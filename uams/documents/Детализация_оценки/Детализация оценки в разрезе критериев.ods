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577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Оценки_по_критериям" table:style-name="ta1">
        <table:table-column table:style-name="co1" table:number-columns-repeated="3" table:default-cell-style-name="ce4"/>
        <table:table-column table:style-name="co2" table:number-columns-repeated="253" table:default-cell-style-name="ce3"/>
        <table:table-column table:style-name="co2" table:number-columns-repeated="16128" table:default-cell-style-name="ce1"/>
        <table:table-row table:style-name="ro1">
          <table:table-cell office:value-type="string" table:style-name="ce2">
            <text:p>Код работы</text:p>
          </table:table-cell>
          <table:table-cell office:value-type="string" table:style-name="ce2">
            <text:p>ID критерия</text:p>
          </table:table-cell>
          <table:table-cell office:value-type="string" table:style-name="ce2">
            <text:p>Оценка по 100 шкале</text:p>
          </table:table-cell>
          <table:table-cell table:number-columns-repeated="16381"/>
        </table:table-row>
        <table:table-row table:style-name="ro1">
          <table:table-cell office:value-type="float" office:value="914650" table:style-name="ce2">
            <text:p>91465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60" table:style-name="ce2">
            <text:p>91466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67" table:style-name="ce2">
            <text:p>91466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2" table:style-name="ce2">
            <text:p>91467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73" table:style-name="ce2">
            <text:p>91467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74" table:style-name="ce2">
            <text:p>91467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5" table:style-name="ce2">
            <text:p>91467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6" table:style-name="ce2">
            <text:p>91467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7" table:style-name="ce2">
            <text:p>91467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8" table:style-name="ce2">
            <text:p>91467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9" table:style-name="ce2">
            <text:p>91467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6" table:style-name="ce2">
            <text:p>91468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87" table:style-name="ce2">
            <text:p>91468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8" table:style-name="ce2">
            <text:p>91468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89" table:style-name="ce2">
            <text:p>914689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0" table:style-name="ce2">
            <text:p>914690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1" table:style-name="ce2">
            <text:p>914691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2" table:style-name="ce2">
            <text:p>91469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3" table:style-name="ce2">
            <text:p>91469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4" table:style-name="ce2">
            <text:p>91469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5" table:style-name="ce2">
            <text:p>91469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6" table:style-name="ce2">
            <text:p>91469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7" table:style-name="ce2">
            <text:p>91469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8" table:style-name="ce2">
            <text:p>91469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02" table:style-name="ce2">
            <text:p>91470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3" table:style-name="ce2">
            <text:p>91470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04" table:style-name="ce2">
            <text:p>91470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05" table:style-name="ce2">
            <text:p>91470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06" table:style-name="ce2">
            <text:p>91470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3" table:style-name="ce2">
            <text:p>91471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7" table:style-name="ce2">
            <text:p>91471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18" table:style-name="ce2">
            <text:p>91471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22" table:style-name="ce2">
            <text:p>91472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26" table:style-name="ce2">
            <text:p>91472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37" table:style-name="ce2">
            <text:p>91473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46" table:style-name="ce2">
            <text:p>91474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52" table:style-name="ce2">
            <text:p>91475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53" table:style-name="ce2">
            <text:p>91475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62" table:style-name="ce2">
            <text:p>91476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67" table:style-name="ce2">
            <text:p>91476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77" table:style-name="ce2">
            <text:p>91477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87" table:style-name="ce2">
            <text:p>91478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88" table:style-name="ce2">
            <text:p>91478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802" table:style-name="ce2">
            <text:p>91480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857" table:style-name="ce2">
            <text:p>91485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08" table:style-name="ce2">
            <text:p>914908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963" table:style-name="ce2">
            <text:p>914963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967" table:style-name="ce2">
            <text:p>914967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995" table:style-name="ce2">
            <text:p>91499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4" table:style-name="ce2">
            <text:p>91500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8" table:style-name="ce2">
            <text:p>91500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9" table:style-name="ce2">
            <text:p>91500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10" table:style-name="ce2">
            <text:p>91501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1" table:style-name="ce2">
            <text:p>91501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12" table:style-name="ce2">
            <text:p>915012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13" table:style-name="ce2">
            <text:p>91501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14" table:style-name="ce2">
            <text:p>91501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15" table:style-name="ce2">
            <text:p>91501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6" table:style-name="ce2">
            <text:p>915016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0" table:style-name="ce2">
            <text:p>915020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1" table:style-name="ce2">
            <text:p>91502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22" table:style-name="ce2">
            <text:p>91502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3" table:style-name="ce2">
            <text:p>91502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4" table:style-name="ce2">
            <text:p>91502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5" table:style-name="ce2">
            <text:p>91502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6" table:style-name="ce2">
            <text:p>91502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7" table:style-name="ce2">
            <text:p>915027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8" table:style-name="ce2">
            <text:p>91502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29" table:style-name="ce2">
            <text:p>915029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30" table:style-name="ce2">
            <text:p>915030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31" table:style-name="ce2">
            <text:p>91503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35" table:style-name="ce2">
            <text:p>91503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6" table:style-name="ce2">
            <text:p>91503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37" table:style-name="ce2">
            <text:p>915037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44" table:style-name="ce2">
            <text:p>91504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48" table:style-name="ce2">
            <text:p>91504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49" table:style-name="ce2">
            <text:p>915049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50" table:style-name="ce2">
            <text:p>91505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51" table:style-name="ce2">
            <text:p>91505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7" table:style-name="ce2">
            <text:p>91505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58" table:style-name="ce2">
            <text:p>915058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59" table:style-name="ce2">
            <text:p>91505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0" table:style-name="ce2">
            <text:p>91506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1" table:style-name="ce2">
            <text:p>915061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62" table:style-name="ce2">
            <text:p>91506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9" table:style-name="ce2">
            <text:p>91506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0" table:style-name="ce2">
            <text:p>91507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2" table:style-name="ce2">
            <text:p>91507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76" table:style-name="ce2">
            <text:p>91507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7" table:style-name="ce2">
            <text:p>91507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6" table:style-name="ce2">
            <text:p>91508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7" table:style-name="ce2">
            <text:p>91508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8" table:style-name="ce2">
            <text:p>91508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89" table:style-name="ce2">
            <text:p>91508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90" table:style-name="ce2">
            <text:p>91509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94" table:style-name="ce2">
            <text:p>91509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02" table:style-name="ce2">
            <text:p>91510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3" table:style-name="ce2">
            <text:p>91510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04" table:style-name="ce2">
            <text:p>91510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08" table:style-name="ce2">
            <text:p>915108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18" table:style-name="ce2">
            <text:p>91511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24" table:style-name="ce2">
            <text:p>91512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0" table:style-name="ce2">
            <text:p>91519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1" table:style-name="ce2">
            <text:p>915191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192" table:style-name="ce2">
            <text:p>91519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3" table:style-name="ce2">
            <text:p>91519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4" table:style-name="ce2">
            <text:p>91519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5" table:style-name="ce2">
            <text:p>915195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196" table:style-name="ce2">
            <text:p>915196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197" table:style-name="ce2">
            <text:p>91519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8" table:style-name="ce2">
            <text:p>91519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9" table:style-name="ce2">
            <text:p>91519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03" table:style-name="ce2">
            <text:p>915203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13" table:style-name="ce2">
            <text:p>915213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14" table:style-name="ce2">
            <text:p>91521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15" table:style-name="ce2">
            <text:p>915215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16" table:style-name="ce2">
            <text:p>91521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17" table:style-name="ce2">
            <text:p>91521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4" table:style-name="ce2">
            <text:p>91522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5" table:style-name="ce2">
            <text:p>91522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6" table:style-name="ce2">
            <text:p>91522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7" table:style-name="ce2">
            <text:p>91522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8" table:style-name="ce2">
            <text:p>91522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9" table:style-name="ce2">
            <text:p>91522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0" table:style-name="ce2">
            <text:p>91523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1" table:style-name="ce2">
            <text:p>91523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2" table:style-name="ce2">
            <text:p>91523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3" table:style-name="ce2">
            <text:p>91523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4" table:style-name="ce2">
            <text:p>91523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8" table:style-name="ce2">
            <text:p>91523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9" table:style-name="ce2">
            <text:p>91523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0" table:style-name="ce2">
            <text:p>91524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1" table:style-name="ce2">
            <text:p>91524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2" table:style-name="ce2">
            <text:p>915242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43" table:style-name="ce2">
            <text:p>91524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4" table:style-name="ce2">
            <text:p>91524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5" table:style-name="ce2">
            <text:p>91524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6" table:style-name="ce2">
            <text:p>91524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7" table:style-name="ce2">
            <text:p>91524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8" table:style-name="ce2">
            <text:p>91524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9" table:style-name="ce2">
            <text:p>91524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4" table:style-name="ce2">
            <text:p>91525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5" table:style-name="ce2">
            <text:p>915255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56" table:style-name="ce2">
            <text:p>91525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7" table:style-name="ce2">
            <text:p>91525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8" table:style-name="ce2">
            <text:p>91525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9" table:style-name="ce2">
            <text:p>91525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0" table:style-name="ce2">
            <text:p>91526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1" table:style-name="ce2">
            <text:p>91526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2" table:style-name="ce2">
            <text:p>91526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3" table:style-name="ce2">
            <text:p>915263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64" table:style-name="ce2">
            <text:p>91526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5" table:style-name="ce2">
            <text:p>91526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6" table:style-name="ce2">
            <text:p>91526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7" table:style-name="ce2">
            <text:p>91526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8" table:style-name="ce2">
            <text:p>91526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9" table:style-name="ce2">
            <text:p>91526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0" table:style-name="ce2">
            <text:p>91527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5" table:style-name="ce2">
            <text:p>91527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6" table:style-name="ce2">
            <text:p>91527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7" table:style-name="ce2">
            <text:p>91527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8" table:style-name="ce2">
            <text:p>91527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9" table:style-name="ce2">
            <text:p>915279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80" table:style-name="ce2">
            <text:p>91528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1" table:style-name="ce2">
            <text:p>91528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2" table:style-name="ce2">
            <text:p>915282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83" table:style-name="ce2">
            <text:p>915283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84" table:style-name="ce2">
            <text:p>91528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5" table:style-name="ce2">
            <text:p>91528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6" table:style-name="ce2">
            <text:p>91528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7" table:style-name="ce2">
            <text:p>91528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8" table:style-name="ce2">
            <text:p>91528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9" table:style-name="ce2">
            <text:p>91528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0" table:style-name="ce2">
            <text:p>91529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1" table:style-name="ce2">
            <text:p>91529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2" table:style-name="ce2">
            <text:p>91529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3" table:style-name="ce2">
            <text:p>915293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95" table:style-name="ce2">
            <text:p>91529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6" table:style-name="ce2">
            <text:p>91529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7" table:style-name="ce2">
            <text:p>91529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8" table:style-name="ce2">
            <text:p>915298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99" table:style-name="ce2">
            <text:p>91529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0" table:style-name="ce2">
            <text:p>915300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01" table:style-name="ce2">
            <text:p>91530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2" table:style-name="ce2">
            <text:p>91530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3" table:style-name="ce2">
            <text:p>91530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4" table:style-name="ce2">
            <text:p>91530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5" table:style-name="ce2">
            <text:p>91530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6" table:style-name="ce2">
            <text:p>91530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7" table:style-name="ce2">
            <text:p>91530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8" table:style-name="ce2">
            <text:p>915308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09" table:style-name="ce2">
            <text:p>91530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0" table:style-name="ce2">
            <text:p>91531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1" table:style-name="ce2">
            <text:p>91531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2" table:style-name="ce2">
            <text:p>91531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3" table:style-name="ce2">
            <text:p>91531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4" table:style-name="ce2">
            <text:p>91531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5" table:style-name="ce2">
            <text:p>91531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6" table:style-name="ce2">
            <text:p>91531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7" table:style-name="ce2">
            <text:p>91531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8" table:style-name="ce2">
            <text:p>91531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9" table:style-name="ce2">
            <text:p>915319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20" table:style-name="ce2">
            <text:p>91532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1" table:style-name="ce2">
            <text:p>91532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2" table:style-name="ce2">
            <text:p>91532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3" table:style-name="ce2">
            <text:p>91532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4" table:style-name="ce2">
            <text:p>91532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5" table:style-name="ce2">
            <text:p>915325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26" table:style-name="ce2">
            <text:p>91532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7" table:style-name="ce2">
            <text:p>91532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8" table:style-name="ce2">
            <text:p>915328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29" table:style-name="ce2">
            <text:p>91532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0" table:style-name="ce2">
            <text:p>91533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1" table:style-name="ce2">
            <text:p>91533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2" table:style-name="ce2">
            <text:p>915332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33" table:style-name="ce2">
            <text:p>915333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34" table:style-name="ce2">
            <text:p>91533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5" table:style-name="ce2">
            <text:p>915335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36" table:style-name="ce2">
            <text:p>91533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7" table:style-name="ce2">
            <text:p>91533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8" table:style-name="ce2">
            <text:p>91533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9" table:style-name="ce2">
            <text:p>91533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0" table:style-name="ce2">
            <text:p>91534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1" table:style-name="ce2">
            <text:p>91534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2" table:style-name="ce2">
            <text:p>915342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43" table:style-name="ce2">
            <text:p>91534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4" table:style-name="ce2">
            <text:p>915344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46" table:style-name="ce2">
            <text:p>915346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47" table:style-name="ce2">
            <text:p>91534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8" table:style-name="ce2">
            <text:p>91534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9" table:style-name="ce2">
            <text:p>91534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0" table:style-name="ce2">
            <text:p>91535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1" table:style-name="ce2">
            <text:p>91535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2" table:style-name="ce2">
            <text:p>91535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4" table:style-name="ce2">
            <text:p>91535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5" table:style-name="ce2">
            <text:p>91535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6" table:style-name="ce2">
            <text:p>91535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7" table:style-name="ce2">
            <text:p>91535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8" table:style-name="ce2">
            <text:p>91535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9" table:style-name="ce2">
            <text:p>91535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0" table:style-name="ce2">
            <text:p>91536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1" table:style-name="ce2">
            <text:p>91536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5" table:style-name="ce2">
            <text:p>91536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7" table:style-name="ce2">
            <text:p>91536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8" table:style-name="ce2">
            <text:p>91536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79" table:style-name="ce2">
            <text:p>91537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81" table:style-name="ce2">
            <text:p>91538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83" table:style-name="ce2">
            <text:p>91538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6" table:style-name="ce2">
            <text:p>91538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7" table:style-name="ce2">
            <text:p>91538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89" table:style-name="ce2">
            <text:p>91538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0" table:style-name="ce2">
            <text:p>91539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2" table:style-name="ce2">
            <text:p>91539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3" table:style-name="ce2">
            <text:p>915393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94" table:style-name="ce2">
            <text:p>91539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0" table:style-name="ce2">
            <text:p>91540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01" table:style-name="ce2">
            <text:p>91540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03" table:style-name="ce2">
            <text:p>91540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4" table:style-name="ce2">
            <text:p>91540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05" table:style-name="ce2">
            <text:p>91540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07" table:style-name="ce2">
            <text:p>91540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13" table:style-name="ce2">
            <text:p>91541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14" table:style-name="ce2">
            <text:p>91541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15" table:style-name="ce2">
            <text:p>91541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27" table:style-name="ce2">
            <text:p>91542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28" table:style-name="ce2">
            <text:p>91542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29" table:style-name="ce2">
            <text:p>91542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30" table:style-name="ce2">
            <text:p>91543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31" table:style-name="ce2">
            <text:p>91543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40" table:style-name="ce2">
            <text:p>91544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42" table:style-name="ce2">
            <text:p>91544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78" table:style-name="ce2">
            <text:p>91547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82" table:style-name="ce2">
            <text:p>91548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519" table:style-name="ce2">
            <text:p>91551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66" table:style-name="ce2">
            <text:p>91556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81" table:style-name="ce2">
            <text:p>915581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588" table:style-name="ce2">
            <text:p>91558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89" table:style-name="ce2">
            <text:p>91558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590" table:style-name="ce2">
            <text:p>91559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20" table:style-name="ce2">
            <text:p>91562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34" table:style-name="ce2">
            <text:p>91563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53" table:style-name="ce2">
            <text:p>91565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54" table:style-name="ce2">
            <text:p>915654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655" table:style-name="ce2">
            <text:p>91565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67" table:style-name="ce2">
            <text:p>91566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71" table:style-name="ce2">
            <text:p>91567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87" table:style-name="ce2">
            <text:p>91568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88" table:style-name="ce2">
            <text:p>91568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741" table:style-name="ce2">
            <text:p>91574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41833" table:style-name="ce2">
            <text:p>941833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27" table:style-name="ce2">
            <text:p>106682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8" table:style-name="ce2">
            <text:p>106682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9" table:style-name="ce2">
            <text:p>106682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0" table:style-name="ce2">
            <text:p>106683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1" table:style-name="ce2">
            <text:p>106683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2" table:style-name="ce2">
            <text:p>106683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3" table:style-name="ce2">
            <text:p>106683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4" table:style-name="ce2">
            <text:p>1066834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35" table:style-name="ce2">
            <text:p>106683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6" table:style-name="ce2">
            <text:p>106683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7" table:style-name="ce2">
            <text:p>106683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8" table:style-name="ce2">
            <text:p>106683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9" table:style-name="ce2">
            <text:p>106683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0" table:style-name="ce2">
            <text:p>106684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1" table:style-name="ce2">
            <text:p>106684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2" table:style-name="ce2">
            <text:p>106684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3" table:style-name="ce2">
            <text:p>106684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4" table:style-name="ce2">
            <text:p>1066844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45" table:style-name="ce2">
            <text:p>106684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7" table:style-name="ce2">
            <text:p>106684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8" table:style-name="ce2">
            <text:p>106684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9" table:style-name="ce2">
            <text:p>106684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0" table:style-name="ce2">
            <text:p>106685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1" table:style-name="ce2">
            <text:p>106685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2" table:style-name="ce2">
            <text:p>106685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3" table:style-name="ce2">
            <text:p>106685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4" table:style-name="ce2">
            <text:p>106685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55" table:style-name="ce2">
            <text:p>106685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6" table:style-name="ce2">
            <text:p>106685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7" table:style-name="ce2">
            <text:p>106685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8" table:style-name="ce2">
            <text:p>106685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9" table:style-name="ce2">
            <text:p>106685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0" table:style-name="ce2">
            <text:p>106686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1" table:style-name="ce2">
            <text:p>106686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2" table:style-name="ce2">
            <text:p>106686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3" table:style-name="ce2">
            <text:p>1066863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64" table:style-name="ce2">
            <text:p>106686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65" table:style-name="ce2">
            <text:p>106686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6" table:style-name="ce2">
            <text:p>106686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7" table:style-name="ce2">
            <text:p>106686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9" table:style-name="ce2">
            <text:p>106686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0" table:style-name="ce2">
            <text:p>106687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1" table:style-name="ce2">
            <text:p>106687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2" table:style-name="ce2">
            <text:p>106687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3" table:style-name="ce2">
            <text:p>1066873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74" table:style-name="ce2">
            <text:p>106687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75" table:style-name="ce2">
            <text:p>106687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6" table:style-name="ce2">
            <text:p>106687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7" table:style-name="ce2">
            <text:p>106687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8" table:style-name="ce2">
            <text:p>106687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9" table:style-name="ce2">
            <text:p>106687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0" table:style-name="ce2">
            <text:p>106688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1" table:style-name="ce2">
            <text:p>106688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2" table:style-name="ce2">
            <text:p>106688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4" table:style-name="ce2">
            <text:p>1066884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85" table:style-name="ce2">
            <text:p>106688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6" table:style-name="ce2">
            <text:p>106688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7" table:style-name="ce2">
            <text:p>106688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8" table:style-name="ce2">
            <text:p>106688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9" table:style-name="ce2">
            <text:p>106688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8" table:style-name="ce2">
            <text:p>106689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9" table:style-name="ce2">
            <text:p>106689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3" table:style-name="ce2">
            <text:p>106690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4" table:style-name="ce2">
            <text:p>106690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5" table:style-name="ce2">
            <text:p>106690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6" table:style-name="ce2">
            <text:p>106690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7" table:style-name="ce2">
            <text:p>106690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8" table:style-name="ce2">
            <text:p>106690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9" table:style-name="ce2">
            <text:p>106690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0" table:style-name="ce2">
            <text:p>106691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1" table:style-name="ce2">
            <text:p>106691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2" table:style-name="ce2">
            <text:p>106691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3" table:style-name="ce2">
            <text:p>106691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4" table:style-name="ce2">
            <text:p>106691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5" table:style-name="ce2">
            <text:p>106691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6" table:style-name="ce2">
            <text:p>106691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7" table:style-name="ce2">
            <text:p>106691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8" table:style-name="ce2">
            <text:p>106691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9" table:style-name="ce2">
            <text:p>1066919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20" table:style-name="ce2">
            <text:p>1066920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21" table:style-name="ce2">
            <text:p>106692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2" table:style-name="ce2">
            <text:p>106692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3" table:style-name="ce2">
            <text:p>106692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4" table:style-name="ce2">
            <text:p>106692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5" table:style-name="ce2">
            <text:p>106692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6" table:style-name="ce2">
            <text:p>106692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7" table:style-name="ce2">
            <text:p>106692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8" table:style-name="ce2">
            <text:p>106692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9" table:style-name="ce2">
            <text:p>106692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0" table:style-name="ce2">
            <text:p>106693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1" table:style-name="ce2">
            <text:p>106693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2" table:style-name="ce2">
            <text:p>106693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3" table:style-name="ce2">
            <text:p>106693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4" table:style-name="ce2">
            <text:p>106693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5" table:style-name="ce2">
            <text:p>106693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6" table:style-name="ce2">
            <text:p>1066936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37" table:style-name="ce2">
            <text:p>106693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8" table:style-name="ce2">
            <text:p>106693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9" table:style-name="ce2">
            <text:p>1066939</text:p>
          </table:table-cell>
          <table:table-cell office:value-type="float" office:value="170441" table:style-name="ce2">
            <text:p>170441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office:value-type="float" office:value="1066940" table:style-name="ce2">
            <text:p>1066940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41" table:style-name="ce2">
            <text:p>106694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2" table:style-name="ce2">
            <text:p>106694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3" table:style-name="ce2">
            <text:p>106694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4" table:style-name="ce2">
            <text:p>106694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5" table:style-name="ce2">
            <text:p>106694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6" table:style-name="ce2">
            <text:p>106694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7" table:style-name="ce2">
            <text:p>106694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8" table:style-name="ce2">
            <text:p>106694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9" table:style-name="ce2">
            <text:p>106694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0" table:style-name="ce2">
            <text:p>106695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1" table:style-name="ce2">
            <text:p>106695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2" table:style-name="ce2">
            <text:p>106695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3" table:style-name="ce2">
            <text:p>106695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4" table:style-name="ce2">
            <text:p>106695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5" table:style-name="ce2">
            <text:p>106695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6" table:style-name="ce2">
            <text:p>1066956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58" table:style-name="ce2">
            <text:p>106695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9" table:style-name="ce2">
            <text:p>106695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60" table:style-name="ce2">
            <text:p>106696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1" table:style-name="ce2">
            <text:p>1066961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63" table:style-name="ce2">
            <text:p>106696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4" table:style-name="ce2">
            <text:p>106696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65" table:style-name="ce2">
            <text:p>106696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6" table:style-name="ce2">
            <text:p>1066966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70" table:style-name="ce2">
            <text:p>106697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1" table:style-name="ce2">
            <text:p>106697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2" table:style-name="ce2">
            <text:p>106697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4" table:style-name="ce2">
            <text:p>106697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5" table:style-name="ce2">
            <text:p>106697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6" table:style-name="ce2">
            <text:p>106697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7" table:style-name="ce2">
            <text:p>106697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8" table:style-name="ce2">
            <text:p>1066978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80" table:style-name="ce2">
            <text:p>106698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82" table:style-name="ce2">
            <text:p>106698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7" table:style-name="ce2">
            <text:p>106698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9" table:style-name="ce2">
            <text:p>106698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0" table:style-name="ce2">
            <text:p>1066990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95" table:style-name="ce2">
            <text:p>106699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97" table:style-name="ce2">
            <text:p>106699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98" table:style-name="ce2">
            <text:p>106699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2" table:style-name="ce2">
            <text:p>106700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3" table:style-name="ce2">
            <text:p>106700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4" table:style-name="ce2">
            <text:p>106700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5" table:style-name="ce2">
            <text:p>106700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7" table:style-name="ce2">
            <text:p>106700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8" table:style-name="ce2">
            <text:p>106700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9" table:style-name="ce2">
            <text:p>1067009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1" table:style-name="ce2">
            <text:p>106701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2" table:style-name="ce2">
            <text:p>106701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5" table:style-name="ce2">
            <text:p>106701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6" table:style-name="ce2">
            <text:p>106701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7" table:style-name="ce2">
            <text:p>106701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8" table:style-name="ce2">
            <text:p>1067018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20" table:style-name="ce2">
            <text:p>106702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1" table:style-name="ce2">
            <text:p>106702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2" table:style-name="ce2">
            <text:p>106702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3" table:style-name="ce2">
            <text:p>106702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5" table:style-name="ce2">
            <text:p>106702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7" table:style-name="ce2">
            <text:p>106702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8" table:style-name="ce2">
            <text:p>106702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9" table:style-name="ce2">
            <text:p>106702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31" table:style-name="ce2">
            <text:p>106703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4" table:style-name="ce2">
            <text:p>106703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5" table:style-name="ce2">
            <text:p>1067035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37" table:style-name="ce2">
            <text:p>106703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8" table:style-name="ce2">
            <text:p>106703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42" table:style-name="ce2">
            <text:p>1067042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47" table:style-name="ce2">
            <text:p>106704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53" table:style-name="ce2">
            <text:p>106705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1" table:style-name="ce2">
            <text:p>106706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62" table:style-name="ce2">
            <text:p>106706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3" table:style-name="ce2">
            <text:p>106706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5" table:style-name="ce2">
            <text:p>106706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6" table:style-name="ce2">
            <text:p>1067066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7" table:style-name="ce2">
            <text:p>1067067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74" table:style-name="ce2">
            <text:p>1067074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7081" table:style-name="ce2">
            <text:p>106708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90" table:style-name="ce2">
            <text:p>106709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95" table:style-name="ce2">
            <text:p>106709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0" table:style-name="ce2">
            <text:p>1067100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01" table:style-name="ce2">
            <text:p>106710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03" table:style-name="ce2">
            <text:p>106710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5" table:style-name="ce2">
            <text:p>106710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7" table:style-name="ce2">
            <text:p>106710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9" table:style-name="ce2">
            <text:p>1067109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11" table:style-name="ce2">
            <text:p>1067111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3" table:style-name="ce2">
            <text:p>106711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15" table:style-name="ce2">
            <text:p>1067115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6" table:style-name="ce2">
            <text:p>1067116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18" table:style-name="ce2">
            <text:p>106711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9" table:style-name="ce2">
            <text:p>1067119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0" table:style-name="ce2">
            <text:p>106712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1" table:style-name="ce2">
            <text:p>1067121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3" table:style-name="ce2">
            <text:p>1067123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4" table:style-name="ce2">
            <text:p>1067124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31" table:style-name="ce2">
            <text:p>1067131</text:p>
          </table:table-cell>
          <table:table-cell office:value-type="float" office:value="170441" table:style-name="ce2">
            <text:p>170441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34" table:style-name="ce2">
            <text:p>1067134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37" table:style-name="ce2">
            <text:p>1067137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9" table:style-name="ce2">
            <text:p>1067139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0" table:style-name="ce2">
            <text:p>1067140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1" table:style-name="ce2">
            <text:p>106714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2" table:style-name="ce2">
            <text:p>1067142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3" table:style-name="ce2">
            <text:p>106714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5" table:style-name="ce2">
            <text:p>1067145</text:p>
          </table:table-cell>
          <table:table-cell office:value-type="float" office:value="170441" table:style-name="ce2">
            <text:p>17044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7148" table:style-name="ce2">
            <text:p>1067148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56" table:style-name="ce2">
            <text:p>1067156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58" table:style-name="ce2">
            <text:p>1067158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61" table:style-name="ce2">
            <text:p>1067161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93" table:style-name="ce2">
            <text:p>1067193</text:p>
          </table:table-cell>
          <table:table-cell office:value-type="float" office:value="170441" table:style-name="ce2">
            <text:p>170441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94" table:style-name="ce2">
            <text:p>1067194</text:p>
          </table:table-cell>
          <table:table-cell office:value-type="float" office:value="170441" table:style-name="ce2">
            <text:p>17044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50" table:style-name="ce2">
            <text:p>914650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60" table:style-name="ce2">
            <text:p>91466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67" table:style-name="ce2">
            <text:p>91466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72" table:style-name="ce2">
            <text:p>91467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3" table:style-name="ce2">
            <text:p>914673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4" table:style-name="ce2">
            <text:p>914674</text:p>
          </table:table-cell>
          <table:table-cell office:value-type="float" office:value="170442" table:style-name="ce2">
            <text:p>170442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675" table:style-name="ce2">
            <text:p>91467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6" table:style-name="ce2">
            <text:p>91467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7" table:style-name="ce2">
            <text:p>91467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8" table:style-name="ce2">
            <text:p>91467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79" table:style-name="ce2">
            <text:p>91467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86" table:style-name="ce2">
            <text:p>91468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7" table:style-name="ce2">
            <text:p>91468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8" table:style-name="ce2">
            <text:p>91468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9" table:style-name="ce2">
            <text:p>91468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0" table:style-name="ce2">
            <text:p>914690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1" table:style-name="ce2">
            <text:p>91469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2" table:style-name="ce2">
            <text:p>91469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3" table:style-name="ce2">
            <text:p>91469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4" table:style-name="ce2">
            <text:p>91469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5" table:style-name="ce2">
            <text:p>91469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6" table:style-name="ce2">
            <text:p>91469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7" table:style-name="ce2">
            <text:p>91469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8" table:style-name="ce2">
            <text:p>91469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2" table:style-name="ce2">
            <text:p>91470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03" table:style-name="ce2">
            <text:p>91470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4" table:style-name="ce2">
            <text:p>91470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05" table:style-name="ce2">
            <text:p>91470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06" table:style-name="ce2">
            <text:p>91470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3" table:style-name="ce2">
            <text:p>914713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17" table:style-name="ce2">
            <text:p>91471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8" table:style-name="ce2">
            <text:p>91471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22" table:style-name="ce2">
            <text:p>91472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26" table:style-name="ce2">
            <text:p>91472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37" table:style-name="ce2">
            <text:p>91473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46" table:style-name="ce2">
            <text:p>91474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52" table:style-name="ce2">
            <text:p>91475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53" table:style-name="ce2">
            <text:p>91475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62" table:style-name="ce2">
            <text:p>91476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67" table:style-name="ce2">
            <text:p>91476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77" table:style-name="ce2">
            <text:p>91477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87" table:style-name="ce2">
            <text:p>91478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88" table:style-name="ce2">
            <text:p>91478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802" table:style-name="ce2">
            <text:p>91480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857" table:style-name="ce2">
            <text:p>91485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08" table:style-name="ce2">
            <text:p>914908</text:p>
          </table:table-cell>
          <table:table-cell office:value-type="float" office:value="170442" table:style-name="ce2">
            <text:p>170442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963" table:style-name="ce2">
            <text:p>91496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67" table:style-name="ce2">
            <text:p>91496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95" table:style-name="ce2">
            <text:p>91499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04" table:style-name="ce2">
            <text:p>91500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8" table:style-name="ce2">
            <text:p>91500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09" table:style-name="ce2">
            <text:p>91500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10" table:style-name="ce2">
            <text:p>91501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11" table:style-name="ce2">
            <text:p>91501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12" table:style-name="ce2">
            <text:p>91501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3" table:style-name="ce2">
            <text:p>91501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4" table:style-name="ce2">
            <text:p>91501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5" table:style-name="ce2">
            <text:p>91501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16" table:style-name="ce2">
            <text:p>915016</text:p>
          </table:table-cell>
          <table:table-cell office:value-type="float" office:value="170442" table:style-name="ce2">
            <text:p>170442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20" table:style-name="ce2">
            <text:p>915020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1" table:style-name="ce2">
            <text:p>91502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2" table:style-name="ce2">
            <text:p>91502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3" table:style-name="ce2">
            <text:p>915023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4" table:style-name="ce2">
            <text:p>91502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5" table:style-name="ce2">
            <text:p>91502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26" table:style-name="ce2">
            <text:p>91502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7" table:style-name="ce2">
            <text:p>915027</text:p>
          </table:table-cell>
          <table:table-cell office:value-type="float" office:value="170442" table:style-name="ce2">
            <text:p>170442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28" table:style-name="ce2">
            <text:p>91502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9" table:style-name="ce2">
            <text:p>91502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0" table:style-name="ce2">
            <text:p>91503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1" table:style-name="ce2">
            <text:p>91503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35" table:style-name="ce2">
            <text:p>91503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36" table:style-name="ce2">
            <text:p>91503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7" table:style-name="ce2">
            <text:p>91503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44" table:style-name="ce2">
            <text:p>91504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48" table:style-name="ce2">
            <text:p>91504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49" table:style-name="ce2">
            <text:p>91504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0" table:style-name="ce2">
            <text:p>915050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51" table:style-name="ce2">
            <text:p>91505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57" table:style-name="ce2">
            <text:p>91505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58" table:style-name="ce2">
            <text:p>91505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59" table:style-name="ce2">
            <text:p>91505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60" table:style-name="ce2">
            <text:p>915060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61" table:style-name="ce2">
            <text:p>91506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2" table:style-name="ce2">
            <text:p>91506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69" table:style-name="ce2">
            <text:p>91506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70" table:style-name="ce2">
            <text:p>915070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72" table:style-name="ce2">
            <text:p>91507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6" table:style-name="ce2">
            <text:p>91507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7" table:style-name="ce2">
            <text:p>91507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86" table:style-name="ce2">
            <text:p>91508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87" table:style-name="ce2">
            <text:p>91508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88" table:style-name="ce2">
            <text:p>91508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89" table:style-name="ce2">
            <text:p>91508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90" table:style-name="ce2">
            <text:p>91509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94" table:style-name="ce2">
            <text:p>91509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02" table:style-name="ce2">
            <text:p>91510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03" table:style-name="ce2">
            <text:p>91510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4" table:style-name="ce2">
            <text:p>91510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08" table:style-name="ce2">
            <text:p>91510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18" table:style-name="ce2">
            <text:p>91511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24" table:style-name="ce2">
            <text:p>91512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90" table:style-name="ce2">
            <text:p>91519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1" table:style-name="ce2">
            <text:p>91519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2" table:style-name="ce2">
            <text:p>91519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93" table:style-name="ce2">
            <text:p>91519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4" table:style-name="ce2">
            <text:p>91519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5" table:style-name="ce2">
            <text:p>91519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6" table:style-name="ce2">
            <text:p>91519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7" table:style-name="ce2">
            <text:p>91519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8" table:style-name="ce2">
            <text:p>91519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9" table:style-name="ce2">
            <text:p>91519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03" table:style-name="ce2">
            <text:p>915203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13" table:style-name="ce2">
            <text:p>91521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14" table:style-name="ce2">
            <text:p>91521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15" table:style-name="ce2">
            <text:p>91521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16" table:style-name="ce2">
            <text:p>91521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17" table:style-name="ce2">
            <text:p>91521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24" table:style-name="ce2">
            <text:p>91522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5" table:style-name="ce2">
            <text:p>91522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6" table:style-name="ce2">
            <text:p>91522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7" table:style-name="ce2">
            <text:p>91522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8" table:style-name="ce2">
            <text:p>91522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9" table:style-name="ce2">
            <text:p>91522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0" table:style-name="ce2">
            <text:p>91523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1" table:style-name="ce2">
            <text:p>91523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2" table:style-name="ce2">
            <text:p>91523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3" table:style-name="ce2">
            <text:p>91523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4" table:style-name="ce2">
            <text:p>91523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8" table:style-name="ce2">
            <text:p>91523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9" table:style-name="ce2">
            <text:p>91523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0" table:style-name="ce2">
            <text:p>91524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1" table:style-name="ce2">
            <text:p>91524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2" table:style-name="ce2">
            <text:p>91524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3" table:style-name="ce2">
            <text:p>91524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4" table:style-name="ce2">
            <text:p>91524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5" table:style-name="ce2">
            <text:p>91524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6" table:style-name="ce2">
            <text:p>91524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7" table:style-name="ce2">
            <text:p>91524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8" table:style-name="ce2">
            <text:p>91524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9" table:style-name="ce2">
            <text:p>91524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4" table:style-name="ce2">
            <text:p>91525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5" table:style-name="ce2">
            <text:p>91525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56" table:style-name="ce2">
            <text:p>91525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7" table:style-name="ce2">
            <text:p>91525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8" table:style-name="ce2">
            <text:p>91525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9" table:style-name="ce2">
            <text:p>91525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0" table:style-name="ce2">
            <text:p>91526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1" table:style-name="ce2">
            <text:p>91526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2" table:style-name="ce2">
            <text:p>91526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3" table:style-name="ce2">
            <text:p>91526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4" table:style-name="ce2">
            <text:p>91526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5" table:style-name="ce2">
            <text:p>91526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6" table:style-name="ce2">
            <text:p>91526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67" table:style-name="ce2">
            <text:p>91526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8" table:style-name="ce2">
            <text:p>91526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9" table:style-name="ce2">
            <text:p>91526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0" table:style-name="ce2">
            <text:p>91527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5" table:style-name="ce2">
            <text:p>91527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6" table:style-name="ce2">
            <text:p>91527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7" table:style-name="ce2">
            <text:p>91527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8" table:style-name="ce2">
            <text:p>91527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9" table:style-name="ce2">
            <text:p>91527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80" table:style-name="ce2">
            <text:p>91528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1" table:style-name="ce2">
            <text:p>91528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2" table:style-name="ce2">
            <text:p>91528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3" table:style-name="ce2">
            <text:p>91528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4" table:style-name="ce2">
            <text:p>91528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5" table:style-name="ce2">
            <text:p>91528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6" table:style-name="ce2">
            <text:p>91528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7" table:style-name="ce2">
            <text:p>91528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8" table:style-name="ce2">
            <text:p>91528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9" table:style-name="ce2">
            <text:p>91528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0" table:style-name="ce2">
            <text:p>91529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1" table:style-name="ce2">
            <text:p>91529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2" table:style-name="ce2">
            <text:p>91529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3" table:style-name="ce2">
            <text:p>91529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5" table:style-name="ce2">
            <text:p>91529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6" table:style-name="ce2">
            <text:p>91529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7" table:style-name="ce2">
            <text:p>91529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8" table:style-name="ce2">
            <text:p>91529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99" table:style-name="ce2">
            <text:p>91529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0" table:style-name="ce2">
            <text:p>91530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1" table:style-name="ce2">
            <text:p>91530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2" table:style-name="ce2">
            <text:p>91530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3" table:style-name="ce2">
            <text:p>91530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4" table:style-name="ce2">
            <text:p>91530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5" table:style-name="ce2">
            <text:p>91530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6" table:style-name="ce2">
            <text:p>91530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07" table:style-name="ce2">
            <text:p>91530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8" table:style-name="ce2">
            <text:p>91530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9" table:style-name="ce2">
            <text:p>91530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0" table:style-name="ce2">
            <text:p>91531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1" table:style-name="ce2">
            <text:p>91531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2" table:style-name="ce2">
            <text:p>91531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3" table:style-name="ce2">
            <text:p>91531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4" table:style-name="ce2">
            <text:p>91531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5" table:style-name="ce2">
            <text:p>91531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6" table:style-name="ce2">
            <text:p>91531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7" table:style-name="ce2">
            <text:p>91531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8" table:style-name="ce2">
            <text:p>91531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19" table:style-name="ce2">
            <text:p>915319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20" table:style-name="ce2">
            <text:p>91532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1" table:style-name="ce2">
            <text:p>91532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2" table:style-name="ce2">
            <text:p>91532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3" table:style-name="ce2">
            <text:p>91532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4" table:style-name="ce2">
            <text:p>91532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5" table:style-name="ce2">
            <text:p>91532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6" table:style-name="ce2">
            <text:p>91532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7" table:style-name="ce2">
            <text:p>91532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28" table:style-name="ce2">
            <text:p>91532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9" table:style-name="ce2">
            <text:p>91532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0" table:style-name="ce2">
            <text:p>91533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1" table:style-name="ce2">
            <text:p>91533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32" table:style-name="ce2">
            <text:p>91533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33" table:style-name="ce2">
            <text:p>91533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4" table:style-name="ce2">
            <text:p>91533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5" table:style-name="ce2">
            <text:p>91533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6" table:style-name="ce2">
            <text:p>91533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7" table:style-name="ce2">
            <text:p>91533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8" table:style-name="ce2">
            <text:p>91533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9" table:style-name="ce2">
            <text:p>91533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0" table:style-name="ce2">
            <text:p>91534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1" table:style-name="ce2">
            <text:p>91534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2" table:style-name="ce2">
            <text:p>91534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3" table:style-name="ce2">
            <text:p>91534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4" table:style-name="ce2">
            <text:p>915344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46" table:style-name="ce2">
            <text:p>915346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47" table:style-name="ce2">
            <text:p>91534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48" table:style-name="ce2">
            <text:p>91534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9" table:style-name="ce2">
            <text:p>91534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0" table:style-name="ce2">
            <text:p>91535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1" table:style-name="ce2">
            <text:p>91535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2" table:style-name="ce2">
            <text:p>91535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4" table:style-name="ce2">
            <text:p>91535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5" table:style-name="ce2">
            <text:p>91535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6" table:style-name="ce2">
            <text:p>91535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7" table:style-name="ce2">
            <text:p>91535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8" table:style-name="ce2">
            <text:p>91535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9" table:style-name="ce2">
            <text:p>91535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0" table:style-name="ce2">
            <text:p>91536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1" table:style-name="ce2">
            <text:p>91536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5" table:style-name="ce2">
            <text:p>91536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7" table:style-name="ce2">
            <text:p>91536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8" table:style-name="ce2">
            <text:p>91536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79" table:style-name="ce2">
            <text:p>91537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1" table:style-name="ce2">
            <text:p>91538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3" table:style-name="ce2">
            <text:p>91538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6" table:style-name="ce2">
            <text:p>91538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87" table:style-name="ce2">
            <text:p>91538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9" table:style-name="ce2">
            <text:p>91538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90" table:style-name="ce2">
            <text:p>91539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2" table:style-name="ce2">
            <text:p>91539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93" table:style-name="ce2">
            <text:p>91539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94" table:style-name="ce2">
            <text:p>91539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400" table:style-name="ce2">
            <text:p>91540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01" table:style-name="ce2">
            <text:p>91540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3" table:style-name="ce2">
            <text:p>915403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404" table:style-name="ce2">
            <text:p>91540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5" table:style-name="ce2">
            <text:p>91540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07" table:style-name="ce2">
            <text:p>91540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3" table:style-name="ce2">
            <text:p>91541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14" table:style-name="ce2">
            <text:p>91541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5" table:style-name="ce2">
            <text:p>91541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27" table:style-name="ce2">
            <text:p>91542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28" table:style-name="ce2">
            <text:p>91542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29" table:style-name="ce2">
            <text:p>91542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430" table:style-name="ce2">
            <text:p>91543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31" table:style-name="ce2">
            <text:p>91543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440" table:style-name="ce2">
            <text:p>91544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42" table:style-name="ce2">
            <text:p>91544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78" table:style-name="ce2">
            <text:p>91547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82" table:style-name="ce2">
            <text:p>91548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519" table:style-name="ce2">
            <text:p>91551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566" table:style-name="ce2">
            <text:p>91556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581" table:style-name="ce2">
            <text:p>915581</text:p>
          </table:table-cell>
          <table:table-cell office:value-type="float" office:value="170442" table:style-name="ce2">
            <text:p>170442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588" table:style-name="ce2">
            <text:p>91558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89" table:style-name="ce2">
            <text:p>91558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90" table:style-name="ce2">
            <text:p>91559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20" table:style-name="ce2">
            <text:p>91562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34" table:style-name="ce2">
            <text:p>91563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53" table:style-name="ce2">
            <text:p>91565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54" table:style-name="ce2">
            <text:p>91565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55" table:style-name="ce2">
            <text:p>91565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667" table:style-name="ce2">
            <text:p>91566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71" table:style-name="ce2">
            <text:p>91567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87" table:style-name="ce2">
            <text:p>91568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88" table:style-name="ce2">
            <text:p>91568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741" table:style-name="ce2">
            <text:p>91574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41833" table:style-name="ce2">
            <text:p>941833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27" table:style-name="ce2">
            <text:p>106682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8" table:style-name="ce2">
            <text:p>106682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9" table:style-name="ce2">
            <text:p>106682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0" table:style-name="ce2">
            <text:p>106683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1" table:style-name="ce2">
            <text:p>106683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2" table:style-name="ce2">
            <text:p>106683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33" table:style-name="ce2">
            <text:p>106683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4" table:style-name="ce2">
            <text:p>106683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5" table:style-name="ce2">
            <text:p>106683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36" table:style-name="ce2">
            <text:p>106683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7" table:style-name="ce2">
            <text:p>106683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38" table:style-name="ce2">
            <text:p>106683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9" table:style-name="ce2">
            <text:p>106683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0" table:style-name="ce2">
            <text:p>106684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1" table:style-name="ce2">
            <text:p>106684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2" table:style-name="ce2">
            <text:p>106684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3" table:style-name="ce2">
            <text:p>106684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4" table:style-name="ce2">
            <text:p>106684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5" table:style-name="ce2">
            <text:p>106684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7" table:style-name="ce2">
            <text:p>106684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48" table:style-name="ce2">
            <text:p>106684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9" table:style-name="ce2">
            <text:p>106684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50" table:style-name="ce2">
            <text:p>106685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1" table:style-name="ce2">
            <text:p>106685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2" table:style-name="ce2">
            <text:p>106685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3" table:style-name="ce2">
            <text:p>106685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4" table:style-name="ce2">
            <text:p>106685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55" table:style-name="ce2">
            <text:p>106685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6" table:style-name="ce2">
            <text:p>106685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7" table:style-name="ce2">
            <text:p>106685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8" table:style-name="ce2">
            <text:p>106685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9" table:style-name="ce2">
            <text:p>106685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0" table:style-name="ce2">
            <text:p>106686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1" table:style-name="ce2">
            <text:p>106686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2" table:style-name="ce2">
            <text:p>106686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3" table:style-name="ce2">
            <text:p>1066863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64" table:style-name="ce2">
            <text:p>106686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5" table:style-name="ce2">
            <text:p>106686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6" table:style-name="ce2">
            <text:p>106686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7" table:style-name="ce2">
            <text:p>106686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9" table:style-name="ce2">
            <text:p>106686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0" table:style-name="ce2">
            <text:p>106687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1" table:style-name="ce2">
            <text:p>106687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72" table:style-name="ce2">
            <text:p>106687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3" table:style-name="ce2">
            <text:p>1066873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74" table:style-name="ce2">
            <text:p>106687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75" table:style-name="ce2">
            <text:p>106687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6" table:style-name="ce2">
            <text:p>106687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77" table:style-name="ce2">
            <text:p>106687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8" table:style-name="ce2">
            <text:p>106687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9" table:style-name="ce2">
            <text:p>106687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80" table:style-name="ce2">
            <text:p>106688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1" table:style-name="ce2">
            <text:p>106688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82" table:style-name="ce2">
            <text:p>106688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4" table:style-name="ce2">
            <text:p>1066884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85" table:style-name="ce2">
            <text:p>106688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6" table:style-name="ce2">
            <text:p>106688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7" table:style-name="ce2">
            <text:p>106688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88" table:style-name="ce2">
            <text:p>106688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9" table:style-name="ce2">
            <text:p>106688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8" table:style-name="ce2">
            <text:p>106689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9" table:style-name="ce2">
            <text:p>106689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3" table:style-name="ce2">
            <text:p>106690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4" table:style-name="ce2">
            <text:p>106690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5" table:style-name="ce2">
            <text:p>106690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06" table:style-name="ce2">
            <text:p>106690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7" table:style-name="ce2">
            <text:p>106690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8" table:style-name="ce2">
            <text:p>106690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09" table:style-name="ce2">
            <text:p>106690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0" table:style-name="ce2">
            <text:p>106691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1" table:style-name="ce2">
            <text:p>106691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2" table:style-name="ce2">
            <text:p>106691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3" table:style-name="ce2">
            <text:p>106691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4" table:style-name="ce2">
            <text:p>106691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5" table:style-name="ce2">
            <text:p>106691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6" table:style-name="ce2">
            <text:p>106691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7" table:style-name="ce2">
            <text:p>106691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8" table:style-name="ce2">
            <text:p>106691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9" table:style-name="ce2">
            <text:p>1066919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20" table:style-name="ce2">
            <text:p>1066920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21" table:style-name="ce2">
            <text:p>106692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2" table:style-name="ce2">
            <text:p>106692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3" table:style-name="ce2">
            <text:p>1066923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24" table:style-name="ce2">
            <text:p>106692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5" table:style-name="ce2">
            <text:p>106692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26" table:style-name="ce2">
            <text:p>106692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7" table:style-name="ce2">
            <text:p>106692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8" table:style-name="ce2">
            <text:p>106692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29" table:style-name="ce2">
            <text:p>1066929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0" table:style-name="ce2">
            <text:p>106693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1" table:style-name="ce2">
            <text:p>106693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2" table:style-name="ce2">
            <text:p>106693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3" table:style-name="ce2">
            <text:p>106693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4" table:style-name="ce2">
            <text:p>106693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5" table:style-name="ce2">
            <text:p>106693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6" table:style-name="ce2">
            <text:p>1066936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37" table:style-name="ce2">
            <text:p>106693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8" table:style-name="ce2">
            <text:p>1066938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39" table:style-name="ce2">
            <text:p>1066939</text:p>
          </table:table-cell>
          <table:table-cell office:value-type="float" office:value="170442" table:style-name="ce2">
            <text:p>170442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office:value-type="float" office:value="1066940" table:style-name="ce2">
            <text:p>106694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1" table:style-name="ce2">
            <text:p>106694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2" table:style-name="ce2">
            <text:p>106694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3" table:style-name="ce2">
            <text:p>106694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4" table:style-name="ce2">
            <text:p>106694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5" table:style-name="ce2">
            <text:p>106694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6" table:style-name="ce2">
            <text:p>106694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7" table:style-name="ce2">
            <text:p>106694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8" table:style-name="ce2">
            <text:p>106694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9" table:style-name="ce2">
            <text:p>106694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0" table:style-name="ce2">
            <text:p>106695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1" table:style-name="ce2">
            <text:p>106695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2" table:style-name="ce2">
            <text:p>106695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3" table:style-name="ce2">
            <text:p>106695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4" table:style-name="ce2">
            <text:p>106695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5" table:style-name="ce2">
            <text:p>106695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6" table:style-name="ce2">
            <text:p>1066956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58" table:style-name="ce2">
            <text:p>106695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59" table:style-name="ce2">
            <text:p>106695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60" table:style-name="ce2">
            <text:p>106696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1" table:style-name="ce2">
            <text:p>1066961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963" table:style-name="ce2">
            <text:p>106696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64" table:style-name="ce2">
            <text:p>106696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65" table:style-name="ce2">
            <text:p>106696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6" table:style-name="ce2">
            <text:p>106696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0" table:style-name="ce2">
            <text:p>106697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1" table:style-name="ce2">
            <text:p>106697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2" table:style-name="ce2">
            <text:p>106697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4" table:style-name="ce2">
            <text:p>106697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5" table:style-name="ce2">
            <text:p>106697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6" table:style-name="ce2">
            <text:p>106697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7" table:style-name="ce2">
            <text:p>106697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8" table:style-name="ce2">
            <text:p>106697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80" table:style-name="ce2">
            <text:p>106698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2" table:style-name="ce2">
            <text:p>106698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7" table:style-name="ce2">
            <text:p>106698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9" table:style-name="ce2">
            <text:p>106698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90" table:style-name="ce2">
            <text:p>106699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5" table:style-name="ce2">
            <text:p>106699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97" table:style-name="ce2">
            <text:p>106699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8" table:style-name="ce2">
            <text:p>106699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2" table:style-name="ce2">
            <text:p>106700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3" table:style-name="ce2">
            <text:p>106700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4" table:style-name="ce2">
            <text:p>1067004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5" table:style-name="ce2">
            <text:p>106700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07" table:style-name="ce2">
            <text:p>106700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8" table:style-name="ce2">
            <text:p>106700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9" table:style-name="ce2">
            <text:p>106700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1" table:style-name="ce2">
            <text:p>106701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2" table:style-name="ce2">
            <text:p>106701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5" table:style-name="ce2">
            <text:p>106701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6" table:style-name="ce2">
            <text:p>106701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7" table:style-name="ce2">
            <text:p>106701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8" table:style-name="ce2">
            <text:p>1067018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20" table:style-name="ce2">
            <text:p>106702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1" table:style-name="ce2">
            <text:p>106702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2" table:style-name="ce2">
            <text:p>106702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3" table:style-name="ce2">
            <text:p>106702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5" table:style-name="ce2">
            <text:p>106702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7" table:style-name="ce2">
            <text:p>1067027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8" table:style-name="ce2">
            <text:p>1067028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9" table:style-name="ce2">
            <text:p>106702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31" table:style-name="ce2">
            <text:p>106703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4" table:style-name="ce2">
            <text:p>106703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35" table:style-name="ce2">
            <text:p>106703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37" table:style-name="ce2">
            <text:p>106703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38" table:style-name="ce2">
            <text:p>106703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42" table:style-name="ce2">
            <text:p>1067042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47" table:style-name="ce2">
            <text:p>1067047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53" table:style-name="ce2">
            <text:p>1067053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61" table:style-name="ce2">
            <text:p>106706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62" table:style-name="ce2">
            <text:p>1067062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63" table:style-name="ce2">
            <text:p>106706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65" table:style-name="ce2">
            <text:p>106706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6" table:style-name="ce2">
            <text:p>1067066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7" table:style-name="ce2">
            <text:p>106706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74" table:style-name="ce2">
            <text:p>1067074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7081" table:style-name="ce2">
            <text:p>106708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90" table:style-name="ce2">
            <text:p>106709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95" table:style-name="ce2">
            <text:p>1067095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00" table:style-name="ce2">
            <text:p>106710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1" table:style-name="ce2">
            <text:p>106710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3" table:style-name="ce2">
            <text:p>1067103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05" table:style-name="ce2">
            <text:p>1067105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07" table:style-name="ce2">
            <text:p>106710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9" table:style-name="ce2">
            <text:p>106710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11" table:style-name="ce2">
            <text:p>106711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3" table:style-name="ce2">
            <text:p>106711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15" table:style-name="ce2">
            <text:p>1067115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6" table:style-name="ce2">
            <text:p>1067116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18" table:style-name="ce2">
            <text:p>106711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9" table:style-name="ce2">
            <text:p>1067119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0" table:style-name="ce2">
            <text:p>1067120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1" table:style-name="ce2">
            <text:p>106712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3" table:style-name="ce2">
            <text:p>106712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4" table:style-name="ce2">
            <text:p>106712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31" table:style-name="ce2">
            <text:p>1067131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34" table:style-name="ce2">
            <text:p>1067134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7" table:style-name="ce2">
            <text:p>1067137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9" table:style-name="ce2">
            <text:p>1067139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0" table:style-name="ce2">
            <text:p>1067140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1" table:style-name="ce2">
            <text:p>1067141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2" table:style-name="ce2">
            <text:p>1067142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3" table:style-name="ce2">
            <text:p>1067143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5" table:style-name="ce2">
            <text:p>1067145</text:p>
          </table:table-cell>
          <table:table-cell office:value-type="float" office:value="170442" table:style-name="ce2">
            <text:p>17044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7148" table:style-name="ce2">
            <text:p>106714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56" table:style-name="ce2">
            <text:p>1067156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58" table:style-name="ce2">
            <text:p>1067158</text:p>
          </table:table-cell>
          <table:table-cell office:value-type="float" office:value="170442" table:style-name="ce2">
            <text:p>170442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61" table:style-name="ce2">
            <text:p>1067161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93" table:style-name="ce2">
            <text:p>1067193</text:p>
          </table:table-cell>
          <table:table-cell office:value-type="float" office:value="170442" table:style-name="ce2">
            <text:p>170442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94" table:style-name="ce2">
            <text:p>1067194</text:p>
          </table:table-cell>
          <table:table-cell office:value-type="float" office:value="170442" table:style-name="ce2">
            <text:p>170442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50" table:style-name="ce2">
            <text:p>91465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60" table:style-name="ce2">
            <text:p>91466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67" table:style-name="ce2">
            <text:p>914667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2" table:style-name="ce2">
            <text:p>91467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3" table:style-name="ce2">
            <text:p>91467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4" table:style-name="ce2">
            <text:p>914674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5" table:style-name="ce2">
            <text:p>914675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6" table:style-name="ce2">
            <text:p>91467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7" table:style-name="ce2">
            <text:p>914677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8" table:style-name="ce2">
            <text:p>91467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9" table:style-name="ce2">
            <text:p>914679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686" table:style-name="ce2">
            <text:p>91468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7" table:style-name="ce2">
            <text:p>91468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88" table:style-name="ce2">
            <text:p>91468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9" table:style-name="ce2">
            <text:p>914689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690" table:style-name="ce2">
            <text:p>914690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691" table:style-name="ce2">
            <text:p>914691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692" table:style-name="ce2">
            <text:p>91469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3" table:style-name="ce2">
            <text:p>91469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4" table:style-name="ce2">
            <text:p>91469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5" table:style-name="ce2">
            <text:p>91469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6" table:style-name="ce2">
            <text:p>91469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7" table:style-name="ce2">
            <text:p>91469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8" table:style-name="ce2">
            <text:p>91469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2" table:style-name="ce2">
            <text:p>91470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3" table:style-name="ce2">
            <text:p>91470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4" table:style-name="ce2">
            <text:p>914704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05" table:style-name="ce2">
            <text:p>91470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6" table:style-name="ce2">
            <text:p>91470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3" table:style-name="ce2">
            <text:p>914713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17" table:style-name="ce2">
            <text:p>91471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8" table:style-name="ce2">
            <text:p>91471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22" table:style-name="ce2">
            <text:p>91472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26" table:style-name="ce2">
            <text:p>91472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37" table:style-name="ce2">
            <text:p>91473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46" table:style-name="ce2">
            <text:p>91474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52" table:style-name="ce2">
            <text:p>91475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53" table:style-name="ce2">
            <text:p>91475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62" table:style-name="ce2">
            <text:p>91476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67" table:style-name="ce2">
            <text:p>914767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777" table:style-name="ce2">
            <text:p>91477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87" table:style-name="ce2">
            <text:p>91478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88" table:style-name="ce2">
            <text:p>91478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802" table:style-name="ce2">
            <text:p>91480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857" table:style-name="ce2">
            <text:p>914857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908" table:style-name="ce2">
            <text:p>914908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963" table:style-name="ce2">
            <text:p>914963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967" table:style-name="ce2">
            <text:p>91496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95" table:style-name="ce2">
            <text:p>91499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4" table:style-name="ce2">
            <text:p>91500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8" table:style-name="ce2">
            <text:p>915008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09" table:style-name="ce2">
            <text:p>91500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0" table:style-name="ce2">
            <text:p>91501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11" table:style-name="ce2">
            <text:p>91501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2" table:style-name="ce2">
            <text:p>91501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3" table:style-name="ce2">
            <text:p>91501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4" table:style-name="ce2">
            <text:p>91501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5" table:style-name="ce2">
            <text:p>915015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16" table:style-name="ce2">
            <text:p>915016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0" table:style-name="ce2">
            <text:p>91502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1" table:style-name="ce2">
            <text:p>91502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2" table:style-name="ce2">
            <text:p>91502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3" table:style-name="ce2">
            <text:p>915023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4" table:style-name="ce2">
            <text:p>915024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5" table:style-name="ce2">
            <text:p>915025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6" table:style-name="ce2">
            <text:p>91502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7" table:style-name="ce2">
            <text:p>915027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28" table:style-name="ce2">
            <text:p>91502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9" table:style-name="ce2">
            <text:p>91502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0" table:style-name="ce2">
            <text:p>91503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1" table:style-name="ce2">
            <text:p>91503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5" table:style-name="ce2">
            <text:p>915035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36" table:style-name="ce2">
            <text:p>91503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37" table:style-name="ce2">
            <text:p>915037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44" table:style-name="ce2">
            <text:p>91504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48" table:style-name="ce2">
            <text:p>91504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49" table:style-name="ce2">
            <text:p>915049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50" table:style-name="ce2">
            <text:p>91505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1" table:style-name="ce2">
            <text:p>91505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7" table:style-name="ce2">
            <text:p>91505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8" table:style-name="ce2">
            <text:p>91505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9" table:style-name="ce2">
            <text:p>91505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0" table:style-name="ce2">
            <text:p>915060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61" table:style-name="ce2">
            <text:p>91506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2" table:style-name="ce2">
            <text:p>915062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69" table:style-name="ce2">
            <text:p>91506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0" table:style-name="ce2">
            <text:p>915070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72" table:style-name="ce2">
            <text:p>91507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6" table:style-name="ce2">
            <text:p>915076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77" table:style-name="ce2">
            <text:p>91507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6" table:style-name="ce2">
            <text:p>915086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87" table:style-name="ce2">
            <text:p>91508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8" table:style-name="ce2">
            <text:p>91508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9" table:style-name="ce2">
            <text:p>915089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90" table:style-name="ce2">
            <text:p>91509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94" table:style-name="ce2">
            <text:p>91509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02" table:style-name="ce2">
            <text:p>91510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3" table:style-name="ce2">
            <text:p>91510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4" table:style-name="ce2">
            <text:p>91510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08" table:style-name="ce2">
            <text:p>91510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18" table:style-name="ce2">
            <text:p>915118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124" table:style-name="ce2">
            <text:p>91512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0" table:style-name="ce2">
            <text:p>91519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1" table:style-name="ce2">
            <text:p>91519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2" table:style-name="ce2">
            <text:p>915192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93" table:style-name="ce2">
            <text:p>91519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4" table:style-name="ce2">
            <text:p>91519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5" table:style-name="ce2">
            <text:p>91519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6" table:style-name="ce2">
            <text:p>91519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7" table:style-name="ce2">
            <text:p>91519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8" table:style-name="ce2">
            <text:p>91519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9" table:style-name="ce2">
            <text:p>91519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03" table:style-name="ce2">
            <text:p>915203</text:p>
          </table:table-cell>
          <table:table-cell office:value-type="float" office:value="170443" table:style-name="ce2">
            <text:p>170443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13" table:style-name="ce2">
            <text:p>91521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14" table:style-name="ce2">
            <text:p>915214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15" table:style-name="ce2">
            <text:p>91521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16" table:style-name="ce2">
            <text:p>91521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17" table:style-name="ce2">
            <text:p>91521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4" table:style-name="ce2">
            <text:p>91522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5" table:style-name="ce2">
            <text:p>91522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6" table:style-name="ce2">
            <text:p>915226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27" table:style-name="ce2">
            <text:p>91522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8" table:style-name="ce2">
            <text:p>91522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9" table:style-name="ce2">
            <text:p>91522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0" table:style-name="ce2">
            <text:p>91523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1" table:style-name="ce2">
            <text:p>91523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2" table:style-name="ce2">
            <text:p>915232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33" table:style-name="ce2">
            <text:p>91523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4" table:style-name="ce2">
            <text:p>91523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8" table:style-name="ce2">
            <text:p>915238</text:p>
          </table:table-cell>
          <table:table-cell office:value-type="float" office:value="170443" table:style-name="ce2">
            <text:p>170443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39" table:style-name="ce2">
            <text:p>91523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0" table:style-name="ce2">
            <text:p>91524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1" table:style-name="ce2">
            <text:p>91524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2" table:style-name="ce2">
            <text:p>91524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3" table:style-name="ce2">
            <text:p>91524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4" table:style-name="ce2">
            <text:p>91524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5" table:style-name="ce2">
            <text:p>91524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6" table:style-name="ce2">
            <text:p>91524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7" table:style-name="ce2">
            <text:p>91524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8" table:style-name="ce2">
            <text:p>91524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9" table:style-name="ce2">
            <text:p>91524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4" table:style-name="ce2">
            <text:p>91525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5" table:style-name="ce2">
            <text:p>91525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6" table:style-name="ce2">
            <text:p>91525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7" table:style-name="ce2">
            <text:p>91525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8" table:style-name="ce2">
            <text:p>91525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9" table:style-name="ce2">
            <text:p>91525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0" table:style-name="ce2">
            <text:p>91526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1" table:style-name="ce2">
            <text:p>91526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2" table:style-name="ce2">
            <text:p>91526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3" table:style-name="ce2">
            <text:p>91526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4" table:style-name="ce2">
            <text:p>91526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5" table:style-name="ce2">
            <text:p>91526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6" table:style-name="ce2">
            <text:p>915266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67" table:style-name="ce2">
            <text:p>91526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8" table:style-name="ce2">
            <text:p>91526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9" table:style-name="ce2">
            <text:p>91526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0" table:style-name="ce2">
            <text:p>91527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5" table:style-name="ce2">
            <text:p>91527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6" table:style-name="ce2">
            <text:p>91527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7" table:style-name="ce2">
            <text:p>91527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8" table:style-name="ce2">
            <text:p>91527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9" table:style-name="ce2">
            <text:p>91527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0" table:style-name="ce2">
            <text:p>915280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81" table:style-name="ce2">
            <text:p>91528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2" table:style-name="ce2">
            <text:p>91528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3" table:style-name="ce2">
            <text:p>91528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4" table:style-name="ce2">
            <text:p>91528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5" table:style-name="ce2">
            <text:p>91528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6" table:style-name="ce2">
            <text:p>91528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7" table:style-name="ce2">
            <text:p>91528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8" table:style-name="ce2">
            <text:p>91528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9" table:style-name="ce2">
            <text:p>91528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0" table:style-name="ce2">
            <text:p>91529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1" table:style-name="ce2">
            <text:p>91529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2" table:style-name="ce2">
            <text:p>91529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3" table:style-name="ce2">
            <text:p>91529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5" table:style-name="ce2">
            <text:p>91529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6" table:style-name="ce2">
            <text:p>91529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7" table:style-name="ce2">
            <text:p>91529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8" table:style-name="ce2">
            <text:p>915298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99" table:style-name="ce2">
            <text:p>91529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0" table:style-name="ce2">
            <text:p>91530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1" table:style-name="ce2">
            <text:p>91530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2" table:style-name="ce2">
            <text:p>91530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3" table:style-name="ce2">
            <text:p>91530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4" table:style-name="ce2">
            <text:p>91530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5" table:style-name="ce2">
            <text:p>91530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6" table:style-name="ce2">
            <text:p>915306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07" table:style-name="ce2">
            <text:p>91530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8" table:style-name="ce2">
            <text:p>91530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9" table:style-name="ce2">
            <text:p>91530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0" table:style-name="ce2">
            <text:p>91531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1" table:style-name="ce2">
            <text:p>91531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2" table:style-name="ce2">
            <text:p>91531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3" table:style-name="ce2">
            <text:p>91531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4" table:style-name="ce2">
            <text:p>91531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5" table:style-name="ce2">
            <text:p>91531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6" table:style-name="ce2">
            <text:p>91531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7" table:style-name="ce2">
            <text:p>91531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8" table:style-name="ce2">
            <text:p>91531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9" table:style-name="ce2">
            <text:p>91531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0" table:style-name="ce2">
            <text:p>91532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1" table:style-name="ce2">
            <text:p>91532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2" table:style-name="ce2">
            <text:p>915322</text:p>
          </table:table-cell>
          <table:table-cell office:value-type="float" office:value="170443" table:style-name="ce2">
            <text:p>170443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23" table:style-name="ce2">
            <text:p>915323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24" table:style-name="ce2">
            <text:p>91532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5" table:style-name="ce2">
            <text:p>91532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6" table:style-name="ce2">
            <text:p>915326</text:p>
          </table:table-cell>
          <table:table-cell office:value-type="float" office:value="170443" table:style-name="ce2">
            <text:p>170443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27" table:style-name="ce2">
            <text:p>915327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28" table:style-name="ce2">
            <text:p>91532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9" table:style-name="ce2">
            <text:p>91532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0" table:style-name="ce2">
            <text:p>91533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1" table:style-name="ce2">
            <text:p>91533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2" table:style-name="ce2">
            <text:p>91533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3" table:style-name="ce2">
            <text:p>91533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4" table:style-name="ce2">
            <text:p>91533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5" table:style-name="ce2">
            <text:p>91533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6" table:style-name="ce2">
            <text:p>91533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7" table:style-name="ce2">
            <text:p>91533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8" table:style-name="ce2">
            <text:p>91533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9" table:style-name="ce2">
            <text:p>91533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0" table:style-name="ce2">
            <text:p>91534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1" table:style-name="ce2">
            <text:p>91534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2" table:style-name="ce2">
            <text:p>91534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3" table:style-name="ce2">
            <text:p>91534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4" table:style-name="ce2">
            <text:p>915344</text:p>
          </table:table-cell>
          <table:table-cell office:value-type="float" office:value="170443" table:style-name="ce2">
            <text:p>170443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46" table:style-name="ce2">
            <text:p>91534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7" table:style-name="ce2">
            <text:p>91534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8" table:style-name="ce2">
            <text:p>91534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9" table:style-name="ce2">
            <text:p>91534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0" table:style-name="ce2">
            <text:p>91535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1" table:style-name="ce2">
            <text:p>91535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2" table:style-name="ce2">
            <text:p>91535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4" table:style-name="ce2">
            <text:p>91535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5" table:style-name="ce2">
            <text:p>915355</text:p>
          </table:table-cell>
          <table:table-cell office:value-type="float" office:value="170443" table:style-name="ce2">
            <text:p>170443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356" table:style-name="ce2">
            <text:p>91535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7" table:style-name="ce2">
            <text:p>91535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8" table:style-name="ce2">
            <text:p>91535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9" table:style-name="ce2">
            <text:p>91535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0" table:style-name="ce2">
            <text:p>91536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1" table:style-name="ce2">
            <text:p>91536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5" table:style-name="ce2">
            <text:p>91536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7" table:style-name="ce2">
            <text:p>91536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8" table:style-name="ce2">
            <text:p>91536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79" table:style-name="ce2">
            <text:p>91537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1" table:style-name="ce2">
            <text:p>91538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83" table:style-name="ce2">
            <text:p>91538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6" table:style-name="ce2">
            <text:p>91538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7" table:style-name="ce2">
            <text:p>91538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9" table:style-name="ce2">
            <text:p>91538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90" table:style-name="ce2">
            <text:p>91539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2" table:style-name="ce2">
            <text:p>91539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93" table:style-name="ce2">
            <text:p>91539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94" table:style-name="ce2">
            <text:p>91539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0" table:style-name="ce2">
            <text:p>91540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1" table:style-name="ce2">
            <text:p>91540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3" table:style-name="ce2">
            <text:p>915403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404" table:style-name="ce2">
            <text:p>91540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5" table:style-name="ce2">
            <text:p>91540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7" table:style-name="ce2">
            <text:p>91540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3" table:style-name="ce2">
            <text:p>91541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4" table:style-name="ce2">
            <text:p>91541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5" table:style-name="ce2">
            <text:p>91541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27" table:style-name="ce2">
            <text:p>91542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28" table:style-name="ce2">
            <text:p>91542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29" table:style-name="ce2">
            <text:p>915429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430" table:style-name="ce2">
            <text:p>91543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31" table:style-name="ce2">
            <text:p>915431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440" table:style-name="ce2">
            <text:p>91544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42" table:style-name="ce2">
            <text:p>91544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78" table:style-name="ce2">
            <text:p>91547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82" table:style-name="ce2">
            <text:p>91548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19" table:style-name="ce2">
            <text:p>915519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566" table:style-name="ce2">
            <text:p>915566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581" table:style-name="ce2">
            <text:p>915581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588" table:style-name="ce2">
            <text:p>915588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589" table:style-name="ce2">
            <text:p>91558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590" table:style-name="ce2">
            <text:p>91559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20" table:style-name="ce2">
            <text:p>91562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34" table:style-name="ce2">
            <text:p>91563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53" table:style-name="ce2">
            <text:p>91565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54" table:style-name="ce2">
            <text:p>91565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55" table:style-name="ce2">
            <text:p>915655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667" table:style-name="ce2">
            <text:p>91566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71" table:style-name="ce2">
            <text:p>91567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87" table:style-name="ce2">
            <text:p>91568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88" table:style-name="ce2">
            <text:p>91568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741" table:style-name="ce2">
            <text:p>915741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41833" table:style-name="ce2">
            <text:p>941833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27" table:style-name="ce2">
            <text:p>106682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8" table:style-name="ce2">
            <text:p>106682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9" table:style-name="ce2">
            <text:p>106682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0" table:style-name="ce2">
            <text:p>106683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1" table:style-name="ce2">
            <text:p>106683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2" table:style-name="ce2">
            <text:p>1066832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33" table:style-name="ce2">
            <text:p>106683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4" table:style-name="ce2">
            <text:p>106683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5" table:style-name="ce2">
            <text:p>106683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6" table:style-name="ce2">
            <text:p>106683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7" table:style-name="ce2">
            <text:p>106683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8" table:style-name="ce2">
            <text:p>106683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9" table:style-name="ce2">
            <text:p>106683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0" table:style-name="ce2">
            <text:p>106684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1" table:style-name="ce2">
            <text:p>106684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2" table:style-name="ce2">
            <text:p>106684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3" table:style-name="ce2">
            <text:p>106684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4" table:style-name="ce2">
            <text:p>1066844</text:p>
          </table:table-cell>
          <table:table-cell office:value-type="float" office:value="170443" table:style-name="ce2">
            <text:p>170443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45" table:style-name="ce2">
            <text:p>106684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7" table:style-name="ce2">
            <text:p>106684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8" table:style-name="ce2">
            <text:p>106684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9" table:style-name="ce2">
            <text:p>106684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0" table:style-name="ce2">
            <text:p>106685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1" table:style-name="ce2">
            <text:p>106685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2" table:style-name="ce2">
            <text:p>106685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3" table:style-name="ce2">
            <text:p>106685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4" table:style-name="ce2">
            <text:p>1066854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1066855" table:style-name="ce2">
            <text:p>106685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6" table:style-name="ce2">
            <text:p>106685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7" table:style-name="ce2">
            <text:p>106685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8" table:style-name="ce2">
            <text:p>106685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9" table:style-name="ce2">
            <text:p>106685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0" table:style-name="ce2">
            <text:p>106686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1" table:style-name="ce2">
            <text:p>106686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2" table:style-name="ce2">
            <text:p>106686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3" table:style-name="ce2">
            <text:p>1066863</text:p>
          </table:table-cell>
          <table:table-cell office:value-type="float" office:value="170443" table:style-name="ce2">
            <text:p>170443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66864" table:style-name="ce2">
            <text:p>106686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5" table:style-name="ce2">
            <text:p>106686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6" table:style-name="ce2">
            <text:p>106686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7" table:style-name="ce2">
            <text:p>106686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9" table:style-name="ce2">
            <text:p>106686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0" table:style-name="ce2">
            <text:p>106687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1" table:style-name="ce2">
            <text:p>1066871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72" table:style-name="ce2">
            <text:p>106687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3" table:style-name="ce2">
            <text:p>106687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4" table:style-name="ce2">
            <text:p>106687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5" table:style-name="ce2">
            <text:p>106687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6" table:style-name="ce2">
            <text:p>1066876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77" table:style-name="ce2">
            <text:p>106687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8" table:style-name="ce2">
            <text:p>106687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9" table:style-name="ce2">
            <text:p>106687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0" table:style-name="ce2">
            <text:p>106688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1" table:style-name="ce2">
            <text:p>1066881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82" table:style-name="ce2">
            <text:p>106688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4" table:style-name="ce2">
            <text:p>106688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5" table:style-name="ce2">
            <text:p>106688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6" table:style-name="ce2">
            <text:p>106688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7" table:style-name="ce2">
            <text:p>106688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8" table:style-name="ce2">
            <text:p>106688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9" table:style-name="ce2">
            <text:p>106688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8" table:style-name="ce2">
            <text:p>106689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9" table:style-name="ce2">
            <text:p>106689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3" table:style-name="ce2">
            <text:p>106690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4" table:style-name="ce2">
            <text:p>106690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5" table:style-name="ce2">
            <text:p>106690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6" table:style-name="ce2">
            <text:p>106690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7" table:style-name="ce2">
            <text:p>106690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8" table:style-name="ce2">
            <text:p>106690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9" table:style-name="ce2">
            <text:p>106690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0" table:style-name="ce2">
            <text:p>106691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1" table:style-name="ce2">
            <text:p>106691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2" table:style-name="ce2">
            <text:p>106691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3" table:style-name="ce2">
            <text:p>106691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4" table:style-name="ce2">
            <text:p>106691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5" table:style-name="ce2">
            <text:p>1066915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16" table:style-name="ce2">
            <text:p>106691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7" table:style-name="ce2">
            <text:p>106691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8" table:style-name="ce2">
            <text:p>106691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9" table:style-name="ce2">
            <text:p>1066919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0" table:style-name="ce2">
            <text:p>106692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1" table:style-name="ce2">
            <text:p>106692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2" table:style-name="ce2">
            <text:p>106692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3" table:style-name="ce2">
            <text:p>1066923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24" table:style-name="ce2">
            <text:p>106692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5" table:style-name="ce2">
            <text:p>106692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6" table:style-name="ce2">
            <text:p>106692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7" table:style-name="ce2">
            <text:p>106692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8" table:style-name="ce2">
            <text:p>1066928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29" table:style-name="ce2">
            <text:p>106692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0" table:style-name="ce2">
            <text:p>106693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1" table:style-name="ce2">
            <text:p>106693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2" table:style-name="ce2">
            <text:p>106693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3" table:style-name="ce2">
            <text:p>106693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4" table:style-name="ce2">
            <text:p>106693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5" table:style-name="ce2">
            <text:p>106693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6" table:style-name="ce2">
            <text:p>106693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7" table:style-name="ce2">
            <text:p>106693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8" table:style-name="ce2">
            <text:p>106693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9" table:style-name="ce2">
            <text:p>1066939</text:p>
          </table:table-cell>
          <table:table-cell office:value-type="float" office:value="170443" table:style-name="ce2">
            <text:p>170443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1066940" table:style-name="ce2">
            <text:p>106694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1" table:style-name="ce2">
            <text:p>106694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2" table:style-name="ce2">
            <text:p>106694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3" table:style-name="ce2">
            <text:p>106694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4" table:style-name="ce2">
            <text:p>106694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5" table:style-name="ce2">
            <text:p>106694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6" table:style-name="ce2">
            <text:p>106694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7" table:style-name="ce2">
            <text:p>106694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8" table:style-name="ce2">
            <text:p>1066948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9" table:style-name="ce2">
            <text:p>106694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0" table:style-name="ce2">
            <text:p>106695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1" table:style-name="ce2">
            <text:p>106695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2" table:style-name="ce2">
            <text:p>106695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3" table:style-name="ce2">
            <text:p>106695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4" table:style-name="ce2">
            <text:p>106695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5" table:style-name="ce2">
            <text:p>106695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6" table:style-name="ce2">
            <text:p>106695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8" table:style-name="ce2">
            <text:p>106695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9" table:style-name="ce2">
            <text:p>1066959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60" table:style-name="ce2">
            <text:p>106696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1" table:style-name="ce2">
            <text:p>106696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3" table:style-name="ce2">
            <text:p>106696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64" table:style-name="ce2">
            <text:p>1066964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65" table:style-name="ce2">
            <text:p>106696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66" table:style-name="ce2">
            <text:p>106696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0" table:style-name="ce2">
            <text:p>106697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1" table:style-name="ce2">
            <text:p>106697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2" table:style-name="ce2">
            <text:p>106697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4" table:style-name="ce2">
            <text:p>106697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5" table:style-name="ce2">
            <text:p>106697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6" table:style-name="ce2">
            <text:p>106697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7" table:style-name="ce2">
            <text:p>106697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8" table:style-name="ce2">
            <text:p>1066978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80" table:style-name="ce2">
            <text:p>106698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2" table:style-name="ce2">
            <text:p>106698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7" table:style-name="ce2">
            <text:p>106698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9" table:style-name="ce2">
            <text:p>106698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0" table:style-name="ce2">
            <text:p>1066990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95" table:style-name="ce2">
            <text:p>106699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7" table:style-name="ce2">
            <text:p>106699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8" table:style-name="ce2">
            <text:p>106699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2" table:style-name="ce2">
            <text:p>106700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3" table:style-name="ce2">
            <text:p>106700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4" table:style-name="ce2">
            <text:p>106700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5" table:style-name="ce2">
            <text:p>106700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7" table:style-name="ce2">
            <text:p>106700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8" table:style-name="ce2">
            <text:p>106700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9" table:style-name="ce2">
            <text:p>106700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1" table:style-name="ce2">
            <text:p>106701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2" table:style-name="ce2">
            <text:p>1067012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5" table:style-name="ce2">
            <text:p>106701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6" table:style-name="ce2">
            <text:p>106701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7" table:style-name="ce2">
            <text:p>106701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8" table:style-name="ce2">
            <text:p>1067018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20" table:style-name="ce2">
            <text:p>106702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1" table:style-name="ce2">
            <text:p>106702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2" table:style-name="ce2">
            <text:p>106702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3" table:style-name="ce2">
            <text:p>106702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5" table:style-name="ce2">
            <text:p>106702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7" table:style-name="ce2">
            <text:p>106702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8" table:style-name="ce2">
            <text:p>106702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9" table:style-name="ce2">
            <text:p>106702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1" table:style-name="ce2">
            <text:p>1067031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34" table:style-name="ce2">
            <text:p>1067034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35" table:style-name="ce2">
            <text:p>106703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37" table:style-name="ce2">
            <text:p>106703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8" table:style-name="ce2">
            <text:p>106703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42" table:style-name="ce2">
            <text:p>106704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47" table:style-name="ce2">
            <text:p>106704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53" table:style-name="ce2">
            <text:p>106705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1" table:style-name="ce2">
            <text:p>106706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2" table:style-name="ce2">
            <text:p>106706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3" table:style-name="ce2">
            <text:p>106706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5" table:style-name="ce2">
            <text:p>1067065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6" table:style-name="ce2">
            <text:p>106706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67" table:style-name="ce2">
            <text:p>106706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74" table:style-name="ce2">
            <text:p>106707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81" table:style-name="ce2">
            <text:p>106708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90" table:style-name="ce2">
            <text:p>1067090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95" table:style-name="ce2">
            <text:p>106709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00" table:style-name="ce2">
            <text:p>106710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1" table:style-name="ce2">
            <text:p>106710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3" table:style-name="ce2">
            <text:p>1067103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05" table:style-name="ce2">
            <text:p>1067105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07" table:style-name="ce2">
            <text:p>1067107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9" table:style-name="ce2">
            <text:p>1067109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11" table:style-name="ce2">
            <text:p>106711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3" table:style-name="ce2">
            <text:p>106711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5" table:style-name="ce2">
            <text:p>1067115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16" table:style-name="ce2">
            <text:p>1067116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8" table:style-name="ce2">
            <text:p>106711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9" table:style-name="ce2">
            <text:p>1067119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0" table:style-name="ce2">
            <text:p>106712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1" table:style-name="ce2">
            <text:p>1067121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3" table:style-name="ce2">
            <text:p>106712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4" table:style-name="ce2">
            <text:p>1067124</text:p>
          </table:table-cell>
          <table:table-cell office:value-type="float" office:value="170443" table:style-name="ce2">
            <text:p>170443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31" table:style-name="ce2">
            <text:p>106713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4" table:style-name="ce2">
            <text:p>1067134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37" table:style-name="ce2">
            <text:p>1067137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39" table:style-name="ce2">
            <text:p>1067139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0" table:style-name="ce2">
            <text:p>1067140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1" table:style-name="ce2">
            <text:p>1067141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2" table:style-name="ce2">
            <text:p>1067142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3" table:style-name="ce2">
            <text:p>1067143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5" table:style-name="ce2">
            <text:p>1067145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8" table:style-name="ce2">
            <text:p>106714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56" table:style-name="ce2">
            <text:p>1067156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58" table:style-name="ce2">
            <text:p>1067158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61" table:style-name="ce2">
            <text:p>1067161</text:p>
          </table:table-cell>
          <table:table-cell office:value-type="float" office:value="170443" table:style-name="ce2">
            <text:p>170443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93" table:style-name="ce2">
            <text:p>1067193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94" table:style-name="ce2">
            <text:p>1067194</text:p>
          </table:table-cell>
          <table:table-cell office:value-type="float" office:value="170443" table:style-name="ce2">
            <text:p>170443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50" table:style-name="ce2">
            <text:p>91465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60" table:style-name="ce2">
            <text:p>91466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67" table:style-name="ce2">
            <text:p>91466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2" table:style-name="ce2">
            <text:p>91467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3" table:style-name="ce2">
            <text:p>91467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4" table:style-name="ce2">
            <text:p>914674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5" table:style-name="ce2">
            <text:p>91467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6" table:style-name="ce2">
            <text:p>91467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77" table:style-name="ce2">
            <text:p>91467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8" table:style-name="ce2">
            <text:p>91467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9" table:style-name="ce2">
            <text:p>914679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686" table:style-name="ce2">
            <text:p>91468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7" table:style-name="ce2">
            <text:p>91468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8" table:style-name="ce2">
            <text:p>91468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9" table:style-name="ce2">
            <text:p>914689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690" table:style-name="ce2">
            <text:p>914690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1" table:style-name="ce2">
            <text:p>914691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2" table:style-name="ce2">
            <text:p>91469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3" table:style-name="ce2">
            <text:p>91469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4" table:style-name="ce2">
            <text:p>914694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695" table:style-name="ce2">
            <text:p>91469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6" table:style-name="ce2">
            <text:p>91469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7" table:style-name="ce2">
            <text:p>91469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98" table:style-name="ce2">
            <text:p>91469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02" table:style-name="ce2">
            <text:p>91470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03" table:style-name="ce2">
            <text:p>91470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04" table:style-name="ce2">
            <text:p>914704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05" table:style-name="ce2">
            <text:p>91470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6" table:style-name="ce2">
            <text:p>91470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3" table:style-name="ce2">
            <text:p>91471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7" table:style-name="ce2">
            <text:p>91471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18" table:style-name="ce2">
            <text:p>91471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22" table:style-name="ce2">
            <text:p>91472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26" table:style-name="ce2">
            <text:p>91472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37" table:style-name="ce2">
            <text:p>91473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46" table:style-name="ce2">
            <text:p>91474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52" table:style-name="ce2">
            <text:p>91475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53" table:style-name="ce2">
            <text:p>914753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762" table:style-name="ce2">
            <text:p>91476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67" table:style-name="ce2">
            <text:p>914767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77" table:style-name="ce2">
            <text:p>91477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87" table:style-name="ce2">
            <text:p>91478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88" table:style-name="ce2">
            <text:p>91478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802" table:style-name="ce2">
            <text:p>91480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857" table:style-name="ce2">
            <text:p>91485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08" table:style-name="ce2">
            <text:p>91490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63" table:style-name="ce2">
            <text:p>91496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67" table:style-name="ce2">
            <text:p>914967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995" table:style-name="ce2">
            <text:p>91499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04" table:style-name="ce2">
            <text:p>91500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8" table:style-name="ce2">
            <text:p>91500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9" table:style-name="ce2">
            <text:p>91500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0" table:style-name="ce2">
            <text:p>91501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1" table:style-name="ce2">
            <text:p>91501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2" table:style-name="ce2">
            <text:p>91501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3" table:style-name="ce2">
            <text:p>91501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4" table:style-name="ce2">
            <text:p>91501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5" table:style-name="ce2">
            <text:p>915015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16" table:style-name="ce2">
            <text:p>91501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0" table:style-name="ce2">
            <text:p>915020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21" table:style-name="ce2">
            <text:p>91502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2" table:style-name="ce2">
            <text:p>91502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23" table:style-name="ce2">
            <text:p>91502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4" table:style-name="ce2">
            <text:p>915024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5" table:style-name="ce2">
            <text:p>91502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6" table:style-name="ce2">
            <text:p>91502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7" table:style-name="ce2">
            <text:p>915027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8" table:style-name="ce2">
            <text:p>91502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9" table:style-name="ce2">
            <text:p>915029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30" table:style-name="ce2">
            <text:p>915030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31" table:style-name="ce2">
            <text:p>91503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5" table:style-name="ce2">
            <text:p>91503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36" table:style-name="ce2">
            <text:p>915036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37" table:style-name="ce2">
            <text:p>915037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44" table:style-name="ce2">
            <text:p>91504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48" table:style-name="ce2">
            <text:p>91504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49" table:style-name="ce2">
            <text:p>915049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50" table:style-name="ce2">
            <text:p>91505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1" table:style-name="ce2">
            <text:p>91505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7" table:style-name="ce2">
            <text:p>91505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8" table:style-name="ce2">
            <text:p>91505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9" table:style-name="ce2">
            <text:p>91505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60" table:style-name="ce2">
            <text:p>91506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1" table:style-name="ce2">
            <text:p>915061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62" table:style-name="ce2">
            <text:p>91506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9" table:style-name="ce2">
            <text:p>915069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70" table:style-name="ce2">
            <text:p>91507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2" table:style-name="ce2">
            <text:p>91507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6" table:style-name="ce2">
            <text:p>91507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7" table:style-name="ce2">
            <text:p>91507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86" table:style-name="ce2">
            <text:p>915086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87" table:style-name="ce2">
            <text:p>91508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088" table:style-name="ce2">
            <text:p>91508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9" table:style-name="ce2">
            <text:p>915089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90" table:style-name="ce2">
            <text:p>91509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94" table:style-name="ce2">
            <text:p>91509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2" table:style-name="ce2">
            <text:p>91510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03" table:style-name="ce2">
            <text:p>91510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4" table:style-name="ce2">
            <text:p>91510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8" table:style-name="ce2">
            <text:p>915108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18" table:style-name="ce2">
            <text:p>915118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24" table:style-name="ce2">
            <text:p>915124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90" table:style-name="ce2">
            <text:p>91519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1" table:style-name="ce2">
            <text:p>91519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2" table:style-name="ce2">
            <text:p>915192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93" table:style-name="ce2">
            <text:p>91519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4" table:style-name="ce2">
            <text:p>91519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5" table:style-name="ce2">
            <text:p>91519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6" table:style-name="ce2">
            <text:p>91519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7" table:style-name="ce2">
            <text:p>91519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8" table:style-name="ce2">
            <text:p>91519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9" table:style-name="ce2">
            <text:p>91519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03" table:style-name="ce2">
            <text:p>91520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13" table:style-name="ce2">
            <text:p>91521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14" table:style-name="ce2">
            <text:p>91521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15" table:style-name="ce2">
            <text:p>91521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16" table:style-name="ce2">
            <text:p>91521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17" table:style-name="ce2">
            <text:p>91521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4" table:style-name="ce2">
            <text:p>91522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5" table:style-name="ce2">
            <text:p>91522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6" table:style-name="ce2">
            <text:p>915226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27" table:style-name="ce2">
            <text:p>91522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8" table:style-name="ce2">
            <text:p>91522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9" table:style-name="ce2">
            <text:p>91522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0" table:style-name="ce2">
            <text:p>91523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1" table:style-name="ce2">
            <text:p>91523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2" table:style-name="ce2">
            <text:p>915232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33" table:style-name="ce2">
            <text:p>91523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4" table:style-name="ce2">
            <text:p>91523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8" table:style-name="ce2">
            <text:p>91523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9" table:style-name="ce2">
            <text:p>91523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0" table:style-name="ce2">
            <text:p>91524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1" table:style-name="ce2">
            <text:p>91524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2" table:style-name="ce2">
            <text:p>91524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3" table:style-name="ce2">
            <text:p>91524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4" table:style-name="ce2">
            <text:p>91524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5" table:style-name="ce2">
            <text:p>91524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6" table:style-name="ce2">
            <text:p>91524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7" table:style-name="ce2">
            <text:p>91524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8" table:style-name="ce2">
            <text:p>91524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9" table:style-name="ce2">
            <text:p>91524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4" table:style-name="ce2">
            <text:p>91525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5" table:style-name="ce2">
            <text:p>91525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6" table:style-name="ce2">
            <text:p>91525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7" table:style-name="ce2">
            <text:p>915257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58" table:style-name="ce2">
            <text:p>91525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9" table:style-name="ce2">
            <text:p>91525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0" table:style-name="ce2">
            <text:p>91526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1" table:style-name="ce2">
            <text:p>91526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2" table:style-name="ce2">
            <text:p>91526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3" table:style-name="ce2">
            <text:p>91526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4" table:style-name="ce2">
            <text:p>91526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5" table:style-name="ce2">
            <text:p>91526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6" table:style-name="ce2">
            <text:p>91526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7" table:style-name="ce2">
            <text:p>91526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8" table:style-name="ce2">
            <text:p>91526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9" table:style-name="ce2">
            <text:p>91526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0" table:style-name="ce2">
            <text:p>91527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5" table:style-name="ce2">
            <text:p>91527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6" table:style-name="ce2">
            <text:p>91527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77" table:style-name="ce2">
            <text:p>91527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8" table:style-name="ce2">
            <text:p>91527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9" table:style-name="ce2">
            <text:p>91527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0" table:style-name="ce2">
            <text:p>91528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1" table:style-name="ce2">
            <text:p>91528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2" table:style-name="ce2">
            <text:p>91528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3" table:style-name="ce2">
            <text:p>91528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4" table:style-name="ce2">
            <text:p>91528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5" table:style-name="ce2">
            <text:p>91528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6" table:style-name="ce2">
            <text:p>91528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7" table:style-name="ce2">
            <text:p>91528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8" table:style-name="ce2">
            <text:p>91528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9" table:style-name="ce2">
            <text:p>915289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90" table:style-name="ce2">
            <text:p>915290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91" table:style-name="ce2">
            <text:p>91529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2" table:style-name="ce2">
            <text:p>91529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3" table:style-name="ce2">
            <text:p>91529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5" table:style-name="ce2">
            <text:p>91529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6" table:style-name="ce2">
            <text:p>91529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7" table:style-name="ce2">
            <text:p>91529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8" table:style-name="ce2">
            <text:p>91529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9" table:style-name="ce2">
            <text:p>91529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0" table:style-name="ce2">
            <text:p>91530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1" table:style-name="ce2">
            <text:p>91530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2" table:style-name="ce2">
            <text:p>91530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3" table:style-name="ce2">
            <text:p>91530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4" table:style-name="ce2">
            <text:p>91530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5" table:style-name="ce2">
            <text:p>91530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6" table:style-name="ce2">
            <text:p>915306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07" table:style-name="ce2">
            <text:p>91530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8" table:style-name="ce2">
            <text:p>91530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9" table:style-name="ce2">
            <text:p>91530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0" table:style-name="ce2">
            <text:p>91531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1" table:style-name="ce2">
            <text:p>91531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2" table:style-name="ce2">
            <text:p>91531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3" table:style-name="ce2">
            <text:p>91531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4" table:style-name="ce2">
            <text:p>91531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5" table:style-name="ce2">
            <text:p>91531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6" table:style-name="ce2">
            <text:p>91531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7" table:style-name="ce2">
            <text:p>91531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8" table:style-name="ce2">
            <text:p>91531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9" table:style-name="ce2">
            <text:p>91531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0" table:style-name="ce2">
            <text:p>91532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1" table:style-name="ce2">
            <text:p>91532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2" table:style-name="ce2">
            <text:p>91532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3" table:style-name="ce2">
            <text:p>915323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24" table:style-name="ce2">
            <text:p>91532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5" table:style-name="ce2">
            <text:p>91532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6" table:style-name="ce2">
            <text:p>91532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7" table:style-name="ce2">
            <text:p>91532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8" table:style-name="ce2">
            <text:p>91532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9" table:style-name="ce2">
            <text:p>91532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0" table:style-name="ce2">
            <text:p>91533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1" table:style-name="ce2">
            <text:p>91533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2" table:style-name="ce2">
            <text:p>91533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3" table:style-name="ce2">
            <text:p>91533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4" table:style-name="ce2">
            <text:p>91533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5" table:style-name="ce2">
            <text:p>91533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6" table:style-name="ce2">
            <text:p>91533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7" table:style-name="ce2">
            <text:p>91533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8" table:style-name="ce2">
            <text:p>91533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9" table:style-name="ce2">
            <text:p>91533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0" table:style-name="ce2">
            <text:p>91534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1" table:style-name="ce2">
            <text:p>91534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2" table:style-name="ce2">
            <text:p>91534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3" table:style-name="ce2">
            <text:p>915343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44" table:style-name="ce2">
            <text:p>91534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6" table:style-name="ce2">
            <text:p>91534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7" table:style-name="ce2">
            <text:p>91534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8" table:style-name="ce2">
            <text:p>91534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9" table:style-name="ce2">
            <text:p>91534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0" table:style-name="ce2">
            <text:p>91535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1" table:style-name="ce2">
            <text:p>91535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2" table:style-name="ce2">
            <text:p>91535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4" table:style-name="ce2">
            <text:p>91535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5" table:style-name="ce2">
            <text:p>91535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6" table:style-name="ce2">
            <text:p>91535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7" table:style-name="ce2">
            <text:p>91535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8" table:style-name="ce2">
            <text:p>91535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9" table:style-name="ce2">
            <text:p>91535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0" table:style-name="ce2">
            <text:p>91536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1" table:style-name="ce2">
            <text:p>91536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5" table:style-name="ce2">
            <text:p>91536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7" table:style-name="ce2">
            <text:p>915367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68" table:style-name="ce2">
            <text:p>91536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79" table:style-name="ce2">
            <text:p>91537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1" table:style-name="ce2">
            <text:p>91538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83" table:style-name="ce2">
            <text:p>91538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6" table:style-name="ce2">
            <text:p>91538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7" table:style-name="ce2">
            <text:p>91538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89" table:style-name="ce2">
            <text:p>91538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0" table:style-name="ce2">
            <text:p>91539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2" table:style-name="ce2">
            <text:p>91539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3" table:style-name="ce2">
            <text:p>91539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94" table:style-name="ce2">
            <text:p>91539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0" table:style-name="ce2">
            <text:p>91540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1" table:style-name="ce2">
            <text:p>91540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3" table:style-name="ce2">
            <text:p>91540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4" table:style-name="ce2">
            <text:p>91540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5" table:style-name="ce2">
            <text:p>91540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7" table:style-name="ce2">
            <text:p>91540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3" table:style-name="ce2">
            <text:p>91541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4" table:style-name="ce2">
            <text:p>91541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15" table:style-name="ce2">
            <text:p>91541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27" table:style-name="ce2">
            <text:p>91542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28" table:style-name="ce2">
            <text:p>91542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29" table:style-name="ce2">
            <text:p>91542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30" table:style-name="ce2">
            <text:p>91543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31" table:style-name="ce2">
            <text:p>915431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440" table:style-name="ce2">
            <text:p>91544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42" table:style-name="ce2">
            <text:p>91544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78" table:style-name="ce2">
            <text:p>91547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82" table:style-name="ce2">
            <text:p>91548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19" table:style-name="ce2">
            <text:p>91551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66" table:style-name="ce2">
            <text:p>91556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81" table:style-name="ce2">
            <text:p>91558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88" table:style-name="ce2">
            <text:p>91558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89" table:style-name="ce2">
            <text:p>91558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590" table:style-name="ce2">
            <text:p>91559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20" table:style-name="ce2">
            <text:p>91562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34" table:style-name="ce2">
            <text:p>91563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53" table:style-name="ce2">
            <text:p>91565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54" table:style-name="ce2">
            <text:p>91565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55" table:style-name="ce2">
            <text:p>91565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667" table:style-name="ce2">
            <text:p>91566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71" table:style-name="ce2">
            <text:p>91567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87" table:style-name="ce2">
            <text:p>91568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88" table:style-name="ce2">
            <text:p>91568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741" table:style-name="ce2">
            <text:p>91574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41833" table:style-name="ce2">
            <text:p>941833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27" table:style-name="ce2">
            <text:p>106682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28" table:style-name="ce2">
            <text:p>106682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9" table:style-name="ce2">
            <text:p>106682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0" table:style-name="ce2">
            <text:p>106683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1" table:style-name="ce2">
            <text:p>106683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2" table:style-name="ce2">
            <text:p>1066832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33" table:style-name="ce2">
            <text:p>106683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4" table:style-name="ce2">
            <text:p>106683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5" table:style-name="ce2">
            <text:p>106683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36" table:style-name="ce2">
            <text:p>106683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7" table:style-name="ce2">
            <text:p>106683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8" table:style-name="ce2">
            <text:p>106683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9" table:style-name="ce2">
            <text:p>106683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0" table:style-name="ce2">
            <text:p>106684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1" table:style-name="ce2">
            <text:p>106684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2" table:style-name="ce2">
            <text:p>106684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3" table:style-name="ce2">
            <text:p>106684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4" table:style-name="ce2">
            <text:p>106684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5" table:style-name="ce2">
            <text:p>106684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7" table:style-name="ce2">
            <text:p>106684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8" table:style-name="ce2">
            <text:p>106684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9" table:style-name="ce2">
            <text:p>106684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0" table:style-name="ce2">
            <text:p>106685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1" table:style-name="ce2">
            <text:p>106685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2" table:style-name="ce2">
            <text:p>106685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3" table:style-name="ce2">
            <text:p>106685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4" table:style-name="ce2">
            <text:p>1066854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1066855" table:style-name="ce2">
            <text:p>106685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6" table:style-name="ce2">
            <text:p>106685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7" table:style-name="ce2">
            <text:p>106685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8" table:style-name="ce2">
            <text:p>106685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9" table:style-name="ce2">
            <text:p>106685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0" table:style-name="ce2">
            <text:p>106686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1" table:style-name="ce2">
            <text:p>106686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2" table:style-name="ce2">
            <text:p>106686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3" table:style-name="ce2">
            <text:p>106686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4" table:style-name="ce2">
            <text:p>106686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5" table:style-name="ce2">
            <text:p>106686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6" table:style-name="ce2">
            <text:p>106686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7" table:style-name="ce2">
            <text:p>106686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9" table:style-name="ce2">
            <text:p>106686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0" table:style-name="ce2">
            <text:p>106687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1" table:style-name="ce2">
            <text:p>106687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2" table:style-name="ce2">
            <text:p>106687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3" table:style-name="ce2">
            <text:p>106687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4" table:style-name="ce2">
            <text:p>106687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5" table:style-name="ce2">
            <text:p>106687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6" table:style-name="ce2">
            <text:p>106687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7" table:style-name="ce2">
            <text:p>106687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8" table:style-name="ce2">
            <text:p>106687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9" table:style-name="ce2">
            <text:p>1066879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80" table:style-name="ce2">
            <text:p>106688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1" table:style-name="ce2">
            <text:p>106688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2" table:style-name="ce2">
            <text:p>106688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4" table:style-name="ce2">
            <text:p>106688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5" table:style-name="ce2">
            <text:p>106688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6" table:style-name="ce2">
            <text:p>106688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7" table:style-name="ce2">
            <text:p>1066887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88" table:style-name="ce2">
            <text:p>106688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9" table:style-name="ce2">
            <text:p>106688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8" table:style-name="ce2">
            <text:p>106689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9" table:style-name="ce2">
            <text:p>106689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3" table:style-name="ce2">
            <text:p>106690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4" table:style-name="ce2">
            <text:p>106690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5" table:style-name="ce2">
            <text:p>106690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06" table:style-name="ce2">
            <text:p>106690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7" table:style-name="ce2">
            <text:p>106690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8" table:style-name="ce2">
            <text:p>106690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9" table:style-name="ce2">
            <text:p>106690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0" table:style-name="ce2">
            <text:p>106691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1" table:style-name="ce2">
            <text:p>106691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2" table:style-name="ce2">
            <text:p>106691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3" table:style-name="ce2">
            <text:p>106691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4" table:style-name="ce2">
            <text:p>106691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5" table:style-name="ce2">
            <text:p>106691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6" table:style-name="ce2">
            <text:p>106691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7" table:style-name="ce2">
            <text:p>106691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8" table:style-name="ce2">
            <text:p>106691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9" table:style-name="ce2">
            <text:p>106691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0" table:style-name="ce2">
            <text:p>106692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1" table:style-name="ce2">
            <text:p>106692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2" table:style-name="ce2">
            <text:p>106692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3" table:style-name="ce2">
            <text:p>106692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4" table:style-name="ce2">
            <text:p>106692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5" table:style-name="ce2">
            <text:p>106692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6" table:style-name="ce2">
            <text:p>106692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7" table:style-name="ce2">
            <text:p>106692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8" table:style-name="ce2">
            <text:p>1066928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29" table:style-name="ce2">
            <text:p>106692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0" table:style-name="ce2">
            <text:p>106693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1" table:style-name="ce2">
            <text:p>106693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2" table:style-name="ce2">
            <text:p>106693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3" table:style-name="ce2">
            <text:p>106693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4" table:style-name="ce2">
            <text:p>106693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5" table:style-name="ce2">
            <text:p>106693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6" table:style-name="ce2">
            <text:p>106693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7" table:style-name="ce2">
            <text:p>106693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8" table:style-name="ce2">
            <text:p>1066938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9" table:style-name="ce2">
            <text:p>1066939</text:p>
          </table:table-cell>
          <table:table-cell office:value-type="float" office:value="170444" table:style-name="ce2">
            <text:p>170444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office:value-type="float" office:value="1066940" table:style-name="ce2">
            <text:p>106694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1" table:style-name="ce2">
            <text:p>106694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2" table:style-name="ce2">
            <text:p>106694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3" table:style-name="ce2">
            <text:p>106694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4" table:style-name="ce2">
            <text:p>106694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5" table:style-name="ce2">
            <text:p>106694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6" table:style-name="ce2">
            <text:p>106694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7" table:style-name="ce2">
            <text:p>106694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8" table:style-name="ce2">
            <text:p>106694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9" table:style-name="ce2">
            <text:p>1066949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0" table:style-name="ce2">
            <text:p>106695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1" table:style-name="ce2">
            <text:p>106695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2" table:style-name="ce2">
            <text:p>106695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3" table:style-name="ce2">
            <text:p>106695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4" table:style-name="ce2">
            <text:p>106695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5" table:style-name="ce2">
            <text:p>106695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6" table:style-name="ce2">
            <text:p>106695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8" table:style-name="ce2">
            <text:p>1066958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59" table:style-name="ce2">
            <text:p>106695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60" table:style-name="ce2">
            <text:p>106696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1" table:style-name="ce2">
            <text:p>106696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3" table:style-name="ce2">
            <text:p>106696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64" table:style-name="ce2">
            <text:p>1066964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65" table:style-name="ce2">
            <text:p>106696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66" table:style-name="ce2">
            <text:p>1066966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0" table:style-name="ce2">
            <text:p>106697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1" table:style-name="ce2">
            <text:p>106697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2" table:style-name="ce2">
            <text:p>106697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4" table:style-name="ce2">
            <text:p>106697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5" table:style-name="ce2">
            <text:p>106697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6" table:style-name="ce2">
            <text:p>106697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7" table:style-name="ce2">
            <text:p>106697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8" table:style-name="ce2">
            <text:p>1066978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80" table:style-name="ce2">
            <text:p>106698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2" table:style-name="ce2">
            <text:p>106698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7" table:style-name="ce2">
            <text:p>1066987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89" table:style-name="ce2">
            <text:p>106698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0" table:style-name="ce2">
            <text:p>106699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5" table:style-name="ce2">
            <text:p>106699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7" table:style-name="ce2">
            <text:p>106699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8" table:style-name="ce2">
            <text:p>106699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2" table:style-name="ce2">
            <text:p>106700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3" table:style-name="ce2">
            <text:p>106700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4" table:style-name="ce2">
            <text:p>106700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5" table:style-name="ce2">
            <text:p>106700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07" table:style-name="ce2">
            <text:p>106700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8" table:style-name="ce2">
            <text:p>106700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9" table:style-name="ce2">
            <text:p>106700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1" table:style-name="ce2">
            <text:p>106701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2" table:style-name="ce2">
            <text:p>1067012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5" table:style-name="ce2">
            <text:p>106701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6" table:style-name="ce2">
            <text:p>106701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7" table:style-name="ce2">
            <text:p>106701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8" table:style-name="ce2">
            <text:p>1067018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20" table:style-name="ce2">
            <text:p>106702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1" table:style-name="ce2">
            <text:p>106702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2" table:style-name="ce2">
            <text:p>106702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3" table:style-name="ce2">
            <text:p>106702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5" table:style-name="ce2">
            <text:p>106702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7" table:style-name="ce2">
            <text:p>106702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8" table:style-name="ce2">
            <text:p>106702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9" table:style-name="ce2">
            <text:p>106702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1" table:style-name="ce2">
            <text:p>1067031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34" table:style-name="ce2">
            <text:p>106703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5" table:style-name="ce2">
            <text:p>106703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37" table:style-name="ce2">
            <text:p>106703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8" table:style-name="ce2">
            <text:p>106703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42" table:style-name="ce2">
            <text:p>106704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47" table:style-name="ce2">
            <text:p>106704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53" table:style-name="ce2">
            <text:p>106705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1" table:style-name="ce2">
            <text:p>106706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2" table:style-name="ce2">
            <text:p>106706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3" table:style-name="ce2">
            <text:p>1067063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65" table:style-name="ce2">
            <text:p>106706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6" table:style-name="ce2">
            <text:p>106706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7" table:style-name="ce2">
            <text:p>1067067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74" table:style-name="ce2">
            <text:p>106707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81" table:style-name="ce2">
            <text:p>106708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90" table:style-name="ce2">
            <text:p>106709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95" table:style-name="ce2">
            <text:p>106709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0" table:style-name="ce2">
            <text:p>106710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01" table:style-name="ce2">
            <text:p>106710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3" table:style-name="ce2">
            <text:p>106710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5" table:style-name="ce2">
            <text:p>1067105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7" table:style-name="ce2">
            <text:p>1067107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09" table:style-name="ce2">
            <text:p>106710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1" table:style-name="ce2">
            <text:p>106711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13" table:style-name="ce2">
            <text:p>106711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5" table:style-name="ce2">
            <text:p>1067115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16" table:style-name="ce2">
            <text:p>1067116</text:p>
          </table:table-cell>
          <table:table-cell office:value-type="float" office:value="170444" table:style-name="ce2">
            <text:p>170444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1067118" table:style-name="ce2">
            <text:p>106711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9" table:style-name="ce2">
            <text:p>1067119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0" table:style-name="ce2">
            <text:p>1067120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1" table:style-name="ce2">
            <text:p>1067121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3" table:style-name="ce2">
            <text:p>1067123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4" table:style-name="ce2">
            <text:p>1067124</text:p>
          </table:table-cell>
          <table:table-cell office:value-type="float" office:value="170444" table:style-name="ce2">
            <text:p>170444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31" table:style-name="ce2">
            <text:p>106713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4" table:style-name="ce2">
            <text:p>1067134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7" table:style-name="ce2">
            <text:p>1067137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39" table:style-name="ce2">
            <text:p>1067139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0" table:style-name="ce2">
            <text:p>1067140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1" table:style-name="ce2">
            <text:p>1067141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2" table:style-name="ce2">
            <text:p>1067142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3" table:style-name="ce2">
            <text:p>106714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5" table:style-name="ce2">
            <text:p>1067145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8" table:style-name="ce2">
            <text:p>106714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56" table:style-name="ce2">
            <text:p>1067156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58" table:style-name="ce2">
            <text:p>1067158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61" table:style-name="ce2">
            <text:p>1067161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93" table:style-name="ce2">
            <text:p>1067193</text:p>
          </table:table-cell>
          <table:table-cell office:value-type="float" office:value="170444" table:style-name="ce2">
            <text:p>17044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94" table:style-name="ce2">
            <text:p>1067194</text:p>
          </table:table-cell>
          <table:table-cell office:value-type="float" office:value="170444" table:style-name="ce2">
            <text:p>170444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50" table:style-name="ce2">
            <text:p>91465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660" table:style-name="ce2">
            <text:p>91466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67" table:style-name="ce2">
            <text:p>914667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2" table:style-name="ce2">
            <text:p>914672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3" table:style-name="ce2">
            <text:p>91467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4" table:style-name="ce2">
            <text:p>914674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5" table:style-name="ce2">
            <text:p>914675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76" table:style-name="ce2">
            <text:p>91467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7" table:style-name="ce2">
            <text:p>91467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8" table:style-name="ce2">
            <text:p>91467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79" table:style-name="ce2">
            <text:p>914679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86" table:style-name="ce2">
            <text:p>91468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7" table:style-name="ce2">
            <text:p>91468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8" table:style-name="ce2">
            <text:p>91468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89" table:style-name="ce2">
            <text:p>914689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0" table:style-name="ce2">
            <text:p>914690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1" table:style-name="ce2">
            <text:p>91469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2" table:style-name="ce2">
            <text:p>91469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3" table:style-name="ce2">
            <text:p>91469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4" table:style-name="ce2">
            <text:p>914694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695" table:style-name="ce2">
            <text:p>91469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6" table:style-name="ce2">
            <text:p>91469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7" table:style-name="ce2">
            <text:p>91469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698" table:style-name="ce2">
            <text:p>91469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2" table:style-name="ce2">
            <text:p>91470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3" table:style-name="ce2">
            <text:p>91470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04" table:style-name="ce2">
            <text:p>914704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05" table:style-name="ce2">
            <text:p>914705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06" table:style-name="ce2">
            <text:p>91470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3" table:style-name="ce2">
            <text:p>91471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17" table:style-name="ce2">
            <text:p>91471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18" table:style-name="ce2">
            <text:p>91471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722" table:style-name="ce2">
            <text:p>91472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26" table:style-name="ce2">
            <text:p>91472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37" table:style-name="ce2">
            <text:p>914737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46" table:style-name="ce2">
            <text:p>91474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52" table:style-name="ce2">
            <text:p>914752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53" table:style-name="ce2">
            <text:p>91475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62" table:style-name="ce2">
            <text:p>91476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67" table:style-name="ce2">
            <text:p>914767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777" table:style-name="ce2">
            <text:p>91477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87" table:style-name="ce2">
            <text:p>91478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788" table:style-name="ce2">
            <text:p>91478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802" table:style-name="ce2">
            <text:p>91480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4857" table:style-name="ce2">
            <text:p>914857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908" table:style-name="ce2">
            <text:p>91490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4963" table:style-name="ce2">
            <text:p>91496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4967" table:style-name="ce2">
            <text:p>914967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4995" table:style-name="ce2">
            <text:p>91499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4" table:style-name="ce2">
            <text:p>91500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8" table:style-name="ce2">
            <text:p>91500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09" table:style-name="ce2">
            <text:p>915009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10" table:style-name="ce2">
            <text:p>915010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11" table:style-name="ce2">
            <text:p>915011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12" table:style-name="ce2">
            <text:p>915012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13" table:style-name="ce2">
            <text:p>91501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4" table:style-name="ce2">
            <text:p>91501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15" table:style-name="ce2">
            <text:p>915015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16" table:style-name="ce2">
            <text:p>915016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0" table:style-name="ce2">
            <text:p>915020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1" table:style-name="ce2">
            <text:p>91502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2" table:style-name="ce2">
            <text:p>91502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3" table:style-name="ce2">
            <text:p>91502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4" table:style-name="ce2">
            <text:p>915024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5" table:style-name="ce2">
            <text:p>915025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26" table:style-name="ce2">
            <text:p>915026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27" table:style-name="ce2">
            <text:p>915027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28" table:style-name="ce2">
            <text:p>91502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29" table:style-name="ce2">
            <text:p>915029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30" table:style-name="ce2">
            <text:p>915030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31" table:style-name="ce2">
            <text:p>91503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5" table:style-name="ce2">
            <text:p>915035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36" table:style-name="ce2">
            <text:p>91503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37" table:style-name="ce2">
            <text:p>915037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44" table:style-name="ce2">
            <text:p>91504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48" table:style-name="ce2">
            <text:p>915048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49" table:style-name="ce2">
            <text:p>915049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50" table:style-name="ce2">
            <text:p>915050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51" table:style-name="ce2">
            <text:p>91505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7" table:style-name="ce2">
            <text:p>915057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58" table:style-name="ce2">
            <text:p>91505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59" table:style-name="ce2">
            <text:p>91505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0" table:style-name="ce2">
            <text:p>91506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1" table:style-name="ce2">
            <text:p>915061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62" table:style-name="ce2">
            <text:p>91506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69" table:style-name="ce2">
            <text:p>915069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915070" table:style-name="ce2">
            <text:p>91507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2" table:style-name="ce2">
            <text:p>91507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6" table:style-name="ce2">
            <text:p>91507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77" table:style-name="ce2">
            <text:p>91507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6" table:style-name="ce2">
            <text:p>915086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87" table:style-name="ce2">
            <text:p>91508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8" table:style-name="ce2">
            <text:p>91508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89" table:style-name="ce2">
            <text:p>915089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090" table:style-name="ce2">
            <text:p>91509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094" table:style-name="ce2">
            <text:p>91509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2" table:style-name="ce2">
            <text:p>91510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3" table:style-name="ce2">
            <text:p>91510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4" table:style-name="ce2">
            <text:p>91510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08" table:style-name="ce2">
            <text:p>915108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18" table:style-name="ce2">
            <text:p>915118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124" table:style-name="ce2">
            <text:p>91512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0" table:style-name="ce2">
            <text:p>91519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1" table:style-name="ce2">
            <text:p>91519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2" table:style-name="ce2">
            <text:p>91519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3" table:style-name="ce2">
            <text:p>91519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4" table:style-name="ce2">
            <text:p>91519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5" table:style-name="ce2">
            <text:p>91519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6" table:style-name="ce2">
            <text:p>91519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197" table:style-name="ce2">
            <text:p>91519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8" table:style-name="ce2">
            <text:p>91519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199" table:style-name="ce2">
            <text:p>91519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03" table:style-name="ce2">
            <text:p>915203</text:p>
          </table:table-cell>
          <table:table-cell office:value-type="float" office:value="170445" table:style-name="ce2">
            <text:p>170445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213" table:style-name="ce2">
            <text:p>91521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14" table:style-name="ce2">
            <text:p>915214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15" table:style-name="ce2">
            <text:p>91521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16" table:style-name="ce2">
            <text:p>91521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17" table:style-name="ce2">
            <text:p>91521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4" table:style-name="ce2">
            <text:p>91522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5" table:style-name="ce2">
            <text:p>91522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6" table:style-name="ce2">
            <text:p>915226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27" table:style-name="ce2">
            <text:p>91522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28" table:style-name="ce2">
            <text:p>91522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29" table:style-name="ce2">
            <text:p>91522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0" table:style-name="ce2">
            <text:p>91523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1" table:style-name="ce2">
            <text:p>91523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2" table:style-name="ce2">
            <text:p>915232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33" table:style-name="ce2">
            <text:p>91523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4" table:style-name="ce2">
            <text:p>91523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38" table:style-name="ce2">
            <text:p>91523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39" table:style-name="ce2">
            <text:p>91523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0" table:style-name="ce2">
            <text:p>91524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1" table:style-name="ce2">
            <text:p>91524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2" table:style-name="ce2">
            <text:p>91524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3" table:style-name="ce2">
            <text:p>91524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4" table:style-name="ce2">
            <text:p>91524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5" table:style-name="ce2">
            <text:p>91524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6" table:style-name="ce2">
            <text:p>91524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7" table:style-name="ce2">
            <text:p>91524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48" table:style-name="ce2">
            <text:p>91524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49" table:style-name="ce2">
            <text:p>91524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4" table:style-name="ce2">
            <text:p>91525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5" table:style-name="ce2">
            <text:p>915255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56" table:style-name="ce2">
            <text:p>91525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7" table:style-name="ce2">
            <text:p>91525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58" table:style-name="ce2">
            <text:p>91525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59" table:style-name="ce2">
            <text:p>91525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0" table:style-name="ce2">
            <text:p>91526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1" table:style-name="ce2">
            <text:p>91526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2" table:style-name="ce2">
            <text:p>91526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3" table:style-name="ce2">
            <text:p>91526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4" table:style-name="ce2">
            <text:p>91526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5" table:style-name="ce2">
            <text:p>91526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6" table:style-name="ce2">
            <text:p>91526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67" table:style-name="ce2">
            <text:p>91526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8" table:style-name="ce2">
            <text:p>91526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69" table:style-name="ce2">
            <text:p>91526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0" table:style-name="ce2">
            <text:p>91527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5" table:style-name="ce2">
            <text:p>91527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6" table:style-name="ce2">
            <text:p>91527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7" table:style-name="ce2">
            <text:p>91527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8" table:style-name="ce2">
            <text:p>91527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79" table:style-name="ce2">
            <text:p>915279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80" table:style-name="ce2">
            <text:p>91528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1" table:style-name="ce2">
            <text:p>91528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2" table:style-name="ce2">
            <text:p>91528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3" table:style-name="ce2">
            <text:p>91528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4" table:style-name="ce2">
            <text:p>91528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5" table:style-name="ce2">
            <text:p>91528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6" table:style-name="ce2">
            <text:p>91528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7" table:style-name="ce2">
            <text:p>91528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88" table:style-name="ce2">
            <text:p>91528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89" table:style-name="ce2">
            <text:p>91528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0" table:style-name="ce2">
            <text:p>91529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1" table:style-name="ce2">
            <text:p>91529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2" table:style-name="ce2">
            <text:p>91529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3" table:style-name="ce2">
            <text:p>91529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5" table:style-name="ce2">
            <text:p>91529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296" table:style-name="ce2">
            <text:p>91529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7" table:style-name="ce2">
            <text:p>91529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298" table:style-name="ce2">
            <text:p>915298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299" table:style-name="ce2">
            <text:p>91529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0" table:style-name="ce2">
            <text:p>91530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1" table:style-name="ce2">
            <text:p>91530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2" table:style-name="ce2">
            <text:p>91530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3" table:style-name="ce2">
            <text:p>91530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4" table:style-name="ce2">
            <text:p>91530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5" table:style-name="ce2">
            <text:p>91530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06" table:style-name="ce2">
            <text:p>915306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07" table:style-name="ce2">
            <text:p>91530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8" table:style-name="ce2">
            <text:p>91530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09" table:style-name="ce2">
            <text:p>91530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0" table:style-name="ce2">
            <text:p>91531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1" table:style-name="ce2">
            <text:p>91531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2" table:style-name="ce2">
            <text:p>91531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13" table:style-name="ce2">
            <text:p>91531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4" table:style-name="ce2">
            <text:p>91531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5" table:style-name="ce2">
            <text:p>91531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6" table:style-name="ce2">
            <text:p>91531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7" table:style-name="ce2">
            <text:p>91531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8" table:style-name="ce2">
            <text:p>91531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19" table:style-name="ce2">
            <text:p>91531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0" table:style-name="ce2">
            <text:p>91532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1" table:style-name="ce2">
            <text:p>91532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2" table:style-name="ce2">
            <text:p>91532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3" table:style-name="ce2">
            <text:p>91532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24" table:style-name="ce2">
            <text:p>91532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5" table:style-name="ce2">
            <text:p>91532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6" table:style-name="ce2">
            <text:p>91532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7" table:style-name="ce2">
            <text:p>91532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28" table:style-name="ce2">
            <text:p>91532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29" table:style-name="ce2">
            <text:p>91532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0" table:style-name="ce2">
            <text:p>91533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1" table:style-name="ce2">
            <text:p>91533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2" table:style-name="ce2">
            <text:p>915332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33" table:style-name="ce2">
            <text:p>91533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4" table:style-name="ce2">
            <text:p>91533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5" table:style-name="ce2">
            <text:p>91533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36" table:style-name="ce2">
            <text:p>91533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7" table:style-name="ce2">
            <text:p>91533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8" table:style-name="ce2">
            <text:p>91533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39" table:style-name="ce2">
            <text:p>91533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0" table:style-name="ce2">
            <text:p>91534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1" table:style-name="ce2">
            <text:p>91534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2" table:style-name="ce2">
            <text:p>91534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3" table:style-name="ce2">
            <text:p>91534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4" table:style-name="ce2">
            <text:p>91534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6" table:style-name="ce2">
            <text:p>91534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7" table:style-name="ce2">
            <text:p>91534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48" table:style-name="ce2">
            <text:p>91534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49" table:style-name="ce2">
            <text:p>91534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0" table:style-name="ce2">
            <text:p>91535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1" table:style-name="ce2">
            <text:p>91535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2" table:style-name="ce2">
            <text:p>91535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4" table:style-name="ce2">
            <text:p>91535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5" table:style-name="ce2">
            <text:p>91535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6" table:style-name="ce2">
            <text:p>91535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7" table:style-name="ce2">
            <text:p>91535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58" table:style-name="ce2">
            <text:p>91535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59" table:style-name="ce2">
            <text:p>91535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0" table:style-name="ce2">
            <text:p>91536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1" table:style-name="ce2">
            <text:p>91536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65" table:style-name="ce2">
            <text:p>91536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67" table:style-name="ce2">
            <text:p>915367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368" table:style-name="ce2">
            <text:p>91536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79" table:style-name="ce2">
            <text:p>91537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1" table:style-name="ce2">
            <text:p>91538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83" table:style-name="ce2">
            <text:p>91538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6" table:style-name="ce2">
            <text:p>91538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387" table:style-name="ce2">
            <text:p>91538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89" table:style-name="ce2">
            <text:p>91538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0" table:style-name="ce2">
            <text:p>91539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2" table:style-name="ce2">
            <text:p>91539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3" table:style-name="ce2">
            <text:p>91539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394" table:style-name="ce2">
            <text:p>91539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0" table:style-name="ce2">
            <text:p>915400</text:p>
          </table:table-cell>
          <table:table-cell office:value-type="float" office:value="170445" table:style-name="ce2">
            <text:p>170445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401" table:style-name="ce2">
            <text:p>91540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3" table:style-name="ce2">
            <text:p>91540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4" table:style-name="ce2">
            <text:p>91540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5" table:style-name="ce2">
            <text:p>91540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07" table:style-name="ce2">
            <text:p>91540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3" table:style-name="ce2">
            <text:p>91541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14" table:style-name="ce2">
            <text:p>91541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15" table:style-name="ce2">
            <text:p>91541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27" table:style-name="ce2">
            <text:p>91542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28" table:style-name="ce2">
            <text:p>91542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29" table:style-name="ce2">
            <text:p>91542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30" table:style-name="ce2">
            <text:p>91543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31" table:style-name="ce2">
            <text:p>91543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40" table:style-name="ce2">
            <text:p>91544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442" table:style-name="ce2">
            <text:p>91544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78" table:style-name="ce2">
            <text:p>91547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482" table:style-name="ce2">
            <text:p>91548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19" table:style-name="ce2">
            <text:p>91551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66" table:style-name="ce2">
            <text:p>91556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81" table:style-name="ce2">
            <text:p>915581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588" table:style-name="ce2">
            <text:p>91558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589" table:style-name="ce2">
            <text:p>91558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590" table:style-name="ce2">
            <text:p>91559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20" table:style-name="ce2">
            <text:p>91562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34" table:style-name="ce2">
            <text:p>91563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15653" table:style-name="ce2">
            <text:p>91565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54" table:style-name="ce2">
            <text:p>91565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55" table:style-name="ce2">
            <text:p>915655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915667" table:style-name="ce2">
            <text:p>91566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71" table:style-name="ce2">
            <text:p>91567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87" table:style-name="ce2">
            <text:p>91568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915688" table:style-name="ce2">
            <text:p>915688</text:p>
          </table:table-cell>
          <table:table-cell office:value-type="float" office:value="170445" table:style-name="ce2">
            <text:p>170445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5741" table:style-name="ce2">
            <text:p>91574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941833" table:style-name="ce2">
            <text:p>94183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27" table:style-name="ce2">
            <text:p>106682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8" table:style-name="ce2">
            <text:p>106682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29" table:style-name="ce2">
            <text:p>106682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0" table:style-name="ce2">
            <text:p>106683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1" table:style-name="ce2">
            <text:p>106683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2" table:style-name="ce2">
            <text:p>106683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3" table:style-name="ce2">
            <text:p>106683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4" table:style-name="ce2">
            <text:p>106683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5" table:style-name="ce2">
            <text:p>106683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6" table:style-name="ce2">
            <text:p>106683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7" table:style-name="ce2">
            <text:p>106683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38" table:style-name="ce2">
            <text:p>106683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39" table:style-name="ce2">
            <text:p>106683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0" table:style-name="ce2">
            <text:p>106684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1" table:style-name="ce2">
            <text:p>106684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2" table:style-name="ce2">
            <text:p>106684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3" table:style-name="ce2">
            <text:p>106684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4" table:style-name="ce2">
            <text:p>106684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5" table:style-name="ce2">
            <text:p>106684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7" table:style-name="ce2">
            <text:p>106684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48" table:style-name="ce2">
            <text:p>106684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49" table:style-name="ce2">
            <text:p>106684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0" table:style-name="ce2">
            <text:p>106685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1" table:style-name="ce2">
            <text:p>106685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2" table:style-name="ce2">
            <text:p>106685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3" table:style-name="ce2">
            <text:p>106685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4" table:style-name="ce2">
            <text:p>1066854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1066855" table:style-name="ce2">
            <text:p>106685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6" table:style-name="ce2">
            <text:p>106685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7" table:style-name="ce2">
            <text:p>106685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58" table:style-name="ce2">
            <text:p>106685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59" table:style-name="ce2">
            <text:p>106685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0" table:style-name="ce2">
            <text:p>106686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1" table:style-name="ce2">
            <text:p>106686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2" table:style-name="ce2">
            <text:p>106686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3" table:style-name="ce2">
            <text:p>106686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4" table:style-name="ce2">
            <text:p>106686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65" table:style-name="ce2">
            <text:p>106686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6" table:style-name="ce2">
            <text:p>106686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7" table:style-name="ce2">
            <text:p>106686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69" table:style-name="ce2">
            <text:p>106686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0" table:style-name="ce2">
            <text:p>106687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1" table:style-name="ce2">
            <text:p>106687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2" table:style-name="ce2">
            <text:p>106687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3" table:style-name="ce2">
            <text:p>106687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4" table:style-name="ce2">
            <text:p>106687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5" table:style-name="ce2">
            <text:p>106687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76" table:style-name="ce2">
            <text:p>1066876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77" table:style-name="ce2">
            <text:p>106687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8" table:style-name="ce2">
            <text:p>106687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79" table:style-name="ce2">
            <text:p>106687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0" table:style-name="ce2">
            <text:p>106688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1" table:style-name="ce2">
            <text:p>1066881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882" table:style-name="ce2">
            <text:p>106688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4" table:style-name="ce2">
            <text:p>106688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5" table:style-name="ce2">
            <text:p>106688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6" table:style-name="ce2">
            <text:p>106688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7" table:style-name="ce2">
            <text:p>106688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88" table:style-name="ce2">
            <text:p>106688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89" table:style-name="ce2">
            <text:p>106688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898" table:style-name="ce2">
            <text:p>106689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899" table:style-name="ce2">
            <text:p>106689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3" table:style-name="ce2">
            <text:p>106690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4" table:style-name="ce2">
            <text:p>106690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5" table:style-name="ce2">
            <text:p>106690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06" table:style-name="ce2">
            <text:p>106690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7" table:style-name="ce2">
            <text:p>106690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08" table:style-name="ce2">
            <text:p>1066908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09" table:style-name="ce2">
            <text:p>106690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0" table:style-name="ce2">
            <text:p>106691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1" table:style-name="ce2">
            <text:p>106691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2" table:style-name="ce2">
            <text:p>106691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3" table:style-name="ce2">
            <text:p>106691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4" table:style-name="ce2">
            <text:p>106691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5" table:style-name="ce2">
            <text:p>106691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6" table:style-name="ce2">
            <text:p>106691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7" table:style-name="ce2">
            <text:p>106691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18" table:style-name="ce2">
            <text:p>106691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19" table:style-name="ce2">
            <text:p>106691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0" table:style-name="ce2">
            <text:p>106692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1" table:style-name="ce2">
            <text:p>106692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2" table:style-name="ce2">
            <text:p>106692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3" table:style-name="ce2">
            <text:p>106692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24" table:style-name="ce2">
            <text:p>106692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25" table:style-name="ce2">
            <text:p>106692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6" table:style-name="ce2">
            <text:p>106692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7" table:style-name="ce2">
            <text:p>106692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28" table:style-name="ce2">
            <text:p>1066928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29" table:style-name="ce2">
            <text:p>106692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0" table:style-name="ce2">
            <text:p>106693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1" table:style-name="ce2">
            <text:p>106693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2" table:style-name="ce2">
            <text:p>106693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3" table:style-name="ce2">
            <text:p>106693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4" table:style-name="ce2">
            <text:p>106693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5" table:style-name="ce2">
            <text:p>106693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6" table:style-name="ce2">
            <text:p>106693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7" table:style-name="ce2">
            <text:p>106693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38" table:style-name="ce2">
            <text:p>1066938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39" table:style-name="ce2">
            <text:p>1066939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1066940" table:style-name="ce2">
            <text:p>106694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1" table:style-name="ce2">
            <text:p>106694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2" table:style-name="ce2">
            <text:p>106694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3" table:style-name="ce2">
            <text:p>106694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4" table:style-name="ce2">
            <text:p>106694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5" table:style-name="ce2">
            <text:p>106694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6" table:style-name="ce2">
            <text:p>106694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7" table:style-name="ce2">
            <text:p>106694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48" table:style-name="ce2">
            <text:p>106694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49" table:style-name="ce2">
            <text:p>106694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0" table:style-name="ce2">
            <text:p>106695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1" table:style-name="ce2">
            <text:p>106695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2" table:style-name="ce2">
            <text:p>106695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3" table:style-name="ce2">
            <text:p>106695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4" table:style-name="ce2">
            <text:p>106695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5" table:style-name="ce2">
            <text:p>106695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6" table:style-name="ce2">
            <text:p>106695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58" table:style-name="ce2">
            <text:p>106695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59" table:style-name="ce2">
            <text:p>1066959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60" table:style-name="ce2">
            <text:p>106696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1" table:style-name="ce2">
            <text:p>106696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3" table:style-name="ce2">
            <text:p>106696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64" table:style-name="ce2">
            <text:p>1066964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65" table:style-name="ce2">
            <text:p>106696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66" table:style-name="ce2">
            <text:p>106696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0" table:style-name="ce2">
            <text:p>106697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1" table:style-name="ce2">
            <text:p>106697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2" table:style-name="ce2">
            <text:p>106697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4" table:style-name="ce2">
            <text:p>106697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5" table:style-name="ce2">
            <text:p>106697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76" table:style-name="ce2">
            <text:p>106697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7" table:style-name="ce2">
            <text:p>106697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78" table:style-name="ce2">
            <text:p>1066978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80" table:style-name="ce2">
            <text:p>106698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2" table:style-name="ce2">
            <text:p>106698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87" table:style-name="ce2">
            <text:p>1066987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89" table:style-name="ce2">
            <text:p>106698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0" table:style-name="ce2">
            <text:p>1066990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6995" table:style-name="ce2">
            <text:p>106699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6997" table:style-name="ce2">
            <text:p>106699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6998" table:style-name="ce2">
            <text:p>106699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2" table:style-name="ce2">
            <text:p>106700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3" table:style-name="ce2">
            <text:p>106700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04" table:style-name="ce2">
            <text:p>106700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5" table:style-name="ce2">
            <text:p>1067005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07" table:style-name="ce2">
            <text:p>106700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8" table:style-name="ce2">
            <text:p>106700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09" table:style-name="ce2">
            <text:p>106700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1" table:style-name="ce2">
            <text:p>1067011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12" table:style-name="ce2">
            <text:p>1067012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5" table:style-name="ce2">
            <text:p>106701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6" table:style-name="ce2">
            <text:p>106701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17" table:style-name="ce2">
            <text:p>106701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18" table:style-name="ce2">
            <text:p>1067018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20" table:style-name="ce2">
            <text:p>106702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1" table:style-name="ce2">
            <text:p>106702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2" table:style-name="ce2">
            <text:p>106702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3" table:style-name="ce2">
            <text:p>106702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5" table:style-name="ce2">
            <text:p>106702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7" table:style-name="ce2">
            <text:p>1067027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28" table:style-name="ce2">
            <text:p>106702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29" table:style-name="ce2">
            <text:p>106702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1" table:style-name="ce2">
            <text:p>1067031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34" table:style-name="ce2">
            <text:p>1067034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35" table:style-name="ce2">
            <text:p>106703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37" table:style-name="ce2">
            <text:p>106703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38" table:style-name="ce2">
            <text:p>106703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42" table:style-name="ce2">
            <text:p>106704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47" table:style-name="ce2">
            <text:p>106704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53" table:style-name="ce2">
            <text:p>106705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061" table:style-name="ce2">
            <text:p>106706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2" table:style-name="ce2">
            <text:p>106706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3" table:style-name="ce2">
            <text:p>106706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5" table:style-name="ce2">
            <text:p>1067065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6" table:style-name="ce2">
            <text:p>1067066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67" table:style-name="ce2">
            <text:p>106706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74" table:style-name="ce2">
            <text:p>106707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81" table:style-name="ce2">
            <text:p>106708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090" table:style-name="ce2">
            <text:p>106709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095" table:style-name="ce2">
            <text:p>106709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00" table:style-name="ce2">
            <text:p>1067100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01" table:style-name="ce2">
            <text:p>106710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03" table:style-name="ce2">
            <text:p>106710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05" table:style-name="ce2">
            <text:p>1067105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07" table:style-name="ce2">
            <text:p>1067107</text:p>
          </table:table-cell>
          <table:table-cell office:value-type="float" office:value="170445" table:style-name="ce2">
            <text:p>170445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1">
          <table:table-cell office:value-type="float" office:value="1067109" table:style-name="ce2">
            <text:p>106710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1" table:style-name="ce2">
            <text:p>106711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3" table:style-name="ce2">
            <text:p>106711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5" table:style-name="ce2">
            <text:p>1067115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16" table:style-name="ce2">
            <text:p>106711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18" table:style-name="ce2">
            <text:p>106711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19" table:style-name="ce2">
            <text:p>1067119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0" table:style-name="ce2">
            <text:p>106712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21" table:style-name="ce2">
            <text:p>1067121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3" table:style-name="ce2">
            <text:p>1067123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24" table:style-name="ce2">
            <text:p>1067124</text:p>
          </table:table-cell>
          <table:table-cell office:value-type="float" office:value="170445" table:style-name="ce2">
            <text:p>170445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067131" table:style-name="ce2">
            <text:p>106713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4" table:style-name="ce2">
            <text:p>1067134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7" table:style-name="ce2">
            <text:p>1067137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39" table:style-name="ce2">
            <text:p>1067139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0" table:style-name="ce2">
            <text:p>1067140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1" table:style-name="ce2">
            <text:p>1067141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2" table:style-name="ce2">
            <text:p>1067142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43" table:style-name="ce2">
            <text:p>1067143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5" table:style-name="ce2">
            <text:p>1067145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48" table:style-name="ce2">
            <text:p>106714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56" table:style-name="ce2">
            <text:p>1067156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1067158" table:style-name="ce2">
            <text:p>1067158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61" table:style-name="ce2">
            <text:p>1067161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93" table:style-name="ce2">
            <text:p>1067193</text:p>
          </table:table-cell>
          <table:table-cell office:value-type="float" office:value="170445" table:style-name="ce2">
            <text:p>170445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067194" table:style-name="ce2">
            <text:p>1067194</text:p>
          </table:table-cell>
          <table:table-cell office:value-type="float" office:value="170445" table:style-name="ce2">
            <text:p>17044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number-rows-repeated="1046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phpMyAdmin 5.2.1</meta:initial-creator>
    <dc:creator>Данила Силищев</dc:creator>
    <meta:creation-date>2026-04-21T11:05:02Z</meta:creation-date>
    <dc:date>2026-04-21T12:35:03Z</dc:date>
  </office:meta>
</office:document-meta>
</file>