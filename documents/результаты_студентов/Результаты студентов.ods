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Вопросы_и_результаты"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Код работы</text:p>
          </table:table-cell>
          <table:table-cell office:value-type="string" table:style-name="ce1">
            <text:p>Язык</text:p>
          </table:table-cell>
          <table:table-cell office:value-type="string" table:style-name="ce1">
            <text:p>Вопрос</text:p>
          </table:table-cell>
          <table:table-cell office:value-type="string" table:style-name="ce1">
            <text:p>Ответ в BASE64</text:p>
          </table:table-cell>
          <table:table-cell office:value-type="string" table:style-name="ce1">
            <text:p>ID проверяющего преподавателя</text:p>
          </table:table-cell>
          <table:table-cell office:value-type="string" table:style-name="ce1">
            <text:p>Итоговая оценка</text:p>
          </table:table-cell>
          <table:table-cell office:value-type="string" table:style-name="ce1">
            <text:p>Комментарий преподавателя к оценке</text:p>
          </table:table-cell>
          <table:table-cell office:value-type="string" table:style-name="ce1">
            <text:p>Штраф за плагиат</text:p>
          </table:table-cell>
          <table:table-cell table:number-columns-repeated="16376"/>
        </table:table-row>
        <table:table-row table:style-name="ro1">
          <table:table-cell office:value-type="float" office:value="915306" table:style-name="ce1">
            <text:p>915306</text:p>
          </table:table-cell>
          <table:table-cell office:value-type="string" table:style-name="ce1">
            <text:p>kazakh</text:p>
          </table:table-cell>
          <table:table-cell office:value-type="string" table:style-name="ce1">
            <text:p>Билет 1&amp;lt;br /&amp;gt; 1. Жетіліп туылған нәрестелердің физиологиялық салмақ жоғалтуы немен сипаттаналады және неше пайыз қүрайды, салмақ жоғалту немен байланысты?&amp;lt;br /&amp;gt; 2. Екі жасар баланың бауырының 2 см ұлғаюы анықталған. 3 жасқа дейінгі балалардың бауырын пальпациялағанда анатомиялық шекарасын атаңыз?&amp;lt;br /&amp;gt;</text:p>
          </table:table-cell>
          <table:table-cell office:value-type="string" table:style-name="ce1">
            <text:p>MSkg0KLQvtC70YvQuiDQttCw0L3QsCDRgtGD0YvQu9Cz0LDQvSDQvdCw0YDQtdGB0YLQtdC70LXRgNC00LXQs9GWINGB0LDQu9C80LDSm9GC0YvSoyDRhNC40LfQuNC+0LvQvtCz0LjRj9C70YvSmyDQttC+0pPQsNC70YPRiyDTmdC00LXRgtGC0LUg0LbSr9C60YLRltC70ZbQuiDQutC10LfRltC90LTQtSDQttC40L3QsNC70LPQsNC9INCw0YDRgtGL0Log0YHRg9C50YvQutGC0YvQutGC0YvQvSDQttC+0LPQsNC70YPRi9C90LAg0LHQsNC50LvQsNC90YvRgdGC0Yss0JHRg9C7INGB0LDQu9C80LDQuiDQttC+0LPQsNC70YLRgyDTmdC00LXRgtGC0LUg0LbQsNC90LAg0YLRg9Cz0LDQvSDQvdCw0YDQtdGB0YLQtSDRgdCw0LvQvNCw0LPRi9C90YvSoyDRiNCw0LzQsNC80LXQvSA1LTEwINC/0LDQudGL0LfRi9C9INC60YPRgNCw0LnQtNGLINC20LDQvdC1INGC0YPQs9Cw0L3QvdCw0L0g0LrQtdC50ZbQvdCz0ZYg0LDQu9KT0LDRiNC60Ysg0LHRltGA0L3QtdGI0LUg0LrRg9C90LTQtSDQsdC+0LvQsNC00Ysg0JHRg9C7INGB0LDQu9C80LDQuiDQttC+0LPQsNC70YLRgyDRg9Cw0LrRi9GC0YjQsCDQttCw0L3QtSDQutCw0LvRi9C/0YLRiyDQtdC60LXQvdGW0L0g0LDRgtCw0L8g0L7RgtC60LXQvSDQttOp0L0g0JTQtdC90ZYg0YHQsNGDINC20LDSo9CwINGC0YPQs9Cw0L0g0L3QsNGA0LXRgdGC0LUg0YLRg9GL0LvQs9Cw0L3QtNCw0LPRiyDRgdCw0LvQvNCw0LPRi9C90YvQvdKjNy0xMCDQv9Cw0LnRi9C30LPQsCDQtNC10LnRltC9INC20L7Qs9Cw0LvRgtCw0LTRiyDQsdGW0YDQsNKbINCx0YPQuyDRgdCw0LvQvNCw0psg0YLRg9GL0LvQs9Cw0L3QvdCw0L0g0LrQtdC50ZbQvSDQsNC70LPQsNGI0LrRiyAyINCw0L/RgtCw0LTQsCDQvdC10LzQtdGB0LUg0L7QtNCw0L0g0LTQsCDQutC+0L8g0YPQsNC60YvRgiDRltGI0ZbQvdC00LUg0pvQsNC70L/Ri9C90LAg0LrQtdC70YPRliDQutC10YDQtdC6INCw0LvQs9Cw0YjQutGLINCw0LnQtNCwINC20LDQvdCwINGC0YPQs9Cw0L0g0L3QsNGA0LXRgdGC0LXQu9C10YDQtNGW0qMg0LrTqdC/0YjRltC70ZbQs9GWINC60YPQvdGW0L3QtSDRiNCw0LzQsNC80LXQvSAzMCDQs9GA0LDQvCDRgdCw0LvQvNCw0psg0pvQvtGB0LDQtNGLINCU0LXQvdGWINGB0LDRgyDQttCw0L3QsCDRgtGD0LPQsNC9INC90LDRgNC10YHRgtC10LvQtdGAINOp0LzRltGA0ZbQvdGW0qMg0LDQu9Cz0LDRiNC60Ysg0LrRg9C90LTQtdGA0ZbQvdC00LUg0YHQsNC70LzQsNC6INC20L7Qs9Cw0LvRgtCw0LTRiyDQkdGD0Lsg0YTQuNC30LjQvtC70L7Qs9C40Y/Qu9GL0Log0YHQsNC70LzQsNC6INC20L7Qs9Cw0LvRgtGDINC90LXQs9GW0LfRltC90LXQvSDQvtC70LDRgNC00YvSoyDRgdGD0YLRgtGWINCw0YPRi9C30YjQsCDQutCw0LHRi9C70LTQsNGD0Ysg05nQu9GWINC00LUg0LDQtyDQsdC+0LvQs9Cw0L0g0YPQsNC60YvRgiDQutC10LfQtdKj0ZbQvdC00LUg0YHRg9C50YvQutGC0YvQutGC0YvSoyDSm9Cw0LnRgtCwINCx06nQu9GW0L3Rg9GW0L3QtdC9INC20LDQvdC1INC20L7Sk9Cw0LvRg9GL0L3QsNC9INC20LDQvdC1INGB0YPQtNGL0qMg0YHQtdC30ZbQu9C80LXQudGC0ZbQvSDQttC+0LPQsNC70YPRi9C90LDQvSDRgtGD0YvQvdC00LDQudC00Ys8YnIgLz4NCjIpMyDQttCw0YHSm9CwINC00LXQudGW0L3Qs9GWINCx0LDQu9Cw0LvQsNGA0LTQsCAgINCx0LDRg9GL0YDQtNGL0qMg0YLQvtC80LXQvdCz0ZYg0LbQuNC10LPRltC9INC+0qMg0LbQsNC6INC60LDQsdGL0YDQs9CwINC20LjQtdCz0ZYg0LzQtdC9INC60ZbQvdC00ZbQuiDQsNGA0LDRgdGL0L3QtNCwINC/0LDQu9GM0L/QsNGG0LjRj9C70LDRg9Cz0LAg0LHQvtC70LDQtNGLINCU0LXQs9C10L3QvNC10L0gLNC/0LDQu9GM0L/QsNGG0LjRj9C90YvSoyDQvdCw0LrRgtGLINCw0L3QsNGC0L7QvNC40Y/Qu9GL0Log0YjQtdC60LDRgNCw0LvQsNGA0Ysg0LHQsNC70LDQvdGL0qMg0LbQsNGB0YvQvdCwINC00LXQvdC1INCx0ZbRgtGW0LzRltC90LUg0LbQsNC90LUg0LHQsNGD0YvRgCDQvNC+0LvRiNC10YDRltC90LUg0LHQsNC50LvQsNC90YvRgdGC0Ysg06nQt9Cz0LXRgNGD0ZYg0LzSr9C80LrRltC9LtCW0LDQu9C/0Ysg0LbQsNGBINCx0LDQu9Cw0LvQsNGA0LTQsCDQsdCw0YPRi9GAINC+0L0g0LbQsNC6INC60LDQsdGL0YDQs9CwINGI0LXRgtGW0L3QtdC9INGB05nQuyDRgtOp0LzQtdC9INC/0LDQu9GM0L/QsNGG0LjRj9C70LDQvdGD0Ysg0LrQtdGA0LXQuiDQsNC7INC+0L3Ri9KjINGC0L7QvNC10L3Qs9GWINGI0LXRgtGWINC60LXQudCx0ZbRgCDQttCw0LPQtNCw0LnQu9Cw0YDQtNCwINKb0LDQsdGL0YDQs9CwINGI0LXRgtGW0L3QtdC9IDItMyDRgdC8INCz0LUg0LTQtdC50ZbQsyDRgdC+0LfRi9C70YPRiyDQvNKv0LzQutGW0L0g0JHQsNGD0YvRgNC00Ysg0L/QsNC70YzQv9Cw0YbQuNGP0LvQsNGDINCx0LDQu9Cw0LPQsCDQutCw0L3QtNCw0Lkg0LTQsCDQsdGW0YAg0YvQvdCz0LDQudGB0YvQt9C00YvQutGC0Ysg0L3QtdC80LXRgdC1INC30LDSm9GL0LwgINC60LXQu9GC0ZbRgNC80LXRgyDSr9GI0ZbQvSDQvNGD0LrQuNGP0YIg0LbQsNC90LUg0LDQutGL0YDRi9C9INC20LDRgdCw0LvRg9GLINC60LXRgNC10Log0LXQutC10L3RltC9INC10YHQutC10YDRgyDQvNCw0qPRi9C30LTRiy7QltCw0L3QsCDRgtGD0LPQsNC9INC905nRgNC10YHRgtC10L3RltKjINCx0LDRg9GL0YDRi9C9INC/0LDQu9GM0L/QsNGG0LjRj9C70LDRgyDTmdC00LXRgtGC0LUg0L7RgNGC0LDQvdCz0Ysg0LHRg9Cz0LDQvdCwINC20LDQvdC1INCw0LvQtNGL0L3Qs9GLINKb0L7Qu9GC0YvSmyDQsNGB0YLRiyDRgdGL0LfRi9Cz0Ysg0LTQtdC90LPQtdC50ZbQvdC00LUg0YHRi9GA0LPRi9C80LDQu9GLINC/0LDQu9Cx0L/QsNGG0LjRjyDQsNGA0LrRi9C70Ysg0LbRg9C30LXQs9C1INCw0YHRi9GA0YvQu9Cw0LTRiy7QkdGD0Lsg0LbQsNCz0LTQsNC50LTQsNGC0LXQutGB0LXRgNGW0L8g0LbQsNGC0LrQsNC9INC/0LXQtNC40LDRgtGA0LTRi9KjINKb0L7Qu9GLINCx0LDRg9GL0YDQtNGL0L0g0YjQtdGC0ZbQvdC10L0g0YHRi9GA0LPRi9C/INC60LXRgtC10LTRliAs0LHRg9C7INC+0YDQs9Cw0L3QvdGL0qMg0LzTqdC70YjQtdGA0ZbQvSDQsNC90YvSm9GC0LDRg9Cz0LAg0LPQsNC90LAg0LXQvNC10YEg0L7QvdGL0qMg0YjQtdGC0ZbQvSDQv9Cw0LvRjNC/0LDRhtC40Y/Qu9Cw0YPQs9CwINC00LAg0LzRg9C80LrRltC90LTRltC6INCx0LXRgNC10LTRliAu0JbQsNC90LAg0YLRg9GL0LvQs9Cw0L0g0L3QsNGA0LXRgdGC0LXQu9C10YAg0YPRiNGW0L0g0L3QvtGA0LzQsCAt0LHQsNGD0YvRgCDRiNC10YLRltC90ZbSoyDSm9Cw0LHRi9GA0LPQsCDQtNC+0pPQsNGB0YvQvdGL0qMg0LDRgdGC0YvQvdCw0L0g0LXQutGWINGB0LDQvdGC0LjQvNC10YLRgNCz0LUg0YjRi9Cz0YPRiyAu0JHQsNKT0LDQu9Cw0YMg0L7RgNGC0LDQvdCz0Ysg0LHRg9Cz0LDQvdCwINGB0YvQt9GL0pPRiyDQsdC+0LnRi9C90YjQsCDQttGD0YDQs9C30ZbQu9C10LTRliAu0J7RgNCz0LDQvdC90YvSoyDRiNC10YLRliDQsNGD0YvRgNGC0L/QsNC70YvQutGB0YvQtyDRgtC10LPRltGBLNOp0YLQutGW0YAg0LbQsNC90LUg0LbSsdC80YHQsNKbLdGB0LXRgNC/0ZbQvNC00ZYg0LHQvtC70YPRiyDQutC10YDQtdC6INCW0LXRgtGWINC20LDRgdC60LAg0LTQtdC50ZbQvdCz0ZYg0YHQsNGDINCx0LDQu9Cw0LvQsNGA0LTQsCDQsdCw0YPRi9GA0LTRi9KjINGI0LXRgtGWINOZ0LTQtdGC0YLQtSDQvtKjINC20LDSmyDSm9Cw0LHRi9GA0LPQsCDQtNC+0pPQsNGB0YvQvdGL0qMg0LDRgdGC0YvQvdCw0L0g0YjRi9Cz0YvQvyDRgtGD0YDQsNC00Ysg0LbQsNC90LUg0L/QsNC70YzQv9Cw0YbQuNGP0LPQsCDQutC+0Lsg0LbQtdGC0ZbQvNC00ZYgLtKu0Ygg0LbQsNGB0LrQsCDRgtC+0LvQvNCw0LPQsNC9INGB0LDRgyDQsdCw0LvQsNC70LDRgCDSr9GI0ZbQvSDQvdC+0YDQvNCwLdCx0LDRg9GL0YDQtNGL0qMg0YjQtdGC0ZbQvSDQvtKjINC20LDSmyDQs9C40L/QvtGF0L7QvdC00YDQuNGP0LTQsNC9IDIg0L3QtdC80LXRgdC1IDMg0YHQsNC90YLQuNC80LXRgtGA0LPQtSDRgtOp0LzQtdC9INCw0L3Ri9Kb0YLQsNGDIC7QltC10YLRliDQttGL0LvQtNCw0L0g0LrQtdC50ZbQvSDQsdCw0YPRi9GA0LTRi9KjINGI0LXQutCw0YDQsNC70LDRgNGLINC10YDQtdGB0LXQutGC0LXRgNCz0LUg0YHQsNC50LrQtdGBINC60LXQu9C10LTRli4yLTMg0LbQsNGB0YLQsNCz0Ysg0LHQsNC70LDQu9Cw0YDQtNCwINCx0LDRg9GL0YAg05nQtNC10YLRgtC1INKb0LDQsdGL0YDQs9CwINGI0LXRgtGW0L3QtdC9IDEsNS0yLDAg0YHQvCDRiNGL0pPRi9C/INGC0rHRgNCw0LTRiyzQvtC90YvSoyDRiNC10YLRliDQttKx0LzRgdCw0psgLNGC0LXQs9GW0YEgLNCw0YPRi9GA0YHRi9C90YPRgdGL0LcgLjUg0LbQsNGB0YLQsNC9INC60LXQudGW0L0g0LHQsNGD0YvRgCDTmdC00LXRgtGC0LUg0pvQsNCx0YvRgNCz0LAg0LDRgdGC0YvQvdCw0L0g0YjRi9C60L/QsNC50LTRiy4g</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1 сұрақ толық емес қателіктері бар.5-8% .Екінші сұрақ қателіктері бар 1-2 см,себебі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34" table:style-name="ce1">
            <text:p>1066834</text:p>
          </table:table-cell>
          <table:table-cell office:value-type="string" table:style-name="ce1">
            <text:p>kazakh</text:p>
          </table:table-cell>
          <table:table-cell office:value-type="string" table:style-name="ce1">
            <text:p>Билет 1&amp;lt;br /&amp;gt; 1. Жетіліп туылған нәрестелердің физиологиялық салмақ жоғалтуы немен сипаттаналады және неше пайыз қүрайды, салмақ жоғалту немен байланысты?&amp;lt;br /&amp;gt; 2. Екі жасар баланың бауырының 2 см ұлғаюы анықталған. 3 жасқа дейінгі балалардың бауырын пальпациялағанда анатомиялық шекарасын атаңыз?&amp;lt;br /&amp;gt;</text:p>
          </table:table-cell>
          <table:table-cell office:value-type="string" table:style-name="ce1">
            <text:p>MS3QttCw0YPQsNC/LiDQotGD0YvQu9KT0LDQvSDQvdOZ0YDQtdGB0YLQtdC70LXRgNC00ZbSoyDRhNC40LfQuNC60LDQu9GL0psg0LTQsNC80YMg0LrTqdGA0YHQtdGC0LrRltGIINC60YDQuNGC0LXRgNC40LnQu9C10YDRltC90ZbSoyDQsdGW0YDRliAtINC00LXQvdC1INGB0LDQu9C80LDSk9GLINCx0L7Qu9GL0L8g0YLQsNCx0YvQu9Cw0LTRiy4g0J3TmdGA0LXRgdGC0LUg0YHQsNC70LzQsNKT0Ysg0rHQuyDQsdCw0LvQsNC70LDRgNC00LAg0L7RgNGC0LDRiNCwINC10YHQtdC/0L/QtdC9INKb0LDQu9GL0L/RgtGL0LTQsCAtIDM1MDAg0LMt0LTRiyDSm9Kx0YDQsNGB0LAsINCw0Lsg0pvRi9C3INCx0LDQu9Cw0LvQsNGA0LTQsCAzMzUwINCzLdC00Ysg0pvSsdGA0LDQudC00YsuINCQ0Lsg0L7RgdGLINC20LDSo9Cw0LTQsNC9INGC0YPRi9C70pPQsNC9INCx0LDQu9Cw0LvQsNGA0LTRi9KjINGB0LDQu9C80LDSk9GLIDI3MDAtNDAwMCDQsyDQsNGA0LDQu9GL0pPRi9C90LTQsCDQsNGD0YvRgtKb0YPRiyDSm9Cw0LvRi9C/0YLRiyDQtNC10L8g0YHQsNC90LDQu9Cw0LTRiy4g0JDQuyA0MDAwINCzINC90LDQvSDQsNGB0LDRgtGL0L0g0LHQvtC70YHQsCAtINGW0YDRliDRgdCw0LvQvNCw0pvRgtGLINCx0LDQu9CwINC00LXQvyDQsNGC0LDQu9Cw0LTRiy4g0JHQsNC70LDQvdGL0qMg0L3QsNKb0YLRiyDRgdCw0LvQvNCw0pPRi9C9INCx0ZbQu9GDINKv0YjRltC9INGC0LDSo9C10YDRgtC10qMg0LHQsNC70LAg0YLQsNC80LDSm9GC0LDQvdGD0YvQvdCwINC00LXQudGW0L0g0LfTmdGAINC205nQvdC1INC905nQttGW0YEg0YjRi9KT0LDRgNKT0LDQvdC90LDQvSDQutC10LnRltC9INCx0LDQu9Cw0L3RiyDQttCw0YLSm9Cw0L0g0LrSr9C50ZbQvdC00LUg0YHQsNC70LzQsNKbINOp0LvRiNC10YPRltGIINKb0rHRgNCw0Lsg0LDRgNKb0YvQu9GLINGB0LDQu9C80LDSk9GL0L0g06nQu9GI0LXRgyDQttKv0YDQs9GW0LfRltC70LXQtNGWLiDQntGB0Ysg0JbQtdGC0ZbQu9GW0L8g0YLRg9GL0LvSk9Cw0L0g0L3TmdGA0LXRgdGC0LXQu9C10YDQtNC1INGB0LDQu9C80LDSmyDQttC+0pPQsNC70YLRgyDQv9GA0L7RhtC10YHRgdGWINGC0YPRi9C70pPQsNC9INC60q/QvdGW0L3QtdC9INCx0LDRgdGC0LDQvyDQsNC70pPQsNGI0pvRiyAyLTMg0LrSr9C90LPQtSDQtNC10LnRltC9INC20LDQu9KT0LDRgdCw0LTRiy4g0JHSsdC7INCx0LDQu9Cw0LvQsNGA0LTRi9KjINGE0LjQt9C40L7Qu9C+0LPQuNGP0LvRi9KbINGB0LDQu9C80LDSmyDQttC+0pPQsNC70YLRgyDQv9GA0L7RhtC10YHRgdGWINC00LXQvyDQsNGC0LDQu9Cw0LTRhC4g0J7Qu9Cw0YAg0LDQu9KT0LDRiNKb0YsgMi0zINC60q/QvdC00LUg0YHQsNC70LzQsNKbINC20L7Sk9Cw0LvRgtKb0LDQvdGL0LzQtdC9IDct0LrSr9C90LPQtSDSm9Cw0YDQsNC5INC90LXQvNC10YHQtSDQutC10Lkg0LHQsNC70LDQu9Cw0YDQtNCwIDIg0LDQv9GC0LDSk9CwINKb0LDRgNCw0Lkg0YHQsNC70LzQsNKT0Ysg0pvQsNC50YLQsCDSm9Cw0LvQv9GL0L3QsCDQutC10LvQtSDQsdCw0YHRgtCw0LnQtNGLLiDQkdCw0LvQsNC70LDRgNC00LAg0YHQsNC70LzQsNKbINC20L4s0LDQu9GC0YPQtNGL0qMg0LXSoyDQttC+0pPQsNGA0pPRiyDRiNC10LPRliDRgNC10YLRltC90LTQtSDRgNKx0pvRgdCw0YIg0LXRgtGW0LvQtdGC0ZbQvSDQutOp0YDRgdC10YLQutGW0Ygg0L/QsNC50YvQtyAtIDYtOCDQv9Cw0LnRi9C30LTRiyDSm9Kx0YDQsNC50LTRiy4g0JXQs9C10YDQtNC10L0g0LHSsdC7INC/0LDQudGL0LfQtNCw0L0g0LDRgdCw0YLRi9C9INCx0L7Qu9GB0LAg0L7QvdC00LAg0LHQsNC70LDQtNCwINKb0LDQvdC00LDQuSDQtNCwINCx0ZbRgCDTqdC30LPQtdGA0ZbRgSDQsdC+0LvRg9GLINC80q/QvNC60ZbQvS4g0KTQuNC30LjQvtC70L7Qs9C40Y/Qu9GL0psg0YHQsNC70LzQsNKbINC20L7Sk9Cw0LvRgtGDINGE0LDQutGC0L7RgNC70LDRgNGL0L3QsCDQutC10LvQtdGC0ZbQvSDQsdC+0LvRgdCw0ps6INC905nRgNC10YHRgtC1INOp0LzRltGA0ZbQvdGW0qMg0LDQu9KT0LDRiNKb0Ysg0LrSr9C90LTQtdGA0ZbQvdC00LUg0LDQvdCwINGB0q/RgtGW0LzQtdC9INKb0L7RgNC10LrRgtC10L3Qs9C10L0g0LrQtdC30ZbQvdC00LUg0LrTqdC/INC806nQu9GI0LXRgNC00LUg0Y3QvdC10YDQs9C40Y8g0LbSsdC80YHQsNC50LTRiy4g0KHQtdCx0LXQsdGWLCDQsdCw0LvQsCDRgtGD0YvQu9KT0LDQvSDQutC10LfRltC90LTQtSDQvtC90YvSoyDQsdCw0YDQu9GL0psg0LbSr9C50LXQu9C10YDRltC80LXQvSDQvNKv0YjQtdC70LXRgNGWLCDQvNGL0YHQsNC7INGA0LXRgtGW0L3QtNC1OiDTqdC60L/QtSwg0LHSr9C50YDQtdC6INC205nQvdC1INGC0LDSk9GLINCx0LDRgdKb0LDQu9Cw0YDRiyDQsdC10LvRgdC10L3QtNGWINOZ0YDRliDSm9Cw0YDSm9GL0L3QtNGLINC20rHQvNGL0YEg0ZbRgdGC0LXQuSDQsdCw0YHRgtCw0LnQtNGLLiDQndOZ0YDQtdGB0YLQtSDQttC+0pPQsNC70YLQsNGC0YvQvSDRgdCw0LvQvNCw0pvRgtGL0qMgNNGC0LXQvSAzINCx06nQu9GW0LPRliDQsdCw0LvQsNC00LAg0YLQtdGA0ZYg0LDRgNKb0YvQu9GLINCx06nQu9GW0L3QtdGC0ZbQvSDRgdKx0LnRi9Kb0YLRi9Kb0L/QtdC9INGI0YvSk9Cw0YDRi9C70LDQtNGLLiDQodC+0L3Ri9C80LXQvSDSm9Cw0YLQsNGAINGC0YPRi9C70pPQsNC9INC60LXQt9C00LXQvSDQsdCw0YHRgtCw0L8g0LDQu9KT0LDRiCDSm9GL0LfQvNC10YLQutC1INC60ZbRgNCz0LXQvSDTqdC60L/QtSDQsNGA0pvRi9C70Ysg0LTQsCDRgdKx0LnRi9Kb0YLRi9KbINCw0LfQtNCw0pPQsNC9INCx06nQu9GW0LPRliDRgdGL0YDRgtKb0LAg0LHTqdC70ZbQvdGW0L8g0L7RgtGL0YDQsNC00YsuINCR0rHQuyDRgdKx0LnRi9Kb0YLRi9KbINCx0LDQu9CwINC+0YDQs9Cw0L3QuNC30LzRltC90LTQtdCz0ZYg0Y3QvdC10YDQs9C40Y8g0LHTqdC70ZbQvdGD0ZYg0L/RgNC+0YbQtdGB0YHRliDQvdOZ0YLQuNC20LXRgdGW0L3QtNC1INGC0q/Qt9GW0LvQs9C10L0g0YHQvtKj0pPRiyDTqdC90ZbQvCDQsdC+0LvRi9C/INGC0LDQsdGL0LvQsNC00Ysu0JHQsNC70LDQtNCwINC305nRgCDRiNGL0pPQsNGA0YMsINC80LXQutC+0L3QuNC50LTRltKjINCx06nQtNGW0L3Rg9GWLCDQutGW0L3QtNGW0Log0LHQsNGD0YvQvdGL0qMg0YLSr9GB0YPRliwg0LrRltC90LTRltC6INC20LDRgNCw0LvQsNC90YvQvdGL0qMg0LrQtdCx0YPRliDQtNC1INC905nRgNC10YHRgtC1INGB0LDQu9C80LDSk9GL0L3Ri9KjINC20L7Sk9Cw0LvRg9GL0L3QsCDRgdC10L/RgtGW0LPRltC9INGC0LjQs9GW0LfQtdC00ZYg0Y/Sk9C90Lgg05nRgdC10YAg0LXRgtGD0YjRliDRgdC10LHQtdC/INCx0L7Qu9CwINCw0LvQsNC00Ysu0JHQsNC70LDQvdGL0qMg0YLQuNGW0YHRgtGWINC00LXQvdC1INC80LDRgdGB0LDRgdGL0YvQvSDTqdC70YjQtdC/LCDQtdGB0LXQv9GC0LXRgyDSr9GI0ZbQvSDTqdC80ZbRgNGW0L3RltKjINC20LDRgNGC0Ysg0LbRi9C70LTRi9KT0YvQvdC00LAg0Y/Sk9C90LggNiDQsNC50LvRi9KT0YvQvdC00LAg0LDQuSDRgdCw0LnRi9C9IDEg0LbQsNGB0pvQsCDQtNC10LnRltC9IDgwMCDQsyDRgdCw0LvQvNCw0psg0pvQvtGB0YvQvyDQvtGC0YvRgNGB0LAsINCw0LsgMSDQttCw0YHRgtCw0L0g0LDRgdKb0LDQvdC90LDQvSDQutC10LnRltC9IDQwMCDQsyDRgdCw0LvQvNCw0psg0pvQvtGB0YvQvyDQvtGC0YvRgNCw0LTRiy4g0JHQsNC70LDQu9Cw0YDQtNGL0qMg0YHQsNC70LzQsNKT0Ysg0YHQvtC90YvQvNC10L0g0pvQsNGC0LDRgCDQvtC70LDRgNC00LAg0LbQsNKb0YHRiyDQtNCw0LzRi9KT0LDQvSDRgtC10YDRliDQsNGB0YLRiyDQvNCw0Lkg0LrQu9C10YLRh9Cw0YLQutCw0YHRi9C90LAg0LHQsNC50LvQsNC90YvRgdGC0Ysg0LHQvtC70YvQvyDQutC10LvQtdC00ZYuINCR0rHQuyDQvNCw0Lkg0LrQu9C10YLRh9Cw0YLQutCw0YHRiyDQsdCw0LvQsNC70LDRgNC00LAg0LDQu9KT0LDRiNGL0L3QtNCwINKb0L7So9GL0YAg0LzQsNC5INGC0ZbQvdGW0LzQtdC9INC60LXQudGW0L0g0LDSmyDQvNCw0LnRgtGW0L3RltC80LXQvSDQsNGD0YvRgdGC0YvRgNGL0LvQsNC00YsuINCW05nQvdC1INCx0LDQu9CwINC20LDRgdGDINKx0LvSk9Cw0LnSk9Cw0L0g0YHQsNC50YvQvSDRgtC10YDRliDQsNGB0YLRiyDQvNCw0Lkg0LrQu9C10YLRh9Cw0YLQutCw0YHRiyDQsNC30LDRjyDQsdCw0YHRgtCw0LnQtNGLLiDQltCw0LvQv9GLINKb0L7RgNGL0YLRi9C90LTRi9C70LDQuSDQutC10YLRgdC10LwsINCx0LDQu9Cw0L3Ri9KjINGE0LjQt9C40L7Qu9C+0LPQuNGP0LvRi9KxINGB0LDQu9C80LDSmyDQttC+0pPQsNC70YLRgyDQv9GA0L7RhtC10YHRgdGWINOp0LzRltGA0ZbQvdGW0qMg0LDQu9KT0LDRiNKb0Ysg0LrSr9C90LTQtdGA0ZbQvdC00LUg0LbSr9C30LXQs9C1INCw0YHQsNC00Ysg0LbTmdC90LUg0L7QuyAyLTMg0LDQv9GC0LDSk9CwINC00LXQudGW0L0g0LbQvtKT0LDQu9GC0pvQsNC9INGB0LDQu9C80LDSk9GL0L0g0pvQsNC50YLQsCDSm9Cw0LvQv9GL0L3QsCDQutC10LvRgtGW0YDRgyDQvNKv0LzQutGW0L3QtNGW0LPRltC90LUg0LjQtS4g0KHQvtC7INGB0LXQsdC10L/RgtGWINCx0rHQuyDSm9Cw0YPRltC/0YLRliDQsdC+0LvRi9C/INGB0LDQvdCw0LvQvNCw0LnQtNGLLiAyLdC20LDRg9Cw0L86INCR0LDQu9Cw0LvQsNGA0LTRi9KjINGC0YPRi9C70pPQsNC90L3QsNC9INCx0LDRgdGC0LDQvyDQsdCw0YPRi9GA0Ysg0YTRg9C90LrRhtC40L7QvdCw0LvQtNGLINGC0rHRgNKT0YvQtNCw0L0g0LXRgNC10YHQtdC60YLQtdGA0LTRltKjINCx0LDRg9GL0YDRi9C90LAg0pvQsNGA0LDSk9Cw0L3QtNCwINGC0L7Qu9GL0pPRi9C80LXQvSDQttC10YLRltC70LzQtdCz0LXQvSDQttOZ0L3QtSDSsdC70pPQsNC50pPQsNC9INCx0L7Qu9GL0L8g0LrQtdC70LXQtNGWLtCR0LDQu9Cw0LvQsNGA0LTRi9KjINGB0LDQu9GL0YHRgtGL0YDQvNCw0LvRiyDRgtKx0YDSk9GL0LTQsCDQtNC10L3QtSDQvNCw0YHRgdCw0YHRi9C90YvSoyA0LDQg0L/QsNC50YvQt9GL0L0g0LHQsNGD0YvRgNGLINCw0LvRi9C/INC20LDRgtCw0YLRi9C9INCx0L7Qu9GB0LAsINCw0Lsg0LXRgNC10YHQtdC60YLQtdGA0LTQtSDQtNC10L3QtSDQvNCw0YHRgdCw0YHRi9C90YvSoyAyLDgt0L/QsNC50YvQt9GL0L3QsCDQtNC10LnRltC9INCx0LDRg9GL0YDRiyDQsNC70YvQvyDQttCw0YLQsNC00YsuINKa0LDQu9GL0L/RgtGLINC20LDSk9C00LDQudC00LAg0LbQsNKj0LAg0YLRg9GL0LvSk9Cw0L0g0L3TmdGA0LXRgdGC0LXQu9C10YAg0LzQtdC9INCx0LDQu9Cw0LvQsNGA0LTQsCDQvtC70LDRgNC00YvSoyDQsdCw0YPRi9GA0Ysg0pvQsNCx0YvRgNKT0LAg0LTQvtKT0LDRgdGLINCw0YHRgtGL0L3QsNC9INGI0YvSk9GL0L8g0q/Qu9C60LXQudGW0L8g0YLSsdGA0LDQtNGLLiDQkdCw0YPRi9GA0LTRi9KjINGC06nQvNC10L3Qs9GWINGI0LXRgtGWIDcg0LbQsNGB0pvQsCDQtNC10LnRltC90LPRliDQsdCw0LvQsNC70LDRgNC00LAg0L7SoyDQttCw0psg0LHSsdKT0LDQvdCw0L7RgNGC0LAg0YHRi9C30YvSk9GL0L3Ri9KjINCx0L7QudGL0L3QtNCwINC+0qMg0LbQsNKbINKb0LDQsdGL0YDSk9CwINC00L7Sk9Cw0YHRi9C90YvSoyDQsNGB0YLRi9C90LDQvSDQv9Cw0LvRjNC/0LDRhtC40Y/Qu9Cw0LTRiy4g0JbQsNGB0YLRi9KbINC10YDQtdC60YjQtdC70ZbQutGC0LXRgNGW0L3QtSDRgdOZ0LnQutC10YEg0pvQsNGA0LDRgdGC0YvRgNCw0YLRi9C9INCx0L7Qu9GB0LDSmzogNiDQsNC50pPQsCDQtNC10LnRltC90LPRliDQsdCw0LvQsNC70LDRgNC00LAg0LHQsNGD0YvRgCAyLTMg0YHQvCDQtNC10LnRltC9INKb0LDQsdGL0YDSk9CwINC00L7Sk9Cw0YHRi9C90LDQvSDRgtOp0LzQtdC9INC/0LDQu9GM0L/QsNGG0LjRj9C70LDQvdCw0LTRiywgNtCw0LnQu9GL0pvRgtCw0L0gLSAyINC20LDRgdKb0LAg0LTQtdC50ZbQvdCz0ZYg0LHQsNC70LDQu9Cw0YDQtNCwIDEsNS0yINGB0Lwg0LTQtdC50ZbQvSDQvtKjINKb0LDQsdGL0YDSk9CwINC00L7Sk9Cw0YHRi9C90LDQvSDRgtOp0LzQtdC9INC/0LDQu9GM0L/QsNGG0LjRj9C70LDQvdCw0LTRiywgMyDQttCw0YHRgtCw0L0gLSA30LbQsNGB0pvQsCDQtNC10LnRltC90LPRliDQsdCw0LvQsNC70LDRgNC00LAgMCw1LTEg0YHQvCDQs9C1INC00LXQudGW0L0g0L/QsNC70YzQv9Cw0YbQuNGP0LvQsNC90LDQtNGLLiDQkNC7IDcg0LbQsNGB0YLQsNC9INCw0YHSm9Cw0L0g0LHQsNC70LDQu9Cw0YDQtNCwINC205nQvdC1INC10YDQtdGB0LXQutGC0LXRgNC00LUg0LrTqdCx0ZbQvdC1INKb0LDQsdGL0YDSk9CwINC00L7Sk9Cw0YHRi9C90LDQvSDRgtOp0LzQtdC9INKb0LDRgNCw0Lkg0YjRi9Kb0L/QsNC50LTRiy4g0JrTqdCx0ZbQvdC10YHQtSDQvdOZ0YDQtdGB0YLQtdC70LXRgNC00LUg0YHQvtC90YvQvNC10L0g0pvQsNGC0LDRgCDRgdC+0Lsg0LbQsNKbINCx0LDRg9GL0YDQtNGL0qMg0LHTqdC70ZbQs9GWINC+0qMg0LbQsNKb0pvQsCDSm9Cw0YDQsNKT0LDQvdC00LAg0q/Qu9C60LXQvdGW0YDQtdC6INCx0L7Qu9GL0L8g0LrQtdC70LXQtNGWLiDQntC7INCx0LDQu9CwIDEsNS0yINC20LDRgdKb0LAg0LbQtdGC0LrQtdC9INC60LXQt9GW0L3QtNC1INGE0LjQt9C40L7Qu9C+0LPQuNGP0LvRi9KbINGC0rHRgNKT0YvQtNCw0L0g0LrRltGI0ZbRgNC10LnQtSDQsdCw0YHRgtCw0LnQtNGLLiDQltCw0qPQsNC00LDQvSDRgtGD0YvQu9KT0LDQvSDQvdOZ0YDQtdGB0YLQtdC70LXRgNC00LUg0LHQsNGD0YvRgNC00YvSoyDQsdOp0LvRltC60LrQtSDQsdOp0LvRltC90YPRliDQsNC50pvRi9C9INC606nRgNGW0L3QsdC10LnQtNGWLiDQkdCw0LvQsCDRiNCw0LzQsNC80LXQvSAxINC20LDRgdKb0LAg0YLQvtC70pPQsNC9INC60LXQt9GW0L3QtdC9INCx0LDRgdGC0LDQvyDQvtC90YvSoyDQsdOp0LvRltC60YLQtdGA0LPQtSDQsdOp0LvRltC90ZbQvyDQsNC50pvRi9C90LTQsNC70YPRiyDQttKv0YDQtdC00ZYuINCh0L7QvdGL0LzQtdC9INKb0LDRgtCw0YAg0L3TmdGA0LXRgdGC0LXQu9C10YAg0LHQsNGD0YvRgNGL0L3Ri9KjINKb0LDQvdC80LXQvSDSm9Cw0LzRgtCw0LzQsNGB0YvQtyDQtdGC0ZbQu9GD0ZYgLSDTqdGC0LUg0LbQsNKb0YHRiyDQtNCw0LzRi9KT0LDQvSDQsdC+0LvRi9C/INC60LXQu9C10LTRli4g0J/QsNGA0LXQvdGF0LjQvNCw0LvRi9KbINGC0ZbQvdGWINC20LDSm9GB0Ysg0LTQuNGE0YTQtdGA0LXQvdGG0LjQsNGG0LjRj9C70LDQvdCw0LTRiyDQtNCwLCA4INC20LDRgdGC0LDQvSDQsNGB0pvQsNC9INCx0LDQu9Cw0LvQsNGA0LTRi9KjINCx0LDRg9GL0YDRiyDQs9C40YHRgtC+0LvQvtCz0LjRj9C70YvSmyDRgtKx0YDSk9GL0LTQsNC9INC10YDQtdGB0LXQuiDQsNC00LDQvNC00LDRgNC00YvSoyDQsdCw0YPRi9GA0YvQvdCwINKx0pvRgdCw0YEg0LHQvtC70YvQvyDQutC10LvQtdC00ZYuINCR0LDRg9GL0YDQtNGL0qMg0LbQsNGBINCx0LDQu9Cw0LvQsNGA0LTQsCDSm9Cw0LHRi9GA0pPQsCDQsNGB0YLRi9C90LDQvSDRiNGL0pPRi9C/INGC0rHRgNGD0Ysg0YHQvtC90YvQvNC10L0g0pvQsNGC0LDRgCDQvtC90YvSoyDSm9Cw0LHRi9GA0pPQsNC70LDRgNGL0L3Ri9KjINC20LDRgSDQutC10LfRltC90LTQtdCz0ZYg0LTQtdC90LUg0LHRltGC0ZbQvNGWINC80LXQvSDQutC10YPQtNC1INKb0YPRi9GB0YvQvdCwINGB0LDQuSDQutGW0YjRliDQsdC+0LvRg9GL0LzQtdC9INC00LUg0YHQuNC/0LDRgtGC0LDQu9Cw0LTRiy4g0KHQvtC7INGB0LXQsdC10L/RgtGWINC00LUg0pvQsNCx0YvRgNKT0LAg0LTQvtKT0LDRgdGLINC20LDRgSDQsdCw0LvQsNC90YvSoyDQsdCw0YPRi9GA0YvQvSDQttCw0YPRi9C/INGC0rHRgNCwINCw0LvQvNCw0LnQtNGLLiDQkdCw0YPRi9GA0LTRi9KjINC10qMg0L3QtdCz0ZbQt9Cz0ZYg0pvRi9C30LzQtdGC0YLQtdGA0ZbQvdGW0qMg0LHRltGA0ZYgLSDTqdGCINGC0q/Qt9GDINC/0YDQvtGG0LXRgdGB0ZYg0LHQvtC70YvQvyDRgdCw0L3QsNC70LDQtNGLLiDQkNC7INCx0LDQu9Cw0LvQsNGA0LTQsCDQsdKx0Lsg0q/QtNC10YDRltGBINC10YDQtdGB0LXQutGC0LXRgNCz0LUg0pvQsNGA0LDSk9Cw0L3QtNCwINCx0LDRj9GDINC20ZbRgNC10LTRli4g0prQvtGA0YvRgtGL0L3QtNGL0LvQsNC5INC60LXQu9GB0LXQuiwg0JHSsdC7INC20LDSk9C00LDQuSDQsdC+0LnRi9C90YjQsCAyINC20LDRgdCw0YAg0LHQsNC70LDQtNCw0pPRiyDQsdCw0YPRi9GA0YvQvdKjIDIg0YHQvCDSsdC70pPQsNC50YvQvywg0L/QsNC70YzQv9Cw0YbQuNGP0LvQsNC90YPRiyDSm9Cw0LvRi9C/0YLRiyDQsdC+0LvRi9C/INGB0LDQvdCw0LvQsNC00YsuICA=</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жаубы дұрыс, бырақ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22" table:style-name="ce1">
            <text:p>1067022</text:p>
          </table:table-cell>
          <table:table-cell office:value-type="string" table:style-name="ce1">
            <text:p>kazakh</text:p>
          </table:table-cell>
          <table:table-cell office:value-type="string" table:style-name="ce1">
            <text:p>Билет 1&amp;lt;br /&amp;gt; 1. Жетіліп туылған нәрестелердің физиологиялық салмақ жоғалтуы немен сипаттаналады және неше пайыз қүрайды, салмақ жоғалту немен байланысты?&amp;lt;br /&amp;gt; 2. Екі жасар баланың бауырының 2 см ұлғаюы анықталған. 3 жасқа дейінгі балалардың бауырын пальпациялағанда анатомиялық шекарасын атаңыз?&amp;lt;br /&amp;gt;</text:p>
          </table:table-cell>
          <table:table-cell office:value-type="string" table:style-name="ce1">
            <text:p>MS4g0JHRltGA0ZbQvdGI0ZYg0YHSsdGA0LDSmyDQsdC+0LnRi9C90YjQsCDQutC10LvQtdGC0ZbQvSDQsdC+0LvRgdCw0psg0LbQtdGC0ZbQu9GW0L8g0YLRg9GL0LvSk9Cw0L0g0L3TmdGA0LXRgdGC0LXQu9C10YDQtNGW0qMg0YTQuNC30LjQvtC70L7Qs9C40Y/Qu9GL0psg0YHQsNC70LzQsNKbINC20L7Sk9Cw0LvRgtGD0Ysg0pvQsNC70YvQv9GC0Ysg0LbQsNKT0LTQsNC5INGA0LXRgtGW0L3QtNC1INGB0LjQv9Cw0YLRgtCw0LvQsNC00YssINGB0LXQsdC10LHRliDQtdC90LTRliDRgtGD0YvQu9KT0LDQvSDQvdOZ0YDQtdGB0YLQtdC70LXRgCDQsdCw0YHRi9C90LTQsCDQvtC90YHRi9C30LTQsCDQsNC3INGB0LDQu9C80LDSm9C/0LXQvSDRgtGD0YvQu9Cw0LTRiywg0L7Sk9Cw0L0g0LHRltGA0LTQtdC9INCx0ZbRgCDRgdC10LHQtdC/0YjRliDQsdGW0LfQtNC1INC20q/QutGC0ZbQu9GW0Log0LrQtdC30ZbQvdC00LXQs9GWINC20LjQvdCw0LvSk9Cw0L0g0LDRgNGC0YvSmyDRgdKx0LnRi9Kb0YLRi9Kb0YLRi9KjINC20L7Sk9Cw0LvRg9GLLCDRj9KT0L3QuCDQsdCw0LvQsCDRltGI0YLQtSDQsdC+0LvSk9Cw0L3QtNCwINGB0LDQu9C80LDSk9GLINGB0rHQudGL0pvRgtGL0pvQv9C10L0g0LHRltGA0LPQtSDQtdGB0LXQv9GC0LXQu9Cz0LXQvS4g0JHSsdC7INC20LDQu9C/0Ysg0LHSr9C60ZbQuyDQtNC10L3QtSDQvNCw0YHRgdCw0YHRi9C90YvSoyA1LTEwINC/0LDQudGL0LfRi9C9INKb0rHRgNCw0LnQtNGLINC205nQvdC1INGC0YPRi9C70pPQsNC90L3QsNC9INC60LXQudGW0L0g0LDQu9KT0LDRiNKb0Ysg0LrSr9C90LTQtdGA0LTQtSDQsdC+0LvQsNC00YssINCw0LvQsNC50LTQsCDQsdKx0Lsg0YHQsNC70LzQsNKbINC20L7Sk9Cw0LvRgtGDINCx0ZbQt9C00LUg0YPQsNKb0YvRgtGI0LAg0LbTmdC90LUg0pvQsNC70YvQv9GC0Ysg0LbQsNKT0LTQsNC5INC10LrQtdC90ZbQvSDQsNGC0LDQvyDTqdGC0LrQtdC9INC206nQvS4g0JHSsdC7INC20LXRgNC00LUg0LTQtdC90ZYg0YHQsNGDINC20LDSo9CwINGC0YPRi9C70pPQsNC9INC905nRgNC10YHRgtC10LvQtdGA0LTQtSDQttCw0LvQv9GLINCw0LvSk9Cw0L3QtNCwINGB0LDQu9C80LDSk9GL0L3Ri9KjIDcg0L/QsNC50YvQt9C00LDQvSAtIDEwINC/0LDQudGL0LfSk9CwINC00LXQudGW0L0g0LbQvtKT0LDQu9GC0LDRgtGL0L3Ri9C9INCw0L3Ri9Kb0YLQsNC/INC60LXRgtGD0LPQtSDQsdC+0LvQsNC00YssINCx0ZbRgNCw0psg0LHSsdC7INGB0LDQu9C80LDSmyDQsNC70pPQsNGI0pvRiyDQtdC60ZYg0LDQv9GC0LAg0L3QtdC80LXRgdC1INC+0LTQsNC9INC00LAg0LrTqdC/LCDQsNC50LvQsNGA0pPQsCDQtNC10LnRltC9INC00LUg0LHQsNGA0YvQvyDSm9Cw0LvQv9GL0L3QsCDQutC10LvRg9GWINC60LXRgNC10Log0L3QvtGA0LzQsCDQsdC+0LnRi9C90YjQsC4gINCV0L3QtNGWINGC0YPRi9C70pPQsNC90LTQsCDQsdCw0LvQsNC90YvSoyDQvNCw0YHRgdCw0YHRiyDQsNC3INCx0L7Qu9KT0LDQvdGL0LzQtdC9LCDQsNC70pPQsNGI0pvRiyDQsNC50LvQsNGA0LTQsCAg0LrRltGI0LrQtdC90YLQsNC5INCx0LDQu9CwINCx0ZbQt9C00LUg05nRgCDQutKv0L0g0YHQsNC50YvQvSDQutC10LnRltC9INCx0LDQu9CwIDMwINCz0YDQsNC80LzQvdCw0L0g0pvQvtGB0YvQvyDQvtGC0YvRgNCw0LTRiy4g0YHQvtC90YvQvNC10L0g0pvQsNGC0LDRgCDQsdKx0Lsg0LbQtdGA0LTQtSDQsNC50YLRi9C70YvQvyDQutC10YLQutC10L3QtNC10Lkg0YHQsNC70LzQsNKbINC20L7Sk9Cw0LvRgtGDINCx0ZbQt9C00LUg0YLQvtC70YvSmyDQv9Cw0YLQvtC70L7Qs9C40Y/RgdGL0Lcg0YLRg9GL0LvSk9Cw0L0g0L3TmdGA0LXRgdGC0LXQu9C10YDQtNC1INC90LXQvNC10L0g0LHQsNC50LvQsNC90YvRgdGC0Ysg0LTQtdCz0LXQvdCz0LUg0LrQtdC70LXRgtGW0L0g0LHQvtC70YHQsNKbINC00LXQvdGWINGB0LDRgyDQttOZ0L3QtSDQttCw0qPQsCDRgtGD0YvQu9KT0LDQvSDQvdOZ0YDQtdGB0YLQtdC70LXRgCDQsdCw0YDQu9GL0pPRiyDQsNC70pPQsNGI0pvRiyDQutKv0L3QtNC1INGB0LDQu9C80LDSmyDQttC+0pPQsNC70YLQsNC00YsuINCR0rHQuyDRhNC40LfQuNC+0LvQvtCz0LjRj9C70YvSmyDQttC+0pPQsNC70YLRgyDQvdC10LPRltC30ZbQvdC00LUg0L7Qu9Cw0YDQtNGL0qMg0YHSr9GC0YLRliDQsNGD0YvQt9GI0LAg05nQu9GW0LTQtSDRgtC+0LvRi9KbINC20LXRgtGW0LvQvNC10LPQtdC90LzQtdC9INC205nQvdC1INCw0Lcg0pvQsNCx0YvQu9C00LDRg9C80LXQvSwg05nQu9GWINC00LUg0LDQtyDRg9Cw0pvRi9GCINC60LXQt9GW0qPQtNC1INGB0rHQudGL0pvRgtGL0pvRgtGL0qMg0pvQsNC50YLQsCDQsdOp0LvRltC90YPRltC90LXQvdC9INC205nQvdC1INC20L7Sk9Cw0LvRg9GL0L3QsNC9INC205nQvdC1INGB0YPQtNGL0qMg0YHQtdC30ZbQu9C80LXQudGC0ZbQvSDQttC+0pPQsNC70YPRi9C90LDQvSDRgtGD0YvQvdC00LDQudC00YsuICAgMi4g0LXQutGW0L3RiNGWINGB0rHRgNCw0psg0LHQvtC50YvQvdGI0LAg0LrQtdC70LXRgtGW0L0g0LHQvtC70YHQsNKbLCDQutGW0YjQutC10L3RgtCw0Lkg0LrQtdC30ZbQvdC00LUg0LHQsNC70LDQvdGL0qMg0LTQtdC90LUg0LzSr9GI0LXQu9C10YDRltC90ZbSoyDQtdGA0LXRgdC10LrRgtC10YDQs9C1INKb0LDRgNCw0pPQsNC90LTQsCDQtdGA0LXQutGI0LUg0LHQvtC70YPRiyDSm9Cw0LvRi9C/0YLRiyDQttCw0pPQtNCw0LksINGB0LXQsdC10LHRliDQttCw0YHRgtGL0psg0LXRgNC10LrRiNC10LvRltC60YLQtdGA0LPQtSDRgdOZ0LnQutC10YEg0LHQsNC70LDQu9Cw0YDQtNCwINC00LXQvdC1INCx0ZbRgtGW0LzRliDTmdC70ZYg0YLQvtC70YvSmyDQttC10YLRltC70LzQtdCz0LXQvSDRgdC+0qMg0LrQtdC50LHRltGAINC80q/RiNC10LvQtdGAINGI0LDQvNCw0LTQsNC9INGC0YvRgSDSsdC70pPQsNC50pPQsNC9INCx0L7Qu9GL0L8sINC/0LDQu9GM0L/QsNGG0LjRj9C70LDQvdGD0pPQsCDSm9C+0LvQttC10YLRltC80LTRliDQvdC10LzQtdGB0LUg0LrQtdGA0ZbRgdGW0L3RiNC1INKb0L7Qu9C20LXRgtGW0LzRgdGW0Lcg0LHQvtC70YPRiyDQvNKv0LzQutGW0L0uINCh05nQudC60LXRgdGW0L3RiNC1INCx0LDQu9CwINC60ZbRiNC60LXQvdGC0LDQuSDQsdC+0LvSk9Cw0L0g0YHQvtKjINCx0LDRgNC70YvSmyDQtNC10L3QtSDQsdGW0YLRltC8INC80q/RiNC10LvQtdGA0ZYg06nRgdGW0L8g0YLQvtC70YvQvyDTqdGB0L/QtdCz0LXQvdGI0LUg0LTQtdC50ZbQvSDRgdCw0LvRi9GB0YLRi9GA0LzQsNC70Ysg0YLSr9GA0LTQtSDQtdGA0LXRgdC10LrRgtC10YDQs9C1INKb0LDRgNCw0pPQsNC90LTQsCDQutGW0YjQutC10L3RgtCw0Lkg0LHQvtC70YvQvyDQutC10LvQtdC00ZYuINCR0rHQuyDQttC10YDQtNC1INCx0ZbQt9C00LUgMiDQttCw0YHQsNGAINCx0LDQu9Cw0L3Ri9KjINC20LDSk9C00LDQudGLINCx0LXRgNGW0LvQs9C10L0sINC20LDSk9C00LDQuSDQsdC+0LnRi9C90YjQsCDQsdCw0LvQsNC90YvSoyDQsdCw0YPRi9GA0YvQvdGL0qMg0LXQutGWINGB0LDQvdGC0LjQvNC10YLRgNCz0LUg0rHQu9KT0LDRjtGLINCw0L3Ri9Kb0YLQsNC70LPQsNC9LCDQsNC7INC90L7RgNC80LAg0LHQvtC50YvQvdGI0LAg0LHSsdC7INC20LDRgdGC0LDSk9GLINCx0LDQu9Cw0LvQsNGA0LTRiyAzINC20LDRgdKb0LAg0LTQtdC50ZbQvdCz0ZYg0LTQsNC80YMg0LrQtdC30LXSo9C00LXRgNGW0L0g0pvQsNGA0LDRgdGC0YvRgNCw0LzRi9C3LCDRj9KT0L3QuCAzINC20LDRgdKb0LAg0LTQtdC50ZbQvdCz0ZYg0LHQsNC70LDQu9Cw0YDQtNGL0qMg0YLTqdC80LXQvdCz0ZYg0LbQuNC10LPRltC9INC+0qMg0LbQsNKbINKb0LDQsdGL0YDSk9CwINC20LjQtdCz0ZYg0LzQtdC9INC60ZbQvdC00ZbQuiDQsNGA0LDRgdGL0L3QtNCwINC/0LDQu9GM0L/QsNGG0LjRj9C70LDRg9KT0LAg0LHQvtC70LDQtNGLLCDQsNC70LDQudC00LAg0LHSsdKT0LDQvSDSm9Cw0YDQsNC80LDRgdGC0LDQvSDQv9Cw0LvRjNC/0LDRhtC40Y/Qu9Cw0L3Rg9C00YvSoyDQvdCw0pvRgtGLINCw0L3QsNGC0L7QvNC40Y/Qu9GL0psg0YjQtdC60LDRgNCw0LvRi9C90LTQsCDQsdGW0LfQtNC1INCx0LDQu9Cw0L3Ri9KjINC20LDQu9C/0Ysg0LTQtdC90LUg0LHRltGC0ZbQvNGW0L3QtSwg0LbQsNGB0YvQvdCwINC205nQvdC1INC00LUg0YHQvtC90YvQvNC10L0g0pvQsNGC0LDRgCDQsdKx0Lsg0LbQtdGA0LTQtSDQsdCw0YPRi9GAINC806nQu9GI0LXRgNGW0L3QtSDQsdCw0LnQu9Cw0L3Ri9GB0YLRiyDTqdC30LPQtdGA0ZbRgdC60LUg0rHRiNGL0YDQsNGD0Ysg0LzSr9C80LrRltC9LiDQndC+0YDQvNCwINCx0L7QudGL0L3RiNCwINC20LDRgSDQsdCw0LvQsNC70LDRgNC00LAg0LHQsNGD0YvRgCDQvNKv0YjQtdGB0ZYg0L7SoyDQttCw0psg0pvQsNCx0YvRgNKT0LAg0YjQtdGC0ZbQvdC10L0gINGB05nQuyDRgtOp0LzQtdC9INC/0LDQu9GM0L/QsNGG0LjRj9C70LDQvdGD0Ysg0LrQtdGA0LXQuiDQtNC10L8g0LXRgdC10L/RgtC10LvQtdC00ZYsINCx0ZbRgNCw0pvRgtCwICDQsNC7INC+0L3Ri9KjINGC06nQvNC10L3Qs9GWINGI0LXRgtGWINC60LXQudCx0ZbRgCDQttCw0pPQtNCw0LnQu9Cw0YDQtNCwINCx0LDRg9GL0YAg0pvQsNCx0YvRgNKT0LAg0YjQtdGC0ZbQvdC10L0gMi0zINGB0LDQvdGC0LjQvNC10YLRgNCz0LUg0LTQtdC50ZbQvSDRgdC+0LfRi9C70YPRiyDQvNKv0LzQutGW0L0uINCc0LDSo9GL0LfQtNGLINC10YHQutC10YDQtSDQutC10YLRgyDQutC10YDQtdC6INC20LDSk9C00LDQudKT0LAg0LrQtdC70LXRgtGW0L0g0LHQvtC70YHQsNKbLCDQsdCw0YPRi9GA0LTRiyDQv9Cw0LvRjNC/0LDRhtC40Y/Qu9Cw0YMg0LrQtdC30ZbQvdC00LUg0LHQsNC70LDSk9CwINGL0qPSk9Cw0LnRgdGL0LfQtNGL0psg0LbTmdC90LUg0LTQtSDQsNGD0YvRgNGC0L/QsNC70YvSmyDRgtGD0LTRi9GA0LzQsNGBINKv0YjRltC9INC20LDSk9C00LDQuSDQttCw0YHQsNC70YMg0LrQtdGA0LXQutGC0ZbQs9GW0L0g0rHQvNGL0YLQv9Cw0YMg0pvQsNC20LXRgi4g0YHQvtC90YvQvNC10L0g0pvQsNGC0LDRgCDQttCw0qPQsCDRgtGD0YvQu9KT0LDQvSDQvdOZ0YDQtdGB0YLQtdC90ZbSoyDQsdCw0YPRi9GA0YvQvSDQv9Cw0LvRjNC/0LDRhtC40Y/Qu9Cw0YMg0LrQtdC30ZbQvdC00LUg0LHRltC3INC+0YDRgtCw0qPSk9GLINCx0rHSk9Cw0L3QsCDRgdGL0LfRi9KbINCw0YDSm9GL0LvRiyDQttOZ0L3QtSDQtNC1INCw0LvQtNGL0qPSk9GLINKb0L7Qu9GC0YvSm9Cw0YHRgtGLINGB0YvQt9GL0psg0LDRgNKb0YvQu9GLINGC06nQvNC10L0g0YHRi9GA0pPQsNC70LDQudGC0YvQvdGL0L0g0LHRltC70YPRltC80ZbQtyDQutC10YDQtdC6LiDQr9KT0L3QuCDQsdCw0YPRi9GAINCw0L3QsNGC0L7QvNC40Y/Qu9GL0psg0YjQtdC60LDRgNCwINCx0L7QudGL0L3RiNCwINKb0LDQsdGL0YDSk9Cw0LTQsNC9IDIg0YHQvCDRgtOp0LzQtdC9INGC0q/RgdGW0L8g0YLSsdGA0YMg0pvQsNC20LXRgi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жауабында қателіктері бар,толық емес</text:p>
          </table:table-cell>
          <table:table-cell office:value-type="float" office:value="0" table:style-name="ce1">
            <text:p>0</text:p>
          </table:table-cell>
          <table:table-cell table:number-columns-repeated="16376"/>
        </table:table-row>
        <table:table-row table:style-name="ro1">
          <table:table-cell office:value-type="float" office:value="1067134" table:style-name="ce1">
            <text:p>1067134</text:p>
          </table:table-cell>
          <table:table-cell office:value-type="string" table:style-name="ce1">
            <text:p>kazakh</text:p>
          </table:table-cell>
          <table:table-cell office:value-type="string" table:style-name="ce1">
            <text:p>Билет 1&amp;lt;br /&amp;gt; 1. Жетіліп туылған нәрестелердің физиологиялық салмақ жоғалтуы немен сипаттаналады және неше пайыз қүрайды, салмақ жоғалту немен байланысты?&amp;lt;br /&amp;gt; 2. Екі жасар баланың бауырының 2 см ұлғаюы анықталған. 3 жасқа дейінгі балалардың бауырын пальпациялағанда анатомиялық шекарасын атаңыз?&amp;lt;br /&amp;gt;</text:p>
          </table:table-cell>
          <table:table-cell office:value-type="string" table:style-name="ce1">
            <text:p>0JbQsNKj0LAg0YLRg9KT0LDQvSDQvdOZ0YDQtdGB0YLQtdC70LXRgNC00ZbSoyDQsNC70pPQsNGI0pvRiyDQutKv0L3QtNC10YDRltC90LTQtSDRhNC40LfQuNC+0LvQvtCz0LjRj9C70YvSmyDRgdCw0LvQvNCw0psg0LbQvtKT0LDQu9GC0YPRiyDQttKv0YDQtdC00ZYuINC20LDSo9CwINGC0YPRi9C70pPQsNC9INC905nRgNC10YHRgtC10L3RltKjINGB0LDQu9C80LDSmyDQttC+0pPQsNC70YLRgyDRgdC10LHQtdC/0YLQtdGA0ZbQvdC1INGC0L7Sm9GC0LDQu9Cw0YAg0LHQvtC70YHQsNC8OiAxKSDQttCw0YLRi9GAINGW0YjRltC90LTQtSDSsdGA0YvSm9GC0YvSoyDRgdKx0LnRi9Kb0YLRi9KbINGB0ZbSo9GW0YDRltC/INCw0LvRg9GL0L3QsCDQsdCw0LnQu9Cw0L3Ri9GB0YLRiywg0YLRg9GL0LvSk9Cw0L3QvdCw0L0g0YHQvtKjINC20LDSo9CwINGC0YPRi9C70pPQsNC9INC905nRgNC10YHRgtC10L3RltKjINCx0L7QudGL0L3QsNC9INCw0YDRgtGL0psg0YHSsdC50YvSm9GC0YvSmyDRiNGL0pPQsCDQsdCw0YHRgtCw0LnQtNGLLCDRgdC+0L3QtNGL0pvRgtCw0L3QtNCwINC905nRgNC10YHRgtC1INGB0LDQu9C80LDSmyDQttC+0pPQsNC70YLQsNC00YsuIDIpINCh0L7QvdGL0LzQtdC9INKb0LDRgtCw0YAg0LbQsNKj0LAg0YLRg9GL0LvSk9Cw0L0g0L3TmdGA0LXRgdGC0LXQvdGW0qMg0LDRgdKb0L7RgNGL0YLRgyDQttKv0LnQtdGB0ZYg0LTSsdGA0YvRgSDQttC10YLRltC70LzQtdCz0LXQvSDQsdC+0LvQsNC00YssINGB0L7QvdC00YvSm9GC0LDQvSDQsNC70pPQsNGIINCw0L3QsCDRgdKv0YLRltC90LXQvSDRgtKv0YHQutC10L0g0YPRi9C30LTRiyDRgtC+0LvRi9KbINGB0ZbSo9GW0YDRltC/LCDSm9C+0YDRi9GC0LAg0LDQu9C80LDQudC00YsuIDMpINCW05nQvdC1INC00LUg0L3TmdGA0LXRgdGC0LXQvdGW0qMg0LDQu9KT0LDRiNKb0Ysg0LrSr9C90LTQtdGA0ZYg0YHQsNC70LzQsNKbINC20L7Sk9Cw0LvRgtGD0Ysg0L3TmdGA0LXRgdGC0LXQvdGW0qMg0LDQu9KT0LDRiNKb0Ysg0YjRi9KT0LDRgNKT0LDQvSDQvNC10LrQvtC90LjQudGWINCw0YDSm9GL0LvRiyDQttOZ0L3QtSDQt9OZ0YAg0YjRi9KT0LDRgNGD0Ysg0LDRgNKb0YvQu9GLINCx0L7Qu9Cw0LTRiy4g0J3QtdCz0ZbQt9GW0L3QtdC9INC20LDSo9CwINGC0YPSk9Cw0L0g0L3TmdGA0LXRgdGC0LXQvdGW0qMg0YTQuNC30LjQvtC70L7Qs9C40Y/Qu9GL0psg0YHQsNC70LzQsNKbINC20L7Sk9Cw0LvRgtGD0YsgMTAlINKT0LAg0LTQtdC50ZbQvSDQttKv0YDQtdC00ZYsINC10LPQtdGAINGB0LDQu9C80LDSmyDQttC+0pPQsNC70YLRg9GLINC+0LTQsNC9INC20L7Sk9Cw0YDRiyDQsdC+0LvQsNGC0YvQvSDQsdC+0LvRgdCwINC/0LDRgtC+0LvQvtCz0LjRj9C70YvSmyDQttCw0pPQtNCw0Lkg0LHQvtC70YvQvyDQtdGB0LXQv9GC0LXQu9C10LTRli4g0KHQvtC90YvQvNC10L0g0pvQsNGC0LDRgCDQttCw0qPQsCDRgtGD0YvQu9KT0LDQvSDQvdOZ0YDQtdGB0YLQtSDTqdC80ZbRgNGW0L3RltKjINCw0LvSk9Cw0YjSm9GLIDMtNSDQutKv0L3RltC90LTQtSDRgdCw0LvQvNCw0psg0LbQvtKT0LDQu9GC0YvQvyDQsdCw0YHRgtCw0LnQtNGLLCDQutC10LvQtdGB0ZYgNy0xMCDRiNGLINC60q/QvdC00LXRgNGW0L3QtNC1INKb0LDQudGC0LAg0YHQsNC70LzQsNKT0Ysg0pvQsNC70YvQv9Kb0LAg0LrQtdC70LUg0LHQsNGB0YLQsNC50LTRiyDQttOZ0L3QtSAyINCw0L/RgtCw0LTQsNC9INGB0L7SoyDQvdOZ0YDQtdGB0YLQtdC90ZbSoyDRgdCw0LvQvNCw0pPRiyDRgtC+0LvRi9KbINKb0LDQu9C/0YvQvdCwINC60LXQu9C10LTRli4gMiDQodKx0YDQsNKb0pvQsCDQttCw0YPQsNC/OiDQldC60ZYg0LbQsNGB0LDRgCDQsdCw0LvQsNC90YvSoyDQsdCw0YPRi9GA0YvQvdGL0qMgMiDRgdC8INKx0LvSk9Cw0Y7Rg9GLINKb0LDQu9GL0L/RgtGLINGE0LjQt9C40L7Qu9C+0LPQuNGP0LvRi9KbINC20LDSk9C00LDQuSDQsdC+0LvRi9C/INGC0LDQsdGL0LvQsNC00YsuINCV0YDRgtC1INC20LDRgdGC0LAgICgxLTMg0LbQsNGBKSDQsdCw0YPRi9GAINC/0LDQu9GM0L/QsNGG0LjRj9GB0Ysg0LHQsNGA0YvRgdGL0L3QtNCwINCx0LDRg9GL0YAg0L7RgNGC0LDSo9KT0Ysg0LHSsdKT0LDQvdCwINGB0YvQt9GL0psg0LHQvtC50YvQvdGI0LAgMiDRgdC8INCz0LUg0LTQtdC50ZbQvSDSm9Cw0LHRi9GA0pPQsCDRgtGW0YHQttC10LPRltC90LXQvSDRgtOp0LzQtdC9INCx0L7Qu9GD0Ysg0pvQsNC70YvQv9GC0YsuINCR0rHQuyDQsdCw0LvQsNC90YvSoyDTqdGB0YPRltC90ZbSoyDQttOZ0L3QtSDRltGI0LrRliDQvNKv0YjQu9C10YDRltC90ZbSoyDTqdGB0ZbQvyDQtNCw0LzRg9GL0L3QsCDQsdCw0LnQu9Cw0L3Ri9GB0YLRiyDQtdGA0LXQutGI0LXQu9GW0LouINCR0LDQu9Cw0LvRgNC00LAg0LHQsNGD0YvRgNC00Ysg0L/QsNC70YzQv9Cw0YbQuNGP0LvQsNGDINKv0YjRltC9INC005nRgNGW0LPQtdGAINCx0LDQu9Cw0L3RiyDRgtC10LPRltGBINC20LXRgNCz0LUg0LbQsNGC0pvRi9C30YvQvyDQsdCw0YPRi9GA0YvQvSDQv9Cw0LvRjNC/0LDRhtC40Y/Qu9Cw0LnQtNGLLiDQn9Cw0LvRjNC/0LDRhtC40Y8g05nQtNGW0YHRliDRgtC10YDQtdKjINGB0YvRgNKT0YvQvNCw0LvRiyDQv9Cw0LvRjNC/0LDRhtC40Y8g0LTQtdC/INCw0YLQsNC70LDQtNGLLiDQlNOZ0YDRltCz0LXRgCDRgdC+0Lsg0pvQvtC70YvQvSDQsdC10LvRltC90ZbSoyDQsNGB0YLRi9C90LAg0pvQvtGP0LTRiywg0LDQuyDQvtKjINKb0L7Qu9GL0LzQtdC9INKb0LDQsdGL0YDSk9CwINGC0ZbRgdC20LXQs9GW0L3QtdC9INGC06nQvNC10L3RltGA0LXQuiDQvtGA0YLQsNKj0pPRiyDQsdKx0pPQsNC90LAg0YHRi9C30YvSk9GLINCx0L7QudGL0L3RiNCwINGC0LXRgNC10qPQtNC10YLRltC/INCx0LDRgdGL0L8sINGB0L7RgdGL0L0g0pvQvtC70YvQvSDRgdGL0YDSk9GL0YLRi9C/INCw0LvQsNC00YsuINCc0rHQvdC00LDQuSDQv9Cw0LvRjNC/0LDRhtC40Y8g0LHQsNGA0YvRgdGL0L3QtNCwINCx0LDRg9GL0YDQtNGL0qMg0YLTqdC80LXQvdCz0ZYg0LbQuNC10LPRliwg0LrQvtC90YHQuNGB0YLQtdC90YbQuNGP0YHRiyDQttOZ0L3QtSDQsdC10YLQutC10LnRliDQsNC90YvSm9GC0LDQu9Cw0LTRiy4g0J3QtdCz0ZbQt9GW0L3QtNC1INC/0LDQu9GM0L/QsNGG0LjRjyDQvdOZ0YLQuNC20LXRgdGW0L3QtNC1INCx0LDRg9GL0YAg0YLTqdC80LXQvdCz0ZYg0LbQuNC10LPRliDRgtC10LPRltGBLCDSm9GL0YDQu9GLLCDQutC+0L3RgdC40YHRgtC10L3RhtC40Y/RgdGLINC20rHQvNGB0LDSmywg0LHQtdGC0LrQtdC50ZYg0YLQtdCz0ZbRgSDQsdC+0LvRg9GLINKb0LDQttC10YIuINCQ0Lsg0JHQsNGD0YvRgCDSm9Cw0LHRi9GA0pPQsCDRgtGW0YHQttC10LPRltC90LXQvSAyINGB0Lwg0LTQtdC9INCw0YDRgtGL0psg0YLTqdC80LXQvSDRgtKv0YHRltC/INC20LDRgtGB0LAg0L7QuyDQsdCw0LvQsNC00LDSk9GLINGC0q/RgNC70ZYg0L/QsNGC0L7Qu9C+0LPQuNGP0LvRi9KbINC/0YDQvtGG0LXRgdGB0YLQtdGA0LTRltKjINCw0LnSm9GL0L3QtNCw0pPRi9GIINCx0LXQu9Cz0ZbRgdGWINCx0L7Qu9GD0Ysg0LzSr9C80LrRltC9LCDQvNGL0YHQsNC70Ysg0LHQsNC70LDQu9GA0LTQsNKT0Ysg0LzSsdC90LTQsNC5INC90L7RgNC80LDQtNCw0L0g0LbQvtKT0LDRgNGLINCz0LXQv9Cw0YLQvtC80LXQs9Cw0LvQuNGPINC60LXQt9GW0L3QtNC1INCx0LDQu9Cw0LTQsCDRgdCw0YDSk9Cw0Y7RgyDQsdCw0LnSm9Cw0LvRi9C/LCDQs9C10L/QsNGC0LjRgiDRgi7QsS4g0YLRg9GA0LDQu9GLINC00LXRgNC10Log0LHQtdGA0YPRliDQvNKv0LzQutGW0L0u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915238" table:style-name="ce1">
            <text:p>915238</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S7QotC10L7RgNC10YLQuNGH0LXRgdC60LjQuSDQstC+0L/RgNC+0YE6PGJyIC8+DQrQp9C10Lwg0YXQsNGA0LDQutGC0LXRgNC40LfRg9C10YLRgdGPINGE0LjQt9C40L7Qu9C+0LPQuNGH0LXRgdC60LDRjyDQv9C+0YLQtdGA0Y8g0LzQsNGB0YHRiyDRgtC10LvQsCDRgyDQtNC+0L3QvtGI0LXQvdC90YvRhSDQvdC+0LLQvtGA0L7QttC0INC4INC60LDQutC+0Lkg0L/RgNC+0YYg0YHQvtGB0YLQsNCy0LvRj9C10YI/PGJyIC8+DQrQktGL0YHQvtC60LjQuSDQvNC10YLQsNCx0L7Qu9C40LfQvCAsINC/0L7RgtC10YDRjyDQttC40LTQutC+0YHRgtC4ICwg0YHQu9Cw0LHQsNGPINGC0LXRgNC80L7RgNC10LPRg9C70Y/RhtC40Y8gPGJyIC8+DQrQpNC40LfQuNC+0LvQvtCz0LjRh9C10YHQutCw0Y8g0L/QvtGC0LXRgNGPINC80LDRgdGB0Ysg0YLQtdC70LAg0YHQvtGB0YLQsNCy0LvRj9C10YIg0L/RgNC40LzQtdGA0L3QviA1LTgg0L/RgNC+0YbQtdC90YLQvtCyINC+0YIg0LzQsNGB0YHRiyDRgtC10LvQsCDRgyDQvdC+0LLQvtGA0L7QttC0INC4INGN0YLQviDRj9Cy0LvRj9C10YLRgdGPINC90L7RgNC80L7QuSAsINCy0LXQtNGMINC90LDRh9C40L3QsNC10YLRgdGPINCw0LrRgtC40LLQsNGG0LjRjyDQv9GA0L7RhtC10YHRgdC+0LIg0LLRgdC10YUg0L7RgNCz0LDQvdC+0LIg0Lgg0YHQuNGB0YLQtdC8INGH0LXQu9C+0LLQtdGH0LXRgdC60L7Qs9C+INC+0YDQs9Cw0L3QuNC30LzQsCAuINCU0LDQvdC90YvQuSDQv9GA0L7RhtC10YHRgSDQv9GA0L7QuNGB0YXQvtC00LjRgiDQv9C+0YHQu9C1INGA0L7QttC00LXQvdC40Y8g0L3QsCAzLTUg0YHRg9GC0LrQuCDQv9C+0YHQu9C1INGA0L7QttC00LXQvdC40Y8gLiDQn9GA0L7QuNGB0YXQvtC00LjRgiDRg9C00LDQu9C10L3QuNC1INC4INC40YHQv9Cw0YDQtdC90LjQtSDQstGB0LXRhSDQttC40LTQutC+0YHRgtC10Lkg0Lgg0L/RgNC+0LTRg9C60YLQvtCyINCy0L3Rg9GC0YDQuNGD0YLRgNC+0LHQvdC+0Lkg0LbQuNC30L3QtdC00LXRj9GC0LXQu9GM0L3QvtGB0YLQuCAsINGC0LDQutC40YUg0LrQsNC6INC80LXQutC+0L3QuNC5ICgg0L/QtdGA0LLQuNGH0L3Ri9C5INC60LDQuyApIC4g0J3QsNGH0LjQvdCw0LXRgtGB0Y8g0LDQutGC0LjQstCw0YbQuNGPINC/0YDQvtGG0LXRgdGB0L7QsiDQtNGL0YXQsNC90LjRjyAsINGD0LTQsNC70Y/QtdGC0YHRjyDQstGB0Y8g0LLQu9Cw0LPQsCDQuNC3INC70LXQs9C60LjRhSDQuCDQtNGL0YXQsNGC0LXQu9GM0L3Ri9GFINC/0YPRgtC10Lkg0Y3RgtC+INC+0L/RgNC10LTQtdC70Y/QtdGC0YHRjyDQvdC10LTQvtGB0YLQsNGC0L7Rh9C90L7RgdGC0YzRjiDQtNGL0YXQsNC90LjRjyAuINCf0YDQsNC60YLQuNGH0LXRgdC60Lgg0LLRgdC1INC00LXRgtC4INCy0L7RgdGB0YLQsNC90LDQstC70LjQstCw0Y7RgiDQvNCw0YHRgdGDINGC0LXQu9CwINC90LAg0L/QtdGA0LLQvtC5IC0g0LLRgtC+0YDQvtC5INC90LXQtNC10LvQtSDQttC40LfQvdC4IC4g0KDQsNC90L3QtdC1INC60L7RgNC80LvQtdC90LjQtSAs0YfQtdGA0LXQtyAyINGH0LDRgdCwINC/0L7RgdC70LUg0L/RgNC+0YbQtdGB0YHQsCDRgNC+0LbQtNC10L3QuNGPINC4INC/0YDQuNC60LvQsNC00YvQstCw0L3QuNGPINC6INCz0YDRg9C00Lgg0YHQv9C+0YHQvtCx0YHRgtCy0YPQtdGCINC60L7QvNC/0LXQvdGB0LjRgNC+0LLQsNGC0Ywg0L/QvtGC0LXRgNC4INGE0LjQt9C40L7Qu9C+0LPQuNGH0LXRgdC60L7QuSDRg9Cx0YvQu9C4IC4g0KLQsNC60LbQtSDQvNCw0LzQvtGH0LrQsNC8INGB0YLQvtC40YIg0LLRgdC10LPQtNCwINC/0L7QvNC90LjRgtGMINC+INC/0LvQvtGF0L7QuSDRgtC10YDQvNC+0YDQtdCz0YPQu9GP0YbQuNC4INGDINC80LDQu9C10L3RjNC60LjRhSDQtNC10YLQtdC5ICwg0YfRgtC+INC90YPQttC90L4g0LrQvtC80L/QtdC90YHQuNGA0L7QstCw0YLRjCDQv9C40YLQsNC90LjQtdC8INC4INC90LUg0LfQsNCx0YvQstCw0YLRjCDQviDQvdC10L7QsdGF0L7QtNC40LzQvtGB0YLQuCDQtNCw0LLQsNGC0Ywg0LLQvtC00YMg0LTQtdGC0Y/QvCAuINCc0LDRgdGB0LAg0YPQsdGL0LvQuCDRgtC10LvQsCDQvNC+0LbQtdGCINGD0LLQtdC70LjRh9C40LLQsNGC0YzRgdGPINC/0YDQuCDQvdC10LTQvtGB0YLQsNGC0L7Rh9C90L7QvCDQutC+0LvQuNGH0LXRgdGC0LLQtSDQvNC+0LvQvtC60LAg0YMg0LzQsNGC0LXRgNC4LCDRh9GC0L4g0LzQvtC20L3QviDQutC+0YDRgNC10LrRgtC40YDQvtCy0LDRgtGMINGB0LzQtdGB0Y/QvNC4INGB0L/QtdGG0LjQsNC70YzQvdC+INC/0L7QtNC+0LHRgNCw0L3QvdGL0LzQuCDQtNC70Y8g0L7Qv9GA0LXQtNC10LvQtdC90L3QvtCz0L4g0YHQu9GD0YfQsNGPINC4INCy0L7Qt9GA0LDRgdGC0LAg0LTQuNGC0Y8gLjxiciAvPg0KPGJyIC8+DQoyLiDQmtC70LjQvdC40YfQtdGB0LrQsNGPINC30LDQtNCw0YfQsDog0JzQsNC70YzRh9C40LogLDIg0LPQvtC00LAg0YEg0YPQstC10LvQuNGH0LXQvdC40LXQvCDQv9C10YfQtdC90Lgg0L3QsCAyINGB0Lwg0LjQtyDQv9C+0LQg0LrRgNCw0Y8g0YDQtdCx0LXRgNC90L7QuSDQtNGD0LPQuCAuIDxiciAvPg0K0K3RgtC+INGP0LLQu9GP0LXRgtGB0Y8g0L3QvtGA0LzQvtC5INC00LvRjyDRgNC10LHQtdC90LrQsCDQtNCw0L3QvdC+0LPQviDQstC+0LfRgNCw0YHRgtCwICwg0LLQtdC00Ywg0L/QtdGH0LXQvdGMINC40LzQtdC10YIg0YDQsNC30LzQtdGAINC+0YLQvdC+0YHQuNGC0LXQu9GM0L3QviDQsdC+0LvRjNGI0LUgLCDRh9C10Lwg0YMg0LLQt9GA0L7RgdC70L7Qs9C+INGH0LXQu9C+0LLQtdC60LAgLjxiciAvPg0K0JDQvdCw0YLQvtC80LjRh9C10YHQutC40LUg0LPRgNCw0L3QuNGG0Ysg0L/QsNC70YzQv9Cw0YbQuNC4INC90LjQttC90LXQs9C+INC60YDQsNGPINC/0LXRh9C10L3QuCDRgyDQtNC10YLQtdC5INCy0L7Qt9GA0LDRgdGC0LAgMyDQu9C10YIg0Lgg0LzQtdC90YzRiNC1IC4gPGJyIC8+DQrQntC90Lgg0L7Qv9GA0LXQtNC10LvRj9GO0YLRgdGPINC/0L4gINC/0YDQsNCy0L7QuSDRgdGC0L7RgNC+0L3QtSDRgdGA0LXQtNC90LXQutC70Y7Rh9C40YfQvdC+0Lkg0LvQuNC90LjQuCDQv9GD0YLQtdC8INC/0LDQu9GM0L/QsNGG0LjQuCAsINC90LDRhdC+0LTRjyDRg9C/0LvQvtGC0L3QtdC90LjQtSAsINC90L4g0LTQtdC70LDRgtGMINGN0YLQviDQvdGD0LbQvdC+INC/0YDQtdC00LXQu9GM0L3QviDQsNC60LrRg9GA0LDRgtC90L4gLCDQstC10LTRjCDRgtC60LDQvdC4INC+0YDQs9Cw0L3QvtCyINC90LDQvNC90L7Qs9C+INC90LXQttC90LXQtSAsINGH0LXQvCDRgyDQstC30YDQvtGB0LvRi9GFICwg0YfRgtC+INC90LDQtNC+INGD0YfQuNGC0YvQstCw0YLRjCDQv9GA0Lgg0L/RgNC+0LLQtdC00LXQvdC40Lgg0LTQsNC90L3Ri9GFINC40YHRgdC70LXQtNC+0LLQsNC90LjQuSDRh9GC0L7QsdGLINC90LUg0L/RgNC40L3QtdGB0YLQuCDQsdC+0LvQtdC30L3QtdC90L3Ri9GFINC+0YnRg9GJ0LXQvdC40Lkg0Lgg0L3QtSDQvdCw0L3QtdGB0YLQuCDQstGA0LXQtCDQt9C00L7RgNC+0LLRjNGOINGA0LXQsdC10L3QutCwIC4g0JXRgdC70Lgg0YHRgNCw0LLQvdC40LLQsNGC0Ywg0YEg0LTQtdGC0YzQvNC4INCy0L7Qt9GA0LDRgdGCIDUtNyDQu9C10YIg0YLQviDQvNC+0LbQvdC+INGD0LrQsNC30LDRgtGMINGC0L7RgiDRhNCw0LrRgiDRh9GC0L4g0YPRgNC+0LLQtdC90Ywg0LjRhSDQv9C10YfQtdC90Lgg0L3QsNGF0L7QtNC40YLRgdGPINC/0YDRj9C8INC/0L4g0LvQuNC90LjQuCDRgNC10LHQtdGA0L3QvtC5INC00YPQs9C4INC4INC90LUg0LLRi9GB0YLRg9C/0LDQtdGCINC30LAg0L3QtdC1ICwg0LXRgdC70Lgg0L3QtSDQuNC80LXQtdGC0YHRjyDQv9Cw0YLQvtC70L7Qs9C40Lkg0YHQstGP0LfQsNC90L3Ri9GFINGBINGN0YLQuNC8INC+0YDQs9Cw0L3QvtC8IC48YnIgLz4NCtCi0LDQutC40Lwg0L7QsdGA0LDQt9C+0Lwg0LIg0L3QsNGI0LXQvCDRgdC70YPRh9Cw0LUg0YPQstC10LvQuNGH0LXQvdC40LUg0L/QtdGH0LXQvdC4INGP0LLQu9GP0LXRgtGB0Y8g0L3QvtGA0LzQvtC5INC00LvRjyDQstC+0LfRgNCw0YHRgtCwINGD0LrQsNC30LDQvdC90L7Qs9C+INC/0LDRhtC40LXQvdGC0LAgL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2" table:style-name="ce1">
            <text:p>915322</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i4g0KMg0LTQtdGC0LXQuSAzLdGFINC70LXRgiDQvdC40LbQvdC40Lkg0LrRgNCw0LkgINC/0LXRh9C10L3QuCDQv9Cw0LvRjNC/0LjRgNGD0LXRhtCwICDQvdCwINGD0YDQvtCy0L3QtSDRgdGA0LXQtNC40L3QviDQutC70Y7Rh9C40YfQtdC90L7QuSDQu9C40L3QuNC4INGBINC/0YDQsNCy0LAg0L3QsCAxLTPRgdC8INC90LjQttC1INGA0LXQsdC10YDQvdC+0Lkg0LTRg9Cz0LgsINC10LUg0L3QuNC20L3Rj9GPINCz0YDQsNC90LjRhtCwINCy0YvRhdC+0LTQuNGCINC40Lcg0L/QvtC0INC/0YDQsNCy0L7Qs9C+INC/0L7QtNGA0LXQsdC10YDRjNGPINC90LAgMiDRgdC8INGN0YLQviDRgdCy0Y/Qt9Cw0L3QviDRgSDRgtC10Lwg0YfRgtC+INC80LDRgdGB0LAg0YLQtdC70LAg0Lgg0LzQsNGB0YHQsCDQv9C10YfQtdC90Lgg0YMg0LTQtdGC0LXQuSDRg9Cy0LXQu9C40YfQuNCy0LDQtdGC0YHRjyDQv9C+INGA0LDQt9C90L7QvNGDLCDRgtCw0LrQttC1INGN0YLQviDRgdCy0Y/Qt9Cw0L3QviDRgSDQsdC+0LvQtdC1INC+0LHQuNC70YzQvdGL0Lwg0LrRgNC+0LLQvtGB0L3QvtCx0LbQtdC90LjQtdC8ICDQsiDQv9C10YfQtdC90Lgg0YMg0LTQtdGC0LXQuSwg0YLQtdC8INGB0LDQvNGL0Lwg0YHQv9C+0YHQvtCx0YHRgtCy0YPRjyDQtdC1INGD0LLQtdC70LjRh9C10L3QuNGOLiDQotCw0LrQttC1INC/0YDQviDQs9GA0LDQvdC40YbRiyDQvNC+0LbQvdC+INC00L7QsdCw0LLQuNGC0Ywg0YfRgtC+INC/0L4g0L/QtdGA0LXQtNC90LXQuSDRgdGA0LXQtNC90LXQuSDQu9C40L3QuNC4INC90LjQttC90LjQuSDQutGA0LDQuSDQvNC+0LbQtdGCINC90LDRhdC+0LTQuNGC0YHRjyDQvNC10LbQtNGDINGD0YDQvtCy0L3QtdC8INGB0YDQtdC00LjQvdGLINGA0LDRgdGB0YLQvtGP0L3QuNGPINC80LXQttC00YMg0L/Rg9C/0LrQvtC8INC4INC80LXRh9C10LLQuNC00L3Ri9C8INC+0YLRgNC+0YHRgtC60L7QvC4g0J/QviDQu9C10LLQvtC5INGA0LXQsdC10YDQvdC+0Lkg0LTRg9Cz0LUg0LTQvtGB0YLQuNCz0LDQtdGCINC/0YDQuNC80LXRgNC90L4g0YPRgNC+0LLQvdGPINC70LXQstC+0Lkg0L/QsNGA0LDRgdGC0LXRgNC90LDQu9GM0L3QvtC5INC70LjQuNC90LjQuCDQvdC1INC00L7RhdC+0LTRjyDQtNC+INC60YDQsNGPINGA0LXQsdC10YDQvdC+0Lkg0LTRg9Cz0LguICA8YnIgLz4NCjEu0J3QsCDQv9C+0YLQtdGA0Y4g0LzQsNGB0YHRiyDRgtC10LvQsCDRgyDQvdC+0LLQvtGA0L7QttC00LXQvdC90YvRhSDQvtCx0YvRh9C90L4g0LLQu9C40Y/QtdGCINC/0L7RgtC10YDRjyDQttC40LTQutC+0YHRgtC4LCDRgdCw0LzQsCDQv9C+0YLQtdGA0Y8g0LzQsNGB0YHRiyDRgtC10LvQsCDQvdCw0YfQuNC90LDQtdGC0YHRjyDQvdCwIDMtNCDQtNC10L3RjCDQttC40LfQvdC4INC10LUg0L/QvtGC0LXRgNGPINGB0L7RgdGC0LDQstC70Y/QtdGCIDctOCUuINCe0YHQvdC+0LLQvdCw0Y8g0L/RgNC40YfQuNC90LAg0L/QvtGC0LXRgNGPINC30LDQutC70Y7Rh9Cw0LXRgtGB0Y8g0LIg0YLQvtC8INGH0YLQviDQv9GA0Lgg0LTRi9GF0LDQvdC40Lgg0YPRhdC+0LTQuNGCINCx0L7Qu9GM0YjQvtC1INC60L7Qu9C40YfQtdGB0YLQstC+INC20LjQtNC60L7RgdGC0Lgg0YfQtdGA0LXQtyDQutC+0LbRgywg0L/RgNC4INGN0YLQvtC8INC90LXRgiDQv9C+0YHRgtGD0L/Qu9C10L3QuNGPINC10LUg0LjQtyDQstC90LUuINCi0LDQutC20LUg0L/QvtGC0LXRgNGPINC80LDRgdGB0Ysg0YLQtdC70LAg0LzQvtC20LXRgiDQsdGL0YLRjCDRgdCy0Y/Qt9Cw0L3QvdC+INGBINC/0LXRgNC10LPRgNC10LLQsNC90LjQtdC8INC90L7QstC+0YDQvtC20LTRkdC90L3Ri9C5LCDRgtCw0Log0LrQsNC6INCyINGC0LDQutC+0Lwg0LLQvtC30YDQsNGB0YLQtSDQotC10L/Qu9C+0L7RgtC00LDRh9CwINC00L7QvNC40L3QuNGA0YPQtdGCINC90LDQtCDRgtC10L/Qu9C+0L/RgNC+0LTRg9C60YbQuNC10LksINC40Lcg0LfQsCDRgdC70LDQsdC+0Lkg0YDQsNC30LLQuNGC0L7RgdGC0Lgg0YLQtdGA0LzQvtGA0LXQs9GD0LvRj9GC0L7RgNC90L7Qs9C+INGG0LXQvdGC0YDQsCDQsiDQvNC+0LfQs9GDLCDRh9GC0L4g0LzQvtC20LXRgiDQv9GA0LjQstC10YHRgtC4INC6INC/0LXRgNC10LPRgNC10LLQsNC90LjRjiDQvNCw0LvRi9GI0LAg0Lgg0L/QvtGC0LXRgNGOINC10YnQtSDQsdC+0LvRjNGI0LXQs9C+INC60L7Qu9C40YfQtdGB0YLQstCwINC20LjQtNC60L7RgdGC0LgsINGC0LXQvCDRgdCw0LzRi9C8INC10YnQtSDRgdC40LvRjNC90LXQtSDRg9C80LXQvdGM0YjQsNC10YLRgdGPINC80LDRgdGB0LAg0YLQtdC70LAuICDQotCw0LrQttC1INC40Lcg0LLQvdC1INC90L7QstC+0YDQvtC20LTQtdC90L3Ri9C5INC80L7QttC10YIg0L3QtSDQv9C+0LvRg9GH0LDRgtGMINC00L7RgdGC0LDRgtC+0YfQvdC+0LUg0LrQvtC70LjRh9C10YHRgtCy0L4g0LzQsNGC0LXRgNC40L3RgdC60L7Qs9C+INC80L7Qu9C+0LrQsCwg0YLQtdC8INGB0LDQvNGL0Lwg0L3QtSDQstC+0YHQv9C+0LvQvdGP0Y8g0L3QtdC+0LHRhdC+0LTQuNC80YvQuSDQvtCx0YrQtdC8INC20LjQtNC60L7RgdGC0Lgg0LIg0L7RgNCz0LDQvdC40LfQvNC1LCDQvdC+INC60YDQvtC80LUg0LzQvtC70L7QutCwINGA0LXQsdC10L3QutGDINC10YnQtSDQvdC10L7QsdGF0L7QtNC40LzQviDQtNCw0LLQsNGC0Ywg0LLQvtC00YMg0YfRgtC+INCx0Ysg0LjQt9Cx0LXQttCw0YLRjCDQv9C10YDQtdCz0YDQtdCy0LDQvdC40Y8uINCd0L4g0YPQttC1INC6IDctMTAg0LTQvdGOINC80LDRgdGB0LAg0L/QvtC70L3QvtGB0YLRjNGOINC90L7RgNC80LDQu9C40LfRg9C10YLRgdGPLtCV0YnQtSDQryDRh9C40YLQsNC7INGH0YLQviDQv9C+0YHQu9C1INGA0L7QttC00LXQvdC40Y8sINC60L7Qs9C00LAg0LzQsNC80LAg0L/RgNC40LrQu9Cw0LTRi9Cy0LDQtdGCINGA0LXQsdC10L3QutCwINC6INCz0YDRg9C00Lgg0YPQttC1INC40LTQtdGCINCy0L7RgdC/0L7Qu9C90LXQvdC40LUg0LTQsNC90L3QvtC5INC/0L7RgtC10YDQuCDQstC10YHQsCwg0LAg0YLQvtGH0L3QtdC1INGB0L/QvtGB0L7QsdGB0YLQstGD0LXRgiDQvNC10L3RjNGI0LjQvCDQtdCz0L4g0L/QvtGC0LXRgNGP0Lw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68" table:style-name="ce1">
            <text:p>915368</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S4g0KTQuNC30LjQvtC70L7Qs9C40YfQtdGB0LrQsNGPINC/0L7RgtC10YDRjyDQvNCw0YHRgdGLINGC0LXQu9CwINGDINC00L7QvdC+0YjQtdC90L3Ri9GFINC90L7QstC+0YDQvtC20LTQtdC90L3Ri9GFLdGN0YLQviDQtdGB0YLQtdGB0YLQstC10L3QvdGL0Lkg0L/RgNC+0YbQtdGB0YEsINC60L7RgtC+0YDRi9C5INC/0YDQvtC40YHRhdC+0LTQuNGCINCyINC/0LXRgNCy0YvQtSDQtNC90Lgg0LbQuNC30L3QuCDRgNC10LHQtdC90LrQsC4g0J7RgdC90L7QstC90YvQtSDRhdCw0YDQsNC60YLQtdGA0LjRgdGC0LjQutC4INGN0YLQvtCz0L4g0Y/QstC70LXQvdC40Y86INCf0L7RgtC10YDRjyDQvNCw0YHRgdGLLiDQntC90LAg0L3QsNCx0LvRjtC00LDQtdGC0YHRjyDQv9C10YDQstGL0LUgMy01INGB0YPRgtC+0Log0L/QvtGB0LvQtSDRgNC+0LbQtNC10L3QuNGPINC4INC+0LHRi9GH0L3QviDQv9GA0LXQutGA0LDRidCw0LXRgtGB0Y8g0LogNy0xMCDQtNC90Y4g0LbQuNC30L3QuC4g0J/RgNC40YfQuNC90LDQvNC4INC/0L7RgtC10YDQuCDQvNCw0YHRgdGLINC80L7Qs9GD0YIg0LHRi9GC0Yw60L/QvtGC0LXRgNGPINC20LjQtNC60L7RgdGC0Lgg0YfQtdGA0LXQtyDQtNGL0YXQsNC90LjQtSzQutC+0LbRgyzQvNC+0YfQvtC5INC4INGB0L3QuNC20LXQvdC40LUg0YHQvtC00LXRgNC20LDQvdC40LUg0LzQtdC60L7QvdC40Y8g0Lgg0YHRgNGL0LPQuNCy0LDQvdC40LUg0YDQtdCx0LXQtdC90LrQsC4g0J3QtdCx0L7Qu9GM0YjQvtC1INC90LXQtNC+0L/QvtC70YPRh9C10L3QuNC1INC/0LjRgtCw0L3QuNC1INCyINC/0LXRgNCy0YvQtSDQtNC90Lgg0LbQuNC30L3QuCDQv9GA0L7QuNGB0YXQvtC00LjRgiDQuNC3INC30LAg0LDQtNCw0L/RgtCw0YbQuNC4INCz0YDRg9C00L3QvtCz0L4g0LLRgdC60LDRgNC80LvQuNCy0LDQvdC40Y8uINCSINC90L7RgNC80LUg0YTQuNC30LjQvtC70L7Qs9C40YfQtdGB0LrQsNGPINC/0L7RgtC10YDRjyDQvNCw0YHRgdGLINGC0LXQu9CwINC00L7QvdC+0YjQtdC90L3QvtCz0L4g0YDQtdCx0LXQvdC60LAg0YHQvtGB0YLQsNCy0LvRj9C10YIgNS04ICUg0L7RgiDQvNCw0YHRgdGLINGC0LXQu9CwINC/0YDQuCDRgNC+0LbQtNC10L3QuNC4LiDQlNC+0L/Rg9GB0YLQuNC80YvQuSDQvNCw0LrRgdC40LzRg9C8INC90LUg0LHQvtC70LXQtSAxMCAlLiDQn9C+0YHQu9C1INGN0YLQvtCz0L4g0L/QtdGA0LjQvtC00LAg0LTQvtC90L7RiNC10L3QvdGL0LUg0L3QvtCy0L7RgNC+0LbQtNC10L3QvdGL0LUg0L3QsNGH0LjQvdCw0Y7RgiDQvdCw0LHQuNGA0LDRgtGMINC80LDRgdGB0YMg0YLQtdC70LAsINC4INC6IDctMTAg0LTQvdGOINC20LjQt9C90Lgg0LTQvtGB0YLQuNCz0LDRjtGCINC40YHRhdC+0LTQvdGL0YUg0L/QvtC60LDQt9Cw0YLQtdC70LXQuS4g0J3QtdC00L7QvdC+0YjQtdC90L3Ri9C1IDctMTQg0LTQvdC10LkuINCV0YHQu9C4INC/0L7RgtC10YDRjyDQvNCw0YHRgdGLINGC0LXQu9CwINC/0YDQtdCy0YvRiNCw0LXRgiAxMCUg0LjQu9C4INCy0L7RgdGB0YLQsNC90L7QstC70LXQvdC40LUg0L/RgNC+0LjRgdGF0L7QtNC40YIg0LzQtdC00LvQtdC90L3Qviwg0Y3RgtC+INC80L7QttC10YIg0L/QvtGC0YDQtdCx0L7QstCw0YLRjCDQtNC+0L8g0L7QsdGB0LvQtdC00L7QstCw0L3QuNGPLCDQtNC70Y8g0LjRgdC60LvRjtGH0LXQvdC40Lkg0L/QsNGC0L7Qu9C+0LPQuNC5LCDQvdCw0L/RgNC40LzQtdGAINC/0YDQvtCx0LvQtdC8INGBINC60L7RgNC80LvQtdC90LjQtdC8ICDQuNC70Lgg0L7QsdC10LfQstC+0LbQuNCy0LDQvdC40LUuICAgICAgICAgICAgICAgICAgICAgPGJyIC8+DQo8YnIgLz4NCjIuINCjINC00LXRgtC10Lkg0LTQviAzLdGFINC70LXRgiDQv9C10YfQtdC90Ywg0YTQuNC30LjQvtC70L7Qs9C40YfQtdGB0LrQuCDQvdC10LzQvdC+0LPQviDQsdC+0LvRjNGI0LUsINC/0L4g0YHRgNCw0LLQvdC10L3QuNGOINGB0L4g0LLQt9GA0L7RgdC70YvQvNC4LiDQmNC3LdC30LAg0L7RgdC+0LHQtdC90L3QvtGB0YLQtdC5INGA0L7RgdGC0LAg0Lgg0YDQsNC30LLQuNGC0LjRjy4g0KMg0LTQtdGC0LXQuSDQtNC+IDMt0YUg0LvQtdGCINC90LjQttC90LjQuSDQutGA0LDQuSDQv9C10YfQtdC90Lgg0LzQvtC20L3QviDQv9Cw0LvRjNC/0LjRgNC+0LLQsNGC0Ywg0L3QuNC20LUg0YDQtdCx0LXRgNC90L7QuSDQtNGD0LPQuC4g0K3RgtC+INGB0LLRj9C30LDQvdC+INGBINC40L3RgtC10L3RgdC40LLQvdGL0Lwg0L7QsdC80LXQvdC+0LIg0LLQtdGJ0LXRgdGC0LIg0Lgg0LDQutGC0LjQstC90L7QuSDRhNGD0L3QutGG0LjQuCDQv9C10YfQtdC90Lgg0LIg0LzQu9Cw0LTQtdC90YfQtdGB0LrQvtC8INC4INGA0LDQvdC90LXQvCDQtNC10YLRgdC60L7QvCDQstC+0LfRgNCw0YHRgtC1LiDQn9GA0LDQstCw0Y8g0YDQtdCx0LXRgNC90LDRjyDQtNGD0LPQsCDRjdGC0L4g0L7RgdC90L7QstC90LDRjyDQstC10YDRhdC90Y/RjyDQsNC90LDRgtC+0LzQuNGH0LXRgdC60LDRjyDQs9GA0LDQvdC40YbQsCwg0L3QuNC20L3QuNC5INC60YDQsNC5INC/0LXRh9C10L3QuCDRgyDQtNC10YLQtdC5INGN0YLQvtCz0L4g0LLQvtC30YDQsNGB0YLQsCDQvtCx0YvRh9C90L4g0L/QsNC70YzQv9C40YDRg9C10YLRgdGPINC90LAgMS0yINGB0Lwg0L3QuNC20LUg0L/RgNCw0LLQvtC5INGA0LXQsdC10YDQvdC+0Lkg0LTRg9Cz0Lgg0L/QviDRgdGA0LXQtNC90LXQuSDQutC70Y7Rh9C40YfQvdC+0Lkg0LvQuNC90LjQuC4g0J/QviDRgdGA0LXQtNC40L3QvdC+0Lkg0LvQuNC90LjQuCDQttC40LLQvtGC0LAg0L/QtdGH0LXQvdGMINC80L7QttC10YIg0L/RgNC+0YnRg9C/0YvQstCw0YLRjNGB0Y8g0L3QsCDRg9GA0L7QstC90LUg0L/Rg9C/0LrQsCDQuNC70Lgg0YfRg9GC0Ywg0L3QuNC20LUg0L/Rg9C/0LrQsCDQsiDQt9Cw0LLQuNGB0LjQvNC+0YHRgtC4INC+0YIg0LrQvtC90YHRgtC40YLRg9GG0LjQuCDRgNC10LHQtdC90LrQsC4g0J/QviDQu9C10LLQvtC5INGA0LXQsdC10YDQvdC+0Lkg0LTRg9Cz0LUg0L3QuNC20L3QuNC5INC60YDQsNC5INC/0LXRh9C10L3QuCDQvtCx0YvRh9C90L4g0L3QtSDQstGL0YXQvtC00LjRgiDQt9CwINC10LUg0L/RgNC10LTQtdC70YsuINCt0YLQviDQvtCx0YPRgdC70L7QstC70LXQvdC+INC+0YHQvtCx0LXQvdC90L7RgdGC0Y/QvNC4INGA0LDRgdC/0L7Qu9C+0LbQtdC90LjRjyDQvtGA0LPQsNC90L7QsiDQsdGA0Y7RiNC90L7QuSDQv9C+0LvQvtGB0YLQuCjQvtGC0L3QvtGB0LjRgtC10LvRjNC90L4g0L3QtdCx0L7Qu9GM0YjQvtC5INGA0LDQt9C80LXRgCDQs9GA0YPQtNC90L7QuSDQutC70LXRgtC60Lgg0Lgg0LTQuNCw0YTRgNCw0LPQvNGLKS4g0J/RgNC4INC/0LDQu9GM0L/QsNGG0LjQuCAg0LrQvtC90YHQuNGB0YLQtdC90YbQuNGPINC80Y/Qs9C60LDRjywg0YDQvtCy0L3QsNGPLCDQs9C70LDQtNC60LDRjywg0LHQtdC30LHQvtC70LXQt9C90LXQvdC90LDRjy4g0KLQsNC60LjQvCDQvtCx0YDQsNC30L7QvCDRgyDQvNCw0LvRjNGH0LjQutCwIDIt0YUg0LvQtdGCINGD0LLQtdC70LjRh9C10L3QuNC1INC/0LXRh9C10L3QuCDQvdCwIDIg0YHQvCDQuNC3INC/0L7QtCDRgNC10LHQtdGA0L3QvtC5INC00YPQs9C4INCz0L7QstC+0YDQuNGCINC90LDQvCDQviDRhNC40LfQuNC+0LvQvtCz0LjRh9C10YHQutC+0Lkg0L3QvtGA0LzQtSDQtNC70Y8g0LTQsNC90L3QvtCz0L4g0LLQvtC30YDQsNGB0YLQsCwg0L3QviDRgtGA0LXQsdGD0LXRgiDQtNC40L3QsNC80LjRh9C10YHQutC+0LPQviDQvdCw0LHQu9GO0LTQtdC90LjQtSDQtNC70Y8g0LjRgdC60LvRjtGH0LXQvdC40LUg0L/QsNGC0L7Qu9C+0LPQuNC5KNCy0LjRgNGD0YEg0LPQtdC/0LDRgtC40YIsINC80LXRgtCw0LHQvtC70LjRh9C10YHQutC40LUg0L3QsNGA0YPRiNC10L3QuNGPLCDQv9Cw0YDQsNC30LjRgtCw0YDQvdGL0LUg0LfQsNCx0L7Qu9C10LLQsNC90LjRjyDQuCDQvtC/0YPRhdC+0LvQtdCy0YvQtSDQv9GA0L7RhtC10YHRgdGLKS4g0JogNy04INCz0L7QtNCw0Lwg0L/QtdGH0LXQvdGMINGA0LXQsdC10L3QutCwINC/0YDQuNC90LjQvNCw0LXRgiDQvNC+0YDRhNC+0LvQvtCz0LjRh9C10YHQutC+0LUg0Lgg0LPQuNGB0YLQvtC70L7Qs9C40YfQtdGB0LrQvtC1INGB0YLRgNC+0LXQvdC40LUg0YLQsNC60L7QtSDQutCw0Log0YMg0LLQt9GA0L7RgdC70L7Qs9C+INGH0LXQu9C+0LLQtdC60LAuIC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9" table:style-name="ce1">
            <text:p>1066919</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S4g0KTQuNC30LjQvtC70L7Qs9C40YfQtdGB0LrQsNGPINC/0L7RgtC10YDRjyDQvNCw0YHRgdGLINGC0LXQu9CwINGP0LLQu9GP0LXRgtGB0Y8g0L3QvtGA0LzQvtC5INGDINC90L7QstC+0YDQvtC20LTQtdC90L3Ri9GFLCDQutC+0YLQvtGA0YvQtSDRgNC+0LTQuNC70LjRgdGMINCyINGB0YDQvtC6LiDQrdGC0L4g0YLQsNC60LbQtSDQsdGD0LTQtdGCINC90L7RgNC80L7QuSDQv9GA0Lgg0YDQsNC90L3QuNGFINGA0L7QtNCw0YUg0LjQu9C4INGDINC00LXRgtC10Lkg0YDQvtC20LTQtdC90L3Ri9C1INGF0LjRgNGD0YDQs9C40YfQtdGB0LrQuNC8INCy0LzQtdGI0LDRgtC10LvRjNGB0YLQstC+0LwgKNC60LXRgdCw0YDRj9GC0LApLCDQvtC00L3QsNC60L4g0YEg0L7Qs9C+0LLQvtGA0LrQsNC80LguINCSINGG0LXQu9C+0LwsINC/0L7RgtC10YDRjyDQvNCw0YHRgdGLINGC0LXQu9CwINC90LUg0Y/QstC70Y/QtdGC0YHRjyDQsdC+0LvRjNGI0L7QuSwg0LAg0LTQvtGB0YLQuNCz0LDQtdGCINC80LDQutGB0LjQvNCw0LvRjNC90L4g0LvQuNGI0Ywg0LTQtdGB0Y/RgtC4INC/0YDQvtGG0LXQvdGC0L7QsiDQstGB0LXQuSDQvNCw0YHRgdGLINGC0LXQu9CwINGA0LXQsdC10L3QutCwICjQtdGB0LvQuCDQstC30Y/RgtGMINGH0YLQviDRgNC10LHQtdC90L7QuiDRgNC+0LTQuNC70YHRjyDRgSDQstC10YHQvtC8IDM0MDDQsywg0YLQviDQvNCw0LrRgdC40LzQsNC70YzQvdCw0Y8g0L/QvtGC0LXRgNGPINGB0L7RgdGC0LDQstC40YIgLSAzNDDQsykuINCe0LTQvdCw0LrQviDRh9Cw0YnQtSDQstGB0LXQs9C+INC/0YDQvtGG0LXQvdGCINGB0L7RgdGC0LDQstC70Y/QtdGCINC+0YIg0L/Rj9GC0Lgg0LTQviDRgdC10LzQuC4g0KLQtdC/0LXRgNGMINC/0LXRgNC10LnQtNC10Lwg0Log0YHQsNC80LjQvCDQv9GA0LjRh9C40L3QsNC8INGB0L3QuNC20LXQvdC40Lgg0LzQsNGB0YHRiyDRgtC10LvQsCDRgNC10LHQtdC90LrQsCAsINGN0YLQviDQstC+INC/0LXRgNCy0YvRhSDQstGL0LTQtdC70LXQvdC40LUg0LzQtdC60L7QvdC40Y8sINGC0LXQvNC90L7Qs9C+INC30LXQu9C10L3QvtCz0L4gKNCx0LjQu9C70LXQstC10YDQtNC40L0pLCDQtNC10LPRgtC10L7QsdGA0LDQt9C90L7Qs9C+INC/0LXRgNCy0LjRh9C90L7Qs9C+INGB0YLRg9C70LAg0L3QvtCy0L7RgNC+0LbQtNC10L3QvdGL0YUsINC60L7RgtC+0YDRi9C5INGE0L7RgNC80LjRgNGD0LXRgtGB0Y8g0LLQvdGD0YLRgNC40YPRgtGA0L7QsdC90L4sINC4INC+0LHRj9C30LDRgtC10LvRjNC90L4g0LTQvtC70LbQtdC9INCy0YvQudGC0LgsINGH0YLQviDQv9C+0LrQsNC20LXRgiDQvdCwINC90L7RgNC80YMg0YDQsNC30LLQuNGC0LjRjyDQltCa0KIuINCf0YDQuCDRg9Cy0LXQu9C40YfQtdC90LjQuCDQv9C+0YLQtdGA0Lgg0LzQsNGB0YHRiyDRgtC10LvQsCDQsdC+0LvRjNGI0LUg0LTQtdGB0Y/RgtC4LCDRgdGC0L7QuNGCINC40YHQutC70Y7Rh9Cw0YLRjCDQv9Cw0YLQvtC70L7Qs9C40Y4sINGB0LLRj9C30LDQvdC90YPRjiDQvdCw0L/RgNC40LzQtdGAINGBINCy0YvRhdC+0LTQvtC8INC80LXQutC+0L3QuNGPLCDRgtC+INC10YHRgtGMINGN0YLQviDQsdC+0LvQtdC30L3QuCDQk9C40YDRiNC/0YDRg9C90LPQsCwg0YHQv9Cw0LXRh9C90YvQtSDQv9GA0L7RhtC10YHRgdGLINCyINC/0YDQvtGB0LLQtdGC0LUg0L/RgNGP0LzQvtC5INC60LjRiNC60LgsINGB0YLQtdC90L7QtyDQsNC90LDQu9GM0L3QvtCz0L4g0L7RgtCy0LXRgNGB0YLQuNGPLiDQn9GA0Lgg0YDQvtC20LTQtdC90LjQuCDQuCDQvtGC0LTQtdC70LXQvdC40Lgg0YDQtdCx0LXQvdC60LAg0L7RgiDQv9C70LDRhtC10L3RgtGLINC80LDRgtC10YDQuCwg0YLQviDQtdGB0YLRjCDQv9C+0LTQstGP0LfRi9Cy0LDQvdC40LUg0L/Rg9C/0L7QstC40L3RiyAo0L/Rg9C/0L7Rh9C90LDRjyDQstC10L3QsCwg0LDRgNGC0LXRgNC40LgpLCDRgtC+INC+0YHRgtCw0YLQvtC6INC60YDQvtCy0Lgg0LIg0L/Rg9C/0L7Rh9C90L7QuSDQstC10L3QtSwg0YLQsNC6INC20LUg0YHRh9C40YLQsNC10YLRgdGPINC60LDQuiDQv9C+0YLQtdGA0Y8g0LzQsNGB0YHRiyDRgNC10LHQtdC90LrQsC4g0KHQu9C10LTRg9GO0YnQsNGPINC/0YDQuNGH0LjQvdCwINC/0L7RgtC10YDQuCDQvNCw0YHRgdGLINGC0LXQu9CwIC0g0LLRi9C/0L7RgiDQttC40LTQutC+0YHRgtC4INGH0LXRgNC10Lcg0LrQvtC20L3Ri9C1INC/0L7QutGA0L7QstGLLCDRgtCw0Log0LrQsNC6INCyINGD0YLRgNC+0LHQtSDQvNCw0YLQtdGA0LgsINGE0YPQvdC60YbQuNGPINC60L7QttC4LCDRgtCw0LrQsNGPINC60LDQuiDQv9C+0YLQvtC+0YLQtNC10LvQtdC90LjQtSDQvdC1INC/0YDQvtC40YHRhdC+0LTQuNC70L4sINC40Lct0LfQsCDRgdGC0YDQtdGB0YHQvtCy0L7QuSDRgdC40YLRg9Cw0YbQuNC4ICjRgNC+0LbQtNC10L3QuNC1INC4INCy0LfQsNC40LzQvtC00LXQudGB0YLQstC40LUg0YEg0L7QutGA0YPQttCw0Y7RidC10Lkg0YHRgNC10LTQvtC5KSwg0YLQviDRgNC10LHQtdC90L7QuiDQvdCw0YfQuNC90LDQtdGCINGC0LXRgNGP0YLRjCDQstC70LDQs9GDINGH0LXRgNC10Lcg0LrQvtC20YMsINGC0LDQuiDQutCw0Log0L7QvdCwINC6INGC0L7QvNGDINC20LUg0L3QtSDQtNC+INC60L7QvdGG0LAg0YHRhNC+0YDQvNC40YDQvtCy0LDQvdCwLCDRgtC+INC10YHRgtGMINC/0YDQvtC/0YPRgdC60LDQtdGCINGB0LvQuNGI0LrQvtC8INC80L3QvtCz0L4g0LLQu9Cw0LPQuCDQuNC3INC+0YDQs9Cw0L3QuNC30LzQsCwg0L3QsNGB0YLQvtC70YzQutC+LCDRh9GC0L4g0LzQvtC20LXRgiDRgNCw0LfQstC40YLRjNGB0Y8g0YTRg9C90LrRhtC40L7QvdCw0LvRjNC90LDRjyDQvtC70LjQs9GD0YDQuNGPINCyINC/0LXRgNCy0YvQtSDQtNC90Lgg0LbQuNC30L3QuC4g0Jog0YLQvtC80YMg0LbQtSwg0L3QtdGB0LzQvtGC0YDRjyDQvdCwINGN0YLRgyDQvtC70LjQs9GD0YDQuNGOLCDQvtC90LAg0L/RgNC+0YXQvtC00LjRgiDQt9CwINC90LXRgdC60L7Qu9GM0LrQviDQtNC90LXQuSwg0L/QvtGB0LvQtSDRh9C10LPQviDQvdCw0YHRgtGD0L/QsNC10YIg0L3QvtGA0LzQsNC70YzQvdC+0LUg0YTQvtGA0LzQuNGA0L7QstCw0L3QuNC1INC80L7Rh9C4INC4INC80L7Rh9C10LjRgdC/0YPRgdC60LDQvdC40LUsINCwINGDINC00LXRgtC10Lkg0L7QvdC+INC00L7RhdC+0LTQuNGCINC00L4g0LTQstCw0LTRhtCw0YLQuC/QtNCy0LDQtNGG0LDRgtC4INC/0Y/RgtC4INGA0LDQtyDQsiDRgdGD0YLQutC4LiDQodC70Y7QvdC+0L7RgtC00LXQu9C10L3QuNC1INGDINC00LXRgtC10Lkg0L7QsdGL0YfQvdC+INCyINGE0L7RgNC80LUg0YTRg9C90LrRhtC40L7QvdCw0LvRjNC90L7QuSDQs9C40L/QtdGA0YHQsNC70LjQstCw0YbQuNC4LCDRgtC+INC10YHRgtGMINGG0LXQvdGC0YDRiyDRgdC70Y7QvdC+0L7RgtC00LXQu9C10L3QuNGPINCyINC60L7RgNC1INCT0JwsINCwINGC0LDQutC20LUg0L3QtdC30YDQtdC70L7RgdGC0Ywg0L/QsNGA0LDRgdC40LzQv9Cw0YLQuNGH0LXRgdC60L7Qs9C+INCy0LvQuNGP0L3QuNGPINC90LAg0YHQu9GO0L3QvdGL0LUg0LbQtdC70LXQt9GLLCDQstC10LTRg9GCINC6INC/0L7RgtC10YDQtSDQstC70LDQs9C4INGH0LXRgNC10Lcg0L7QsdC40LvRjNC90L7QtSDRgdC70Y7QvdC+0YLQtdGH0LXQvdC40LUuINCV0YnQtSDQvtC00L3QvtC5INC/0YDQuNGH0LjQvdC+0LkgLCDQutC+0YLQvtGA0L7QuSDQvNC+0LbQvdC+INC+0L/QuNGB0LDRgtGMINC/0L7RgtC10YDRjiDQvNCw0YHRgdGLINGC0LXQu9CwINGP0LLQu9GP0LXRgtGB0Y8g0LLRi9Cy0L7QtCDQvtC60L7Qu9C+0L/Qu9C+0LTQvdGL0YUg0LLQvtC0INC40Lcg0LvQtdCz0LrQuNGFINC/0YPRgtC10Lwg0LjRhSDRgdGA0YvQs9C40LLQsNC90LjRjyAo0L7QtNC90LDQutC+INC90LUg0YLQvtC70YzQutC+INCyINC70LXQs9C60LjRhSDQvtC90Lgg0L/RgNC40YHRg9GC0YHRgtCy0YPRjtGCLCDQvdCw0L/RgNC40LzQtdGAINC4INCyINC00YDRg9Cz0LjRhSDRh9Cw0YHRgtGP0YUg0YLQtdC70LAg0LrQsNC6INGB0YDQtdC00L3QtdC1INGD0YXQviwg0LbQutGCINC4INGCLtC0LikuINCSINGD0YLRgNC+0LHQtSDQvNCw0YLQtdGA0Lgg0LvQtdCz0LrQuNC1INCx0YvQu9C4INC90LDQv9C+0LvQvdC10L3RiyDQvtC60L7Qu9C+0L/Qu9C+0LTQvdGL0LzQuCDQstCy0L7QtNCw0LzQuCwg0LjQty3Qt9CwINGH0LXQs9C+INC+0L3QuCDQvdC1INGD0YfQsNGB0YLQstC+0LLQsNC70Lgg0LIg0LDQutGC0LUg0LTRi9GF0LDQvdC40Y8g0Lgg0LPQsNC30L7QvtCx0LzQtdC90LUsINGBINGA0L7QttC00LXQvdC40LXQvCDRgNC10LHQtdC90LrQsCDRjdGC0LAg0YTRg9C90LrRhtC40Y8g0L3QsNGH0LjQvdCw0LXRgiDRgNCw0LHQvtGC0LDRgtGMINC4INC70LXQs9C60LjQtSDRgdGC0LDQvdC+0LLRj9GC0YHRjyDQv9C90LXQstC80LDRgtC40LfQuNGA0L7QstCw0L3QvdGL0LzQuCDQuCDQstC+0LfQtNGD0YjQvdGL0LzQuC4g0Jog0YLQvtC80YMg0LbQtSwg0L/RgNC4INCy0YvQtNC+0YXQtSwg0YDQtdCx0LXQvdC+0Log0YLQsNC60LbQtSDRgtC10YDRj9C10YIg0LLQu9Cw0LPRgy4g0J/QvtGB0LvQtdC00L3Rj9GPLCDQvdC+INC90LXQvNCw0LvQviDQt9C90LDRh9C40LzQsNGPINC/0YDQuNGH0LjQvdCwINC/0L7RgtC10YDQuCDQvNCw0YHRgdGLIC0g0Y/QstC70Y/QtdGC0YHRjyDRgdC60YPQtNC90L7QtSDQv9C40YLQsNC90LjQtSDRgNC10LHQtdC90LrQsCwg0YLQviDQtdGB0YLRjCDQuNC3LdC30LAg0YHRgtGA0LXRgdGB0L7QstC+0Lkg0YHQuNGC0YPQsNGG0LjQuCDRgyDRgNC10LHQtdC90LrQsCDQuCDRgyDQvNCw0YLQtdGA0LgsINCy0L7Qt9C80L7QttC90L4g0L/RgNC+0LjRgdGF0L7QtNC40YIg0L3QtdC00L7Qv9C+0LvRg9GH0LXQvdC40LUg0L/QuNGC0LDQvdC40Y8g0YfQtdGA0LXQtyDQs9GA0YPQtNGMLCDQv9C+0Y3RgtC+0LzRgyDRgdGC0L7QuNGCINC/0YDQuNC60LvQsNC00YvQstCw0YLRjCDRgNC10LHQtdC90LrQsCDQuiDQs9GA0YPQtNC4INGBINC/0LXRgNCy0YvRhSDQtNC90LXQuSDQttC40LfQvdC4LCDRh9GC0L7QsdGLINC+0L0g0L/QvtC70YPRh9Cw0Lsg0L/QuNGC0LDRgtC10LvRjNC90YvQtSDQstC10YnQtdGB0YLQstCwINC00LvRjyDQtNCw0LvRjNC90LXQudGI0LXQs9C+INGA0L7RgdGC0LAuINCf0L7QtNCy0L7QtNGPINC40YLQvtCzINC/0L4g0LTQsNC90L3QvtC80YMg0LLQvtC/0YDQvtGB0YMsINC80L7QttC90L4g0YEg0YPQstC10YDQtdC90L3QvtGB0YLRjNGOINGB0LrQsNC30LDRgtGMLCDRh9GC0L4g0L/QvtGC0LXRgNGPINC80LDRgdGB0Ysg0YLQtdC70LAg0LIg0L/QtdGA0LLRi9C1INC00L3QuCDQttC40LfQvdC4ICgzLTQg0LTQtdC90YwpINC/0YDQvtC40YHRhdC+0LTQuNGCINGDINCy0YHQtdGFINC00L7QvdC+0YjQtdC90L3Ri9GFINC00LXRgtC10LksINC4INC60L7RgtC+0YDQsNGPINCy0L7RgdC/0L7Qu9C90Y/QtdGC0YHRjyDQvdCwINGB0LXQtNGM0LzQvtC5INC4INC00LXRgdGP0YLRi9C1INC00L3QuCDQsiDQvdC+0YDQvNC1LCDQsCDQsiDQtNCw0LvRjNC90LXQudGI0LXQvCDQuCDQstC+0LLRgdC1INGD0LLQtdC70LjRh9C40LLQsNC10YLRgdGPINC80LDRgdGB0LAg0YLQtdC70LAg0YHRgtGA0LXQvNC40YLQtdC70YzQvdGL0LzQuCDRgtC10LzQv9Cw0LzQuC4gPGJyIC8+DQoyLiDQkiDQvdC+0YDQvNC1INC40Lct0LfQsCDQsdC+0LvRjNGI0LjRhSDRgNCw0LfQvNC10YDQvtCyINC/0LXRh9C10L3QuCDRgyDQtNC10YLQtdC5INC00L4gMyDQu9C10YIsINC/0YDQuCDRhNC40LfQuNGH0LXRgdC60L7QvCDQvtCx0YHQu9C10LTQvtCy0LDQvdC40Lgg0LzQvtC20L3QviDQvdCw0LHQu9GO0LTQsNGC0Ywg0LXQtSDQstGL0YXQvtC0INC40Lcg0L/QvtC0INC60YDQsNGPINC/0YDQsNCy0L7QuSDRgNC10LHQtdGA0L3QvtC5INC00YPQs9C4LiDQp9GC0L7QsdGLINC+0LHRitGP0YHQvdC40YLRjCDRjdGC0L4g0YHQvtGB0YLQvtGP0L3QuNC1LCDQvdC1INGF0LDRgNCw0LrRgtC10YDQvdC+0LUg0LTQu9GPINCy0LfRgNC+0YHQu9C+0LPQviDQvtGA0LPQsNC90LjQt9C80LAsINC90YPQttC90L4g0LLRgdC/0L7QvNC90LjRgtGMINGA0LDQt9Cy0LjRgtC40LUg0L/Qu9C+0LTQsC4g0K3RgtC+INCy0L4t0L/QtdGA0LLRi9GFINGB0LLRj9C30LDQvdC+INGBINGC0LXQvCwg0YfRgtC+INCy0L4g0LLQvdGD0YLRgNC40YPRgtGA0L7QsdC90L7QvCDRgNCw0LfQstC40YLQuNC4INC/0LvQvtC00LAgLSDRhNC10YLQsNC70YzQvdC+0LUg0LrRgNC+0LLQvtC+0LHRgNCw0YnQtdC90LjQtSwg0LIg0L/RgNC+0YbQtdGB0YHQtSDQutC+0YLQvtGA0L7QuSDQsdC+0LvQtdC1INC+0LrRgdC40LPQtdC90LjRgNC+0LLQsNC90L3QsNGPINC60YDQvtCy0Ywg0L/QvtGB0YLRg9C/0LDQu9CwINCyINC+0YDQs9Cw0L3RiyDQv9C10YDQstC+0YHRgtC10L/QtdC90L3QvtC5INCy0LDQttC90L7RgdGC0LgsINGC0L4g0LXRgdGC0Ywg0LzQvtC30LMsINGB0LXRgNC00YbQtSDQuCDQv9C10YfQtdC90YwuINCi0LXQvCDRgdCw0LzRi9C8INGF0L7RgNC+0YjQviDQstCw0YHQutGD0LvRj9GA0LjQt9C40YDQvtCy0LDQvdC90LDRjyDQuCDQv9C40YLQsNC10LzQsNGPINC/0LXRh9C10L3RjCDQvdC10LjQt9Cx0LXQttC90L4g0LHRg9C00LXRgiDQsdC+0LvRjNGI0LUg0LIg0L/RgNC+0L/QvtGA0YbQuNGP0YUg0L7RgtC90L7RgdC40YLQtdC70YzQvdC+INC+0YHRgtCw0LvRjNC90YvRhSDQvtGA0LPQsNC90L7QsiDRgNC10LHQtdC90LrQsC4g0JXRgdC70Lgg0L/QvtC00LrRgNC10L/Qu9GP0YLRjCDRhNCw0LrRgtCw0LzQuCwg0YLQviDRgyDQvdC+0LLQvtGA0L7QttC00LXQvdC90YvRhSDQv9C10YfQtdC90Lgg0YHQvtGB0YLQsNCy0LvRj9C10YIg0LTQviDRh9C10YLRi9GA0LXRhSDQv9GA0L7RhtC10L3RgtC+0LIg0L7RgiDQvNCw0YHRgdGLINGC0LXQu9CwLCDQsiDRgtC+INCy0YDQtdC80Y8sINC60LDQuiDRgyDQstC30YDQvtGB0LvRi9GFINC+0L3QviDRgdC+0YHRgtCw0LLQuNGCINC70LjRiNGMINC00LLQsCDQv9GA0L7RhtC10L3RgtCwLiDQktC+LdCy0YLQvtGA0YvRhSwg0L/QtdGH0LXQvdGMINGP0LLQu9GP0LXRgtGB0Y8g0LzQtdGB0YLQvtC8INC+0LHRgNCw0LfQvtCy0LDQvdC40Y8g0Lgg0YLRgNCw0L3RgdCw0LzQuNC90LjRgNC+0LLQsNC90LjRjyDQsNC80LjQvdC+0LrQuNGB0LvQvtGCLCDRh9GC0L4g0L3QtdC+0LHRhdC+0LTQuNC80L4g0LTQu9GPINC+0LHRgNCw0LfQvtCy0LDQvdC40Y8g0LHQtdC70LrQvtCyLCDRgNCw0LfQstC40YLQuNGPINC4INGA0L7RgdGC0LAg0L7RgNCz0LDQvdC40LfQvNCwLiDQodC+INCy0YDQtdC80LXQvdC10Lwg0Lgg0YEg0YDQvtGB0YLQvtC8INC+0YDQs9Cw0L3QuNC30LzQsCwg0LXQtSDQs9GA0LDQvdC40YbQsCDQsdGD0LTQtdGCINC60LDQuiDRgyDQstC30YDQvtGB0LvRi9GFLCDQvdC1INCy0YvRhdC+0LTRjyDQuNC3INC/0L7QtCDQutGA0LDRjyDRgNC10LHQtdGA0L3QvtC5INC00YPQs9C4LiDQkNC90LDRgtC+0LzQuNGH0LXRgdC60LjQtSDQs9GA0LDQvdC40YbRiyDQv9Cw0LvRjNC/0LDRhtC40Lgg0LIg0LTQtdGC0LXQuSDQtNC+INGC0YDQtdGFINC70LXRgiDRj9Cy0LvRj9GO0YLRgdGPOiDQv9Cw0LvRjNC/0LDRgtC+0YDQvdC+INC+0L/RgNC10LTQtdC70Y/RjtGCINC/0LXRh9C10L3RjCDRgyDQutGA0LDRjyDQv9GA0LDQstC+0Lkg0YDQtdCx0LXRgNC90L7QuSDQtNGD0LPQuCDQvdC40LbQtSAxLTMg0YHQsNC90YLQuNC80LXRgtGA0L7QsiDQv9C+INC/0YDQsNCy0L7QuSDRgdGA0LXQtNC90LXQutC70Y7Rh9C40YfQvdC+0Lkg0LvQuNC90LjQuC4g0J/QtdGH0LXQvdGMINC/0YDQuCDQv9Cw0LvRjNC/0LDRhtC40Lgg0LzRj9Cz0LrQvtC5INC60L7QvdGB0LjRgdGC0LXQvdGG0LjQuCwg0LHQtdC3INGD0L/Qu9C+0YLQvdC10L3QuNC5IC0g0YLQsNC6INC60LDQuiDQsiDQvdC+0YDQvNC1INCyINC90LXQuSDQvdC10YIg0L7RgtC10YfQvdC+0YHRgtC4INC4INGE0LjQsdGA0L7Qt9C90YvRhSDRg9C/0LvQvtGC0L3QtdC90LjQuS4g0KLQutCw0L3RjCDQv9C10YfQtdC90Lgg0YMg0LTQtdGC0LXQuSDQsdC+0LvQtdC1INGN0LvQsNGB0YLQuNGH0L3QsNGPLCDRgtCw0Log0LrQsNC6INC/0LXRh9C10L3RjCDQv9C+0LvQvdC+0LrRgNC+0LLQvdGL0Lkg0L7RgNCz0LDQvSwg0Lgg0LXQtSDRhNGD0L3QutGG0LjRjywg0L7Qv9C40YHQsNC90L3QsNGPINCy0YvRiNC1ICjQsdC10LvQutC+0LLRi9C5INC+0LHQvNC10L0sINC+0LHRgNCw0LfQvtCy0LDQvdC40LUg0LbQtdC70YfQuCkg0YDQsNCx0L7RgtCw0LXRgiDQvdC1INC/0L7Qu9C90L7RhtC10L3QvdC+INC40Lct0LfQsCDQvdC10LfRgNC10LvQvtGB0YLQuCDQvtGA0LPQsNC90LAsINGC0L4g0LXRgdGC0Ywg0LIg0L3QtdC5INCx0L7Qu9GM0YjQtSDQstC+0LTRiyDQuCDQutGA0L7QstC4LCDRh9C10Lwg0LHQtdC70LrQvtCy0YvRhSDRgdGC0YDRg9C60YLRg9GAINC4INGB0LDQvNC40YUg0LrQu9C10YLQvtC6L9C/0LDRgNC10L3RhdC40LzRiyDQvNC10L3RjNGI0LUgKNCz0LXQv9Cw0YLQvtGG0LjRgtC+0LIsINCwINGC0LDQutC20LUg0LbQtdC70YfQvdGL0YUg0L/RgNC+0YLQvtC60L7Qsikg0L/QviDRgdGA0LDQstC90LXQvdC40Y4g0YHQviDQstC30YDQvtGB0LvRi9C8INC+0YDQs9Cw0L3QuNC30LzQvtC8LiDQoyDQtNC10YLQtdC5INC00L4g0L7QtNC90L7Qs9C+INCz0L7QtNCwIC0g0L/QtdGH0LXQvdGMINC90LXQt9GA0LXQu9Cw0Y8sINC4INC40LzQtdC10YIg0LLQuNC0INC00L7Qu9GM0YfQsNGC0L7QuSDQv9Cw0YDQtdC90YXQuNC80LDRgtC+0LfQvdC+0Lkg0LrRgNGD0L/QvdC+0Lkg0LbQtdC70LXQt9GLICjQuiDQstC+0YHRjNC80Lgt0LTQtdCy0Y/RgtC4INCz0L7QtNCw0Lwg0LbQuNC30L3QuCDQv9C10YfQtdC90Ywg0YDQtdCx0LXQvdC60LAg0LHRg9C00LXRgiDQs9C40YHRgtC+0LvQvtCz0LjRh9C10YHQutC4INC4INC80L7RgNGE0L7Qu9C+0LPQuNGH0LXRgdC60Lgg0YHRhdC+0LbQsCDRgSDQv9C10YfQtdC90YzRjiDQstC30YDQvtGB0LvQvtCz0L4pLiDQn9Cw0LvRjNC/0LjRgNGD0LXRgtGB0Y8g0LIg0L7RgdC90L7QstC90L7QvCDQv9GA0LDQstCw0Y8g0LTQvtC70Y8g0L/QtdGH0LXQvdC4LCDQuNC3LdC30LAg0LXQtSDQsdC+0LvRjNGI0LXQuSDQstCw0YHQutGD0LvRj9GA0LjQt9Cw0YbQuNC4INC4INCx0L7Qu9GM0YjQuNGFINGA0LDQt9C80LXRgNC+0LIg0L3QsNC0INC70LXQstC+0Lkg0LTQvtC70LXQuSDRgdC+0L7RgtCy0LXRgtGB0YLQstC10L3QvdC+LiDQntC00L3QsNC60L4g0YEg0L3QtdC40LfQsdC10LbQvdGL0Lwg0YDQvtGB0YLQvtC8INC+0YDQs9Cw0L3QuNC30LzQsCAo0YHQutC10LvQtdGC0LAsINC80YvRiNC10YfQvdC+0LPQviDQutCw0YDQutCw0YHQsCkg0YMg0LfQtNC+0YDQvtCy0YvRhSDQtNC10YLQtdC5LCDQv9GA0LjQsdC70LjQt9C40YLQtdC70YzQvdC+INGBINGB0LXQvNC4INC40LvQuCDQstC+0YHRjNC80Lgg0LvQtdGCLCDQsiDQt9Cw0LLQuNGB0LjQvNC+0YHRgtC4INGC0LDQutC20LUg0L7RgiDQv9C+0LvQsCwg0L/RgNC4INGE0LjQt9C40YfQtdGB0LrQvtC8INC+0LHRgdC70LXQtNC+0LLQsNC90LjQuCDQsiDQs9C+0YDQuNC30L7QvdGC0LDQu9GM0L3QvtC8INC/0L7Qu9C+0LbQtdC90LjQuCwg0L3QuNC20L3QuNC5INC60YDQsNC5INC/0LXRh9C10L3QuCDQvdC1INCx0YPQtNC10YIg0L/QsNC70YzQv9C40YDQvtCy0LDRgtGM0YHRjyDQuCDQv9GA0L7RidGD0L/Ri9Cy0LDRgtGM0YHRjywg0LAg0L/QviBsaW5lYSBtZWRpYW5hIGFudGVyaW9yICjQv9C10YDQtdC00L3Rj9GPINGB0YDQtdC00LjQvdC90LDRjyDQu9C40L3QuNGPKSDQvdC1INCy0YvRhdC+0LTQuNGCINC30LAg0YLRgNC10YLRjCDRgNCw0YHRgdGC0L7Rj9C90LjRjyDQvNC10LbQtNGDINC80LXRh9C10LLQuNC00L3Ri9C8INC+0YLRgNC+0YHRgtC60L7QvCDQs9GA0YPQtNC40L3RiyDQtNC+INC/0YPQv9C60LAuINCe0LTQvdCw0LrQviwg0LXRgdC70Lgg0L3QuNC20L3QuNC5INC60YDQsNC5INC/0LXRh9C10L3QuCDRgdC40LvRjNC90L4g0LLRi9GF0L7QtNC40YIg0LfQsCDQutGA0LDQuSDRgNC10LHQtdGA0L3QvtC5INC00YPQs9C4LCDRgtC+INC80L7QttC90L4g0LPQvtCy0L7RgNC40YLRjCDQviDQv9Cw0YLQvtC70L7Qs9C40Lgg0L/QtdGH0LXQvdC4LCDQvtCxINC10LUg0LjQvdGC0L7QutGB0LjQutCw0YbQuNC4INC60YHQtdC90L7QsdC40L7RgtC40LrQsNC80LgsINC+0YLQtdGH0L3QvtGB0YLRjNGOINGC0LrQsNC90LguIA==</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21" table:style-name="ce1">
            <text:p>1067021</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S7QpNC40LfQuNC+0LvQvtCz0LjRh9C10YHQutCw0Y8g0YPQsdGL0LvRjCAo0L/QvtGC0LXRgNGPINC80LDRgdGB0Ysg0YLQtdC70LApINGP0LLQu9GP0LXRgtGB0Y8g0L3QtSDQv9Cw0YLQvtC70L7Qs9C40LXQuSzQsCDQvdC+0YDQvNC+0Lkg0Lgg0LLRgdGC0YDQtdGH0LDQtdGC0YHRjyDQsiAxMDAlINGB0LvRg9GH0LDRj9GFINCyINC/0LXRgNCy0YvQtSAyLTTQtNC90Y8g0LbQuNC30L3QuCDQvNC70LDQtNC10L3RhtCwINC4INGB0L7RgdGC0LDQstC70Y/QtdGCINGDINC00L7QvdC+0YjQtdC90L3Ri9GFINC00LXRgtC10LkgKDUtNyUgLSDQvNCw0LrRgdC40LzQsNC70YzQvdC+INC80L7QttC10YIg0YHQvtGB0YLQsNCy0LvRj9GC0Ywg0LTQviAxMCUpLNCwINGDINC90LXQtNC+0L3QvtGI0LXQvdC90YvRhSAoOS0xNCUpLtCS0L7RgdGB0YLQsNC90L7QstCw0LvQtdC90LjQtSDQvNCw0YHRgdGLINGC0LXQu9CwINCy0L7Qt9C90LjQutCw0LXRgiDQvdCwIDctMTAg0LTQvdC4INGDINC00L7QvdC+0YjQtdC90L3Ri9GFKNGDINC90LXQtNC+0L3QvtGI0LXQvdC90YvRhSDQvNC+0LbQtdGCINGB0L7RgdGC0LDQstC70Y/RgtGMIDItMyDQvdC10LTQtdC70LgpLtCf0YDQuNGH0LjQvdCw0LzQuCDQvNC+0LbQtdGCINGB0LvRg9GH0LjRgtGMINGN0YLQuCAxLtC90LXQtNC+0LXQtNCw0L3QuNC1INCyINC/0LXRgNCy0YvQtSDQtNC90Lgg0LbQuNC30L3QuCzQstGL0YDRi9Cz0LjQstCw0L3QuNC1INC+0LrQvtC70L7Qv9C70L7QtNC90YvRhSDQstC+0LQs0LLRi9GB0YvRhdCw0L3QuNC1INC/0YPQv9C+0LLQuNC90L3QvtCz0L4g0L7RgdGC0LDRgtC60LAs0L3QtdC00L7RgdGC0LDRgtC+0YfQvdC+0LUg0L/QvtGC0YDQtdCx0LvQtdC90LjQtSDQttC40LTQutC+0YHRgtC4LNC/0L7RgtC10YDRjyDQttC40LTQutC+0YHRgtC4INGH0LXRgNC10Lcg0LrQvtC20YMs0LvQtdCz0LrQuNC1LNGE0LXQutCw0LvQuNC4KNC80LXQutC+0L3QvdC40LkpLNC00LvRjyDQstC+0YHRgdGC0LDQvdC+0LLQu9C10L3QuNGPINC80LvQsNC00LXQvdGG0LAg0L3Rg9C20L3QvjrRgNCw0L3QvdC40LUg0L/RgNC40LrQu9Cw0LTRi9Cy0LDQvdC40LUg0Log0LPRgNGD0LTQuCwg0YHQstC+0LXQstGA0LXQvNC10L3QvdC+0LUg0L/QuNGC0LDQvdC40LUs0L/RgNC+0YTQuNC70LDQutGC0LjQutC4INCz0LjQv9C+0LPQsNC70LDQutGC0LjQuCjRgtC+INC10YHRgtGMINGH0YLQvtCxINCz0YDRg9C00L3QvtC1INC80L7Qu9C+0LrQviDQvNCw0YLQtdGA0Lgg0LHRi9C70L4g0L/RgNC40LzQtdGB0LXQuSDQuCDQtNC+0YHRgtCw0YLQvtGH0L3QvtC8INC60L7Qu9C40YfQtdGB0YLQstC+INC/0LjRgi7QstC10YnQtdGB0YLQsiks0LrQvtC90YLRgNC+0LvRjCDQvNCw0YHRgdGLINGC0LXQu9CwPGJyIC8+DQoyLtCf0LXRh9C10L3RjCAtINGP0LLQu9GP0LXRgtGB0Y8g0YHQsNC80L7QuSDQutGA0YPQv9C90L7QuSDQttC10LvQtdC30L7QuSDQv9C40YnQtdCy0LDRgNC40YLQtdC70YzQvdC+0Lkg0YHQuNGB0YLQtdC80YsgNCUg0L7RgiDQvNCw0YHRgdGLINGC0LXQu9CwINC90L7QstC+0YDQvtC20LTQtdC90L3QvtCz0L4s0LIg0YLQviDQstGA0LXQvNGPINC60LDQuiDRgyDQstC30YDQvtGB0LvQvtCz0L4gMiUgICDQuCDQsiDQv9C+0YHRgtC90LDRgtCw0LvRjNC90L7QvCDQv9C10YDQuNC+0LTQtSDQv9GA0L7QtNC+0LvQttCw0LXRgiDRgNC+0YHRgtC4INC4INC90L4g0LzQtdC00LvQtdC90LXQtdGH0LXQvCDQvNCw0YHRgdCwINGC0LXQu9CwINC4INCy0YHQu9C10LTRgdGC0LjQuCDRjdGC0L7Qs9C+ICDQvNC+0LbQtdGCINCy0YvRhdC+0LTQuNGC0Ywg0LjQtyDQv9C+0LQg0YDQtdCx0LXRgNC90L7QuSDRgNGD0LPQuCDQvdCwIDEtMtGB0Lwg0L3QuNC20LUg0LIg0L7QsdC70LDRgdGC0Lgg0L/RgNCw0LLQvtCz0L4g0L/QvtC00YDQtdCx0LXRgNGM0Y8g0L/QviDQv9GA0LDQstC+0Lkg0YHRgNC10LTQvdC1LdC60LvRjtGH0LjRh9C90L7QuSDQu9C40L3QuNC4LNGC0LDQutC20LUg0LzQvtC20L3QviDQv9GA0L7QuNC30LLQtdGB0YLQuCDQv9Cw0LvRjNC/0LDRhtC40Y4g0LzQvtC20L3QviDQv9C+INGB0YDQtdC00LjQvdC90L7QuSDQu9C40L3QuNC4KNGH0YPRgtGMINCy0YvRiNC1INC/0YPQv9C60LAg0LvQuNC90LjQuCku0KLQsNC6INC20LUg0LjQvNC10LXRgtGB0Y8g0L/QsNC70YzQv9Cw0YbQuNGPINC/0L4g0J7QsdGA0LDQt9GG0L7QstGDLdCh0YLRgNCw0LbQtdGB0LrQvizQutC+0LPQtNCwINGA0LXQsdC10L3QvtC6INC70LXQttC40YIg0L3QsCDRgdC/0LjQvdC1LNC90L7Qs9C4INGB0LvQtdCz0LrQsCDRgdC+0LPQvdGD0YLRiyDQuCDQv9Cw0LvRjNC/0LDRhtC40Y4g0L/RgNC+0LLQvtC00Y/RgiDQv9GA0Lgg0YHQv9C+0LrQvtC50L3QvtC8INC00YvRhdCw0L3QuNC4LNCy0L4g0LLRgNC10LzRjyDQstC00L7RhdCwINC/0LXRh9C10L3RjCDQvtC/0YPRgdC60LDQtdGC0YHRjyDQuCDRgdGC0LDQvdC+0LLQuNGC0YHRjyDQtNC+0YHRgtGD0L/QvdC+0Lkg0Log0L/QsNC70YzQv9Cw0YbQuNC4LtCU0L7Qv9C+0LvQvdC40YLQtdC70YzQvdC+INGC0LDQutC20LU6INChIDcg0LvQtdGCINCyINC/0L7Qu9C+0LbQtdC90LjQuCDQu9C10LbQsCDQvdC40LbQvdC40Lkg0LrRgNCw0Lkg0L/QtdGH0LXQvdC4INC90LUg0L/QsNC70YzRhtC40YDRg9C10YLRgdGPICzQsCDQv9C+INGB0YDQtdC00L3QuNC90L7QuSDQu9C40L3QuNC4INC90LUg0LLRi9GF0L7QtNC40YIg0LfQsCDQv9GA0LXQtNC10LvRiyDQstC10YDRhdC90LXQuSDRgtGA0LXRgtGM0LUg0YDQsNGB0YHRgtC+0Y/QvdC40Y8g0L7RgiDQv9GD0L/QutCwINC00L4g0LzQtdGH0LXQstC40LTQvdC+0LPQviDQvtGC0YDQvtGB0YLQutCwLNCwINC6IDgg0LPQvtC00LDQvCDQv9C10YfQtdC90Ywg0LzQvtGA0YTQvtC70L7Qs9C40YfQtdGB0LrQuCDQuCDQs9C40YHRgtC+0LvQvtCz0LjRh9C10YHQutC4INGB0YLRgNGD0LrRgtGD0YDQuNGA0L7QstCw0L3QsCDQv9C+0LvQvdC+0YHRgtGM0Y4s0L/RgNC40YfQuNC90LDQvNC4INGC0LDQuiDQttC1INC10LUg0YPQstC10LvQuNGH0LXQvdC40Y8g0LzQvtC20LXRgiDRgdC70YPQttC40YLRjCDQv9C+0LvQvdC+0LrRgNC+0LLQvdC+0YHRgtGMINC/0LXRh9C10L3QuCzQsiDRgdC70LXQtNGB0YLQstC40Lgg0Y3RgtC+0LPQviDQv9GA0Lgg0LjQvdGE0LXQutGG0LjRj9GFINC80L7QttC10YIg0LLQvtGB0L/QsNC70Y/RgtGM0YHRjyDQuCDRg9Cy0LXQu9C40YfQuNCy0LDRgtGM0YHRjw==</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согласно лиги честности оценка снижена на 10%</text:p>
          </table:table-cell>
          <table:table-cell office:value-type="float" office:value="10" table:style-name="ce1">
            <text:p>10</text:p>
          </table:table-cell>
          <table:table-cell table:number-columns-repeated="16376"/>
        </table:table-row>
        <table:table-row table:style-name="ro1">
          <table:table-cell office:value-type="float" office:value="1067038" table:style-name="ce1">
            <text:p>1067038</text:p>
          </table:table-cell>
          <table:table-cell office:value-type="string" table:style-name="ce1">
            <text:p>russian</text:p>
          </table:table-cell>
          <table:table-cell office:value-type="string" table:style-name="ce1">
            <text:p>Билет 1&amp;lt;br /&amp;gt; 1.Чем характеризуется физиологическая потеря массы тела у доношенных новорожденных и какой процент это составляет?&amp;lt;br /&amp;gt; 2.У мальчика 2-х лет имеется увеличение печени на 2 см из под края реберной дуги. Назовите анатомические границы пальпации нижнего края печени у детей до 3-х лет.&amp;lt;br /&amp;gt;</text:p>
          </table:table-cell>
          <table:table-cell office:value-type="string" table:style-name="ce1">
            <text:p>MSDQstC+0L/RgNC+0YE6INCk0LjQt9C40L7Qu9C+0LPQuNGH0LXRgdC60L7QtSDQv9C+0YLQtdGA0Y8g0LzQsNGB0YHRiyDRgtC10LvQsCDRgNC10LHQtdC90LrQsCDRgyDQtNC+0L3QvtGI0LXQvdC90YvRhSDQvdC+0LLQvtGA0L7QttC00LXQvdC90YvRhSwg0Y3RgtC+INC90L7RgNC80LDQu9GM0L3QvtC1INGB0L7RgdGC0L7Rj9C90LjQtSDQutC+0YLQvtGA0L7QtSDRgdC70YPRh9Cw0LXRgtGB0Y8gMTAwJSDRgyDQstGB0LXRhSDQvdC+0LLQvtGA0L7QttC00LXQvdC90YvRhSDRh9C10YDQtdC3IDItMyDQtNC90Y8uINCi0L4g0LXRgdGC0Ywg0Y3RgtC+INCw0LHRgdC+0LvRjtGC0L3QviDRhNC40LfQuNC+0LvQvtCz0LjRh9C10YHQutCw0Y8g0L3QvtGA0LzQsCDQstC10LTRjCDRh9C10YDQtdC3IDItMyDQtNC90Y8g0L/QvtGB0LvQtSDRgNC+0LbQtNC10L3QuNGPINGC0LXRgNGP0LXRgtGB0Y8g0LzQsNGB0YHQsCDRgtC10LvQsCDQvdCwIDUtNyAlINC+0YIg0LjQt9C90LDRh9Cw0LvRjNC90L7QuSDQvNCw0YHRgdGLINGC0LXQu9CwINC90L7QstC+0YDQvtC20LTQtdC90L3QvtCz0L4sINCwINGDINC90LXQtNC+0L3QvtGI0LXQvdC90YvRhSDQtNC10YLQtdC5INC90LAgMTAlLiDQrdGC0L4g0L/RgNC+0LjRgdGF0L7QtNC40YIg0L/QvtGC0L7QvNGDINGH0YLQviDQvdC+0LLQvtGA0L7QttC00LXQvdC90YvQuSDQvdCw0YfQuNC90LDQtdGCINC/0L7RgtC10YLRjCDRgtC+INC10YHRgtGMINGBINC/0L7QvNC+0YnRjNGOINC/0L7RgtCwINGC0LXRgNGP0LXRgiDQstC10YEsINC40Lcg0LfQsCDQvNC+0YfQuCDRgtCw0LrQttC1INGC0LXRgNGP0LXRgiDQstC10YEg0Lgg0LjQty3Qt9CwINC80LXQutC+0L3QuNGPKNC20LXQu9GC0L4t0LfQtdC70LXQvdC+0LLQsNGC0YvQuSDQutCw0LspLiDQp9C10YDQtdC3INC/0L7RgtC+0LLRi9C1INC20LXQu9C10LfRiyDQstGL0YXQvtC00LjRgiDQstC+0LTQsCDQuNC3INC+0YDQs9Cw0L3QuNC30LzQsC4g0JAg0YLQsNC60LbQtSDQstGL0YHRi9GF0LDQvdC40LUg0L/Rg9C/0L7QstC40LTQvdC+0LPQviDQvtGB0YLQsNGC0LrQsCwg0Lgg0L3QtdC00L7QtdC00LDQvdC40LUg0LIg0L/QtdGA0LLRi9C1INC00L3QuC4g0Jgg0LLRgdC10LPQtNCwINC90LDQtNC+INCyINGC0LDQutC40YUg0YHQu9GD0YfQsNGP0YUg0LjQvdGE0L7RgNC80LjRgNC+0LLQsNGC0Ywg0LzQsNC80YMg0L3QvtCy0L7RgNC+0LbQtNC10L3QvdC+0LPQviDQuCDQvtCx0YrRj9GB0L3QuNGC0YwsINGH0YLQviDRjdGC0L4g0LDQsdGB0L7Qu9GO0YLQvdCw0Y8g0YTQuNC30LjQvtC70L7Qs9C40YfQtdGB0LrQsNGPINC90L7RgNC80LAg0L7RgNCz0LDQvdC40LfQvNCwINC90L7QstC+0YDQvtC20LTQtdC90L3QvtCz0L4uICAgICAgICAgPGJyIC8+DQoyINCy0L7Qv9GA0L7RgTog0KPQstC10LvQuNGH0LXQvdC40LUg0L/QtdGH0LXQvdC4INC90LAgMiDRgdC8INC40Lcg0L/QvtC0INC60YDQsNGPINGA0LXQsdC10YDQvdC+0Lkg0LTRg9Cz0Lgg0YMgMi3RhSDQu9C10YLQvdC10LPQviDQvNCw0LvRjNGH0LjQutCwINGN0YLQviDQvdC+0YDQvNCwINCyINGN0YLQvtC8INCy0L7Qt9GA0LDRgdGC0LUsINCy0LXQtNGMINC/0LXRh9C10L3RjCDRjdGC0L4g0LHQvtC70YzRiNC+0Lkg0L7RgNCz0LDQvSDQsiDQv9C40YnQtdCy0LDRgNC40YLQtdC70YzQvdC+0LksINC4INC60YDQvtCy0LXRgtCy0L7RgNC90L7QuSDRgdC40YHRgtC10LzQtSDQuCDQstGB0LXQs9C00LAg0LTQviAzINC70LXRgiDRjdGC0L4g0L3QvtGA0LzQsCwg0Lgg0LXQs9C+INGA0LDQt9C80LXRgNGLINCx0YPQtNGD0YIg0YHQvtGB0YLQsNCy0LvRj9GC0Ywg0L3QsCA0JSDQvtGCINC80LDRgdGB0Ysg0YLQtdC70LAsINC60L7Qs9C00LAg0YMg0LLQt9GA0L7RgdC70YvRhSDQstGB0LXQs9C+INC90LAgMiUuINCYINC/0LXRh9C10L3RjCDQv9C+0YHQu9C1INGA0L7QttC00LXQvdC40Y8g0LLRgdC1INGA0LDQstC90L4g0L/RgNC+0LTQvtC70LbQsNC10YIg0YDQsNGB0YLQuCDQstC10LTRjCDRjdGC0L4g0L7QtNC40L0g0LHQvtC70YzRiNC40YUg0L7RgNCz0LDQvdC+0LIsINC4INC60LDQuiDRgNCw0Lcg0YLQsNC60Lgg0L7QvdCwINCx0YPQtNC10YIg0YDQsNGB0YLQuCDQtNCw0LvRjNGI0LUg0LTQviAyLTMg0LvQtdGCLCDQuCDRjdGC0LjQvCDQvtCx0YrRj9GB0L3Rj9C10YLRgdGPINC90L7RgNC80LAg0YfRgtC+INC+0L3QsCDRg9Cy0LXQu9C40YfQtdC9INC90LAgMS0yINGB0LwuINCf0LDQu9GM0L/QsNGG0LjRjyDQs9GA0LDQvdC40YbRiyDQv9C10YfQtdC90Lgg0L/RgNC+0LjQt9Cy0L7QtNC40YLRgdGPINCyINC/0L7Qu9C+0LbQtdC90LjQtSDQu9C10LbQsC4g0JPRgNCw0L3QuNGG0LDQvNC4INC/0LDQu9GM0L/QsNGG0LjQuCDQvdC40LbQvdC10LPQviDQutGA0LDRjyDQv9C10YfQtdC90Lgg0YMg0LTQtdGC0LXQuSDQtNC+INGC0YDQtdGFINC70LXRgiDQvdC1INC00L7Qu9C20L3QsCDQv9GA0LXQstGL0YjQsNGC0Ywg0L3QsCAxLTIg0YHQvCDQvdC40LbQtSDQv9GA0LDQstC+0Lkg0YDQtdCx0LXRgNC90L7QuSDQtNGD0LPQuCDQv9C+INGB0YDQtdC00L3QtdC60LvRjtGH0LjRh9C90L7QuSDQu9C40L3QuNC4LCDQuCDQvdC1INC00L7Qu9C20L3QsCDQv9GA0LXQstGL0YjQsNGC0Ywg0L/QviDQv9Cw0YDQsCDRgdGC0LXRgNC90LDQu9GM0L3QvtC5INC70LjQvdC40Lgg0L3QsCDQstC10YDRhdC90Y7RjiDRgtGA0LXRgtGMINGA0LDRgdGB0YLQvtGP0L3QuNC1INC+0YIg0L/Rg9C/0LrQsCDQtNC+INC80LXRh9C10LLQuNC00L3QvtCz0L4g0L7RgtGA0L7RgdGC0LrQsC4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79" table:style-name="ce1">
            <text:p>914679</text:p>
          </table:table-cell>
          <table:table-cell office:value-type="string" table:style-name="ce1">
            <text:p>english</text:p>
          </table:table-cell>
          <table:table-cell office:value-type="string" table:style-name="ce1">
            <text:p>Ticket 1&amp;lt;br /&amp;gt; 1.What characterizes the physiological loss of weight in full-term newborns, what percentage is this?&amp;lt;br /&amp;gt; 2.A 2-year-old boy has an enlarged liver by 2 centimeters from under the edge of the costal arch. What are the anatomical boundaries of palpation of the lower edge of the liver in children under 3 years of age.&amp;lt;br /&amp;gt;</text:p>
          </table:table-cell>
          <table:table-cell office:value-type="string" table:style-name="ce1">
            <text:p>cGh5c2lvbG9naWFsIHdlaWdodCBsb3MgaW4gIGZ1bGwgdGVybSBuZXdib3JucyBwcmltaXJhbHkgYXR0cmlidXRlZCB0byB0aGUgbG9zcyBvZiBhY2Nlc3MgZXh0cmFjZWxsdWxhciBmbHVpZHMgYW5kIHRoZSBhbGxpbWluYXRpb24gb2YgbWFjY2luaXVtIHRoZSB3ZWlnaHQgbG9zcyB0eXBpY2FsbHkgb2NjdXJzIGR1cmluZyB0aGUgZmlyc3QgZmV3IGRheXMgb2YgO2xpZmUgcmVhY2hpbmcgaXRzIG5hZGlyIGFyb3VuZCBkYXkgMyAuIHRoZSBwZXJjZW50YWdlIG9mIHdlaWdodCBsb3NzIGlzIHVzdWFsbHkgaW4gcmFuZ2Ugb2YgNSV0byA3JSBvZiB0aGUgYmlydGggd2VpZ2h0ICAuICAgMiBwYWxwYXRpb24gb2YgdGhlIGxvd2VyIGVkZ2Ugb2YgdGhlIGxpdmVyIGluY2hpbGRyZW4gdW5kZXIgdGhlIDMgeWVhcnMgb2YgYWdlIGludm9sdmVzIGxvY2F0aW5nIGxpdmVyIHdpdGhpbiB0aGUgcmlnaHQgdXBlZXIgcXVhZHJhbnQgb2YgdGhlIGFiZG9tZW4geW91IGNhbiB0eXBpY2FsbHkgcGFscGF0ZSB0aGUgbGl2ZXIgZWRnZSBhYm91dCAxIHRvIDIgIGNlbnRpbWV0ZXJzIGJlbG93IHRoZSBjb3N0ZWwgbWFyZ2luIHRoaXMgaXMgcGVyZm9ybWVkIGdlbnRseSBhbmQgc3lzdGVtaWNhdHRlbHkgdGFraW5nIGludG8gYWNjb3VudCB2YXJpYXRpb24gaW4gaW5kaXZpZHVhbCBhbmF0b215IGFuZCBjb25zaWRpcm5nIGZhY3RvcnMgc3VjaCBhcyB0aGUgY2hpbGQncyBicmVhdGhpbmcgYW5kIHJlbGF4dGF0aW9uIC4gZW5sYXJnZW1lbnQgIG9mIHRoZSBsaXZlciBjYW4gaW5kaWNhdGUgc2lnbnMgYW5kIHN5bXB0b21zLi4uLiA=</text:p>
          </table:table-cell>
          <table:table-cell office:value-type="float" office:value="170348" table:style-name="ce1">
            <text:p>170348</text:p>
          </table:table-cell>
          <table:table-cell office:value-type="float" office:value="68" table:style-name="ce1">
            <text:p>68</text:p>
          </table:table-cell>
          <table:table-cell office:value-type="string" table:style-name="ce1">
            <text:p>Тhe answers are short, without full justification.</text:p>
          </table:table-cell>
          <table:table-cell office:value-type="float" office:value="0" table:style-name="ce1">
            <text:p>0</text:p>
          </table:table-cell>
          <table:table-cell table:number-columns-repeated="16376"/>
        </table:table-row>
        <table:table-row table:style-name="ro1">
          <table:table-cell office:value-type="float" office:value="915057" table:style-name="ce1">
            <text:p>915057</text:p>
          </table:table-cell>
          <table:table-cell office:value-type="string" table:style-name="ce1">
            <text:p>english</text:p>
          </table:table-cell>
          <table:table-cell office:value-type="string" table:style-name="ce1">
            <text:p>Ticket 1&amp;lt;br /&amp;gt; 1.What characterizes the physiological loss of weight in full-term newborns, what percentage is this?&amp;lt;br /&amp;gt; 2.A 2-year-old boy has an enlarged liver by 2 centimeters from under the edge of the costal arch. What are the anatomical boundaries of palpation of the lower edge of the liver in children under 3 years of age.&amp;lt;br /&amp;gt;</text:p>
          </table:table-cell>
          <table:table-cell office:value-type="string" table:style-name="ce1">
            <text:p>QW5zd2VyIDEuIDxiciAvPg0KMS4gRnVsbCB0ZXJtLCBuZXcgYm9ybnMgdHlwaWNhbGx5eSBleHBlcmllbmNlIGEgcGh5c2lvbG9naWNhbCBsb3NzIG9mIHdlaWdodCBpbiBmaXJzdHQgZmV3IGRheXMsIG9mIGxpZmVlIC4gVGhpcyBpcyBkdWUgdG8gc3ZlcmFsIGZhY3RvcnNzIGluY2x1ZGluZyB0aGUgbG9zcyBvZiBleGNlc3MgZmx1aWRkIG1lY29uaXVtbSwgKHRoZSBkYXJrIHN0aWNreSBzdWJzdGFuY2UgaW4gdGhlIGJhYnlpZXMgaW50ZXN0aW5lICksIGFuZCBhIGRlY3JlYXNlIGluIHRoZSBmZWVkaW5nc3MuPGJyIC8+DQoyLiA8YnIgLz4NClRoZSBhbW91bnR0IG9mIHdlaWdodCBsb3NzLCBjYW4gdmFyeXkgZnJvbSBiYWJ5IHRvIGJhYnkgLCBidXQgb24gYXZlcmFnZSBmdWxsIHRlcm0gbmV3Ym9ybnMgLCA8YnIgLz4NCmxvc2UgYmV0d2VlbiA1LTEwJSBvZiB0aGVpcnIgYmlydGggd2VpZ2h0dCBpbiB0aGUgZmlyc3R0IHdlZWsgb2YgbGlmZSwgZm9yciBleGFtcGxlIGEgNy1wb3VuZGQoMy4ya2cpIGJhYnl5IG1heSBsb3NlIHVwdG8gMTAgb3VuY2hlcygyODMgZ20pIGluIHRoZWlyIDFzdCBmZXcgZGF5c3MsIGFmdGVyIGJpcnRoaC48YnIgLz4NCjMuIEl0IDlpcyBpbXBvcnRhbnR0IHRvIG5vdGUgdGhhdCBpcyB3ZWlnaHQgLCBpcyBjb25zaWRlcnJlZCBub3JtYWwgYW5kIGV4cGVjdGVkZCBpbiBoZWFsdGh5eSwgZnVsbCB0ZXJtLW5ld3cgYm9ybnNzLiBIb3dldmVyLCBoZWFsdGhjYXJlIHByb3ZpZGVzIGNsb3NlbHl5IG1vbml0b3IgbmV3dyBib3Juc3MsIHRvIGVuc3VyZSB0aGF0IHRoZXkgYXJlIG1vbml0b3JpbmdnIHRoZXJlIHdlaWdodHQgYW5kIGh5ZHJhdGlvbiBsZXZlbHMsIGFuZCB0byBhZGRyZXNzIGFueXkgY29uY2VycyBvcnIgaXNzdWVzcyBtYXkgcmlzZWUuIDxiciAvPg0KQW5zd2VyIDIuPGJyIC8+DQogQW5hdG9taWNhbGx5LCBib3VuZHJpZXNzIG9mIHBhbHBhdGlvbiBpbiB0aGVlZSBsaXZlciwgaW4gY2hpbGRyZW5uIHVuZGVyIDN5ZWFyc3Mgb2YgYWdlICwgaW4gY2hpbGRyZW5uIHVuZGVyIDN5ZWFyIG9mIGFnZSB0aGUgbGl2ZXIgc2l6ZSdzIGFuZGQgcG9zaXRpb24gYXJlIGluZmx5ZW5jZWQgIGJ5IHRoZWlyIGRldmVsb3BtZW50YWwgYW5hdG9teXksIHRoZSBsaXZlcnIgLCBpcyBwcm9wb3J0aW9uYWxseSBsYXJnZWVyIGluIHlvdW5kIGNoaWxkcmVuJ3MgY29tcGFyZWRkIHRvIGFkdWx0cyBkdWUgdG8gdGhlIGZvbGxvd2luZyAsIHJlYXNvbnMtIDxiciAvPg0KMS0gSGlnaGggbWV0YWJvbGljYyBhY3Rpdml0eXkgb2YgdGhlIGxpdmVyLCBkdXJpbmcgaW5mYW5jeXkgYW5kIGVhcmx5eSBjaGlsZGhvb2QgLiA8YnIgLz4NCjItIFRoZSBsaXZlcidzIHNpZ25pZmljYW50IHJvbGUgaW4gZ3Jvd3RoIGRldmVsb3BtZW50IHByb2Nlc3Nlcy4gPGJyIC8+DQpMb3dlcnIgZWRnZSBvZiB0aGUgbGl2ZXJyLTxiciAvPg0KMS0gVGhlIGxvd2VyIGVkZ2VlIG9mIHRoZSBsaXZlcnIgaW4gY2hpbGRyZW5uLCB1bmRlciAzeWVhcnNzIG9mIGFnZSBjYW4gbm9ybWFsbHksIDEtMmNtIGJlbG93dyB0aGUgY29zdGFsIG1hcmdpbm4sIGluIHRoZSBtaWQtY2xhdmljdWxhcnIgbGluZSAuPGJyIC8+DQoyLSBUaGlzcyBpcyBwaHl5c2lvbG9neSBhbmQgbm90IGNvbnNpZGVycmVkIGFibm9ybWFsIGFzIHRoZSBsaXZlciAsIG9jY3VwaWVzIGEgcmVsYXRpdmVseXkgbGFyZ2Ugc3BhY2UsIGluIHRoZSBhYmRvbWluYWxsIGNhdml0eXkgYXQgdGhpcyBhZ2UgLiA8YnIgLz4NClVwcGVyciBCb3VuZGFyeSBvZiB0aGUgTGl2ZXItPGJyIC8+DQoxLSBUaGUgdXBwZXIgYm91bmRyaWVzcyBvZiB0aGUgbGl2ZXIgLCByZW1haW4gY29uc2lzdHMgd2l0aCBhZHVsdHMgdHlwaWNhbGx5IGF0IHRoZSA1dGhoLCBpbnRlcmNvYXN0YWwgc3BhY2VlIGF0IHRoZSByaWdodHQgc2lkZS48YnIgLz4NCldoeXkgbGl2ZXIgaXMgcGFscGFibGVlIGluIHRoZSB5b3VuZyBjaGlsZHJlbnM/LSA8YnIgLz4NCjEtIFRoZWUgYWJkb21pbmFsIHdhbGwgLCBpcyB0aGluIG1ha2luZyBpbnRlcm5hbCBvcmdhbnMsIG1vcmUgZWFzaWx5eSwgcGFscGFibGUuIDxiciAvPg0KMi0gVGhlIGxpdmVyIGlzIHJlbGF0aXZlZWx5IGxhcmdlciBpbiBwcm9wb3J0aW9uYWxsIHRvIHRoZSBhYmRvbWluYWxsIGNhdml0eS48YnIgLz4NCjMtIEEgcGFscGFibGVlIGxpdmVyIGVkZ2Ugd2l0aCwgMS0yY20gb2YgdGhlIGNvYXN0YWxsIG1hcmdpbiBpcyBub3JtYWwgb2YgdGhpcyBhZ2UgZ3JvdXBwLiA8YnIgLz4NCkNsaW5pY2FsIFJlbGV2YW5jZWUtIDxiciAvPg0KSWYgdGhlIGxpdmVyIGVkZ2VlIGV4dGVuZHMgLCBtb3JlIHRoYW4gMmNtIGJlbG93dyB0aGUgY29hc3RhbCBtYXJnaW5uLCBvciBpcyB0ZW5kZXIgLCBmaXJtICwgb3IgZW5sYXJnZWRkIHRoaXMgbWF5eSBpbmRpY2F0ZSBoZXBhdG9tZWdhbGx5IG9yIGFub3RoZXJyIHVuZGVybHlpbmdnIGNvbmRpdGlvbnMgc3VjaCBhcyA6LTxiciAvPg0KMS1JbmZlY3Rpb25zICh2aXJhbGwgaGVwYXRpdGllcyBvciBtYWxhcmlhKTxiciAvPg0KMi0gTWV0YWJvbGljYyBkaXNvcmRlcnMgPGJyIC8+DQozLSBDYXJkaWFjIGlzc3VlcyAoaGVhcnQgZmFpbHVyZSkgIDxiciAvPg0KNC0gTWFsaWduYW5jaWVzczxiciAvPg0KQ29uY2x1c2lvbiBtYXl5IGluY2x1ZGUtIDxiciAvPg0KSW4gY2hpbGRyZW5zIHVuZGVyIDN5ZWFyIG9mIGFnZSwgdGhlIGxvd2VyIGVkZ2Ugb2YgdGhlZSBsaXZlciBpcyBub3JtYWxseSBwYWxwYWJsZSAxLTJjbSBiZWxvd3cgdGhlIGxvd2VyIGNvYXN0YWwgbWFyZ2luLCBpbiB0aGVlIG1pZGNsYXZpY3VsYXIgbGluZSwgdGhpcyByZWZsZWN0cyBub3JtYWxsIGRldmVscG9tZW50YWwgYW5hdG9teSBhbm5kZCB0aGUgcGh5c2lvbG9neSBpbiBlYXJseXkgY2hpbGRob29kL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 to the first question is incomplete, without justification</text:p>
          </table:table-cell>
          <table:table-cell office:value-type="float" office:value="0" table:style-name="ce1">
            <text:p>0</text:p>
          </table:table-cell>
          <table:table-cell table:number-columns-repeated="16376"/>
        </table:table-row>
        <table:table-row table:style-name="ro1">
          <table:table-cell office:value-type="float" office:value="915225" table:style-name="ce1">
            <text:p>915225</text:p>
          </table:table-cell>
          <table:table-cell office:value-type="string" table:style-name="ce1">
            <text:p>kazakh</text:p>
          </table:table-cell>
          <table:table-cell office:value-type="string" table:style-name="ce1">
            <text:p>Билет 2&amp;lt;br /&amp;gt; 1.Ерте жастағы балалардың май шел қабаты жиырылмалы емес термогенезге қатысып (жылу өнімдің бұлшық ет жиырылуымен байланысты емес), бұңдағы қандай тінің арқасында болады? Неге?&amp;lt;br /&amp;gt; 2.Жаңа туған нәрестелерде және ерте жастағы балаларда жұрек тондарының ерекшеліктері қандай және немен сипаттаналады?&amp;lt;br /&amp;gt;</text:p>
          </table:table-cell>
          <table:table-cell office:value-type="string" table:style-name="ce1">
            <text:p>MdGI0ZYg0YHSsdGA0LDSm9Kb0LAg0LbQsNGD0LDQvyDQsdC10YDQtSDQutC10YLRgdC10Lwg0LXRgNGC0LUg0LbQsNGB0YLQsNKT0Ysg0LHQsNC70LDQu9Cw0YDQtNGL0qMg0YLQtdGA0LzQvtCz0LXQvdC10LfRliDRiNC10Lsg0LzQsNC5INKb0LDQsdCw0YLRi9C90YvSoyDQvdC10LPRltC30ZYg0pvQvtKj0YvRgCDQvNCw0Lkg0YLRltC90ZbQvdC1INCx0LDQudC70LDQvdGL0YHRgtGLINCx0L7Qu9Cw0LTRiy4g0J7QuyDQvdC10LPRltC30ZbQvdC10L0g0LTQtdC90LUg0YHQsNC70LzQsNKT0YvQvdGL0qMgMS0zINC/0LDQudGL0LfRi9C9INKb0rHRgNCw0LnQtNGLLiDSmtC+0qPRi9GAINC80LDQuSDRgtGW0L3RliDRgtC10YDQvNC+0LPQtdC90LXQt9C00ZbSoyDQvdC10LPRltC30LPRliDQvNC10YXQsNC90LjQt9C80ZYg0LHQvtC70YvQvyDRgtCw0LHRi9C70LDQtNGLLtOo0LnRgtC60LXQvdGWINC+0Lsg0LzQuNGC0L7RhdC+0L3QtNGA0LjRj9C70LDRgNGL0L3QtNCw0pPRiyDRgtC10YDQvNC+0LPQtdC90LjQvSDQsdC10LvQvtCz0ZYg0LDRgNKb0YvQu9GLINGN0L3QtdGA0LPQuNGP0L3RiyDQttGL0LvRg9KT0LAg0LDQudC90LDQu9C00YvRgNCw0LTRiy4g0JXRgNGC0LUg0LbQsNGB0YLQsNKT0Ysg0LHQsNC70LDQu9Cw0YDQtNCwINC+0Lsg0L3QtdCz0ZbQt9GW0L3QtdC9INC80L7QudGL0L0sINC20LDRg9GL0YDRi9C9LNCw0YDSm9CwINC205nQvdC1INCx0q/QudGA0LXQuiDQvNCw0qPRi9C90LTQsCDRiNC+0pPRi9GA0LvQsNC90LDQtNGLLiDQntC90YvSoyDQvdC10LPRltC30LPRliDSm9GL0LfQvNC10YLRliDQttC40YvRgNGL0LvQvNCw0LnRgtGL0L0g0YLQtdGA0LzQvtCz0LXQvdC10LcsINGP0pPQvdC4INCx0rHQu9GI0YvSmyDQtdGC0YLRltKjINC20LjRi9GA0YvQu9GD0YvQvdGB0YvQtyDQttGL0LvRgyDTqdC90LTRltGA0LUg0LDQu9Cw0LTRiy4g0KLQtdGA0LzQvtCz0LXQvdC10Lcg0LzQtdGF0LDQvdC40LfQvNGWINGB0LjQvNC/0LDRgtC40LrQsNC70YvSmyDQttKv0LnQutC1INC20q/QudC10YHRltC90ZbSoyDQsdC10LvRgdC10L3QtNGW0LvRltCz0ZbQvdC10L0g0L3QvtGA0Y3Qv9C40L3QtdGE0YDQuNC9INCx06nQu9GW0L3Rg9GW0L3QtdC9INC20q/Qt9C10LPQtSDQsNGB0LDQtNGLLiDQkdOp0LvRltC90LPQtdC9INC90L7RgNGN0L/QuNC90LXRhNGA0LjQvSDSm9C+0qPRi9GAINC80LDQudC00LDSk9GLINC70LjQv9C+0LvQuNC30LTRliDSm9Cw0LzRgtCw0LzQsNGB0YvQtyDQtdGC0LXQtNGWLtCb0LjQv9C40LTRgtC10YAg0LzQuNGC0L7RhdC+0L3QtNGA0LjRj9C00LAg0YvQtNGL0YDQsNKT0LDQvSDQutC10LfQtNC1LCDRjdC90LXRgNCz0LjRjyDQttGL0LvRg9KT0LAg0LDQudC90LDQu9Cw0LTRiywg0LHRltGA0LDSm9GC0LAg0JDQotCkINGB0LjQvdGC0LXQt9C00LXQu9C80LXQudC00ZYuINCV0YDRgtC1INC20LDRgdGC0LDSk9GLINCx0LDQu9Cw0LvQsNGA0LTRi9KjINCx0rHQu9GI0YvSmyDQtdGC0YLQtdGA0ZYg0LbQtdGC0LrRltC70ZbQutGC0ZYg0LTQtdKj0LPQtdC50LTQtSDQttGL0LvRgyDTqdC90LTRltGA0LUg0LDQu9C80LDQudC00YssINGB0L7QvdC00YvSm9GC0LDQvSDQtNCwINKb0L7So9GL0YAg0LzQsNC5INGC0ZbQvdGWINC90LXQs9GW0LfRliDRgtC10YDQvNC+0LPQtdC90LXQtyDQutOp0LfRliDQsdC+0LvRi9C/INGC0LDQsdGL0LvQsNC00YsuINCR0rHQuyDQvNC10YXQsNC90LjQt9C8INC905nRgNC10YHRgtC10L3RltKjINGB0YvRgNGC0pvRiyDQvtGA0YLQsCDRgtC10LzQv9C10YDQsNGC0YPRgNCw0YHRiyDQsdC10LnRltC80LTQtdC70YPQtNC1INC80LDSo9GL0LfQtNGLINGA06nQuyDQsNGC0LrQsNGA0LDQtNGLLjxiciAvPg0KPGJyIC8+DQrQkNC7INC10L3QtNGWIDLRiNGWINGB0rHRgNCw0pvSm9CwINC20LDRg9Cw0L8g0LHQtdGA0LUg0LrQtdGC0YHQtdC8LiDQltCw0qPQsCDRgtGD0LPQsNC9INC905nRgNC10YHRgtC10LvQtdGAINC80LXQvSDQtdGA0YLQtSDQttCw0YHRgtCw0pPRiyDQsdCw0LvQsNC70LDRgNC00LDSk9GLINC20q/RgNC10Log0YLQvtC90LTQsNGA0YvQvdGL0qMg0LXRgNC10LrRiNC10LvRltCz0ZYg0L7Qu9Cw0YDQtNGL0qMg0L/QsNC50LTQsCDQsdC+0LvRgyDRgdC10LHQtdC/0YLQtdGA0ZYg0LzQtdC9INC20q/RgNC10Lot0LrQsNC90YLQsNC80YvRgCDQttKv0LnQtdGB0ZbQvdGW0qMg0LXRgNC10LrRiNC10LvRltC60YLQtdGA0ZbQvdC1INCx0LDQudC70LDQvdGL0YHRgtGLINCx0L7Qu9Cw0LTRiy4g0JHSsdC7INGI0YPQvNC00LDRgCDQvdC10LPRltC30ZbQvdC10L0g0LHRltC30LTQtSDRhNC40LfQuNC+0LvQvtCz0LjRj9C70YvSmyDQvdC10LzQtdGB0LUg0L/QsNGC0L7Qu9C+0LPQuNGP0LvRi9C6INCx0L7Qu9GD0Ysg0LzSr9C80LrRltC9LiDQpNC40LfQuNC+0LvQvtCz0LjRj9C70YvQuiDQttGD0YDQtdC6INGI0YPQu9Cw0YDRi9C90LAg0YLQvtC60YLQsNC70LAg0LrQtdGC0YHQtdC8LCDQsdKx0Lsg0YjRg9C70LDRgCDQttKv0YDQtdC60YLRltKjINKb0LDQu9GL0L/RgtGLINC20LDQs9C00LDQudC00LAg0LbRg9C80YvRgSDRltGB0YLQtdGD0ZYg0LrQtdC30ZbQvdC00LUg0L/QsNC50LTQsCDQsdC+0LvQsNC00YsuINCW05nQvdC1INC00LUg0LHQsNC70LDQu9Cw0YDQtNGL0qMg0YjQsNC80LDQvNC10L0gMzAtNzAg0L/RgNC+0YbQtdC90YLRltC90LTQtSDQutC10LfQtNC10YHQtdC00ZYuINCo0YMg05nQtNC10YLRgtC1INC20YPQvNGB0LDQuiwg0LDQuyDQutCw0YDQutGL0L3QtNGL0LvRi9KT0YsgMS0yLzYg0LHQsNC70Lsg0LHQvtC70YvQvyDQutC10LvQtdC00ZYuINCR0LDQu9Cw0L3Ri9C9INC00LXQvdC1INC60LDQu9C/0Ysg06nQt9Cz0LXRgNCz0LXQvdC00LUsINC80YvRgdCw0LvRiyDQttCw0YLQutCw0L0g0LHQsNC70LDQvdGLINGC0rHRgNKT0YvQt9KT0LDQvdC00LAg0YjRg9C70LDRgCDQutCw0YDQutGL0L3QtNGL0LvRi9Cz0Ysg0LTQsCDTqdC30LPQtdGA0YPRliDQvNGD0LzQutGW0L0uINCo0YPQu9Cw0YAg0LHQvtC70pPQsNC90YvQvNC10L0g0LHQsNC70LAg0LbQsNC70L/RiyDQttCw0pPQtNCw0LnRiyDQttCw0LrRgdGLLNGP0pPQvdC4INGC0YvQvdGL0YEg0LDQu9GD0Yss0LTQsNC80YPRiyDQvdC+0YDQvNCw0LTQsCDQsdC+0LvQsNC00YsuINCQ0Lsg0LHSsdC7INGI0YPQu9Cw0YAg0L3QtdCz0ZbQt9GW0L3QtdC9INC60LDQvdC90YvQvSDRgtGD0YDQsdGD0LvQtdC90YLRgtGWINC60L7Qt9KT0LDQu9GL0YHRi9C90LDQvSDRgtGD0YvQvdC00LDQudC00YsuINCi0YPRgNCx0YPQu9C10L3RgtGC0ZbQu9GW0Log0LrQsNC60L/QsNC60YjQsCDRgtC10YHRltC60YLQtdGA0ZYg0LzQtdC9INKb0LDQvSDRgtCw0LzRi9GA0LvQsNGA0YvQvdGL0L0g0LTQuNCw0LzQtdGC0YDRlizSm9Cw0L0g0LDSk9GDINC20YvQu9C00LDQvNC00YvSk9GLINC205nQvdC1INC00LUg0LrQsNC90L3Ri9KjINGC0rHRgtC60YvRgNC70YvSk9GLINCx0rHQt9GL0LvRi9GB0YvQvdCw0L0g0L/QsNC50LTQsCDQsdC+0LvQsNC00YsuINOo0LrQv9C1INCw0YDRgtC10YDQuNGP0YHRi9C90YvQvSDRgdC40YHRgtC+0LvQsNC70YvSmyDRiNGL0pPRgyDRiNGD0Ys6INC90LXQs9GW0LfRltC90LXQvSDQttCw0L3QsCDRgtGD0LPQsNC9INC905nRgNC10YHRgtC10LvQtdGA0LTQtSDQttC40ZYg0LDQvdGL0LrRgtCw0LvQsNC00Ysg0LbTmdC90LUg0LTQtSDQttCw0YHRi9C90LAg0LrQsNGA0LDQuSDQttC+0LnRi9C70LDQtNGLLiDQkNC7INC10L3QtNGWINC/0LDRgtC+0LvQvtCz0LjRj9C70YvQuiDRiNGD0LvQsNGA0pPQsCDRgtC+0pvRgtCw0LvQsCDQutC10YLRgdC10LwuINCe0Lsg0L3QtdCz0ZbQt9GW0L3QtdC9INOZ0YDRgtKv0YDQu9GWINC20q/RgNC10Log0LDRg9GA0YPQu9Cw0YDRiywg0LbSr9GA0LXQuiDQutCw0L3RgtCw0LzRi9GAINC20YPQudC10YHRltC90ZbSoyDRgtGD0LAg0LHRltGC0LrQtdC9INCw0LrQsNGD0LvQsNGA0Ysg0L3TmdGC0LjQttC10YHRltC90LTQtSDQv9Cw0LnQtNCwINCx0L7Qu9Cw0LTRiy4g0JHSsdC7INGI0YMg0LDQudC60YvQvSDQtdGB0YLRltC70LXQtNGWLCDQsNC7INC60LDRgNC60YvQvdC00YvQu9GL0pPRiyAzLzYg0LHQsNC70Lsg0L3QtdC80LXRgdC1INC+0LTQsNC9INC00LAg0LbQvtKT0LDRgNGLINCx0L7Qu9GD0Ysg0LzRg9C80LrQuNC9LiDQqNGD0LvQsNGAINCx0ZbQt9C00LUg0LHQsNC70LDQvdGL0qMg0LTQtdC90LUg0LrQsNC70L/Ri9C90LAg0YLTmdGD0LXQu9C00ZYg0LXQvNC10YEuINCh0L7QvdGL0LzQtdC9INC60LDRgtCw0YAg0LTQuNCw0YHRgtC+0LvQsCDQutC10LfRltC90LTQtSDRgtKx0YDQsNKb0YLRiyDRgtKv0YDQtNC1LCDRg9C30LTRltC60YHRltC3INC10YHRgtGW0LvRg9GWINC80YPQvNC60ZbQvS4g0prQvtGB0YvQvNGI0LAg0YLRi9C90YvRgSDQsNC70YPQtNGL0L0g0LrQuNGL0L3QtNCw0YPRiywg0YbQuNCw0L3QvtC3LNOp0YHRgyDQvNC10L0g0YHQsNC70LzQsNKbINC60L7RgdGD0LTRi9C9INCx0LDRj9GD0LvQsNGD0Ysg0LzRg9C80LrRltC9LiDQlNC40LDRgdGC0L7Qu9Cw0LvRi9KbINGI0YM6INC80LjRgtGA0LDQu9GM0LTRliDQvdC10LzQtdGB0LUg0YLRgNC40LrRg9GB0L/QuNC00LDQu9GM0LTRliDRgdGC0LXQvdC+0Lcg0LrQtdC30ZbQvdC00LUg0LDQvdGL0LrRgtCw0LvQsNC00YsuINCa0L7QvdGC0LjQvdGD0LDQu9GM0LTRiyDRiNGDOiDQvdC10LPRltC30ZbQvdC10L0g0LDRiNGL0Log0LDRgNGC0LXRgNC40Y/Qu9GL0psg06nQt9C10Log0LrQtdC30ZbQvdC00LUg0LXRgdGC0ZbQu9C10LTRli4g0JbSr9GA0LXQuiDRiNGD0LvQsNGA0YvQvdGL0L0g0LXRgNC10LrRiNC10LvRltC60YLQtdGA0ZbQvSDQsNC90YvQutGC0LDRgyDSr9GI0ZbQvTog0LDRg9GB0LrRg9C70YzRgtCw0YbQuNGPLNGN0YXQvtC60LDRgNC00LjQvtCz0YDQsNGE0LjRjyzQrdCa0JMg0LbTmdC90LUg0YDQtdC90YLQs9C10L3QvtCz0YDQsNGE0LjRjyDTmdC00ZbRgdGC0LXRgNGW0L0g0LrQvtC70LTQsNC90LDQvNGL0Lcu0JHQsNC70LDQu9Cw0YDQtNCw0pPRiyDQttKv0YDQtdC6INGI0YPQu9Cw0YDRi9C90YvSoyDQutOp0LHRltGB0ZYg0LfQuNGP0L3RgdGL0Lcg0LHQvtC70YvQvyDRgtCw0LHRi9C70LDQtNGLINC205nQvdC1INC20LDRgdGLINOp0YHQutC10L0g0YHQsNC50YvQvSDQttC+0pPQsNC70LDQtNGLLiDQkNC70LDQudC00LAsINC/0LDRgtC+0LvQvtCz0LjRj9C70YvSmyDRiNGD0LzQtNCw0YDSk9CwINC60q/QtNGW0Log0LHQvtC70pPQsNC9INC60LXQt9C00LUg0LTQtdGA0LXRgyDQtNOZ0YDRltCz0LXRgCDQutOp0YDRltC90YMg0LrQsNC20LXRgi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2 сұрақта кателіктер бар, толық емес№</text:p>
          </table:table-cell>
          <table:table-cell office:value-type="float" office:value="0" table:style-name="ce1">
            <text:p>0</text:p>
          </table:table-cell>
          <table:table-cell table:number-columns-repeated="16376"/>
        </table:table-row>
        <table:table-row table:style-name="ro1">
          <table:table-cell office:value-type="float" office:value="915344" table:style-name="ce1">
            <text:p>915344</text:p>
          </table:table-cell>
          <table:table-cell office:value-type="string" table:style-name="ce1">
            <text:p>kazakh</text:p>
          </table:table-cell>
          <table:table-cell office:value-type="string" table:style-name="ce1">
            <text:p>Билет 2&amp;lt;br /&amp;gt; 1.Ерте жастағы балалардың май шел қабаты жиырылмалы емес термогенезге қатысып (жылу өнімдің бұлшық ет жиырылуымен байланысты емес), бұңдағы қандай тінің арқасында болады? Неге?&amp;lt;br /&amp;gt; 2.Жаңа туған нәрестелерде және ерте жастағы балаларда жұрек тондарының ерекшеліктері қандай және немен сипаттаналады?&amp;lt;br /&amp;gt;</text:p>
          </table:table-cell>
          <table:table-cell office:value-type="string" table:style-name="ce1">
            <text:p>MS4g0JHQsNC70LDQu9Cw0YAg0LzQtdC9INC10YDQtdGB0LXQutGC0LXRgCDQsNGA0LDRgdGL0L3QtNCw0pPRiyDRgtC10YDQvNC+0LPQtdC90LXQt9C00LUg0LDQudGL0YDQvNCw0YjRi9C70YvSm9GC0LDRgCDQsdCw0LnSm9Cw0LvQsNC00YsuINOo0LnRgtC60LXQvdGWINC905nRgNC10YHRgtC10LvQtdGA0LTQtSDQvtGA0LPQsNC90LjQt9C8INOZ0LvRliDRgtC+0LvRi9KbINC20LXRgtGW0LvQvNC10LPQtdC9ICDQsdC+0LvRi9C/INC60LXQu9C10LTRliwg0YHQvtC90YvQvNC10L0g0pvQsNGC0LDRgCDQutC10LnQsdGW0YAg0LzQtdGF0LDQvdC40LfQvNC00LXRgCDQtNC1INC20LXRgtGW0LvQvNC10LPQtdC9INCx0L7Qu9GL0L8g0LrQtdC70LXQtNGWLiDQkdCw0LvQsNC70LDRgNC00YvSoyDTqdC80ZbRgNGW0L3RltKjINCw0LvSk9Cw0YjSm9GLINCw0LnQu9Cw0YDRi9C90LTQsNKT0Ysg0YLQtdGA0ZYg0LDRgdGC0Ysg0LzQsNC5INGC0ZbQvdC00LXRgNGWINGC0LXRgNC80L7Qs9C10L3QtdC30LPQtSDSm9Cw0YLRi9GB0LDQtNGLLCDRgdC10LHQtdCx0ZYg0L7Qu9Cw0YDQtNCwINCw0psg0LzQsNC5INGC0ZbQvdC00LXRgNGWINC00LXQvdC1INGC0LXQvNC/0LXRgNCw0YLRg9GA0LDRgdGLINGC06nQvNC10L3QtNC10LPQtdC90LTQtSDQttGL0LvRgyDTqdC90LTRltGA0YPQs9C1INC606nQvNC10LrRgtC10YHQtdC00ZYsINCx0rHQuyDRgtGW0L3QtNC10YDQtNC1INKb0LjRgdGL0psg0LzQuNGC0L7RhdC+0L3QtNGA0LjRj9C70LDRgCDQsdC+0LvQsNC00YssINC+0LvQsNGAINGC0LXRgNC80L7Qs9C10L3QtdC3INCx0LXQu9GB0LXQvdC00ZbQu9GW0LPRltC9INCw0YDRgtGC0YvRgNCw0LTRiywg0LHSsdC7INCx0LDQu9Cw0LvQsNGA0LTRi9KjINGB0YPRi9Kb0pvQsCDRgtOp0LfRltC80LTRltC70ZbQs9GW0L0g0LDRgNGC0YLRi9GA0LDQtNGLLiDQntGB0Ysg0YLRltC9INC80LXQvSDQvNC10YXQsNC90LjQt9C80LTQtdGAINCw0YDSm9Cw0YHRi9C90LTQsCDQvdOZ0YDQtdGB0YLQtdC70LXRgNC00LUg0LbQuNGL0YDRi9C70LzQsNC70Ysg0LXQvNC10YEg0YLQtdGA0LzQvtCz0LXQvdC10Lcg0LbSr9C30LXQs9C1INCw0YHQsNC00YsuIDxiciAvPg0KMi4g0JbQsNKj0LAg0YLRg9KT0LDQvSDQvdOZ0YDQtdGB0YLQtdC70LXRgNC00ZbSoyDQttOZ0L3QtSDQtdGA0YLQtSDQttCw0YHRgtCw0pPRiyDQsdCw0LvQsNC70LDRgNC00YvSoyDQttKv0YDQtdC6INGC0L7QvdC00LDRgNGL0L3Ri9KjINC10YDQtdC60YjQtdC70ZbQutGC0LXRgNGWINGE0LjQt9C40L7Qu9C+0LPQuNGP0LvRi9KbINGE0LDQutGC0L7RgNC70LDRgNKT0LAg0LHQsNC50LvQsNC90YvRgdGC0Ysg06nQt9Cz0LXRgNC10LTRli4gIDxiciAvPg0K0KHQsNGDINCx0LDQu9Cw0L3Ri9KjINC20q/RgNC10LPRltC90ZbSoyDQsdCw0YDQu9GL0psg0LDQudC80LDSk9GL0L3QtNCwINC10LrRliDRgtC+0L0g0LDQudKb0YvQvSDQtdGB0YLRltC70YPRliDQvNKv0LzQutGW0L06IDEg0LbTmdC90LUgMiDRgtC+0L0uINCR0ZbRgNGW0L3RiNGWINC205nQvdC1INC10LrRltC90YjRliDRgtC+0L3QtNCw0YAg0LDRgNCw0LvRi9KT0YvQvdC00LDSk9GLINC40L3RgtC10YDQstCw0Lsg0YHQuNGB0YLQvtC70LDSk9CwINGB05nQudC60LXRgSDQutC10LvQtdC00ZYuINCQ0Lsg0LXRgNC10YHQtdC60YLQtdGA0LTQtSDRgdC40YHRgtC+0LvQsCDTmdC00LXRgtGC0LUg0LTQuNCw0YHRgtC+0LvQsNC00LDQvSDQtdC60ZYg0LXRgdC1INKb0YvRgdKb0LAg0LHQvtC70YvQvyDQutC10LvQtdC00ZYuINCt0LzQsdGA0LjQvtC60LDRgNC00LjRjyDQtNC10LPQtdC90ZbQvNGW0Lcg0LHRltGA0ZbQvdGI0ZYg0LbTmdC90LUg0LXQutGW0L3RiNGWINGC0L7QvSDQtNGL0LHRi9GB0YLQsNGA0YvQvdGL0qMg0LDQudKb0YvQvdC00YvSk9GL0L3Ri9KjINGC0LXSoyDQsdC+0LvRg9GLINC205nQvdC1INC+0LvQsNGA0LTRi9KjINCw0YDQsNC70YvSmyDQuNC90YLQtdGA0LLQsNC70YvQvdGL0qMg0YLQtdKjINCx0L7Qu9GD0YssINCx0rHQuyDQvNCw0Y/RgtC90LjQuiDRgtOZ0YDRltC30LTRliDRi9GA0pPQsNKb0YLRiyDQsdGW0LvQtNGW0YDQtdC00ZYuINOo0LzRltGA0ZbQvdGW0qMg0LDQu9KT0LDRiNKb0Ysg0LXQutGWINCw0L/RgtCw0YHRi9C90LTQsCDRjdC80LHRgNC40L7QutCw0YDQtNC40Y8g0pvQsNC70YvQv9GC0Ysg0pvSsdCx0YvQu9GL0YEg0LHQvtC70YvQvyDRgdCw0L3QsNC70LDQtNGLLiDQkdCw0LvQsNC70LDRgNC00LAg0YLRg9KT0LDQvdC90LDQvSDQutC10LnRltC9INCw0LvSk9Cw0YjSm9GLINC60q/QvdC00LXRgNGW0L3QtNC1INC20q/RgNC10Log0YLQvtC90LTQsNGA0YvQvdGL0qMg0YTQuNC30LjQvtC70L7Qs9C40Y/Qu9GL0psg05nQu9GB0ZbQt9C00ZbQs9GWINCx0LDQudKb0LDQu9Cw0LTRiy4g0JbSr9GA0LXQuiDRgtC+0L3QtNCw0YDRiyDQutC10LnRltC9INC10YDQtdGB0LXQutGC0LXRgNCz0LUg0pvQsNGA0LDSk9Cw0L3QtNCwINCw0L3Ri9KT0YvRgNCw0psg0LbTmdC90LUg0LTQtSDSr9C90LTRliDQsdC+0LvQsNC00YsuINOY0LvRgdGW0Lcg0LXRgdGC0ZbQu9C10YLRltC9INGC0L7QvdC00LDRgCDRgtKx0LnRi9Kb0YLQsNC70pPQsNC9INC00LXQvyDQsNGC0LDQu9Cw0LTRiy4g0JDQuyDRgtGL0Lwg0LHTmdGB0LXSoyDQtdGB0YLRltC70LXRgtGW0L3QtNC10YAg0YLSsdC50YvSmyDRgtC+0L3QtNCw0YAg0LTQtdC/INGB0LjQv9Cw0YLRgtCw0LvQsNC00YsuIDEg0LbTmdC90LUgMiDRgtC+0L3QtNCw0YAg0q/QvdC00ZbQu9GW0LPRliDQttCw0YHSm9CwINCx0LDQudC70LDQvdGL0YHRgtGLINOp0LfQs9C10YDQtdC00ZY6IDEuINC20LDSo9CwINGC0YPSk9Cw0L0g0L3TmdGA0LXRgdGC0LXQu9C10YDQtNGW0qMg0LDQu9KT0LDRiNKb0YsgMi0zINC60q/QvdC00LXRgNGW0L3QtNC1INC20q/RgNC10Log0rHRiNGL0L3QtNCwINC205nQvdC1INCR0L7RgtC60LjQvS3QrdGA0LHQsCDQvdKv0LrRgtC10YHRltC90LTQtSAyINGC0L7QvSAxINGC0L7Sk9CwINKb0LDRgNCw0pPQsNC90LTQsCDQsNC90YvSmyDQtdGB0YLRltC70LXQtNGWLiDQmtC10LnRltC9INC+0LvQsNGA0LTRi9KjINC00YvQsdGL0YHRiyDRgtC10qPQtdGB0LXQtNGWLiDQkNC7IDItMyDQsNC50LTQsNC9INC60LXQudGW0L0gMdGC0L7QvSDQsdCw0YHRi9C80YvRgNCw0psg0LHQvtC70LAg0LHQsNGB0YLQsNC50LTRiy4g0JXQutGW0L3RiNGW0LTQtdC9INOp0LzRltGA0ZbQvdGW0qMg0LDQu9KT0LDRiNKb0Ysg0LbRi9C70YsgMSDRgtC+0L0g0LDQudKb0YvQvdGL0YDQsNKbINC10YHRgtGW0LvQtdC00ZYgMiDQttCw0YHRgtCw0L0g0LHQsNGB0YLQsNC/INGC0L7QvdC00LDRgCDRgtC10qPQtdGB0ZbQvyAy0YjRliDRgtC+0L0g0LHRltGA0YLRltC90LTQtdC/INCx0LDRgdGL0Lwg0LHQvtC70LAg0LHQsNGB0YLQsNC50LTRiy4g0q7RiNGW0L3RiNGW0LTQtdC9IDIg0LbQsNGBINCw0YDQsNC70YvSk9GL0L3QtNCwIDLRiNGWINGC0L7QvSDRgdC+0Lsg0LbQsNKb0YLQsNKT0Ysg0LXQutGW0L3RiNGWINKb0LDQsdGL0YDSk9CwINCw0YDQsNC70YvSk9GL0L3QtNCwINC+0qMg0LbQsNKb0pvQsCDSm9Cw0YDQsNKT0LDQvdC00LAg0LDQvdGL0psg0LXRgdGC0ZbQu9C10LTRliDQsdKx0Lsg06jQutC/0LUg0LDRgNGC0LXRgNC40Y/RgdGLINCw0LnQvNCw0pPRi9C90LTQsNKT0Ysg0LXQutGWINGC0L7QvdC90YvSoyDRhNC40LfQuNC+0LvQvtCz0LjRj9C70YvSmyDQsNC60YbQtdC90YLRltC90LUg0LHQsNC50LvQsNC90YvRgdGC0YsuINCi06nRgNGC0ZbQvdGI0ZbQtNC10L0gMTIg0LbQsNGB0pvQsCDSm9Cw0YDQsNC5INCx0ZbRgNGW0L3RiNGWINC205nQvdC1INC10LrRltC90YjRliDRgtC+0L3QtNCw0YAg0q/QvdC00ZbQu9GW0LPRliDRgtC10qPQtdGB0LXQtNKjLCDQutC10LnRltC90ZbRgNC10Log0LXQutGW0L3RiNGWINGC0L7QvSDSm9C+0LvSm9CwINKv0YHRgtGW0L3QtNC1INC+0qMg0LbQsNKb0YLQsCDQsdCw0YHRi9C80YvRgNCw0psg0YjRi9KT0LDQtNGLLiDQkdKx0Lsg0LbQsNGB0pvQsCDQsdCw0LnQu9Cw0L3Ri9GB0YLRiyDQsdCw0LvQsNC70LDRgNC00YvSoyDQttKv0YDQtdC6INGC0L7QvdC00LDRgNGL0L3QtNCwINCx0L7Qu9Cw0YLRi9C9INOp0LfQs9C10YDRltGB0YLQtdGA0ZYu</text:p>
          </table:table-cell>
          <table:table-cell office:value-type="float" office:value="170348" table:style-name="ce1">
            <text:p>170348</text:p>
          </table:table-cell>
          <table:table-cell office:value-type="float" office:value="96" table:style-name="ce1">
            <text:p>9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654" table:style-name="ce1">
            <text:p>915654</text:p>
          </table:table-cell>
          <table:table-cell office:value-type="string" table:style-name="ce1">
            <text:p>kazakh</text:p>
          </table:table-cell>
          <table:table-cell office:value-type="string" table:style-name="ce1">
            <text:p>Билет 2&amp;lt;br /&amp;gt; 1.Ерте жастағы балалардың май шел қабаты жиырылмалы емес термогенезге қатысып (жылу өнімдің бұлшық ет жиырылуымен байланысты емес), бұңдағы қандай тінің арқасында болады? Неге?&amp;lt;br /&amp;gt; 2.Жаңа туған нәрестелерде және ерте жастағы балаларда жұрек тондарының ерекшеліктері қандай және немен сипаттаналады?&amp;lt;br /&amp;gt;</text:p>
          </table:table-cell>
          <table:table-cell office:value-type="string" table:style-name="ce1">
            <text:p>MSnQkdGW0YDRltC90YjRliDQttCw0pPQtNCw0Y/RgtGC0LAg0LXRgNGC0LUg0LbQsNGB0YLQsNKT0Ysg0LHQsNC70LDQu9Cw0YDQtNGL0qMg0YLQtdGA0LzQvtCz0LXQvdC10LfRlizRgdC+0L3Ri9KjINGW0YjRltC90LTQtSDQttC40YvRgNGL0LvQvNCw0LvRiyDQtdC80LXRgSDRgtC10YDQvNC+0LPQtdC90LXQtyDRiNC10Lsg0LzQsNC5INKb0LDQsdCw0YLRi9C90LTQsCDQsdC+0LvQsNGC0YvQvSDQvdC10LPRltC30LPRliDSm9C+0qPRi9GAINC80LDQuSDRgtGW0L3RltC90LUg0LHQsNC50LvQsNC90YvRgdGC0Ysu0prQvtKj0YvRgCDQvNCw0Lkg0YLRltC90ZYg0LDQtNCw0Lwg0LTQtdC90LXRgdGW0L3QtNC1INGB0LDQu9C80LDSk9GL0L3Ri9KjIDEtM9C/0LDQudGL0LfRi9C9INCx0LXRgNC10LTRli7SmtC+0qPRi9GAINC80LDQuSDRgtGW0L3RliDRgtC10YDQvNC+0LPQtdC90LXQt9C00ZbSoyDQvdC10LPRltC30LPRliDQvNC10YXQsNC90LjQt9C80ZYg0LHQvtC70YvQvyDRgtCw0LHRi9C70LDQtNGLLtCR0rHQuyDQvdC10LPRltC30ZbQvdC10L0g0LbQsNGB0LDRiNCw0LTQsCDQsdC+0LvQsNGC0YvQvSDQv9GA0L7RhtC10YHRgtC10YDQs9C1INCx0LDQudC70LDQvdGL0YHRgtGLINC00LXQvyDRgtC+0L/RiNGL0LvQsNGD0LzRi9C30pPQsCDQsdC+0LvQsNC00Ysu0KHQtdCx0LXQsdGWINCx0rHQuyDQvNC40YLQvtGF0L7QvdC00YDQuNGP0LTQsNKT0Ysg0YLQtdGA0LzQvtCz0LXQvdC40L0g0LHQtdC70L7Qs9GLINCw0YDSm9GL0LvRiyDRjdC90LXRgNCz0LjRj9C90Ysg0LbRi9C70YPSk9CwINCw0LnQvdCw0LvQtNGL0YDQsNGC0YvQvSwg0LDQtNCw0Lwg0L7RgNCz0LDQvdC40LfQvNC00LUg0LbRi9C70YMg06nQvdC00ZbRgNGD0LTQtSDQvNCw0qPRi9C30Ysg0LfQvtGAINC80LDQudC00YvSoyDQsNGA0L3QsNC50Ysg0YLSr9GA0ZYu0JXRgNGC0LUg0LbQsNGB0YLQsNKT0Ysg0LHQsNC70LDQu9Cw0YDQtNCwINCx0rHQuyDQvNCw0Lkg0pvQvtGA0YvQvdGL0qMg0LrTqdC/INCx06nQu9GW0LPRliDQvNC+0LnRi9C9LNC20LDRg9GL0YDRi9C9INCw0YDSm9CwLNGB0L7QvdGL0LzQtdC9INKb0LDRgtCw0YAg0LHSr9C50YDQtdC6INC80LDSo9GL0L3QtNCwINGI0L7Sk9GL0YDQu9Cw0L3QsNC00Ysu0J7QvdGL0qMg0L3QtdCz0ZbQt9Cz0ZYg0pvRi9C30LzQtdGC0ZYg0LXRgNC10LrRiNC1LtCv0pPQvdC4INC20LjRi9GA0YvQu9C80LDQudGC0YvQvSDRgtC10YDQvNC+0LPQtdC90LXQtyDQtNC10L8g0LDRgtCw0LvQsNC00Ysu0JHSsdC7INC00LXQs9C10L3RltC80ZbQtyDQsdKx0LvRiNGL0pvQtdGC0YLRltKjINKb0LDRgtGL0YHRg9GL0L3RgdGL0Lcg0L3QtdC80LXRgdC1INC20LjRi9GA0YvQu9GD0YvQvdGB0YvQtyDQttGL0LvRgyDTqdC90LTRltGA0YMu0KLQtdGA0LzQvtCz0LXQvdC10Lcg0LzQtdGF0LDQvdC40LfQvNGWINGW0YHQutC1INKb0L7RgdGL0LvSk9Cw0L3QtNCwLNGB0LjQvNC/0LDRgtC40LrQsNC70YvSmyDQttKv0LnQutC1INC20q/QudC10YHRltC90ZbSoyDQsdC10LvRgdC10L3QtNGW0LvRltCz0ZYg0LDRgNGC0YvQvyzQvdC+0YDRjdC/0LXQvdC10YTRgNC40L3QvdGW0qMg0LHTqdC70ZbQvdGD0ZbQvSDRgtGD0LTRi9GA0LDQtNGLLtCQ0Lsg0LHRltC30LTQtSDQsdOp0LvRltC90LPQtdC9INC90L7RgNGN0L/QuNC90LXRhNGA0LjQvSDSm9C+0qPRi9GAINC80LDQudC00LDSk9GLINC70LjQv9C+0LvQuNC3INKv0LTQtdGA0ZbRgdGW0L0g0LbQsNC90LTQsNC90LTRi9GA0LDQtNGLLtCv0pPQvdC4INC80LDQuSDSm9GL0YjSm9GL0LvQtNCw0YDRi9C90YvSoyDRi9C00YvRgNCw0YPRi9C9INC20q/Qt9C10LPQtSDQsNGB0YvRgNCw0LTRiy7QltCw0YHQsNGI0LAg0ZbRiNGW0L3QtNC10LPRliDQvNC40YLQvtGF0L7QvdC00YDQuNGP0LTQsCDQu9C40L/QuNC00YLQtdGAINGL0LTRi9GA0LDSk9Cw0L0g0LrQtdC30LTQtSDRjdC90LXRgNCz0LjRjyDQttGL0LvRg9KT0LAg0LDQudC90LDQu9Cw0LTRiy7QkdGW0YDQsNKbINGC0LXRgNC80L7Qs9C10L3QtdC30LTRltKjINCx0LDRgdGC0Ysg0LXRgNC10LrRiNC10LvRltCz0ZYg0LzSsdC90LTQsCDQkNCi0KQs0Y/Sk9C90Lgg0Y3QvdC10YDQs9C40Y8g0pvQvtGA0Ysg0YHQuNC90YLQtdC30LTQtdC70LzQtdC50LTRli7QldGA0YLQtSDQttCw0YHRgtCw0pPRiyDQsdCw0LvQsNC70LDRgNC00YvSoyDQsdKx0LvRiNGL0pvQtdGC0YLQtdGA0ZYg0LbQtdGC0LrRltC70ZbQutGC0LUg0LzTqdC70YjQtdGA0LTQtSDQttGL0LvRgyDTqdC90LTRltGA0LUg0LDQu9C80LDQudC00Ysu0KHQvtC90LTRi9Kb0YLQsNC9INKb0L7So9GL0YAg0LzQsNC5INGC0ZbQvdGWINC10YDRgtC1INC20LDRgdGC0LDSk9GLINCx0LDQu9Cw0LvQsNGA0LTQsCDRgtC10YDQvNC+0LPQtdC90LXQt9C00ZbSoyDQvdC10LPRltC30LPRliDQutOp0LfRliDQsdC+0LvRi9C/INGC0LDQsdGL0LvQsNC00Ysu0prQvtGA0YLRi9C90LTRi9C70LDQuSDQutC10LvQtSDRgtC10YDQvNC+0LPQtdC90LXQt9C00ZbSoyDQvdOZ0YDQtdGB0YLQtdC70LXRgCDSr9GI0ZbQvSDQvNCw0qPRi9C30Ysg0LbQvtKT0LDRgNGLLtOo0LnRgtC60LXQvdGWINC+0Lsg0L3TmdGA0LXRgdGC0LXQvdGW0qMg0YHRi9GA0YLSm9GLINGB0YPRi9KbINC+0YDRgtCw0pPQsCDQsdC10LnRltC80LTQtdC70YPRltC90LTQtSDSr9C70LrQtdC9INGA06nQuyDQsNGC0pvQsNGA0LDQtNGLLjxiciAvPg0KMinQltCw0qPQsCDRgtGD0pPQsNC9INC905nRgNC10YHRgtC10LvQtdGAINC80LXQvSDQttCw0YEg0LHQsNC70LDQu9Cw0YDQtNGL0qMg0LbSr9GA0LXQuiDRgtC+0L3QtNCw0YDRi9C90YvSoyDQtdGA0LXQutGI0LXQu9GW0LrRgtC10YDRlizRgdC+0L3Ri9C80LXQvSDSm9Cw0YLQsNGAINGC0YPRi9C90LTQsNGD0Ysg0L7Qu9Cw0YDQtNCw0pPRiyDQttKv0YDQtdC6INKb0LDQvdGC0LDQvNGL0YAg0LbSr9C50LXRgdGW0L3RltKjINC00LDQvNGD0YvQvdCwLNC10YDQtdC60YjQtdC70ZbQutGC0LXRgNGW0L3QtSDQsdCw0LnQu9Cw0L3Ri9GB0YLRiy7Qr9KT0L3QuCDQttKv0YDQtdC60YLQtSDQsdC+0LvQsNGC0YvQvSDRiNGD0LzQtNCw0YDSk9CwINCx0LDQudC70LDQvdGL0YHRgtGLLtCR0rHQuyDRiNGD0LzQtNCw0YAg0YTQuNC30LjQvtC70L7Qs9C40Y/Qu9GL0pst0Y/Sk9C90Lgg0LfQuNGP0L3RgdGL0Lcg0LbTmdC90LUg0L/QsNGC0L7Qu9C+0LPQuNGP0LvRi9KbLdCw0YPRgNGDINCx0LXQu9Cz0ZbRgdGWINCx0L7Qu9GD0YvQvdCwINKb0LDRgNCw0Lkg0pvQsNGA0LDRgdGC0YvRgNGL0LvQsNC00Ysu0KTQuNC30LjQvtC70L7Qs9C40Y/Qu9GL0psg0LfQuNGP0L3RgdGL0Lcg0YjRg9C70LDRgNKT0LAg0YLQvtKb0YLQsNC70LDRgCDQsdC+0LvRgdCw0psg0L7Qu9Cw0YAg0pvQsNC70YvQv9GC0Ysu0K/Sk9C90Lgg0LbSr9GA0LXQuiDSm9Kx0YDRi9C70YvQvNGL0L3Ri9KjINKb0LDQu9GL0L/RgtGLINC20LDSk9C00LDQudC00LAg0LbSsdC80YvRgSDRltGB0YLQtdGD0ZbQvdC1INCx0LDQudC70LDQvdGL0YHRgtGLINGC0YPRi9C90LTQsNC50LTRiy7QkdKx0Lsg0LHQsNC70LDQu9Cw0YDQtNGL0qMgMzAtNzDQv9Cw0LnRi9C30YvQvdC00LAg0LrQtdC30LTQtdGB0LXQtNGWLtCc0rHQvdC00LDQuSDQttKv0YDQtdC6INGI0YPQu9Cw0YDRiyDQttKx0LzRgdCw0pss0pvQsNGA0pvRi9C90LTRiy7QnNGL0YHQsNC70Ysg0LHSsdC7INGI0YPQu9Cw0YAg0LHQsNC70LDQvdGL0qMg0LTQtdC90LUg0pvQsNC70L/Ri9C9INOp0LfQs9C10YDRgtC60LXQvdC00LUs0Y/Sk9C90Lgg0LbQsNGC0pvQsNC90L3QsNC9INGC0rHRgNKT0LDQvdKT0LAg0LDRg9GL0YHRgtGL0YDSk9Cw0L3QtNCwINOp0LfQs9C10YDRg9GWINC80q/QvNC60ZbQvS7QodC40YHRgtC+0LvQsCDQutC10LfRltC90LTQtSDRiNGD0LvQsNGAINCw0LnSm9GL0L0g0LXRgdGC0ZbQu9C10LTRliDQttOZ0L3QtSDRg9Cw0pvRi9GC0Ysg0pvRi9GB0pvQsC7QkdKx0Lsg0LrQtdC30LTQtSDRgtGL0L3Ri9GBINCw0LvRgyzQtNCw0LzRg9GLLNC20LDQu9C/0Ysg0LbQsNKT0LTQsNC50Ysg0pvQsNC70YvQv9GC0Ysg0LHQvtC70LDQtNGLLtCh0L7QvdGL0LzQtdC9INKb0LDRgtCw0YAg0LzSsdC90LTQsNC5INGI0YPQu9Cw0YAg0pvQsNC90L3Ri9KjINGC0YPRgNCx0YPQu9C10L3RgtGC0ZYg0pvQvtC30pPQsNC70YvRgdGL0L3QsNC9INGC0YPRi9C90LTQsNC50LTRiy7TqNC50YLQutC10L3RliDQsdKx0Lsg0YLRg9GA0LHRg9C70LXQvdGC0YLRliDSm9Cw0pvQv9Cw0pvRiNCwINGC0LXRgdGW0LrRgtC10YDRliDQvNC10L0g0pvQsNC9INGC0LDQvNGL0YDQu9Cw0YDQtNGL0qMg0LTQuNCw0LzQtdGC0YDRltC90LUs0pvQsNC9INCw0pPRgyDQttGL0LvQtNCw0LzQtNGL0pPRi9C90LAg0L7QvdGL0qMg0YLSsdGC0pvRi9GA0LvRi9KT0YvQvdCwINCx0LDQudC70LDQvdGL0YHRgtGLLtCk0LjQt9C40L7Qu9C+0LPQuNGP0LvRi9KbINGI0YPQu9Cw0YAg0LbQsNKj0LAg0YLRg9KT0LDQvSDQvdOZ0YDQtdGB0YLQtdC70LXRgNC00LUg0LbQuNGWINCw0L3Ri9Kb0YLQsNC70LDQtNGLINC205nQvdC1INC00LDQvNGDINCx0LDRgNGL0YHRi9C90LTQsCzQttCw0YEg06nRgtC1INC60LXQu9C1INC20L7QudGL0LvQsNC00Ysu0KTQuNC30LjQvtC70L7Qs9C40Y/Qu9GL0psg0YjRg9C70LDRgNC00YvSoyDRgdC40L/QsNGC0YLQsNC80LDRgdGLOtC40L3RgtC10L3RgdC40LLRgtGW0LvRltCz0ZYt05nQu9GB0ZbQtyDQvdC10LzQtdGB0LUg0L7RgNGC0LDRiNCwLNC70L7QutCw0LvQuNC30LDRhtC40Y/RgdGLLdC606nQsdGW0L3QtNC1INC20q/RgNC10Log0rHRiNGL0L3QtNCwLNOp0LrQv9C1INCw0YDRgtC10YDQuNGP0YHRiyDQsNC50LzQsNKT0YvQvdC00LAg0LXRgdGC0ZbQu9C10LTRli7QldGB0YLRltC70LPQtdC9INC20LXRgNC00LXQvSDQsdCw0YHSm9CwINCw0LnQvNCw0pvSm9CwINGC0LDRgNCw0LvQvNCw0LnQtNGLLtCj0LDSm9GL0YLSm9CwINGC05nRg9C10LvQtNGW0LvRltCz0ZYt0LrTqdCx0ZbQvdC10YHQtSDRgdC40YHRgtC+0LvQsCDQutC10LfRltC90LTQtSDQv9Cw0LnQtNCwINCx0L7Qu9Cw0LTRiy7SsNC30LDSmyDQtdC80LXRgSzSr9C90ZYg0LbSsdC80YHQsNKbINC905nQt9GW0Lou0JTQuNC90LDQvNC40LrQsNGB0Yst0YLSsdGA0LDSm9GC0Ysg0LXQvNC10YEs0L/QvtC30LjRhtC40Y/Sk9CwINCx0LDQudC70LDQvdGL0YHRgtGLINOp0LfQs9C10YDQtdC00ZYu0JrQtdC70LXRgdGWINC60LXQt9C10LrRgtC1INC/0LDRgtC+0LvQvtCz0LjRj9C70YvSmyDQttKv0YDQtdC6INGI0YPQu9Cw0YDRi9C90LAg0LrQtdC70LXRgtGW0L0g0LHQvtC70YHQsNC8LNC+0LvQsNGAINC20q/RgNC10Lot0pvQsNC90YLQsNC80YvRgCDQttKv0LnQtdGB0ZbQvdGW0qMg0YLRg9CwINC/0LDQudC00LAg0LHQvtC70pPQsNC9INC90LXQvNC10YHQtSDQttKv0YDQtSDQv9Cw0LnQtNCwINCx0L7Qu9KT0LDQvSDQsNKb0LDRg9C70LDRgNGL0L3QsNC9INCx0L7Qu9GD0Ysg0LzSr9C80LrRltC9LtCR0rHQuyDQutC10LfQtNC1INCx0LDQu9Cw0LvQsNGA0LTQsCDQsdC+0LvQsNGC0YvQvSDRiNGDINKb0LDRgNKb0YvQvdC00YvQu9GL0pPRiyDTqdGC0LUg0LbQvtKT0LDRgNGLINCx0L7Qu9Cw0LTRiy7QkdKx0Lsg0LrQtdC30LTQtSDQtNC40LDRgdGC0L7Qu9CwINC60LXQt9GW0L3QtNC1INC00LUs0YLQvtKb0YLQsNGD0YHRi9C3INGI0YPQu9Cw0YAg0LXRgdGC0ZbQu9GD0ZYg0LzSr9C80LrRltC9LtCh0L7QvdGL0LzQtdC9INKb0LDRgtCw0YAg0LHSsdC7INGI0YPQu9Cw0YAg0LHQsNC70LDQu9Cw0YDQtNGL0qMg0LHQsNGB0pvQsCDQvNKv0YjQtdC70LXRgNGW0L3QtSDTmdGB0LXRgCDQtdGC0LXQtNGWLtCv0pPQvdC4INGC0YvQvdGL0YEg0LDQu9GD0LTRi9KjINKb0LjRi9C90LTQsNGD0Yss0LTQsNC80YPQtNCw0pPRiyDTqdC30LPQtdGA0ZbRgdGC0LXRgCDQsdC+0LvRg9GLINC80q/QvNC60ZbQvS7QotC10YDRltC00LUg0YbQuNCw0L3QvtC3INCx0LDQudKb0LDQu9Cw0LTRiy7Qn9Cw0YLQvtC70L7Qs9C40Y/Qu9GL0psg0YjRg9C70LDRgNC00YvSoyDQsdGW0YDQtdGAINGC0q/RgNC70LXRgNGW0L3QtSDRgtC+0pvRgtCw0LvQsCDQutC10YLRgdC10Lwu0JzRi9GB0LDQu9GLINC00LjQsNGB0YLQvtC70LDQu9GL0psg0YjRgy3QvNC40YLRgNCw0LvRjNC00Ysg0YHRgtC10L3QvtC3INC90LXQvNC10YHQtSDRgtGA0LjQutGD0YHQv9C40LTQsNC70YzQtNGLINGB0YLQtdC90L7QtyDQutC10LfRltC90LTQtSDQsNC90YvSm9GC0LDQu9Cw0LTRiy7QmtCw0L3RgtC40L3Rg9Cw0LvRjNC00Ysg0YjRgy3QsNGA0YLQtdGA0LjRj9C70YvSmyDTqdC30LXQutGC0LXRgNC00ZbSoyDQsNGI0YvSmyDQsdC+0LvRg9GL0L3QtNCwINGC0YPRi9C90LTQsNC50LTRiy7QnNKx0L3QtNCw0Lkg0L/QsNGC0L7Qu9C+0LPQuNGP0LvRi9KbINGI0YPQu9Cw0YDQtNGLINCw0L3Ri9Kb0YLQsNGDINKv0YjRltC9INCt0JrQkyzRjdGF0L7QutCw0YDQtNC40L7Qs9GA0LDRhNC40Y8s0LDRg9GB0LrRg9C70YzRgtCw0YbQuNGPLNGA0LXQvdGC0LPQtdC90L7Qs9GA0LDRhNC40Y8g0pvQvtC70LTQsNC90YvQu9Cw0LTRiy7SmtC+0YDRgtGL0L3QtNGL0LvQsNC5INC60LXQu9C1INC20LDSo9CwINGC0YPSk9Cw0L0g0L3TmdGA0LXRgdGC0LXQu9C10YDQtNC1INCx0L7Qu9Cw0YLRi9C9INGI0YPQu9Cw0YAg0LrTqdCx0ZbQvdC1INC30LjRj9C90YHRi9C3INCx0L7Qu9GL0L8g0YLQsNCx0YvQu9Cw0LTRiyDQttOZ0L3QtSDQvtC70LDRgCDQttCw0YEg06nRgdC1INC60LXQu9C1INOp0LfQtNGW0LPRltC90LXQvSDQttC+0pPQsNC70YPRiyDQvNKv0LzQutGW0L0u0JHRltGA0LDSmyDQtdCz0LXRgCDQvtC70LDRgCDQv9Cw0YLQvtC70L7Qs9C40Y/Qu9GL0psg0YjRg9C80LTQsNGAINGB0LjRj9Kb0YLRiyDQutKv0LTRltC6INGC0YPQtNGL0YDRgdCwLNC80rHQvdGLINC00LXRgCDQutC10LfRltC90LTQtSDTmdGB0ZbRgNC10YHQtSDQtdGA0YLQtSDQsNC90YvSm9GC0LDQvyzQtNC40LDQs9C90L7RgdGC0LjQutCwINC80LXQvSDQtdC8INC20q/RgNCz0ZbQt9Cz0LXQvSDQttOp0L0u</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2 сұрак кателіктер бар, толық емес негізділігі.</text:p>
          </table:table-cell>
          <table:table-cell office:value-type="float" office:value="0" table:style-name="ce1">
            <text:p>0</text:p>
          </table:table-cell>
          <table:table-cell table:number-columns-repeated="16376"/>
        </table:table-row>
        <table:table-row table:style-name="ro1">
          <table:table-cell office:value-type="float" office:value="1066953" table:style-name="ce1">
            <text:p>1066953</text:p>
          </table:table-cell>
          <table:table-cell office:value-type="string" table:style-name="ce1">
            <text:p>kazakh</text:p>
          </table:table-cell>
          <table:table-cell office:value-type="string" table:style-name="ce1">
            <text:p>Билет 2&amp;lt;br /&amp;gt; 1.Ерте жастағы балалардың май шел қабаты жиырылмалы емес термогенезге қатысып (жылу өнімдің бұлшық ет жиырылуымен байланысты емес), бұңдағы қандай тінің арқасында болады? Неге?&amp;lt;br /&amp;gt; 2.Жаңа туған нәрестелерде және ерте жастағы балаларда жұрек тондарының ерекшеліктері қандай және немен сипаттаналады?&amp;lt;br /&amp;gt;</text:p>
          </table:table-cell>
          <table:table-cell office:value-type="string" table:style-name="ce1">
            <text:p>MS4g0JXRgNGC0LUg0LbQsNGB0YLQsNKT0Ysg0LHQsNC70LDQu9Cw0YDQtNGL0qMg0LzQsNC5INGI0LXQuyDSm9Cw0LHQsNGC0Ysg0LbQuNGL0YDRi9C70LzQsNC70Ysg0LXQvNC10YEg0YLQtdGA0LzQvtCz0LXQvdC10LfQs9C1INKb0LDRgtGL0YHRi9C/ICwg0LHSsdC90LTQsNKT0Ysg0pvQvtKj0YvRgCDQsNGB0YLRiyDRiNC10LvQvNCw0LnRiyDRgtGW0L3RliDQsNGA0pvQsNGB0YvQvdC00LAg0YLQtdGA0LzQvtCz0LXQvdC10LfQs9C1INKb0LDRgtGL0YHQsNC00YsuINCv0pPQvdC4INKb0L7So9GL0YAg0LDRgdGC0Ysg0YjQtdC70LzQsNC50Ysg0pvSsdGA0LDQvNGL0L3QtNCwINC20YvQu9GDINKx0YHRgtCw0L8g0YLSsdGA0LDRgtGL0L0g0pvSsdGA0YvQu9GL0LzQtNCw0YAg0LHQsNGALiDQodC+0Lsg0YHQtdCx0LXQv9GC0LXQvSDQvtGB0Ysg0pvQvtKj0YvRgCDQsNGB0YLRiyDRiNC10LvQvNCw0LnRiyDQtdGA0YLQtSDQttCw0YHRgtCw0pPRiyDQsdCw0LvQsNC70LDRgCDSr9GI0ZbQvSDTqdGC0LUg0LzQsNKj0YvQt9C00Ysg0LHQvtC70YvQvyDQutC10LvQtdC00ZYuINCR0LDQu9Cw0LTQsCDQttGL0LvRg9C00Ysg0YHQsNKb0YLQsNC50YLRi9C9INC80LXRgtCw0LHQvtC70LjQutCw0LvRi9KbINC/0YDQvtGG0LXRgdGBINCx0L7Qu9Cw0LTRiyAtINC20LjRi9GA0YvQu9C80LDQudGC0YvQvSDRgtC10YDQvNC+0LPQtdC90LXQty4g0JHSsdC7INGB0LjQvNC/0LDRgtC40LrQsNC70YvSmyDQvdC10YDQstGC0ZbSoyDQvdC+0YDQsNC00YDQtdC90LDQu9C40L3QtNGWINCx0LDSk9Cw0L3QsCDQsNC50YLRi9C/INC60LXRgtC60LXQvSDSm9C+0qPRi9GAINC80LDQudKT0LAg0YjRi9KT0LDRgNCw0LTRiy4g0J7RgdGLINKb0L7So9GL0YAg0LzQsNC50LTRi9KjINC90LXQs9GW0LfQs9GWINKb0YvQt9C80LXRgtGWINC00LXQvdC10L3RltKjINC20YvQu9GD0LvRi9KT0YvQvSDRgdCw0pvRgtCw0YMuINCU0LXQvdC10L3RltKjIDUg0L/QsNC50YvQt9GL0L0g0L7RgdGLINGI0LXQu9C80LDQuSDQsNC70LDQtNGLLiDQkdKx0pPQsNC90LDSr9GB0YLRliwg0LHSsdKT0LDQvdCwINCw0YHRgtGLLCDQsNGA0pvQsNC00LAg0LbQsNGD0YvRgNGL0L0g0LDRgNCw0LvRi9KbINCx0rHQu9GI0YvSm9C10YLRgtC10YAg0LDRgNCw0YHRi9C90LTQsCwg0LzQvtC50YvQvSDSm9Cw0L3RgtCw0LzRi9GA0LvQsNGA0YvQvdGL0qMg0LDQudC90LDQu9Cw0YHRi9C90LTQsCDQvtGA0L3QsNC70LDRgdCw0LTRiy4g0JbTmdC90LXQtNC1INGW0YjQutGWINCw0pPQt9Cw0LvQsNGAINCw0YDQsNGB0YvQvdC00LAg0LHSr9C50YDQtdC6LCDQsdCw0YPRi9GAINC80LDSo9GL0L3QtNCwLiDSmtC+0LvRgtGL0psg0LDRgdGC0YssINC205nQvdC1INGI0YvQvdGC0LDSmyDQsdGD0YvQvdGLINC80LDSo9GL0L3QtNCwINC+0YDQvdCw0LvQsNGB0LDQtNGLLiDQndOZ0YDQtdGB0YLQtSDQtdC90LTRliDRgtGD0YvQu9KT0LDQvdC00LAg0L7RgdGLINGI0LXQu9C80LDQuSwg0LHQsNGB0YLQsNC/0pvRiyAxLTIg0LrSr9C9INCx0LXQu9GB0LXQvdC00ZYg0pvRi9C30LzQtdGCINCw0YLSm9Cw0YDQsNC00YsuINCh0LXQsdC10LHRliDQvdOZ0YDQtdGB0YLQtSDSr9GI0ZbQvSDRgdGL0YDRgtKb0Ysg0L7RgNGC0LDQvdGL0qMg0YLQtdC80L/QtdGA0LDRgtGD0YDQsNGB0Ysg0pvQvtC70LDQudGB0YvQtyDQsdC+0LvQsNC00YssINGB0L7QuyDRgdC10LHQtdC/0YLQtdC9INCx0LXQu9GB0LXQvdC00ZYg0pvRi9C30LzQtdGC0ZbQvSDQsNGC0pvQsNGA0YvQvyDQvdOZ0YDQtdGB0YLQtdC90ZbSoyDQtNC10L3QtdGB0ZbQvSDSm9C+0LvQsNC50LvRiyDQttGL0LvRiyDRgtC10LzQv9C10YDQsNGC0YPRgNCw0LTQsCDSsdGB0YLQsNC/INGC0rHRgNGD0YvQvSDSm9Cw0LzRgtCw0LzQsNGB0YvQtyDQtdGC0LXQtNGWLiDQm9C40L/QvtC70LjQt9Cz0LUg0LbQsNGD0LDQvyDQsdC10YDRltC/LCDQsdOp0LvRltC90LXRgtGW0L0g0LzQsNC5INKb0YvRiNKb0YvQu9C00LDRgNGL0L3Ri9KjINGC0L7RgtGL0pPRg9GLLiDQntGB0Ysg0LzQtdGF0LDQvdC40LfQvCDQsNGA0pvRi9C70Ysg0LbRi9C70YMg0LHTqdC70LXQtNGWLCDQvtC00LDQvSDTmdGA0ZYg0pvQvtKj0YvRgCDQvNCw0LnQtNGL0qMg0pvQsNC90LzQtdC9INKb0LDQvNGC0LDQvNCw0YHRi9C3INC10YLRltC70YPRliDQutKv0YjQtdC50ZbQvyDQtNC10L3QtdC90ZYg0LbRi9C70YvRgtCw0LTRiy4g0JHSsdC7INC80LXRhdCw0L3QuNC30Lwg0LzQtdGC0LDQsdC+0LvQuNC30LzQtNGWIDItMyDQtdGB0LUg0LDRgNGC0YLRi9GA0YvQvywg0L7RgtGC0LXQs9GW0L3RltC00LUg0LrTqdC/INC806nQu9GI0LXRgNC00LUg0pvQsNC80YLQsNC80LDRgdGL0Lcg0LXRgtC10YLRltC9INCx0L7Qu9Cw0LTRiy4gPGJyIC8+DQoyLiDQltCw0qPQsCDRgtGD0pPQsNC9INC905nRgNC10YHRgtC10LvQtdGA0LTQtSDQttOZ0L3QtSDQtdGA0YLQtSDQttCw0YHRgtCw0pPRiyDQsdCw0LvQsNC70LDRgNC00LAg0LbSr9GA0LXQuiDRgtC+0L3QtNCw0YDRi9C90YvSoyDQtdGA0LXQutGI0LXQu9C10YDRltC60YLQtdGA0ZY6INCV0YDQtdGB0LXQutGC0LXRgNCz0LUg0pvQsNGA0LDSk9Cw0L3QtNCwINC60q/RiNGC0ZbRgNC10Log0LbTmdC90LUg0LTQsNGD0YvRgdGLINKb0LDRgtGC0Ysg0YjRi9KT0LDRgtGL0L0g0LHQvtC70LDQtNGLLiDQntKT0LDQvSDRgdC10LHQtdC/INC20LDQu9C/0Ysg0LHQsNC70LDQu9Cw0YDQtNGL0qMg0LrQtdGD0LTQtSDSm9GD0YvRgdGLINC20rHSm9CwINCx0L7Qu9KT0LDQvdC00YvSm9GC0LDQvSDQttCw0pvRgdGLINC10YHRgtGW0LvQtdC00ZYuINCW05nQvdC10LTQtSDQsdCw0LvQsNC70LDRgNC00LAg0LbSr9GA0LXQuiDRgdC+0pPRgyDQttC40ZbQu9GW0LPRliDQtdGA0LXRgdC10LrRgtC10YDQs9C1INKb0LDRgNCw0pPQsNC90LTQsCDQttC+0pPQsNGA0Ysg0LHQvtC70LDQtNGLLiDQnNC40L3Rg9GC0YvQvdCwIDcwLTExMCDRgNC10YIg0LDRgNCw0LvRi9KT0YvQvdC00LAg0LHQvtC70LDQtNGLLiDQndOZ0YDQtdGB0YLQtdC90ZbSoyDQsdCw0YHRgtCw0L/Sm9GLIDItMyDQutKv0L3RltC90LTQtSDQttKv0YDQtdC6INKx0YjRi9C90LTQsCDQttOZ0L3QtSDQkdC+0YLQutC40L3QsCDQrdGA0LHQsCDQvdKv0LrRgtC10YHRltC90LvQtdGA0ZbQvdC00LUgMiDRgtC+0L3QvdCw0L0gMSDRgtC+0L0g0LDQudKb0YvQvdGL0YDQsNKbINC10YHRgtGW0LvQtdGC0ZbQvSDQsdC+0LvQsNC00YsuINCR0ZbRgNCw0Lcg0YPQsNKb0YvRgtGC0LDQvSDQutC10LnRltC9INC+0LvQsNGA0LTRi9KjINKv0L3RliDRgtC10qPQtdGB0LXQtNGWLiDQntC00LDQvSAyINCw0LnQtNCw0L0g0YHQvtKjIDEg0YLQvtC9INCx0LDRgdGL0LzRi9GA0LDSmyDQsdC+0LvQsNC00Ysg0Y/Sk9C90Lgg0LbQsNKb0YHRiyDQtdGB0YLRltC70LXQtNGWLiDQkdCw0LvQsNC90YvSoyDQsdGW0YDRltC90YjRliDQttGL0LvRi9C90LTQsCAxINGC0L7QvSDQttCw0pvRgdGLINC10YHRgtGW0LvQtdC00ZYsINC+0LTQsNC9INC60LXQudGW0L0g0YLQtdKj0LXRgdC10LTRliwgMiDQttCw0YHRgtCw0L0g0LrQtdC50ZbQvSAyINGC0L7QvSDQttCw0pvRgdGL0YDQsNKbINC10YHRgtGW0LvQtdGC0ZbQvSDQsdC+0LvQsNC00YsuINCi0LDSk9GLLCAyINC20LDRgdGC0LDQvSAxMiDQttCw0YHSm9CwINC00LXQudGW0L0gMiDRgtC+0L0g0YHQvtC7INC20LDSmyDQtdC60ZbQvdGI0ZYg0pvQsNCx0YvRgNKT0LDQsNGA0LDQu9GL0pPRi9C90LTQsCwg0L7SoyDQttCw0pvSm9CwINKb0LDRgNCw0pPQsNC90LTQsCDQttCw0pvRgdGLINC10YHRgtGW0LvQtdGC0ZbQvSDQsdC+0LvQsNC00YssINCh0LXQsdC10LHRliDTqdC60L/QtSDQsNGA0YLQtdGA0LjRj9GB0Ysg0q/RgdGC0ZbQvdC00LUgMiDRgtC+0L3QvdGL0qMg0YTQuNC30LjQvtC70L7Qs9C40Y/Qu9GL0psg0LDQutGG0LXQvdGC0ZYg0LHQsNGALiA8YnIgLz4NCtCi0q/RgNC70LXRgNGWOiDQrdC80LHRgNC40L7QutCw0YDQtNC40Y8g0LTQtdCz0ZbQvdGW0LzRltC3IDHRiNGWINC205nQvdC1IDLRiNGWINGC0L7QvdC00LDRgCDQtNGL0LHRi9GBINCw0LnSm9GL0L3QtNGL0pPRiyDQsdGW0YDQtNC10LksINGC0L7QvdC00LDRgNCw0YDQsNC70YvSmyDQuNC90YLQtdGA0LLQsNC7INGC0LXSoyDQvNCw0Y/RgtC90LjQutC60LUg0rHSm9GB0LDRgSDRgNC40YLQvCDQsdC+0LvQsNC00Ysu0JXQvdC00ZYg0YLRg9KT0LDQvSDQvdOZ0YDQtdGB0YLQtdC90ZbSoyDQsdCw0YHRgtCw0L/Sm9GLIDIg0LDQv9GC0LDRgdGL0L3QtNCwINCx0rHQuyDRgNC40YLQvCDSm9Cw0LvRi9C/0YLRiyDQsdC+0LvRi9C/INGB0LDQvdCw0LvQsNC00YsuINCe0LTQsNC9INC60LXQudGW0L3Qs9GWINGC0q/RgNGWINC+0Lsg0JHTqdC70ZbQvdGDLCDQsdOp0LvRltC90YMg0LTQtdCz0LXQvdGW0LzRltC3OiDSm9GL0YHSm9CwINGC0L7QvdC00LDRgCDQsNGA0LDQu9GL0pPRi9C90LTQsCDQvdCw0pvRgtGLINKv0LfRltC70ZbRgSDQtdGB0YLRltC70LXRgtGW0L0g0LrQtdC30LTQtdCz0ZYg0YLQvtC90L3Ri9KjINCx06nQu9GW0L3Rg9GWINCx0L7Qu9GL0L8g0YLQsNCx0YvQu9Cw0LTRiy4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3" table:style-name="ce1">
            <text:p>1067143</text:p>
          </table:table-cell>
          <table:table-cell office:value-type="string" table:style-name="ce1">
            <text:p>kazakh</text:p>
          </table:table-cell>
          <table:table-cell office:value-type="string" table:style-name="ce1">
            <text:p>Билет 2&amp;lt;br /&amp;gt; 1.Ерте жастағы балалардың май шел қабаты жиырылмалы емес термогенезге қатысып (жылу өнімдің бұлшық ет жиырылуымен байланысты емес), бұңдағы қандай тінің арқасында болады? Неге?&amp;lt;br /&amp;gt; 2.Жаңа туған нәрестелерде және ерте жастағы балаларда жұрек тондарының ерекшеліктері қандай және немен сипаттаналады?&amp;lt;br /&amp;gt;</text:p>
          </table:table-cell>
          <table:table-cell office:value-type="string" table:style-name="ce1">
            <text:p>MS4g0JXRgNGC0LUg0LbQsNGB0YLQsNCz0Ysg0LHQsNC70LDQu9Cw0YDQtNGLINGC0LXRgNC80L7Qs9C10L3QtdC30Ysg0YDQtdCz0YPQu9GP0YbQuNGPINC10YDQtdC60YjQtdC70ZbQs9GWINCx0LDRgCDQvtC7INGC0LXRgNGWINCw0YHRgtGLINC80LDQuSDRgtGW0L3QtNC10YDRltC90ZbSoyDRgtC40L/RltC90LUg0LHQsNC50LvQsNC90YvRgdGC0Ysg0L3QsNC60YLRi9GA0LDQuiDQsNC50YLRgdCw0Log0LrQvtC90YvRgCDQvNCw0Lkg0YLRltC90ZYgLNC+0Lsg0LHQsNC70LAg0YHQsNC70LzQsNCz0YvQvdGL0qMgMS0xLDUg0L/QsNC50YvQt9GL0L0g0LDQu9GL0L8g0L7RgtGL0YAuINCv0LPQvdC4INC60L7QvdGL0YAg0LzQsNC5INGC0ZbQvdGWINGC0LXRgNC80YPRgNC10LPRg9C70Y/RhtC40Y/QtNCwINC80LDQvdGL0LfQtNGLINGA06nQuyDQsNGC0LrQsNGA0LDQtNGLLiDQnNC40YLQsNGF0L7QvdC00YDQuNGP0LvQsNGAINGN0L3QtdGA0LPQuNGPINGC0q/Qt9GW0LvRg9GWINKv0YjRltC9INC60LDQttC10YLRliDRgtC10YDQvNC+0LPQtdC90LjQvSDQvdCw0LrRgtGLINC+0YHRiyDRgtGW0L3QtNC10YDQtNC1INC+0YDQvdCw0LvQsNGB0LDQtNGLLiDQvtC7INC+0YHRiyDQvNC40YLQvtGF0L7QvdC00YDQuNGP0LvQsNGA0LTQsCDRjdC90LXRgNCz0LjRjyAo0LbRi9C70YMpINOp0L3QtNGW0YDRg9Cz0LUg0LrQsNGC0YvRgdCw0LTRiy4g0LXRgNGC0LUg0LbQsNGB0YLQsNCz0Ysg0LHQsNC70LDQu9Cw0YDQtNCwINCx0rHQuyDQvNCw0Lkg0YLRltC90LTQtdGA0ZYg0LzQvtC50YvQvSDQttCw0YPRgNGL0L3QsCDQsdC10Lsg0LDQudC80LDQs9GL0L3QtNCwINC+0YDQvdCw0LvQsNGB0LDQtNGLLiDQvdC10LPRltC30LPRliDQvNCw0LrRgdCw0YLRiyDQttC40YvRgNGL0LvQvNCw0LnRgtGL0L0g0LbRi9C70YMg0LDQu9C80LDRgdGDINCx0L7Qu9GL0L8g0YLQsNCx0YvQu9Cw0LTRiy4g0K/Qs9C90Lgg0YLQtdGA0LzQvtGA0LXQs9GD0LvRj9GG0LjRj9C90YvSoyDQsdGD0LvRiNGL0LrQtdGCINC60LDRgtGL0YHRg9GL0L3RgdGL0Lcg0L/QsNC50LTQsCDQsdC+0LvQsNGC0YvQvSDRgtC10YDQvNC+0YDQtdCz0YPQu9GP0YbQuNGPLtC20YvQu9GDINCw0LvQvNCw0YHRg9C00YvSoyDRgNC10YLRgtC10LvRg9GWINC90LXQs9GW0LfRltC90LXQvSDRgdC40LzQv9Cw0YLQuNC60LDQu9GL0Log0LbRg9C50LrQtSDQttGD0LnQtdGB0ZbQvNC10L0g0ZbRgdC60LUg0LDRgdGL0YDRi9C70LDQtNGLINC+0Lsg0L3QvtGA0Y3Qv9C40L3QtdGE0YDQuNC9INGB0LjQvdGC0LXQt9GW0L3QtdC9INC20YPQt9C10LPQtSDQsNGB0LDQtNGLLiDQntGB0Ysg0LPQvtGA0LzQvtC9INOZ0YHQtdGA0ZYg0L3QsNC60YLRiyDQvNCw0Lkg0YLRltC90LTQtdGA0LTQtdCz0ZYg0LvQuNC/0L7Qu9C40LfQtNGWINC60q/RiNC10LnRgtC10LTRlizRgtC10YDQvNC+0YDQtdCz0YPQu9GP0YbQuNGPINC60YPRiNC10LnQtdC00ZYuINGP0LPQvdC4INC80LjRgtC+0YXQvtC90LTRgNC40Y/Qu9Cw0YDQtNCw0LPRiyDQu9C40L/QuNC00YLQtdGAINGL0LTRi9GA0LDQvyDQkNCi0KQg0YHQuNC90YLQtdC30ZYg0LrRg9GI0LXQudC10LTRli7QldGA0YLQtSDQttCw0YHRgtCw0LPRiyDQsdCw0LvQsNGA0LTRi9KjINGE0LjQt9C40L7Qu9C+0LPQuNGP0LvRi9C6INC10YDQtdC60YjQtdC70ZbQutGC0LXRgNGW0L3QtSDQsdCw0LnQu9Cw0L3Ri9GB0YLRiyDQvdCw0LrRgtGL0YDQsNC6INCw0LnRgtGB0LDQuiDQsdKx0LvRiNGL0LrQtdGC0YLQtdGAINGC0L7Qu9GL0Log0LbQtdGC0ZbQu9C80LXQs9C10L3QtNGW0LrRgtC10L0g0LbQuNGL0YDRi9C70LDRgtGL0L0o0L3QsNC60YLRiyDQsNGC0LDRg9GLINC10YHRltC80LTQtSDQttC+0Log0LXQtNGWKSDQttGL0LvRgyDTqdC90LTRltGA0ZbQu9GD0ZYg0LDQtyDRgdC+0L3QtNGL0LrRgtCw0L0g0LbRi9C70YMg06nQvdC00ZbRgNGW0LvRgyDQutOp0L8g0LHTqdC70ZbQs9GWINC80LDQuSDRgtGW0L3QtNC10YDRliDQsNGA0LrQsNC70Ysg0LbSr9C30LXQs9C1INCw0YHQsNC00YsuINCd05nRgNC10YHRgtC10L3RltKjINGB0YvRgNGC0LrRiyDQvtGA0YLQsCDRgtC10LzQv9C40YDQsNGC0YPRgNCw0YHRi9C90LAg0LDQtNCw0L/RgtCw0YbQuNGP0YHRi9C90LTQsCDQvNCw0qPRi9C30LTRiyDRgNOp0Lsg0LDRgtC60LDRgNCw0LTRiy4gICAgICAgICAgICAgICAgICAgICAgICAgICAgICAgICAgICAgICAgICAgICAgICAgICAgICAgICAgICAgICAgICAgICAgICAgICAgICAgICAgICAgICAgICAgICAyLiDQltCw0qPQsCDRgtGD0YvQu9Cz0LDQvSDQvdOZ0YDQtdGB0YLQtdC70LXRgNC00LXQs9GWINC20q/RgNC10Log0YLQvtC90LTQsNGA0YvQvdGL0qMg0LXRgNC10LrRiNC10LvRltC60YLQtdGA0ZYg0L7Qu9Cw0YDQtNGL0qMg0LbRg9GA0LXQuiDRiNGD0LvQsNGA0YvQvdCwLCDQvtC70LDRgNC00YvSoyDQv9Cw0LnQtNCwINCx0L7Qu9GDINGB0LXQsdC10LHRltC90LUg0LbTmdC90LUg0LHQsNC70LDQu9Cw0YDQtNCw0LPRiyDQttGD0YDQtdC6INC60LDQvSDRgtCw0LzRi9GAINGB0LjRgdGC0LXQvNCw0YHRi9C90YvSoyDQtdGA0LXQutGI0LXQu9GW0LrRgtC10YDRltC90LUgINCx0LDQudC70LDQvdGL0YHRgtGLLtC20LDSo9CwINGC0YPRi9C70LPQsNC9INC905nRgNC10YHRgtC10LvQtdGA0LTQtdCz0ZYg0LrTqdC/INGI0YPQu9Cw0YAg0LfQuNGP0L3RgdGL0Lcg0LHQvtC70LDQtNGLIC7QvdC10LPRltC30ZbQvdC10L0g0YjRg9C70LDRgCDRhNC40LfQuNC+0LvQvtCz0LjRj9C70YvQuiDQvdC+0YDQvNCw0YHRgtC10L3QuNC60LDQu9GL0Log0LHQvtC70YPRiyDQvNKv0LzQutGW0L0g0L3QtdC80LXRgdC1INC/0LDRgtC+0LvQvtCz0LjRj9C70YvQuiDRiNGD0LvQsNGAINCx0L7Qu9GD0Ysg0LzRg9C80LrRltC9LiAg0KTQuNC30LjQvtC70L7Qs9C40Y/Qu9GL0Log0L3QvtGA0LzQsCDRiNGD0LvQsNGAINC+0Lsg0LbRg9GA0LXQuiDQutGD0YDRi9C70YvQvNGL0L3Ri9KjINC60LDQu9GL0L/RgtGLINC20LDQs9C00LDQudC00LAg0LbSsdC80YvRgSDRltGB0YLQtdGDINC20LDRgtC60LDQvdC00YvSm9GC0LDQvSDQv9Cw0LnQtNCwINCx0L7Qu9Cw0YLRi9C9INGI0YPQu9Cw0YAu0L3QtdCz0ZbQt9GW0L3QtdC9INCx0LDRgNC70YvQuiDQsdCw0LvQsNGA0LvQsNGA0LTQsCDQsdCw0LnQutCw0LvQsCDQsdC10YDQvNC10LnQtNGWINGI0LDQvNCw0LzQtdC9IDI1LTcwINC/0LDQudGL0Lcg0LHQsNC70LDQu9Cw0YDQtNCwINC60LXQt9C00LXRgdC10LTRli7QqNGDINGB0LjQv9Cw0YLRgtCw0LzQsNGB0Ys6INCW0rHQvNGB0LDQuiDRgtC+0L3QtNGLINC205nQvdC1INC60LDRgNC60YvQvdC00YvQu9GL0LPRiyAxLTIg0LHQsNC7LiDQsNC50LrRi9C9INC205nQvdC1INKb0YvRgdKb0LAg0LHQvtC70YvQvyDRgdC40YHRgtC+0LvQsCDQutC10LfRltC90LTQtSDRiNGD0LvQsNGAINC10YHRgtGW0LvQtdC00ZYuINGI0YPQu9Cw0YDQtNGL0qMg0LHQvtC70YPRiyDQsdCw0LvQsNC00LAg0YLRi9C90YvRgSDQsNC70YPRiyDQvNC10L0g0LTQtdC90LUg0LbQsNCz0LDQtNCw0LnRiyDQvdC+0YDQvNCw0LvRi9C6INCx0L7Qu9GB0LDQtNCwINCx0L7Qu9GD0Ysg0LzSr9C80LrRltC9LtCa0LDQvdC90YvSoyDRgtGD0YDQsdGD0LvQtdGC0YLRltC70ZbQs9GW0L3QtdC9INGC0YPRi9C90LTQsNGD0YvQtNCwINC80q/QvNC60ZbQvS7QntGB0Ysg0YLRg9GA0LHRg9C70LXQvdGC0YLRltC70ZbQuiDQutCw0LrQv9Cw0LrRiNCwINGC0LXRgdGW0LPRltC80LXQvSDQutCw0L0g0YLQsNC80YvRgNC70LDRgCDQsNGA0LDRgdGL0L3QsNC9ICAg06nRgtGD0YjRliDQutCw0L0g0LrTqdC70LXQvNGW0L3QtSDRgtGD0YLQutGL0YDQu9GL0LPRi9C90LAg0LHQsNC50LvQsNC90YvRgdGC0Ysg0YLRg9GL0L3QtNCw0YPRiyDQvNGD0LzQutGW0L0uINOo0LrQv9C1INCw0YDRgtC10YDQuNGP0YHRi9C90YvSoyDRgdC40YHRgtC+0LvQuNGH0LXRgdC60LjQuSAg0YjRgyDRiNGL0LPRg9GLINC20LDQvdCwINGC0YPRi9C70pPQsNC9INC905nRgNC10YHRgtC10LvQtdGA0LTQtSDQutOp0L8g0LrQtdC30LTQtdGB0LXQtNGWINCw0LvQsNC50LTQsCDQttCw0YHRi9C90LAg0LHQsNC50LvQsNC90YvRgdGC0Ysg0LbQvtC50YvQu9CwINCx0LDRgdGC0LDQudC00Ysu0J/QsNGC0LDQu9C+0LPQuNGP0LvRi9C6INGI0YPQu9Cw0YAg0LbRg9GA0LXQuiDQutCw0L0g0YLQsNC80YvRgCDQttGD0LnQtdGB0ZbQvdGW0qMg0YLRg9CwINCx0ZbRgtC60LXQvSDQvdC10LzQtdGB0LUg0LbSr9GA0LUg0L/QsNC50LTQsCDQsdC+0LvSk9Cw0L0g0LDQutCw0YPQu9Cw0YDRiyDQutC10LfRltC90LTQtSDQv9Cw0LnQtNCwINCx0L7Qu9GD0YjRiyDRiNGD0LvQsNGALtCe0YHRiyDQutC10LfQtNC1INGI0YMg0LDQutGL0L0g0LbRltC90LUg0LDQvdGL0Log0LXRgdGC0ZbQu9C10LTRli7QutCw0YDQutGL0L3QtNGL0LvRi9Cz0Ysg0YjQsNC80LDQvNC10L0gICAgMy02LtCo0YPQu9Cw0YAg0LTQtdC90LUg0LbQsNCz0LTQsNC50YvQvdCwICzQutCw0LvQv9GL0L3QsCDRgtOZ0YPQtdC70LTRliDQtdC80LXRgSDQsdC+0LvRi9C/LCDQlNC40LDRgdGC0L7Qu9CwINC60LXQt9GW0L3QtNC1INGD0LfQtNGW0LrRgdGW0Lcg0LbTmdC90LUg0YLRg9C/0LDQutGC0Ysg0YLRg9GA0LTQtSDQsdCw0LnQutCw0LvQsNC00Ysu0JTQuNCw0YHRgtC+0LvQsNC70YvQuiDRiNGDINC80LjRgtGA0LDQu9GM0LTRliAg0L3QtdC80LXRgdC1INGC0YDQuNC60YPRgdC/0LjQtNCw0LvRjNC00ZYg0YHRgtC10L3QvtC3INC60LXQt9GW0L3QtNC1ICDQsNC90YvQutGC0LDQu9GI0YMg0YjRgy7QmtC+0L3RgtC40L3Rg9Cw0LvRjNC00Ysg0YjRgyDQsdGD0Lsg0YjRgyDQtdC60YDQtdC60YjQtdC70ZbQs9GWINCw0YjRi9C6INCw0YDRgtC10YDQuNGP0LvRi9C6INOp0LfQtdC6INC60LXQt9GW0L3QtNC1INCw0L3Ri9C60YLQsNC70YPRiNGLINGI0YMg0LHQvtC70YvQvyDRgtCw0LHRi9C70LDQtNGLLtCd0LXQs9GW0LfRltC90LUg0LbRg9GA0LXQuiDRiNGD0LvQsNGA0YvQvSDQttOZ0L3QtSDQvtC70YDQsNC00YvSoyDQtdGA0LXQutGI0LXQu9GW0LrRgtC10YDRltC9INCw0L3Ri9C60YLQsNGDINKv0YjRltC9INCt0LrQsyzRjdGF0L7QutCw0YDQtNC40L7Qs9GA0LDRhNC40Y8gLCDQsNGD0YHQutGD0LvRjNGC0LDRhtC40Y8g0LbTmdC90LUg0YHTmdGD0LvQtdC70ZYg0LTQuNCw0LPQvdC+0YHRgtC40LrQsCDQvdCw0LrRgtGL0YDQsNC6INCw0LnRgtGB0LDQvNGA0LXQvdGC0LPQtdC90L7Qs9GA0LDRhNC40Y8g05nQtNGW0YHRgtC10YDRliDQutC+0LvQtNCw0L3Ri9C70YvQtNGLLiDQtdCz0LXRgNC00LUg0YjRgyDQsNC90YvQutGC0LDQu9Cz0LDQvSDQutC10LfQtNGWINCx0LDQu9CwINC005nRgNGW0LPQtdGAINCx0LDQutGL0LvQsNGD0L3QtNCwINCx0L7Qu9GD0Ysg0LrQtdGA0LXQui4g0KPQsNC60YvRgtGL0LvRiyDQsNC90YvQutGC0LDQu9Cz0LDQvSDRiNGDINCx0LDQu9Cw0LvQsNGA0LTQsNKT0Ysg0LXRgNGC0LUg0YHRgtCw0LTQuNC00LjRj9C00LDQs9GLINC/0LDRgtC+0LvQvtCz0LjRj9C70LDRgCDQtNC40LDQs9C90L7RgdGC0LjQutCw0YHRi9C90LAg06nRgtC1INC80LDSo9GL0LfQtNGLICAgICAgICAgICAgICAgICAgICAgICAgICAgICAgICAgICAgICAgICAgICAgICAgICAgICAgICAgICAgICAgICAgICAg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90" table:style-name="ce1">
            <text:p>915390</text:p>
          </table:table-cell>
          <table:table-cell office:value-type="string" table:style-name="ce1">
            <text:p>russian</text:p>
          </table:table-cell>
          <table:table-cell office:value-type="string" table:style-name="ce1">
            <text:p>Билет 2&amp;lt;br /&amp;gt; 1.Какая роль подкожно жировой клетчатки у детей первых месяцев жизни в не сократительном термогенезе (теплопродукции, не связанной с мышечным сокращением). Благодаря наличию в ней какой ткани?&amp;lt;br /&amp;gt; 2.Какова особенность сердечных тонов у новорожденных и детей раннего возраста и чем они характеризуются?&amp;lt;br /&amp;gt;</text:p>
          </table:table-cell>
          <table:table-cell office:value-type="string" table:style-name="ce1">
            <text:p>MSnQoyDQtNC10YLQtdC5INC40LzQtdGO0YLRgdGPINGB0LLQvtC4INGE0LjQt9C40L7Qu9C+0LPQuNGH0LXRgdC60LjQtSDQvtGB0L7QsdC10L3QvdC+0YHRgtC4INC/0L7QtNC60L7QttC90L7QuSDQttC40YDQvtCy0L7QuSDQutC70LXRgtGH0LDRgtC60LguINCjINC90L7QstC+0YDQvtC20LTQtdC90L3QvtCz0L4gNSUg0LzQsNGB0YHRiyDRgtC10LvQsCDQt9Cw0L3QuNC80LDQtdGCINCx0YPRgNCw0Y8g0LbQuNGA0L7QstCw0Y8g0YLQutCw0L3RjCwg0LrQvtGC0L7RgNCw0Y8g0L3QsNGF0L7QtNC40YLRgdGPINCyINC+0YHQvdC+0LLQvdC+0Lwg0LzQtdC20LTRgyDQu9C+0L/QsNGC0LrQsNC80LgsINCyINC+0LHQu9Cw0YHRgtC4INCz0YDRg9C00LjQvdGLLCDRiNC10LgsINC30LDRgtGL0LvQutCwLCDQsCDRgtCw0LrQttC1INCy0L7Qt9C70LUg0L/QvtGH0LXQuiDQuCDQvdCw0LTQv9C+0YfQtdGH0L3QuNC60L7Qsi4g0KEg0LLQvtC30YDQsNGB0YLQvtC8INC6LdCy0L4g0LHRg9GA0L7QuSDQttC40YDQvtCy0L7QuSDRgtC60LDQvdC4INGB0L3QuNC20LDQtdGC0YHRjy4g0KHRgtC+0LjRgiDQvtGC0LzQtdGC0LjRgtGMLCDRh9GC0L4g0YLQuNC/0LjRh9C90YvQuSDQsdGD0YDRi9C5INGG0LLQtdGCINC/0YDQuNC00LDQtdGCINCx0L7Qu9GM0YjQvtC1INC6LdCy0L4g0LzQuNGC0L7RhdC+0L3QtNGA0LjQuCDQvdCw0YXQvtC00Y/RidC40LXRgdGPINCyINCw0LTQuNC/0L7RhtC40YLQsNGFLCDQsdC+0LPQsNGC0YvQtSDQttC10LvQtdC30LXRgdC+0LTQtdGA0LbQsNGJ0LjQvNC4INCx0LXQu9C60LDQvNC4LiDQkdGD0YDQsNGPINC20LjRgNC+0LLQsNGPINGC0LrQsNC90Ywg0L7RgtC70LjRh9Cw0LXRgtGB0Y8g0L7RgiDQsdC10LvQvtC5INC90LUg0YLQvtC70YzQutC+INGG0LLQtdGC0L7QvCwg0L3QviDQuCDRjdC80LHRgNC40L7Qs9C10L3QtdC30L7QvC4g0JHRg9GA0LDRjyDQttC40YDQvtCy0LDRjyDRgtC60LDQvdGMINGE0L7RgNC80LjRgNGD0LXRgtGB0Y8g0L3QsCAxMyDQvdC10LTQtdC70LUg0LLQvdGD0YLRgNC40YPRgtGA0L7QsdC90L7Qs9C+INGA0LDQt9Cy0LjRgtC40Y8g0L7RgiDQvNC40L7QsdC70LDRgdGC0L7QsiDQvNC40L7RgtC+0LzQsCDRgdC+0LzQuNGC0L7Qsiwg0LrQvtGC0L7RgNGL0LUg0Y/QstC70Y/RjtGC0YHRjyDQv9GA0LXQtNGI0LXRgdGC0LLQtdC90L3QuNC60LDQvNC4INGB0LrQtdC70LXRgtC90L7QuSDQvNGD0YHQutGD0LvQsNGC0YPRgNGLLCDQsCDQsdC10LvQsNGPINC20LjRgNC+0LLQsNGPINGC0LrQsNC90Ywg0YTQvtGA0LzQuNGA0YPQtdGC0YHRjyDQvtGCINC/0YDQtdC00YjQtdGB0YLQstC10L3QvdC40LrQsCDRgdC+0LXQtNC40L3QuNGC0LXQu9GM0L3QvtC5INGC0LrQsNC90LguINCR0YPRgNCw0Y8g0LbQuNGA0L7QstCw0Y8g0YLQutCw0L3RjCDRg9GH0LDRgdGC0LLRg9C10YIg0LrQsNC6INGA0LDQtyDRgtCw0LrQuCDQsiDQvdC1INGB0L7QutGA0LDRgtC40YLQtdC70YzQvdC+0Lwg0YLQtdGA0LzQvtCz0LXQvdC10LfQtSwg0L/QviDQtNGA0YPQs9C+0LzRgyDRjdGC0L4g0L3QsNC30YvQstCw0LXRgtGB0Y8g0LDQtNCw0L/RgtC40LLQvdGL0Lwg0YLQtdGA0LzQvtCz0LXQvdC10LfQvtC8LiDQkNC00LDQv9GC0LjQstC90YvQuSDRgtC10YDQvNC+0LPQtdC90LXQtyDQstC60LvRjtGH0LDQtdGC0YHRjywg0LrQvtCz0LTQsCDRgdC90LjQttCw0LXRgtGB0Y8g0YLQtdC80L/QtdGA0LDRgtGD0YDQsCDQvtC60YDRg9C20LDRjtGJ0LXQuSDRgdGA0LXQtNGLLCDQv9GA0Lgg0L/QtdGA0LXQvtGF0LvQsNC20LvQtdC90LjQuCDQuCDQv9C+0LLRi9GI0LXQvdC40Lgg0LvQtdC/0YLQuNC90LAgKNC/0L7QstGL0YjQsNC10YIg0Y3QutGB0L/RgNC10YHRgdC40Y4gVUNQLTEpLiDQn9GA0Lgg0L/QvtC90LjQttC10L3QuNC4INGC0LXQvNC/0LXRgNCw0YLRg9GA0Ysg0L7QutGA0YPQttCw0Y7RidC10Lkg0YHRgNC10LTRiyDRgdGC0LjQvNGD0LvQuNGA0YPQtdGC0YHRjyDRgdC40LzQv9Cw0YLQuNGH0LXRgdC60LDRjyDQvdC10YDQstC90LDRjyDRgdC40YHRgtC10LzQsCwg0LLRi9C00LXQu9GP0LXRgtGB0Y8g0L3QvtGA0LDQtNGA0LXQvdCw0LvQuNC9LCDQutC+0YLQvtGA0LDRjyDRg9GH0LDRgdGC0LLRg9C10YIg0LIg0Y3QutGB0L/RgNC10YHQuNC4IFVDUC0xINC4INC40L3QuNGG0LjQuNGA0YPQtdGCINGB0LXQutGA0LXRhtC40Y4g0LPQvtGA0LzQvtC90LfQsNCy0LjRgdC40LzQvtC5INC70LjQv9Cw0LfRiy4g0JvQuNC/0LDQt9CwINC90LDRh9C40L3QsNC10YIg0YDQsNGB0YnQtdC/0LvRj9GC0Ywg0LbQuNGA0Ysg0YEg0YTQvtGA0LzQuNGA0L7QstCw0L3QuNC10Lwg0YHQstC+0LHQvtC00L3Ri9GFINC20LjRgNC90YvRhSDQutC40YHQu9C+0YIuINCe0YHQvtCx0LXQvdC90L7RgdGC0YzRjiDQvNC40YLQvtGF0L7QvdC00YDQuNC4INCx0YPRgNC+0Lkg0LbQuNGA0L7QstC+0Lkg0YLQutCw0L3QuCDRj9Cy0LvRj9C10YLRgdGPINGC0L4sINGH0YLQviDQsiDQvdC40YUg0L/RgNC+0YbQtdGB0YHRiyDQvtC60LjRgdC70LXQvdC40Y8g0Lgg0YTQvtGB0YTQvtGA0LjQu9C40YDQvtCy0LDQvdC40Y8g0YDQsNC30L7QsdGJ0LXQvdGLINC30LAg0YHRh9C10YIg0YHQv9C10YbQuNCw0LvQuNC30LjRgNC+0LLQsNC90L3Ri9GFINGA0LDQt9C+0LHRidCw0Y7RidC40YUg0LHQtdC70LrQvtCyICh1bmNvdXBsaW5nIHByb3RlaW5zIC0gVUNQKS4g0KHRg9GJ0LXRgdGC0LLRg9C10YIgNSDRgtC40L/QvtCyINC00LDQvdC90YvRhSDQsdC10LvQutC+0LIsIDEg0YLQuNC/INC90LDRhdC+0LTQuNGC0YHRjyDQsiDQsdGD0YDQvtC5INC20LjRgNC+0LLQvtC5INGC0LrQsNC90LgsIDIg0YLQuNC/IC0g0LIg0LHRg9GA0L7QuSDQuCDQsdC10LvQvtC5INC20LjRgNC+0LLQvtC5INGC0LrQsNC90LgsIDMg0YLQuNC/IC0g0LIg0YHQutC10LvQtdGC0L3QvtC5INC80YPRgdC60YPQu9Cw0YLRg9GA0LUsINCwIDQg0LggNSDQsiDQs9C+0LvQvtCy0L3QvtC8INC80L7Qt9Cz0LUuINCSINGB0LLRj9C30Lgg0YEg0Y3RgtC40Lwg0L/RgNC4INCx0LXRgtCwINC+0LrQuNGB0LvQtdC90LjQuCDQttC40YDQvdGL0YUg0LrQuNGB0LvQvtGCINGE0L7RgNC80YPQtdGC0YHRjyDRgtC10L/Qu9C+LCDQsCDQvdC1INCQ0KLQpC4g0Jgg0LTQsNC90L3Ri9C5INC/0YDQvtGG0LXRgdGBINGF0LDRgNCw0LrRgtC10YDQuNC30YPQtdGCINC90LXRgdC+0LrRgNCw0YLQuNGC0LXQu9GM0L3Ri9C5INGC0LXRgNC80L7Qs9C10L3QtdC3INGDINC00LXRgtC10Lkg0L/QtdGA0LLRi9GFINC80LXRgdGP0YbQtdCyINC20LjQt9C90LguICAgICAgICAgICAgICAgICAgICAgICAgICAgICAgICAgICAgICAgICAgICAgICAgICAgICAgICAgICAgICAgICAgICAgICAgMikg0J/QtdGA0LLRi9C5INGC0L7QvSDRhNC+0YDQvNC40YDRg9C10YLRgdGPINCyINC90LDRh9Cw0LvQtSDRgdC+0LrRgNCw0YnQtdC90LjRjyDQttC10LvRg9C00L7Rh9C60L7Qsiwg0LrQvtCz0LTQsCDQt9Cw0LrRgNGL0LLQsNC10YLRgdGPINC/0YDQtdC00YHQtdGA0LTQvdC+LdC20LXQu9GD0LTQvtGH0LrQvtCy0YvQuSDQutC70LDQv9Cw0L0uINCYIDEt0YvQuSDRgtC+0L0g0L7QsdGD0YHQu9Cw0LLQu9C40LLQsNC10YIgMyDRhNCw0LrRgtC+0YDQsCDQuNC70Lgg0LrQvtC80L/QvtC90LXQvdGC0LAuIDEg0LrQvtC80L/QvtC90LXQvdGCINC60LvQsNC/0LDQvdC90YvQuSwg0LrQvtCz0LTQsCDQt9Cw0LrRgNGL0LLQsNGO0YLRgdGPINC80LjRgtGA0LDQu9GM0L3Ri9C5INC4INGC0YDQuNC60YPRgdC/0LjQtNCw0LvRjNC90YvQtSDQutC70LDQv9Cw0L3Riy4gMiDQutC+0LzQv9C+0L3QtdC90YIg0LzRi9GI0LXRh9C90YvQuSwg0L/RgNC4INC60L7Qu9C10LHQsNC90LjQuCDQvNC40L7QutCw0YDQtNCwLiAzINC60L7QvNC/0L7QvdC10L3RgiDRgdC+0YHRg9C00LjRgdGC0YvQuSAtINC/0YDQuCDQutC+0LvQtdCx0LDQvdC40LUg0YHRgtC10L3QvtC6INCw0L7RgNGC0Ysg0Lgg0LvQtdCz0YfQvdC+0LPQviDRgdGC0LLQvtC70LAuIDEg0YLQvtC9INCy0YvRgdC70YPRiNC40LLQsNGC0YHRjyDQv9C+0YHQu9C1INCx0L7Qu9GM0YjQvtC5INC/0LDRg9C30YssINC4INC00LDQvdC90YvQuSDRgtC+0L0g0L7QtNC40L3QvtC60L7QstGL0Lkg0YEg0L/Rg9C70YzRgdC+0Lwg0L3QsCDRgdC+0L3QvdC+0Lkg0LDRgNGC0LXRgNC40Lgg0Lgg0LLQtdGA0YXRg9GI0LXRh9C90YvQvCDRgtC+0LvRh9C60L7QvC4g0J/QtdGA0LLRi9C5INGC0L7QvSDRh9Cw0YnQtSDQsNC60YbQtdC90YLQuNGA0L7QstCw0L3QvdC10LUsINGH0LXQvCDQstGC0L7RgNC+0LksINC+0YHQvtCx0LXQvdC90L4g0L3QsCDQstC10YDRhdGD0YjQutC1INGB0LXRgNC00YbQsC4g0JLRgtC+0YDQvtC5INGC0L7QvSDRhNC+0YDQvNC40YDRg9C10YLRgdGPINC/0YDQuCDQt9Cw0L/QvtC70L3QtdC90LjQuCDQutGA0L7QstGM0Y4g0LbQtdC70YPQtNC+0YfQutC+0LIsINGC0L4g0LXRgdGC0Ywg0LTQuNCw0YHRgtC+0LvRiy4g0JTQsNC90L3Ri9C5INGC0L7QvSDRhNC+0YDQvNC40YDRg9C10YIg0LfQsNC60YDRi9GC0YvQtSDQsNC+0YDRgtCw0LvRjNC90YvRhSDQuCDQu9C10LPQvtGH0L3Ri9GFINC60LvQsNC/0LDQvdC+0LIg0Lgg0LrQvtC70LXQstCw0L3QuNC10Lwg0YHRgtC10L3QvtC6INC+0LTQvdC+0LjQvNC10LXQvdGL0YUg0YHQvtGB0YPQtNC+0LIuINCe0YLQu9C40YfQuNGPIDIg0YLQvtC90LAg0L7RgiAxLdCz0L4g0YHRh9C40YLQsNC10YLRgdGPINCy0YDQtdC80Y8g0LXQs9C+INCy0YvRgdC70YPRiNC40LLQsNC90LjRjy4gMiDRgtC+0L0g0LLRi9GB0LvRg9GI0LjQstCw0LXRgtGB0Y8g0L/QvtGB0LvQtSDQvNCw0LvQvtC5INC/0LDRg9C30YsuINCS0L7Qt9GA0LDRgdGC0L3QvtC5INC+0YHQvtCx0LXQvdC90L7RgdGC0LggMiDRgtC+0L3QsCDRj9Cy0LvRj9C10YLRgdGPINGC0L4sINGH0YLQviDQsiDQv9C10YDQuNC+0LQg0L7RgiAyLTEyINC70LXRgiDQvtC9INC70YPRh9GI0LUg0LLRi9GB0LvRg9GI0LjQstCw0LXRgtGB0Y8g0LLQviAyINC80LXQttGA0LXQsdC10YDRjNC1INGB0LvQtdCy0LAsINGH0LXQvCDRgdC/0YDQsNCy0LAuINCYINC00LDQvdC90YvQuSDRhNCw0LrRgiDRhNC+0YDQvNC40YDRg9C10YIg0YTQuNC30LjQvtC70L7Qs9C40YfQtdGB0LrQuNC5INCw0LrRhtC10L3RgiAyLdCz0L4g0YLQvtC90LAg0L3QsCDQu9C10LPQvtGH0L3QvtC5INCw0YDRgtC10YDQuNC10LkuINCU0LDQvdC90YvQuSDRhNC40LfQuNC+0LvQvtCz0LjRh9C10YHQutC40Lkg0LDQutGG0LXQvdGCIDIt0LPQviDRgtC+0L3QsCDRgdC70LXQstCwINC+0LHRg9GB0LvQvtCy0LvQtdC90LAg0YTQuNC30LjQvtC70L7Qs9C40YfQtdGB0LrQuNC80Lgg0L7RgdC+0LHQtdC90L3QvtGB0YLRj9C80Lgg0LrRgNC+0LLQvtC+0LHRgNCw0YnQtdC90LjRjyDRgyDQtNC10YLQtdC5LiDQoyDQtNC10YLQtdC5IDEt0LPQviDQs9C+0LTQsCDQttC40LfQvdC4INC70LXQs9C+0YfQvdC+0LUg0LDRgNGC0LXRgNC40Y8g0LjRgdC/0YvRgtGL0LLQsNC10YIg0LHQvtC70YzRiNC+0LUg0LTQsNCy0LvQtdC90LjQtSDQuNC3LdC30LAg0L7RgdC+0LHQtdC90L3QvtGB0YLQtdC5INC80LDQu9C+0LPQviDQutGA0YPQs9CwINC60YDQvtCy0L7QvtCx0YDQsNGJ0LXQvdC40Y8sINC60L7RgtC+0YDQsNGPINGP0LLQu9GP0LXRgtGB0Y8g0L/RgNC40YHQv9C+0YHQvtCx0LvQtdC90LjQtdC8INC6INCy0L3QtdGD0YLRgNC+0LHQvdC+0LzRgyDQtNGL0YXQsNC90LjRji4gINCf0L7RgdC70LUgMTIg0LvQtdGCINC30LLRg9GH0LDQvdC40LUg0YLQvtC90L7QsiDRgdGA0LDQstC90LjQstCw0LXRgtGB0Y8g0Lgg0LLRgtC+0YDQvtC5INGC0L7QvSDQvdCw0YfQuNC90LDQtdGCINCy0YvRgdC70YPRiNC40LLQsNGC0YzRgdGPINCx0L7Qu9GM0YjQtSDRgSDQv9GA0LDQstCwLCDRgtC+INC10YHRgtGMINC90LDQtCDQsNC+0YDRgtC+0LkuINCe0YHQvtCx0LXQvdC90L7RgdGC0YzRjiDRgtC+0L3QvtCyINC90L7QstC+0YDQvtC20LTQtdC90L3Ri9GFINGP0LLQu9GP0LXRgtGB0Y8g0LXQs9C+INCx0L7Qu9C10LUg0LPRgNC+0LzQutC+0LUg0LfQstGD0YfQsNC90LjQtSwg0LfQsCDRgdGH0LXRgiDQsdC70LjQt9C60L7Qs9C+INGA0LDRgdC/0L7Qu9C+0LbQtdC90LjRjyDRgdC10YDQtNGG0LAg0Log0LPRgNGD0LTQvdC+0Lkg0LrQu9C10YLQutC1LiDQotCw0LrQttC1INGDINC90L7QstC+0YDQvtC20LTQtdC90L3Ri9GFINGC0L7QvdGLINGH0LDRidC1INGA0LjRgtC80LjRh9C90YvQtSwg0L3QviDQvNC+0LPRg9GCINCx0YvRgtGMINC90LUg0YDQtdCz0YPQu9GP0YDQvdGL0LzQuCwg0Y3RgtC+INGC0LDQuiDQvdCw0LfRi9Cy0LDQtdC80LDRjyDRhNC40LfQuNC+0LvQvtCz0LjRh9C10YHQutCw0Y8g0LDRgNC40YLQvNC40Y8g0YHQstGP0LfQsNC90L3QsNGPINGBINC00YvRhdCw0L3QuNC10LwuINCk0LjQt9C40L7Qu9C+0LPQuNGH0LXRgdC60L7QtSDRgNCw0YHRidC10L/Qu9C10L3QuNC1IDIg0YLQvtC90LAg0L3QtdGA0LXQtNC60L4g0YHQu9GL0YjQvdC+LCDQvtGB0L7QsdC10L3QvdC+INC/0YDQuCDQstC00L7RhdC1LiAzINC4IDQg0YLQvtC9INC+0LHRi9GH0L3QviDQvdC1INCy0YvRgdC70YPRiNC40LLQsNGO0YLRgdGPL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2" table:style-name="ce1">
            <text:p>1066932</text:p>
          </table:table-cell>
          <table:table-cell office:value-type="string" table:style-name="ce1">
            <text:p>russian</text:p>
          </table:table-cell>
          <table:table-cell office:value-type="string" table:style-name="ce1">
            <text:p>Билет 2&amp;lt;br /&amp;gt; 1.Какая роль подкожно жировой клетчатки у детей первых месяцев жизни в не сократительном термогенезе (теплопродукции, не связанной с мышечным сокращением). Благодаря наличию в ней какой ткани?&amp;lt;br /&amp;gt; 2.Какова особенность сердечных тонов у новорожденных и детей раннего возраста и чем они характеризуются?&amp;lt;br /&amp;gt;</text:p>
          </table:table-cell>
          <table:table-cell office:value-type="string" table:style-name="ce1">
            <text:p>ICAgMS7Qn9C+0LTQutC+0LbQvdC+INC20LjRgNC+0LLQsNGPINC60LvQtdGC0YfQsNGC0LrQsCDQuNCz0YDQsNC10YIg0L7RgdC90L7QstC90YPRjiDRgNC+0LvRjCDQsiDRgtC10L/Qu9C+0L/RgNC+0LTRg9C60YbQuNC4LCDQvtGB0L7QsdC10L3QvdC+INGDINC00LXRgtC10LkuINCY0LzQtdC10YLRgdGPINCx0LXQu9GL0Lkg0LbQuNGALCDQutC+0YLQvtGA0YvQuSDQt9Cw0L3QuNC80LDQtdGCINCx0L7Qu9GM0YjQuNC5INC/0YDQvtGG0LXQvdGCINCf0JbQmiDQuCDQvdCw0YXQvtC00LjRgtGB0Y8g0LLQviDQvNC90L7Qs9C40YUg0YLQutCw0L3Rj9GFINC4INCx0YPRgNGL0Lkg0LbQuNGALiDQkdGD0YDRi9C5INC20LjRgCDRgNCw0YHQv9C+0LvQsNCz0LDQtdGC0YHRjyDQv9C+0LQg0LrQvtC20LXQuSDQsiDQvNC10LbQu9C+0L/QsNGC0L7Rh9C90L7QuSDQvtCx0LvQsNGB0YLQuCAsINCyINGB0YDQtdC00L7RgdGC0LXQvdC40Lgg0L7QutC+0LvQviDQsNC+0YDRgtGLLiDQoyDQtNC10YLQtdC5INC+0L0g0LfQsNC90LjQvNCw0LXRgiDQsdC+0LvRjNGI0LUg0L/QvtCy0LXRgNGF0L3QvtGB0YLQuC4g0J7QvSDRgNCw0LHQvtGC0LDQtdGCINGC0LDQuiwg0YfRgtC+INC90LUg0LjRgdC/0L7Qu9GM0LfRg9C10YIg0YHQvtC60YDQsNGJ0LXQvdC40LUg0LzRi9GI0YYuINCi0LDQutC20LUsINGC0LDQvCDRgtCw0LrQvtCyINC80LXRhdCw0L3QuNC30Lwg0YDQsNC30L7QsdGJ0LXQvdC40Y8g0L7QutC40YHQu9C40YLQtdC70YzQvdC+0LPQviDRhNC+0YHRhNC+0YDQuNC70LjRgNC+0LLQsNC90LjRjyDRh9GC0L4sICDRjdC90LXRgNCz0LjRjiDQutC+0YLQvtGA0LDRjyDQvtCx0YDQsNC30YPQtdGC0YHRjyDQv9GA0Lgg0LPQuNC00YDQvtC70LjQt9C1INCi0YDQuNCz0LvQuNGG0LXRgNC40LTQvtCyINC4INGB0LLQvtCx0L7QtNC90YvRhSDQttC40YDQvdGL0YUg0LrQuNGB0LvQvtGCINC+0L0g0L/RgNC10L7QsdGA0LDQt9GD0LXRgiAg0L3QtSDQsiDQkNCi0KQsINCwINCyINGC0LXQv9C70L4uINCV0YnQtSDQvdC10L7QsdGF0L7QtNC40LzQviDRg9C/0L7QvNGP0L3Rg9GC0Ywg0YLQviwg0YfRgtC+INCx0YPRgNGL0Lkg0LbQuNGAINCx0L7Qs9Cw0YIg0YHQv9C10YbQuNCw0LvRjNC90YvQvCDQsdC10LvQutC+0LwsINC/0L7QtCDQvdCw0LfQstCw0L3QuNC10Lwt0YLQtdGA0LzQvtCz0LXQvdC40L0g0Lgg0YLQsNC60LbQtSwg0LzQuNGC0L7RhdC+0L3QtNGA0LjRj9C80LguINCY0LzQtdC90L3Qviwg0LHQu9Cw0LPQvtC00LDRgNGPINGN0YLQuNC8INGN0LvQtdC80LXQvdGC0LDQvCDRjdC90LXRgNCz0LjRjyDQv9GA0LXQvtCx0YDQsNC30YPQtdGC0YHRjyDQsiDRgtC10L/Qu9C+INCx0LXQtyDQuNGB0L/QvtC70YzQt9C+0LLQsNC90LjRjyDQvNGL0YjQtdGH0L3Ri9GFINGB0L7QutGA0LDRidC10L3QuNC5LiDQkCDRjdGC0L4g0LfQvdCw0YfQuNGCLCDRh9GC0L4g0LHRg9GA0YvQuSDQttC40YAg0LLRi9GA0LDQsdCw0YLRi9Cy0LDQtdGCINGC0LXQv9C70L4g0L/Rg9GC0LXQvCDRgtC10YDQvNC+0LPQtdC90LXQt9CwLiDQkiDRh9C10Lwg0LbQtSDQstCw0LbQvdC+0YHRgtGMINGDINC90L7QstC+0YDQvtC20LTQtdC90L3Ri9GFPyDQsiDRgtC+0LwsINGH0YLQviDRgyDQvdC40YUg0LHRg9GA0YvQuSDQttC40YAg0LfQsNC90LjQvNCw0LXRgiDQvtGB0L3QvtCy0L3Rg9GOINC/0L7QstC10YDRhdC90L7RgdGC0Ywg0LjRhSDRgtC10LvQsC4g0J/QvtGN0YLQvtC80YMsINC90L7QstC+0YDQvtC20LTQtdC90L3Ri9C1INCx0L7Qu9C10LUg0YPRj9C30LLQuNC80Ysg0Log0L/QtdGA0LXQvtGF0LvQsNC20LTQtdC90LjRjiDQuNC70Lgg0Log0L/QtdGA0LXQs9GA0LXQstGDLiAgICAgICAgIDxiciAvPg0KICAgMi7QntGB0L7QsdC10L3QvdC+0YHRgtGMINGB0LXRgNC00LXRh9C90YvRhSDRgtC+0L3QvtCyINGDINC00LXRgtC10Lkg0L7QsdGD0YHQu9C+0LLQu9C10L3QsCDQuNGFINCw0L3QsNGC0L7QvNC+INGE0LjQt9C40L7Qu9C+0LPQuNGH0LXRgdC60LjQvNC4INC+0YHQvtCx0LXQvdC90L7RgdGC0Y/QvNC4LiDQkCDQuNC80LXQvdC90L46INC80Y/Qs9C60LDRjywg0L/QvtC00LDRgtC70LjQstCw0Y8g0LPRgNGD0LTQvdCw0Y8g0LrQu9C10YLQutCwLCDQutC+0YLQvtGA0LDRjyDQv9C+0LfQstC+0LvRj9C10YIg0YPRgdC70YvRiNCw0YLRjCDRgtC+0L3Riywg0LrQvtGC0L7RgNGL0YUg0YMg0LLQt9GA0L7RgdC70YvRhSDQsiDQvdC+0YDQvNC1INC90LUg0YHQu9GL0YjQvdC+ICgzLDQg0YLQvtC90YspLiDQotCw0LrQttC1LCDRgyDQtNC10YLQtdC5INGC0L7QvdGLINGB0LXRgNC00YbQsCDQsdC+0LvQtdC1INC30LLRg9GH0L3Ri9C1INC4INCx0L7Qu9C10LUg0Y/RgdC90YvQtSwg0YfRgtC+INGC0L7QttC1INC80L7QttC90L4g0L7QsdGK0Y/RgdC90LjRgtGMINGF0L7RgNC+0YjQtdC5INC/0YDQvtGF0L7QtNC40LzQvtGB0YLRjNGOINC30LLRg9C60LAg0YfQtdGA0LXQtyDRgtC60LDQvdC4LiDQotCw0LrQttC1LCDQvNC+0LbQvdC+INC+0YLQvNC10YLQuNGC0Ywg0YfRgtC+INGA0LDQt9C80LXRgCDQs9GA0YPQtNC90L7QuSDQutC70LXRgtC60Lgg0LzQtdC90YzRiNC1INC4INC70YPRh9GI0LUg0YHQu9GL0YjQvdC+INC30LDQutGA0YvRgtC40LUg0LDQvtGA0YLQsNC70YzQvdC+0LPQviDQutC70LDQv9Cw0L3QsCDQuCDQutC70LDQv9Cw0L3QsCDQu9C10LPQvtGH0L3QvtC5INCw0YDRgtC10YDQuNC4INC/0YDQuCDQsNGD0YHQutGD0LvRjNGC0LDRhtC40Lgg0YHQtdGA0LTRhtCwLiAgICAgICAgICAgICAgICAgICAgICAgICAgICAgICAgICAgICDQoyDQtNC10YLQtdC5INGA0LDQvdC90LXQs9C+INCy0L7Qt9GA0LDRgdGC0LAg0LjQu9C4INGDINC90L7QstC+0YDQvtC20LTQtdC90L3Ri9GFINC40LzQtdC10YLRgdGPINGC0LDQutCw0Y8g0L7RgdC+0LHQtdC90L3QvtGB0YLRjCwg0LrQsNC6INGE0LjQt9C40L7Qu9C+0LPQuNGH0LXRgdC60L7QtSDRgNCw0YHRidC10L/Qu9C10L3QuNC1IDIg0YLQvtC90LAt0LTQuNCw0YHRgtC+0LvQuNGH0LXRgdC60L7Qs9C+LiDQrdGC0L4g0YHRh9C40YLQsNC10YLRgdGPINC90L7RgNC80L7QuSwg0LrQvtGC0L7RgNCw0Y8g0L7QsdGD0YHQu9C+0LLQu9C10L3QsCDQsdC+0LvQtdC1INC80LXQtNC70LXQvdC90YvQvCDQt9Cw0LrRgNGL0YLQuNC10Lwg0LrQu9Cw0L/QsNC90LAg0LvQtdCz0L7Rh9C90L7QuSDQsNGA0YLQtdGA0LjQuC4g0JjQvdGC0LXRgNCy0LDQuyDQvNC10LbQtNGDIDEg0LggMiDRgtC+0L3QvtC8INGB0L7QvtGC0LLQtdGC0YHRgtCy0YPQtdGCINGB0LjRgdGC0L7Qu9C1ICjRgyDQtNC10YLQtdC5KS4g0J/QtdGA0LLRi9C5INGC0L7QvS3RgdC40YHRgtC+0LvQuNGH0LXRgdC60LjQuSwg0L7QsdGL0YfQvdC+INCz0YDQvtC80YfQtSDQstGC0L7RgNC+0LPQvi4g0J3Qviwg0Y3RgtC+INC90LUg0LLRgdC10LPQtNCwINC+0YHRgtCw0LXRgtGB0Y8g0YLQsNC6LiDQlNCw0LvQtdC1LCDRgSDQtNCw0LvRjNC90LXQudGI0LjQvCDQvdC+0YDQvNCw0LvRjNC90YvQvCDRgNCw0LfQstC40YLQuNC10Lwg0YDQtdCx0LXQvdC60LAg0L/RgNC10L7QsdC70LDQtNCw0L3QuNC1INGC0L7QvdC+0LIg0LzQtdC90Y/QtdGC0YHRjy4g0JTQtdGC0Y/QvCDRhdCw0YDQsNC60YLQtdGA0LXQvSDRgtCw0LrQvtC5INC/0YDQuNC30L3QsNC6INC60LDQuiDRjdC80LHRgNC40L7QutCw0YDQtNC40Y8t0Y3RgtC+INC80LDRj9GC0L3QuNC60L7QvtCx0YDQsNC30L3Ri9C5INGA0LjRgtC8LCDQutC+0YLQvtGA0YvQuSDQvtCx0YPRgdC70L7QstC70LXQvSDRgtC10LwsINGH0YLQviDQv9C10YDQstGL0Lkg0Lgg0LLRgtC+0YDQvtC5INGC0L7QvSDRgdC70YvRiNC90L4g0L7QtNC40L3QsNC60L7QstC+INC4INC40L3RgtC10YDQstCw0Lsg0LzQtdC20LTRgyDQvdC40LzQuCDRgtC+0LbQtSDQvtC00LjQvdCw0LrQvtCy0YvQuS4g0J/QtdGA0LLRi9C1IDIg0L3QtdC00LXQu9C4INC20LjQt9C90Lgg0YMg0L3QvtCy0L7RgNC+0LbQtNC10L3QvdC+0LPQviDQvtGB0LvQsNCx0LvQtdC90L3Ri9C1INGC0L7QvdGLLCDQuCDRg9C20LUg0LIg0LTQsNC70YzQvdC10LnRiNC10Lwg0L7QvdC4INC80LXQvdGP0Y7RgtGB0Y8g0L/QviDQt9Cy0YPRh9C90L7RgdGC0Lgg0Lgg0LjQvdGC0LXRgNCy0LDQu9GDLiDQmiAyLTMg0L3QtdC00LXQu9C1INC20LjQt9C90Lgg0YMg0LTQtdGC0LXQuSDQsiDRgtC+0YfQutC1INCR0L7RgtC60LjQvdCwLdCt0YDQsdCwINC4INC90LAg0LLQtdGA0YXRg9GI0LrQtSDRgdC10YDQtNGG0LAgMiDRgtC+0L0g0LPRgNC+0LzRh9C1INC/0LXRgNCy0L7Qs9C+LiDQlNCw0LvQtdC1LCDQvtC90Lgg0LLRi9GA0LDQstC90LjQstCw0Y7RgtGB0Y8uINCaIDIgLTMg0LzQtdGB0Y/RhtGDINGD0LbQtSDQv9GA0LXQvtCx0LvQsNC00LDQtdGCIDEg0YLQvtC9LCDQutC+0YLQvtGA0YvQuSDRgdC+0YXRgNCw0L3Rj9C10YIg0YHQstC+0LUg0LfQstGD0YfQvdC+0LUg0L/RgNC10L7QsdC70LDQtNCw0L3QuNC1INC00L4g0LrQvtC90YbQsCAxINCz0L7QtNCwLiDQkCDQutC+IDIg0LPQvtC00YMg0LbQuNC30L3QuCDQstGL0YHQu9GD0YjQuNCy0LDQtdGC0YHRjyDQu9GD0YfRiNC1IDIg0YLQvtC9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8" table:style-name="ce1">
            <text:p>1066938</text:p>
          </table:table-cell>
          <table:table-cell office:value-type="string" table:style-name="ce1">
            <text:p>russian</text:p>
          </table:table-cell>
          <table:table-cell office:value-type="string" table:style-name="ce1">
            <text:p>Билет 2&amp;lt;br /&amp;gt; 1.Какая роль подкожно жировой клетчатки у детей первых месяцев жизни в не сократительном термогенезе (теплопродукции, не связанной с мышечным сокращением). Благодаря наличию в ней какой ткани?&amp;lt;br /&amp;gt; 2.Какова особенность сердечных тонов у новорожденных и детей раннего возраста и чем они характеризуются?&amp;lt;br /&amp;gt;</text:p>
          </table:table-cell>
          <table:table-cell office:value-type="string" table:style-name="ce1">
            <text:p>MSnQntCi0JLQldCiINCd0JAg0J/QldCg0JLQq9CZINCS0J7Qn9Cg0J7QoTog0JTQsNC90L3QvtC5INGC0LrQsNC90YzRjiDRj9Cy0LvRj9C10YLRgdGPINCx0YPRgNCw0Y8g0LbQuNGA0L7QstCw0Y8g0YLQutCw0L3RjCwg0LrQvtGC0L7RgNCw0Y8g0L3QsNGH0LjQvdCw0LXRgiDRgdCy0L7RjiDQt9Cw0LrQu9Cw0LTQutGDINGDINC/0LvQvtC00LAg0L3QsNGH0LjQvdCw0Y8g0YEgMTMg0L3QtdC00LXQu9C4INGN0LzQsdGA0LjQvtCz0LXQvdC10LfQsC4g0JXRgdC70Lgg0YHRgNCw0LLQvdC40LLQsNGC0Ywg0Y3RgtGDINGC0LrQsNC90Ywg0YEg0LHQtdC70L7QuSDQttC40YDQvtCy0L7QuSDRgtC60LDQvdGM0Y4sINGC0L4g0L7QvdCwINC40LzQtdC10YIg0L3QsNC80L3QvtCz0L4g0LHQvtC70YzRiNC1INC80LjRgtC+0YXQvtC90LTRgNC40LksINC+0YDQs9Cw0L3QvtC40LTQvtCyLCDQu9C40LfQvtGB0L7QvCwg0LrQvtC80L/Qu9C10LrRgdCwINCT0L7Qu9GM0LTQttC4INC4INC20LjRgNC90YvRhSDQutC40YHQu9C+0YIsINGC0YDQuNCz0LvQuNGG0LXRgNC40LTQvtCyLCDQutC+0YLQvtGA0YvQtSDRgNCw0YHRidC10L/Qu9GP0Y/RgdGMINCy0YvQtNC10LvRj9GO0YIg0LPQvtGA0LDQt9C00L4g0LHQvtC70YzRiNC1INGN0L3QtdGA0LPQuNC4INC4INGC0LXQv9C70LAuINCU0L7QvdC+0YjQtdC90L3Ri9C1INC90L7QstC+0YDQvtC20LTQtdC90L3Ri9C1INC40LzQtdGO0YIg0LTQsNC90L3Rg9GOINGC0LrQsNC90Ywg0LIg0LrQvtC70LjRh9C10YHRgtCy0LUg0L7RgiAzMCDQtNC+IDgwINCzLCDRh9GC0L4g0YHQvtGB0YLQsNCy0LvRj9C10YIgMS0zINC/0YDQvtGG0LXQvdGC0LAg0L7RgiDQvtCx0YnQtdC5INC80LDRgdGB0Ysg0YLQtdC70LAuINCR0YPRgNCw0Y8g0LbQuNGA0L7QstCw0Y8g0YLQutCw0L3RjCDRh9Cw0YnQtSDQstGB0LXQs9C+INC70L7QutCw0LvQuNC30YPQtdGC0YHRjyDQsiDQv9C+0LTQvNGL0YjQtdGH0L3QvtC5INC+0LHQu9Cw0YHRgtC4LCDQsiDQt9Cw0LTQvdC10Lkg0L7QsdC70LDRgdGC0Lgg0YjQtdC4LCDRgtCw0LrQttC1INCx0L7Qu9GM0YjQvtC1INC60L7Qu9C40YfQtdGB0YLQstC+INGA0LDRgdC/0L7Qu9Cw0LPQsNC10YLRgdGPINC+0LrQvtC70L4g0YnQuNGC0L7QstC40LTQvdC+0Lkg0Lgg0LLQuNC70L7Rh9C60L7QstC+0Lkg0LbQtdC70LXQtywg0LIg0L/RgNC+0YHRgtGA0LDQvdGB0YLQstC1INC80LXQttC00YMg0LvQvtC/0LDRgtC60LDQvNC4LCDRgtCw0LrQttC1INC80L7Qs9GD0YIg0YDQsNGB0L/QvtC70LDQs9Cw0YLRjNGB0Y8g0LLQvtC60YDRg9CzINC/0L7Rh9C10LouINCR0YPRgNCw0Y8g0LbQuNGA0L7QstCw0Y8g0YLQutCw0L3RjCDQv9C+0LzQuNC80L4g0Y3RgtC+0LPQviDQvNC+0LbQtdGCINGC0LDQutC20LUg0LLRgdGC0YDQtdGH0LDRgtGM0YHRjyDQsiDRgtCw0LrQuNGFINC+0LHQu9Cw0YHRgtGP0YUsINC60LDQujog0LTQtdC70YzRgtC+0LLQuNC00L3QsNGPLCDQs9C00LUg0YLRgNCw0L/QtdGG0LXQstC40LTQvdCw0Y8g0LzRi9GJ0YbQsCDQuCDQutGA0YPQv9C90YvQtSDQvNCw0LPQuNGB0YLRgNCw0LvRjNC90YvQtSDRgdC+0YHRg9C00YsuINCU0LDQvdC90LDRjyDRgtC60LDQvdGMINC40LzQtdC10YIg0L7Rh9C10L3RjCDQstCw0LbQvdC+0LUg0LfQvdCw0YfQtdC90LjQtSDQsiDQttC40LfQvdC4INGA0LXQsdC10L3QutCwINCyINGA0LDQvdC90LXQvCDQstC+0LfRgNCw0YHRgtC1LCDRgtCw0Log0LrQsNC6ICDQvtC90LAg0YPRh9Cw0YHRgtCy0YPQtdGCINCyINC90LXRgdC+0LrRgNCw0YLQuNGC0LXQu9GM0L3QvtC8INGC0LXRgNC80L7Qs9C10L3QtdC30LUsINC/0YDQvtGG0LXRgdGB0LDRhSDQvtCx0YDQsNC30L7QstCw0L3QuNGPINGC0LXQv9C70LAsINC60L7RgtC+0YDRi9C1INC90LUg0YHQstGP0LfQsNC90Ysg0YEg0LzRi9GI0LXRh9C90YvQvCDRgdC+0LrRgNCw0YnQtdC90LjQtdC8LiDQkdGD0YDQsNGPINC20LjRgNC+0LLQsNGPINGC0LrQsNC90Ywg0L/QvtGB0LvQtSDRgNC+0LbQtNC10L3QuNGPINCyINGC0LXRh9C10L3QuNC1INC/0LXRgNCy0YvRhSDQtNCy0YPRhSDQtNC90LXQuSDQttC40LfQvdC4INGA0LXQsdC10L3QutCwINC+0LHQtdGB0L/QtdGH0LjQstCw0LXRgiDQt9Cw0YnQuNGC0YMg0L7RgiAi0L/QtdGA0LXQvtGF0LvQsNC20LTQtdC90LjRjyIsINC/0L7QvNC40LzQviDRjdGC0L7Qs9C+INC80L7QttC10YIg0YPRh9Cw0YHRgtCy0L7QstCw0YLRjCDQsiDQv9GA0L7RhtC10YHRgdCw0YUg0YLQtdGA0LzQvtGA0LXQs9GD0LvRj9GG0LjQuCwg0LfQsNGC0LXQvCDQvtC90LAg0YHQviDQstGA0LXQvNC10L3QtdC8INCx0YPQtNC10YIg0LjRgdGH0LXQt9Cw0YLRjCDQuNC3LdC30LAg0YLQvtCz0L4sINGH0YLQviDRgdC/0L7RgdC+0LHQvdC+0YHRgtGMINC6INGC0LXQv9C70L7Qv9GA0L7QtNGD0LrRhtC40Lgg0LHRg9C00LXRgiDRgdC90LjQttCw0YLRjNGB0Y8uINCe0LTQvdCw0LrQviDQvdC10LHQvtC70YzRiNCw0Y8g0YfQsNGB0YLRjCDQsdGD0YDQvtC5ICDQttC40YDQvtCy0L7QuSDRgtC60LDQvdC4INGDINC90LXQutC+0YLQvtGA0YvRhSDQtNC10YLQtdC5INC80L7QttC10YIg0YHQvtGF0YDQsNC90Y/RgtGM0YHRjy4g0J3QsNC/0YDQuNC80LXRgCwg0LIg0YLQsNC60LjRhSDRgdGC0YDQsNC90LDRhSDQutCw0Log0JrQsNC90LDQtNCwLCDQqNCy0LXRhtC40Y8g0L/RgNCw0LrRgtC40LrRg9GO0YIg0YHQv9C10YbQuNCw0LvRjNC90YvQtSDQvNC10YLQvtC00YssINC60L7RgtC+0YDRi9C1INC/0L7Qt9Cy0L7Qu9GP0Y7RgiDRg9C70YPRh9GI0LjRgtGMINGA0LDQsdC+0YLRgyDQsdGD0YDQvtC5INC20LjRgNC+0LLQvtC5INGC0LrQsNC90LguINCU0LXQu9C+INCyINGC0L7QvCwg0YfRgtC+INC00LXRgtC10Lkg0L7RgdGC0LDQstC70Y/RjtGCINC90LAg0YPQu9C40YbQsNGFINCyINC60L7Qu9GP0YHQutCw0YUg0L3QsCDQv9Cw0YDRgyDQvNC40L3Rg9GCLCDRh9GC0L7QsdGLINCx0YPRgNCw0Y8g0LbQuNGA0L7QstCw0Y8g0YLQutCw0L3RjCDQvdCw0YfQsNC70LAg0YTRg9C90LrRhtC40L7QvdC40YDQvtCy0LDRgtGMINC4INC30LDRidC40YnQsNC70LAg0L7RgiDRhdC+0LvQvtC00LAuINCf0YDQuCDQv9C70L7RhdC+0Lwg0L/QuNGC0LDQvdC40Lgg0LjQt9C90LDRh9Cw0LvRjNC90L4g0LHRg9C00LXRgiDRgNCw0YHRidC10L/Qu9GP0YLRjNGB0Y8g0YHQvdCw0YfQsNC70LAg0LHQtdC70LDRjyDQttC40YDQvtCy0LDRjyDRgtC60LDQvdGMLCDQsCDQv9C+0YHQu9C1INGD0LbQtSDQsdGD0YDQsNGPINC20LjRgNC+0LLQsNGPINGC0LrQsNC90YwuINCc0LXRhdCw0L3QuNC30Lwg0YDQsNCx0L7RgtGLINCx0YPRgNC+0Lkg0LbQuNGA0L7QstC+0Lkg0YLQutCw0L3QuCDRgdCy0Y/Qt9Cw0L3QviDRgSDRgtC10LwsINGH0YLQviDQsiDQvNC40YLQvtGF0L7QvdC00YDQuNGP0YUg0LHRg9GA0L7QuSDQttC40YDQvtCy0L7QuSDRgtC60LDQvdC4INGA0LDRgdC/0L7Qu9Cw0LPQsNC10YLRgdGPINGB0L/QtdGG0LjQsNC70YzQvdGL0Lkg0LHQtdC70L7Qui0g0YLQtdGA0LzQvtCz0LjQvdC40L0sINC60L7RgtC+0YDRi9C5INC/0YDQuCDRhdC+0LvQvtC00LUg0L3QsNGH0LjQvdCw0LXRgiDRgdCy0Y/Qt9GL0LLQsNGC0YzRgdGPINGB0L4g0YHQv9C10YbQuNGE0LjRh9C10YHQutC40LzQuCDRgNC10YbQtdC/0YLQvtGA0LDQvNC4INC4INGB0L/QvtGB0L7QsdGB0YLQstGD0LXRgiDRgNCw0LfQvtCx0YnQtdC90LjRjiDQuCDRhNC+0YHRhNC+0YDQuNC70LjRgNC+0LLQsNC90LjRjiwg0YfRgtC+INGB0L/QvtGB0L7QsdGB0YLQstGD0LXRgiDRgNCw0YHRgdC10LrQsNC90LjRjiDRgtC10L/Qu9CwLCDQstC80LXRgdGC0L4g0L/RgNC40LLRi9GH0L3QvtCz0L4g0L7QsdGA0LDQt9C+0LLQsNC90LjRjyDQkNCi0KQuINCU0LDQvdC90LDRjyDRgNC10LDQutGG0LjRjyDRgtCw0LrQttC1INGA0LXQs9GD0LvQuNGA0YPQtdGC0YHRjyDRgSDQv9C+0LzQvtGJ0YzRjiAg0YHQuNC80L/QsNGC0LjRh9C10YHQutC+0Lkg0L3QtdGA0LLQvdC+0Lkg0YHQuNGB0YLQtdC80YssINC60L7RgtC+0YDQsNGPINCyINC+0YLQstC10YIg0L3QsCDRhdC+0LvQvtC0INCw0LrRgtC40LLQuNGA0YPQtdGC0YHRjyDQuCDQstGL0YDQsNCx0LDRgtGL0LLQsNC10YIg0L3QvtGA0LDQtNGA0LXQvdCw0LvQuNC9LiDQktCw0LbQvdC+INC+0YLQvNC10YLQuNGC0YwsINGH0YLQviDRgyDQvdC10LTQvtC90L7RiNC10L3QvdGL0YUg0L3QvtCy0L7RgNC+0LbQtNC10L3QvdGL0YUg0LHRg9GA0L7QuSDQttC40YDQvtCy0L7QuSDRgtC60LDQvdC4INC80LDQu9C+LCDQuNC3LdC30LAg0YfQtdCz0L4g0L7QvdC4INGH0LDRgdGC0L4g0LzQtdGA0LfQvdGD0YIg0Lgg0L3QsNGF0L7QtNGP0YLRgdGPINC/0L7QtCDQutC+0L3RgtGA0L7Qu9C10Lwg0LLRgNCw0YfQtdC5LdC90LXQvtC90LDRgtC+0LvQvtCz0L7QsiDQuCDQv9C+0LzQtdGJ0LDRjtGC0YHRjyDQsiDRgdC/0LXRhtC40LDQu9GM0L3Ri9C1INC60LDQvNC10YDRiywg0LPQtNC1INGA0LXQs9GD0LvQuNGA0YPQtdGC0YHRjyDRgtC10LzQv9C10YDQsNGC0YPRgNCwINC00LvRjyDRgtC+0LPQviwg0YfRgtC+INC90L7QstC+0YDQvtC20LTQtdC90L3Ri9C1INC90LUg0L/QtdGA0LXQvtGF0LvQsNC00LjQu9C40YHRjC4yKdCe0KLQktCV0KIg0J3QkCDQktCi0J7QoNCe0Jkg0JLQntCf0KDQntChOiDQodC10YDQtNC10YfQvdGL0LUg0YLQvtC90Yst0Y3RgtC+INC60L7RgNC+0YLQutC40LUsINC60YDQsNGC0LrQvtCy0YDQtdC80LXQvdC90YvQtSDQt9Cy0YPQutC4LCDQutC+0YLQvtGA0YvQtSDQstGL0YHQu9GD0YjQuNCy0LDRgtGM0YHRjyDQv9GA0Lgg0LDRg9GB0LrRg9C70YzRgtCw0YbQuNC4LCDQutC+0YLQvtGA0YvQtSDRhNC+0YDQvNC40YDRg9GO0YLRgdGPINC+0L3QuCDQv9GA0Lgg0L7RgtC60YDRi9GC0LjQuCDQuCDQt9Cw0LrRgNGL0YLQuNC4INC60LvQsNC/0LDQvdC+0LIg0YHQtdGA0LTRhtCwLiDQktCw0LbQvdC+INC/0L7QvdC40LzQsNGC0Ywg0LzQtdGF0LDQvdC40LfQvNGLINGE0L7RgNC80LjRgNC+0LLQsNC90LjRjyDRjdGC0LjRhSDQt9Cy0YPQutC+0LIsINC/0L7RjdGC0L7QvNGDINGA0LDQt9Cx0LXRgNC10Lwg0LrQsNC6INC+0L3QuCDQstC+0LfQvdC40LrQsNGO0YIuINCjINGA0LXQsdC10L3QutCwINCy0YvQtNC10LvRj9GO0YIg0LIg0L3QvtGA0LzQtSDQtNCy0LAg0LLQuNC00LAg0YHQtdGA0LTQtdGH0L3Ri9GFINGC0L7QvdC+0LI6INC/0LXRgNCy0YvQuSDRgtC+0L0g0Lgg0LLRgtC+0YDQvtC5INGC0L7QvS4g0J/QtdGA0LLRi9C5INGN0YLQvi3RgdC40YHRgtC+0LvQuNGH0LXRgdC60LjQuSDRgtC+0L0g0LLQvtC30L3QuNC60LDQtdGCINC/0YDQuCDRgdC+0LrRgNCw0YnQtdC90LjQuCDQttC10LvRg9C00L7Rh9C60L7QsiDQuCDQv9C+0YHQu9C1INC30LDRhdC70L7Qv9GL0LLQsNC90LjRjyDQkNCSLdC60LvQsNC/0LDQvdC+0LIuINCV0LPQviDQstC+0LfQvdC40LrQvdC+0LLQtdC90LjQtSDQvtCx0YPRgdC70LDQstC70LjQstCw0LXRgiDRgdGA0LDQt9GDINC90LXRgdC60L7Qu9GM0LrQviDRgdC+0YHRgtCw0LLQu9GP0Y7RidC40YU6INC60LvQsNC/0LDQvdC90YvQuSDQutC+0LzQv9C+0L3QtdC90YIgKNCy0L4g0LLRgNC10LzRjyDQt9Cw0LrRgNGL0YLQuNGPINC80LjRgtGA0LDQu9GM0L3QvtCz0L4g0Lgg0YLRgNC10YXRgdGC0LLQvtGA0YfQsNGC0L7Qs9C+INC60LvQsNC/0LDQvdC+0LIpLCDRgdC+0YHRg9C00LjRgdGC0YvQuSDQutC+0LzQv9C+0L3QtdC90YIgKNCyINC90LDRh9Cw0LvQtSDRhNCw0LfRiyDQuNC30LPQvdCw0L3QuNGPINC60YDQvtCy0Lgg0LjQtyDQttC10LvRg9C00L7Rh9C60L7QsiDQstC+0LfQvdC40LrQsNC10YIg0LrQvtC70LXQsdCw0L3QuNC1INGB0YLQtdC90L7QuiDQsNC+0YDRgtGLINC4INC70LXQs9C+0YfQvdC+0LPQviDRgdGC0LLQvtC70LApLCDQvNGL0YjQtdGH0L3Ri9C5INC60L7QvNC/0L7QvdC10L3RgiAo0YHQvtC60YDQsNGJ0LXQvdC40LUg0YHQsNC80LjRhSDQttC10LvRg9C00L7Rh9C60L7QsiksINC/0YDQtdC00YHQtdGA0LTQvdGL0Lkg0LrQvtC80L/QvtC90LXQvdGCICjRgtCw0LrQttC1INCy0LvQuNGP0LXRgiDQvdCw0L/RgNGP0LbQtdC90LjQtSDQv9GA0LXQtNGB0LXRgNC00LjQuSkuINCf0YDQuCDRjdGC0L7QvCDQsiDQvdC+0YDQvNC1INC/0LXRgNCy0YvQuSDRgtC+0L0g0LTQvtC70LbQtdC9INGB0L7QstC/0LDQtNCw0YLRjCDRgSDQv9GD0LvRjNGB0L7QvCDQvdCwINGB0L7QvdC90L7QuSDQsNGA0YLQtdGA0LjQuCDQuCDQstC10YDRhdGD0YjQtdGH0L3Ri9C8INGC0L7Qu9GH0LrQvtC8LiDQodCw0Lwg0L7QvSDQs9GA0L7QvNC60LjQuSDQuCDQsdC+0LvQtdC1INC30LLQvtC90LrQuNC5LiDQktGC0L7RgNC+0Lkg0LTQuNCw0YHRgtC+0LvQuNGH0LXRgdC60LjQuSDRgtC+0L0g0LLQvtC30L3QuNC60LDQtdGCINGD0LbQtSDQv9GA0Lgg0LfQsNC/0L7Qu9C90LXQvdC40Lgg0LbQtdC70YPQtNC+0YfQutC+0LIsINGCLtC1INCyINGE0LDQt9GDINC00LjQsNGB0YLQvtC70Ysg0L7QsdGD0YHQu9Cw0LLQu9C40LLQsNC10YLRgdGPINGC0LXQvCwg0YfRgtC+INC30LDQutGA0YvQstCw0Y7RgtGB0Y8g0LrQu9Cw0L/QsNC90Ysg0LvQtdCz0L7Rh9C90L7Qs9C+INGB0YLQstC+0LvQsCDQuCDQsNC+0YDRgtGLLCDQstC+0LfQvdC40LrQsNC10YIg0L3QsNC/0YDRj9C20LXQvdC40LUg0YHRgtC10L3QvtC6INGC0LDQuiDQuCDRgdC10YDQtNGG0LAsINGC0LDQuiAg0Lgg0LrRgNGD0L/QvdGL0YUg0YHQvtGB0YPQtNC+0LIsINGH0YLQviDRgdC/0L7RgdC+0LHRgdGC0LLRg9C10YIg0LLQvtC30L3QuNC60L3QvtCy0LXQvdC40Y4g0LLRgtC+0YDQvtCz0L4g0YLQvtC90LAuINCc0LDQutGB0LjQvNCw0LvRjNC90L4g0YXQvtGA0L7RiNC+INCy0YLQvtGA0L7QuSDRgtC+0L0g0LLRi9GB0LvRg9GI0LjQstCw0LXRgtGB0Y8g0LLQviDQstGC0L7RgNC+0Lwg0LzQtdC20YDQtdCx0LXRgNGM0LUg0YHQv9GA0LDQstCwINC40LvQuCDRgdC70LXQstCwINC+0YIg0LPRgNGD0LTQuNC90Ysg0LggItCy0YvRgdC70YPRiNC40LLQsNC10YLRgdGPINC70YPRh9GI0LUg0L/QvtGB0LvQtSDQvNCw0LvQvtC5INC/0LDRg9C30YsiINC4INC+0L0g0LIg0YHRgNCw0LLQvdC10L3QuNC4INGBINC/0LXRgNCy0YvQvCDRgtC+0L3QvtC8INCx0L7Qu9C10LUg0L/RgNC40LPQu9GD0YjQtdC90L3Ri9C5LiDQoyDQvdC+0LLQvtGA0L7QttC00LXQvdC90YvRhSDQv9C10YDQstGL0LUg0L3QtdC00LXQu9C4INCy0YvQtNC10LvRj9C10YLRgdGPINGC0LDQutC+0LUg0YHQvtGB0YLQvtGP0L3QuNC1INC60LDQuiDRjdC80LHRgNC40L7QutCw0YDQtNC40Y8sINC60L7RgtC+0YDQsNGPINGF0LDRgNCw0LrRgtC10YDQuNC30YPQtdGC0YHRjyDQvNCw0Y/RgtC90LjQutC+0L7QsdGA0LDQt9C90YvQvCDRgNC40YLQvNC+0LwsINC/0YDQuCDQutC+0YLQvtGA0L7QvCDQs9GA0L7QvNC60L7RgdGC0Ywg0L/QtdGA0LLRi9GFINC4INCy0YLQvtGA0YvRhSDRgtC+0L3QvtCyINC+0LTQuNC90LDQutC+0LLQsNGPINC4INC40L3RgtC10YDQstCw0LvRiyDQvNC10LbQtNGDINC90LjQvNC4INGA0LDQstC90YsuINCSINC/0LXRgNCy0YvQtSDQtNCy0LUg0L3QtdC00LXQu9C4INGN0LzQsdGA0LjQvtC60LDRgNC00LjRjyDRgdGH0LjRgtCw0LXRgtGB0Y8g0L3QvtGA0LzQvtC5LCDQvtC00L3QsNC60L4g0LIg0LTQsNC70YzQvdC10LnRiNC10Lwg0LXRgdC70Lgg0LHRg9C00LXRgiDQv9GA0LjRgdGD0YLRgdGC0LLQvtCy0LDRgtGMLCDRgtC+INCz0L7QstC+0YDQuNGCINGD0LbQtSDQviDQv9Cw0YLQvtC70L7Qs9C40YfQtdGB0LrQvtC8INGB0L7RgdGC0L7Rj9C90LjQuC4g0JXRgdC70Lgg0LPQvtCy0L7RgNC40YLRjCDQsiDRhtC10LvQvtC8INC/0YDQviDQvtGC0LvQuNGH0LjQtSDRgtC+0L3QvtCyINGB0LXRgNC00YbQsCDRgyDQtNC10YLQtdC5INC+0YIg0LLQt9GA0L7RgdC70YvRhSwg0YLQviDQvtC90Lgg0YMg0L3QuNGFINCx0L7Qu9C10LUg0Y/RgdC90YvQtSDQuCDQt9Cy0YPRh9C90YvQtSwg0L/QtdGA0LLRi9C5INGC0L7QvSDQvtGCINCy0YLQvtGA0L7Qs9C+INGC0L7QvdCwINC+0YLQu9C40YfQsNC10YLRgdGPICLQv9C+INC30LLRg9GH0L3QvtGB0YLQuCIsINC60L7RgtC+0YDQsNGPINCx0YPQtNC10YIg0LzQtdC90Y/RgtGM0YHRjyDQsiDQt9Cw0LLQuNGB0LjQvNC+0YHRgtC4INC+0YIg0LLQvtC30YDQsNGB0YLQsC4g0KMg0L3QvtCy0L7RgNC+0LbQtNC10L3QvdGL0YUg0L/QtdGA0LLRi9C1INC00LLQtSDQtNC90Lgg0LbQuNC30L3QuCDQstGC0L7RgNC+0Lkg0YLQvtC9INC90LDQvNC90L7Qs9C+INCz0YDQvtC80YfQtSwg0YfQtdC8INC/0LXRgNCy0YvQuSDQuCDRj9GA0LrQviDQstGL0YHQu9GD0YjQuNCy0LDQtdGC0YHRjyDQsiDQtNC+0L/QvtC70L3QuNGC0LXQu9GM0L3QvtC5INGC0L7Rh9C60LUgItCR0L7RgtC60LjQvdCwLdCt0YDQsdCwIiAsINC30LDRgtC10Lwg0YLQvtC90LAg0LIg0LrQsNC60L7QuS0g0YLQviDQvNC+0LzQtdC90YIg0LLRi9GA0LDQstC90LjQstCw0Y7RgtGB0Y8g0Lgg0YHQviAyINC80LXRgdGP0YbQsCDQsdGD0LTQtdGCINCx0L7Qu9C10LUg0LfQstGD0YfQvdGL0Lwg0L/QtdGA0LLRi9C5INGC0L7QvSwg0LrQvtGC0L7RgNGL0Lkg0LHRg9C00LXRgiDQv9GA0LXQvtCx0LvQsNC00LDRgtGMINC/0LXRgNCy0YvQtSDQtNCy0LAg0LPQvtC00LAg0LbQuNC30L3QuCAg0Lgg0LfQsNGC0LXQvCDQvtC/0Y/RgtGMINC/0YDQvtC40YHRhdC+0LTQuNGCINCy0YvRgNCw0LLQvdC40LLQsNC90LjQtSDQt9Cy0YPRh9C90L7RgdGC0Lgg0YLQvtC90L7Qsiwg0YPQttC1INC/0L7RgdC70LUg0LTQstGD0YUg0LvQtdGCINC90LDRh9C40L3QsNC10YLRgdGPINC/0YDQtdC+0LHQu9Cw0LTQsNC90LjQtSDQtNC40LDRgdGC0L7Qu9C40YfQtdGB0LrQvtCz0L4g0YLQvtC90LAuINCSINCy0L7Qt9GA0LDRgdGC0LUg0YEgMiDQtNC+IDEyINC70LXRgiDQstGC0L7RgNC+0Lkg0YLQvtC9INCx0YPQtNC10YIg0YXQvtGA0L7RiNC+INCy0YvRgdC70YPRiNC40LLQsNGC0YzRgdGPINCy0L4g0LLRgtC+0YDQvtC8INC80LXQttGA0LXQsdC10YDRjNC1ICDRgdC70LXQstCwLCDRh9C10Lwg0YHQv9GA0LDQstCwLCDRh9GC0L4g0LHRg9C00LXRgiDQs9C+0LLQvtGA0LjRgtGMINC+0LEg0YTQuNC30LjQvtC70L7Qs9C40YfQtdGB0LrQvtC8INCw0LrRhtC10L3RgtC1INCy0YLQvtGA0L7Qs9C+INGC0L7QvdCwINGB0LvQtdCy0LAg0L3QsNC0INC70LXQs9C+0YfQvdC+0Lkg0LDRgNGC0LXRgNC40LXQuSwg0LAg0LfQsNGC0LXQvCDQuiAxMiDQs9C+0LTQsNC8INC/0YDQvtC40YHRhdC+0LTQuNGCINC+0L/Rj9GC0Ywg0LLRi9GA0LDQstC90LjQstCw0L3QuNC1INC4INC30LLRg9GH0L3QvtGB0YLRjCDRgdGC0LDQvdC+0LLQuNGC0YHRjyDRj9GA0YfQtSDRgSDQv9GA0LDQstC+0Lkg0YHRgtC+0YDQvtC90YssINGCLtC1INC90LDQtCDQsNC+0YDRgtC+0LkuINCi0LDQutC20LUg0LHQvtC70YzRiNC1INGDINC/0L7Qu9C+0LLQuNC90Ysg0LTQtdGC0LXQuSDQstC+INCy0YDQtdC80Y8g0LTQuNCw0YHRgtC+0LvRiyDQvNC+0LbQtdGCINCy0YvRgdC70YPRiNC40LLQsNGC0YzRgdGPINGC0LjRhdC40Lkg0Lgg0LrQvtGA0L7RgtC60LjQuSwg0LTQvtCx0LDQstC+0YfQvdGL0Lkg0YLRgNC10YLQuNC5INGC0L7QvS4g0J/QvtGP0LLQu9C10L3QuNC1INGN0YLQvtCz0L4g0YLQvtC90LAg0L7QsdGD0YHQu9Cw0LLQu9C40LLQsNC10YIg0YDQsNGB0YLRj9C20LXQvdC40LUg0LzRi9GI0LXRh9C90L7QuSDRgdGC0LXQvdC60Lgg0LbQtdC70YPQtNC+0YfQutC+0LIg0L/RgNC4INC/0L7RgdGC0YPQv9C70LXQvdC40Lgg0LrRgNC+0LLQuC4g0JTQsNC90L3Ri9C5INGC0L7QvSDQu9GD0YfRiNC1INCy0YHQtdCz0L4g0LLRi9GB0LvRg9GI0LjQstCw0LXRgtGB0Y8g0YMg0L/QvtC00YDQvtGB0YLQutC+0LIg0LIg0LPQvtGA0LjQt9C+0L3RgtCw0LvRjNC90L7QvCDQv9C+0LvQvtC20LXQvdC40Lgg0LIgNSAo0L/Rj9GC0L7QvCkg0LzQtdGB0YLQtSDQstGL0YHQu9GD0YjQuNCy0LDQvdC40Y8uINCY0L3QvtCz0LTQsCDQvNC+0LbQtdGCINCy0YvRgdC70YPRiNC40LLQsNGC0YzRgdGPINGB0LvQsNCx0YvQuSwg0YLQsNC60LbQtSDQtNC+0LHQsNCy0L7Rh9C90YvQuSDRh9C10YLQstC10YDRgtGL0Lkg0YLQvtC9LCDQutC+0YLQvtGA0YvQuSDRj9Cy0LvRj9C10YLRgdGPINC/0YDQtdC00YHQtdGA0LTQvdGL0LwsINGC0LDQuiDQutCw0Log0YHQstGP0LfQsNC9INGBINGB0L7QutGA0LDRidC10L3QuNC10Lwg0L/RgNC10LTRgdC10YDQtNC40LkuINCU0LDQvdC90YvQuSDRgtC+0L0g0LLRi9GB0LvRg9GI0LjQstCw0LXRgtGB0Y8g0LIg0LHQvtC70YzRiNC40L3RgdGC0LLQtSDRgdC70YPRh9Cw0LXQsiDRgyAg0LTQtdGC0LXQuS3RgdC/0L7RgNGC0YHQvNC10L3QvtCyLiDQktCw0LbQvdC+INC+0YLQvNC10YLQuNGC0Ywg0YLQsNC60LbQtSDQvdCw0LvQuNGH0LjQtSDRgyDQtNC10YLQtdC5INGA0LDQt9C00LLQvtC10L3QuNGPINC4INGA0LDRgdGJ0LXQv9C70LXQvdC40Y8g0YHQtdGA0LTQtdGH0L3Ri9GFINGC0L7QvdC+0LIuINCg0LDQt9C00LLQvtC10L3QuNC10Lwg0L3QsNC30YvQstCw0Y7RgiDQtNC10LvQtdC90LjQtSDRgtC+0L3QsCwg0LrQvtCz0LTQsCDQvNC10LbQtNGDINC60L7RgNC+0YLQutC40LzQuCDRgtC+0L3QsNC80Lgg0LjQvNC10LXRgtGB0Y8g0YfQtdGC0LrQviDQstGL0YHQu9GD0YjQuNCy0LDQtdC80LDRjyDQuCDQstGL0YDQsNC20LXQvdC90LDRjyDQv9Cw0YPQt9CwLCDRgtC+0LPQtNCwINC60LDQuiDRgNCw0YHRidC10L/Qu9C10L3QuNC1INGN0YLQviDQtNC10LvQtdC90LjQtSDRgtC+0L3QsCwg0LrQvtCz0LTQsCDRgtC+0L0g0YHQu9GL0YjQtdC9INC60LDQuiDQsdGD0LTRgtC+INCx0Ysg0LIg0LLQuNC00LUg0LTQstGD0YUg0YfQsNGB0YLQtdC5LCDQvdC+INC/0LDRg9C30Ysg0L/RgNC4INGN0YLQvtC8INC80LXQttC00YMg0L3QuNC80Lgg0L3QtdGCLiAgIA==</text:p>
          </table:table-cell>
          <table:table-cell office:value-type="float" office:value="170348" table:style-name="ce1">
            <text:p>170348</text:p>
          </table:table-cell>
          <table:table-cell office:value-type="float" office:value="87" table:style-name="ce1">
            <text:p>87</text:p>
          </table:table-cell>
          <table:table-cell office:value-type="string" table:style-name="ce1">
            <text:p>Согласно лиги честности, оценка снижена на 5%</text:p>
          </table:table-cell>
          <table:table-cell office:value-type="float" office:value="5" table:style-name="ce1">
            <text:p>5</text:p>
          </table:table-cell>
          <table:table-cell table:number-columns-repeated="16376"/>
        </table:table-row>
        <table:table-row table:style-name="ro1">
          <table:table-cell office:value-type="float" office:value="915031" table:style-name="ce1">
            <text:p>915031</text:p>
          </table:table-cell>
          <table:table-cell office:value-type="string" table:style-name="ce1">
            <text:p>english</text:p>
          </table:table-cell>
          <table:table-cell office:value-type="string" table:style-name="ce1">
            <text:p>Ticket 2&amp;lt;br /&amp;gt; 1.Subcutaneous fatty tissue in children in the first months of life is involved in non-contractile thermogenesis (heat production not related to muscle contraction), Due to the presence of what tissue in it does this occur? &amp;lt;br /&amp;gt; 2. What is the peculiarity of heart sounds in newborns and young children and how are they characterized?&amp;lt;br /&amp;gt;</text:p>
          </table:table-cell>
          <table:table-cell office:value-type="string" table:style-name="ce1">
            <text:p>c3ViY3V0ZW5lb3VzIGZhdHR5IHRpc3N1ZSBpbiB0aGUgY2hpbGRlcmVuIGluIHRoZSBmaXJzdCBtb250aCBvZiB0aGUgbGlmZSBpcyBpcyBpbnZvbHZlZCBub24gY29udGFjdGlsZSB0aGVybW9nZW5lc2lzIChoZWF0IHByb2R1Y3Rpb2luIG5vdCByZWxlYXRlZCB0byBtdXNjbGUgY29udHJhY3Rpb24gKSBiZWNvdXNlIHRoZSBuZXdib3JuIGJhYnkgaGFzIGEgbm90IGRldmVsb3BtZW50IHByb3BlcmxseSBuZXJ2ZSBhbmQgdGhleXQgbm90IGNvbnRyb2xlIG91ZSByZXNvcHNlIGFuZCB0aGUgc3ViY3V0ZW5pb3VzIGZhdHR5IHRpc3NlIGFyZSBub3QgcHJvcGVyIGRldmVsb3BtZW50IGFuZCB0aGV5IGFyZSBub3QgY29udHJvbGUgb3V2ZXIgc3ViY3V0ZW5lb3VzIGZldHR5IHRpc3NlIHN1bmN1dGVuaW91cyBmYXR0eSBhcmUgYSBwYXJ0IG9mIGJvZHkgdGhleSBhcmUgd29yayBtdXNjbGUgY29udHJhY3Rpb24gYW5kIHBlcmlwaGFyYWwgb3JnYW5zIGNvbnRyYWN0aW9uIGFuZCB3b3JrIG9uIHRoZSBwaHlzaWNhbCBhY3Rpdml0eSBmYXR0eSB0aXNzdWUgaW4gdGhlIGZpcnN0IG1vbnRoIG9mIHRoZSBsaWZlIGlzIGludm9sdmUgaW4gbm9uIGNudHJhY3RpbGUgdGhlcm1vZ2VuZXNpcyB0aGUgbmV3Ym9ybiBiYWJ5IGFyZSBub3QgY2FwYWJsZSBmb3IgdGhlIGhlYXQgcHJvZHVjdGlvbiBhbmQgbXVzY2xlIGNvbnRyYWN0aW9uIGJlY291c2UgaW4gbmV3Ym9ybiBiYWJ5IG5vdCBoYXZlIGRldmVsb3BtZW50IHN1YmNvbnNpb3VzIHN1YmN1dGVuaW91cyBtdXNjbGUgYW5kIGRvbnQgaGF2ZSB0aGUgZnVsbHkgZGV2ZWxvcG1lbnQgb2YgdGhlIGJyYWluIGFuZCBwYXJjdGlhbGx5IGxlc3MgYWN0aXZpdHkgb2YgYm9keSBhbmQgbGVzcyBsZXNzIG1vdGFib2xpYyByYXRlIGJlY291c2UgdGhleSBoYXZlIG5vdCBwcm9wZXJseSB0aGVyZSBib2R5IG9yZ2Fucy4gc28gbmV3Ym9ybiBiYWJ5IGNhbm5vdCBjYXBhYmxlIGZvciB0aGUgaGVhdCBwcm9kdWN0aW9uIGFuZCBtdXNjbGUgY29udHJhY3Rpb24uIGluIG5ldyBib3JuIGJhYnkgbm90IGRldmVsb3BtZW50IHRoZSBzdXBlcmZpY2lhbCBmYWNpYSBhbmQgZGVlcCBmYWNpYSB0aGV5IGFyZSB3b3JrIG9uIHRoZSBib2R5IGNvbnRyYWN0aW9uIGFuZCBhbmQgcGh5c2ljYWwgYWN0aXZpdHkgb2YgdGhlIGJvZHkgc28gbm90IGEgYWN0aXZpdHkgYm9keSBjYW5ub3QgaGVhdCBwcm9kdWN0aW9uIFNVQiBDVVRFTklPVVMgRkFUVFkgVElTU1VFIEFGVEVSIERFVkVMT1BNRU5UIENPTlZFUlQgIFRIRSBNVVNDTEUgLiAyLiAgVEhFIFBFQ1VMSUFSSVRZIE9GIFRIRSBIRUFSVCBTT1VORCBJTiBORVdCT1JOUyBBTkQgWU9VTkcgQ0hJTERFUk5OIC4gSU4gTkVXQk9STiBCQUJZIEFORCBZT1VORyBDSElMRFJFQU4gVEhFUkUgSEVBUlQgQVJFIFNPTUUgU0FNRSBTT1VORCBCVVQgSU4gTkVXIEJPUk4gQkFCWSBIRUFSVCBBUkUgQSBOT1QgUFJPUEVSIERFVkVMT1BORU5UVCBBVCBUSEUgQklSVEhUSU1FIElOIE5FV0JPUk4gQkFCWSBIRUFSVCBIQVZFIEZPUkFNRU4gT1ZBTEUuIEZPUkFNRU4gT1ZBTEUgSVMgQSBIRUFSVCBWQUxWRSBJTiBUSEUgUklHSFQgQVRFUklZQSBUTyBMRUZUIEFURVJJWUEgVEhJUyBJUyBXT1JLIEZPUiBERUNSRUFTRSBUSEUgSEVBUlQgTE9BRCBNQUlOTFkgSEVBUlQgU09VTkQgR0VOUkFURSBCWSBUSEUgSEVBUlQgVkFMVkUgQ0xPU0UgT1IgT1BFTkUgQVQgVEhFIFRJTUUgT0YgU1lTVE9MRSBBTkQgRFlTVE9MRS4gSU4gTkVXIEJPUk4gSEFWRS4gUFVMTU9OQVJZIEFORCBBUk9UQSBDT05ORVRJT04gSU4gTkVXIEJPUk4gQ0hJTERFUiBIRUFSVCBJUyBTQU1BTEwgREVQRU5EIFRIRSBCT0RZIFNJWkUgQU5EIE5FV0JPUk4gQkFCWSBIRUFSVCBSQVRFIEFSRUUgSElHSCBDT1BSRVNJT04gSU4gWU9VTkcgQ0hJTERFUk4gKDAtMjggREFZICkgSEVSVCBSQVRFIElTIDEyMCBUTyAxNjBicG0gQU5EICgxLTEyIE1PTlRIKSB0aGUgaGVhcnQgcmF0ZSBpcyBhIDEwMC0xNTBicG0uIHdoZW4gY2hpbGRlcm4gYXJlIGRldmxvcG1lbnQgaGVhcnQgYXJlIGRlY3JlYXNlc2UuIGluIHlvdW5nIGNoaWxkZXJuIGhlYXJ0IGFyZSBkZXZlbG9wbWVudCBzbyBhdCB0aGUgc3lzdG9saWMgdGltZSBhbmQgZHlzdG9saWMgdGltZSBoZWFydCBzb3VuZCBhcmUgYSBkZWZyZW50IGJyY291c2UgdGhlIHlvdW5nIGNoaWxkZXJuIGhlcmF0IGlzIGRldmVscCBhbmQgaGVhcnQgdmFsdmUgYXJlIHByb3Blcmx5IHdvcmsgIGFuZCBjbG9zZSB0aGUgZm9yYW1lbiBvdmFsZSBhbmQgcHVsbW9uYXJ5IGFuZCBhcm90aWMgc2Vub3NpcyBhcmUgY2xvc2UuIGluIHlvdW5nIGNoaWxkZXJuIGhlYXJ0IHNvdW5kIGlzIGEgbGlrZSBsYWJkdWIudGhlIGx1YmR1YiBzb3VuZCBpcyBnZW5yYXRlIGF0IHRoZSB0aW1lIG9mIGhlcnQgdmFsdmUgY2xvc2UgLiAxLiBoaWdlciBwaXRoY2ggYW5kIGludGVuc2ljdHkuIGR1ZSB0byB0aGluIGNoZXN0IHdhbGwgMi4gZmFzdGVyIGhlYXJ0IHJhdGUuIGFjY2V0dWF0ZWQgc2Vjb3VuZCBoZWFydCBzb3VuZCBzMiBwdWxtb25hZXJ5IGNvbXBvbmVudCBwMiBvZnRlbiBsb3dkZXIgcGh5c2lsb2dpY2FsIHNwbGl0aW5nIG9mIHMyIElOIFlPVU5HIENISUxERVJOLSAxLCBJTk5PQ0VOVCBNVVJNT1IgQVJFIENPTU1FTiBBTkQgT0ZURU4gQkVJTkcgMiwgVEhJUkQgSEVSQVQgU09VTkQgQ0FOIEJFIE5PUk1BTCBWRU5UUklDVUxBUiBGSUxMSU5HLiA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104" table:style-name="ce1">
            <text:p>915104</text:p>
          </table:table-cell>
          <table:table-cell office:value-type="string" table:style-name="ce1">
            <text:p>english</text:p>
          </table:table-cell>
          <table:table-cell office:value-type="string" table:style-name="ce1">
            <text:p>Ticket 2&amp;lt;br /&amp;gt; 1.Subcutaneous fatty tissue in children in the first months of life is involved in non-contractile thermogenesis (heat production not related to muscle contraction), Due to the presence of what tissue in it does this occur? &amp;lt;br /&amp;gt; 2. What is the peculiarity of heart sounds in newborns and young children and how are they characterized?&amp;lt;br /&amp;gt;</text:p>
          </table:table-cell>
          <table:table-cell office:value-type="string" table:style-name="ce1">
            <text:p>c3ViIGN1dGVhbmlvdXMgZmF0dHkgdGlzc3VlIGluIGZpcnN0IG1vbnRoIGlzIGR1ZSB0byBwcmVzZW5jZSBvZiBhZGlwb3NlIHRpc3N1ZSB0aGVyZSBhcmUgdHdvIHR5cGVzIG9mIGFkaXBvc2UgdGlzc3VlIGZpcnN0IGlzIHdoaXRlIGZhdCBhbmQgc2Vjb25kIGlzIGJyb3duIGZhdCB0aGVzZSBib3RoIGZhdHMgc3RvcmVzIHRoZSBlbmVyZ3kgaW4gdGhlIGJvZHkgYnJvd24gZmF0IGlzIG1ldGFib2xpY3R5IGFjdGl2ZSBhbmQgaGVscHMgaW4gbm9uIHNldmVyaW5nIHRoZXJtb3JlZ3VsYXRpb24udGhlcm1vcmVndWxhdGlvbiBpcyBhIHByb2Nlc3MgYnkgd2hpY2ggdGhlIGJvZHkgbWFpbnRhaW5zIGl0cyB0ZW1wcmF0dXJlIGJ5IGdlbmVyYXRpbmcgaGVhdCBidXQgaW4gbmV3IGJvcm4gdGhlcnNlIGlzIG5vbiBzZXZlcmluZyB0aGVybW9yZWd1bGF0aW9uIGluIHRoaXMgdGhlIGhlYXQgd2lsbCBiZSBwcm9kdWNlIGJ1dCB0aGUgbXVzY2xlcyBhcmUgbm90IGNvbnRyYWN0LnRoZSBwcm93biBmYXQgaGF2ZSBlbm91Z2ggaGVhdCB0byBwcm9kdWNlIGhlYXQgaW4gdGhlIG5ldyBib3JuIGFuZCBpdCBoYXZlIG1vcmUgbnVtYmVyIG9mIG1pdG9jaG9uZHJpYSBieSB3aGljaCBpdCBhYXBlcnMgYnJvd24gYW5kIHRoZXkgYWxzbyByZXNwb25zaWJhbCBmb3IgaGVhdCBwcm9kdWN0aW9uIC4gbWl0b2Nob25kcmlhIGluIHRoZSBicm93biBmYXQgY29udGFpbiBhIHByb3RpZW4gd2hpY2ggaXMga25vd24gYXMgdGhlcm1vZ2VuaW5lIGl0IGlzIGEgdW5jb3VwbGluZyBwcm90aWVuIC5pdCBkbyB1bmNvdXBsaW5nIG9mIG94aWRhdGl2ZSBwaG9zcG9yeWxhdGlvbiBieSB3aGljaCB0aGVyZSBpcyBvbmx5IHByb2R1Y3Rpb24gb2YgdGhlIGhlYXQgaGVlcGVucyBub3QgdGhlIGF0cC5uZXdib3JuIG5vdCBkbyBzaGV2ZXJpbmcgbGlrZSB0aGUgYWR1bHRzIHNvIGJyb3duIGZhdCBpcyBlc3NlbnRpYWwgZm9yIHRoZSBwcm9kdWN0aW9uIG9mIGhlYXQgYW5kIG1haW50YWluIHRoZSB0ZW1wcmF0dXJlIG9mIGJhYnkgdGhlIGJyb3duIGZhdCBpcyBsb2NhdGVkIGF0IHRoZSBuZWNrIGFyZWEgLHNob3VsZGVyIGFyZWEgYW5kIGFyb3VuZCB0aGUgaGVhcnQgLGtpZG5leSBhbmQgbGl2ZXIgLnNlY29uZCBxdWVzdGlvbiBpcyB0aGUgaGVhcnQgc291bmQgaW4gY2hpbGRyZW4gaXMgbGVhc3QgZGlzdGljdC4gdGhlIHRoaW4gY2hlYXQgd2FsbCBhbmQgdGhlIHN1YmN1dGVhbm91cyB0aXNzdWUgbWFrZSB0aGUgaGVhcnQgc291bmQgbGVzcyBjbGVhci4gZHVlIHRvIHRoZSBoaWdoZXIgcmF0ZSBvZiBoZWFydCBiZWF0IG9yIGhlYXJ0IHJhdGUgd2hpY2ggaXMgYXJvdW5kIDEyMCB0byAxNjAgYmVhdHMgcGVyIG1pbml0dWUgYnkgd2hpY2ggaGVhcnQgc291bmQgaXMgbW9yZSByYXBpZGx5IGFuZCBpbnRlbnNlIC5zeXN0b2xpYyBtdXJtZXJpbiBjaGlsZHJlbiBpcyBmdW5jdGlvbmFsIG11cm11ciBpdCBpcyAgY29tbW9uIGluIHRoZSBjaGlsZHJlbiBhbmQgdGhpcyBpcyBoYXBwZW4gZHVlIHJhcGlkIGZsb3cgb2YgYmxvb2QgYWNyb3NzIHRoZSBkZXZlbG9waW5nIGhlYXJ0IHZhbHZlIC50aGUgc3BsaXQgaGVhcnQgc291bmQgaW4gdGhlIG5ldyBib3JuIGFsc28ga25vd24gYXMgUzIgb3Igc2Vjb25kIGhlYXJ0IHNvdW5kIG1heSBiZSBoZWFyZCBkdWUgdG8gZGVsYXkgY2xvdXNlciBvZiBwdWxvbW9uYXJ5IHZhbHZlIHRoaXMgaXMgYWxzbyBub3JtYWwudGhlIG5ldyBib3JuIGdyb3dzIHVwIHRoZSBjaGVhdCB3YWxsIHRoaWNrbmVzcyBhbmQgaGVhcnQgcmF0ZSBkZWNyZWFzZXMgbWFrZXMgdGhlIGhlYXJ0IHNvdW5kIG1vcmUgY2xlYXIgYXMgY29tcGFyZSB0byBud2Vib3JuLm11cm11ciA=</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343" table:style-name="ce1">
            <text:p>915343</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INCf0YDQvtGC0LXQvtC70LjRgtGC0LjQutCw0LvRi9C6ICDRhNC10YDQvNC10L3RgtGC0LXRgCDQtdGA0LXRgdC10LrRgtC10YDQs9C1INC60LDRgNCw0LPQsNC90LTQsCDQsdCw0LvQsNC70LDRgNC00LAg0LXRgNC10LrRiNC10LvRltC60LrQtSDQuNC1LiDQn9GA0L7RgtC10L7Qu9C40YLQuNC60LDQu9GL0LogINGE0LXRgNC80LXQvdGC0YLQtdGAINCx0LXQu9C+0LrRgtCw0YDQtNGL0L0g0YvQtNGL0YDQsNGD0YvQvSDQutCw0LzRgtCw0LzRgdGL0Lcg0LXRgtC10LTRliwg0LbQsNC90LUg0L7Qu9Cw0YAg0YLRg9GA0LvQuCDQvNC10YLQsNCx0L7Qu9C40LrQsNC70YvQuiDQv9GA0L7RhtC10YHRgtC10YDQs9C1INC60LDRgtGL0YHQsNC00YsuICDQkNGB0LrQvtGA0YvRgtGDINGC0LjQvdC00LXRgNC40L3QuNC9INC60LDQudGC0LAg0LrRg9GA0YvQu9GD0Ysg0LbQsNC90LUg0LjQvNC80YPQvdC00YvQuiDQttGD0LnQtSDQtNC1INC80LDQvdGL0LfQtNGLINGE0LjQt9C40L7Qu9C+0LPQuNGP0LvRi9C6INGA0L7QuyDQsNGC0LrQsNGA0LDQtNGLLiDQmtGW0YjQutC10L3RgtCw0Lkg0LHQsNC70LDQu9Cw0YDQtNCwINCx0YPQuyDRhNC10YDQvNC10L3RgtGC0LXRgNC00ZbSoyDQsdC10LvQs9GW0LvRliDQsdGW0YAg0LTQsNC80YMg0LrQtdC30LXQvdC00LXRgNC4INGO0LHQsNGALiDQvtC70LDRgNC00YvQvSDRgdC40L3RgtC10LfQtNC10LvRg9GWINCw0L3RgtC10L3QsNGC0LDQu9GM0LTRi9C6INC60LXQt9C10L3QtNC1INCx0LDRgdGC0LDQu9Cw0LTRiy7QvtC70LDRgNC00YvQvSDQsdC10LvRgdC10L3QtNGW0LvRltCz0ZYg0YPQu9C60LXQvdC00LXRgNCz0LUg0LrQsNGA0LPQsNC90LTQsCDRgtC+0LzQtdC9LiDQkdCj0Lsg0LDRgdC60L7RgNGL0YLRgyDQttGD0LnQtdGB0ZbQvdGW0L0g0YLQvtC70YvQuiDQttC10YLQuNC70LzQtdGD0LjQvdC1INCx0LDQudC70LDQvdGL0YHRgtGLLiAg0J/QoNCe0YLQtdC+0LvQuNGC0LjQutCw0LvRi9C6ICDRhNC10YDQvNC10L3RgtGC0LXRgCDQntCb0JDQoNCT0JAgLSAxLtCf0JXQn9Ch0JjQvSDQsNGB0LrQsNC30LDQvdGL0L3QvdC90YvQvSDRiNGL0YDRi9GI0YLRiyDQutCw0LHQsNGC0YvQvdC00LAg0L7QvdC00LjRgNC40LvQtdC00LgsINCw0LrRg9GL0LfQtNCw0YDQtNGL0L0g0LHQsNGB0YLQsNC/0LrRiyDRgdCw0YLRi9C00LDSk9GLINGL0LTRi9GA0LDRg9GL0L3QsCDQutCw0YLRi9GB0LDQtNGLLiAgMi7RgtGA0LjQv9GB0LjQvSDQvNC10L0g0YXQuNC80L7RgtGA0LjQv9GB0LjQvSDRg9C50LrRiyDQsdC10LfQuNC90LTQtSDQvtC90LTQuNGA0LjQu9C40L8g0LHQtdC70L7QutGC0LDRgNC00Ysg0LrQuNGI0Lgg0L/QtdC/0YLQuNC00YLRgtC10YAg0LzQtdC9INCw0LzQuNC90LrRi9GI0LrRi9C70LTQsNGA0YvQvdCwINC00LXQudC9INGL0LTRi9GA0LDRgtCw0LTRiy4zLtC60LDRgNCx0L7QutGB0LjQv9C10L/RgtC40LTQsNC30LAg0LDQvNC40L3QutGL0YjQutGL0LvQtNCw0YDRi9C9INGI0YvQs9Cw0YDRgyDRg9GI0LjQvSAg0L/QtdC/0YLQuNC00YLQtdGA0LTQuCDQs9C40LTRgNC+0LvQuNC30LTQtdC50LTQuC4gPGJyIC8+DQrQu9C40L/QsNC30LAg0LzQtdC9INCw0LzQuNC70LDQt9CwINC80LDQuSDQvNC10L0g0LrQvtC80LjRgNGB0YPQtNGLINGL0LTRi9GA0LDRgtGD0LPQsCDQutCw0LrRgtGL0YHQsNC00Ysu0KTQtdGA0LzQtdC90YLRgtC10YDQtNGW0qMg0LTQtdC90LPQtdC50ZYg0LzQtdC9INC60YvQt9C80LXRgtGWINCx0LDRgdGC0LDQv9C60Ysg0YPQsNC60YLRgtCwINC00LDQvNGD0YvQvdGL0L0g0LDQu9Cz0LDRiNC60Ysg0LrQtdC30LXQvdC00LXRgNC40L3QtNC1INGC0L7QvNC10L0g0LHQvtC70YPRiyDQvNGD0LzQutC40L0g0LHQuNGA0LDQuiDRg9Cw0LrRi9GCINC+0YLQtSDQutC10LvQtSDQsNGB0LrQvtGA0YvRgtGDINC20YPQudC10YHRltC90ZbQvSDRgtC+0LvRi9C6INC60LDQu9GL0L/RgtCw0YHRg9GL0L3QsCDQutCw0YDQsNC5INC+0LvQsNGA0LTRi9C9INCx0LXQu9GB0LXQvdC00LjQu9C40LPQuCDQttC+0LPQsNGA0LvQsNC50LTRiy48YnIgLz4NCiAyINGB0YPRgNCw0LogIDxiciAvPg0KMTAg0LbQsNGB0LDRgCDQsdCw0LvQsCDRltGI0ZbQvdGW0qMgLNCx0LDRgdGL0L3Ri9C9INCw0YPRi9GA0YPRiywg0YjQvtC70LTQtdGDLCDQvdC10YHQtdC/INGI0YvQs9Cw0YDRgyDQttC40ZbTmdC70LXRgywg0YLQsNCx0LXRgtC4INC20L7Qs9Cw0YDRiyDRiNCw0LPRi9C80LTQsNC90LPQsNC9LiDQttCw0LvQv9GLINGB0LjQvNC/0L7QvNC00LDRgNGLINC00LjQsNCx0LXRgtGC0LjQvSDQsdCw0YAg0LXQutC10L3QuNC9INCx0LjQu9C00LjRgNC10LTQuC4gIDxiciAvPg0K0JHQtdC70L7QutGC0YvQvSDQsdC+0LvRg9GLMCw50L/QsNC50YvQtyDQt9OZ0YDQtNC1INCx0LXQu9C+0Log0LHQvtC70YPRiyAg0LHRg9C50YDQtdC6INC60YvQt9C80LXRgtGW0L3RltKjINCx0YPQt9GL0LvRg9GL0L0g0LrQvtGA0YHQtdGC0LXQtNGWLiDQlNC40LDQsdC10YLQutC1INCx0LDQudC70LDQvdGL0YHRgtGLINCx0YPQudGA0LXQuiDQutGL0LfQvNC10YLRltC90ZbSoyDQvdCw0YjQsNGA0LvQsNGD0Ysg05nRgdGW0YDQtdGB0LUg0L3QtdGE0YDQvtC/0LDRgtC40Y/QvdGL0L0g0LHQtdC70LPQuNC70LXRgNC40L0g0LrQvtGA0YHQtdGC0YPRliDQvNGD0LzQutC40L0gLtCc0JXQvdGI0LjQutGC0Lgg0YHQsNC70LzQsNC6IDEwMzUg0LrQsNC70YvQv9GC0Ysg0LTQuNC/0LDQt9C+0L3QtNCwICwg0LHQuNGA0LDQuiDQutCw0L3RgiDQtNC40LDQsdC10YLQuCDQutC10LfQuNC90LTQtSDQt9Cw0YAg0YHQsNC70LzQsNCz0Ysg0L7Qt9Cz0LXRgNGD0Lgg0LzRg9C80LrQuNC9ICwgINCb0LXQudC60L7RhtC40YLRgtC10YAg0L3QvtGA0LzQsNC00LAg0Y/Qs9C90Lgg0LrQsNCx0YvQvdGDINC20L7QuiAuINGG0LjQu9C40L3QtNGA0LvQtdGA0LTQvSDQutC+0L8g0LHQvtC70YPRiyDQsdGD0LnRgNC10Log0YLRltC90LTQtdGA0ZbQvdGW0L0g0LfQsNC60YvQvNC00LDQvdGD0YvQvSDQttOZ0L3QtSDQuNC90YTQtdC60YbQuNGPINCx0LDRgNGL0L0g0LHQuNC70LTQuNGA0LXQtNC4LiDQkdGD0Lsg0LTQuNCw0LHQtdGCINC20LDQvdC1INC+0L3Ri9C9INCw0YHQutGL0L3Rg9C70LDRgNGLINC60LXQt9GW0L3QtNC1INC60L7RgNC40L3QtdGC0LjQvSDQsdC10LvQs9C40L3QuCDQsdC40LvQtNC40YDQtdC00LguINCa0JXRgtC+0L0g0LTQtdC90L3QtdC70LXRgNGWINGC0L7QttC1INC20L7Qs9Cw0YDRiyDRj9Cz0L3QuCDQsdGD0Lsg0LXQvSDQvNCw0L3Ri9C30LTRiyDQutC+0YDRgdC10YLQutC40YguINCa0LXRgtC+0L0g0LTQtdC90LXQu9C10YDRltC90ZbQvSDQutC+0L8g0LHQvtC70YPRiyDQsNCz0LfQsCDRjdC90LXRgNCz0LjRjyDRg9GI0LjQvSDQvNCw0LnQtNGLINC/0LDQudC00LDQu9Cw0L3QsNC00YsgLiDQkdGD0Lsg0LTQuNCw0LHQtdGC0YLQuNC6INC60LXRgtC+0LDRhtC40LTQvtC30LTRi9C9INCx0LXQu9Cz0LjRgdC4INCx0L7Qu9GL0L8g0YLQsNCx0YvQu9Cw0LTRiy4g0JrQkNCd0KIgNyDQv9Cw0LnRi9C3ICAg0LTQtdC90LPQtdC50ZbQvdC00LUg0LbQvtCz0LDRgNGLINC00LXQvdCz0LXQudC00LUgLCDQutCw0L3RgiDQtNC40LDQsdC10YLQuCDQsdCw0YAg0LHQsNC70LDQu9Cw0YDQtNGL0L0g0LrQsNC90YIg0LTQtdC90LPQtdC50ZYg0LbQvtCz0LDRgNGLINCx0L7Qu9GD0Ysg0YLTmdC9IC7QkdCj0LvRgiDQtNC40LDQsdC10YLRgtC40L0g0L3QsNGI0LDRgCDQsdCw0LrRi9C70LDQvdCz0LDQvdGL0L0g0L3QtSDQtNC40LDQsdC10YLQuNC60LDQu9GL0Log0LrQtdGC0L7QsNGG0LjQtNC+0LfQtNGLINC60L7RgNGB0LXRgtC10LTRli4g0KLRg9GB0LjQvdC00LjRgNC80LUtINC30LDRgNC00LUg0LHQtdC70L7QutGC0YvQvSAsINC60LXRgtC+0L0g0LTQtdC90LXQu9C10YDRltC90qMsINC60LDQvdGC0YLRi9C9INC20L7Qs9Cw0YDRiyDQtNC10L3Qs9C10LnQtNC1INCx0L7Qu9GD0Ysg0LTQuNCw0LHQtdGC0LjQutCw0LvRi9KbINC60LXRgtC+0LDRhtC40LTQvtC30LTRi9C9INCx0LXQu9Cz0LjRgdC4INCx0L7Qu9GD0Ysg0LzRg9C80LrQuNC9LiDQkdGD0Lsg0LHQsNC70LDQu9Cw0YDQtNGLINC60LDQvdGCINC00LjQsNCx0LXRgtC40L3QuNC9INCw0YHQutGL0L3Rg9GLINGA0LXRgtC40L3QtNC1INC20LjRliDQutC+0YDQuNC90LXQtNC4LCDQmtC10YLQvtC9INC00LXQvdC10LvQtdGA0ZYg0LzQtdC9INC60LDQvdGC0YLRi9C9INC20L7Qs9Cw0YDRiyDQsdC+0LvRg9GLINCw0LPQt9Cw0L3Ri9C9INGN0L3QtdGA0LPQuNGPINC/0LDQudC00LDQu9Cw0L3Rg9GGINGD0YjQuNC9INC80LDQudC00Ysg0L/QsNC50LTQsNC70LDQvdGL0L8g0LbQsNGC0LrQsNC90YvQvdC90Ysg0LHQtdC70LPQuNGB0LguINCR0KPQuyDQs9C40L/QtdGA0LPQuNC60LXQvNC40Y8g0L3QtSDQvNC10YLQsNCx0L7Qu9C40LrQsNC70YvQuiDQsNGG0LjQtNC+0LfQtNGLINC60L7RgNGB0LXRgtC10LTRli7QlNC40LDQsdC10YLQuNC60LDQu9GL0Log0LrQtdGC0L7QsNGG0LjQtNC+0Lcg0LHRltGD0Lsg0YLQvtGC0LXQvdGI0LUg0LbQsNCz0LTQsNC5INC20LDQvdC1INGC0LXQtyDQutC+0LzQtdC6INC60LDQttC10YIg0LXRgtC10LTQuC7QmtC+0YDRi9GC0YvQvdC00YvQu9Cw0Lkg0LrQtdC70LUg0LrQsNC90YIg0LTQuNCw0LHQtdGC0LjQvdC40L0g0LDRgdC60YvQvdCz0LDQvSDRgtGD0YDQuCDQtNC40LDQsdC10YLQuNC60LDQu9GL0Log0LrQtdGC0L7QsNGG0LjQtNC+0Lcg0LHQvtC70YPRiyDQvNGD0LzQutC40L0uIDxiciAvPg0K</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1-ші сұрақтың жауабы толық емес, басты химозин мен гастриксин ферменттерінің басымдылығы жазылмаған. 2-ші сұрақта- Жалпы зәр анализын интерпретацияланыз, сұралған.Яғни, протеиурия бүйректегі базальды мембрананың зақымдалуынан болып жатқанын, глюкозурия- нефронның қай бөлігінде реабсорбция бұзылысы болып тұрғанын нақты жазу керек. Болжамды диагноз сұралып тұрған жоқ</text:p>
          </table:table-cell>
          <table:table-cell office:value-type="float" office:value="0" table:style-name="ce1">
            <text:p>0</text:p>
          </table:table-cell>
          <table:table-cell table:number-columns-repeated="16376"/>
        </table:table-row>
        <table:table-row table:style-name="ro1">
          <table:table-cell office:value-type="float" office:value="1066860" table:style-name="ce1">
            <text:p>1066860</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MS7Qn9Cg0L7RgtC10L7Qu9C40YLQuNC60LDQu9GL0psg0YLRhNC10YDQvNC10L3RgtGC0LXRgCDTmdGA0YLRg9GA0LvRiyAg0YTQuNC30LjQvtC70L7Qs9C40Y/Qu9GL0psg0L/RgNC+0YbQtdGB0YHRgtC10YDQtNC1INC80LDQvdGL0LfQtNGLINGA06nQuyDQsNGC0LrQsNGA0LDRgtGL0L3RiyDQsdC10LvQs9GW0LvRli4g0JzRi9GB0LDQu9GLOiDQsNC60YPRi9C30LTQsNGA0LTRi9C9INC00LXQs9GA0LDQtNCw0YbQuNGP0YHRiy4g0LDQutGD0YvQt9C00LDRgNC00Ysg0YLRgNCw0L3RgdC70Y/RhtC40Y/QtNCw0L0g0LrQtdC50ZbQvdCz0ZYg06nQvdC00LXRgyDRjtC10LvRgdC10L3QtNC1INC10LzQtdGBINC/0YDQtdC00YjQtdGB0YLQstC10L3QvdC40LrRgtC10YDQtNGWINCx0LXQu9GB0LXQvdC00ZbRgNGDLiDRgdC10LrRgNC10YbQuNGPLCDRgtCw0YHRi9C80LDQu9C00LDRgywg0LbQsNGB0YPRiNCwINC80LXRgtCw0LHQvtC70LjQt9C80ZbQvSDRgdGL0YDRgtKb0Ysg0L7RgNGC0LDQvdGL0qMg06nQt9Cz0LXRgNGD0ZbQvdC1INCx0LXQudGW0LzQtNC10YMsINOp0L7RgCzQsNC90YvRgSDRhNGD0L3QutGG0LjRj9C70LDRgNGL0L0g0LbRg9C30LXQs9C1INCw0YHRg9GAINGB0LXQutGW0LvQtNGWINCx0ZbRgCDSm9Cw0YLQsNGAINC/0YDQvtGG0LXRgdGB0YLQtdGA0LPQtSDQutCw0YLRi9GB0LDQtNGLLiDQmtGW0YjQutC10L3RgtCw0Lkg0LHQsNC70LDQu9Cw0YDQtNGL0qMg0LDRgSDSm9C+0YDRi9GC0YMg0LbSr9C50LXRgdGWINGC0L7Qu9GL0psg0LbQtdGC0ZbQu9C80LXQs9C10L0g0YHQvtC90LTRi9Kb0YLQsNC9INC+0LvQsNGA0LTRi9KjINCw0pvRg9GL0LfQtNGLINGL0LTRi9GA0LDRgtCw0YLRi9C9INC/0YDQvtGC0LXQvtC70LjQt9C00ZbQuiDRhNC10YDQvNC10L3RgtGC0LXRgNC00ZbSoyDQtdGA0LXQutGI0LXQu9GW0LrRgtC10YDRltC80LXQvSDRgdC40L/QsNGC0YLQsNC70LDQtNGLLiDQkdKx0Lsg0YTQtdGA0LzQtdC90YLRgtC10YAg0LDRgSDQutC+0YDRi9GC0YMsINGC0ZbQvdC00LXRgNC00ZbQvSDQutCw0LnRgtCwINKb0rHRgNGL0LvRgywg0LbTmdC90LUg0LjQvNC80YPQvdC00YvSmyDQttKv0LnQtdGB0ZbQvdGW0qMg0LrRi9C30LzQtdGC0ZYg0YHQuNGP0pvRgtGLINOZ0YDRgtKv0YDQu9GWINGE0LjQt9C40L7Qu9C+0LPQuNGP0LvRi9KbINC/0YDQvtGG0YbQtdGB0LXRgtC10YDQtNC1INC80LDQvdGL0LfQtNGLINC60YvQt9C80LXRgiDQsNGC0LrQsNGA0LDQtNGLLtCe0LvQsNGAINCw0YHSm9Cw0LfQsNC9INKx0LnSm9GLINCx0LXQt9GWINC205nQvdC1INGW0YjQtdC60YLQtSDQsdOp0LvRltC90LXRgtGW0L0g0LHQvtC70YvQvyDQutC10LvQtdC00ZYuINCa0ZbRiNC60LXQvdGC0LDQuSDQsdCw0LvQsNC70LDRgNC00LAg0LrQtdC30LTQtdGB0LXRgtGW0L0g0LrQtdC50LHRi9GAINC/0YDQvtGC0LXQvtC70LjRgtC40LrQsNC70YvSmyDRhNC10YDQvNC10L3RgtGC0LXRgNCz0LUg0LzRi9C90LDQu9Cw0YAg0LbQsNGC0LDQtNGLOiDQkNCh0pvQsNC30LDQvdC90YvSoyDRhNC10YDQvNC10L3RgtGC0LXRgNGWOyDQn9C10L/RgdC40L0t0LHQtdC70L7QutGC0LDRgNC00Ysg0L/QtdC/0YLQuNC00YLQtdGA0LPQtSDQtNC10LnTmdC9INGL0LTRi9GA0L/QsNGC0YMg0LrRi9C30LzQtdGC0ZbQvSDQsNGC0LrQsNGA0LDQtNGLLtCf0LXQv9GB0LjQvdC+0LPQtdC9INGC0q/RgNGW0L3QtNC1INCx06nQu9GW0L3QtdC00ZbQtNC1INGC0rHQtyDSm9GL0YjSm9GL0LvRi9C80LXQvSDTmdGA0LXQutGC0YLQtdGB0YMg0YHQsNC70LTQsNGA0YvQvdCw0L0g0LHQtdC70YHQtdC90LTRiyDQv9C10L/RgdC40L3Qs9C1INCw0LnQvdCw0LvQsNC00Yss0L3QtdCz0YvQt9GL0L3QtdC9INGB0YPRgiDQsdC10LvQvtCz0YvQvSDRi9C00YvRgNCw0YLRg9KT0LAg0L3QtdCz0ZbQt9C00LXQu9Cz0LXQvSDRj9KT0L3QuCDRgdC+0pPQsNC9INC606nQvNC10LrRgtC10YHQtdC00ZYuINCg0LXQvdC90LjQvSAv0YXQuNC80L7Qt9C40L0gOyDRgdGD0YIg0LHQtdC70L7Qs9GL0L0g0LrQsNC30LXQuNC90LTRliDRg9C50YvRgtGL0L8sINC+0L3RiyDQv9C10L/RgdC40L3Qs9C1INGL0LTRi9GA0LDRgtGD0pPQsCDQtNCw0LnRi9C90LTQsNC50LTRiy4g0JHSsdC7INGE0LXRgNC80LXQvdGC0YLRltKjINC10YDQtdC60YjQtdC70ZbQs9GWINC+0L3Ri9KjINCx0LXQu9GB0LXQvdC00ZbQu9GW0LPRliDRgtC10Log0LHQsNC70LDQu9Cw0YDQtNCwINC20L7Sk9Cw0YDRiywg0LDQuyDQtdGA0LXRgdC10LrRgtC10YDQtNC1INC60LXQt9C00LXRgdC/0LXQudC00ZYuINKw0JnSmtCrINCR0JXQl9CG0J3QhtKiINCk0JXQoNCc0JXQndCi0KLQldCg0IY7INCi0KDQmNCf0KHQmNCdLSDQv9C+0LvQuNC/0LXQv9GC0LjQtNGC0LXRgNC00Ysg0L/QtdC/0YLQuNC00YLQtdGA0LPQtSDQttOZ0L3QtSDQtNC1INCw0LzQuNC90LrRi9GI0LrRi9C70LTQsNGA0YvQvdCwINC00LXQudGW0L0g0YvQtNGL0YDQsNGC0LDQtNGLLtCi0YDQuNC/0YHQuNC90L7Qs9C10L0g0YLSr9GA0ZbQvdC00LUg0LHTqdC70ZbQvdGW0L8s0ZbRiNC10LrRgtC10LPRliDRjdC90YLQtdGA0L7Qv9C10L/RgtC40LTQsNC30LAg0YTQtdGA0LzQtdC90YLRltC90ZbSoyDTmdGB0LXRgNGW0L3QtdC9INCx0LXQu9GB0LXQvdC00ZYg0YLRgNC40L/RgdC40L3Qs9C1INCw0LnQvdCw0LvQsNC00YsuINCl0JjQnNCe0KLQoNCY0J/QodCY0J060YLRgNC40L/RgdC40L3QvdGL0L0g0LrTqdC80LXQs9GW0LzQtdC9INCw0LrRgtC40LLRgtC10L3RltC/LCDQkdC10LvQvtC60YLQsNGA0LTRiyDQv9C10L/RgtC40LTRgtC10YDQs9C1INGL0LTRi9GA0LDRgtCw0LTRiy4g0K3Qm9CQ0KHQotCQ0JfQkDog0LHQsNC50LvQsNC90YvRgdGC0YvRgNGD0YjRiyDRgtGW0L3QtNC10YDQtNC10LPRltGN0LvQsNGB0YLQuNC9INCx0LXQu9C+0LPRi9C9INGL0LTRi9GA0LDRgtCw0YLRgdCwLNCa0JDQoNCR0J7QmtCh0JjQn9CV0J/QotCY0JTQkNCX0JA6INC/0L7Qu9C40L/QtdC/0YLQuNGC0YLQtdGA0LTRliDRgdC+0L3Qs9GLINOp0L3RltC80ZYtINCw0LzQuNC90LrRi9GI0LrRi9C70LTQsNGA0YvQvdCwINC00LXQudGW0L0g0YvQtNGL0YDQsNGC0LDQtNGLLiDQn9Cw0L3QutGA0LXQsNGC0LjQvSwg0YLRgNC40L/RgdC40L0sINC205nQvdC1INGF0LjQvNC+0YLRgNC40L/RgdC40L0g0LHQsNGALCDQsdGD0Lsg0LHQsNGA0LvRi9C6INC/0YDQvtGC0LXQvtC70LjRgtC40LrQsNC70YvSmyDRhNC10YDQvNC10L3RgtGC0LXRgCDQsNGBINKb0L7RgNGL0YLRg9C00Ysg0LbQsNKb0YHQsNGA0YLRg9KT0LAg0pvQsNCx0YvQvdCw0YPQtNGLINCw0LfQsNC50YLRg9KT0LAsINGB0LDRg9GL0pPRg9KT0LAg0LbTmdC90LUg0YLQtdC3INC60LDQu9C/0YvQvdCwINC60LXQu9GC0ZbRgNGD0LPQtSDQutOp0LzQtdC60YLQtdGB0LXRgtGW0L0g0LHQvtC70YvQvyDRgtCw0LHRi9C70LDQtNGLLiDQotGW0YLRltGA0LrQtdC90LPQtdC9INGW0YjQtdC6INGB0LjQvdC00YDQvtC80YvQvdC00LAg0LbTmdC90LUg0LDRgdC/0LDQv9GC0YvQuiDRltGI0LXQuiDQsNGD0YDRg9C70LDRgNGL0L3QtNCwINC606nQvNC10LrRgtC10YHQtdC00ZYsINCx0rHQu9GI0YvSm9C10YIg0LDRg9GL0YDRgdGL0L3Rg9GL0L0g0LDQt9Cw0LnRgtCw0LTRiyzQttOZ0L3QtdC00LUg0LrQtdC50LHRltGAINC/0YDQvtGC0LXQvtC70LjRgtC40LrQsNC70YvSmyDRhNC10YDQvNC10L3RgtGC0LXRgCDQsdC+0LvRg9GLINC80q/QvNC60ZbQvSwg0LrQsNGC0LXRgNC70ZYg0ZbRgdGW0LrQutC10LTQtSDSm9Cw0YDRgdGLINKb0LDRgdC40LXRgtGC0LXRgNGWINC00LUg0LHQsNGAINC10LrQtdC9LiDQmtGW0YjQutC10L3RgtCw0Lkg0LHQsNC70LDQu9Cw0YDQtNGL0qMg0L/RgNC+0YLQtdC+0LvQuNC30LTQtNGW0Log0YTQtdGA0LzQtdC90YLRgtC10YDRliDTqdC80ZbRgNC00ZbSoyDQsNC70pPQsNGI0pvRiyDQttGL0LvRi9C90LTQsCDQsdGW0YDRgtGW0L3QtNC10L8g0LTQsNC80LjQtNGLLiDQodC+0pPQsNC9INCx0LDQudC70LDQvdGL0YHRgtGL0L7QvdGL0L0gINCd0JXQk9CG0JfQk9CGINCV0KDQldCa0KjQldCb0IbQk9CGLSDQsNC90LAg0YHSr9GC0ZbQvSDRi9C00YvRgNCw0YLRg9KT0LAg0LHQtdC50ZbQvNC00LXQu9Cz0LXQvSDRhNC10YDQvNC10L3RgtGC0LXRgNC00ZbSoyDQttC+0pPQsNGA0pPRiyDQsdC10LvQtNGB0LXQvdC00ZbQu9GW0LPRliDQsdC+0LvRi9C/INGC0LDQsdGL0LvQsNC00YsuINCQ0YEg0pvQvtGA0YvRgtGDINC20q/QudC10YHRliAxINC20LDRgdKb0LAg0pvQsNGA0LDQsNC5INGC0L7Qu9GL0psg0LbQtdGC0ZbQu9GW0L8sINOZ0YDRgtGD0YDQu9GLINCw0LrRg9C30LTRiyDRgtCw0pPQsNC80LTQsNGA0LTRiyDQutC+0YDRi9GC0YPSk9CwINKb0LDQsdGW0LvQtdGC0YLRliDQsdC+0LvQsNC00YsuINCR0LDQu9Cw0L3Ri9KjINC00LXQvdGB0LDRg9C70YvSk9GLINC80LXQvSDQtNCw0LzRg9GLINKv0YjRltC9INC+0L3Ri9KjINGC0LDQvNCw0pvRgtCw0L3Rg9GCINGA0LDRhtC40L7QvdGLINC20LDRgSDQtdGA0LXQutGI0LXQu9GW0LPRltC90LUg0YHQsNC5INCx0L7Qu9GD0Ysg0YLQuNGW0YEg0LbTmdC90LUg0LDRgdCwINC80LDSo9GL0LfQtNGLLiAgICAgICAgICAgICAgICAgICAgICAgICAgICAgICAgICAgICAgICAgICAgICAgICAgICAgICAgICAgICAgICAgICAgICAgICAgICAgICAgICAgICAgICAgICAgICAgMi4gMTAg0LbQsNGB0LDRgCDQsdCw0LvQsNC00LAg0LHQsNC50pvQsNC70pPQsNC9INGB0LjQvNC/0YLQvtC80LTQsNGAINGB0L7QvdC00LDQuSDQsNC6INCw0L3QsNC70LjQt9C00LXRgCDQutOp0YDRgdC10YLQutGW0YjRgtC10YDRltC90LUg0YHQsNC50LrQtdGBINC60LDQvdGCINC00LjQsNCx0LXRgtGWINC00LjQsNCz0L3QvtC30YvQvSDQsdC+0LvQttCw0Lkg0LDQu9Cw0LzRi9C3LiAgICAgICAgICAgICAgICAgICDQndOZ0YLQuNC40LbQtdC70LXRgNC00ZbSoyDQuNC90YLQtdGA0L/RgNC10YLQsNGG0LjRj9GB0YvQvdCwINC60LXQu9GB0LXQujsgICAgICAgICAgICAgICAgICAgICAgICAgICAgICAgICAgICAgICAgICAgICAgICAgICAgICAgICAgICAgICAgICAgICAgICAgICAgICAgICAgICAgICAgICAgICAgICAgICAg0J/RgNC+0YLQtdC40L07INC305nRgNC00LXQs9GWINCw0LrRg9C30LTRi9C9INCx0L7Qu9GD0YsgMCw5INC/0LDQudGL0Lcg0LHQtdC70LPRltC70ZYg0LHRltGAINCx0q/QudGA0LXQuiDQttCw0pPQtNCw0LnRi9C90LTQsCDRgdC+0L3Ri9C9INGW0YjRltC90LTQtSDQutCw0L3RgiDQtNC40LDQsdC10YLRltC90LTQtSDQv9Cw0LnQtNCwINCx0L7Qu9GD0Ysg0LzSr9C80LrRltC9INC/0YDQvtGC0LXQvdGD0YDQuNGP0L3RiyDQutOp0YDRgdC10YLQtdC00ZYuICAgICAgICAgICAgICAgICAgICAgICAgICAgICAgICAgICAgICAgICAgICAgICAgICAgICAgICAgICAgICAgICAgICAgICAgICAgICAgICAgICAgICAgICAgICAgICAgICAgICAgICAgICAgICAgICAgICAgICAgICAgICAgICAgICAgICAgICAgICAgICAgICAgICAg0JzQtdC90YjRltC60YLRliDQsNGD0YDQu9GL0pPRiyDQvdC10LzQtdGB0LUg0YLRi9KT0YvQt9C00YvSk9GLOyAxMDM1INGD0LvQtdGBINGB0LDQu9C80LDQs9GLINC+0Lsg0L3QtdCz0YvQt9GL0L3QtdC9INC60LDQu9GL0L/RgtGL0LTQsCAxMDEwLTEwMjUgLiDQl9OZ0YDQtNGW0qMg0LbQvtKT0LDRgNKT0Ysg0YLRi9KT0YbQt9C00YvSk9GLINC+0YDQs9Cw0L3QuNC30LzQvdGW0pMg0YHSsdC50YvSm9GC0YvSm9GC0Ysg0LbQvtKT0LDQu9GC0YvQvyDQttCw0YLQutCw0L3Ri9C9ICAg0LrTqdGA0YHQtdGC0LXQtNGWLiDQkdKx0Lsg0LPQuNC/0LXRgNCz0LvQuNC60LXQvNC40L3Ri9C9INGB0LDQu9C00LDRgNGLLCDRgdC10LHQtdCx0ZYg0LrQsNC90L3QsNC9INCw0YDRgtGL0Log0LrQsNC90YIg0LfTmdGA0LzQtdC9INCx0ZbQs9C1INGI0YvSk9Cw0YDRi9C70LDQtNGLLCDQsNC7INCx0YPQuyDSm9C3INC60LXQt9C10LPRltC90LTQtSDQt9OZ0YAg0YLRi9KT0YvQt9C00YvSk9GL0L0g0LDRgNGC0YLRi9GA0LDQtNGLLiDQm9CV0JnQmtCe0KbQmNCi0KLQldCgLSDQvdC+0YDQvNCw0LTQsCAwLDYg0LrTqdGA0YMg0LDQu9Cw0L3Ri9C90LTQsCwg0LAg0LHRltC30LTQtSDQv9Cw0YbQuNC10L3RgtGC0LUgMCwyINC00LXQvNC10Log0LfTmdGA0LTQtSDQu9C10LnQutC+0YbQuNGC0YLQtdGAINC606nQu9C10LzRliDQutCw0LvRi9C/0YLRiyDRiNC10LPRltC90LTQtSDQttOZ0L3QtSDQtdGI0LrQsNC90LTQsNC5INC10LvQtdGD0LvRliDQsNGD0YvRgtC60YPQu9Cw0YAg0LbQvtC6LCDRgdC+0L3Ri9C80LXQvSDQsdGW0YDQs9C1INC40L3RhNC10LrRhtC40Y/Qu9GL0psg0q/RgNC00ZbRgdGC0LXRgCDQttC+0Log0LXQutC10L3RltC9INC606nRgNGB0LXRgtC10LTRli4g0KbQmNCb0JjQndCU0IbQoNCb0JXQoC0g0L3QvtGA0LzQsNC00LAg0LHRg9C70LDRgCDQvdC10LPRltC30ZbQvdC10L0g0LHQvtC70LzQsNGD0Ysg0L3QtdC80LXRgdC1INCw0LfSk9Cw0L3RgtCw0Lkg0LzTqdC70YjQtdGA0LTQtSDSk9Cw0L3QsCDQsdC+0LvRgyDRgtC40ZbRgS4g0KbQuNC70LjQvdC00ZbRgNC70LXRgNC00ZbSoyDQutKb0L8g0LzTqdC70YjQtdGA0LTQtSDQsdC+0LvRg9GLINCx0q/QudGA0LXQuiDRgtKv0YLRltC60YjQtdC70LXRgNC90ZbSoyDQt9Cw0LrRi9C80LTQsNC70YPRi9C9INC606nRgNGB0LXRgtC10LTRliwg0LTQuNCw0LHQtdGCINC60LXQt9GW0L3QtNC1INCx0q/QudGA0LXQuiDRgtKv0YLRltC60YjQtdC70LXRgNGW0L3RltKjINC30LDQutGL0LzQtNCw0L3Rg9GLINC205nQvdC1INC/0YDQvtGC0LXQvdGD0YDQuNGPLCDRhtC40LvQuNC90LTRg9GA0LjRjyDQv9Cw0LnQtNCwINCx0L7RgNC70YPRi9C90LAg0LfTmdGA0LTQtSDQutOp0L8g0LzTqdC70YjQtdGA0LTQtSDQsdC+0LvRg9GL0L3QsCDQsNC70YvQvyDQutC10LvQtdC00ZYuINCa0JXQotCe0J0g0JTQldCd0JXQqNCG0JrQotCV0KDQhi0g0L7Qu9Cw0YAg0L3QtdCz0ZbQt9GWINC90L7RgNC80LDQtNCwINCx0L7Qu9C80LDRgyDRgtC40ZbRgS4g0JrQldGC0L7QvdC00LDRgNC00YvSoyDQsdC+0LvRg9GLINC60LDQvdGCINC00LjQsNCx0LXRgtGW0L3QtNC1INC/0LDQudC00LAg0LHQvtC70LDRgtGL0L0g0LrQtdGC0L7QvdGD0YDQuNGP0L3RiyDQutOp0YDRgdC10YLQtdC00ZYsINCx0YPQuyDQv9GA0L7RhtC10YHRgSDQvdC10LPRltC30ZbQvdC10L0g0Y3QvdC10YDQs9C40Y8g0LbQtdGC0ZbRgdC/0LXRgyDQvdOZ0YLQuNC20LXRgdGW0L3QtNC1INC80LDQudC70LDRgNC00YvQvSDQsdC10YLRgtCwINGC0L7RgtGL0pPRg9GLINGW0YHQutC1INKb0L7RgdGL0LvRg9GL0L3QsNC9INC20q/Qt9C10LPQtSDQsNGB0LDQtNGLLtCv0pPQvdC4INC+0YDQs9Cw0L3QuNC30Lwg0LPQu9GO0LrQvtC30LAg0LbQtdGC0ZbRgdC/0LXRg9GI0ZbQu9Cz0ZbQvdC10L0g0LzQsNC50LvQsNGA0LTRiyDRjdC90LXRgNCz0LjRjyDQutOp0LfRliDRgNC10YLRltC90LTQtSDQv9Cw0LnQtNCw0LvQsNC90LAg0LHQsNGB0YLQsNKT0LDQvSAuINCa0LXRgtC+0L0g0LTQtdC90LXRiNGW0YLQtdGA0ZbQvdGW0qMg0LbQuNC90LDQu9GD0Ysg0LTQuNCw0LHQtdGC0YLRltC6INC60LXRgtC+0LDRhtC40LTQvtC30pPQsCDQutC+0LzQsNKT0LAg0LTQtdC50ZbQvSDQsNC70YvQvyDQsdCw0YDQsNGC0YvQvSDQsNGD0YvRgCDQttCw0pPQtNCw0LnQtNGL0qMg0LHRltGA0ZYuINKa0JDQndCiLSDQt9OZ0YDQtNC10LPRliDQutCw0L3RgiA3INC/0LDQudGL0Lcg0LbQvtKT0LDRgNGLINC606nRgNGB0LXRgtC60ZbRiCDQttOZ0L3QtSDQutCw0L3RgiDQtNC40LDQsdC10YLRltC90LUg0YLTmdC9INCz0LjQv9C10YDQs9C70LjQutC10LzQuNGP0L3Riywg0YHTmdC50LrQtdGB0ZbQvdGI0LUg0LDRgNGC0YvSmyDSm9Cw0L3RgtGC0YvSoyDQt9OZ0YDQvNC10L0g0YjRi9KT0YPRi9C9INCz0LvRjtC60L7Qt9GD0YDQuNGP0L3RiyDQutOp0YDRgdC10YLQtdC00ZYuINCT0LvRjtC60L7Qt9CwINOp0LfRltC80LXQvSDQsdGW0YDQs9C1INGB0YMg0YLQsNGA0YLQsNGC0YvQvdGLINCx0LXQu9Cz0ZbQu9GWINGB0L7QvdGL0L0g0L3QsNGC0LjQttC10YHRltC90LTQtSDQvtGA0LPQsNC90LjQt9GWINGB0YPRgdGL0LfQtNCw0L3Ri9C/LCDRiNOp0LvQtNC10YMg0L7RgNGL0L0g0LDQu9Cw0LTRiy4g0IbRiNGC0ZbSoyDQsNGD0YDRg9GLINCx0LDRgSDQsNGD0YDRg9GLLiDRiNOp0LvQtNC10YMsINC/0L7Qu9C40YPRgNC40Y8sINGC05nQsdC10YLRltC90ZbSoyDQttC+0pPQsNGA0LvQsNGD0YssINGB0LDQu9C80LDSmyDRgtCw0YHRgtCw0YMg0LbTmdC90LUg0LfTmdGAINCw0L3QsNC70LjQt9GW0L3RltKjINC905nRgtC40LbQtdC70LXRgNGW0L0g0LXRgdC60LXRgNC1INC+0YLRi9GA0YvQvyDQsdCw0LvQsNC00LAg0LrQsNC90YIg0LTQuNCw0LHQtdGC0ZYg0L3QtdC80LXRgSDQtNC40LDQsdC10YLRgtGW0Log0LrQtdGC0L7QsNGG0LjQtNC+0Lcg0LHQsNGAINC10LrQtdC90ZbQvSDQsNC50YLQsCDQsNC70LDQvNGL0LcuINCU0rHRgNGL0YEg0LXQvNC00LXRgyDSr9GI0ZbQvSDQvNC10LTQuNGG0LjQvdCw0LvRi9KbINC80LDQvNCw0L3QvNC10L0g0pvQvtGB0YvQvNGI0LAg0YLQtdC60YHQtdGA0YPQtNC10L0g06nRgtGW0L8sINGC0LjRltGB0YLRliDQtdC8INGI0LDRgNCw0L3RiyDQsNC70YMg0LzQsNKj0YvQt9C00Ysg0LXQutC10L3RltC9INC10YHQutC10YDQs9C10L0g0LDQsdC30LDQuy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69" table:style-name="ce1">
            <text:p>1066869</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0JrRltGI0LrQtdC90YLQsNC5INCx0LDQu9Cw0LvQsNGA0LTQsNKT0Ysg0L/RgNC+0YLQtdC+0LvQuNGC0LjQutCw0LvRi9KbINGE0LXRgNC80LXQvdGC0YLQtdGAINCx0LXQu9C+0LrRgtCw0YDQtNGLINGL0LTRi9GA0LDRgtCw0YLRi9C9INGE0LXRgNC80LXQvdGC0YLQtdGALiDQkdGD0Lsg0YTQtdGA0LzQtdC90YLRgtC10YAg0LDRgSDQutC+0YDRi9GC0YMs0YLRltC90LTQtdGA0LTRltKjINKb0LDQudGC0LAg0pvSsdGA0YvQu9GD0Ysg0LbTmdC90LUg0LjQvNC80YPQvdC00YvSmyDQttGD0LnQtdC90ZbSoyDSm9GL0LfQvNC10YLRliDRgdC40Y/Sm9GC0Ysg05nRgNGC0q/RgNC70ZYg0YTQuNC30LjQvtC70L7Qs9C40Y/Qu9GL0psg0L/RgNC+0YbQtdGB0YHRgtC10YDQtNC1INC80LDSo9GL0LfQtNGLINGA06nQuyDQsNGC0pvQsNGA0YvQtNGLLtCa0LjRiNC60LXQvdGC0LDQuSDQsdCw0LvQsNC70LDRgNC00LAg0LrQtdC30LTQtdGB0LXRgtC40L0g0LrQtdC50LHQuNGAINC/0YDQvtGC0LXQvtC70LjRgtC40LrQsNC70YvQuiDRhNC10YDQvNC10L3RgtGC0LXRgNCz0LUg0LzRi9GB0LDQuyDQsNC50YLQsNGC0YvQvSDQsdC+0LvRgdCw0Lw60KLRgNC40L/RgdC40L060YPQudC60Ysg0LHQtdC30LjQvdC00LUg0L7QvdC00LjRgNC40LvQtdC00Lgg0LbTmdC90LUg0LDRiCDRltGI0LXQutGC0LUg0YLQsNKT0LDQvNC00YvSmyDQsNKb0YPRi9C30LTQsNGA0LTRi9KjINKb0L7RgNGL0YLRi9C70YPRi9C90LAg0LrQvtC80LXQutGC0LXRgdC10LTRli7QpdC40LzQvtGC0YDQuNC/0YHQuNC9OtGD0LnQutGLINCx0LXQt9C40L3QtNC1INC00LUg0L7QvdC00LjRgNC40LvQtdC00ZYs0L7QuyDQsNGBINKb0L7RgNGL0YLRgyDQutC10LfRltC90LTQtSDQsdC10LvQvtC60YLQsNGA0LTRi9KjINC60ZbRiNGW0YDQtdC6INC/0LXQv9GC0LjQtNGC0LXRgNCz0LUg0YvQtNGL0YDQsNGD0YvQvdCwINC60L7QvNC10Log0LHQtdGA0LXQtNC4LtCt0LvQsNGB0YLQsNC30LA60rDQudKb0Ysg0LHQtdC30Lgg0L7QvdC00LjRgNC10LTQuCzQvtC7INC00LDQvdC10LrQtdGAINGC0LjQvdC00LXRgNC00LXQs9C4INGB0LXRgNC/0LjQvNC00Lgg0YLQsNC70YjRi9Kb0YLQsNGA0LTRi9KjINGL0LTRi9GA0LDRg9GL0L3QsCDQutOp0LzQtdC6INCx0LXRgNC10LTRli4g0J/RgNC+0YLQtdC+0LvQuNGC0LjQutCw0LvRi9KbINGE0LXRgNC80LXQvdGC0YLQtdGAINOp0YLQtSDQvNCw0L3Ri9C30LTRiyDRhNGD0L3QutGG0LjRj9KT0LAg0LjQtSDQttOZ0L3QtSDQutGW0YjQutC10L3RgtCw0Lkg0LHQsNC70LDQu9Cw0YDSk9CwINCw0LrRg9GL0Lcg0LzQvtC70LXQutGD0LvQsNC70LDRgNGL0L3Ri9KjINGL0LTRi9GA0LDRg9GL0L3QsCDQutOp0LzQtdC6INCx0LXRgNC10LTRliDQttOZ0L3QtSDQsdGD0Lsg0LHQtdC70LPQuNC70Lgg0LHRltGAINGC0LDSk9Cw0LzQtNCw0YAg0LzQtdC9INC60L7RgdC/0LDQu9Cw0YDQtNCw0L0g06nRgtC1INC+0L3QsNC5INGC0LDQsdGL0LvQsNC00Ysu0JDRgdKb0LDQt9Cw0L3QtNCwINCw0YHSm9Cw0LfQsNC9INKb0YvRiNKb0YvQu9GLINC/0LXQv9GB0LjQvdC+0LPQtdC9INC00LXQvyDQsNGC0LDQu9Cw0YLRi9C9INCw0LrRg9GL0LfQtNGLINC/0LXQv9GB0LjQvdCz0LUg0L7Qt9Cz0LXRgNGC0LXQtNGWLtC+0Lsg0L7QtNCw0L0g05nRgNGWINCw0LzQvNC40L3Sm9GL0YjSm9GL0LvQtNGLINGL0LTRi9GA0LDRgtCw0LTRiy7QodC+0L3QtNCw0Lkg0LDQuiDQvdCw0YDQtdGB0YLQtdC70LXRgNC00LUg0LrQsNC50LzQvtC30LjQvSDQtNC10L8g0LDRgtCw0LvQsNGC0YvQvSDQv9GA0L7RgtC10L7Qu9C40YLQuNC60LDQu9GL0Log0YTQtdGA0LzQtdC90YLRgtC4INC60L7RgNC10YLQuNC9INCx0L7Qu9Cw0LzRi9C3LCDQvtC7INGA0LXQvdC40L0g0LTQtdC/INGC0LUg0LDRgtCw0LvQsNC00Ysu0J7QuyDQsNGB0pvQsNC30LDQvdC00LDSk9GLINGB0q/RgtGC0ZbSoyDQutC+0LDQs9GD0LvRj9GG0LjRj9GB0YvQvdCwINC00LAg0pvQsNGC0YvRgdCw0LTRiy7QnNCw0LnQtNGL0qMg0YvQtNGL0YDQsNGD0YvQvdCwINC60L7QvNC10LrRgtC10YHQtdGC0LjQvSDQsdC+0LvQuNC60YLQtdGALtCw0LrRg9GL0LfQtNCw0YDQtNGL0L0g0YvQtNGL0YDQsNGD0YvQvdCwINC/0YDQvtGC0LXQsNC30LDQu9Cw0YAs0LrQvtC80LjRgNGB0YPQu9Cw0YDQtNGLINC/0YDQvtGC0LXQsNC30LDQu9Cw0YAs0L3Rg9C60LvQtdC40L0g0pvRi9GI0pvRi9C70LTQsNGA0YvQvdGL0qMg0YvQtNGL0YDQsNGD0YvQvdCwINC90YPQutC70LXQsNC30LDQu9Cw0YAg0LrQvtC80LXQutGC0LXRgdC10LTRli4g0J/QkNC90LrRgNC10LDRgtC40L0s0YLRgNC40L/RgdC40L3QttOZ0L3QtSDRhdC40LzQvtGC0YDQuNC/0YHQuNC9INCx0LDRgCzQsdKx0Lsg0LHQsNGA0LvRi9C6INC/0YDQvtGC0LXQvtC70LjRgtC40LDQu9GL0Log0YTQtdGA0LzQtdC90YLRgtC10YAg0LDRgSDSm9C+0YDRi9GC0YPQtNGLINC20LDSm9GB0LDRgNGC0YPSk9CwICzSm9Cw0LHRi9C90YPQtNGLINCw0LfQsNC50YLRg9KT0LAs0YHQsNGD0YvSk9GD0pPQsCDQttOZ0L3QtSDRgtC10Lcg0pvQsNC70L/Ri9C90LAg0LrQtdC70q/Qs9C1INC60L7QvNC10Log0LHQtdGA0LXQtNGWLtCi0ZbRgtGW0YDQutC10L3Qs9C10L0g0ZbRiNC10Log0YHQuNC90LTRgNC+0LzRi9C90LTQsCDQttOZ0L3QtSDQsNGB0L/QsNC/0YLRi9KbINGW0YjQtdC6INCw0YPRgNGD0LvQsNGA0YvQvdC00LAg0LrTqdC80LXQuiDQsdC10YDQtdC00ZYs0LDRg9GL0YDRgdGL0L3Rg9C00Ysg0LDQt9Cw0LnRgtCw0LTRiyzQutC10LnQsdGW0YAg0L/RgNC+0YLQtdC+0LvQuNGC0LjQutCw0LvRi9C6INGE0LXRgNC80LXQvdGC0YLQtdGA0LTRltKjINKb0LDRgtC10YDQu9GWINGW0YHRltC60LrQtSDQtNC1INKb0LDRgNGB0Ysg05nRgdC10YDRliDQsdCw0YAuIDIp0JHQtdGA0ZbQu9Cz0LXQvSDQttCw0pPQtNCw0LnQtNCwINC90LXRgdC10L/RgtGW0qMg0LbQsNC70L/RiyDRgtCw0LvQtNCw0YPRi9C90LTQsCDSm9Cw0L3RgiDQtNC40LDQsdC10YLQuCDRi9Kb0YLQuNC80LDQuyDQtNC10L8g0LHQvtC70LbQsNC50LzRi9C9LtCY0L3RgtC10YDQv9GA0LjRgtCw0YbQuNGP0YHRi9C90LAg0YLQvtKb0YLQsNC70YHQsNKbOtCf0YDQvtGC0LXQuNC9OtCX05nRgNC00LXQs9C4INCw0LrRg9GL0Lcg0LHQvtC70YPRiyAoMCw5KSAsINCx0LXQu9Cz0ZbQu9GWINCx0ZbRgCDQsdKv0LnRgNC10Log0LbQsNKT0LTQsNC50YvQvdC00LAg0LDRgtCw0L8g0LDQudGC0YHQsNKbLCDSm9Cw0L3RgiDQtNC40LDQsdC10YLQuNC90LTQtSDQv9Cw0LnQtNCwINCx0L7Qu9GLINC80YPQvNC60LjQvS7QkdKx0Lsg0LHRltC30LTQtSDQv9GA0L7RgtC10LjQvdGD0YDQuNGP0L3RiyDQutC+0YDRgdC10YLQtdC00ZYu0JzQtdC90YjRltC60YLQuCDQsNGD0YvRgNC70YvQujogMTAzNSDRg9C70LXRgSDRgdCw0LvQvNCw0pPRiyDQutC+0L3RhtC10L3RgtGA0LDRhtC40Y/Qu9Cw0L3Qs9Cw0L0g0LfQsNGA0LTQuCDQutC+0YDRgdC10YLQtdC00Lgs0L7QuyDSm9Cw0L3RgiDQtNC40LDQsdC10YLQuNC80LXQvSDQsdCw0LnQu9Cw0L3Ri9GB0YLRiyDRgdKx0LnRi9Kb0YLRi9Kb0YLRiyDRgtKx0YLRi9C90YPQtNGLINC20L7Sk9Cw0YDRiyzRiNC+0LvQtNC10YMg0L/RgNC+0YbQtdGB0ZYg0LHQsNGAINC10LrQtdC90ZbQvSAg0LbTmdC90LUg0LbQuNGWINC305nRgCDRiNGL0LPQsNGA0YMg0L/QvtC70LjRg9GA0LjRjyAg0L3QsNGC0LjQttC10YHQuCDQsdC+0LvRg9GLINGL0pvRgtC40LzQsNC7LtCQ0psg0LrQsNC9INC20LDRgdGD0YjQsNC70LDRgNGLOtC305nRgNC00LUgMC0yINC70LXQudC60L7RhtC40YLRgtC10YAg0LHQvtC70YPRiyAg0pvQsNC70YvQv9GC0Ysg0YjQtdC60YLQtSDQttOZ0L3QtSDQtdGI0pvQsNC90LTQsNC5INKb0LDRg9GW0L8g0YLQvtC90LTQuNGA0LzQtdC50LTRli7QptC40LvQuNC90LTRgNC70LXRgDog0KbQuNC70LjQvdC00YDQu9C10YAg0LrTqdC/INCx0L7Qu9GD0Yss0LHSr9C50YDQtdC6INGC0YPRgtC40LrRiNC10LvQtdGA0LjQvdC40L0g0LfQsNC60YvQvNC00LDQu9GD0YvQvSDQutC+0YDRgdC10YLQtdC00Lgs0YHQvtC90LTQsNC5INCw0Log0LrQtdC50LHRltGAINCx0q/QudGA0LXQuiDQsNGD0YDRg9C70LDRgNGL0L3QtNCwLNC90LDQutGC0YvRgNCw0Log0LDQudGC0YHQsNC8LCDQtNC40LDQsdC10YLRgtGW0Log0L3QtdGE0YDQvtC/0LDRgtC40Y/QtNCwINC60LXQt9C00LXRgdC10LTRli7QmtC10YLQvtC9INC00LXQvdC10LvQtdGA0ZY60JrQtdGC0L7QvdC00LDRgNC00YvSoyDQsdC+0LvRg9GLLCDRj9KT0L3QuCDQvtKjINC90LDRgtC40LbQtSDQutC+0YDRgdC10YLRg9C4ICDQutC10YLQvtC90YPRgNC40Y8g0LHQtdC70LPRltGB0ZYg0LHQvtC70YvQvyDRgtCw0LHRi9C70LDQtNGLLtCe0Lsg0LjQvdGB0YPQu9C40L0g0LbQtdGC0LjRgdC/0LXRg9GI0LjQu9C40LPQuNC90LUg0LHQsNC50LvQsNC90YvRgdGC0Ysg0LDSk9C30LAg0Y3QvdCz0LXRgNCz0LjRjyDQsNC70YMg0q/RiNGW0L0g0LzQsNC50LvQsNGA0LTRiyDRi9C00YvRgNCw0YLQsNGC0YvQvSDQsdCw0pvRi9C70LDQvdCx0LDQudGC0YvQvSDSm9Cw0L3RgiDQtNC40LDQsdC10YLQuNC90LTQtSDQutOp0YDRltC90ZbRgSDQsdC10YDQtdC00ZYu0prQsNC90YI6INC30LDRgNC00LXQs9C4INKb0LDQvdGCINCx0L7Qu9GD0Yss0Y/Sk9C90Lgg0LPQu9GO0LrQvtC30LDQvdGL0L0g0LHQvtC70YPRiyAg0LHSsdC7INOZ0LTQtdGC0YLQtdC9INGC0YvRgSDQttC+0pPQsNGA0Ysg0LbTmdC90LUg0pvQsNC90YIg0LTQuNCw0LHQtdGC0LjQvdC1INGC05nQvSDQtdGA0LXQutGI0LUg0LPQuNC/0LXRgNCz0LvQuNC60LXQvNC40Y/QvdGLINC60L7RgNGB0LXRgtC10LTRli7QhtGI0YLRltKjINCw0YPRgNGD0YssINCx0LDRgSDQsNGD0YDRg9GLICzRiNC+0LvQtNC10YMsLNC/0L7Qu9C40YPRgNC40Y8s0YLQsNCx0LXRgtGC0ZbQvSDQttC+0LPQsNGA0Ysg0LHQvtC70YPRiyzRgdCw0LvQvNCw0psg0LbQvtCz0LDQu9GC0YMg0YHQvtC90LTQsNC5INCw0Log0LfQsNGAINCw0L3QsNC70LjQt9C40L3QtNC10LPQuCDQvNCw0LvQuNC80LXRgtGC0LXRgNCz0LUg0pvQsNGA0LDQuSDQvtGC0YvRgNGL0L8s0L3QsNKb0YLRiyDQtNC40LDQs9C90L7QtyDSm9Cw0L3RgiDQtNC40LDQsdC10YLRltC9INC60L7RjiDQttOZ0L3QtSDRgtC40ZbRgdGC0ZYg0LXQvNC00LXRgyDRg9GI0LjQvSDQsdCw0LvQsNCz0LAg0LzQtdC00LjRhtC40L3QsNC70YvQuiDQutGL0LfQvNC10YLQutC10YDQtNC40L0g0LrQvtGB0YvQvNGI0LAg0YLQtdC60YHQtdGA0YPQuNC90LXQvSDQvtGC0YMg0LzQsNC90YvQt9C00Ysu0prQkNCd0KIg0JTQmNCQ0JHQldCi0Jgg0L3QtdC80LXRgdC1INCa0JXQotCe0JDQptCY0JTQntCXLtCR0rHQuyDQsdCw0LvQsNC90YvQvSDRltGI0ZYg0LDRg9GL0YDQsNC00Yss0YjQvtC70LTQtdC50LTQuCzQttOZ0L3QtSDRgtCw0YPQu9C40LPQuNC90LUgMy00INC70LjRgtGAINGB0YMg0LjRiNC60LXQvdC90LXQvSDQutC10LnQuNC9INC00LUg0YLQuNC90LTQtdGA0LTQuNC9INGB0LXRgNC/0LjQvNC00LjQu9C40LPQuCDRgtC+0LzQtdC90LTQtdC50LTRlizQttC40ZYg0LfQsNGAINGI0YvQs9Cw0YDRgywg0YLQsNCx0LXRgiDQttC+0LPQsNGA0Ysg0LHQvtC70YPRiywg0L7RgdGL0LvQsNGAICDQt9OZ0YAg0LDQvdCw0LvQuNC30LjQvdC00LUsINGB0L7QvdC00LDQuSDQsNC6ICDRgdCw0LvQvNCw0psg0LbQvtCz0LDQu9KT0LDQvdC90LDQvSDQsdCw0LnSm9Cw0YHQsNC6INCx0L7Qu9Cw0LTRiy7QmtC10YLQvtC9INC00LXQvdC10LvQtdGA0LjQvdC40L0g0LbQvtCz0LDRgNGLINCx0L7Qu9GD0YsgINC00LjQsNCx0LXRgtGC0LjQuiDQutC10YLQvtCw0YbQuNC00L7QtyDQsdC10LvQs9C40YHQuCDQsdC+0LvRg9GLINC80YPQvNC60LjQvS7QodC+0L3QtNCw0Lkt0LDSmyDQsNC60YPRi9C30LTRi9KjINC/0LDQudGL0LfQtNGL0psg0LzTqdC70YjQtdGA0ZbQvdGW0L0g0YLQvtC80LXQvdC00LXQs9C10L3QuNC9INCx0LDQudC60LDQtNGL0LosINCw0Lsg0pvQsNC70YvQv9GC0Ysg0YjQtdCz0ZYgNjAtODMg0LPRgCDQutGD0YDQsNC50YLRi9C90YvQvSwg0LDQuyDQsdCw0LvQsNC00LAg0LrQsNC70YvQv9GC0Ysg0YjQtdC60YLQtdC9INC60LDRgNCw0LPQsNC90LTQsCDQttC+0LPQsNGA0Ysg0LXQutC10L3QuNC9ICDQsdCw0LnQutCw0YHQsNC6INCx0L7Qu9Cw0LTRiyzRj9Cz0L3QuCAxMDM1IFdCQyAg0LbQvtKT0LDRgNGLINC10LrQtdC90ZbQvSDQutC+0YDQtdC80ZbQty7QkdCw0LvQsNC70LDRgNC00LDSk9GLINC60LXRgtC+0L0g0LTQtdC90LXRgdGW0L3RltKjICDSm9Cw0LvRi9C/INGI0LXQs9GWIDMg0LXRgdC1INC20L7Qs9Cw0YDRiyzRj9KT0L3QuCAwLDUg0LzQvNC+0LvRjC7SmtCw0L3RgiDQtNC10L3Qs9C10LnRliDSm9Cw0LvRi9C/0YLRiyDQsdC40YDQsNC6INGC0LAg0LTQuNCw0LHQtdGC0YLRltC6INC60LXRgtC+0LDRhtC40LTQvtC3INC20LDQs9C00LDQudGL0L0g0L7QuyDQsdCw0Y/RgyDQutC+0YLQtdGA0ZbQu9GD0ZYg0LzRg9C80LrRltC9LiAgPGJyIC8+DQo8YnIgLz4NCjxiciAvPg0KPGJyIC8+DQogIDxiciAvPg0KPGJyIC8+DQo8YnIgLz4NCjxiciAvPg0KPGJyIC8+DQo8YnIgLz4NCjxiciAvPg0K</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0" table:style-name="ce1">
            <text:p>1066870</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0JrRltGI0LrQtdC90YLQsNC5INCx0LDQu9Cw0LvQsNGA0LTQsNKT0Ysg0L/RgNC+0YLQtdC+0LvQuNGC0Lhr0LDQu9GL0Log0YTQtdGA0LzQtdC90YLRgtC10YAg0LHRltC30LTQtSDQsdC10LvQvtC60YLQsNGA0LTRiyDQsNGA0L3QsNC50Ysg0YvQtNGL0YDQsNGC0LDRgtGL0L0g0YTQtdGA0LzQtdC90YLRgtC10YAg0LHQvtC70YvQvyDRgdCw0L3QsNC70LDQtNGLLtCR0rHQuyDRhNC10YDQvNC10L3RgtGC0LXRgCDQsNGBINC60L7RgNGL0YLRgyDRgtGW0L3QtNC10YDQtNGW0L0g0LrQsNC50YLQsCDQutKx0YDRi9C70YPRiyDQttOZ0L3QtSDQuNC80YPQvdC00YvQuiDQttKv0LnQtdC90ZbSoyDQttKx0LzRi9GB0Ysg0YHQuNGP0pvRgtGLINOZ0YAg0YLSr9GA0LvRliDRhNC40LfQvtC70L7Qs9C40Y/Qu9GL0Log0L/RgNC+0YbQtdGB0YLQtdGA0LTQtSDQvNCw0qPRi9C30LTRiyDRgNOp0Lsg0LDRgtC60LDRgNCw0LTRiy7QmtGW0YjQutC10L3RgtCw0Lkg0LHQsNC70LDQu9Cw0YDQtNCwINC/0YDQvtGC0LXQvtC70LXRgtC40LrQsNC70YvQuiDRhNC10YDQvNC10L3RgtGC0LXRgCDQsdCw0YAu0JDRgdC60LDQt2HQvdC00LDQs9GLINC90LXQs9GW0LfQs9GWINGE0LXRgNC80LXQvdGCINC/0LXQv9GB0LjQvdC00ZYg0LDQudGC0YPSk9CwINCx0L7Qu9Cw0LTRiy7QkdKx0Lsg0L/QtdC/0YHQuNC90L7Qs9C10L0g0YLSr9GA0ZbQvdC00LUg0LHQtdC70YHQtdC90LTRliDQtdC80LXRgSDQutKv0LnQtNC1INCx06nQu9GW0L3QtdC00ZbQtNC1INCw0YHQutCw0LfQsNC90L3Ri9KjINC60YvRiNC60YvQu9C00YtrINC+0YDRgtCw0YHRi9C90LTQsCDQn9CdIDEuNS0yINCw0YDQsNC70YvQs9GL0L3QtNGLINCx0LXQu9GB0LXQvdC00ZYga9Kv0LnQs9C1INCw0LnQvdCw0LvQsNC00Ysu0J3QtdCz0ZbQt9Cz0ZYg0pvRi9C30LzQtdGC0ZY60LDQutGD0YvQt9C00LDRgNC00Ysg0L/QvtC70LjQv9C10L/RgtC40LTRgtC10YAg0LzQtdC9INC/0LXQv9GC0LjQtNGC0LXRgNCz0LUg0YvQtNGL0YDQsNGC0LDQtNGLLjIu0rDQudC60Ysg0LHQtdC30ZbQvdGW0qMg0YTQtdGA0LzQtdGC0YLQtdGA0ZY60YLRgNC40L/RgdC40L0g0LbTmdC90LUg0YXQuNC80L7RgtGA0LjQv9GB0LjQvS7QkdKx0Lth0YAg0LHQtdC70YHQtdC90LTRliDQtdC80LXRgSDRgtKv0YDRltC90LTQtSDQsdOp0LvRltC90LXQtNGWLtCQ0Lsg0ZbRiNC10LrRgtC1INGN0L3RgtC10YDQtdC60LjQvdCw0LdhINGE0LXRgNC80LXQvdGC0ZbQvdGW0qMg0LrTqdC80LXQs9GW0LzQtdC9INCx0LXQu9GB0LXQvdC00ZYg0YLSr9GA0LPQtSAg0LDQudC90LDQu9Cw0LTRiy7QndC10LPRltC30LPRliDQsNGC0LrQsNGA0LDRgtGL0L0g0LrRi9C30LzQtdGC0ZbQv9C+0LvQuNC/0LXQv9GC0LjQtNGC0LXRgNC00ZYg0L7QtNCw0L0g05nRgNGWINC/0LXQv9GC0LjQtNGC0LXRgCDQvNC10L0g0LDQvNC40L3QutGL0YjQutGL0LvQtNCw0YDQs9CwINC00LXQudGW0L0g0YvQtNGL0YDQsNGC0LDQtNGLLtKw0LnQutGLICDQsdC10LfRltC90LXQvSDRgtCw0pPRiyAg0LrQsNGA0LHQvtC60YHQuNC/0LXQv9GC0LjQtNCw0LfQsCDRhNC10YDQvNC10L3RgtGWINCx06nQu9GW0L3QtdC00ZYu0J7QmyDQsdGW0LfQtNC1INC+0LvQuNCz0L7Qv9C10L/RgtC40LTRgtC10YDQtNGWINC20LXQutC1INCw0LzQuNC9a9GL0YjQutGL0LvQtNCw0YDSk9CwINC00LXQudGW0L0gINGL0LTRi9GA0LDRgtCw0LTRiy7QkNGIICDRltGI0LXQutGC0LXQs9GWINGE0LXRgNC80LXQvdGCINGN0L3RgtC+0YDQtdC60LjQvdCw0LfQsC3RgtGA0LjQv9GB0LjQvdC+0LPQtdC90LTRliDRgtC40L/RgdC40L3Qs9C1INCw0LnQvdCw0LvQtNGL0YDQsNC00Ysu0JrRltGIa9C10L3RgtCw0Lkg0LHQsNC70LDQu9Cw0YDQtNCw0LPRiyDQv9GA0L7RgtC10L7Qu9C40YLQuNC60LDQu9GL0LogINC10YDQtWvRiNC10LvRltC60YLQtdGA0ZbQvdC1INGC0L7QutGC0LDQu9GB0LDQvDrQltCw0qPQsCDRgtGD0pPQsNC9INC905nRgNC10YHRgtC10LvQtdGAINC80LXQvSDQtdC80YjQtdC60YLQtdCz0ZYg0LHQsNC70LDQu9Cw0YDQtNGL0qMg0LDRgSDQutC+0YDRi9GC0YMg0YTQtdGA0LzQtdC90YLQtdGA0ZYg0YLQvtC70YvQuiDQttC10YLRltC70LzQtdCz0LXQvSDQv9C10L/RgdC40L0g0YLRgNC40L/RgdC40L0g0LbRltC90LUg0YXQuNC80L7RgtGA0LjQv9GB0LjQvSDQvNOp0LvRiNC10YDRliDQsNC3INC205nQvdC1INCx0LXQu9GB0LXQvdC00ZbQu9GW0LPRliDRgtOp0LzQtdC9LiAg0JHSsdC7INCw0LrRg9GL0LfQtNCw0YDQtNGL0L0g0YLQvtC70YvQuiAg0YvQtNGL0YDQsNC80LDRg9GL0L3QsCDTmdC60LXQu9GD0ZYg0LzSr9C80LrRltC9INCx0L7Qu9GL0L8g0YLQsNCx0YvQu9Cw0LTRiy7QndOZ0YDQtdGB0YLQtdC00LUg0LDRgdC60LDQt9Cw0L0g0YHTqdC70ZbQvdGW0L3SoyDQn9CdIGvTqdGA0YHQtdGC0LrRltGI0ZYg0LbQvtCz0LDRgNGLIDQtNiDQsNGA0LDQu9GL0pPRi9C90LTQsCDQsdKx0Lsg0L/QtdC/0YHQuNC9INCx0LXQu9GB0LXQvdC00ZbQu9GW0LPRltC9INGI0LXQutGC0LXQudC00ZYu0J3TmdGA0LXRgdGC0LXQu9C10YDQtNC1INCw0YHQutC+0YDRi9GC0YMg0LbSr9C50LXRgdGWINCw0L3QsCDRgdKv0YLRltC90LTQtdCz0ZYg0LDQutGD0YvQt9C00LDRgNC00Ysg0YvQtNGL0YDQsNGC0YPQs9CwINCx0LXQudGW0LzQtNC10LvQs9C10L0u0JbQsNGBINOp0YHQutC10L0gINGB0LDQudGL0L3RhNC10YDQvNC10L3RgtGC0LXRgNC00ZbSoyDQsdC10LvRgdC10L3QtNGW0LvRltCz0ZYg0LDRgNGC0LDQtNGLINC205nQvdC1INCw0YHQutC+0YDRi9GC0YMg0L/RgNC+0YbQtdGB0ZYg0LbQtdGC0ZbQu9C10LTRli4gMSDQtmHRgdC60LAga9Cw0YDQsNC5INGE0LXRgNC80LXQvdGC0YLQtdGA0LTRltKjINCx0LXQu9GB0LXQvdC00ZbQs9GWINC10YDQtdGB0LXQutGC0LXRgNC80LXQvSDRgtC10qPQtdGB0LXQtNGWLtCf0YDQvtGC0LXQvtC70LjRgtC4a9Cw0LvRi9C6INGE0LXRgNC80LXQvdGC0YLQtdGA0LTRltKjINGC06nQvNC10L0g0LHQtdC70YHQtdC90LTRltC70ZbQs9GWICDRgdOZ0LHQuNC70LXRgNC00ZbSoyDQsNGB0LrQsNC30LDQvSDRltGI0LXQuiDQttC+0LvRi9C90YvQvSDRiNGL0YDRi9GI0YLRiyDQutCw0LHQsNGC0YvQvSDQt9Cw0LrRi9C80LTQsNGD0LTQsNC9INC60L7RgNCz0LDQudC00YsuIDIg0YHSsdGA0LDQutC60LAg0LbQsNGD0LDQvyDQsdC10YDRgdC10Lw60JHSsdC7INC20LXRgNC00LXQs9GWINC20LDQu9C/0Ysg0LfTmdGAINCw0L3QsNC70LjQt9GW0L0ga9Op0YDRltC/ICDQutCw0L3RgiDQtNC40LDQsdC10YLRltC9INCx0L7Qu9C20LDRg9Cz0LAg0LHQvtC70LDQtNGLLtCR0LXRgNGW0LvQs9C10L0g0L3TmdGC0LjQttC10LvQtdGA0LPQtSDQutC10LvQtdGC0ZbQvSDQsdC+0LvRgdCw0Lw6MS3Qt9OZ0YDQtNC1INCw0LrRg9GL0LfQtNGL0qMg0LHQvtC70YPRiyBr0LDQvdGCINC00LjQsNCx0LXRgtGWINC60LXQt9GW0L3QtNC1INC/0LDQudC00LAg0LHQvtC70YPRiyDQvNKv0LzQutGW0L0u0JHSsdC7INC/0YDQvtGC0LXQuNC90YPRgNC40Y8g0LrTqdGA0YHQtdGC0LXQtNGWLjEwMzUg0LzQtdC90YjRltC60YLRliDRgdCw0LvQvNCw0LPRiyDQutC+0L3RhtC10L/RgtGA0LDRhtC40Y/Qu9Cw0L3Qs9Cw0L0g0LfTmdGA0LTRliDQutOp0YDRg9Cz0LUg0LHQvtC70LDQtNGLLtCe0Jsg0pvQsNC90YIg0LTQuNCw0LHQtdGC0ZbQvNC10L0g0LFh0LnQu9Cw0L3Ri9GB0YLRiyDRgdKx0LnRi9C60YLRi9C60YLRiyDQutOp0L8g0LrQsNCx0YvQu9C00LDRgyAg0LbTmdC90LUg0LfTmdGA0LTRliDQttC40ZYg0YjRi9KT0LDRgNGDINC905nRgtC40LbQtdGB0ZbQvdC00LUg0LHQvtC70LDQtNGLLtCe0L3QsNC0INGB0L7SoyDQv9Cw0YbQuNC10L3RgtGC0LUg0LfTmdGA0LTRliAwLTIg0LvQtdC50LrQvtGG0LjRgtGC0LXRgNC00ZbSoyAg0LHQvtC70YPRiyBr0LDQu9GL0L/RgtGLINC20LDSk9C00LDQuS7QkNC7INGG0LXQu9C40L3QtNGA0LvQtdGA0LTRltKjIGvTqdC/INC806nQu9GI0LXRgNC00LUg0LHQvtC70YPRiyDQsdKv0LnRgNC10Log06nQt9C10LrRiNC10LvQtdGA0ZbQvdGW0qMg0Ldh0pvRi9C80LTQsNC90YMg0LHQtdC70LPRltGB0ZbQvdC1INGC05nQvS7QkdKx0Lsg0YLQvtC60YHQuNC60LDQu9GL0Log05nRgdC10YAg0LbTmdC90LUg0LzQtdGC0L7QsdC+0LvQuNC60LDQu9GL0Log0LHSsdC30YvQu9GL0YHRgtCw0YDQtNGL0qMg0LHQtdC70LPRltGB0ZYg0LHQvtC70YvQvyDRgtCw0LHRi9C70LDQtNGLLtCh0L7QvdC00LDQudCwayDQutCw0L3RgiDQtNC40LDQsdC10YLRliDQutC10LfRltC90LTQtSDQuNC90YHRg9C70LjQvSDRgtCw0L/RiNGL0LvRi9Cz0YvQvdCwINCx0LDQudC70LDQvdGL0YHRgtGLINC+0YDQs9Cw0L3QuNC30LwgINGN0L3QtdGA0LPQuNGPINCw0LvRgyDSr9GI0ZbQvSDQvNCw0LnQu9Cw0YDQtNGLINGL0LTRi9GA0LDRgtGLINCw0YDQutGL0LvRiyAg0LDSm9C30LDQtNCwINC60LXRgtC+0L3QtNCw0YDQtNGL0pMg0L9h0LnQtNCwINCx0L7Qu9GD0YsgINC20q/Qt9C10LPQtSDQsNGB0LDQtNGLLtCX05nRgNC00LXQs9GWINKb0LDQvdGCIDcg0L/QsNC50YvQtyDRiNCw0LzQsNC00LDQvSDRgtGL0YEg0LbQvtKT0LDRgNGLINCx0rHQuyDSm9Cw0L3RgiDQtNC40LDQsdC10YLRltC90LUg0YLTmdC9INCz0LjQv9C10YDQs9C70LjQutC10LzQuNGP0L3RiyDQutOp0YDRgdC10YLQtdC00ZYu0JfTmdGAINCw0L3QsNC70LjQt9GW0L0g0LbTmdC90LUg0LHQsNC70LDQvdGL0L0ga9C70LjQvdC40LrQsNC70YvQuiDQsdC10LvQs9GW0LvQtdGA0ZbQvSDQutCw0YDQsNC/INC205nQvdC1INGC0LDQu9C00LDQuSDQvtGC0YvRgNGL0L8s0LzQtdC9INCx0LDQu9Cw0LTQsCDQs9C40L/QtdGA0LPQu9C40LrQtdC80LjRj9C90YssINC60LXRgtC+YdGG0LjQtNC+0LfQtNGLINC205nQvdC1INGB0YPRgdGL0LfQtNCw0L3Rg9C00Ysg0LDQvdGL0LrRgtCw0LTRi9C8LtCe0YHRiyDQsWHRgNC70YvQuiDQt9C10YDRgtGC0LXRgyDQvdOZ0YLQuNC20LXQu9C10YDRltC90LUg0YHSr9C50LXQvdC1INC+0YLRi9GA0YvQvyAxINGC0LjQv9GC0ZYg0LrQsNC90YIg0LTQuNCw0LHQtdGC0ZbQvdGW0qMg0LTQtWvQvtC80L/QtdC90YHQsNGG0LjRj9C70LDQvdCz0LDQvSDQutC10LfQtdKj0LTSoyDQtdC60LXQvdGW0L0g0LDQudGC0YPSk9CwINCx0L7Qu9Cw0LTRiyDQvNC10L3RltKjINC90LDSm9GC0Ysg0LrQvtC50pPQsNC9INC00LjQsNCz0L3QvtC30YvQvCDQvtGB0Ys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85" table:style-name="ce1">
            <text:p>1066885</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MS7QldGA0YLQtSDQttCw0YHRgtCw0pPRiyDQsdCw0LvQsNC70LDRgNC00YvSoyDQv9GA0L7RgtC10L7Qu9C40YLQuNC60LDQu9GL0psg0YTQtdGA0LzQtdC90YLRgtC10YDRliDQtdGA0LXQutGI0LUg0LrQtdC70LXQtNGWLNC+0LvQsNGAINCx0LXQu9GB0LXQvdC00ZbQu9GW0LPRliDRgtOp0LzQtdC9INOZ0YDRliDTmdC70YHRltC3INC60LXQu9C10LTRli7QpNC10YDQvNC10L3RgtGC0LXRgCDQv9C10L/RgdC40L0s0LPQsNGB0YLRgNC40LrRgdC40L0g0YLRgNC40L/RgdC40L0s0YXQuNC80L7RgtGA0LjQv9GB0LjQvSzRhdC40LzQvtC30LjQvSzQu9C40L/QsNC30LAg0YHQuNGP0pvRgtGLINGE0LXRgNC80LXQvdGC0YLQtdGAINC20LDRgtCw0LTRiy7QsdGW0YDQsNKbINC+0LvQsNGA0LTRi9KjINCw0LrRgtC40LLRgtGW0LvRltCz0ZYg0YLTqdC80LXQvSDQsdC+0L8g0LrQtdC70LXQtNGWLtCf0LXQv9GB0LjQvdC90ZbSoyAg05nRgdC10YDRliDSm9Cw0YDRi9C9INGB06nQu9GW0L3RltKjINKb0YvRiNKb0YvQu9GL0LTRi9KT0YsgIHBoIDEtMiDQsdC+0LvSk9Cw0L3QtNCwINCx0LDQudKb0LDQu9Cw0LTRiy7QsNC7INC20LDSo9CwINGC0YPRi9C70pPQsNC9INCx0LDQu9Cw0LvQsNGA0LTQsCDQsdKx0Lsg0LrTqdGA0YHQtdGC0LrRltGIIDYsMCDQsdC+0LvQsNC00Ysu0J/QtdC/0YHQuNC9LdC20LDSo9CwINGC0YPSk9Cw0L0g0LHQsNC70LDQu9Cw0YDQtNCwINCw0pvRg9GL0Lcg0LPQuNC00YDQvtC70LjQt9GW0L3QtNC1INCx0LDRgdGC0LDRg9GI0Ysg0YDTqdC70LTRliDQsNGC0pvQsNGA0LDQtNGLLNCw0YHSm9Cw0LfQsNC90LTQsCDQsdOp0LvRltC90LXQtNGWLtC+0L3Ri9KjINC/0YDQvtGC0LXQvtC70LjRgiDQsdC10LvRgSDQttC+0pPQsNGA0Ysg0LHQvtC/INC60LXQu9C10LTRli7QotCg0LjQv9GB0LjQvS3SsNC50pvRiyDQsdC10LfRltC90LTQtSDQv9GA0L7RhNC10YDQvNC10L3RgiDRgtGD0YDQuNC90LTQtSDTqdC90LTRltGA0ZbQu9C10LTRli4g0KLRgNC40L/RgdC40L3QvtCz0LXQvSDRgtKv0YDRltC90LTQtSDQsNGJ0Ysg0ZbRiNC10LrQutC1INGC0q/RgdGW0L8g0L7QvdC00LAg0Y3QvdGC0LXRgNC+0LrQuNC90LDQt9CwINOZ0YHQtdGA0ZbQvdC10L0s0LDQutGC0LjQstGC0ZYg0YTQvtGA0LzQsNKT0LAg0LDRg9GL0YHRi9C/LNGC0LDSk9Cw0LzQtNGL0Log0LDQutGD0YvQl9C00LDRgNCU0Ysg0pvQvtGA0YvRgtGD0pPQsCDSm9Cw0YLRi9GB0LDQtNGLLtCl0LjQvNC+0YLRgNC40L/RgdC40L0t0rHQudKb0Ysg0LHQtdC30ZbQvdC00LXQs9GWINCw0YbQuNC90LDRgNC70YvSmyDQttCw0YHRg9GI0LDQu9Cw0YDQvNC10L0g06nQvdC00ZbRgNGW0LvQtdGC0ZbQvSDQsdC+0L8g0YLQsNCx0YvQu9Cw0LTRiy7QttOZ0L3QtSDQsNGBINKb0L7RgNGL0YLRgyDQutC10LfRltC90LTQtSDQv9Cw0L3QutGA0LXQsNGC0LjQvdC00ZbQuiDRgdOp0LvQvNC10L0gMTIg0LXQu9GWINGW0YjQtdC60LrQtSDRgtKv0YHRltC/LNC+0L3QtNCwINCw0pvRg9GL0LfQtNCw0YDQtNGLINC60ZbRiNGW0YDQtdC6INC/0LXQv9GC0LjQtNGC0LXRgNCz0LUg0LHTqdC70LXQtNGWLtKw0LnSm9GLINCx0LXQt9GW0L3QtNC10LPRliDQv9GA0L7RgtC10L7Qu9C40YLQuNC60LDQu9GL0psg0YTQtdGA0LzQtdC90YLRgtC10YDQtNGW0qMg0LHQtdC70YHQtdC90LTRltC70ZbQs9GWINCw0LvSk9Cw0YjSm9GLIDIg0LbRi9C70LTQsCDQsdC10LvRgdC10L3QtNGW0YDRltC70LXQtNGWLNOZ0YDRliDSm9Cw0YDQsNC5INC+0Lsg0YHQvtC7INKb0LDQu9C/0YvQvdC00LAg0pvQsNC70LDQtNGLLtCt0LvQsNGB0YLQsNC30LAg0rHQudKb0Ysg0LHQtdC30ZYg06nQvdC00ZbRgNC10LTRliDQttOZ0L3QtSDQtNOZ0L3QtdC60LXRgCDRgtGW0L3QtNC10YDRltC90LTQtdCz0ZYg0YHQtdGA0L/RltC80LTRliDRgtCw0LvRiNGL0pvRgtCw0YDQtNGLINCx0rHQt9GD0pPQsCDQutOp0LzQtdC60YLQtdGB0LXQtNGWLiDQmtCw0YDQsdC+0LrRgdC40L/QtdC/0YLQuNC00LDQt9CwLdC/0LXQv9GC0LjQtNGC0LXRgNC00ZYg0LDQvNC40L3Sm9GL0YjSm9GL0LvQtNCw0YDRi9C90LAg0LTQtdC50ZbQvSDRi9C00YvRgNCw0YLQsNGC0YvQvSDRhNC10YDQvNC10L3Rgi7QvtC90YvSoyDQsdC10LvRgdC10L3QtNGW0LvRltCz0ZYg0YPQsNKb0YvRgiDTqdGC0LUg0LrQtdC70LUg0LDRgNGC0LDQtNGLLtCg0LXQvdC90LjQvSAo0YXQuNC80L7Qt9C40L0pLdC905nRgNC10YHRgtC10LvQtdGA0LTRltKjINCw0pvQtiDRgdKv0YLRgtGWINKx0LnRi9GC0YPSk9CwINKb0LDRgtGL0YHQsNGC0YvQvSDRhNC10YDQvNC10L3Rgi7QkNGB0pvQsNC30LDQvdC90YvSoyDRiNGL0YDRi9GI0YLRiyDSm9Cw0LHQsNGC0YvQvdCw0L0g0L/RgNC10YDQtdC90LjQvSDRgtKv0YDRltC90LTQtSDQsdOp0LvRltC90LXQtNGWLtCh0YPRgtC10Log0LrQsNGC0LjQvtC90LTQsNGA0YvQvNC10L0g0LHQtdC70YHQtdC90LTRltGA0ZbQu9C10LTRli7QntC7INC60LDQt9C10LjQvdC00ZYg0YvQtNGL0YDQsNGC0YvQvyzQsNC90LAg0YHSr9GC0ZbQvSDSm9C+0YDRi9GC0YPSk9CwINC606nQvNC10LrRgtC10YHQtdC00ZYu0JHSsdC7INGE0LXRgNC80LXRgiAxINC20LDRgdKb0LAg0LTQtdC50ZbQvdCz0ZYg0LHQsNC70LDQu9Cw0YDQtNCwINOZ0YHRltGA0LXRgdC1INCw0LrRgtC40LLRgtGWLjxiciAvPg0KPGJyIC8+DQoyLtCR0ZbQtyDQsdGD0Lsg0rHRgdGL0L3Ri9C70pPQsNC9INC20LDSk9C00LDQudC00LAg0LfTmdGA0LTRliDQttCw0LvQv9GLINGC0LDQu9C00LDRgyDQsNC90LDQu9C40LfRltC90LXQvSDSm9Cw0L3RgiDQtNC40LDQsdC10YLRliAxINGC0LjQv9GW0L0g0LDQvdGL0pvRgtCw0LTRi9KbLtCV0qMg0LDQu9C00YvQvNC10L0g0LHRltC3INC/0YDQvtGC0LXQuNC90YPRgNC40Y/QvdGLINC606nRgNC10LzRltC3LtCv0pPQvdC4IDAsOSDQv9Cw0LnRi9C3LtCX05nRgNC00LXQs9GWINCw0pvRg9GL0LfQtNGL0qMg0LHQvtC70YPRiyDQvtC7INC60LXQudCx0ZbRgCDQsdKv0LnRgNC10Log0LDRg9GA0YPQu9Cw0YDRi9C90LTQsCDQttOZ0L3QtSDSm9Cw0L3RgiDQtNC40LDQsdC10YLRliDQutC10LfRltC90LTQtSDQsdC+0LvQsNC00Ysu0J7QmyDQtNC40LDQsdC10YLRgtGW0Log0L3QtdGE0YDQvtC/0LDRgtC40Y/QvdGLINC606nRgNGB0LXRgtC10LTRli7Ql9OZ0YDQtNGW0qMg0LzQtdC90YjRltC60YLRliDRgdCw0LvQvNCw0pPRiyzQvdC+0YDQvNCw0LTQsCDQvtC7IDEwMTItMTAyNSDQsdC+0LvRg9GLINGC0LjRltGBLtCX05nRgNC00ZbSoyDQttC+0pPQsNGA0pPRiyDRgtGL0pPRi9C30LTRi9KT0Ysg0L7QvdGL0qMg0YHSsdC50YvSm9GC0YvSm9GC0Ysg0LrQvtC/INC806nQu9GI0LXRgNC00LUg0LbQvtKT0LDQu9GC0YvQvyDQttCw0YLSm9Cw0L3Ri9C9INC606nRgNGB0LXRgtC10LTRli7QkdKx0Lsg0LPQuNC/0LXRgNCz0LvQuNC60LXQvNC40Y/QvdGL0qMg0YHQsNC70LTQsNGA0YvQvdCw0L0g0LHQvtC70LDQtNGLLtCv0pPQvdC4LNKb0LDQvdC90LDQvSDQsNGA0YLRi9KbINKb0LDQvdGCINC305nRgNC80LXQvSDRiNGL0pPRi9C/INC60LXRgtGW0L8g0LbQsNGC0LrQsNC90LTRi9C60YLQsNC9INCx0L7Qu9Cw0LTRiy7QsdGD0Lsg0LfTmdGA0LTRltKjINGC0YvSk9GL0LfQtNGL0pPRi9C9INCw0YDRgtGC0YvRgNC/INC20ZbQsdC10YDQtdC00ZYu0JvQtdC50LrQvtGG0LjRgtGC0LXRgCDQvdC+0YDQvNCw0LTQsCAwLTYg0LrTqdGA0YMg0LDQu9Cw0qPRi9C90LTQsC7Ql9OZ0YDQtNC1IDAtMiDQu9C10LnQutC+0YbQuNGCINGB0LDQvdGLINKb0LDQu9GL0L/RgtGLINC00LXSo9Cz0LXQudC00LUg0LXQutC10L3RltC9INC606nRgNC10LzRltC3LtCv0pPQvdC4INC10LvQtdGD0LvRliDSm9Cw0YPRltC/INC/0LXQvSDQuNC90YQg0LDRg9GA0YMg0LbQvtKbINC10LrQtdC90ZbQvSDQutOp0YDQtdC80ZbQty7QptC40LvQuNC90LTRgNC70LXRgCDSm9Cw0LvRi9C/0YLRi9C00LAg0YbQuNC70LjQvdC00YDQu9C10YAg0LHQvtC70LzQsNGD0Ysg0LrQtdGA0LXQui7QkNC7INCx0rHQuyDQttCw0pPQtNCw0LnQtNCwINGG0LjQu9C40L3QtNGA0LvQtdGAINC606nQvyDQsdC10YDRltC70LPQtdC9LNC+0Lsg0LHSr9C50YDQtdC6INGC0q/RgtGW0LrRiNC10LvQtdGA0ZbQvdGW0qMg0LfQsNKb0YvQvNC00LDQu9KT0LDQvdGL0L0g0LrTqdGA0YHQtdGC0LXQtNGWLtCU0LjQsNCx0LXRgiDQutC10LfRltC90LTQtSDQsdKv0LnRgNC10Log06nQt9C10LrRiNC10LvQtdGA0ZbQvdGW0qMg0LfQsNC60YvQvNC00LDQu9GD0Ysg0L/RgNC+0YLQtdC40L3Rg9GA0LjRjyDQvNC10L0g0YbQuNC70LjQvdC00YDQu9C10YDQtNGW0qMg0LrTqdC/INCx0L7Qu9GD0YvQvdCwINOZ0LrQtdC70LXQtNGWLtCa0LXRgtC+0L0g0LTQtdC90LXQu9C10YDRliDQvtKjLNC90L7RgNC80LDQtNCwINC+0LvQsNGAINC80YPQu9C00LXQvCDQsdC+0LvQvNCw0YPRiyDQutC10YDQtdC6LtCa0LXRgtC+0L3QtNCw0YDQtNGL0qMg0LHQvtC70YPRiyzSm9Cw0L3RgiDQtNC40LDQsdC10YLRliDQutC10LfRltC90LTQtSDQsdC+0LvQsNGC0YvQvSDQutC10YLQvtC90YPRgNC40Y/QvdGLINC606nRgNGB0LXRgtC10LTRli7Rj9KT0L3QuCDQvtGA0LPQsNC90LjQt9C8INCz0LvRjtC60L7Qt9CwINC20LXRgtGW0YHQv9C10YPRiNGW0LvRltCz0ZbQvdC10L0g0LzQsNC50LvQsNGA0LTRiyDRjdC90LXRgNCz0LjRjyDQutOp0LfRliDRgNC10YLRltC90LTQtSDSm9C+0LvQtNCw0L3QsNC00Ysu0J7Qu9Cw0YDQtNGL0qMg0LbQuNC90LDQu9GD0YsgINCw0pPQt9Cw0LTQsCDQttC40L3QsNC70YPRiyDQtNC40LDQsdC10YLRgtGW0Log0LrQtdGC0L7QsNGG0LjQtNC+0LfSk9CwINOZ0LrQtdC70LXQtNGWLtCd0L7RgNC80LDQtNCwINC305nRgNC00LUg0pvQsNC90YIg0LHQvtC70LzQsNGD0Ysg0LrQtdGA0LXQuizQsNC90LDQu9C40LfQtNC1INKb0LDQvdGCIDclINC606nQvyDQvNOp0LvRiNC10YDQtNC1INC606nRgNGB0LXRgtGW0LvRltC/INGC0rHRgC7QntC7INCz0LjQv9C10YDQs9C70LjQutC10LzQuNGP0pPQsCDRgtOZ0L0g0LHQtdC70LPRlizQvtC7INCz0LvRjtC60L7Qt9GD0YDQuNGP0L3RiyDQutOp0YDRgdC10YLQtdC00ZYu0K/Sk9C90Lgg0LfTmdGA0LzQtdC9INKb0LDQvdGC0YLRi9KjINGI0YvSk9GD0YvQvS7QltOZ0L3QtSDRltGI0YLRltKjINCw0YPRi9GA0YPRiyzQsdCw0YEg0LDRg9GA0YMs0YjTqdC70LTQtdGDLNC/0L7Qu9C40YPRgNC40Y8s0YLTmdCx0LXRgiDQttC+0pPQsNGA0YvQu9Cw0YPRiyzRgdCw0LvQvNCw0psg0LbQvtKT0LDQu9GC0YMg0LbTmdC90LUg0LfTmdGAINCw0L3QsNC70LjQt9C00LXRgNGW0L3TmdGC0LjQttC10YHRliDQvtGB0YvQu9Cw0YDQtNGL0qMg0LHQsNGA0LvRi9KT0Yss0LHQsNC70LDQtNCwINC00LjQsNCx0LXRgiDQtdC60LXQvdGW0L0s0LTQuNCw0LHQtdGC0YLRltC6INC60LXRgtC+0LDRhtC40LTQvtC3INC10LrQtdC90ZbQvSDQutOp0YDRgdC10YLQtdC00ZYuPGJyIC8+DQo=</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3" table:style-name="ce1">
            <text:p>1066903</text:p>
          </table:table-cell>
          <table:table-cell office:value-type="string" table:style-name="ce1">
            <text:p>kazakh</text:p>
          </table:table-cell>
          <table:table-cell office:value-type="string" table:style-name="ce1">
            <text:p>Билет3&amp;lt;br /&amp;gt; 1.Ерте жастағы балалардын протеолитикалық ферменттерің ерекшеліктерің атаныз және қандай ферментер оларға жатады ?&amp;lt;br /&amp;gt; 2.10 жасар бала,шағымдары ішінің,басының ауыруы,шөлдеу (тәуллігіне 3-4 литрге дейін су ішеді), несеп шығаруы жиі,тәббиетті жоғар. Ауырғанына екі апта болған. Қарағанда әлсіз,терісі ақшыл, қүрғақ. Жалпы зәр анализде белок 0.9%, тығыздығы 1035, лейкоциттер 0-2 көз аймағында, цилиндрлер көп, кетон денелері+++, қант 7%.Жалпы зәр анализын интерпретацияланыз. &amp;lt;br /&amp;gt;</text:p>
          </table:table-cell>
          <table:table-cell office:value-type="string" table:style-name="ce1">
            <text:p>MS7Qn9GA0L7RgtC10L7Qu9C40YLQuNC60LDQu9GL0psg0YTQtdGA0LzQtdC90YLRgtC10YAg0LDSm9GD0YvQtyDQutCw0YLQvtCx0L7Qu9C40LfQvNGW0L3QtSDRj9KT0L3QuCDQsNKb0YPRi9C30LTQsNGA0LTRiyDQsNC80LjQvdC60YvRiNC60YvQu9C00LDRgNGL0L3QsCDQtNC10LnRltC9INGL0LTRi9GA0LDRgtCw0YLRi9C9INGE0LXRgNC80LXQvdGC0YLQtdGAINCx0L7Qu9GL0L8g0YLQsNCx0YvQu9Cw0LTRiy4g0JrRltGI0LrQtdC90YLQsNC5INCx0LDQu9Cw0LvQsNGA0LTQsCAsINOZ0YHRltGA0LXRgdC1INC20LDSo9CwINGC0YPSk9Cw0L0g0LHQsNC70LDQu9Cw0YDQtNCwINCx0rHQuyDRhNC10YDQvNC10L3RgtGC0LXRgCDQtdGA0LXQutGI0LXQu9GW0LrRgtC10YDQs9C1INC40LUg0LTQtdGB0LXQuiDQsdC+0LvQsNC00Ysu0K/Sk9C90Lgg0L7Qu9Cw0YAg0LDRgdKb0L7RgNGL0YLRgyDQttKv0LnQtdGB0ZbQvdGW0qMg0LbQtdGC0ZbQu9C80LXQs9C10L3QtNGW0LrRgtC10L0g0LbTmdC90LUg0YHRi9GA0YLRgtCw0L0g0LrQtdC70LXRgtGW0L0g0YLQsNC80LDSm9Kb0LAg0LHQtdC50ZbQvNC00LXQu9GD0ZbQvdC1INCx0LDQudC70LDQvdGL0YHRgtGLLiDQkdKx0Lsg0YTQtdGA0LzQtdC90YLRgtC10YAg0YLQsNC80LDSm9GC0YvSoyDSm9C+0YDRi9GC0YvQu9GD0YvQvSwg0LXRgdC60ZYg0LbQsNGB0YPRiNCw0LvQsNGA0LTRi9KjINGL0LTRi9GA0LDRg9GL0L0g0LbTmdC90LUg0YLQsNKT0Ysg0LHQsNGB0pvQsCDQsdC40L7Qu9C+0LPQuNGP0LvRi9KbINC/0YDQvtGG0LXRgdGC0LXRgNCz0LUg0pvQsNGC0YvRgdCw0LTRiy7Qn9GA0L7RgtC40LvQuNGC0LjQutCw0LvRi9KbINGE0LXRgNC80LXQvdGC0YLQtdGAINCw0pvRg9GL0LfQtNCw0YDQtNGL0qMg0LDQvNC40L3Sm9GL0YjSm9GL0LvQtNCw0YDRiyDQvNC10L0g0L/QtdC/0YLQuNC00YLQtdGA0LPQtSDQsNC50L3QsNC70YPRi9C90LAg0pvQsNGC0YvRgdCw0LTRiy4g0JbQsNKj0LAg0YLRg9Cz0LDQvSDQsdCw0LvQsNC70LDRgCDQvNC10L0g0LXRgNGC0LUg0LbQsNGB0YLQsNKT0Ysg0LHQsNC70LDRgNC00LAg0LHSsdC7INGE0LXRgNC80LXQvdGCINC20q/QudC10LvRliDRgtKv0YDQtNC1ICDQtNCw0LzQuNC00Ysu0JHQtdC70YHQtdC90LTRltC70ZbQs9GWINC10YDQtdGB0LXQutGC0LXRgNCz0LUg0LrQsNGA0LDQs9Cw0L3QtNCwINOp0LfQs9C10YjQtdC70LXRgy4g0K/Sk9C90Lgg0LHQtdC70YHQtdC90LTRltC70ZbQs9GWINGI0LXQutGC0LXRg9C70ZYuINCe0Lsg0LDRgSDSm9C+0YDRi9GC0YPQtNGL0qMg0YLQvtC70YvSmyDQttC10YLRltC70LzQtdGD0ZbQvdC1INCx0LDQudC70LDQvdGL0YHRgtGLLiDQodC+0L3QtNGL0pvRgtCw0L0g0LHQtdC70YHQtdC90LTRltC70ZbQs9GWINGI0LXQutGC0LXRg9C70ZYuINCa0ZbRiNC60LXQvdGC0LDQuSDQsdCw0LvQsNC70LDRgNC00LDSk9GL0Lgg0LzQsNKj0YvQt9C00Ysg0L/RgNC+0YLQtdC+0LvQuNGC0LjQutCw0LvRi9KbINGE0LXRgNC80LXQvdGC0YLQtdGA0LPQtSDRgtC+0pvRgtCw0LvRgdCw0LwuINCf0LXQv9GB0LjQvS0g0LDRgdKb0LDQt9Cw0L3QvdGL0qMg0pvRi9GI0pvRi9C7INC+0YDRgtCw0YHRi9C90LTQsCDQttKx0LzRi9GBINGW0YHRgtC10LnRgtGW0L0g0LDSm9GD0YvQt9C00Ysg0L/QtdC/0YLQuNC0LiDQldGA0LXQutGI0LXQu9GW0LPRliDQttCw0qPQsCDRgtGD0LPQsNC9INGB05nQsdC40LvQtdGA0LTQtSDQsdKx0Lsg0YTQtdGA0LzQtdC90YIg0LHQtdC70YHQtdC90LTRltC70ZbQs9GWINGC06nQvNC10L0sINGC0LXQuiAzLTQg0LDQudC00LDQvSDQutC10LnQvdGWINGC0L7Qu9GL0psg0LbSsdC80YvRgSDRltGB0YLQtdC5INCx0LDRgdGC0LDQudC00YsuINCf0LDQvdC60YDQtdCw0YLQuNC60LDQu9GL0psg0L/RgNC+0YLQtdCw0LfQsNC70LDRgCwg0Y/Sk9C90Lgg0YLRgNC40L/RgdC40L0sINGF0LXQvNC+0YLRgNC40L/RgdC40L0sINC60LDRgNCx0L7QutGB0LjQv9C10L/RgtC40LTQsNC30LDQu9Cw0YAu0rDQudKb0Ysg0LHQtdC30ZbQvdC10L0g0LHTqdC70ZbQvdC10YLRltC9INC/0LXQv9GC0LjQtNGC0LXRgCDQvNC10L0g0LDQvNC40L3QutGL0YjQutGL0LvQtNCw0YDRi9C9INGL0LTRi9GA0LDRgtCw0LTRiy4g0JHSm9C7INGE0LXRgNC80LXQvdGCINC+0L0g0LXQutGWINC10LvRliDRltGI0LXQutGC0LUg0LbSsdC80YvRgSDRltGB0YLQtdC50LTRli4g0JbQsNKj0LAg0YLRg9KT0LDQvSDRgdOZ0LHQuNC70LXRgNC00LUg0LHSsdC7INGE0LXRgNC80LXQvdGC0YLQtdC00ZYg0LDQtyDQvNOp0LvRiNC10YDQtNC1INCx06nQu9GW0L3QtdC00ZYuINCi0LXQuiA2INCw0LnQu9GL0pPRi9C90LAg0pvQsNGA0LDQuSDQsNGA0YLQsNC00Ysu0KXQtdC80L7Qt9C40L0t0LHSsdC7INC60LDQt9C10LjQvSDQsNKb0YPRi9C3INGB0q/RgtGW0L3RltKjINKb0YvRidKb0YvQuyDQvtGA0YLQsNC00LAg0pvQsNC70YvSo9C00LDRg9GL0L3QsCDQutOp0LzQtdC60YLQtdGB0LXQtNGWLtCR0rHQuyDRgdGD0YLRgtGW0qMg0LDRgdKb0LDQt9Cw0L3QvdGL0qMg0pvRi9GI0pvRi9C7INC+0YDRgtCw0YHRi9C90LTQsCDRgdCw0pvRgtCw0LvRg9GL0L3QsCDQvNKv0LzQutGW0L3QtNGW0Log0LHQtdGA0LXQtNGWLtCV0YDQtdC60YjQtdC70ZbQs9GWINC20LDSk9CwINGC0YPSk9Cw0L0g0YHTmdCx0LjQtNC1INCx0LXQu9GB0LXQvdC00ZbQu9GW0LPRliDQttC+0LPQsNGA0YsuINCW0YvQu9C00LDRgCDTqdGC0LUg0LHQsNC70LAg06nRgdC60LXQvSDRgdCw0LnRi9C9INCx0LXQu9GB0LXQvdC00ZbQu9GW0LPRliDRgtOp0LzQtdC90LTQtdC/INC60LXRgtC10LTRli4g0K/Sk9C90Lgg0LHSsdC7INGB0q/RgtGC0ZbSoyDSm9C+0YDRi9GC0YvQu9GD0YvQvdCwINC606nQvNC10LrRgtC10YHQtdC00ZYuINCt0LvQsNGB0YLQsNC30LAt0LHSsdC7INGE0LXRgNC80LXQvdGCINGC0ZbQvdC00LXRgNC90LTQtSDRjdC70LDRgdGC0LjQvdC90ZbSoyDRi9C00YvRgNCw0YPRi9C90LAg0LbQsNGD0LDQv9GC0YsuINCV0YDQtdC60YjQtdC70ZbQs9GW0L3QtSDQutC10LvQtdGAINCx0L7Qu9GB0LDQvCDQsdC10LvRgdC10L3QtNGW0LvRltCz0ZYg0YLQsNC80LDSm9GC0YvSoyDSm9C+0YDRi9GC0YvQu9GD0YvQvdCwINCx0LDQudC70LDQvdGL0YHRgtGLINKx0LvSk9Cw0Y/QtNGLLiDQkNCc0LjQu9Cw0LfQsCAtINCx0rHQuyDSm9Cw0L3RgtGC0Ysg0YvQtNGL0YDQsNGC0LDRgtGL0L0g0YTQtdGA0LzQtdC90YIu0JrTqdC80ZbRgNGB0YPQu9Cw0YDQtNGLINKb0L7RgtGL0YLRgyDSr9GI0ZbQvSDQvNCw0qPRi9C30Ysg0LfQvtGALtCW0LDSo9CwINGC0YPSk9Cw0L0g0YHTmdCx0LjQu9C10YDQtNC1INCx0LXQu9GB0LXQvdC00ZbQu9GW0LPRliAg0YLTqdC80LXQvSDQsdC+0LvRi9C/INC60LXQu9C10LTRli4g0KLQsNC80LDSm9Kb0LAg0LHQsNC50LvQsNC90YvRgdGC0Ysg0LHQtdC70YHQtdC90LTRltC70ZbQs9GWINCw0YDRgtCw0LTRiy4g0JbQsNKj0LDQtNCw0L0g0YLRg9KT0LDQvSDQvdOZ0YDQtdGB0YLQtdC70LXRgNC00LUg0LbQsNC70L/RiyDRhNC10YDQvNC10L3RgtGC0LXRgNC00ZbSoyDQsdC10LvRgdC10L3QtNGW0LvRltCz0ZYg0YLTqdC80LXQvSDQttOZ0L3QtSDQsNGB0pvQvtGA0YvRgtGDINCw0L3QsCDRgdKv0YLRltC9INKb0L7RgNGL0YLRg9C80LXQvSDRiNC10LrRgtC10LvQtdC00ZYuNiDQsNC50LTQsCDQsdCw0LvQsNC70LDRgNC00YvSoyDRhNC10YDQvNC10L3RgtGC0ZbQuiDQttKv0LnQtdGB0ZYg0LDQudGC0LDRgNC70YvSm9GC0LDQuSDQtNCw0LzRgtC40LTRiy4g05jRgdGW0YDQtdGB0LUg0rHQudKb0Ysg0LHQtdC30ZYg0YTQtdGA0LzQtdC90YLRgtC10YDRli7QkdKb0Lsg0LHQsNC70LDQvdGL0qMg0YLQsNC80LDSm9GC0Ysg0pvQvtGA0YvRgtGDINKb0LDQsdGW0LvQtdGC0ZbQvSDQsNGA0YLRgtGL0YDQsNC00YsuIDEg0LbQsNGB0pvQsCDSm9Cw0YDQsNC5INCx0LDQu9Cw0L3Ri9KjINGE0LXRgNC80LXQvdGC0YLRltC6INC20q/QudC10YHRliDRgtC+0LvRi9Kb0YLQsNC5INC00LDQvNC40LTRiy7SmtC+0YDRi9GC0YvQvdC00YvQu9Cw0YHQsNC8INC60ZbRiNC60LXQvdGC0LDQuSDQsdCw0LvQsNC70LDRgNC00LAg0L/RgNC+0YLQtdC+0LvQuNGC0LjQutCw0LvRi9KbINGE0LXRgNC80LXQvdGC0YLQtdGAINGD0LDSm9GL0YIg06nRgtC1INC60LXQu9C1INC00LDQvNC40LTRiy4g0JHQsNC70LDQvdGL0qMg0LbQsNC70L/RiyDQtNCw0LzRg9GL0LzQtdC9INCx0ZbRgNCz0LUg0LbSr9GA0LXQtNGWINC00LXRgdC10Lwg0LHQvtC70LDQtNGLLiDQntC7INOp0Lcg0LrQtdC30LXQs9GW0L3QtNC1INC60q/RgNC00LXQu9GWINGC0LDSk9Cw0LzQtNCw0YDQtNGLINKb0L7RgNGL0YLRg9KT0LAg0LzSr9C80LrRltC90YjRltC70ZbQs9GWINCx0L7Qu9Cw0LTRiy48YnIgLz4NCjxiciAvPg0KPGJyIC8+DQoyLtCX05nRgNC00LUg0LDSm9GD0YvQtyAwLDkg0L/QsNC50YvQty4g0JDQuyDQt9OZ0YDQtNC10LPRliDQsdC10LvQvtC6IDAsMDMzINCzL9C7INCw0YHQv9Cw0YPRiyDQutC10YDQtdC6INC10LTRli7Qn9GA0L7RgtC10LjQvdGD0YDQuNGPINC+0YDRi9C9INCw0LvRi9C/INGC0rHRgC4g0J/RgNC+0YLQtdC40L3Rg9GA0LjRjyDQsdKv0LnRgNC10Log0LfQsNKb0YvQvNC00LDQvdGD0Ysg0L3QtdC80LXRgdC1INC305nRgCDQttC+0LvQtNCw0YDRi9C90YvSoyDQuNC90YTQtdC60YbQuNGP0YHRi9C9INC606nRgNGB0LXRgtC10LTRli7QkdGW0YDQsNKbINCx0rHQuyDQttCw0pPQtNCw0LnQtNCwINC/0YDQvtGC0LXQudC90YPRgNC40Y8g06nRgtC1INC20L7Qs9Cw0YDRiyDQtdC80LXRgS4sINCx0rHQuyDRg9Cw0pvRi9GC0YjQsCDQvdC10LzQtdGB0LUg0YTRg9C90LrRhtC40L7QvdCw0LvQtNGL0psg06nQt9Cz0LXRgNGW0YHRgtC10YDQtNGWINC606nRgNGB0LXRgtC10LTRli4g0JHSr9C50YDQtdC6INCw0YPRgNGD0Ysg0LHQvtC70LzQsNGB0LAg0LTQsCwg0LHSsdC7INKb0LDQvdGCINC00LjQsNCx0LXRgtGW0LzQtdC9INCx0LDQudC70LDQvdGL0YHRgtGLINCx0L7Qu9GD0Ysg0LzSr9C80LrRltC9LiAg0JfTmdGA0LTRltKjINGC0YvSk9GL0LfQtNGL0pPRiyAxMDM1LiDQkdKx0Lsg0LzTmdC9INKb0LDQtNGL0L/RgtGLLtCR0rHQuyDQsdKv0LnRgNC10LrRgtGW0qMg0LrQvtC90YbQtdC90YLRgNCw0YbQuNGP0YHRiyDSm9Cw0LvRi9C/0YLRiyDQtdC60LXQvdGW0L0g0LrTqdGA0YHQtdGC0LXQtNGWLiDQm9C10LnQutC+0YbQuNGC0YLQtdGAIDAtMi4g0JDQtyDQvNOp0LvRiNC10YDQtNC1LiDQkdC10LvRgdC10L3QtNGWINKb0LDQsdGL0L3Rg9KT0LAg0YLTmdC9INC10LzQtdGBINC606nRgNGB0LXRgtC60ZbRiC4g0KbQuNC70LjQvdC00YDQu9C10YDQtNGW0qMg0LrTqdC/INCx0L7Qu9GD0Yst0LHSr9C50YDQtdC6INCw0YDRg9C70LDRgNGL0L0o0LPQu9C+0LzQtdGA0YPQu9Cw0L3QtdGE0YDQuNGCLCDQvdC10YTRgNC+0L/QsNGC0LjRjykg0LrTqdGA0YHQtdGC0LXQtNGWLiDQkNC7INCx0pvQuyDQttCw0pPQtNCw0LnQtNCwINC00LjQsNCx0LXRgtC/0LXQvSDQsdCw0LnQu9Cw0L3Ri9GB0YLRiyDQsdKv0LnRgNC10LrRjNGC0ZbSoyDQt9Cw0pvRi9C80LTQsNC90YPRi9C9INC606nRgNGB0LXRgtC10LTRli4g0JrQtdGC0L7QvdC00Ysg0LTQtdC90LXQu9C10YDQtNGW0qMg0LHQvtC70YPRiyDQutC10YLQvtC3INCx0LXQvSDQutC10YLQvtCw0YbQuNC00L7Qt9C00YvSoyDQsdC10LvQs9GW0YHRli4g0JHSsdC7IDEg0YLQuNC/0YLRliDQtNC40LDQsdC10YLQv9C10L0g0LDRg9GL0YDQsNGC0YvQvSDQsdCw0LvQsNC70LDRgNC00Ysg0LrQtdC30LTQtdGB0LXQtNGWLiDSmtCw0L3RgiA3INC/0LDQudGL0LcuINCR0rHQuyDQutOp0YDRgdC10YLQutGW0Ygg0LPQuNC/0LXRgNCz0LvQuNC60LXQvNC40Y/QvdGL0qMg0LHQtdC70LPQtdGB0ZYuINCX05nRgNC00LXQs9GWINKb0LDQvdGCINC00LjQsNCx0LXRgtGC0ZbQuiDQtNC40LDQs9C90L7RgdGC0LjQutCw0L3Ri9KjINC80LDSo9GL0LfQtNGLINC606nRgNGB0LXRgtC60ZbRiNGWLiDQndCw0YPSm9Cw0YHRgtGL0qMg0LrQu9C40L3QuNC60LDQu9GL0psg0LTQtdGA0LXQutGC0LXRgNGWINC80LXQvSDQt9C10YDRgtGF0LDQvdCw0LvRi9KbINGC0LDQu9C00LDRgyDQvdOZ0YLQuNC20LXQu9C10YDRliAxINGC0LjQv9GC0ZbQuiDQtNC40LDQsdC10YLRgtKjINC606nRgNGB0LXRgtC10LTRli4g0JTQuNCw0LPQvdC+0LfQtNGLINGA0LDQsNGB0YLQsNGDINC80LXQvSDQtdC80LTQtdGDINKv0YjRltC9INGC0LDSk9GLINC00LAg0pvQvtGB0YvQvNGI0LAg0LfQtdGA0YLRgtC10YPQu9C10YDQtNGWINC20q/Qt9C10LPQtSDQsNGB0YvRgNGDINKb0LDQttC10YIuPGJyIC8+DQo=</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87" table:style-name="ce1">
            <text:p>915387</text:p>
          </table:table-cell>
          <table:table-cell office:value-type="string" table:style-name="ce1">
            <text:p>russian</text:p>
          </table:table-cell>
          <table:table-cell office:value-type="string" table:style-name="ce1">
            <text:p>Билет3&amp;lt;br /&amp;gt; 1.Назовите особенности протеолитических ферментов у детей раннего возраста и какие ферменты к ним относятся?&amp;lt;br /&amp;gt; 2.Ребенку 10 лет, обратился к врачу с жалобами на боли в животе, головную боль, жажду (пьет до 3-4 литров воды в сутки), частое мочеиспускание, повышенный аппетит, похудание. Болен в течении 2-х недель. При осмотре вялый, бледный, выраженная сухость кожи, снижение тургора тканей. В общем анализе мочи белок 0.9%, уд. вес 1035, лейкоциты 0-2 в п/ зрения, цилиндры в большом количестве, кетоновые тела+++, сахар 7%. Сделайте интерпретацию общего анализа мочи. &amp;lt;br /&amp;gt;</text:p>
          </table:table-cell>
          <table:table-cell office:value-type="string" table:style-name="ce1">
            <text:p>MSnQvtGB0L7QsdC10L3QvdC+0YHRgtC4INC00LXRgtC10Lkg0YDQsNC90L3QtdCz0L4g0LLQvtC30YDQsNGB0YLQsCDQv9GA0L7RgtC10L7Qu9C40YLQuNGH0LXRgdC60LjQtSDRhNC10YDQvNC10L3RgtGLINGB0LvRjtC90L3Ri9C1INC20LXQu9C10LfRiyDRgyDQtNC10YLQtdC5INGF0L7RgNC+0YjQviDRgNCw0LfQstC40YLRiyDQuCDQuNGFINGE0LXRgNC80LXQvdGC0LDRgtC40LLQvdCw0Y8g0LDQutGC0LjQstC90L7RgdGC0Ywg0L7Rh9C10L3RjCDQstGL0YHQvtC60LAg0Y3RgtC+INC90YPQttC90L4g0LTQu9GPINGC0L7Qs9C+INGH0YLQviDQsdGLINGA0LDRiNC40L/Qu9GP0YLRjCDRg9Cz0LvQtdCy0L7QtNGLINC4INC40LzQtdC10YIg0LDQvdGC0LjQsdCw0LrRgtC10YDQuNCw0LvRjNC90YPRjiDRgdCy0L7QudGB0YLQstC+INGC0LDQuiDQutCw0Log0LTQtdGC0Lgg0L/QvtC30L3QsNGOINC80LjRgCDRgtGA0L7Qs9Cw0Y8g0Lgg0L/RgNC+0LHRg9GPINCy0YHRkSDRh9GC0L4g0LjQvCDQv9C+0LQg0YDRg9C60Lgg0YLQsNC6INC20LUg0L/QuNGJ0LXQstCw0YDQuNGC0LXQu9GM0L3Ri9C1INGE0LXRgNC80LXQvdGC0Ysg0L7Rh9C10L3RjCDQv9C70L7RhdC+INGA0LDQt9Cy0LjRgtGLINC4INCy0YvQtNC10LvRj9GO0YIg0YLQsNC8INC80LXQvNCx0YDQsNC90L3QvtC1INC/0LjRidC10LLQsNGA0LXQvdC40LUg0Lgg0LLRi9C00LXQu9GP0Y7RgiDQvtGH0LXQvdGMINC80LDQu9C+INGE0LXRgNC80LXQvdGC0L7QsiDQstC+INCy0YDQtdC80Y8g0LzQvtC70L7Rh9C90L7Qs9C+INC/0LXRgNC40L7QtNCwINC90L3QviDQvtC90Lgg0LXRgdGC0Ywg0L3QviDQuNGFINCw0LrRgtC40LLQvdC+0YHRgtGMINC+0YfQtdC90Ywg0LzQsNC70LAg0LLRi9C00LXQu9GP0Y7RgiDRgtCw0LrQuNC1INGE0LXRgNC80LXQvdGC0Ysg0Y3QvdGC0LXRgNC+0LrQuNC90LDQt9CwINGE0LDRgdGE0LDRgtCw0LfQsCDQu9C40L/QsNC30LAgINC+0YfQtdC90Ywg0LzQsNC70L4g0LLRi9GA0LDQsdCw0YLRi9Cy0LDQtdGC0YHRjyDRgdC+0LvRj9C90L3QvtC5INC60LjRgdC70L7RgtGLINGN0YLQviDRj9Cy0LvRj9C10YLRgdGPINCw0L3QsNGC0L7QvNC40YfQtdGB0LrQuNC5LdGE0LjQt9C40L7Qu9C+0LPQuNGH0LXRgdC60LjQvCDQvtGB0L7QsdC10L3QvdC+0YHRgtC10Lkg0LTQtdGC0LXQuSDRgNCw0L3QvdC10LPQviDQstC+0LfRgNCw0YHRgtCwINC90L4g0L7QvdC4INGBINC80L7QvNC10L3RgtCwINGA0L7QttC00LXQvdC40LUg0LbQtdC70YPQtNC+0Log0L/RgNC40YHQv9C+0YHQvtCx0LvQtdC9INC6INCz0LjQtNGA0L7Qu9C40LfRgyDQvNCw0YLQtdGA0Lgg0LzQvtC70L7QutCwINC4INCy0YvRgNCw0LHQsNGC0YvQstCw0LXRgtGB0Y8g0YHQv9C10YbQuNCw0LvRjNC90YvQtSDRhNC10YDQvNC10L3RgtC+0LIg0LIg0LzQsNC70L7QvCDQutC+0LvQuNGH0LXRgdGC0LLQtSDRgtCw0LrQuNC1INC60LDQuiAg0YTQuNGC0LDQu9GM0L3Ri9C5INC/0LXQv9GB0LjQvSDQuCDQvNCw0LvRjNGC0LDQt9GLINC4INC70LDQutGC0LDQt9GLINC+0L3QuCDQsdGD0LTRg9GCINCz0LjQtNGA0L7Qu9C40LfQuNGA0L7QstCw0YLRjCDQvNC+0LvQvtC60L4g0LzQsNGC0LXRgNC4INGC0L7QtdGB0YLRjCDQsdC10LvQvtC6INC40Lcg0LfQsCDRgtC+0LPQviDRh9GC0L4g0YMg0LTQtdGC0LXQuSDRgdC10LrRgNC10YLQvtGA0L3Ri9C5INGB0L/QvtGB0L7QsdC90L7RgdGC0Ywg0LbQtdC70YPQtNC60LAg0YDQsNC30LLQuNGC0LAg0L7Rh9C10L3RjCDRgdC70LDQsdC+INC+0YIg0YLRg9C00LAg0LLRi9GC0LXQutCw0LXRgiDRgdC70LDQsdCw0Y8g0LfQsNGJ0LjRgtCwINC+0YIg0LLQvdC10YjQvdC40Lkg0YHRgNC10LTQuCDQvdC+INGN0YLQviDQvdCw0LTQviDRh9GC0L4g0LHRiyDQv9C+0LvRg9GH0LDRgtGMINC+0YIg0LzQvtC70L7QutCwINC80LDRgtC10YDQuCDQtNC+0YHRgtCw0YLQvtGH0L3QviDQutC+0LvQuNGH0LXRgdGC0LLQviDQuNC80LzRg9C90L7Qs9C70L7QsdGD0LvQuNC90Ysg0YHQviDQstGA0LXQvNC10L3QtdC8INCz0LTQtS3RgtC+INC6INC/0LXRgNCy0L7QvNGDINCz0L7QtNGDINC20LjQt9C90Lgg0YMg0LTQtdGC0LXQuSDQttC10LvRg9C00L7QuiDQvdCw0YfQuNC90LDQtdGCINCy0YvRgNCw0LHQsNGC0YvQstCw0YLRjCDQttC10LvRg9C00L7Rh9C90YvQuSDQu9C40L/QsNC30LAg0LrQvtGC0L7RgNCw0Y8g0YHQv9C+0YHQvtCx0L3QsCDQuiDQs9C40LTRgNC+0LvQuNC30YMg0LbQuNGA0L7QsiDQsiDQvdC10LnRgtGA0LDQu9GM0L3QvtC8INGB0YDQtdC00LUg0LggINC/0L4g0LzQtdGA0LUg0YDQsNGB0YjQuNGA0LXQvdC40LUg0L/QuNGC0LDQvdC40LXQvCDRgNC10LHQtdC90LrQsCDRgtCw0Log0LbQtSDRgdC90LjQttCw0LXRgtGB0Y8g0LDQutGC0LjQstC90L7RgdGC0Ywg0LvQsNC60YLQsNC30Ysg0LogNS02INCz0L7QtNCw0Lwg0LjQu9C4INC10LPQviDQstGL0YDQvtCx0L7RgtC60LAg0L7RgiDRgtGD0LTQsCDQvNC+0LbQtdGCINGB0LvRg9GH0LjRgtGB0Y8g0L3QtSDQv9C10YDQtdC90L7RgdC40LzQvtGB0YLRjCDQvNC+0LvQvtC60LAg0L/QvtC00LbQtdC70YPQtNC+0YfQvdCw0Y8g0LbQtdC70LXQt9CwINCy0YvRgNCw0LHQsNGC0YvQstCw0LXRgiDRhNC10YDQvNC10L3RgtGLINC60L7RgtC+0YDRi9C1INGA0LDRiNC10L/Qu9GP0Y7RgiDRg9Cz0LvQtdCy0L7QtNGLINC20LjRgNGLINC4INCx0LXQu9C60Lgg0YMg0LTQtdGC0LXQuSDRgNCw0L3QvdC10LPQviDQstC+0LfRgNCw0YHRgtCwINC90LjQt9C60L7QtSDQutC+0LvQuNGH0LXRgdGC0LLQviDQv9Cw0L3QutGA0LDRgtC40YfQtdGB0LrQvtCz0L4g0YHQvtC60LAg0Lgg0YTQtdGA0LzQtdC90YLRiyDQv9C+0LTQttC10LvRg9C00L7Rh9C90L7QuSDQttC10LvQtdC30Ysg0LzQsNC70L4g0LDQutGC0LjQstC90Ys8YnIgLz4NCjxiciAvPg0KMikg0YMg0L3QsNGI0LXQs9C+INGO0L3QvtCz0L4g0L/QsNGG0LjQtdC90YLQsCDRj9Cy0L3Ri9C1INC/0YDQuNC30L3QsNC60Lgg0YHQsNGF0LDRgNC90L7Qs9C+INC00LjQsNCx0LXRgtCwINGC0LDQuiDQutCw0Log0LLRgdC1INCw0L3QsNC70LjQt9GLINGB0L7QvtGC0LLQtdGC0YHRgtCy0YPQtdGCINC6INGN0YLQvtC80YMg0YLQviDQtdGB0YLRjCDRgNC10LHQtdC90L7QuiDQvtGH0LXQvdGMINC80L3QvtCz0L4g0L/RjNGR0YIg0L/QvtCy0YvRiNC10L3QvdGL0Lkg0LDQv9C/0LXRgtC40YIg0L3QviDQvdC1INC90LDQsdC40YDQsNC10YIg0LzQsNGB0YHRgyDRjdGC0L4g0L7Qt9C90LDRh9Cw0LXRgiDQviDRgtC+0Lwg0YfRgtC+INCz0LvRjtC60L7Qt9CwINC60L7RgtC+0YDQsNGPINC00L7Qu9C20L3QsCDQt9CwINGB0YfRkdGCINC40L3RgdGD0LvQuNC90LAg0L/QvtC/0LDRgdGC0Ywg0LIg0LrQu9C10YLQutC4INC90LUg0L/QvtC/0LDQtNCw0LXRgiDQuCDQvdCw0YXQvtC00LjRgtGB0Y8g0LIg0LrRgNC+0LLQuCDQvtGCINGC0YPQtNCwINCw0L3QsNC70LjQtyDQvdCwINGB0LDRhdCw0YAg0L/QvtCy0YvRiNC10L0g0Lgg0LjQtyDQt9CwINGN0YLQvtCz0L4g0L7RgNCz0LDQvdC40LfQvCDQvdCw0YfQuNC90LDQtdGCINC60LDRgtCw0LHQvtC70LjRh9C10YHQutGD0Y4g0YTRg9C90LrRhtC40Y4g0LbQuNGA0L7QsiDRh9GC0L4g0LHRiyDQvtCx0LXRgdC/0LXRh9C40YLRjCDQutC70LXRgtC60Lgg0Y3QvdC10YDQs9C40Lgg0LDRgtGEINC4INC+0YIg0LrQsNGC0LDQsdC+0LvQuNC30LzQsCDQttC40YDQvtCyINC+0YHQstC+0LHQvtC20LTQsNC10YLRgdGPINC+0LPRgNC+0LzQvdC+0LUg0LrQvtC70LjRh9C10YHRgtCy0L4g0LrQtdGC0L7QvdC+0LLRi9GFINGC0LXQuyDQuCDQvtC90Lgg0L7QsdC90LDRgNGD0LbQuNCy0LDRjtGC0YHRjyDQsiDQvNC+0YfQtSDQuCDQv9C70Y7RgSDRgNC10LHQtdC90L7QuiDQvNC90L7Qs9C+INC/0YzRkdGCINC+0YIg0YLRg9C00LAg0Lgg0L/QvtCy0YvRiNC10L3QvdC+0LUg0LzQvtGH0LXQuNGB0L/Rg9GB0LrQsNC90LjQtSDQuCDQvtGCINGC0YPQtNCwINC60L7QttCwINGB0YPRhdCw0Y8g0Lgg0YLRg9Cz0L7RgCDQutC+0LbQuCDRgdC90LjQttC10L3QvdGL0Lkg0YLQvtC10YHRgtGMINCy0L7QtNCwINCyINC+0YDQs9Cw0L3QuNC30Lwg0LTQvtC70LbQvdGL0Lwg0L7QsdGA0LDQt9C+0Lwg0L3QtSDQv9C+0L/QsNC00LDQtdGCINGC0L7QtdGB0YLRjCDQsiDRgdCw0LzQuCDQutC70LXRgtC60Lgg0LjQtyDQt9CwINC/0L7QstGL0YjQtdC90L3QvtCz0L4g0LrQvtC70LjRh9C10YHRgtCy0LAg0YHQsNGF0LDRgNCwINCy0L7QtNCwINC90LUg0L/QvtC/0LDQtNCw0LXRgiDQsiDQutC70LXRgtC60Lgg0LTQvtC70LbQvdGL0Lwg0L7QsdGA0LDQt9C+0Lwg0Lgg0LjQt9C30LAg0Y3RgtC+0LPQviDRgNCw0LfQtNGA0LDQttCw0Y7RgtGB0Y8g0L7RgdC80L7RgNC10YbQtdC/0YLQvtGA0Ysg0Lgg0L/QvtC00LDRjtGCINGB0LjQs9C90LDQuyDQv9C+INCw0YTRhNC10YDQtdGC0L3Ri9C8INC/0YPRgtGP0Lwg0LIg0YHRgtCy0L7QuyDQvNC+0LfQs9CwINCyINGG0LXQvdGC0YAg0LbQsNC20LTRiyDQuCDQvtGCINGC0YPQtNCwINC+0YDQs9Cw0L3QuNC30Lwg0L/Ri9GC0LDQtdGC0YHRjyDQstC+0YHQv9C+0LvQvdC40YLRjCDQsdCw0LvQsNC90YEg0LLQvtC00Ysg0L3QviDQvdC40LrQsNC6INC90LUg0L/QvtC70YPRh9Cw0LXRgtGB0Y8g0LjQtyDQt9CwINGN0YLQvtCz0L4gINGA0LXQsdC10L3QvtC6INC80L3QvtCz0L4g0L/RjNC10YIg0Lgg0LIg0LzQvtGH0LUg0L7QsdC90LDRgNGD0LbQuNCy0LDQtdGC0YHRjyDQsdC10LvQvtC6INCwINCyINC90L7RgNC80LUg0LXQs9C+INC90LUg0LTQvtC70LbQvdC+INCx0YvRgtGMINC4INGC0LDQuiDQttC1INC80L7QttC90L4g0L/RgNC10LTQv9C+0LvQvtC20LjRgtGMINGH0YLQviDRgyDRgNC10LHQtdC90LrQsCDQvNC+0YfQsCDQvNC+0LbQtdGCINC/0LDRhdC90YPRgtGMINC80L7Rh9CwINCw0YbQuNGC0L7QvdC+0Lwg0LjQtyDQt9CwINC/0L7QstGL0YjQtdC90LjQtSDQutC10YLQvtC90L7QstGL0YUg0YLQtdC7INC4INCy0L7Qt9C80L7QttC90L4g0LjQtyDRgNGC0LAg0YLQvtC20LUg0YXQsNGA0LDQutGC0LXRgNC90YvQuSDQt9Cw0L/QsNGFINC80L7QttC10YIg0L/RgNC40YHRg9GC0YHRgtCy0L7QstCw0YLRjCAg0L3Rg9C20L3QviDQv9C+0L3Rj9GC0Ywg0L/RgNC40YfQuNC90YMg0YHQsNC80L7Qs9C+INGB0LDRhdCw0YDQvdC+0LPQviDQtNC40LDQsdC10YLQsCDQu9C40LHQviDQvdCw0YDRg9GI0LXQvdC90L7QtSDQstGL0YDQsNCx0L7RgtC60LAg0LjQvdGB0YPQu9C40L3QsCDQv9C+0LTQttC10LvRg9C00L7Rh9C90L7QuSDQttC10LvQtdC30L7QuSDRjdGC0L4g0LzQvtC20LXRgiDQsdGL0YLRjCDQuNC3INC30LAg0LPQtdC90LXRgtC40YfQtdGB0LrQvtC5INC/0YDQtdC00YDQsNGB0L/QvtC70L7QttC10L3QvdC+0YHRgtC4INGA0LXQsdC10L3QutCwINC70LjQsdC+INCw0YPRgtC+0LjQvNC80YPQvdC90L7QtSDRgNC10LDQutGG0LjRjyDQsNC90YLQuNGC0LXQuyDQvdCwINGB0LDQvCDQvtGA0LPQsNC9INC40LvQuCDQvNC+0LbQtdGCINCx0YvRgtGMINC40L3RgdGD0LvQuNC9LdGA0LXQt9C40YHRgtC10L3RgtC90L7RgdGC0Ywg0YLQvtC10YHRgtGMINCyINC+0YDQs9Cw0L3QuNC30LzQtSDQtdGB0YLRjCDQtNC+0LvQttC90L4g0LrQvtC70LjRh9C10YHRgtCy0L4g0LjQvdGB0YPQu9C40L3QsCDQvdC+INC6INC90LXQvNGDINC90LXRgiDRgdC/0LXRhtC40LDQu9GM0L3Ri9GFINGA0LXRhtC10L/RgtC+0YDQvtCyINC80L7QuSDQv9GA0LXQtNCy0LDRgNC40YLQtdC70YzQvdGL0Lkg0LTQuNCw0LPQvdC+0Lcg0L/QvtGB0LvQtSDQv9C10YDQstC40YfQvdC+0LPQviDQvtGB0LzQvtGC0YDQsCDRjdGC0L4g0YHQsNGF0LDRgNC90YvQuSDQtNC40LDQsdC10YIg0Lgg0L3Rg9C20L3QviDQvdCw0LfQvdCw0YfQuNGC0Ywg0LTQvtC/0L7Qu9C90LjRgtC10LvRjNC90YvQvCAg0L7QsdGB0LvQtdC00L7QstCw0L3QuNC1INC90LAg0YPQt9C4INC4INC+0YbQtdC90LrQsCDQv9C+0LTQttC10LvRg9C00L7Rh9C90L7Qs9C+INC20LXQu9C10LfRiyDQuCDQv9C+0YfQtdC6INC4INC90LAg0LjRhSDRhNGD0L3QutGG0LjQvtC90LDQu9GM0L3QvtGB0YLRjCAg0Lgg0YLQtdGB0YIg0L3QsCDQuNC90YHRg9C70LjQvSDRgNC10LfQuNGB0YLQtdC90YLQvdC+0YHRgtGMINC4INC00LvRjyDQv9GA0L7RhNC40LvQsNC60YLQuNC60Lgg0L3Rg9C20L3QviDRgdC+0LHQu9GO0LTQsNGC0Ywg0YHRgtGA0L7Qs9GD0Y4g0LTQuNC10YLRgyDQuCDRgdC00LXQu9Cw0YLRjCDQv9GA0L7RhNC10LvQsNC60YLQuNC60YMg0YHQsNGF0LDRgNC90L7Qs9C+INC00LjQsNCx0LXRgtCwINC00LvRjyDRgNC10LHQtdC90LrQsCDRgtC+0LXRgdGC0Ywg0L7QsdGM0Y/RgdC90LjRgtGMINC10LzRgyDRh9GC0L4g0YLQsNC60L7QtSDQuCDQutCw0Log0YEg0Y3RgtC40Lwg0LbQuNGC0Yw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93" table:style-name="ce1">
            <text:p>915393</text:p>
          </table:table-cell>
          <table:table-cell office:value-type="string" table:style-name="ce1">
            <text:p>russian</text:p>
          </table:table-cell>
          <table:table-cell office:value-type="string" table:style-name="ce1">
            <text:p>Билет3&amp;lt;br /&amp;gt; 1.Назовите особенности протеолитических ферментов у детей раннего возраста и какие ферменты к ним относятся?&amp;lt;br /&amp;gt; 2.Ребенку 10 лет, обратился к врачу с жалобами на боли в животе, головную боль, жажду (пьет до 3-4 литров воды в сутки), частое мочеиспускание, повышенный аппетит, похудание. Болен в течении 2-х недель. При осмотре вялый, бледный, выраженная сухость кожи, снижение тургора тканей. В общем анализе мочи белок 0.9%, уд. вес 1035, лейкоциты 0-2 в п/ зрения, цилиндры в большом количестве, кетоновые тела+++, сахар 7%. Сделайте интерпретацию общего анализа мочи. &amp;lt;br /&amp;gt;</text:p>
          </table:table-cell>
          <table:table-cell office:value-type="string" table:style-name="ce1">
            <text:p>MS4g0Jog0L/RgNC+0YLQtdC+0LvQuNGC0LjRh9C10YHQutC40Lwg0YTQtdGA0LzQtdC90YLQsNC8INC+0YLQvdC+0YHRj9GC0YHRjyDRhNC10YDQvNC10L3RgtGLINC20LXQu9GD0LTQutCwLCDRgtCw0LrQuNC1INC60LDQuiDQv9C10L/RgdC40L0sINGC0YDQuNC/0YHQuNC9LCDRhdC10LzQvtGC0YDQuNC/0YHQuNC9LCDQutCw0YDQsdC+0LrRgdC40L/QtdC/0YLQuNC00LDQt9GLLCDQutC+0YLQvtGA0YvQtSDRg9GH0LDRgdGC0LLRg9GO0YIg0LIg0L/QtdGA0LXQstCw0YDQuNCy0LDQvdC40Lgg0LHQtdC70LrQvtCyLiDQoyDRgNC10LHQtdC90LrQsCDQu9GD0YfRiNC1INGA0LDQsdC+0YLQsNC10YIg0YXQuNC80L7Qt9C40L0sINGA0LDRgdGJ0LXQv9C70Y/RjtGJ0LjQuSDQu9Cw0LrRgtC+0LfRgy4g0JDQutGC0LjQstC90L7RgdGC0Ywg0LTRgNGD0LPQuNGFINGE0LXRgNC80LXQvdGC0L7QsiDQv9C+0LLRi9GI0LDQtdGC0YHRjyDQv9C+INC80LXRgNC1INC/0LXRgNC10YXQvtC00LAg0YDQtdCx0LXQvdC60LAg0L7RgiDQs9GA0YPQtNC90L7Qs9C+INCy0YHQutCw0YDQvNC70LjQstCw0L3QuNGPINC90LAg0L/RgNC40LrQvtGA0LwsINCwINC30LDRgtC10Lwg0L3QsCDRgdCw0LzQvtGB0YLQvtGP0YLQtdC70YzQvdC+0LUg0L/QuNGC0LDQvdC40LUg0LTRgNGD0LPQuNC80Lgg0L/RgNC+0LTRg9C60YLQsNC80LguINCQ0LrRgtC40LLQvdC+0YHRgtGMINC/0YDQvtGC0LXQvtC70LXRgtC40YfQtdGB0LrQuNGFINGE0LXRgNC80LXQvdGC0L7QsiDQv9C+0LLRi9GI0LDQtdGC0YHRjyDQvdCwIDMtNiDQvNC10YHRj9GG0LDRhSwg0LTQu9GPINGA0LDRgdGJ0LXQv9C70LXQvdC40Y8g0LbQuNGA0L7Qsiwg0YPQs9C70LXQstC+0LTQvtCyINC4INC00YDRg9Cz0LjRhSDQstC10YnQtdGB0YLQsiwg0L/QvtGB0YLRg9C/0LDRjtGJ0LjRhSDRgSDQutC+0YDQvNC70LXQvdC40LXQvC4g0YDQnSDQttC10LvRg9C00LrQsCDRgyDRgNC10LHQtdC90LrQsCDRgdC70LDQsdC+0LrQuNGB0LvQvtGC0L3Ri9C5LCDQsiDRgdCy0Y/Qt9C4INGBINC/0L7RgtGA0LXQsdC70LXQvdC40LXQvCDQs9GA0YPQtNC90L7Qs9C+INC80L7Qu9C+0LrQsCDQvNCw0YLQtdGA0Lgg0Lgg0L/RgNC40LrQvtGA0LzQsC4g0J7QtNC90LDQutC+LCDRgdC+0YHRgtCw0LIg0LbQtdC70YPQtNC+0YfQvdC+0LPQviDRgdC+0LrQsCDRgdC+0LLQv9Cw0LTQsNC10YIg0YEg0YHQvtGB0YLQsNCy0L7QvCDQttC10LvRg9C00L7Rh9C90L7Qs9C+INGB0L7QutCwINCy0LfRgNC+0YHQu9C+0LPQviDRh9C10LvQvtCy0LXQutCwICgg0L7RgtC70LjRh9Cw0Y7RgtGB0Y8g0YHQvtC+0YLQvdC+0YjQtdC90LjQtdC8INGN0LvQtdC80LXQvdGC0L7Qsiwg0YMg0LTQtdGC0LXQuSBIQ0wg0L3QuNC20LUsINGH0LXQvCDRgyDQstC30YDQvtGB0LvRi9GFICkuINCd0LjQt9C60LDRjyDQsNC60YLQuNCy0L3QvtGB0YLRjCDQv9GA0L7RgtC10L7Qu9C40YLQuNGH0LXRgdC60LjRhSDRhNC10YDQvNC10L3RgtC+0LIg0YLQsNC6INC20LUg0YHQstGP0LfQsNC90LAg0YHQviDRgdC70LDQsdGL0Lwg0YDQsNC30LLQuNGC0LjQtdC8INGE0YPQvdC60YbQuNC5INC/0L7QtNC20LXQu9GD0LTQvtGH0L3QvtC5INC20LXQu9C10LfRiy4g0JogMSDQs9C+0LTRgyDQttC40LfQvdC4INCw0LrRgtC40LLQvdC+0YHRgtGMINGE0LXRgNC80LXQvdGC0L7QsiDRgdGC0LDQvdC+0LLQuNGC0YHRjyDQv9C+0YfRgtC4INC60LDQuiDRgyDQstC30YDQvtGB0LvQvtCz0L4g0YfQtdC70L7QstC10LrQsC48YnIgLz4NCjIuINCY0Lcg0LDQvdCw0LzQvdC10LfQsCDQuCDQttCw0LvQvtCxINGA0LXQsdC10L3QutCwLCDQsCDRgtCw0Log0LbQtSDQv9C+INC/0L7QutCw0LfQsNGC0LXQu9GP0Lwg0LDQvdCw0LvQuNC30L7Qsiwg0LzQvtC20L3QviDRgdC00LXQu9Cw0YLRjCDQt9Cw0LrQu9GO0YfQtdC90LjQtSwg0YfRgtC+INGDINGA0LXQsdC10L3QutCwINGB0LDRhdCw0YDQvdGL0Lkg0LTQuNCw0LHQtdGCLiDQkiDQvtCx0YnQtdC8INCw0L3QsNC70LjQt9C1INC80L7Rh9C4INC80Ysg0LLQuNC00LjQvDog0L/QvtCy0YvRiNC10L3QvdC+0LUg0YHQvtC00LXRgNC20LDQvdC40LUg0LHQtdC70LrQsCAoIDAsOSUsINCyINC90L7RgNC80LUgMCwzJSApIC0g0L/RgNC+0YLQtdC40L3Rg9GA0LjRjywg0LLQvtC30LzQvtC20L3RiyDQv9Cw0YLQvtC70L7Qs9C40YfQtdGB0LrQuNC1INC/0YDQvtGG0LXRgdGB0Ysg0LIg0L/QvtGH0LrQsNGFINC40LvQuCDQv9C+0LLRi9GI0LXQvdC40LUg0LDQu9GM0LHRg9C80LjQvdC+0LIg0LIg0LrRgNC+0LLQuDsg0YPQtC7QstC10YEgMTAzNSAoINCyINC90L7RgNC80LUg0YMg0YDQtdCx0LXQvdC60LAgMTAg0LvQtdGCIDEwMTAtMTAxMiwg0YPQtNC10LvRjNC90YvQuSDQstC10YEg0LPQvtCy0L7RgNC40YIg0L4g0L/QvtCy0YvRiNC10L3QvdC+0Lwg0LrQvtC70LjRh9C10YHRgtCy0LUg0LzQvtGH0LXQstC+0Lkg0LrQuNGB0LvQvtGC0YssINC60YDQtdCw0YLQuNC90LjQvdCwINC4INC00YDRg9Cz0LjRhSDRjdC70LXQvNC10L3RgtC+0LIg0LzQvtGH0LggKTsg0LvQtdC50LrQvtGG0LjRgtGLIDAtMiDQsiDQv9C+0LvQtSDQt9GA0LXQvdC40Y8gKCDQsiDQvdC+0YDQvNC1IDAtMSwg0LzQvtC20LXRgiDQs9C+0LLQvtGA0LjRgtGMINC+0LEg0L7RgdGC0YDQvtC8INCy0L7RgdC/0LDQu9C40YLQtdC70YzQvdC+0Lwg0L/RgNC+0YbQtdGB0YHQtSDQsiDQvtGA0LPQsNC90LjQt9C80LUgKTsg0YbQuNC70LjQvdC00YDRiyDQsiDQsdC+0LvRjNGI0L7QvCDQutC+0LvQuNGH0LXRgdGC0LLQtSAtINCz0L7QstC+0YDQuNGCINC+INGA0LDQt9GA0YPRiNC40YLQtdC70YzQvdGL0YUg0L/RgNC+0YbQtdGB0YHQsNGFINCyINGN0L/QuNGC0LXQu9C40LDQu9GM0L3QvtC8INGB0LvQvtC1LCDQstC+0LfQvNC20L3QviDQsiDQutCw0L3QsNC70YzRhtCw0YUg0L/QvtGH0LXQujsg0LrQtdGC0L7QvdC+0LLRi9C1INGC0LXQu9CwIC0g0L/QvtCy0YvRiNC10L3Riywg0YHQstC+0LnRgdGC0LLQtdC90L3QviDQtNC70Y8g0YHQsNGF0LDRgNC90L7Qs9C+INC00LjQsNCx0LXRgtCwIC0g0YHQstC40LTQtdGC0LXQu9GM0YHRgtCy0YPRjtGCINC+INC90LDRgNGD0YjQtdC90LjRj9GFINCyINC80LXRgtCw0LHQvtC70LjRh9C10YHQutC40YUg0L/RgNC+0YbQtdGB0YHQsNGFICgg0JDRhtC10YLQuNC7LdCa0L7QkCDQuNC00LXRgiDQvdCwINGB0LjQvdGC0LXQtyDQutC10YLQvtC90L7QstGL0YUg0YLQtdC7LCDQv9C+0YLQvtC80YMg0YfRgtC+INCyINGD0YHQu9C+0LLQuNGP0YUg0KHQlCDRgNCw0LfQstC40LLQsNC10YLRgdGPINCw0YbQuNC00L7Qtywg0Lgg0L3QsNGA0YPRiNCw0LXRgtGB0Y8g0LzQtdGC0LDQsdC+0LvQuNGH0LXRgdC60LjQuSDQv9GD0YLRjCDQs9C70Y7QutC+0LfRiyApOyDRgdCw0YXQsNGAIDclIC0g0LIg0LzQvtGH0LUg0LTQvtC70LbQtdC9INC+0YLRgdGD0YLRgdGC0LLQvtCy0LDRgtGMICgg0L3QsNC70LjRh9C40LUg0LPQvtCy0L7RgNC40YIg0L4g0LPQu9GO0LrQvtC30YPRgNC40LgsINC4INC/0L7QstGL0YjQtdC90L3QvtC5INCz0LvRjtC60L7Qt9C1INCyINC60YDQvtCy0Lgp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20" table:style-name="ce1">
            <text:p>1067020</text:p>
          </table:table-cell>
          <table:table-cell office:value-type="string" table:style-name="ce1">
            <text:p>russian</text:p>
          </table:table-cell>
          <table:table-cell office:value-type="string" table:style-name="ce1">
            <text:p>Билет3&amp;lt;br /&amp;gt; 1.Назовите особенности протеолитических ферментов у детей раннего возраста и какие ферменты к ним относятся?&amp;lt;br /&amp;gt; 2.Ребенку 10 лет, обратился к врачу с жалобами на боли в животе, головную боль, жажду (пьет до 3-4 литров воды в сутки), частое мочеиспускание, повышенный аппетит, похудание. Болен в течении 2-х недель. При осмотре вялый, бледный, выраженная сухость кожи, снижение тургора тканей. В общем анализе мочи белок 0.9%, уд. вес 1035, лейкоциты 0-2 в п/ зрения, цилиндры в большом количестве, кетоновые тела+++, сахар 7%. Сделайте интерпретацию общего анализа мочи. &amp;lt;br /&amp;gt;</text:p>
          </table:table-cell>
          <table:table-cell office:value-type="string" table:style-name="ce1">
            <text:p>MSDQstC+0L/RgNC+0YEuICDQodC90LjQttC10L3QvdCw0Y8g0LDQutGC0LjQstC90L7RgdGC0Ywg0L/RgNC+0YLQtdCw0LcsINGDINC90L7QstC+0YDQvtC20LTQtdC90L3Ri9GFINC/0LXQv9GB0LjQvSDQuCDRgtGA0LjQv9GB0LjQvSDQvdC40LbQtSDRh9C10Lwg0YMg0LLQt9GA0L7RgdC70YvRhSwg0LbQtdC70YPQtNC+0YfQvdGL0Lkg0YHQvtC6INCz0LjQv9C+0LDQutGC0LjQstC10L0sINGB0LvQsNCx0L7QutC+0L3RhtC10L3RgtGA0LjRgNC+0LLQsNC90L3QsNGPIC0g0L/QtdC/0YHQuNC90L7Qs9C10L0g0LDQutGC0LjQstC40YDRg9C10YLRgdGPINCyINC80LXQvdGM0YjQtdC5INGB0YLQtdC/0LXQvdC4LiDQndC40LfQutCw0Y8g0LrQuNGB0LvQvtGC0L3QvtGB0YLRjCDQttC10LvRg9C00LrQsCDRgdC/0L7RgdC+0LHRgdGC0LLRg9C10YIg0L/QtdGA0LXQstCw0YDQuNCy0LDQvdC40Y4g0LzQvtC70L7QutCwLCDQvdC+INC+0LPRgNCw0L3QuNGH0LjQstCw0LXRgiDQv9C+0LvQvdC+0YbQtdC90L3Ri9C5INC/0YDQvtGC0LXQvtC70LjQty4gMi4g0J/RgNC10L7QsdC70LDQtNCw0L3QuNC1INGE0LXRgNC80LXQvdGC0L7QsiDRgNCw0YHRidC10L/Qu9GP0Y7RidC40YUg0LzQvtC70L7Rh9C90YvQtSDQsdC10LvQutC4LCDRgtC+INC10YHRgtGMINC60LjRgdC70L7RgtC90L7RgdGC0Ywg0YDQtdC90LjQvdCwINGN0YLQviDRgdC/0LXRhtC40YTQuNGH0LXRgdC60LjQuSDRhNC10YDQvNC10L3RgiDRgdCy0LXRgNGC0YvQstCw0Y7RidC40Lkg0LrQsNC30LXQuNC9LCDRgNC10L3QuNC9INC+0YHQvtCx0LXQvdC90L4g0LDQutGC0LjQstC10L0g0LIg0L/QtdGA0LLRi9C1INC80LXRgdGP0YbRiyDQttC40LfQvdC4LCDRgSDQstC+0LfRgNCw0YHRgtC+0Lwg0YDQtdC90LjQvSDQt9Cw0LzQtdC90Y/QtdGC0YHRjyDQv9C10L/RgtC40L3QvtC8LiAgMy4g0Y3RgtC+INC+0LPRgNCw0L3QuNGH0LXQvdC90LDRjyDQsNC60YLQuNCy0L3QvtGB0YLRjCDRhNC10YDQvNC10L3RgtC+0LIg0YLQvtC90LrQvtCz0L4g0LrQuNGI0LXRh9C90LjQutCwLCDRgtC+INC10YHRgtGMINGN0L3RgtC10YDQvtC60LjQvdCw0LfQsCDQsNC60YLQuNCy0LjRgNGD0LXRgiDRgtGA0LjQv9GB0LjQvdC+0LPQtdC90YLRgNC40L/RgdC40L0uIDQuINC80LXQtNC70LXQvdC90LDRjyDQsNC00LDQv9GC0LDRhtC40Y8g0L/QvtC00LbQtdC70YPQtNC+0YfQvdC+0Lkg0LbQtdC70LXQt9GLLCDRgtC+INC10YHRgtGMINGB0LXQutGA0LXRhtC40Y8g0YTQtdGA0LzQtdC90YLQvtCyINC/0L7QtNC20LXQu9GD0LTQvtGH0L3QvtC5INC20LXQu9C10LfRiyDQvdC10LfRgNC10LvQsNGPINC4INGA0LDQt9Cy0LjQstCw0LXRgtGBINC6IDYtMTIg0LzQtdGB0Y/RhtCw0LwsINC40LzQtdC90L3QviDQv9C+0Y3RgtC+0LzRgyDQsdC10LvQutC+0LLQsNGPINC/0LjRidCwINCy0LLQvtC00LjRgtGB0Y8g0LIg0YDQsNGG0LjQvtC9INC90LUg0YDQsNC90LXQtSA3LTgg0LzQtdGB0Y/RhtC10LIuICAgICAgICAgICAgICAgICAgICA8YnIgLz4NCtCe0YHQvdC+0LLQvdC+0LUg0YDQsNGB0YnQtdC/0LvQtdC90LjQtSDQv9GA0L7QuNGB0YXQvtC00LjRgiDQsiDRgtC+0L3QutC+0Lwg0LrQuNGI0LXRh9C90LjQutC1INC/0L7QtCDQtNC10LnRgdGC0LLQuNC10Lwg0YLRgNC40L/RgdC40L3QsCDQuCDQtNGA0YPQs9C40YUg0YTQtdGA0LzQtdC90YLQvtCyINC/0L7QtNC20LXQu9GD0LTQvtGH0L3QvtC5INC20LXQu9C10LfRiyDQutC+0YLQvtGA0YvQtSDQsNC60YLQuNCy0LjRgNGD0Y7RgtGB0Y8g0L/QvtGB0YLQtdC/0LXQvdC90L4g0YEg0LLQvtC30YDQsNGB0YLQvtC8LiAgICAgICAgICAgICAgICAgICAgICAgICAgICAgICAgICAgICAgICAgICAgICAgICAgICAgICAgICAgICAgICAgICAgICAgICAgICAgICAgICAgICAgICAgICAg0J7RgdC90L7QstC90YvQtSDQv9GA0L7RgtC10L7Qu9C40YLQuNGH0LXRgdC60LjQtSDRhNC10YDQvNC10L3RgtGLOiAxLiDRgNC10L3QuNC9LSDQvtCx0LXRgdC/0LXRh9C40LLQsNC10YIg0YHQstC10YDRgtGL0LLQsNC90LjQtSDQvNC+0LvQvtGH0L3QvtCz0L4g0LrQsNC30LXQuNC90LAuIDIuINGC0YDQuNC/0YHQuNC9LCDRhdC40LzQvtGC0YDQuNC/0YHQuNC9ICjQv9C+0LTQttC10LvRg9C00L7Rh9C90LDRjyDQttC10LvQtdC30LApLiAzINC/0LXQv9GB0LjQvSAo0LbQtdC70YPQtNC+0LopLiDQmtCw0YDQsdC+0LrRgdC40L/QtdGC0LjQtNCw0LfRiywg0LDQvNC40L3QvtC/0LXRgtC40LTQsNC30YsgKNC60LjRiNC10YfQvdC40LopPGJyIC8+DQo8YnIgLz4NCjIg0LLQvtC/0YDQvtGBLiDQkiDQntCQ0Jwg0LHQtdC70L7QuiAwLDklIC0g0LLRi9GA0LDQttC10L3QvdCw0Y8g0L/RgNC+0YLQtdC40L3Rg9GA0LjRjywg0YPQtNC10LvRjNC90YvQuSDQstC10YEg0L/QvtCy0YvRiNC10L0sINGH0YLQviDRg9C60LDQt9GL0LLQsNC10YIg0L3QsCDQtNC10LPQuNC00YDQsNGC0LDRhtC40Y4g0Lgg0LLRi9GB0L7QutGD0Y4g0L7RgdC80L7Qu9GP0YDQvdC+0YHRgtGMINC80L7Rh9C4LCDQu9C10LnQutC+0YbQuNGC0YsgMC0yINCyINC/L9C30YDQtdC90LjRjyAtINCyINC90L7RgNC80LUsINC40LvQuCDQvdC10LfQvdCw0YfQuNGC0LXQu9GM0L3QviDQv9C+0LLRi9GI0LXQvdGLLCDQstC+0YHQv9Cw0LvQtdC90LjRjyDQsiDQvNC+0YfQtdCy0YvRhSDQv9GD0YLRj9GFINC90LXRgiwg0YbQuNC70LjQvdC00YDRiyDQsiDQsdC+0LvRjNGI0L7QvCDQutC+0LvQuNGH0LXRgdGC0LLQtSAtINGH0LDRgdGC0L4g0YHQvtC/0YDQvtCy0L7QttC00LDQtdGCINCy0YvRgNCw0LbQtdC90L3Ri9C5INC60LXRgtC+0Lcg0LggINC00LXQs9C40LTRgNCw0YLQsNGG0LjRjiwg0LzQvtC20LXRgiDQsdGL0YLRjCDQvdCw0YfQsNC70L7QvCDQstGL0YDQsNC20LXQvdC90L7QuSDRgtGD0LHRg9C70L7Qv9Cw0YLQuNC4LiDQmtC10YLQvtC90L7QstGL0LUg0YLQtdC70LAg0YPQutCw0LfRi9Cy0LDQtdGCINC90LAg0LrQtdGC0L7QvdGD0YDQuNGOLCDRjdGC0L4g0L/RgNC40LfQvdCw0Log0LrQtdGC0L7QsNGG0LjQtNC+0LfQsCwg0YLQviDQtdGB0YLRjCDQtNC10YTQuNGG0LjRgtCwINC40L3RgdGD0LvQuNC90LAuINCU0LXRhNC40YbQuNGCINC40L3RgdGD0LvQuNC90LAg0L7Qt9C90LDRh9Cw0LXRgiDRg9GB0LjQu9C10L3QvdGL0Lkg0LvQuNC/0L7Qu9C40Lcg0Lgg0LrQtdGC0L7Qs9C10L3QtdC3LiDQk9C70Y7QutC+0LfQsCDQsiDQvNC+0YfQtSDRg9C60LDQt9GL0LLQsNC10YIg0L3QsCDQs9C70Y7QutC+0LfRg9GA0LjRjiwg0Y3RgtC+INC/0YDQuNC30L3QsNC6INCz0LjQv9C10YDQs9C70LjQutC10LzQuNC4INC/0L7RgtC+0LzRgyDRh9GC0L4g0L/RgNC10LLRi9GI0LDQtdGCINC/0L7Rh9C10YfQvdGL0Lkg0L/QvtGA0L7QsyDRgNC10LDQsdGB0L7RgNCx0YbQuNC4LiDQkNC90LDQu9C40Lcg0LzQvtGH0Lgg0L/QvtC00YLQstC10YDQttC00LDQtdGCINC90LDRgNGD0YjQtdC90LjQtSDRg9Cz0LvQtdCy0L7QtNC90L7Qs9C+INC+0LHQvNC10L3QsCDQutC10YLQvtCw0YbQuNC00L7Qt9C+0Lwg0YXQsNGA0LDQutGC0LXRgNC90L7QtSDQtNC70Y8g0YHQsNGF0LDRgNC90L7Qs9C+INC00LjQsNCx0LXRgtCwINC/0LXRgNCy0L7Qs9C+INGC0LjQv9CwLiDQoNC10LrQvtC80LXQvdC00YPQtdGC0YHRjyDRgdGA0L7Rh9C90L7QtSDQs9C+0YHQv9C40YLQsNC70LjQt9Cw0YbQuNGPINCyINGN0L3QtNC+0LrRgNC40L3QvtC70L7Qs9C40YfQtdGB0LrQvtC1INC4INC/0LXQtNC40LDRgtGA0LjRh9C10YHQutC+0LUg0L7RgtC00LXQu9C10L3QuNC1LCDQsCDRgtCw0Log0LbQtSDQvdCw0YfQsNC70L4g0LjQvdGE0YPQt9C40L7QvdC90L7QuSDRgtC10YDQsNC/0LjQuCDQv9C+INC/0YDQvtGC0L7QutC+0LvRgyDQu9C10YfQtdC90LjRjyDQtNC40LDQsdC10YLQuNGH0LXRgdC60L7Qs9C+INC60LXRgtC+0LDRhtC40LTQvtC30LAg0YMg0LTQtdGC0LXQuS4g0JIg0L7QsdGJ0LXQvCDQvNC+0LbQvdC+INGB0LTQtdC70LDRgtGMINC40L3RgtC10YDQv9GA0LXRgtCw0YbQuNGOLCDRgtC+INGH0YLQviDRgyDRgNC10LHQtdC90LrQsCAxMCDQu9C10YIg0L3QsCDRhNC+0L3QtSDQutC70LjQvdC40YfQtdGB0LrQuNGFINGB0LjQvNC/0YLQvtC80L7QsiDRgtCw0LrQuNGFINC60LDQuiDQv9C+0LvQuNGD0YDQuNGPLCDQv9C+0LvQuNC00LjQv9GB0LjRjywg0L/QvtC70LjRhNCw0LfQuNGPLCDQv9C+0YXRg9C00LDQvdC40LUsINCx0LvQtdC00L3QvtGB0YLRjCwg0LLRj9C70L7RgdGC0YwsINCy0YvRgNCw0LbQtdC90L3QsNGPINGB0YPRhdC+0YHRgtGMINC60L7QttC4INC/0L7Qt9Cy0L7Qu9GP0LXRgiDQt9Cw0L/QvtC00L7Qt9GA0LjRgtGMINC00LXQsdGO0YIg0YHQsNGF0LDRgNC90L7Qs9C+INC00LjQsNCx0LXRgtCwINC/0LXRgNCy0L7Qs9C+INGC0LjQv9CwINGBINC60LXRgtC+0LDRhtC40LTQvtC30L7QvC48YnIgLz4NCjxiciAvPg0KPGJyIC8+DQo=</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88" table:style-name="ce1">
            <text:p>914688</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MSkgUHJvdGVvbHl0aWMgZW56eW1lcyBpbiB5b3VuZyBjaGlsZHJlbiAsIGludm9sdmVkIGluIHRoZSBkaWdlc3Rpb24gb2YgcHJvdGVpbnMgLCBpbmNsdWRlIHBlcHNpbiAoIHdoaWNoIGlzIHByb2R1Y2VkIGluIHRoZSBzdG9tYWNoKSB0cnlwc2luIGFuZCBjaHltb3RyeXBzaW4gKHdoaWNoIGlzIHByb2R1Y2VkIGluIHRoZSBwYW5jcmVhcykuIFRoZXNlIGVueHltZXMgYnJlYWtkb3duIHByb3RlaW5zIHdoaWNoIGJyZWFrZG93biBpbnRvIHNtYWxsZXIgcGVwdGlkZXMgYW5kIGFtaW5vIGFjaWRzIGJ5IGNsZWF2aW5nIHBlcHRpZGUgYm9uZHMsIGhlbHBpbmcgaW4gdGhlIGFic29ycHRpb24gZHVyaW5nIHRoZSBkaWdlc3RpdmUgcHJvY2Vzcy4gcHJvdGVvbHl0aWMgZW56eW1lcyBhcmUgcGggc3BlY2lmaWMuIHBlcHNpbiB3b3JrcyBhdCBhbiBvcHRpbWFsIGFjaWRpYyBwaCBpbiB0aGUgdGhlIHN0b21hY2ggLiB0cnlzaW4gYW5kIGNoeW1vdHJpcHNpbiB3b3JrcyBhdCB0aGUgYWxrYWxpbmUgcGggaW4gc21hbGwgaW50ZXN0aW5lLkNoeW1vdHJ5cHNpbiBoZWxwcyB0cnlwc2luIGluIGJyZWFrZG93biBvZiBwcm90ZWlucy5HYXN0cmljIGFuZCBwYW5jcmVhdGljIGVuenltZSBsZXZlbCBpcyBsb3cgaW4gaW5mYW50cyBidXQgaXQgZ3JhZHVhbGx5IGluY3JlYXNlcyB3aXRoIGFnZS5SZW5pbiBpcyBhbHNvIGZvdW5kIGluIGluZmFhbnRzIHdoaWNoIGhlbHAgaW4gZGlkZXN0aW5nIG1pbGsgcHJvdGVpbnMuICAgICAgICAgICAgICAgICAgICAgICAgICAgICAgICAgICAgICAgICAgICAgICAgICAgICAgICAgMikgVGhlIGdlbmVyYWwgYW5hbHlzaXMgb2YgdXJpbmUgaW4gMTAgeWVhciBvbGQgYm95IGdlbmVyYWxpc2VkIHNldmVyYWwgZmluZGluZ3MgLSAgYWJub3JtYWxseSBoaWdoIHN1Z2FyIChnbHVjb3NlKSBsZXZlbCAoNyUpIC4gSXQgaW5kaWNhdGVzIGh5cGVyZ2x5Y2VtaWEgLCBzdWdnZXN0aW5nIHBvb3JseSBjb250cm9sbGVkIGRpYWJldGVzIG1lbGxpdHVzLkhpZ2ggbGV2ZWwgb2Yga2V0b25lIGJvZGllcyAoa2V0b251cmlhKSBpbiBsYXJnZSBhbW91bnRzICgrKyspIHN1Z2dlc3QgdGhlIGJyZWFrZG93biBvZiBmYXRzIGR1ZSB0byBpbnN1bGluIGRlZmljaWVuY3ksIGEgY2hhcmFjdGVyaXN0aWMgZmVhdHVyZSBvZiBkaWFiZXRpYyBhY2lkb3Npcy4gSGlnaCBwcm90ZWluIGxldmVscyAoMC45JSkgaW5kaWNhdGVzIHByb3RlaW51cmlhLCBzdWdnZXN0aW5nIHBvc3NpYmxlIGtpZG5leSBpbnZvbHZlbWVudCwgd2hpY2ggY291bGQgYmUgYXNzb2NpYXRlZCB3aXRoIGRpYWJldGVzIG9yIGEgc2VwYXJhdGUgcmVuYWwgaXNzdWUgLkhpZ2ggc3BlY2lmaWMgZ3Jhdml0eSgxMDM1KSBpbmRpY2F0ZXMgY29uY2VudHJhdGVkIHVyaW5lICwgd2hpY2ggYmUgcG9zc2libGUgZHVlIHRvIGRlaHlkcmF0aW9uIHJlc3VsdGluZyBmcm9tIGV4Y2Vzc2l2ZSBmbHVpZCBsb3NzLiBGbGFjY2lkICwgcGFsZSAsIHNldmVyZSBkcnkgc2tpbiAsIGRlY3JlYXNlZCB0aXNzdWUgdHVyZ29yIGFyZSB0aGUgc2lnbnMgb2YgZGVoeWRyYXRpb24gd2hpY2ggaXMgY29uc2lzdGVudCB3aXRoIHRoZSBpbmNyZWFzZSB0aGlyc3QgLCBmcmVxdWVudCB1cmluYXRpb24gYW5kIHdlaWdodCBsb3NzIHJlcG9ydGVkIGJ5IHRoZSBwYXRpZW50IFByZXNlbmNlIG9mIGN5bGluZGVycyBpbiB0aGUgbGFyZ2UgbnVtYmVycyBpbmRpY2F0ZXMgdGhlIHJlbmFsIGludm9sdmVtZW50ICwgcG9zc2libGUgZGFtYWdlIHRvIHJlbmFsIHR1YnVsZXMuIC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05" table:style-name="ce1">
            <text:p>914705</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MS50aGUgcHJvdGlsaXRpYyBlbnp5bWVzIGFyZSB0aGUgZW56eW1lcyB0aGF0IGFyZSBhY2NvdW50YWJsciBmb3IgdGhlIGJyZWFrIGRvd24gb2YgdGhlIHByb3RpZW4gZnJvbSB0aGUgZGlldCAuIHRoZSBlblh5bWVzIGluY2x1ZGVkIGluIGl0IGFyZSAgUEVQU0lOKHByZXNlbnQgb2luIHRoZSBzdG9tYWNjaCApIChhY3RpdmF0ZWQgYnkgdGhlIHByZXNlbmNlIG9mIHRoZSBoY2wgaW4gdGhlIHN0b21hY2ggKSwgVFJZUFNJTiAsIENIWU1PVFJZUElTTSAoYm90dGggYXJlIHNlY3JldGVkIGZyb20gdGhlIHBhbmNyZWFzKSwgQ0FSQk9YWVBFUFRJREFTRVMoIGJyZWFrcyBpbmRpdmlkdWFsIGFtaW9ub28gYWNpZHMgZnJvbSB0aGUgcGVwZXRpZGVzKSAuICAudGhlc2UgZW56eW1lcyBicmVha2Rvd24gcHJvdGVpbnMgaW4gc2FtbGwgZmF0dHkgYWNpZHMgYW5kIGFtbWlvbm8gYWNpZHMgLCB3aGljaCBjYW4gbGF0ZXIgYmUgYWJzb3JkZXJkIGluIHRoZSBkaWdlc3RpdmUgc3lzdGVtIHZlcnkgZWFzaWxseSBieSB0aGUgc21hbGwgaW50ZXN0aW5lIC4gaW4geW91bmcgY2hvaWxkcmVuL2luZmFucyAgdGhlIGFjdGl2aXR5IG9mIHRoZSBwcm90aWxpeWMgZW56eW1lcyBpcyB1bmRlcmRldmVsb3BlZCBkdWUgdG8gbm90IGZ1bGx5IG1hdHVyZWQgZGlnZXN0aXZlIHRhY3l0c3MuICAgICAgICAgICAgICAgICAgICAgICAgICAgICAgICAgICAgICAgICAgICAgICAgICAgICAgICAgICAgICAgICAgICAgICAgICAgICAgICAgICAgICAgICAgICAgICAgICAgICAgICAgICAgICAgICAgMi50aGUgYW5hbHlzaXMgb2YgdGhlIHVyaW5lIHRlc3QgaXMgOi0gICAgICAgICAgICAgICAgICAgICAgICAgICAgICAgICAgICAgICAgICAgICAgICAgICAgICAgICAgICAgICAgICAgICAgICAgICAgICAgICAgICAgICAgICAgQSkgdGhlIHNlcGVjaWZpYyBncmF2aXR5IG9mIHRoZSB1cmluZSBpcyAxLjAzNSBXSElDSCBNRUFOUyBUSEUgVVJJTkUgSVMgQ09OQ0VOVFJBVEVEIGFuZCByZXN1bHRpbmcgZnJvbSB0aGUgZXhjZXNzY2l2ZSBmbHVpZCBsb3NzcyBmcm9tIHRoZSBib2R5LiAgICAgICAgICAgICAgICAgICAgICAgICAgICAgICAgICAgICAgICAgICAgICAgICAgICAgICAgICAgICAgICAgICAgICAgICAgICAgICAgICAgICAgICAgICAgICAgICAgICAgICAgICAgICAgPGJyIC8+DQpCKXN1Z2FyIGxldmVscyBhcmUgNyUgd2hpY2ggbWVhbnMgdGhlcmUgaXMgcHJlc2VuY2Ugb2YgdGhlIGdsdWNvc2UgaW4gdGhlIHVyaW5lICwgd2hpY2ggY2FuIGJlIGR1ZSB0byB0aGUgdW5kZXJseWluZyBjYXVzZSBsaWtlIGRpYWJldGljIG1lbGxhdHVpcyAoRE0pLiBDKSBLRVRPTkUgQk9ESUVTIEFSRSBBTFNPIFBSRVNFTlQgd2hpY2ggbWVhbnNzIGNhbiBpbmNpZGFjZSBhcyBhIG1hcmtlciAgdG8gdGhlIGtldG9vYWNpZG9zaXMgdGhhdCBvY2N1ciBkdWUgdG8gdGhlIERNLiBhbmQgYWxzbyBicmVhayBkb2VuIG9mIGZhdHMgZHVlIHRvIGluc3VsaW4gZGVmaWNpZW5jeSAgRClQUkVTRU5DRSBPRiBUSEUgUFJPVEVJTiAwLjklIG1lYW5zIHRoZXJlIGlzIHRoZSBjYW5jZXMgb2YgdGhlIHByb3RvdXJpYSwgd2hpY2ggY2FuIGluY2lkYXRlIHRoZSBwcm9ibGVtIHdpdGggdGhlIGtpZG5leSBpbiB0aGUgcmVuYWwgZmlsbHRyYXRpb24gIEUpV0hJVEUgQkxPT0QgQ0VMTFMgSU4gU0lHSFQgQVJFIDAtMiBJTiBTSUdIVCBhcmUgTk9STUFMLiBGKSBjeWxpbmRlcnMgaW4gbGFyZ2UgbnVtYmVyIGNhbiBpbmRpY2NhdGUgcmVuYWwgaW52b2xtZWVudCBjYW4gYWxzbyBnaXZlIGhpbnQgb2YgZGFtYWdlIHRvIHJlbmFsIHR1YnVsZXMgIC5BbHNvIHRoZSBmbGFjQ2NpZCAsIHBhbGUgLCBkcnkgc2tpbiAsIGRlY3Jlc2VkIHRpc3N1ZSB0dXJnZXIgYXJlIGFsc28gdGhlIHNpZ25zIG9mIHRoZSBkZWhkcmF0aW9uLnRoZSBpbmNyZXNlZCB0aGlyc3QgLCBmcmVxdWVudCB1cmluYXRpb24gLCBhcHBldGl0ZSBpbmNlIGFuZCB3ZWlnaHQgYWxvc3MgYXJlIGFsb3MgdGhlIHNpZ2hzIG9mIHRoZSBkZWh5ZHRhdGlvbiAuICB0ZWFyYXRtZW50IGZvciB0aGlzIGNvbmR0aW9uIGNhbiBiZSB0cmVhdGluZyB0aGUgdW5kZXJseWluZyBjYXVzZSBmaXJzdCB0aGF0IElTIERJQUJFVElTIE1BTExJVFVTIEJZIFRIRSBJTlNVTElOIFRIRVJBUFkgI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967" table:style-name="ce1">
            <text:p>914967</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IDEpIGltbWF0dXJlIGRpZ2VzdGl2ZSBzeXN0ZW06IHRoZSBhY3Rpdml0eSBvZiBwcm90ZW9seXRpYyBlbnp5bWVzIGluIGluZmFudHMgaXMgZ2VuZXJhbGx5IGxvd2VyIGNvbXBhcmVkIHRvIG90aGVyIGFkdWx0cyBkdWUgdG8gdGggaW1tYXR1YXJpdHkgb2YgdGhlIHBhbmNyZWFzIGFuZCBnYXN0cm9pbnRlc3RpbmFsIHRyYWN0LiBhbmQgaXQgaXMgb3B0aW1pemVkIHdpdGggYnJlYXN0IG1pbGsgaW4gYnJlYXN0IGZlZWRpbmcgdG8gaW5mYW50cyB0aGlzIGVuenltZXMgYXJlIHBlcnRpY3VsYXJseSBhZGFwdGVkIGRpZ2VzdCBwcm90ZWlucyBmb3VuZCBpbiBodW1hbiBzdWNoIGFzIGNhc2FpbiBhbmQgd2hleSBwcm90ZWluLiBhbmQgZ3JhZHVhbCBkZXZlbHBvbWVudDogdGhlIHByb2R1Y3Rpb24gYW5kIGFjdGl2aXR5IG9mIHNvbWUgcHJvdGVvbHl0aWMgZW56eW1lIHN1Y2ggYXMgdHJ5cHNpbiAsIGluY3JlYXNlcyB0aGUgZ3JhZHVhbGx5ICwgYXMgcGFuY2VhcnMgbWF0dXJlLmFuZCBzdXBwcnQgZnJvbSB0aGUgc3RvbWFjaCBlbnp5bWUtIHBlcHNpbiBpcyBkaWdlc3QgdGhlIHByb3RlaW4gaW4gZWFybHkgbGlmZS4gbWFpbiBwcm90ZW9seXRpYyBlbnp5bWVzIGluIHlvdW5kIGNoaWxkcmVuczogMSkgcGVwc2luOiBpdCBpcyBwcm9kdWNlZCBpbiBzdG9tYWNoIGFjdGl2YXRlZCBpbiBhY2lkaWMgY29uZGl0aW9uIGFuZCBiZWluZyBwcm90ZWluIGRpZ2VzdGlvbiBieSBicmVha2luZyBkb3duIGxhcmdlIG1vbGVjdWxlIHByb3RlaW4uIDIpIHRyeXBzaW46IHNlY3JlYXRlZCBidSBwYW5jcmVhcyBhbmQgYWN0aXZhdGVkIGluIHNtYWxsIGludGVzdGluZS4gMykgY2h5bW90cnlwc2luOiBhbHNvIHByb2R1Y2VkIGJ5IHBhbmNyZWFzIGFuZCAgYWN0aXZhdGVkIGk5biB0aGUgc21hbGwgaW50ZXN0aW5lLiA0KWVsYXN0YXNlOiBhbm90aGVyIHBhbmNyZWF0aWMgZW56eW1lIGl0IGRpZ2VzdCBlbGFzdGluIGFuZCBvdGhlciBwcm90ZWlucy4gNSkgY2FyYm94eXBlcHRpZGUuICAgICAgICAgICAgICAgICAgICAgICAgICAgICAgICAgICAgICAgICAgICAgICAgICAgICAgICAgICAgICAgICAgICAgICAgICAgICAgICAgICAgICAgICAgICAgICAgICAgICAgICAgICAgICAgMikgaGVyZSBtZW50aW9uZWQgYXMgdGhlIGNoaWxkIGlzIHN1ZmZlcmluZyBmcm9tIHRoZSBhYmRvbWluYWwgcGFpbiAsIGhlYWRhY2hlLCBhbmQgdGhpcnN0LCBmcmVhcXVlbnQgdXJpbmF0aW9uIGFuZCBpbmNyZWFzZSBhcHBldGl0ZSBhbmQgZGVjcmVhc2UgdGlzc3VlIHR1cmdvciBhbmQgZXZlbiBhZnRlciBkcmlua2luZyAzIHRvIDQgbGl0ZXJzIHBlciBkYXkuIGJ1dCBzdGlsbCB3ZWlnaHQgbG9zcyBhbmQgdXJpbmUgYW5hbHlzaXMgdGhlcmUgaXMgaW5jcmVhc2UgYW1vdW50IG9mIGtldG9uZSBib2RpZXMuIHRoZXJlIGFyZSBpbmRpY2F0aW9uIGFuZCBzeW1wdG9tcyBvZiBkaWFiZXRpYyBrZXRvZGFjaWRvY2lzLiBoaW5kdSB1cmluZSBhbmFseXNpcyB3ZSBjYW4gc2VlIHRoZSBwcm90ZWluIHByb3RlaW4gcGVyY2VudGFnZSBpcyBkZWNyZWFzZSBmcm9tIHRoZSBub3JtYWwgbGV2ZWwgd2hlbiB0aGUgdGhlIG5vcm1hbCByYW5nZSBpcyA2MC04M2cvbC4gdGhlIHNwZWNpZmljIGdyYXZpdHkgaXMgaW5jcmVhc2VkIHRoYW4gdGhlIG5vcm1hbCByYW5nZSB3aGljaCBpcyAxMDA1IHRvIDEwMzAuIFdCQyBhcmUgaW5jcmVhc2VkLiAgdGhlIGtldG9uZSBib2R5IGxldmVsIGluIHRoZSBjaGlsZHJlbiBpbmNyZWFzZWQgb2YgMyB0aW1lcyBvZiB0aGUgbm9ybWFsIHJhbmdlICB3aGljaCBpcyAwLjVtbW9sL2wuIHN1Z2FyIGxldmVsIGlzIG5vcm1hbCBidXQgaW4gdGhlIGRpYWJldGljIGtldG9hY2lkb3NpcyBpdCByaXNlcyBzbG93bHkgYnkgdGltZS4=</text:p>
          </table:table-cell>
          <table:table-cell office:value-type="float" office:value="170348" table:style-name="ce1">
            <text:p>170348</text:p>
          </table:table-cell>
          <table:table-cell office:value-type="float" office:value="70" table:style-name="ce1">
            <text:p>7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30" table:style-name="ce1">
            <text:p>915030</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QU5TV0VSIDEuIFBST0xZVElDIEFOWllNIEFSRSBSRVNQT05TSUJMRSBGT1IgQlJFQUtET1dOIFBST1RJRU4gSU5UTyBBTUlOTyBBQ0lEIEFORCBTTUFMTCAgIFBFUFRJREVTIFdISUNIIEFSRSBWSVRBTCBGT1IgRElHRVRJT04gQU5EIEdST1dUSCAgRkVBVFVSRSBPRiBQUk9MWVRJQyBFTlpZRSBJTiBDSElMRCBMSUtFICAgLi4uLi4uLi4uLiBERVZFTE9QTUVOVEFMIEFEQVBUQVRJT04gLi4uIElOIE5FT05BVEUgQU5EIFlPVU5HIENISUxEIFRIRVkgQUNUSVZJVFkgT0YgQ0VSVEVOVCBQUklURUlMWVRJQyBFTlpZTSBJUyBJTU1BVFVSRSBCVVQgSU5DUkVBUyBBUyAgVEhFWSBHUk9XVEggLi4uIEVOSEFOQ0UgQ0FTSUVOIERJR0VUSU9OIC4uLiBZT05HIENISUxEIFRBS0UgSEFWSUxZIE1JTEsgUFJPVElFTiBMSUtFIENBU0VOIERJR0VOVEVEIEVGRkVDVElWTFkgQlkgUkVOTkkgQU5EIFBFUFNJTiAuLi4gUEFOQ1JJVElDIEVOWllNIC4uLi4gRU5aWU0gTElLRSBUUllQU0lOIENIWU1PVFJJUFNJTiBIRUxQIElOIERJR0VTSU9OIE9GICBQUk9USUVOICBJTlRPIFNNQUxMRVIgUEVQVElEUyAuLi4gQURJTkcgSU4gVEhFSVIgICBBQlNPUkJUSU9OIERVUklORyBUSEUgRElHRVNUSVZFIFBST0NFU1MgICAgMi4gQU5TV0VSICAuLiBUSEUgR0VORVJBTCBSRUxJR0VUSU9OIElOIDEwIFlFQVIgT0xERCBDSElMREVSTiAgQU5EIEFCTk9STUFMIEZJTkRJTkcgTElLRSBGUkVRVUVOVCBVUklOQVRJT04gQU5EICAgIEhJR0ggU1VHRVIgTEVWRUwgNyUgIFRIQVQgSU5ESUNBVEUgSFlQRVJHTFlDRU1JQSAgU1VHR0VTVElWIFBPT1JMWSBDRU5URVJMTCBESUFCSVRFUyBNRUxMSVRVUyAuLi4gQU5EIElOQ1JFQVNTICBMRVZFTCBPRiBLRVRPTiBCT0RJRVMgKysrIFRIQVQgSU5ESUNBVEVORyAgQU5EIFNVR0dFU1RJTkcgVEhBVCBCUkVBSy1ET1dOIE9GIEZBVEVTIERVRSBUTyBQUkVTRU5DRSBPRiBISUdIIElOU1VMSU4gREVGSUNFTkNZIEEgQ0hFQUNURVJTVElDIEZFQVRVUkVTIE9GIERJQUJJVFVTIE1JTElUVVMgQU5EIFNBQlJBVEUgS0lETkVZIElTU1VFICBJVFMgIENBVVNFIE9GIFdFSUdIVCBMT1NTICAgQU5EIFRIRSBTUEVDSUZJQyBHUkFWSVRZIElTIDEwMzUgQ09ORU5UUkFURSBVUklOICBBRlRFUiBEUklOSyAzLTQgTElURVJTIFdBVEVSIERBSUxZICBJVCBNQVkgUE9TU0lCSUxJVFkgREVIWURSQVRJT04gSVQgU0lHTiBPRiBUSFJJU1QgIEFORCBUSFkgU0tJTiBJUyBEUlkgQU5EICBUSVNTVUUgVE9SR1VSICBJUyBTSUdOIE9GIEZSSVFVRU5UIFVSSU5BVElPTiBSRVBPUlRMWSBCWSBQQVRJRU5UIFBSRVNFTkNFMyAgT0YgQ1lMRU5ERVJTIElOIExBUkdFUiBOVU1CRVIgIElORElDQVRFIFJFTkFMIElOT0xWTUVOVCBBTkQgIFBPU1NJQkxFIERBTUFHRUUgIFRIRSAgUkVOQUwgVFVCVUxFU1MgLi4gICAg</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60" table:style-name="ce1">
            <text:p>915060</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MS5mZWF0dXJlcyBvZiBwcm90ZW9seXRpYyBlbnp5bWVzIGluIHlvdW5nIGNoaWxkcmVuIHByb3Rlb2x5dGljIGVuenltZXMgYWxzbyBrbm93biBhcyBwcm90ZXN0IGFyZSByZXNwb25zaWJsZSBmb3IgYnRlYWtpbmcgZG93biBwcm90aWVucyBpbnRvIHNtYWxsZXIgcGVwdGlkZXMgYW5kIGFtaW5vIGFjaWRzIGluIHlvdW5nIGNoaWRlcm4uICAgMS4gaW1tYXR1cmUgZGlnZXN0aXZlIHN5c3RlbTogdGhlIGRpZ2VzdGl2ZSBlbnp5bWUgYWN0aXZpdHkgaW4gaW5mYW50cyBhbmQgeW91bmcgY2hpZGVybiBpcyBub3QgZnVpaXkgZGV2ZWxvcGVkIGxlYWRpbmcgdG8gbGVzcyBlZmZjaWVudCBwcm90aWVuIGdpZ2VzdGlvbiBjb21wYXJlZCB0byBhZHVsdHMuICAgICAyLiBzcGVjaWZpYyBlbnp5bWUgcHJlc2VuY2U6ICAgIHBlcHNpbjogYWN0aXZlIGluIHRoZSBhY2lkaWMgZW52aXJvbm1lbnQgb2YgdGhlIHN0b21hY2ggYnRlYWtzIGRvd24gcHJvdGVpbnMgaW50byBwZXB0aWRlcy4gICAgICB0cnlwc2luIGFuZCBjaHltb3RyeXNwaW46IHNlY3JlYXRlZCBieSB0aGUgcGFuY3JhcyBhY3RpdmF0ZWQgaW4gdGhlIGR1b2RudW0gdG8gY2xlYXZlIHBlcHRpZWQgYm9uZHMuICAgICBjYXJib3h5cGVwdGlkZXM6ICBmdXJ0aGVyIGJyZWFrcyBkb3duIHBlcHRpZGVzIGludG8gYW1pbm8gYWNpZHMuICAgICAgZGlwZXB0aWRhc2VzIGFtZCBhbWlub3BwZXRpZGVzOiBmb3VuZCBpbiB0aGUgc21hbGwgaW50ZXN0aW5hbCBsaW5pbmcgY29tcGxldGUgdGhlIGdpZ2VzdGlvbiBvZiBwZXB0aWRlcyBpbnRvIGZyZWUgYW1pbm8gYWNpZHMuICAgICAgMy4gYnJlc3QgbWlsayBhZGFwdGF0aW9uOiBicmVhc3QgbWlsayBjb250YWlucyBwcm90ZXNlcyBhbmQgZmFjaWxpdGVzIHByb3RpZW5zIGRpZ2VzdGlvbiBpbiBpbmZhbnRzLiAgICAgIDQuIGdyYWR1YWwgbWF0dXJhdGlvbjogIHByb3Rlb2x5dGljayBlbnp5bWVzIGFjdGl2aXR5IGluY3JlYXNlcyB3aXRoIGFnZSByZWFjaGluZyBhZHVsdCBsZXZlbHMgYXJvdW5kIDItMyB5ZWFycy4gICAgICAgICAgICAgICAgaW50ZXJwcmV0YXRpb24gb2YgdGhlIGdlbmVyYWwgdXJpbmUgYW5hbHlzaXMgICAgdGhlIGFuYWx5c2lzIGluZGljYXRlcyBzZXZlcmUgbWV0YWJvbGljIGRlcmFuZ2VtZW50cyBsaWtlbHkgZHVvIHRvIGRpYWJldGljIGtldG9hY2lkb3Npcy4gICAgICAxLiBwcm90aWVuOiBpbmRpY2F0ZXMgbWlsZCBwcm90ZWludXJpYSBvZnRlbiBwcmVzZW50IGluIHN0cmVzcyBzdGF0ZXMgb3IgZWFybHkga2lkbmV5IGRhbWFnZS4gICAgIDIuIHNwZWNpZmljIGdyYWF2aXR5OiAgaW5kaWNhdGVzIGhpZ2hseSBjb25jZW50cmF0ZWQgdXJpbmUgZHVlIHRvIGRlaHlkcmF0aW9uIGZyb20gcG9seXVyaWEuICAzLiB3aGl0ZSBibG9vZCBjZWxscyA6IG5vIHNpZ25pZmljYW50cyBpbmZsYW1tYXRpb24gb3IgaW5mZWN0aW9uIGluIHRoZSB1cmluYXJ5IHRyYWN0LiAgICA0LiBjeWxpbmRlcjogc3VnZ2VzdCByZW5hbCB0dWJ1bGFyIGRhbWFnZSBjb21tb24gaW4gc2V2ZXJlIGRlaHlkcmF0aW9uIG9yIERLQS4gICAgNS4ga2V0b25lIGJvZGllczogcmVmbGVjdHMga2V0b2FjaWRvc2lzIGEgaGFsbG1hcmsgb2YgdW5jb250cm9sbGVkIGRpYWJldGVzIG1lbGxpdHVzLiAgIDYuIHN1Z2FyOiBpbmRpY2F0ZXMgc2lnbmlmaWNhbnQgZ2l5Y29zdXJpYSBhIHJlc3VsdCBvZiBoeXBlcmdseWNlbWlhIGV4Y2VlZGluZyB0aGUgcmVuYWwgdGhlc2hvbGQgdGhlIHJlbmFsIHRocmVzaG9sZCBmb3IgZ2x1Y29zZSByZWFib3NvcnB0aW9uL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15" table:style-name="ce1">
            <text:p>1067115</text:p>
          </table:table-cell>
          <table:table-cell office:value-type="string" table:style-name="ce1">
            <text:p>english</text:p>
          </table:table-cell>
          <table:table-cell office:value-type="string" table:style-name="ce1">
            <text:p>Ticket 3&amp;lt;br /&amp;gt; 1. What are the features of proteolytic enzymes in young children and what enzymes belong to them?&amp;lt;br /&amp;gt; 2.A 10-year-old boy сame to the doctor with complaints of abdominal pain, headache, thirst (drinks up to 3-4 liters of water per day), frequent urination, increased appetite, weight loss. He was ill for 2 weeks. On examination, flaccid, pale, severe dry skin, decreased tissue turgor. In the general analysis of urine, protein is 0.9%, specific gravity is 1035, white blood cells are 0-2 in sight, cylinders are in large numbers, ketone bodies +++, sugar 7%. Interpret the general analysis of urine. &amp;lt;br /&amp;gt;</text:p>
          </table:table-cell>
          <table:table-cell office:value-type="string" table:style-name="ce1">
            <text:p>YW5zd2VyLTEuZmVhdHVyZXMgb2YgcHJvdGVvbHl0aWMgZW56eW1lcyBpbiB5b3VuZyBjaGlsZHJlbjotIGl0IGlzIGludm9sdmVkIGluIHRoZSBkaWdlc3Rpb24gb2YgcHJvdGllbiBpbmNsdWRlIHBlcHNpbiAocHJvZHVjZSBpbiB0aGUgc3RvbWFjaCl0cnlwc2luICBhbmQgY2h5bW90cnlwc2luKHByb2R1Y2UgaW4gdGhlIHBhbmNyZWFzKS50aGVzZSBlbnp5bWUgYnJlYWtkb3duIHByb3RlaW4gaW50byBzbWFsbGVyICBwZXB0aWRlcyBhbmQgYW1pbm8gYWNpZCBhaWRpbmcgdGhlaXIgYWJzb3JwdGlvbiBkdXJpbmcgdGhlIGRpZ2VzdGl2ZSBwcm9jZXNzLi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gYW5zd2VyLTIuaW50cmVwdGlvbiB0aGUgZ2VucmFsIGFuYWx5c2lzIG9mIHVyaW5lLSBpbiB3aGljaCB0aGUgZmluZGluZyBhcmUgYWJub3JtYWxseSBoaWdoIHN1Z2FyIGdsdWNvc2UgbGV2ZWwgNyUsaW5kaWNhdGUgaHlwZXJnbHljZW1pYSBzdWdnZXN0ZWQgcG9vcmx5IGNvbnRyb2xsZWQgZGlhYmV0ZXMgbWFsbGl0dXMuaGlnaCBsZXZlbCBvZiBrZXRvbiBib2RpZXMga2V0b251cmlhICBzdWdnZXN0ZWQgIGJyZWFrZG93biBvZiBmYXRzIGR1ZSB0byBpbnN1bGluIGRlZmljaWFuY3ksYSBjaGFyZWN0ZXJzdGljIGZlYXR1cmVzIG9mIGRpYWJldGljIGtldG9hY2lkb3Npcy5lbGV2YXRlZCBwcm90aWVuIGxldmVsIDAuOSUgaW5kaWNhdGVkIHByb3RlaW51cmlhIHN1Z2dlc3RlIGQgcG9zc2libHkga2lkbmV5IGludm9sdmVtZW50IHdoaWNoIGNvdWxkIGJlIGFzc29jaWF0ZWQgd2l0aCBkaWFiZXRlcyBvciBzZXByYXRlIHJlbmFsIGlzc3VlLiBoaWdoIHNwZWNpZmljIGdyYXZpdHkgMTAzNSBpbmRpY2F0ZSBjb25jZW50cmF0ZWQgdXJpbmUgcG9zc2libHkgZHVlIHRvIGRlaHlkcmF0aW9uIHJlc2x1dGluZyBmcm9tIGV4eGNlc2l2ZSBmbHVpZCBsb3NzIC5mbGFjY2lkICxwYWxlIHNldmVyIGRyeSBza2luIGFuZCBkZWNyZWFzZSAgdGlzc3VlIHRlcmdlciBzaWduICBvZiBkZWh5ZHJhdGlvbiB3aGljaCBpcyBjb25zaXN0ZW50IHdpdGggdGhlIGluY3JlYXNlZCB0aGlyc3QgZnJlcXVlbnQgdXJpbmF0aW9uIGFuZCB3ZWlnaHQgbG9zcyByZXBvcnRlZCBieSB0aGUgcGF0ZWludCBwcmVzZW5jZSBvZiBjeWxpbmRlciBpbiBsYXJnZSBudW1iZXIgaW5kaWNhdGUgcmVuYWwgaW52b2x2ZW1lbnQgYW5kIHBvc3NpYmxlIGRhbWFnZSB0byB0aGUgcmVuYWwgdHVidWxlLiA=</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the answer is incomplete, the text is short</text:p>
          </table:table-cell>
          <table:table-cell office:value-type="float" office:value="0" table:style-name="ce1">
            <text:p>0</text:p>
          </table:table-cell>
          <table:table-cell table:number-columns-repeated="16376"/>
        </table:table-row>
        <table:table-row table:style-name="ro1">
          <table:table-cell office:value-type="float" office:value="915203" table:style-name="ce1">
            <text:p>915203</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S3QttCw0YPQsNC/OiDQkdCw0LvQsNC70LDRgNC00YvSoyDRgdGW0LvQtdC60LXQuSDQsdC10LfQtNC10YDRltC90ZbSoyDQtNCw0LzRg9GLINKb0rHRgNGB0LDSm9GW0YjRltC70ZbQuijQv9GA0LXQvdCw0YLQsNC70YzQtNGL0pvSmykg0LTQsNC80YMg0LrQtdC30LXSo9GW0L3QtNC1INCx0LDRgdGC0LDQu9Cw0LTRiyAg0LbTmdC90LUgINGC0L7Qu9GL0pPRi9C80LXQvSDQtNCw0LzRg9GLINC20q/RgNC80LXQudC00ZYuINCR0LDQu9Cw0LvQsNGA0LTRi9KjINGC0YPRi9C70pPQsNC9INGB05nRgtGC0LXQs9GWINGB0ZbQu9C10LrQtdC5INCx0LXQt9C00LXRgNGW0L3RltKjINC10YDQtdC60YjQtdC70ZbQs9GWINCx0ZbRgNC90LXRiNC1INCw0YHQv9C10LrRgtGW0LvQtdGA0LTQtSDQutOp0YDRltC90LXQtNGWLCDQvNGL0YHQsNC70Ysg0L3TmdGA0LXRgdGC0LUg0LbTmdC90LUg0YHTmdCx0Lgg0LrQtdC30LTQtdGA0ZbQvdC00LUg0YHRltC70LXQutC10Lkg0LHQtdC30LTQtdGA0ZYg0YLQvtC70YvSmyDQttC10YLRltC70LzQtdCz0LXQvSDQttOZ0L3QtSDRhNGD0L3QutGG0LjQvtC90LDQu9GM0LTRi9KbINCx0LXQu9GB0LXQvdC00ZbQu9GW0LPRliDRgtOp0LzQtdC9INCx0L7Qu9Cw0LTRiy4g0JXQutGW0L3RiNGW0LTQtdC9INGB05nQsdC40LTRltKjINGB0ZbQu9C10LrQtdC50ZYg0LrQvtC90YHQuNGB0YLQtdC90YbQuNGP0YHRiyDQsdC+0LnRi9C90YjQsCDRgtKx0YLSm9GL0YAg0LrQtdC70LXQtNGWLCDQsdKx0Lsg0YHTmdCx0LjQtNGW0qMg0LXQvNGI0LXQutGC0LXQs9GWINC20LDRgdGC0LDSk9GLINC10LzRgyDQv9GA0L7RhtC10YHRgdGW0LzQtdC9INCx0LDQudC70LDQvdGL0YHRgtGLINCz0LXRgNC80LXRgtC40LfQsNGG0LjRj9C90Ysg0pvQsNC80YLQsNC80LDRgdGL0Lcg0LXRgtC10LTRli4g0KHRltC70LXQutC10Lkg0pvSsdGA0LDQvNGLINC00LAg0LXRgNC10LrRiNC1LCDQvtC90LTQsCDQsNC70YzRhNCwIC0g0LDQvNC40LvQsNC30LAg0YTQtdGA0LzQtdC90YLRltC90ZbSoyDQsdGW0YDRltC90YjRltC00LXQvSDQutC+0L3RhtC10L3RgtGA0LDRhtC40Y/RgdGLINCw0Lcg0LHQvtC70YvQvyDQutC10LvRgdC1LCDSm9GL0LfQvNC10YLRgtGW0Log0LbQsNKT0YvQvdCw0L0g0LHQtdC70YHQtdC90LTRltC70ZbQs9GWINGC06nQvNC10L0g0LHQvtC70YvQvyDRgtCw0LHRi9C70LDQtNGLKNCx0rHQuyDQsdCw0LvQsNC90YvSoyDSm9C+0YDQtdC60YLQtdC90YPRltC80LXQvSDRgtGW0LrQtdC70LXQuSDQsdCw0LnQu9Cw0L3Ri9GB0YLRiykuINCQ0LTQsNC80LTQsCDRgdGW0LvQtdC60LXQuSDQsdC10LfQtNC10YDRltC90ZbSoyAzLdC10YMg0LXQutC10L3RltC9INCx0ZbQu9C10LzRltC3INC205nQvdC1INC00LUg0L7Qu9Cw0YDSk9CwINC20LDSmyDQsNGB0YLRiyAsINGC0ZbQuyDQsNGB0YLRiyAsINGI0YvSm9GI0YvRgiDQsdC10LfQtNC10YDRliDQutGW0YDQtdC00ZYuINCR0LDQu9Cw0L3Ri9KjINCw0LvSk9Cw0YjSm9GLINCw0LnQu9Cw0YDRi9C90LTQsNKT0Ysg0YHRltC70LXQutC10Lkg0LHQtdC30LTQtdGA0ZbQvdGW0qMg0YTQuNC30LjQvtC70L7Qs9C40Y/Qu9GL0psg0LPQuNC/0L7RhNGD0L3QutGG0LjRj9GB0Ysg0LHRltGA0L3QtdGI0LUg0YTQsNC60YLQvtGA0LvQsNGA0pPQsCDRgtGW0LrQtdC70LXQuSDQsdCw0LnQu9Cw0L3Ri9GB0YLRiyDQtdC60LXQvdGW0L0g0LDQudGC0LAg0LDQu9Cw0LzRi9C9LiDQntC70LDRgNC00YvSoyDRltGI0ZbQvdC00LXQs9GWINCx0ZbRgNGW0L3RiNGWINC60LXQu9GC0ZbRgNC10YLRltC90ZbQvCwg0L7QuyDQvdC10LnRgNC+0LPRg9C80L7RgNCw0LvRjNC00YvSmyDRgNC10YLRgtC10LvRg9C00ZbSoyDRgtC+0LvRi9KT0YvQvNC10L0g0LbQtdGC0ZbQu9C80LXQs9C10L3QtNGW0LPRlijQvNC4INKb0YvRgNGC0YvRgdGLINGC0L7Qu9GL0psg0YTRg9C90LrRhtC40Y8g0LDRgtKb0LDRgNGD0LTRiyDQv9C+0YHRgtC90LDRgtCw0LvRjNC00YvSmyDQtNCw0LzRg9GL0LTRi9Kj0qMgMy3QsNC50LTQsNC9INCx0LDRgdGC0LDQu9Cw0LTRiywg0LTTmdC7INC+0YHRiyDRgdOZ0YLRgtC1INGN0LvQtdC60YLRgNC+0Y3QvdGG0LXRhNCw0LvQvtCz0YDQsNC80LzQsNC00LAg0LDQu9GM0YQg0YDQuNGC0Lwg0LHQsNC50pvQsNC70LDRgtGL0L0g0LHQvtC70YvQvyDQutC10LvQtdC00ZYpIC4g0JPQuNC/0L7RgdCw0LvQuNCy0LDRhtC40Y/QvdGL0qMg0LHQsNGB0pvQsCDRhNCw0LrRgtC+0YDQu9Cw0YDRi9C90LAg0pvQvtGA0LXQutGC0LXQvdGDINGC0LXQuiDSm9Cw0L3QsCDQsNC90LAg0YHSr9GC0ZbQvNC10L0g0LHQvtC70YPRiywg0LbTmdC90LUg0LTQtSDQsNC70pPQsNGI0pvRiyDQsNC50LvQsNGA0LTQsNKT0Ysg0YHQtdGA0LPQtdC60YLRltC6INC60LXQt9C10qPRltC90LXQvSDSsdC50pvRi9C00LAg06nRgtC60ZbQt9C10YLRltC9INGD0LDSm9GL0YLRiyDQutOp0L8g0LHQvtC70YPRiywg0LHQsNC70LAg0LbRi9C70LDSk9Cw0L3QtNCwINGB0ZbQu9C10LrQtdC5INCx0LXQt9C00LXRgNGWINGB0LXQutGA0LXRhtC40Y/Qu9GL0psg0pvRi9C30LzQtdGC0ZYg0LHTmdGB0LXSo9C00LXRg9GWINC+0YHRiyDRhNC40LfQuNC+0LvQvtCz0LjRj9C70YvSmyDRgdGW0LvQtdC60LXQuSDQsdC10LfQtNC10YDRltC90ZbSoyDQsNC3INCx06nQu9GW0L3Rg9GW0L0gINGB0LjQv9Cw0YLRgtCw0Lkg0LDQu9Cw0LTRiyDQtNC10L8g0L7QudC70LDQudC80YvQvS4g0JDQuyDQvNCw0pPQsNC9INCx0LXRgNGW0LvQs9C10L0g0LbQsNKT0LTQsNC50LDRgtGC0YvSmyDQtdGB0LXQvyDQsdC+0LnRi9C90YjQsCwg0YHRltC70LXQutC10LnQtNGW0qMg0LrTqdC/INCx06nQu9GW0L3Rg9GWINC/0LDRgtC+0LvQvtCz0LjRj9C70YvSmyDQttCw0pPQtNCw0LnSk9CwINC60LXQu9GC0ZbRgNC1INCw0LvQsNC80YvQtyDQsdCwPyEg0JzQtdC90ZbSoyDQvtC70LDQuSDQtNC10L8g0L7QudC70LDQvNCw0YPRi9C80LAg0LHRltGA0L3QtdGI0LUg0YHQtdCx0LXQv9GC0LXRgCDQsdCw0YA6INGB0ZbQu9C10LrQtdC5INCx0LXQt9C00LXRgNGWINCx0LDQu9CwINC00q/QvdC40LXQs9C1INC60LXQu9Cz0LXQvSDRgdOZ0YLRgtC10L0g0LHQsNGB0YLQsNC/LNCx0ZbRgNGW0L3RiNGWINCw0LnRi9C90YvQvSDTqdC3INC00LDQvNGD0YvQvdCQINCx0LDRgdGC0LDRgyDQsNC70YHQsCwg05nRgNGWINKb0LDRgNCw0LkgIDMtNCDQsNC5INCx0L7QudGLINC00LDQvNC40YLRi9C9INCx0L7Qu9GL0L8g0LrQtdC10LvQtdC00ZYuINCR0LDQu9Cw0LvQsNGA0LTRi9KjINC80LXRgtCw0LHQvtC70LjQt9C8INC10YDQtdC60YjQtdC70ZbQutGC0LXRgNGWINOZ0YDRgtKv0YDQu9GWINC10LrQtdC90ZbQvSDQtdGB0LrQtdGA0YHQtdC6LCAzINCw0LnQu9GL0psg0LHQsNC70LDQvdGL0qMg0YHRltC70LXQutC10Lkg0LHQtdC30LTQtdGA0ZYg0LbQtdGC0ZbQu9GW0L8sINGE0YPQvdC60YbQuNC+0L3QsNC70YzQtNGL0psg0LHQtdC70YHQtdC90LTRltGW0LvRltCz0ZYg0pvQsNC70YvQv9GC0LDRgdGD0Ysg0LbTmdC90LUg0L7QtNCw0L0g0LDRgdCwINGC0rHRgNCw0pvRgtCw0L3Rg9GLINC/0LDRgtC+0LvQvtCz0LjRj9C70YvSmyDQtdC80LXRgSDRhNC40LfQuNC+0LvQvtCz0LjRj9C70YvSmyDSm9Kx0LHRi9C70YvRgdKb0LAg0LrTqdCx0ZbRgNC10Log0LrQtdC70LXQtNGWINC00LXQvyDQvtC50LvQsNC50LzRi9C9LiDQkdCw0YHSm9CwINC20LDSk9GL0L3QsNC9INCw0LvRi9C/INKb0LDRgNCw0LnRgtGL0L0g0LHQvtC70YHQsNKbLCDQsdGW0LfQtNC1INGE0LjQt9C40L7Qu9C+0LPQuNGP0LvRi9KbINGB06nQuyDQsNKT0Ysg0L3QtdC80LXRgdC1INCz0LjQv9CV0YDRgdCw0LvQuNCy0LDRhtC40Y8g0LTQtdCz0LXQvSDSsdKT0YvQvCDQsdCw0YAsINC+0Lsg0LbQsNKT0LTQsNC5INC005nQuyDQsdGW0LfQtNGW0qMg0L/QsNGG0LjQtdC90YLRltC80ZbQt9C00LXQs9GWINGB0LXQutGW0LvQtNGWINCw0YPRi9C3INKb0YPRi9GB0YvQvdCwINGB0ZbQu9C10LrQtdC5INC606nQvyDQsdOp0LvRltC90YPRliDRgdC10LHQtdC/0YLRliDQvtC7INCw0YPRi9C30LTRi9Kj0qMg0YHRi9GA0YLRi9C90LAg0pvQsNGA0LDQuSDQsNKT0YPRi9C80LXQvSDRgdC40L/QsNGC0YLQsNC70LDQtNGLLiDQmtC10LfQtdKj0ZYg0LTQtSDQsdGW0YAg0Y7RltGA0ZbQvdC90LUg0YHTmdC50LrQtdGBINC60LXQu9C10LTRligyOCDQutKv0L0g0LzQtdC9IDEg0LbQsNGBINCw0YDQsNC70YvSk9Cw0L3QtNCwLCDQvdC10LPRltC30ZbQvdC10L0gMy00INCw0LnQu9GL0psg0YHTmdCx0LjQtNC1KS4g0JHQsNGB0pvQsCDRhNCw0LrRgtC+0YAg0YDQtdGC0ZbQvdC00LUg0YHRltC70LXQutC10Lkg0LHQtdC30LTQtdGA0ZbQvdGW0qMg0YHQtdC60YDQtdGG0LjRj9GB0YvQvSDQsNGA0YLRgtGL0YDRg9KT0LAg0LHQsNKT0YvRgtGC0LDQu9KT0LDQvSDSm9C+0LfQtNGL0YDSk9GL0YjRgtCw0YDQtNGL0qMg0LDRg9GL0Lcg0pvRg9GL0YHRi9C90LAg0YLSr9GB0YPRliwg0LzRi9GB0LDQuyDQsNC50YLQsNGC0YvQvSDQsdC+0LvRgdCw0psg0LHSsdC7INCw0LnQu9GL0psg0LHQsNC70LDQu9Cw0YAg0LrQuNGW0LzRltC90ZbSoyDQttCw0pPQsNGB0YvQvSwg0L7QudGL0L3RiNGL0pvRgtCw0YDQtNGLINC90LXQvNC10YHQtSDSm9C+0LvRi9C9INGB0L7RgNGD0Ysg0LzSsdC80LrRltC9LiDQntGB0Ysg0LrQtdC30LTQtdGA0LTQtSDQsNGD0YvQtyDSm9GD0YvRgdGL0L3QsCDRgtKv0YHQutC10L0g0LzQuNC60YDQvtCx0YLQsNGA0LTRiyDQttC+0Y7Sk9CwINCw0YDQvdCw0LvSk9Cw0L0g0YHRltC70LXQutC10LnQtNGW0qMg0LrTqdC/INCx06nQu9GW0L3Rg9GWINKb0LDQu9GL0L/RgtGLINC20LDSk9C00LDQuSgo0YHRltC70LXQutC10Lkg0pvSsdGA0LDQvNGL0L3QtNCwINC70LjQt9C+0YbQuNC8INC80LjQutGA0L7QsdGC0LDRgNC00Ysg0LbQvtGPINCw0LvQsNC00YspINKa0L7RgNGL0YLRi9C90LTRiyDRgNC10YLRltC90LTQtSDQsNC50YLQsNGC0YvQvdGL0LwsIDMtNCDQsNC50pPQsCDQtNC10LnRltC9INCx0LDQu9Cw0L3Ri9KjINGB0ZbQu9C10LrQtdC5INCx0LXQt9C00LXRgNGW0L3SoyDRgdC10LrRgNC10YbQuNGP0YHRiyDQsNC3INCx0L7Qu9GD0Ysg0LTQsCwg0q/RiCAt0YLTqdGA0YIg0LDQudC70YvSmyDQutC10LfQtNC10YDRltC90LTQtSDRgdGW0LvQtdC60LXQuSDQsNGD0YvQtyDSm9GD0YvRgdGL0L3QsNC9INGB0YvRgNGC0pvQsCDRiNGL0pPRi9C/INCw0pPRg9GLINC00LAtINCx0LDQu9Cw0L3Ri9KjINC90L7RgNC80LAgLSDRhNC40LfQuNC+0LvQvtCz0LjRj9GB0YvQvdCwINC60LXQu9C10LTRliAo0LXRgdC60LXRgNC1INC+0YLRi9GA0LDRgtGL0L0g0LbQsNKT0LTQsNC5INGE0LjQt9C40LrQsNC70YvSmyDQvdC10YDQsi3Qv9GB0LjRhdC40LDQu9GL0psg0LTQsNC80YMg0LDSm9Cw0YPQu9Cw0YDRiyDQttC+0psg0LHQvtC70pPQsNC9INC60LXQt9C00LTQtS4pPGJyIC8+DQo8YnIgLz4NCjItINGB0rHRgNCw0psg0LHQvtC50YvQvdGI0LAg0LbRg9Cw0YPQsNC/OiDQsNCy0YLQvtGAINCw0YLQsNGD0Ysg0LHQvtC50YvQvdGI0LAg0KfQtdC50L0gLSDQodGC0L7QutGBINGC0YvQvdGL0YHRiyDQtdGA0LXRgdC10LrRgtC10YDQtNC1INGC0YvQvdGL0YEg0LDQu9GDINCw0LrRgtGW0YHRltC90ZbSoyDQvdC+0YDQvNCw0YHRi9C90LAg0pvQsNC50YjRiyDQv9Cw0YDQsNC80LXRgtGAINCx0L7Qu9GB0LAsINCx0LDQu9Cw0LvQsNGA0LTQsNKT0Ysg0YLRi9C90YvRgSDQsNC70YMg0YLQsNC60YLRltGB0ZbQvdGW0qMg0LHSsdC30YvQu9KT0LDQvdGL0L0g0LrTqdGA0YHQtdGC0L/QtdC50LTRli4g0JHSsdC7INGC0YvQvdGL0YEg0YLQuNC/0ZbQvdC1INGB0LjQv9Cw0YLRgtCw0LzQsCDQsdC10YDQtdGC0ZbQvSDQsdC+0LvRgdCw0LwsINGC0YvQvdGL0YEg0LDQu9GDINC20LjRliDQttOZ0L3QtSDQsdC10YLQutC10Lkg0LHQvtC70LDQtNGLKNCx0LDQu9Cw0LvQsNGA0LTQsNKT0Ysg0YTQuNC30LjQvtC70L7Qs9C40Y/Qu9GL0psg0KLQkNGF0LjQv9C90L7RjSksINC+0pPQsNC9INKb0L7RgdCwINC+0L3Ri9KjINCw0LzQv9C70LjRgtGD0LTQsNGB0Ysg0LHRltGA0YLQtSDQsdGW0YDRgtC1INGA0LjRgtC80LTRliDRgtKv0YDQtNC1INCw0YDRgtCw0LTRiyDQtNCwICwg0L/QuNC60LrQtSDQttC10YLQutC10L3QtNC1INGC0YvQvdGL0YEg0YLQvtKb0YLQsNC50LTRiy4g0JHSsdC7INC/0LDRg9C30LAgNS0xMCDRgdC10LrRg9C90LTRgtCw0L0g0LDRgdC/0LDQudC00Ysg05nQtNC10YLRgtC1LiDQntGB0Ysg0L/QsNGD0LfQsNC00LDQvSDQutC10LnRltC9INGC0YvQvdGL0YEg0LDQu9GDINGC0LDQutGC0ZbRgdGW0L3RltKjINCw0L/QvNC70LjRgtGD0LTQsNGB0Ysg0pvQsNC50YLQsNC00LDQvSDQsNGA0YLQsNC00Ysg0LbTmdC90LUg0YjRi9Kj0YvQvdCwINC20LXRgtGW0L8g0YLQvtKb0YLQsNC50LTRiy4g0J/RgNC+0YbQtdGB0YEg0pvQsNC50YLQsNC70LDQvdCw0LTRiywg0LHSsdC7INGC0YvQvdGL0YEg0LDQu9GDINGA0LXRgtGC0LXQu9GD0ZbQvdGW0qMg0YLQvtC70YvSmyDQttC10YLRltC70LzQtdCz0LXQvdGWLCDRgdOZ0LHQuNC70LXRgNC00ZbSoyDRgtGL0L3Ri9GBINCw0LvRgyDQsdKx0LvRiNGL0psg0LXRgtGC0LXRgNGWLCDQsNGA0LDRgdGL0L3QtNCwINOZ0YHRltGA0LXRgdC1INC00LjQsNGE0YDQsNCz0LzQsCDQvdCw0YjQsNGAINKb0YvQt9C80LXRgiDQsNGC0pvQsNGA0YPRi9C80LXQvSDQsdCw0LnQu9Cw0L3Ri9GB0YLRiy4g0KLRi9C90YvRgSDQsNC70YMgINKv0YjRltC9INC60LXRg9C00LUg0YLQvtGA0YvQvdGL0qMg0LrTqdC70LXQvNGWINC00LUg0LDQtywg0YLRi9C90YvRgSDQsNC70YMg0LbSr9C50LXRgdGW0L3RltKjINCw0L3QsNGC0L7QvNC40YLRj9C70YvSmyDQttC10YLRltC70YPRliDRgtC+0LvRi9KT0YvQvNC10L0g0LDRj9Kb0YLQsNC70LzQsNKT0LDQvS4g0KHQvtC90LTRi9Kb0YLQsNC9INC00LAg0LDQu9KT0LDRiNKb0Ysg0LDQudC70LDRgNC00LAg0YLRi9C90YvRgSDQttC40ZbQu9GW0LPRliA0MC02MCDRgNC10YIg0LzQuNC90YPRgtGL0L3QsC4g0J7RgdGLINGE0LDQutGC0L7RgNC70LDRgNC00YvSoyDQsdCw0YDQu9GL0pPRiyDRgdOZ0LHQuNC00LXQs9GWINGC0YvQvdGL0YEg0LDQu9GD0LTRi9KjINC10YDQtdC60YjQtSDRgtC40L/RliDQvtGA0YvQvSDQsNC70YPRi9C90LAg0YHQtdCx0LXQv9GI0ZYg0LHQvtC70LAg0LDQu9Cw0LTRiy4g0JzQuCDSm9GL0YDRgtGL0YHRiyDSm9GL0LfQvNC10YLRliDQvNC10L0sINC80Lgg0LHQsNKT0LDQvdGL0L3QsCAg0LbQsNGC0LDRgtGL0L0g0YHQvtC/0LDSm9GI0LAg0LzQuNC00YvSoyDSm9Kx0YDRi9C70YvQvNC00YvSmyDSm9GL0LfQvNC10YLRgtGW0Log0LbQtdGC0ZbQu9GDINGC0YvQvdGL0YEg0LDQu9GD0LTRi9KjINGA0LXRgtGC0LXQu9GD0ZYg0LTSsdGA0YvRgdGC0LDQu9GD0YvQvdCwINCw0LvRi9C/INC60LXQu9GB0LUsINC00LjQsNGE0YDQsNCz0LzQsCDSm9Cw0LHRi9GA0pPQsNCw0YDQsNC70YvSmyDQsdKx0LvRiNGL0psg0LXRgtGC0LXRgCDQttC10YLRltC70ZbQvywg0LrQtdGD0LTQtSDRgtC+0YDRiyDSr9C70LrQtdC50ZbQvywg0LDQu9GM0LLQtdC+0LvQsCDRgdCw0L3RiyDQsNGA0YLRi9C/INC205nQvdC1INGB0YPRgNGE0LDQutGC0LDQvdGC0YLQsNGAINKb0YvQt9C80LXRgtGWINCx0LXQu9GB0LXQvdC00ZbQu9C10L3QtSDRgtKv0YHQutC10L3QtNC1INGC0YvQvdGL0YEg0LDQu9GDINGC0LDQutGC0ZbRgdGWINC205nQvdC1INGC0LjQv9GWINCx0ZbRgNGC0LUg0LHRltGA0YLQtSDQtdGA0LXRgdC10LrRgtC10YDQs9C1INGB05nQudC60LXRgSDQutC10LvQtdC00ZYuKDEg0LbQsNGB0YLQsCAzNS00MCDRgNC10YIg0LzQuNC90YPRgtGL0L3QsCwgNy0xMSDQttCw0YHRgtCwIDE5LTIwLCDQsNC7INC10YDQtdGB0LXQtdC6INC+0YDQs9Cw0L3QuNC30LzQtdC0IDE2LTE4INGC0YvQvdGL0YEg0LDQutGC0ZbRgdGWINCx0LDQudKb0LDQu9Cw0LTRiykgICAgIA==</text:p>
          </table:table-cell>
          <table:table-cell office:value-type="float" office:value="170348" table:style-name="ce1">
            <text:p>170348</text:p>
          </table:table-cell>
          <table:table-cell office:value-type="float" office:value="98" table:style-name="ce1">
            <text:p>9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2" table:style-name="ce1">
            <text:p>915282</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S4gMyDQsNC50LvRi9KbINCx0LDQu9Cw0LvQsNGA0LTQsCDQsNGD0YvQt9C00LDRgNGL0L3QsNC9INGB0ZbQu9C10LrQtdC50LTRltKjINCw0pPRg9GLINC90LXQvNC10YHQtSDRgdCw0LvQuNCy0LDRhtC40Y8g0pvQsNC70YvQv9GC0Ysg0YTQuNC30LjQvtC70L7Qs9C40Y/Qu9GL0psg0LbQsNKT0LTQsNC5INCx0L7Qu9GL0L8g0YHQsNC90LDQu9Cw0LTRiy4g0J7Sk9Cw0L0g0YHQtdCx0LXQvyDQsdC+0LvQsNGC0YvQvSDQsdGW0YDSm9Cw0YLQsNGAINCw0L3QsNGC0L7QvNC40Y/Qu9GL0pstINGE0LjQt9C40L7Qu9C+0LPQuNGP0LvRi9KbINC10YDQtdC60YjQtdC70ZbQutGC0LXRgCDQsdCw0YAuINCc0YvRgdCw0LvRiyDQsNGD0YvQtyDSm9GD0YvRgdGL0L3Ri9KjINC60ZbRiNC60LXQvdGC0LDQuSDQsdC+0LvRg9GLLCDRgtGW0Lsg0LDRg9GL0LfQtNGLINGC0L7Qu9GL0pvRgtCw0Lkg0LDQu9GL0L8g0LbQsNGC0LDQtNGLLCDRgtGW0LvQtNGW0qMg0pvQvtC30pPQsNC70LzQsNC70YvQu9GL0pPRiyDRgtOp0LzQtdC9INC205nQvdC1INGCLtCxLiDQndC10LPRltC30ZbQvdC10L0g0L3TmdGA0LXRgdGC0LXQu9C10YDQtNC1IDEsNS0yINCw0LnQtNCwINGB0ZbQu9C10LrQtdC5INCx0LXQt9C00LXRgNGWINGC0L7Qu9GL0psg0LbQtdGC0ZbQu9GW0L8g0pvRi9C30LzQtdGC0ZbQvSDQsNGC0pvQsNGA0LAg0LHQsNGB0YLQsNC50LTRiywg0LDQuyAzLTQg0LDQudC70LDRgNGL0L3QsNC9INGB0ZbQu9C10LrQtdC50LTRltKjINCw0YPRi9C3INKb0YPRi9GB0YvQvdGL0qMg0YHRi9GA0YLRi9C90LAg0LDSk9GL0L8g0LrQtdGC0YPRliDQsdCw0LnSm9Cw0LvQsNC00YsuINCe0YHRiyDQttCw0YHRgtCw0pPRiyDQsdCw0LvQsNC70LDRgNC00LAg0YHRltC70LXQutC10LnQtNGW0qMg0LrTqdC/INOp0L3QtNGW0YDRltC70YPRliDQsdCw0LnQu9Cw0L3Ri9GB0YLRiyDQsdC+0LvQsNC00Ysg0LHQtdC3INGB06nQuyDTqdC90LTRltGA0ZbRgdGWINC20LXRgtGW0LvQs9C10L0sINCx0LDRgdKb0LDQtNCwINCw0YHSm9C+0YDRgtGDINC20q/QudC10LvQtdGA0ZYg0LTQsNC80YMg0q/RgdGC0ZbQvdC00LUuINCW05nQvdC1INC00LUg0LzQuNC00YvSoyDRgdC10L3RgdC+0YDQu9GL0psg0LbTmdC90LUg0LzQvtGC0L7RgNC70YvSmyDQsdOp0LvRltC80LTQtdGA0ZYg0L/QvtGB0YLQvdCw0YLQsNC70YzQtNGL0Log0LrQtdC30LXSo9C00LUg0LXQvdC00ZYg0LTQsNC80YvQvyDQutC10LvQtSDQttCw0YLRi9GALCDRgdC+0L3QtNGL0pvRgtCw0L0g0LHQsNC70LDQtNCwINGB0ZbQu9C10LrQtdC50LTRliDQttKx0YLRgyDQttOZ0L3QtSDRgdGL0YDRgtKb0LAg0YjRi9KT0LDRgNGDINGA0LXRhNC70LXQutGB0ZYg0LbQvtKbLCDRgdC+0Lsg0YHQtdCx0LXQv9GC0ZbQtNC1INGB0ZbQu9C10LrQtdC5INCw0YPRi9C3INKb0YPRi9GB0YvQvdCw0L0g0LXRiNCx0ZbRgCDQutC10LTQtdGA0LPRltGB0ZbQtyDRgdGL0YDRgtKb0LAg0LDSk9GL0L8g0LrQtdGC0LXQtNGWLiDQldC80YMg0LrQtdC30ZbQvdC00LXQs9GWINC20rHRgtGDINC+0Lsg0YLRg9CwINC/0LDQudC00LAg0LHQvtC70pPQsNC9INGI0LDRgNGC0YHRi9C3INGA0LXRhNC70LXQutGBLCDQsNC7INGB0ZbQu9C10LrQtdC50LTRltKjINC20rHRgtGL0LvRg9GLINGD0LDSm9GL0YIg06nRgtC1INC/0LDQudC00LAg0LHQvtC70LDRgtGL0L0g0YDQtdGE0LvQtdC60YEuICAgICAgICAgICAyLiDQp9C10LnQvSDQodGC0L7QutGBINGC0YvQvdGL0YHRiy3Qs9C40L/QtdGA0LLQtdC90YLQuNC70Y/RhtC40Y8g0LzQtdC9INCw0L/QvdC+0Y3QvdGL0qMg0L3QtdC80LXRgdC1INGC0YvQvdGL0YHRgtGL0qMg0YLQvtKb0YLQsNGD0YvQvNC10L0g0LrQtdC30LXQutGC0LXRgdGD0ZYuINCv0pPQvdC4INC+0Lsg0LHQsNGB0YvQvdC00LAg0YLQtdGA0LXSoyDRgtGL0L3Ri9GBINCw0LvRg9C80LXQvSDQsdCw0YHRgtCw0LvRi9C/LCDQutC10LnRltC9INGC0YvQvdGL0YEg0LDQu9GDINC60q/RiNGWINC80LXQvSDQttC40ZbQu9GW0LPRliDQsdGW0YDRgtGW0L3QtNC10L8g0YLTqdC80LXQvdC00LXQvyDRgdC+0qPRi9C90LTQsCA1LTEwINGB0LXQutGD0L3QtNGC0YvSmyDQsNC/0L3QvtGNINC+0YDRi9C9INCw0LvQsNC00YsuINCm0LjQutC7INGC0YPRgNCwINC+0YHRi9C70LDQuSDQsdGW0YDQvdC10YjQtSDRgNC10YIsINC606nQsdGW0L3QtdGB0LUg0rHQudGL0pvRgtCw0YMg0LrQtdC30ZbQvdC00LUg0pvQsNC50YLQsNC70LDQvdGL0L8g0L7RgtGL0YDQsNGC0YvQvSDQsdC+0LvQsNC00YsuINCV0LPQtdGAINCn0LXQudC9INCh0YLQvtC60YEg0YLRi9C90YvRgdGLINC60LXQt9GW0L3QtNC1INCx0LDQu9Cw0LvQsNGA0LTQsCDRhtC40LDQvdC+0LcsINGC0rHQvdGI0YvSk9GDINCx0LXQu9Cz0ZbQu9C10YDRliDQsdC+0LvQvNCw0YHQsCDQvtC90LTQsCDQvtC90Ysg0pvQsNC70YvQv9GC0Ysg0L3TmdGA0LXRgdGC0LXQu9C10YDQtNGW0qMg0YTQuNC30LjQvtC70L7Qs9C40Y/Qu9GL0psg0YLRi9C90YvRgdGLINGA0LXRgtGW0L3QtNC1INGB0LDQvdCw0LnQvNGL0LcuINCh0LXQsdC10LHRliDQsdCw0LvQsNC70LDRgNC00YvSoyDRgtGL0L3Ri9GBINCw0LvRgyDQttKv0LnQtdGB0ZbQvdGW0qMg06nQt9GW0L3QtNGW0Log0LDQvdCw0YLQvtC80LjRjy0g0YTQuNC30LjQvtC70L7Qs9C40Y/Qu9GL0psg0LXRgNC10LrRiNC10LvRltC60YLQtdGA0ZYg0LHQsNGALiDQnNGL0YHQsNC70YssINC20LDQu9C/0Ysg0LbQsNKj0LAg0YLRg9GL0LvSk9Cw0L0g0L3TmdGA0LXRgdGC0LXQu9C10YDQtNGWINGC0YvQvdGL0YEg0YLQtdGA0LXSo9C00ZbQs9GWINGC0LDRj9C3INCx0L7Qu9Cw0LTRiyAo0YDQtdGB0L/QuNGA0LDRgtC+0YDQu9GL0psg0LHTqdC70ZbQvCDTmdC70ZYg0YLQvtC70YvSmyDQttC10YLRltC70ZbQvyDQtNCw0LzRi9KT0LDQvSDQttC+0pspLNC60LXRg9C00LUg0pvRg9GL0YHRi9C90YvSoyDQttOZ0L3QtSDQttCw0LvQv9GLINGC0YvQvdGL0YEg06nRgtC60ZbQt9GDINC20L7Qu9C00LDRgNGL0L3Ri9KjINC60ZbRiNC60LXQvdCw0Lkg0LHQvtC70YPRiyDRgi7QsS4g0JrSr9C90LTRltC30LPRliDQsNC60YLQuNCy0YLRliDQutC10LfRltC90LTQtSDRgtGL0L3Ri9GBINCw0LvRgyDQttC40ZbQu9GW0LPRliDQttC+0pPQsNGA0Ysg0LHQvtC70YHQsCwg0YLSr9C90LTQtSDRgdC40LzQv9Cw0YLQuNC60LDQu9GL0psg0LbSr9C50LrQtSDQttKv0LnQtdGB0ZbQvdGW0qMg0pvQvtC30pPRi9GI0YLRi9KT0Ysg0YLTqdC80LXQvdC00LXRg9C00LXQvSDQttOZ0L3QtSDQttCw0qPQsNC00LAg0LDQudGC0LAg0LrQtdGC0LrQtdC90LTQtdC5INGC0YvQvdGL0YEg0LDQu9GDINGC0LXRgNC10qPQtNGW0LPRliDRgtCw0Y/QtyDQsdC+0LvRg9GL0L3QsNC9INGC0YvQvdGL0YEg0LHRltGA0YLQtS0g0LHRltGA0YLQtSDQsNC30LDRj9GL0L8g0YLQvtKb0YLQsNGD0Ysg0L7RgNGL0L0g0LDQu9Cw0LTRiy4g0KHQvtGB0YvQvSA1LTEwINGB0LXQutGD0L3QtCDTqdGC0LrQtdC9INGB0L7SoyDRgtGL0L3Ri9GBINCx0LDRgdGC0LDQv9Kb0Ysg0pvQsNC70L/Ri9C90LAg0LrQtdC70ZbQvywg0YbQuNC60Lsg0pvQsNC50YLQsNC00LDQvSDSm9Cw0LnRgtCw0LvQsNC90LDQtNGLLiDQkdKx0L3QtNCw0Lkg0YLRi9C90YvRgSDQttCw0qPQsCDRgtGD0YvQu9KT0LDQvSDQvdOZ0YDQtdGB0YLQtdC70LXRgCDSr9GI0ZbQvSDSm9Cw0LvRi9C/0YLRiyDQttOZ0L3QtdC00LUg06nQvNGW0YDRltC90LUg0pvQsNGD0ZbQvyDRgtOp0L3QtNGW0YDQvNC10LnQtNGWLiA6KQ==</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82" table:style-name="ce1">
            <text:p>915482</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S4g0JHSsdC90LTQsNC5INC20LDRgdGC0LDSk9GLINCx0LDQu9Cw0LvQsNGA0LTQsCDRgdGW0LvQtdC60LXQuSDQsNKT0YPRiyDTmdC00LXRgtGC0LUg0L3QvtGA0LzQsCDQsdC+0LvRi9C/INC60LXQu9C10LTRli4g0JHRltGA0LDSmyDQsNC70LDQudC00LAg0L7Qu9Cw0YDQtNGL0qMg0YjQtdC60YLQtdC9INGC0YvRgSDQutOp0L8g0LHQvtC70YPRiyDQsdCw0LvQsNC90YvSoyDQttCw0YHRi9C90LDQtNCwINCx0LDQudC70LDQvdGL0YHRgtGLINCx0L7Qu9Cw0LTRiy4g0L3QtdC80LXRgdC1INCw0YPRgtC+0LjQvNGD0L3QtNGL0psg0LbQsNKT0LTQsNC50LvQsNGA0LTQsCDRgdC40YDQtdC6INC20LDSk9C00LDQudC70LDRgNC00LAg0LrQtdC30LTQtdGB0LXQtNGWLiDTqNC50YLQutC10L3RliDQsdCw0LvQsCDTqdGC0LUg0LrRltGI0LrQtdC90YLQsNC5INC+0YHRi9KT0LDQvSDQsdCw0LnQu9Cw0L3Ri9GB0YLRiyDQvNGL0LnQtNGL0qMg0YHQtdC90YHQvtGA0LvRi9KbINC205nQvdC1INC80L7RgtC+0YDQu9GL0psg0LHTqdC70ZbQs9GWINC20LDRgSDSsdC70pPQsNC50pPQsNC9INGB0LDQudGL0L0g0LzQvtGC0L7RgNC70YvSmyDQttKv0LnQtdCz0LUg0LHQsNC50LvQsNC90YvRgdGC0Ysg0LTQsNC80LjQtNGLLiDQodC10L3RgdC+0YDQu9GL0psg0YHQsNC90LDQvdGL0qMg0LbQtdGC0ZbRgdC/0LXRg9GI0ZbQu9GW0LPRliDQttOZ0L3QtSDQvtC70LDRgNC00YvSoyDRgtC+0LvRi9KbINC00LDQvNGL0LzQsNKT0LDQvdC90YvSoyDQsNGA0pvQsNGB0YvQvdC00LDSm9C+0Lcs0LDQu9GL0YEg0LHQtdC70YHQtdC90LTRltC70ZbQs9GW0L3RltKjINC20LXRgtGW0YHQv9C10YPRiNGW0LvRltCz0ZYg0LHQsNC50pvQsNC70YvQvyDRgtKx0YDQsNC00YsuINCR0rHQuyDQttCw0YHRgtCwINC905nRgNC10YHRgtC10L3TmdGWINGP0pPQvdC4INCx0LDQu9Cw0LvQsNGA0LTRi9KjINGB0ZbQu9C10LrQtdC5INCx0LXQt9C00LXRgNGWINKb0LDRgNKb0YvQvdC00Ysg0YLSr9GA0LTQtSDQtNCw0LzRi9KT0LDQvSDQsdC+0LvRi9C/INC60LXQu9C10LTRliwg0LDQuyDQttKx0YLRi9C90YMg0LbTmdC90LUg0YHRltC70LXQutC10Lkg0YjRi9KT0LDRgNGDINC+0LvQsNGA0LTQsCDQutC+0L7RgNC00LjQvdCw0YbQuNGP0YHRiyDTmdC70ZYg0YLQvtC70YvSmyDQvtGA0L3QsNGC0YvQu9C80LDSk9Cw0L0g0LHQvtC70YPRi9C00LAg0LzSr9C80LrRltC9INCx0L7Qu9GL0L8g0LrQtdC70LXQtNGWLiDQodC+0L3Ri9KjINC905nRgtC40LbQtdGB0ZbQvdC00LUg0YHRltC70LXQutC10LnQtNGW0qMg0LHRltGAINCx06nQu9GW0LPRliDQsNGD0YvQt9C00LDQvSDQsNKT0YvQvyDQutC10YLRg9GWINC80q/QvNC60ZbQvS4gINCx0rHQuyDQttCw0pPQtNCw0Lkg0YHRltC70LXQutC10Lkg0LDSk9GD0YvQvdCwINC90LXQvNC10YHQtSDRiNCw0LzQsNC00LDQvSDRgtGL0YEg0YHRltC70LXQutC10Lkg0LDSk9GD0pPQsCDQsNC70YvQvyDQutC10LvQtdC00ZYu0JHSsdC7INOZ0LTQtdGC0YLQtSDTqdGC0L/QtdC70ZYg0LbTmdC90LUg06nQt9C00ZbQs9GW0L3QtdC9INOp0YLQtdGC0LXRltC9INC20LDSk9C00LDQuSDQsdC+0LvRi9C/INC60LXQu9C10LTRli4g0JbQsNC70L/RiyDQvdOZ0YDQtdGB0YLQtSDQsdCw0LvQsNC70LDRgNC00YvSoyDRgdGW0LvQtdC60LXQuSDQsdC10LfQtNC10YDRltC90ZbSoyDQtdGA0LXRiNC10LvRltC60YLQtdGA0ZYg0YHQtdC60YDQtdGG0LjRj9C90YvSoyDQsdC10LvRgdC10L3QtNGW0LvRltCz0ZbQvdC10L0g0YLTqdC80LXQvSDQsNC3INC806nQu9GI0LXRgNC00LUg0pvQvtGOINGC0rHRgtKb0YvRgCDRgdGW0LvQtdC60LXQudC00ZbSoyDQsdOp0LvRltC90YPRliDQtdC80YMg0LrQtdC30ZbQvdC00LUg0LDRg9GL0Lcg0pvRi9GB0YvQvdGL0qMg0LrQtdGA0LzQtdGC0LDRhtC40Y/RgdGLINCx0L7Qu9GL0L8g0LrQtdC70LXQtNGWINCx0LDQu9Cw0LvQsNGA0LTQsCDRgdGW0LvQtdC60LXQuSDQsdC10LnRgtCw0YDQsNC/INC205nQvdC90LUg05nQu9GB0ZbQtyDSm9GL0YjSm9GL0Lsg0LHQvtC70YvQvyDQutC10LvQtdC00ZYuIDEsNSAyINCw0LnQu9GL0psg0LHQsNC70LDQtNGLINGB0ZbQu9C10LrQtdC5INCx0LXQt9C00LXRgNGWINCw0YDRgtCwINCx0LDRgdGC0LDQudC00Ysg0YHQvtC90YvSoyDQsNGA0pvQsNGB0YvQvdC00LDQtNCw0YHRltC70LXQutC10LnRgtGW0qMg0LrTqdC/INCx06nQu9GW0L3Rg9GWINC/0LDQudC00LAg0LHQvtC70LDQtNGLLCDQsNC7IDMsNCDQsNC50LvRi9KbINCx0LDQu9Cw0LTQsCDRgdGW0LvQtdC60LXQuSDRgtGW0L/RgtGWINCw0YPRi9C3INKb0YPRi9GB0YvQvdGL0qMg0YHRi9GA0YLRi9C90LAg0LTQtdC50ZbQvSDQsNKT0YvQvyDQutC10YLQtdGC0LXRltC90LMg0LbQsNKT0LTQsNC50LvQsNGAINCx0L7Qu9Cw0LTRiy4g0JHSsdC7INGB0ZbQu9C10LrQtdC5INCx06nQu9GW0L3Rg9C00ZbSoyDQvdC+0YDQvNCw0YHRiyDQsdC+0LvRi9C/INC60LXQu9C10LPQtdC90LTRltC60YLQtdC9INC+0L7RgdGLINC20LDRgdGC0LDSk9GLINCx0LDQu9Cw0LvQsNGA0LTQsCDQsNGB0LAg0LDQu9Cw0qPQtNCw0YPRiNGL0LvRi9KbINGC0YPRi9C90LTQsNGC0pvRi9C30LHQsNC50LTRiy4g0J7QuyDQsdCw0LvQsNC90YvSoyDQtNC10L3RgdCw0YPQu9GL0pPRi9C90LAg0L3QtdC80LXRgdC1INCx0L7Qu9Cw0L3Ri9KjINCx0L7Qu9C80YvRgdGL0L3QsCDSm9Cw0L3QtNCw0LnQtNCwINCx0ZbRgCDQv9C+0L/RgtC+0LvQvtCz0LjRj9C70YvSmyDQttCw0pPQtNCw0LnQu9Cw0YDQtNGLINC606nRgNGB0LXRgtC/0LXQudC00ZYuPGJyIC8+DQoyLiDQp9C10LnQvSDQodGC0L7QutGBINGC0YvQvdGL0YEg0LDQu9GD0Ysg0L7QuyDQttKv0YDQtdC6INC20LXRgtC60ZbQu9GW0LrRgdGW0LfQtNGW0LPRliwg0LjQvdGB0YPQu9GM0YIsINC80Lgg0LbQsNGA0LDSm9Cw0YLRiyDRgdC40Y/Sm9GC0Ysg05nRgNGC0q/RgNC70ZYg0LbQsNKT0LTQsNC50LvQsNGA0LTQsCDQv9Cw0LnQtNCwINCx0L7Qu9GLINC80q/QvNC60ZbQvS7Qk9C40L/QtdGA0LLQuNC90YLQtdC70Y/RhtC40Y/QvNC10L0g0LDQv9C90L7RjSDQutC10LfRltC90LTQtSDRgdC40L/QsNGC0YLQsNC70pPQsNC9INGC0YvQvdGL0YEg0LDQu9GDINKv0LvQs9GW0YHRliAuINCU0LXQvdGWINGB0LDRgyDQsdCw0LvQsNC00LAg06nQvNGW0YDRltC90ZbSoyDQsNC70pPQsNGI0pvRiyDQsNC50LvQsNGA0YvQvdC00LAg0pvQsNC70YvQv9GC0Ysg0YTQuNC30LjQvtC70L7Qs9C40Y/Qu9GL0psg0L3SsdGB0pvQsCDRgNC10YLRltC90LTQtSDSsdC50pvRiyDQutC10LfRltC90LTQtSDQp9C10LnQvSDRgdGC0L7QutGBINGC0YvQvdGL0LDRgSDQsNC70YMg0L/QsNC50LTQsCDQsdC+0LvRg9C60Ysg0LzSr9C80LrRltC9LiDSrtC70LPRliDTmdC00LXRgtGC0LUg0YLRi9C90YvRgSDQsNC70YMg0LbQuNGW0LvRltCz0ZbQvNC10L0g0YLQtdGA0LXSo9C00ZbQu9GW0LPRltC90ZbSoyDQsdGW0YDRjNC1INCx0ZbRgNGC0LUg0LbQvtKT0LDRgNC70LDRg9GL0LzQtdC60L0g0YHQvtC00LDQvSDQutC10LnRltC9INCx0ZbRgNGC0LUg0LHRltGA0YLQtSDRgtKb0LzQtdC90LTQtdGD0ZbQvNC10L0g0YHQvtC00LDQvSDQutC10LnRltC9INC+0LvQsNGA0LTRi9KjINGC0YvQvdGL0YEg0LDQu9GD0LTRi9KjINCw0pvRi9GAINGB0L7So9GL0L3QtNCwINKx0LfRltC70ZbRgdGW0LzQtdC9INGB0LjQv9Cw0YLRgtCw0LvQsNC00YsuINCe0LvQsNGAIDUg0LbTmdC90LUgMTAg0YHQuNC60YPQvdC00pvQsCDRgdC+0LfRi9C70LDQtNGLLiDQntGB0YvQtNCw0L0g0LrQtdC50ZbQvSDRgtGL0L3Ri9GBINCw0LvRgyDQsdGW0YDRgtGW0L3QtNC10L8g0LDRgNGC0LDQtNGLICDQttOZ0L3QtSDQvtC70LDRgNC00YvSoyDRgtGL0L3Ri9GBINC20LjRltC70ZbQs9GWINC20L7Sk9Cw0YDQu9Cw0L8g0LbTmdC90LUg0L7RgdGLINGG0LjQutC7INKb0LDQudGC0LDQtNCw0L0g0pvQsNC50YLQsNC70LDQvdGL0L8g0L7RgtGL0YDQsNC00YsuINCR0rHQuyDSr9C70LPRliDTmdC00LXRgtGC0LUg06nQt9C00ZbQs9GW0L3QtdC9INGI0LXQutGC0LXQu9C10LTRliDQttOZ0L3QtSDQtNC10L3RliDRgdCw0YMg0L3TmdGA0LXRgdGC0LXQu9C10YDQtNGW0qMg0LXQu9C10YPQu9GWINC/0YDQvtCx0LvQtdC80LDQu9Cw0YAg0YLRg9KT0YvQt9Cx0LDQudC00YsuINGB05nQsdC40LvQtdGA0LTQtSDRgtGL0L3Ri9GBINCw0LvRgyDQvtCx0YHQvtC70Y7RgtGC0ZbQuiDRgdCw0LvRi9GB0YLRi9GA0LzQsNC70Ysg0LrSm9C70LXQvNC00LXRgNGWINC60ZbRiNGWINCx0L7Qu9Cw0LTRiyAsINCx0LXRgtC60LXQudC70ZYg0YLQuNGW0LzRgdGW0Lcg0YLRi9C90YvRgSDQsNC70YPSk9CwINKb0LDRgNCw0LzQsNGB0YLQsNC9INC20LjRliDRgtGL0L3RgdGC0LDQvdGDINCw0YDSm9GL0LvRiyDQsdC+0LvQsNC90YvSoyDQvtGA0LPQsNC90LjQt9GW0LzRliDQvtGC0YLQtdCz0ZbQvNC10L0g0LbQtdGC0LrRltC70ZbQutGC0ZYg0YLSr9GA0LTQtSDSm9Cw0LzRgtCw0LzQsNGB0YvQtyDQtdGC0ZbQu9C10LTRli4g0J3TmdGA0LXRgdGC0LXQu9C10YDQvNC10L0g0LXRgNGC0LUg0LbQsNGB0YLQsNKT0Ysg0LHQsNC70LDQu9Cw0YDQtNCwINGC0YvQvdGL0YHRgtGL0qMg0LbTmdC90LUg0pvSsdGA0YHQsNKb0YLRi9KjINGC0LjQv9GWINCx0LDRgdGL0Lwg0LHQvtC70YvQvyDQutC10LvQtdC00ZYuINC+0Lsg0pvQsNCx0YvRgNKT0LDQu9Cw0YDQtNGL0qMg0LPQvtGA0LjQt9C+0L3RgtCw0LvRjNC00ZYg0pvQsNC70L/RiyDQvNC10L0g0YLTqdC80LXQvSDQtNC40LDRhNGA0LDQs9C80LDQvdGL0qMg0YLSsdGA0YPRi9C90LDQvSDQutC10YPQtNC1INKb0YPRi9GB0YvQvdC00LAg0LrQtdC50LTQtSDQttC10YLQutGW0LvRltC60YHRltC30LTQtdGAINC/0LDQudC00LAg0LHQvtC70LvRg9GLINC80q/QvNC60ZbQvS4gINCU0LXQs9C10L3QvNC10L0g0KfQtdC50L0g0YHRgtC+0LrRgSDRgtGL0L3Ri9GBINCw0LvRg9GLINGB0LDSm9GC0LDQu9GB0LAg0L3QtdC80LXRgdC1INGG0LjQsNC90L7QtyDQttOZ0L3QtSDQvdCw0YjQsNGAINGC0LDQvNCw0pvRgtCw0L3RgyDRgdC40Y/Sm9GC0Ysg0LHQsNGB0pvQsCDQsdC10LvQs9GW0LvQtdGA0LzQtdC9INCx0LDQudC70LDQvdGL0YHRgtGLINCx0L7Qu9KT0LDQvSDQttCw0pPQtNCw0LnQu9Cw0YDQtNCwINCx0rHQuyDQtNC10L3RgdCw0YPQu9GL0psg0YHQsNKb0YLQsNGDINC80LDQvNC90YvQvdGL0qMg0pvQvtGB0YvQvNGI0LAg0LrSr9GC0ZbQvNC00LXRgNC00ZYg0L3QtdC80LXRgdC1INKb0LDRgNCw0YPQu9Cw0YDQtNGLINGC0LDQu9Cw0L8g0LXQutGC0LrQtdC9INCx0L7Qu9GD0Ysg0LzSr9C80LrRltC9L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590" table:style-name="ce1">
            <text:p>915590</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SkgM9Cw0LnQu9GL0Log0LHQsNC70LDQtNCwINGB0YvQu9C10LrQtdC50LTRi9C9INC60L7QvyDQsdC+0LvRi9C90YPRiyDQttC40Ysg0LrQtdC30LTQtdGB0LXRgtGL0L0g0YHQvtGL0L3QvNC10L0g0LHRi9GA0LPQtSDQutCw0LvRi9C/0YLRiyDQttCw0LPQtNCw0Lku0KHQtdC10LHQtdCx0ZYg0LHQsNC70LAg0L7RgtC1INC60YvRiNC60LXQvdGC0LDQuSAg0LbQsNC90LUg0LzQuNC00YvQvSDRgdC10L3RgdC+0YDQu9GL0Log0LbQsNC90LUg0LzQsNGC0L7RgNC70YvQuiDQttGD0LnQtdGB0Ysg0LbQsNGBINGD0LvQs9Cw0LnQs9Cw0L0g0YHQsNC50YvQvSDQttC10YLRi9C70LzQtdCz0LXQvS4g0JHRg9C7INC/0YDQvtGG0LXRgdGBINCh0LXQvdGB0L7RgNC70YvQuiDQttCw0L3QtSDQvNCw0YLQvtGA0LvRi9C6INC20YPQudC10LPQtdCx0LDQudC70LDQvdGL0YHRiyDQtNCw0LzQuNC00YsuINCh0L7QvdGL0LzQtdC9INC60LDRgtCw0YAg0LHRg9C70LDQuSDRgdGL0LvQtdC60LXQudC00YvQvSDQutC+0L8g0LHQvtC70YvQvdGL0YMg0LbTmdC90LUg0YHRi9C70LXQutC10Lkg0LbRg9GC0YvQu9GL0YMg0YDQtdGC0YLQtdC70YPRi9C90YvQvSAgINGC0L7Qu9GL0Log0LbQtdGC0YvQu9C80LXRg9GL0LzQtdC90LTQtSDQsdCw0LnQu9Cw0L3Ri9GB0YLRiy4g0K/Sk9C90Lgg0LHRg9C7INGE0LjQt9C40L7Qu9C+0LPQuNGP0LvRi9C6INGB0YvQu9C10LrQtdC5INCw0LPRgy4g0KHRi9C70LXQutC10Lkg0LrRi9GI0LrRi9C70Ysg0LDQtNCw0Lwg0LbQsNGB0YvQvdCwINCx0LDQudC70LDQvdGL0YHRgtGLINCw0YHQsCDRgtGD0YHQtdC00YsuINCQ0YPRi9C3INC60YPRi9GB0YvQvdCwICDRgtCw0LzQsNC6INGC0YPRgdC60LXQvdC90LXQvSDRgdC+0L0g0YLQsNC80LDQuizQutGD0LvQsNC6INC80LDQvdGL0L3QtNCw0LPRiyDQttCw0Log0LDRgdGC0Yss0LbQsNC90LUg0YLRi9C7INCw0YHRgtGLINCx0LXQt9C00LXRgNGL0LzQtdC9ICDQsNGA0LDQu9Cw0YHRi9C/INGI0YvQu9Cw0L3QsNGC0YvQvSDQsdC+0LvQsNC00YsuINCe0LTQsNC9INCx0L7Qu9C10Log0LDRg9GL0Lcg0LrRg9GL0YHRi9C80LXQvSDRgtGL0LvQtNGL0L0g0YjRi9GA0YvRiNGC0Ysg0LrQsNCx0YvQs9GL0L3QtNCwINC606nQv9GC0LXQs9C10L0g0rHRgdCw0psg0LHQtdC30LTQtdGAINC60LXQt9C00LXRgdC10LTRiy7QntC70LDRgCDRgtGD0YvQu9Cz0LDQvdC90LDQvSDQsdCw0YHRgtCw0L8g0LrRi9C30LzQtdGCINC10YLQtdC00YsuINCQ0LvQsNC50LTQsCDQsNC70LPQsNGI0LrRiyDQutGD0L3QtNC10YDRiyAs0YjRi9GA0YvRiNGC0Ysg0LHQtdC30LTQtdGA0LTRi9C9INCw0Lcg0LHQvtC70YPRi9C90LDQvSDRgdGL0LvQtdC60LXQuSDQsdC+0LvRi9C90YPRiyDQttC10YLQutGL0LvRi9C60YHRi9C3INCx0L7Qu9Cw0LTRiy4g0YHQvtC7INGB0LXQsdC10L/RgtC10LPRiyDQtdGA0YLQtSDQttCw0LzRgdGC0LDQs9GLINCx0LDQu9Cw0YDQtNGL0L0g0YjRi9GA0YvRiNGC0Ysg0LrQsNCx0YvQs9GLINC60YPRgNCz0LDQuiDQsdC+0LvRi9C/INC60LXQu9C10LTRiy7TqNC80ZbRgNGW0L3RltKjIDMtNiDQsNC50YvQvdCw0L0gLNGC0YvQv9GC0Ysg0LrQtdC50LTQtSDQvtC00LDQvdC00LAg0LXRgNGC0LUg0YHRi9C70LXQutC10Lkg0LHQvtC70YvQvdGD0Ysg0LHRi9GA0LDQtyDQsNGA0YLQsNC00Ysu0JHQsNC70LDQu9Cw0YAg0YHRi9C70LXQutC10LnQtNGLINC20YPRgtGL0L8g0YPQu9Cz0LXRgNC80LXQudC00Ysg0YHQvtC7INGB0LXQsdC10L/RgtGLINCw0YPRi9C3INC60YPRi9GB0YvQvdCw0L0g0LDQs9GL0L8g0YLRg9GA0LDQtNGLLiAg0JHSsdC7INC20LDQs9C00LDQudC00Ysg0YTQuNC30LjQvtC70L7Qs9C40Y/Qu9GL0Log0LrQsNC90LjQstCw0YbQuNGPINC00LXQvyDQsNGC0LDQudC00YsuINCh0L7QvdC00LDQuSDQsNKbICDQsdCw0LvQsNC70LDRgNC00LAg0YLRltGBINGI0YvQs9GD0YvQvdCwINCx0LDQudC70LDQvdGL0YHRgtGLICzRgtGL0YHRgtGL0L0g0YjRi9Cz0YPQtNGL0L0g0LHRi9GA0YvQvdGI0Ysg0LHQtdC70LPRi9GB0Ysg0LHQvtC70YvQvyDQodGW0LvQtdC60LXQudC00YvQvSDQsNCz0YPRiyzQsNGA0YLRi9C6INGB0YvQu9C10LrQtdC5INCx0L7Qu9GL0L3Rg9GLICzRgdGL0LvQtdC60LXQuSDQsdC10LfQtNGL0L0g0LTRg9GA0YvRgSDQttGD0LzRi9GBINGL0YHRgtC10LnRgtGL0L0g0LrQvtGA0YHQtdGC0LXQtNGLLiDQkdGD0Lsg0L3QsNGA0LXRgdGC0LXQu9C10YDQtNGL0L0g0LDRgSDQutC+0YDRgtGL0YLRgyDQttKv0LnQtdGB0YvQvdGL0L0g0LTQsNC80YvQvyDQutC10LvQtSDQttCw0YLQutCw0L3Ri9C9INCx0LXQu9Cz0YvRgdGLLiDQodGL0LvQtdC60LXQuSDQsNGBINC+0LrRgNGC0YvRgyDQv9GA0L7RhtC10YHRi9C90YvQvSDQsNC70LPQsNGI0LrRiyDQutC10LfQtdC90YsgLtCe0YHRiyDQutC10LfQtdC90LTQtSDQsdCw0LvQsNC00LAg0YTQtdGA0LzQtdC90YLRgtC10YAg0LDRgdGL0YDQtdGB0LUg0LDQvNC40LvQsNC30LAg0LHTqdC70YvQvdGL0L8g0LDRgSDQutC+0YDRi9GC0YMg0LbRg9C50LXRgdGL0L3QtSDQutCw0YLRi9GB0LDQtNGLLiAg0JrQvtGA0YvRgtGL0L3QtNGL0LvQsNC5INC60LXQu9C1IDMg0LDQuSDQsdCw0LvQsNC70LDRgNC00LAg0YHRi9C70LXQutC10LnQtNGL0L0g0LrQvtC/INCx0L7Qu9GL0L3Rg9GLINC60LDQu9GL0L/RgtGLINGE0LjQt9C40L7Qu9C+0LPQuNGP0LvRi9C6INC20LDQs9C00LDQuS4g0JHRg9C7INGB0YvQu9C10LrQtdC5INCx0LXQt9C00LXRgNGL0L3Ri9C9INCx0LXQu9GB0LXQvdC00YvRgNGD0YvQvNC10L0g0LbRg9GC0YMg0LTQsNCz0LTRi9C70LDRgNGL0L3Ri9C9INGC0L7Qu9GL0Log0LbQtdGC0YvQu9C80LXRg9GL0YTQvNC10L0g0Lgg0YLRltGB0YLRi9C9ICDRiNGL0LPRg9GL0L3QsCDQtNCw0LnRi9C90LTRi9C6INCx0L7Qu9GL0L8g0LXRgdC10L/RgtC10LvQtdC00YsuIC4g0YPQsNGL0LrRgiDQvtGC0LUg0LrQtdC70LUg0LHQsNC70LAg0YHRi9C70LXQutC10Lkg0LbRg9GC0YPQtNGLINGD0LnRgNC10L3QtdC00YsuINCh0L7QvdGL0LzQtdC9INC60LDRgtCw0YAgOiDQsNGD0YvQtyDQutGD0YHRi9C90YvQvSDRgdC10LfRi9C80YLQsNC70LTRi9C70YvQs9GL0LTQsCDQsNGB0LXRgCDQtdGC0LXQtNGLINGP0LPQvdC4INCx0LDQu9CwINC+0YHRiyDQttCw0YHRgtCwINCw0YPRi9C3INCw0YDQutGL0LvRiyDQsNC70LXQvNC00Ysg0YLQsNC90Lgg0LHQsNGB0YLQsNC50LTRiyzQt9Cw0YLRgtCw0YDQtNGLINCw0YPQt9GL0L3QsCDRgdCw0LvRg9Cz0LAg0LHQtdC50YvQvCDQsdC+0LvRi9C/INC60LXQu9C10LTRiy4g0JHRg9C7INC10YDQutC10YLRgtC10YAg0YHRi9C70LXQutC10Lkg0LHQtdC30LTQtdGA0YvQvSDRi9C90YLQsNC70LDQvdC00YvRgNGL0L8g0LrQvtC/INCx0L7Qu9GD0YvQvdC1INCw0LrQtdC70LXQtNGLLtCe0YHRiyDRgdC10YHQsdC10L/RgtC10YDQs9C1INCx0LDQudC70LDQvdGL0YHRgtGLIDMg0LDQudC70YvQuiDQsdCw0LvQsNC70LTQsCDRgdGL0LvQtdC60LXQudC00YvQvSDQsdC+0LvRi9C90YPRiyDQutCw0LvRi9C/0YLRiy4g0JDRgtCwIC3QsNC90LDRgdGL0L3Ri9C9INGD0LDQudGL0LzQttC00LDRg9GL0L3Ri9C9INC60LDQttC10YLRgtGLINC20L7Qui4gMinQodGD0YDQsNC6INC20LDRg9Cw0LHRizog0KfQtdC50L0g0YHRgtC+0LrRgSDRgtGL0L3Ri9GBINCw0LvRg9GLLNC20YPRgNC10Log0LbQtdGC0LrRi9C70YvQutGB0YvQt9C00YvQs9GLLNC40L3RgdGD0LvRjNGCINC80Lgg0LbQsNGA0LDQutCw0YLRiyDRgdC10LrRi9C70LTRiyAg05nRgCDRgtKv0YDQu9GWINCw0YPRi9GA0YPQu9Cw0YDQtNCwINC/0LDQudC00LAg0LHQvtC70YPRiyDQvNGD0LzQutGL0L0sINCz0LjQv9C10YDQstC10L3RgtC40LvRj9GG0LjRj9C80LXQvSDQsNC/0L3QvtGNINC60LXQt9C10L3QtNC10YDRi9C90YvQvSDQsNGD0YvRgNC/0LDQu9Cw0LvRi9Cz0YvQvNC10L0g0YHQuNC/0LDRgtGC0LDQu9Cw0YLRi9C9INGC0YvQvdGL0YEg0LDQu9GDINC606nRgNGL0L3Ri9GB0Ysg0LHQvtC70YvQvyDRgtCw0LHQsNC70LDQtNGLLiAg0JTQtdC90ZYg0YHQsNGDINCx0LDQu9Cw0LvRgNC00LAg0L7QvNGL0YDRi9C90YvQvSDQsNC70LPQsNGI0LrRiyDQsNC50LvQsNGA0YvQvdC00LAg0JrQsNC70YvQv9GC0Ysg0YTQuNC30LjQvtC70L7Qs9C40Y/Qu9GL0Log0LbQsNCz0LTQsNC5INGA0LXRgtC40YvQvdC00LUg0YPQudGL0LrRgtCw0L8g0LbQsNGC0LrQsNC9INC60LXQt9C00LXRgNGL0L3QtNC1INCn0LXQudC9INGB0YLQvtC60YEg0YLQuNGL0L3Ri9GB0Ysg0L/QsNC50LTQsCDQsdC+0LvRg9GLINGL0LrRgtC40LzQsNC7LiDQkdGD0Lsg05nQtNC10YLRgtC1INGC0YvQvdGL0YEg0LDQu9GDINC20LjRi9C70YvQs9GLINC80LXQvSDRgtC10YDQtdC90LTRi9Cz0YvQvdGL0L0g0LHRi9GA0YLRgtC1INCx0YvRgNGC0LUg0LbQvtCz0LDRgNC70LDRg9GL0LzQtdC9INGB0L7QtNCw0L0g0YHQvtC9INCx0YvRgNGC0LUg0LHRi9GA0YLQtSDRgtC+0LzQtdC90LTQtdGD0YvQvNC10L0g0LbQsNC90LUg0LDQutGL0YDRi9C90LTQsCDRgtGL0L3Ri9GBINCw0LvRg9C00YvQvSDRg9C30YvQu9GD0YvQvNC10L0g0LrQvtGA0YvQvdGL0YEg0YLQsNCx0LDQtNGLLiDQltCw0L3QtSDQsdGD0LsgNS0xMNGBINGB0L7Qt9GL0LvQsNC00YsuINCe0YHRi9C00LDQvSDRgdC+0L0g0LrQsNC50YLQsNC00LDQvSDRgtGL0L3Ri9GBINCw0LvRgyDQsdGL0YDRgtGL0L3QttC00LXQvyDQsNGA0YLQsNC00YsuINCW0LDQvdC1INCm0LjQutC7INC60LDQudGC0LDQu9Cw0L3Ri9C/INC+0YLRi9GA0LDQtNGLLiDQkdGD0Lsg0YLRi9C90YvRgSDQsNC70YMg0YLSr9GA0Ysg0LDQtNC10YLRgtC1INC+0LfQtNGL0LPRi9C80LXQvSDRgNC10YLQtdC70LXQtNGLLiDQttCw0L3QtSDQtNC10L3RiyDRgdCw0YMg0L3QsNGA0LXRgdGC0LXQu9C10YDQtNGL0L0g0LTQtdC90YHQsNGD0LvRi9Cz0YvQvdCwINC10LvQtdGD0LvRiyDQsNGB0LXRgCDQtdGC0L/QtdC50LTRiy7Qp9C10LnQvSDRgdGC0L7QutGBINGC0YvQvdGL0YEg0LDQu9GDINGB0LDQutGC0LDQtNC70LDRgtGL0L0g0LHQvtC70YHQsCDQttCw0L3QtSDRhtC40LDQvdC+0Lcg0L3QtdC80LXRgdC1INC90LDRiNCw0YAg0YLQsNC80LDQutGC0LDQvdGDICDRgdC40Y/RhdGC0Ysg0LHQsNGB0LrQsCDQtNCwINCx0LXQu9Cz0YvQu9C10YDQvNC10L0g0LHQsNC50LvQsNC90YvRgdGC0Ysg0LHQvtC70YHQsCDQvtC7INC00LXQvdGB0LDRg9C70YvQuiDRgdCw0LrRgtCw0YMg0LzQsNC80LDQvdGLINC20YPQs9GL0L3Rg9C00Ysg0YLQsNC70LDQvyDQtdGC0LXQtNGLLiAg0JbQsNC70L/RiyDQp9C10LnQvSDRgdGC0L7QutGBINGC0YvQvdGL0YHRiyDQvtC80YvRgNGL0L0g0LDQu9Cz0LDRiNC60Ysg0LDQudC70LDRgNGL0L3QtNCwINCw0YHRi9GA0LXRgdC1INGI0LDQu9CwINGC0YPQs9Cw0L0g0L3QsNGA0LXRgdGC0LXQu9C10YDQtNC1INC90LXQvNC10LzRgdC1INC+0LbQtiDRgtC+0LvRi9C6INC20LXRgtGL0LvQvNC10LPQtdC9INCx0LDQu9Cw0LvRgNC00LAg0LbQuNGWINC60LXQt9C00LXRgdC10LTRiy4gINCR0YPQuyDQsNC/0L3QvtGNINGE0LDQt9Cw0YHRi9C80LXQvSDQsdGL0YDQs9C1INC20YPRgNC10LTRiy7QldCz0LXRgCDQsdGD0Lsg0YPQt9GL0LvRi9GBIDEwINGB0LXQuiDQsNGB0LDRgtGL0L0g0LHQvtC70YHQsCDQsNC70LDQvdC00LDRg9GI0YvQu9GL0Log0YLRg9C00YvRgNGD0Ysg0LzRg9C80LrRi9C9LiAg0KHQsNGDINCx0LDQu9Cw0LvQsNGA0LTQsCDQp9C10LnQvSDRgdGC0L7QutGBINGC0YvQvdGL0YHRi9C90YvQvSDQutC10LfQtNC10YHRgyDRgdC10LHQtdCx0Ysg0YLRi9C90YvRgSDQsNC70YMg0L7RgNGC0LDQu9Cw0LPRi9C9INC20LXRgtGL0YTQu9C80LXRg9GL0L3QsCDQsdCw0LnQu9Cw0L3Ri9GB0YLRiyA6IDEr0LzQuCDQsdCw0LPQsNC90Ysg0YLRi9C90YvRgSDQsNC70YPQtNGLINCx0LDQutGL0LvQsNC50YLRi9C9INC+0YDRgtCw0LvRi9C6INGC0L7Qu9GL0Log0LTQsNC80YvQvyDRg9C70LPQtdGA0LzQtdC50LTRiyAyKyDRgtGL0L3Ri9GBINCw0LvRg9C00Ysg0YDQtdGC0YLQudGC0YvQvSDRgNC10YTQu9C10LrRgtC+0YDQu9GL0Log0LbRg9C50LUg0LrQsNC70YvQv9GC0LDRgdGDINGB0LDRgtGB0YvQvdC00LAg0LHQvtC70LDQtNGLLiAzK9C+0LrQv9C10L3Ri9C9INC20LDQvdC1INGC0YvQvdGL0YEg0LDQu9GDINCx0YPQu9GL0YjRi9C60LXRgtGC0LXRgNC90YvQtNC1INC20YPQvNGL0YHRi9C90LTQsNCz0Ysg0YPQudC70LXRgdGL0LzQtNGL0Log0LbQtdGC0YvRgdC/0LXRg9GL0LTQtSDRgdC10LHQtdC/INCx0L7Qu9GL0L8g0YLQsNCx0YvQu9Cw0LTRiy4g</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56" table:style-name="ce1">
            <text:p>1066856</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0JHQhtCX0JTQlSDQkdCQ0JvQkNCb0JDQoNCU0JAg0KHQhtCb0JXQmtCV0Jkg0JHQldCX0JTQldCg0IYg0KLQntCb0KvSmiDQltCV0KLQhtCb0JzQldCT0JXQnSDQkdCe0JvQq9CfINCa0JXQm9CV0JTQhi7QodCe0Jsg0KHQldCR0JXQn9Ci0JXQnSDQlNCVINCR0IbQl9CU0JUg0JHQkNCb0JDQm9CQ0KDQlNCQINCQ0KPQq9CXINKa0KPQq9Ch0KvQndCU0JAg0KHQhtCb0JXQmtCV0JnQlNCG0J0g0JrTqNCfINCQ0pLQo9CrINCR0JDQmdKa0JDQm9CQ0JTQqy4g0J7QmyDQkdCG0JfQlNCVINKa0JDQm9Cr0J/QotCrINCW0JDSktCU0JDQmSDQkdCe0JvQq9CfINCa0JXQm9CV0JTQhi7Qr9KS0J3QmCDQkdCQ0JvQkNCd0KvQnSDQlNCQ0JzQoyDSrtCU0JXQoNCG0KHQhtCd0JUg0JXQqNKa0JDQndCU0JDQmSDQmtCV0KDQhiDTmNCh0JXQoNCGINCW0J7Smi7QkdCG0JfQlNCVINCR0JDQm9CQ0JvQkNCg0JTQkCDQkNCZ0KLQq9CfINOo0KLQmtCV0J3QlNCV0Jkg0KHQhtCb0JXQmtCV0Jkg0JHQldCX0JTQldCg0IYg0KLQntCb0KvSmiDQlNCQ0JzQq9Cc0JDSktCQ0J0uINCh0J7QmyDQodCV0JHQldCf0KLQhiDQkdCQ0JvQkNCb0JDQoNCU0JAg0KHQhtCb0JXQmtCV0Jkg0JDSktCj0Ksg0JrTqNCfINCR0JDQmdKa0JDQm9CQ0JTQqy7QkdCG0JfQlNCVINCh0J7QndCr0JzQldCdINKa0JDQotCQ0KAg0JDQo9Cr0Jcg0prQo9Cr0KHQq9Cd0JTQkCDQkdCG0KDQndCV0KjQlSDQkdCV0JfQlNCV0KAg0JHQkNCgLtCQ0KPQq9CXINKa0KPQq9Ch0KvQndCU0JAg0KLQkNCc0JDSmiDSmtKw0JvQkNKaINCW0JDQndCr0J3QlNCQ0pLQqyDQltCQ0pog0JDQodCi0Ksg0JbTmNCd0JUg0KLQhtCbINCQ0KHQotCrINCR0JXQl9CU0JXQoNCG0J3QhtCdINCh0IbQm9CV0JrQldCZ0IbQnNCV0J0g0JDQoNCQ0JvQkNCh0JDQlNCrLtCh0J7QndCr0JzQldCdINKa0JDQotCQ0KAg0JHQhtCX0JTQlSDQkNCj0KvQlyDQmtCj0KvQodCrINCc0JXQnSDQotCG0JvQlNCG0J0g0KjQq9Cg0KvQqNCi0Ksg0prQkNCR0JDQotCr0J3QlNCQ0JPQqyDQmtOo0J/QotCV0JPQldCdINCc0JDQmdCU0JAg0JHQldCX0JTQldCgINCR0JDQoC7QntCb0JDQoCDQodOY0JHQmCDQlNKu0J3QmNCV0JPQlSDQmtCV0JvQk9CV0J3QndCV0J0g0JHQkNCh0KLQkNCfINKa0KvQl9Cc0JXQoiDQldCi0JXQlNCGLiAg0JHQhtCg0JDSmiDQkNCb0pLQkNCo0prQqyDQkNCZ0JvQkNCg0JTQkCDQrNCo0KvQoNCr0KjQotCrINCR0JXQl9CU0JXQoNCG0J3QhtCdINCQ0Jcg0JHQntCb0pLQkNCd0KvQndCQ0J0g0KHQhtCb0JXQmtCV0Jkg0JXQoNCG0JrQodCG0Jcg0KLSrtCg0JTQlSDQkdOo0JvQhtCd0JUg0JHQldCg0JXQlNCGLtCW05jQndCVINCh0J7QndCr0J0g05jQodCV0KDQhtCd0JXQnSDQkdCQ0JvQkNCb0KDQlNCQINCQ0KPQq9CXINKa0KPQq9Ch0Ksg0prSsNCg0pLQkNKaINCR0J7Qm9Cr0J8g0JrQldCb0JXQlNCGLiDQltOY0J3QlSDQlNCVINCR0IbQl9CU0JUg0J7Qm9CQ0KDQlNCr0J0g0q7QqNCG0J3QqNCGINCQ0JvQotCr0J3QqNCrINCQ0JnQm9CQ0KDQq9Cd0JTQkCDQodCG0JvQldCa0JXQmdCU0IbQnSDQmtOo0JHQldCu0IYg0KLQkNKS0Ksg0JDQoNCi0JDQlNCrLtCd0JXQnNCV0KHQlSDQntCU0JDQnSDQldCg0KLQlSDQkdCQ0KHQotCQ0JvQo9CrINCc0q7QnNCa0IbQnS7QkdCQ0JvQkNCb0JDQoNCU0JAg0KHQhtCb0JXQmtCV0JnQlNCGINCW0rDQotCr0J8g0q7Qm9CT0JXQoNCc0JXQmSzQkNCj0KvQl9CU0JDQoNCr0J3QkNCdINCQ0pLQq9CfINCi0rDQoNCQ0JTQqyDQntCbINCR0qLQl9CU0JUg0KHQhtCb0JXQmtCV0Jkg0JHTqNCb0IbQndCj0IYg0JzQldCdINCW0rDQotCj0JTQq9CdINCU0rDQoNCr0KEg0JTQkNCc0KvQnNCQ0KPQq9Cd0JDQnSDQkdCe0JvQkNCU0Ksu0JzSsNCd0JTQkNCZINCW0JDSktCU0JDQmSDQpNCY0JfQmNCe0JvQntCT0JjQr9Cb0KvSmiDQodCQ0JvQmNCS0JDQptCY0K8g0J3QldCc0JXQnNCVINCh0IbQm9CV0JrQldCZINCQ0pLQoyDQlNCV0J8g0JDQotCQ0JvQkNCU0Ksu0JbTmNCd0JUg0J7Qm9CQ0KDQlNCQINCa0KDQkNCl0JzQkNCbINCc0JXQnSDQk9Cb0K7QmtCe0JPQldCd0JTQhiDQldCg0IbQotCj0JTQhiDSmtCQ0JbQldCiINCV0KLQldCi0IbQnSDQkNCc0JjQm9Cb0JDQl9CQINCR0J7Qm9CQ0JTQqy4g0JXQmtCG0J3QqNCGINCh0rDQoNCQ0pog0KfQldCZ0J0g0KHQotCe0JrQoSDQotCr0J3Qq9ChINCQ0JvQoyDQltKu0KDQldCaINCW0JXQotCa0IbQm9CG0JrQodCG0JfQlNCG0JPQhiDQmNCd0KHQo9Cb0KzQoiDQltOY0J3QlSDQntCd0KvQnNCV0J0g0JzQmCAg0JbQkNCg0JDSmtCQ0KLQqyDQodCY0K/SmtCi0Ksg05jQoNCi0q7QoNCb0IYg0JbQkNKS0JTQkNCZ0JvQkNCg0JTQkCDQn9CQ0JnQlNCQINCR0J7Qm9Cj0Ksg0JzSrtCc0JrQhtCdLtCW0JDQm9Cf0Ksg0JPQmNCf0JXQoNCS0JXQndCi0JXQm9Cv0KbQmNCvINCc0JXQnSDQkNCf0J3QntCtINCa0JXQl9CV0J3QndCU0JXQoNCG0J3QhtCdINCQ0KPQq9Ch0J/QkNCb0Ksg0JrQldCX0JXQndCU0JXQoNCG0JzQldCdINCh0JjQn9CQ0KLQotCQ0JvQkNCU0KsuINOo0JzQhtCg0JTQhtCdINCQ0JvSktCQ0KjSmtCrINCQ0JnQm9CQ0KDQq9Cd0JTQkCDQkdCG0JfQlNCVINCh0JDQoyDQkdCQ0JvQkNCb0JDQoNCU0JAgINCR0IbQl9CU0JUgINCn0JXQmdCdINCh0KLQntCa0KEg0KLQq9Cd0KvQodCrINKw0JnSmtCrINCa0JXQl9CG0J3QlNCVINCR0JDQmdKa0JDQm9Cj0Ksg0JzSrtCc0JrQhtCdLiDQntCbINOY0JTQldCi0KLQlSDQotCr0J3Qq9ChINCQ0JvQoyDQltCY0IbQm9CG0JPQhtCd0IbQnSDQndCV0JzQldCh0JUg0KLQldCg0JXQndCU0IbQk9CG0J3QhtCdINCR0IbQoNCi0JUg0JHQhtCg0KLQlSDSsNCb0pLQkNCZ0KvQnyDQndCV0JzQldCh0JUg0JHQkNCv0KPQm9CQ0KvQnNCV0J0g0KHQmNCf0JDQotCi0JDQm9CQ0JTQqy7QodCe0JTQkNCdINCa0JXQmdCY0J0g0KLQq9Cd0KvQoSDQkNCb0KMg0JbQmNCG0JvQhtCT0IYg0JDQoNCi0KvQnyDQkdKw0Jsg0KbQmNCa0Jsg0prQkNCZ0KLQkNCb0JDQndCQ0JTQqy7QkdKw0Jsg0J/QoNCe0KbQldChINOo0JfQhtCdINOo0JfQhiDQoNCV0KLQotCV0J8g0JbQkNCd0JAg0KLQo9KS0JDQnSDQndOY0KDQldCh0KLQldCT0JUg0JfQmNCv0J3Qq9CdINCa0JXQm9Ci0IbQoNCc0JXQmdCU0IYu0JHQhtCg0JDQmiDQkdKw0Jsg0KLQq9Cd0KvQoSDQkNCb0KMg0KLSrtCg0IYg0KHQkNKa0KLQkNCb0KHQkCDQptCY0JDQndCe0JfQkdCV0J0g0J3QldCc0JXQodCVINCR0JDQodKa0JAg0JHQldCb0JPQhtCb0JXQoNCc0JXQnSDQnNCr0KHQkNCb0JAg0KLQkNCc0JDQmtCi0JDQndCjINCd0JDQqNCQ0KDQm9CQ0KHQkCAgINCe0J3QlNCQINCe0Jsg0JTQldCd0KHQkNCj0JvQq9Ka0prQkCDQmtCV0KDQhiDTmNCh0JXQoNCG0J0g0KLQmNCT0IbQl9Cj0IYg0JzSrtCc0JrQhtCdLiDQkdKw0Jsg0JbQkNKS0JTQkNCZ0JTQkCDQlNCV0KDQldCjINCR0JDQm9CQ0J3QqyDQlNOY0KDQhtCT0JXQoNCT0JUg0JDQm9Cr0J8g0JHQkNCg0KvQnyzQotCe0JvQq9KS0KvQnNCV0J0g0prQkNCg0JDQm9CjINCa0JXQoNCV0Jog0JHQntCb0JDQlNCr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7" table:style-name="ce1">
            <text:p>1066917</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S7QpNGD0L3QutGG0LjRjyDRgdC70Y7QvdC90YvRhSDQttC10LvQtdC3INC+0LrQvtC70L7Rg9GI0L3Ri9GFLNC/0L7QtNGH0LXQu9GO0YHRgtC90L3Ri9GFLNC/0L7QtNGP0LfRi9GH0L3Ri9GFINC90LDRh9C40L3QsNGO0YIg0L/RgNC+0Y/QstC70Y/RgtGM0YHRjyDQv9C+0YHQu9C1INGA0L7QttC00LXQvdC40Y8g0YDQtdCx0LXQvdC60LAg0L7QvtC00L3QsNC60L4g0LLRi9C00LXQu9GP0Y7RgtGM0YHRjyDQvNCw0LvQvi7Qn9C+0Y3RgtC+0LzRgyDRgyDQvdC+0LLQvtGA0L7QttC00LXQvdC90L7Qs9C+INGB0LvQuNC30LjRgdGC0LDRjyDQvtCx0L7Qu9C+0YfQutCwINCyINC+0YHQvdC+0LLQvdC+0Lwg0YHRg9GF0LDRjy7QoSA0LTYg0LzQtdGB0Y/RhtC+0LIg0YHQtdC60YDQtdGG0LjRjyDQt9C90LDRh9C40YLQtdC70YzQvdC+INGD0LLQtdC70LjRh9C40LLQsNC10YLRjNGB0Y8s0YfQsNGB0YLQviDQtNC10YLQuCDQvdC1INGD0YHQv9C10LLQsNGO0YIg0LXQtSDQs9C70L7RgtCw0YLRjCzQuCDRgdC70Y7QvdCwINCy0YvRgtC10LrQsNC10YIg0L3QsNGA0YPQttGDLjxiciAvPg0KMi7QlNGL0YXQsNC90LjQtSDQp9C10LnQvS3QodGC0L7QutGB0LAgLdCy0L3QsNGH0LDQu9C1INGBINC60LDQttC00YvQvCDQstC00L7RhdC+0Lwg0YPQstC10LvQuNGH0LjQstCw0LXRgtGM0YHRjyDQtdCz0L4g0LPQu9GD0LHQuNC90Ysg0Lgg0YfQsNGB0YLQvtGC0Ysg0LTQviDQvNCw0LrRgdC40LzRg9C80LAs0LfQsNGC0LXQvCDQsNC80L/Qu9C40YLRg9C00LAg0Lgg0YfQsNGB0YLQvtGC0LAg0LLQtNC+0YXQsCDRg9C80LXQvdGC0YjQsNC10YLRjNGB0Y8g0Lgg0L3QsNGB0YLRg9C/0LDQtdGCINCw0L/QvdC+0Y0sINC/0YDQvtC00L7Qu9C20LjRgtC10LvRjNC90L7RgdGC0YzRjiAyMC0zMCDRgdC10LrRg9C90LQg0LjQvdC+0LPQtNCwINCx0L7Qu9GM0YjQtS7Qn9GA0Lgg0L/RgNC+0LTQvtC70LbQuNGC0LXQu9GM0L3QvtC5INC/0LDRg9C30LUg0LDQv9C90L7RjSDRgNC10LHQtdC90L7QuiDQvNC+0LbQtdGCINGC0LXRgNGP0YLRjCDRgdC+0LfQvdCw0L3QuNC1Li7QrdGC0L4g0YHQsNC80YvQuSDQvdC10LHQu9Cw0LPQvtC/0YDQuNGP0YLQvdGL0Lkg0YLQuNC/INC00YvRhdCw0L3QuNC1LtCd0LDQuNCx0L7Qu9C10LUg0YfQsNGC0LDRjyDQv9Cw0YLQvtC70L7Qs9C40YfQtdGB0LrQsNGPINC00YvRhdCw0L3QuNGPINCn0LXQvdC50LAg0YHRgtC+0LrRgdCwINC90LDRgNGD0YjQtdC90LjQtSDQutGA0L7QstC+0L7QsdGA0LDRidC10L3QuNC1INCz0L7Qu9C+0LLQvdC+0LPQviDQvNC+0LfQs9CwINC4INGG0LXQvdGC0YAg0LTRi9GF0LDRgtC10LvRjNC90L7Qs9C+INGG0LXQvdGC0YDQsCzQstC+0LfQvdC40LrQsNC10YIg0Y3RgtC+INC/0YDQuCDQvNC10L3QuNC90LPQuNGC0LUs0LrRgNC+0LLQvtC40LfQu9C40Y/QvdC40LUg0LPQvtC70L7QstC90L7Qs9C+INC80L7Qt9Cz0LAs0YLRj9C20LXQu9C+0Lkg0YHQtdGA0LTQtdGH0L3QvtC5INC90LXQtNC+0YHRgtCw0YLQvtGH0L3QvtGB0YLQuCzQstC+0YHQv9Cw0LvQuNGC0LXQu9GM0L3Ri9GFINC/0YDQvtGG0LXRgdGB0LDRhSDRgdC+INC30L3QsNGH0LjRgtC10LvRjNC90L7QuSDQuNC90YLQvtC60YHQsNC60LDRhtC40LXQuS7QoyDQvdC+0LLQvtGA0L7QttC00LXQvdC90YvRhSDQvtGB0L7QsdC10L3QvdC+K9C90LXQtNC+0L3QvtGI0LXQvdC90YvRhSDQs9C40YHRgtCw0YbQuNC+0L3QvdC+0LPQviDQstC+0LfRgNCw0YHRgtCwINC00L4gMzYg0L3QtdC00LXQu9GMLNC00YvRhdCw0L3QuNC1INGH0LDRgdGC0L4g0LDRgNC40YLQvNC40YLQuNGH0L3QvtC1LCDRgtC+ICDQtdGB0YLRjCDQvdCwINC/0YDQvtGC0LjQtNC10L3QuNC4INC+0LTQvdC+0Lkg0LzQuNC90YPRgtGLINGA0LXQsdC10L3QvtC6INC00YvRiNC40YIg0YLQviDRh9Cw0YnQtSzRgtC+INGA0LXQttC1LtCY0L3QvtCz0LTQsCDRgyDRgtCw0LrQvtCz0L4g0YDQtdCx0LXQvdC60LAg0L3QsCDQv9GA0L7RgtGP0LbQtdC90LjQuCDQvdC10YHQutC+0LvRjNC60L4g0YHQtdC60YPQvdC0INC00YvRhdCw0L3QuNC1INC80L7QttC10YIg0L7RgtGB0YPRgdGC0LLQvtCy0LDRgtGMLNGH0YLQviDQvdCw0LfRi9Cy0LDQtdGC0YzRgdGPINCw0L/QvdC+0Y0u0J/RgNC40YfQuNC90LAg0LrQvtGC0L7RgNGL0YUg0Y/QstC70Y/QtdGC0YzRgdGP0L3QtdC00L7RgNCw0LfQstC40YHRgtGMINC00YvRhdCw0YLQtdC70YzQvdC+0LPQviDRhtC10L3RgtGA0LAs0YXQsNGA0LDQutGC0LXRgNC+0L0g0YLQvtC70YzQutC+INCyINC/0LXRgNCy0YvQtSAzINC80LXRgdGP0YbQsCDQttC40LfQvdC4LtCSINC00LDQu9GM0L3QtdC50YjQtdC8INCyINC90L7RgNC80LUg0LTRi9GF0LDQvdC40LUg0LTQvtC70LbQvdC+INCx0YvRgtGMINGA0LjRgtC80LjRj9C90YvQvCzQsNGA0LjRgtC80LjRjyDRj9Cy0LvRj9C10YLRjNGB0Y8g0L/RgNC40LfQvdCw0LrQvtC8INC/0LDRgtC+0LvQvtCz0LjRh9C10YHQutC+0LPQviDQv9GA0L7RhtC10YHRgdCwLg==</text:p>
          </table:table-cell>
          <table:table-cell office:value-type="float" office:value="170348" table:style-name="ce1">
            <text:p>170348</text:p>
          </table:table-cell>
          <table:table-cell office:value-type="float" office:value="77" table:style-name="ce1">
            <text:p>77</text:p>
          </table:table-cell>
          <table:table-cell table:style-name="ce2"/>
          <table:table-cell office:value-type="float" office:value="10" table:style-name="ce1">
            <text:p>10</text:p>
          </table:table-cell>
          <table:table-cell table:number-columns-repeated="16376"/>
        </table:table-row>
        <table:table-row table:style-name="ro1">
          <table:table-cell office:value-type="float" office:value="1066972" table:style-name="ce1">
            <text:p>1066972</text:p>
          </table:table-cell>
          <table:table-cell office:value-type="string" table:style-name="ce1">
            <text:p>kazakh</text:p>
          </table:table-cell>
          <table:table-cell office:value-type="string" table:style-name="ce1">
            <text:p>Билет 4&amp;lt;br /&amp;gt; 1.3 айлық бала, анасы баланың ауызынан көп сілекейдің ағуын байқайды. Қарағанда баланың физикалық және нерв-психикалық дамуы жасына сәйкес. Сілекейдын көп бөлінуі осы жастағы балада немен байланысты?&amp;lt;br /&amp;gt; 2.Алғашқы айлардағы сау балаларда Чейн- Стокс тынысының белгілері қандай?&amp;lt;br /&amp;gt;</text:p>
          </table:table-cell>
          <table:table-cell office:value-type="string" table:style-name="ce1">
            <text:p>MdCW0JDQo9CQ0J86INCx0LXRgNGW0LvQs9C10L0g0LXRgdC10L/RgtC10LPRliDQsdCw0LvQsCAzINCw0LnQu9GL0psg0L7QvdC00LAg0LDRg9C30YvQvdCw0L0g0LrTqdC/INGB0ZbQu9C10LrQtdC5INCw0pPRg9GLINKb0LDQu9GL0L/RgtGLINCx0L7Qu9GL0L8g0YLQsNCx0YvQu9Cw0LTRiyAg0LzSsdC90Ysg0YTQuNC30LjQvtC70L7Qs9C40Y/Qu9GL0psg0YHQsNC70LjQstCw0YbQuNGPINC00LXQuSDQsNCw0LvQsNC80YvQty4gPGJyIC8+DQoxLDXQsNC50LTQsNC9INCx0LDRgdGC0LDQvyDQsdCw0LvQsNC70LDRgNC00LAg0YHRltC70LXQutC10Lkg0LHTqdC70ZbQvdGD0ZYg0LDRgNGC0LAg0LHQsNGB0YLQsNC50LTRiyDQsNC7INCx0LDQu9Cw0L3Ri9KjIDItNCDQsNC50LvRi9KT0YvQvdC00LAg0YHRltC70LXQutC10Lkg0LHTqdC70ZbQvdGD0ZYg0pvQsNGC0YLRiyDQsNGA0YLRi9C/INGC0ZbQv9GC0ZYg0L7QuyDQsNGD0LfRi9C90LDQvSDQsNKT0YPRi9C9INCx0LDQudKb0LDQudC00YssINCx0rHQuyDQttCw0pPQtNCw0LnRiyDSm9Cw0LvRi9C/0YLRiyDRhNC40LfQuNC+0LvQvtCz0LjRj9C70YvSmyDQttCw0pPQtNCw0LnRiy4g0L7QvdGL0qMg0L7RgdGL0LvQsNC5INOp0LfQs9C10YDRg9GW0L3RltKjINC90LXQs9GW0LfRltC90LTQtSAg0LHRltGA0ZbQvdGI0ZbQtNC10L0g0LHQsNC70LDQtNCw0pPRiyDRgdGW0LvQtdC60LXQuSDQsdC10LfQtNC10YDRltC90ZbSoyDQsNC90LDRgtC+0LzQuNGP0LvRi9KbINC205nQvdC1INGE0YPQvdC60YbQuNC+0L3QsNC70LTRiyDQtNCw0LzRg9GLINC20LDRgtGL0YAuINCR0LDQu9Cw0LvQsNGA0LTQsCDQttCw0psg0LDRgdGC0YstINGB0YPQsdC80LDQvdC00LjQsdGD0LvRj9GA0LvRiyAg0LbTmdC90LUg0YLRltC7INCw0YHRgtGLLdGB0YPQsdC70LjQvdCz0YPQsNC70LTRiyAg0YHRltC70LXQutC10Lkg0LHQtdC30LTQtdGA0ZbQvdC10L0g0YHRltC70LXQutC10Lkg0LHTqdC70ZbQvdGD0ZYg0LDQu9KT0LDRiNGL0L3QtNCwINCx0LDRgdGL0Lwg0LHQvtC70YvQvyDQutC10LvQtdC00ZYg0LTQtSDQsdCw0YDQu9GL0psg0YHRltC70LXQutC10LnQtNGW0qMg0LbQsNC70L/RiyA3MC04MCDQv9Cw0LnRi9C30YvQvSDSm9Kx0YDQsNC50LTRiy7QsNC7INKb0rHQu9Cw0psg0LzQsNKj0YvQvdC00LDSk9GLINC/0LDRgNC+0YLQuNC0INCx0LXQt9C00LXRgNGW0L3RltKjINGE0YPQvdC60YbQuNGP0YHRiy0g0YHRltC70LXQutC10Lkg0LHTqdC70YPRliAyLTPQsNC50LTQsNC9INCx0LDRgdGC0LDQvyDQsdCw0YHRi9C8INCx0L7Qu9Cw0LTRiyDQttOZ0L3QtSDQvtGB0Ysg0LbQvtKT0LDRgNGLINCx0LXQu9GB0LXQvdC00ZbQu9GW0LPRltC90LXQvSDQvtC7IDIwLTMwINC/0LDQudGL0LfRi9C9INKb0rHRgNCw0LnQtNGL0Ysg0L7RgdGLINCx0LXQt9C00LXRgNC00ZbSoyDRgdGW0LvQtdC60LXQuSDQsdOp0LvRg9GWINCw0YDRgtGD0Ysg0L3QtdCz0ZbQs9GWINGE0LDQutGC0L7RgC4g0LHSsdC7INCx0ZbRgNGW0L3RiNGWINGE0LDQutGC0L7RgNGAINCx0L7Qu9GB0LAuINCV0LrRltC90YjRltC00LXQvSDQsdCw0LvQsNC00LAg05nQu9GWINGB0ZbQu9C10LrQtdC5INCx06nQu9GW0L3Qs9C10L3QvNC10L0g0L7QvdGLINC20rHRgtGDINGA0LXRhNC70LXQutGB0ZYg0YLQvtC70YvSmyDQttC10YLRltC70LzQtdCz0LXQvSDQsdC+0LvQsNC00Ysg0Y/Sk9C90Lgg0YLQvtC70YvSmyDQsNCy0YLQvtC80LDRgtGC0LDQvdCx0LDSk9Cw0L0g0LHQvtC70LDQtNGLLiDQvNC40YvQvdGL0qMg0YHQtdC90YHQvtGA0LvRiyDQttOZ0L3QtdC00LUg0LzQvtGC0L7RgNC70Ysg0LbSr9C50LXRgdGWINCx0LDQu9Cw0LTQsCDQttCw0YHRi9C90LAg0pvQsNGA0LDQuSDQtNCw0LzQuNGC0YvQvSDQsdC+0LvRi9C/INC60LXQu9C10LTRliDQvtC70LDRgNC00LDSk9GLINGB0LXQvdGB0L7RgNC70YvSmyDRgdCw0L3QsNGB0Ysg0LzQtdC9INKb0L7Qt9KT0LDQu9GL0YHRiyDRgtC+0LvRi9KbINC20LXRgtGW0LvQvNC10LPQtdC9INCx0L7Qu9Cw0LTRiyDQsdCw0LvQsCDQsNGD0LfRi9C9INC20LDQsdGD0YvQvdCwINKb0LDQsdGW0LvQtdGC0YHRltC3INCx0L7Qu9GD0YvQvdCw0L0g0L7QvdGL0qMg0LDRg9C30YvQvdCw0L0g0YHRltC70LXQutC10Lkg0LDSk9GD0YvQvSDQutOp0YDQtdC80ZbQty4g0KHQvtC90YvQvNC10L0g0pvQsNGC0LDRgCDQsdCw0LvQsCDQsNGD0LfRi9C90LAg05nRgCDRgtKv0YDQu9GWINC30LDRgtGC0LDRgNC00Ysg0LDQu9GL0L8g0LHQsNGA0YvQvyDRgtGL0pPRg9GLINC00LAg0pvQvtGB0YvQvNGI0LAg05nRgdC10YAg0LXRgtC10LTRliDQtNC1INGB0ZbQu9C10LrQtdC5INCx06nQu9GW0L3Rg9GW0L0g0YLRltGC0ZbRgNC60LXQvdC00ZbRgNC10LTRltC00LUg0L7RgdGL0LTQsNC9INCx0LDQu9Cw0LTQsCAg0L7RgNCw0LvRjNC00YvSmyDQvNC40LrRgNC+0LHRgtGLINGA0LXRhNC70LXQutGBINC+0YDRi9C9INCw0LvQsNC00YsuINC20LDQu9C/0Ysg0YHRgtC10YDQuNC70YzQtNGWINC10LzQtdGBINC30LDRgtGC0LDRgNKT0LAg0LrTqdC/0YLQtdC/INGB0ZbQu9C10LrQtdC5INCx06nQu9GW0L3QtdC00ZYu0YHRltC70LXQutC10LnQtNGW0qMg0LrTqdC/INCx06nQu9GW0L3Rg9GWINC+0YHRiyDQttCw0YHRgtCw0pPRiyDQsdCw0LvQsNC00LAg0pvQsNC70YvQv9GC0Ysg0LTQsNC80YPRi9C90LAg0L3QtdCz0ZbQt9C00LXQu9Cz0LXQvSDQttCw0pPQtNCw0Lkg0L7QuyDRgdC+0YHRi9C9INGD0LDSm9GL0YIg06nRgtGW0YHRltC80LXQvSDSm9Cw0LvRi9C/0pvQsCDQutC10LvQtdGC0ZbQvSDTqdGC0L/QtdC70ZYg0LbQsNKT0LTQsNC5LiA8YnIgLz4NCjxiciAvPg0KMiDQltCQ0KPQkNCfINCw0LvSk9Cw0YjSm9GLINCw0LnQu9Cw0YDQtNCwINCx0LDQu9Cw0LTQsCDRgtGL0L3Ri9GBINCw0LvRg9GLINC00LDQvNGL0L8g0LbQsNGC0pvQsNC9INCx0L7Qu9Cw0LTRiywg0Y/Sk9C90Lgg0YLQvtC70YvSmyDQttC10YLRltC70LzQtdCz0LXQvS4g0L7RgdGLINC60LXQt9C10qPQtNC1INCw0LvSk9Cw0YjSm9GLIDYtOCDQsNC/0YLQsNC70LDRgNC00LAg0LbQvtKT0LDRgNGLINCx0LDQudKb0LDQu9Cw0YLRi9C9INC205nQvdC1IDMg0LDQudC00LDQvSDQsdCw0YHRgtCw0L8g0pvQsNC70YvQv9Kb0LAg0LrQtdC70LUg0LHQsNGB0YLQsNC50YLRi9C9INC/0LXRgNC40L7QtNGC0YvSmyDRgtGL0L3Ri9GBINCw0LvRg9C00YvSoyDRgtKv0YDRliDQsdC+0LvRi9C/INGC0LDQsdGL0LvQsNGC0YvQvSDQp9C10LnQvS0gINCh0YLQvtC60YHRgiDRgtGL0L3Ri9GB0YvQvSDQsdCw0LnSm9Cw0LzRi9C3LiDQsdCw0LvQsNC00LAg0LHSsdC7INKv0YDQtNGW0YEg0L/QsNGC0L7Qu9C+0LPQuNGC0Y/Qu9GL0psg0LXQvNC10YEuINCx0rHQuyDRgtGL0L3Ri9GBINC20LDQu9C/0Ysg0pvQsNGC0YLRiyDRgtC10YDQtdKjINC20LjRliDRgtGL0L3Ri9GBINCw0LvRg9C80LXQvSDQutOp0YDRltC90LXQtNGWINGB0L7RgdGL0L0g0LzQsNC60YHQuNC80LDQu9C00Ysg0LzTmdC90LPQtSDQttC10YLQutC10L3QvdC10L0g0LrQtdC50ZbQvSDQsdCw0LvQsNC90YvSoyDRgtGL0L3Ri9GB0Ysg0YLTqdC80LXQvdC00LXQvyDRgtC+0pvRgtCw0LnQtNGLINGP0pPQvdC4INCx0ZbRgNC90LXRiNC1INGB0LXQutGD0L3QtNKb0LDQsNC/0L3QvtGNINC+0YDRi9C9INCw0LvQsNC00YsuINC+0LsgNS0xMCAg0YHQtdC60YPQvdC00YLRiyDSm9Kx0YDQsNC50YLRi9C9INCx0L7Qu9GL0L8g0LrQtdC70LXQtNGWLiDRgdC+0YHRi9C9INC+0YHRiyDRhtC40LrQu9C00Ysg0pvQsNC50YLQsNC70LDRg9GLINC80q/QvNC60ZbQvSAg0LHQsNC70LDQvdGL0qMg0YLQtdGA0LXSoyDSsdC50pvRiyDQutC10LfQtdKj0ZbQvdC00LUg0LHSsdC7INGC0YvQvdGL0YEg0LbQuNGWINCx0LDQudKb0LDQu9Cw0LTRiy4g0YHQtdCx0LXQsdGWINGC0LXRgNC10qMg0rHQudKb0YvQtNCwINGC0YvQvdGL0YEg0LDQu9GDINC+0YDRgtCw0LvRi9KT0YvQvdGL0qMg0LHQtdC70YHQtdC90LTRltC70ZbQs9GWINGC06nQvNC10L3QtNC10LnQtNGWLiAg0J/QtdGA0LjQvtC00YLRi9KbINGC0YvQvdGL0YEg0LDQu9GDINC10YjSm9Cw0L3QtNCw0Lkg0pvQvtGB0YvQvNGI0LAg0L/QsNGC0L7Qu9C+0LPQuNGP0LvRi9KbINC606nRgNGW0L3RltGB0YLQtdGA0LzQtdC9INCx0ZbRgNCz0LUg0LbSr9GA0LzQtdC50LTRli4g0YLRi9C90YvRgSDSsdGB0YLQsNC80LDQu9Cw0YDRiyDSm9GL0YHSm9CwINCx0L7Qu9GL0L8g0L7Rj9C90pPQsNC90L3QsNC9INC60LXQudGW0L0g0LHQsNC70LDQvdGL0qMg0YLRi9C90YvRgSDRi9GA0pPQsNKT0Ysg0pvQsNC70YvQv9Kb0LAg0LrQtdC70LXQtNGWLiDQsdCw0LvQsNC90YvSoyDQttCw0pPQtNCw0LnRiywg0YHQsNC70LzQsNKbINKb0L7RgdGD0Ysg0pvQsNC70YvQv9GC0Ysg0LHQvtC70YvQvyDQutC10LvQtdC00ZYuINC10LPQtdGA0LTQtSDQsdCw0LvQsNC00LDSk9GLINGC0YvQvdGL0YEg0rHRgdGC0LDQvNCw0LvQsNGA0YsgMTDRgdC10LrRg9C90LTRgtCw0L0g0LDRgdCw0YLRi9C9INCx0L7Qu9GB0LAgMTAtMjDRgdC10LrRg9C90LQg0LHQvtC70YHQsCDQsdCw0LvQsCDQsdC+0LfQsNGA0YvQvyDTmdC70YHRltC30LTQtdC90ZbQvyDQvtC90YvSoyDRgdCw0LvQvNCw0psg0pvQvtGB0YPRiyDRgtOp0LzQtdC90LTQtdC/INGC0LXRgNGWINCx0L7Qt9Cw0YDRg9GLINC80LXQvSDQsdGW0YDQs9C1INC20q/RgNC10LTRliwg0LHSsdC7INC/0LDRgtC+0LvQvtCz0LjRj9C70YvSmyDQp9C10LnQvS3QodGC0L7QutGBINGC0YvQvdGL0YHRiyDQsdC+0LvRi9C/INGC0LDQsdGL0LvQsNC00YsuINCR0rHQuyDQvdC10LPQtSDQvtGA0YvQvSDQsNC70LDQtNGLINC00LXQs9C10L3Qs9C1INC20LDRg9Cw0L8g0LHQtdGA0LXRgtGW0L0g0LHQvtC70YHQsNC8IC3QvNC40LTRi9KjINGC0YvQvdGL0YEg0L7RgNGC0LDQu9GL0pPRi9C80LXQvSAgKNC80Lgg0LHQsNKT0LDQvdGL0L3Ri9KjINGB0L7Qv9Cw0pvRiNCwINC80LjQtNCw0pPRiyDRgtGL0L3Ri9GBINCw0LvRgyDQvtGA0YLQsNC70YvSk9GLKdGC0YvQvdGL0YEg0LDQu9GDINGA0LXRgtGC0LXQudGC0ZbQvSDQsdKx0LvRiNGL0pvQtdGC0YLQtdGA0LTRltKjINGC0L7Qu9GL0psg0LTQsNC80LzRi9C80LDSk9Cw0L3QtNGL0pPRi9C90LXQvSwg0q/QudC70LXRgdGW0LzRliDQttC+0psg0LHQvtC70pPQsNC90LTQsCDSm9Cw0LvRi9C/0YLQsNGB0LDQtNGLLiDRgdC+0L3Ri9C80LXQvSDSm9C+0YHQsCDQsdCw0LvQsNC00LDSk9GLINGF0LXQvNC+0YDQtdGG0LXQv9GC0L7RgNC70LDRgCDQvtGC0YLQtdCz0ZYg0LzQtdC9INC606nQvNGW0YDSm9GL0YjSm9GL0Lsg0LPQsNC30YvQvdGL0qMg0pvQsNC90LTQsNKT0Ysg0LTQtdC90LPQtdC50ZYg06nQt9C10LPRgNGW0YHRltC90LUg0YHQtdC30ZbQvNGC0LDQu9C00YvSk9GLICDRgtOp0LzQtdC9ICwg0L7Qu9Cw0YAg0YLRi9C90YvRgSDQvtGA0YLQsNC70YvSk9GL0L3QsCDTmdGB0LXRgCDQtdGC0ZbQvyDQvtC90Ysg0YPQsNKb0YvRgtGI0LAg0q/QtNC10YLQtdGC0ZbQvSDQsdC+0LvRi9C/INC60LXQu9C10LTRli4g0LHQsNC70LAg0YHQvtGB0YvQvSDRgtC10YDQtdKjINC20LjRliDRgtGL0L3Ri9GB0Ysg0LHRltGA0YLQtSDQsdGW0YDRgtC1INCw0YDRgtGL0L8g0YHQvtGB0YvQvSDRgtOp0LzQtdC90LTQtdC50LTRliDQtNC1INGC0YvQvdGL0YEg0LDQu9GD0Ysg0YLQvtKb0YLQsNC50LTRiyA1LTEw0YHQtdC60YPQvdC00pvQsCDQutC10LnRltC9INKb0LDQu9C/0YvQvdCwINC60LXQu9C10LTRli4g0LHRltGA0ZbQvdC10YjQtSDQsNC50LTQsNC9INGB0L7SoyDQsdKx0Lsg0YDQuNGC0LzQtNGLINGH0LXQudC9INGB0YLQvtC60YHRgiDRgtGL0L3Ri9GBINCw0LvRg9GLINC20L7Sk9Cw0LvQsNC00YsuICjQvtGB0YvQvdC00LDQuSDQttCw0pPQtNCw0Lkg05nQtNC10YLRgtC1INCx0LDQu9Cw0LTQsCDQvtGA0YLQsNC70YvSmyDQttKv0LnQutC1INC20q/QudC10YHRltC90ZbSoyDQtNCw0LzRg9GL0L3Ri9KjINCw0YDSm9Cw0YHRi9C90LTQsCA2INCw0LnSk9CwINKb0LDRgNCw0Lkg0LbQvtKT0LDQu9Cw0LTRiykg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59" table:style-name="ce1">
            <text:p>915259</text:p>
          </table:table-cell>
          <table:table-cell office:value-type="string" table:style-name="ce1">
            <text:p>russian</text:p>
          </table:table-cell>
          <table:table-cell office:value-type="string" table:style-name="ce1">
            <text:p>Билет 4&amp;lt;br /&amp;gt; 1.На приеме мама с ребенком 3 месяцев, мама отмечает у ребенка обильное слюнотечение. При осмотре физическое и нервно-психическое развитие соответствует возрасту. С чем связано у детей обильное слюнотечение в этом возрасте?&amp;lt;br /&amp;gt; 2.Объясните, чем проявляется дыхание Чейна- Стокса в первые месяцы жизни у здоровых детей ?&amp;lt;br /&amp;gt;</text:p>
          </table:table-cell>
          <table:table-cell office:value-type="string" table:style-name="ce1">
            <text:p>MS4g0KHQu9GO0L3QvtGC0LXRh9C10L3QuNC1INCyIDMg0LzQtdGB0Y/RhtCwINGP0LLQu9GP0LXRgtGB0Y8g0L3QvtGA0LzQvtC5INC4INC90LUg0YLRgNC10LHRg9C10YIg0LrQsNC60L7Qs9C+INC70LjQsdC+INC80LXQtNC40YbQuNC90YHQutC+0LPQviDQstC80LXRiNCw0YLQtdC70YzRgdGC0LLQsC4g0JjQt9C90LDRh9Cw0LvRjNC90L4gLNC60L7Qs9C00LAg0YDQtdCx0LXQvdC+0Log0YLQvtC70YzQutC+INGA0L7QtNC40LvRgdGPINGDINC90LXQs9C+INCy0YvRgNCw0LHQsNGC0YvQstCw0LXRgtGB0Y8g0L7Rh9C10L3RjCDQvNCw0LvQviDRgdC70Y7QvdGLICzQuNC90L7Qs9C00LAg0LTQsNC20LUg0LPQvtCy0L7RgNGP0YIgLNGH0YLQviDRgdC70LjQt9C40YHRgtCw0Y8g0L7QsdC+0LvQvtGH0LrQsCDRgNGC0LAg0YMg0YLQvtC70YzQutC+INGA0L7QtNC40LLRiNC40YXRgdGPINC00LXRgtC10Lkg0YHRg9GF0LDRjy4g0J3QviDQvdGD0LbQvdC+INC/0L7QvdC40LzQsNGC0YwgLCDRh9GC0L4g0YEgMy02INC80LXRgdGP0YbQtdCyINGDINGA0LXQsdC10L3QutCwINC90LDRh9C40L3QsNGO0YIg0YTRg9C90LrRhtC40L7QvdC40YDQvtCy0LDRgtGMINC+0YfQtdC90Ywg0YXQvtGA0L7RiNC+INCy0YHQtSDQttC10LvQtdC30YsgLiDQldGB0LvQuCDQs9C+0LLQvtGA0LjRgtGMINC60L7QvdC60YDQtdGC0L3QtdC1INC10YHRgtGMINC90LjQttC90LXRh9C10LvRjtGB0YLQvdCw0Y8gLNC+0LrQvtC70L7Rg9GI0L3Ri9C1LCDQv9C+0LTRj9C30YvRh9C90LDRjyDQuCDQsiDRgdCw0LzQvtC5INC/0L7Qu9C+0YHRgtC4INGA0YLQsCDQuNC80LXQtdGC0YHRjyDQvNC90L7Qs9C+INC80LDQu9C10L3RjNC60LjRhSDQttC10LvQtdC3ICzQutC+0YLQvtGA0YvQtSDQstGL0YDQsNCx0LDRgtGL0LLQsNGO0YIg0YHQu9GO0L3Rgy4g0JIgMyDQvNC10YHRj9GG0LAg0YDQtdCx0LXQvdC60YMg0YHRgtCw0L3QvtCy0LjRgtGB0Y8g0LjQvdGC0LXRgNC10YHQvdC10LUg0YDQsNGB0YHQvNCw0YLRgNC40LLQsNGC0Ywg0Lgg0LHRgNCw0YLRjCDQsiDRgNGD0LrQuCDQuCDRgNC+0YIg0YDQsNC30LvQuNGH0L3Ri9C1INC/0YDQtdC00LzQtdGC0YsgLiDQkCDQvdC1INCy0YHQtdCz0LTQsCDRjdGC0Lgg0L/RgNC10LTQvNC10YLRiyDQvtGH0LXQvdGMINGH0LjRgdGC0YvQtSAs0YLQsNC6INC60LDQuiDRgNC+0LTQuNGC0LXQu9C4INC90LUg0LLRgdC10LPQtNCwINC80L7Qs9GD0YIg0LfQsCDRjdGC0LjQvCDRg9GB0LvQtdC00LjRgtGMLiDQotCw0Log0LbQtSDQvNGLINC30L3QsNC10LwsINGH0YLQviDRgdC70Y7QvdCwINC40LzQtdC10YIg0LHQsNC60YLQtdGA0LjRhtC40LTQvdC+0LUg0LTQtdC50YHRgtCy0LjQtSDQuCDQsiDQvdC10LrQvtC8INGA0L7QtNC1INC30LDRidC40YnQsNC10YIg0YDQtdCx0LXQvdC60LAg0L7RgiDRgNCw0LfQu9C40YfQvdGL0YUg0LjQvdGE0LXQutGG0LjQuS4g0KLQsNC6INC20LUg0L3Rg9C20L3QviDQv9C+0L3QuNC80LDRgtGMICzRh9GC0L4g0YMg0YDQtdCx0LXQvdC60LAgLNC60L7RgtC+0YDRi9C5INGA0L7QtNC40LvRgdGPIDMg0LzQtdGB0Y/RhtCwINC90LDQt9Cw0LQg0LXRidC1INC/0LvQvtGF0L4g0YDQsNC30LLQuNGC0LAg0YbQvdGBICzQsCDQuNC80LXQvdC90L4g0L7QvSDQtdGJ0LUg0YHQsNC8INC90LUg0LzQvtC20LXRgiDQv9GA0L7Qs9C70LDRgtGL0LLQsNGC0Ywg0LIg0L/QvtC70L3QvtC5INC80LXRgNC1INGN0YLRgyDRgdC70Y7QvdGDINC4INGA0LXQs9GD0LvQuNGA0L7QstCw0YLRjCDQtdC1LiDQndC+INGN0YLQviDQvdC1INGP0LLQu9GP0LXRgtGB0Y8g0L/QsNGC0L7Qu9C+0LPQuNC10LkgLNCwINC90LDQvtCx0L7RgNC+0YIg0YHQstC10LTQtdGC0LXQu9GM0YHRgtCy0YPQtdGCLNGH0YLQviDRgNCw0LfQstC40YLQuNC1INGA0LXQsdC10L3QutCwINC40LTQtdGCINGB0YLRgNC+0LPQviDQv9C+INC10LPQviDQstC+0LfRgNCw0YHRgtGDINCx0LXQtyDQutCw0LrQuNGFINC70LjQsdC+INC+0YLQutC70LDQvdC10L3QuNC5INC4INGC0L4g0YfRgtC+INGA0LXQsdC10L3QvtC6INGP0LLQu9GP0LXRgtGB0Y8g0LTQvtC90L7RiNC10L3QvdGL0LwuINCf0YHQuNGF0L7Qu9C+0LPQuNGH0LXRgdC60Lgg0LIg0Y3RgtC+0Lwg0LLQvtC30YDQsNGB0YLQtSDQtNC10YLRj9C8ICzQutCw0Log0YDQsNC3INC40L3RgtC10YDQtdGB0L3QviAs0YfRgtC+INC/0YDQvtC40YHRhdC+0LTQuNGCINCy0L7QutGA0YPQsyDQuCDQvtC90Lgg0YLQsNC60LjQvCDQvtCx0YDQsNC30L7QvCDQuNC30YPRh9Cw0Y7RgiDRjdGC0L7RgiDQvNC40YAg0Lgg0Y3RgtC+INGC0L7QttC1INC/0L7QutCw0LfQsNGC0LXQu9GMINGF0L7RgNC+0YjQtdCz0L4g0L/RgdC40YXQvi3RjdC80L7RhtC40L7QvdCw0LvRjNC90L7Qs9C+INGA0LDQt9Cy0LjRgtC40Y8g0LzQsNC70YvRiNCwLiDQotCw0Log0LbQtSDQv9GA0LjRh9C40L3QvtC5INGB0LvRjtC90L7RgtC10YfQtdC90LjRjyDQsiDQsdGD0LTRg9GJ0LXQvCDQsdGD0LTQtdGCINGP0LLQu9GP0YLRjNGB0Y8g0YDQvtGB0YIg0LzQvtC70L7Rh9C90YvRhSDQt9GD0LHQvtCyIC4g0JrQvtCz0LTQsCDQt9GD0LHRiyDRgyDRgNC10LHQtdC90LrQsCDQvdCw0YfQuNC90LDRjtGCINGA0L7RgdGC0LggLNGC0L4g0Y3RgtC+INGB0L7Qv9GA0L7QstC+0LbQtNCw0LXRgtGB0Y8g0LHQvtC70YzRjiAs0LAg0YHQu9GO0L3QsCDQstGL0YDQsNCx0LDRgtGL0LLQsNC10YLRgdGPINC60LDQuiDQv9GA0L7RgtC40LLQvtCy0L7RgdC/0LDQu9C40YLQtdC70YzQvdCw0Y8g0YDQtdCw0LrRhtC40Y8g0L7RgNCz0LDQvdC40LfQvNCwINC4INGN0YLQviDRgtC+0LbQtSDQvdC1INCx0YPQtNC10YIg0L/QsNGC0L7Qu9C+0LPQuNC10LkuINCa0L7Qs9C00LAg0YDQtdCx0LXQvdC+0Log0L/QvtC00YDQsNGB0YLQtdGCLCDRgtC+INC+0L0g0YHQvNC+0LbQtdGCINGB0LDQvCDQutC+0L3RgtGA0L7Qu9C40YDQvtCy0LDRgtGMINGB0LvRjtC90L7QstGL0LTQtdC70LXQvdC40LUg0LjQtyDQv9C+0LvQvtGB0YLQuCDRgNGC0LAg0Lgg0YLQvtCz0LTQsCDRgdC70Y7QvdC+0YLQtdGH0LXQvdC40LUg0L/RgNC10LrRgNCw0YLQuNGC0YzRgdGPLiAyLiDQlNGL0YXQsNC90LjQtSDQp9C10LnQvdCwLSDQodGC0L7QutGB0LAg0L/RgNC10LTRgdGC0LDQstC70LXQvdC+IDog0LrQvtCz0LTQsCDRgNC10LHQtdC90L7QuiDQvdCw0YfQuNC90LDQtdGCINC00YvRiNCw0YLRjCwg0LAg0LjQvNC10L3QvdC+INC/0L7RgdC70LUg0YDQvtC20LTQtdC90LjRjyDRgyDQvdC10LPQviDQvNC+0LbQtdGCINC/0YDQuNGB0YPRgtGB0YLQstC+0LLQsNGC0Ywg0LTQsNC90L3Ri9C5INCy0LjQtCDQtNGL0YXQsNC90LjQtS4g0J3QviDQvdGD0LbQvdC+INGD0YfQuNGC0YvQstCw0YLRjCAs0YfRgtC+INC90L7RgNC80L7QuSDRjdGC0L4g0Y/QstC70Y/QtdGC0YHRjyDRgtC+0LvRjNC60L4g0LIg0L/QtdGA0LLRi9C1INC80LXRgdGP0YbRiyDQttC40LfQvdC4LiDQntC/0LjRgdCw0L3QuNC1INGN0YLQvtCz0L4g0LTRi9GF0LDQvdC40Y86INC/0YDQuCDRjdGC0L7QvCDRgtC40L/QtSDQtNGL0YXQsNC90LjQtSDQv9GA0LjRgdGD0YLRgdGC0LLRg9C10YIg0YMg0YDQtdCx0LXQvdC60LAg0LDQv9C90L7RjSAo0Y3RgtC+INCy0YDQtdC80LXQvdC90LDRjyDQvtGB0YLQsNC90L7QstC60LAg0LTRi9GF0LDQvdC40Y8g0LPQtNC1INGC0L4g0L3QsCA1LTEwINGB0LXQutGD0L3QtCkg0L/QvtGB0LvQtSDRjdGC0L7Qs9C+INCw0L/QvdC+0Y0g0YDQtdCx0LXQvdC+0Log0L3QsNGH0LjQvdCw0LXRgiDRh9Cw0YHRgtC+INC4INC/0L7QstC10YDRhdC90L7RgdGC0L3QviDQtNGL0YjQsNGC0Ywg0Lgg0L/RgNC4INC60LDQttC00L7QvCDQsNC60YLQtSDQtNGL0YXQsNC90LjRjyDQs9C70YPQsdC40L3QsCAg0LLQtNC+0YXQsCDQuCDQstGL0LTQvtGF0LAg0YPQstC10LvQuNGH0LjQstCw0LXRgtGB0Y8gLNC60L7Qs9C00LAg0LPQu9GD0LHQuNC90LAg0LTRi9GF0LDQvdC40Y8g0LTQvtGB0YLQuNCz0LDQtdGCINGB0LLQvtC10LPQviDRhNC40LfQuNC+0LvQvtCz0LjRh9C10YHQutC+0LPQviDQv9C40LrQsCAs0YLQviDRh9Cw0YHRgtC+0YLQsCDQuCDQs9C70YPQsdC40L3QsCDQvtC/0Y/RgtGMINC40LTQtdGCINC90LAg0YPQsdGL0LvRjCDQuCDQtNC+0YHRgtC40LPQsNC10YIg0YHQu9C10LTRg9GO0YnQtdCz0L4g0LDQv9C90L7RjSg1LTEwINGB0LXQuiku0JTQsNC90L3Ri9C5INGC0LjQvyDQtNGL0YXQsNC90LjRjyDQv9GA0L7QuNGB0YXQvtC00LjRgiDRgyDQtNC10YLQtdC5INC4INC+0L0g0L3QtSDQstGB0LXQs9C00LAg0YHRh9C40YLQsNC10YLRgdGPINC/0LDRgtC+0LvQvtCz0LjRh9C10YHQutC40LwsINCwINC90LDQvtCx0L7RgNC+0YIg0L3QvtGA0LzQvtC5LiDQldGB0LvQuCDRgyDRgNC10LHQtdC90LrQsCDQv9GA0L7Rj9Cy0LvRj9C10YLRgdGPINGB0LjQvdGO0YjQvdC+0YHRgtGMKNGH0LDRidC1INCy0YHQtdCz0L4g0LIg0L3QvtGB0L7Qs9GD0LHQvdC+0Lwg0YLRgNC10YPQs9C+0LvRjNC90LjQutC1KSzQsdC70LXQtNC90L7RgdGC0Ywg0YDQtdCx0LXQvdC60LAg0LjQu9C4INGA0L7QtNC40YLQtdC70Lgg0LLQuNC00Y/RgiDQvdC10LrQuNC5INC00LjRgdC60L7QvNGE0L7RgNGCINGDINGA0LXQsdC10L3QutCwICzRgtC+INC90YPQttC90L4g0L7QsdGA0LDRgtC40YLRjNGB0Y8g0Log0LLRgNCw0YfRgy4g0JTQsNC90L3Ri9C5INGC0LjQvyDQtNGL0YXQsNC90LjRjyDQv9GA0L7QuNGB0YXQvtC00LjRgiDRh9Cw0YnQtSDQstGB0LXQs9C+INC90L7Rh9GM0Y4uINCjINC00LXRgtC10Lkg0LIg0L/QtdGA0LLRi9C1INC80LXRgdGP0YbRiyDQttC40LfQvdC4INC10YnQtSDQvtGH0LXQvdGMINC80LDQu9C10L3RjNC60LjQtSDQu9C10LPQutC40LUg0Lgg0YfQsNGB0YLQvtGC0LAg0LTRi9GF0LDRgtC10LvRjNC90YvRhSDQtNCy0LjQttC10L3QuNC5INC90LDQvNC90L7Qs9C+INCy0YvRiNC1ICzRh9C10Lwg0YMg0LLQt9GA0L7RgdC70YvRhS4g0J3QviDRgSDQstC+0LfRgNCw0YHRgtC+0Lwg0LLQvNC10YHRgtC1INGBINGA0LXQsdC10L3QutCw0Lwg0YDQvtGB0YLRg9GC0YPRgiDQuCDQtdCz0L4g0LvQtdCz0LrQuNC1INC30LAg0YHRh9C10YIg0YPQstC10LvQtdGH0LXQvdC40Y8g0LrQvtC70LjRh9C10YHRgtCy0LAg0LDQu9GM0LLQtdC+0LsgLtCi0LDQuiDQttC1INC90YPQttC90L4g0L7RgtC80LXRgtC40YLRjCAs0YfRgtC+INC00YvRhdCw0YLQtdC70YzQvdCw0Y8g0LzRg9GB0LrQu9Cw0YLRg9GA0LAg0YMg0LTQtdGC0LXQuSAs0YLQsNC6INC20LUg0L/Qu9C+0YXQviDRgNCw0LfQstC40YLQsCDQuCDRgNC10LHQtdC90LrRgyDQvNC+0LbQtdGCINC90LUg0YXQstCw0YLQsNGC0Ywg0YHQuNC7INGB0LTQtdC70LDRgtGMINCz0LvRg9Cx0L7QutC40Lkg0Lgg0YfQtdGC0LrQuNC5INCy0LTQvtGFINC4INCy0YvQtNC+0YUuINCd0L4g0L3QtSDQvdGD0LbQvdC+INCx0LXRgdC/0L7QutC+0LjRgtGM0YHRjyDRjdGC0L4g0YLQvtC20LUg0LIg0YDQsNC80LrQsNGFINC90L7RgNC80Ysg0LTQu9GPINC00LDQvdC90L7Qs9C+INCy0L7Qt9GA0LDRgdGC0LAuINCi0LDQuiDQttC1INC80L7QttC90L4g0L7RgtC80LXRgtC40YLRjCAs0YfRgtC+INGDINC00LXRgtC10Lkg0L/RgNC10L7QsdC70LDQtNCw0LXRgiDRgdC40LzQv9Cw0YLQuNGH0LXRgdC60LDRjyDQvdC10YDQstC90LDRjyDRgdC40YHRgtC10LzQsCDQuCDQvtC90Lgg0L7Rh9C10L3RjCDRgdC40LvRjNC90L4g0YDQtdCw0LPQuNGA0YPRjtGCINC90LAg0Y3QvNC+0YbQuNC4LCDRgdGC0YDQtdGB0YEg0Lgg0YLQt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5" table:style-name="ce1">
            <text:p>915355</text:p>
          </table:table-cell>
          <table:table-cell office:value-type="string" table:style-name="ce1">
            <text:p>russian</text:p>
          </table:table-cell>
          <table:table-cell office:value-type="string" table:style-name="ce1">
            <text:p>Билет 4&amp;lt;br /&amp;gt; 1.На приеме мама с ребенком 3 месяцев, мама отмечает у ребенка обильное слюнотечение. При осмотре физическое и нервно-психическое развитие соответствует возрасту. С чем связано у детей обильное слюнотечение в этом возрасте?&amp;lt;br /&amp;gt; 2.Объясните, чем проявляется дыхание Чейна- Стокса в первые месяцы жизни у здоровых детей ?&amp;lt;br /&amp;gt;</text:p>
          </table:table-cell>
          <table:table-cell office:value-type="string" table:style-name="ce1">
            <text:p>MS7QodC70Y7QvdCwIC0g0Y3RgtC+INGA0LDQt9C90L7QstC40LTQvdC+0YHRgtGMINGB0L7QutC+0LIg0L/QuNGJ0LXQstCw0YDQuNGC0LXQu9GM0L3QvtC5INGB0LjRgdGC0LXQvNGLICwg0LrQvtGC0L7RgNGL0LUg0LLRi9GA0LDQsdCw0YLRi9Cy0LDRjtGC0YHRjyDRgdC70Y7QvdC90YvQvNC4INC20LXQu9C10LfQsNC80LggLCDQuNC80LXRjtGJ0LjQtSDRgdCy0L7RjiDQu9C+0LrQsNGG0LjRjiDQsiDRgNC+0YLQvtCy0L7QuSDQv9C+0LvQvtGB0YLQuCAuINCe0LHQuNC70YzQvdC+0LUg0YHQu9GO0L3QvtGC0LXRh9C10L3QuNC1INCyINCy0L7Qt9GA0LDRgdGC0LUg0LTQviAzINC80LXRgdGP0YbQtdCyINGB0LLRj9C30LDQvdC+INGBINGE0LjQt9C40L7Qu9C+0LPQuNGH0LXRgdC60LjQvCDRgNCw0LfQstC40YLQuNC10Lwg0YHQu9GO0L3QvdGL0YUg0LbQtdC70LXQtyAsINCwINGC0LDQutC20LUg0LjRhSDQsNC60YLQuNCy0L3Ri9C8INGE0YPQvdC60YbQuNC+0L3QuNGA0L7QstCw0L3QuNC10LwgLiAg0YHQu9GO0L3QvdGL0LUg0LbQtdC70LXQt9GLINCyINCy0L7Qt9GA0LDRgdGC0LUg0LTQviAxMiDQvNC10YHRj9GG0LXQsiDQvNC+0LPRg9GCINCx0YvRgtGMINCyINC/0YDQvtGG0LXRgdGB0LUg0YDQsNC30LLQuNGC0LjRjywg0Lgg0YTRg9C90LrRhtC40L7QvdC40YDRg9GO0YIg0L3QtdC/0L7Qu9C90L7RhtC10L3QvdC+ICwg0YLQviDQtdGB0YLRjCDQvtC90Lgg0LXRidC1INC90LUg0LTQviDQutC+0L3RhtCwINC30YDQtdC70YvQtSDQtNC70Y8g0YDQtdCz0YPQu9GP0YbQuNC4INCy0YvQtNC10LvQtdC90LjRjyDRgdC70Y7QvdGLIC4g0JDQutGC0LjQstC90L7RgdGC0Ywg0YHQu9GO0L3QvdGL0YUg0LbQtdC70LXQtyDQvdCw0LHQu9GO0LTQsNC10YLRgdGPINGDINC00LXRgtC10Lkg0LIg0LLQvtC30YDQsNGB0YLQtSAxLDUg0LAg0YLQsNC60LbQtSAyINC80LXRgS4g0KTQuNC30LjQvtC70L7Qs9C40YfQtdGB0LrQvtC1INGB0LvRjtC90L7QvtGC0LTQu9C10L3QtdC40LXQvCDQvdCw0LfRi9Cy0LDQtdGC0YHRjyDRgdC+0YHRgtC+0Y/QvdC40LUg0LrQvtCz0LTQsCDRgNC10LHQtdC90L7QuiDQvdC1INC80L7QttC10YIg0YDQtdCz0YPQu9C40YDQvtCy0LDRgtGMINCy0YvQtNC10LvQtdC90LjQtSDRgdC70Y7QvdGLICwg0LAg0YLQsNC60LbQtSDQtdCz0L4g0LfQsNCz0LvQsNGC0YvQstCw0L3QuNC1IC4g0K3RgtC+INGB0LLRj9C30LDQvdC+INGBINC90LXQtNC+0YHRgtCw0YLQvtGH0L3QvtC5INC30YDQtdC70L7RgdGC0YzRjiDQuNC80LXQvdC90L4g0YbQtdC90YLRgNC+0LIg0YDQtdCz0YPQu9GP0YbQuNC4INCy0YvQtNC10LvQtdC90LjRjyDQuCDQt9Cw0LPQu9Cw0YLRi9Cy0LDQvdC40Y8g0YHQu9GO0L3RiyAsINC60L7RgtC+0YDRi9C1INGA0LDRgdC/0L7Qu9C+0LbQtdC90Ysg0LIg0L/RgNC+0LTQvtC70LPQvtCy0LDRgtC+0Lwg0LzQvtC30LPQtSAuINCh0L7RgdGC0LDQsiDRgdC70Y7QvdGLINGBINCy0L7Qt9GA0LDRgdGC0L7QvCDRgtCw0LrQttC1INC80LXQvdGP0LXRgtGB0Y8gLCDQsCDQuNC80LXQvdC90L4g0YPQstC10LvQuNGH0LjQstCw0LXRgtGB0Y8g0LjRhSDQutC40YHQu9C+0YLQvdC+0YHRgtGMLiDQntC00L3QsNC60L4g0LXRgdGC0Ywg0YLQtSDRgdGC0YDRg9C60YLRg9GA0YsgLCDQutC+0YLQvtGA0YvQtSDQvdC1INC80LXQvdGP0Y7RgtGB0Y8g0YEg0YDQvtC20LTQtdC90LjRjyAsINGC0L4g0LXRgdGC0Ywg0L/QvtGB0YLQvtGP0L3QvdC+INCyINC40YUg0YHQvtGB0YLQsNCy0LUg0LjQvNC10LXRgtGB0Y8g0LDQu9GM0YTQsC3QsNC80LjQu9Cw0LfQsCDQuCDQtNGA0YPQs9C40LUg0YTQtdGA0LzQtdC90YLRiyAsINC60L7RgtC+0YDRi9C1INC60YDQsNC50L3QtSDQvdC10L7QsdGF0L7QtNC40LzRiyDQtNC70Y8g0YDQsNGB0YnQtdC/0LvQtdC90LjRjyDRgtCw0LrQuNGFINGB0YLRgNGD0LrRgtGD0YAg0LrQsNC6INC60YDQsNGF0LzQsNC7INC4INCz0LvQuNC60L7Qs9C10L0gLiDQoyDQvdC+0LLQvtGA0L7QttC00LXQvdC90YvRhSDQtNC10YLQtdC5INCyINC/0LXRgNCy0YvQtSDQs9C+0LTRiyDQttC40LfQvdC4ICwg0L3QsNCx0LvRjtC00LDQtdGC0YHRjyDQv9C+0LLRi9GI0LXQvdC40LUg0LDQutGC0LjQstC90L7RgdGC0Lgg0Y3RgtC40YUg0YTQtdGA0LzQtdC90YLQvtCyIC4gMikg0JTRi9GF0LDQvdC40LUg0KfQtdC50L3QsC3QodGC0L7QutGB0LAgLCDQv9C+0LQg0Y3RgtC40Lwg0YLQtdGA0LzQuNC90L7QvCDQv9C+0LTRgNCw0LfRg9C80LXQstCw0LXRgtGB0Y8g0L/QtdGA0LjQvtC00LjRh9C10YHQutC+0LUg0LTRi9GF0LDQvdC40LUgLCDRgtC+INC10YHRgtGMINGA0LXQsdC10L3QvtC6INC00YvRiNC40YIgLCDQvtC00L3QsNC60L4g0LjQvNC10LXRgtGB0Y8g0L7Qv9GA0LXQtNC10LvQtdC90L3QsNGPINC/0LDRg9C30LAgKDUtMTAg0YHQtdC6KSwg0L/QvtGB0LvQtSDQutC+0YLQvtGA0L7Qs9C+INC90L7RgNC80LDQu9GM0L3QvtC1INC00YvRhdCw0L3QuNC1INCy0L3QvtCy0Ywg0LLQvtC30L7QsdC90L7QstC70Y/QtdGC0YHRjyAsINC80L7QttC10YIg0LHRi9GC0Ywg0YXQsNGA0LDQutGC0LXRgNC10L0g0LTQu9GPINC30LTQvtGA0L7QstGL0YUg0L3QvtCy0L7RgNC+0LbQtNC10L3QvdGL0YUg0LTQtdGC0LXQuSAuINCe0L0g0LzQvtC20LXRgiDQsdGL0YLRjCDRgdC90LDRh9Cw0LvQsCDRgNC10LTQutC40LwgLCDQsCDRgtCw0LrQttC1INC/0L7QstC10YDRhdC90L7RgdGC0L3Ri9C8ICwg0L7QtNC90LDQutC+INC10LPQviDQs9C70YPQsdC40L3QsCDRgSDRgtC10YfQtdC90LjQtdC8INCy0YDQtdC80LXQvdC4INC80L7QttC10YIg0LLQvtC30YDQsNGB0YLQsNGC0YwgLCDQsCDRgNC40YLQvCDQvNC+0LbQtdGCINGD0LLQtdC70LjRh9C40LLQsNGC0YzRgdGPINC4INC00L7RgdGC0LjQs9C90YPRgtGMINC80LDQutGB0LjQvNGD0LzQsCAsINC30LDRgtC10Lwg0LTRi9GF0LDQvdC40LUg0LzQvtC20LXRgiDRgdC+INCy0YDQtdC80LXQvdC10Lwg0LfQsNC80LXQtNC70Y/RgtGM0YHRjyDQuCDRgdGC0LDQvdC+0LLQuNGC0YHRjyDQv9C+0LLQtdGA0YXQvdC+0YHRgtC90YvQvCDQuCDQvtC/0Y/RgtGMINC/0YDQtdC60YDQsNGJ0LDQtdGC0YHRjyDQvdCwINC+0L/RgNC10LTQtdC70LXQvdC90YvQuSDQv9C10YDQuNC+0LQg0LLRgNC10LzQtdC90LggLiDQoyDQtNC10YLQtdC5INC90L7QstC+0YDQvtC20LTQtdC90L3Ri9GFINC00LDQvdC90YvQuSDRgtC40L8g0LTRi9GF0LDQvdC40Y8g0L3QtSDRj9Cy0LvRj9C10YLRgdGPINC/0LDRgtC+0LvQvtCz0LjQtdC5INC4INC80L7QttC10YIg0L3QsNCx0LvRjtC00LDRgtGM0YHRjyDRgyDQsdC+0LvRjNGI0LjQvdGB0YLQstCwINC00LXRgtC10LkgLCDQsiDRh9Cw0YHRgtC90L7RgdGC0Lgg0LIg0L/QtdGA0LLRi9C1INC80LXRgdGP0YbRiyDQttC40LfQvdC4INC4INCyINC90L7Rh9C90L7QtSDQstGA0LXQvNGPINGB0YPRgtC+0Log0L3QsNCx0LvRjtC00LDQtdGC0YHRjyDRh9Cw0YnQtSAsINC90LXQttC10LvQuCDRh9C10Lwg0LIg0LTQvdC10LLQvdC+0LUg0LLRgNC10LzRjyAuINCU0LDQvdC90YvQuSDRgtC40L8g0LTRi9GF0LDQvdC40Y8g0YHQstGP0LfQsNC9INGBINC90LXQtNC+0YDQsNC30LLQuNGC0L7RgdGC0YzRjiDQtNGL0YXQsNGC0LXQu9GM0L3QvtCz0L4g0YbQtdC90YLRgNCwICwg0LrQvtGC0L7RgNGL0Lkg0LIg0YHQstC+0Y4g0L7Rh9C10YDQtdC00Ywg0YDQsNGB0L/QvtC70L7QttC10L0g0LIg0L/RgNC+0LTQvtC70LPQvtCy0LDRgtC+0Lwg0LzQvtC30LPQtSAuINCf0L4g0LzQtdGA0LUg0YDQvtGB0YLQsCDRgNC10LHQtdC90LrQsCAsINC00YvRhdCw0YLQtdC70YzQvdGL0Lkg0YbQtdC90YLRgCDRgdC+0LLQtdGA0YjQtdC90YHRgtCy0YPQtdGC0YHRjyDQuCDQtNGL0YXQsNC90LjQtSDQvdC+0YDQvNCw0LvQuNC30YPQtdGC0YHRjyAuINCe0LTQvdCw0LrQviAsINC10YHQu9C4INC20LUg0LTRi9GF0LDQvdC40LUg0KfQtdC50L3QsC3QodGC0L7QutGB0LAg0L/RgNC+0Y/QstC70Y/QtdGC0YHRjyDQv9Cw0YLQvtC70L7Qs9C40YfQtdGB0LrQuNC80Lgg0YHQvtGB0YLQvtGP0L3QuNGP0LzQuCA6INGG0LjQsNC90L7QtyAoINC/0L7Rj9Cy0LvQtdC90LjQtSDRgdC40L3RjtGI0L3QvtGB0YLQuCDQutC+0LbQuCAsINCy0YHQu9C10LTRgdGC0LLQuNC1INCz0LjQv9C+0LrRgdC40LgpICDQsNC/0L3QvtGNIC0g0LTQu9C40YLQtdC70YzQvdC+0LUg0L7RgtGB0YPRgtGB0YLQstC40LUg0LTRi9GF0LDQvdC40Y8pICDQs9C40L/QvtC60YHQuNGPINC4INC00YDRg9Cz0LjQtSDQv9GA0LjQt9C90LDQutC4ICwg0YLQviDRjdGC0L4g0YLRgNC10LHRg9C10YIg0LjRgdC60LvRjtGH0LXQvdC40Y8g0L3QtdCy0YDQvtC70L7Qs9C40YfQtdGB0LrQuNGFINC40LvQuCDRgNC10YHQv9C40YDQsNGC0L7RgNC90YvRhSDQt9Cw0LHQvtC70LXQstCw0L3QuNC5IC4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72" table:style-name="ce1">
            <text:p>914672</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5Qcm9mdXNlZSBzYWx2dGlvbiBpbiBhIDMgbW9udGhoIG9sZCBpc3MgdHlwY2FseSBhIG5vcm1sIGRldmVsb3BtbnRhbCBwaGVub21lbmFhIGl0dCBpcyBub3R0IGEgY2F1c2VlIG9mZiBjb25jZXJybiAuVEhFIE1BSU5OIFJFQVNPTk5TIFJFID1JbWF0dXJlIHN3YWxvd2luZyByZWZsZXh4OmF0IHRocyBhZ2VlIGluZmFubnQgaHZlIG5vdHQgeWV0IGRldmxvcGVkZCB5dCBmdWx5IGR2bHBvZWRkIGNvbnRyb2wgb3ZyIHRoZXIgc3dhbG93d2luZyAsc28gc2FsaXZhIHRlbmRkIHRvIGFjdW11bGF0ZSBpbiB0aGVyIG1vdXRoIGFuZGQgZHJpYmJsZSBvdXQgLkluY3Jlc2VkIHNhbGl2cnkgZ2xhbmRkIGFjdGl2dHkgOnNhbGl2YXJ5IGdsYW5kZCBiZWNvbWVzcyBtb3JlIGFjdHZlIGFyb3VubmQgMnRvIDMgbW9udGhzcyBvZiBhZ2UgaW4gcHJlcHJ0aW9uIG9mZiB0ZWV0aGluZyBhbmRkIHNvbGlkIGZvb2RzIGxhdGVyIGluIGluZmFuY3l5LlRlZXRoaW5nIHByZXBhcnRpb25uOndoaWxlIHRlZXRoaCBtYXkgbm90IHlldCBiZSBlcnVwdG5nZyAsdGhlIGJvZHl5IHN0YXJ0cyBwcmVwcmluZ2cgZm9yIHRoZSB0ZWV0aCBieSBwcm9kdWNuZyBtb3JlIHNhbGl2YS5PcmFsIGV4cGxvcnRpb24gOkluZmFudHNzIGJlZ2FpbiB0byBleHBsb3IgdGhlaXIgZW52aXJvbm1lbnQgd2l0aCB0aGVyIG1vdXRoc3MgLGxlYWRpbmdnIHRvIGluY3Jlc2VkZCBzYWxpdmEgcHJvZHVjdGlvbm4gLjIuQ2h5ZW5lIC1TVE9LRVNTICBicmV0aGluZ2cgcmVmZXJzIHRvIGEgcGF0ZXJuIG9mIHBlcmlvZGljYyBicmV0aGluZyBjaGFyYWN0ZXJpc2VkIGJ5IDpHcmFkdWwgaW5jcmVzZSBpbiB0aCByZXNwaXJ0b3J5IHJhdGUgYW5kIGRlcHRoIChjcmVzY2VuZG8pLGZvbG93ZWQgYnkgZ3JhZHVhbCBkZWNyZXNlIChkZWNyZXNjZW5kbyksbGVkaW5nIHRvIGEgc2hvcnQgcGF1c3NlIChhcG5lYSkuSU4gaGVsdGh5IGluZm50cyAsdGhpcyBpcyBhIG5vcm1hbGwgdmFyaWFudHQgb2YgYnJldGhpbmcgcmVndWx0aW9uIGR1ZSB0byB0aGUgaW1hdHVyZSBjZW50cmwgbmVydm91cyBzeXN0ZW0gdGh0IGNvbnRyb2xzcyBicmVhdGhpbmcuV0hZIElUIE9DVVJFUzp0aGUgcmVzcGlydG9yeSBjZW50cmUgaW4gdGggYnJhaW5zdGVtIHJlIG5vdCBmdWx5IG1hdHVyZSxhbmRkIHRoaXMgY2FuIGxlYWQgdG8gZmx1Y3R1YXRpb25zIGluIHJlc3BpcnRvcnkgcmh5dGhtIC5DT01PTiBBR0U6cGVyaW9kaWMgYnJlYXRoaW5nIChpbmNsdWRpbmcgQ2hleW5lZSAtc3Rva2VzcyBsaWtlIHBhdGVybilpcyBtb3N0IGNvbW9uIGluIHRoZSBmaXJzdCBmZXcgbW9udGhzcyBvZiBsaWZlICxlc3BlY2FseSBkdXJpbmdnIHNsZWVwIChSRU0gb3IgTk9OIFJFTSBzdGFnZWVzKVNJR05JRkNBTkNFOmluIGhlbHRoeSBpbmZhbnRzICx0aHMgaXMgYmVuaWduIGFuZGQgc2VsZiByZXNvbHZuZyBhcyB0aCBjZW50cmFsIHJlc3BpcnRvcnkgY29udHJvbCBtYXR1cmVzIGJ5IGFyb3VuZCA2IG1vbnRoc3Mgb2YgYWdlL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677" table:style-name="ce1">
            <text:p>914677</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4gRXhjZXNzaXZlIHNhbGl2YXRpb24gaW4gYSAzLW1vbnRoLW9sZCBjaGlsZDotIEV4Y2Vzc2l2ZSBzYWxpdmF0aW9uIGluIGEgMy1tb250aC1vbGQgY2hpbGQgaXMgb2Z0ZW4gZHVlIHRvIHRoZSBub3JtYWwgZGV2ZWxvcG1lbnQgcHJvY2VzcyBrbm93biBhcyBkb29ybGluZyBhdCB0aGlzIGFnZSwgaW5mYW50IGhhdmUgbm90IHlldCBkZXZlbG9wZWQgZnVsbCBjb250cm9sZSBvdmVyIHRoZWlyIG9yYWwgbXVzY2xlcywgd2hpY2ggY2FuIGxlYWQgdG8gZG9vcmxpbmcuIHNhbGl2YXRpb24gdXNhbGx5IGluY3JlYXNlcyBhcm91bmQgMyBtb250aHMgYXMgdGhlIGluZmFudHMgYWJpbGl0eSB0byBzd2FsbG93IHNhbGl2YSBoYXNub3QgZnVsbHkgbWF0dXJlZC4gdGhpcyBjb25kaXRpb24gaXMgZ2VuZXJhbGx5IGNvbnNpZGVyZCBub3JtYWwgYW5kIGlzIHVzYWxseSBzZWVuIGJlZm9yZSB0aGUgZXJ1cHRpb24gb2YgdGhlIGZyaXN0IHRlZXRoLCB0eXBpY2FsbHkgYXJvdW5kIDYgbW9udGhzIG9mIGFnZS4gaWYgdGhlIGNoaWxkcyBwaHlzaWNhbCBhbmQgbmV1cm9wc3ljaGljIGRldmVsb3BtZW50IGNvcnJlc3BvbmRzIHRvIHRoZWlyIGFnZSBhbmQgdGhlcmUgYXJlIG5vIG90aGVyIGNvbmNlcm5pbmcgc3ltcHRvbXMsIHRoaXMgaXMgbGlrZWx5IGp1c3QgYSBkZXZlbG9wbWVudCBzdGFnZS4gMi4gQ2hleW5lLXN0b2tlcyBicmF0aGluZyBtYW5pZmVzdHMgaW4gdGhlIG1vbnRoc3Mgb2YgbGlmZSBpbiBoZWFsdGh5IGNoaWxkcmVuOi1DaGV5bmUtc3Rva2UgYnJlYXRoaW5nIGlzIGEgcGVyaW9kaWMgYnJlYXRoaW5nIHBhdHRlcm4gY2hhcmFjdGVyaXplZCBieSBjeWNsZXMgb2YgYXBuZWEoYnJlYXRoaW5nIGNlc3NhdGlvbikgZm9sbG93ZWQgYnkgZ3JhZHVhbCBpbmNyZWFzZXMgYW5kIHRoZSBkZWNyZWFzZXMgaW4gZGVwdGggb2YgYnJlYXRoaW5nLiBpbiBoZWFsdGh5IG5ld2Jvcm5zIGFuZCBpbmZhbnRzLCB0aGlzIGNhbiBiZSBhIG5vcm1hbCBwaGVub21lbm9uLCBwYXJ0aWN1bGFybHkgZHVyaW5nIHNsZWVwLiBpdCBpcyBvZnRlbiBvYnNlcnZlZCBkdXJpbmcgdGhlIGZyaXN0IGZldyBtb250aHMgb2YgbGlmZSBjYW4gYmUgY2F1c2VkIGJ5IHRoZSBpbW1hdHVyZSByZWd1bGF0aW9uIG9mIHJlc3BpcmF0b3kgY29udHJvbCBjZW50ZXJzIGluIHRoZSBicmFpbnN0ZW0uIHRoZXNlIGVwaXNvZGVzIG9mIGlyYWd1bGFyIGJyZWF0aGluZyB0eXBpY2FsbHkgcmVzb2x2ZSBieSA2IG1vbnRocyBvZiBhZ2UgYXMgcmVzcGlyYXRvcnkgY29udHJvbCBzeXN0ZW0gbWF0dXJlcy4gaWYgY2hleW5lIHN0b2tlcyBicmVhdGhpbmcgcGVyc2lzdHMgYmV5b25kIHRoaXMgcGVyaW9kIG9yIGlzIGFzc29jaWF0ZWQgd2l0aCBvdGhlciBzeW1wdG9tcyBlZy1jeWFub3NpcywgZGlmZmljdWx0eSBmZWVkaW5nIGZ1dGhlciBldmFsdXRpb24gbWF5IGJlIHJlcXVpcmVkL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02" table:style-name="ce1">
            <text:p>914702</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YWNjb3JkaW5nIHRvIGluICB0aGlzIGNhc2UgIHRoZSBjb25zdWx0YXRpb24sLCB0aGUgbW90aGVyIHdpdGggMyBtb250aHMgb2xkIGNoaWxkICBpIHNlZSBpbiB0aGlzIGNhc2Ugbm90ZSBwcm9mdXNlZSBzYWxpdmF0aW9ubiBvZiB0aGUgY2hpbGRkIGZyb20gbW91dGggLiBvbiB0aGUgZXhhbWluYXRpb24gdGhlIHBoeXNpY2FsIGFuZCBuZXVyb3BzeWNoaWMgZGV2ZWxvcG1lbnQgYXQgYWdlIHR5cGljYWxseSBhYSBub3JtYWwgcGFydHQgb2YgdGhlaXIgZGV2ZWxvcG1lbnQgcHJvY2VzcyBhdCB0aGUgYWdlIGluZmVudHMgYXJlIGxlYXJuaW5nIHRvby4gZXhwbG9yZSB0aGVpciBtb3V0aCBhbmQgbWF5IGhhdmVlIG5vdCBmdWxseSBkZXZlbG9wZWQgY29udHJvbCBvdmVyIHRoZWlyIG9yYWwgbXVzY2xlcyBhbmQgdGhleSBhcmVlIHNlY3JlYXRpbmcgcHJvZnVzZSBleGNlc3NpdmUgc2FsaXZhdGlvbm4gIGZyb20gbW91dGhoLiB0aGV5IGluY3JlYXNlIHNhbGl2YXRpb24gIGF0dHJpYnV0ZWQgdG8gdGVldGguLm92ZXIgZXhwbG9yYXRpb24gYW5kIGdyYWR1YWwgbWF0dXJhdGlvbm4gb2ZmIHRoZSBzd2FsbG9pbmcgcmVmbGV4J3MgIC4uaXQgY29uc2lkZXJlZCBhcyBhIG5vcm1hbGx5IGFuZCB0cmFpbnNpc3QgcGhhc2Ugb2Z0ZW4gcmVzb2x2aW5nIGFzIGFhIGNoaWxkIGdyb3dzIGFuZGQgdGhlaXIgbW90b3IgY29udHJvbCBpbXByb3ZlZXMuIGNhdXNlcyBvZmV4Y2Vzc2l2ZWUgc2FsaXZhdGlvbiBpbiB0aGUgY2hpbGRyZW4gYXQgdGhpc3MgYWdlaXNzICBzZWNvbmRhcnl5IGltbXVuZWRlZmljaWVuY3kgc3RhdGVzLCwgaW5mZWN0aW9uc3MtIGxpa2UgdHViZXJjbG91c2VzLCwgSElWLGNocm9uaWMsLHZpcmFsbCBhbmQgYmFjdGVyaWFsbC5tYWxudXRyaXRpb247OyBwcm90ZWluICAgICAgIGFuZCBtYWxudXRyaXRpb25uIGluIHZpdGFtaW5zIGxpa2Ugdml0YW1pbiBELCxtaW5lcmFscyBsaWtlIHppbmMuLk1lZGljYWwgdHJlYXRtZW50dCBjaGVtb3RoYXJweSBjb3J0aWNvaWRzdGVyaW9zICByYWRpYXRpb24gdGhlcnB5ICAuLmNocm9uaWMgZGlzZWFzZSBsaWtlIGRpYWJpdGljLCByZW5hbCBmYWlsdXJlLCxsaXZlciBkaXNlYXNlIGFuZCBsZXVrbWlhYSBsb3NzYW5kIG90aGVyIHZpcmFsIGFuZCBiYWN0ZXJpYWwgZGlzZWFzZWVzLiBzcGxlbmFjdG9teS0tIGxvc3Mgb2Ygc3BsZWVuIHJlZHVjZSBhbmQgYWdpbmctbmF0dXJhbCBpbW11bmUgYW5kIG5hdHVyYWwgdG94aW5zLjIuVGhlIENoZXluZSBTdHJva2VzIGJyZWF0aGluZ2cgbWFuaWZlc3RzIGluIHRoZWUgZmlyc3QgbW9udGhzIG9mIHRoamUgbGlmZSBpbm4gdGhlIGhlYWx0aHkgY2hpbGRyZS4uIGlzIHRoZSBwYXR0ZXJubiBwZXJpb2RpYyBicmVhdGhpbm5nZyBjaGFyY3Rlcml6ZWQuLiBieSB0aGUgY3ljbGUgb2YgZ3JhZHVhbGx5IGluY3JlYXNlZSBhbmQgZGVjcmVhc2luZ2cgcmVzcGVyYXRvcnl5IGVmZm9ydHMuLmZvbGxvd2VkIGJ5IChhcG5lYSkgdHlwaWNhbGx5IGFzc29jaWF0ZWQgd2l0aGggYWR1bHQgd2hvbyBoYXZlIGNhcmRpYWMgYW5kIG5ldXJvbG9naWNhbGwgcHJvYmxlbXMuLk5vcm1hbCBwZXJpb2RpY2MgYnJlYXRoaW5nLS1pbiB0aGUgaW5mZW50cyBhbmQgbmV3dyBib3JuIGJhYnkgcmVzcGlyYXRvcnkgc3lzdGVtbSBpcyBpbW1hdHVyZS4uaW4gdGhlIGZpcnN0IGZldyBtb250aHNzLiB0aGVuIGFmdGVyIHNvbWUgbW9udGhzIGl0IHdpbGwgbWF0dXJlIGFuZCBub3JtYWxseSBmdW5jdGlvbi4uIEFwcHJlYW5jZS0tIG5ld2Jvcm4gY2hpbGQgYnJlYXRoaW5nIGdyYWR1YWxseSBzbG93ZXIuLiBEdXJhdGlvbi0tIHRoZXNlIGVwaXNvZGljIGJyZWF0aCBhcmVlIHNob3J0IG5vdCBsYXN0aW5nIG1vcmUgdGhhbiAxMCBzZWNvbmQuLiBTaWduaWZpY2FuY2UtLXRoZSBicmVhdGhpbmdnIHBhdHRlcm4gaXMgaW4gYmVnbmluZyBpc3MgaGVhbHRoeS4uIG9uIHRoZSBhYm92ZSBjYXNlIHRoZSBjaGV5bmUgc3Rva2VzIGJyZWF0aGluZyBpbiB0aGUgZmlyc3QgbW9ubnRoIG9mIGxpZmUgaW4gaGVhbHRoeSBjaGlsZHJlbiBpcyBoaWdoIGJlY2F1c2UgdGhleSByZXF1aXJlIG1vcmUgb3h5Z2VubiBhbmQgdGhlaXIgbWV0YWJvbGltIGlzIGhpZ2hhbmQgdGhleSBoYXZlIHRvIGRpZ2VzdHQgbWlsayBlYXNpbHkuLiBzbyB0aGUgYnJlYXRoaW5nZyByYXRlIGlzIGVwaXNvZGljIGlubiBuZXdib3JuIGJhYmllcyB0aGFuIGNvbXBhcmUgdG8gYWR1bHRzL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22" table:style-name="ce1">
            <text:p>915022</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BDYXVzZSBvZiB0aGUgZXhjZXNzaXZlIHNhbGl2YXRpb24gaW4gdGhlIDMgbW9udGggIG9sZCAtIGV4Y2Vzc2l2ZSBzYWxpdmF0aW9uaW4gdGhlIDMgbW9udGggY2hpbGQgbm9ybWFsIHBoeXNpb2xvZ2ljYWwgcGhlbm9tZW5hIG9mIHRoZSByZWxhdGVkIHRvIHRoZSBkZXZlbG9wbWVudCB0byBwcm9jZXNzIG9mIHNhbGl2YXJ5IGdsYW5kIGFuZCBvcmFsIHN0cnVjdHVyZSAuIChhKWltbXVuaW5pdHkgb2YgdGhlIG9yYWwgbW90ZXIgLSAgYXQgdGhlIGFnZSBvZiBpbmZhbnQgYWJpbGl0eSBvZiBhaW0gdG8gc3dvbGxlciB0byBkZWNyZXNlcyBkZXZlb3BpbmcgbGVhZGluZyB0byBkcm9vcGluZyAuIChiKUluY3Jlc2VzIHRoZSBzYWxpdmFyeSBnbGFuZCBhY3Rpdml0eSAtIHNhbGl2YXJ5IGdsYW5kIGJlY29tZSBtb3JlIGFjdGl2ZSBhcm91bmQgdG8gdGhlIDIgdG8gMyBtb250aCBhZ2Ugb2YgdGhlIHBhcnQgdGhlIG5vcm1hbCBncm93dGggb2YgY2hpbGQgLiBpdHMgaW5jcmVzZXMgdGhlIGFjdGl2aXR5IHRvIHByZXBhcmUgdGhlIGRpZ2VzdGl2ZSBzeXN0ZW0gZm9yIGZ1dHVyZSBmb29kIGNvbnN1bXB0aW9uIC4gKGMpIG9yYWwgZXhwbG9yYXRpb24gYW5kIGRldmVsb3BtZW50IC0gaW5mYW50IGJlZ2luZCB0aGUgZXhwb2xyZSB0aGUgbW9udGggb3JhbCBjYXZpdHkgd2l0aCB0aGUgc3RpbXV0ZWQgc2FsaXZhcnkgZ2xhbmQgYWN0aXZpdHkgLiB0aGlzIHBhcnQgaXMgc2Vuc29yeSBhbWQgbW90b3IgZGV2ZWxvcG1lbnQgLiAyIENIRVlORSBTVE9LRVMgQlJFQVRISU5HIElOIFRIRSAxIE1PTlRIIENISUxEIC0gY2hleW5lIHN0b2tlcyBicmVhdGhpbmcgaXMgcGF0aGVybiBvZiB0aGUgcGVyaW9kaWMgIGJyZWF0aGluZyBvZiBjaGFyY3RlcnppZSBvZiByZXNwaXN0b3J5IHJhdGUgb2YgYW5kIGRlcHRoIG9mIGluY3Jlc2VpbmcgYW5kIGRlY3Jlc2luZyB0aGUgcmF0ZSBvZiBzb21ldGltZSBzZXByYXRlIHRvIHRoZSB2YXJpb3VzIG9mIGJyaWVmIGFwbmVhLiBpbiB0aGUgaGVhbHRoeSBpbmZhbnQgZHVyaW5nIHRoZSAxIG1vbnRoIG9mIGNoaWxkIG9mIHdlbGwgaW5mYW50IGNoaWxkIHRvIGNvbnNpZGVyIGFzIHRoZSBpbW11bmUgcGh5c2lvbG9naWNhbCBwaGVub21lbmEgaXMgZHVlIHRvIHRoZSByZXNwaXJhdG95IGNhdXNlcyAuIChhKSBkdXJhaXRpb24gb2YgdGhlIGFwbmVhIC0gaXRzIHR5cGljYWwgMTAgdG8gMjAgc2Vjb25kIG9mIHRoZSBub3QgY29uc2lkZXIgd2l0aCB0aGUgb3h5Z2VuIGRlc3RydWN0aW9uIG9mIGJyYWNoeWNhcmRpYSB3aXRoIGhlYXRoeSBpbmZhbnQgLiAoYikgYWJzZWNzZSBvZiBwaHlzaW9sb2dpY2FsIHNpZ24gLSB0aGVyZSBhcmUgbm8gYXNzb2NhdGlvbiBzaWduIG9mIHRoZSByZXNwaXJhdG9yeSBkaXN0cmVzcyBzY3V0IGN5bmFuaWQgLCBncnVkaW5nIGFuZCByZWZyYWN0aW9uIG9mIHRoZSBpbmZhbnQgLiAoYykgSW5jcmVzZXMgdGhlIHNlbnNpdml0eSB0byBjbzIgYW5kIG8yIGxldmVsIC0gaW5mYW50IGhhdmUgaGlnaGVkIHNlbnNpdml0eSB0byB0aGUgZnVuY3Rpb24gb2YgIGNvMiBhbmQgTzIgd2hpY2ggdHJpZ2dlciB0aGUgcGVyaW9kaWMgZ2FydGhlcmluZyAuIChkKSBpbW11dHVyZSByZXNwaXRvcnkgY2VudGVyIC0gdGhlIG1lZHVsbGEgYW5kIHBvbnMgd2hlbiByZWd1bGF0ZWQgYnJlYXRoaW5nIGFyZSBub3QgZnVsbHkgZGV2ZWxvcGVkIGF0IGJpcnRoIGxlYWRpbmcgdG9yZWd1YWx0aW5nIGJyZWF0aHVuZyByYXRl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72" table:style-name="ce1">
            <text:p>915072</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4gVGhlIG1vdGhlciB3aXRoIDMgbW9udGggb2xkIGNoaWxkIHByb2Z1c2Ugc2FsaXZhdGlvbiBvZiB0aGUgY2hpbGQgdGhlcmUgYXJlIHNvbWUgcmVhc29ucyBjb21lIG91dCBvbiB0aGUgZXhhbWluYXRpb24gb2YgcGh5c2ljYWwgYW5kIG5ldXJvcHN5Y2hpYyBkZXZlbG9wbWVudCBpbiB0aGlzIGFnZSAuICAgICAgICAgICAgICAgICAgICAgICAgICAgICAgICAgICAgICAgICAgICAgICAgICAgICAgICAgICAgICAgICAgICAgICAgICAgICAgICAgICAgICAgICAgICAgICAgICBEcm9vbGluZyBjYWIgYmUgYSBzeW1wdG9tcyBvZiBtZWRpY2FsIGNvbmRpdGlvbiBvciBkZXZsb3BtZW50YWwgZGVsYXkgYXMgYSByZXN1bHQgb2YgdGFraW5nIGNlcnRxYWluIG1lZGljYXRpb25zIC5hbnl0aGluZyB0aGF0IGxlYWQgdG8gZXhjZXNzaXZlIHNhbGl2YSBwcm9kdWN2eHRpb24gLGRpZmZpY3VsdHkgaW4gc3dhbGxvaW5nIG9vciBwcm9ibGVtIHdpdGggbXVzY2xlIGNvbnRyb2xlIG1heSBsZWFkIHRvIGRyb29saW5nIC4gYWdlIGRyb29saW1nIGJlZ2lucyBhZnRlciBiaXJ0aCBhbmQgcGVha3MgYmV0d2VlbiB0aHJlZSBvciBzaXggbW9udGhzZXIgb2YgaW5mYW50cyBiZWNvbWUgbW9yZSBhY3RpdmUgLkFnZSBkcm9vbGluZyBpcyBjb3JyZWN0IHdpdHRoIGFnZSBhbmQgYmVhY2sgdG8gbm9ybWFsIHdpdGggaW5jcmVhc2UgaW4gYWdlIC4gTmV1cm9sb2dpY2FsIGRpc29yZGVycyBjZXJ0YWluIG1lZGljYWwgY29uZGl0aW9ucyBjYW4gcHV0IHlvdSBhdGZkZ3IgcmlzayBmb3IgZHJvb2xpbmcgcGFydGljdWxhcmx5IGlmIHRoZXkgY2F1c2UgYSBsb3NlIG9mIGNvbnRyb2xlIG9mIGZhY2lhbCBtdXNjbGUuICAgICAgICAgICAgICAgICAgICAgICAgICAgICAgICAgICAgICAgICAgICAgICAgICAgICAgICAgICAgICAgICAgICAgICAgICAgICAgU29tZXRpbWUgZHJvb2xpbmcgaXMgYSBuYXR1cmFsIHBoZW5vbWVub24gdGhhdCBtYXkgYmUgY29ycmVjdCB3aXRoIGluY3JlYXNlIGluIGFnZSBzb21lIHRpbWUgdGhlcmUgaXdzIG5ldXJvbWFzY3VsYXIgY29ycm9kdGlvbiBpcyBub3QgY29vcmRpbmF0ZSBwcm9wd2VybHkgaW4gdGhpcyBhZ3Igc28gYmFieSBiZWFjb21lIHJla2Vhc2Ugc2FsaXZhIG1haWxueSBkdXI5aW5nIHNsZWVwIGFuZCBzb21lIHRpbWUgaXQgbWF5IGJlIHNpZ24gb2YgZmVlZGluZyB0aW1lIHNvIHRoZXJlIGlzIGdvb2QgY2hvaWNlIGlzIGNvdW5zdWxhdCB5b3VyIHBlZGlhdHJpY2lhbnMgYW5kIG1ha2UgaXQgYmV0dGVyIHdpdGggY2hlY2t1cCBiZWFjdXNlIGl0cyBnb29kIHRvIGNoZWNrIGl0IGluc3Rpc2FsbCBwaGFzZSAgICAgICAgICAgICAgICAgICAgICAgICAgICAgICAgICAgICAgICAgICAgIDxiciAvPg0KICAgIC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CAgIDIuIENoZXluZS1zdG9rZXMgcmVzcGlyYXRpb24gYXJlIGEgcmFyZSBhYm5vcm1hbCBicmVhdGhpbmcgcGF0dGVybnMgdGhhdCBvY2N1ciB3aGlsZSBhd2FrZSB0aGF0IHVzdWFsbHkgb2NjdXJzIGR1cmluZyBzbGVlcC4gVGhlIHBhdHRlcm4gaW55anZvbHZlcyBhIHBlcmlvZCBvZiBmYXN0IHNoYWxsb3cgYnJlYXRoaW5nIGZvbGxvd2VkIGJ5IHNsb3cgLGhlYXZpZXJicmVhdGhpbmcgYW5kIG1vbWN1cnMgd2l0aG91dCBhbnkgYnJlYXRoIGF0IGFsbCBjYWxsZWQgYXBuZWFzLiBpbnN0ZWFkIG9mIGFuIGFwZW5lYSBzb21lIHBlb3BsZSBoYXNhdmUgcGVyaW9kIG9mIGV4dHJlYW1sbHUgc2hhbGxvdyBicmVhdGhpbmcgY2FsbGVkIGh5cG9wbmVhcy4gICAgICAgICAgICAgICAgICAgICAgICAgICAgICAgICAgICAgICAgICAgICAgICAgICAgICAgICAgICAgICBhZnRlciBhbiBhcG5lYXMgb3IgaHlwb3BuZWFzIHRoZSBwYXR0ZXIgYmVnaW5zIGFnYWluIGluIGN5Y2xlIHRoYXQgdHlwaWNhbGx5IGxhc3RzIDQ1IHRvIDkwIHNlY29uZHMuIENoZXluZS1zdG9rZXMgYnJlYXRoaXVuZyBtYXkgYmUgYXNzb2NpYXRlZCB3aXRoIGNlbnRyYWwgc2xlZXAgYXBuZWFzIC4gc2xlZXBzIGFwbmVhcyBvY2N1ciB3aGVuIHRoZSBib2R5aW5nIGRvZXMgbm90IG1ha2UgYXBwcm9wcmlhdGUgcmVzcGlyYXRvcnkgZWZmb3J0cyBkdXJpbmcgc2xlZXAgZHVlIHRvIGFic2VuY2Ugb2Ygc2lnbmFscyBmcm9tIGJyYWluIC5DaGV5bmUtc3Rva2VzIGFuZCBjZW50cmFsIHNsZWVwIGFwbmVhIHJlc3BpcnJhdGlvbiBpbXBhY3QgcmVzcGlyYXRvcnkgZWZmb3J0cyBpbiBkaWZmZXJudCB3YXlzIC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77" table:style-name="ce1">
            <text:p>915077</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5leGNlc3NpdmUgc2FsaXZhdGlvbiBpcyBjYWxsZWQgZHJvb2xpbmcuaXQgaXMgZHVlIHRvIG1hbnkgZmFjdG9ycyBsaWtlIG1vdXRoIGlycml0YXRpb24gb3IgdGVldGhpbmcgaW4gZ3VtcyBiZWNhdXNlIHRpbWUgb2YgdGVldGhpbmcgZ3VtcyBwYWluIGFuZCBpcnJpdGF0aW9uIGluIG1vdXRoLml0IG1heSBiZSBhIG5ldXJvbG9naWNhbCBjb25kaXRpb24gc3VjaCBhcyBjZXJlYnJhbCBwYWxzeS5pdCBoYXMgaW5mZWN0aW9uIGxpa2UgdGhydXNoIG9yIGhhbmQtZm9vdCBvciBtb3V0aCBpbmZlY3Rpb24uc2FsaXZhIGhhcyBnb29kIHByb3BlcnR5IG9mIGRpZ2VzdGlvbiBhbmQgcHJldmVudCBiYWN0ZXJpYWwgaW5mZWN0aW9uLml0IGlzIG5vcm1hbCBpbiBjaGlsZHJlbiBhbmQgYWZ0ZXIgc29tZSB3ZWVrIHNhbGl2YXJ5IGdsYW5kIHdvcmsgcHJvcGVybHkuZXhjZXNzaXZlIHNhbGl2YXRpb24gZHVlIHRvIHVsY2VyIGluIHN0b21hY2ggb3IgaW5qdXJ5IGluIGludGVzdGluZS5zYWxpdmEgaGFzIGEgYmFjdGVyaW9jaWRhbCBwcm9wZXJ0eSBpbiBuYXR1cmUgd2hpY2ggaXMga2lsbGVkIGJhY3RlcmlhIC50aGVyZSBhcmUgbm8gb3RoZXIgY29uY2VybnMgb2YgZXhjZXNzaXZlIHNhbGl2YXRpb24uc3VjaCBhcyB0ZWV0aGluZyBvciBjb2xkIHdhc2hjbG90aHMgdG8gYWxsZXZpYXRlIGRpc2NvbWZvcnQuIHNhbGl2YSBoYXZlIGEgbWFueSBlbnppbWUgbGlrZSBjYXJib2h5ZHJhdGUgZGlnZXN0aXZlIGVuenltZSBhbmQgcHJvdGVpbiBlbnp5bWUgbGlrZSBwZXBzaW4gd2hpY2ggaGVscCBpbiBkaWdlc3Rpb24gYW5kIGR1ZSB0byBzYWxpdmEgZ29vZCBtb3ZlbWVudCBvZiBmb29kIGZyb20gbW91dGggdG8gc3RvbWFjaC4gYW5kIHN0b21hY2ggYWN0aXZhdGlvbiBlbnp5bWUgbGlrZSAgcGVwc2luIHdoaWNoIGlzIGJyZWFrZG93biBwcm90ZWluIGludG8gcGVwdGlkZS4gZXhjZXNzaXZlIHNhbGl2YXRpb24gaXMgaW1wb3J0YW50IHRvIG1ldGFib2xpc20uICAgICAgICAgICAgICAgICAgICAgICAgICAgIDIuY2hleW5lIHN0b2tlcyBicmVhdGhpbmctIGl0IGlzIGFibm9ybWFsIGJyZWF0aGluZyBpbiBmaXJzdCBtb250aCBvZiBsaWZlIGluIGhlYWx0aHkgY2hpbGRyZW4uaXQgaXMgYSBjeWNsaWNhbCBwYXR0ZXJuIGluIGJlYXRoZSBsaWtlIGluY3Jlc2UgYW5kIGRlY3JlYXNlIGluIG5hdHVyZSAuc29tZXRpbWUgaXQgaW5jcmVzZSBhbmQgZGVjcmVzZS5pdCBpcyB0eXBpY2FsbHkgYSBzZXJpb3VzIG1lZGljYWwgY29uZGl0aW9uIGluIGluZmFudHMuc3VjaCBhcyBoZWFydCBmYWlsdXJlIGFuZCBicmFpbiBpbmp1cnkuaXQgbWF5IG9jY3VyIGR1ciB0byB0aGUgaW1tYXR1cmUgcmVzcGlyYXRvcnkgc3lzdGVtLml0IG9jY3VyIGR1ZSB0byBzbGVlcC5zb21lIHN0dWR5IGZpbmRpbmcgMTAlIGhlYWx0aHkgNm1vbnRoIGNoaWxkcmVuIHN1ZmZlciB0aGlzIHByb2JsZW0uIGluZmFudHMgaGFzIGEgcmFwaWQgYW5kIHNoYWxsb3cgYnJlYXRoaW5nIGR1ZSB0byBoaWdoIHJhdGUgb2YgcHVsc2UgYW5kIGltbWF0dXJlIHJlc3BpcmF0b3J5IHN5c3RlbS4gaW5mYW50cyBiZWF0cy4gaXQgaXMgYWxzbyBjYWxsZWQgbm9uIHJhcGlkIGV5ZSBtb3ZlbWVudCBpbiBjaGlsZHJlbi53aGVuIGNoaWxkcmVuIGluIGRlZXAgc2xlZXAgc3RhdGUgaXQgbWFheSBiZSBtb3JlIHByb25vdWNlIGR1cmluZyByYXBpZCBncm93dGggcGVyaW9kLmluIGhlYWx0aHkgY2hpbGRyZW4gY2hleW5lIHN0b2tlIGlzIG5vdCBhIGNvbmNlcm5zIG9mIGFuZCB0ZW5kcyB0byByZXNvbHZlIGl0IG93biByZXNwaXJhdG9yeSBzeXN0ZW0gbWF0dXJlLml0IGhhcyBvdGhlciBzeW1wdG9zIGxpa2UgY3lhbm9zaXMgKGJsdWlzaCBza2luKW9yIGNob2tpbmcuIGFwcHJveHggMTAwLTE2MCAuaW5mYW50cyBsdW5ncyBpcyBub3QgZnVsbHkgZGV2ZWxvcGVkIGFuZCBoYXZlIGEgZm9udGFsZSBvdmFsZSBpbiBoZWFydCAuIGluZmFudHMgaGF2ZSBhIGJyb3duIGFkaXBvc2UgdGlzc3VlIGZvciBwcm9kdWNpbmcgaGVhdCB0byBwcmV2ZW50IGNvbGQuaW5mYW50cyBoYXMgcmFwaWQgYnJlYXRoZSBkdWUgdG8gc21hbGwgYW5kIHVuZGVyZGV2ZWxvcGVkIG11c2NsZXMgb2YgaGVhcnQgYW5kIGxvdyBjYXJkaWFjIG91dHB1dCBvZiBoZWFydC5maXJzdCBtb250aCBjaGlsZCBoYXMgc29tZSBjaGFuZ2VzIGluIGdyb3d0aCBhbmQgY2lyY3VsYXRpb24gc3lzdGVtIGFuZCBkZXZlbG9wIG1hdHVyZSBkaWdlc3Rpb24gLiBpdCBoYXMgYSBjb21tb24gaW4gbmF0dXJlIG9mIGZpcnN0IG1vbnRoIG9mIGJhYnku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88" table:style-name="ce1">
            <text:p>915088</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e3tBbnN3ZXIgMX19Oi0iRXhjZXNzaXZlIHNlbGl2YXRpb24gaW4gYSAzIG1vbnRoIG9sZCBCYWJ5ICBpcyB1c3VhbGx5IG5vcm1hbCBhbmQgaGFwcGVucyBiZWNhdXNlIG9mIHRoZWlyIG5hdHVyYWwgZGV2ZWxvcG1lbnQiICAgLiAgPGJyIC8+DQogMS4gTWF0dXJpbmcgc2FsaXZhcnkgZ2xhbmRzOi0gQXJvdW5kIDIgdG8gMyBtb250aHMgb2YgYWdlICwgYSBCYWJ5J3Mgc2FsaXZhcnkgZ2xhbmQgYmVjb21lcyBtb3JlIGFjdGl2ZSwuICJUaGlzIG1lYW5zIHRoZXkgc3RhcnQgcHJvZHVjaW1nIG1vcmUgc2FsaXZlIHRoYW4gYmVmb3JlIiwuIFRIZSBiYWJ5IGRvc2VuJ3QgbmVlZCB0aGlzIG11Y2ggc2FsaXZhIHlldCwgYnV0IHRoZWlyIGJvZHkgaXMgcHJlcGFyaW5nIGZvciBmdXR1cmUgc3RhZ2VzLCBsaWtlIGVhdGluZyAgc29saWQgZm9vZHMuLiAgICAgICAgICAgICAgICAgICAgICAgICAgICAgICAgICAgICAgICAgICAgICAgICAgICAgICAgICAgICAgICAgICAgICAgICAgICAgICAgICAgICAgICAgICAgICAgICAgICAgICAgPGJyIC8+DQogMi4gUG9vciBzd2FsbG93aW5nIGNvbnRyb2w6LSBBdCB0aGlzIGFnZSwgYmFiaWVzIGFyZSBzdGlsbCBsZWFybmluZyBob3cgdG8gY29udHJvbCBzd2FsbG93aW5nLiAiU2luY2UgdGhleSBjYW4ndCBtYW5hZ2UgYWxsIHRoZSBzYWxpdmUgdGhleSBwcmR1Y2UiLiBTb21lIG9mIGl0IGRyaWJibGVzIG91dCBhcyBkcm9vbC4uICAgICAgICAgICAgICAgICAgICAgICAgICAgICAgICAgICAgICAgICAgICAgICAgICAgICAgICAgICAgICAgICAgICAgICAgICAgMy4gVGVzdGluZyggcG9zc2liYWx5IHN0YXJ0aW5nKTotIGFsdGhvdWdoIHRlZXRoaW5nIHR5cGljYWxseSBiZWdpbnMgYXJvdW5kIDQgdG8gNiBtb250aHMsIFNvbWUgYmFiaWVzICAiZ3VtcyBzdGFydCB0byBmZWVsICBpcnJpdGF0ZWQgZWFybGllciwgd2hpY2ggY2FuIGFsc28gdHJpZ2dlciBtb3JlIHNhbGl2YSIuLiBFeGNlc3NpdmUgc2FsaXZhdGlvbiBhdCB0aGlzIGFnZSBpcyBub3JtYWwgYW5kIGlzIHBhcnQgb2Ygb3VyICBiYWJ5J3MgZ3Jvd3RoLi4gSXQgaXMgdXN1YWxseSBub3QgYSBzaWduIG9mIGFueSBwcm9ibGVtIHVubGVzcyBhY2NvbXBhbmVpZCBieSBvdGhlciBjb25jZXJuaW5nIHN5bXB0b21zIGxpa2UgZmV2ZXIsIGRpZmZpY3VsdHkgZmVlZGluZyBvciBjaG9raW5nLi4uICAgICAgICAgICAgICAgICAgICAgICAgICAgICAgICAgICAgICAgICAgICAgICAgICAgICAgICAgICAgICAgICAgICAgICAgICAgICAgICAgICAgICAgICAgICAgICAgICAgICAgICAgICAgICAgICAgICAgICAgICAgICAgICAge3tBbnN3ZXIgMn19Oi0gIkNoZXluZSAtIHN0cm9rZXMgYnJlYXRoaW5nIChDQlMpIiBpcyBhIHR5cGUgb2YgYWJub3JtYWwgYnJlYXRoaW5nIHBhdHRlcm4gY2hhcmVjdGVyaXplZCBieSBjeWNsZXMgb2YgZ3JhZHVhbGx5IGluY3JlYXNpbmcgYW5kIGRlY3JlYXNpbmcgZGVhcHRoIG9mIHJlc3BpcmF0aW9uIi4gRm9sbG93ZWQgYnkgYSB0ZW1wb3JhcnkgY2Vzc2F0aW9uIG9mIGJyZWF0aGluZyhhcG5lYSksLkluIHRoZSBmaXJzdCBmZXcgbW9udGggb2YgbGlmZSAsIENoZXluZSBzdHJva2VzIGJyZWF0aGluZyBpcyBvZnRlbiBhIG5vcm1hbCBwbmV1bW9uaWEgZHVlIHRvIGltbW1hdHVyZSByZXNwaXJhdG9yeSBjb250cm9sIHN5c3RlbS4sIFRoZSBrZXkgcmVhc29ucyBpbmNsdWRlcyA6LT4xLiBJbW1hdHVyaXR5IG9mIHRoZSBicmFpbnN0ZW0gcmVzcGlyYXRvcnkgY2VudGVycyB0aGlzIGltbWF0dXJpdHkgY2FuIGNhdXNlIGFuIGV4YWdnb3JhdGVkIHJlc3BvbnNlIHRvIENPMiAsIGZsdWN0dXJhdGlvbiwgbGVhZGluZyB0byBwZXJpb2RpYyBicmVhdGhpbmdfLiAgICAgICAgICAgICAgICAgICAgICAgICAgICAgICAgICAgICAgICAgICAgICAgICAgICAgICAgICAgICAgICAgICAgICAgICAgICAgICAgICAgICAgICAgICAgICAgICAgOi0+Mi4gTG93ZXIgc2Vuc2l0aXZpdHkgdG8gQ08yIGxldmVsczpjYXVzaW5nIHBhdXNlcyBpbiBicmVhdGhpbmcgaW4gYmVmb3JlIGh5cGVydmVudGlsYXRpb24gcmVzdW1lc18uICAgICAgICAgICAgICAgICAgICAgICAgICAgIDotPjMuIFNsZWVwIHJlbGF0ZWQgdnVsbmVyYmlsaXR5OiBDU0Igb2Z0ZW4gb2NjdXJzIGR1cmluZyBzbGVlcCAoZXNwZWNpYWxsIGluIGxpZ2h0IHNsZWVwIG9yIHJhcGlkIGV5ZSBtb3ZlbWVudChSRU0pIHNsZWVwKSB3aGVuIHJlc3BpcmF0b3J5IGNvbnRyb2wgaXMgZXZlbiBtb3JlIHVuc3RhYmxlIGluIGluZmFudHMuICAgICAgICAgICAgICAgICAgICAgICAgICAgICAgICAgICAgICAgICAgICAgICAgICAgICAgICAgICAgICAgICAgICAgICAgICAgIDxiciAvPg0KOi0+NC4gTm9ybWFsIHRyYW5zaXRpb24gdG8gZXh0cmF1dGVyaW5lIGxpZmVfLiAgICAgICAgICAgICAgICAgICAgICAgICAgICAgICAgICAgICAgICAgICAgICAgICAgICAgICAgICAgICAgICAgICAgICAgICAgICAgICAgICAgOi0+NS4gcGVyaW9kaWMgYnJlYXRoaW4gOiBhIHJlbGF0ZWQgYnV0IG1pbGRlciBwYXR0ZXJuICwgaXMgdmVyeSBjb21tb24gaW4gaGVhbHRoeSBpbmZhbnRzIGFuZCBpcyBvZnRlbiBjb25zaWRlcmVkIHBhcnQgb2Ygbm9ybWFsIGRldmVsb3BtZW50LC4gICAgICAgICAgICAgICAgICAgICAgICAgICAgICAgICAgICAgICAgICAgICAgICAgICAgICAgICAgICAgICAgICAgICAgICAgICAgICAgICAgICAgICAgICAgICAgICAgICAgICAgICAgICAgICAgIDxiciAvPg0KICAgICAgIDotPkN5Y2xpYyBwYXR0cmVuOiBHcmFkdWFsIGluY3JlYXNlIGluIGJyZWF0aGluZyBhbXBsaXR1ZGUgKGh5cGVydmVudGlsYXRpb24gcGhhc2UpICwgZ3JhZHVhbCBkZWNyZWFzZSBpbiBicmVhdGhpbmcgYW1wbGl0dWRlICwgYSBwYXVzZSAoYXBuZWEpIGJlZm9yZSB0aGUgY3ljbGUgdHlwaWNhbGx5IGxhc3QgMjAgc2Vjb25kcyB0byAyIG1pbnR1dGVzLC4gICAgICAgICAgICAgICAgICAgICAgICAgICAgICAgICAgICAgICAgICAgICAgPGJyIC8+DQogICAgICAgOi0+QXNzb2NpYXRlZCBzeW1wdG9tczogQXBuZWEsIChwYXVzZXMgaW4gYnJlYXRoaW5nLCBpcnJlZ3VsYXIgb3h5Z2VuIGxldmVsLCB3aGljaCBtYXkgbGVhZHMgdG8gY3lhbm9zaXMoYmx1ZSBza2luKSBkdXJpbmcgcGF1c2VzLCBEaXNydXB0ZWQgc2xlZXAgaWYgb2NjdXJyaW5nIGF0IG5pZ2h0Liwu</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19" table:style-name="ce1">
            <text:p>1067119</text:p>
          </table:table-cell>
          <table:table-cell office:value-type="string" table:style-name="ce1">
            <text:p>english</text:p>
          </table:table-cell>
          <table:table-cell office:value-type="string" table:style-name="ce1">
            <text:p>Ticket 4&amp;lt;br /&amp;gt; 1. At the consultation, the mother with 3-month-old child notes profuse salivation of the child. On examination, the physical and neuropsychic development corresponds to age. What is the cause of the excessive salivation in children at this age?&amp;lt;br /&amp;gt; 2. Explain how Cheyne-Stokes breathing manifests in the first months of life in healthy children?&amp;lt;br /&amp;gt; &amp;lt;br /&amp;gt;</text:p>
          </table:table-cell>
          <table:table-cell office:value-type="string" table:style-name="ce1">
            <text:p>MS4gRXhlc3NpdmUgc2FsaXZhdGlvbiBpbiBhIDMgbW9udGggb2xkIGNoaWxkIGlzIHR5cGljYWxseSBhIG5vcm1hbCBwYXJ0IG9mIHRoZXJlIGRvdmVsb3BtZW50IHByb2Nlc3MgLCBpbiB0aGlzIGFnZSBpbmZhbnRzIGFyZSBsZWFybmluZyB0byBleHBsb3JlIHRoZXJlIG1vdXRoIHRvIGFuZCBtYXkgbm90IGhhdmUgZnVsbHkgZGV2bG9wZWQgY29udHJvbCBvdmVyIHRoZXJlIG9yYWwgbXVzY2xlcy4gdGhlIGluY3Jlc2Ugc2FsaXZhdGlvbiBjYW4gYXR0cmlidXRlIHRvIHRlZXRpbmcgLCBvcmFsIGV4cHJsb3JhdGlvbiBhbmQgZ3JhZHVhbCBtYXR1cmF0aW9uIG9mIHRoZSBzd29sbGluZyByZWZsZXggaXRzIGNvbnNpZGVyIGEgbm9ybWFsIGFuZCB0cmFuc2llbnQgcGhhc2Ugb2Z0ZW4gcmVzb2x2aW5nIGFzIHRoZSBjaGlsZCBncm93cyBhbmQgdGhlcmUgbW90ZXIgY29udHJvbCBpbXByb3ZlIC4gICBzYWxpdmFyeSBnbGFuZCBiZWNvbWUgbW9yZSBhY3RpdmUgYXJvdW5kIDItMyBtb250aHMgYW5kIG9yYWwgIGV4cGxvbHJhdGlvbiBpcyBhbHNvIG1vcmUgbW9zdCBjb21tb24gaW4gdGhpcyBhZ2UgYW5kIGFzIG5ldXJvbXVzY3VsYXIgY29udHJvbCBpbXByb3ZlIHNhbGl2YXRpb24gYmVjb21lIG1vcmUgcmVndWxhdGVkIC4gICAgICAgICAgICAgICAgICAgICAgICAgICAgICAgICAgICAgICAgICAgICAgICAgICAgICAgICAgICAgICAgICAgICAgICAgICAgICAgICAgICAgICAgICAgICAgICAgICAgICAyLkNoZXluZS1zdG9rZXMgYmJyZWF0aGluZyBpbiBhIGhlYWx0aHkgaW5mYW50IGR1cmluZyB0aGUgZmlyc3QgbW9udGggb2YgbGlmZSBtZW5pZmVzdCBhcyBhIGN5Y2xpYyBwYXR0ZXJuIG9mIGJyZWF0aGluZyBjaHJhY3RlcmlzZWQgYnkgYSBncmFkdWFsIGRlZXBpbmluZyBhbmQgdGhlbiBzaGFsbG93aW5nIG9mIGJyZWF0aCBhbmQgZm9sbG93ZWQgYnkgYSB0ZW1wb3JhcnkgcGF1c2Ugb2YgYnJhdGhpbWcgdGhhdCBpcyBjYWxsZWQgQVBOSUEgLiB0aGlzIHBhdHRlcm4gcmVwZWF0ZXMgaW4gYSByZWd1bGFyIGN5Y2xlIC5JbiBoZWFsdGh5IG5ldyBib3JuIHRoaXMgcmVzcGlyYXRvcnkgcGF0dGVybiBpcyByZXN1bHQgb2YgaW1tYXR1cmUgcmVzcGlyYXRvcnkgY2VudGVyIGluIHRoZSBicmFpbiAuIFRoZSBncmFkdWFsIGRldmVsb3BlbWVudCBvZiB0aGVzZSBjZW50ZXIgbGVhZHMgdG8gcGVyaW9kaWMgYnJlYXRoaW5nIHBhdHRlcm4gLiBJdCBpcyBnZW5lcmFsbHkgY29uc2lkZXIgYXMgYSBub3JtYWwgIHZhcmllbnQgaW4gdGhlIGZpcnN0IGZldyBtb250aHMgb2YgbGlmZSAsYW5kIG1vc3QgaW5mYW50cyBuYXR1cmFsbHkgdHJhbnNpdGlvbiB0byBhIG1vcmUgcmVndWxhciBicmVhdGhpbmcgcGF0dGVybiBhcyB0aGV5IGdyb3cgLiB0aGlzIGNpbnNpZGVyIGEgbm9ybWFsIGFuZCB0ZW1wb3JhcnkgdmFyaWVudCBpbiBlYXJseSBpbmZhbmN5IC4=</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the answer is incomplete, the text is short</text:p>
          </table:table-cell>
          <table:table-cell office:value-type="float" office:value="0" table:style-name="ce1">
            <text:p>0</text:p>
          </table:table-cell>
          <table:table-cell table:number-columns-repeated="16376"/>
        </table:table-row>
        <table:table-row table:style-name="ro1">
          <table:table-cell office:value-type="float" office:value="915228" table:style-name="ce1">
            <text:p>915228</text:p>
          </table:table-cell>
          <table:table-cell office:value-type="string" table:style-name="ce1">
            <text:p>kazakh</text:p>
          </table:table-cell>
          <table:table-cell office:value-type="string" table:style-name="ce1">
            <text:p>Билет 5&amp;lt;br /&amp;gt; 1.Жүректің сопақша тесігінің анатомиялық жабылуы мерізімі?&amp;lt;br /&amp;gt; 2.Жана туған балаларда сору кезінде герметизациияны сақтап алатын ауыз қуысының ерекшеліктерің атаныз.&amp;lt;br /&amp;gt;</text:p>
          </table:table-cell>
          <table:table-cell office:value-type="string" table:style-name="ce1">
            <text:p>MSDRgdKx0YDQsNKbINGB0L7Qv9Cw0pvRiNCwINGC0LXRgdGW0LotINKb0rHRgNGB0LDSm9GW0YjRltC70ZbQuiDQtNCw0LzRgyDQutC10LfRltC90LTQtSDQvtKjINC20q/RgNC10LrRiNC1INC80LXQvSDRgdC+0Lsg0LbSr9GA0LXQutGI0LUg0LDRgNCw0YHRi9C90LTQsCDQvtGA0L3QsNC70LDRgdKb0LDQvSDQsNGI0YvSmyDRgtC10YHRltC6LCDSsdGA0YvSm9GC0LAg0L7SoyDQttKv0YDQtdC60YjQtdC00LXQvSDSm9Cw0L0g0L7RgdGLINGC0LXRgdGW0Log0LDRgNKb0YvQu9GLINGB0L7QuyDQttKv0YDQtdC60YjQtdCz0LUg0YLSr9GB0ZbQvyDQvtGC0YvRgNCw0LTRiy4g0JHSsdC7INOp0Lcg0LrQtdC30LXQs9GW0L3QtNC1INKx0YDRi9Kb0YLQsCDTqdC60L/QtdC90ZbSoyDTqdC3INKb0YvQt9C80LXRgtGW0L0g0LDRgtKb0LDRgNC80LDRg9GL0LzQtdC9INCx0LDQudC70LDQvdGL0YHRgtGLLiDSsNGA0YvSm9GC0YvSoyDQvtGC0YLQtdCz0ZbQvNC10L0g0pvQsNC80YLQsNC80LDRgdGL0Lcg0LXRgtGW0LvRg9GWINC/0LvQsNGG0LXQvdGC0LDQtNCw0L0g0LrQtdC70LXRgtGW0L0g0LrRltC90LTRltC6INCy0LXQvdCw0YHRiyDQsNGA0pvRi9C70Ysg0LbSr9C30LXQs9C1INCw0YHQsNC00YsuINCe0Lsg0YHTmdC50LrQtdGB0ZbQvdGI0LUg0LXQutGWINGC0LDRgNC80LDSm9Kb0LAg0LHTqdC70ZbQvdC10LTRljsg0pvRi9GB0pvQsCDRgtCw0YDQvNCw0pPRiyDRgtOp0LzQtdC90LPRliDQutGD0YvRgSDQstC10L3QsNKT0LAtINCy0LXQvdC+0LfQtNGL0psg0YjRg9C90YIsINC10LrRltC90YjRliDQsdGW0YDRli0g0L/QvtGA0YLQsNC70LTRiyDQstC10L3QsNKT0LAg0LbQsNC70pPQsNGB0LDQtNGLLiDQkdCw0YPRi9GA0pPQsCDQvtGC0YLQtdCz0ZbQvNC10L0g0pvQsNC90YvSm9Kb0LDQvSDSm9Cw0L0g0LHQsNGA0LDQtNGLLiDSmtGD0YvRgSDQstC10L3QsCDQvtKjINC20q/RgNC10LrRiNC10LPQtSDSm9Cw0L3QtNGLINCw0L/QsNGA0LDQtNGLLCDRgdC+0L3Ri9C80LXQvSDSm9Cw0YLQsNGAINC80rHQvdC00LAg0LbQvtKT0LDRgNGLINKb0YPRi9GB0YLRiyDQstC10L3QsCDQsNGI0YvQu9Cw0LTRiy4g0J7RgdGLINC20LXRgNC00LXQvSDSm9Cw0L0g0YHQvtC7INC20q/RgNC10LrRiNC10LPQtSDRgtKv0YHRltC/INC+0YLRi9GA0LDQtNGLLCDQsNGA0Ysg0pvQsNGA0LDQuSDSm9Cw0YDRi9C90YjQsNKT0LAg0LrQtdC50ZbQvSDQsNC+0YDRgtCw0pPQsCDTqdGC0LXQtNGWLiDSmtC+0LvSm9Cw0L3Ri9KjINGC06nQvNC10L3QtNC10LPQtdC9INCx06nQu9GW0LPRliDQutGW0L3QtNGW0Log0LDRgNGC0LXRgNC40Y/RgdGLINCw0YDSm9GL0LvRiyDQv9C70LDRhtC10L3RgtCw0pPQsCDQsdCw0pPRi9GC0YLQsNC70LDQtNGLLiDQkNC7INOp0LrQv9C10LPQtSDQttCw0LvQv9GLINKb0LDQvdC90YvSoyAxMCDQv9GA0L7RhtC10L3RgtGWINKT0LDQvdCwINGC0q/RgdGW0L8g0L7RgtGL0YDQsNC00YsuINCW05nQvdC10LTQtSDTqdC60L/QtdCz0LUg0LDQtyDSm9Cw0L0g0YLSr9GB0YPRltC90LUg0YHQtdCx0LXQvyDQsdC+0LvQsNGC0YvQvS0g0LDRiNGL0psg0LDRgNGC0LXRgNC40L7Qt9C00Ysg0L/RgNC+0YLQvtC6INCx0LDRgC4g0prQsNC90L3Ri9KjINC+0YHRi9C70LDQuSDSsdGA0YvSm9GC0LAg0LDQudC90LDQu9GD0YsgLSDTqdC80ZbRgNC70ZbQuiDQvNCw0qPRi9C30LTRiyDQvtGA0LPQsNC90LTQsNGAOtC80LgsINC20q/RgNC10LosINCx0LDRg9GL0YDQtNGL0qMg0LbQsNKb0YHRiyDSm9Cw0L3QvNC10L0g0pvQsNC80YLQsNC80LDRgdGL0Lcg0LXRgtGW0LvRg9GW0L3QtSDQttCw0YPQsNC/0YLRiyDQtNC10YHQtdC60YLQtSDQsdC+0LvQsNC00YsuICDQndOZ0YDQtdGB0YLQtdC00LUg0YHQvtC/0LDSm9GI0LAg0YLQtdGB0ZbQutGC0ZbSoyDQsNGI0YvSmyDRgtGD0YvQu9GD0Ysg0L/QsNGC0L7Qu9C+0LPQuNGP0L3RiyDQutOp0YDRgdC10YLQv9C10LnQtNGWLiDQkdCw0LvQsCDRgtGD0YvQu9KT0LDQvdC90LDQvSDRgdC+0qMg06nRgdC1INC60LXQu9C1INCx0LXQu9Cz0ZbQu9GWINCx0ZbRgCDRg9Cw0pvRi9GCINGW0YjRltC90LTQtSDQttCw0LHRi9C70LDQtNGLLiDQkdKx0Lsg0YHTmdC50LrQtdGB0ZbQvdGI0LUg0LHQsNC70LDQtNCw0pPRiyDQs9Cw0Lcg0LDQu9C80LDRgdGD0LTRi9KjLCDRj9KT0L3QuCDTqdC60L/QtdC90ZbSoyDQttKx0LzRi9GBINCw0YLSm9Cw0YDQsCDQsdCw0YHRgtCw0YPRi9C80LXQvSDRgtGW0LrQtdC70LXQuSDQsdCw0LnQu9Cw0L3Ri9GB0YLRiy4g0J3QtdCz0ZbQt9GW0L3QtdC9INGC0LXRgdGW0Log0YLQvtC70YvSm9GC0LDQuSAxMi0xOCDQsNC5INGI0LDQvNCw0YHRi9C90LTQsCDQttCw0LHRi9C70LDQtNGLLCDQvtGB0YvQu9Cw0Lkg0LbSr9GA0LXQutGI0LUg0LDRgNCw0LvRi9KbINKb0LDQu9Kb0LAg0pvQsNC70YvQv9GC0LDRgdCw0LTRiy4g0KLQtdGB0ZbQutGC0ZbSoyDQvtGA0L3RiyDQttKx0pvQsCDQsdC+0LvRi9C/INKb0LDQu9Cw0LTRiy4gMSDQttCw0YHQsNGAINCx0LDQu9Cw0LvQsNGA0LTRi9KjINKb0YvRgNGL0pstINC10LvRgyDQv9Cw0LnRi9C30YvQvdC00LAg0LHSsdC7INGC0LXRgdGW0Log0LbQsNCx0YvQu9C80LDRg9GLINCx0LDQudKb0LDQu9Cw0LTRiy4gMi0zINC20LDRgSDRiNCw0LzQsNGB0YvQvdC00LDSk9GLINCx0LDQu9Cw0LvQsNGA0LTQsCDQttC40YvRgNC80LAg0LHQtdGBINC/0LDQudGL0LfQtNCw0Lkg0LrQtdC30LTQtdGB0YHQtSDQutC10YDQtdC6LiDQkdKx0Lsg0LHQsNC70LDQvdGL0qMg06nQvNGW0YDRltC90LTQtSDQutC10LvQtdKj0YHRltC30LTRltC60YLQtdGAINGC0YPRi9C90LTQsNGC0YPRiyDQvNKv0LzQutGW0L06INGC0YvQvdGL0YEg0LDQu9GDINCx0rHQt9GL0LvRi9GB0YLQsNGA0Yss0LrRltGI0ZbQs9GW0YDRltC8INC20q/RgNC10Log0pvQsNC90YLQsNC80YvRgCDQttKv0LnQtdGB0ZbQvdC00LUg0LHSsdC30YvQu9GL0YHRgtCw0YAg0LbTmdC90LUg0LjQvdGB0YPQu9GM0YLQutC1INC00LXQs9C10L0g0LHQtdC50ZbQvNC00ZbQu9GW0LogKNC80LjQutGA0L7RgtGA0L7QvNCx0YLQsNGA0LTRi9KjINC/0LDQudC00LAg0LHQvtC70YPRi9C80LXQvSDQsdCw0LnQu9Cw0L3Ri9GB0YLRiykg0YLRg9GL0L3QtNCw0LnQtNGLLiAgMiDRgdKx0YDQsNKb0pvQsCDQutC10LvRgdC10LwsINC20LDSo9CwINGC0YPSk9Cw0L0g0LHQsNC70LDQvdGL0qMg0LDRg9GL0Lcg0pvRg9GL0YHRiyDQtdGA0LXQutGI0LXQu9GW0LrRgtC10YDRliDRgdC+0YDRgyDQsdCw0YDRi9GB0YvQvdC00LDSk9GLINCz0LXRgNC80LXRgtC40LfQsNGG0LjRj9C90Ysg0YHQsNKb0YLQsNGD0pPQsCDSm9C+0LvQsNC50LvRiyDQttCw0pPQtNCw0Lkg0LbQsNGB0LDQudC00YsuINC20LDSo9CwINGC0YPRi9C70pPQsNC9INCx0LDQu9Cw0LTQsCDRgdC+0YDRgywg0LXQvNGDINGI0LDRgNGC0YLRiyDRgNC10YTQu9C10LrRgSzQvdOZ0YDQtdGB0YLQtSDQtdGA0L3RltC90ZbSoyDQsdKx0YDRi9GI0YvQvSDRgtKv0YDRgtC10YLRltC9INCx0L7Qu9GB0LDSmyDQsdCw0LvQsCDRgtGW0YLRltGA0LrQtdC90LTRltGA0LPRltGIINC20LDSm9Kb0LAg0LHQsNGB0YvQvSDQsdKx0YDRi9C/INCw0YPQt9GL0LzQtdC9INGW0LfQtNC10LnRgtGW0L0g0LHQvtC70LDQtNGLLiDQotOp0LzQtdC90LPRliDQtdGA0L3RliDQutC10qPRltGA0LXQuiDQttOZ0L3QtSDQtNC1INCx0rHQu9GI0YvSm9C10YLRgtC10YDRliDQttCw0pvRgdGLINC00LDQvNGL0pPQsNC9LiDSmtCw0YLRgtGLINGC0LDSo9C00LDQudGLINCx0LDQu9Cw0L3Ri9KjINC20LDQu9C/0LDSmywg0LDQuyDQttKx0LzRgdCw0psg0YLQsNKj0LTQsNC50Ysg0pvRi9GB0pvQsCDQsdC+0LvRi9C/INC60LXQu9C10LTRliDQtdC60LXQvS4g0KLQsNKj0LTQsNC5INGI0YvQvNGL0LvQtNGL0YDRi9KT0Ysg0LbSsdGC0pvRi9C90YjQsNKb0YLRi9KjINCw0YDRgtKb0Ysg0pvQsNCx0YvRgNKT0LDRgdGL0L3QsCDQttCw0LvSk9Cw0YHQsNC00YssINCx0rHQuyDQsdCw0LvQsNC90YvSoyDQtdC80YMg0LrQtdC30ZbQvdC00LUg0YLRi9C90YvRgSDQsNC70YPRi9C90LAg0LrTqdC80LXQutGC0LXRgdC10LTRli4g0KLRltC70ZYg0q/Qu9C60LXQvSDTmdGA0ZYg0LbQsNC70L/QsNKbINCx0L7Qu9GL0L8g0LrQtdC70LXQtNGWLCDRgdOZ0LnQutC10YHRltC90YjQtSDQvdOZ0YDQtdGB0YLQtdC90ZbSoyDQsNGD0YvQtyDSm9GD0YvRgdGL0L0g0YLQvtC70YvSmyDQsNC70YvQvyDQttCw0YLQsNC00YsuINCQ0L3QsNGB0YvQvSDQtdC80YMg0LrQtdC30ZbQvdC00LUg0LXRgNC90ZbQvNC10L0g0LXQvNGI0LXQuiDQsNGA0LXQvtC70LDRgdGL0L0g0pvQsNGA0LzQsNC/INCw0LvQsNC00YssINC40LXQs9GWINCx0L7Qu9GB0LAg0YHQvtGA0YPSk9CwINC606nQvNC10LrRgtC10YHQtdC00ZYuINCQ0Lsg0YLTqdC80LXQvdCz0ZYg0LbQsNKbINGB0q/QudC10LPRliDQsNGA0YLSm9CwINC205nQvdC10LTQtSDRgtOp0LzQtdC90LPQtSDSm9C+0LfSk9Cw0LvQsNC00Ysg0LTQsCwg0L7RgdGLINGB05nRgtGC0LUg0LDRg9GL0Lcg0pvRg9GL0YHRi9C90LTQsCDRgtC10YDRltGBINKb0YvRgdGL0Lwg0YLRg9GL0L3QtNCw0LnQtNGLINC00LAsINCx0L7RgSDRgtKx0YDSk9Cw0L0g0LDRg9GL0Lcg0LrRg9GL0YHRi9C90LAg0LDQvdCwINGB0q/RgtGWINC60LXQu9C10LTRli4g0KLRltC7INC606nQvNC10LPRltC80LXQvSDRgdKv0YIg0LbSsdGC0pvRi9C90YjQsNKbINCw0YDSm9GL0LvRiyDTqdKj0LXRiNC60LUg0LbRltCx0LXRgNGW0LvQtdC00ZYuICAgICA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жауаптары толық емес, 2-ші сұрақта ауыз қуысы ерекшеліктері-толықтырылмаған, биша түйіндері, ауыз куысы кішкентай болатыны секілді ерекшеліктері жазылмаған</text:p>
          </table:table-cell>
          <table:table-cell office:value-type="float" office:value="0" table:style-name="ce1">
            <text:p>0</text:p>
          </table:table-cell>
          <table:table-cell table:number-columns-repeated="16376"/>
        </table:table-row>
        <table:table-row table:style-name="ro1">
          <table:table-cell office:value-type="float" office:value="915301" table:style-name="ce1">
            <text:p>915301</text:p>
          </table:table-cell>
          <table:table-cell office:value-type="string" table:style-name="ce1">
            <text:p>kazakh</text:p>
          </table:table-cell>
          <table:table-cell office:value-type="string" table:style-name="ce1">
            <text:p>Билет 5&amp;lt;br /&amp;gt; 1.Жүректің сопақша тесігінің анатомиялық жабылуы мерізімі?&amp;lt;br /&amp;gt; 2.Жана туған балаларда сору кезінде герметизациияны сақтап алатын ауыз қуысының ерекшеліктерің атаныз.&amp;lt;br /&amp;gt;</text:p>
          </table:table-cell>
          <table:table-cell office:value-type="string" table:style-name="ce1">
            <text:p>MS7QltKv0YDQtdC60YLRltKjINGB0L7Qv9Cw0pvRiNCwINGC0LXRgdGW0LPRltC90ZbSoyDQttCw0LHRi9C70YPRiyDTmdC00LXRgtGC0LUsINCx0LDQu9Cw0L3Ri9KjINOp0LzRltGA0ZbQvdGW0qMg0LHRltGA0ZbQvdGI0ZYg0LbRi9C70LTQsNGA0YvQvdC00LAg0LbSr9GA0LXQtNGWLiDQltCw0LHRi9C70YMg0LzQtdGA0LfRltC80ZYgMyDQsNC50LTQsNC9IDEg0LbQsNGB0pvQsCDQtNC10LnRltC9INC+0YDRi9C9INCw0LvRg9GLINC80q/QvNC60ZbQvS4g0JHSsdC7INGC0LXRgdGW0Log0L3QtdCz0ZbQt9GW0L3QtdC9INKx0YDRi9Kb0YLRi9KbINC60LXQt9C10qPQtNC1INC20q/RgNC10LrRiNC10LvQtdGAINCw0YDQsNGB0YvQvdC00LDSk9GLINKb0LDQvSDQsNC50L3QsNC70YvQvNC00LDRgNGL0L3QsCDQvNKv0LzQutGW0L3QtNGW0Log0LHQtdGA0LXQtNGWINC205nQvdC1INCx0LDQu9CwINGC0YPRi9C70pPQsNC90L3QsNC9INC60LXQudGW0L0g06nQutC/0LXQu9GW0Log0pvQsNC9INCw0LnQvdCw0LvRi9C80Ysg0LHQsNGB0YLQsNC70pPQsNC90LTQsCDQsdGW0YDRgtGW0L3QtNC10L8g0LbQsNCx0YvQu9Cw0LTRiy4g0JbQsNC70L/RiyDQvtC90YvSoyDQttCw0LHRi9C70YPRi9C90LAg0LrQtdC70LXRgtGW0L0g0LHQvtC70YHQsNKbLiDQpNC40LfQuNC+0LvQvtCz0LjRj9C70YvSmyDQttCw0LHRi9C70YMg0LrQtdC30ZbQvdC00LUsINC905nRgNC10YHRgtC1INGC0YPRi9C70pPQsNC90L3QsNC9INC60LXQudGW0L3Qs9GWINCw0LvSk9Cw0YjSm9GLINC60q/QvdC00LXRgNGW0L3QtNC1INC90LXQvNC10YHQtSDQsNC/0YLQsNC70LDRgNGL0L3QtNCwINGB0L7Qv9Cw0pvRiNCwINGC0LXRgdGW0Log05nQtNC10YLRgtC1ICDRhNGD0L3QutGG0LjQvtC90LDQu9C00Ysg0YLSr9GA0LTQtSDTqdC30ZYg0LbQsNCx0YvQu9GL0L8g0LrQtdGC0LXQtNGWLiDQkdKx0Lsg0LrQtdC30LTQtSDRgdC+0Lsg0LbSr9GA0LXQutGI0LXQtNC10LPRliDSm9GL0YHRi9C8INC+0qMg0LbSr9GA0LXQutGI0LXQtNC10LPRliDSm9GL0YHRi9C80L3QsNC9INC20L7Sk9Cw0YDRi9C70LDQvdGL0L8sINGC0LXRgdGW0Log0LrQu9Cw0L/QsNC90Ysg0LbQsNCx0YvQu9Cw0LTRiy4g0JDQuyDQsNC90LDRgtC+0LzQuNGP0LvRi9KbINC20LDQsdGL0LvRg9GL0L3QsCDQutC10LvQtdGC0ZbQvSDQsdC+0LvRgdCw0pssINC005nQvdC10LrQtdGAINGC0ZbQvdC00LXRgNC00ZbSoyDTqdGB0YPRliDQvdOZ0YLQuNC20LXRgdGW0L3QtNC1INGB0L7Qv9Cw0pvRiNCwINGC0LXRgdGW0Log0YLQvtC70YvSm9GC0LDQuSDQsdGW0YLQtdC70LXQtNGWINC205nQvdC1INCx0rHQuyDSr9GA0LTRltGBINGC0L7Qu9GL0pvRgtCw0LkgMSDQttCw0YHSm9CwINC00LXQudGW0L0g0LDRj9Kb0YLQsNC70LDQtNGLLiDQkdGW0YDQsNKbINC60LXQudCx0ZbRgCDQttCw0pPQtNCw0LnQu9Cw0YDQtNCwINGB0L7Qv9Cw0pvRiNCwINGC0LXRgdGW0Log0YLQvtC70YvSmyDQttCw0LHRi9C70LzQsNGD0Ysg0LzSr9C80LrRltC9LiDQkdKx0Lsg0LbQsNKT0LTQsNC50LTRiyDQv9Cw0YLQtdC90YLRgtGWINGB0L7Qv9Cw0pvRiNCwINGC0LXRgdGW0LPRliDQtNC10L8g0LDRgtCw0LnQtNGLLiDQkdKx0Lsg0LbQsNKT0LTQsNC5INGB0LjRgNC10Log0LrQtdC30LTQtdGB0LXQtNGWLiDQltCw0LvQv9GLINGB0L7Qv9Cw0pvRiNCwINGC0LXRgdGW0LrRgtGW0qMg0L3TmdGA0LXRgdGC0LXQu9C10YDQtNC10LPRliDRgNOp0LvRliDSsdGA0YvSm9GC0YvSmyDQutC10LfQtdKj0LTQtSDRgtGL0L3Ri9GBINCw0LvRgyDSm9GL0LfQvNC10YLRliDRltGB0LrQtSDSm9C+0YHRi9C70LzQsNKT0LDQvdC00YvSm9GC0LDQvSwg0pvQsNC9INCw0LnQvdCw0LvRi9C8INC20q/RgNC10LrRgtGW0qMg0L7SoyDQttCw0psg0LbSr9GA0LXQutGI0LXRgdGW0L3QtdC9INGB0L7QuyDQttCw0psg0LbSr9GA0LXQutGI0LXQs9C1INKb0LDRgNCw0Lkg0L7RgdGLINGB0L7Qv9Cw0pvRiNCwINGC0LXRgdGW0Log0LDRgNKb0YvQu9GLINOp0YLQtdC00ZYuINCh06nQudGC0ZbQvyDQvtGC0YLQtdCz0ZbQs9C1INCx0LDQuSDSm9Cw0L3QtNGLINC905nRgNC10YHRgtC10L3RltKjINCx0q/QutGW0Lsg0LTQtdC90LXRgdGW0L3QtSDRgtCw0YDQsNC70YPRi9C90LAg0YHQtdC/0YLRltCz0ZbQvSDRgtC40LPRltC30LXQtNGWLiAyLiDQltCw0qPQsCDRgtGD0pPQsNC9INCx0LDQu9Cw0LvQsNGA0LTQsCDRgdC+0YDRgyDQutC10LfRltC90LTQtSDQs9C10YDQvNC10YLQuNC30LDRhtC40Y/QvdGLINGB0LDSm9GC0LDQvyDQsNC70LDRgtGL0L0g0LDRg9GL0Lcg0pvRg9GL0YHRi9C90YvSoyDQtdGA0LXQutGI0LXQu9GW0LPRliDQvtC90YvSoyDTqdC80ZbRgNCz0LUg0LHQtdC50ZbQvNC00LXQu9GD0ZbQvdC1ICDQutOp0LzQtdCz0ZbQvSDRgtC40LPRltC30LXQtNGWLiDQk9C10YDQvNC10YLQuNC30LDRhtC40Y/QvdGLINGB0LDSm9GC0LDQvyDSm9Cw0LvRg9GL0L3QsCDRi9Kb0L/QsNC70YvQvSDRgtC40LPRltC30LXRgtGW0L0g0LHQsNC70LDQu9Cw0YDQtNGL0qMg06nQt9GW0L3RltKjINGE0LjQt9C40L7Qu9C+0LPQuNGP0LvRi9KbINC10YDQtdC60YjQtdC70ZbQutGC0LXRgNGWINCx0L7Qu9Cw0LTRiy4g0JbQsNC70L/RiyDRgtGD0pPQsNC9INC905nRgNC10YHRgtC10LvQtdGA0LTRltKjINCw0YPRi9C3INKb0YPRi9GB0Ysg0pvSsdGA0YvQu9GL0LzRi9C90YvSoyDQtdGA0LXQutGI0LXQu9GW0LPRliDRgtGW0LvQtNGW0qMg0LDRg9GL0LfQtNGL0qMg0YLQsNKj0LTQsNC50YvQvdC00LAg0LLQsNC60YPRg9C80LTRi9KbINGC0YvSk9GL0LfQtNCw0pPRi9GIINC20LDRgdCw0YMg0pvQsNCx0ZbQu9C10YLRltC90LUg0LjQtS4g0JHSsdKT0LDQvSDQvdOZ0YDQtdGB0YLQtSDRgtGW0LvRltC90ZbSoyDQttC+0pPQsNGA0Ysg0L7RgNC90LDQu9Cw0YHRg9GLINC205nQvdC1INGC0ZbQuyDQvNC10L0g0pvQsNGC0YLRiyDRgtCw0qPQtNCw0Lkg0LDRgNCw0YHRi9C90LTQsCDRgtGL0pPRi9C30LTQsNGDINKb0LDQsdGW0LvQtdGC0ZYg0YvSm9C/0LDQu9GL0L0g0YLQuNCz0ZbQt9C10LTRli4g0JHSsdC7INKv0YDQtNGW0YEg0L3TmdGA0LXRgdGC0LUg0q/RiNGW0L0g06nRgtC1INC80LDSo9GL0LfQtNGLINCx0L7Qu9GL0L8g0YLQsNCx0YvQu9Cw0LTRiy4g06jQudGC0LrQtdC90ZYg0YHSr9GC0YLRliDQutC10YPQtNC10LTQtdC9INCw0LvRg9KT0LAg0LbTmdC90LUg0L7QvdGLINC10YjSm9Cw0L3QtNCw0Lkg0LDSk9GL0L8g0LrQtdGC0L/QtdGB0YLQtdC9LCDRgdC+0L3Ri9C80LXQvSDSm9Cw0YLQsNGAINGB0ZbSo9GW0YDRgyDRgtC40ZbQvNC00ZbQu9GW0LPRltC9INC20L7Sk9Cw0LvRgtC/0LDQuSDRgtC40ZbQvNC00ZYg0LbSsdGC0YPSk9CwINC80q/QvNC60ZbQvdC00ZbQuiDQsdC10YDQtdC00ZYuINCd05nRgNC10YHRgtC1INCw0YPRi9C3INKb0YPRi9GB0YvQvdC00LDSk9GLINC10YDQtdC60YjQtdC70ZbQs9GWINC10YDRltC90LTQtdGA0ZYg0pvQsNC70YvSoyDQttOZ0L3QtSDQvtC90YvSoyDRltGI0LrRliDQsdC10YLQutC10LnRltC90LTQtSDQutOp0LvQtNC10L3QtdKjINC20L7RgtCw0LvQsNGA0LTRi9KjINCx0L7Qu9GD0YssINC905nRgNC10YHRgtC10LPQtSDQs9C10YDQvNC10YLQuNC30LDRhtC40Y/QvdGLINGB0LDSm9GC0LDQvyDSm9Cw0LvRg9GL0L3QsCDRgdC10L/RgtGW0LPRltC9INGC0LjQs9GW0LfQtdC00ZYuINCh0L7QvdGL0LzQtdC9INKb0LDRgtCw0YAsINC905nRgNC10YHRgtC10LvQtdGA0LTQtSDQsNGD0YvQt9C00YvSoyDRiNC10qPQsdC10YDQu9GWINCx0rHQu9GI0YvSm9C10YLRgtC10YDRliDQttCw0pvRgdGLINC00LDQvNGL0pPQsNC9INCx0L7Qu9GL0L8g0LrQtdC70LXQtNGWLiDQltCw0LvQv9GLINC905nRgNC10YHRgtC10LvQtdGA0LTQtSDRgtGW0LvQtNGW0qMg0LXRgNC10LrRiNC1INCx0L7Qu9GD0YssINC20L7RgtCwINGC05nRgNGW0LfQtNGWINC006nSo9C10YHRgtC10YDQtNGW0qMg0LHQvtC70YPRiywg0LHSsdC70YjRi9Kb0LXRgtGC0ZbQuiDQtdGA0LXQutGI0LXQu9GW0LrRgtC10YDRltC90ZbSoyDQsdC+0LvRg9GL0L3Ri9C9INOZ0YHQtdGA0ZYg0LPQtdGA0LzQtdGC0LjQt9Cw0YbQuNGP0L3RiyDRgdCw0pvRgtCw0L8g0pvQsNC70YPRi9C90LAg06nRgtC1INGC0LjRltC80LTRliDRgdC10L/RgtGW0LPRltC9INGC0LjQs9GW0LfQtdC00ZYu</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2 сұрақтың да жауабы толықтырылмаған, ауыз қуысы ерекшеліктері толық емес</text:p>
          </table:table-cell>
          <table:table-cell office:value-type="float" office:value="0" table:style-name="ce1">
            <text:p>0</text:p>
          </table:table-cell>
          <table:table-cell table:number-columns-repeated="16376"/>
        </table:table-row>
        <table:table-row table:style-name="ro1">
          <table:table-cell office:value-type="float" office:value="915311" table:style-name="ce1">
            <text:p>915311</text:p>
          </table:table-cell>
          <table:table-cell office:value-type="string" table:style-name="ce1">
            <text:p>kazakh</text:p>
          </table:table-cell>
          <table:table-cell office:value-type="string" table:style-name="ce1">
            <text:p>Билет 5&amp;lt;br /&amp;gt; 1.Жүректің сопақша тесігінің анатомиялық жабылуы мерізімі?&amp;lt;br /&amp;gt; 2.Жана туған балаларда сору кезінде герметизациияны сақтап алатын ауыз қуысының ерекшеліктерің атаныз.&amp;lt;br /&amp;gt;</text:p>
          </table:table-cell>
          <table:table-cell office:value-type="string" table:style-name="ce1">
            <text:p>MSkg0JbSr9GA0LXQutGC0ZbSoyDRgdC+0L/QsNKb0YjQsCDRgtC10YHRltCz0ZYgZm9yYW1lbiBvdmFsZSAtINC20q/RgNC10LrRgtGW0qMg0L7SoyDQttOZ0L3QtSDRgdC+0Lsg0LbQsNKbINC20q/RgNC10LrRiNC1INCw0YDQsNGB0YvQvdC00LDSk9GLINC60LvQsNC/0L0uINCR0rHQuyDSm9Kx0YDQu9GL0LzQvdGL0L0g0LDQvdCw0YLQvtC80LjRj9C70YvSmyDQttCw0LHRi9C70YPRiyAtINC905nRgNC10YHRgtC1INGC0YPRi9C70pPQsNC9INGD0LDSm9GL0YLRgtCw0pPRiyA2INCw0LnQtNCw0L0gMiDQttCw0YEg0LDRgNCw0LvRi9KT0YvQvdC00LAg0LHQvtC70LDQtNGLLiDQndC10LPRltC30LPRliDSm9GL0LfQvNC10YLRljog0rDRgNGL0psg0YHTmdGC0ZbQvdC00LUgLSDRgdC+0L/QsNKb0YjQtSDRgtC10YHRltC60YLRltKjINCx0LDRgdGC0Ysg0pvRi9C30LzQtdGC0ZYg06nQutC/0LXQs9C1INKb0LDQvSDQsNKT0YvQvNGL0L0g0LDQt9Cw0LnRgtGDINCx0L7Qu9GL0L8g0YLQsNCx0YvQu9Cw0LTRiy4gINCi0YPRi9C70pPQsNC9INGB05nRgtGC0ZbQvdC00LUgLSDRgdC+0L/QsNKb0YjQsCDRgtC10YHRltC6INGB05nQsdC40LTRltKjINCw0LvSk9Cw0YjSm9GLINGC0YvQvdGL0YEg0LDQu9GD0YvQvNC10L0g0pvQsNC9INCw0LnQvdCw0LvRi9C80YvQvSDQttCw0pvRgdCw0YDRgtGD0pPQsCwg0LHQtdC70YHQtdC90LTRltGA0YPQs9C1INGL0pvQv9Cw0Lsg0LXRgtC10LTRli4g0JHSsdC7INC20LDSk9C00LDQudC00LAg0LbSr9GA0LXQutGC0LXQs9GWINC20q/RgNC10LrRiNC10L3RltKjINKb0YvRgdGL0LzRi9C9INGC06nQvNC10L3QtNC10YLRltC/LCDRgdC+0Lsg0LbQsNKbINC20q/RgNC10LrRiNC10LTQtdCz0ZYg0pvRi9GB0YvQvNC00Ysg0LDRgNGC0YLRi9GA0LDQtNGLLiDQkdKx0Lsg0LzQtdGF0LDQvdC40LfQvNC90ZbSoyDQsNGA0pvQsNGB0YvQvdC00LAg0LrQu9Cw0L/QvSDQttCw0LHRi9C70YvQvywg0LHRltGA0YLRltC90LTQtdC/INC20q/RgNC10LrRgtC10LPRliDRgdC+0L/QsNKb0YjQsCDRgtC10YHRltC60YLRltKjINC20LDQsdGL0LvRg9GL0L3QsCDRltC60LXQu9C10LTRli4g0J/QsNGC0L7Qu9C+0LPQuNGP0LvRi9KbINC20LDSk9C00LDQudGL0L3QtNCwINC60LXQudCx0ZbRgCDRgdOZ0LHQuNC70LXRgNC00LUg0LHSsdC7INGC0LXRgdGW0Log0LbQsNCx0YvQu9C80LDQuSDSm9Cw0LvQsNC00YsuINCR0rHQvdC00LDQuSDSm9Kx0LHRi9C70YvRgdGC0YssINGP0pPQvdC4INC/0LDRgtC+0LvQvtCz0LjRj9C90Ysg0L/QsNGC0LXQvdGC0YLRliDRgdC+0L/QsNKb0YjQsCDRgtC10YHRltC6INC00LXQvyDQsNGC0LDQudC80YvQty4g0JHSsdC7INC/0LDRgtC+0LvQvtCz0LjRjyDTqdGC0LUg0LrTqdC/INC60LXQt9C00LXRgdC10LTRliDQttOZ0L3QtSDRgdC40LzQv9GC0L7QvNC00LDRgNGB0YvQtyDQttKv0YDQtdC00ZYuINKa0L7RgNGC0YvQvdC00YvQu9Cw0Lkg0LrQtdC70YHQtdC8INC20q/RgNC10LrRgtGW0qMg0YHQvtC/0LDSm9GI0LAg0YLQtdGB0ZbQs9GWINGB05nQsdC4INGD0YvQu9KT0LDQvSDRg9Cw0pvRi9GC0YLQsNKT0YsgNiDQsNC5INC205nQvdC1IDIg0LbQsNGBINCw0YDQsNC70YvSk9GL0L3QtNCwINGC0L7Qu9GL0psg0LbQsNCx0YvQu9GL0L8sINCx0ZbRgtC10LvQtdC00ZYuICAgICAgICA8YnIgLz4NCjIpINCd0LXQs9GW0LfRltC90LXQvSDQttCw0qPQsCDRgtGD0pPQsNC9INGB05nQsdC40LvQtdGA0LTRltKjINCw0YPRi9C3INKb0YPRi9GB0Ysg0LHRltGA0YjQsNC80LAg0LrRltGI0LrQtdC90YLQsNC5INC205nQvdC1INOp0YLQtSDQvdOZ0LfRltC6INCx0L7Qu9GL0L8g0LrQtdC70LXQtNGWLiDQodC+0L3Ri9C80LXQvSDSm9Cw0YLRgtCw0YAg0LDRg9GL0Lcg0pvRg9GL0YHRi9C9INKv0LvQutC10L0g0YLRltC70LTQtdGA0ZYg0YLQvtC70YLRi9GA0YvQvyDRgtKx0YDQsNC00YsuINCQ0Lsg0LDQu9GM0LLQtdC+0LvQsNGA0LvRiyDTqdGB0ZbQvdC00ZbQu9C10YDRliDRgtC+0LvRi9KbINCw0LnSm9GL0L3QtNCw0LvQvNCw0pPQsNC9LiDQodC+0L3Ri9C80LXQvSDSm9Cw0YLRgtCw0YAg0YLQsNKj0LTQsNC5INCx06nQu9GW0LPRliDQvdOZ0LfRltC6INCx0L7Qu9GL0L8g0LrQtdC70LXQtNGWINC205nQvdC1INC10YDRltC9INCx0rHQu9GILiDQtdGC0YLQtdGA0ZYg0LbQsNKb0YHRiyDQtNCw0LzRi9KT0LDQvS4g0KHTmdCx0LjQtNGW0qMg0YHQvtGA0YMg0LbTmdC90LUg0LbSsdGC0YMg0LzQtdGF0LDQvdC40LfQvNGWINGC0YPQsCDQsdGW0YLQutC10L0g0YjQsNGA0YLRgtGLINGA0LXRhNC70LXQutGB0YLQtdGA0ZbQvdGW0qMg0LHRltGA0ZYg0LHQvtC70YvQvyDRgtCw0LHRi9C70LDQtNGLLiDQltCw0qPQsCDRgtGD0pPQsNC9INGB05nQsdC40LvQtdGA0LTQtdCz0ZYg0LDRg9GL0Lcg0pvRg9GL0YHRi9C90YvQvSDSm9Kx0YDQu9GL0LzQtNGL0psg0LXRgNC10LrRiNC10LvRltCz0ZYsINC+0L3RiyDQtdC80ZbQt9GDINCx0LDRgNGL0YHRi9C90LTQsCDQsNGD0YvQtyDSm9GD0YvRgdGL0L3Ri9C9INGC0YvSk9GL0LfQtNCw0LvRg9GL0LzQtdC9INGB0LjQv9Cw0YLRgtCw0LvQsNC00YsuINCR0rHQuyDRgtGW0LvQtNGW0qMsINCw0YPRi9C30LTRi9KjINGC06nQsdC10YHRltC90LUg0LLQsNC60YPQvNC00YvSmyDRgtGL0pPRi9C30LTQsNKT0YvRiCDQttCw0YHQsNGD0YvQvNC10L0g0LrTqdGA0ZbQvdGW0YEg0LHQtdGA0LXQtNGWLiDQktCw0LrRg9C80LTRi9KbINGC0YvSk9GL0LfQtNCw0LvRg9C00Ysg0LbQsNGB0LDRg9KT0LAg0YHTmdCx0LjQs9C1INGC0ZbQu9GW0L3RltKjINC20L7Sk9Cw0YDRiyDQvtGA0L3QsNC70LDRgdGD0Ysg0LbTmdC90LUg0YLRltC7INC80LXQvSDSm9Cw0YLRgtGLINGC0LDSo9C00LDQuSDQsNGA0LDRgdGL0L3QtNCwINGC0YvSk9GL0Lcg0YLRi9KT0YvQt9C00LDSk9GL0Ygg0pvQsNC70YvQv9GC0LDRgdGC0YvRgNGDINKb0LDQsdGW0LvQtdGC0ZYg0LrTqdC80LXQutGC0LXRgdC10LTRli4g0JHSsdC7INC80LXRhdCw0L3QuNC30Lwg0YHTmdCx0LjQs9C1INC10LzRiNC10Log0YHSr9GC0ZbQvdC10L0g0YHSr9GCINCw0LvRg9KT0LAg0LrTqdC80LXQuiDQsdC10YDQtdC00ZYg0LbTmdC90LUg0L7QvdGL0L0g0LDSk9GL0L8g0LrQtdGC0L/QtdC5LCDRgdC+0L3Ri9C80LXQvSDSm9Cw0YLRgtCw0YAg0YHQvtGA0pPRi9GI0YLRi9KbINKb0LDQsdGW0LvQtdGC0ZbQvSDQttC+0pPQsNC70YLQv9Cw0Lkg0YHSr9GC0YLRltKjINC905nRgNC10YHRgtC10LPQtSDRgtC40ZbQvNC00ZYg0LHQsNGA0YvQvywg0LbSsdGC0YvQu9GD0YvQvdCwINC606nQvNC10Log0LHQtdGA0LXQtNGWLiDQkNGD0YvQt9C00YvQvSDQstCw0LrRg9C80LTRi9KbINGC0YvSk9GL0LfQtNCw0LvRg9GLINC905nRgNC10YHRgtC10LPQtSDRgtC40ZbQvNC00ZYg0YLQsNC80LDSm9GC0LDQvdGD0pPQsCDQttOZ0L3QtdC00LUg0LXQvNGDINCx0LDRgNGL0YHRi9C90LTQsCDRgtKx0L3RiNGL0pvQv9Cw0LksINCw0YPQsNC90Ysg0YLQuNGW0LzQtNGWINGI0YvSk9Cw0YDRgyDQvNC10L0g0LDQu9GD0pPQsCDQtNCwINC606nQvNC10Log0LHQtdGA0LXQtNGWLiDQkdCw0LvQsNC9INC10LzRgyDQsdCw0YDRi9GB0YvQvdC00LAg0LDQvdCw0LTQsCwg0LHQsNC70LDQtNCwINGL0L3Sk9Cw0LnQu9GLINKb0LDQu9GL0L/RgtCwLCDRgdC+0L3Ri9C80LXQvSDSm9Cw0YLRgtCw0YAg0YLRi9C90YvRiCDQutKv0LnQtNC1INCx0L7Qu9GD0Ysg0pvQsNC20LXRgi4g0JDQvdCw0pPQsCDQutC10qPQtdGBINGA0LXRgtGW0L3QtNC1INCx0LDQu9Cw0L3Ri9C9INCw0YPRi9C3INKb0YPRi9GB0YvQvdCwINC00rHRgNGL0YEg0YHQsNC70YPQtNGLINC205nQvdC10LTQtSDQs9C40LPQuNC10L3QsNC70YvSmyDRiNCw0YDQsNC70LDRgNC00Ysg0rHRgdGC0LDQvdGD0LTRiyDSsdGB0YvQvdCw0LzRi9C3L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сұрақтардың жауабы толық ашылып жазылмаған. Сонымен қаттар ауыз қуысын үлкен тілдері толтырып тұрады- қате кеткен.Вуыз қуысының ерекшеліктері толық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915" table:style-name="ce1">
            <text:p>1066915</text:p>
          </table:table-cell>
          <table:table-cell office:value-type="string" table:style-name="ce1">
            <text:p>kazakh</text:p>
          </table:table-cell>
          <table:table-cell office:value-type="string" table:style-name="ce1">
            <text:p>Билет 5&amp;lt;br /&amp;gt; 1.Жүректің сопақша тесігінің анатомиялық жабылуы мерізімі?&amp;lt;br /&amp;gt; 2.Жана туған балаларда сору кезінде герметизациияны сақтап алатын ауыз қуысының ерекшеліктерің атаныз.&amp;lt;br /&amp;gt;</text:p>
          </table:table-cell>
          <table:table-cell office:value-type="string" table:style-name="ce1">
            <text:p>MSDQltKv0YDQtdC60YLRltKjINGB0L7Qv9Cw0pvRiNCwINGC0LXRgdGW0LPRliAyINC20q/RgNC10LrRiNC1INCw0YDQsNGB0YvQvdC00LAg0L7RgNC90LDQu9Cw0YHQsNGC0YvQvSDRgtC10YHRltC6LiDQkdKx0Lsg0pvSsdGA0YHQsNKb0ZbRiNGW0LvRltC6INC00LDQvNGDINC60LXQt9GW0L3QtNC1INKb0LDQvSDTqdC60L/QtdCz0LUg0pvQsNGA0LDQuSDQsdCw0YDQvNCw0LksIDIt0YjRliDQttKv0YDQtdC60YjQtSDQsNGA0psuINCw0L7RgNGC0LDSk9CwINCx0LDRgNCw0LTRiy4g0J7QuyDRgtGD0pPQsNC9INGB0L7SoyDTqdC60L/QtSDRgtGL0L3Ri9GBINCw0LvRg9KT0LAg0pvQsNGC0YvRgdGL0L8sINGB0L7QuyDQttKv0YDQtdC60YjQtdC00LXQs9GWINKb0YvRgdGL0Lwg0L7SoyDQttKv0YDQtdC60YjQtdC00LXQvSDQttC+0pPQsNGA0Ysg0LHQvtC70LDQtNGLLCDQutC70LDQv9Cw0L0g0LbQsNCx0YvQu9Cw0LTRiy4g0JrQu9Cw0L/QsNC9INCw0LvSk9Cw0YjSm9GLINC20LDQsdGL0LvRg9GLIDI0LTQ4INGB0LDSk9Cw0YLRgtCwINC20q/RgNC10LTRli4gINCe0Lsg0YTQuNCx0YDQvtC30LTQsNC90YvQvyDQsdGW0YLQtdC70ZbQvywgMy02INCw0Lkg0ZbRiNGW0L3QtNC1INGC0L7Qu9GL0psg0LbQsNCx0YvQu9Cw0LTRiy4g0KHQvtC00LDQvSDRgdC+0qMg0YHQvtC/0LDSm9GI0LAg0L7QudGL0pvSm9CwINCw0LnQvdCw0LvQsNC00YsuINCR0ZbRgNCw0psg0LrQtdC50LHRltGAINC20LDSk9C00LDQudC00LAg0L7QuyDRgtC+0LvRi9KbINC20LDQsdGL0LvQvNCw0Lkg0L/QsNGC0LXQvdGC0YLRliDRgdC+0L/QsNKb0YjQsCDRgtC10YHRltC6INCx0L7Qu9GL0L8g0pvQsNC70LDQtNGLLiDQntC7INCw0YPRgdC60YPQu9GM0YLQsNGG0LjRj9C00LAg0YjRg9C70LDRgNC00YvSoyDQsdC+0LvRg9GL0LzQtdC9INC205nQvdC1INC60LXQudCx0ZbRgCDQttKv0YDQtdC6INCw0pvQsNGD0YvQvNC10L0g0YHQuNC/0LDRgtGC0LDQu9Cw0LTRiy4g0JzRi9GB0LDQu9GLINKb0LDQvdC90YvSoyDQsNGA0LDQu9Cw0YHRg9GL0L3QsCDTmdC60LXQu9C10LTRli4g0J7QuyDQutC10LnQsdGW0YAg0LbQsNKT0LTQsNC50LTQsCDRgdC40LzQv9GC0L7QvNGB0YvQtyDTqdGC0LXQtNGWLCDQtNC10LPQtdC90LzQtdC9INC+0L3RiyDQsdCw0pvRi9C70LDRgyDQutC10YDQtdC6LjxiciAvPg0KMiDQldGA0ZbQvSDQsdKx0LvRiNGL0psg0LXRgtGC0LXRgNGWINC20LDSm9GB0Ysg0LTQsNC80YvSk9Cw0L0sINC10YDRltC90LTQtdGAINGB0q/RgiDQsdC10LfRltC90LUg0YLRi9KT0YvQtyDQttCw0LHRi9GB0LAg0LvQsNC00YssINCz0LXRgNC80LXRgtC40LfQsNGG0LjRjyDSm9Cw0LzRgtCw0LzQsNGB0YvQtyDQtdGC0LXQtNGWLCDRgdKv0YIg0LDSk9GL0L8g0LrQtdGC0L/QtdC50LTRliwg0LDRg9CwINC60ZbRgNC80LXQudC00ZYuINCR0LjRiCDQtNC10L3QtdGB0ZYg0LbQsNKb0YHRiyDQtNCw0LzRi9KT0LDQvSwg0L7QuyDRgdKv0YLRgtGWINGW0YjQutC1INC20LDSm9GB0Ysg0YLQsNGA0YLRgyDSr9GI0ZbQvSDSm9GL0L/QsNC7INC20LDRgdCw0LnQtNGLLiDQltOZ0L3QtSDQtNC1INKb0YvQt9GL0Lsg0LjQtdC6INCx0LDQu9Cw0LvQsNGA0LTQsCDRgtGW0YEg0LHQvtC70LzQsNKT0LDQvdC00YvSm9GC0LDQvSwg0L7Qu9Cw0YAg0LDQvdCwINC10LzRiNC10LPRltC9INKb0LDRgtGC0Ysg0rHRgdGC0LDQudC00YsuINCi0ZbQuyDQtdC80ZbQt9GW0LrRgtGWINC90LXQvNC10YHQtSDQtdC80YjQtdC60YLRliDQttC+0pPQsNGA0Ysg0YLQsNKj0LTQsNC50pPQsCDQsdCw0YHRi9C/INGC0rHRgNCw0LTRiywg0LHSsdC7INC00LAg0LDRg9GL0Lcg0ZbRiNGW0L3QtNC1INKb0YvRgdGL0LzQtNGLINKx0YHRgtCw0L8g0YLSsdGA0YvQvyA8YnIgLz4NCiDQs9C10YDQvNC10YLQuNC30LDRhtC40Y/Qu9GL0psg0pvRi9C30LzQtdGCINCx0LXRgNC10LTRli4g0J3QtdCz0ZbQt9GW0L3QtNC1INC905nRgNC10YHRgtC10LvQtdGA0LTQtSDRgdC+0YDRgyDRgNC10YTQu9C10LrRgdGWINC20LDSm9GB0Ysg0LTQsNC80YvQvNCw0pPQsNC9INCx0ZbRgNCw0psg0LXRgNGW0L0sINKb0YvQt9GL0Lsg0LjQtdC6LCDRgtGW0Lsg0LbTmdC90LUg0LbSsdC80YHQsNKbINGC0LDSo9C00LDQuSDQutOp0LzQtdCz0ZbQvNC10L0g0LbQsNKb0YHRiyDQs9C10YDQvNC10YLQuNC30LDRhtC40Y8g0LHQvtC70LDQtNGLLiAg0JDQuyDRgtGW0YHRgtC10YAg0YjRi9Kb0pvQsNC9INC80LXQt9C10YLRgtC1INCx0LDQu9Cw0LTQsCDRgdC+0YDRgyDQv9GA0L7RhtC10YHRliDRgtKx0YDQsNKb0YLQsNC90LTRiy4g0J7QtNCw0L0g0LHQsNGB0pvQsCDQvtC7INC/0L7Qt9CwINCx0LDQu9Cw0LvQsNGA0LTRiyDQsNGB0pvQsNC30LDQvSDQutOp0LvQtNC10L3QtdKjINC+0YDQvdCw0LvQsNGB0LDQtNGLLCDQvtC00LDQvSDQsdCw0YHSm9CwINCx0LDQu9Cw0pPQsCDQvtKT0LDQvSDRgdC+0YDRg9KT0LAg0YvSo9KT0LDQudC70Ysg0L/QvtC30LAg0LrQtdGA0LXQui4g0JXQs9C10YAg0L/QvtC30LAg0LTSsdGA0YvRgSDQsdC+0LvQvNCw0YHQsCDQvtC7INGB0q/RgtGC0ZbSoyDQsNKT0YPRi9C90LAg05nQutC10LvQtdC00ZYsINC205nQvdC1INC00LUg0YHSr9GC0YLRltKjINCw0YHSm9Cw0LfQsNC90L3QsNC9INKb0LDQudGC0LDQtNCw0L0g0YjRi9KT0YPRi9C90LAg05nQutC10LvRg9GWINC80q/QvNC60ZbQvS4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сұрақтардың жауабы толық ашылып жазылмаған. Сонымен қаттар ауыз қуысын үлкен тілдері толтырып тұрады- қате кеткен.Вуыз қуысының ерекшеліктері толық жазылмаған</text:p>
          </table:table-cell>
          <table:table-cell office:value-type="float" office:value="0" table:style-name="ce1">
            <text:p>0</text:p>
          </table:table-cell>
          <table:table-cell table:number-columns-repeated="16376"/>
        </table:table-row>
        <table:table-row table:style-name="ro1">
          <table:table-cell office:value-type="float" office:value="1067090" table:style-name="ce1">
            <text:p>1067090</text:p>
          </table:table-cell>
          <table:table-cell office:value-type="string" table:style-name="ce1">
            <text:p>kazakh</text:p>
          </table:table-cell>
          <table:table-cell office:value-type="string" table:style-name="ce1">
            <text:p>Билет 5&amp;lt;br /&amp;gt; 1.Жүректің сопақша тесігінің анатомиялық жабылуы мерізімі?&amp;lt;br /&amp;gt; 2.Жана туған балаларда сору кезінде герметизациияны сақтап алатын ауыз қуысының ерекшеліктерің атаныз.&amp;lt;br /&amp;gt;</text:p>
          </table:table-cell>
          <table:table-cell office:value-type="string" table:style-name="ce1">
            <text:p>MSnQodC+0L/QsNKb0YjQsCDRgtC10YHRltC6IChmb3JhbWVuIG92YWxlKSDQsdKx0Lsg0LHQsNC70LDQu9Cw0YDQtNCwINC20q/RgNC10LrRgtGW0qMg0YLRg9CwINCx0ZbRgtC60LXQvSDQsNKb0LDRg9C70LDRgNGL0L3Ri9KjINCx0ZbRgNGWINCx0L7Qu9GL0L8g0YLQsNCx0YvQu9Cw0LTRiywg0Y/Sk9C90Lgg0LHSsdC7INC+0qMg0LbQsNKbINC20q/RgNC10LrRiNC10LTQtdC9INKb0LDQvdC00Ysg0YHQvtC7INC20LDSmyDQttKv0YDQtdC60YjQtdCz0LUg06nQuiDQsdKx0Lsg0rHRgNGL0pvRgtCwINC20q/RgNC10LrRiNC10LvQtdGAINCw0YDQsNGB0YvQvdC00LAg0L7RgNC90LDQu9Cw0YHSm9Cw0L0g0LHQvtC70YvQvyDRgtCw0LHRi9C70LDQtNGLINC205nQvdC1INCx0rHQuyDRgtC10YHRltC6INC80YvQvdCw0YMg0L7RgtGC0LXQs9GW0LPQtSDQsdCw0LksINKb0LDQvdGL0pvSm9Cw0L0g0pvQsNC90LTRiyDQv9C70LDRhtC10L3RgtCw0YDQu9GL0psg0LDQudC90LDQu9GL0LzQvdCw0L0g0LDQudC90LDQu9GL0L8g06nRgtC60ZbQt9GD0LPQtSDQutOp0LzQtdC60YLQtdGB0LXQtdGC0ZbQvSDQsdC+0LvRi9C/INGC0LDQsdGL0LvQsNC00YsuINKa0LDQu9GL0L/RgtGLINC00LAg0Y/Sk9C90Lgg06nQutC/0LUg0LbSsdC80YvRgdGLINGC0YPRi9C70pPQsNC90L3QsNC9INGB0L7SoyDQsdCw0YHRgtCw0L8g06nQtyDRhNGD0L3QutGG0LjQvtC90LDQu9C00YvSmyDSm9GL0LfQvNC10YLRltC90LUg0YHTmdC50LrQtdGBINC20LXRgtGW0LvRltC/LCDQtNCw0LzRi9C/INCx0LDRgdGC0LDRgyDQutC10LfRltC90LTQtSDQsdKx0LsgZm9yYW1lbiBvdmFsZSDRgtC+0LvRi9KbINC20LDQsdGL0LvRg9GLINKb0LDQttC10YIsINCw0LvQsNC50LTQsCDQutC10LnQsdGW0YAg0LbQsNKT0LTQsNC50LvQsNGA0LTRiyDQsNC70YvQvyDSm9Cw0YDQsNC50YLRi9C9INCx0L7Qu9GB0LDSmyDQsdKx0Lsg0YHQvtC/0LDSm9GI0LAg0YLQtdGB0ZbQuiDQttCw0LHRi9C70LzQsNC5INKb0LDQu9GD0Ysg0LzSr9C80LrRltC9INC90LXQvNC10YHQtSDQsNC90LDRgtC+0LzQuNGP0LvRi9KbINC20LDQsdGL0LvRg9GLINC60LXRiCDRgdCw0YLRi9KT0LAg0rHQu9Cw0YHRi9C/INC60LXRiNGW0YDQtdC6INC20LDQsdGL0LvRg9GLINCx0LDQudKb0LDQu9GD0Ysg0LzSr9C80LrRltC9LCDQsdKx0L3QtNCw0Lkg0pvSsdGA0YvQu9GL0LzQtNGL0psg06nQt9Cz0LXRgNGW0YHRgtC1INGB0L7Qv9Cw0pvRiNCwINGC0LXRgdGW0Log06nQtyDQsNGC0LDRg9GL0L0g06nQt9Cz0LXRgNGC0LXQtNGWINGP0pPQvdC4IFBGTyDQtNC10L8g0LDRgtCw0LvQsNC00YssINCx0rHQuyDQv9Cw0YLQtdC90YLRgtC10LvQvNC10LPQtdC9INC00LXQs9C10L0g0LzQsNKT0YvQvdCw0pPQsCDQuNC1LtCV0L3QtNGWINGB0L7Qv9Cw0pvRiNCwINGC0LXRgdGW0LrRgtGW0qMg0pvQsNC70YvQv9GC0YvQtNCwLCDQsdCw0LvQsCDQtNKv0L3QuNC10LPQtSDQutC10LvQs9C10L3QvdC10L0g0YHQvtKjINC20LDRgNGC0Ysg0LbRi9C70LTQsCjQsNC70YLRiyDQsNC5KSDQvdC10LzQtdGB0LUg0LHRltGAINC20LDRgdGL0L3QtNCwINGC0L7Qu9GL0psg0LbQsNCx0YvQu9GD0Ysg0pvQsNC20LXRgi7QodC+0L3QtNGL0pvRgtCw0L0g0LTQsCDQsdCw0LvQsNC90YvSoyDQsNGC0LAt0LDQvdCw0LvQsNGA0Ysg0q/RiNGW0L0g0LHQsNC70LDQvdGL0qMg0LHQsNGB0YLQsNC/0pvRiyDTqdGB0YMg0LrQtdC30LXSo9GW0L3QtNC1INCx0rHQuyDRgtC10YHRltC60YLRltKjINC20LDQsdGL0LvQvNCw0YPRiyDQsNC90LDRgtC+0LzQuNGP0LvRi9KbLdGE0LjQt9C40L7QvtC70L7Qs9C40Y/Qu9GL0psg0YLSsdGA0pPRi9C00LDQvSDSm9Cw0LvRi9C/0YLRiyDQsdC+0LvRi9C/INGC0LDQsdGL0LvQsNC00YssINGP0pPQvdC4INCx0rHQuyDRgtC10YHRltC60YLRltKjINC00LjRhNGE0LXRgNC10L3RhtC40YDQvtCy0LrQsNGB0YssINC20LDQsdGL0LvRg9GLINCw0LvRgtGLINCw0Lkg0LzQtdC9INCx0ZbRgCDQttGL0Lsg0ZbRiNGW0L3QtNC1INCx0LDSm9GL0LvQsNGDINKb0LDQttC10YIuINCV0LPQtdGA0LTQtSwg0LHSsdC7INGB0L7Qv9Cw0pvRiNCwINGC0LXRgdGW0LrRgtGW0qMg0LbQsNCx0YvQu9GD0YvQvdC00LAg06nQt9Cz0LXRgNGW0YHRgtC10YAg0LHQvtC70YHQsCwg0LrQsNGA0LTQuNC+0LvQvtCz0YLRi9KjINC60LXSo9C10YHRltC90LUg0LbSr9Cz0ZbQvdC1INC+0YLRi9GA0YvQvyDQtdC80LTRltC6INGI0LDRgNCw0LvQsNGA0LTRiyDSm9Cw0YDQsNGB0YLRi9GA0YPSk9CwINCx0L7Qu9Cw0LTRiywg0LHRltGA0LDSmyDQutOp0L8g0LbQsNKT0LTQsNC50LTQsCDQsdKx0Lsg0YHQvtC/0LDSm9GI0LAg0YLQtdGB0ZbQuiDQttCw0LHRi9C70LDQtNGLLiDQkdKx0Lsg0YHQvtC/0LDSm9GI0LAg0YLQtdGB0ZbQutGC0ZbSoyDQttCw0LHRi9C70LzQsNGD0Ysg0LHQsNC70LAg0LDSk9C30LDRgdGL0L3QtNCwINKb0LDQvdC00LDQuSDQv9Cw0YLQvtC70L7Qs9C40Y/Qu9GL0psg06nQt9Cz0LXRgNGW0YHRgtC10YDQs9C1INOZ0LrQtdC70YPRliDQvNKv0LzQutGW0L0/LNC80YvRgdCw0LvRizog0LXQvdC00ZYgZm9yYW1lbiBvdmFsZSDQsNGA0pvRi9C70Ysg0rHRgdCw0psg0L3QtdC80LXRgdC1INOZ0YDRgtKv0YDQu9GWINC606nQu9C10LzQtNC10LPRliDSm9Cw0L0g0rHQudGL0L3QtNGL0LvQsNGA0Ysg06nRgtGW0L8g0LrQtdGC0YPRliDQvNKv0LzQutGW0L0sINCx0rHQuyDTqdC3INC60LXQt9C10LPRltC90LTQtSDRgdC+0Lsg0LbQtdGA0LPRltC70ZbQutGC0ZYg0YLRltC90LTQtdGA0LTRltKjINC40YjQtdC80LjRj9GB0YvQvdCwINC+0YLRgtC10LrQv9C10L0g0pvQsNC90YvSk9GDLNKb0LDQvNGC0LDQvNCw0YHRi9C3INC10YLRltC70YMg0LTQtdKj0LPQtdC50ZbQvSDQtdC005nRg9GW0YAg0YLTqdC80LXQvdC00LXRgtC10LTRliDQvdOZ0YLQuNC20LXRgdGW0L3QtNC1INGC0ZbQvdC00ZbQuiDQs9C40L/QvtC60YHQuNGPINCx0L7Qu9GD0Ysg0LzSr9C80LrRltC9LtCh0L7Qv9Cw0pvRiNCwINGC0LXRgdGW0LrRgtGW0qMg0LbQsNCx0YvQu9C80LDRg9GLINGC0LXQuiDQsNKT0LfQsNC70YvSmyDQtNC10qPQs9C10LnQtNC1INKT0LDQvdCwINC10LzQtdGBINCx0LDRgdKb0LAg0LTQsCDSm9Kx0YDRi9C70YvQvNC00YvSmyDTqdC30LPQtdGA0ZbRgdGC0LXRgNCz0LUg05nRgdC10YDRltC9INGC0LjQs9GW0LfRg9GWINC80q/QvNC60ZbQvSwg0LzRi9GB0LDQu9GLOiA8YnIgLz4NCtCx0LDQu9Cw0L3Ri9KjINCw0LvSk9Cw0YjSm9GLINOp0LzRltGAINC60LXQt9C10qPQtNC10YDRltC90LTQtSDQsdGW0YAt0LHRltGA0ZbQvNC10L0g0LHQsNC50LvQsNC90YvRgdGLINCx0LDRgCBzaW51cyBhcnRlcmlvc3VtINC80LXQvSBzaW51cyB2ZW5vc3VzINKb0LAg0YTRg9C90LrRhtC40L7QvdCw0LvQtNGL0psg0YLSr9GA0LTQtSDQutC10YDRliDTmdGB0LXRgNGW0L0g0LHQtdGA0YPRliDQvNKv0LzQutGW0L0sINC90LDSm9GC0YvRgNCw0psg0YbQuNGA0LrRg9C70Y/RhtC40Y8g0LHSsdC30YvQu9GL0YHRiy4yKdCW0LDSo9CwINGC0YPSk9Cw0L0g0LHQsNC70LDQu9Cw0YDQtNCw0pPRiyDQsNGD0YvQtyDSm9GD0YvRgdGL0L3Ri9KjINCw0L3QsNGC0L7QvNC40Y/Qu9GL0pst0YTQuNC30LjQvtC70L7Qs9C40Y/Qu9GL0psg0YLSsdGA0pPRi9C00LDQvSDQsdGW0YDSm9Cw0YLQsNGAINC10YDQtdC60YjQtdC70ZbQutGC0LXRgNGW0L0g0LDQudGC0YvQvyDRiNGL0pPRg9GL0LzRi9C30pPQsCDQsdC+0LvQsNC00YsuINCQ0LvQtNGL0LzQtdC9INCw0YPRi9C3INKb0YPRi9GB0YssINC20LDSo9CwINGC0YPSk9Cw0L0g0LHQsNC70LDQu9Cw0YDQtNCwINCw0YPRi9C3INKb0YPRi9GB0Ysg0LrTqdC70LXQvNGWINC20LDSk9GL0L3QsNC9INGC0LDRgCwg0LrRltGI0LrQtdC90YLQsNC5INCx0L7Qu9GL0L8g0LrQtdC70LXQtNGWLCDQsdKx0Lsg06nQtyDQutC10LfQtdCz0ZbQvdC00LUg0YLRltC70LPQtSDTmdGB0LXRgNGWINCx0LDRgCDRj9KT0L3QuCDRgtGW0LvRliDQsdCw0LvQsNC90YvSoyDQttCw0LvQv9Cw0psg0LbTmdC90LUg0LDRg9GL0Lcg0pvRg9GL0YHRi9C90YvSoyDQutOp0LvQtdC80ZbQvSDQvNGL0L3QsNGDINGC0L7Qu9GL0pPRi9C80LXQvSDQtNC10YDQu9GW0Log0LDQu9GL0L8g0LbQsNGC0LDQtNGLINC00LXRgdC10Log0LHQvtC70LDQtNGLLiDQotGW0YEg0LXRgNC10LrRiNC10LvRltC60YLQtdGA0ZbQvdC1INC60LXQu9C10YLRltC9INCx0L7Qu9GB0LDSmywg05nQt9GW0YDQs9C1IDMg0LDQudKT0LAg0LTQtdC50ZbQvSDQsdCw0LvQsNC70LDRgNC00LAg0YLRltGB0YLRltKjINOp0YHRg9GWINCx0LDQudKb0LDQu9C80LDQudC00YssINGP0pPQvdC4INGC0ZbRgdGW0L3RltKjINCx0L7Qu9C80LDRg9GLINCx0LDQu9CwINCw0L3QsCDRgdKv0YLRltC9INC10LzQs9C10L0g0LrQtdC30LTQtSDQtdC80YjQtdC6INGB0q/RgtGW0L3RltKjINC20LDRgNCw0pvQsNGC0YLQsNC90YPRi9C9LCDQsNC90LDRgdGL0L3QsCDQtNC10LPQtdC9INCw0YPRi9GA0YHRi9C90YMg0YHQtdC30ZbQvNGW0L0g0YLRg9C00YvRgNC80LDQudC00YssINCx0rHQuyDQtNCwINCx0ZbRgCDQtdGA0LXQutGI0LXQu9GW0Lou0JHQsNC70LDQvdGL0qMg0LDRg9GL0Lcg0pvRg9GL0YHRiyDSm9Kx0YDSk9Cw0psg0LHQvtC70YPRiyDQvNKv0LzQutGW0L0sINGP0pPQvdC4INOZ0LfRltGA0LPQtSDRgdGW0LvQtdC60LXQuSDQsdC10LfQtNC10YDQtNGW0qMg0LHQtdC70YHQtdC90LTRltC70ZbQs9GWINGC06nQvNC10L0sINC60LXQudGW0L0g0LHQsNC70LDQtNCw0pPRiyDRgdGW0LvQtdC60LXQuSDQsdC10LfQtNC10YDQtNGW0qMg0LHQtdC70YHQtdC90LTRltCz0ZYg0LXQtNOZ0YPRltGAINC20L7Sk9Cw0YDRi9C70LDQudC00YssINGC0ZbQv9GC0ZYg0YHRltC70LXQutC10Lkg0LDRg9GL0Lcg0pvRg9GL0YHRi9C90LDQvSDRgdGL0YDRgtKb0LAg0pvQsNGA0LDQuSDQsNKT0YvQvywg0Y/Sk9C90Lgg0LHTqdC70ZbQvdGW0L8g0YjRi9KT0YvQvyDQutC10YLQtSDQsdC10YDQtdC00ZYuINCW05nQvdC1INKb0LDRgtGC0Ysg0YLQsNKj0LTQsNC5INC80LXQvSDQttKx0LzRgdCw0psg0YLQsNKj0LTQsNC5INCw0LvRjNCy0LXQvtC70Y/RgNC70Ysg06nRgdGW0L3QtNGW0LvQtdGAINOZ0LvRliDRgtC+0LvRi9KbINC20LXRgtGW0LvQvNC10LPQtdC9LiDQotCw0qPQtNCw0Lkg0L/RltGI0ZbQvdGWINC00L7Sk9Cw0Lsg0YLTmdGA0ZbQt9C00LXRgS4g0JbTmdC90LUg0LXSoyDQsdCw0YHRgtGL0YHRiyDSsdGA0YLRgtGL0qMg0ZbRiNC60ZYg0LHQtdGC0ZbQvdC00LUg0L7RgNC90LDQu9Cw0YHSm9Cw0L0g0JHQuNGIYSDQttCw0YHRgtGL0pvRiNCw0LvQsNGA0Ysg0L7RgdGLINC20LDSo9CwINGC0YPSk9Cw0L0g0LHQsNC70LDQu9Cw0YDQtNCwINC10LzRiNC10LrRgtGWINGB0L7RgNGDINC60LXQt9GW0L3QtNC1INGC0ZbQu9Cz0LUg0pvQvtGB0YvQvNGI0LAg0LrTqdC80LXQuiDQsdC10YDQtdC00ZYsINCx0rHQuyDQutC10LfQtNC1INCx0LDQu9CwINGC0ZbQu9GW0L0g0YLTqdC80LXQvSDQttOZ0L3QtSDQsNGA0YLSm9CwINGC0LDRgNGC0YMg0LDRgNKb0YvQu9GLINCw0YPRi9C3INKb0YPRi9GB0YvQvdC00LAg0YLQtdGA0ZbRgSDSm9GL0YHRi9C80LTRiyDQttCw0YHQsNGD0pPQsCDQutOp0LzQtdC60YLQtdGB0LXQtNGWLCDQsNC7INCx0rHQuyDQsNC90LAg0YHSr9GC0ZbQvdGW0qMg0LHQsNC70LDQvdGL0qMg0LDRg9GL0Lcg0pvRg9GL0YHRi9C90LAg0pvQsNGA0LDQuSDTqdGC0YPRltC90LUg0LbQsNKb0YHRiyDQttCw0pPQtNCw0LnQtNGLINGC0YPQtNGL0YDQsNC00YsuINCR0rHQuyDQkdC40YjQsCDQttCw0YHRgtGL0pvRiNCw0LvQsNGA0YvQvdGL0qMg0YTQuNC30LjQvtC70L7Qs9C40Y/Qu9GL0psg0pvQsNC70YvQv9GC0Ysg0pvRi9C30LzQtdGC0ZYg0LHQvtC70YvQvyDRgtCw0LHRi9C70LDQtNGLICjRj9KT0L3QuCDSsdGA0YIg0LrTqdC70LXQvNGW0L3QvSDRgdCw0pvRgtCw0LnQtNGLLCDRgtGW0LvQs9C1INC00LUg06nQtyDTmdGB0LXRgNGWINCx0LDRgCku0JXSoyDQsdCw0YHRi9C90LTQsCDQsNC50YLRi9C70YvQvyDQutC10YLQutC10L0g0LDRg9GL0Lcg0pvRg9GL0YHRi9C90YvSoyDRgtCw0YAg0LHQvtC70YMg0LXRgNC10LrRiNC10LvRltCz0ZYg0LTQtSwg0LHQsNC70LDQvdGL0qMg0L7RgdGLINC10LzRiNC10Log0rHRiNGL0L0g0LDRg9GL0LfRi9C80LXQvSDQttCw0pvRgdGLINKx0YHRgtCw0YPRi9C90LAsINC+0L3Ri9KjINC90YvSmyDQvtGA0L3QsNC70LDRgdGD0YvQvdCwINC205nQvdC1INGB0q/RgtGC0ZYg0LTSsdGA0YvRgSDQtdC80YPRltC90LUg0pvQvtC70LDQudC70Ysg0YvSm9C/0LDQuyDQttCw0YHQsNC50LTRiy4g0prQvtGA0YvRgtGL0L3QtNGL0LvQsNC50YLRi9C9INCx0L7Qu9GB0LDQvCwg0LDRgtCw0LvSk9Cw0L0g0LHSsdC7INCw0YPRi9C3INKb0YPRi9GB0YvQvdGL0qMg0LXRgNC10LrRiNC10LvRltC60YLQtdGA0ZYg0LbQsNKj0LAg0YLRg9KT0LDQvSDQsdCw0LvQsNC70LDRgNC00LAg0LDQvdCwINGB0q/RgtGW0LzQtdC9INKb0L7RgNC10LrRgtC10L3RgyDQutC10LfRltC90LTQtSDQvtKT0LDQvSDQvtKjINOZ0YHQtdGA0ZbQvSDQsdC10YDQtSDQvtGC0YvRgNGL0L8g0pvQvtC70LDQudC70Ysg0LbQsNKT0LTQsNC50LTRiyDRgtGD0pPRi9C30LDQtNGLLCDQvtGB0Ysg0LDRgNKb0YvQu9GLINCx0LDQu9Cw0L3Ri9KjINGE0LjQt9C40L7Qu9C+0LPQuNGP0LvRi9KbINGC0rHRgNKT0YvQtNCwINKb0LDQu9GL0L/RgtGLINC00LDQvNGD0YssINOp0YHRg9GWLCDQt9Cw0YIg0LDQu9C80LDRgdGDINC205nQvdC1INC80q/RiNC10LvQtdGA0LTRltKjINC00rHRgNGL0YEsINGC0L7Qu9GL0psg0LTQsNC80YPRi9C90LAg0LTQsCDSm9C+0YHRi9C80YjQsCDQttCw0pPQtNCw0Lkg0LbQsNGB0LDQuSDQsNC70LDQvNGL0LcuINCv0pPQvdC4LCDQsNGD0YvQtyDSm9GD0YvRgdGL0L3Ri9KjINCx0rHQuyDQtdGA0LXQutGI0LXQu9GW0LrRgtC10YDRliDQsdGW0YAt0LHRltGA0ZbQvNC10L0g06nRgtC1INGC0YvSk9GL0Lcg0LHQsNC50LvQsNC90YvRgdGC0LAg0LHQvtC70LDQtNGL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92" table:style-name="ce1">
            <text:p>915292</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4g0J7QstCw0LvRjNC90L7QtSDQvtGC0LLQtdGA0YHRgtC40LUg0YDQsNC30LzQtdGA0Ysg0L7RgiA10LzQvCDQstGB0YLRgNC10YfQsNGO0YLRjNGPINC00L4gMTnQvNC8INC90LDRhdC+0LTQuNGC0YHRjyDQvNC10LbQtNGDINC/0YDQsNCy0L7QvCDQuCDQu9C10LLQvtC8INC/0YDQtdC00YHQtdGA0LTQuNC10Lwg0Y/QstC70Y/QtdGC0YHRjyDQuNC3IDIg0YjRg9C90YLQvtCyINC90LAg0YDQsNCy0L3QtdC1INGBINCx0LDRgtC+0LvQvtCy0L7QvCDQv9GA0L7RgtC+0LrQvtC8INGE0YPQvdC60YbQuNGPINGP0LLQu9GP0LXRgtGB0Y8g0LLRi9Cx0YDQvtGBINC60YDQvtCy0Lgg0YfQtdGA0LXQtyDQv9GA0LDQstC+0LUg0L/RgNC10LTRgdC10YDQtNC40LUg0LIg0LvQtdCy0L7QuSDQvtCx0YXQvtC00Y8g0LzQsNC70YvQuSDQutGA0YPQsyDQutGA0L7QstC+0L7QsdGA0LDRidC10L3QuNC1LiDQl9Cw0LrRgNGL0YLQuNC1INC/0YDQvtC40YHRhdC+0LTQuNGC0Ywg0L/QvtGB0LvQtSDRgNC+0LbQtNC10L3QuNC1INCyINCy0L3Rg9GC0YDQuCDRg9GC0YDQvtCx0L3QsCDQvtCx0YDQsNC30YPQtdGC0YHRjyDQutC70LDQv9Cw0L0g0LvQtdCy0L7QvCDQv9GA0LXQtNGB0LXRgNC00LjQtSDQv9GA0Lgg0LIg0L/QtdGA0LLQvtC8INCy0LTQvtGF0LUg0YDQtdCx0LXQvdC60LAg0LIg0L3QsNGH0LjQvdCw0LXRgiDRgNCw0LHQvtGC0LDRgtGMINC80LDQu9GL0Lkg0LrRgNGD0LMg0LrRgNC+0LLQvtC+0LHRgNCw0YnQtdC90LjQtSDQtNCw0LLQu9C10L3QuNC1INC/0YDQtdC00YHQtdGA0LTQuNC5INGD0LLQtdC70LjRh9C40LLQsNC10YLRgdGPINC30LDQutGA0YvQstCw0Y8g0L7QsdGA0LDQt9C+0LLQsNCy0YjQuNC8INC60LvQsNC/0LDQvdC+0LwgLiDQl9Cw0LrRgNGL0YLQuNC1INC/0YDQvtC40YHRhdC+0LTQuNGC0Ywg0YEg0LzQvtC80LXQvdGC0LAg0YDQvtC20LTQtdC90LjQtSDQsiDQvdC+0YDQvNC1INC+0L3QsCDQtNC+0LvQttC90LAg0LfQsNC60YDRi9Cy0LDRgtGM0YHRjyA2LTkg0LzQtdGB0Y/RhtC1INC40L3QvtCz0LTQsCDQvtC90LAg0LfQsNC60YDRi9Cy0LDQtdGC0YHRjyDQvdCwIDEyINC80LXRgdGP0YbQtSDQt9Cw0YDQsNGB0YLQsNGPINGB0L7QtdC00LjQvdC10YLQtdC70YzQvdGL0Lwg0YLQutCw0L3QuCAuINCV0YHRgtGMINC/0LDRgtC+0LvQvtCz0LjRh9C10YHQutC+0LUg0YHQvtGB0YLQvtGP0L3QuNC1INC60L7Qs9C00LAg0L7RgtCy0LXRgNGB0YLQuNC1INC90LUg0LfQsNC60YDRi9Cy0LXRgtGB0Y8g0L/RgNC40YfQuNC90L7QuSDQvNC+0LbQtdGCINCz0LXQvdC10YLQuNGH0LXRgdC60LjQuSDRhNCw0LrRgtC+0YAg0LjQu9C4INC90LUg0LTQsNC90L7RiNC90L7RgdGC0Ywg0YDQtdCx0LXQvdC60LAgLjxiciAvPg0KMi4g0KDQvtGC0L7QstCw0Y8g0L/QvtC70L7RgdGC0Ywg0YMg0LzQsNC70YvRiNC10Lkg0LjQvNC10LXRgtGMINC80LDQu9GL0Lkg0YDQsNC30LzQtdGAICDRhdC+0YDQvtGI0L4g0YDQsNC30LLQuNGC0LAg0YHQvtC10LTQuNC90LXRgtC10LvRjNC90LDRjyDRgtC60LDQvdGMINC4INC10LUg0LLQsNGB0LrRg9C70LjQt9Cw0YLRgdC40Y8g0LggINC60YDRg9Cz0L7QstCw0Y8g0LzRi9GI0YbQsCDRgNGC0LAgLCDRj9C30YvQuiDQsdC+0LvRjNGI0L7QuSDRhdC+0YDQvtGI0L4g0LLQsNGB0LrRg9C70LjQt9C40YDQvtCy0LDQvdC+INC40LzQtdGC0YzRgdGPINC80L3QvtCz0L4g0YHQvtGB0L7Rh9C60L7QsiAuINCl0L7RgNC+0YjQviDRgNCw0LfQstC40YLQsCDRidC10YfQvdGL0LUg0LzRi9GI0YbRiyDQuNC80LXRgtGM0YHRjyDQttC40YDQvtCy0YvQtSDQsdC70Y/RiNC60Lgg0JHQuNGI0LAgLiDQldGB0YLRjCAg0L/QvtC/0LXRgNC10YfQvdGL0LUg0LLQsNC70LjQutC4IC4g0J/RgNC+0YLQvtC60Lgg0YHQu9GO0L3Ri9GFINC20LXQu9C10Lcg0L/Qu9C+0YXQsCDRgNCw0LfQstC40YLRjCDQuNC3INC30LAg0Y3RgtC+0LPQviDQstGL0LTQtdC70Y/QtdGC0YzRgdGPINC80L3QvtCz0L4g0YHQu9GO0L3Riy4g0JIg0LDQutGC0LUg0YHQvtGB0LDQvdC40LUg0L/QvtC70L7RgdGC0Lgg0L7QsdGA0LDQt9GD0LXRgtGB0Y8g0L7RgtGA0LjRhtCw0YLQtdC70YzQvdCw0Y8g0LTQsNCy0LvQtdC90LjQtSDRgSDQv9C+0LzQvtGJ0YzRjiDQutGA0YPQs9C+0LLQvtC5INC80YvRidGG0Ysg0YDRgtCwINC4INC90LjQttC90Y/RjyAg0YfQtdC70Y7RgdGC0Ywg0L7RgtC+0LTQstC40LPQsNC10YLRgdGPINC90LDQt9Cw0LQg0L7QsdGA0LDQt9GD0Y8g0LPQtdGA0LzQtdGC0LjQt9Cw0YbQuNGOIC4gINCf0YDQuCDQttCw0LTQvdC+0LwgINGB0L7RgdCw0L3QuCDQvNC+0LbQtdGCINCx0YvRgtGMINC/0L7Qv9Cw0LTQsNC90LjQtSDQstC+0LfQtNGD0YXQsCDQuNC70Lgg0YHRgNGL0LPQsNCy0LDQvdC40LUg0Y3RgtC+INGP0LLQu9GP0LXRgtGB0Y8g0L3QvtGA0LzQvtC5I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6" table:style-name="ce1">
            <text:p>915326</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kg0JDQvdCw0YLQvtC80LjRh9C10YHQutC+0LUg0LfQsNC60YDRi9GC0LjQtSDQvtGC0LrRgNGL0YLQvtCz0L4g0L7QstCw0LvRjNC90L7Qs9C+INC+0LrQvdCwINC/0YDQvtC40YHRhdC+0LTQuNGCINCyIDMg0LzQtdGB0Y/RhtCwLiDQktGA0L7QttC00LXQvdC90YvQuSDQv9C+0YDQvtC6INC+0YLQutGA0YvRgtC+0LUg0L7QstCw0LvRjNC90L7QtSDQvtC60L3QviDQv9GA0LXQtNGB0YLQsNCy0LvRj9C10YIg0YHQvtCx0L7QuSDQvtGC0LLQtdGA0YHRgtC40LUg0LzQtdC20LTRgyDQv9GA0LXQtNGB0LXRgNC00LjRj9C80LguINCS0L4g0LLQvdGD0YLRgNC40YPRgtGA0L7QsdC90L7QvCDRgNCw0LfQstC40YLQuNC4INGA0Y/QtNC+0Lwg0YEg0L7QstCw0LvRjNC90YvQvCDQvtC60L3QvtC8INGE0L7RgNC80LjRgNGD0LXRgtGB0Y8g0LrQu9Cw0L/QsNC9LCDQutC+0YLQvtGA0YvQuSDQv9C+0YHQu9C1INGA0L7QttC00LXQvdC40Y8g0YHRgNCw0YHRgtCw0LXRgtGB0Y8g0YHQstC+0LjQvNC4INGB0YLQstC+0YDQutCw0LzQuCwg0YLQsNC60LjQvCDQvtCx0YDQsNC30L7QvCDQt9Cw0YDQsNGB0YLQsNC10YIg0L7QstCw0LvRjNC90L7QtSDQvtGC0LLQtdGA0YHRgtC40LUg0Lgg0YTQvtGA0LzQuNGA0YPQtdGC0YHRjyDQvNC10LbQv9GA0LXQtNGB0LXRgNC90LDRjyDQv9C10YDQtdCz0L7RgNC+0LTQutCwLCDRjdGC0L4g0L/RgNC+0LjRgdGF0L7QtNC40YIg0L/QvtGC0L7QvNGDINGH0YLQviDQuNC00LXRgiDQv9C10YDQtdGA0LDRgdC/0YDQtdC00LXQu9C10L3QuNC1INC60YDQvtCy0Lgg0LzQtdC20LTRgyDQv9GA0LXQtNGB0LXRgNC00LjRj9C80LgsINC60LDQuiDRgdC70LXQtNGB0YLQstC40LUg0L/QvtCy0YvRiNC10L3QuNC1INC00LDQstC70LXQvdC40Y8g0Lgg0L3QsNC70LjRh9C40LUg0L7QstCw0LvRjNC90L7Qs9C+INC+0LrQvdCwINGC0LXRgNGP0LXRgiDRhNGD0L3QutGG0LjQvtC90LDQu9GM0L3Ri9C5INGB0LzRi9GB0LsuINCk0L7RgNC80LAg0LLRgNC+0LbQtNC10L3QvdC+0LPQviDQv9C+0YDQvtC60LAg0L7RgtC60YDRi9GC0L7Qs9C+INC+0LLQsNC70YzQvdC+0LPQviDQvtC60L3QsCDRgdCy0Y/Qt9Cw0L3QsCDRgSDQvdC10LTQvtGA0LDQt9Cy0LjRgtC40LXQvCDQutC70LDQv9Cw0L3QsCDQstC+INCy0L3Rg9GC0YDQuNGD0YLRgNC+0LHQvdC+0Lwg0L/QtdGA0LjQvtC00LUsINC40Lct0LfQsCDRh9C10LPQviAg0L7RgdGC0LDQtdGC0YHRjyDQvtGC0LLQtdGA0YHRgtC40LUg0LIg0LzQtdC20L/RgNC10LTRgdC10YDQtNC90L7QuSDQv9C10YDQtdCz0L7RgNC+0LTQutC1LiAyKSDQk9C10YDQvNC10YLQuNC30LDRhtC40Lgg0LLQviDQstGA0LXQvNGPINCw0LrRgtCwINGB0L7RgdCw0L3QuNGPINGB0LLRj9C30LDQvdCwINGB0L4g0YHRgtGA0L7QtdC90LjQtdC8INC/0L7Qu9C+0YHRgtC4INC90L7QstC+0YDQvtC20LTQtdC90L3Ri9GFLiDQotC+0LvRgdGC0YvQtSDQs9GD0LHRiyDQsiDQstC40LTQtSDRhdC+0LHQvtGC0LAsINC+0YLRgdGD0YLRgdGC0LLQuNC1INC30YPQsdC+0LIsINC00LXRgdC90LXQstCw0Y8g0LzQtdC80LHRgNCw0L3QsCwg0LbQuNGA0L7QstGL0LUg0LrQvtC80LrQuCDQkdC40YjQsCwg0LLRi9GA0LDQttC10L3QvdGL0LUg0L3QtdCx0L3Ri9C1INC/0L7Qv9C10YDQtdGH0L3Ri9C1INGB0LrQu9Cw0LTQutC4IC0g0Y3RgtC4INC+0YHQvtCx0LXQvdC90L7RgdGC0Lgg0L7QsdC10YHQv9C10YfQuNCy0LDRjtGCINGE0LjQt9C40L7Qu9C+0LPQuNGH0LXRgdC60YPRjiDRgNC10YLRgNC+0LPQvdCw0L/QsNGC0LjRji4g0JLQviDQstGA0LXQvNGPINCw0LrRgtCwINGB0L7RgdCw0L3QuNGPINGA0LXQsdC10L3QvtC6INGB0LbQuNC80LDQtdGCINGH0LXQu9GO0YHRgtGP0LzQuCDRgdC+0YHQvtC6INCz0YDRg9C00Lgg0Lgg0LDRgNC10L7Qu9GDINC4INC+0LHRgNCw0LfRg9C10YLRgdGPINCz0LXRgNC80LXRgtC40LfQuNGA0L7QstCw0L3QvdCw0Y8g0L/QvtC70L7RgdGC0Ywg0YEg0L7RgtGA0LjRhtCw0YLQtdC70YzQvdGL0Lwg0LTQsNCy0LvQtdC90LjQtdC8LCDRh9GC0L4g0L7QsdC10YHQv9C10YfQuNCy0LDQtdGCINC/0L7RgdGC0YPQv9C70LXQvdC40LUg0LzQvtC70L7QutCwLiDQktC+INCy0YDQtdC80Y8g0LDQutGC0LAg0YHQvtGB0LDQvdC40Y8g0YfQtdC70Y7RgdGC0Ywg0LTQstC40LPQsNC10YLRgdGPINCy0L/QtdGA0LXQtCDQuCDQvdCw0LfQsNC0INC00L7QstC+0LvRjNC90L4g0LHRi9GB0YLRgNC+LCDRjdGC0L4g0LLQvtC30LzQvtC20L3QviDQsdC70LDQs9C+0LTQsNGA0Y8g0L7RgtGB0YPRgtGB0YLQstC40Y4g0YHRg9GB0YLQsNCy0L3QvtCz0L4g0LHRg9Cz0L7RgNC60LAg0L3QsCDQvdC40LbQvdC10Lkg0YfQtdC70Y7RgdGC0Lgu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2" table:style-name="ce1">
            <text:p>915352</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7QntCy0LDQu9GM0L3QvtC1INC+0LrQvdC+LdGN0YLQviDQvtGC0LLQtdGA0YHRgtCy0LjQtSzQutC+0YLQvtGA0L7QtSDQvdCw0YXQvtC00LjRgtGB0Y8g0LzQtdC20LTRgyDQv9GA0LXQtNGB0LXRgNC00LjRj9C80Lgs0LLQviDQstGA0LXQvNGPINCx0LXRgNC10LzQtdC90L3QvtGB0YLQuCDQvNCw0YLQtdGA0Lgg0L7QvdC+INC40LPRgNCw0LXRgiDRgNC+0LvRjCDQstC+INCy0L3Rg9GC0YDQuNGD0YLRgNC+0LHQvdC+0Lwg0LrRgNC+0LLQvtC+0LHRgNCw0YnQtdC90LjQuC7QndC+INC/0L7RgdC70LUg0YDQvtC20LTQtdC90LjRjyzRgtCw0Log0LrQsNC6INGB0LjRgdGC0LXQvNCwINC00YvRhdCw0L3QuNGPINC4INC60YDQvtC+0LHRgNCw0YnQtdC90LjRjyDRgyDQvdC+0LLQvtGA0L7QttC00LXQvdC90L7Qs9C+INC40LfQvNC10L3Rj9GO0YLRgdGPINC4INCw0LTQsNC/0YLQuNGA0YPRjtGC0YHRjyDQuiDQsNGC0LzQvtGB0YTQtdGA0L3QvtC80YMg0LTRi9GF0LDQvdC40Y4g0Lgg0LrRgNC+0LLQvtC+0LHRgNCw0YnQtdC90LjRjiDQstC+INCy0L3QtdGI0L3QtdC5INGB0YDQtdC00LUg0LIg0L3QvtGA0LzQtSDRjdGC0L4g0L7RgtCy0LXRgNGB0YLQstC40LUg0LfQsNC60YDRi9Cy0LDQtdGC0YHRjyDQuCDQsiDQtdCz0L4g0LzQtdGB0YLQvtC90LDRhdC+0LbQtNC10L3QuNC4INC+0LHRgNCw0LfRg9C10YLRgdGPINGB0LLRj9C30LrQsC7QktGB0LUg0Y3RgtC+INC/0YDQvtGB0LjRhdC+0LTQuNGCINCx0LvQsNCz0L7QtNCw0YDRjyDRgNCw0LfQvdC+0YHRgtC4INCw0YDRgtC10YDQuNCw0LvRjNC90L7Qs9C+INC00LDQstC70LXQvdC40Y8g0LIg0L/RgNC10LTRgdC10YDQtNC40Y/RhS7QkiDQvdC+0YDQvNC1INC+0LLQsNC70YzQvdC+0LUg0L7QutC90L4g0LfQsNC60YDRi9Cy0LDQtdGC0YHRjyDQv9C+0YfRgtC4INGB0YDQsNC30YMg0L/QvtGB0LvQtSDRgNC+0LbQtNC10L3QuNGPINCyINGC0LXRh9C10L3QuNC4IDItMyDQvNC10YHRj9GG0LXQsiDQuCDQtNC+0LvQttC10L0g0LfQsNC60YDRi9GC0YzRgdGPINCyINC/0YDQuNC90YbQuNC/0LUg0LTQviA2INC80LXRgdGP0YbQtdCyLNC90L4g0LLRgdGC0YDQtdGH0LDRjtGC0YHRjyDRgdC40YLRg9Cw0YbQuNC4INC60L7Qs9C00LAg0L7QvdC+INC+0YHRgtCw0LXRgtGB0Y8g0L7RgtC60YDRi9GC0YvQvCDRgyDQtNC10YLQtdC5INGB0YLQsNGA0YjQtSA2INC80LXRgdGP0YbQtdCyINC4INCy0L4g0LLRgNC10LzRjyDQv9C10YDQuNC+0LTQsCDQstC30YDQvtGB0LvQtdC90LjRjyzRh9GC0L4g0Y/QstC70Y/QtdGC0YHRjyDQvtC00L3QvtC5INC40Lcg0YTQvtGA0Lwg0L/QvtGA0L7QutC+0LIg0YHQtdGA0LTRhtCwLtCS0L7Qt9C80L7QttC90LAg0LTQsNC90L3QsNGPINGB0LjRgtGD0LDRhtC40Y8gLNC10YHQu9C4INC00LDQstC70LXQvdC40LUg0L3QtSDRgdC+0L7RgtCy0LXRgtGB0YLQstGD0LXRgiDRgNCw0LfQvdC+0YHRgtC4INC60LDQttC00L7Qs9C+INC/0YDQtdC00YHQtdGA0LTQuNGPLtCY0L3QvtCz0LTQsCDQvtGC0LLQtdGA0YHRgtCy0LjQtSDQvNC+0LbQtdGCINC90LUg0L/RgNC40YfQuNC90Y/RgtGMINC00LjRgdC60L7QvNGE0L7RgNGCINGH0LXQu9C+0LLQtdC60YMg0YEg0LTQsNC90L3QvtC5INC/0LDRgtC+0LvQvtCz0LjQtdC5LtCU0LvRjyDRgtC+0YfQvdC+0Lkg0LTQuNCw0LPQvdC+0YHRgtC40LrQuCDRgdGH0LjRgtCw0Y4s0YfRgtC+INC/0YDQvtC40LfQstC+0LTRj9GCINGN0LrQsyzRg9C30Lgg0Lgg0YDQtdC90YLQs9C10L0g0YHQtdGA0LTRhtCwLjxiciAvPg0KMi7QoNC+0YLQvtCy0LDRjyDQv9C+0LvQvtGB0YLRjCDRgyDQvdC+0LLQvtGA0L7QttC00LXQvdC90YvRhSDQvNCw0LvQtdC90YzQutCw0Y8s0YHQu9C40LfQuNGB0YLQsNGPINC80Y/Qs9C60LDRjyDQuCDQvdC10LbQvdCw0Y8s0L/QvtGN0YLQvtC80YMg0L7QvdCwINC80L7QttC10YIg0L/QvtCy0YDQtdC20LTQsNGC0YHRjyDQtNCw0LbQtSDQv9GA0Lgg0LzQtdC70YzRh9Cw0LnRiNC40YUg0L/RgNC40LrQvtGB0L3QvtCy0LXQvdC40Y/RhSDQuCDQvtGB0LzQvtGC0YDQsNGFLtCY0LzQtdC10YLRgdGPINGF0L7RgNC+0YjQviDRgNCw0LfQstC40YLQsNGPINC60YDRg9Cz0LvQsNGPINC80YvRiNGG0LAg0YDRgtCwLNGC0LDQutC20LUg0YXQvtGA0L7RiNC+INGA0LDQt9Cy0LjRgtCw0Y8g0YnQtdGH0L3QsNGPINC80YvRiNGG0LAs0LrQvtGA0L7RgtC60LjQuSDQuCDRgtC+0LvRgdGC0YvQuSDRj9C30YvQuizQttC40YDQvtCy0YvQtSDQutCw0LzQvtGH0LrQuCDQkdC40YjQsCzQutC+0YLQvtGA0YvQtSDQvdCw0YXQvtC00Y/RgtGB0Y8g0LzQtdC20LTRgyDQutC+0LbQtdC5INC4INGJ0LXRh9C90L7QuSDQvNGL0YjRhtC10Lku0JzRj9Cz0LrQvtC1INC4INGC0LLQtdGA0LTQvtC1INC90LXQsdC+LtCp0LXQutC4INGDINC90L7QstC+0YDQvtC20LTQtdC90L3Ri9GFINC/0YPRhdC70YvQtSDQuCDQstGL0L/Rg9C60LvRi9C1LtCh0YLQvtC40YIg0L7RgtC80LXRgtC40YLRjCzRh9GC0L4g0LPRg9Cx0Ysg0YMg0L3QuNGFINCx0L7Qu9GM0YjQuNC1LNCwINC90LAg0LjRhSDQstC90YPRgtGA0LXQvdC90LXQuSDQv9C+0LLQtdGA0YXQvdC+0YHRgtC4INC90LDRhdC+0LTRj9GC0YHRjyDQstCw0LvQuNC60Lgu0JAg0LLQvtC30LvQtSDQvdC40LbQvdC10Lkg0YfQtdC70Y7RgdGC0Lgg0L/QvtC/0LXRgNC10YfQvdGL0LUg0LLQsNC70LjQutC4LtCj0LfQtNC10YfQutC+INC60L7RgNC+0YLQutC+0LUu0JLQviDQstGA0LXQvNGPINCw0LrRgtCwINGB0L7RgdCw0L3QuNGPINGA0LXQsdC10L3QvtC6INC80L7QttC10YIg0L7QtNC90LLRgNC10LzQtdC90L3QviDQuCDQtNGL0YjQsNGC0Yws0Y3RgtC+0LzRgyDRgdCy0LjQtNC10YLQtdC70YzRgdGC0LLRg9C10YIg0YLQvizRh9GC0L4g0LTQviAg0LfQsNC00L3QtdC5INGB0YLQtdC90LrQuCDQs9C70L7RgtC60Lgg0L3QtSDQtNC+0YXQvtC00Y/RgiDQvdGD0LbQvdGL0LUg0YHRgtGA0YPQutGC0YPRgNGLLtCjINCy0LfRgNC+0YHQu9GL0YUg0LrQvtC90LXRh9C90L4g0LbQtSDQstGB0LUg0L/QviDQtNGA0YPQs9C+0LzRgy4gINCS0YHQtSDRjdGC0Lgg0YHRgtGA0YPQutGC0YPRgNGLINC/0L7Qu9C+0YHRgtC4INGA0YLQsCDRgdC/0L7RgdC+0LHRgdGC0LLRg9GO0YIg0LPQtdGA0LzQtdGC0LjQt9Cw0YbQuNC4INCy0L4g0LLRgNC10LzRjyDQsNC60YLQsCDRgdC+0YHQsNC90LjRjyzRgtC+INC10YHRgtGMINC00LvRjyDQvtCx0YDQsNC30L7QstCw0L3QuNGPINCy0LDQutGD0YPQvNCwLtCi0LDQuiDQutCw0Log0LrQvtC90LXRh9C90L4g0LbQtSDQsiDRjdGC0L7QvCDQsNC60YLQtSDQtNC+0LvQttC90Ysg0LDQutGC0LjQstC90L4g0YDQsNCx0L7RgtCw0YLRjCDQvdC1INGC0L7Qu9GM0LrQviDQvNGL0YjRhtGLINGA0L7RgtC+0LLQvtC5INC/0L7Qu9C+0YHRgtC4LNC/0L7RjdGC0L7QvNGDINC80Ysg0LLQuNC00LjQvCDQvdC1INGC0L7Qu9GM0LrQviDRgNCw0LfQstC40YLRg9GOINC60YDRg9Cz0LvRg9GOINC80YvRiNGG0YMs0YnQtdGH0L3Ri9C1INC4INGC0L7Qu9GB0YLRi9C5INGP0LfRi9C6LNCwINC80L7QttC10Lwg0LvQuNGG0LXQt9GA0LXRgtGMINCy0YvRiNC10L/QtdGA0LXRh9C40YHQu9C10L3Ri9C1INC+0YHQsdC10L3QvdC+0YHRgtC4LjxiciAvPg0K0JrRgNC+0LzQtSDRgtC+0LPQviDQvNC+0LbQvdC+INGC0LDQutC20LUg0LTQvtC/0L7Qu9C90LjRgtGMLNGH0YLQviDQvtCx0YDQsNC30L7QstC90LjQtSDQstCw0LrRg9GD0LzQsCDQtNC70Y8g0LDQutGC0LAg0YHQvtGB0LDQvdC40Y8s0L/QvtC80L7Qs9Cw0LXRgiDQvdC1INC/0L7RgtC10YDRj9GC0Ywg0LPRgNGD0LTQvdC+0LUg0LzQvtC70L7QutC+INC4INGB0L/QvtGB0L7QsdGB0YLQstGD0LXRgiDQvdC1INC/0L7Qv9Cw0LTQsNC90LjRjiDQstC+0LfQtNGD0YXQsCDQstC90YPRgtGA0Ywu0JXRgdC70Lgg0Y3RgtC+INC/0YDQvtC40LfQvtGI0LvQviDQsiDQtNCw0LvRjNC90LXQudGI0LXQvCDQvtC90L4g0LzQvtC20LXRgiDQv9GA0LjQstC10YHRgtC4INC6INC60L7Qu9C40LrQsNC8INGDINC80LDQu9GL0YjQtdC5LtCf0L7RjdGC0L7QvNGDINC+0YHQvtCx0LXQvdC90L7RgdGC0Lgg0YHRgtGA0L7QtdC90LjRjyDRgNC+0YLQvtCy0L7QuSDQv9C+0LvQvtGB0YLQuCDQvtGH0LXQvdGMINCy0LDQttC90YsuPGJyIC8+DQo=</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40" table:style-name="ce1">
            <text:p>915440</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inQntGB0L7QsdC10L3QvdC+0YHRgtC4INGB0YLRgNC+0LXQvdC40Y8g0YDQvtGC0L7QstC+0Lkg0L/QvtC70L7RgdGC0Lgg0L3QvtCy0L7RgNC+0LbQtNC10L3QvdGL0YUsINGB0L/QvtGB0L7QsdGB0YLQstGD0Y7RidC40LUg0LPQtdGA0LzQtdGC0LjQt9Cw0YbQuNC4INCy0L4g0LLRgNC10LzRjyDQsNC60YLQsCDRgdC+0YHQsNC90LjRjzog0J/QvtC70L7RgdGC0Ywg0YDRgtCwINC90L7QstC+0YDQvtC20LTQtdC90L3QvtCz0L4g0LjQvNC10LXRgiDQvtGB0L7QsdC10L3QvdC+0YHRgtC4INCyINGB0YLRgNC+0LXQvdC40Lgg0YLQsNC60LjQtSDQutCw0Lo6INCj0L/RgNGD0LPQvtGB0YLRjCDQs9GD0LEsINCz0YPQsdGLINC/0LvQvtGC0L3QviDQvtGF0LLQsNGC0YvQstCw0Y7RgiDRgdC+0YHQvtC6LCDRgtCw0Log0LbQtSDQvdCwINCy0L3Rg9GC0YDQtdC90L3QtdC5INGH0LDRgdGC0Lgg0LPRg9CxINC40LzQtdC10YLRgdGPINCy0LDQu9C40Log0Y3Qv9C40YLQtdC70LjQsNC70YzQvdGL0LksINC60L7RgtC+0YDRi9C5INGC0LDQuiDQttC1INGB0L/QvtGB0L7QsdGB0YLQstGD0LXRgiDQv9C70L7RgtC90L7QvNGDINC/0YDQuNC70LXQs9Cw0L3QuNGOINC6INGB0L7RgdC60YMg0LzQsNGC0LXRgNC4LiDQkiDQvtCx0LvQsNGB0YLQuCDRidC10Log0LjQvNC10Y7RgtGB0Y8g0LbQuNGA0L7QstGL0LUg0LrQvtC80LrQuCDQkdC40YjQsCwg0L/RgNC40LTQsNGO0YIg0L/Qu9C+0YLQvdC+0YHRgtGMINGJ0LXQutCw0Lwg0L3QvtCy0L7RgNC+0LbQtNC10L3QvdC+0LPQviDRjdGC0L4g0YLQsNC6INC20LUg0LLQu9C40Y/QtdGCINC90LAg0LPQtdGA0LzQuNGC0LjQt9Cw0YbQuNGOINCy0L4g0LLRgNC10LzRjyDQsNC60YLQsCDRgdC+0YHQsNC90LjRjyDQuCDRgdC+0LfQtNCw0L3QuNC1INCy0LDQutGD0YPQvNCwLCDQvdC40LbQvdGP0Y8g0YfQtdC70Y7RgdGC0Ywg0L3QtdC80L3QvtCz0L4g0L7RgtCy0LXQtNC10L3QsCDQstC90LjQtyDQuCDRg9C30LrQsNGPLCDRj9C30YvQuiDQv9C+0LTQstC40LbQvdGL0Lkg0Lgg0LTQstC40LbQtdGC0YHRjyDQstC+0LvQvdC+0L7QsdGA0LDQt9C90L4sINGB0L7Qt9C00LDQstCw0Y8g0L7RgtGA0LjRhtCw0YLQtdC70YzQvdC+0LUg0LTQsNCy0LvQtdC90LjQtSDQtNC70Y8g0LjQt9Cy0LvQtdGH0LXQvdC40Y8g0LjQtyDQs9GA0YPQtNC4INC80L7Qu9C+0LrQsCwg0L/Qu9C+0YLQvdC+INC/0YDQuNC70LXQs9Cw0LXRgiDQuiDQvdC10LHRgywg0YHQsNC8INGA0L7RgiDQvtGC0L3QvtGB0LjRgtC10LvRjNC90L4g0LzQsNC70LXQvdGM0LrQvtCz0L4g0YDQsNC30LzQtdGA0LAg0Lgg0Y/Qt9GL0Log0LfQsNC90LjQvNCw0LXRgiDQv9C+0YfRgtC4INCy0YHQtSDQv9GA0L7RgtGB0YDQsNC90YHRgtCy0L4g0LLQvdGD0YLRgNC4LSDRjdGC0L4g0L/QvtC30LLQvtC70Y/QtdGCINC/0LvQvtGC0L3QviDQv9GA0LjQu9C10LPQsNGC0Ywg0Log0LPRgNGD0LTQuCDQvdC+0LLQvtGA0L7QttC00LXQvdC90L7QvNGDLCDQvtGB0L7QsdC10L3QvdC+0YHRgtC4INGB0YLRgNC+0LXQvdC40Y8g0LzRj9Cz0LrQvtCz0L4g0Lgg0YLQstC10YDQtNC+0LPQviDQvdC10LHQsCwg0LLRi9GB0L7QutC+0LUg0L/QvtC70L7QttC10L3QuNC1INCz0L7RgNGC0LDQvdC4INC4INC90LXQsdC90L7Qs9C+INC30LDQvdCw0LLQtdGB0LAuINCT0L7RgNGC0LDQvdGMINC90LDRhdC+0LTQuNGC0YHRjyDQstGL0YjQtSwg0LAg0L3QtdCx0L4g0L7Qv9GD0YHQutCw0LXRgtGB0Y8g0L3QuNC30LrQvi0g0Y3RgtC+INGB0L/QvtGB0L7QsdGB0YLQstGD0LXRgiDQuNC30L7Qu9GP0YbQuNC4INC80LXQttC00YMg0L3QvtGB0L7Qs9C70L7RgtC60L7QuSDQuCDQv9C+0LvQvtGB0YLRjNGOINGA0YLQsC0g0YfRgtC+INC/0YDQtdC00L7RgtCy0YDQsNGJ0LDQtdGCINC/0L7Qv9Cw0LTQtdC90LjQtSDQstC+0LfQtNGD0YXQsCDQuCDQv9C+0LzQvtCz0LDQtdGCINGN0YTRhNC10LrRgtC40LLQvdC+0LzRgyDRgdC+0YHQsNC90LjRji4gINCh0YLRgNC+0LXQvdC40LUg0YHQsNC80L7Qs9C+INGP0LfRi9C60LAg0L3QvtCy0L7RgNC+0LbQtNC10L3QvdC+0LPQvi0g0LjQvNC10LXRgiDQstGL0YHQvtC60YPRjiDQv9C+0LTQstC40LbQvdC+0YHRgtGMLiAgMSkg0J7QstCw0LvRjNC90L7QtSDQvtC60L3Qvi3QvtGC0LLQtdGA0YHRgtC40LUg0LIg0LzQtdC20L/RgNC10LTRgdC10YDQtNC90L7QuSDQv9C10YDQtdCz0L7RgNC+0LTQutC1INC80LXQttC00YMg0L/RgNCw0LLRi9C8INC4INC70LXQstGL0Lwg0L/RgNC10LTRgdC10YDQtNC40LXQvCwg0YTRg9C90LrRhtC40L7QvdC40YDQvtCy0LDQvdC40LUg0L7RgdGD0YnQtdGB0YLQstC70Y/QtdGC0YHRjyDQv9C+INGC0LjQv9GDINC00LLQtdGA0LrQuCwg0YEg0L/QvtC80L7RidGM0Y4g0L7QstCw0LvRjNC90L7Qs9C+INC+0LrQvdCwINCyINGE0LXRgtCw0LvRjNC90L7QvCDQv9C10YDQuNC+0LTQtSDQvtGB0YPRidC10YHRgtCy0LvRj9C10YLRgdGPINGB0LHRgNC+0YEg0LrRgNC+0LLQuCDRgdC/0YDQsNCy0LAtINC90LDQu9C10LLQviwg0LzQsNC70YvQuSDQutGA0YPQsyDQutGA0L7QstC+0L7QsdGA0LDRidC10L3QuNGPLdCx0L7Qu9GM0YjQvtC5INC60YDRg9CzINC60YDQvtCy0L7QvtCx0YDQsNGJ0LXQvdC40Y8sINC10YHQu9C4INC+0L3QviDQvdC1INC30LDQutGA0YvRgtC+LSDQvtC90L4g0Y/QstC70Y/QtdGC0YHRjy0g0L/QtdGA0YHQuNGB0YLQuNGA0YPRjtGJ0LjQvCwg0LvQtdCz0LrQuNC1INC10YnQtSAg0L3QtSDRgNCw0YHQv9GA0LDQstC70LXQvdGLINC4INC90LUg0YTRg9C90LrRhtC40L7QvdC40YDRg9GO0YIg0LIg0L/QvtC70L3QvtC5INC80LXRgNC1LCDQsCDRgtCw0Log0LbQtSDQuNGFINC60YDQvtCy0L7QvtCx0YDQsNGJ0LXQvdC40LUg0LzQuNC90LjQvNCw0LvRjNC90L4sINC40LfQtyDQt9CwINGN0YLQvtCz0L4g0LrRgNC+0LLRjCDRgtC10YfQtdGCINCyINC+0YHQvdC+0LLQvdC+0Lwg0YfQtdGA0LXQtyDQvtC60L3Qvi3QsiDQu9C10LLQvtC1INC/0YDQtdC00YHQtdGA0LTQuNC1INC4INCw0YDRgtC10YDQuNCw0LvRjNC90YvQuS3QkdC+0YLQsNC70LvQvtCyINC/0YDQvtGC0L7Quiwg0LjQtyDQu9C10LPQvtGH0L3QvtCz0L4g0YHRgtCy0L7Qu9CwINCyINCw0L7RgNGC0YMuINCh0YPRidC10YHRgtCy0YPQtdGCINCw0L3QsNGC0L7QvNC40YfQtdGB0LrQvtC1INC4INGE0LjQt9C40L7Qu9C+0LPQuNGH0LXRgdC60L7QtSDQt9Cw0LrRgNGL0YLQuNC1INCw0YDRgtC10YDQuNCw0LvRjNC90L7Qs9C+INC/0YDQvtGC0L7QutCwLiDQkNC90LDRgtC+0LzQuNGH0LXRgdC60L7QtSDQt9Cw0LrRgNGL0YLQuNC1INC00L7Qu9C20L3QviDQt9Cw0LLQtdGA0YjQuNGC0YHRjyDQuiAxLTIg0LPQvtC00LDQvCDQttC40LfQvdC4LCDRhNC40LfQuNC+0LvQvtCz0LjRh9C10YHQutC+0LUtINC6IDMtNiDQvNC10YHRj9GG0LXQsiDQttC40LfQvdC4LCDQvdCwINC80LXRgdGC0LUg0LfQsNC60YDRi9GC0LjRjyDQvtCy0LDQu9GM0L3QvtCz0L4g0L7QutC90LAt0L7QsdGA0LDQt9GD0LXRgtGB0Y8g0L7QstCw0LvRjNC90L7QtSDRg9Cz0LvRg9Cx0LvQtdC90LjQtS4g0J3QviDRgtCw0Log0LbQtSDQsdGL0LLQsNGO0YIg0YHQu9GD0YfQsNC4INC60L7Qs9C00LAg0YPQttC1INCy0L4g0LLQt9GA0L7RgdC70L7QvCDQstC+0LfRgNCw0YHRgtC1INC70Y7QtNC4INC40LzQtdGO0YIg0L3QtdC30LDQutGA0YvRgtC+0LUg0L7QstCw0LvRjNC90L7QtSDQvtC60L3Qvi4g0K3RgtC+INGC0YDQtdCx0YPQtdGCINC/0L7RgdGC0L7Rj9C90L3QvtCz0L4g0L3QsNCx0LvRjtC00LXQvdC40Y8g0Lgg0LrQvtC90YLRgNC+0LvRjyDQt9CwINGB0L7RgdGC0L7Rj9C90LjQtdC8INGDINGB0L/QtdGG0LjQsNC70LjRgdGC0LAuINCt0YLQviDRj9Cy0LvRj9C10YLRgdGPINC/0LDRgtC+0LvQvtCz0LjRh9C10YHQutC40Lwg0L/RgNC+0YbQtdGB0YHQvtC8INGC0YDQtdCx0YPRjtGJ0LjQvCDQu9C10YfQtdC90LjRjy4g0KfQtdGA0LXQtyDQvdC10LPQviDQutGA0L7QstGMINC/0L7Qv9Cw0LTQsNC10YIg0LjQtyDQv9GA0LDQstC+0LPQviDQv9GA0LXQtNGB0LXRgNC00LjRjyDQsiDQu9C10LLQvtC1LCDQvNC40L3Rg9GPINC90LUg0YTRg9C90LrRhtC40L7QvdC40YDRg9GO0YnQuNC1INC70LXQs9C60LjQtSDQvtCx0LXRgdC/0LXRh9C40LLQsNC10YIg0LrRgNC+0LLQvtGB0L3QsNCx0LbQtdC90LjQtSDQv9C70L7QtNCwLiDQn9C10YDQstGL0Lkg0LLQtNC+0YUtLS3Qu9C10LPQutC40LUg0YDQsNGB0L/RgNCw0LLQu9GP0Y7RgtGB0Y8tLT4g0LTQsNCy0LvQtdC90LjQtSDQsiDQu9C10LLQvtC8INC/0YDQtdC00YHQtdGA0LTQuNC4INC/0L7QstGL0YjQsNC10YLRgdGPLS3Qt9Cw0YLQtdC8INC/0YDQvtC40YHRhdC+0LTQuNGCINC/0L7RgdGC0LXQv9C10L3QvdC+0LUg0YTRg9C90LrRhtC40L7QvdCw0LvRjNC90L7QtSDQt9Cw0LrRgNGL0YLQuNC1INC+0LLQsNC70YzQvdC+0LPQviDQvtC60L3QsC4g0J3QtdC00L7QvdC+0YjQtdC90L3QvtGB0YLRjCDQvNC+0LbQtdGCINC/0L7QstC70LjRj9GC0Ywg0L3QsCDQv9GA0L7RhtC10YHRgSDQt9Cw0LrRgNGL0YLQuNGPINC+0LLQsNC70YzQvdC+0LPQviDQvtC60L3QsC4g0J/QvtCy0YvRiNC10L3QuNC1INC00LDQstC70LXQvdC40Y8g0LIg0L/RgNCw0LLQvtC8INC/0YDQtdC00YHQtdGA0LTQuNC4INGC0LDQuiDQttC1INGP0LLQu9GP0LXRgtGB0Y8g0L7QtNC90LjQvCDQuNC3INGE0LDQutGC0L7RgNC+0LIg0L/RgNC4INC/0LDRgtC+0LvQvtCz0LjQuCDQu9C10LPQutC40YUg0Lgg0YHQtdGA0LTRhtCw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0" table:style-name="ce1">
            <text:p>1066920</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4g0J7RgtC60YDRi9GC0L7QtSDQvtCy0LDQu9GM0L3QvtC1INC+0LrQvdC+LdGN0YLQviDQstGA0L7QttC00LXQvdC90YvQuSDQv9C+0YDQvtC6INGB0LXRgNC00YbQsCwg0L/RgNC4INC60L7RgtC+0YDQvtC8INC+0LLQsNC70YzQvdC+0LUg0L7QutC90L4g0L/QvtGB0LvQtSDRgNC+0LbQtNC10L3QuNGPINC+0YHRgtCw0LXRgtGB0Y8g0L7RgtC60YDRi9GC0YvQvCDQuCDQv9GA0L7QuNGB0YXQvtC00LjRgiDQt9Cw0LHRgNC+0YEg0LrRgNC+0LLQuCDQuNC3INC/0YDQsNCy0L7Qs9C+INC/0YDQtdC00YHQtdGA0LTQuNGPINCyINC70LXQstC+0LUsINGH0LXQs9C+INCyINC90L7RgNC80LUg0L3QsNCx0LvRjtC00LDRgtGM0YHRjyDQvdC1INC00L7Qu9C20L3Qvi4g0KTQuNC30LjQvtC70L7Qs9C40YfQtdGB0LrQvtC1INC30LDQutGA0YvRgtC40LUg0L7QstCw0LvRjNC90L7Qs9C+INC+0LrQvdCwINC/0YDQvtC40YHRhdC+0LTQuNGCINCyINC/0LXRgNCy0YvQtSDQvdC10YHQutC+0LvRjNC60L4g0YfQsNGB0L7QsiDQv9C+0YHRgtCw0L3QsNGC0LvRjNC90L7Qs9C+INC/0LXRgNC40L7QtNCwINC4INC30LDQstC10YDRiNCw0LXRgtGB0Y8g0Log0LrQvtC90YbRgyDQv9C10YDQstGL0YUg0YHRg9GC0L7Qui4g0JfQsNGF0LvQvtC/0YvQstCw0L3QuNC1INC/0YDQvtC40YHRhdC+0LTQuNGCINCy0YHQu9C10LTRgdGC0LLQuNC1INGD0LLQtdC70LjRh9C10L3QuNGPINC00LDQstC70LXQvdC40Y8g0LIg0LvQtdCy0L7QvCDQv9GA0LXQtNGB0LXRgNC00LjQuCwg0L7QvdC+INGB0YLQsNC90L7QstC40YLRgdGPINCy0YvRiNC1INGH0LXQvCDQsiDQv9GA0LDQstC+0LwsINGN0YLQviDRgdCy0Y/Qt9Cw0L3QviDRgSDRgtC10LwsINGH0YLQviDQvdC+0LLQvtGA0L7QttC00LXQvdC90YvQuSDQv9C10YDQtdGF0L7QtNC40YIg0L3QsCDQu9C10LPQvtGH0L3QvtC1INC00YvRhdCw0L3QuNC1INC4INGB0L3QuNC20LDQtdGC0YHRjyDQvdCw0LPRgNGD0LfQutCwINC90LAg0LzQsNC70YvQuSDQutGA0YPQsyDQutGA0L7QstC+0L7QsdGA0LDRidC10L3QuNGPLCDQvdCw0YfQuNC90LDQtdGCINGE0YPQvdC60YbQuNC+0L3QuNGA0L7QstCw0YLRjCDRgtCw0LrQttC1INCx0L7Qu9GM0YjQvtC5INC60YDRg9CzINC60YDQvtCy0L7QvtCx0YDQsNGJ0LXQvdC40Y8uINCX0LDQutGA0YvRgtC40LUg0L7QstCw0LvRjNC90L7Qs9C+INC+0LrQvdCwINC90LUg0LTQsNC10YIg0LLQvtC30LzQvtC20L3QvtGB0YLQuCDQtNC70Y8g0L7QsdGA0LDRgtC90L7Qs9C+INGC0L7QutCwINC60YDQvtCy0Lgg0LzQtdC20LTRgyDQv9GA0LXQtNGB0LXRgNC00LjRj9C80LguINCQ0L3QsNGC0L7QvNC40YfQtdGB0LrQvtC1INC30LDQutGA0YvRgtC40LUg0L7QstCw0LvRjNC90L7Qs9C+INC+0LrQvdCwINC/0YDQvtC40YHRhdC+0LTQuNGCINC/0L7Qt9C20LUg0LTQviDQutC+0L3RhtCwINC/0LXRgNCy0L7Qs9C+INCz0L7QtNCwINC20LjQt9C90LgsINGC0L4g0LXRgdGC0Ywg0LTQviAxMiDQvNC10YHRj9GG0LXQsiDQv9C+0YHQu9C1INGA0L7QttC00LXQvdC40Y8sINGN0YLQviDRgdCy0Y/Qt9Cw0L3QviDRgSDRgtC10LwsINGH0YLQviDQuiDQv9C10YDQstC+0LzRgyDQutC+0L3RhtGDINC20LjQt9C90Lgg0L/RgNC+0LjRgdGF0L7QtNC40YIg0LfQsNGA0LDRgdGC0LDQvdC40LUg0YHQtdGA0LTQtdGH0L3Ri9GFINGB0YLRgNGD0LrRgtGD0YAsINC30YDQtdC70L7RgdGC0Ywg0LzQuNC+0LrQsNGA0LTQsCwg0YHQtdGA0LTQtdGH0L3Ri9C1INCy0L7Qu9C+0LrQvdCwINC/0L7Qu9C90L7RgdGC0YzRjiDQt9Cw0LrRgNGL0LLQsNGO0YIg0YHQvtC+0LHRidC10L3QuNGPINC80LXQttC00YMg0L7QsdC+0LjQvNC4INC/0YDQtdC00YHQtdGA0LTQuNGP0LzQuCwg0LrRgNCw0Y8g0YHQtdGA0LTQtdGH0L3QvtC5INC/0LXRgNC10LPQvtGA0L7QtNC60Lgg0YHRgNCw0YHRgtCw0Y7RgtGB0Y8sINGC0L4g0LXRgdGC0Ywg0YHQvtC30LTQsNGO0YLRgdGPINGD0YHQu9C+0LLQuNGPINC00LvRjyDQv9C+0LvQvdC+0Lkg0LPQtdGA0LzQuNGC0LjQt9Cw0YbQuNC4LiDQodC+0LPQu9Cw0YHQvdC+INGB0YLQsNGC0LjRgdGC0LjQutC1INGDIDIwLTMwJSDQtNC10YLQtdC5INC+0LLQsNC70YzQvdC+0LUg0L7QutC90L4g0L7RgdGC0LDQtdGC0YHRjyDQvtGC0LrRgNGL0YLRi9C8INC4INC/0L7RgdC70LUg0L/QtdGA0LLQvtCz0L4g0LPQvtC00LAg0LbQuNC30L3QuCzRh9GC0L4g0YHQstC40LTQtdGC0LXQu9GM0YHQstGD0LXRgiDQvtCxINC+0YLRgdGD0YLRgdGC0LLQuNC4INC10LPQviDQsNC90LDRgtC+0LzQuNGH0LXRgdC60L7Qs9C+INC30LDQutGA0YvRgtC40Y8uINCf0YDQuCDRjdGC0L7QvCDQtNCw0L3QvdGL0Lkg0L/QvtGA0L7QuiDQvdC1INC/0YDQvtGP0LLQu9GP0LXRgtGB0Y8g0LrQu9C40L3QuNGH0LXRgdC60LgsINGC0L4g0LXRgdGC0Ywg0L3QtSDQstGL0YHQu9GD0YjQuNCy0LDQtdGC0YHRjyDQv9Cw0YLQvtC70L7Qs9C40YfQtdGB0LrQuNGFLCDQvtGA0LPQsNC90LjRh9C10YHQutC40YUg0YjRg9C80L7Qsiwg0L7RgtGB0YPRgtGB0YLQstGD0LXRgiDRhtC40LDQvdC+0YLQuNGH0L3QvtGB0YLRjCDQutC+0LbQvdGL0YUg0L/QvtC60YDQvtCy0L7Qsiwg0L3QtSDQvdCw0LHQu9GO0LTQsNGO0YLRgdGPINC/0LDRgtC+0LvQvtCz0LjQuCDRgdC+INGB0YLQvtGA0L7QvdGLINGB0LXRgNC00LXRh9C90L4t0YHQvtGB0YPQtNC40YHRgtC+0Lkg0Lgg0LTRi9GF0LDRgtC10LvRjNC90YvRhSDRgdC40YHRgtC10LwsINC90LXRgiDQu9C10LPQvtGH0L3QvtC5INCz0LjQv9C10YDRgtC10L3Qt9C40LguINCSINGC0LDQutC40YUg0YHQu9GD0YfQsNGP0YUg0YXQuNGA0YPRgNCz0LjRh9C10YHQutC+0LUg0LLQvNC10YjQsNGC0LXQu9GM0YHRgtCy0L4g0L/QviDQv9C+0LLQvtC00YMg0LfQsNC60YDRi9GC0LjRjyDQvtGC0LrRgNGL0YLQvtCz0L4g0L7QstCw0LvRjNC90L7Qs9C+INC+0LrQvdCwINC90LUg0YLRgNC10LHRg9GO0YLRgdGPLiDQntC00L3QsNC60L4g0LIg0YHQu9GD0YfQsNC1INCy0YvRj9Cy0LvQtdC90LjRjyDQv9Cw0YLQvtC70L7Qs9C40YfQtdGB0LrQuNGFINGI0YPQvNC+0LIsINGG0LjQsNC90L7Qt9CwINC60L7QttC90YvRhSDQv9C+0LrRgNC+0LLQvtCyLCDQutC+0L3RgdGD0LvRjNGC0LDRhtC40Lgg0LLRgNCw0YfQsCDQutCw0YDQtNC40L7Qu9C+0LPQsCwg0LTQsNCy0YjQtdCz0L4g0LfQsNC60LvRjtGH0LXQvdC40LUg0LIg0L/QvtC70YzQt9GDINGF0LjRgNGD0YDQs9C40YfQtdGB0LrQvtCz0L4g0LLQvNC10YjQsNGC0LXQu9GM0YHRgtCy0LA7INCyINGC0LDQutC40YUg0LrQu9C40L3QuNGH0LXRgdC60LjRhSDRgdC70YPRh9Cw0Y/RhSDQvdC10L7QsdGF0L7QtNC40LzQviDQv9GA0L7QstC10LTQtdC90LjQtSDQutCw0YDQtNC40L7RhdC40YDRg9GA0LPQuNGH0LXRgdC60L7QuSDQvtC/0LXRgNCw0YbQuNC4INC/0L4g0L/QvtCy0L7QtNGDINC30LDQutGA0YvRgtC40Y8g0L7QstCw0LvRjNC90L7Qs9C+INC+0LrQvdCwLiDQotCw0LrQuNC8INC+0LHRgNCw0LfQvtC8LCDRhNC40LfQuNC+0LvQvtCz0LjRh9C10YHQutC+0LUg0Lgg0LDQvdCw0YLQvtC80LjRh9C10YHQutC+0LUg0LfQsNC60YDRi9GC0LjQtSDQvtCy0LDQu9GM0L3QvtCz0L4g0L7QutC90LAg0L/RgNC+0LjRgdGF0L7QtNGP0YIg0LIg0YDQsNC30LvQuNGH0L3Ri9C1INGB0YDQvtC60LgsINC90L4g0LIg0L3QvtGA0LzQtSDRjdGC0Lgg0LTQstCwINGB0L7QsdGL0YLQuNGPINC00L7Qu9C20L3RiyDQv9GA0L7QuNC30L7QudGC0Lgg0LTQviDQs9C+0LTQsC4g0J3QtdGB0LzQvtGC0YDRjyDQvdCwINGC0L4sINGH0YLQviDQvtGC0LrRgNGL0YLQvtC1INC+0LLQsNC70YzQvdC+0LUg0L7QutC90L4g0Y/QstC70Y/QtdGC0YHRjyDQvtC00L3QvtC5INC40Lcg0YTQvtGA0Lwg0LLRgNC+0LbQtNC10L3QvdGL0YUg0L/QvtGA0L7QutC+0LIg0YHQtdGA0LTRhtCwLCDQsiDQvdC10LrQvtGC0L7RgNGL0YUg0YHQu9GD0YfQsNGP0YUg0L7QvdC+INC80L7QttC10YIg0L3QtSDQv9GA0LXQtNGB0YLQsNCy0LvRj9GC0Ywg0YPQs9GA0L7Qt9GLINC00LvRjyDQttC40LfQvdC4INGA0LXQsdC10L3QutCwINC4INC90LUg0YLRgNC10LHRg9C10YIg0LzQtdC00LjRhtC40L3RgdC60L7Qs9C+INCy0LzQtdGI0LDRgtC10LvRjNGB0YLQstC+LCDQsiDRgtC+INCy0YDQtdC80Y8g0LrQsNC6INCyINGA0Y/QtNC1INC00YDRg9Cz0LjRhSDRgdC70YPRh9Cw0LXQsiDQvdC10L7QsdGF0L7QtNC40LzQviDQv9GA0L7QstC10LTQtdC90LjQtSDRhdC40YDRg9GA0LPQuNGH0LXRgdC60L7QuSDQvtC/0LXRgNCw0YbQuNC4PGJyIC8+DQoyLiDQoNC+0YLQvtCy0LDRjyDQv9C+0LvQvtGB0YLRjCDQvdC+0LLQvtGA0L7QttC00LXQvdC90YvRhSDQuNC80LXQtdGCINGA0Y/QtCDQsNC90LDRgtC+0LzQuNGH0LXRgdC60LjRhSwg0YTQuNC30LjQvtC70L7Qs9C40YfQtdGB0LrQuNGFINC+0YHQvtCx0LXQvdC90L7RgdGC0LXQuSwg0YHQv9C+0YHQvtCx0YHRgtCy0YPRjtGJ0LjRhSDQs9C10YDQvNC40YLQuNC30LDRhtC40Lgg0LLQviDQstGA0LXQvNGPINCw0LrRgtCwINGB0L7RgdCw0L3QuNGPLiDQktC+LdC/0LXRgNCy0YvRhSwg0L3QsNC70LjRh9C40LUgItC20LjRgNC+0LLQvtCz0L4g0LrQvtC80LrQsCIsINC60L7QvNC60LAg0JHQuNGI0LAsINC/0YDQtdC00YHRgtCw0LLQu9GP0Y7RidC10LPQviDQsNC90LDRgtC+0LzQuNGH0LXRgdC60L7QtSDQvtCx0YDQsNC30L7QstCw0L3QuNC1INCyINGB0LvQvtC1INC/0L7QtNC60L7QttC90L4t0LbQuNGA0L7QstC+0Lkg0LrQu9C10YLRh9Cw0YLQutC4INCyINGJ0LXRh9C90L7QuSDQvtCx0LvQsNGB0YLQuCwg0L7QvdC+INGA0LDRgdC/0L7Qu9C+0LbQtdC90L4g0LzQtdC20LTRgyDQvNGL0YjRhtCw0LzQuCDQtNCw0L3QvdC+0Lkg0L7QsdC70LDRgdGC0Lgg0Lgg0LLRi9C/0L7Qu9C90Y/QtdGCINGB0YLQsNCx0LjQu9C40LfQuNGA0YPRjtGJ0YPRjiDRhNGD0L3QutGG0LjRjiwg0L/RgNC10L/Rj9GC0YHRgtCy0YPRjyDQt9Cw0L/QsNC00LDQvdC40Y4g0YnQtdC6INCy0L4g0LLRgNC10LzRjyDQsNC60YLQsCDRgdC+0YHQsNC90LjRjy4g0JrRgNC+0LzQtSDRgtC+0LPQviDRidC10YfQvdGL0Lkg0LrQvtC80L7Quiwg0L/RgNC40LTQsNC10YIg0LPQtdGA0LzQuNGC0LjQt9Cw0YbQuNGOLCDRgtC+INC10YHRgtGMINC/0YDQtdC00YPQv9GA0LXQttC00LDQtdGCINC/0L7Qv9Cw0LTQsNC90LjQtSDQstC+0LfQtNGD0YXQsCwg0L7QsdC10YHQv9C10YfQuNCy0LDRjyDRgdC+0YHRgtC+0Y/QvdC40LUg0LLQsNC60YPRg9C80LAuINCS0YLQvtGA0L7QuSDQvtGB0L7QsdC10L3QvdC+0YHRgtGM0Y4g0Y/QstC70Y/RjtGC0YHRjyDQs9GD0LHRiyDQvdC+0LLQvtGA0L7QttC00LXQvdC90L7Qs9C+LCDRgtC+0LvRgdGC0YvQtSDQuCDQv9C70L7RgtC90YvQtSDRgSDRhdC+0YDQvtGI0L4g0YDQsNC30LLQuNGC0YvQvNC4INC60YDRg9Cz0L7QstGL0LzQuCDQvNGL0YjRhtCw0LzQuC4g0J3QsCDQstC10YDRhdC90LXQuSDQs9GD0LHQtSDQvdC+0LLQvtGA0L7QttC00LXQvdC90L7Qs9C+INC40LzQtdC10YLRgdGPINCy0LDQu9C40LrQvtC+0LHRgNCw0LfQvdC+0LUg0L7QsdGA0LDQt9C+0LLQsNC90LjQtSwg0YLQsNC6INC90LDQt9GL0LLQsNC10LzRi9C5INGB0L7RgdC+0YfQtdC6LCDQutC+0YLQvtGA0YvQuSDQv9GA0LjQtNCw0LXRgiDQv9C70L7RgtC90L7QtSDQv9GA0LjQu9C10LPQsNC90LjQtSDQs9GD0LEg0L3QvtCy0L7RgNC+0LbQtdC90L3Ri9GFINC6INC80LDRgtC10YDQuNC90YHQutC+0Lkg0LPRgNGD0LTQuC4g0J3QtdGB0LzQvtGC0YDRjyDQvdCwINC+0YLRgdGD0YLRgdGC0LLQuNC1INC30YPQsdC+0LIsINCx0LvQsNCz0L7QtNCw0YDRjyDQv9C70L7RgtC90L7RgdGC0Lgg0LPRg9CxINC90L7QstC+0YDQvtC20LTQtdC90L3Ri9C5INGB0L7QstC10YDRiNCw0LXRgiDRgdC+0YHQsNGC0LXQu9GM0L3Ri9C1INC00LLQuNC20LXQvdC40Y8g0LHQtdC3INC+0YLRgNGL0LLQsNC90LjRjyDQvtGCINCz0YDRg9C00LguINCi0YDQtdGC0YzRjyDQvtGB0L7QsdC10L3QvdC+0YHRgtGMINGA0L7RgtC+0LLQvtC5INC/0L7Qu9C+0YHRgtC4INC90L7QstC+0YDQvtC20LTQtdC90L3QvtCz0L4sINC+0LHQtdGB0L/QtdGH0LjQstCw0Y7RidCw0Y8g0LPQtdGA0LzQuNGC0LjQt9Cw0YbQuNGOLdGN0YLQviDQutC+0YDQvtGC0LrQuNC5INC4INGI0LjRgNC+0LrQuNC5INGP0LfRi9C6INC90L7QstC+0YDQvtC20LTQtdC90L3QvtCz0L4g0Lgg0LTQtdGB0L3RiyDQsdC10Lcg0LfRg9Cx0L7Qsiwg0LHQu9Cw0LPQvtC00LDRgNGPINGC0LDQutC+0LzRgyDQsNC90LDRgtC+0LzQuNGH0LXRgdC60L7QvNGDINGB0YLRgNC+0LXQvdC40Y4g0L7QsdC10YHQv9C10YfQuNCy0LDQtdGC0YHRjyDQv9C70L7RgtC90L7QtSDQv9GA0LjQu9C10LPQsNC90LjQtSDQuCDRgNC10LHQtdC90L7QuiDQvdC1INC00LDQstC40YLRgdGPINC80L7Qu9C+0LrQvtC8LCDRgtCw0Log0LrQsNC6INGP0LfRi9C6INC90LUg0LzQtdGI0LDQtdGCLiDQp9C10YLQstC10YDRgtCw0Y8g0L7RgdC+0LHQtdC90L3QvtGB0YLRjCDRgNC+0YLQvtCy0L7QuSDQv9C+0LvQvtGB0YLQuCDQvdC+0LLQvtGA0L7QttC00LXQvdC90L7Qs9C+LdGN0YLQviDQv9GA0LjQv9C+0LTQvdGP0YLQvtGB0YLRjCwg0YLQviDQtdGB0YLRjCDQstGL0YHQvtC60L7QtSDRgNCw0YHQv9C+0LvQvtC20LXQvdC40LUg0LzRj9Cz0LrQvtCz0L4g0L3QtdCx0LAg0Lgg0YTQsNC60YIsINGC0L7Qs9C+INGH0YLQviDQvtC90L4g0YHQu9C40LLQsNC10YLRgdGPINGBINC90LDQtNCz0L7RgNGC0LDQvdC90LjQutC+0LwsINGH0YLQviDQtNCw0LXRgiDQstC+0LfQvNC+0LbQvdC+0YHRgtGMINC00LvRjyDQv9C+0LvQvdC+0YbQtdC90L3QvtCz0L4g0L3QvtGB0L7QstC+0LPQviDQtNGL0YXQsNC90LjRjyDQuCDQv9GA0LXQv9GP0YLRgdCy0YPQtdGCINCw0YHQv9C40YDQsNGG0LjQuCDQs9GA0YPQtNC90YvQvCDQvNC+0LvQvtC60L7QvCDQstC+INCy0YDQtdC80Y8g0LDQutGC0LAg0YHQvtGB0LDQvdC40Y8uINCi0LDQutC40Lwg0L7QsdGA0LDQt9C+0LwsINC20LjRgNC+0LLRi9C1INC60L7QvNC60LgsINC/0LvQvtGC0L3QvtGB0YLRjCDQs9GD0LEsINGA0LDQt9Cy0LjRgtC+0YHRgtGMINC60YDRg9Cz0L7QstC+0Lkg0LzRi9GI0YbRiyDRgNGC0LAsINCw0L3QsNGC0L7QvNC40YfQtdGB0LrQuNC1INC+0YHQvtCx0LXQvdC90L7RgdGC0Lgg0Y/Qt9GL0LrQsCDQuCDQvNGP0LPQutC+0LPQviDQvdC10LHQsCwg0L7QsdC10YHQv9C10YfQuNCy0LDRjtGCINCz0LXRgNC80LjRgtC40YfQvdC+0YHRgtGMINCy0L4g0LLRgNC10LzRjyDQs9GA0YPQtNC90L7Qs9C+INCy0YHQutCw0YDQvNC70LjQstCw0L3QuNGPINC4INC90LUg0LTQvtC/0YPRgdC60LDRjtGCINGP0LLQu9C10L3QuNGPINCw0Y3RgNC+0YTQsNCz0LjQuCwg0YLQviDQtdGB0YLRjCDQt9Cw0LPQu9Cw0YLRi9Cy0LDQvdC40Y8g0LLQvtC30LTRg9GF0LAuINCT0LXRgNC80LjRgtC40YfQvdC+0YHRgtGMINCy0L4g0LLRgNC10LzRjyDQsNC60YLQsCDRgdC+0YHQsNC90LjRjyDRj9Cy0LvRj9C10YLRgdGPINC+0YHQvdC+0LLQvtC5INC/0YDQsNCy0LjQu9GM0L3QvtC5INGC0LXRhdC90LjQutC4INC60L7RgNC80LvQtdC90LjRjyDQs9GA0YPQtNGM0Y4g0Lgg0L3QtSDRgdC+0LfQtNCw0LXRgiDRgdGC0YDQtdGB0YHQvtCy0L7QuSDRgdC40YLRg9Cw0YbQuNC4INC00LvRjyDQvdC+0LLQvtGA0L7QttC00LXQvdC90L7Qs9C+LCDRgtC10Lwg0YHQsNC80YvQvCDQvtCx0LXRgdC/0LXRh9C40LLQsNGPINC10LPQviDQsNC00LXQutCy0LDRgtC90YvQvCDQvtCx0YrQtdC80L7QvCDQs9GA0YPQtNC90L7Qs9C+INC80L7Qu9C+0LrQsCwg0L3QtdC+0LHRhdC+0LTQuNC80L7Qs9C+INC00LvRjyDRgNC+0YHRgtCwINC4INGA0LDQt9Cy0LjRgtC40Y8g0YHQvtCz0LvQsNGB0L3QviDQstC+0LfRgNCw0YHRgtGDLg==</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0" table:style-name="ce1">
            <text:p>1066940</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0J7RgtCy0LXRgiDQvdCwIDEg0LLQvtC/0YDQvtGBOiDQntCy0LDQu9GM0L3QvtC1INC+0LrQvdC+IC0g0LLQsNC20L3QsNGPINCw0L3QsNGC0L7QvNC40YfQtdGB0LrQsNGPINC+0YHQvtCx0LXQvdC90L7RgdGC0Ywg0LLQviDQstC90YPRgtGA0LjRg9GC0YDQvtCx0L3QvtC8INC/0LXRgNC40L7QtNC1LCDQutC+0YLQvtGA0LDRjyDRgNCw0YHQv9C+0LvQvtC20LXQvdCwINC80LXQttC00YMg0LTQstGD0LzRjyDQv9GA0LXQtNGB0LXRgNC00LjRj9C80Lgg0YHQtdGA0LTRhtCwLiDQktC+INCy0L3Rg9GC0YDQuNGD0YLRgNC+0LHQvdC+0Lwg0L/QtdGA0LjQvtC00LUg0LrRgNC+0LLQvtC+0LHRgNCw0YnQtdC90LjQtSDQuNC00LXRgiDQt9CwINGB0YfQtdGCINC/0YPQv9C+0YfQvdGL0YUg0LLQtdC9INC4INCw0YDRgtC10YDQuNC5LCDQutC+0YLQvtGA0YvQtSDQvdCw0L/RgNCw0LLQu9GP0Y7RgtGB0Y8g0L7RgiDQvNCw0YLQtdGA0LgsINCyINGC0L4g0LbQtSDQstGA0LXQvNGPINC80LDQu9GL0Lkg0LrRgNGD0LMg0LrRgNC+0LLQvtC+0LHRgNCw0YnQtdC90LjRjyDQv9C+0LvQvdC+0YHRgtGM0Y4g0L7RgtGB0YPRgtGB0YLQstGD0LXRgi4g0JrRgNC+0LLRjCDRgSDQutC40YHQu9C+0YDQvtC00L7QvCDQuCDQv9C40YLQsNGC0LXQu9GM0L3Ri9C80Lgg0LLQtdGJ0LXRgdGC0LLQsNC80Lgg0LjQtNGD0YIg0L7RgiDQvNCw0YLQtdGA0Lgg0Log0L/Qu9Cw0YbQtdC90YLQtSDQv9C+INC/0YPQv9C+0YfQvdGL0Lwg0LLQtdC90LDQvCAo0L7QvdCwINC10LTQuNC90YHRgtCy0LXQvdC90LDRjywg0L/Rg9C/0L7Rh9C90YvRhSDQsNGA0YLQtdGA0LjQuSDQutC+0YLQvtGA0YvQtSDQvdC10YHRg9GCINCy0LXQvdC+0LfQvdGD0Y4g0LrRgNC+0LLRjCAtIDIpLCDQtNCw0LvQtdC1INC/0YPQv9C+0YfQvdCw0Y8g0LLQtdC90LAg0YDQsNC30LTQtdC70Y/QtdGC0YHRjyDQvdCwIDIg0YfQsNGB0YLQuCAtINC+0LTQvdCwINC40LTQtdGCINCyINC/0LXRh9C10L3RjCwg0LTRgNGD0LPQsNGPINGB0LvQuNCy0LDQtdGC0YHRjyDRgSDQvdC40LbQvdC10Lkg0L/QvtC70L7QuSDQstC10L3QvtC5LiDQl9Cw0YLQtdC8LCDQv9C+INCy0LXQvdC+0LfQvdGL0Lwg0YHQvtGB0YPQtNCw0Lwg0LrRgNC+0LLRjCDQstC70LjQstCw0LXRgtGB0Y8g0LIg0L/RgNCw0LLQvtC1INC/0YDQtdC00YHQtdGA0LTQuNC1LCDQvtGC0LrRg9C00LAg0YPQttC1INGB0YDQsNC30YMg0L/QtdGA0LXRhdC+0LTQuNGCINCyINC70LXQstC+0LUg0L/RgNC10LTRgdC10YDQtNC40LUg0LIg0LHQvtC70YzRiNC+0Lkg0LrRgNGD0LMg0LrRgNC+0LLQvtC+0LHRgNCw0YnQtdC90LjRjy4g0KLQsCDRh9Cw0YHRgtGMINC60YDQvtCy0LgsINC60L7RgtC+0YDQsNGPINC40LTQtdGCINCyINC/0YDQsNCy0YvQuSDQttC10LvRg9C00L7Rh9C10LosINC90LDQv9GA0LDQstC70Y/QtdGC0YHRjyDQv9C+INC70LXQs9C+0YfQvdC+0LzRgyDRgdGC0LLQvtC70YMg0Lgg0YfQtdGA0LXQtyDQsNGA0YLQtdGA0LjQsNC70YzQvdGL0Lkg0L/RgNC+0YLQvtC6ICjQkdC+0YLQsNC70LvQvtCyINC/0YDQvtGC0L7Quiwg0LrQvtGC0L7RgNGL0Lkg0L/QvtGB0LvQtSDRgNC+0LbQtNC10L3QuNGPINGA0LXQtNGD0YbQuNGA0YPQtdGCINC4INC/0YDQtdCy0YDQsNGJ0LDQtdGC0YHRjyDQsiDQsNGA0YLQtdGA0LjQsNC70YzQvdGD0Y4g0YHQstGP0LfQutGDKSDQv9C10YDQtdGF0L7QtNC40YIg0LIg0LDQvtGA0YLRgy4g0JXRgdGC0Ywg0YTQuNC30LjQvtC70L7Qs9C40YfQtdGB0LrQvtC1INC4INCw0L3QsNGC0L7QvNC40YfQtdGB0LrQvtC1INC30LDQutGA0YvRgtC40LUg0L7QstCw0LvRjNC90L7Qs9C+INC+0LrQvdCwLiDQpNC40LfQuNC+0LvQvtCz0LjRh9C10YHQutC+0LUg0LfQsNC60YDRi9GC0LjQtSDQvdCw0YfQuNC90LDQtdGC0YHRjyDQstC+INCy0YDQtdC80Y8g0YDQvtC20LTQtdC90LjRjyDRgNC10LHQtdC90LrQsCDQuCDQtdCz0L4g0L/QtdGA0LLQvtCz0L4g0LLQtNC+0YXQsCDQstC+0LfQtNGD0YXQsC4g0JTQsNCy0LvQtdC90LjQtSDQsiDQu9C10LLQvtC8INC/0YDQtdC00YHQtdGA0LTQuNC4INGB0YLQsNC90L7QstC40YLRgdGPINCx0L7Qu9GM0YjQtSDQuNC3LdC30LAg0L3QsNGH0LDQu9CwINGE0YPQvdC60YbQuNC+0L3QuNGA0L7QstCw0L3QuNGPINC80LDQu9C+0LPQviDQutGA0YPQs9CwINC60YDQvtCy0L7QvtCx0YDQsNGJ0LXQvdC40Y8sINC4INC+0LLQsNC70YzQvdC+0LUg0L7QutC90L4g0L3QsNGH0LjQvdCw0LXRgiDQt9Cw0LrRgNGL0LLQsNGC0YzRgdGPLiDQkNC90LDRgtC+0LzQuNGH0LXRgdC60Lgg0LfQsNC60YDRi9GC0LjQtSDQvtCy0LDQu9GM0L3QvtCz0L4g0L7QutC90LAg0L/RgNC+0LjRgdGF0L7QtNC40YIg0LIg0YLQtdGH0LXQvdC40LggNi0xMiDQvNC10YHRj9GG0LXQsiDQv9C+0YHQu9C1INGA0L7QttC00LXQvdC40Y8g0YDQtdCx0LXQvdC60LAsINC90L4g0LIgMjAtMjUlINGB0LvRg9GH0LDRj9GFINC+0L3QviDQvtGB0YLQsNC10YLRgdGPINC+0YLQutGA0YvRgtGL0LwuINCSINCx0L7Qu9GM0YjQuNC90YHRgtCy0LUg0YHQu9GD0YfQsNC10LIg0L7RgtC60YDRi9GC0L7QtSDQvtCy0LDQu9GM0L3QvtC1INC+0LrQvdC+INC90LUg0LzQtdGI0LDQtdGCINGE0YPQvdC60YbQuNC+0L3QuNGA0L7QstCw0L3QuNGOINC+0YDQs9Cw0L3QuNC30LzQsCDQuCDRh9C10LvQvtCy0LXQuiDQvNC+0LbQtdGCINC00LDQttC1INC90LUg0LTQvtCz0LDQtNGL0LLQsNGC0YzRgdGPINC+0LEg0Y3RgtC+0LwsINC90L4g0LIg0LrQvtC80LHQuNC90LjRgNC+0LLQsNC90LjQuCDRgSDQtNGA0YPQs9C40LzQuCDQsdC+0LvQtdC30L3Rj9C80Lgg0YHQtdGA0LTRhtCwICjQv9C+0YDQvtC60Lgg0Lgg0YIu0LQuKSDQvNC+0LbQtdGCINC/0YDQvtGP0LLQuNGC0Ywg0YHQtdCx0Y8uINCe0YLQstC10YIg0L3QsCAyINCy0L7Qv9GA0L7RgTog0JrQsNC6INC80Ysg0LfQvdCw0LXQvCwg0YDQvtGC0L7QstCw0Y8g0L/QvtC70L7RgdGC0Ywg0YMg0L3QvtCy0L7RgNC+0LbQtNC10L3QvdC+0LPQviDQvtGH0LXQvdGMINC80LDQu9C10L3RjNC60LDRjyDQv9C+INGB0YDQsNCy0L3QtdC90LjRjiDRgdC+INCy0LfRgNC+0YHQu9GL0LzQuCwg0Y/Qt9GL0Log0YLQvtC70YnQtSDQuCDQsdC+0LvRjNGI0LUg0L/QviDQvtGC0L3QvtGI0LXQvdC40Y4g0Log0KDQnyDQuCDRjdGC0L4g0Y/QstC70Y/QtdGC0YHRjyDQvtC00L3QvtC5INC40Lcg0L7RgdC+0LHQtdC90L3QvtGB0YLQtdC5INGDINC90L7QstC+0YDQvtC20LTQtdC90L3Ri9GFLiDQotCw0LrQttC1LCDRgyDQvNCw0LvRi9GI0LXQuSDRhdC+0YDQvtGI0L4g0YDQsNC30LLQuNGC0LDRjyDQutGA0YPQs9C+0LLQsNGPINC80YvRiNGG0LAg0YDRgtCwLCDRh9GC0L4g0LTQsNC10YIg0LLQvtC30LzQvtC20L3QvtGB0YLRjCDQv9C70L7RgtC90L7QuSDQs9C10YDQvNC10YLQuNC30LDRhtC40Lgg0LLQviDQstGA0LXQvNGPINCw0LrRgtCwINGB0L7RgdCw0L3QuNGPINC90L7QstC+0YDQvtC20LTQtdC90L3QvtCz0L4uINCd0LUg0LfQsNCx0YvQstCw0LXQvCDQuCDQv9GA0L4g0LbQuNGA0L7QstC+0Lkg0LrQvtC80L7QuiDQkdC40YjQsCwg0YDQsNGB0L/QvtC70L7QttC10L3QvdCw0Y8g0LIg0YnQtdC60LDRhSDRgNC10LHQtdC90LrQsCDQv9C+0LQg0YHQu9C+0LXQvCDQutC+0LbQuCwg0Lgg0LrQvtGC0L7RgNCw0Y8g0LTQsNC10YIg0L7QsdGK0LXQvCDQuCDQtNC+0YHRgtCw0YLQvtGH0L3Rg9GOINCz0LXRgNC80LXRgtC40LfQsNGG0LjRjiDQtNC70Y8g0LDQutGC0LAg0YHQvtGB0LDQvdC40Y8gKNC00LDQvdC90YvQuSDQttC40YDQvtCy0L7QuSDQutC+0LzQvtC6INCR0LjRiNCwINC90LDRh9C40L3QsNC10YIg0LjRgdGH0LXQt9Cw0YLRjCDQv9C+0YHQu9C1INC/0LXRgNC10YXQvtC00LAg0YDQtdCx0LXQvdC60LAg0YEg0LPRgNGD0LTQvdC+0LPQviDQutC+0YDQvNC70LXQvdC40Y8g0L3QsCDQstC30YDQvtGB0LvRi9C5KS4g0J3QsNGB0YfQtdGCINC80Y/Qs9C60L7Qs9C+INC4INGC0LLQtdGA0LTQvtCz0L4g0L3QtdCx0LAgLSDRgyDQtNC10YLQtdC5INC+0L3QuCDQvdC10L/QvtC70L3QvtGG0LXQvdC90L4g0YDQsNC30LLQuNGC0YssINC4INC30LDRgdC70L7QvdC60Lgg0LzQtdC20LTRgyDQs9C70L7RgtC60L7QuSDQuCDQvdC10LHQvtC8INC10YnQtSDQvdC1INGB0YTQvtGA0LzQuNGA0L7QstCw0LvQvtGB0YwgLSDQsdC70LDQs9C+0LTQsNGA0Y8g0Y3RgtC+0LzRgyDRgNC10LHQtdC90L7QuiDQvNC+0LbQtdGCINGB0L/QvtC60L7QudC90L4g0L/QuNGC0LDRgtGM0YHRjyDQuCDQtNGL0YjQsNGC0Ywg0L7QtNC90L7QstGA0LXQvNC10L3QvdC+Lg==</text:p>
          </table:table-cell>
          <table:table-cell office:value-type="float" office:value="170348" table:style-name="ce1">
            <text:p>170348</text:p>
          </table:table-cell>
          <table:table-cell office:value-type="float" office:value="92" table:style-name="ce1">
            <text:p>9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5" table:style-name="ce1">
            <text:p>1067145</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4g0J7QstCw0LvRjNC90L7QtSDQvtC60L3QviDQv9GA0LXQtNGB0YLQsNCy0LvRj9C10YIg0YHQvtCx0L7QuSDQvtGC0LLQtdGA0YHRgtC40LUg0LzQtdC20LTRgyDQv9GA0LXQtNGB0LXRgNC00LjRj9C80Lgg0Lgg0YDQsNGB0L/QvtC70LDQs9Cw0LXRgtGB0Y8g0YHQvtC+0YLQstC10YLRgdGC0LLQtdC90L3QviDQsiDQvNC10LbQv9GA0LXQtNGB0LXRgNC00L3QvtC5INC/0LXRgNC10LPQvtGA0L7QtNC60LUg0LHQu9C40LbQtSDQuiDQsNGC0YDQuNC+0LLQtdC90YLRgNC40LrRg9C70Y/RgNC90L7QvNGDINC+0YLQstC10YDRgdGC0LjRji4g0J7QvdC+INGP0LLQu9GP0LXRgtGB0Y8g0L/RgNC40YHQv9C+0YHQvtCx0LvQtdC90LjQtdC8INC00LvRjyDQv9C70L7QtNCwLCDRgtCw0Log0LrQsNC6INC60YDQvtCy0L7QvtCx0YDQsNGJ0LXQvdC40LUg0L/Qu9C+0LTQsCDQuNC80LXQtdGCINGB0LLQvtC4INC+0YHQvtCx0LXQvdC90L7RgdGC0LguINCjINC/0LvQvtC00LAg0LvQtdCz0LrQuNC1INC/0YDQsNC60YLQuNGH0LXRgdC60Lgg0L3QtSDRhNGD0L3QutGG0LjQvtC90LjRgNGD0Y7Rgiwg0L/QvtGN0YLQvtC80YMg0LbQtSDQvNCw0LvRi9C5INC40LvQuCDQv9C+LdC00YDRg9Cz0L7QvNGDINC70LXQs9C+0YfQvdGL0Lkg0LrRgNGD0LMg0LrRgNC+0LLQvtC+0LHRgNCw0YnQtdC90LjRjyDQvdC1INCy0YvRgNCw0LbQtdC90LAsINGC0L7Rh9C90LXQtSDQs9C+0LLQvtGA0Y8g0LrRgNC+0LLQvtGB0L3QsNCx0LbQtdC90LjQtSDQu9C10LPQutC40YUg0YfQtdGA0LXQtyDQu9C10LPQvtGH0L3Ri9C1INCw0YDRgtC10YDQuNC4INC+0YHRg9GJ0LXRgdGC0LLQu9GP0LXRgtGB0Y8g0LIg0LfQvdCw0YfQuNGC0LXQu9GM0L3QviDQvNC10L3RjNGI0LXQuSDRgdGC0LXQv9C10L3QuCwg0YHRgNCw0LLQvdC40YLQtdC70YzQvdC+INGDINCy0LfRgNC+0YHQu9GL0YUuINCQINGN0YLQviDQv9GA0L7QuNGB0YXQvtC00LjRgiDQsdC70LDQs9C+0LTQsNGA0Y8g0L3QsNC70LjRh9C40Y4gINC+0YLQutGA0YvRgtC+0LPQviDQvtCy0LDQu9GM0L3QvtCz0L4g0L7QutC90LAg0Lgg0LDRgNGC0LXRgNC40LDQu9GM0L3QvtCz0L4g0L/RgNC+0YLQvtC60LAuINCe0LLQsNC70YzQvdC+0LUg0L7QutC90L4g0YHQv9C+0YHQvtCx0YHRgtCy0YPQtdGCINCy0YvQsdGA0L7RgdGDINC60YDQvtCy0Lgg0LjQtyDQv9GA0LDQstC+0LPQviDQv9GA0LXQtNGB0LXRgNC00LjRjyDQsiDQu9C10LLQvtC1INC/0YDQtdC00YHQtdGA0LTQuNC1LCDRgtCw0LrQuNC8INC+0LHRgNCw0LfQvtC8INGH0LDRgdGC0LjRh9C90L4g0L7QutGB0LjQs9C10L3QuNGA0L7QstCw0L3QvdCw0Y8g0LrRgNC+0LLRjCDQv9C+0YHRgtGD0L/QsNC10YIg0YHRgNCw0LfRgyDQsiDQsdC+0LvRjNGI0L7QuSDQutGA0YPQsyDQutGA0L7QstC+0L7QsdGA0LDRidC10L3QuNGPINC80LjQvdGD0Y4g0LzQsNC70YvQuSAo0LvQtdCz0LrQuNC1KS4g0JAg0LDRgNGC0LXRgNC40LDQu9GM0L3Ri9C5INC/0YDQvtGC0L7QuiAtINCy0YvQsdGA0L7RgdGDINC60YDQvtCy0Lgg0LjQtyDQv9GA0L7RgdCy0LXRgtCwINC70LXQs9C+0YfQvdC+0LPQviDRgdGC0LLQvtC70LAg0LIg0LDQvtGA0YLRgy4g0JIg0LzQvtC80LXQvdGCINGA0L7QttC00LXQvdC40Y8g0LbQtSwg0L/QvtGB0LvQtSDRgtC+0LPQviDQutCw0Log0L3QvtCy0L7RgNC+0LbQtNC10L3QvdGL0Lkg0YHQtNC10LvQsNC10YIg0L/QtdGA0LLRi9C5INCy0LTQvtGFLCDQu9C10LPQutC40LUg0YDQsNGB0L/RgNCw0LLQu9GP0Y7RgtGB0Y8sINC60YDQvtCy0L7RgdC90LDQsdC20LXQvdC40LUg0YHQvtC+0YLQstC10YLRgdGC0LLQtdC90L3QviDQu9C10LPQutC+0LPQviDQu9C10LPQvtGH0L3Ri9C80Lgg0LDRgNGC0LXRgNC40Y/QvNC4INGD0LLQtdC70LjRh9C40LLQsNC10YLRgdGPLiDQkiDRhtC10LvQvtC8INCz0L7QstC+0YDRjywg0LvQtdCz0L7Rh9C90YvQuSDRgNGD0LMg0LrRgNC+0LLQvtC+0LHRgNCw0YnQtdC90LjRjyDQv9GA0LjQvtCx0YDQtdGC0LDQtdGCINGB0LLQvtGOINGE0YPQvdC60YbQuNC+0L3QsNC70YzQvdC+0YHRgtGMLiDQlNCw0L3QvdGL0LUg0LjQt9C80LXQvdC10L3QuNGPINCz0LXQvNC+0LTQuNC90LDQvNC40LrQuCDQv9GA0LjQstC+0LTRj9GCINC6INC30LDQutGA0YvRgtC40Y4g0L7QstCw0LvRjNC90L7Qs9C+INC+0LrQvdCwLCDRgtCw0Log0LrQsNC6INC4INGE0LjQt9C40L7Qu9C+0LPQuNGH0LXRgdC60Lgg0L3Rg9C20LTRiyDQsiDQvdC10Lwg0YPQttC1INC90LXRgiwg0Lgg0L3QsNC+0LHQvtGA0L7RgiDQvtC90L4g0YPQttC1INCyINGC0L7QuSDQuNC70Lgg0LjQvdC+0Lkg0YHRgtC10L/QtdC90Lgg0LHRg9C00LXRgiDQvNC10YjQsNGC0Ywg0L3QvtGA0LzQsNC70YzQvdC+0LzRgyDQvdCw0L/RgNCw0LLQu9C10L3QuNGOINGC0L7QutCwINC60YDQvtCy0LguINCS0L3QsNGH0LDQu9C1LCDQutCw0Log0LHRiyDRg9Cy0LXQu9C40YfQtdC90LjQtSDQstC90YPRgtGA0LjQs9GA0YPQtNC90L7Qs9C+INC00LDQstC70LXQvdC40Y8g0L/RgNC4INC/0YDQtdCy0L7QvCDQstC00L7RhdC1INC/0YDQuNCy0L7QtNC40YIg0Log0YPQu9GD0YfRiNC10L3QuNGOINCy0YvQsdGA0L7RgdCwINC60YDQvtCy0Lgg0L/RgNCw0LLRi9C8INC+0YLQtNC10LvQvtC8INGB0LXRgNC00YbQsCAo0LAg0LjQvNC10L3QvdC+INC/0YDQsNCy0YvQvCDQttC10LvRg9C00L7Rh9C60L7QvCkg0LIg0LvQtdCz0L7Rh9C90YvQuSDRgdGC0LLQvtC7LiDQo9GB0LjQu9C10L3QuNC1INGC0L7QutCwINC60YDQvtCy0Lgg0LjQtyDQv9GA0LDQstC+0LPQviDQv9GA0LXQtNGB0LXRgNC00LjRjyDQsiDQv9GA0LDQstGL0Lkg0LbQtdC70YPQtNC+0YfQtdC6INCy0YvQvdGD0LbQtNCw0LXRgiDQutC70LDQv9Cw0L3QvtC/0L7QtNC+0LHQvdGL0Lkg0LvQvtGB0LrRg9GCINGC0LrQsNC90LgsINGE0YPQvdC60YbQuNC+0L3QuNGA0YPRjtGJ0LXQuSDQv9GA0LXQttC00LUg0LrQsNC6INC60LvQsNC/0LDQvSDQvtCy0LDQu9GM0L3QvtCz0L4g0L7QutC90LAsINC30LDQutGA0YvQstCw0YLRjCDQv9GA0L7RgdCy0LXRgiDQv9C+0YHQu9C10LTQvdC10LPQvi4g0J7Qv9C40YHQsNC90L3Ri9C1INCy0YvRiNC1INC80L7QvNC10L3RgtGLINC/0YDQvtC40YHRhdC+0LTRj9GCINC/0YDQsNC60YLQuNGH0LXRgdC60Lgg0YHRgNCw0LfRgyDQv9C+0YHQu9C1INGA0L7QttC00LXQvdC40Y8sINC/0LXRgNCy0L7Qs9C+INCy0LTQvtGF0LAuINCU0LDQu9C10LUg0LbQtSwg0LIg0YLQtdGH0LXQvdC40LUg0L/RgNC10LLRi9GFINC90LXQtNC10LvRjCDQttC40LfQvdC4INC90LDQsdC70Y7QtNCw0LXRgtGB0Y8g0YHRgNCw0YHRgtCw0L3QuNC1INC60LvQsNC/0LDQvdCwINGBINC60YDQsNGP0LzQuCDQvtCy0LDQu9GM0L3QvtCz0L4g0L7RgtCy0LXRgNGB0YLQuNGPLCDQuCDQv9GA0LjQvNC10YDQvdC+INCy0L4g0LLRgtC+0YDQvtC5LdGC0YDQtdGC0YzQtdC5PGJyIC8+DQrQvdC10LTQtdC70LUg0LbQuNC30L3QuCDRgNC10LHQtdC90LrQsCDQvtCy0LDQu9GM0L3QvtC1INC+0LrQvdC+INCx0YvQstCw0LXRgiDRg9C20LUg0LfQsNC60YDRi9GC0YvQvCAo0L/QviDQvdC10LrQvtGC0L7RgNGL0Lwg0LTRgNGD0LPQuNC8INC40YHRgtC+0YfQvdC40LrQsNC8LCDQv9C+0LvQvdC+0LUg0LfQsNC60YDRi9GC0LjQtSDQvtCy0LDQu9GM0L3QvtCz0L4g0L7RgtCy0LXRgNGB0YLQuNGPINC/0YDQvtC40YHRhdC+0LTQuNGCINCyINGC0YDQtdGC0YzQtdC8INC80LXRgdGP0YbQtSwg0L/QviDQtNGA0YPQs9C40LwgLSDQtNC+INC60L7QvdGG0LAg0L/QtdGA0LLQvtCz0L4g0LPQvtC00LAg0LbQt9C90Lgg0YDQtdCx0LXQvdC60LApLiDQndC10YDQtdC00LrQviDQtNCw0L3QvdC+0LUg0L7RgtCy0LXRgNGB0YLQuNC1INC80L7QttC10YIg0L3QtSDQt9Cw0LrRgNGL0LLQsNGC0YzRgdGPINC00L4g0L/QvtC00YDQvtGB0YLQutC+0LLQvtCz0L4gKNC30YDQtdC70L7Qs9C+KSDQv9C10YDQuNC+0LTQsC4g0JAg0YHQvtCy0YHQtdC8INC90LXQt9Cw0LrRgNGL0YLQuNC1INC+0LLQsNC70YzQvdC+0LPQviDQvtC60L3QsCDQv9GA0LXQtNGB0YLQsNCy0Y/QtdGCINGB0L7QsdC+0Lkg0L7QtNC40L0g0LjQtyDQstGA0L7QttC00LXQvdC90YvRhSDQv9C+0YDQvtC60L7QsiDRgdC10YDQtNGG0LAsINC4INC+0LHRi9GH0L3QviDQvdC1INC/0YDQtdC00YHRgtCw0LLQu9GP0LXRgiDQutCw0Log0YLQsNC60L7QstC+0Lkg0L7Qv9Cw0YHQvdC+0YHRgtC4INC20LjQt9C90Lgg0LvRjtC00LXQuSAo0YDQtdC00LrQviwg0LzQvtCz0YPRgiDQtNCw0LbQtSDQvdC1INC90LDQsdC70Y7QtNCw0YLRjNGB0Y8g0L3QuNC60LDQutC40LUg0LfQvdCw0YfQuNGC0LXQu9GM0L3Ri9C1INGB0LjQvNC/0YLQvtC80YspLiDQlNCw0L3QvdC+0LUg0YHQvtGB0YLQvtGP0L3QuNC1INC4INC90LDQt9GL0LLQsNGO0YIg0L7RgtC60YDRi9GC0YvQvCDQvtCy0LDQu9GM0L3Ri9C8INC+0LrQvdC+0Lwg0LjQu9C4INC20LUg0LjQvdCw0YfQtSwg0L/QtdGA0YHQuNGB0YLQuNGA0YPRidC10LUg0L7QstCw0LvRjNC90L7QtSDQvtC60L3Qvi4g0JrQvtC90LXRh9C90L4g0LbQtSDQstGB0LUg0YLQsNC60Lgg0LTQsNC90L3QvtC1INGB0L7RgdGC0L7Rj9C90LjQtSDQvdCw0YDRg9GI0LDQtdGCINC/0YDQsNCy0LjQu9GM0L3Ri9C5INGC0L7QuiDQuCDQvdCw0L/RgNCw0LLQu9C10L3QuNC1INC60YDQvtCy0LgsINC4INCyINGG0LXQu9C+0Lwg0LPQtdC80L7QtNC40L3QsNC80LjQutC4LCDQv9GA0LjQstC+0LTRjyDQuiDRgdC80LXRiNC40LLQsNC90LjRjiDQvtC60YHQuNCz0LXQvdC40YDQvtCy0LDQvdC90L7QuSDQsNGA0YLQtdGA0LjQsNC70YzQvdC+0Lkg0Lgg0LTQtdC30L7QutGB0LjQs9C10L3QuNGA0L7QstCw0L3QvdC+0Lkg0LLQtdC90L7Qt9C90L7QuSDQutGA0L7QstC4LiDQkiDQuNGC0L7Qs9C1INC80L7Qs9GD0YIg0L3QsNCx0LvRjtC00LDRgtGM0YHRjyDQv9GA0LjQt9C90LDQutC4INCz0LjQv9C+0LrRgdC10LzQuNC4INC4INCz0LjQv9C+0LrRgdC40LgsINCz0LvQsNCy0L3Ri9C8INC+0LHRgNCw0LfQvtC8INC/0YDQvtGP0LLQu9GP0Y7RidCw0Y/RgdGPLCDQs9C+0LvQvtCy0L3QvtCz0L4g0LzQvtC30LPQsCwg0LAg0YLQsNC60LbQtSDQtNGA0YPQs9C40YUg0L7RgNCz0LDQvdC+0LIg0Lgg0YLQutCw0L3QtdC5ICjQvtC00YvRiNC60LAg0L/RgCDQvdC10LfQvdCw0YfQuNGC0LXQu9GM0L3QvtC5INGE0LjQt9C40YfQtdGB0LrQvtC5INCw0LrRgtC40LLQvdC+0YHRgtC4INC6INC/0YDQuNC80LXRgNGDKS48YnIgLz4NCjIuINCQ0L3QsNGC0L7QvNC+LdGE0LjQt9C40L7Qu9C+0LPQuNGH0LXRgdC60LjQtSDQvtGB0L7QsdC10L3QvdC+0YHRgtC4INGA0L7RgtC+0LLQvtC5INC/0L7Qu9C+0YHRgtC4LCDQutC+0YLQvtGA0YvQtSDRgdC/0L7RgdC+0LHRgdGC0LLRg9GO0YIgINCz0LXRgNC80LXRgtC40LfQsNGG0LjQuCDQuCDRg9C70YPRh9GI0LXQvdC40Y4g0LDQutGC0LAg0YHQvtGB0LDQvdC40Y8g0YMg0LTQtdGC0LXQuSwg0LLQutC70Y7Rh9Cw0Y7RgiDQsiDRgdC10LHRjyDRgdC70LXQtNGD0Y7RidC40LUg0L/RgNC40LfQvdCw0LrQuDogMSkg0LPRg9Cx0Ysg0YMg0L3QvtCy0L7RgNC+0LbQtNC10L3QvdGL0YUg0Lgg0LTQtdGC0LXQuSDQvtGC0L3QvtGB0LjRgtC10LvRjNC90L4g0LHQvtC70YzRiNC40LUsINC40LzQtdGO0YIg0L/QvtC/0LXRgNC10YfQvdGL0LUg0YHQutC70LDQtNC60LgsINC40LvQuCDRgtCw0Log0LPQvtCy0L7RgNGPLCDQstCw0LvQuNC60Lgg0YEg0LLQvdGD0YLRgNC10L3QvdC10Lkg0L/QvtCy0YDQtdGF0L3QvtGB0YLQuCDQvdCwINGB0LvQuNC30LjRgdGC0L7QuSDQvtCx0L7Qu9C+0YfQutC1OyAyKSDQutGA0YPQs9C+0LLQsNGPINC80YvRiNGG0LAg0L7RgtCy0LXRgNGB0YLQuNGPINGA0YLQsCDQsdC+0LvQtdC1INGA0LDQt9Cy0LjRgtCwINC4INC+0LHQu9Cw0LTQsNC10YIg0LHQvtC70YzRiNC10Lkg0YTRg9C90LrRhtC40L7QvdCw0LvRjNC90L7QuSDQsNC60YLQuNCy0L3QvtGB0YLRjDsgMykg0YHQu9C40LfQuNGB0YLQsNGPINC+0LHQvtC70L7Rh9C60LAg0LTQvdCwINC/0L7Qu9C+0YHRgtC4INGA0YLQsCDQuNC80LXQtdGCINC90LAg0YHQstC+0LXQuSDQv9C+0LLQtdGA0YXQvdC+0YHRgtC4INC00LjRhNGE0YPQt9C90L4g0YDQsNGB0L/QvtC70L7QttC10L3QvdGL0LUg0LzQtdC70LrQuNC1INCy0L7RgNGB0LjQvdC60LgsINC90LUg0YXQsNGA0LDQutGC0LXRgNC90YvQtSDQtNC70Y8g0LTQu9GPINCy0LfRgNC+0YHQu9C+0LPQvjsgNCkg0YLQstC10YDQtNC+0LUg0L3QtdCx0L4g0YLQsNC60LbQtSDQuNC80LXQtdGCINC90LAg0YHQstC+0LXQuSDRgdC70LjQt9C40YHRgtC+0Lkg0L/QvtC/0LXRgNC10YfQvdC+INGA0LDRgdC/0L7Qu9C+0LbQtdC90L3Ri9C1INGB0LrQu9Cw0LTQutC4ICjQtNC+0L/QvtC70L3QuNGC0LXQu9GM0L3Qviwg0L/QviDRgdGA0LXQtNC40L3QvdC+0Lkg0LvQuNC90LjQuCDQvdCwINGB0LvQuNC30LjRgdGC0L7QuSDQv9C+0YHQu9C10LTQvdC10LPQviDQuNC80LXRjtGC0YHRjyDQttC10LvRgtC+0LLQsNGC0YvQtSDQvtCx0YDQsNC30L7QstCw0L3QuNGPLCDQv9GA0LXQtNGB0YLQsNCy0LvRj9GO0YnQuNC1INGB0L7QsdC+0Lkg0L7RgdGC0LDRgtC60LgsINC40LvQuCDRgtCw0Log0LPQvtCy0L7RgNGPLCDRgNC10LzQvdCw0L3RgtGLINGB0LvRjtC90L3Ri9GFINC20LXQu9C10LcpOyA1KSDRhdCw0YDQsNC60YLQtdGA0L3QsNGPINC+0YHQvtCx0LXQvdC90L7RgdGC0Ywg0Y/Qt9GL0LrQsCwg0LrQvtGC0L7RgNCw0Y8g0YMg0LTQtdGC0LXQuSDQvtGC0L3QvtGB0LjRgtC10LvRjNC90L4g0YLQvtC70YzRidC1INC4INC60L7RgNC+0YfQtTsgNikg0LrRgNCw0Lkg0L3QtdCx0L3QvtC5INC30LDQvdCw0LLQtdGB0LrQuCDQvdC1INC00L7RgdGC0LjQs9Cw0LXRgiDQt9Cw0LTQvdC10Lkg0YHRgtC10L3QutC4INCz0LvQvtGC0LrQuCwg0L/RgNC4INGN0YLQvtC8INCy0YXQvtC0INCyINCz0L7RgNGC0LDQvdGMINGA0LDRgdC/0L7Qu9C+0LPQsNC10YLRgdGPINC90LAg0LHQvtC70LXQtSDQstGL0YHQvtC60L7QvCDRg9GA0L7QstC90LUsINGB0L7QvtCx0YnQsNGP0YHRjCDQv9GA0Y/QvNC+INGBINC/0L7Qu9C+0YHRgtGM0Y4g0L3QvtGB0LAgKCDRgtC+0YfQvdC10LUg0YXQvtCw0L3QsNC80LgpLiDQrdGC0Lgg0L7RgdC+0LHQtdC90L3QvtGB0YLQuCDRgdC/0L7RgdC+0LHRgdGC0LLRg9GO0YIg0LTRi9GF0LDQvdC40Y4g0L/RgNC4INC90LXQv9GA0LXRgNGL0LLQvdC+0Lwg0LDQutGC0LUg0YHQvtGB0LDQvdC40Y87IDcpINCi0LDQutC20LUg0L3QsCDQtNC10YHQvdCw0YUg0LjQvNC10Y7RgtGB0Y8g0LLQsNC70LjQutC+0L/QvtC00L7QsdC90YvQtSDQvtCx0YDQsNC30L7QstCw0L3QuNGPLCDQuNC70Lgg0YHQutC70LDQtNC60Lg7IDgpINC60LDQvNC+0YfQutC4INCR0LjRiNCwLCDQutC+0YLQvtGA0YvQtSDQv9GA0LXQtNGB0YLQsNCy0LvRj9GO0YIg0YHQvtCx0L7QuSDQttC40YDQvtCy0YvQtSDQutC70LXRgtGH0LDRgtC60Lgg0LzQtdC20LTRgyDRgdC70LjQt9C40YHRgtC+0Lkg0YnQtdC60Lgg0Lgg0YnQtdGH0L3QvtC5INC80YvRiNGG0LXQuSwg0YLQsNC60LbQtSDQuNCz0YDQsNGO0YIg0LLRgdC/0L7QvNC+0LPQsNGC0LXQu9GM0L3Rg9GOINGA0L7Qu9GMINC/0YDQuCDQsNC60YLQtSDRgdC+0YHQsNC90LjRjy4g0JLQvtGCINC40LzQtdC90L3QviDQtNCw0L3QvdGL0LUg0L7RgdC+0LHQtdC90L3QvtGB0YLQuCwg0LPQu9Cw0LLQvdGL0Lwg0L7QsdGA0LDQt9C+0Lwg0L/RgNC10LTRgdGC0LDQstC70LXQvdC90YvQtSDRgNCw0LfQu9C40YfQvdGL0LzQuCDRgdC60LvQsNC00LrQsNC80LgsINCy0LDQu9C40LrQsNC80LgsINC80LXQu9C60LjQvNC4INCy0L7RgNGB0LjQvdC60LDQvNC4INCyINC/0L7Qu9C+0YHRgtC4INGA0YLQsCDRgyDQtNC10YLQtdC5LCDRgdC/0L7RgdC+0LHRgdGC0LLRg9GO0YIg0LPQtdGA0LzQtdGC0LjQt9Cw0YbQuNC4INCy0L4g0LLRgNC10LzRjyDQsNC60YLQsCDRgdC+0YHQsNC90LjRjy4=</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58" table:style-name="ce1">
            <text:p>1067158</text:p>
          </table:table-cell>
          <table:table-cell office:value-type="string" table:style-name="ce1">
            <text:p>russian</text:p>
          </table:table-cell>
          <table:table-cell office:value-type="string" table:style-name="ce1">
            <text:p>Билет 5&amp;lt;br /&amp;gt; 1.Одной из форм врожденных пороков сердца является открытое овальное окно. В течении какого периода происходит его анатомическое закрытие?&amp;lt;br /&amp;gt; 2. Назовите особенность строения ротовой полости у новорожденных, которая способствует герметизации во время акта сосания.&amp;lt;br /&amp;gt;</text:p>
          </table:table-cell>
          <table:table-cell office:value-type="string" table:style-name="ce1">
            <text:p>MS7QvtGC0LrRgNGL0YLQvtC1INC+0LLQsNC70YzQvdC+0LUg0L7RgtCy0LXRgNGB0YLQuNC1INGN0YLQviDQvtGB0L7QsdC10L3QvdC+0YHRgtGMINC60YDQvtCy0L7QvtCx0YDQsNGJ0LXQvdC40Y8g0L/Qu9C+0LTQsCDRgtCw0Log0LrQsNC6INGDINC/0LvQvtC00LAg0LrRgNC+0LLQvtGC0L7QuiDQtNC+0LvQttC10L0g0L7QsdGF0L7QtNC40YLRjCDQu9C10LPQutC40LUgLCDQv9C10YDQstC5INCy0LTQvtGFINC90L7QstC+0YDQvtC20LTQtdC90L3QvtCz0L4g0LAg0LjQvNC10L3QvdC+INCy0YvRgtCw0LvQutC40LLQsNC90LjQtSDQstGA0L7QstC4INCyINC70LXQstC+0LPQviDQv9GA0LXQtNGB0LXRgNC00LjRjyDQstC+INCy0YDQtdC80Y8g0L/QtdGA0LLQvtCz0L4g0LLQtNC+0YXQsCDRgdC/0L7RgdC+0LHRgdGC0LLRg9C10YIg0LfQsNC60YDRi9GC0LjRjiDQvtGC0LrRgNGL0YLQvtCz0L4g0L7QstCw0LvRjNC90L7Qs9C+INC+0LrQvdCwICwg0YLQsNC60LjQvCDQvtCx0YDQsNC30L7QvCDQvtCy0LDQu9GM0L3QvtC1INC+0LrQvdC+INC30LDQutGA0YvQstCw0LXRgtGB0Y8g0LIg0YLQtdGH0LXQvdC40LUg0L3QtdGB0LrQvtC70YzQutC40YUg0LzQtdGB0Y/RhtC10LIg0L7RgiDRgNC+0LbQtNC10L3QuNGPINC90L7QstC+0YDQvtC20LTQtdC90L3QvtCz0L4u0JIg0YHQu9GD0YfQsNC1INC10YHQu9C4INC+0L3QviDQvdC1INC30LDQutGA0L7QtdGC0YHRjyDQvdGD0LbQvdC+INC+0LHRgNCw0YnQsNGC0YzRgdGPINC6INCy0YDQsNGH0YMg0YHQv9C10YbQuNCw0LvQuNGB0YLRgyDQuCDQvdCw0LHQu9GO0LTQsNGC0YzRgdGPINC00LDQu9C10LUg0YMg0L3QtdCz0L4uIDIu0L7RgdC+0LHQtdC90L3QvtGB0YLRjCDRgdGC0YDQvtC10L3QuNGPINGA0L7RgtC+0LLQvtC5INC/0L7Qu9C+0YHRgtC4INGN0YLQviDRgNC10YTQu9C10LrRgSDRgdC+0YHQsNC90LjRjyDQuCDQs9C70L7RgtCw0L3QuNGPIC4g0Y/Qt9GL0Log0YMg0L3QvtCy0L7RgNC+0LbQtNC10L3QvdGL0YUg0LLQviDQstGA0LXQvNGPINGA0LDRgdC/0L7Qu9C+0LbQtdC90LjRjyDQs9GA0YPQtNC4INCyINGA0L7RgtC+0LLQvtC5INC/0L7Qu9C+0YHRgtC4INCw0LLRgtC+0LzQsNGC0LjRh9C10YHQutC4INCw0LrRgtC40LLQuNGA0YPQtdGCINCw0LrRgiDRgdC+0YHQvtCw0L3QuNGPINGH0YLQviDQsdGP0LfRi9C6INC90LXQvNC90L7Qs9C+INCy0YvQv9GP0YfQuNCy0LDQtdGC0YHRjyDQstC/0LXRgNC10LQg0LTQu9GPINGD0LrRgNC10L/Qu9C10L3QuNGPINC+0LHRhdCy0LDRgtCwINGB0L7RgdC60LAg0LzQsNGC0LXRgNC4ICwg0YLQsNC6INC20LUg0LTQu9GPINGC0L7Qs9C+INGH0YLQvtCxINCy0L7Qt9C00YPRhSDQvdC1INC/0L7Qv9Cw0Lsg0LLQvNC10YHRgtC1INGBINC80L7Qu9C+0LrQvtC8INC4INGD0LrRgNC10L/Qu9GP0LXRgiDQutCw0Log0YPQttC1INCz0L7QstC+0YDQuNC70L7RgdGMINGB0LDQvCDQvtCx0YXQstCw0YIg0YHQvtGB0LrQsC4g0J3QvtCy0L7RgNC+0LbQtNC10L3QvdGL0LUg0YDQuNGC0LzQuNGH0L3QviDRgdC+0YHRg9GCINCz0YDRg9C00Ywg0LzQsNGC0LXRgNC4INC80LDRgtC10YDQuCDRg9GB0L/QtdCy0LDRjyDQv9GA0Lgg0Y3RgtC+0Lwg0LTQtdC70LDRgtGMINGB0LDQvCDQs9C70L7RgtC+0Log0Lgg0LLQtNC+0YUg0YEg0LLRi9C00L7RhdC+0LwuINCy0YvQv9GP0YfQuNCw0L3QuNGPINGP0LfRi9C60LAg0YHQv9C+0YHQvtCx0YHRgtCy0YPQtdGCINCz0LXRgNC80LXRgtC40LfQsNGG0LjQuCDQsNC60YLQsCDRgdC+0YHQsNC90LjRjy4g</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94" table:style-name="ce1">
            <text:p>914694</text:p>
          </table:table-cell>
          <table:table-cell office:value-type="string" table:style-name="ce1">
            <text:p>english</text:p>
          </table:table-cell>
          <table:table-cell office:value-type="string" table:style-name="ce1">
            <text:p>Ticket 5&amp;lt;br /&amp;gt; 1. One of the forms of congenital heart defects is an open foramen ovale. During what period of life its anatomical closure occurs?&amp;lt;br /&amp;gt; 2. What is the structural feature of the oral cavity in newborns, which promotes its sealing during the act of breast feeding. &amp;lt;br /&amp;gt;</text:p>
          </table:table-cell>
          <table:table-cell office:value-type="string" table:style-name="ce1">
            <text:p>ICBUaGUgZm9yYW1lbiBvdmFsZSBpcyBhIHNtYWxsIG9wZW5pbmcgYmV0d2VlbiByaWdodCBhbmQgbGVmdCBhdHJpYSBvZiB0aGUgZmV0YWwgaGVhcnQuIGJlZm9yZSBiaXJ0aCBpdHMgb3BlbmluZyBhbGxvd3MgYmxvb2QgdG8gYnlwYWFzIHRoZSBsdW5ncy4gYW5kIGZsb3cgZGlyZWN0bHkgIHJpZ2h0IGF0cmlhbSB0byB0aGUgbGVmdCBhdHJpYW0uIGFmdGVyIGJpcnRoIHdoZW4gYmFieSB0YWtlcyBpdHMgZnJpc3QgYnJlYXRoZXMgdGhlIGx1bmdzIGV4cGVuZCAgYW5kIGJsb29kIHByZXNzdXJlIGlzICBpbiBsZWZ0IGF0cml1bSBpbmNyZWFzZSAgY2F1c2luZyB0aGUgZm9yYW1lbiBvdmFsZSB0aGUgY2xvc2UgZnVuY3Rpb25sbHkuIG92ZXIgdGltZSBmb2xsb3dlZCBieSBhbmF0b21pY2FsIGNsb3N1cmUgd2hlcmUgY29ubmVjdGl2ZSB0aXNzdWUgZnVzZWQgdGhlIHR3byBhdHJpYWwgc2VwdGEuICAgICAgICAgICAgICAgICAgICAgICAgICAgICAgICAgICAgICAgICAgICAgICAgICAgICAgICAgICAgMSA9IHBlcmlvZCBvZiB0aGUgbGlmZSBpdHMgYW5hdG9taWNhbCBjbG9zdXJlIGZvcmVtZW4gb3ZhbGU9IHRoZSBmb3JhbWVuIG92YWxlIHR5cGljYWxseSBvY2N1cmVzIGFuYXRvbWljYWwgY2xvc3VyZSBXSVRISU4gT05FIFlFQVIgT0YgTElGRSAuIGhvd2V2ZXIgaW4gc29tZSBpbmRpdmlkdWFsIGl0cyB0YWtlIGxvbmdlciBhbmQgcGFydGlhbGx5IG9wcm4gbGVhZGluZyB0byBhIHBhdGVudCBmb3JhbWVuIG92YWxlIChQRk8pLiAgICAgICAgICAgICAgICAgICAgICAgICAgMiA9IHRoZSBzdHJ1Y3R1cmFsIGZlYXR1cmUgb2YgdGhlIG9yYWwgY2F2aXR5IGluIG5ld2Jvcm5zID0gYSBrZXkgc3RydWN0dXJhbCAgZmVhdHVyZXMgb2YgYSBvcmFsIGNhdml0eSBpbiBuZXdib3JucyBpdHMgcHJvbW90ZXMgc2VhbGluZyBkdXJpbmcgYnJlYXN0ZmVlZGluZyBpcyB0aGUgcHJlc2VuY2Ugb2YgRkFUIFBBRFMgSU4gVEhFIENIRUVLUyAoIEJVQ0NBTCBGQVQgUEFEUykuIHdoaWNoIGhlbHBzIHN0YXBiaWxpemUgaW4gdGhlIG9yYWwgY2F2aXR5IGFuZCBjcmVhdGUgYSBiZXR0ZXIgc2VhbCBkdXJpbmcgc3Vja2luZy4gYWRkaXRpb25hbGx5IGlzIG5ld2Jvcm5zIGJhYnkgVE9VTkdFIEFORCBTT0ZUIFBBTEFURSB3b3JrcyB0b2dldGhlciBmcm9tIGluIHZhY3V1bSwgZW5hYmxpbmcgZWZmaWNpYW50IG1pbGsgZXh0cmFjdGlvbi4gIA==</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12" table:style-name="ce1">
            <text:p>915012</text:p>
          </table:table-cell>
          <table:table-cell office:value-type="string" table:style-name="ce1">
            <text:p>english</text:p>
          </table:table-cell>
          <table:table-cell office:value-type="string" table:style-name="ce1">
            <text:p>Ticket 5&amp;lt;br /&amp;gt; 1. One of the forms of congenital heart defects is an open foramen ovale. During what period of life its anatomical closure occurs?&amp;lt;br /&amp;gt; 2. What is the structural feature of the oral cavity in newborns, which promotes its sealing during the act of breast feeding. &amp;lt;br /&amp;gt;</text:p>
          </table:table-cell>
          <table:table-cell office:value-type="string" table:style-name="ce1">
            <text:p>MSotQW5hdG9taWNhbCBjbG9zdXJlIG9jY3Vycy0gdGhlIGZvcm0gb2YgY29uZ2VuaXRhbCBoZWFydCBkZWZlY3RzIGlzIGFuIG9wZW4gZm9yYW1lbiBvdmFsZS4gdGhlIGZvcmFtZW4gb3ZhbGUgIGlzIHBoeXNpb2xvZ3kgb3BlbmluZyBiZXR3ZWVuIHRoZSByaWdodCBhbmQgbGVmdCBhdHJpYSBpbiB0aGUgZmV0YWwgaGVhcnQgYWxsb3dpbmcgb3h5Z2VuYXRlZCBibG9vZCBmcm9tIHRoZXBsYWNlbnRhIHRvIGJ5cGFzcyB0aGUgbm9uIGZ1bmN0aW9uYWwgZmV0YWwgbHVuZyAsIGFmdGVyIGJpcnRoIGFzIG9jY3VycyBjbG9zdXJlIGlzIHR3byBzdGFnZXMgLihhKTEgZnVuY3Rpb25hbCBjbG9zdXJlLXRpbWluZyB3aXRoaW4gdGhpcyBmaXJzdCBmZXcgaG91cnMgdG8gZGF5cyBhZnR0ZXIgYmlydGggbWVjaGFuaXNtIGF0IGJpcnRoIHRoZSBsdW5nIGV4cGFuZCByZWR1Y2luZyBwdWxtb25hcnkgdmFzY3VsYXIgcmVzaXN0YW5jZSBhbmQgaW5jcmVhc2luZyBpbiBoaWdodCBibG9vZCBwcmVzc3VyZSBpbiB0aGUgbGVmdCBhdHJpdW0gY29tYXBhcmVkIHRvIHRoZSByaWdodCBhdHJpdW0gcHVzaGluZyB0aGUgc2VwdHVtICxhIHRoaW4gZmxhcCBvZiB0aXNzdWUgYWdhbmlzdCBvZiB0aGUgc2VwdHVtIGZ1bmN0aW9uYWxseSBzZWFsbGluZyBvZiB0aGUgZm9yYW1lbiBvdmFsZS4gLihCKSBhbmF0b21pY2FsIGNsb3N1cmUtIHRoZSB0aW1pbmcgdHlwaWNhbGx5IHdpdGhpbiA2IG1vbnRoIHRvIDIgeWVhcnMgLiBhZnRlciAyIHllYXIgaXMgYW5hdG9taWNhbCBjbG9zdXJlcyBvY2N1cnMuIG92ZXIgdGltZSB0aGUgc2VwdHVtIHByaW11bSBhbmQgc2VwdHVtIHNlY2R1bWUgZnVzZSBwZXJtZW50bHkgIC4yKi0gdGhlIHN0cnVjdHVyYWwgZmVhY3R1cmUgb2YgdGhlIG9yYWwgY2F2aXR5IGluIG5ldyBib3JuIGZpcnN0IGlzIHByb21pZW50IHRvbmd1ZSBpbiB0aGUgbmV3IGJvcm4gYmFieSB0b25ndWUgaXMgcmVsYXRpdmVseSBsYXJnZSAuc2Vjb25kIGlzIHNvZnQgcGFsYXRlIC0gdGhlIG5ldyBib3JuIGJhYnkgcmVsYXRpdmVseSBoaWdoIGFuZCBhcmNoIHRoaXMgbGFyZ2Ugc2l6ZSBpcyBmbGV4aWJpbGl0eSBhbmQgYWxsb3cgdGhlIHRvbmd1ZSBtb3ZpZCBhbmQgYnJlc3QgZmVlZGluZy4gLnRoaXMgYW5hdG9taWNhbCBzdHJhY3R1cmUgaXMgY3JlYXRpbmcgYSBzZWFsIGJldHdlZW4gdGhlIHRvbmd1ZSBhbmQgcGFsYXRlLiB0aGlyZCBpcyBhYnNlbmNlIG9mIHRlZXRoIC4gdGhlIG5ldyBib3JuIGJhYnkgbGFjayB0ZWV0aCBhbmQgYWxsb3dpbmcgdG9uZ3VlIG1vdmVtZW50IC4gZW5hbmNoaW5nIGl0cyBhYmlsaXR5IHRvIGZvcm0gZHVyaW5nIGEgc2hvcnQgZHVyaW5nICBzaG9ydCBicmVhc3QgZmVlZGluZy4gNC4gc3Vja2luZyByZWZsZXgtdGhlIG5ldyBib3JuIGhhcyBhIHN0cm9uZyBzdWNraW5nIHJlZmxleCB0aGF0IGNvb3JkaW5hdGUgdG9uZ3VlIG1vdmVtZW50IHdpdGggdG8gbGlwIGNsb3N1cmUgdG8gbWFpbnRhaW5lIC4gdGhlIHJlZmxleCBpcyBjcnVjaWFsIGlzIGJyZWFzdCBmZWVkaW5nIC50aGUgcHJvbW90ZSBpdHMgc2VhbGluZyBkdXJpbmcgdGhlIGFjdCBvZiBicmVhc3QgZmVlZGluZyB3aGVuIGEgbmV3IGJvZW4gYmFieSAgYWJzZW50IG9mIHRlZXRoICxtb3ZlbWVudCBvZiB0b25ndWUgYW5kIHN1Y2tpbmcgcmVmbGV4IC4gdGhpcyBpcyBoZWxwIGJyZXN0ZmVlZGluZy4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15" table:style-name="ce1">
            <text:p>915015</text:p>
          </table:table-cell>
          <table:table-cell office:value-type="string" table:style-name="ce1">
            <text:p>english</text:p>
          </table:table-cell>
          <table:table-cell office:value-type="string" table:style-name="ce1">
            <text:p>Ticket 5&amp;lt;br /&amp;gt; 1. One of the forms of congenital heart defects is an open foramen ovale. During what period of life its anatomical closure occurs?&amp;lt;br /&amp;gt; 2. What is the structural feature of the oral cavity in newborns, which promotes its sealing during the act of breast feeding. &amp;lt;br /&amp;gt;</text:p>
          </table:table-cell>
          <table:table-cell office:value-type="string" table:style-name="ce1">
            <text:p>MS4gdGhlIGNvbmdlbml0YWwgaGVhcnQgIGRlZmVjdCBpcyBhbiBvcGVuIGZvcmFtZW4gb3ZhbGUuIGl0cyBhbmF0b21pY2FsIGNsb3N1cmUgb2NjdXJzIGluIHRoZSBsaWZlIHBlcmlvZCBvZiAyIHllYXJzICBvZiBsaWZlLiBtZWNoYW5pc206IG92ZXIgdGhlIHRpbWUsICB0aGUgc2VwdHVtICBwcmltdW0gYW5kIHRoZSBzZXB0dW0gIHNlY29uZHJpdW0gIGZ1c2UgcGVybWFuZW50bHksIHJlc3VsdGluZyAgaW4gdGhlIGFuYXRvbWljYWwgY2xvc3VyZSBvZiB0aGUgZm9yYW1lbiBvdmFsZS48YnIgLz4NCiAgMi4gICB0aGUgbmV3Ym9ybiBiYWJ5IHRha2VzIHRpbWUgdG8gYWRhcHQgdGhpcyBmZWVkaW5nIG1ldGhvZC4gICB0aGUga2V5IHN0cnVjdHVyYWwgZmVhdHVyZXMgb2YgdGhlIG9yYWwgY2F2aXR5IGluIG5ld2Jvcm4gdGhhdCBmYWNpbGl0YXRlIHRoZSBlZmZlY3RpdmUgYnJlYXN0ZmVlZGluZyBhcmU6LSAoMSlzb2Z0IHBhbGF0ZTogIHRoZSBzb2Z0IHBhbGF0ZSBpbiB0aGUgbmV3Ym9ybiAgaXMgcmVsYXRpdmVseSBoaWdoIGFuZCAgYXJjaGVkLnRoaXMgYW5hdG9taWNhbCBzdHJ1Y3R1cmUgY29udHJpYnV0ZXMgaW4gc2VhbCBiZXR3ZWVuICB0aGUgdG9uZ3VlIGFuZCB0aGUgcm9vZiBvZiB0aGUgbW91dGggZm9yIGVmZmVjdGl2ZSBicmVhc3RmZWVkaW5nLiAgICgyKSBhYnNlbmNlIG9mIHRlZXRoczogbmV3Ym9ybiBsYWNrIHRlZXRocywgYWxsb3dpbmcgdGhlIHRvdW5nZSB0byBtb3ZlIGZyZWVseSB3aXRoaW4gdGhlIG1vdXRoLCBlbmhhbmNpbmcgaXRzIGFiaWxpdHkgdG8gIGZvcm0gYSBzZWN1cmUgc2VhbCAgZHVyaW5nICBicmVhc3RmZWVkaW5nLiAoMykgc3Vja2luZyByZWZsZXhlczogIHRoZSBuZXdib3JuIGhhcyAgYSBzdHJvbmcgc3Vja2luZyByZWZsZXggIGNvb3JkaW5hdGVzIHRoZSB0b3VuZ3VlIG1vdmVtZW50IHRvIGxpcCBjbG9zdXJlLiAoNCkgcHJvbWluYW50IHRvbmd1ZTogIGluIG5ld2Jvcm5zLCB0aGUgdG9uZ3VlICBpcyByZWxpdGl2ZWx5IGxhcmdlICBjb21wYXJlZCB0byB0aGUgc2l6ZSBvZiB0aGUgb3JhbCBjYXZpdHkgYW5kIGV4dGVuZHMgb3ZlciB0aGUgbG93ZXIgIGd1bXMuICB0aGlzIGxhcmdlIHNpemUgYW5kIGZsZXhpYmlsaXR5ICBhbGxvd3MgIHRoZSB0b25ndWUgIHRvIG1vbGQgIGFyb3VuZCB0aGUgbmlwcGxlIGFuZCBjcmVhdGUgdGhlIHNlYWwgZm9yIHByb3BlciBicmVhc3RmZWVkaW5nLg==</text:p>
          </table:table-cell>
          <table:table-cell office:value-type="float" office:value="170348" table:style-name="ce1">
            <text:p>170348</text:p>
          </table:table-cell>
          <table:table-cell office:value-type="float" office:value="68" table:style-name="ce1">
            <text:p>6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86" table:style-name="ce1">
            <text:p>915086</text:p>
          </table:table-cell>
          <table:table-cell office:value-type="string" table:style-name="ce1">
            <text:p>english</text:p>
          </table:table-cell>
          <table:table-cell office:value-type="string" table:style-name="ce1">
            <text:p>Ticket 5&amp;lt;br /&amp;gt; 1. One of the forms of congenital heart defects is an open foramen ovale. During what period of life its anatomical closure occurs?&amp;lt;br /&amp;gt; 2. What is the structural feature of the oral cavity in newborns, which promotes its sealing during the act of breast feeding. &amp;lt;br /&amp;gt;</text:p>
          </table:table-cell>
          <table:table-cell office:value-type="string" table:style-name="ce1">
            <text:p>MS50aGUgZm9yYW1lbiBvdmFscGxheSBhIGNydWNpYWwgcm9sZSBpbiB0aGUgc2h1bnRpbmcgdGhlIGJsb29kIGZyb20gdGhlIHJpZ2h0IGF0cml1bSB0byB0aGUgbGVmdCBhdHJpdW0uICB0aGUgYW5hdG9taWNhbCBjbG9zZXIgb2YgdGhlIGZvcmVtYW4gb3ZhbGUuIHRoZSBmb3JhbWVuIG92YWxlIGlzIGEgZmV0YWwgY2FyZGlhYyBzdHJ1Y3R1cmUsIGFsbG93IHRoZSBibG9vZCB0byBieXBhc3MgZHVyaW5nIHRoZSBkZXZlbG9wbWVudCBvZiB0aGUgZmV0dXMsIHRoZSBmdWN0aW9uIG9mIHRoZSBmb3JhbWVuIG92ZWwgb2NjdXIgdmVyeSBzaG9pcnRseSBhZnRlciB0aGUgYmlydGgsIGR1ZSB0byBpbmNyZWFzZSBpbiB0aGUgcHJlc3N1cmUgb2YgdGhlIGxlZnQgYXRyaWFsLiB0aGUgYW5hdG9taWNhbCBjbG9zdXJlIHdoZXJlIHRoZSBzZXB0dW0gcHJlbWl1bSBhbmQgdGhlIHNlcHR1bSBzZWN1ZHVtIGZ1c2UsIGl0IHR5cGljYWxseSBjb21wbGV0ZSBpbiB0aGUgZmlyc3QgeWVhciBvZiB0aGUgYmlydGhpbiBzb21lIGNhc2VzIGl0IHJlbWFpbiB0aGUgcGF0aWVudCBpdCBpcyBrbm93biBhcyBwYXRlbnQgZm9yYW1lbiBvdmFsZS4gICAgICAgICAgICAyLiBzdHJ1Y3R1cmFsIGZlYXR1cmUgaW4gbmV3Ym9ybiBhcyBvcmFsIGNhdml0eS4gdGhlIG5ld2Jvcm4gaGF2ZSB0aGUgc3BlY2lhbGlzZWQgb3JhbCBzdHJ1Y3R1cmUgLiBpbmNsdWRpbmcgdGhlIHN1Y2tpbmcgcGFkIGluIHRoZSBjaGVla3MgYW5kIGEgaGlnaCBhcmNoZWQgcGxhdGUgLCB0aGVzZSBhbG9uZyB3aXRoIHRoZSBjaG9yZGlhdGUgdG9uZ3VlIG1vdmVtZW50IGFuZCBhbHNvIHRoZSB0aWdodCBsaXAgc2VlbC4gZHVyaW5nIHRoZSBicmVzdGZlZWRpbmcgdGhlcmUgaXMgZWZmaWNpZW50IHNlZWxpbmcgIGl0IG1pbmltaXplIHRoZSBsZWthZ2UgYW5kIG9wdGltaXplIHRoZSBmZWVkaW5nLiB0aGUgdG9uZ3VlIGlzIGxhcmdlIGluIHRoZSByZWxldmVudCBvZiB0aGUgb3JhbCBjYXZpdHkgYW5kIG1vdmUgaW4gdGhlIGNvb3JkaW5hdGUgbWFubmVyIHRvIGNyZWF0IHRoZSB2YWN1bWUgZm9yIHRoZSBzdWNja2luZy4=</text:p>
          </table:table-cell>
          <table:table-cell office:value-type="float" office:value="170348" table:style-name="ce1">
            <text:p>170348</text:p>
          </table:table-cell>
          <table:table-cell office:value-type="float" office:value="68" table:style-name="ce1">
            <text:p>6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62" table:style-name="ce1">
            <text:p>915262</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45INCw0LnQtNCwINGC0L7Qu9GL0pvSm9Cw0L3QtNGLINC20LXRgtGW0LvRltC/LNC00q/QvdC40LXQs9C1INC60q/QvdGW0L3QtSDQttC10YLRltC70LPQtdC9INC905nRgNC10YHRgtC1INC00q/QvdC40LXQs9C1INC60LXQu9C00ZYu0JHQsNC70LDQu9Cw0YDQtNGLINKb0LDRgNCw0pPQsNC9INGD0LDSm9GL0YLRgtCwINGC0LXRgNGW0YHRltC90LTQtSDQvNC+0L3Qs9C+0LvQvtC40LTRgtGLINC00LDSm9GC0LDRgNC00Ysg0LDQvdGL0pvRgtCw0pPQsNC9LtCe0LvQsNGA0LTRi9KjINC/0LDQudC00LAg0LHQvtC70YMg0YHQtdCx0LXQsdGWINC/0LjQs9C80LXQvdGCINGC0q/Qt9GD0YjRliDQttCw0YHRg9GI0LDQu9Cw0YDQtNCw0L0g0YLSr9C30ZbQu9C10LTRlizRj9KT0L3QuCDQvNC10LvQsNC90L7RhtC40YLRgtC10YAg0L/QsNC50LTQsCDQsdC+0LvRgyDTmdGB0LXRgNGW0L3QtdC9INGB0L7QvdC00LDQuSDQtNCw0pvRgtCw0YAg0YHTmdCx0LjQtNC1INC606nRgNC10LzRltC3LtCi0LXRgNGW0L3RltKjINGC0YPQsCDQsdGW0YLQutC10L0g0LzQtdC70LDQvdC+0YbQuNGC0L7Qt9GL0L0g0LrTqdGA0LXQvNGW0Lcu0J7QuyDQtNC10LPQtdC90ZbQvNGW0Lcg0LTQtdC90LXQtNC10LPRliDQutOp0LrRiNGW0Lsg0YLSr9GB0YLRliDQtNCw0pvRgtCw0YDQtNGL0qMg0LHQvtC70YPRiyzQntGA0L3QsNC70LDRgdGDINCw0LnQvNCw0pvRgtCw0YDRiyDQsdOp0LrRgdC10L3RltKjINC205nQvdC1INCw0YDSm9Cw0LTQsCDQvtGA0L3QsNC70LDRgdKb0LDQvdGL0L0g0LrTqdGA0LUg0LDQu9Cw0LzRi9C3INGB0L7QvdGL0LzQtdC9INKb0LDRgtCw0YAg0YHQuNGA0LXQuiDQttCw0pPQtNCw0LnQtNCwINCw0Y/SmyDSm9C+0LvQtNCw0YDQtNCwINC/0LDQudC00LAg0LHQvtC70YPRi9C9INC606nRgNGD0LPQtSDQsdC+0LvQsNC00Ysu0J7QuyDRgdOZ0LHQuNC00ZbSoyDQtNC10L3RgdCw0YPQu9GL0pPRi9C90LAg0LfQuNGP0L0g05nQutC10LvQvNC10LnQtNGWINGP0pPQvdC4IDItMyDQttGL0LvQtNCw0L0g0LrQtdC50ZbQvSDRgdOZ0LHQuNC00ZbSoyDSr9GB0YLRltC90LXQvSDQutC10YLRltC/INKb0LDQu9GD0YvQvSDQsNKj0pPQsNGA0YPSk9CwINCx0L7Qu9Cw0LTRiy7RgtGW0L/RgtC10L0g0LrQtdC50ZbQtNC1INC60LXRgtC/0LXQs9C10L0g0LbQsNKT0LTQsNC50LTQsCDQtdGA0LXRgdC10LrRgtC10YDQtNGW0qMg06nQt9GW0L3QtNC1INKb0LDQu9GL0L8g0LrQtdGC0YMg0LbQsNKT0LTQsNC50YvQvSDQutOp0YDQtdC80ZbQty7Qn9C10LTQuNCw0YLRgCDQvNCw0LzQsNC90Ysg0YDQtdGC0ZbQvdC00LUg0LzQtdC9INGB05nQsdC40LTRltKjINCw0L3QsNGB0YvQvdCwINCx0rHQuyDQtNCw0pvRgtCw0YAg06nQvNGW0YDQs9C1INKb0LDRg9GW0L/RgdGW0Lcg0LXQutC10L3RltC9INC205nQvdC1INCw0LvQsNKj0LTQsNC80LDRg9GL0L0g0YHSsdGA0LDQudC80YvQty7SmtC+0YDRi9GC0YvQvdC00YvQu9Cw0LnRgtGL0L0g0LHQvtC70YHQsNC8INCx0rHQuyDQtNCw0pvRgtCw0YDQtNGL0qMg0YHTmdCx0LjQtNGW0qMg06nQvNGW0YDRltC90LUg0pvQsNGD0ZbQvyDRgtOp0L3RltC/INGC0rHRgNKT0LDQvSDQttC+0psg0LXQutC10L3RltC9LNCw0LvQsNC90LTQsNC80LDRg9KT0LAg0LHQvtC70LDQtNGLLjxiciAvPg0KMi7QkdC10YDRltC70LPQtdC9INC805nQu9GW0LzQtdGCINCx0L7QudGL0L3RiNCwINCw0LnRgtCw0YLRi9C9INCx0L7Qu9GB0LDQvC43INCQ0LnQu9GL0psg0YHTmdCx0LjQtNGWINKb0LDRgNCw0pPQsNC90LTQsCDQvNCw0L3QtNCw0Lkg0LbTmdC90LUg0YLTqdCx0LUg0YLTqdC80L/QtdC60YLQtdGA0ZYg0q/Qu9C60LXQudCz0LXQvdGW0L0s0ZbRiNGW0L3RltKjINKv0LvQutC10Y7RltC80LXQvSzRgNCw0YXQuNGCINGC05nRgdC/0ZbQs9GWLNC60LXRg9C00LUg0pvRg9GL0YHRi9C90YvSoyDRgtOp0LzQtdC90LPRliDQttCw0pPRiyDQutC10qPQtdC50LPQtdC90ZbQvSzQsdCw0YPRi9GA0Ysg0pvQsNCx0YvRgNKT0LAg0LTQvtKT0LDRgdGL0L3QsNC9IDPRgdC8INGI0YvSk9GD0YvQvSzQutOp0LrQsdCw0YPRi9GAINC/0LDQu9C/0LDRhtC40Y/Qu9Cw0L3Rg9GL0L3QsCzSm9Cw0L3QtNCw0pPRiyDQutCw0LvRjNGG0LjQuSDQtNC10qPQs9C10LnRli0xLDcg0LzQvFzQuyzQsNC7INGE0L7RgdGE0L7RgCAxLDEyINC80Lxc0Lsu0J7RgdGLINCx0LXRgNGW0LvQs9C10L0g0LDSm9C/0LDRgNCw0YLRgtCw0YDSk9CwINGB0q/QudC10L3QtSDQvtGC0YvRgNGL0L8g0L3TmdGA0LXRgdGC0LXQtNC10LPRliDRgdKv0LnQtdC6INC20q/QudC10YHRltC90ZbSoyDQt9C10YDRgtGC0LXRgyDTmdC00ZbRgdGW0LzQtdC9INCw0LnRgtCw0YLRi9C9INCx0L7Qu9GB0LDQvCDRgNCw0YXQuNGC0YLRltKjINC/0LDQudC00LAg0LHQvtC70YMg0LzSr9C80LrRltC90LTRltCz0ZbQvSDQsdC+0LvQttCw0LnQtNGLLtCW0LDRg9Cw0LHRi9C80LTRiyDQvdC10LPRltC30LTQtdC50YLRltC9INCx0L7Qu9GB0LDQvCDQsNKT0LfQsNC00LAg0JQg0LTTmdGA0YPQvNC10L3RltKjINC20LXRgtGW0YHQv9C10YPRiNGW0LvRltCz0ZbQvSDRj9KT0L3QuCDRgdKv0LnQtdC60YLQtdGA0LTRltKjINC20rHQvNGB0LDRgNGD0YvQvNC10L0g0pvQsNGC0LDRjtGL0LzQtdC9INGB0LjQv9Cw0YLRgtCw0LvQsNGC0YvQvSDQutOp0YDRltC90ZbRgS7QvdOZ0YDQtdGB0YLQtdC90ZbSoyDRgdKv0LnQtdC6INC20q/QudC10YHRltC9INC30LXRgNGC0YLQtdGDINKv0YjRltC9INGA0LXQvdGC0LPQtdC90L7Qu9C+0LPQuNGP0LvRi9KbINOZ0LTRltGB0YLQtdGA0ZbQvdC10L0g06nRgtC60ZbQt9C10LzRltC3LtCg0LXQvdGC0LPQtdC9INGB05nRg9C70LvQtdGA0ZbQvdC10L0g0YHSr9C50LXQuiDSm9Kx0YDRi9C70YvQvNGL0LzQtdC9INGC0YvSk9GL0LfQtNGL0pPRi9C9INC+0L3Ri9C80LXQvSDSm9C+0YHQsCDTqdGB0YPRltC9INCw0L3Ri9Kb0YLQsNGD0pPQsCDQsdCw0pPRi9GC0YLQsNC70pPQsNC9INOZ0LTRltGBINCx0L7Qu9GL0L8g0YLQsNCx0YvQu9Cw0LTRiy7RgNC10L3RgtCz0LXQvdC90LXQvSDRgdKv0LnQtdC60YLRltKjINKx0YjRgtCw0YDRi9C90YvSoyDRgtC+0LfRg9GLINGC0L7Qt9Cx0LDRg9GL0L0g0LHQsNKT0LDQu9Cw0YPSk9CwINC80q/QvNC60ZbQvdC00ZbQuiDQsdC10YDQtdC00ZYu0KDQtdC90YLQs9C10L0g0LDRgNKb0YvQu9GLINKb0LDQvdC00LDQudC00LAg0LTQsCDQsdGW0YAg0LTQtdGE0L7RgNC80LDRhtC40Y8g0L3QtdC80LXRgdC1INCw0YPRi9GC0pvRg9C70LDRgNC00YvSoyDQsdCw0YAg0LbQvtKT0YvQvSDQutOp0YDRg9Cz0LUg0LzSr9C80LrRltC90LTRltC6INCx0LXRgNC10LTRli7QkdC10YDRltC70LPQtdC90LPQtSDQvdCw0LfQsNGAINCw0YPQtNCw0YDRgdCw0psg0LzQsNKj0LTQsNC5INC80LXQvSDRgtOp0LHQtSDRgtOp0LzQv9C10LrRgtC10YDRltC90ZbQvdGW0qMg0q/Qu9C60LXQudCz0LXQvdGW0L0g0LrTqdGA0LUg0LDQu9Cw0LzRi9C3INC+0YHRi9KT0LDQvSDQvtGA0LDQuSDQsdGW0Lcg0YDQsNGF0LjRgtC60LUg0LrSr9C00ZbQutGC0LXQvdC10LzRltC3LtKa0LDQvSDQsNC90LDQu9C40LfRliDQutCw0LvRjNGG0LjQuSDQttOZ0L3QtSDRhNC+0YHRhNC+0YDQu9Cw0YDQtNGL0qMg0LrTqdGA0YHQtdGC0LrRltGI0YLQtdGA0ZbQvSDQutOp0YDQtSDQsNC70LDQvNGL0Lcs06nQt9GW0L3RltKjINC90L7RgNC80LDRgdGL0L3QsNC9INGC0q/RgdGW0L8g0LrQtdGC0YPRltC90LXQvSDRgdKv0LnQtdC6INC20q/QudC10YHRltC90LUg0pvQsNGC0YvRgdGC0Ysg0LrSr9C00ZbQuiDRgtGD0LDQtNGLLiDRgdKv0LnQtdC60LrQtSDSm9Cw0YLRgtGLINOZ0YHQtdGAINC10YLQtdGC0ZbQvdGW0qMg0LXRgdC60LXRgNGD0ZbQvNGW0Lcg0pvQsNC20LXRgi7QpNC40LfQuNC60LDQu9GL0psg0YLSr9GA0LTQtSDSm9Cw0YDQsNGDINCw0YDSm9GL0LvRiyDRj9KT0L3QuCDQv9Cw0LvRjNC/0LDRhtC40Y/Qu9Cw0YMg0LDRgNKb0YvQu9GLINGB0q/QudC10LrRgtC10YDQtNGW0qMg0YjRi9KT0YvSo9Kb0Ysg0LbQtdGA0LvQtdGA0ZbQvSDQv9Cw0LvRjNC/0LDRhtC40Y/Qu9Cw0YPSk9CwINC80q/QvNC60ZbQvdC00ZbQuiDQsdC10YDQtdC10LTRli7SmtC+0YDRi9GC0LAg0LrQtdC70LPQtdC90LTQtSDQtdCz0LXRgNC00LUg0L3TmdGA0LXRgdGC0LXQs9C1INC90LDSm9GC0Ysg0LTQuNCw0LPQvdC+0Lcg0pvQvtC50pPRi9C80YvQtyDQutC10LvRgdC1INC+0L3QtNCwINC30LXRgNGC0YLQtdGDINC20q/RgNCz0ZbQt9GW0L8g0pvQsNC9INCw0L3QsNC70LjQt9C00LXRgNGW0L0g0YLQsNC70LTQsNGDINC+0YLRi9GA0YvQvyDRgtCw0pPRiyDSm9C+0YHRi9C80YjQsCDQt9C10YDRgtGC0LXRg9C70LXRgNC00ZYg0LbSr9GA0LPRltC30LUg0L7RgtGL0YDQsCzQttOZ0L3QtSDQtNOZ0YDRltCz0LXRgNCz0LUg0LbSr9Cz0ZbQvdGDINCw0YDSm9GL0LvRiyDQtNC40LDQs9C90L7Qt9C00Ysg0L3QsNKb0YLRiyDSm9C+0Y8g0LDQu9Cw0LzRi9C3LiA8YnIgLz4NCg==</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2 сұрақ толық емес, кателіктер бар объективті қарағанда қандай симтомдарді анықтаймыз№</text:p>
          </table:table-cell>
          <table:table-cell office:value-type="float" office:value="0" table:style-name="ce1">
            <text:p>0</text:p>
          </table:table-cell>
          <table:table-cell table:number-columns-repeated="16376"/>
        </table:table-row>
        <table:table-row table:style-name="ro1">
          <table:table-cell office:value-type="float" office:value="915263" table:style-name="ce1">
            <text:p>915263</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4g0KLQtdGA0ZYg0LzQtdC70LDQvdC+0YbQuNGC0L7Qt9GLINGC0LXRgNC80LjQvdGW0LzQtdC9INCx0LDQudC70LDQvdGL0YHRgtGLINKv0LTQtdGA0ZbRgSwg0YLQtdGA0ZYg0LTQtSDQvNC+0L3Qs9C+0LvQvtC40LQg0LTQsNKb0YLQsNGA0YvQvdGL0qMg0LbQuNGC0L3QsNC70YPRi9C80LXQvSDQutOp0YDRltC90LXQtNGWLiDQnNC+0L3Qs9C+0LvQvtC40LTRgtGLINGC05nQvdC00LXRgSDQtNCw0pvRgtCw0YAgLSDQsdGW0LfQtNC1INCx0LDQu9Cw0LvQsNGA0LTQsCDRgtC10Lcg06nRgdGD0ZbQvNC10L0g0LbTmdC90LUg0YLQtdGA0ZYg0L/QuNCz0LzQtdC90YLRgtC10YDRltC90ZbSoyjQvNC10LvQsNC90LjQvSDRgdC40Y/Sm9GC0Ysg0LbTmdC90LUg0YIu0LEuKSDQttC40L3QsNC70YvQvywg0LTSsdGA0YvRgSDRgtC10YDRliDQsdC+0LnRiyDRgtCw0YDQsNC70LzQsNGD0YvQvdCw0L0g0LTQtdGD0LPQtSDQsdC+0LvQsNC00YsuINCR0ZbQt9C00LUg0LDSk9C30LDQtNCwINGC0LXRgNGW0LTQtSDQvNC10LvQsNC90L7RhtC40YLRgtC10YAg0LzQtdC70LDQvdC40L0g0L/QuNCz0LzQtdC90YLRltC90ZbSoyDRgtKv0LfRltC70ZbRg9GW0L0g0LHRltC70LXQvNGW0LcsINCx0rHQuyDQsNC00LDQvCDRgtC10YDRltGB0ZbQvdGW0qMg0YPQu9GM0YLRgNCw0LrSr9C70LPRltC9INGB05nRg9C70LXQu9C10YDRltC90LUg0YDQtdCw0LrRhtC40Y/RgdGLINC10LrQtdC90ZbQvSDQsdGW0LvQtdC80ZbQtywg0L7RgdGL0pPQsNC9INCx0LDQudC70LDQvdGL0YHRgtGLINCw0LTQsNC8INGC0LXRgNGW0YHRliDRgtKv0YHRliDTqdC30LPQtdGA0ZbQvyDQvtGC0YvRgNCw0LTRiy4g0JzRi9GB0LDQuyDSr9GI0ZbQvSDQsNGE0YDQuNC60LDQu9GL0pvRgtCw0YDQtNGLINCw0LvQsNGC0YvQvSDQsdC+0LvRgdCw0pssINC+0Lsg0LbQtdGA0LvQtdGA0LTQtSDQutKv0L0g0pvQsNGC0YLRiyDRi9GB0YLRi9KbINCx0L7Qu9KT0LDQvdC00YvSm9GC0LDQvSwg0L7Qu9Cw0YDQtNGL0qMg0L7RgNCz0LDQvdC40LfQvNGW0L3QtNC1INC80LXQu9Cw0L3QuNC9INC606nQv9GC0LXQvyDRgtKv0LfRltC70ZbQvywg0YPQu9GM0YLRgNCw0LrSr9C70LPRltC9INGB05nRg9C70LXQu9C10YDQs9C1INGA0LXQsNC60YbQuNGPINGA0LXRgtGW0L3QtNC1INC+0LvQsNGAINGC0LXRgNGW0YHRliDRgtGL0Lwg0pvQsNGA0LDQudGL0L8g0LrQtdGC0LXQtNGWLiDQldC90LTRliDQsdCw0LvQsNC70LDRgNC00LAg0LzQvtC90LPQvtC70L7QuNC00YLRiyDQtNCw0pvRgtCw0YAg0L/QsNC50LTQsCDQsdC+0LvRg9GL0L3QsCDQutC10LvRgdC10LosINCx0rHQvdC00LDQuSDQtNCw0pvRgtCw0YAg0L3QtdCz0ZbQt9C40L3QtdC9INCQ0LfQuNGPINGF0LDQu9GL0pvRgtCw0YDRiyDQsNGA0LDRgdGL0L3QtNCwINCx0LDQudKb0LDQu9Cw0LTRiywg0LHSsdC90LTQsNC5INC00LDSm9GC0LDRgNC00YvSoyDQv9Cw0LnQtNCwINCx0L7Qu9GD0YvQvdCwINGB0LXQsdC10L86INCx0LDQu9CwINGC0LXRgNGW0YHRliDSm9Cw0LHQsNGC0YLQsNGA0Ysg05nQu9GWINGC0L7Qu9GL0psg0LbQtdGC0ZbQu9C80LXQs9C10L0sINKb0LDQsdCw0YLRgtCw0YAg0LDRgNCw0YHRiyDQsdC+0YEg0LTQtdGD0LPQtSDQutC10LvQtdC00ZYsINC00LDQvNGDINCx0LDRgNGL0YHRi9C90LTQsCDRgtC10YDRliDSm9Cw0LHQsNGC0YLQsNGA0Ysg0LDRgNCw0LvRi9KT0YvQvdGL0qMg0LDRgNCw0pvQsNGI0YvQutGC0LDRgNGLINOp0LfQs9C10YDRg9C40L3RltKjINOZ0YHQtdGA0ZbQvdC10L0g0LHRltC30LTQtSDQtNC10YDQvNCwINKb0LDQsdCw0YLRi9C90LTQsCDQvNC10LvQsNC90LjQvSDRgtKv0LfRg9GI0ZYg0LbQsNGB0YPRiNCw0LvQsNGA0YvQvdGL0qMo0LzQtdC70LDQvdC+0YbQuNGC0LXRgNC00ZbSoykg0LbQuNC90LDQu9GL0L8g0pvQsNC70YPRi9C90LDQvSDQutOp0YDRltC90LXRgtGW0L0g0LTQsNKbLiDQkdC40YDQsNC6INGC0LAg0LHSsdC7INC00LDSmyDQsNGC0LDQu9GD0Ysg0LzQvtC90LPQvtC70L7QuNC00YLRi9KbINCx0L7Qu9Cz0LDQvdGL0LzQtdC9ICwg0LHRltGAINC10LvQtNGW0qMg0L3QtdC80LXRgdC1INC80LXQutC10L0g0LDQtNCw0Lwg0LTQsNGA0Ysg0q/RiNGW0L0g0pvQvtC70LTQsNC90YvQu9C80LDQudC00YssINC60LXQtyDQutC10LvQs9C10L0g0LDQtNCw0LzQtNCw0YDQtNCwINCx0LDQudKb0LDQu9GD0Ysg0LzSr9C80LrRltC9LiDQnNC10LvQsNC90L7RhtC40YLRgtC10YAg0LbQuNC90LDQu9GB0LAsINC80LXQu9Cw0L3QuNC9INC/0LjQs9C80LXQvdGC0ZYg0LTQtSDQvtGB0Ysg0LbRjdC10YDQtNC1INOp0L3QtNGW0YDRltC70L8sICDRgtC10YDRliDQv9C40LPQvNC10L3RgtGC0LXRgNGW0L3RltKjINC20LjQvdCw0LvRi9C/INKb0LDQu9GD0YvQvdCw0L0g0L7RgdGL0L3QtNCw0Lkg0LTQsNKb0YLQsNGAINC/0LDQudC00LAg0LHQvtC70LDQtNGLLiDQkdKx0Lsg0LTQsNKb0YLQsNGAINGD0LDSm9GL0YIg06nRgtC1INC60LXQu9C1INC80LXQu9Cw0L3QuNC9INC20L7RjtGI0Ysg0YTQtdGA0L/QvNC10L3RgtGC0LXRgNGW0L3RltKjINOZ0YHQtdGA0ZbQvdC10L0g0LbQvtC50YvQu9GL0L8g0LrQtdGC0YPRliDQtNC1INC80q/QvNC60ZbQvSwg0L3QtdCz0LjQt9C40L3QtdC9IDItMyDQttCw0YHQutCwINC00LXQudC40L0g0LbQvtC50YvQu9GD0Ysg0LrQtdGA0LXQuiwg0LHRltGA0LDSmyDRgtCwINC60LXQuSDQttCw0LnQtNCw0LnQu9Cw0YDQtNCwINC10YDQtdGB0LXQutGC0LXRgNC00LUg0LTQtSDRgdCw0pvRgtCw0LvRi9C/INKb0LDQu9GD0Ysg0LTQsCDQvNKv0LzQutGW0L0uINCR0rHQuyDQvdC10LPRltC30ZbQvdC10L0g0LrQvtCx0ZbQvdC10YHQtSAi0L3QtdC00L7QvdC+0YjQtdC90L3Ri9C5IiDRgtGD0YvQu9KT0LDQvSDQsdCw0LvQtNCw0YDQtNCwINC60LXQt9C00LXRgdC10LTRli4g0JHRltGA0LDSmyDQutKv0L3RltC90LUg0LbQtdGC0ZbQvyDRgtGD0YvQu9KT0LDQvSDQsdCw0LvQsNC90YvSoyDRgtC10YDRltGB0ZbQvdC00LUg0LzQvtC90LPRiNC+0LvQvtC40LTRgtGL0psg0LTQsNKb0YLQsNGA0LTRiyDQsdCw0LnQutCw0LvRg9GLINC10YjSm9Cw0L3QtNCw0Lkg0L/QsNGC0L7Qu9C+0LPQuNGEINC10LzQtdGBINC10LrQtdC90ZbQvSDQsNC90LDRgdGL0L3QsCDRgtKv0YHRltC90LTRltGA0YMg0LrQtdGA0LXQuiwg0LrSr9C50LfQtdC70ZbRgdCz0LUg0L7RgNGL0L0gINC20L7Smy4g0J7RgNC90LDQu9Cw0YHRgyDQsNC50LzQsNKb0YLQsNGA0Ysg0LHRltGA0L3QtdGI0LUsINC+0LvQsNGAOiDQkNC70LDSm9Cw0L0g0LbTmdC90LUg0YLQsNCx0LDQvSDRgtC10YDRltGB0ZYsINGB0LDQvSwg0YHQuNGA0LDSmyDQuNGL0pvRgtCwINC205nQvdC1INCx0LXQu9C00LUg0LTQtSDRgtC10YDRliDTqdKj0ZbRgNC70LXRgNGWINC80LXQvSDQsNGA0pvQsNC00LAg0LrTqdCx0ZbRgNC10Log0LrQtdC30LTQtdGB0LXQtNGW0q8uICAyLdGB0rHRgNCw0psuINCe0LHRitC10LrRgtC40LLRgtGWINC60LDRgNCw0YMg0LbTmdC90LUg0YjQsNKT0YvQvNC00LDRgNKT0LAg0YHSr9C50LXQvdC1INC+0YLRi9GA0L7Ri9C/LCDQsdCw0LvQsNC00LAg0YDQsNGF0LjRgiDQsNGD0YDRg9GL0L3Ri9KjINCx0LXQu9Cz0ZbQu9C10YDRltC9INC606nRgNC10LzRltC3LiDQoNCw0YXQuNGCLSDQvtGA0LPQsNC90LjQt9C80LTQtSDQlCDQtNOZ0YDRg9C80LXQvdGW0L3RltKjINC20LXRgtGW0YHQv9C10YPRiNGW0LvRltCz0ZbQvNC10L0g0LrTqdGA0ZbQvdC10YLRltC9LCDRgdKv0LnQtdC60YLQtSDQvNC40L3QtdGA0LDQu9C00Ysg0LfQsNGC0YLQsNGA0LTRi9KjINC205nQvdC1INC+0YDQs9Cw0L3QuNC60LDQu9GL0psg0LfQsNGC0YLQsNGA0LTRi9KjINC80LXRgtCw0LHQvtC70LjQt9C80ZbQvdGW0qMg0LHSsdC30YvQu9GD0YvQvNC10L0g0LrTqdGA0ZbQvdC10YLRltC9LCDRgdKv0LnQtdC6INC00LXRhNC+0YDQvNCw0YbQuNGP0YHRi9C90YvSoyDQsdCw0LnSm9Cw0LvRg9GL0LzQtdC9INC606nRgNC+0ZbQvdC10YLRltCz0L0g0LDRg9GA0YMsINCx0YvQu9Cw0LnRiNCwINCw0LnRgtKb0LDQvdC00LvQsCDQlCDQs9C40L/QvtCy0LjRgtCw0LzQuNC90L7Qt9GL0L3Ri9KjINGB0LDQu9C00LDRgNGL0L3QsNC9INC00LDQvNC40YLRi9C9INC+0YHRgtC10L7QvNCw0LvRj9GG0LjRjy4g0JHQsNGD0YvRgCDSm9Cw0LHRi9GA0pPQsCDQtNC+0pPQsNGB0YvQvdCw0L0g0YjRi9KT0YvQvyDRgtKx0YDRg9GLLCDQvdOZ0YDQtdGB0YLQtdC70LXRgNC00LUg0L3QvtGA0LzQsCDQsdC+0LvRi9C/INGC0LDQsdGL0LvQsNC00YssINOp0LnRgtC60LXQvdGWINCx0LDRg9GL0YAg0q/Qu9C60LXQvSDQvNKv0YjQtSDQsdC+0LvSk9Cw0L3QtNGL0LrRgtCw0L0sINCx0LDQu9Cw0LvQsNGA0LTQsCDQutGD0YDRgdCw0Log0LrRg9GL0YHRiyDQvNC10L0g0LrQtdGD0LTQtSDSm9GD0YvRgdGLINC60ZbRiNC60LXQvdGC0LDQuSDQsdC+0LvRg9GL0L3QsNC9LCDQsdCw0YPRi9GAL9Kb0rHRgNGB0LDQuiDQutGD0YvRgdGLICLRgdC+0L7RgtC90L7RiNC10L3QuNC1ItGB0ZYg0q/Qu9C60LXQvSDQsdC+0LvQsNC00Ysg0LTQsCwg0LHQsNGD0YvRgCDSm9Cw0LHRi9GA0pPQsCDQtNC+0pPQsNGB0YvQvdCw0L0g0YjRi9KT0YvQvyDRgtKx0YDQsNC00YsuINCUINC005nRgNGD0LzQtdC90ZYg0LHRltC30LTQtSDRgtC10YDRltC00LUg0YPQu9GM0YLRgNCw0LrSr9C70LPRltC9INGB05nRg9C70LXQu9C10YDRltC90ZbSoyDTmdGB0LXRgNGW05nQvSDRgdC40L3RgtC10LfQtNC10LvQtdC00ZYsINC+0Lsg0LrQtdC30LTQtSDQv9GA0L7QstC40YLQsNC80LjQvSDQsdC+0LvRi9C/INGC0LDQsdGL0LvQsNC00YssINC+0Lsg0LDQu9C00YvQvNC10L0g0LHQsNGD0YvRgNKT0LAg0LrQtdC50ZbQvSDQsdKv0LnRgNC10LrRgtC1INC80LXRgtCw0LHQvtC70LjQt9C80LPQtSDSsdGI0YvRgNCw0L8sIDI1KNCe0J0p0JQg0LDQudC90LDQu9Cw0LTRiy4gINCR0rHQuyDQstC40YLQsNC80LjQvdC90ZbSoyDTmdGB0LXRgCDQtdGC0YMg0LzQtdGF0LDQvdC40LfQvNGWOiDQlCDQstC40YLQsNC80LjQvdGWINGB0q/QudC10Log0YLRltC90ZbQvdC00LXQs9GWICLQvNCw0LrRgNC+0YTQsNCz0YLRi9KbIiDQttCw0YHRg9GI0LDQu9Cw0YAtINC+0YHRgtC10L7QutC70LDRgdGC0LDRgNKT0LAg05nRgdC10YAg0LXRgtC10LTRliDQtNC1LCDRgdKv0LnQtdC6INGA0LXQt9C+0YDQsdGG0LjRj9GB0YvQvSDRiNCw0pvRi9GA0YvQvywg0pvQsNC90LTQsCDQodCwMisg0LbTmdC90LUg0J0y0KDQnjQtINC00LXSo9Cz0LXQudGW0L0g0LDRgNGC0YLRi9GA0LDQtNGLLiDQkdKv0LnRgNC10LrRgtC1INC60LDQu9GM0YbQuNC50LTRltKjINGA0LXQsNCx0YHQvtGA0LHRhtC40Y/RgdGL0L0g0LrSr9GI0LXQudGC0LXQtNGWLCDQsdKx0Lsg0pvQsNC90LTQsCDQutCw0LvRjNGG0LjQuSDQtNC10qPQs9C10LnRltC9INC+0LTQsNC9INOZ0YDRliDQttC+0pPQsNGA0YvQu9Cw0YLQsNC00Ysg0LTQsCwg0YDQtdC30L7QsdGG0LjRjyDQsdC+0LvSk9Cw0L0g0YHSr9C50LXQuiDRgtGW0L3RltC90ZbSoyDQutCw0LnRgtCwINC60YPRgNGL0LvRg9GL0L3QsCDQttKx0LzRgdCw0LvQsNC00YsuINCV0L3QtNGWINC+0YHRiyDQstC40YLQsNC80LjQvdC90ZbSoyDQsNC30LTRi9KT0YvQvdCw0L0g0pvQsNC90LTQsCDQutCw0LvRjNGG0LjQuSDQvNC10L0g0YTQvtGB0YTQvtGAINKb0YvRiNKb0YvQu9GL0L3Ri9KjINC806nQu9GI0LXRgNGWINGC06nQvNC10L3QtNC10LPQtdC9LCDQsdKx0Lsg0LjQvtC90LTQsNGAINGC06nQvNC10L3QtNC10YPRltC90LXQvSDRgdKv0LnQtdC60YLQtSDQutC10YDQtdC60YLRliDQutCw0LvRjNGG0LjQudCz0LjQtNGA0L7QutGB0LjQsNC/0LDRgtC40YLRgtC10YDRliDRgtKv0LfRltC70LzQtdC5LCDRgdKv0LnQtdC6INC80LjQvdC10YDQsNC70LjQt9Cw0YbQuNGP0YHRiyDQsNC30LDRj9C00Ysg0LTQsCwg0L7RgNCz0LDQvdC40LrQsNC70YvSmyDQvdOZ0YDRg9GL0LfQtNCw0YAo0LrQvtC70LvQsNCz0LXQvSAxINGC0LjQv9GWKSDQutOp0LHQtdC50ZbQvyDQutC10YLQtdC00ZYg0LTQtSwg0YHSr9C50LXQuiDRgtGW0L3RliDRjdC70LDRgdGC0LjQutCw0LvRi9KbINCx0L7Qu9GL0L8sINC90LDQs9GA0YPQt9C60LAg0YLSr9GB0YHQtSDTmdGA0YLSr9GA0LvQuCDQtNC10YTQvtGA0LzQsNGG0LjRj9C70LDRgNKT0LAg0rHRiNGL0YDQsNC50LQuINCg0LDRhdC40YLRgtGW0qMg0L/QsNC50LTQsCDQsdC+0LvRgyDQvNC10YXQsNC90LjQt9C80ZbQvSzQlCDQs9C40L/QvtCy0LjRgtCw0LzQuNC90L7Qt9GL0LzQtdC9INGC0q/RgdGW0L3QtNGW0YDQtNGW0LwsINC10L3QtNGWINC+0YHRi9C90Ysg0LfQtdGA0YLRgtC10YMg05nQtNGW0YHRgtC10YDRltC90LUg0LrQtdC70YHQtdC6LiDQodKv0LnQtdC6INGC0ZbQvdGW0L3RltKjINC30LXRgNGC0YLQtdGDINOZ0LTRltGB0YLQtdGA0ZYg0LHRltGA0L3QtdGI0LU6INCg0LXQvdGC0LPQtdC9INGC0q/RgdGW0YDRgy0g0YHSr9C50LXQutGC0ZbSoyDQtNC10YTQvtGA0LzQsNGG0LjRj9C70LDRgNGL0L0g0LrTqdGA0LXQvNGW0LcsINGB0q/QudC10Log0pvSsdGA0YvQu9GL0LzRi9C9LCDRgtGL0LPRi9C30LTRi9Cz0LjQvSDQutC+0YDRg9Cz0LUg0LHQvtC70LDQtNGLLiDQoNCw0YXQuNGC0LrQtSDQv9C+0LTQvtC30YDQtdC90LjQtSDQsdC+0LvRgdCwINGB0q/QudC10Log06nRgdGDINGC0LDSm9GC0LDQudGI0LDQu9Cw0YDRi9C90LXRi9KjINOp0LfQs9C10YDRg9GWLCDSsdC30YvQvSDRgdKv0LnQtdC6INGD0YjRgtCw0YDRi9C90YvSoyDRgtC+0LfRg9GLLCDQtNC10LPQtdC90LTQtdC5INCx0LXQu9Cz0ZbQu9C10YAg0LrTqdGA0YPQs9C1INCx0L7Qu9Cw0LTRiy4gINKa0LDQvSDQsNC90LDQu9C40LfRliwg0YHQvtC90YvSoyDRltGI0ZbQvdC00LUg0KHQsDIrKNC60LDQu9GM0YbQuNC5KSDQvNC10L0g0J0y0KDQnjQtINC40L7QvdC00LDRgNGL0L3Ri9KjINGB0YvQvdCw0LrRgtCw0YDQvSDQsNC70LDQvNGL0LcuINCU0LXQvdGB0LjRgtC+0LzQtdGC0YDQuNGPINCw0LTQuNGB0LjQvSDQutC+0LvQtNCw0L3RgyDQsNGA0LrRi9C70YssINGB0YPQudC10Log0YLRltC90ZYg0YLRi9KT0YvQt9C00YvSk9GL0L0g0LHQsNC60YvQu9Cw0YPSk9CwINCx0L7Qu9Cw0LTRiy4g0KLRi9KT0YvQt9C00YvQvNC10L0g0pvQsNGC0LDRgCDSm9Kx0YDQsNC80YvQvSjQutC+0LvQu9Cw0LPQtdC9INC806nQu9GI0LXRgNGWLCDQutCw0LvRjNGG0LjQuSDQvNC10L0g0YTQvtGB0YTQvtGAINC806nQu9GI0LXRgNC70LXRgNGW0L3RltKjINCw0YDQsNKb0LDRgtGL0LPQvdCw0YHRiykg0LrTqdGA0YPQs9C1INCx0L7Qu9Cw0LTRiy4g0JrQu9C40L3QuNC60LDQu9GL0Log0YLQtdC60YHQtdGA0YMg0YHSr9C50LXQutGC0LXRgNC00LjQvSDRiNGL0LPRi9C90LrRiyDQttC10YDQu9C10YDQuNC9INC/0LDQu9GM0L/QsNGG0LjRj9C70LTQsNC/INC606nRgNGD0LPQtSDQsdC+0LvQsNC00YssINC20LDQvSDQttCw0LrRgtGLINC30LXRgNGC0YLQtdGDINC60LXRgNC10LouINOY0YDRgtGD0YDQu9GWINC40L3RhNC10LrRhtC40Y/Qu9GL0psg0LDRg9GA0YPQu9Cw0YAg0LTQsCDQsdCw0LnSm9Cw0LvRg9GLINC80q/QvNC60L0sINC20LDQvSDQttCw0LrRgtGLINGE0LjQt9C40LrQsNC70YvSmyDRgtC10LrRgdC10YDRgyDQutC10YDQtdC6LCAi0YTRgNC+0L3RgtCw0LvQvdGL0Lkg0Lgg0L/QsNGA0LjQtdGC0LDQu9GM0L3Ri9C1INGC0YPQsdC10YDQutGD0LvQtdC30YsiINC606nRgNGW0L3RgyDQvNGD0LzQutC40L3QvS4g0KPQl9CYINCx0LDRg9GL0YAg0LzQtdC9INC606nQutCx0LDRg9GL0YDQtNGLINGC0q/RgdGW0YDRg9Cz0LUg0LHQvtC70LDQtC4gXNCU0LjQsNCz0L3QvtGB0YLQuNC60LDQu9GL0psg0YHRi9C90LDQvNCw0LvQsNGA0LTQsCDQsdCw0YA6INCh0LjQvNC/0YLQvtC8INCi0YDRg9GB0YHQviDQuCDQpdCy0L7RgdGC0LXQutCwLSDQutCw0LvRjNGG0LjQuSDQttC10YLRltGB0L/QtdGD0YjQu9GW0LPRliDQutC10LfRltC00L3QtSDQttKv0LnQutC1LdCx0rHQu9GI0YvSm9C10YIg0pvQvtC30pPRi9GI0YLRi9KT0YvQvSDQsdCw0pPQsNC70LDRgyDQsNGA0pvRi9C70YsuINCR0LjQvtGF0LjQvNC40Y/Qu9GL0psg0LrQsNC9INCw0LDQvdCw0LvQuNC30ZYgLSDRgdGW0LvRltGC0ZbQu9GW0Log0YTQvtGB0YTQsNGC0LDQt9CwINGA0LDRhdC40YLRgtGW0qMg0LzQsNGA0LrQtdGA0ZYg0LHQvtC70YvQvyDRgtCw0LHRi9C70LDQtNGLLCDQutCw0L3QtNCwINC606nQsdC10LnQtNGWINC00LXQs9C10L0g0YHTqdC3LCDRgNCw0YXQuNGC0LrQtSDQutKv0LTRltC6INC/0LDQudC00LAg0LHQvtC70LDQtNGLLiAg</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1 сұрақта қате орналасуы жаңбас, арқа.2 сұрақта объективті қараған кезде қандай симтомдарды анықтаймыз мысалы рахитік блезік, т.б.</text:p>
          </table:table-cell>
          <table:table-cell office:value-type="float" office:value="0" table:style-name="ce1">
            <text:p>0</text:p>
          </table:table-cell>
          <table:table-cell table:number-columns-repeated="16376"/>
        </table:table-row>
        <table:table-row table:style-name="ro1">
          <table:table-cell office:value-type="float" office:value="915328" table:style-name="ce1">
            <text:p>915328</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kg0JrSr9C90ZbQvdC1INC20LXRgtGW0L8g0YLRg9GL0LvSk9Cw0L0g0LHQsNC70LDQu9Cw0YDQtNCwINC80L7So9KT0L7Qu9C+0LnQtNGC0Ysg0LTQsNKb0YLQsNGAINCw0L3Ri9Kb0YLQsNC70YPRiyDQvNKv0LzQutGW0L0u0JzQvtKj0pPQvtC70L7QudC00YLRiyDQtNCw0pvRgtCw0YDQtNGLINC60LXQudC00LUg0YLQtdGA0ZYg0LzQtdC70L7QvdCw0YbQuNC00L7Qt9GLINC00LXQvyDRgtC1INCw0YLQsNC50LTRiyDQttOZ0L3QtSDQsdKx0Lsg0LTQsNKb0YLQsNGAINC606nQsdGW0L3QtSDRgtC10YDRltGB0ZYg0LrSr9Kj0LPRltGA0YIg0YLSr9GB0YLRliDQsNC00LDQvNC00LDRgNC00LAg0LrQtdC30LTQtdGB0LXQtNGWLtCc0L7So9KT0L7Qu9C+0LnQtNGC0Ysg0LTQsNKb0YLQsNGA0LTRi9KjINC90LXQs9GW0LfQs9GWINC/0LDQudC00LAg0LHQvtC70YMg0YHQtdCx0LXQsdGW0L3QtSDRgtC10YDRliDQsNGB0YLRi9C90LTQsCDRgtC10YDQtdKj0ZbQvdC00LUg0LbQsNGC0pvQsNC9INGC0LXRgNGWINC80LXQu9C+0L3QvtGG0LjQtNC+0Lcg0Y/Sk9C90Lgg0L/QuNCz0LzQtdC90YLRgtC10YPRiNGWINC20LDRgdGD0YjQsCDQsdC+0LvRg9GL0L3QsCDQsdCw0LnQu9Cw0L3Ri9GB0YLRiyDQsdC+0LvQsNC00Ysu0J3QtdCz0ZbQt9GW0L3QtdC9INCx0rHQuyDQtNCw0pvRgtCw0YAg0pvQsNGC0LXRgNGB0ZbQtyDQttOZ0L3QtSDQtdGI0pvQsNC90LTQsNC5INC80LXQtNC40YbQuNC90LDQu9GL0psg0LDQu9Cw0qPQtNCw0YLRg9GI0YvQu9GL0psg0YLRg9C00YvRgNC80LDQudC00Ysu0JzQvtKj0pPQvtC70L7QudC00YLRiyDQtNCw0pvRgtCw0YAg0LTQtdC/INCw0YLQsNC70YMg0YHQtdCx0LXQsdGWINCx0rHRgNGL0L3QtNCw0YDRiyDSm9C+0LnRi9C70pPQsNC9INGP0pPQvdC4INC905nRgdGW0LvQs9C1INCx0LDQudC70LDQvdGL0YHRgtGLINCw0LnRgtGL0LvRi9C/INC60LXRgtC60LXQvS7QkdKx0Lsg0LzQtdC70L7QvdC+0YbQuNC00L7QtyDQv9C40LPQvNC10L3RgtGW0L3QtdC9INGC0YPRi9C90LTQsNC50YLRi9C9INC00LDSm9GC0LDRgCDRg9Cw0pvRi9GCINOp0YLQtSDQttC+0LnRi9C70YvQvyDQutC10YLQtdC00ZYu0JvQvtC60LDQu9C40LfQsNGG0LjRj9GB0Ysg0Y/Sk9C90Lgg0L7RgNC90LDQu9Cw0YHQsNGC0YvQvSDQttC10YDRliDQsNGA0pvQsNC90YvSoyDRgtOp0LzQtdC90LPRliDQsdOp0LvRltCz0ZbQvdC00LUg0LbTmdC90LUg0LHQsNC70YLRi9GA0LTQsCDQutC10LfQtNC10YHQtdC00ZYu0JrQtdC5INC20LDSk9C00LDQudC70LDRgNC00LAg0LHQsNGB0pvQsCDQtNCwINC20LXRgNC70LXRgNC00LUg0LzRi9GB0LDQu9GLINCw0Y/Smy3Sm9C+0LvQtNCwINC60LXQt9C00LXRgdGD0ZYg0LzSr9C80LrRltC9LtCR0rHQuyDQtNCw0pvRgtCw0YAg0YPQsNKb0YvRgiDTqdGC0LUgMi0zINC20LDRgdGC0LAg0LbQvtC50YvQu9GL0L8g0LrQtdGC0LXQtNGWLtCR0ZbRgNCw0psg0LHSsdC7INCx0LDRgNC70YvSmyDQttCw0pPQtNCw0LnQtNCwINC10LzQtdGBLtCa0LXQudC00LUg0J7QtNCw0L0g0rHQt9Cw0psg0YPQsNKb0YvRgtKb0LAg0LXRgNC10YHQtdC6INC20LDRgdC60LAg0LTQtdC50ZbQvSDQsdC+0LvRg9GLINC80q/QvNC60ZbQvS4gIDIpINCR0ZbQt9C00LUg0YHQuNC/0LDRgtGC0LDQu9KT0LDQvSA3INCw0LnQu9GL0psg0LHQsNC70LDQtNCwINCg0LDRhdC40YIg0LDRg9GA0YPRi9C90YvSoyDQsdC10LvQs9GW0LvQtdGA0ZYg0LHQsNC50pvQsNC70LDQtNGLLtCR0rHQuyDQsNGD0YDRgyDQlCDQstC40YLQsNC80LjQvdGW0L3RltKjINC20LXRgtGW0YHQv9C10YPRiNGW0LvRltCz0ZbQvdC10L0g0YLRg9GL0L3QtNCw0LnQtNGLLtCg0LDRhdC40YIg0LDRg9GA0YPRiyDRgdKv0LnQtdC60YLQtdGA0LTRltKjINC20rHQvNGB0LDRgNGD0Ysg0L3QtdC80LXRgdC1INKb0LDRgtCw0Y7Rg9GL0L3QsNC9INGC0YPRi9C90LTQsNC50LTRiy7QkdCw0LvQsNC90YvSoyDQsdKx0YLRiyDRgtCw0LvRgtCw0Lsg0L/RltGI0ZbQvdGWINCeINGC05nRgNGW0LfQtNGWINCw0YjRi9KbINCx0L7Qu9GL0L8g0LrQtdC70LXQtNGWLtCX0LXRgNGC0YLQtdGDINOZ0LTRltGB0YLQtdGA0ZbQvdC1INGC0L7Sm9GC0LDQu9GB0LDQvCDRgNC10L3RgtCz0LXQvSDRgdOZ0YPQu9C10YHRltC80LXQvSDQt9C10YDRgtGC0LXRgyDRgtC40ZbQvNC00ZYg0LHQvtC70YvQvyDQutC10LvQtdC00ZYu0JHSsdC7INCx0LDQu9Cw0L3Ri9KjINOp0YHRltC/INC20LXRgtGW0LvRg9GW0L0g0LHQsNKb0YvQu9Cw0L8g0LDQvdGL0pvRgtCw0YPSk9CwINGC0LjRltC80LTRliDQt9C10YDRgtGC0LXRgyDTmdC00ZbRgdGWINCx0L7Qu9GL0L8g0YLQsNCx0YvQu9Cw0LTRiy7SmtCw0L0g0LDQvdCw0LvQuNC30ZbQvSDQt9C10YDRgtGC0LXRgyDQvNCw0qPRi9C30LTRiy7QodC10LHQtdCx0ZYg0LrQsNC70YzRhtC40Lkg0LzQtdC9INGE0L7RgdGE0L7RgNC00YvSoyDQv9Cw0YDQsNC80LXRgtGA0LvQtdGA0ZbQvSDQutOp0YDRg9Cz0LUg0LHQvtC70LDQtNGLLtCa0LDQu9GM0YbQuCDQvNC10L0g0YTQvtGB0YTQvtGAINCw0Lcg0LHQvtC70YHQsCDRgdKv0LnQtdC6INC80LXRgtC+0LHQvtC70LjQt9C80ZbQvdC00LUg0LDRg9GL0YLSm9GDINCx0LDRgCDQtdC60LXQvdC00ZbQs9GW0L0g0LrTqdGA0YHQtdGC0LXQtNGWLtCR0LDQu9Cw0L3RiyDQutC70LjQvdC40LrQsNC70YvSmyDRgtC10LrRgdC10YDRg9C80LXQvSDSm9C+0YHQviDRhNC40LfQuNC60LDQu9GL0psg0YLQtdC60YHQtdGA0LPQtdC9INC00rHRgNGL0YEg0LHQvtC70LDQtNGLLtCR0ZbQt9C00LXQs9GWINCx0LDQu9Cw0L3RiyDRgdC40L/QsNGC0YLQsNC50YLRi9C9INCx0L7Qu9GB0LDQvCDRgNCw0YXQuNGCINCw0YPRgNGD0Ysg0LHQsNGAINC10LrQtdC90ZbQvSDQvdC10LPRltC30LTQtdC/INGC0rHRgC7QndCw0pvRgtGL0LvQsNC5INC60LXRgtGB0LXQvCDQsdCw0LvQsCDQvNCw0LfQsNGB0YvQtyzRgtC10YDRiNC10qMg0rHQudKb0YvRgdGLINC00rHRgNCy0YEg0LXQvNC10YEg0LbTmdC90LUg0ZbRiNGW0L3RltKjINKv0LvQutC10Y7RlizQutC10YPQtNC1INKb0YPRi9GB0YvQvdGL0qMg0YLTqdC80LXQvdCz0ZYg0LHTqdC70ZbQs9GW0L3RltKjINC60LXSo9C10LnQs9C10L3RlizQsdCw0YPRi9GAINKb0LDQsdGL0YDSk9CwINC00L7Sk9Cw0YHRi9C90LDQvSAzINGB0Lwg0LPQtSDRiNGL0pPRi9C/INGC0rHRgNKT0LDQvdGLINGP0pPQvdC4INCx0LDQu9Cw0LTRiyDQs9C10L/QvtGC0L7QvNC10LPQsNC70LjRjyDQsdCw0YAg0LbTmdC90LUg0L/QsNC70YzQv9Cw0YbQuNGP0LvQsNKT0LDQvdC00LAg0LHQsNGD0YvRgNC00YvSoyDRiNC10YLRliDQv9Cw0LvRjNC/0LDRhtC40Y/Qu9Cw0L3Rg9GLINGB0LjQvNC/0YLQvtC80LTQsNGA0Ysg0LHQsNC70LDQtNCwINGA0LDRhdC40YIg0LDRg9GA0YPRiyDQsdCw0YAg0LXQutC10L3RltC9INC90LXQs9GW0LfQtNC10L8g0YLSsdGALtCR0rHQuyDQsNGD0YDRg9C00YvSoyDRgtGD0YvQvdC00LDRgyDRgdC10LHQtdCx0ZYg0JQg0LTTmdGA0YPQvNC10L3RltC90ZbSoyDQttC10YLQutGW0LvRltC60YHRltC30LTRltCz0ZbQvdC10L0g0LHQvtC70LDQtNGLLtCUINC005nRgNGD0LzQtdC90ZYg0LDSk9C30LDSk9CwINC60q/QvSDRgdOZ0YPQu9C10YHRliDQsNGA0pvRi9C70Ysg0YLSr9GB0LXQtNGWLtCUINC005nRgNGD0LzQtdC90ZbQvdGW0qMg0L3QtdCz0ZbQt9Cz0ZYg0pvRi9C30LzQtdGC0ZYg0LrQsNC70YzRhtC40Lkg0YTQvtGB0YTQvtGAINCw0LvQvNCw0YHRg9GL0L3QtNCwINC80LDSo9GL0LfQtNGLINCx0L7Qu9GL0L8g0LrQtdC70LXQtNGWLtCUINC005nRgNGD0LzQtdC90ZYg0ZbRiNC10LrRgtC10YDQtNC1INCa0LDQu9GM0YbQuNC00ZbSoyDRgdGW0qPRg9GW0L0g0LDRgNGC0YLRi9GA0LDQtNGLLtKa0L7RgNGL0YLRi9C90LTRi9C70LDQuSDQutC10YLRgdC10Lwg0LHRltC30LTQtdCz0ZYg0LHQtdGA0ZbQu9Cz0LXQvSDQsdCw0LvQsNC00LAg0LHQtdGA0ZbQu9Cz0LXQvSDRgdC40LzQv9GC0L7QvNC00LDRgNGLINCw0YDSm9GL0LvRiyDQoNCw0YXQuNGCINC00LjQsNCz0L3QvtC30YvQvSDSm9C+0Y/RgtGL0L0g0LXQtNGW0Lwg0LbTmdC90LUg0L7RgdGLINCx0L7QudGL0L3RiNCwINC80LXQtNC40YbQuNC90LDQu9GL0psg0LXQvCDRiNCw0YDQsNC70LDRgCDSm9C+0LvQtNCw0L3Ri9C/LNKb0rHRgNCw0LzRi9C90LTQsCDQlCDQtNOZ0YDRg9C80LXQvdGWINCx0LDRgCDQv9GA0LXQv9Cw0YDQsNGC0YLQsNGAINGC0LDSk9Cw0LnRi9C90LTQsNC50LzRi9C9Lg==</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2 сұрак толық емес? объективті қараған кезде симптомдарды нақты білу мысалы рахиті блезік т.б.</text:p>
          </table:table-cell>
          <table:table-cell office:value-type="float" office:value="0" table:style-name="ce1">
            <text:p>0</text:p>
          </table:table-cell>
          <table:table-cell table:number-columns-repeated="16376"/>
        </table:table-row>
        <table:table-row table:style-name="ro1">
          <table:table-cell office:value-type="float" office:value="1066831" table:style-name="ce1">
            <text:p>1066831</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7QltCw0LvQv9GLINCx0LDQu9CwINC00q/QvdC40LXQs9GWINC60LXQu9Cz0LXQvdC00LUg0LHQsNC70LDQvdGLINKb0LDRgNCw0YMg0LbSr9GA0LPRltC30ZbQu9C10LTRli7Qr9KT0L3QuCDQvtC7INC60LXQt9C00LUg0LHQsNC70LDQvdGL0qMg0LHQvtC50Ysg0LzQtdC9INGB0LDQu9C80LDSk9GL0L3Ri9KjINKb0LDRgtGL0L3QsNGB0Yss0LHQsNGBINOp0LvRiNC10LzQtNC10YDRliwg0YLQtdGA0ZbRgdGWINCx0LDRgNC70YvSk9GLINKb0LDRgNCw0LvQsNC00Ysu0KHQtdCx0LXQsdGWINCx0rHQuyDTqdC30LPQtdGA0ZbRgdGC0LXRgNC00ZbSoyDQsdC+0LvRg9GLINCx0LDQu9Cw0LTQsCDQvNGL0YHQsNC70Ysg0LPQvtGA0LzQvtC90LDQu9GM0LTRi9KbINOp0LfQs9C10YDRltGB0YLQtdGA0LTRliDQsNC90YvSm9GC0LDRg9KT0LAg0LrTqdC80LXQutGC0LXRgdC10LTRli7QltCw0LvQv9GLINCx0LXRgNGW0LvQs9C10L0g0YHSsdGA0LDSm9GC0LAg0LzQvtC90pPQvtC70L7QuNC00YLRiyDQtNCw0pvRgtCw0YAg0LTQtdCz0LXQvdGW0LzRltC3INC20LDSo9CwINGC0YPSk9Cw0L0g0L3QsNGA0LXRgdGC0LXRgNC70LXRgNC00LUg0LrQtdC30LTQtdGB0LXRgtGW0L0g0LDSm9GI0YvQuyDRgdCw0YDRiyDRgtKv0YHRgtGWINC00LDSm9GC0LDRgCDQvdC10LzQtdGB0LUg0L7Qu9Cw0YAg0LrTqdC60YjRltC7INC20LDRgdGL0Lsg0YLSr9GB0YLRltC00LUg0LHQvtC70YPRiyDQvNKv0LzQutGW0L0u0JHSsdC70LDRgCDQsdGW0LfQtNC1INGC0LXRgNGW0L3RltKjINGC0LXRgNC10qMg0pvQsNCx0LDRgtGL0L3QtNCwINC80LXQu9Cw0L3QvtGG0LjRgtGC0LXRgNC00ZbSoyDQttC40L3QsNC70YPRi9C90LDQvSDQv9Cw0LnQtNCwINCx0L7Qu9Cw0LTRiy7QkdKx0L3RiyDSm9Cw0LvRi9C/0YLRiyDRhNC40LfQuNC+0LvQvtCz0LjRj9C70YvSmyDSm9Kx0LHRi9C70YvRgSDRgNC10YLRltC90LTQtSDSm9Cw0YDQsNGB0YLRi9GA0YPSk9CwINCx0L7Qu9Cw0LTRiy7QndC+0YDQvNCw0LTQsCDQsdKx0Lsg0LbQsNGB0YPRiNCw0LvQsNGAINGC0LXRgNGW0L3RltKjINGN0L/QuNC00LXRgNC80LjRgSDSm9Cw0LHQsNGC0YvQvdC00LAg0L7RgNC90LDQu9Cw0YHRi9C/LNGC0LXRgNGW0LPQtSDTqdC30ZbQvdGW0qMg0pvQsNC70YvQv9GC0Ysg0YLSr9GB0ZbQvSDQsdC10YDQtdC00ZYu0JDQuyDQsdCw0LvQsNC00LAg0Y3QvNCx0YDQuNC+0L3QsNC70YzQtNGL0psg0LrQtdC30LXSo9C00LUg0L7RgdGLINC80LXQu9C+0L3QvtGG0LjRgtGC0LXRgCDQsdCw0LvQsNC90YvSoyDQtNC10YDQvNCwINKb0LDQsdCw0YLRi9C90LAg0LbRi9C70LbRi9C/INGB0L7QvdC00LAg0L7RgNC90LDQu9Cw0YHQsNC00Ysu0KHQvtC7INKv0YjRltC9INC+0YHRi9C90LTQsNC5INC00LDSm9GC0LDRgCDQv9Cw0LnQtNCwINCx0L7Qu9Cw0LTRiy7QlNC10YDQvNCwINKb0LDQsdCw0YLRi9C90LTQsCDQvtGA0L3QsNC70LDRgdKb0LDQvSDRgtC10YDRliDQttCw0YHRg9GI0LDQu9Cw0YDRiyzQttCw0YDRi9Kb0YLRiyDTqdC30ZbQvdC1INGB0ZbSo9GW0YDRltC/INC606nQutGI0ZbQuyDRgNC10qPQsyDQsdC10YDQtdC00ZYu0JHSsdC90Ysg0KLQuNC90LTQsNC70Lsg0Y3RhNC10LrRgtGWINC00LXQvyDQsNGC0LDQudC80YvQty7QnNC+0L3Qs9C+0LvQvtC40LTRgtGLINC00LDSm9GC0LDRgNC00YvSmyDQv9GW0YjRltC90ZYg0LHRltC30LTQtSDQtNKx0YDRi9GBINC10LzQtdGBINC/0ZbRiNGW0L3QtNGWINCx0L7Qu9GL0L8g0LrQtdC70LXQtNGWLtCa0L7QvdGC0YPRgNGDINCw0L3Ri9KbINC10LzQtdGBINCx0L7Qu9Cw0LTRiy4g0LDQtNC10YLRgtC1INC+0L3Ri9KjINC606nQu9C10LzRliDQsdGW0YDQvdC10YjQtSDQvNC40LvQu9C10LzQtdGC0YDQtNC10L0sINCx0ZbRgCDQvdC10YjQtSDRgdCw0L3RgtC40LzQtdGC0YDQs9C1INC00LXQudGW0L0g0LbQtdGC0LXQtNGWLtCW0LDQu9C/0Ysg0LHSsdC7INC00LDSm9GC0LDRgCDQutOp0LHRltC90LUg0LDRhNGA0LjQutCw0LvRi9KbLCDQu9Cw0YLQuNC90LDQvNC10YDQuNC60LDQu9GL0psg0L3QtdC80LXRgdC1INCw0LfQuNGP0LvRi9KbINKx0LvRgtGC0LDRgNC00LAg0LrQtdC30LTQtdGB0LXQtNGWLtCf0LDQudC00LAg0LHQvtC70LDRgtGL0L0g0L7RgNGL0L3QtNCw0YDRiyDQvtC7INCx0LXQu9C00LUsINKb0rHQudGL0LzRiNCw0pvRgtCwINC60LXQudC00LUg0LbQsNC80LHQsNGBINC205nQvdC1INGB0LDQvSDQsNC50LzQsNKb0YLQsNGA0YvQvdC00LAg0LrQtdC30LTQtdGB0LXQtNGWLtCR0ZbRgNCw0psg06nRgtC1INGB0LjRgNC10Log0LDRgNKb0LDQtNCwINKb0L7Qu9C00LAg0LrQtdC30LTQtdGB0YPRliDQvNKv0LzQutGW0L0u0JHSsdC7INC00LDSm9GC0LDRgCDRgtGD0YvQu9KT0LDQvdC90LDQvSDQsdCw0YHRgtCw0L8g0LDQvdGL0pvRgtCw0LvQsNC00Ysg0LbTmdC90LUgNCDQvdC10LzQtdGB0LUgNSDQttCw0YHSm9CwINC00LXQudGW0L0g0LHQvtC70LDQtNGLINC00LAg06nQt9C00ZbQs9GW0L3QtdC9INC20L7QudGL0LvRi9C/INC60LXRgtC10LTRli7QkdGW0YDQsNKbINOp0YLQtSDRgdC40YDQtdC6INC10YDQtdGB0LXQuiDQttCw0YHSm9CwINC00LXQudGW0L0g0pvQsNC70YPRiyDQvNKv0LzQutGW0L0uPGJyIC8+DQoyLtCW0LDQu9C/0Ysg0LHSsdC7INGB0rHRgNCw0pvSm9CwINC60LXQu9GB0LXQuiwg0LHSsdC7INC20LXRgNC00LUg0LrQu9C40L3QuNC60LDQu9GL0psg0LHQtdC70LPQtdC70LXRgCDRgGHRhdC40YLQutC1INGC05nQvSDQsdC+0LvRi9C/INGC0rHRgC7QkNC7INGA0LDRhdC40YIg0LTQtdCz0LXQvdGW0LzRltC30LPQtSDRgtC+0pvRgtCw0LvRi9C/INC60LXRgtGB0LXQuizQsdKx0Lsg0JQg0LTTmdGA0YPQvNC10L3RltC90ZbSoyDQttC10YLRltGB0L/QtdGD0YjRltC70ZbQs9GW0L3QtdC9INGB0q/QudC10LrRgtC10YDQtNGW0qMg0LHSsdC30YvQu9GL0YHRi9C90LAg0LDQu9GL0L8g0LrQtdC70LXRgtGW0L0g0LDRg9GA0YMu0JHSsdC7INCw0YPRgNGDINC60LXQt9GW0L3QtNC1INGB0q/QudC10Log05nQu9GB0LXRgNGW0L8g0LbSsdC80YHQsNGA0YvQvyzTqdC3INKb0LDQu9GL0L/RgtGLINC/0ZbRiNGW0L3QvdC10L0g0LDQudGL0YDRi9C70LDQtNGLLtCR0rHQuyDQtdKjINCx0LDRgdGC0Ysg0LrTqdGA0YHQtdGC0LrRltGI0ZYu0JbQsNC70L/RiyDRgtC10LrRgdC10YDRg9C00ZYg0LHRltC3INC20LDQu9C/0Ysg0YLQtdC60YHQtdGA0YPQtNC10L0g0LHQsNGB0YLQsNC50LzRi9C3LtCR0rHSk9Cw0L0g0LHRltC3INC/0LDQu9GM0L9h0YbQuNGPLNC/0LXRgNC60YPRgdGB0LjRjyDQttOZ0L3QtSBh0YPRgdC60YPQu9GM0YLQsNGG0LjRj9C90Ysg0LbQsNGC0pvRi9C30LDQvNGL0Lcu0K/Sk9C90Lgg0LHRltC30LTRltKjINC20LDSk9C00LDQudC00LAg0L/QsNC70YzQv9Cw0YbQuNGPLNC+0Lsg0YHSr9C50LXQutGC0LXRgNC00ZbSoyDQtNC10YTQvtGA0LzQsNGG0LjRj9GB0YvQvSDQsNC90YvSm9GC0LDRgy7QkdGW0LfQtNC1INC905nRgNC10YHRgtC10LTQtSDQvNCw0qPQtNCw0LksINGC06nQsdC1INGB0q/QudC10LrRgtC10YDRltC90ZbSoyDSr9C70LrQtdC50LPQtdC90ZbQvSDQsdCw0LnSm9Cw0LnQvNGL0LfQttOZ0L3QtSDSm9Cw0LHRi9GA0pPQsCDQsNGB0YLRi9C90YvSoyDSr9C70LrQtdC50LPQtdC90ZbQvSDQutOp0YDRg9Cz0LUg0LHQvtC70LDQtNGLLtCh0L7QvdC00LDQuSDQsNKbINCx0LXRgiDQsdKx0LvRiNGL0psg0LXRgtGC0LXRgNGW0L3RltKjINGC0L7QvdGD0YHRi9C9INGC0LXQutGB0LXRgNGDINC60LXRgNC10Lou0KHQtdCx0LXQsdGWINGA0LDRhdC40YIg0LrQtdC30ZbQvdC00LUg0LHSsdC70YjRi9Kb0LXRgiDQs9C40L/QvtGC0L7QvdC40Y/RgdGLINCx0L7Qu9GD0Ysg0LzSr9C80LrRltC9LtCW05nQvdC1INCx0ZbQt9C00LUg0L3TmdGA0LXRgdGC0LXQvNGW0LfQtNC1INCz0LXQv9C+0YLQvtGB0L/Qu9C10L3QvtC80LXQs9Cw0LvQuNC40Y8g0LHQsNGALtCv0pPQvdC4INCx0LDRg9GL0YAg0LzQtdC9INC606nQutCx0LDRg9GL0YDQtNGL0qMg0rHQu9KT0LDRjtGLLtCa0LXQu9C10YHRliDTmdC00ZbRgSDQvtC7INGA0LXQvdCz0LXQvdC+0LPRgNCw0LzQvNCwINOZ0LTRltGB0ZYu0KHQtdCx0LXQsdGWINCx0rHQuyDRgNC10L3RgtCz0LXQvSDRgdCw0YPQu9C10YHRliDRgdKv0LnQtdC60YLRltKjINKb0rHRgNGL0LvRi9C80YvQvSDQttOZ0L3QtSDRgtGL0pPRi9C30LTRi9KT0YvQvSDRgtCw0pPRiyDQtNCwINGB0q/QudC10Log06nRgdGD0ZbQvSDQsNC90YvSm9GC0LDRg9KT0LAg0LrTqdC80LXQutGC0LXRgdC10LTRli7QoNCw0YXQuNGC0LrQtSDQutKv0LTRltC6INCx0L7Qu9KT0LDQvdC00YvSm9GC0LDQvSzQvtGB0YvSk9Cw0L0g0YLTmdC9INOp0LfQs9C10YDRltGB0YLQtdGA0LTRliDQutOp0YDQtSDQsNC70LDQvNGL0Lcu0JzRi9GB0LDQu9GLLNCh0q/QudC10Log06nRgdGDINC30L7QvdCw0YHRi9C90LTQsNKT0Ysg0YLQvtGB0YLQsNKT0LDQvSDRgtOZ0YDRltC30LTRliDQtNC10YTQvtGA0LzQsNGG0LjRj9C90Yss0LzQtdGC0LDRhNC40LfQtNGW0qMg0LrQtdKj0LXRg9GW0L0g0LbTmdC90LUg0LrQvtGA0YLQuNC60LDQu9GM0LTRiyDRgdKv0LnQtdC60YLRltKjINC20rHSm9Cw0YDRg9GLINC80LXQvSAg0LrQtdGD0LTQtSDRgdKv0LnQtdC60YLQtdGA0ZbQvdGW0qMg0LTQtdGE0L7RgNC80LDRhtC40Y/RgdGL0L0g0LrTqdGA0YPQs9C1INCx0L7Qu9Cw0LTRiy7QmtC10LvQtdGB0ZYg0LzQsNKj0YvQt9C00Ysg05nQtNGW0YHRgtC10YDQtNGW0qMg0LHRltGA0ZYg0LvQsNCx0L7RgNCw0YLQvtGA0LjRj9C70YvSmyDQt9C10YLRgtC10YPQu9C10YAu0K/Sk9C90Lgg0pvQsNC9INCw0L3QsNC70LjQt9GW0L0g0LbQsNGB0LDRgy7QkdKx0Lsg0LDRgNKb0YvQu9GL0LTQsCDRgNCw0YXQuNGC0LrQtSDRgtOZ0L0g0LHQtdC70LPRltC70LXRgNC00ZYg0LrTqdGA0LXQvNGW0LcuINCc0YvRgdCw0LvRiyDQsdGW0LfQtNC1INC905nRgNC10YHRgtC10LTQtSDQutCw0LvRjNC50LjQuSDQvNC10L0g0YTQvtGB0YTQvtGA0LTRi9KjINKb0LDQvdC00LDSk9GLINC806nQu9GI0LXRgNGW0L3RltKjINCw0Lcg0LXQutC10L3RltC9INC606nRgNC10LzRltC3LtCR0rHQuyDRgdKv0LnQtdC6INGB0YvSo9KT0YvRiCDQsdC+0LvRg9GL0L3QsCDTmdC60LXQu9C10LTRli7QntC90YvSoyDQsNC30LDRjtGLLNC+0YDQs9Cw0L3QuNC30LzQtNC1INC60LDQu9GM0YbQuNC5INGE0L7RgdGE0L7RgCDQsNC70LzQsNGB0YPRi9C90YvSoyDQsdKx0LfRi9C70YvRgdGL0L3QsNC9INGC0YPRi9C90LTQsNC/INC+0YLRi9GALtCW05nQvdC1INCx0rHQuyDQttC10YDQtNC1INGB0ZbQu9GC0ZbRhNC+0YHRhNGC0LDQt9CwINC80LXQvSDQlCDQstC40YLQsNC80LjQvdGW0L3RltKjINC806nQu9GI0LXRgNGW0L0g0YLQtdC60YHQtdGA0YMg0LrQtdGA0LXQui7QlCDQstC40YLQsNC80LjQvdGWINGA0LDRhdC40YIg0LrQtdC30ZbQvdC00LUg0YLTqdC80LXQvSzQsNC7INGB0ZbQu9GC0ZbRhNC+0YHRhNGC0LDQt9CwINC20L7Sk9Cw0YDRiyDQsdC+0LvQsNC00Yss0KHQtdCx0LXQsdGWINGB0q/QudC10Log0LzQtdGC0L7QsdC+0LvQuNC30LzRliDQttC+0pPQsNGA0YvQu9Cw0LnQtNGLLtCV0LPQtdGAINCx0rHQuyDQtNC40LDQs9C90L7QtyDRgNCw0YHRgtCw0LvRgdCwLCDQsdCw0LvQsNC00LDSk9GLINC60LDQu9GM0YbQuNC5INGE0L7RgdGE0L7RgCDQvNC10L0g0JQg0LLQuNGC0LDQvNC40L3RltC9INC20L7Sk9Cw0YDRi9C70LDRgtGDINKb0LDQttC10YIu0J7RgNCz0LDQvdC40LfQvNC00LUg0L7RgdGLINCUINCy0LjRgtCw0LzQuNC90ZbQvdGW0qMg0YLTqdC80LXQvdC00ZbQs9GW0L3QtdC9INCx0LDQu9Cw0LTQsCDSm9C+0YHRi9C80YjQsCDRgtC10YDRiNC10qPQtNGW0Log0rHQudKb0YvRgdGL0LfQtNGL0psg0YHQtdC60ZbQu9C00ZYg0L/RgNC+0LHQu9C10LzQsNC70LDRgCDRgtGD0YvQvdC00LDQvyDQttCw0YLRi9GALg==</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Жауабы дұрыс, толық емес</text:p>
          </table:table-cell>
          <table:table-cell office:value-type="float" office:value="0" table:style-name="ce1">
            <text:p>0</text:p>
          </table:table-cell>
          <table:table-cell table:number-columns-repeated="16376"/>
        </table:table-row>
        <table:table-row table:style-name="ro1">
          <table:table-cell office:value-type="float" office:value="1066871" table:style-name="ce1">
            <text:p>1066871</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7QnNC+0L3Qs9C+0LvQvtC50LTRgtGL0psg0LTQsNKb0YLQsNGAINCx0rHQuyDQsdGW0LfQtNC1INGE0LjQt9C40L7Qu9C+0LPQuNGP0LvRi9KbINC/0LjQs9C80LXQvdGC0LDRhtC40Y8g0LHQvtC70YvQvyDRgtCw0LHRi9C70LDQtNGLINC+0Lsg0LrTqdCx0ZbQvdC10YHQtSDQttCw0qPQsCDRgtGD0YvQu9KT0LDQvSDQvdOZ0YDQtdGB0YLQtdC70LXRgNC00LUg0LrQtdC30LTQtdGB0LXQtNGWLtCv0pPQvdC4INCw0LfQuNGP0LvRi9Kb0YLQsNGA0LTQsCDQvdOZ0YHRltC70LTQtdGA0LTQtSDQutC10LfQtNC10YHQtdGC0ZbQvSDQtdC60LXQvS7QkNC7INC/0LDQudC00LAg0LHQvtC70YPRi9C90LAg0LrQtdC70LXRgtGW0L0g0LHQvtC70YHQsNC8INGN0LzQsdGA0YLQvtCz0LXQvdC10LfQtNGW0qMg0LzQtdC70LDQvdC+0YbQuNGC0YLQtdGA0LTRltKjINGC0LXRgNGW0L3RltKjINC20L7Sk9Cw0YDSk9GLINKb0LDQsdCw0YLRgtCw0YDRi9C90LTQsCDRgtC+0LvRi9KbINC606nRiNGW0L8g0q/Qu9Cz0LXRgNC80LXRg9GW0L3QtSDQsdCw0LnQu9Cw0L3Ri9GB0YLRiyDRj9KT0L3QuCDQvNC10LvQsNC90LjQvdGW0qMg0LTQtdGA0LzQsNC90YvQvSDRgtC10YDQtdKjINGC0LXRgNC10qMg0pvQsNCx0LDRgtGC0LDRgNGL0L3QtNCwINC20LjQvdCw0pvRgtCw0LvRg9GL0L3QsNC9INC/0LDQudC00LAg0LHQvtC70LDQtNGLLtGP0pPQvdC4INC80LXQu9Cw0L3QuNC90L3RltC9INC20LjQvdCw0LvRg9GL0L3QsNC9INC+0YHRiyDQtNCw0pvRgtCw0YAg0L/QsNC50LTQsCDQsdC+0LvQsNC00Ysu0LDQuyDQvtGA0L3QsNC70LDRgdGDINCw0LnQvNCw0pvRgtCw0YDRiyDQsdGW0LfQtNC1INC606nQsdGW0L3QtSDQsdC10Lsg0LDQudC80LDSk9GL0L3QsCDQttOZ0L3QtSDQsdOp0LrRgdC1INGB0L7RgdGL0L0g0LDRgNKb0LDQtNCwINC+0YDQvdCw0LvQsNGB0LDQtNGLLtCR0rHQuyDQtNCw0pvRgtCw0YAg0pvQsNGD0ZbQv9GB0ZbQtyDQttOZ0L3QtSDQtdGI0pvQsNC90LTQsNC5INC10LzQtNGWINKb0LDQttC10YIg0LXRgtC/0LXQudC00ZYu0L7QuyDQtNCw0psgNCDQvdC10LzQtdGB0LUgNSDQttCw0YHSm9CwINC00LXQudGW0L0g0LrQtdGC0ZbQvyDSm9Cw0LvQsNC00YsuPGJyIC8+DQoyLtCd0LDRg9Kb0LDRgSAg0LHQsNC70LDQtNCwINC60LvQuNC90LjQutCw0LvRi9KbINCx0LXQu9Cz0ZbQu9C10YDRliDQvNC10L0g0pvQsNC9INC606nRgNGB0LXRgtC60ZbRiNGC0LXRgNGWINCUINCy0LjRgtCw0LzQuNC9INC20LXRgtGW0YHQv9C10YPRiNGW0LvRltCz0ZbQvdC10L0g0YLRg9GL0L3QtNCw0pPQsNC9INGA0LDRhdC40YLRgtGW0qMg0LHQtdC70LPRltC70LXRgNGW0L0g0LrTqdGA0YHQtdGC0LXRgtC00ZYu0K/Sk9C90Lgg0LHSsdC7ICDQsNGD0YDRgyDRgdKv0LnQtdC6INC80LXRgtC+0LHQvtC70LjQt9C80L3RltKjINCx0rHQt9GL0LvRg9GL0LzQtdC9INGB0LjQv9Cw0YLRgtCw0LvQsNGC0YvQvSDQsNGD0YDRgyDQsdC+0LvRi9C/INGC0LDQsdGL0LvQsNC00Ysu0LHSsdC7INCw0YPRgNGD0LTRi9KjINGB0LXQsdC10LHRgtC10YDRliDQutKv0L0g0YHTmdGD0LvQtdGB0ZYg0LbQtdGC0ZbRgdC/0LXRg9GI0ZbQu9GW0LPRliDQlCDQstC40YLQsNC80LjQvSDQsNC3INGC0LDQvNCw0pvRgtCw0YDQtNGLINC/0LDQudC00LDQu9Cw0L3RgyzRgdC+0L3Ri9C80LXQvSDSm9Cw0YLQsNGAINCz0LXQvdC10YLQuNC60LDQu9GL0psg0YTQsNC60YLQvtGA0LTRiyDQttCw0YLSm9GL0LfQsNC80YvQtyDQsdKx0Lsg0L3QtdCz0ZbQt9Cz0ZYg0YHQtdCx0LXQsdGC0LXRgC7Ql9C10YDRgtGC0LXRgyDTmdC00ZbRgdGC0LXRgNGW0L3QtSDRgNC10L3Qs9C10L3QvtCz0YDQsNGE0LjRjyDTmdC00ZbRgdGWINKb0L7Qu9C00LDQvdGL0LvQsNC00Ysu0LHSsdC7INOZ0LTRltGBINCw0YDSm9GL0LvRiyDQsdGW0Lcg0LzQtdGC0LDRhNC40LfQtNC10YAg0LDQudC80LDSk9GL0L3Ri9C9INC60LXSo9C10Y7RltC9INCx0LDQudKb0LDRgdCw0psg0LHQvtC70LDQtNGLLtC205nQvdC1INCw0Y/SmyDRgdKv0LnQtdC60YLQtdGA0ZbQvdGW0L0g0L4g0L3QtdC80LXRgdC1IHgg0YLTmdGA0ZbQt9C00ZYg0pvQuNGB0LDRjtC70LDRgNC00Ysg0LHQsNC50pvQsNGB0LDSmyDQsdC+0LvQsNC00Ysu0YHQvtC90YvQvNC10L0g0pvQsNGC0LDRgCDRjdC/0LjRhNC40LfQtNGW0qMg0LDQudKb0YvQvSDQtdC80LXRgSDRiNC10LrQsNGA0LDQu9Cw0YDRi9C9INC205nQvdC1INGB0q/QudC10Log0YLRltC90ZbQvSDRgtGL0pPRi9C30LTRi9KT0Ysg0YLTqdC80LXQvdC00ZbQs9GW0L0g0LHQsNC50pvQsNGB0LDSmyDQsdC+0LvQsNC00Ysu0YLQsNKT0Ysg0LHQsNGB0pvQsCDTqdC30LPQtdGA0ZbRgdGC0LXRgNCz0LUg0pvQsNCx0YvRgNKT0LAg0LzQtdC9INGI0LXQvNGW0YDRiNC10Log0YjQtdC60LDRgNCw0YHRi9C90LTQsCDRgtKv0LnRltC9INGC05nRgNGW0LfQtNGWINKb0LDQu9GL0qPQtNCw0YPQu9Cw0YAg0Y/Sk9C90Lgg0pvQsNCx0YvRgNKT0LDQu9Cw0YDQtNCw0pPRiyDRgNCw0YXQuNGCINCx0ZbQu9C10LfRltC60YLQtdGA0ZbQvSDQttOZ0L3QtSDQttCw0LzQsdCw0YEg0YHSr9C50LXQutGC0LXRgNGW0L3RltC9INC00LXRhNC+0YDQvNCw0YbQuNGP0YHRi9C9INGP0pPQvdC4INKb0LjRgdCw0Y7Qu9Cw0YDQtNGLINCx0LDQudKb0LDQudC80YvQtyDQvtGB0Ysg05nQtNGW0YEg0LDRgNKb0YvQu9GLLtCi0LDSk9GLINCx0ZbQtyDQlCDQtNOZ0YDRg9C80LXQvdC90ZbSoyDQtNC10qPQs9C10LnRltC90LUg0LbTmdC90LUg0L/QsNGA0LDRgtCz0L7RgNC80L7QvSDQtNC10qPQs9C10LnRltC90LUg0pvQsNGA0LDRg9GL0LzRi9C3INC60LXRgNC10Lou0Y/Sk9C90Lgg0YDQsNGF0LjRgiDQutC10LfRltC90LTQtSDQtCDQstC40YLQvNC40L0g0YLTqdC80LXQvSDQsNC7INC/0LDRgNCw0YLQs9C+0YDQvNC+0L0g0LTQtdKj0LPQtdC50ZYg0LbQvtKT0LDRgNGLINCx0L7Qu9Cw0LTRiy4=</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7" table:style-name="ce1">
            <text:p>1066877</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NiDRiNGLINCx0LjQu9C10YIgMSBj0rHRgNCw0pvSm9CwINC20LDRg9Cw0L8g0LHQtdGA0LXRgCDQsdC+0LvRgdCw0pssINCx0LDQu9CwINGC0YPRi9C70pPQsNC90L3QsNC9INC60LXQudGW0L0g0LDQu9KT0LDRiNKb0Ysg0LrSr9C90LTQtdGA0ZbQvdC00LUg0LzQvtC90pPQvtC70L7QuNC00YLRiyDQtNCw0pvRgtCw0YDQtNGLINC606nRgNGD0ZbQvNGW0LfQs9C1INCx0L7Qu9Cw0LTRiy4g0KHQuNC/0LDRgtGC0LDQudGC0YvQvSDQsdC+0LvRgdCw0pssINC80L7QvdCz0L7Qu9C+0LjQtNGC0Ysg0LTQsNKb0YLQsNGAIC0g0JbQsNKj0LAg0YLRg9KT0LDQvSDQvdOZ0YDQtdGB0YLQtdC90ZbSoyDQtNC10L3QtdGB0ZbQvdC00LUg0LrQtdC30LTQtdGB0LXRgtGW0L0g0LDSm9GI0YvQuy3RgdCw0YDRiyDRgtKv0YHRgtGWINC90LXQvNC10YHQtSDQutOp0LrRiNGW0Lsg0LbQsNGB0YvQuyDRgtKv0YHRgtGWINC00LDSm9GC0LDRgC4g0J7Qu9Cw0YAg0YLQtdGA0ZbQvdGW0qMg0YLQtdGA0LXSoyDSm9Cw0LHQsNGC0YLQsNGA0YvQvdC00LAg0LzQtdC70LDQvdC+0YbQuNGC0YLQtdGA0LTRltKjINC20LjQvdCw0LvRg9GL0L3QsNC9INC/0LDQudC00LAg0LHQvtC70LDQtNGLINC205nQvdC1INCx0rHQuyDSm9Cw0LvRi9C/0YLRiyDRhNC40LfQuNC+0LvQvtCz0LjRj9C70YvSmyDSm9Kx0LHRi9C70YvRgSDQsdC+0LvRi9C/INGC0LDQsdGL0LvQsNC00YsuINCd0L7RgNC80LDQtNCwINC80LXQu9Cw0L3QvtGG0LjRgtGC0LXRgCDRjdC/0LjQtNC10YDQvNC40YEg0pvQsNCx0LDRgtGL0L3QtNCwINC+0YDQvdCw0LvQsNGB0LDQtNGLINC205nQvdC1INGC0LXRgNGW0L3RltKjINKb0LDQu9GL0L/RgtGLINGC0q/RgdGW0L0g0pvQsNC70YvQv9GC0LDRgdGC0YvRgNCw0LTRiy4g0JHRltGA0LDSmyDRjdC80LHRgNC40L7QvdCw0LvRjNC00Ysg0LTQsNC80YMg0LrQtdC30LXSo9GW0L3QtNC1INC80LXQu9Cw0L3QvtGG0LjRgtGC0LXRgCwg0YLQtdGA0ZbQvdGW0qMg0LTQtdGA0LzQsCDSm9Cw0LHQsNGC0YvQvdCwINC20YvQu9C20YvQvyzQvtGB0Ysg0YLSsdGB0YLQsCDQvNC+0L3Qs9C+0LvQvtC40LTRgtGL0psg0LTQsNKb0YLQsNGA0LTRiyDRgtKv0LfQtdC00ZYuINCh0L7QvdGL0LzQtdC9INKb0LDRgtCw0YAsINCi0LXRgNC10qMg0pvQsNCx0LDRgtGC0LAg0L7RgNC90LDQu9Cw0YHSm9Cw0L0g0LzQtdC70LDQvdC+0YbQuNGC0YLQtdGAINC20LDRgNGL0pvRgtGLINGB0ZbSo9GW0YDQtdC00ZYg0LTQtSwg0LrTqdC60YjRltC7INGC0q/RgdGC0ZYg0YDQtdKj0Log0LHQtdGA0ZbQvyDRgtKx0YDQsNC00Ysu0JbTmdC90LUg0YjQsNGC0LDRgdC/0LDRgdCw0Lwg0JHSsdC7INKb0rHQsdGL0LvRi9GBINCi0LjQvdC00LDQu9C7INGN0YTRhNC10LrRgtGW0YHRliDQtNC10L8g0LDRgtCw0LvQsNC00YsuINCU0LDSm9GC0LDRgCDQv9GW0YjRltC90ZYg0LTSsdGA0YvRgSDQtdC80LXRgSDRgNC10YLRltC80LXQvSDQtdC80LXRgSwg0pvSsdGA0YvQu9GL0LzQtNCw0YDRiyDTqdC30LPQtdGA0LPQtdC9INGI0LXQutCw0YDQsNGB0Ysg0LDQvdGL0psg0LXQvNC10YEg0LHQvtC70YvQvyDQutOp0YDRltC90LXQtNGWLiDQndC10LPRltC30ZYg0LTQsNKb0YLQsNGAINC606nQu9C10LzRliDQsdGW0YDQvdC10YjQtSDQvNC40LvQuNC80LXRgtGA0LTQtdC9INCx0ZbRgNC90LXRiNC1INGB0LDQvdGC0LjQvNC10YLRgNCz0LUg0LTQtdC50ZbQvSDQsdC+0LvRgyDQutC10YDQtdC6LiDQnNC+0L3Qs9C+0LvQvtC40LTRgtGL0psg0LTQsNKb0YLQsNGAICDQkNC30LjRj9C70YvSm9GC0LDRgCwg0LDRhNGA0LjQutCw0LvRi9Kb0YLQsNGALCDQu9Cw0YLRi9C90LDQvNC10YDQuNC60LDQu9GL0psg0LbQtdGA0LPRltC70ZbQutGC0ZYg0LDQvNC10YDQuNC60LDQu9GL0psg0rHQu9GCINOp0LrRltC70LTQtdGA0ZbQvdGW0qMg0YHTmdCx0LjQu9C10YDRltC90LTQtSDQutC10LfQtNC10YHQtdC00ZYuINCW05nQvdC1INC90LXQs9GW0LfRltC90LXQvSDQsdC10LvQtNC1LCDSm9Kx0LnRi9C80YjQsNKb0YLQsCwg0LrQtdC5INC60LXQt9C00LUg0LbQsNC80LHQsNGBINC205nQvdC1INGB0LDQvSDQsNC50LzQsNKT0YvQvdC00LAg0L7QtNCw0L0g0YHTmdC7INGC06nQvNC10L0g0LDQudC80LDSm9GC0LDRgNC00LAgLCDQsNGA0pvQsNC00LAg0L3QtdC80LXRgdC1INKb0L7QuyDQsNGP0pvRgtCwINCx0LDQudKb0LDQu9GD0Ysg0LzSr9C80LrRltC9LiDQnNC+0L3Qs9C+0LvQvtC40LTRgtGLINC00LDSm9GC0LDRgCDRgtGD0pPQsNC90L3QsNC9INCx0LDRgdGC0LDQvyDQutOp0YDRltC90LXQtNGWINC205nQvdC1INGI0LDQvNCw0LzQtdC9IDQtNSDQttCw0YHSm9CwINC00LXQudGW0L0g0LHQsNC70LDQvdGL0qMg0YLQtdGA0ZbRgdGW0L3QtNC1INCw0L3Ri9Kb0YLQsNC70LDQtNGLLiDQmtC10LnQsdGW0YAg0LrQtdC30LTQtdGA0LTQtSAg0LHSsdC7INC00LDSm9GC0LDRgCDQsdCw0LvQsNC70YvSmyDQttCw0YHSm9CwINC00LXQudGW0L0g0YHQsNKb0YLQsNC70YvQvywg0YHQuNGA0LXQuiDQttCw0pPQtNCw0LnQtNCwINC10YDQtdGB0LXQuiDRiNCw0pvRgtCwINC00LAg0pvQsNC70YvQvyDQttCw0YLQsNGC0YvQvSDQutC10LfQtNC10YAg0LHQvtC70LDQtNGLINC10LrQtdC9LiDQnNC+0L3Sk9C+0LvQvtC40LTRgtGLINC00LDSm9GC0LDRgCDQsdKx0Lsg0L/QsNGC0L7Qu9C+0LPQuNGPINC90LXQvNC10YHQtSDQsNGD0YDRgyDQtdC80LXRgSDQttOZ0L3QtSDQvtC70LDRgCDQvdOZ0YDQtdGB0YLQtdC90ZbSoyDQtNC10L3RgdCw0YPQu9GL0pPRi9C90LAg0YTQuNC30LjQvtC70L7Qs9C40Y/Qu9GL0psg0LXRgNC10LrRiNC10LvRltC60YLQtdGA0ZbQvdGW0qMg06nQt9Cz0LXRgNGW0YHRltC90LUg05nRgdC10YAg0LXRgtC/0LXQudC00ZYuINCQ0L3QsNGB0Ysg0q/RiNGW0L0g0pvQvtGA0pvQsNGC0YvQvSDQttCw0LnRgiDQtdC80LXRgS4gMiDRgdKx0YDQsNKbLCDQoNCw0YXQuNGCLdCx0rHQuyDQlCDQtNOZ0YDRg9C80LXQvdGW0L3RltKjINC20LXRgtGW0YHQv9C10YPRiNGW0LvRltCz0ZbQvdC10L0sINGB0q/QudC10LrRgtC10YDQtNGW0qMg0LbSsdC80YHQsNGA0YPRi9C80LXQvSwg0pvQuNGB0LDQudGL0L8g0LTQtdGE0L7RgNC80LDRhtC40Y/Qu9Cw0L3Rg9GL0LzQtdC9INGB0LjQv9Cw0YLRgtCw0LvQsNGC0YvQvSDQsNGD0YDRgy4g0JHSsdC7INC/0LDRgtC+0LvQvtCz0LjRj9C70YvSmyDQttCw0pPQtNCw0LnSk9CwINCw0L3QsNGB0YvQvdGL0qMg0LDSk9C30LDRgdGL0L3QtNCwINC0INC005nRgNGD0LzQtdC90ZYg0LTSsdGA0YvRgSDQttC10YLQv9C10YPRliDQttOZ0L3QtSDQsdCw0LvQsNC90Ysg0YLRg9GL0LvSk9Cw0L3QvdCw0L0g0LrQtdC50ZbQvSDQutKv0L0g0LrTqdC30ZbQvdC1INC20LXRgtC60ZbQu9GW0LrRgtGWINGC0q/RgNC00LUg0YjRi9KT0LDRgNC80LDSk9Cw0L3QvdCw0L0g0LHQvtC70YPRiyDQvNKv0LzQutGW0L0uINCX0LXRgNGC0YLQtdGD0LTRltKjINOp0LfRltC9INCx0LDRgdGC0LDSk9Cw0L3QtNCwINCx0ZbQtyDQutC70LjQvdC40LrQsNC70YvSmyDSm9Cw0YDQsNC/INC30LXRgNGC0YLQtdC50LzRltC3LCDQtdKjINCw0LvQtNGL0LzQtdC9INGB0q/QudC10LrRgtGW0qMg0LTQtdGE0L7RgNC80LDRhtC40Y/RgdGL0L3QsCDQsdCw0pPQsCDQsdC10YDQtdC80ZbQtywg0LzRi9GB0LDQu9GLINC80LDSo9C00LDQuSDRgdKv0LnQtdCz0ZbQvdGW0qMg0YjRi9KT0YvSo9Kb0YvQu9GL0pPRiywg0LrQtdGD0LTQtSDSm9GD0YvRgdGL0L3Ri9KjINC60LXSo9C10Y7RliAs0LDRj9KbINKb0L7QuyDRgdKv0LnQtdC60YLQtdGA0ZbQvdGW0qMg0YHRi9GA0YLSm9CwINKb0LDRgNCw0L8g0pvQuNGB0LDRjtGLINCx0rHQvdGL0qMg0LHQsNGA0LvRi9KT0Ysg0YDQsNGF0LjRgtGC0ZbSoyDQsdC10LvQs9GW0YHRli4g0KHQvtC90LTQsNC5INGC0LXQutGB0LXRgNGDINC60LXQt9GW0L3QtNC1INGA0LDRhdC40YLQutC1INC60q/QtNGW0LrRgtC10L3Qs9C10L0g0LHQsNC70LDQtNCwLCDQsdKx0LvRiNGL0pvQtdGC0YLQtdGA0LTRltKjINCz0LjQv9C+0YLQvtC90LjRj9GB0Ysg0LTQsCDQsdCw0LnSm9Cw0LvQsNC00YsuINCv0pPQvdC4INOZ0LvRgdGW0LfQtNGW0LouIDIg0YjRltC00LXQvSDRgNC10L3RgtCz0LXQvdC+0LPRgNCw0YTQuNGPINOZ0LTRltGB0ZbQvSDSm9C+0LvQtNCw0L3QsNC80YvQty4g0KHQtdCx0LXQsdGWINGA0LXQvdGC0LPQtdC9INGB05nRg9C70LXQu9C10YDRliDQvdC10LPRltC30ZbQvdC10L0g0YHSr9C50LXQuiDSm9Kx0YDRi9C70YvQvNGL0L0sINGC0YvSk9GL0LfQtNGL0LvRi9KT0YvQvSwg06nRgdGD0ZbQvSDQsdCw0pPQsNC70LDRgyDSr9GI0ZbQvSDSm9C+0LvQtNCw0L3Ri9C70LDQtNGLLiDQoNCw0YXQuNGC0LrQtSDRgtOZ0L0g0LrSr9C00ZbQuiDQsdC+0LvRgdCwLCDQvtGB0Ysg0LfQtdGA0YLRgtC10YMg0LDRgNKb0YvQu9GLINC+0L3RiyDQutOp0YDQtSDQsNC70LDQvNGL0Lcg0L3QsNKb0YLRiywg0LHQsNKT0LAg0LHQtdGA0LXQvNGW0LcuINCh0q/QudC10LrRgtGW0qMg06nRgdGDINC30L7QvdCw0YHRi9C90LTQsNKT0Ysg0YLQvtGB0YLQsNKT0LDQvSDRgtOZ0YDRltC30LTRliDQtNC10YTQvtGA0LzQsNGG0LjRj9C70LDRgCwg0LzQtdGC0LDRhNC40LfQtNGW0qMg0LrQtdKj0LXRjtGWINC205nQvdC1INGI0LXRgtGC0LXRgNGW0L3RltKjINCx0rHQu9GL0qPSk9GL0YDQu9Cw0L3Rg9GLLCDQutC+0YDRgtC40LrQsNC70YzQtNGLINGB0q/QudC10LrRgtGW0qMg0LbSsdKb0LDRgNGD0YssINC205nQvdC1INKb0LDQsdGL0YDSk9Cw0LvQsNGAINC80LXQvSDQutC10YPQtNC1INGB0q/QudC10LrRgtC10YDRltC90LTQtSDQtNC10YTQvtGA0LzQsNGG0LjRj9C70LDRgCDQutOp0YDRltC90LXQtNGWLiAzINGI0ZbQtNC10L0g0LvQsNCx0L7RgNC+0YLQvtGA0LjRj9C70YvSmyDQt9C10YDRgtGC0LXRg9C70LXRgNCz0LUg0pvQsNGA0LDRgdCw0psg0LrQsNC70YzRhtC40LnQtNGW0qMg0LTQtSDRhNC+0YHRhNC+0YDQtNGL0qMg0LTQsCDQtNC10qPQs9C10LnRltC9INGC06nQvNC10L0g0LXQutC10L3RltC9INC606nRgNC10LzRltC3LCDQsdKx0Lsg0YHSr9C50LXQutGC0ZbSoyDRgdGL0L3Sk9GL0Ygg0LXQutC10L3RltC9INCw0LnRgtCw0YLRi9C9INC606nRgNGB0LXRgtC60ZbRiC4g0KHQvtC90YvQvNC10L0g0pvQsNGC0LDRgCDRgdGW0LvRgtGW0LvRliDRhNC+0YHRhNCw0YLQsNC30LAsICDQtCDQstC40YLQsNC80LjQvdGWINC00LXSo9Cz0LXQudGW0L0g0YLQtdC60YHQtdGA0LPQtdC9INC206nQvSDRgdC10LHQtdCx0ZYg0LbQsNKj0LAg0LDQudGC0pvQsNC90LTQsNC5INGA0LDRhdC40YIg0LQg0LLQuNGC0LDQvNC40L3RltC90ZbSoyDRgtCw0L/RiNGL0LvRi9KT0YvQvdCw0L0g0YLRg9GL0L3QtNCw0LnQtNGLLiDQkNC7INGB0ZbQu9GC0ZbQu9GWINGE0L7RgdGE0LDRgtCw0LfQsCDQttC+0pPQsNGA0YvQu9Cw0LnQtNGLINGB0LXQsdC10LHRliDRgdKv0LnQtdC6INC80LXRgtCw0LHQvtC70LjQt9C80ZbQvdGW0qMg0pvQsNGA0pvQsNC90LTRiyDRgtKv0YDQtNC1INC20q/RgNGW0L8g0LbQsNGC0pvQsNC90LDQvdGL0L0g0LrTqdGA0YHQtdGC0LXQtNGWIC4g0JXQs9C10YAg0LTQuNCw0LPQvdC+0LfRi9C80YvQtyDRgNCw0YHRgtCw0LvRgdCwLCDQtCDQstC40YLQsNC80LjQvdGWINC00LXSo9Cz0LXQudGW0L0g0LrQsNC70YzRhtC40Lkg0YTQvtGB0YTQvtGAINC00LXSo9Cz0LXQudGW0L0g0YDQtdGC0YLQtdGD0LzQtdC9INCw0LnQvdCw0LvRi9GB0YMg0LrQtdGA0LXQui4g0JQg0LLQuNGC0LDQvNC40L3RliDQsdCw0LvQsNC00LAg0LrTqdC/0YLQtdCz0LXQvSDQv9GA0L7RhtC10YHRgdGC0LXRgNCz0LUg0pvQsNGC0YvRgdCw0LTRiywg0LbQvtKT0LDRgNGL0LTQsCDQsNC50YLRi9C70pPQsNC90LTQsNC5INGB0q/QudC10LrRgtGW0qMsINCx0L7QudC00YvSoyDTqdGB0YPRltC90LUsINC80LXRgtCw0LHQvtC70LjQt9C80LPQtSwg0YHQsNC90LDQvdGL0qMg0LDQudKb0YvQvdC00YvQu9GL0pPRi9C90LAsINGC0LXRgNC80L7RgdGC0LDRgtGC0YvQu9GL0pvRgtGL0qMg0LTQtdKj0LPQtdC50ZbQvdC1LCDQv9GB0LjRhdC+0LvQvtCz0LjRj9C70YvSmyDRjdC80L7RhtC40L7QvdCw0LvQtNGLINGC0rHRgNKT0YvQtNCw0L0g0LTSsdGA0YvRgSDTqdGB0ZbQvyDQttC10YLRltC70YPRltC90LTQtSDQvNCw0qPRi9C30Ysg0LfQvtGALiDQnNKx0pPQsNC70ZbQvNGW0LzRltC3INCx0ZbQt9C00ZYg0YHRgtCw0YbQuNC+0L3QsNGA0LTQsCDQsNC70YvQvyDQttKv0YDQs9C10L3QtNC1INC20LDSo9CwINGC0YPRi9C70pPQsNC9INC905nRgNC10YHRgtC10LvQtdGA0LTRltKjINCw0L3QsNC70LDRgNGL0L3QsCDQstGL0L/QuNGB0LrQsCDQsdC+0LvSk9Cw0L3QvdCw0L0g0YHQvtKjLCDQutKv0L0g0LrTqdC30ZbQvdC1INC20LjRliDRiNGL0pPRg9KT0LAg0LrQtdKj0LXRgSDQsdC10YDQs9C10L0g0LHQvtC70LDRgtGL0L0uINCe0YHRiyDRgdOZ0YLRgtC10L0g0LHQsNGB0YLQsNC/INC10YHRltC80ZbQt9C00LUg0pvQsNC70LTRiy4g0JDQuyDQvtC90YvSoyDRgdC10LHQtdCx0ZYg0LbQvtKT0LDRgNGLINCw0LnRgtGL0LvSk9Cw0L0g0L/QsNGC0L7Qu9C+0LPQuNGP0pPQsCDQsNC70YvQvyDQutC10LvQvNC10YEg0q/RiNGW0L0u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6" table:style-name="ce1">
            <text:p>1066906</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zQltCw0LvQv9GLINC20LDSo9CwINGC0YPRi9C70LPQsNC9INCx0LDQu9Cw0LvQsNGA0LTQsCDQvNC+0L3Qs9C+0LvQvtC40LTRgtGLINC00LDSm9GC0LDRgNC00YvSoyDQv9Cw0LnQtNCwINCx0L7Qu9KT0LDQvS4g0LbQsNC70L/RiyDQsdKx0Lsg0L/QsNC50LTQsCDQsdC+0LvSk9Cw0L0g0LTQsNKb0YLQsNGAINCx0LDQu9CwINC00LXQvdGB0LDRg9C70YvSk9GL0L3QsCDQt9C40Y/QvdGB0YvQtyDQsdC+0LvRi9C/INC60LXQu9C10LTRli4g0JTQsNC60YLQsNGA0LTRi9KjINC/0LDQudC00LAg0LHQvtC70YMg0LDQudC80LDSm9GC0LDRgNGLINCw0YDSm9CwINCw0LnQvNCw0pPRiyDQvNC10L0g0LHTqdC60YHQtSDQsNC50LzQsNKT0YvQvdC00LAgINGB0YLRgNC10Log0LbQsNKT0LTQsNC50LTQsCDSm9C+0Lsg0LzQtdC9INCw0Y/Sm9GC0LDRgNC00LAg0L7RgNC90LDQu9Cw0YHQsNC00YsuINCf0LDQudC00LAg0LHQvtC70pPQsNC90L3QsNC9INC60LXQudGW0L0g0LHRltGAINC20LDRgdGC0LAg0LrQtdGC0LXQtNGWLCDRiNCw0LvQsCDRgtGD0YvQu9KT0LDQvSDQsdCw0LvQsNC70LDRgNC00LAgMiDQttCw0YHSm9CwINC00LXQudGW0L0g0YHQvtC30YvQu9Cw0LTRiy4g0J/QsNC50LTQsCDQsdC+0LvRgyDRgdC10LHQtdCx0ZYg0rHRgNGL0psg0LTQsNC80YMg0LrQtdC30ZbSo9C00LUg0LTQtdGA0LzQsCDRgtC10YDQuNCz0LUg0LDRg9GL0YHSm9Cw0L0g0LrQtdC30LTQtSDQvNC10LvQsNC90LjQvtGG0LjRgtGC0LXRgCDQtNCw0LzRg9GL0L3QtNCw0pPRiyDQsNKb0LDRg9C70LDRgNC00LDQvSDQv9Cw0LnQtNCwINCx0L7Qu9Cw0LTRiy4g0JbQsNC70L/RiyDQsNC50YLQsCDQutC10YLQutC10L3QtNC10Lkg0LHSsdC7INCx0LDQu9CwINC00LXQvdGB0LDRg9C70YvSk9GL0L3QsCDQtdGI0pvQsNC90LTQsNC5INC30LjRj9C9INC60LXQu9GC0ZbRgNC80LXQudC00ZYuINCW0LDQu9C/0Ysg0LzQvtC90pPQvtC70L7QuNC00YLRiyDQtNCw0pvRgtCw0YAg0LTQtdC/INCw0YLQsNC70YPRiyDQsdC10LvQs9GW0LvRliDQvNC+0L3Sk9C+0LvQvtC40LTRgtGL0psg0L3TmdGB0ZbQu9C00LXRgNC00LUg0LbQuNGWINC60LXQt9GC0LXRgdC10YLRltC90LTRltC60YLQtdC9INC+0YHRi9C70LDQuSDQsNGC0LDQu9GL0L8g0LrQtdGC0LrQtdC9LiAgICAyLCDQltCw0LvQv9GLINCx0LDQu9Cw0LTQsCDRgNCw0YXQuNGCINCw0YPRgNGD0YvQvdGL0qMg0LHQtdC70LPSo9C70LXRgNKj0L0g0LrTqdGA0qPQvyDRgtKx0YDQvNGL0LcsINCx0rHSk9Cw0L0g0LHQsNC70LAg0LbQsNC50LvRiyDQsdC10YDRltC70LPQtdC9INCw0pvQv9Cw0YDQsNGC0YLQsNC9INCx0ZbQu9GW0L8g0YLSsdGA0LzRi9C3LiDQltCw0LvQv9GLINKb0LDQvSDQsNC90LDQu9C40LfRltC90LUg0pvQsNGA0LDRgdCw0psg0LHSsdC7INC20LXRgNC00LUg0JrQsNC70YzRhtC40Lkg0LzQtdC9INCk0L7RgdGE0L7RgCDQtNC10qPQs9C10LnRliDQvdC+0YDQvNCw0LTQsNC9INGC06nQvNC10L0uINCR0rHQuyDQutGW0YjQutC10L3RgtCw0Lkg0LHQsNC70LDQtNCwINCUINCy0LjRgtCw0LzQuNC90ZbQvdGW0qMg0LbQtdGC0LrRltC70ZbQutGB0ZbQt9C00ZbQs9GW0L0g0LrTqdGA0ZbQvyDRgtKx0L/QvNGL0LcuINCW0LDQtNC/0Ysg0JQg0LLQuNGM0LDQvNC40L3RiyDQutCw0LvRjNGG0LjQuSDQvNC10L0g0YTQvtGB0YTQvtGA0LTRi9KjINCw0LvQvNCw0YHRg9GL0L3QsCDQvdC10LPRltC30LPRliDSm9GL0LfQvNC10YIg0LDRgtKb0LDRgNCw0LTRiywg0LrQsNC70YzRhtC40LTRliAg0LDQutGC0LjQstGC0ZYg0YTQvtGA0LzQsNGB0YvQvdCwINCw0LnQvdCw0LvQtNGL0YDQsNC00Ysg0LbTmdC90LUg0YTQvtGB0YTQvtGA0LvQsNGA0LTRi9KjINCw0LvQvNCw0YHRg9GL0L0g0pvQsNC80YLQsNC80LDRgdGL0Lcg0LXRgtC10LTRli4g0JbQsNC70L/RiyDQvtGB0Ysg0JQg0LLQuNGC0LDQvNC40L3RltC90ZbQvSDQttC10YLRltGB0L/QtdGD0YjRltC70ZbQs9GW0L3QtdC9INGE0L7RgdGE0L7RgCDQttOZ0L3QtSDQutCw0LvRjNGG0LjQuSAg0LDQu9C80LDRgdC/0LDQuSDQt9OZ0YAg0LDRgNKb0YvQu9GLINGI0YvSk9GL0L8g0LrQtdGC0LXQtNGWINC205nQvdC1INC305nRgCDQsNC90LDQu9C40LfRltC9INC606nRgNCz0LXQvdC00LUg0LXQutC10YPRltC90ZbSoyDQt9OZ0YDQtNC10LPRliDQttC+0pPQsNGA0Ysg0LTQtdC90LPQtdC50ZbQvSDQutOp0YDQtdC80ZbQty4g0JDQs9C30LDQtNCwINC60LDQu9GM0YbQuNC5INC00LXQvdCz0LXQudGWINGC06nQvNC10L3QtNC10LPQtdC90L3QtdC9INC60LXQudGW0L0sINC60LDQu9GM0YbQuNC5INC20LXRgtC60ZbQu9GW0LrRgdGW0LfQtNGW0LPRltC90ZbQvSDRgdCw0LvQtNCw0YDRi9C90LDQvSDSm9Cw0LvSm9Cw0L3RiNCwINC80LDQvdGLINCx0LXQt9GW0L3QtdC9INC/0LDRgNCw0YLQs9C+0YDQvNC+0L0g0LHTqdC70ZbQvdC10LTRli4g0JHSsdC7INOp0Lcg0LrQtdC30LXQs9C40L3QtNC1INC/0LDRgNCw0YLQs9C+0YDQvNC+0L0g0LDSk9C30LDQtNCw0pPRiyDQutCw0LvRjNGG0LjQuSDQttC10YLRltGB0L/QtdGD0YjRltC70ZbQs9GW0L0gINGA0LXRgtGC0LXRgyDSr9GI0ZbQvSDQutCw0LvRjNGG0LjQudC00ZYg0YHSr9C50LXQutGC0LXRgNC00LXQvSDQsNC70LDQtNGLINC205nQvdC1INC+0YHRiyDQsNGA0pvRi9C70Ysg0LrQsNC70YzRhtC40LTRiyDRgNC10YLRgtC10LnQtNGWLiDQntGB0YvQvdGL0qMg05nRgdC10YDRltC90LXQvSDRgdKv0LnQtdC60YLQtdGA0LTRltKjINCx0LXRgNGW0LrRgtGW0LvRltCz0ZYg0LHSsdC30YvQu9Cw0LTRiyDRgdGL0L3Sk9GLINC60LXQu9C10LTRliDQttOZ0L3QtSDQvtGB0YLQtdC+0L/QsNGA0L7QtyDRgdC10LrRltC70LTRliDQsNGD0YDRg9C70LDRgNC00Ysg0YLRg9GL0L3QtNCw0YLQsNC00YsuINCh0L7QvdGL0LzQtdC9INKb0L7RgdCwINGA0LDRhdC40YLQv9C10L0g0LDRg9GL0YDQsNGC0YvQvSDQsdCw0LvQsNC70LDRgNC00YvQvSDQsNC50pvRi9C9INCx0LXQu9Cz0LjRgdC4INGA0LXRgtC40L3QtNC1ICDRgdKv0LnQtdC60LXRgNC00ZbQvSDQtNC10YTQvtGA0LzQsNGG0LjRj9GB0Ysg0YHQvtC90YvQvSDRltGI0ZbQvdC00LUg0LDRj9KbINGB0q/QudC10LPRgtC10YDRltC90ZbQvSDQtNC10YTQvtGA0LzQsNGG0LjRj9GB0YvQvSDQutOp0YDQtdC80ZbQty4g0JHSsdC7INGA0LDRhdC40YIg0LDRg9GA0YPRi9C90YvSoyDQvdC10LPQt9GWINCx0LXQu9Cz0ZbRgdGW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1" table:style-name="ce1">
            <text:p>1067141</text:p>
          </table:table-cell>
          <table:table-cell office:value-type="string" table:style-name="ce1">
            <text:p>kazakh</text:p>
          </table:table-cell>
          <table:table-cell office:value-type="string" table:style-name="ce1">
            <text:p>Билет 6&amp;lt;br /&amp;gt; 1.Күніңе жетіп туған балаланы қарағанда терісінде монголоидты дақтар анықталған. Олардын пайда болуы? Орналасуын аймақтары.&amp;lt;br /&amp;gt; 2. 7 айлық бала.Туғанан табиғи тамақтануда. Анасынын шағымдары мазасыздануға, тершенділікке, үйқынын бүзылуына. Қарағанда: мандай және төбе төмпектері үлкейген, рахит тәспігі,ішінің «үлкеюі», кеуде куысының төменгі жағы кенейеді, бауыры қабырға доғасынан 3 см шығады, көк баырдын шеті пальпацияналады. Қанда: Са - 1,7 мм/л, Фосфор 1.12мм/л.Балаларда сүйек жүйесінің зерттеу әддісімен қандай өзгерістерді анықтауға болады?&amp;lt;br /&amp;gt;</text:p>
          </table:table-cell>
          <table:table-cell office:value-type="string" table:style-name="ce1">
            <text:p>MS7QmtKv0L3RltC90LUg0LbQtdGC0ZbQvyDRgtGD0YvQu9KT0LDQvSDQsdCw0LvQsNC70LDRgNC00YvSoyDRgtC10YDRltGB0ZbQvdC00LUg0LzQvtKj0pPQvtC70L7QudC00YLRiyDQtNCw0pvRgtCw0YAg0LDQvdGL0pvRgtCw0LvSk9Cw0L0u0J7Qu9Cw0YDQtNGL0qMg0L/QsNC50LTQsCDQsdC+0LvRg9GL0L3QsCDQutC10LvQtdGC0ZbQvSDQsdC+0LvRgdCw0psg0LbQsNC70L/RiyDQsdKx0Lsg0LTQsNKb0YLQsNGAINC606nQsdGW0L3QtSDQttC40ZYg0LzQvtC90LPQvtC70L7QuNC00YLRiyzQvdC10LPRgNC+0LjQtNGC0Ysg0L3TmdGB0ZbQu9C00ZYs0YHQuNGA0LXQuiDQtdGD0YDQvtC/0L7QuNC00YLRiyDQvdOZ0YHRltC70LTRliDQsdCw0LvQsNC70LDRgNC00LAg0LrQtdC30LTQtdGB0LXQtNGWLtCf0LDRgtC+0LvQvtCz0LjRjyDQtdC80LXRgSzQvdC+0YDQvNCwINC00LXQvyDQtdGB0LXQv9GC0LXQu9C10LTRli7SmtKx0YDRgdCw0pvRgtGL0psg0LTQsNC80YMg0LHQsNGA0YvRgdGL0L3QtNCwINC80LjQtdC70LDQvdC+0YbQuNGC0YLQtdGAKNC/0LjQs9C80LXQvdGCINOp0L3QtNGW0YDRg9GI0ZYg0LbQsNGB0YPRiNCw0LvQsNGAKdGC0LXRgNGWINKb0LDQsdCw0YLRi9C90LAg0LrTqdGC0LXRgNGW0LvQtdC00ZYg0LbTmdC90LUg0YHQvtC7INC20LXRgNCz0LUg0YjQvtKT0YvRgNC70LDQvdCw0LTRiy7QmtC10Lkg0LbQsNKT0LTQsNC50LvQsNGA0LTQsCDQvtC70LDRgCDQtNC10YDQvNCwINKb0LDQsdCw0YLRi9C90LAg06nRgtGW0L8g0YHQvtC7INCw0LnQvNCw0pvRgtCwINGI0L7Sk9GL0YDQu9Cw0L3Ri9C/INKb0LDQu9GL0L8g0pvQvtGP0LTRiy7QntGB0YvQtNCw0L0g0YHTmdCx0Lgg0YLQtdGA0ZbRgdGW0L3QtNC1INGC0YPRi9C70pPQsNC9INGB05nRgtGC0LXQvSDQsdCw0YHRgtCw0L8gNiDQsNC5LDEyINCw0LksMTgg0LDQuSzQutC10LnQtNC1IDI0INCw0Lkg0LDRgNCw0LvRi9KbINGD0LDSm9GL0YLRgtCw0pPRiyDQtNC10L3QtdC90ZbSoyDSm9Kx0LnRi9C80YjQsNKbINGB0q/QudC10LPRltC90ZbSoyDQsNC50LzQsNKT0YvQvdC00LAs0LXQutGWINGB0LDQvdC90YvSoyDRltGI0LrRli3RgdGL0YDRgtKb0Ysg0LDQudC80LDSm9GC0LDRgNGL0L3QtNCwINC205nQvdC1INC00LUg0LbQuNGWINCx0LXQuy3QsNGA0pvQsCDQsNC50LzQsNKb0YLQsNGA0YvQvdC00LAg0LrRltGI0LrQtdC90LUg0LTQsNKb0YLQsNGAINGC0q/RgNGW0L3QtNC1INCx0L7Qu9Cw0LTRiy7QotKv0YHRgtC10YDRliDQsNGI0YvSmyDRgdKx0YDSk9GL0LvRgiDQvdC10LzQtdGB0LUg0LrTqdC60YjRltC70LTQtdGDINGP0pPQvdC4INC606nQs9C10YDQs9C10L0o0YHQuNC90Y/QuinRgdC40Y/Sm9GC0Ysg0LHQvtC70YvQvyDRgtKx0YDQsNC00Ysu0q7RgdGC0ZbQvdC10L0g0LHQsNGB0YHQsNKjINCw0YPRi9GA0LzQsNC50LTRiyzRgtKv0YHRgyDTqdC30LPQtdGA0LzQtdC50LTRli7Qn9GW0YjRltC90LTQtdGA0ZYg05nRgNGC0q/RgNC70ZYs0LrTqdC70LXQvNC00LXRgNGWINC00LUg05nRgNGC0q/RgNC70ZYs0LrQsNGA0YLQsCDRgtOZ0YDRltC30LTRlizQutC10LnQtNC1INGC0ZbQv9GC0ZYg0LHRltGAINCw0LvQsNKb0LDQvdC90YvSoyDQvNOp0LvRiNC10YDRltC80LXQvSDQsdGW0YDQtNC10Lkg0LHQvtC70YvQvyDSm9Cw0LvQsNC00Ysu0JHQsNC70LAg0LXRgdC10LnQtSDQutC10LvQtSDQsdKx0Lsg0LTQsNKb0YLQsNGAINC20L7Sk9Cw0LvQsNC00Ysu0KLQtdGA0ZYg0LHRltGA0LrQtdC70LrRliDRgtKv0YHQutC1INC10L3QtdC00ZYuNdC20LDRgdKb0LAg0LTQtdC50ZbQvdCz0ZYg0LDRgNCw0LvRi9Kb0YLQsC48YnIgLz4NCjIu0JHQtdGA0ZbQu9Cz0LXQvSDQutC70LjQvdC40LrQsNC70YvSmyDRgtCw0L/RgdGL0YDQvNCw0LTQsNKT0YsgN9Cw0LnQu9GL0psg0LHQsNC70LDQtNCwINGA0LDRhdC40YIgLNGP0pPQvdC4INCUINC005nRgNGD0LzQtdC90ZbQvdGW0qMg0LbQtdGC0LrRltC70ZbQutGB0ZbQt9C00ZbQs9GWICjRltGI0LrQtSDSm9Cw0LHRi9C70LTQsNGDINCx0L7Qu9C80LDSk9Cw0L3QvdCw0L0v0LrSr9C90L3RltKjINC606nQt9GW0L3RltKjINC20LXRgtC60ZbQu9GW0LrRgdGW0Lcg0YLSr9GB0YPRltC90LXQvS/QlCDQtNOZ0YDRg9C80LXQvdGW0L3RltKjINC00rHRgNGL0YEg0YHRltKj0ZbRgNGW0LvQvNC10YPRltC90LXQvSnQsdC+0LvQsNGC0YvQvSDRgdKv0LnQtdC60YLQtdGA0LTRltKjINOZ0LvRgdGW0LfQtNGW0LPRltC80LXQvSDQttOZ0L3QtSDRiNCw0LzQsNC00LDQvSDRgtGL0YEg0LbSsdC80YHQsNGA0YPRi9C80LXQvSDRgdC40L/QsNGC0YLQsNC70LDRgtGL0L0g0LDRg9GA0YMu0K/Sk9C90Lgg0L7RgdGC0LXQvtC80LDQu9GP0YbQuNGPLtCR0rHQuyDQttCw0pPQtNCw0LnQtNCwINCx0LDQu9Cw0LTQsNKT0Ysg0YDQsNGF0LjRgiDQsdC10LvQs9GW0LvQtdGA0ZYg0L7Quy3QvNCw0LfQsNGB0YvQt9C00YvSmyzRgtC10YDRiNC10qPQtNGW0Los0rHQudKb0YvQvdGL0qMg0LHSsdC30YvQu9GD0Yss0YTRgNC+0L3RgtCw0LvRjNC00ZYg0LbTmdC90LUg0L/QsNGA0LjQtdGC0LDQu9GM0LTRliDQsdGD0LPQvtGA0L7QutGC0LDRgNC00YvSoyDSr9C70LrQtdGO0ZYu0JPQuNC/0L7QutCw0LvRjNGG0LXQvNC40Y8s0LPQuNC/0L7RhNC+0YHRhNC+0YLQtdC80LjRjyDQvtGA0YvQvSDQsNC70LDQtNGLLtCR0rHQuyDQsdCw0LvQsNKT0LAg0YLQtdC60YHQtdGA0ZbRgSDQttKv0YDQs9GW0LfRg9C00ZYg0YDQtdC90YLQs9C10L3QvdC10L0g0LHQsNGB0YLQsNGDINKb0LDQttC10YIu0KDQtdC90YLQs9C10L0g0LDQv9C/0LDRgNCw0YLRiyDQsNGA0pvRi9C70Ysg06nRgdGDINGC0LDSm9GC0LDQu9Cw0YDRi9C90YvSoyDQutC10qPQtdGO0ZbQvSwg0YHSr9C50LXQutGC0ZbSoyDQttCw0pPQtNCw0LnRi9C9INC606nRgNC1INCw0LvQsNC80YvQtyDQttOZ0L3QtSDQtNC1INCw0L3QsNGC0L7QvNC40Y/Qu9GL0psg0YHSr9C50LXQuiDTqdGB0YMg0LXRgNC10LrRiNC10LvRltC60YLQtdGA0ZbQvSDQsdCw0pvRi9C70LDQuSDQsNC70LDQvNGL0Lco0LrTqdC/INC20LDSk9C00LDQudC00LAg0YDQsNGF0LjRgiDQsNGD0YDRg9GL0LzQtdC9INCw0YPRi9GA0LDRgtGL0L0g0LHQsNC70LDQu9Cw0YDQtNCwINCw0Y/SmyDRgdKv0LnQtdCz0ZYg0YHRi9GA0YLSm9GLL9GW0YjQutC1INC80LDQudGL0YHRi9C/INOp0YHQtdC00ZYp0Y/Sk9C90Lgg0YHSr9C50LXQuiDQtNC10YTQvtGA0LzQsNGG0LjRj9GB0YvQvS7QodC+0L3Ri9C80LXQvSDSm9Cw0YLQsNGAINCS0LjRgtCw0LzQuNC90LTQtdGA0LPQtSDQsdOp0LvQtdC6INKb0LDQvSDQsNC90LDQu9C40LfRltC9INGC0LDQv9GB0YvRgNGDINKb0LDQttC10YIg0L7QuyDQsNCy0LjRgtCw0LzQuNC90L7Qt9C00Ysg0LHSsdC7INGB0LvRg9GH0LDQudC00LAg0JQg0LLQuNGC0LDQvNC40L3RltC90ZbSoyDSm9Cw0L3RiNCw0LvRi9Kb0YLRiyDQtNC10YTQuNGG0LjRgtGC0LAg0LXQutC10L3RltC9INC606nRgNC1INCw0LvQsNC80YvQty7QodC+0L3Ri9C80LXQvSDSm9Cw0YLQsNGAINCa0LDQu9GM0YbQuNC5INC205nQvdC1INGE0L7RgdGE0L7RgCDRj9KT0L3QuCDRjdC70LXQutGC0YDQvtC70LjRgtGC0LXRgNC00ZbSoyDQtNC1INC806nQu9GI0LXRgNGW0L0g0LHRltC70YMg0pvQsNC20LXRgtC/0ZbQty7QodC40LzQv9GC0L7QvCDQotGA0YPRgdGB0L4g0LbTmdC90LUg0KXQstCw0YHRgtC10LrQsCDQttKv0YDQs9GW0LfQtdC80ZbQty7QlNC10L3RgdC40L3QvtC80LXRgtGA0LjRjy3RgdKv0LnQtdC60YLRltKjINC80LjQvdC10YDQsNC70LTRi9KbINGC0YvSk9GL0LfQtNGL0pPRi9C9INCw0L3Ri9Kb0YLQsNGD0pPQsCDQvNKv0LzQutGW0L3QtNGW0Log0LHQtdGA0LXQtNGWLtCj0JTQlyDQsNC/0L/QsNGA0LDRgtGLINCx0LDRg9GL0YAg0LzQtdC9INC606nQutCx0LDRg9GL0YDQtNGL0qMg0rHQu9KT0LDRjiDRgdC10LHQtdCx0ZbQvSDQsNC90YvSm9GC0LDRgyDSr9GI0ZbQvS7QodGW0LvRgtGW0LvRltC6INGE0L7RgdGE0LDRgtCw0LfQsCDRgNCw0YXQuNGC0YLRltKjINCx0LXQu9GB0LXQvdC00ZbQu9GW0LPRltC90ZbSoyDQvNCw0YDQutC10YDRlizRgNCw0YXQuNGCINCx0L7Qu9GB0LAg0LbQvtKT0LDRgNGL0LvQsNC50LTRiy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9" table:style-name="ce1">
            <text:p>915359</text:p>
          </table:table-cell>
          <table:table-cell office:value-type="string" table:style-name="ce1">
            <text:p>russian</text:p>
          </table:table-cell>
          <table:table-cell office:value-type="string" table:style-name="ce1">
            <text:p>Билет 6&amp;lt;br /&amp;gt; 1.У доношенного новорожденного ребенка на приеме выявлены монголоидные пятна. Чем объясняется их появление? И укажите их локализацию.&amp;lt;br /&amp;gt; 2. Ребенку 7 месяцев. с рождения на естественном вскармливании. Жалобы на беспокойство, потливость, плохой сон. Объективно: отмечаются увеличенные лобные и теменные бугры, рахитические четки, &amp;quot;распластанный&amp;quot; живот, расширенная нижняя апертура грудной клетки, край печени выступает на 3 см из-под реберной дуги, пальпируется край селезенки. В сыворотке крови: Са - 1,7 мм/л, Р -1.12мм/л. В чём заключается методика исследования костной системы у детей?&amp;lt;br /&amp;gt;</text:p>
          </table:table-cell>
          <table:table-cell office:value-type="string" table:style-name="ce1">
            <text:p>MS7QnNC+0L3Qs9C+0LvQvtC40LTQvdC+0LUg0L/Rj9GC0L3QsCDQuNC80LXRjtGCINGB0LjQvdC10LLQsNGC0YPRjiDQvtC60YDQsNGB0LrRgywg0YMg0L3QvtCy0L7RgNC+0LbQtNC10L3QvdGL0YUg0LzQvtCz0YPRgiDQstGL0Y/QstC70Y/RgtGM0YHRjyDRgtCw0LrQuNC1INC80L7QvdCz0L7Qu9C+0LjQtNC90YvQtSDQv9GP0YLQvdCwINC90LAgMi0zINC00LXQvdGMINC20LjQt9C90LgsINC+0L3QuCDRj9Cy0LvRj9GO0YLRgdGPINGE0LjQt9C40L7Qu9C+0LPQuNGH0LXRgdC60LjQvNC4LiDQkCDRgtCw0LrQttC1INGN0YLQuCDQv9GP0YLQvdCwINGP0LLQu9GP0Y7RgtGB0Y8g0L3QsNC60L7Qv9C70LXQvdC40LXQvCDQvNC10LvQsNGC0L7QvdC40L3QsCDQvdCwINGB0L7QtdC00LjQvdC40YLQtdC70YzQvdC+0Lkg0YLQutCw0L3QuCDQutC+0LbQuC7QktC/0LXRgNCy0YvQtSDQstGL0Y/QstC40LvQuCDRgyDQtNC10YLQtdC5INC80L7QvdCz0L7Qu9C+0LjQtNC90L7Qs9C+INC/0YDQvtC40YHRhdC+0LbQtNC10L3QuNC1INC/0L7RjdGC0L7QvNGDINC90LDQt9GL0LLQsNGO0YLRgdGPINC80L7QvdCz0L7Qu9C+0LjQtNC90YvQvNC4LiDQndC+INC+0L3QuCDRgtCw0LrQttC1INC40LzQtdGO0YLRgdGPINGDINC00LXRgtC10Lkg0LTRgNGD0LPQuNGFINGA0LDRgTsg0LvQvtC60LDQu9C40LfQsNGG0LjRjyDRjdGC0LjRhSDQv9GP0YLQtdC9IDog0LIg0LHQvtC70YzRiNC40L3RgdGC0LLQtSDRgdC70YPRh9Cw0LXQsiDQvdCw0YXQvtC00LjRgtGB0Y8g0L3QsCDQutGA0LXRgdGC0YbQtSwg0YDQtdC20LUg0L3QsCDQstC90YPRgtGA0LXQvdC90LXQuSDRgdGC0L7RgNC+0L3QtSDQsdC10LTQtdGALtCt0YLQuCDQv9GP0YLQvdCwINC40YHRh9C10LfQsNGO0YIg0L3QsCAyLTMg0LPQvtC0INC20LjQt9C90Lgg0YDQtdCx0LXQvdC60LAg0L3QviDQvNC+0LPRg9GCINC+0YHRgtCw0YLRjNGB0Y8g0L3QsCDQstGB0Y4g0LbQuNC30L3RjCzQvtC90Lgg0L3QtSDRj9Cy0LvRj9GO0YLRgdGPINC/0LDRgtC+0LvQvtCz0LjRh9C10YHQutC40LzQuC4yLiDQodGD0LTRjyDQv9C+INCy0YHQtdC8INC20LDQu9C+0LHQsNC8INC4INC/0L4g0YTQuNC30LjQutCw0LvRjNC90L7QvNGDINC+0YHQvNC+0YLRgNGDINC80L7QttC90L4g0L/RgNC10LTQv9C+0LvQvtC20LjRgtGMINGH0YLQviDRgyDRgNC10LHQtdC90LrQsCDRgNCw0YXQuNGCLtCi0LDQuiDQutCw0Log0YMg0L3QtdCz0L4g0L7RgtC80LXRh9Cw0Y7RgtGB0Y8g0YPQstC10LvQuNGH0LXQvdC40LUg0LvQvtCx0L3QvtC5INC4INGC0LXQvNC10L3QvdC+0Lkg0LHRg9Cz0L7RgCDQsCDRgtCw0LrQttC1INGA0LDRhdC40YLQuNGH0LXRgdC60LjQtSDRh9C10YLQutC4LCLRgNCw0YHQv9C70LDRgdGC0LDQvdC90YvQuSDQttC40LLQvtGCIiwg0YDQsNGB0YjQuNGA0LXQvdC90LDRjyDQvdC40LbQvdGP0Y8g0LDQv9C10YDRgtGD0YDQsCDQs9GA0YPQtNC90L7QuSDQutC70LXRgtC60LgsINC60YDQsNC5INC/0LXRh9C10L3QuCDQstGL0YHRgtGD0L/QsNC10YIg0L3QsCAzINGB0Lwg0LjQtyDQv9C+0LQg0YDQtdCx0LXRgNC90L7QuSDQtNGD0LPQuC4g0JAg0YLQsNC60LbQtSDQv9GA0Lgg0YTQuNC30LjQutCw0LvRjNC90L7QvCDQvtCx0YHQu9C10LTQvtCy0LDQvdC40Lgg0L3Rg9C20L3QviDQv9GA0L7Qv9Cw0LvRjNC/0LjRgNC+0LLQsNGC0Ywg0LLRgdC1INC60L7RgdGC0L3Ri9C1INGB0YLRgNGD0LrRgtGD0YDRiyDQtNC70Y8g0LLRi9GP0LLQu9C10L3QuNC4INCw0L3QvtC80LDQu9C40Lgu0J/QviDQsNC90LDQu9C40LfQsNC8INC60YDQvtCy0Lgg0LzQvtC20L3QviDRg9Cy0LjQtNC10YLRjCDQv9C+0L3QuNC20LXQvdC90L7QtSDQutC+0LvQuNGH0LXRgdGC0LLQviDQutCw0LvRjNGG0LjRjyDQuCDRhNC+0YHRhNC+0YDQsCDQutC+0YLQvtGA0LDRjyDQs9C+0LLQvtGA0LjRgiDQviDQvdCw0YDRg9GI0LXQvdC40Y/RhSDQvNC10YLQsNCx0L7Qu9C40LfQvNCwINC4INC/0L7QtNGC0LLQtdGA0LbQtNCw0LXRgiDRjdGC0L7RgiDQtNC40LDQs9C90L7Qtywg0L/QviDQsNC90LDQu9C40LfQsNC8INC60YDQvtCy0Lgg0L3Rg9C20L3QviDQvtCx0YDQsNGC0LjRgtGMINCy0L3QuNC80LXQvdC40LUg0L3QsCDRidC10LvQvtGH0L3Rg9GOINGE0L7RgdGE0LDRgtCw0LfRgyDRgtCw0Log0LrQsNC6INC+0L3QviDQv9C+0LrQsNC30YvQstC10YIg0LDQutGC0LjQstC90L7RgdGC0Ywg0L7RgdGC0LXQvtCx0LvQsNGB0YLQvtCyLtCQINGC0LDQutC20LUg0L/RgNC+0LLQtdGA0LjRgtGMINC/0LDRgNCw0YLQuNGA0LXQvtC40LTQvdGL0Lkg0LPQvtGA0LzQvtC9INC4INCy0LjRgtCw0LzQuNC9INCUMy4g0KLQsNC6INC60LDQuiDQs9C70LDQstC90L7QuSDRhNGD0L3QutGG0LjQtdC5INGN0YLQvtCz0L4g0LPQvtGA0LzQvtC90LAg0Y/QstC70Y/QtdGC0YHRjyDRgNC10LPRg9C70LjRgNC+0LLQsNC90LjQtSDQutCw0LvRjNGG0LjRjyDQuCDRhNC+0YHRhNCw0YDQsC7QlNC70Y8g0YLQvtGH0L3QvtCz0L4g0YPRgdGC0LDQvdC+0LLQu9C10L3QuNC1INGB0YLQvtC40YIg0LjRgdGB0LvQtdC00L7QstCw0YLRjCDQutC+0YHRgtC90YPRjiDRgtC60LDQvdGMINGH0LXRgNC10Lcg0YDQtdC90YLQs9C10L3QvtCz0YDQsNGE0LjRjiDQuCDQo9CX0JguINCd0LAg0YDQtdC90YLQs9C10L3QvtCz0YDQsNC80LzQtSDQvNC+0LbQtdC8INC+0YbQtdC90LjRgtGMINC/0LvQvtGC0L3QvtGB0YLRjCzRgdGC0YDRg9C60YLRg9GA0YMg0Lgg0YDQvtGB0YIg0LrQvtGB0YLQtdC5LtCe0YHQvtCx0LXQvdC90L4g0L/RgNC4INGA0LDRhdC40YLQtSDQvNC+0LbQvdC+INCy0YvRj9Cy0LjRgtGMINGC0LDQutC40LUg0YXQsNGA0LDQutGC0LXRgNC40YHRgtC40LrQuCDQutCw0Log0YDQsNGB0YjQuNGA0LXQvdC40LUg0LzQtdGC0LDRhNC40LfQsNGA0L3Ri9GFINC30L7QvSzQuNGB0YfQtdGA0YfQtdC90L7RgdGC0Ywg0Lgg0L7QsdC70L7QvNCw0L3QvdC+0YHRgtGMINC00LjRgdGC0LDQu9GM0L3Ri9GFINC60L7QvdGG0L7QsiDRgtGA0YPQsdGH0LDRgtGL0YUg0LrQvtGB0YLQtdC5LNC+0YHRgtC10L7Qv9C+0YDQvtC3INC60L7RgdGC0LXQuS7QoyDQtNC10YLQtdC5INGBINGA0LDRhdC40YLQvtC8INC+0LHRi9GH0L3QviDQutC+0YHRgtC4INGB0YLQsNC90L7QstGP0YLRgdGPINC80Y/Qs9C60L4g0YHRgtGA0YPQutGC0YPRgNC90YvQvNC4LtCQINC90LAg0YPQu9GM0YLRgNCw0LfQstGD0LrQsNCy0L7QvCDQuNGB0YHQu9C10LTQvtCy0LDQvdC40Lgg0YHRgtC+0LjRgiDQvtCx0YDQsNGC0LjRgtGMINCy0L3QuNC80LDQvdC40LUg0L3QsCDQv9C70L7RgtC90L7RgdGC0Ywg0LrQvtGB0YLQtdC5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30" table:style-name="ce1">
            <text:p>915430</text:p>
          </table:table-cell>
          <table:table-cell office:value-type="string" table:style-name="ce1">
            <text:p>russian</text:p>
          </table:table-cell>
          <table:table-cell office:value-type="string" table:style-name="ce1">
            <text:p>Билет 6&amp;lt;br /&amp;gt; 1.У доношенного новорожденного ребенка на приеме выявлены монголоидные пятна. Чем объясняется их появление? И укажите их локализацию.&amp;lt;br /&amp;gt; 2. Ребенку 7 месяцев. с рождения на естественном вскармливании. Жалобы на беспокойство, потливость, плохой сон. Объективно: отмечаются увеличенные лобные и теменные бугры, рахитические четки, &amp;quot;распластанный&amp;quot; живот, расширенная нижняя апертура грудной клетки, край печени выступает на 3 см из-под реберной дуги, пальпируется край селезенки. В сыворотке крови: Са - 1,7 мм/л, Р -1.12мм/л. В чём заключается методика исследования костной системы у детей?&amp;lt;br /&amp;gt;</text:p>
          </table:table-cell>
          <table:table-cell office:value-type="string" table:style-name="ce1">
            <text:p>MS7QnNC+0L3Qs9C+0LvQvtC40LTQvdGL0LUg0L/Rj9GC0L3QsCDQv9GA0LXQtNGB0YLQsNCy0LvRj9GO0YIg0YHQvtCx0L7QuSDQstGA0L7QttC00ZHQvdC90YvQtSDRg9GH0LDRgdGC0LrQuCDQs9C40L/QtdGA0L/QuNCz0LzQtdC90YLQsNGG0LjQuCzQutC+0YLQvtGA0YvQtSDQstC+0LfQvdC40LrQsNGO0YIg0LjQty3Qt9CwINCx0L7Qu9GM0YjQvtCz0L4g0YHQutC+0L/Qu9C10L3QuNGPINC80LXQu9Cw0L3QvtGG0LjRgtC+0LIg0LIg0LHQvtC70LXQtSDQs9C70YPQsdC+0LrQuNGFINGB0LvQvtGP0YUg0LrQvtC20Lgu0Y3RgtC4INC/0Y/RgtC90LAg0LjQvNC10Y7RgiDRgdC10YDQvtCy0LDRgtC+LdCz0L7Qu9GD0LHQvtCy0LDRgtGL0Lkg0LjQu9C4INGB0LjQvdC10LLQsNGC0L4t0LfQtdC70ZHQvdGL0Lkg0YbQstC10YIsINC40L3QvtCz0LTQsCDRh9GD0YLRjCDQutC+0YDQuNGH0L3QtdCy0LDRgtGL0Lkg0L7RgtGC0LXQvdC+0LouPGJyIC8+DQrRh9Cw0YnQtSDQstGB0LXQs9C+INC00LDQvdC90YvQtSDQv9GP0YLQvdCwINGA0LDRgdGB0L/QvtC70L7Qs9Cw0Y7RgtGB0Y8g0LIg0LrRgNC10YHRgtGG0L7QstC+LdC/0L7Rj9GB0L3QuNGH0L3QvtC5INC+0LHQu9Cw0YHRgtC40Ywg0LAg0YLQvtGH0L3QtdC1INC90LAg0L3QuNC20L3QtdC5INGH0LDRgdGC0Lgg0YHQv9C40L3Riy4g0YLQsNC6INC20LUg0LTQsNC90L3Ri9C1INC/0Y/RgtC90LAg0LzQvtCz0YPRgiDQsdGL0YLRjCDQvdCwINGP0LPQvtC00LjRhtCw0YUg0Lgg0YDQtdC20LUg0LLRgdC10LPQviDQtNCw0L3QvdGL0LUg0L/Rj9GC0L3QsCDQvNC+0LPRg9GCINGA0LDRgdC/0YDQvtGB0YLRgNCw0L3Rj9GC0YzRgdGPINC90LAg0LTRgNGD0LPQuNC1INC80LXRgdGC0LAg0YLQtdC70LAsINC90L4g0YHQsNC80YvQvCDRh9Cw0YHRgtGL0Lwg0Lgg0LrQu9Cw0YHRgdC40YfQtdGB0LjQvCDQvNC10YHRgtC+0Lwg0LTQu9GPINC/0Y/RgtGP0L0g0Y/QstC70Y/QtdGC0YHRjyDQuNC80LXQvdC90L4g0L/QvtGP0YHQvdC40YfQvdC+LdC60YDQtdGB0YLRhtC+0LLQsNGPINC+0LHQu9Cw0YHRgtGMIC4g0L7QsdGL0YfQvdC+INC/0Y/RgtC90LAgINC40YHRh9C10LfQsNGO0YIg0LjQu9C4ICDQsdC70LXQtNC90LXRjtGCINC6IDTigJM3INCz0L7QtNCw0Lwg0LbQuNC30L3QuCDQuCDQvtGH0LXQvdGMICDRgNC10LTQutC+INGB0L7RhdGA0LDQvdGP0Y7RgtGB0Y8g0LIg0L/QvtC00YDQvtGB0YLQutC+0LLQvtC8INC4INCy0LfRgNC+0YHQu9C+0Lwg0LLQvtC30YDQsNGB0YLQtS4g0Y3RgtC4ICDQv9GP0YLQvdCwINC90LUg0L/RgNC10LTRgdGC0LDQstC70Y/RjtGCINC+0L/QsNGB0L3QvtGB0YLQuCDQuCDQvdC1INGC0YDQtdCx0YPRjtGCINC70LXRh9C10L3QuNGPLDxiciAvPg0KMi7RgyDQtNC10YLQtdC5INC+0YbQtdC90LjQstCw0Y7RgiDRhNC+0YDQvNGDINCz0L7Qu9C+0LLRiyDQsiDQvtGB0L3QvtCy0L3QvtC8INC70L7QsdC90YvQtSDQuCDRgtC10LzQtdC90L3Ri9C1INCx0YPQs9GA0Yss0L/RgNC+0LLQvtC00Y/RgiDQvtGB0LzQvtGC0L8g0LPRgNGD0LTQvdC+0Lkg0LrQu9C10YLQutC4ICzQv9GA0L7QstC10YDRj9GO0YIg0LrQvtGB0YLQvdC+LdC80YvRiNC10YfQvdGL0Lkg0YLQvtC90YPRgSwgINC+0YbQtdC90LjQstCw0Y7RgiDRgdC+0YHRgtC+0Y/QvdC40LUg0YDQvtC00L3QuNGH0LrQvtCyINGA0LDQt9C80LXRgCDQsdC+0LvRjNGI0L7Qs9C+INGA0L7QtNC90LjRh9C60LAsINC60YDQsNGPLCDRgtCw0Log0LbQtSDQvtGG0LXQvdC40LLQsNGOINC90LDQu9C40YfQuNC1INCx0L7Qu9C10LLQvtC5INGA0LXQsNC60YbQuNC4INC/0YDQuCDQvdCw0LTQsNCy0LvQuNCy0LDQvdC40Lgg0L3QsCDQutC+0YHRgtC4IC4g0LTQtdGC0Y/QvCDQuNC30LzQtdGA0Y/RjtGCINC+0LrRgNGD0LbQvdC+0YHRgtGMINCz0L7Qu9C+0LLRiyDQuCDQs9GA0YPQtNC4LCDRgNC+0YHRgiwg0LzQsNGB0YHQsCDRgtC10LvQsCwg0YDQsNGB0YfQuNGC0YvQstCw0Y7RgiDQuNC80YIuPGJyIC8+DQrQoNC10L3RgtCz0LXQvdC+0LPRgNCw0YTQuNGH0LXRgdC60L7QtSDQuNGB0YHQu9C10LTQvtCy0LDQvdC40LUg0Y/QstC70Y/QtdGC0YHRjyDQvtGB0L3QvtCy0L3Ri9C8ICDQvNC10YLQvtC00L7QvCDQtNC70Y8g0L/QvtC00YLQstC10YDQttC00LXQvdC40Y8g0YDQsNGF0LjRgtCwINGA0LXQvdGC0LPQtdC90L7Qs9GA0LDRhNC40Y8g0LTQuNGB0YLQsNC70YzQvdGL0YUg0L7RgtC00LXQu9C+0LIg0LvRg9GH0LXQstGL0YUgINC4INCx0L7Qu9GM0YjQtdCx0LXRgNGG0L7QstGL0YUg0LrQvtGB0YLQtdC5IC4g0YLQsNC6INC20LUg0L7RhtC10L3QuNCy0LDRjtGCINGB0L7RgdGC0L7Rj9C90LjQtSDQvNC10YLQsNGE0LjQt9C+0LIsINC30L7QvdGDINGA0L7RgdGC0LAsINGH0ZHRgtC60L7RgdGC0Ywg0LrQvtGB0YLQvdGL0YUg0LrQvtC90YLRg9GA0L7Qsiwg0L3QsNC70LjRh9C40LUg0L7RgdGC0LXQvtC/0L7RgNC+0YLQuNGH0LXRgdC60LjRhSDQuNC30LzQtdC90LXQvdC40LksINC6INC00L7Qv9C+0LvQvdC40YLQtdC70YzQvdGL0LUg0LzQtdGC0L7QtNCw0Lwg0LzQvtC20L3QviDQvtGC0L3QtdGB0YLQuCDQo9CX0Jgg0LrQvtGB0YLQtdC5INC+0L0g0LjRgdC/0L7Qu9GM0LfRg9C10YLRgdGPINC90LDQvNC90L7Qs9C+INGA0LXQttC10YfQtdC8INGA0LXQvdCz0YLQtdC9INC40YHQv9C+0LvRjNC30YPQtdGC0YHRjyDQtNC70Y8g0L/QtdGA0LLQuNGH0L3QvtC5INC00LjQsNCz0L3QvtGB0YLQuNC60Lgg0YDQsNGF0LjRgtCwLCDQvNC+0LbQtdGCINC/0YDQuNC80LXQvdGP0YLRjNGB0Y8g0LrQsNC6INGB0LrRgNC40L3QuNC90LPQvtCy0YvQuSDQvNC10YLQvtC0INCyINC90LXQutC+0YLQvtGA0YvRhSDRgdC70YPRh9Cw0Y/RhS4g0LAg0YLQsNC6INC20LUg0LvQsNCx0L7RgNCw0YLQvtGA0L3Ri9C1INC00LDQvdC90YvQtSDRg9GA0L7QstC10L3RjCBDYSwgUCwg0YnQtdC70L7Rh9C90LDRjyDRhNC+0YHRhNCw0YLQsNC30LAsINCy0LjRgtCw0LzQuNC90LAgR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08" table:style-name="ce1">
            <text:p>915008</text:p>
          </table:table-cell>
          <table:table-cell office:value-type="string" table:style-name="ce1">
            <text:p>english</text:p>
          </table:table-cell>
          <table:table-cell office:value-type="string" table:style-name="ce1">
            <text:p>Ticket 6&amp;lt;br /&amp;gt; 1. Term born baby at the examination Mongoloid spots are revealed. How to explain their appearance? And indicate their localization.&amp;lt;br /&amp;gt; 2.The child is 7 months old. From birth on natural feeding. Complaints of anxiety, sweating, poor sleep. Objectively: there are enlarged frontal and parietal tubercles, rickets, a flattened abdomen, an enlarged lower chest aperture, the edge of the liver protrudes 3 cm from under the costal arch, the edge of the spleen is palpated. In blood serum: Ca - 1.7 mm / l, P 1.12 mm / &amp;lt;br /&amp;gt; What is the methodology for studying the skeletal system in children?&amp;lt;br /&amp;gt; &amp;lt;br /&amp;gt;</text:p>
          </table:table-cell>
          <table:table-cell office:value-type="string" table:style-name="ce1">
            <text:p>MS99LiB0ZXJtIHRoZSBib3JuIGJhYnkgYXQgdGhlIGV4YW1pbmF0aW9uIG1vbm9nb2xvaWQgc3BvdHMgYXJlIHJldmVhbGVkIC5pdCBpcyBhbHNvIGtub3duIGFzIGNvbmdlbml0YWwgZGVybWFsIG1lbGFub2N5dG9zaXMgYXJlIGJlbmlnbiBwaWdtZW50ICBsZXNzaW9ucyBvZnRlbiBvYnNlcnZlZCBpbiBpbmZlbnRzIHBlcnRpY3VsbGxhcnkgaW4gdGhvc2UgZGFya2VyIHNraW4gdG9uZXMgLi4gdGhlc2Ugc3BvdCBhYXJlIHJlc3VsdCBvZiBpbnRlcmFwbWVudCBvZiBtZWxlbm9jeXRlcyBpbm4gdGhoZSBkZWVlcGVyIGxleWVyIG9mIHRoZSBza2luIGR1ZXJpbm5nIGVtYnJ5b25pYyBkZXZlbG9wbWVudCAuLiB0aGV5IGFycmUgdHlwaWNhbHkgYmx1ZSBncmV5IGluIGNvbG91cnIgYXJlIG1vc3QgY29tbWVubGx5IGZvdW5kIGluIGxvb3dlciBiYWNrICYgYnV0dG9rIHBlcnNlbmNlIG9mIG1vbmdvbG9pZCBzcG9ydHMgZG9lcyBub3QgaW5kaWNhdCBhbnkgdW5kZXJseWluZyBoZWFsdGggaXNzdWVzIGFuZCB1ZXN1bHkgZmFkZXMgYXMgdGhlIGNoaWxkcyBncm93IC4gICAgMi99LiB0aGUgY2hpbGQgc3ltcHRvbXMgYWxvbmcgd2l0aCB0aGUgcGh5c2ljYWwgYW5kIGxhYm9yYXRyeSBmaW5kaW5uZyAuIHN1Z2dnZXN0IG51dHJpc2lvbmFsIHJpY2tldCB0aGF0IGEgY29ubmRpdGlvbiB3aGVyZSByZXN1bHRpbmcgb2Ygdml0YW1pbiBkIGRlZmljZW5jeSB0aGF0IGNhbiBpbmRlcXV0cyBjYWxjaXVtIGFuZCBwaG9zcGhvcnVzIGFic29yYnRpb24gLCAsICAgYW5kIC50aGUgbWV0aG9yZCBvZiB0aGUgc3R1ZHkgc2tlbGV0YWwgc3lzdGVtIGluIGNoaWxsZWRyZW4gaW5jbHVkZXM7IHRoZSBjb21tb24gbWV0aG9yZHMgYXJlIEEucmFkaW9ncnBoeSB4cmF5IGFyZSBjb21tZW5seSB1c2VkIGFzIGVsZXZldGVkIGJvbmUgZGVuc2l0eSAsIHN0dWN0dXJlIGFubmQgZ3Jvd3RoIGNoYW5nIGluIGJvbmUgZGVuc2l0eSBhbmQgdGhlIHByZXNlbmNlIG9mICAgcmFjaGl0aWMgICBkZWZvcm1pdGlzIGNhbiBjYW4gYmUgdmlzdWxpemVkICAgICAgICAgICAgICAgICAgICAgICAgICAgICAgICAgICAgICAgICAgICAgICAgICAgICAgICAgICAgICAgICAgICBCLnNlcnVtIGNhbHNpdW0gYW5kIHBob3NwaG9ydXMgbGV2ZWwgYmxvb29kIHRlc3QgYXMgY2FzZSBtb25ldGl6ZSBhbmQgICAgaGVscCBhc3NlcyBtaW5yYWwgbGV2ZWwgY3J1c2lhbCBmb3IgYm9uZSBoZWx0aCAgICBDLiBjbGluaWNhbCBleGFtaW5hdGlvbiA7IGFzc3NlbmNpYWwgZm9yIG1vbml0ZXJpbmcgYm9uZSBoZWx0aCBhbmQgZmluZCBvdXQgc29tZSBhYm5vcm1pbGl0eXMgYyBELiBib25lIGRlbnNpdG9tZXRyeSBkdWFsIGVuZXJneSB4cmF5IGFic29ycHRpb29tZXRyeSAoZHhhKWl0dHMgbWVzc3VyZSBib25lIG1pbnJhbCBkZW5zaXR5IGFuZCAgICAgIGhlbHAgdG8gZGlhZ25vc2UgdGhlIGNvbmRpdGlvbiB0aGF0IGNhbiBoZWxwIHRvIGRpYWdub3NlIGMwb25kaXRpb24gdGhhdCBhZmZlY3RpbmcgYm9uZSBzdHJlbnRoICAgICAgICAgRS4gbnV0cmlzaW9uYWwgZXNzaXNtZW50cyBlbGV2YXRpbmcgY2hpbGQgZGlldCBhbmQgbnVldHJpbmlvbmFsIG1ldGhvcmQgdG8gZXNzaW9udGlhbCB0byBpZGVudGlmeSBudXRyaXRpb25hbCBkZWZpY2VuY3kgdGhhdCBjb250cmlidXRpbmcgc2tlbGV0YWwgc3lzdGVtbSBpc3N1ZXMgIEYuIGhvcm1vbmFsIHRlc3RpbmcgaW4gc29vbWUgY2FzZXMgZXNzZW5jaWFsIGxldmVsIGluZGljYXRlZCB0byBib25lIGhlbHRoIHN1Y2ggYXNkIHBhcmF0aHlyb2lkIGhvcm1vbiAocHRoKSBhbm5kIHZpdC4gRCBpZCBuZWVzZXNzZXJ5IGZvciBib25lIGhlbHRoIC4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11" table:style-name="ce1">
            <text:p>915011</text:p>
          </table:table-cell>
          <table:table-cell office:value-type="string" table:style-name="ce1">
            <text:p>english</text:p>
          </table:table-cell>
          <table:table-cell office:value-type="string" table:style-name="ce1">
            <text:p>Ticket 6&amp;lt;br /&amp;gt; 1. Term born baby at the examination Mongoloid spots are revealed. How to explain their appearance? And indicate their localization.&amp;lt;br /&amp;gt; 2.The child is 7 months old. From birth on natural feeding. Complaints of anxiety, sweating, poor sleep. Objectively: there are enlarged frontal and parietal tubercles, rickets, a flattened abdomen, an enlarged lower chest aperture, the edge of the liver protrudes 3 cm from under the costal arch, the edge of the spleen is palpated. In blood serum: Ca - 1.7 mm / l, P 1.12 mm / &amp;lt;br /&amp;gt; What is the methodology for studying the skeletal system in children?&amp;lt;br /&amp;gt; &amp;lt;br /&amp;gt;</text:p>
          </table:table-cell>
          <table:table-cell office:value-type="string" table:style-name="ce1">
            <text:p>KDEpIE1vbmdvbG9pZCBhbHNvIHdlIGNhbiBjYWxsIGFzIGNvbmdlbml0YWwgZGVybWFsIG1lbGFub2N5dGVzICwgaXQgaXMgYSBiZW5pZ24sIGFuZCBhcHBlYXJzIGFzYSBwaWdtZW50ZWQgYXJlYSAgdGhhdCBjb21tb21seSBhcHBlYXJzIG9uIHRoZSBsb3dlciBiYWNrIGFuZCBidXR0b2NrcyBvZiB0aGUgbmV3IGJvcm4gYmFieS5wZXJ0aWN1bGFybHkgYXNpYW4gLGFmcmljYW4gY29udGluZW50YWwgY2hpbGRzLGFuZCBpbiBuYXRpdmUgYW1lcmljYW5zLCBtZWxhbm9jeXRlcyBhcmUgdHJhcHBlZCBpbiB0aGUgc2tpbiBpbiBkZWVwIGxheWVyIGR1cmluZyBmZXRhbCBkZXZlbG9wbWVudCwgIyBMT0NBTElaQVRJT04tbWFpbmx5IHRoZXNlIG1hbm9nb2xvaWRzIHNwb3RzIGFyZSBsb2NhdGVkIGluIHRoZSBzYWNyYWwgYXJlYSAoOWxvd2VyIGJhY2sgYXJlYSkgYW5kIGJ1dHRvY2tzIGFuZCBzb21ldGltZXdzIHRoZXkgYXJlIHByZXNlbnQgb20gdGhlIHNwZWNpZmljIGFyZWFzIGxpa2Ugc2hvdWxkZXIgYW5kIGxlZ3Mgb2YgdGhlIGJhYnksICNleHBsYW5hdGlvbi10aGVzZSBzcG90cyBkb2VzIG5vdCBzaG93IHRoYXQgdGhlcmUgaXMgYW55IGFibm9ybWFsIGNvbmRpdGlvbiwgdGhleXQgYXJlIG5vdCBzaWduIG9mIHBhdGhvbG9naWNhbCBjb25kaXRpb24sIGFuZCB0aGV5IGZlZCBvciBnbzBlcyBhd2F5IGFmdGVyIGZldyB5ZWFycyBmcm9tIHRoZSBiYWJpZXMgc2tpbi5hbmQgdGhlc2Ugc3BvdHMgZ290IGNsZWFyIGZyb20gdGhlIHNraW4gYWZ0ZXIgc29tZSB5ZWFycy4gICAgICAgICAgICAgICAgICAgICAgICAgICAgICAgICAgICAgICAgICAgICAgICAgICAgICAgICAgICAgICAgICAgICAgICAgICAgICAgICAgICAgICAgICAgICAgICAgICAgICAgICAgICAgICAgICAgICAgICAgICAoMikgZnJvbSB0aGUgZ2l2ZW5uIHN5bXB0b21zIHdlIGNhbiBhY2Nlc3MgdGhhdCBpdCBpcyAicmlja2V0cyIgYW5kIHdlIGNhbiBhbHJlYWR5IHNheSBieSB0aGUgc3ltcHRvbXMgbGlrZSBhbnhpZXR5ICwgc3dlYXRpbmcgLCBwb29yIHNsZWVwIGFuZCBlbmxhcmdlZWQgZnJvbnRhbCBhbmQgcGVyaXRhbCB0dWJlcmNsZXMgYWxsIG1lbnRpb25lZCBzeW1wdG9tcyBsaWtlIGZsYXR0ZW5lZCBhYmRvbWVuICwgZW5sYXJnZWQgbG93ZXIgY2hlc3QgYXBlcnR1cmUsIHRoZXNlIGFsbCBhcmUgY2xhc3NpYyBzaWducyBvZiByaWNrZXRzLCBpdCBpcyBkdWUgdG8gZGVmaWNpZW5jeSBvZiB2aXRhbWluIEQgLCBDQUxDSVVNIGFuZCBwaG9zcGhhdGUsIGFuZCBkdWUgdG8gdGhlc2UgZGVmaWNpZW5jaWVzIHRoZXJlIGlzIGJvbmUgbWluZXJhbGl6YXRpb24gaW1wYWlyZW1lbnQgYW5kIG9uZSBzeW1wb3RvbS0gdGhhdCBpcyAicmljaGtpdGljIGNoZXN0IiwgaXMgYWxzbyBtb3N0IGNvbW1vbiBzeW1wcHRvbSBvZiByaWNrZXRzLCAjIGxpdmVyIGFuZCBzcGxlZW4gZW5sYWdlbWVudCBzaG93cyB0aGUgbW9yZSBzZXZlcmVzIGZvcm0gb2Ygcmlja2V0cyBpdCBpcyB2ZXJ5IG11Y2ggZGFuZ2Vyb3VzIGFuZCBtZXRhYm9saWMgZGlzdHVyYmFuY2UgaXMgYWxzbyBnb3QgYXNzb2NpYXRlZCB3aXRoIGl0LiBibG9vZCB0ZXN0IGFuZCBzZXJ1bSBhbmFseXNpcyBpcyBkb25lIHRvMCBnZXQgbW9yZSBzcGVjaWZpYyBkZXRhaWxzIG9mIHJpY2tldHMsIG5vdyAgICAgICAgICAgICAgICAgICAgICAgICAgICA8YnIgLz4NCiMjIG1ldGhvZG9sb2d5IGZvciBzdHVkeWluZyB0aGUgc2tlbGV0YWwgc3lzdGVtIGluIGNoaWxkLSMxKSBjbGluaWNhbCBleGFtaW5hdGlvbi1pbiBjbGluaWNhbCBleGFtaW5hdGlvbiB3ZSBhY2Nlc3MgYm9uZSBkZWZvcm1pdGllcyBsaWtlIGJvdyBsZWdzIGFuZCBlbmxhcmdlZCB3cmlzdCBhbmQgY29zdG9jaG9uZHJhbCBqdW5jdGlvMG4gIzIpIFgtUkFZLSBpbiB4cmF5IHdlIGFjY2VzcyBvciBnb3QgdG8ga25vdyBhYm91dCB0aGUgYm9uZSBzdHJ1Y3R1cmUgaXRzIHNoYXBlIGFuZCB0aGUgYm9uZSBkZW5jaXR5LCB3ZSBjYW4gZWFzaWx5IGFjY2VzcyB0aGUgYm9uZSBkZWZvcm1pdHkgYnkgZXhhbWlucyB0aGUgeHJheS4gIzMpIGxhYm9yYXRvcnkgdGVzdHMgY2FuIGJlIGRvbmUtd2UgY2hlY2sgc2VydW1tIGNhbGNpdW0gbGV2ZWwgdGVzdCBpbiB0aGF0IGFuZCBhbG9uZyB3aXRoIHRoaXMgd2UgY2hlY2sgc2VydW0gcGhvc3BoYXRlIGxldmVsIHRlc3QgYW5kIGFsa2FsaW5lIHBob3NwaGF0ZSBsZXZlbCBjaGVjayBhbmQgd2UgYWxzbyBjaGVjayB2aXRhbWluIEQgbGV2ZWxzIGluIHRoZSBibG9vZCAsaXQgZ2l2ZXMgdXMgdmFyaW91cyBkYXRhIHRvIGFuYWxpemUgYWJvdXQgYW55YiBza2VsZXRhbCBkZWZvcm1pdHkgaW4gdGhlIG5ldyBib3JuIG9yIGJhYnksIGJ5IGNoZWNraW5nIHRoZXNlIHBhcmFtZXRlcnMgd2UgYWxzbyBjYW4gY2xlYXJseSBnb3QgdG8ga25vdyBhYm91dCB0aGUgY2F1c2Ugb2Ygcmlja2V0cyBpbiB0aGUgYmFieSAjNCkgYm9uZSBzY2ludHlncmFwaHkgY2FuIGFsc28gYmUgZG9uZSBpbiBzb21lIGNhc2VzLiBzbyBhbGxvdmVyIHRoZXNlIGFyZSB0aGUgbWFpbiBtZXRob2RzIGZvciBzdHVkeWluZyB0aGUgc2tlbGV0YWwgc3lzdGVtIGluIGNoaWxkLiBhbmQgYnkgdGhlc2UgbWV0aG9kc24gd2UgY2FuIGVhc2lseSBnb3QgdG8ga25vdyBhYm91dCBza2VsZXRhbCBkaXNzYWVzIG9yIGRpc29yZGVyIGluIGNoaWxkL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431" table:style-name="ce1">
            <text:p>915431</text:p>
          </table:table-cell>
          <table:table-cell office:value-type="string" table:style-name="ce1">
            <text:p>kazakh</text:p>
          </table:table-cell>
          <table:table-cell office:value-type="string" table:style-name="ce1">
            <text:p>Билет 7&amp;lt;br /&amp;gt; 1. Педиатрдын қабылдауында 3 жасар қыз бала.Бала бала бақшасына орналасады. Салмағы 15,1 кг, бойы 98см.1жастан асқан балалардың бойы мен салмағы қандай эмпирикалық формула бойынша есептеледі&amp;lt;br /&amp;gt; 2.Нәрестеллерде өттің қоюлануы синдромы деген не?&amp;lt;br /&amp;gt;</text:p>
          </table:table-cell>
          <table:table-cell office:value-type="string" table:style-name="ce1">
            <text:p>MS3RgdKx0YDQsNKbLtCR0ZbRgNGW0L3RiNGW0LTQtdC9IDEg0LbQsNGB0YLQsNC9INCw0YHSm9Cw0L0g0LHQsNC70LDQu9Cw0YAgINCx0LDQu9Cw0LvQsNGA0YvQvdGL0qMg0LHQvtC50YvQvSDTqdC70YjQtdGD0LTQtSDSm9C+0LvQtNCw0L3QsNGC0YvQvSDRjdC80L/QuNGA0LjQutCw0LvRi9KbINGE0L7RgNC80YPQu9Cw0L3RiyDQttCw0LfRgdCw0psgIjEg0LbQsNGB0YLQsNKT0Ysg0LHQvtC50YsgKzUgKNC20LDRgdGLIC0xKSIg0YHQvtC90LTQsCDQvNGL0YHQsNC70YsgMSDQttCw0YHRgtCw0pPRiyDQsdCw0LvQsNC00LAg0L7RgNGC0LDRiNCwINCx0L7QudGLIDc1INGB0Lwg0LHQvtC70YPRiyDRgtC40ZbRgS7QodC+0L3QtNCwINC606nRgNGB0LXRgtC60ZbRiCDQsdC+0LnRi9C90YjQsCDRiNCw0LzQsNC80LXQvSDQvdC+0YDQvNCw0LTQsCA4NS0xMDAg0YHQvCDQsdC+0LvRg9GLINKb0LDQttC10YIsINGP0pPQvdC4IDMg0LbQsNGB0YLQsNKT0Ysg0LHQsNC70LAg0q/RiNGW0L0gOTgg0YHQvCDQvdC+0YDQvNCwINCx0L7Qu9GL0L8g0YLQsNCx0YvQu9Cw0LTRiy7QldC60ZbQvdGI0ZbQtNC1INGB0LDQu9C80LDSmyDQutOp0YDRgdC10YLQutGW0YjRliwg0L7QuyDQvNGL0L3QsCDRhNC+0YDQvNGD0LvQsNC80LXQvSDTqdC70YjQtdC90LXQtNGWICIxINC20LDRgdGC0LDSk9GLINC+0YDRgtCwINGB0LDQu9C80LDSmysyICjQttCw0YEtMSkiLCDSm9Cw0LvRi9C/0YLQsCAxINC20LDRgdCw0YAg0LHQsNC70LDQtNCwIDEwINC60LMg0L3QvtGA0LzQsNKT0LAg0YHQsNC5INCx0L7Qu9Cw0LTRiy4gMyDQttCw0YHRgtCw0pPRiyDQsdCw0LvQsCDSr9GI0ZbQvSAiMTArMigzLTEpIi7QkdKx0Lsg0LTQtdCz0LXQvdGW0LzRltC3IDEzLTE2INC60LMg0YjRi9KT0LDQtNGLLCDRj9C60Lgg0LHQsNC70LDQtNCwIDE1LDEg0LrQsy0g0pvQsNC70YvQv9GC0YsvINC/0LDRgtC+0LvQvtCz0LjRj9GB0YvQtywg06nQtyDQttCw0YHRi9C90LAg0YHQsNC5INC00LDQvNGL0L8g0LbQsNGC0YvRgCDQtNC10LPQtdC90LTRliDQsdGW0LvQtNGW0YDQtdC00ZYu0JXQs9C10YAg0L7QuyDSm9Cw0LvRi9C/0YLQsNC9INGC06nQvNC10L0v0LbQvtKT0LDRgNGLINCx0L7Qu9GB0LAg0LPQtdC90LXRgtC40LrQsNC70YvSmywg0YTQuNC30LjQvtC70L7Qs9C40Y/Qu9GL0pssINGA0LDQtNC40LDQutGC0LjQstGC0ZYg05nRgdC10YDQu9C10YDQtNGWINCw0LnRgtCwINCw0LvQsNC80YvQty7QnNGL0YHQsNC7INGA0LXRgtGW0L3QtNC1INC10YDQs9C10LbQtdC50LvRltC70ZbQuiwg0L3QtdC80LXRgdC1INGC0ZbRgNC10LotINKb0LjQvNGL0Lsg0LDQv9C/0LDRgNCw0YLRi9C90YvSoyDQsNKb0LDRg9C70LDRgNGLLCDRgNCw0YXQuNGCINGB0LXQutGW0LvQtNGWINCw0YPRgNGD0LvQsNGA0LTRiyDQttCw0YLSm9GL0LfQsNC80YvQty48YnIgLz4NCjxiciAvPg0KMi3RgdKx0YDQsNKbLtOY0YPQtdC70LTQtdC9INCx0ZbQtyDQv9C+0YXQuNC60LDQu9C40Y8g0rHSk9GL0LzRi9C90LAg0LDQvdGL0pvRgtCw0LzQsCDQsdC10YDRltGD0LzRltC3INGI0LDRgNGCLiDQn9C+0YXQuNC60LDQu9C40Y8tINC905nRgNC10YHRgtC10LvQtdGA0LTQtSDQsdC+0LvQsNGC0YvQvSDTqdGC0YLRltKjINKb0L7RjtC70LDQvdGD0Ysu0K/Sk9C90Lgg06nRgiDQutC+0L3Rhi7QttC+0pPQsNGA0Ysg0L3QtdC80LXRgdC1INOp0YLQtSDQttC+0pPQsNGA0Ysg0LHQvtC70YPRiy7QntC7INOp0YIg0pvRi9GI0pvRi9C70LTQsNGA0Ysg0LHQuNC70LvQuNGA0YPQsdC40L0g0LzQtdC9INCx0LDRgdKb0LAg0LrQvtC80L/QvtC90LXQvdGC0YLQtdGAINGC0LXQv9C1LdGC0LXSo9C00ZbQs9GW0L3SoyDQsdKx0LfRi9C70YPRi9C90LDQvSDQv9Cw0LnQtNCwINCx0L7Qu9Cw0YLRi9C9INC/0YDQvtGG0LXRgdGBLtCe0L3Ri9KjINCw0LnSm9GL0L0g0YHQtdCx0LXQv9GC0LXRgNGW0L3QtSDQsdCw0LvQsNC00LDSk9GLINGE0LjQt9C40L7Qu9C+0LPQuNGP0LvRi9KbINC10YDQtdC60YjQtdC70ZbQutGC0LXRgCwg0Y/Sk9C90Lgg0LHQsNC70LDQtNCwINOp0YIg0LbSr9C50LXRgdGWINGC0L7Qu9GL0psg0pvQsNC70YvQv9GC0LDRgdC/0LDSk9Cw0L3Ri9C90LAg0LHQsNC50LvQsNC90YvRgdGC0Ysu0J7QvdGLINC90LXQs9GW0LfQtNC10LnRgtGW0L0g0LHQvtC70YHQsNC8LCDQsdCw0YPRi9GA0LTQsCDQttOZ0L3QtSDTqdGCINC20L7Qu9C00LDRgNGL0L3QtNCw0pPRiyDRhNC10YDQvNC10L3RgtCw0YLQuNCy0YLRltC6INCx0LXQu9GB0LXQvdC00ZbQu9GW0Log0YLTqdC80LXQvSDQtdC60LXQvdGW0L0g0LHRltC70LXQvNGW0LcsINGB0L7QuyDRgdC10LHQtdC/0YLRliDTqdGC0YLRltKjINKb0LDQttC10YLRgtGWINCw0pPRi9C80Ysg0pvQsNC80YLQsNC80LDRgdGL0Lcg0LXRgtGW0LvQvNC10LnQtNGWLtC10LrRltC90YjRliDRgdC10LHQtdGC0LUg0LHRltC3INC/0LDRgtC+0LvQvtCz0LjRj9C70YvSk9KbINC20LDQudGC0YLQsNGA0LTRiyDQutOp0YDQtdC80ZbQtywg0Y/Sk9C90Lgg06nRgiDQttC+0LvQtNCw0YDRiyDQsNGA0YLQutC90LXQt9C40Y/RgdGLINC90LXQvNC10YHQtSDQtNC40YHQutC90LXQt9C40Y/RgdGLLtCh0L7QvdGL0LzQtdC9INKb0LDRgtCw0YAg0L3TmdGA0LXRgdGC0LXQtNC10LPRliDQs9C10L3QtdGC0LjQutCw0LvRi9KbINC80YPRgtCw0YbQuNGPLCDQvNGL0YHQsNC70Ysg0LHQuNC70LvQuNCw0YDQu9GLINCz0LjQv9C+0L/Qu9Cw0LfQuNGPLtKu0YjRltC90YjRltC00LXQvSDQsdCw0YPRi9GA0LTRi9KjINGE0YPQvdC60YbQuNC+0L3QsNC70LTRiywg0YLQviDQtdGB0YLRjCDSm9Cw0LvRi9C/0YLRiyDTqdC3INC20LDRgdGL0L3QsCDRgdCw0Lkg0LbQtdGC0ZbQu9C80LXRg9GWLtCe0LTQsNC9INCx0LDRgdKb0LAg06nRgtGC0ZbSoyDRgtC+0pvRi9GA0LDRg9GL0L0g0LbQsNGC0pvRi9C30LDQvNGL0LcuINCa0LvQuNC90LjQutCw0LvRi9KbINCx0LXQu9Cz0ZbQu9C10YDRljsg0YLQtdGA0ZYg0YHQsNGA0pPQsNGO0YsvINGA0LXSo9GWINOp0LfQs9C10YDRg9GWLCDQvdOZ0LbRltGBINOp0LfQs9C10YDRg9GWLCDRgtKv0YHRltC90ZbSoyDQsNKb0YjRi9C7INC60LXQu9GD0ZYsINKb0L7RjtC70LDQvdGL0L8g0pvQsNGC0LDRjtGLLtCW0prQkCDQsNC90LDQu9C40LfRltC90LTQtSDQsdC40LvQu9C40YDRg9Cx0LHQuNC9INC00LXSo9Cz0LXQudGW0L3RltKjINC20L7Sk9Cw0YDRiyDQsdC+0LvRg9GLLNC606nQvyDQttCw0pPQtNCw0LnQtNCwINGC0YPRgNCwINCx0LjQu9C70LjRgNGD0LHQuNC9INC00LXSo9Cz0LXQudGW0L3QtdC9INCw0L3Ri9Kb0YLQsNC70LDQtNGLLiDQr9KT0L3QuCDQv9C10LTQuNCw0YLRgCDQvNCw0LzQsNC9INC905nRgNC10YHRgtC10L3RltKjINCw0YLQsC3QsNC90LDRgdGL0L3QsCDQvdOZ0LbRltGB0YLRltKjINCx06nQu9GW0L3Rg9GW0L0g0pvQsNC00LDSk9Cw0LvQsNC/INC+0YLRi9GA0YMg0LrQtdGA0LXQuiDQtNC10LPQtdC9INC60LXSo9C10YEg0LHQtdGA0LUg0LDQu9Cw0LTRiywg0YHQtdCx0LXQsdGWINC60LXQudCx0ZbRgCDQttCw0pPQtNCw0LnQtNCwINCx0LDQu9Cw0pPQsCDRgdKx0LnRi9Kb0YLRi9Kb0YLRi9KjINGC05nRg9C70ZbQutGC0ZbQuiDQvdC+0YDQvNCw0YHRi9C9INC00rHRgNGL0YEg0LHQtdGA0LzQtdGD0ZYg0LzSr9C80LrRltC9LtCV0LPQtdGAINCx0rHQuyDRgNC10LrQvtC80LXQvdC00LDRhtC40Y/QvdGLINGB0LDSm9GC0LDQuSDRgtKx0YDQsCwg0LHQsNC70LDQtNCwINC/0L7RhdC40LrQsNC70LjRjyDQsdCw0LnSm9Cw0LvRgdCwINCx0LDRg9GL0YDRi9C90LAg0LbTmdC90LUg06nRgiDQttC+0LvQtNCw0YDRi9C90YvSoyDRhNGD0L3QutGG0LjQvtC90LDQu9GM0LTRliDSm9GL0LfQvNC10YLRltC9INGC0LXQutGB0LXRgNC10LzRltC3LiDTqNC3INGC0rHQttGL0YDRi9C80LTQsNC80LDQvNCwINC606nRiNC10YLRltC9INCx0L7Qu9GB0LDSmywg06nRgtGC0ZbSoyDSm9C+0Y7Qu9Cw0L3RgyDRgdC40L3QtNGA0L7QvNGLLSDQv9C+0YXQuNC60LDQu9C40Y8g0LTQtdC/INCw0YLQsNC70LDQtNGLLg==</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2" table:style-name="ce1">
            <text:p>1066872</text:p>
          </table:table-cell>
          <table:table-cell office:value-type="string" table:style-name="ce1">
            <text:p>kazakh</text:p>
          </table:table-cell>
          <table:table-cell office:value-type="string" table:style-name="ce1">
            <text:p>Билет 7&amp;lt;br /&amp;gt; 1. Педиатрдын қабылдауында 3 жасар қыз бала.Бала бала бақшасына орналасады. Салмағы 15,1 кг, бойы 98см.1жастан асқан балалардың бойы мен салмағы қандай эмпирикалық формула бойынша есептеледі&amp;lt;br /&amp;gt; 2.Нәрестеллерде өттің қоюлануы синдромы деген не?&amp;lt;br /&amp;gt;</text:p>
          </table:table-cell>
          <table:table-cell office:value-type="string" table:style-name="ce1">
            <text:p>0JbQsNGD0LDQvzE6IDHQttCw0YHRgtCw0L0g0LrQtdC50ZbQvdCz0ZYg0LHQsNC70LDQu9Cw0YDQtNGL0qMg0LTQtdC90LUg0rHQt9GL0L3QtNGL0pPRiyDQsdCw0pPQtNCw0YDQu9GLINC10YHQtdC/0YLQtdGDINKv0YjRltC9INC60LXQu9C10YHRltC00LXQuSDTmdC00ZbRgdGC0LXRgNC00ZYg0pvQvtC70LTQsNC90YPSk9CwINCx0L7Qu9Cw0LTRizog0L3TmdGA0LXRgdGC0LXQvdGW0qMg0LHQvtC50YsgNCDQttCw0YHRi9C90LAg0pvQsNGA0LDQuSDQtdC60ZYg0LXRgdC1INOp0YHQtdC00ZYg0LbTmdC90LUgMTAw0YHQvCDSm9Kx0YDQsNC50LTRiy4gNNC20LDRgdKb0LAg0LTQtdC50ZbQvdCz0ZYg0LHQsNC7LdC00YvSoyDQsdC+0LnRiyAo0YHQvCk9MTAwLTgoNC1uKSw00LbQsNGB0YLQsNC9INCw0YHSm9Cw0L0g0LHQsNC7LdC00LAg0LHQvtC50YsgPTEwMCs2KG4tNCnRhNC+0YDQvNGD0LvQsCDQsNGA0pvRi9C70Ysg0LXRgdC10L/RgtC10LnQvNGW0Lcs0LzSsdC90LTQsNKT0Ysg0L8t0LHQsNC70LDQvdGL0qMg0LbQsNGB0Ys7Mi0xMSDQttCw0YEg0LDRgNCw0LvRi9KT0YvQvdC00LDSk9GLINCx0LDQu9Cw0LvQsNGAINKv0YjRltC9INKb0LDQu9GL0L/RgtGLINC00LXQvdC1INGB0LDQuy3QvdGL0qMg0LHQsNKT0LTQsNGA0LvQsNC80LDQu9GLINC10YHQtdC/0YLQtdGDINGE0L7RgNC80YPQu9Cw0YHRiyA60LTQtdC90LUg0YHQsNC70LzQsNKT0Yso0LrQsyApMTAuNSsybizQvNKx0L3QtNCw0pPRiyAgbi0xMSDQttCw0YHSm9CwINC00LXQudGW0L3Qs9GWINCx0LDQu9Cw0L3Ri9KjINC20LDRgdGLOzEwLDUtMSDQttCw0YHRgtCw0pPRiyDQsdCw0LvQsNC90YvSoyDQvtGA0YLQsCDQtNC10L3QtSDRgdCw0LvQvNCw0pPRiy7QkdC+0Lkg0LTQsNC80YPRiyDSm9Cw0LvRi9C/0YLRiyDQsdC+0LvRi9C/INGC0LDQsdGL0LvQsNC00YsuIDPQttCw0YHSm9CwINC00LXQudGW0L3Qs9GWINCx0LDQu9Cw0LvQsNGAINKv0YjRltC9INCx0L7QudGLOiDQsdCw0LvQsCDRgtGD0pPQsNC90LTQsCDRiNCw0LzQsNC80LXQvSA1MNGB0Lws0LDQuyAx0LbQsNGB0YLQsCDRiNCw0LzQsNC80LXQvSA3NSDRgdC8LDQt0LbQsNGB0YLQsCAxMDDRgdC8LNGB0L7QvdC00YvSm9GC0LDQvSDQsdC+0Lk0INC20LDRgdKb0LAg0LTQtdC50ZbQvSDTqdGB0ZbQvyDQtdC60ZYg0LXRgdC1IDEwMNGB0Lwg0LPQtSDQtNC10LnRltC9INOp0YHQtdC00ZYu0JHQtdGA0ZbQu9Cz0LXQvSDQsdCw0LvQsNC90YvSoyDQttCw0YHRiyAzLNCx0L7QudGLIDk4INGB0Lwg0Y/Sk9C90Lgg0LHQvtC5INC00LDQvNGD0Ysg0pvQsNC70YvQv9GC0YsuIGtnPTIqMys4ICzRgdCw0LvQvNCw0pPRiyBrZz0xMCsyKigzLTEpPTEwKzQ9MTRrZyDQvdCw0pvRgtGLINGB0LDQu9C80LDSk9GLIDE1LDEgLdGP0pPQvdC4INCx0rHQuyDSm9Cw0LvRi9C/0YLRiyDRiNC10LrRgtC10YDQtNC1INOp0LnRgtC60LXQvSAzINC20LDRgdGC0LDSk9GLINCx0LDQu9CwINKv0YjRltC9ICstMTXQv9Cw0LnRi9C3INCw0YPRi9GC0pvRgyDRgNKx0pvRgdCw0YIg0LXRgtGW0LvQtdC00ZYuICAgICAgICA8YnIgLz4NCjxiciAvPg0KPGJyIC8+DQo8YnIgLz4NCiDQltCw0YPQsNC/Mjog0J3TmdGA0LXRgdGC0LXQu9C10YDQtNC1INOp0YLRgtGW0qMg0pvQvtGO0LvQsNC90YMg0YHQuNC90LTRgNC+0LzRiyDQv9Cw0YXQuNC60L7Qu9C40Y8g0L3QtdC80LXRgdC1INC/0YHQuNGF0LjQvtC90YbQuNGPICDRgdC40L3QtNGA0L7QvNGLINC00LXQvyDQsNGC0LDQu9Cw0LTRiy7Qn9Cw0YXQuNC60L7Qu9C40Y8g0YHQuNC90LTRgNC+0LzRiyDQtNC10L8tINC20LDSo9CwINGC0YPSk9Cw0L0g0L3TmdGA0LXRgdGC0LXQu9C10YDQtNC1INC60LXQt9C00LXRgdC10YLRltC9INOp0YLRgtGW0qMg0pvQvtGO0LvQsNC90YvQvy7TqdGCINC20L7Quy3RgNGLINCw0YDSm9GL0LvRiyDQsNKT0YPRi9C9INKb0LjRi9C90LTQsNGC0LDRgtGL0L0g0L/QsNGC0L7Qu9C+0LPQuNGP0LvRi9KbINC20LDSk9C00LDQuSDQsdC+0LvRi9C/INGC0LDQsdGL0LvQsNC00Ysu0J7QuyDQvdC10L7QvdCw0YLQsNC70YzQtNGLINGF0L7Qu9C10YHRgtCw0LfQtNGL0qMg0Y/Sk9C90Lgs06nRgtGC0ZbSoyDQsNKT0YPRi9C90YvSoyDQsdKx0LfRi9C70YPRiyDQsdGW0YAg0YLSr9GA0ZbQvdC1INC20LDRgi3QtNGLLtCf0LDRhdC40LrQvtC70LjRjyDRgdC40L3QtNGALdC90YvSoyDQvNOZ0L3RljogMS3TqdGC0YLRltKjINGE0LjQt9C40LrQvi3RhdC40LzQuNGP0LvRi9KbINKb0LDRgdC40LXRgtGWINOp0LfQtdCz0ZbRgNGB0LrQtSDQsNC50L3QsNC70YvQvyzQvtC7INKb0L7RjiDRgtKx0YLSm9GL0YAg0LHQvtC70YvQvyDRgtCw0LEt0LTRiy7QkdKx0Lsg06nRgiDTqdC30LXQutGI0LXQu9C10YDRltC90LTQtSDRltGA0LPQtdC70LXRgSDRgtGD0pPRi9C30YvQvyzQsdCw0YPRi9GA0LTQsCDRhdC+0LvQtdGB0YLQsNC3INC205nQvdC1INC00LUg0YHQsNGA0pPQsNGOINC00LDQvNGD0YjRiy7TqNGCINKb0L7RjtC70YvSk9GLINOp0YIg0LbQvtC70LTQsNGA0YvQvSDRgtC+0LvRi9KbINCx0ZbRgtC10L8g0YLQsNGBLdC80LDQudC00YssINCx0ZbRgNCw0psg0LDSk9GD0YvQvSDQtdC005nRg9GW0YAg0pvQuNC90LTQsNGCLdC00YsuINCa0LvQuNC90LjQutCw0LvRi9KbINC606nRgNGW0L3RltGB0YLQtdGA0ZY60KLRg9GL0LvSk9Cw0L3QvdCw0L0g0LrQtdC50ZbQvSDQsdGW0YDQvdC10YjQtSDQsNC/0YLQsNC00LAg0LTQsNC80LjRgtGL0L0g0YLSsdGA0LDSm9GC0Ysg0YHQsNGA0pPQsNGOLNGW0YjRgtGW0qMg0LrQtdCx0YPRlizQsNGF0L7Qu9C40Y/Qu9GL0psg0L3TmdC20ZbRgSzRj9KT0L3QuCDQvdOZ0LbRltGB0ZYg0YLSr9GB0YHRltC3LNKb0LDRgNCwLdKb0L7So9GL0YAg0LfTmdGALNCx0LDRg9GL0YAg0LzQtdC9INC606nQutCx0LDRg9GL0YDQtNGL0qMg0rHQu9KT0LDQudGL0L8g0ZbRgdGW0L3Rg9GWLCDQttOZ0L3QtSDQtNC1INKb0LDQvdC00LDSk9GLINGC0ZbQutC10LvQtdC5INCx0LjQu9C40YDRg9Cx0LjQvdC90ZbSoyDQttC+0pPQsNGA0YvQu9Cw0YPRiy7QlNC40LDQs9C90L7RgdGC0LjQutCw0YHRizrQsdC40L7RhdC40LzQuNGP0LvRi9KbINKb0LDQvSDQsNC90LDQu9C40LfRliDRgtGW0LrQtdC70LXQuSDQsdC40LvQuNGA0YPQsdC40L3QvdGW0qMg0LbQvtKT0LDRgNGL0LvQsNGD0Ysg06nRgiDSm9GL0YjSm9GL0LvQtNCw0YDRi9C90YvSoyDQttC+0pPQsNGA0YvQu9Cw0YPRiyzQs9C10L/QvtGC0LDRhNC10YDQvNC10L3RgtGC0LXRgNC00ZbSoyDQttC+0pPQsNGA0Ysg0LHQvtC70YPRiy7Qo9CU0Jcg0LHQvtC50YvQvdGI0LAgKNGD0LvRjNGC0YDQsNC00YvQsdGL0YHRgtGL0psg0LfQtdGA0YLRgtC10YMpOtOp0YIg0LbQvtC70LQt0L3Ri9KjINCw0L3QsNGC0L7QvNC40Y/Qu9GL0psg0LHRltGC0LXQu9GD0ZbQvSDQttC+0pvSm9CwINGI0YvSk9Cw0YDRgyzQs9C10L/QsNGC0L7QsdC40LvQuNCw0YDQu9GL0psg0YHRhtC40L3RgtC40LPRgNCw0YTQuNGPOtOp0YLRgtGW0qMg0LDSk9GDINKb0LDRgNKb0YvQvdC00YvQu9GL0pPRi9C9INCx0LDSk9Cw0LvQsNGDLNCx0LDRg9GL0YAg0LHQuNC+0L/RgdC40Y/RgdGLINGF0L7Qu9C10YHRgtCw0Lcg0LHQtdC70LPRltC70LXRgNGWINC80LXQvSDTqdGCINKb0L7RjtC70YvSk9GL0L0g0LDQvdGL0pvRgtCw0YMg0q/RiNGW0L0g0LrTqdC80LXQutGC0LXRgdC10LTRli7QkdKx0Lsg0LrTqdGA0YHQtdGC0LrRltGI0YLQtdGA0LTRltKjINGC0ZbQutC10LvQtdC5INOp0LfQs9C10YDRltGB0YLQtdGA0ZYg0YXQvtC70LXQsNGB0YLQsNC3INCx0LXQvSDRgdCw0YDRiyDQsNGD0YDRg9KT0LAg0LDQu9GL0L8g0LrQtdC70LXQtNGW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2" table:style-name="ce1">
            <text:p>1066922</text:p>
          </table:table-cell>
          <table:table-cell office:value-type="string" table:style-name="ce1">
            <text:p>kazakh</text:p>
          </table:table-cell>
          <table:table-cell office:value-type="string" table:style-name="ce1">
            <text:p>Билет 7&amp;lt;br /&amp;gt; 1. Педиатрдын қабылдауында 3 жасар қыз бала.Бала бала бақшасына орналасады. Салмағы 15,1 кг, бойы 98см.1жастан асқан балалардың бойы мен салмағы қандай эмпирикалық формула бойынша есептеледі&amp;lt;br /&amp;gt; 2.Нәрестеллерде өттің қоюлануы синдромы деген не?&amp;lt;br /&amp;gt;</text:p>
          </table:table-cell>
          <table:table-cell office:value-type="string" table:style-name="ce1">
            <text:p>MSDRgdKx0YDQsNKbLtCf0LXQtNC40LDRgtGAINKb0LDQsdGL0LvQtNCw0YPRi9C90LTQsNKT0YsgMyDQttCw0YHQsNGAINKb0YvQtyDQsdCw0LvQsNC90YvSoyAg0LHQvtC50Ysg0LzQtdC9INGB0LDQu9C80LDSk9GLINGB0LDQu9C80LDSk9GLIDE1LDEg0LrQsyDQsdC+0LnRiyA5OCDRgdC8ICAu0KHQsNC70LzQsNKT0Ysg0LrQsyA9MTArMirQttCw0YHRiy4gMyDQttCw0YHRgtCw0pPRiyDQsdCw0LvQsCDSr9GI0ZbQvSAxMCsyKjMoINC20LDRgdGLKT0xMCs0ID0xNNC60LMu0J3QsNKb0YLRiyDRgdCw0LvQvNCw0pPRiyAxNSwxINC60LMg0LbQsNGB0YvQvdCwINGB0LDQuSAu0JHQvtC50LTRiyDQtdGB0LXQv9GC0LXRgyDRhNC+0YDQvNGD0LvQsNGB0Ys60JHQvtC50Ysg0YHQvD0gNzUrNSog0LbQsNGB0YsuIDMg0LbQsNGBINCx0LDQu9CwINKv0YjRltC9IDc1KzUqMz05MCDRgdC8LtCR0LDQu9Cw0L3Ri9KjINCx0L7QudGLIDk4INGB0Lwg0pvQsNC70YvQv9GC0Ysg0LTQtdKj0LPQtdC50LTQtdC9INC20L7Sk9Cw0YDRiyzQsdCw0LvQsCDQttCw0pvRgdGLINOp0YHRg9C00LUu0LHSsdC7ICDRjdC80L/QuNGA0LjQutCw0LvRi9KbINGE0L7RgNC80YPQu9Cw0L3Ri9KjINCx0LDQu9CwINKv0YjRltC9INC80LDSo9GL0LfQtNGL0LvSk9GLOtCW0LDQu9C/0Ysg0LHSsdC7INGN0LzQv9C40YDQuNC60LDQu9GL0psg0YTQvtGA0LzRg9C70LAg0LHQsNC70LDQvdGL0qMg0LHQsNC50Ysg0LzQtdC9INGB0LDQu9C80LDSk9GL0L3QsCDRgdCw0Lkg0pvQsNC70YvQv9GC0Ysg0LrTqdGA0YHQtdGC0LrRltGI0YLQtdGA0ZbQvSDQtdGB0LXQv9GC0LXRg9Cz0LUg0LzSr9C80LrRltC90LTRltC6INCx0LXRgNC10LTRli7Qr9KT0L3QuCDQsdCw0LvQsCDTqdC3INC20LDRgdGL0L3QsCDRgdCw0Lkg06nRgdGW0L8g0LbQsNGC0YvRgNC80LAs0YLQsNC80LDSm9GC0LDQvdGDINC20LXRgtC60ZbQu9GW0LrRgtGW0LzQtSzRgdC+0L3Ri9C80LXQvSDSm9Cw0YLQsNGAINCw0YPRgNGD0LvQsNGA0LTRi9KjINCw0LvQtNGL0L0g0LDQu9GDINC90LXQvNC10YEg0LXRgNGC0LUg0LDQvdGL0pvRgtCw0YMg0q/RiNGW0L0g0LTQtSAg0LzQsNKj0YvQt9C00Ysg0LHQvtC70YvQvyDRgtCw0LHRi9C70LDQtNGLLtCW05nQvdC1INC00LUg0L/QtdC00LjQsNGC0YDQu9GL0psg0LHQsNKb0YvQu9Cw0YMg0LbTmdC90LUg0YHQutGA0LjQvdC40LMg0LbSr9GA0LPRltC30YMg0q/RiNGW0L0g0L3QtdCz0ZbQt9Cz0ZYg0pvSsdGA0LDQuyDQsdC+0LvRi9C/INGC0LDQsdGL0LvQsNC00YsuPGJyIC8+DQogMiDRgdKx0YDQsNKbLiDTqNGC0YLRltKjINKb0L7RjtC70LDQvdGDIC3QsdKx0Lsg0LbQsNKj0LAg0YLRg9KT0LDQvSDQvdOZ0YDQtdGB0YLQtdC70LXRgNC00LUg0LHQsNC70LDQu9Cw0YDQtNCwINOp0YIg0pvRi9GI0pvRi9C70LTQsNGA0YvQvdGL0qMg0pvQsNC9INCw0pPRi9C80YvQvdC00LAg0LbQvtKT0LDRgNC70LDRg9GL0L3QsNC9INC/0LDQudC00LAg0LHQvtC70LDRgtGL0L0g0L/QsNGF0LjQutC+0LvQuNGPINGB0LjQvdC00YDQvtC80Ysg0LTQtdC/INCw0YLQsNGB0LDSmyDQsdC+0LvQsNC00Ysu0J7QvdGL0qMg06nQt9GW0L3QtNGW0Log0YTQuNC30LjQvtC70L7Qs9C40Y/Qu9GL0psg0YHQtdCx0LXQv9GC0LXRgNGWINCx0LDRgDrQkdGW0YDRltC90YjRltC00LXQvSDQsdCw0YPRi9GA0LTRi9KjINGE0LXRgNC80LXQvdGC0YLQtdGA0ZYg0L3TmdGA0LXRgdGC0LXQu9C10YDQtNC1INOZ0LvRliDRgtC+0LvRi9KT0YvQvNC10L0g06nQt9GW0L3RltKjINGE0YPQvdC60YbQuNGP0YHRi9C9INCw0YLSm9Cw0YDQsCDQsNC70LzQsNC50LTRiy7QkdKx0Lsg0YTQtdGA0LzQtdC90YLRgtGW0qMg0pvQsNGC0LDRgNGL0L3QsCDQs9C70Y7QutGD0YDQvtC90LjQu9GC0YDQsNC90YHRhNC10YDQsNC30LAg0YTQtdGA0LzQtdC90YLRltC9INC20LDRgtKb0YvQt9GB0LDSmyDQsdC+0LvQsNC00Ysu0JHSsdC7INGE0LXRgNC80LXQvdGCINOp0Lcg0LrQtdC30LXQs9GW0L3QtNC1INGC0YPRgNCwINC10LzQtdGBINCx0LjQu9C70LjRgNGD0LHQuNC90LTRliDRgtGW0LrQtdC70LXQuSzRg9GL0YLRgtGLINC10LzQtdGBLNC+0YDQs9Cw0L3QuNC30LzQvdC10L0g0YLQtdC3INGJ0YvSk9Cw0YDRi9C70LDRgtGL0L0g0LHQuNC70LvQuNGA0YPQsdC40L3Qs9C1INCw0LnQvdCw0LvQtNGL0YDRgyDRgNC10LDQutGG0LjRj9GB0YvQvSDSm9Cw0LzRgtCw0LzQsNGB0YvQtyDQtdGC0LXQtNGWLtCR0rHQuyDRhNC10YDQvNC10L3RgtGC0ZbSoyDRgtC+0LvRi9KbINC20LXRgtGW0LvQvNC10YPRlizTqdGCINC20L7Qu9C00LDRgNC90YvSoyDRhNGD0L3QutGG0LjRj9GB0YvQvdGL0qMg0LHQsNGP0YPQu9Cw0YPRiyzRgdC+0L3Ri9C80LXQvSDSm9Cw0YLQsNGAINGI0LDQu9CwINGC0YPRi9C70pPQsNC9INC905nRgNC10YHRgtC10LvQtdGA0LTRltKjINCx0LDRg9GL0YAg0pvRi9C30LzQtdGC0ZbQvdGW0qMg05nQu9GB0ZbQt9C00ZbQs9GWINC20L7Sk9Cw0YDRi9C00LAg0LDQudGC0YvQu9KT0LDQvSDTqdGC0YLRltKjINKb0L7RjtC70LDQvdGD0YvQvdCwINGB0LXQsdC10L/QutC10YAg0LHQvtC70LDQtNGLLtCh0L7QvdGL0LzQtdC9INKb0LDRgtCw0YAg0L3TmdGA0LXRgdGC0LXQu9C10YDQtNGW0qMg06nRgiDQttC+0LvQtNCw0YDRi9C90YvSoyDQsNC90LDRgtC+0LzQuNGP0LvRi9KbINGE0LjQt9C40L7Qu9C+0LPQuNGP0LvRi9KbINC10YDQtdC60YjQtdC70ZbQutGC0LXRgNGW0L3QtSDRgtGW0LrQtdC70LXQuSDQsdCw0LnQu9Cw0L3Ri9GB0YLRiyDQtNCwINC+0YDRi9C9INCw0LvQsNC00Ysu0KHQtdCx0LXQsdGWINCx0rHQuyDQttCw0pPQtNCw0LnQtNCwINOp0YIg0LbQvtC70LTQsNGA0Ysg0YLQsNGAINOZ0YDRliDSm9GL0YHSm9CwINC205nQvdC1INC40LXQutC80YHRltC3LNC+0YHRi9KT0LDQvSDQsdCw0LnQu9Cw0L3Ri9GB0YLRiyDTqdGC0YLRltKjINCx0LDRj9GDINC20q/RgNGD0ZYg0LHQvtC70LDQtNGLLtCR0rHQuyDQvtC90YvSoyDTqdGCINKb0LDQsdGL0L3QtNCwINKx0LfQsNKbINGC0rHRgNGL0L8g0pvQvtGO0LvQsNC90YPRi9C90LAg05nQutC10LvQtdC00ZYu0JbTmdC90LUg0LTQtSDTqdGCINKb0LDQsdGL0L3Ri9KjINC20LjRi9GA0YvQu9GD0Ysg0LzQvtGC0L7RgNC40LrQsCDSm9Cw0LHRltC70LXRgtGWINGC06nQvNC10L0s0LHSsdC7INC00LAg06nRgtGC0ZbSoyDRgtC+0pvRgtCw0L8g0pvQsNGD0YvQvdCwINOZ0LrQtdC70LXQtNGWLtCa0LXQu9C10YHRliDQtdGA0LXQutGI0LXQu9GW0Log0LDRgdKb0LDQt9Cw0L0g0ZbRiNC10Log0LbQvtC70LTQsNGA0YvQvdC00LDSk9GLINGF0L7Qu9C40YbQuNGB0YLQvtC60LjQvdC40L0g0LPQvtGA0LzQvtGA0L3Ri9C90YvSoyDRgtOp0LzQtdC9INC00LXQvdCz0LXQudGWINC20LjRliDQvdCw0YDQtdGB0YLQtdC70LXRgNC00LUg0LHQvtC70LDRgtGL0L0g0LbQsNKT0LTQsNC5LtCQ0Lsg0LHSsdC7INCz0L7RgNC80L7QvSDTqdGCINKb0LDQsdGL0L0g0LbQuNGL0YDRi9C70YLQsNGC0YvQvSDSm9GL0LfQvNC10YLQutC1INC40LUuINCd05nRgNC10YHRgtC10LvQtdGA0LTQtSDRjdGA0LjRgtGA0L7RhtC40YLRgtC10YDQtNGW0qMg0YvQtNGL0YDQsNGD0YvQvdGL0qMg0LbQvtKT0LDRgNGLINC20q/RgNGD0ZYsINCw0pvRg9GL0LfQtNCw0YAg0LzQtdC9INC80LDQudC70LDRgNC00Ysg0YHRltKj0ZbRgNGDINGC0L7Qu9GL0psg0pvQsNC70YvQv9GC0LDRgdC/0LDSk9Cw0L3RiyDQsdKx0L3Ri9KjINCx0LDRgNC70YvSk9GLINOp0YLRgtGW0qMg0pvSsdGA0LDQvNGL0L3Ri9KjINOp0LfQs9C10YDRg9GW0L3QtSDQttCw0pPQtNCw0Lkg0LbQsNGB0LDQudC00YsuINCR0rHQuyDQttC40ZYg0LrQtdC30LTQtdGB0LXRgtGW0L0g0YPQsNKb0YvRgtGI0LAg0LbTmdC90LUg0YTQuNC30LjQvtC70L7Qs9C40Y/Qu9GL0psg0L/RgNC+0YbQtdGB0YE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1" table:style-name="ce1">
            <text:p>915341</text:p>
          </table:table-cell>
          <table:table-cell office:value-type="string" table:style-name="ce1">
            <text:p>russian</text:p>
          </table:table-cell>
          <table:table-cell office:value-type="string" table:style-name="ce1">
            <text:p>Билет 7&amp;lt;br /&amp;gt; 1.На приеме у педиатра в поликлинике мама с девочкой 3 лет. Ребенок оформляется в детский сад. Масса тела 15,1 кг, длина тела 98см.&amp;lt;br /&amp;gt; Напишите эмпирическую формулу для расчета длины тела старше 1 года&amp;lt;br /&amp;gt; Напишите эмпирическую формулу для расчета массы тела старше 1 года&amp;lt;br /&amp;gt; 2.Что означает Синдром сгущения желчи у новорожденных?&amp;lt;br /&amp;gt;</text:p>
          </table:table-cell>
          <table:table-cell office:value-type="string" table:style-name="ce1">
            <text:p>MS4g0JTQu9GPINGA0LDRgdGH0LXRgtCwINC00LvQuNC90Ysg0Lgg0YDQvtGB0YLQsCDRgyDQtNC10YLQtdC5INC40YHQv9C+0LvRjNC30YPRjtGCINGB0L/QtdGG0LjQsNC70YzQvdGL0LUg0Y3QvNC/0LjRgNC40YfQtdGB0LrQuNC1INGE0L7RgNC80YPQu9GLLiDQlNC70Y8g0YDQsNGB0YfQtdGC0LAg0LzQsNGB0YHRiyDRgtC10LvRiyDRgyDQtNC10YLQtdC5INC+0YIgMiDQtNC+IDEwLTExINC70LXRgiDQuNGB0L/QvtC70YzQt9GD0Y7RgiDRhNC+0YDQvNGD0LvRgzogMTAuNdC60LMrMm7QutCzINCz0LTQtSAxMC410LrQsy0g0Y3RgtC+INGB0YDQtdC00L3Rj9GPINC80LDRgdGB0LAg0YLQtdC70LAg0YMg0LTQtdGC0LXQuSDQsiDQstC+0LfRgNCw0YHRgtC1ICAxINCz0L7QtNCwLCDQsCBuLdCy0L7Qt9GA0LDRgdGCINGA0LXQsdC10L3QutCwLiDQlNC70Y8g0YDQsNGB0YfQtdGC0LAg0YDQvtGB0YLQsCDRgyDQtNC10YLQtdC5INGB0YLQsNGA0YjQtSAxINCz0L7QtNCwINC40YHQv9C+0LvRjNC30YPRjtGCINC00LLQtSDRhNC+0YDQvNGD0LvRizog0LTQu9GPINC00LXRgtC10Lkg0L7RgiAxINC00L4gNCDQuCDQvtGCIDQg0LTQviA4LiDQpNC+0YDQvNGD0LvQsCDQtNC70Y8g0LTQtdGC0LXQuSDQvtGCIDEg0LTQviA0OiAxMDAtOCg0LW4pINCz0LTQtSAxMDAg0Y3RgtC+INGB0YDQtdC00L3QuNC5INGA0L7RgdGCINGDINGA0LXQsdC10L3QutCwINCyINCy0L7Qt9GA0LDRgdGC0LUgNCDQu9C10YIsINCwIG4g0Y3RgtC+INCy0L7Qt9GA0LDRgdGCLiDQtNC70Y8g0LTQtdGC0LXQuSDQvtGCIDQg0LvQtdGCINC40YHQv9C+0LvRjNC30YPQtdGC0YHRjyDRhNC+0YDQvNGD0LvQsDogMTAwKzYobi00KS4gKNC/0L4g0JPQtdC/0L/QtSk8YnIgLz4NCjxiciAvPg0KPGJyIC8+DQo8YnIgLz4NCjxiciAvPg0KMi4gINCh0LjQvdC00YDQvtC8INGB0LPRg9GJ0LXQvdC40Y8g0LbQtdC70YfQuCDRgyDQvdC+0LLQvtGA0L7QttC00LXQvdC90L7Qs9C+INGN0YLQviDRgtCw0LrQvtC5INGB0LjQvdC00YDQvtC8LCDQutC+0LPQtNCwINC/0YDQuCDRgNC+0LbQtNC10L3QuNC4INGDINGA0LXQsdC10L3QutCwINGE0LjQt9C40L7Qu9C+0LPQuNGH0LXRgdC60Lgg0YPQstC10LvQuNGH0LXQvdCwINCz0YPRgdGC0L7RgtCwINC20LXQu9GH0L3QvtC5INC20LjQtNC60L7RgdGC0LgsINGB0LLRj9C30LDQvdC+INGN0YLQviDRgSDQs9C10LzQvtC70LjQt9C+0Lwg0Y3RgNC40YLRgNC+0YbQuNGC0L7Qsiwg0YIu0LouINGN0YDQuNGC0YDQvtGG0LjRgtC+0LIg0YMg0L3QvtCy0L7RgNC+0LbQtNC10L3QvdC+0LPQviDQvNC90L7Qs9C+LCDQsCDRgdGA0L7QuiDQuNGFINC20LjQt9C90Lgg0LzQsNC7LCDQt9C90LDRh9C40YIg0LIg0YDQtdC30YPQu9GM0YLQsNGC0LUg0LjRhSDRgNCw0LfRgNGD0YjQtdC90LjRjyDQutC+0LvQuNGH0LXRgdGC0LLQviDQsdC40LvQuNGA0YPQsdC40L3QsCDRg9Cy0LXQu9C40YfQuNCy0LDQtdGC0YHRjywg0L7QvSDQstGL0YXQvtC00LjRgiDRgSDQutC+0LbQtdC5LCDQvNC+0YfQvtC5LCDQsCDRgtCw0Log0LbQtSDQv9C10YfQtdC90YzRjiwg0LrQvtGC0L7RgNCw0Y8g0LLRi9C00LXQu9GP0LXRgiDQtdCz0L4g0LjQt9C90LDRh9Cw0LvRjNC90L4g0LIg0LbQtdC70YfQvdGL0Lkg0LzQtdGI0L7Quiwg0LAg0L7RgtGC0YPQtNCwINC20LXQu9GH0Ywg0L/QvtC/0LDQtNCw0LXRgiDQsiDQutC40YjQtdGH0L3QuNC6LiDRgtCw0Log0LbQtSDRjdGC0L4g0YHQstGP0LfQsNC90L4g0YEg0YLQtdC8LCDRh9GC0L4g0YTQtdGA0LzQtdC90YLRiyDRgyDQv9C10YfQtdC90Lgg0L/RgNC4INGA0L7QttC00LXQvdC40Lgg0YDQsNCx0L7RgtCw0Y7RgiDQvdC1INGC0LDQuiDRhdC+0YDQvtGI0L4g0LrQsNC6INGDINCy0LfRgNC+0YHQu9GL0YUuINCyINGB0LLRj9C30Lgg0YEg0LjQt9Cx0YvRgtC60L7QvCDQsdC40LvQuNGA0YPQsdC40L3QsCDQvdCw0YHRgtGD0L/QsNC10YIg0LbQtdC70YfQtdC60LDQvNC10L3QvdCw0Y8g0LHQvtC70LXQt9C90YwgLSDRhdC+0LvQtdGB0YLQsNC3PGJyIC8+DQogPGJyIC8+DQo=</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17" table:style-name="ce1">
            <text:p>1067017</text:p>
          </table:table-cell>
          <table:table-cell office:value-type="string" table:style-name="ce1">
            <text:p>russian</text:p>
          </table:table-cell>
          <table:table-cell office:value-type="string" table:style-name="ce1">
            <text:p>Билет 7&amp;lt;br /&amp;gt; 1.На приеме у педиатра в поликлинике мама с девочкой 3 лет. Ребенок оформляется в детский сад. Масса тела 15,1 кг, длина тела 98см.&amp;lt;br /&amp;gt; Напишите эмпирическую формулу для расчета длины тела старше 1 года&amp;lt;br /&amp;gt; Напишите эмпирическую формулу для расчета массы тела старше 1 года&amp;lt;br /&amp;gt; 2.Что означает Синдром сгущения желчи у новорожденных?&amp;lt;br /&amp;gt;</text:p>
          </table:table-cell>
          <table:table-cell office:value-type="string" table:style-name="ce1">
            <text:p>MS4g0JLQntCf0KDQntChLiAi0K3QvNC/0LjRgNC40YfQtdGB0LrQsNGPINGE0L7RgNC80YPQu9CwIiDQtNC70Y8g0YDQsNGB0YfQtdGC0LAg0LzQsNGB0YHRiyDRgtC10LvQsCDRgNC10LHQtdC90LrQsCDRgdGC0LDRgNGI0LUgMSDQs9C+0LTQsDogMTAsNSArIDJuLCDQs9C00LUgbiAtINGN0YLQviDQstC+0LfRgNCw0YHRgiDRgNC10LHQtdC90LrQsCDQvtGCIDIg0LTQviAxMSDQu9C10YIsINCwIDEwLDUgLSDRjdGC0L4g0YHRgNC10LTQvdC40Lkg0LLQtdGBINCz0L7QtNC+0LLQsNC70L7Qs9C+INGA0LXQsdC10L3QutCwLiDQodC70LXQtNGD0LXRgiDQvtGC0LzQtdGC0LjRgtGMLCDRh9GC0L4g0L/QvtGB0LvQtSAxMCDQu9C10YIg0LzQsNGB0YHQsCDRgtC10LvQsCDRgNC10LHQtdC90LrQsCDQtdC20LXQs9C+0LTQvdC+INGD0LLQtdC70LjRh9C40LLQsNC10YLRgdGPINC90LAgNCDQutCzLCDRgdC70LXQtNC+0LLQsNGC0LXQu9GM0L3QviDQtNC10YLRj9C8INGB0YLQsNGA0YjQtSAxMCDQu9C10YIg0L/RgNC40LzQtdC90LjQvNCwINC00YDRg9Cz0LDRjyDRhNC+0YDQvNGD0LvQsCDRgNCw0YHRh9C10YLQsCDQvNCw0YHRgdGLINC4INC00LvQuNC90Ysg0YLQtdC70LAuICLQrdC80L/QuNGA0LjRh9C10YHQutCw0Y8g0YTQvtGA0LzRg9C70LAiINC00LvRjyDRgNCw0YHRh9C10YLQsCDQtNC70LjQvdGLINGC0LXQu9CwINGA0LXQsdC10L3QutCwINGB0YLQsNGA0YjQtSAxINCz0L7QtNCwOiAxMDAtOCg0LW4pLCDQs9C00LUgbiAtINGN0YLQviDQstC+0LfRgNCw0YHRgiDRgNC10LHQtdC90LrQsCDQsiDQs9C+0LTQsNGFLiAyLiDQktCe0J/QoNCe0KEuINCh0LjQvdC00YDQvtC8INGB0LPRg9GJ0LXQvdC40Y8g0LbQtdC70YfQuCDQuNC70Lgg0L/QviDQtNGA0YPQs9C+0LzRgyDRgdC40L3QtNGA0L7QvCAi0L/QsNC60LjRhdC+0LvQuNC4IiDRgyDQvdC+0LLQvtGA0L7QttC00LXQvdC90YvRhSDQvtC30L3QsNGH0LDQtdGCINCy0Y/Qt9C60L7RgdGC0Ywg0LbQtdC70YfQuCwg0LLQvtC30L3QuNC60LDRjtGJ0LDRjyDQvdCwINGE0L7QvdC1INC/0L7QstGL0YjQtdC90L3QvtCz0L4g0LPQtdC80L7Qu9C40LfQsCAo0YDQsNC30YDRg9GI0LXQvdC40LUg0Y3RgNC40YLRgNC+0YbQuNGC0L7Qsikg0LIg0LrRgNC+0LLQuCDQuCDQv9C+0LLRi9GI0LXQvdC90YvQvCDQvtCx0YDQsNC30L7QstCw0L3QuNC10Lwg0LHQuNC70LjRgNGD0LHQuNC90LAsINGH0YLQviDQvNC+0LbQtdGCINC/0YDQuNCy0LXRgdGC0Lgg0Log0L7RgNCz0LDQvdC40LfQsNGG0LjQuCDQttC10LvRh9C60L3QvtCz0L4g0YLRgNC+0LzQsdCwLiDQotCw0LrQttC1INGDINC90L7QstC+0YDQvtC20LTQtdC90L3Ri9GFINGB0L7RhdGA0LDQvdGP0LXRgtGB0Y8g0LTQviA4NSUg0YTQtdGC0LDQu9GM0L3QvtCz0L4g0LPQtdC80L7Qs9C70L7QsdC40L3QsCwg0L3QsNC00L7QsdC90L7RgdGC0Ywg0LIg0LrQvtGC0L7RgNGL0YUg0L/QvtGB0LvQtSDRgNC+0LbQtNC10L3QuNGPINGA0LXQsdC10L3QutCwINC+0YLQv9Cw0LTQsNC10YIsINC4INC+0L3QuCDRgtCw0LrQttC1INC/0L7QtNCy0LXRgNCz0LDRjtGC0YHRjyDRgNCw0LfRgNGD0YjQtdC90LjRjiwg0L/RgNC40LLQvtC00Y8g0Log0YHQs9GD0YnQtdC90LjRjiDQttC10LvRh9C4LiDQotCw0LrQvtC1INGB0L7RgdGC0L7Rj9C90LjQtSDRgNC10LHQtdC90LrQsCDQvdCw0LfRi9Cy0LDRjtGCICLQotGA0LDQvdC30LjRgtC+0YDQvdGL0Lwg0L3QtdC+0L3QsNGC0LDQu9GM0L3Ri9C8INGF0L7Qu9C10YHRgtCw0LfQvtC8Ii4g0J/QtdGA0LLRi9C1INGB0LjQvNC/0YLQvtC80Ysg0YXQvtC70LXRgdGC0LDQt9CwINC+0LHRi9GH0L3QviDQv9C+0Y/QstC70Y/RjtGC0YHRjyDQsiDQstC+0LfRgNCw0YHRgtC1IDUtMTIg0LTQvdC10LksINC40L3QvtCz0LTQsCAzLTQg0L3QtdC00LXQu9C4LiDQodC40L3QtNGA0L7QvCDRgdCz0YPRidC10L3QuNGPINC20LXQu9GH0Lgg0L/RgNC4INCT0JHQnSDQvNC+0LbQtdGCINC/0YDQuNCy0L7QtNC40YLRjCDQuiDQvtCx0YDQsNC30L7QstCw0L3QuNGOINC/0LjQs9C80LXQvdGC0L3Ri9GFINC60LDQvNC90LXQuS4g0KMg0L3QvtCy0L7RgNC+0LbQtNC10L3QvdGL0YUg0L/QvtC80LjQvNC+INGC0YDQsNC90LfQuNGC0L7RgNC90L7Qs9C+INGF0L7Qu9C10YHRgtCw0LfQsCDQvNC+0LPRg9GCINCx0YvRgtGMINC4INC00YDRg9Cz0LjQtSDQv9C+0LPRgNCw0L3QuNGH0L3Ri9C1INGB0L7RgdGC0L7Rj9C90LjRjywg0YLQsNC60LjQtSDQutCw0Lo6INGE0LjQt9C40L7Qu9C+0LPQuNGH0LXRgdC60LDRjyDQttC10LvRgtGD0YXQsCAo0YHQstGP0LfQsNC90L3QsNGPINGBINC90LXQt9GA0LXQu9C+0YHRgtGM0Y4g0YTQtdGA0LzQtdC90YLQvdC+0Lkg0YHQuNGB0YLQtdC80Ysg0L/QtdGH0LXQvdC4LCDQvtGB0L7QsdC10L3QvdC+INGE0LXRgNC80LXQvdGC0LAg0LPQu9GO0LrRg9GA0L7QvdC40LvRgtGA0LDQvdGB0YTQtdGA0LDQt9GLIC0g0L/RgNC10LLRgNCw0YnQsNGO0YnQsNGPINC90LXRgdCy0Y/Qt9Cw0L3QvdGL0Lkg0LHQuNC70LjRgNGD0LHQuNC9INCyINGB0LLRj9C30LDQvdC90YvQuSksINGC0YDQsNC90LfQuNGC0L7RgNC90LDRjyDQv9C+0YLQtdGA0Y8g0LzQsNGB0YHRiyDRgtC10LvQsCDQvNCw0LrRgdC40LzQsNC70YzQvdC+INC00L4gMTAlICjRgdCy0Y/Qt9Cw0L3QvdCw0Y8g0YEg0L/QvtCy0YvRiNC10L3QvdGL0Lwg0LLRi9C00LXQu9C10L3QuNC10Lwg0LLQvtC00Ysg0YfQtdGA0LXQtyDQv9C+0LLQtdGA0YXQvdC+0YHRgtGMINC60L7QttC4LCDQvtGC0YXQvtC20LTQtdC90LjQtdC8INC80LXQutC+0L3QuNGPIC0g0Y3RgtC+INC/0LXRgNCy0L7QtSDQuNGB0L/RgNCw0LbQvdC10L3QuNGPINGA0LXQsdC10L3QutCwINC30LXQu9C10L3QvtCy0LDRgtC+0LPQviDRhtCy0LXRgtCwLCDRgdC+0LTQtdGA0LbQsNGJ0LDRjyDQsiDRgdC10LHQtSDQv9GA0L7Qs9C70L7Rh9C10L3QvdGL0LUg0L7QutC+0LvQvtC/0LvQvtC00L3Ri9C1INCy0L7QtNGLLCDQttC10LvRh9C90YvQtSDQv9C40LPQvNC10L3RgtGLLCDRgdC70YPRidC10L3QvdGL0Lkg0Y3Qv9C40YLQtdC70LjQuSDQuCDQtNGALiDQutC+0LzQv9C+0L3QtdC90YLRiyk7INC90LXQudGC0YDQvtGE0LjQu9C10LcgKNC60L7RgtC+0YDQsNGPINC40LzQtdC10YIgMiDRhNC40LfQuNC+0LvQvtCz0LjRh9C10YHQutC40YUg0L/QtdGA0LXQutGA0LXRgdGC0LApLCDQs9C+0YDQvNC+0L3QsNC70YzQvdGL0Lkg0LrRgNC40Lcg0YMg0L3QvtCy0L7RgNC+0LbQtNC10L3QvdGL0YUgKNCy0YHQv9C70LXRgdC6INCz0L7RgNC80L7QvdC+0LI6INCh0KLQkywg0JDQmtCi0JMsINCi0KLQkyksINCwINGC0LDQutC20LUg0YHQvtGB0YLQvtGP0L3QuNGPINC90LDQt9GL0LLQsNC10LzQvtC1ICLQvNCw0LvRi9C8INC/0YPQsdC10YDRgtCw0YLQvtC8IiDQuNC70LggItC/0L7Qu9C+0LLQvtC5INC60YDQuNC3Iiwg0YXQsNGA0LDQutGC0LXRgNC40LfRg9GO0YnQsNGP0YHRjyDRg9Cy0LXQu9C40YfQtdC90LjQtdC8INC80L7Qu9C+0YfQvdGL0YUg0LbQtdC70LXQtyDQuCDQstGL0LTQtdC70LXQvdC40Y/QvNC4INC40Lcg0LLQu9Cw0LPQsNC70LjRidCwINGDINC00LXQstC+0YfQtdC6LCDRgNC10LbQtSDQstGB0YLRgNC10YfQsNC10YLRgdGPINGDINC80LDQu9GM0YfQuNC60L7Qsi4g0JTQsNC90L3QvtC1INGP0LLQu9C10L3QuNC1INGB0LLRj9C30LDQvdC+INGBINGC0LXQvCwg0YfRgtC+INCy0L4g0LLQvdGD0YLRgNC40YPRgtGA0L7QsdC90L7QvCDRgNCw0LfQstC40YLQuNC4INGA0LXQsdC10L3QvtC6INC/0L7Qu9GD0YfQsNC10YIg0L/QvtC70L7QstGL0LUg0LPQvtGA0L7QvNC90YsgKNGN0YHRgtGA0L7Qs9C10L3Riykg0L7RgiDQvNCw0YLQtdGA0LgsINC/0L7RgdC70LUg0YDQvtC20LTQtdC90LjRjyDQs9C+0YDQvNC+0L3RiyDQvNCw0YLQtdGA0Lgg0LLRgdC1INC10YnQtSDQvNC+0LPRg9GCINCy0LvQuNGP0YLRjCDQvdCwINC+0YDQs9Cw0L3QuNC30Lwg0YDQtdCx0LXQvdC60LAsINCwINGC0LDQutC20LUg0L/RgNC4INCz0L7RgNC80L7QvdCw0LvRjNC90L7QvCDQvdCw0L/RgNGD0YjQtdC90LjQuCDRgyDQutC+0YDQvNGP0YnQtdC5INC80LDRgtC10YDQuCwg0LPQvtGA0L7QvNC90Ysg0LzQvtCz0YPRgiDQv9C+0YHRgtGD0L/QsNGC0Ywg0LLQvNC10YHRgtC1INGBINCz0YDRg9C00L3Ri9C8INC80L7Qu9C+0LrQvtC8LiDQktCw0LbQvdC+INC30L3QsNGC0Ywg0Y3RgtC4INGB0L7RgdGC0L7Rj9C90LjRjyDRgyDQtNC10YLQtdC5LCDRh9GC0L7QsdGLINCyINC00LDQu9GM0L3QtdC50YjQtdC8INC90LUg0YHQv9GD0YLQsNGC0Ywg0LjRhSDRgSDRj9Cy0L3QvtC5INC/0LDRgtC+0LvQvtCz0LjQtdC5L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802" table:style-name="ce1">
            <text:p>914802</text:p>
          </table:table-cell>
          <table:table-cell office:value-type="string" table:style-name="ce1">
            <text:p>english</text:p>
          </table:table-cell>
          <table:table-cell office:value-type="string" table:style-name="ce1">
            <text:p>Ticket 7&amp;lt;br /&amp;gt; 1.A mother with a daughter of 3 years old at the pediatrician consultation in the clinic. The child needs to be registered in kindergarten. Body weight is 15.1 kg, body height is 98cm.&amp;lt;br /&amp;gt; Write an empirical formula for calculating the body height of a child over 1 year old.&amp;lt;br /&amp;gt; Write an empirical formula for calculating the body weight of a child over 1 year old.&amp;lt;br /&amp;gt; 2. What does the pachycolia (increased concentration of bile) syndrome of in newborns means?&amp;lt;br /&amp;gt;</text:p>
          </table:table-cell>
          <table:table-cell office:value-type="string" table:style-name="ce1">
            <text:p>MS4pIEVtcGVyaWNhbCAgZm9ybXVsYSAgQm9keSBoZWlnaHQgZm9ybXVsYSA6LSBGb3IgY2hpbGRyZW4gbW9yZSB0aGFuIDEgeWVhciBvbGQgaGVpZ2h0IEluIGNtIGNhbiBiZSB1c2luZyA6ICAgICAgICAgICAgICAgICAgICAgICAgICAgICAgICAgICAgICAgICAgICBoZWlnaHQgaW4gY20gY2FuIGJlIHVzaW5nID0gNzUgKyAoNiB0aW1lcyBhZ2UgaW4geWVhcnMpLiAgICAgICAgICAgICAgICAgICAgICAgICAgICAgICAgICAgICAgICAgICAgICAgICAgICAgICAgICAgICAgICAgICAgICAgICAgICAgICAgICAgICAgICAgIDxiciAvPg0KICAgICAgICAgICAgICAgICAgICAgICAgICAgID03NSArKDYqMykgPSA5MyBjbSAgICAgICAgICAgICAgICAgICAgICAgICAgICAgICAgICAgICAgICAgICAgICAgICAgICAgICAgICAgICAgICAgICAgICAgICAgICAgICAgICA8YnIgLz4NCkJvZHkgd2VpZ2h0IGZvcm11bGEgOi0gRm9yIGNoaWxkcmVuIG1vcmUgdGhhbiAxIHllYXIgb2xkIC4gICAgICAgICAgICAgICAgICAgICAgICAgICAgICAgICAgICAgICAgICAgICAgICAgICAgICAgICAgICAgICAgICAgICAgICAgICAgICAgQm9keSB3ZWlnaHQgaW4ga2cgY2FuIGJlIGVzdGltYXRlZCBieSB1c2luZyAuICB3ZWlnaHQgaW4ga2cgPSAxMCsgKDIgdGltZXMgYWdlICBpbiB5ZWFyKS4gICAgICAgICAgICAgICAgICAgICAgICAgICAgICAgICAgICAgICAgICAgICAgICAgICAgPGJyIC8+DQogICAgICAgICAgICAgICAgICAgICAgICAgICAgICAgICAgICAgICAgICAgICAgICAgICAgICAgICAgICAgID0xMCArICgyKjMpID0gMTYga2cgICA8YnIgLz4NClRoZXNlIGZvcm11bGFzIHByb3ZpZGUgYXBwcm94aW1hdGUgdmFsdWVzIGFuZCBhbmQgc2hvdWxkIGJlIGNyb3NzIGNoZWNrZWQgd2l0aCBncm93dGggY2hhcnRzIGZvciBhY2N1cmFjeS4gICAgICAgICAgICAgICAgICAgICAgICAgICAgICAgMi4pIFBhY2h5Y29saXMgc3luZHJvbWUgaW4gbmV3Ym9ybmUgOiBwYWNoY29saWEgcmVmZXJzIHRvIGluY3JlYXNlZCBjb25jZW50cmF0aW9uIG9mIGJpbGUgcGFydGljdWxhcmx5IGJpbGUgc2FsdHMgYW5kIHBpZ21lbnRzIGluIHRoZSBnYXN0cm9pbnRlc3RpbmFsIHN5c3RlbSBvZiBuZXdib3Jucy4gVGhpcyBjb25kaXRpb24gbWF5IGFyaXNlIGR1ZSB0byA6IChhKSBQaHlzaW9sb2dpY2FsIGNhdXNlIDogdGhlIGltbWF0dXJpdHkgb2YgdGhlIGxpdmVyIGFuZCBiaWxlIGR1Y3Qgc3lzdGVtIGNvbW1vbiBpbiBuZW9uYXRlcyBjYW4gbGVhZCB0byB0cmFuc2llbnQgIGh5cGVyY29uY2VudHJhdGlvbiBvZiBiaWxlLiAgKGIpIHBhdGhvbG9naWNhbCBjYXVzZSA6IGNvbmRpdGlvbnMgbGlrZSBiaWxpYXJ5IGF0cmVzaWEsIGNob2xlZG9jaGFsIGN5c3Qgb2YgaGVtb2x5dGljIGRpc2Vhc2VzIGNhdXNpbmcgIGV4Y2VzcyBiaWxscnViaW4gcHJvZHVjdGlvbi4gIE1hbmlmZXN0YXRpb24gaW5jbHVkZSBkYXJrIGdyZWVuIG9yIHllbGxvd2lzaCBzdG9vbCAsIHBvdGVudGlhbCBqYWluZGljZSBhbmQgYWJkb21pbmFsIGRpc2NvbWZvcnQuIHNldmVyZSBjYXNlcyBjYW4gZGlzcnVwdCBmYXQgZGlnZXN0aW9uIGFuZCBhYnNvcnB0aW9uIGR1ZSB0byB0aGUgcmVkdWNlZCBlbXVsc2lmaWNhdGlvbiBvZiBkaWV0YXJ5IGZhdHMuIEVhcmx5IHJlY29nbml0aW9uIGFuZCBkaWZmZXJlbnRpYXRpb24gYmV0d2VlbiBwaHlzaW9sb2dpY2FsIGFuZCBwYXRob2xvZ2ljYWwgY2F1c2VzIGFyZSBjcml0aWNhbCBmb3IgYXBwcm9wcmlhdGUgbWFuYWdlbWVudC4gTWFuYWdlbWVudCBvZiBwYWNoeWNvbGlhcyBzeW5kcm9tZSA6IHRyZWF0aW5nIGEgcGFjaHljb2xpYSBzeW5kcm9tZSBkZXBlbmRzIHVwb24gIHRoZSB1bmRlcmx5aW5nIGNhdXNlIGFuZCBzZXZlcml0eSBpbiBzb21lIGNhc2VzICBzdXBwb3J0aXZlIG1lYXN1cmVzICBzdWNoIGFzIGVuc3VyaW5nIGFkZXF1YXRlIGh5ZHJhdGlvbiAsIG1vbml0b3JpbmcgYmlscnViaW4gbGV2ZWxzIGFuZCBhZGRyZXNzaW5nIGFueSBhc3NvY2lhdGVkIGNvbmRpdGlvbnMgbWF5IGJlIHN1ZmZ1Y2llbnQuICBJbiBzZXZlcmUgY29uZGl0aW9uIHRob3NlIGxpbmtlZCB0byBzcGVjaWZpYyBtZWRpY2FsIGNvbmRpdGlvbiByZTRxdWlyZSBzcGVjaWZpYyBtZWRpY2FsIGludGVydmVudGlvbnMgaW52b2x2aW5nIG1lZGljYXRpb25zIHRvIGltcHJvdmUgYmlsZSBmbG93IGFuZCBhZGRyZXNzIGxpdmVyLiBlYXJseSBkZXRlY3Rpb24gYW5kIG1hbmFnZW1lbnQgb2YgcGFjaHljb2xpYSBzeW5kcm9tZSBpcyBjcnVjaWFsIGZvciBwcmV2ZW50aW5nIHBvdGVudGlhbCBjb21wbGljYXRpb25zIGFuZCBzdXBwb3J0aW5nIHRoZSBvdmVyYWxsIGRldmVsb3BlbWVudCBvZiAgbmV3Ym9ybi4gIA==</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13" table:style-name="ce1">
            <text:p>915013</text:p>
          </table:table-cell>
          <table:table-cell office:value-type="string" table:style-name="ce1">
            <text:p>english</text:p>
          </table:table-cell>
          <table:table-cell office:value-type="string" table:style-name="ce1">
            <text:p>Ticket 7&amp;lt;br /&amp;gt; 1.A mother with a daughter of 3 years old at the pediatrician consultation in the clinic. The child needs to be registered in kindergarten. Body weight is 15.1 kg, body height is 98cm.&amp;lt;br /&amp;gt; Write an empirical formula for calculating the body height of a child over 1 year old.&amp;lt;br /&amp;gt; Write an empirical formula for calculating the body weight of a child over 1 year old.&amp;lt;br /&amp;gt; 2. What does the pachycolia (increased concentration of bile) syndrome of in newborns means?&amp;lt;br /&amp;gt;</text:p>
          </table:table-cell>
          <table:table-cell office:value-type="string" table:style-name="ce1">
            <text:p>MS5BUyB0aGUgZW1waXJpY2FsIGZvcm11bGEgZm9yIHRoZSAzIHllYXIgb2xkIHdvdWxkIGJlIGFzIHRoZSB3ZWlnaHQgZm9yIDEgeWVhciB0byA2IHllYXIgb2xkIGNoaWxkIHdlaWdodD0oa2cpIG11bHRpcGxlIDIrOCBrZyB5ZXQgZm9yIHRob3NlIDcrMTAgeWVhciB3ZWlnaHQ9YWdlKHlyKSBtdWx0aXBsZSAzKzIoa2cpLi5CT0RZIGhlaWdodCBmb3JtdWxhIChpbiBjbSksIGZvciBjaGlsZHJlbiBhZ2VkIDEtNCB5ZWFycz03NSs1IG11bHRpcGxlKGFnZSBpbiB5ZWFycykuQk9EWSB3ZWlnaHQgZm9yIHRoZSBjaGlsZHJlbiBhZ2UgMS0xMHllYXIsIFdFSUdIVD0xMCsyIG11bHRpcGxlIChhZ2UgaW4geWVhcikgMi5BUyBtZW50aW9uZWQgcGFjaHljb2xpYSB0aGF0IGlzIGluY3JlYXNlZCBjb25jZW50cmF0aW9uLCBvZiBiaWxlIGFuZCBiaWxlIGFjaWQgaW4gdGhlIGJhbGwgYmxhZGRlciBhbmQgb2Z0ZW4gYmlsZSBkdWN0cy5NT1JFIGJpbGUgYWNpZCBzZWNyZXRpb24gb2NjdXIgd2hlbiB0aGVyZSBpcyBwb29yIGRpZ2VzdGlvbiBvciBhYnNvcnB0aW9uIG9mIGZhdHMuc29tZXRpbWVzIG1heSBvY2N1ciBkdWUgdG8gaW1tYXR1cml0eSBvZiBiaWxlIGR1Y3RzIG90IE9GIGRpc2Z1bmN0aW9uIGluIGJpbGUgZmxvdy5CSUxFIGlzIGV4cGVjdGVkIHRvIGZhdCBhc3NpbXVsYXRpb24udGhpcyBpbXBsaWVzIG91clIgYm9keSBuZWVkcyB0byBkZWxpdmVyIG1vcmUgYmlsZSBhbmQgYmlsZSBhY2lkcyB3aGVuIHdlIGVhdCBhIHRvbmUgb2YgZm9vZCB2YXJpZXRlcyB0aGF0IGFyZSBoaWdoIGluIGZhdC5mb2xsb3dpbmYgYSBsb3cgZmF0IGVhdGluZyByZWdpbWVuIGNhbiBkZWNyZWFzZSBob3cgbXVjaCBiaWxlIGNvcnJvc2l2ZSB5b3VyIGJvZHkgcHJvZHVjdHMgY2F1c2luZyBsZXNzIG9mIGl0IGFkdmFuY2UgdG93YXJkIG91ciBjb2xvbi50aGUgbmVydmUgYmxhZGRlciBzdG9yZXMgYW5kIHRoaW5rIGJpbGUgZHVyaW5nIHRoZSBmYXN0aW5nIHN0YXRlICwgcmVndWxhcmx5IGJpbGUgaXMgYW1hc3NzZWQgZml2ZS1vdmVybGFwIGluIHRoZSBuZXJ2ZSBibGFkZGVyIGJ5IGFzc2ltaWxhdGlvbiBvZiB3YXRlciBhbmQgbGl0dGxlIGVsZWN0cm9seXRlLWJhc2ljYWxseSB0aGUgbmF0dXJhbCBwYXJ0aWNsZXMgYXJlIGFsbCBoZWxkLnRoZSBiaWxlIGlmIGlmIHNlY3JldGVkIGluIGV4Y2VzcyBjYXVzZSBtdWNoIGhhcm0gdG8gb3VyIGJvZHkgYW5kIHZlcnkgbXVjaCB0byB0aGUgbmV3Ym9ybi4uZGlzY2hhcmdlIGludG8gYmlsZSBpcyBBIGEgc2lnbmlmaWNhbnQgY291cnNlIGZvciB0YWtraW5nIG91dCBjaG9sZXN0ZXJvbC5uZW9uYXRhbCBjaG9sZXN0ZXJvbCBpcyBicm91Z2h0IGFib3V0IGJ5IEJZIHZhcmlvdXMgbWV0YWJvbGljIHByb2JsZW1zIGxpa2UgY3lzdGljIGZpYnJvc2lzKGNmKSBhbmQgYWxwaGEtMSBhbnRpdHJ5cHNpbiBpbmFkZXF1YWxpdHkgIGJlaW5nIHRoZSBtb3N0IHdpZGVseSByZWNvZ25pemVkLiBhbmQgQU5EIHNvbWUgb3RoZXIgbGlrZSBuZW9uYXRhbCBqYXVuZGljZSAsaGVtb2x5dGljYyBkaXNlYXNlcyBvZiBuZW9uYXRhbCxzZXBzaXMsYmlsaWFyeSBhdHJlc2lhIG9yciBvYnN0cnVjdGlvbiBhbmQgaW5mZWN0aW9uIGltcGFjdGluZyBsaXZlciBmdW5jdGlvbi5jbGluaWNhbCBzaWduaWZpY2FuY2Ugb2YgdGhpcyBoeXBlcmJpbGlydWJpbmVtaWEgbGVhZGluZyB0byBqYXVuZGljZSBhbmQgbWFsYWJzb3JwdGlvbiBvZkYgZmF0IHNvbHVibGUgdml0YW1pbnMgbGlrZSB2aXRhbWluIEEsRCxFLEsuY2FuIGFsc28gbGVhZCB0byBjaG9sZW9zdGFzaXMgdGhhdCBpcyBpbXBhaXJlZCBibG9vZCBmbG93IC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48" table:style-name="ce1">
            <text:p>915048</text:p>
          </table:table-cell>
          <table:table-cell office:value-type="string" table:style-name="ce1">
            <text:p>english</text:p>
          </table:table-cell>
          <table:table-cell office:value-type="string" table:style-name="ce1">
            <text:p>Ticket 7&amp;lt;br /&amp;gt; 1.A mother with a daughter of 3 years old at the pediatrician consultation in the clinic. The child needs to be registered in kindergarten. Body weight is 15.1 kg, body height is 98cm.&amp;lt;br /&amp;gt; Write an empirical formula for calculating the body height of a child over 1 year old.&amp;lt;br /&amp;gt; Write an empirical formula for calculating the body weight of a child over 1 year old.&amp;lt;br /&amp;gt; 2. What does the pachycolia (increased concentration of bile) syndrome of in newborns means?&amp;lt;br /&amp;gt;</text:p>
          </table:table-cell>
          <table:table-cell office:value-type="string" table:style-name="ce1">
            <text:p>QSBtb3RoZXIgd2l0aCBhIGRhdWdodGVyIG9mIDMgeWVhcnMgb2xkIGF0IHRoZSBwZWRpYXRyaWNpYW4gY29uc3VsdGF0aW9uIGluIHRoZSBjbGluaWMgIC50aGUgY2hpbGQgbmVlZHMgdG8gYmUgcmVnaXN0ZXJlZCBpbiBraW5kZXJnYXJlbi4gYm9keSB3ZWlnaHQgaXMgMTUuMSBrZyBib2R5IGhlaWdodCBpcyA5OCBjbS4gICBlbXBpcmljYWwgIGZvcm11bGFzIGZvciBlc3RlbWF0aW5nICBib2R5IGhpZ2h0IGFuZCB3ZWlnaHQgaW4gY2hpbGRyZW4gb25lIHllc3Igb25lIHllYXIgY29tbW9ubHkgdXNlZCBpbiBwZWRpYXRyaWNzLiBib2R5IGhlaWdodCBmb3JtdWxhIGZvciBib3lzICBoZWlnaHQgYXQgIDIgeWVhcnMgKyAgaGVpZ2h0IGF0IDMgeWVhcnMsICgyIClmb3IgZ2lybHMgaGVpZ2h0IGF0IDE4IG1vbnRoICsgaGVpZ2h0IGF0IDIuNSB5ZWFycyAgLiBCb2R5IHdlaWdodCBmb3JtdWxhICBmb3IgYm95cyAgd2VpZ2h0IGF0IDIgeWVhcnMgKyB3ZWlnaHQgYXQgMyB5ZWFycyAsICgyIClmb3IgZ2lybHMgIHdlaWdodCBhdCAxOCBtb250aHMgKyAgd2VpZ2h0IGF0IDIuNSB5ZWFycy4gdHdvIHRoaXMgZm9ybXVsYXMgcHJvdmlkIGEgcm91Z2ggZXN0aW1hdGUgIGJhc2VkIG9uIGFnZSAgYW5kIHByZXZpb3VzIG1lYXN1cm1lbnRzLiAoMikgcGFjaHljb2xpYSBpbiBuZXdib3JuIHJlZmVycyB0byBhbiAgIGluY3Jlc2VzIGNvbmNlbnRyYXRpb24gIG9mIGJpbGUgaW4gdGhlIG1hY2Nvbml1bSBpcyB0aGUgZmlyc3Qgc3Rvb2wgcGFzcyAgYnkgYSBuZXdib3JuIC4gIG5vcm1hbGx5IG1hY2Nvbml1bSBoYXZlIGEgZ3JlYW5pc2gtIGJsYWNrIGNvbG91ciBidXQgcGFjaHljb2xpYW4gcmVzdWx0cyBpbiBsaWdodGVyICAsIHBhbGUgY29sb3IgZHVlIHRvIGhpZ2hlciBjb25jZW50cmF0aW9uICBvZiBiaWxlLiB0aGlzIGNvbmRpdGlvbiBjYW4gYmUgIGFzc29zaWF0ZWQgd2l0aCB2YXJpb3VzIGZhY3Rvciwgc3VjaCBhcyBsaXZlciBkeXNmdWN0aW9uLCBiaWxlIGR1Y3Qgb2JzdHJ1Y3Rpb24gICBvciBvdGhlciBpc3N1ZXMgYWZmZWN0aW5nICB0aGUgYmlsZSBmbG93LiBwYWNoeWNvbGlhIG1heSAgcHJvbXB0ICBmdXJ0aGVyIGludmVzdGlnYXRpb24gIHRvIGlkZW50aWZ5IHRoZSB1bmRlcmxpbmUgICBjYXVzZSAgLCBhcyBhIGNhbiBiZSBpbmRpY2F0aXZlICBvZiBjZXJ0YWluIGxpdmVyIGFuZCBnYXN0cm9pbnRlc3RpbmFsIGNvbmRpdGlvbiAgdGhhdCBuZWVkICAgYXR0ZW50aW9uIGFuZCBtYW5lYWdlbWVudCAuI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191" table:style-name="ce1">
            <text:p>915191</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3RgdKx0YDQsNKbINCc0L7RidC40YfQsCDQutC70LDRgdGB0LjRhNC40LrQsNGG0LjRj9GB0Ysg0LHQvtC50YvQvdGI0LAg0LbSr9GA0LXQuiDRiNGD0LvQsNGA0YsgNNCx06nQu9GW0L3QtdC00ZYu0J7RgNCz0LDQvdC00YvSmyzQvtGA0LPQsNC90LTRi9KbINC20rHQudC10LvRltC6LNCk0YPQvdC60YbQuNGP0LvRi9KbLNGE0LjQt9C40L7Qu9C+0LPQuNGP0LvRi9KbLtCe0YDQs9Cw0L3QtNGL0pst0LbSr9GA0LXQuiDSm9Cw0LHQsNGC0YLQsNGA0YvQvNC10L0g0YLQsNC80YvRgNC70LDRgNGL0L3Ri9KjINC/0LDRgtC+0LvQvtCz0LjRj9GB0Ysg0LrQtdC30ZbQvdC00LUu0J7RgNCz0LDQvdC00YvSmy3QttKv0LnQtdC70ZbQui3QttKv0YDQtdC6INKb0LDQsdCw0YLRgtCw0YDRiyzRgtCw0LzRi9GA0LvQsNGA0Ysg0LbTmdC90LUg06nQt9Cz0LXQtNC1INC20q/QudC10LvQtdGA0LTQtdCz0ZYg0LHSsdC30YvQu9GL0YHRgtCw0YDQtNCwLtCk0YPQvdC60YbQuNGP0L3QsNC70LTRi9KbLdKb0YvQt9C80LXRgtGC0ZbQuiDQsdGW0YDQu9GW0LogLNC90LXQs9GW0LfRltC90LXQvSDQv9Cw0YLQvtC70L7Qs9C40Y8g0LHQvtC70YvQvyDRgtCw0LHRi9C70LzQsNC50LTRiy7Sm9Cw0LvRi9C/0LDRgtGLINC20LDSk9C00LDQudC00LAg0LHQvtC70LDRgtGL0L0g0YjRgy7QsdKx0Lsg0YjRgyDQvdOZ0LfRltC6INC205nQvdC1INGB0LjRgNC10Los0LzRg9C30YvQutCw0LvRi9KbINGC0LXQvNC/0YLRliDSr9C90LTRlizRgdC40YHRgtC+0LvQsCDQutC10LfRltC90LTQtSDQtdGB0YLRltC70LXQtNGWLtCk0LjQt9C40L7Qu9C+0LPQuNGP0LvRi9KbLdCx0rHQu9C00LAg0pvQsNC70YvQv9GC0Ysg0YTQuNC30LjQvtC70L7Qs9C40Y/Qu9GL0psg0L3QvtGA0LzQsNC00LAg0YjRgy7QnNC+0YnQuNGH0LAg0LrQu9Cw0YHRgdC40YTQuNC60LDRhtC40Y/RgdGLINCx0L7QudGL0L3RiNCwLdGB0LjRgdGC0L7Qu9Cw0LvRi9KbLNC00LjQsNGB0YLQvtC70LDQu9GL0pss0q/Qt9GW0L3QtNGW0LvRlizRhNGD0L3QutGG0LjRj9C90LDQu9C00YvSmyDRiNGD0LvQsNGA0LTRiyDQsNC20YvRgNCw0YLQsNC80YvQty7QodC40YHRgtC+0LvQsNC70YvSmy3QttKv0YDQtdC6INKb0LDRgNGL0L3RidCw0LvQsNGA0Ysg0LbQuNGL0YDRi9C70YMg0LrQtdC30ZbQvdC00LUg0L/QsNC50LTQsCDQsdC+0LvQsNGC0YvQvSDRiNGDLtCx0rHQuyDTqdC30ZYgMiDQttGW0LrRgtC10LvQtdC00ZYt0KDQtdCz0YPRgNCz0LjRgtCw0YbQuNGP0LvRi9KbLdC60LvQsNC/0YvQvdC00LDRgNC00YvSoyDQtNKx0YDRi9GBINC20LDQsdGL0LvQvNCw0pPQsNC90YvQvdC00LAs0pvQsNC9INCw0pPRi9GB0Ysg06nQtyDQsdCw0pPRi9GC0YvQvdCw0L0g0LDRgNGC0pvQsCDQsNKT0YMu0JvQsNKb0YLRi9GA0YvQu9KT0LDQvS3QutC70L/QsNC90LTQsNGAINC20LDQsdGL0psg0LHQvtC70LDQtNGLLdGB0L7QuyDQutC10LfQtNC1INKb0LDQvSDSr9C70LrQtdC9INC60q/RiNC/0LXQvSDQu9Cw0pvRgtGL0YDRi9C70pPQsNC90LTQsCDQtdGB0YLRltC70LXQtNGWLtCU0LjQsNGB0YLQvtC70LDQu9GL0pst0LHSsdC70YjRi9KbINC10YIg0LHQvtGB0LDSo9GB0YMg0YHQvtKj0YvQvdC00LAg0LXRgdGC0ZbQu9C10LTRli7QldGA0YLQtSDQtNC40LDRgdGC0L7Qu9Cw0LvRi9KbINGI0YMs0L7RgNGC0LAg0LTQuNCw0YHRgtC+0LvQsNC70YvSmyDRiNGDLNC60LXRiCDQtNC40LDRgdGC0L7Qu9Cw0LvRi9KbINGI0YPQtNGLINCw0LbRi9GA0LDRgtCw0LzRi9C3LtKu0LfQtNGW0LrRgdGW0LcgLdC20q/RgNC10Log0YbQuNC60LvRltC70ZbQvdGW0qMg0LrQtdC3INC60LXQu9Cz0LXQvSDQutC10LfRltKj0ZbQvdC00LUg0LXRgdGC0ZbQu9GD0ZYg0LzSr9C80LrRltC9LtGI0YPQu9Cw0YAg0LHSsdC7INC60LXQt9C00LUg06nRgtC1INC905nQt9GW0Log0YHQuNGA0LXQuiDRiNGD0LvQsNGAINCx0L7Qu9GL0L8g0YLQsNCx0YvQu9Cw0LTRiy7TqNGC0LUg0YLRi9C90YvRiCDQutKv0LnQtNC1INC20q/RgNCz0ZbQt9GW0LvQtdC00ZYg0L7QvdGL0qMg0LXRgdGC0ZbQu9GDINGC0LXQvNC/0ZbQvNC10L0g0LbQuNGW0LvRltCz0ZYg0YLTqdC80LXQvS7QkNC70LzQsNGB0YvQvyDQvtGC0YvRgNCw0YLRi9C9INGI0YMu0KTRg9C90LrRhtC40Y/QvdCw0LvQtNGL0pst0pvQsNC70YvQv9GC0Ysg0L3QvtGA0LzQsNC00LAg0LXRgdGC0ZbQu9C10YLRltC9INGI0YMs0LrQtdC5INCx0LDQu9Cw0LvQsNGA0LTQsCDQutC10LfQtNC10YHQtdC00ZYs0LHSsdC7INKb0L7RgNKb0LDRgtGL0L3QtNCw0Lkg0LbQsNKT0LTQsNC5INC10LzQtdGBLtCW05nQvdC1INC80rHQvdC00LAg0LHQsNC70LDQvdGL0qMg0YTQuNC30LjQvtC70L7Qs9C40Y/Qu9GL0psg0LbQsNGB0YvQvNC10L0g0LTQtdC90LUg0LHRltGC0ZbQvNGWINOp0Lcg0pvQsNC70L/Ri9C90LAg0YLRg9GA0LAg0LrQtdC70LXRgtGW0L3RltC9INCx0LDSm9GL0LvQsNGDINC60LXRgNC10Lou0JrTqdC/0L3QtdGB0LUt0LTQtdC8INGI0YvSk9Cw0YDRg9C00LDQvSDRgdC+0qMg0LXRgdGC0Lgg0LDQu9Cw0LzRi9C3LtCe0L3QtNCw0Lkg0YjRg9C70LDRgNC00Ysg0L/QsNGC0L7Qu9C+0LPQuNGPINGA0LXRgtGW0L3QtNC1INGB0LDQvdCw0LzQsNC50LTRiyDRgdC+0L3QtNGL0pvRgtCw0L0g0LTTmdGA0ZbQs9C10YAg0LrTqdC80LXQs9GW0L3QtSDQttKv0LPRltC90ZbQu9C80LXQudC00ZYu0JbSr9GA0LXQuiDRiNGD0LvQsNGA0Ysg0LXSoyDQutOp0L8g0LXRgdGC0LjRgtGW0L0g0LvQvtC60LDQu9C40LfQsNGG0LjRj9C70YvSmyDQsNC50LzQsNKbINCx0rHQuy3RgtOp0YEg0LzQsNKj0YvQvdCw0L0gMi0z0YHQvCDQvtKj0pPQsCDQtdGB0YLRltC70LXQtNGWLtCR0LDQu9Cw0LvQsNGA0LTRi9KjINC20q/RgNC10Log0YvRgNKT0LDSk9GLINC80LXQvSDRgdC+0pPRgyDQttC40ZbQu9GW0LPRltC90LTQtSDQtdGB0LXQv9C60LUg0LDQu9GD0YvQvNGL0Lcg0LrQtdGA0LXQui7QodC10LHQtdCx0ZYg0LHRltC3INGI0YMg0LTQtdC/INC+0LnQu9Cw0pPQsNC9INC00YvQsdGL0YEtUzEtUzLRgdC+0pPRgyDQsNGA0LDRgdGL0L3QtNCw0pPRiyDQttC40ZbQu9GW0LrQutC1INC20LDRgtGL0L8g0LrQtdGC0YPRliDQvNKv0LzQutGW0L0u0KHQtdCx0LXQsdGWINCx0LDQu9Cw0LvQsNGA0LTRi9KjINC20q/RgNC10Log0YLQvtC90LTQsNGA0Ysg06nRgtC1INC20LjRliDRgdC+0pPRgyDQsNGA0LDRgdGLINGC0LXQtyDRg9Cw0pvRi9GC0Ysg0pvRi9GB0pvQsCDQsdC+0LvRg9GL0L3QsCDQsdCw0LnQu9Cw0L3Ri9GB0YLRiy3QttKv0YDQtdC6INGI0YPQu9Cw0YDRi9C80LXQvSDRiNCw0YLQsNGB0YLRi9GA0YMg0LbQsNKT0LTQsNC50LvQsNGA0Ysg0LbQuNGWINC60LXQt9C00LXRgdC10LTRli7QltKv0YDQtdC6INGI0YPQu9Cw0YDRiy3TmdGAINGC0q/RgNC70ZYg0pvQsNC70YvQv9GC0LAg0YLQtdC80LHRltGA0ZYg0LHQvtC50YvQvdGI0LAg0LXRgNC10LrRiNC10LvRltC90LXQtNGWLNCx0LDQu9Cw0LTQsNGA0LTQsCDQutC10YPQtNC1INKb0YPRi9GB0Ysg0LrRltGI0LrQtdC90YLQsNC5LNC20q/RgNC10Log0pvQsNCx0LDRgtGC0LDRgNGLINC20rHSm9CwINC205nQvdC1INC80LjQutC+0LDRgNC00Ysg0YLQvtC70YvSmyDQtNCw0LzRi9C80LDSk9Cw0L3RiyDSr9GI0ZbQvS3RiNGD0LvQsNGAINC60LXQudC00LUg0pvQsNGC0YLRiyDQtdGB0YLRltC70LXQtNGWLtCW0q/RgNC10Log0LDRgdC60YPQu9GM0YLQsNGG0LjRj9GB0Ysg0LHQsNC70LDQu9Cw0YDSk9CwINOp0YLQtSDQttKx0LzRgdCw0pss0YLTqdC80LXQvSDQutKv0YjRgtC1INC20LDRgdCw0LvQsNC00Ysu0KHQtdCx0LXQsdGWINCx0LDQu9Cw0LDRgNC00YvSoyDQttKv0YDQtdC6INKb0LDQvSDRgtCw0LzRi9GAINC20q/QudC10YHRli3QndOZ0LfRltC6INOZ0YDRliDRgtC+0LvRi9KbINC20LXRgtGW0LvQvNC10LPQtdC9LNCx0ZbRgNCw0psg0LbSr9GA0LXQs9GWINC60LDQv9C40LvRj9GA0LvRiyDSm9GL0Lsg0YLQsNC80YvRgNC70LDRgNC80LXQvSDTqdGC0LUg0LbQsNKb0YHRiyDSm9Cw0LzRgtCw0LzQsNGB0YvQtyDQtdGC0ZbQu9Cz0LXQvS7QltOZ0L3QtSDQttKv0YDQtdC6INC80LDSo9GLINGC0LXRgNGW0YHRliDQttGL0LvRiyDQsdC+0LvRi9C/INGC0LDQvNGL0YAg06nRgtC60ZbQt9Cz0ZbRiNGC0ZbQs9GWINC20L7Sk9Cw0YDRiyDQttOZ0L3QtdC1INC80LXRgtC+0LHQvtC70LjQt9C8INOp0YLQtSDQttGL0LvQtNCw0Lwg0LbSr9GA0LXQtNGWLtGB0L7QvdC00YvSm9GC0LDQvSDRhNCw0L3QtdC90LTQvtGB0LrQvtC/0YLRiyDQvNGW0L3QtNC10YLRgtGWINGC0q/RgNC00LUg0LbRi9C70YvRgtGL0L8g0pvQvtC70LTQsNC90pPQsNC9INC00rHRgNGL0YEu0J3TmdGA0LXRgdGC0LXQu9C10YDQtNC1LdC20q/RgNC10LrRiNGW0L0g0YLSr9GA0YLQutGW0YHRli000pvQsNCx0YvRgNKT0LAg0LDRgNCw0LvRi9Kb0YLQsCDQvtGA0L3QsNC70LDRgdCw0LTRiy7QltOZ0L3QtSDQvtC7IDEsNS0y0LbQsNGB0pvQsCDSm9Cw0YDQsNC5INC10YDQtdGB0LXQutGC0LXRgNC00ZbSo9C60ZbQvdC00LXQuSA10pvQsNCx0YvRgNKT0LAg0LDRgNCw0LvRi9Kb0pvQsCDRgtGD0YDQsCDQutC10LvQtdC00ZYu0LHQsNC70LDRgNC00YvSoyDQttKv0YDQtdCz0ZYg0pvQuNKT0LDRiCDQvtGA0L3QsNC70LDRgdGD0YvQvdCwINCx0LDQudC70LDQvdGL0YHRgtGLLNC20q/RgNC10Log0YjRg9C70LDRgNGLINC+0YHRiyDQsNC50LzQsNKb0YLQsCDQttC40ZYg0LXRgdGC0Lgg0LDQu9Cw0LzRi9C3LtCQ0YPRgdC60YPQu9GM0YLQsNGG0LjRjy010L3Sr9C60YLQtSDQsdC+0LnRi9C90YjQsCDQttCw0YHQsNC70YvQvdCw0LTRiy7QmtC10LnQtNC1INCx0LDQu9Cw0LTQsNGA0LTQsCDRgtGD0pPQsNC90L3QsNC9INGB0L7SoyDRgdC+0L/QsNKb0YjQsCDRgtC10YHRltC60YLRltKjINCx0ZbRgtC10LvQvNC10YPRliDQsdC+0LvRi9C/LdCx0rHQuyDQsNGA0LDQu9GL0pvQtNCwINKb0YvRgdGL0LzSk9CwINCx0LDQudC70LDQvdGL0YHRgtGLINCx0ZbRgCDRiNGD0LvQsNGA0LTRi9KjINC10YHRgtGW0LvRg9GWINC80q/QvNC60ZbQvS7QodC+0L/QsNKb0YjRiyDRgtC10YHRltC6INC10LrRliDQttKv0YDQtdC60YjRltC90ZbSoyDQsNGA0LDRgdGL0L3QtNCwINC+0YDQvdCw0LvQsNGB0pvQsNC9INC20LDQsdGL0LvRg9GLINGC0YPSk9Cw0L3QvdCw0L0gMi0z0YHQsNKT0YLRgtCw0L0gMi3QttCw0YHSm9CwINC00LXQudGW0L0g0LHQvtC70LDQv9C00Ysg0pvQsNGC0YLRiyDQutC10YjRltC60YLRltGA0ZbQu9GDINC80LXRgNC30ZbQvNGWLTfQttCw0YHSm9CwINC00LXQudGW0L0u0KHQvtC90LTRi9Kb0YLQsNC9INC80rHQvdGLINGC0LXQutGB0LXRgNGDINOp0YLQtSDQvNCw0qPRi9C30LTRiy7QnNC+0YnQuNGH0LAg0LrQu9Cw0YHRgdC40YTQuNC60LDRhtC40Y/RgdGL0L3QsCDQutC10LnRltC90LXQvSDQt9C10YDRgtGC0LXRg9C70LXRgCDQttKv0YDQs9GW0LfRltC70ZbQvyDQttCw0qPQsNGA0YLRg9C70LDRgCDQtdC90LPRltC30ZbQu9C00ZYu0prQvtGA0YvRgtGL0L3QtNGL0LvQsNC5INC60LXRgtGB0LXQvC3QltKv0YDQtdC6INGI0YPQu9Cw0YDRiyDQsdCw0LvQsNC90YvSoyDQtNKx0YDRi9GBINOp0YHRg9GWINC80LXQvSDSm9Cw0LvRi9C/0YLQsNGB0YPRiyDSr9GI0ZbQvSDTqdGC0LUg0LzQsNKj0YvQt9C00Ysg0LbTmdC90LUg0L7QvdGLINCx0ZbQu9GDINC80LXQvSDRgtGL0qPQtNCw0L8g0LDQttGL0YDQsNGC0LAg0LHRltC70YMg0LzQsNKj0YvQt9C00YvQu9GL0L0g0LrTqdGA0YHQtdGM0YLQtdC00ZYuPGJyIC8+DQoyLdCw0LnQu9GL0psg0LHQsNC70LDQu9Cw0YDRiy3QsNC90LDRgdGL0L3Ri9KjINGI0LDSk9GL0LzRi9C80LXQvSDQtdC80YXQsNC90LDSk9CwINC60LXQu9C00ZYs0LbQsNC70L7QsdGLLdCw0L3QsCDRgdKv0YLRltC80LXQvSDRgtCw0LzQsNKb0YLQsNC90pPQsNC9INGB0L7SoyDQvNCw0LfQsNGB0YvQt9C00LDQvdCw0LTRiy7QsdKx0Lsg0LzQsNC30LDRgdGL0LfQtNGL0pvRgtGL0qMg0YHQtdCx0LXQsdGWLdCw0Ygg0ZbRidC10LrRgtGW0qMg0LDQvdCw0YLQvtC80LjRjy3RhNC40LfQuNC+0LvQvtCz0LjRj9C70YvSmyDQtdGA0LXQutGI0LXQu9GW0LPRltC90LUg0LHQsNC50LvQsNC90YvRgdGLINCx0LDRgNC80LA6MtCw0LnQu9GL06kg0LHQsNC70LAt0LDRiCDRltGI0LXQs9GWINOZ0LvRliDRgtC+0LvRi9KbINC20LXRgtGW0LvQvNC10LPQtdC9LNC205nQvdC1INCw0Ygg0ZbRiNC10LPRliDRgtCw0YAg0LTQuNCw0LzQtdGC0ZbRgNGWINC60ZbRiNC60LXQvdGC0LDQuSAs0rHQt9GL0L3Ri9KT0YstMdC80LXRgtGA0ZYg0YnQsNC80LDRgdGL0L3QtNCwINCx0L7Qu9Cw0LTRiy7QkNGIINGW0YjQtdC6LTPQsdOp0LvRltC80ZYg0LHQsNGALjEy0LXQu9GWINGW0YjQtdC6LNC80YvSm9GL0L0g0ZbRiNC10Los0LbRltKj0ZbRiNC60LUg0ZbRiNC10Log0LTQtdC/INCw0LbRi9GA0LDRgtCw0LzRi9C3INCx0LDQu9Cw0YDQtNCwINCw0Ygg0ZbRiNC10LPSo9GWINCw0L3RgtC+0LzQuNGP0LvRi9KbINGC0L7Qv9C+0LPRgNCw0YTQuNGP0YHRiy3QsNGB0pvQsNC30LDQvSDQsNGB0YLRi9C90LDQvSDQv9C40LvQvtGA0LjQutCw0LvRi9KbINCx06nQu9GW0LzRltC90LXQvSDRgtOp0LzQtdC9INC+0YDQvdCw0LvQsNGB0YvQvyzQkdC10LvQtNGW0qMgMy000L7QvNGL0YDRgtKb0LAg0LTQtdKj0LPQtdC50ZbQvdC1INGB05nQudC60LXRgSDQutC10LvQtdC00ZYu0KLTqdC80LXQvdGW0L3QtdC9INC606nQu9C00LXQvdC10qMg0LbQuNC10Log0ZbRiNC10Los0LDRgNGLINKb0LDRgNCw0Lkg0YLQvtKbINGW0YjQtdC60LrQtSDQttCw0LvSk9Cw0YHQsNC00Ysu0JHQsNC70LDRgNCw0LTRi9KjINCw0Ygg0ZbRiNC10LPRltC90ZbSoyDSm9Cw0YLQv9Cw0YDQu9Cw0YDRiyDTmdC70ZYg0YLQvtC70YvSmyDQttC10YLRltC70LzQtdC50LTRliDQttOZ0L3QtSDQsNGJINGW0YnQtdC60YLQtdCz0ZYg0Y3Qv9C40YLQtdC70LjQudGW0L3RltKjINCw0YDQsNGB0YvQvdC00LDSk9GLLdCx0LXQt9C00LXRgNGWINGC0L7Qu9GL0psg0pvQsNC70YvQv9GC0LDRgdC/0LDQuSDRgtCw0LzQsNKb0YLRiyDSm9C+0YDRi9GC0YMg0LzQtdC9INCx0LDRgdKb0LAg0ZbRiNC10Log0LHTqdC70ZbQvNGW0L3QtSDTqdGC0LrRltC30YMg0pvRi9C30LzQtdGC0ZbQvSDRgtOp0LzQtdC90LTQtdGC0LXQtNGWLtCR0LDQu9Cw0YDQtNGL0qMg0LDRiCDRltGI0LXQs9GWINCw0L3QsNGC0L7QvNC40Y/Qu9GL0psg0YLSsdKT0YvQtNCwLdKb0LDQsdCx0LDRgtGLINC20rHSm9CwLTEt0YjRi9GA0YvRiNGC0Ysg0pvQsNCx0LDRgtGC0YssMi3QqNGL0YDRi9GIINCw0YHRgtGLLDMt0JHSsdC70YjRi9KbINC10YIgNC3RgdGL0YDRgtKb0Ysg0YHRltGA0LvRliDSm9Cw0LHQsNGCLNCo0LDRgNGL0Ygg0pvQsNCx0LDRgtGL0L3QtNCw0pPRiyDQsdKv0YDQu9C10YDRliDTmdC70ZYg0LrRltGI0LrQtdC90YLQsNC5INGC0L7Qu9GL0psg0LbQtdGC0ZbQu9C80LXQs9C10L0u0JbTmdC90LUg0LHSsdC7INGC0LDQvNCw0pvRgtGL0qMg0YHSr9GC0YLRltKjINGC0L7Qu9GL0psg0YHRltKj0LHQtdGD0ZbQvNC10L0g0YHRltKj0YMg0YPQsNKb0YvRgtGL0LzQtdC9INC20YvQu9C20YMg0YPQsNKb0YvRgtGL0L0g0YnQtdC60YLQtdC50LTRli7QkdKx0Lsg0LTQtdCz0LXQvdGW0LzRltC3INCx0LDQu9CwINCw0L3QsCDRgdKv0YLRltC9INC10LzRltC/INC+0L3Ri9KjINGW0YjQtdC60YLQtSDRgdGW0qPRltGA0YMg0YPQsNKb0YvRgtGLINC80LXQvSDRgdGW0qPRgyDRgdGL0LnRi9C80LTRi9C70YvSk9GL0L0g0YLTqdC80LXQvdC00LXRgtGW0L8t0YHSr9GC0YLRltKjINCw0YjRg9GLINOZ0LrQtdC70YPRliDQvNKv0LzQutGW0L0u0JHSsdC7INCx0LDQu9Cw0pPQsCDQttCw0LnRgdGL0LfQtNGL0psg05nQutC10LvRltC/LNC20LDQvNCw0L0g0LjRltGB0YLRliDRiNGL0pPQsNGA0YPRiyDQvNKv0LzQutGW0L0u0JHQsNC70LDQu9Cw0YDQtNGL0qMg0YTQuNC30LjQvtC70L7Qs9C40Y/Qu9GL0psg0LXRgNC10LrRiNC10LvRltCz0ZYt0YTQtdGA0LzQtdC90YLQsNGC0LjQstGC0ZYg0LHQtdC70YHQtdC90LTRltC70ZbQs9OZIDLQsNC50LvRi9KbINCx0LDQu9CwINKv0YjRltC9INOZ0LvRliDRgtC+0LvRi9KbINC00LDQvNGL0LzSk9Cw0L0g0LbTmdC90LUg0LHSsdC7INCw0L3QsCDRgdKv0YLRltC90L3RltKjINKb0rHRgNCw0LzRi9C90LTQsNKT0Ysg0LvQsNC60YLQvtC30LDQvdGLINC00rHRgNGL0YEg0YvQtNGL0YDQsNGC0L/QsNC5INCx0LDQu9Cw0LTQsCDQvNCw0LfQsNGB0YvQt9C00YvSmyDRgtGD0YvQvdC00LDRgtGD0Ysg0YvSm9GC0LjQvNCw0Lsg0LHQsNC70LDQvdGL0qMg0ZbRidGW0L3QtSDQs9Cw0Lcg0LbQuNC90LDQu9GL0L8g0ZbRiSDQutC10YPRltC9INGC0YPQtNGL0YDRg9GLINC80q/QvNC60ZbQvS7QkdCw0LvQsNC90YvSoyDRiNGL0YDRi9GIINCw0YHRgtGLINKb0LDQsdCw0YLRi9C90YvQvdC00LDSk9GLINGN0LvQsNGB0YLQuNC60LDQu9GL0psg0LrQvtC70LDQs9C10L0g0YLQsNC70YjRi9Kb0YLQsNGA0Ysg0LTSsdGA0YvRgSDSm9Cw0LvRi9C/0YLQsNGB0L/QsNC5INGW0YnQtdC60ZbQvdGW0qMg0LjQutC10LzQtNGW0LPRltC90LUg05nRgdC10YAg0LXRgtGW0L8g0pvQvtGA0LXQutGC0ZbSoyDQt9Cw0YLRgtCw0YDQtNGL0qMg0YHRltKj0YPRltC90LUg0LrQtdC00LXRgNCz0ZYg0LHQvtC70LDQtNGLLtCR0rHQu9C00LAg0LHQsNC70LDQtNCwINC80LDQt9Cw0YHRi9C30LTRi9Kb0pvQsCDTmdC60LXQu9C10LTRli7QhtGI0LXQutGC0ZbSoyDQsdKx0LvRiNGL0psg0LXRgtGC0ZbQuiDSm9Cw0LHQsdCw0YLRiy3QttCw0pvRgdGLINKb0LDQvdC80LXQvSDSm9Cw0LzRgtCw0LzQsNGB0YvQtyDQtdGC0ZbQu9Cz0LXQvS7QkdCw0LvQsNC90YvSoyDRltGI0LXQs9GW0L0g0L/QsNC70YzQv9Cw0YbQuNGP0LvQsNKT0LDQvdC00LAg06nRgtC1INC905nQt9GW0Log0LHQvtC70YMg0LrQtdGA0LXQuiDRgdC10LHQtdCx0ZYg0YLQtdGA0ZbRgdGWINC20rHQvNGB0LDSmyzRltGI0LXQuiDSm9Cw0LHQsdCw0YLQsNGA0Ysg0LbSsdKb0LAs0YLQtdGA0ZYg0YHQtdC30ZbQvNGC0LDQu9C00YvSk9GLINOp0YLQtSDQttC+0pPQsNGA0Ysu0JDRiCDRltGJ0LXQs9GW0L3QtNC10LPRli3QttCw0LnRgdGL0LfQtNGL0psg0L7RgdGLINCx0ZbRgNC90LXRiNC1INGB0LXQsdC10L/RgtC10L0g0LHQvtC70YPRiyDQvNKv0LzQutGW0L0uMtCw0LnQu9GL0psg0LHQsNC70LAt0LDRiCDRltGI0LXQs9GW0L3QtdC00LXQs9GWINCx0LXQt9C00LXRgNGWINCw0LvRiNCw0psg0YHQuNGA0LXQuiDQvtGA0L3QsNC70LDRgdCw0LTRiy7QltOZ0L3QtSDQvNKx0L3QtNCwINCx0LDQu9CwINC80LDQt9Cw0YHRi9C30LTQsNC90YPRiyDQsdCw0LvRi9C90YvSoyDRhNC40LfQuNC+0LvQvtCz0LjRj9C70YvSmyDTqdC30ZbQvdC00ZbQuiDQtdGA0LXQutGI0LXQu9GW0LPRliDQvNC10L0g0LDQvdCwINGB0q/RgtGW0L3RltKjINKb0rHRgNCw0LzRi9C90LAg0LHQsNC50LvQsNC90YvRgdGC0YsuMtCw0LnQu9GL0psg0LHQsNC70LAg06nRgtC1INC60ZbRiNC60LXQvdGC0LDQuSDQttOZ0L3QtS3QvNKx0LvQtNCwINCx0LDQu9Cw0pPQsCDRgdKv0YLRgtGWINC00rHRgNGL0YEg0YHRltKj0YPRltC90LUg0LrQtdC70LXSo9GB0ZbQt9C00ZbQuiDQutC10LvRgtGW0YDQtdC00ZYu0JDRiCDRltGI0LXQuiDSm9Cw0YLQv9Cw0YDQsNC70LDRgNGLINGC0L7Qu9GL0psg0LTQsNC80YvQvNCw0pPQsNC9IC7SmtC+0YDRgtGL0L3QtNGL0LvQsNC5INC60LXRgtGB0LXQvCDQvtGB0YvQvdC00LDQuSDQsdGW0YDQvdC10YjQtSDRgdC10LHQtdC/0YLQtdC9LdCx0LDQu9Cw0LTRiyDQttCw0LnRgdGL0LfQtNGL0psg0YHQtdC30ZbQvNGWINC+0YDRi9C9INCw0LvRg9GLINC80q/QutC80ZbQvQ==</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96" table:style-name="ce1">
            <text:p>915196</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DQny7QoS7QnNC+0YnQuNGH0LAg0LrQu9Cw0YHRgdC40YTQuNC60LDRhtC40Y/RgdGLINCx0L7QudGL0L3RiNCwINC20q/RgNC10Log0YjRg9C70LDRgNGL0L0gNNC60LUg0LHTqdC70ZbQvyDSm9Cw0YDQsNGB0YLRi9GA0LDQvNGL0Lc6INCU0LjQsNGB0YLQvtC70LDQu9GL0pssINGB0LjRgdGC0L7Qu9Cw0LvRi9KbLCDSr9C30LTRltC60YHRltC3INC205nQvdC1INKb0LDQu9GL0L/RgtGLLiDQldC90LTRliDQvtC70LDRgNC00YvSoyDTmdGA0pvQsNC50YHRi9C90LAg0LbQtdC60LUt0LbQtdC60LUg0YLQvtKb0YLQsNC70LAg06nRgtGB0LXQvCwg0YHQuNGB0YLQvtC70LDQu9GL0psg0YjRgyDQttKv0YDQtdC6INKb0LDRgNGL0L3RiNCw0LvQsNGA0YvQvdGL0qMg0LbQuNGL0YDRi9C70YPRi9C90YvSoyDTmdGB0LXRgNGW0L3QtdC9INC/0LDQudC00LAg0LHQvtC70LDRgtGL0L0g0YjRgy4g0J7Sk9Cw0L0g0pvQsNKb0L/QsNKb0YjQsNC70LDRgNC00YvSoyDRgtCw0YDRi9C70YPRiyDQvdC10LzQtdGB0LUg0LHRltGC0LXQu9GD0ZYg0LrQtdC30ZbQvdC00LUg0LbTmdC90LUg0pvQsNC90L3Ri9KjINKb0LDQvSDRgtCw0LzRi9GA0LvQsNGAINCw0YDSm9GL0LvRiyDQu9Cw0pvRgtGL0YDRgyDQsNKb0LDRg9C70LDRgNGLINC80LXQvSDSm9Cw0L3QvdGL0qMg0LrQtdGA0ZYg0LDSk9GD0Ysg0L3TmdGC0LjQttC10YHRltC90LTQtSDQv9Cw0LnQtNCwINCx0L7Qu9Cw0YLRi9C9INGA0LXQs9GD0YDQs9C40YLQsNGG0LjRjyDRiNGD0LvQsNGA0Ysg0LTQtdC/INGC0LUg0LHTqdC70ZbQvyDSm9Cw0YDQsNGB0YLRi9GA0YHQsNKbINCx0L7Qu9Cw0LTRiy4g0JDQuyDQtNC40LDRgdGC0L7Qu9Cw0LvRi9KbINGI0YPQu9Cw0YAg0LrQtdGA0ZbRgdGW0L3RiNC1INC20q/RgNC10Log0pvQsNGA0YvQvdGI0LDQu9Cw0YDRi9C90YvSoyDQsdC+0YHQsNKj0YHRg9GLINC60LXQt9GW0L3QtNC1INC/0LDQudC00LAg0LHQvtC70LDRgtGL0L0g0YjRgy4g0prQsNKb0L/QsNKb0YjQsNC70LDRgNC00YvSoyDQttC10YLQutGW0LvRltC60YHRltC30LTRltCz0ZYsINGP0pPQvdC4INKb0LDQsdGW0LvQtdGC0YHRltC3INKb0LDSm9C/0LDSm9GI0LDQu9Cw0YAg0LDRgNKb0YvQu9GLINKb0LDQvdC90YvSoyDQsNKT0YPRi9C90LDQvSDQtdGA0YLQtSDQtNC40LDRgdGC0L7Qu9Cw0LvRi9KbINGI0YMg0LXRgdGC0ZbQu9C10LTRli4g0J7RgdGLINC00LjQsNGB0YLQvtC70LDQu9GL0psg0YjRg9C00YvSoyDTqdC30ZbQvSDQtdGA0YLQtSDQttOZ0L3QtSDQutC10Ygg0LTQuNCw0YHRgtC+0LvQsNC70YvSmyDRiNGD0LvQsNGAINC00LXQvyDQsdOp0LvRltC/INKb0LDRgNCw0YHRgtGL0YDQsNC80YvQty4g0JDQuyDSr9C30LTRltC60YHRltC3INGI0YMg0pvQsNGA0YvQvdGI0LDQu9Cw0YDQtNGL0qMg0LHQvtGB0LDSo9GB0YPRi9C90LAg0LTQsCDTmdGA0ZYg0L7Qu9Cw0YDQtNGL0qMg0LbQuNGL0YDRi9C70YPRi9C90LAg0LTQsCDRgtOZ0YPQtdC70YHRltC3LCDQsdCw0YDQu9GL0psg0LbSr9GA0LXQuiDRhtC40LrQu9GWINCx0L7QudGL0L3QtNCwINC10YHRgtGW0LvQtdGC0ZbQvSDRiNGDINCx0L7Qu9GL0L8g0YLQsNCx0YvQu9Cw0LTRiy4g0J7QuyDQttKv0YDQtdC60YLRltKjINKb0rHRgNGL0LvRi9C80LTRi9KbINCw0pvQsNGD0LvQsNGA0YvQvdC00LAg0L/QsNC50LTQsCDQsdC+0LvQsNC00YsuINCc0YvRgdCw0LvRizog0LDRgtGA0LjQsNC70YzQtNGL0pssINGP0pPQvdC4INC20q/RgNC10LrRiNC10LvQtdGAINCw0YDQsNGB0YvQvdC00LDSk9GLINC/0LXRgNC00LUg0LDSm9Cw0YPQu9Cw0YDRiyDQvdC10LzQtdGB0LUg0LDRgNGC0LXRgNC40L7Qt9GLINC60LXQt9GW0L3QtNC1LiDQmtC10LvQtdGB0ZYg0LbSr9GA0LXQuiDRiNGD0LvQsNGA0YvQvdGL0qMg0YHQvtKj0pPRiyDRgtKv0YDRliDSm9Cw0LvRi9C/0YLRiyDRiNGDLiDQntC7INC20q/RgNC10LrRgtC1INC10YjSm9Cw0L3QtNCw0Lkg0LTQsCDQv9Cw0YLQvtC70L7Qs9C40Y8g0LbQvtKbINC60LXQt9GW0L3QtNC1INC00LUg0LXRgdGC0ZbQu9C10YLRltC9INGI0YMg0LHQvtC70YvQvyDRgtCw0LHRi9C70LDQtNGLLiDQntC90YvSoyDQtdGI0pvQsNC90LTQsNC5INC30LjRj9C90Ysg0LbQvtKbLiAgPGJyIC8+DQoyINCQ0L3QsNGC0L7QvNC40Y/Qu9GL0psg0YLSsdGA0pPRiyDRltGI0LXQutGC0LXRgNC00ZYgNNC60LUg0LHTqdC70ZbQvyDSm9Cw0YDQsNGB0YLRi9GA0LDQvNGL0Lc6INC+0L0g0LXQutGWINC10LvRliDRltGI0LXQuiwg0LDRiCDRltGI0LXQuiwg0YLQvtKbINGW0YjQtdC6INC205nQvdC1INGC0ZbQuiDRltGI0LXQui4g0JDRiCDRltGI0LXQui0g0L7QvSDQtdC60ZYg0LXQu9GWINGW0YjQtdC60YLQtdC9INC60LXQudGW0L0g0L7RgNC90LDQu9Cw0YHSm9Cw0L0g0ZbRiNC10Log0YLSr9GA0ZYg0LHQvtC70YvQvyDRgtCw0LHRi9C70LDQtNGLLiDQkdCw0LvQsNC70LDRgNC00LAg0LDRiCDRltGI0LXQuiDQtdGA0LXRgdC10LrRgtC10YDQs9C1INKb0LDRgNCw0pPQsNC90LTQsCDQsNC90LDRgtC+0LzQvi3RhNC40LfQuNC+0LvQvtCz0LjRj9C70YvSmyDRgtKx0YDSk9GL0LTQsCDQtdGA0LXQutGI0LXQu9C10L3QtdC00ZYuINCV0qMg0LDQu9C00YvQvNC10L0g0LDQvdCw0YLQvtC80LjRj9C70YvSmyDQtdGA0LXQutGI0LXQu9GW0LrRgtC10YDRltC90LUg0LrQtdC70YHQtdC6LCDQtNC10L3QtSDQvNCw0YHRgdCw0YHRi9C80LXQvSDRgdCw0LvRi9GB0YLRi9GA0pPQsNC90LTQsCDQvdOZ0YDQtdGB0YLQtdC70LXRgNC00LUg0LXRgNC10YHQtdC60YLQtdGA0LTQtdC9INKx0LfRi9C9INCx0L7Qu9GL0L8g0LrQtdC70LXQtNGWLiDSmtCw0LHRi9GA0pPQsNC70LDRgNGLINKb0LDQu9GL0qMg05nRgNGWINC905nQt9GW0Log0LHQvtC70LDQtNGLLiDQm9C40LzRhNC+0LjQtNGC0YvSmyDRgtGW0L3QtNC10YDRliDQvdCw0YjQsNGAINC00LDQvNGL0pPQsNC9LiDQodC+0Lsg0YHQtdCx0LXQv9GC0ZYg0LTQtSDQuNC90YTQtdC60YbQuNGP0LvQsNGA0pPQsCDQsdC10LnRltC8INCx0L7Qu9GL0L8g0LrQtdC70LXQtNGWLiDTmNGA0ZYg0YjRi9GA0YvRiNGC0Ysg0pvQsNCx0LDRgtGLINKb0LDQvSDRgtCw0LzRi9GA0LvQsNGA0LzQtdC9INC20LDSm9GB0Ysg0pvQsNC80YLQsNC80LDRgdGL0Lcg0LXRgtGW0LvQs9C10L0uINCe0YHRi9C90YvSoyDTmdGB0LXRgNGW0L3QtdC9INC905nRgNC10YHRgtC10LvQtdGA0LTQtSDQsNGIINGW0YjQtdC6INGA0LXQs9C10L3QtdGA0LDRhtC40Y/Sk9CwINOZ0YDRliDSm9Cw0LHRi9C90YPSk9CwINCx0LXQudGW0Lwg0LHQvtC70YvQvyDQutC10LvQtdC00ZYuINCV0L3QtNGWINGE0LjQt9C40L7Qu9C+0LPQuNGP0LvRi9KbINC10YDQtdC60YjQtdC70ZbQutGC0LXRgNGW0L3QtSDRgtC+0pvRgtCw0LvRgdCw0LwsINC905nRgNC10YHRgtC10LvQtdGA0LTQtSDRhNC10YDQvNC10L3RgtGC0LXRgNC00ZbSoyDQttC10YLRltGB0L/QtdGD0YjRltC70ZbQs9GWINC00LDQvNC40LTRiy4g0KLRltC/0YLRliDQu9Cw0LrRgtCw0LfQsCDRhNC10YDQvNC10L3RgtGW0L3RltKjINC00LUg0LbQtdGC0ZbRgdC/0LXRg9GI0ZbQu9GW0LPRltC9INC+0YDRi9C9INCw0LvQsNC00YsuINCe0YHRi9C90YvSoyDTmdGB0LXRgNGW0L3QvdC10L0g0L3TmdGA0LXRgdGC0LXQvdGW0qMg0LDRiCDRltGI0LXQs9GW0L3QtNC1INCw0L3QsCDRgdKv0YLRltC90ZbSoyDSm9Kx0YDQsNC80YvQvdC00LDSk9GLINC70LDQutGC0L7Qt9CwINGC0L7Qu9GL0psg0YHRltKj0ZbRgNGW0LvRg9GWINC20q/RgNC80LXQudC00ZYg0LTQtSDQsdCw0LvQsNC00LAg0ZbRiCDQsdOp0LvRltCz0ZbQvdGW0qMg0LDRg9GL0YDRgdGL0L3Rg9GL0L0g0YLRg9GL0L3QtNCw0YLQsNC00YsuINOY0YDRliDQsdKx0Lsg0LHQsNC70LAg0ZbRiNGW0L3RltKjINC60LXQsdGD0ZbQvSDQtNC1INGC0YPQtNGL0YDQsNC00YsuINCh0L7QvdGL0LzQtdC9INKb0LDRgtCw0YAg0LHSsdC70YjRi9KbINC10YIg0LzQvtGC0L7RgNC40LrQsNGB0Ysg0LbQsNKb0YHRiyDQtNCw0LzRi9KT0LDQvdC90LDQvSDRltGI0LXQuiDQsNGA0pvRi9C70Ysg0LfQsNGC0YLQsNGAINGC0LXQtyDTqdGC0ZbQvywg0pvQvtGA0LXQutGC0ZbQuiDQt9Cw0YLRgtCw0YAg0YLQvtC70YvSmyDRgdGW0qPRltGA0ZbQu9GW0L8g0q/Qu9Cz0LXRgNC80LXQudC00ZYuINCe0YHRiyDQtdGA0LXQutGI0LXQu9GW0LrRgtC10YDRltC90ZbSoyDTmdGB0LXRgNGW0L3QtdC9IDLQsNC50LvRi9KbINCx0LDQu9Cw0LTQsCDQvNCw0LfQsNGB0YvQt9C00YvSmyDQvtGA0YvQvSDQsNC70YPRiyDQvNKv0LzQutGW0L0uINCh0L7QvdGL0LzQtdC9INKb0LDRgtCw0YAg0LDQvdCwINGB0q/RgtGW0L3RltKjINKb0rHRgNCw0LzRi9C90LTQsNKT0Ysg0LDQu9C70LXRgNCz0LXQvdC00ZYsINGC0L7QutGB0LjQutCw0LvRi9KbINC30LDRgtGC0LDRgCDQtNCwINCx0LDQu9Cw0LvQsNGA0LTRi9KjINGW0YjQtdC60YLQtdGA0ZYg0LDRgNKb0YvQu9GLINGB0ZbSo9GW0YDRltC70ZbQvyDQsNGD0YvRgNGB0YvQvdGDINGB0LXQt9GW0LzRltC9INGC0YPQtNGL0YDRg9GLINC80q/QvNC60ZbQvS4g0KHQtdCx0LXQsdGWINCw0LnRgtGL0L8g0LrQtdGC0LrQtdC90ZbQvNGW0LfQtNC10Lkg0LHQsNC70LDQu9Cw0YDQtNGL0qMg0ZbRiNC10LrRgtC10YDRltC90LTQtSDQu9C40LzRhNC+0LjQtNGC0YvSmyDRgtGW0L3QtNC10YAg0YLQvtC70YvSmyDQtNCw0LzRi9C80LDSk9Cw0L3QtNGL0pvRgtCw0L0g0LjQvdGE0LXQutGG0LjRj9C70LDRgNKT0LAg0LHQtdC50ZbQvCDQsdC+0LvRi9C/INC60LXQu9C10LTRli4g0prQvtGA0YvRgtGL0L3QtNGL0LvQsNC5INC60LXQu9C1LCDQsdCw0LvQsNC90YvSoyDQsNC90LDRgdGLINCw0LvQu9C10YDQs9C10L3QtNGWINOZ0YDRliDRgtC+0LrRgdC40LrQsNC70YvSmyDTmdGB0LXRgCDQutOp0YDRgdC10YLQtdGC0ZbQvSDRgtCw0pPQsNC80LTRi9KbINC30LDRgtGC0LDRgNC00Ysg0LDQt9Cw0LnRgtGL0L8sINCx0LDQu9CwINC10LzRltC30YMg0LrQtdC30ZbQvdC00LUg0LHQsNC70LAg0ZbRiNGW0L3QtSDRgdKv0YLQv9C10L0g0pvQsNGC0LDRgCDQsNGD0LDQvdGL0qMg0LrQtdGC0L/QtdGD0ZbQvdC1INC90LDQt9Cw0YAg0LDRg9C00LDRgNGDINC60LXRgNC10LouINOY0YDRliDQsdCw0LvQsCDRltGI0ZbQvdC00LUg0LbQsNC50YHRi9C30LTRi9KbINC/0LXQvSDQutC10LHRgyDQsdCw0LnSm9Cw0LvRgdCwLCDQvNCw0YHRgdCw0LYg0LbQsNGB0LDQvywg0LDRj9Kb0YLQsNGA0YvQvSDQsdKv0LPRgyDQsNGA0pvRi9C70Ysg0ZbRiNGC0LXQs9GWINCz0LDQt9C00LDRgNC00Ysg0YjRi9KT0LDRgNGDINC60LXRgNC10Lou</text:p>
          </table:table-cell>
          <table:table-cell office:value-type="float" office:value="170348" table:style-name="ce1">
            <text:p>170348</text:p>
          </table:table-cell>
          <table:table-cell office:value-type="float" office:value="92" table:style-name="ce1">
            <text:p>9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0" table:style-name="ce1">
            <text:p>915230</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4g0J8u0KEu0JzQvtGJ0LjRh9CwINC60LvQsNGB0YHQuNGE0LjQutCw0YbQuNGP0YHRiyDQsdC+0LnRi9C90YjQsCDQttGD0YDQtdC6INGI0YPQu9Cw0YDRiyDQvNC10L0g0L7QvdGL0L0g0YHQuNC/0LDRgtGC0LDQvNCw0YHRi9C9INCw0LnRgtCwINC60LXRgtC10YLRi9C9INCx0L7Qu9GB0LDQvCwg0JzQvtGJ0LjRhtCwINC60LvQsNGB0YHQuNGE0LjQutCw0YbQuNGP0YHRiyDQsdC+0LnRi9C90YjQsCDRiNGD0LvQsNGAIDTQutC1INCx06nQu9GW0L3QtdC00ZYuINCe0LvQsNGAOiAxLtCh0LjRgdGC0L7Qu9Cw0LvRi9KbLCAyLtCU0LjQsNGB0YLQvtC70LDQu9GL0pssIDMu0q7Qt9C00ZbQutGB0ZbQtywgNC7QpNGD0L3QutGG0LjQvtC90LDQu9C00YvSmy4g0KHQuNGB0YLQvtC70LDQu9GL0psg0YjRgy3QttKv0YDQtdC60YLRltKjINKb0LDRgNGL0L3RiNCw0LvQsNGA0Ysg0LbQuNGL0YDRi9C70pPQsNC9INC60LXQt9C00LUsINGP0pPQvdC4INGC0LDQvNGL0YAg0YLQsNGA0LvRi9Cz0LDQvSDQutC10LfQtNC1KNCQ0L7RgNGC0LAg0YHRgtC10L3QvtC30YspLCDQutC70LDQv9Cw0L3QtNCw0YAg0LHRi9GC0LXQu9Cz0LXQvSDQutC10LfQtNC1INC/0LDQudC00LAg0LHQvtC70LDRgtGL0L0g0YjRgy4g0JTQuNCw0YHRgtC+0LvQsNC70YvSmy3QttKv0YDQtdC60YLRltKjINKb0LDRgNGL0L3RiNCw0LvQsNGA0YvQvdGL0qMg0LHQvtGB0LDQvdGB0YPRi9GLINC60LXQt9GL0L3QtNC1INC/0LDQudC00LAg0LHQvtC70LDQtNGLLiDQnNC40YLRgNCw0LvRjNC90YvQuSDRgdGC0LXQvdC+0LcsINCQ0L7RgNGC0LDQu9GL0psg0pvQsNKb0L/QsNKb0YjQsNC90YvSoyDQttC10YLQutGW0LvRltC60YHRltC30LTRltCz0ZYg0YHQtdCx0LXQvyDQsdC+0LvQsCDQsNC70LDQtNGLLiDSrtC30LTRltC60YHRltC3LdC606nQsdGW0L3QtdGB0LUg0LbSr9GA0LXQuiDQsNKb0LDRg9C70LDRgNGLINC60LXQt9GL0L3QtNC1INC90LXQvNC10YHQtSDQsdKv0LrRltC7INC20YPRgNC10Log0YbQuNC60LvRltC90LTQtSDQv9Cw0LnQtNCwINCx0L7Qu9Cw0LTRiywg0LDRiNGL0Log0LDRgNGC0LXRgNC40L7Qtywg0LbSr9GA0LXQuiDQv9C10YDQtNC10LvQtdGA0ZbQvdGW0qMg0LDQutCw0YPQu9Cw0YDRiyDQutC10LfRltC90LTQtSDQsdCw0LnQutCw0YPQs9CwINCx0L7Qu9Cw0LTRiy4g0KTRg9C90LrRhtC40L7QvdCw0LvQtNGL0pst0YHQsNGDINCw0LTQsNC80LTQsNGA0LTQsCDSm9Cw0LvRi9C/0YLRiyDQvy7QsS4g0JbTmdC90LXQtNC1INC20q/RgNC10LrRgtC1INC10YjSm9Cw0L3QtNCw0Lkg0LDSm9Cw0YMg0LHQvtC70LzQsNC50LTRiywg0prQsNC9INCw0pPRi9C80Ysg0LbRi9C70LTQsNC80LTQsNKT0LDQvdC00LAg0LbTmdC90LUg0YLQsNKT0YvQtNCwINCx0LDRgdKb0LAg0YHQtdCx0LXQv9GC0LXRgNC00ZbSoyDTmdGB0LXRgNGW0L3QtdC9INCx0L7Qu9Cw0LTRiy4g0JbQsNC70L/RiyDQvtGB0Ysg0LbSr9GA0LXQuiDRiNGD0LvQsNGA0YvQvSDQsNC90YvSm9GC0LDRgyDSr9GI0ZbQvSDQv9Cw0YbQuNC10L3RgtGC0ZYg0LfQtdC50ZbQvSDRgdCw0LvQsCDQvtGC0YvRgNGL0L8g0YLQtdC60YHQtdGA0YMsINGP0pPQvdC4INCw0YPRgdC60YPQu9GM0YLQsNGG0LjRjyDQttKv0YDQs9GW0LfRgywg0pvQvtGB0YvQvNGI0LAg0YLQtdC60YHQtdGA0ZbRgdGC0LXRgNC00LXQvSDTqdGC0LrRltC30ZbQvyDQutC10LnRltC9INC90LDSm9GC0Ysg0LTQuNCw0LPQvdC+0Lcg0pvQvtGOINC80LDSo9GL0LfQtNGLLjxiciAvPg0KMi4gMtCw0LnQu9GL0psg0LHQsNC70LDQtNCwINCw0L3QsCDRgdKv0YLRltC80LXQvSDRgtCw0LzQsNKb0YLQsNC90YPRi9C90LDQvSDQutC10LnRltC9INC80LDQt9Cw0YHRi9C30LTQsNC90YPRiyDQttC40ZYg0LrQtdC30LTQtdGB0LXRgtGW0L0g0LbQsNCz0LTQsNC5LCDRj9KT0L3QuCAyINCw0LnQu9GL0psg0LHQsNC70LDQtNCwINCw0Ygg0ZbRiNC10LPRliDRgtC+0LvRi9KbINC00LDQvNGL0LzQsNKT0LDQvSDQsdC+0LvRi9C/INC60LXQu9C10LTRliwg0LXRgNC10YHQtdC6INCw0LTQsNC80LTQsNGA0pPQsCDQutCw0YDQsNCz0LDQvdC00LAg06nRgtC1INKx0LfRi9C9INC205nQvdC10LTQtSDQttGW0qPRltGI0LrQtS4g0pvQsNCx0LDRgtGC0LDRgNGLINC20rHSm9CwINC205nQvdC1INC905nQt9GW0LosINKb0LDQvdC80LXQvSDSm9Cw0LzRgtCw0LzQsNGB0YvQtyDQtdGC0ZbQu9GD0ZYg0LbQsNKb0YHRiyDRgdC+0L3Ri9KjINC10YHQtdCx0ZbQvdC10L0g0LjQvdGE0LXQutGG0LjRj9C70LDRgNKT0LAg0YHQtdC30ZbQvNGC0LDQuyDQsdC+0LvRi9C/INC60LXQu9C10LTRli4g0JvQuNC80YTQsNC70LDRgNGLINC00rHRgNGL0YEg0LbQtdGC0ZbQu9C80LXQs9C10L0g0YHQvtC90YvSoyDQvdOZ0YLQuNC20LXRgdGW0L3QtNC1INC40LzQvNGD0L3QtNGL0psg0LbSr9C50LXRgdGWINGC06nQvNC10L0uINCk0LXRgNC80LXQvdGC0YLQtdGAINC00YPRgNGL0YEg0LbQtdGC0YvQu9C80LXQs9C10L0uICDQodC+0Lsg0YHQtdCx0LXQv9GC0LXQvSDQvdOZ0YDQtdGB0YLQtSDRltGI0LXQs9GWINC606nQv9GC0LXQs9C10L0g0LfQsNGC0YLQsNGA0pPQsCwg0LvQsNC60YLQvtC30LDSk9CwINGB0LXQt9GW0LzRgtCw0Lsg0LrQtdC70ZbQvywg0LzQsNC30LDRgdGL0LfQtNCw0L3Ri9C/INCw0YPRi9GA0YHRi9C90YPRiyDQvNKv0LzQutGW0L0uINCQ0L3QsCDRgdGD0YLRi9C80LXQvSDRgtCw0LzQsNKb0YLQsNC90pPQsNC90L3QsNC9INC60LXQudGW0L0g0LHQsNC70LDQtNCwINCz0LDQtyDQvdC10LzQtdGB0LUg0LrQvtC70LjQutGC0LXRgCDQv9Cw0LnQtNCwINCx0L7Qu9GD0YvQtNCwINC60LXQt9C00LXRgdGW0L8g0LbQsNGC0LDQtNGLLiDQotCw0pPRi9C00LAg0LzQsNC30LDRgdGL0LfQtNCw0L3Rg9GL0L3Ri9KjINGB0LXQsdC10L/RgtC10YDRltC90LUg0LHQsNC70LDQvdGL0qMg0LDRgNGC0YvSmyDQvNOp0LvRiNC10YDQtNC1INGC0LDQvNCw0pvRgtCw0L3Rg9GL0L0sINCz0LDRgdGC0YDQvtGN0LfQvtGE0LDQs9C10LvRjNC00ZYg0YDQtdGE0LvQtdC60YHRgtGLLCDRgtOp0LfRltC80YHRltGW0LfQtNGW0LrRgtGWINCw0LnRgtCwINCw0LvQsNC80YvQty4g0JXQs9C10YDQtNC1INC80LDQt9Cw0YHRi9C30LTQsNC90YPRi9C9INC60L7QudC80LDRgdCwINC90LXQvNC10YHQtSDQvtC7INC20LDSk9C00LDQuSDQttC40ZYg0LrQtdC30LTQtdGB0LXRgtGW0L0g0LHQvtC70YHQsCwg0LTTmdGA0ZbQs9C10YAg0L/QtdC00LjQsNGC0YDSk9CwINKb0LDRgNCw0LvRgyDSm9Cw0LbQtdGCL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1 сұрақта кателіктер бар</text:p>
          </table:table-cell>
          <table:table-cell office:value-type="float" office:value="0" table:style-name="ce1">
            <text:p>0</text:p>
          </table:table-cell>
          <table:table-cell table:number-columns-repeated="16376"/>
        </table:table-row>
        <table:table-row table:style-name="ro1">
          <table:table-cell office:value-type="float" office:value="915242" table:style-name="ce1">
            <text:p>915242</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dCh0rHRgNCw0psg0J8u0KEuINCc0L7RidC40YfQsCDQutC70LDRgdGB0LjRhNC40LrQsNGG0LjRj9GB0Ysg0LHQvtC50YvQvdGI0LAg0LbSr9GA0LXQuiDRiNGD0LvQsNGA0Ysg0LbTmdC90LUg0L7QvdGL0qMg0YHQuNC/0LDRgtGC0LDQvNCw0YHRiyDRgtGD0LDRgNC70Ysg0LDQudGC0LDRgtCw0YvQvSDQsdC+0LvRgdCw0psuINCR0LDQu9Cw0LvQsNGA0LTQsCDQtdGA0LXRgdC10Log0LDQtNCw0LzQtNCw0YDSk9CwINKb0LDRgNCw0pPQsNC90LTQsCDQtdGA0LXQutGI0LXQu9GW0LrRgtC10YDRliDQsNC50YLQsNGA0LvRi9Kb0YLQsNC5INC606nQvy4g0JHQsNC70LDQu9Cw0YDQtNCwINKb0rHRgNGB0LDSmyDQsdOp0LvRltCz0ZbQvdC00LXQs9GWINCx0rHQu9GI0YvSm9C10YLRgtC10YDRliDTmdC70YHRltC3INCx0L7Qu9GL0L8g0LrQtdC70LXQtNGWLCDRgdC+0Lsg0YHQtdCx0LXQsdGC0LXQvyDQvtC70LDRgNC00YvSoyDQsNGD0YHQutGD0LvRgtCw0YbQuNGPINC60LXQt9GW0L3QtNC1INC+0LvQsNGA0LTQsCDRgtC+0L3Rg9GB0YLQsNGA0Ysg0pvQsNC90LTQsNC50LTQsCDQsdGW0YAg0YjRg9C70LDRgNGLICDSm9Cw0YLRgtGL0YDQsNKbLCDRi9GA0pPQsNKb0YLRi9KT0Ysg0LzQtdC9INC60q/RiNGWINOZ0LvQtNC1INKb0LDQudC00LAg0LbQsNKb0YHRiyDQtdGB0YLRltC70LXQtNGWLCDRj9KT0L3QuCDQsNCx0LDQu9Cw0LvQsNGA0LTQsCDQtdGA0LXRgdC10Log0LDQtNCw0LzQtNCw0YDSk9CwINKb0LDRgNCw0pPQsNC90LTQsCDTmdC70LTQtSDSm9Cw0LnQtNCwINKb0LDRgtGC0Ysg0LXRgdGC0ZbQu9GW0L8sINKb0LDRgtGC0YvRgNCw0psg0YHQvtKT0LDQtNGLLiDRgdC10YDQv9GW0LzQtNGW0LvRltCz0ZYg0LbQvtKT0LDRgNGLICAg0KHQvtC90YvQvNC10LXQvSDQny7QoS7QnNC+0YnQuNGH0LAg0LrQu9Cw0YHRgdC40YTQuNGE0LrQsNGG0LjRj9GB0Ysg0LHQvtC50YvQvdGI0LAg0LbSr9GA0LXQuiDRiNGD0LvQsNGA0YvQvdGL0qMg0YLSr9GA0LvQtdGA0ZYg0LzQtdC9INC+0L3Ri9KjINGB0LjQv9C/0LDRgtCw0LzQsNGB0Ys6INC+0LvQsNGAIDQg0YLSr9GA0ZYg0LHQvtC70LDQtNGLLCDQsdGW0YDRltC90YjRliAtINGB0LjRgdGC0L7Qu9Cw0LvRi9KbINGI0YMgLCDQtdC60ZbQvdGI0ZYtINC00LjQsNGB0YLQvtC70LDQu9GL0psg0YjRgyAg0LbTmdC90LUg0q/RiNGW0L3RiNGWIC0g0q/Qt9C00ZbQutGB0ZbQtyDRiNGDICwg0YLTqdGA0YLRltC90YjRli0g0pvRi9C30LzQtdGC0YLRltC6INC90LXQvNC10YHQtSDQvtC90Ysg0LHQsNGB0pvQsNGI0LAg0YTRg9C90LrRhtC40L7QvdCw0LvQtNGL0psg0YjRgyDQtNC10L8g0YLQtSDQsNGC0LDQudC00YsuIDxiciAvPg0KMS7QkdGW0YDRltC90YjRliDRgdC40YHRgtC+0LvQsNC70YvSmyDRiNGD0pPQsCDRgtC+0pvRgtCw0LvQsNGC0YvQvSDQsdC+0LvRgdCw0LwsIC0g0LHSsdC7INC90LXQs9GW0LfRliDQttKv0YDQtdC6INKb0LDRgNGL0L3RiNCw0LvQsNGA0YvQvdGL0qMgINC20LjRi9GA0LvRi9C90pPQsNC9INC60LXQt9GW0L3QtNC1INC/0LDQudC00LAg0LHQvtC70LDRgtGL0L0g0LbSr9GA0LXQuiDRiNGD0LvQsNGA0YvQvdGL0qMg0LHRltGAINGC0q/RgNGWLtCh0LjRgdGC0L7Qu9Cw0LvRi9KbINGI0YPQtNCwINCx0ZbRgtC10LvRltC/INC90LXQvNC10YHQtSDQutC10YDRltGB0ZbQvdGI0LUg0YLQsNGA0YvQu9GL0L/QvyDQutCw0LvSk9Cw0L0g0LrQu9Cw0L/QsNC9INCw0YDSm9GL0LvRiyDQvdC10LzQtdGB0LUg0YLTmdC80YvRgCDQsNGA0pvRi9C70Ysg0LHQvtC70LDRgtGL0L0g0Y/Sk9C90Lgg0LrSr9GI0YLQtdC/INGB0L7Sk9GD0LTRi9KjINC905nRgtC40LbQtdGB0ZbQvdC00LUg0LHQvtC70LDRgtGL0L0g0LvQsNKb0YLRi9GA0YvQvyDRgdC+0pPRgyDQttOZ0L3QtSDRgdC+0Lsg0LDSk9GL0LzQvdGL0qMg0LrQu9Cw0L/QsNC90LTQsNGAINCw0YDSm9GL0LvRiyDQutC10YDRliDQsNKT0YPRiyDQv9Cw0LnQtNCwINCx0L7Qu9Cw0YLRi9C9ICDRgdC10LrRltC70LTRliDQsdC10LnQvdC10LvQtdC90LXQtNGWLiA8YnIgLz4NCjIu0LDQuyDQtdC60ZbQvdGI0ZYg0L7QuyDQtNC40LDRgdGC0L7Qu9Cw0LvRi9KbINGI0YMg0L7QuyDQutC10YDRltGB0ZbQvdGI0LUg0LbSr9GA0LXQuiDSm9Cw0YDRi9C90YjQsNC70LDRgNGL0L3Ri9KjINCx0L7RgdCw0qPRgdGL0pPQsNC90LTQsCDQv9Cw0LnQtNCwINCx0L7Qu9Cw0YLRi9C9INGI0YPQvNC10L0g0L3QtdCz0ZbQt9C00LXQu9C10LTRliDQtdC60LXQvS4g0L7QuyDQttKv0YDQtdC6INC20LXRgtC60ZbQu9GW0LrRgdGW0LfQtNGW0LPRliDQutC10LfRltC90LTQtSDQutC70LDQv9Cw0L3QtNCw0YDQtNGL0qMg0LDSk9GD0YvQvdGL0L3QsNC9INCx0L7Qu9Cw0YLRi9C9INCw0LnRgtGL0L8g0LrQtdGC0LrQtdC90LTQtdC5INC00LjQsNGB0YLQvtC70LDQu9GL0psg0YjRgyDQsdC+0LvRi9C/INC60LXQu9C10LTRliDQtdC60LXQvSwg0L7QvdGL0qMg0YLQsNC80YvRgCDRgtCw0YDRi9C70pPQsNC9ICDQttOZ0L3QtSDRgtCw0YDRi9C70pPQsNC9ICDQutC70LDQv9Cw0L3Qu9C00LDRgNGL0L3Ri9KjINCw0pPRi9C80YvQvdCwINCx0LDQudC70LDQvdGL0YHRgtGLINC+0YDRgtCwINC205nQvdC1INC60LXRiCDQtNC40LDRgdGC0L7Qu9Cw0LvRi9KbINGI0YMg0LTQtdC/INCx06nQu9GD0LPQtSDQsdC+0LvQsNC00YsgPGJyIC8+DQozINKu0YjRltC90YjRliDQvtC7INKv0LfQtNGW0LrRgdGW0Lcg0YjRgyDQsdC+0LvRi9C/INC60LXQu9C10LTRli4g0KPQt9C00ZbQutGB0ZbQtyDRiNGDINC00LXQs9C10L3QvNGW0Lcg0L7QuyDQttKv0YDQtdC6INCw0pvQsNGD0LvQsNGA0Ysg0LrQtdC30ZbQvdC00LUg0LrTqdGA0ZbQvdC10YLRltC9LNC80YHRi9Cw0LvSk9CwINC20q/RgNC10Log0LDRgtGA0LjQsNC70LTRiyDQsNKb0LDRg9C70LDRgNGL0L3QtNCwINC60LXQt9C10YHQtdC00ZYsINCw0YjRi9KbINCw0YDRgtC10YDQuNGPINGC0q/RgtGW0LPRliAg0LbSr9GA0LXQuiDRhtC40LrQu9C00LAg0LrQtdC30LTQtdGB0LXRgdGC0ZbQvSDRiNGD0LTRi9KjINGC0q/RgNGWINC+0Lsg05nQtNC10YLRgtC1INKv0LfQtNGW0LrRgdGW0Lcg0YHQtdC60ZbQu9C00ZYg0YDTqdC7INCw0YLTqdCw0YDQsNC00YsuICA8YnIgLz4NCjQg0KLTqdGA0YLRltC90YjRliDRiNGDINC+0Lsg0YTRg9C90LrRhtC40L7QvdCw0LvQtNGL0psg0YjRgyAt0pvQsNC90LTQsNC50LTQsCDQsdGW0YAg0LDSm9Cw0YPQu9Cw0YDRiyDQttC+0pssINGP0pPQvdC4INC00LXQvdGWINGB0LDRgyDQsNC00LDQvNC00LDRgNC00LAg0LHQvtC70LDRgtGL0L0sINC20q/RgNC10Log0pvRi9C30LzQtdGC0YLQtdGA0ZYg0YLQvtC70YvSmyDQvtGA0YvQvdC00LDRg9C00LAg0LHQvtC70LDRgtGL0L0g0YLSr9GA0ZYuINCx0rHQuyDQutCw0LvQv9GC0Ysg0LHQvtC70YvQvyDQutC10LvQtdC00ZYsINGP0pPQvdC4INC+0Lsg0LbSr9GA0LXQutGC0ZbSoyDSm9GL0LfQvNC10YLRgtGW0qMg0YTRg9C90LrRhtC40L7QvdCw0LvQtNGL0pPRi9C9INC+0YDRi9C90LTQsNC50LTRiy4gPGJyIC8+DQoy0KHSsdGA0LDSmyDQldC80YXQsNC90LDSk9CwINC60LXQu9Cz0LXQvSAyINCw0LnQu9GL0psg0LHQsNC70LDQvdGL0qMg0LDQvdCwINGB0q/RgtGC0ZYg0LzQtdC9INGC0LDQvNCw0pvQsNGC0LDQvdKT0LDQvdC90LDQvSDQutC10LnRltC9INC80LDQt9Cw0YHRi9C30LTQsNC90YPRiyDQvtC7INC00LXQs9C10L3RltC80ZbQtywtINCx0LDQu9Cw0L3Ri9KjINCw0Ygg0ZbRiNC10LrRgtGW0qMg0LDQvdCw0YLQvtC80L4t0YTQuNC30LjQvtC70L7Qs9C40Y/Qu9GL0psg0LXRgNC10LrRiNC10LvRltCz0L3QtNC1INC10LrQtdC90ZYg0LzTmdC70ZbQvC4g0JbQsNC70L/RiyAyINCw0LnQu9GL0psg0LHQsNC70LDQvdGL0qMg0YLQsNC80LDSm9GC0LDQvSDQvNCw0LfQsNGB0YvQvdC00LDQvdGD0Ysg0LHSsdC7INGE0LjQt9C40L7Qu9C+0LPQuNGP0LvRi9KbINKv0YDQtNGW0YEg0LHQvtC70YvQvyDQutC10YLQtdC00ZYsINCw0LvQtNGL0LzQtdC9INCx0ZbQtyDQsdCw0LvQsNC90YvSoyDQvNCw0LfQsNGB0YvQt9C00LDQvdGD0YvQvSDQvtC90YvSoyDSm9Cw0LvQsNC5INGC0LDQvNCw0pvRgtCw0L3QtNGL0YDRi9C70pPQsNC90YvQvdCwINC805nQvSDQsdC10YDRg9GW0LzRltC3INKb0LDQttC10YIu0LbTmdC90LUg0L7QvdGLINCw0LvQtNGL0LzQtdC9INC+0L3Ri9KjINGE0LjQt9C40L7Qu9C+0LPQuNGP0LvRi9KbINGC0rHRgNKT0YvQtNCwINGB0LDRgNCw0LvQsNKT0LDQvSDQttOp0L0s0Y/Sk9C90Lgg0LDQvdCw0YHRiyDQsdCw0LvQsNKT0LAg0YLQsNC80LDSmyDQsdC10YDRgyDQsdCw0YDRi9GB0YvQvdC00LAg0L7QvdGL0qMg0LTSsdGA0YvRgSDQtdC80ZbQvyDQttCw0YLSm9Cw0L3Ri9C90LAg0LrTqdKj0ZbQuyDQsdOp0LvRg9GWINC205nQvdC1INKb0LDQvdC00LDQuSDQv9C+0LfQsNC00LAg0YLQsNC80LDSm9GC0LDQvdC00YvRgNGL0L8g0LbQsNGC0pvQsNC90YvQvdGLINC10YHQutC10YDQtSDQvtGC0YvRgNGL0L8sINCx0LDQu9Cw0L3Ri9KjINKb0LDQu9GL0L/RgtGLINC806nQu9GI0LXRgNC00LUg0YLQsNC80LDSm9Cw0YLQsNC90pPQsNC90YvQvdGLINC10YHQutGA0LUg0L7RgtGL0YDRg9C80YvQtyDSm9Cw0LbQtdGCLiA8YnIgLz4NCtCW0LDQu9C/0Ysg0LDRiCDRltGI0LXQuiDQsNC90LDRgtC+LdGE0LjQt9C40L7Qu9C70LPQuNGP0LvRi9KbINC10YDQtdC60YjQtdC70ZbQutGC0LXRgNGWLiDQodCQ0KMg0LHQsNC70LDQtNGLINCw0Ygg0ZbRiNC10Log0LXRgNC10YHQtdC6INCw0LTQsNC80LTQsNGA0pPQsCDSm9Cw0YDQsNKT0LDQvdC00LAgINC+0L3Ri9KjINGE0LjQt9C40L7Qu9C+0LPQuNGP0LvRi9KbINGC0rHRgNKT0YvQtNCwINC/0ZbRiNGW0L3Rliwg0LrTqdC70LXQvNGWLCDQsNGD0pvRi9C80YssINC205nQvdC1INGB0LDQu9C80LDSk9GLINCx0ZbRgNGI0LDQvNCwINC60ZbRiNC60LXQvdGC0LDQuSDQttOZ0L3QtSDSm9Cw0LnRgtCwINOp0YDRltGB0YLQtdGDINGB0LDRgtGL0YHRi9C90LTQsCwg0JHQsNC70LDQu9Cw0YDQtNCwINCw0Ygg0ZbRiNC10LrRgtGW0qMg0YjRi9GA0YvRiNGC0YssINGI0YvRgNGL0YjQsNGB0YLRiyDSm9Cw0LHQsNGC0YvQvdGLLCDQsdKx0LvRiNGL0LXRgtGC0ZYgINKb0LDQsdCw0YLRi9C90YvSoyDRgdC10YDQv9GW0LzQtNGWINCx0L7Qu9GD0LzRi9C10L0g0LbTmdC90LUg0L7QvdGL0qMg0LbSsdKb0LAg0LHQvtC70YPRi9C80LXQvSDRgdC40L/Qv9Cw0YLQsNC70LDQtNGLLiDRiNGL0YDRi9GI0YLRiyDSm9Cw0LHQsNGC0YvQvdGL0qMg0YjRi9GA0YvRiCDQsdOp0LvRg9GWINCw0YDSm9GL0LvRiyDRgdKv0YLRgtGW0qMg0pvSsdGA0LDQvNC90YvQtNCw0pPRiyDQsNKb0rHRg9GL0Lcg0LHQtdC9INC80LDQuSwg0LrTqdC80ZbRgNGB0YPQu9Cw0YDQtNGLINC20LDSm9GB0Ysg0YHRltKj0ZbRgNC10LTRli4g0YjRi9GA0YvRiNGL0YLRiyDSm9Cw0LHQsNGC0YLRiyDTmdC00LXRgtGC0LXQs9GW0LTQtdC9INC905nQt9GW0LosINC20rHQvNGB0LDSmyDQsdC+0LvRi9C/INC60LXQu9C10LTRltGB0L7QuyDRgdC10LHQtdC/0YLQtdC9INC+0Lsg0LPQuNC/0LXRgNGB0LXQt9GW0LzRgtCw0LvQtNGL0LvRi9Op0L/QtdC9INC10YDQtdC60YjQtdC70L3QtdC00ZYuINC+0LvQsNGA0LTQsNKT0Ysg0LzQuNGC0L7RhdC+0L3QtNGA0LjRj9C80LXQvSDQu9C40LfQvtGB0L7QvNCw0LvQsNGA0YvQvdGL0qMg0LbQsNGB0YPRiNCw0LvQsNGA0LTQsCAg0pvQsNGA0pvRi9C90LTRiyDQtNCw0LzRg9GL0LzQtdC9INCx0LDQudC70LDQvdGL0YHRgtGL0YDRg9KT0LAg0LHQvtC70LDQtNGLINCw0Lsg0L7QvdGL0qMg0LDSm9GD0YvQt9C00LDRgCDQvNC10L0g0LrTqdC80ZbRgNGB0YMg0LzQsNC50LvQsNGA0LTRi9KjINC20LDSm9GB0Ysg0YHRltKj0ZbRgNC10LTRli7RgdC+0L3Ri9C80LXQvSDQltC10Y7QvdC10Lwg0LTQtdCz0LXQvSDQvtC9INC10LrRliDQtdC70ZYg0ZbRiNC10Log0L/QtdC9INGI0LDQttGL0YDQsNKb0LDQudC00LAg0LDRgNCw0YHRi9C90LTQsCDQvtGA0L3QsNC70YHQsNGC0YvQvSAg0LbRltKj0ZbRiNC60LUg0ZbRiNC10LrRgtGW0qMg0LHTqdC70ZbQs9GWLiDQltOZ0L3QtSDQttC10Y7QvdC10LzQvdGW0qMg0pvQsNCx0YvRgNKT0LDRgdGLINKb0LDQu9GL0qMgINC+0Lsg0LvRjtC80LXQvdGWINKv0LvQutC10L0gINC+0YDQvdCw0LvQsNGB0LDQtNGLLtC905nRgNC10YHRgtC10LvQtdGA0LTQtSAg0LjRgNC40LzQtNC10YDRliDQvNC10L0g0LHSsdC70YjRi9Kb0LXRgtGC0ZbQuiDQsdCw0LnQu9Cw0LzQtNCw0YDRiyDRgtC+0LvRi9KbINC20LXRgtGW0LvQvNC10LPQtdC9LNC20LDQu9C/0Ysg0LDQudGC0pvQsNC90LTQsCDQsdCw0LvQsNC70LDRgNC00LAg0LDRiCDRltGI0LXQuiDRgtC+0LvRi9KbINC20LXRgtGW0LvQvNC10LPQtdC9INCx0L7Qu9GL0L8g0LrQtdC70LXQtNGWLCDQttOZ0L3QtSDQvtC7INC70LDQutGC0L7Qt9CwINGB0LjRj9Kb0YLRiyDRhNC10YDQvNC10L3RgtGC0LXRgNCz0LUg0YHQtdC30ZbQvNGC0LDQuyDQsdC+0LvRg9GLINC80q/QvNC60ZbQvSDQttOZ0L3QtSDQvtGB0YvQvdC00LDQuSAg0LzQsNC30LDRgdGL0LfQtNCw0L3RgyDRgdC10LHQtdC/0YLQtdGA0ZbQvSDRiNCw0pvRi9GA0LDQtNGLLiAgINC80LDQt9Cw0YHRi9C30LTQsNC90YPQtNGL0qMg0LHQvtC70YMg0YHQtdCx0LXQv9GC0LXRgNGW0L3RltKjINCx0ZbRgNGWINC+0Lsg0LDRgNGC0YvSmyDRgtCw0LzQsNKb0LDRgtCw0L3QtNGL0YDRi9C/INKb0L7RjiDQvdC10LzQtdGB0LUg0YHRg9GC0L/QtdC9INCx0LXRgNCz0LUg0LDRg9Cw0L3Ri9KjINC20rHRgtGL0L8g0pvQvtGO0LzQtdC9INGB0LjQv9C/0LDRgtCw0LvQsNC00YsuINGP0pPQvdC4INCw0Y3RgNC+0YTQsNCz0LjRj9C90YvSoyDQsdC+0LvRg9GL0L3QsCDTmdC60LXQu9C10LTRliDQvtC7INCx0LDQu9Cw0L3Ri9KjINC80LDQt9Cw0YHRi9C30LTQsNC90LTRi9GA0YPSk9CwINOZ0LrQtdC/INGB0L7Sk9Cw0LTRiy4g0L7QuyDQsdGL0LvQsNC50YjQsCDQsNC50YLSm9Cw0L3QtNCwINCx0LDQu9Cw0LTQsCDQsNGD0YvRgNGB0YvQvdGDINGB0LXQt9GW0LzRltC10L0g0YvSo9KT0LDQudGB0YvQt9C00YvSm9GC0Ysg0YjQsNKb0YvRgNCw0LTRiy4g0LbTmdC90LUg0LrQvtC70LjQutCwINGC0q/RgNGW0L3QtNC1INGB0LXQt9GW0LvQtdC00ZYuPGJyIC8+DQo=</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93" table:style-name="ce1">
            <text:p>915293</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7QnNC+0YnQuNGH0LAg0LbTmdC90LUg0LHQsNGB0pvQsCDQsNCy0YLQvtGA0LvQsNGAINC20LDRgSDQsdCw0LvQsNC70LDRgNC00LDSk9GLINC20q/RgNC10Log0YjRg9C70LDRgNGL0L0g0YLTqdGA0YIg0YLQvtC/0pvQsCDQsdOp0LvRgyDSsdGB0YvQvdGL0LvSk9Cw0L0sMS7QvtGA0LPQsNC90LjQutCw0LvRi9KbLdC20q/RgNC10Log0pvQsNCx0LDRgtGC0LDRgNGL0L3Ri9KjINC205nQvdC1INC00LUg0LbSr9GA0LXQutGC0LXQvSDRiNGL0pvSm9Cw0L0g0ZbRgNGWINGC0LDQvNGL0YDQu9Cw0YDQtNGL0qMg0L7RgNCz0LDQvdC40LrQsNC70YvSmyDQttCw0pvRi9C90LTQsNC70YPRi9C90LDQvSDRgtGD0YvQvdC00LDSk9Cw0L0uMi3QvtGA0LPQsNC9LdGE0YPQvdGD0YbQuNC+0L3QsNC70LTRi9KbLdCw0LTQsNC8INCw0pPQt9Cw0YHRi9C90LTQsNKT0Ysg0LHQsNGB0pvQsCDQvNKv0YjQtdC70LXRgCDQvNC10L0g0LbSr9C50LrQtdC70LXQtNGW0qMg0LbSr9C50LXQu9C10YDRliDQsNGD0YDRg9C70LDRgNGLINC905nRgtC40LbQtdGB0ZbQvdC00LUg0LbSr9GA0LXQuiDRhNGD0L3QutGG0LjRj9GB0YvQvdGL0qMg0LHSsdC30YvQu9GL0YHRiyDRgtGD0YvQvdC00LDSk9Cw0L3QtNCwLDMt0YTRg9C90LrRhtC40L7QvdCw0LvQtNGL0pst0LDQtNCw0LzQtNCwINC20q/RgNC10LrRgtC10L0g0YLRi9GBINCw0YPRgNGD0LvQsNGA0Ysg0LrQtdC30ZbQvdC00LUg0LbSr9GA0LXQuiDSm9GL0LfQvNC10YLRliDTqdGL0LfRi9C80LXRgtGWINCx0rHQt9GL0LvSk9Cw0L3QtNCwLjQt0YTQuNC30LjQvtC70L7Qs9C40Y/Qu9GL0pst0LbSr9GA0LXQuiDSm9Cw0L3RgtCw0LzRi9GAINC20q/QudC10YHRltC90ZbSoyDRhNC40LfQuNC+0LvQvtCz0LjRj9C70YvSmyDQsNC90LDRgtC+0LzQuNGP0LvRi9KbINC10YDQtdC60YjQtdC70ZbQutGC0LXRgNGW0L3RltKjINCx0L7Qu9GD0YvQvNC10L0g0L3QtdCz0ZbQt9C00LXQu9C10YLRltC9LNGB0LDRgyDQsNKT0LfQsNC00LDSk9GLINC20q/RgNC10LrRgtGW0qMg0LbQsNC30YvSm9GB0YvQtyDRiNGD0LvQsNGALtCW0q/RgNC10LrRgtGW0qMg0YTRg9C90LrRhtC40L3QsNC70LTRi9KbINGB0LjQv9Cw0YLRgtCw0LzQsNC70LDRgNGLLdGB0LjRgdGC0L7Qu9Cw0LvRi9KbINCx0rHQuyDQttKv0YDQtdC60YLRltKjINGC0L7QvdC00LDRgNGL0LzQtdC9INCx0LDQudC70LDQvdGL0YHQv9Cw0pPQsNC9INKx0LfQsNKbINC10LzQtdGBINC205nQvdC1INGB0LjRgdGC0L7Qu9Cw0L3RiyDSsdGB0YLQsNC/INCw0LvRi9C/INC20LDRgtC/0LDQudC00Yss06nRgtC1INC20rHQvNGB0LDSmyDTmdC70ZYg0L3TmdC30ZbQuiDQsdC+0LvRi9C/INC60LXQu9C10LTRli7TqNC3INC60LXQt9C10LPRltC90LTQtSDRiNC10LrRgtC10LvQs9C10L0g0LDQudC80LDSm9GC0LAg0pPQsNC90LAg0LXRgdGC0ZbQu9C10LTRliDQttOZ0L3QtSDQsdCw0YDRi9C90YjQsCDQtdGB0YLRltC70LXRgtGW0L0g0LDQudC80LDSm9GC0LDQvSDQsdCw0YHSm9CwINCw0LvRi9GB0pvQsCDRgtCw0YDQsNC80LDQudC00Ys60YLRi9C90YvRgSDRgtKx0YDQsNKb0YLRiyDQtdC80LXRgSAt0LTQtdC90LUg0pvQsNC70L/Ri9C90LAgLNGC0YvQvdGL0YEg0LDQu9GDINC60LXQt9C10qPQtNC10YDRltC90LUg0LbTmdC90LUg0YTQuNC30LjQutCw0LvRi9KbINC20q/QutGC0LXQvNC10LPQtSDQsdCw0LnQu9Cw0L3Ri9GB0YLRiyDTqdC30LPQtdGA0LXQtNGWOy0gMS0yINGC0L7QvdC00LDRgCDTqdC30LPQtdGA0ZbRgdGWINKb0L7RgdGL0LzRiNCwINGC0L7QvdC00LDRgCzSsdCw0L0g0LDQudC90LDQu9GL0Lwg0LbQtdGC0LrRltC70ZbQutGB0ZbQt9C00ZbQs9GW0L3RltKjINC205nQvdC1INC20q/RgNC10Log0YjQtdC60LDRgNCw0LvQsNGA0YvQvdGL0qMg0LrQtdKj0LXRjtGW0L3RltKjINCx0LXQu9Cz0ZbQu9C10YDRliDQsdC+0LvQvNCw0LnQtNGLLtCU0LjQvtGB0YLQsNC70LDQu9GL0psg0YjRgyAt0LbSr9GA0LXQuiDSm9Cw0YDRi9C90YjQsNC70LDRgNGL0L3Ri9KjINCx0L7RgdCw0qPRgdGD0YvQvdGL0qMg0L3TmdGC0LjQttC10YHRltC90LTQtSDQv9Cw0LnQtNCwINCx0L7Qu9Cw0LTRiyzQvtC70LDRgNC00LAg0pvQsNC90L3Ri9KjINC20LXRgtC60ZbQu9GW0LrRgdGW0Lcg0LrQu9Cw0L/Ri9C9INCw0YDSm9GL0LvRiyDQsNKT0YPRi9C90LDQvSDQtdGA0YLQtSDQtNC40L7RgdGC0LDQu9Cw0LvRi9KbINGI0YMg0L3QtdC80LXRgdC1INGC0LDRgNGL0LvSk9Cw0L0g0LrQu9Cw0L/Ri9C9INCw0YDSm9GL0LvRiyDSm9Cw0L0g0LDSk9GD0YvQvdCwINCx0LDQudC70LDQvdGL0YHRgtGLINC60LXRiCDQtNC40L7RgdGC0LDQu9Cw0LvRi9KbINGI0YMu0q7Qt9C00ZbQutGB0ZbQtyDRiNGDLdCx0q/QutGW0Lsg0LbSr9GA0LXQuiDRhtC40LrQu9C90LTQtSDQtNCw0LnRi9C9INCx0L7Qu9Cw0LTRiyDTmdC00LXRgtGC0LUg0LbSr9GA0LXQuiDSm9Kx0YDRi9C70YvQvNC00LDRgNGL0L3QtNCw0pPRiyDQsNKb0LDRg9C70LDRgNC00LDQvSDRgtGD0YvQvdC00LDQudC00Ysu0KTRg9C90LrRhtC40L7QvdCw0LvQtNGWINGI0YPQu9Cw0YAgLSDQttKv0YDQtdC6INCw0YPRgNGD0LvQsNGA0Ysg0LbQvtKbINC00LXQvdGWINGB0LDRgyDRgdOZ0LHQuNC70LXRgNC00LUg0L/QsNC50LTQsCDQsdC+0LvQsNGC0YvQvSDQttCw0pvRgdGLINGI0YMuPGJyIC8+DQo8YnIgLz4NCjIu0JHQsNC70LDQtNCw0YDQtNCwINCw0Ygg0ZbRiNC10LogLNC20ZbSo9GW0YjQutC1INGW0YjQtdC6INC205nQvdC1INC80YvSm9GL0L0g0ZbRiNC10LrRgtC10L0g0LHTqdC70ZbQvNC00LXRgNGW0L3QtdC9INGC0rHRgNCw0LTRiy7QkdCw0LvQsNC70LDRgNC00LDSk9GLINCw0Ygg0ZbRiNC10LrRgtGW0qMg0LXRgNC10LrRiNC10LvRltCz0ZbQvdC1INGC0L7Sm9GC0LDQu9Cw0YLRi9C9INCx0L7Qu9GB0LDQvCzQttGW0qPRltGI0LrQtSDRltGI0LXQutGC0LUg0LrTqdC/INCx0L7Qu9Cw0LTRiyzQsNC70LDQudC00LAg0LHQsNC70LDQvdGL0qMg0LbQsNGB0YvQvdCwINKb0LDRgNCw0Lkg0LrTqdC70LXQvNGWINOp0LfQs9C10YDRltC/INGC0L7Qu9GL0pPRi9C80LXQvSDQttC+0LnRi9C70LDQtNGLLtCW0ZbSo9GW0YjQutC1INGW0YjQtdC60YLRltKjINGB0ZbRgNC70ZYg0pvQsNCx0LDRgtGLINC90LXQvNC10YHQtSDRiNGL0YDRi9GI0YLRi9Kb0LDQsdCw0YLRiyDTqdGC0LUg0LbSsdKb0LAg0pvQsNC9LdGC0LDQvNGL0YDQu9Cw0YDSk9CwINCx0LDQuSDQttOZ0L3QtSDQttC+0pPQsNGA0pPRiyDTqdGC0LrRltC30LPRltGI0LrQtSDQuNC1INCx0L7Qu9GL0L8g0LrQtdC70LXQtCzQttCw0YEg0LHQsNC70LDQu9Cw0YDQtNCwINGI0YvRgNGL0YjRgtGLINKb0LDQsdCw0YLRi9C90LTQsCDQttC10LrQtdC70LXQvdCz0LXQvSDQttOZ0L3QtSDRgtC+0L/RgtGL0psg0LvQuNC80YTQsCDQvNC+0LvQtdC60YPQu9Cw0LvQsNGA0Ysg0YLQtdGA0LXSoyDQvtGA0L3QsNC70LDRgdKb0LDQvS7QkdCw0YHRgtCw0L/Sm9GLINC60LXQt9C00LUg0L7Qu9Cw0YAg0ZbRiNC10LrRgtGW0qMg0LHSr9C60ZbQuyDQsNC50LzQsNKT0YvQvdC00LAg0LrQtdC30LTQtdGB0LXQtNGWLNCw0Lsg0LrQtdC50ZbQvdC90LXQvSDQu9C40LzRhNCw0LvRi9KbINC/0L7Qu9C10LrRg9C70LDQu9Cw0YAg0YLQvtC/0YLQsNGB0pvQsNC9INGC0q/RgNC00LUg0LzRi9Kb0YvQvSDRltGI0LXQutGC0LUg0pvQsNC90LAg0L7RgNC90LDQu9Cw0YHQsNC00Ysu0JbQsNGBINCx0LDQu9Cw0LvQsNGA0LTQsCDQu9C40LzRhNCw0LvRi9KbINGC0LDQvNGL0YDQu9Cw0YDRiyDQtdGA0LXRgdC10LrRgtC10YDQs9C1INKb0LDRgNCw0pPQsNC90LTQsCDQutOp0L8g0LbTmdC90LUg0pvRg9GL0YHRiyDQutOp0L8g0LHQvtC70LDQtNGLLNC20ZbSo9GW0YjQutC1INGW0YjQtdC60YLQtdC9INCw0pPQsNGC0YvQvSDQu9C40LzRhNCwINCx0LDRg9GL0YAg0LDRgNKb0YvQu9GLINKv0LTQtdC50LTRli7QsNC7INGB0L7QuyDRltGI0LXQutC60LUg0YHRltKj0ZbRgNGW0LvQs9C10L0g0LHSm9C70ZbQvCDSm9Cw0L3Sk9CwINGB0ZbSo9C10LTRli7QltCw0YEg0LHQsNC70LDQu9Cw0YDQtNCwINC20ZbSo9GW0YjQutC1INGW0YjQtdC60YLRltKjINCx0rHQu9GI0YvSm9C10YLRliDRgtC+0LvRi9KbINC00LDQvNGL0LzQsNKT0LDQvSzQvdOZ0YDQtdGB0YLQtdC70LXRgNC00LUg0YjQsNC20YvRgNKb0LDQuSDSm9GL0YHSm9CwINCx0L7Qu9GL0L8g0YLQsNCx0YvQu9Cw0LTRiyzQttGW0qPRltGI0LrQtSDRltGI0LXQutGC0ZbSoyDRgdC10LrRgNC10YLQvtGA0LvRi9KbINCw0L/QsNGA0LDRgtGLINC905nRgNC10YHRgtC1INGC0YPSk9Cw0L3QvdCw0L0g0LHQsNGB0YLQsNC/INKb0LDQu9GL0L/RgtCw0YHQsNC00Ysu0JXRgNGC0LUg0LbQsNGB0YLQsNKT0Ysg0LHQsNC70LDQu9Cw0YDQtNCwINC905nRgNGD0YvQt9C00YvSoyDSm9C+0YDRi9GC0YvQvdC00YvQu9GD0YvQvdC00LAg0LXRgNC10LrRiNC10LvRltC60YLQtdGAINCx0LDRgCAt0YjRi9GA0YvRiNGC0Ysg0pvQsNCx0LDRgtGLINGN0L/QuNGC0LXQu9C40LDRhtC40LTRgtGC0LXRgNGW0L3RltKjINC/0LXQvdCw0YbQuNGC0L7QtyDQv9GA0L7RhtC10YHRltC90LUg0LbQsNKb0YHRiyDSm9Cw0YLRi9GB0YPRiyzQsNC70pPQsNGI0pvRiyDQsNC/0YLQsNC70LDRgNC00LAg0LDQvdCw0L3Ri9KjINGB0q/RgtGW0L3QtNC10LPRliDQsNKb0YPRi9C3INKb0LDQvdKT0LAg06nQt9Cz0LXRgNCz0LXQvSDQutKv0LnRltC90LTQtSDRgtKv0YHQtdC00ZYu0JHRltGAINC20LDRgdGC0LDQvSDQsNGB0pvQsNC9INGB05nQsdC40LvQtdGA0LTQtSDQsNKb0YPRi9C30LTRi9KjINCz0LjQtNGA0L7Qu9C40LfRliDQsNGA0pvRi9C70Ysg0LDQvNC40L3Sm9GL0YjSm9GL0LvQtNCw0YAg0YLSr9C30ZbQu9C10LTRli7QnNC+0LvRjNGC0LDQt9CwINGE0LXRgNC80LXQvdGC0ZbQvdGW0qMg0LHQtdC70YHQtdC90LTRltC70ZbQs9GWINCx0LDQu9Cw0LvQsNGA0LTQsCDRgtGD0pPQsNC90YjQsCDRgtGW0L/RgtC10L0gLdCw0psg0LXRgNC10YHQtdC60YLQtdGA0LTRltC60ZbQvdC00LXQuSDQutC10LnRltC90L3QtdC9INGB0LDRhdC+0YDQvtC30LDQvdGL0qMg0LHQtdC70YHQtdC90LTRltC70ZbQs9GWINCw0YDRgtCwINGC0q/RgdC10LTRli7Qm9Cw0LrRgtC+0LfQsCDRhNC10YDQvNC10L3RgtGW0L3RltKjINCx0LXQu9GB0LXQvdC00ZbQu9GW0LPRliDQsdCw0LvQsNC70LDRgNC00LAg0LDQvdCw0YHRi9C90YvSoyDRgdKv0YLRltC80LXQvSDSm9C+0YDQtdC60YLQtdC90LXRgtGW0L0g0LrQtdC30LTQtSDQttC+0pPQsNGA0Ysg0LrSr9C50LTQtSDSm9Cw0LvQsNC00Ysu0JDQuyDQtdC80YXQsNC90LDQtNCw0pPRiyDQtdC60ZYg0LDQudC70YvSmyDQvdOZ0YDQtdGB0YLQtdC90ZbSoyDQttCw0pPQtNCw0LnRi9C90LAg0LrQtdC70LXRgtGW0L0g0LHQvtC70YHQsNC8LdCx0LDQu9Cw0LvQsNGA0LTRi9KjINCw0Ygg0ZbRiNC10LrRgtGW0qMg0LDQvdCw0YLQvtC80LjRj9C70YvSmy3RhNC40LfQuNC+0LvQvtCz0LjRj9C70YvSmyDQtdGA0LXQutGI0LXQu9GW0LrRgtC10YDRliDQsdC+0LnRi9C90YjQsCDRltGI0LXQutGC0ZbSoyDRiNGL0YDRi9GI0YLRiyDSm9Cw0LHRi9KT0YvQvdC00LAg0YLQsNC80LDSmyDSm9C+0YHQv9Cw0YHRi9C80LXQvSDQvNC10YXQsNC90LjQutCw0LvRi9KbINGC0ZbRgtGW0YDQutC10L3RgyDQsNGA0pvRi9C70Ysg0ZbRiNC10Log0YHTqdC70ZYg0LHTqdC70ZbQvdC10LTRlizQsNC7INGF0LjQvNC40Y/Qu9GL0psg0YLRltGC0ZbRgNC60LXQvdC00ZbRgNCz0ZbRiNGC0ZbSoyDSm9Kx0YDQsNC80YvQvdC00LAg0YLSsdC3INKb0YvRiNKb0YvQu9GLINOp0YIs06nRgiDSm9GL0YjSm9GL0LvRi9C90YvSoyDQvNCw0qPRi9C30Ysg0LHQsNGALNC+0YHRi9C70LDRgNC00YvSoyDQvdOZ0YLQuNC20LXRgdGW0L3QtNC1INGW0Ygg0pvQsNGC0YPRiyDRltGI0LXQutGC0ZbSoyDRiNGL0YDRi9C70LTQsNGD0YvQvNC10L0g0YHQtdGA0L/RltC90ZbRgSDQsdC10YDQtdC00ZYu0IbRiCDTqdGC0YMg0YLQvtC60YHQuNC60LDQu9GL0psg0LHTqdC70ZbQvCDRltGIINGB0q/Qt9C10LPRliDQtNC40LfQtdC90YLRgNC40Y8u0IbRiNC10LrRgtGW0qMg0YHQtdC60YDQtdGC0L7RgNC70YvSmyDQsdOp0LvRltC80ZYg0L3TmdGA0LXRgdGC0LUg0YLRg9GL0LvSk9Cw0L3QvdCw0L0g0LHQsNGB0YLQsNC/INC00LDQvNC40LTRiyAs0YLRltC/0YLRliDQutGW0YjQutC10L3RgtCw0Lkg0YHTmdCx0LjQu9C10YDQtNGW0qMg0ZbRiNC10Log0YHTqdC70ZYgINC10YDQtdGB0LXQutGC0LXRgNC00ZbQutGW0L3QtNC10Lkg0LHQsNC50pvQsNC70LDQtNGLINCw0LvQsNC50LTQsCDQvtC70LDRgNC00YvSoyDQsdC10LvRgdC10L3QtNGW0LvRltCz0ZYg0LXRgNC10YHQtdC60YLQtdGA0LPQtSDSm9Cw0YDQsNKT0LDQvdC00LAg0YLTqdC80LXQvSDQsdC+0LvQsNC00Yss0IbRiNC10Log0YTQtdGA0LzQtdC90YLRltC90ZbSoyDSsdC50pvRiyDQsdC10Lcg0LHTqdC70ZbQvNGWINC80LDQudC70LDRgNC00YvSoyDQutOp0LzSo9GA0YHRgyDQvdOZ0YDRg9GL0LfQtNCw0YAg0LbSr9C30L3Qs9C1INCw0YHQsNC00Yss0LzQsNC50LvQsNGA0LTRi9KjINCw0YHSm9C+0YDRgtGDINC20q/QudC10YHRliDQu9C40L/QvtC70LjRgtC60LjQutCw0LvRi9KbINGE0LXRgNC80LXQvdGC0YLQtdGA0LTRltKjINCx0LXQu9GB0LXQvdC00ZbQu9GW0LPRltC90ZbSoyDRgtOp0LzQtdC9INCx0L7Qu9GD0YvQvdCwINCx0LDQudC70LDQvdGL0YHRgtGLICzSm9Cw0YDSm9GL0L3QtNGLINC20rHQvNGL0YEg0LDRgtKb0LDRgNCw0LTRiy7QhtGIINKb0LDRgtGD0Ysg0L3QtdCz0ZbQt9GW0L3QtdC9INGE0YPQvdC60YbQuNC+0L3QsNC70LTRi9KbINC205nQvdC1INC+0YDQs9Cw0L3QuNC60LDQu9GL0psg0YLSr9GA0LvQtdGA0LPQtSDQsdOp0LvRltC90LXQtNGWLjItMyDQsNC50LvRi9KbINC905nRgNC10YHRgtC10LvQtdGA0LTQtSDRltGI0LXQutGC0ZbSoyDQsNC90LDRgtC+0LzQuNGP0LvRi9KbINGE0LjQt9C40L7Qu9C+0LPQuNGP0LvRi9KbINC10YDQtdC60YjQtdC70ZbQutGC0LXRgNGW0L3QtSDQsdCw0LnQu9Cw0L3Ri9GB0YLRiyDRhNGD0L3QutGG0LjQvtC90LDQu9C00ZYg0ZbRiCDSm9Cw0YLRgyDQsdCw0LnSm9Cw0LvQsNC00Ysu0KHTmdCx0LjQu9C10YDQtNC1INC+0YHRi9C90YvSoyDQvdOZ0YLQuNC20LXRgdGW0L3QtNC1INC80LDQt9Cw0YHRi9C30LTQsNC90YMg0LHQvtC70LDQtNGL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67" table:style-name="ce1">
            <text:p>915367</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i7QndC10LPRltC30ZbQvdC10L0g0LHQsNC70LDQvdGL0qMg06nQt9GW0qMg0LbQsNC50YHRi9C3INGB0LXQt9GW0L3Rg9GWINC10LrRliDRgdC10LHQtdC/0YLQtdC9INCx0L7Qu9GD0Ysg0LzSr9C80LrRltC9LiDQkdGW0YDRltC90YjRltGB0ZbQvdC00LUg0L7QuyDQsNC90LDRgdGL0L3Ri9KjINOp0LfRltC90LTQtSDSm9Cw0L3QtNCw0Lkg0LTQsCDQsdGW0YAg0YLQsNC80LDSm9GC0LDQvdGD0YvQvdCwINCx0LDQudC70LDQvdGL0YHRgtGLLCDQvdC1INOp0LzRltGAINGB0LDQu9GC0YvQvdCwINCx0LDQudC70LDQvdGL0YHRgtGLINGB0q/RgtGC0ZbSoyDRgtC+0LvRi9KbINKb0rHQvdC00YvQu9GL0psg0LHQtdGA0LUg0LDQu9C80LDRg9GLLiDTmNGA0LjQvdC1INCx0rHQuyDQutOp0L8g0LbQsNKT0LTQsNC50LTQsCDQsdGW0YDQtNC10L0g0LXRgdGW0YDRgtC60ZYsINGI0YvQu9GL0Lwg0LbTmdC90LUg0LfQuNGP0L3QtNGLINC30LDRgtGC0LDRgNC80LXQvSDQsdCw0LnQu9Cw0L3Ri9GB0YLRiyDQtNCwINCx0L7Qu9C80LDRg9GLINC80q/QvNC60ZbQvS4g0JrQtdC50LHRltGAINC20LDSk9C00LDQudC70LDRgNC00LAg0LDQvdCw0YHRiyDTqdC30ZYg0LHRltC70LzQtdC5INCw0L3QsCDRgdKv0YLRltC90LUg0LfQuNGP0L0g0LrQtdC70YLRltGA0LXRgtGW0L0g0pvQvtGA0LXQuiDSm9Cw0LHRi9C70LTQsNGD0Ysg0LzSr9C80LrRltC9LiDQkNC7INC10LrRltC90YjRltGB0ZYg0YHTmdC50LrQtdGB0ZbQvdGI0LUg0YLRltC60LXQu9C10Lkg0L3TmdGA0LXRgdGC0LXQvNC10L0g0LHQsNC50LvQsNC90YvRgdGC0YsuINCv0pPQvdC4LCDQvtC90YvSoyDQsNGILdGW0YjQtdC6INC20L7Qu9GL0L3QtNCwINCx06nQs9C00LUg0LfQsNGCINCx0L7Qu9GD0Ysg0LzSr9C80LrRltC9LCDQvdC1INGW0YHRltC90YMg0LHQvtC70YPRiyDQtNCwINC80q/QvNC60ZbQvS4g0JDQuyDQvdCw0pvRgtGLINC+0YHRiyDQttCw0pPQtNCw0LnQtNCwINC80LXQvdGW0qMg0L7QudGL0LzRiNCwINCx0rHQuyDQttCw0YEg0LXRgNC10LrRiNC10LvRltCz0ZbQvdC1INCx0LDQudC70LDQvdGL0YHRgtGLINC20LXRjtC90YPQvNCz0LUg0YLTmdGD0LXQu9C00ZYuINCv0pPQvdC4LCDQuNC20LXQvdGO0Lwg0LTQtdCz0LXQvSDQvtC9INC10LrRliDQtdC70ZYg0ZbRiNC10LrQv9C10L0g0YjQsNC20YvRgNCw0pvQsNC50LTRi9C9INCw0YDQsNGB0YvQvdC00LAg0LHQvtC70LDRgtGL0L0g0LfQsNGCLiDQntGB0Ysg0LbQtdC90LjRjtC80L3RltKjINC70LDQutGC0L7Qt9Cw0pPQsCDRgdC10LfRltC80YLQsNC7INCx0L7Qu9GDINC10YDQtdC60YjRltC70ZbQs9GW0L3QtSDQsdCw0LnQu9Cw0L3Ri9GB0YLRiyDQtdC90LTRliDRgtGD0YvQu9KT0LDQvSDQvdOZ0YDQtdGB0YLQtdC70LXRgNC00LUg0L7QuyDSm9Cw0YLRgtGLINC00LDQvNGD0YvQvdCwINCx0LDQudC70LDQvdGL0YHRgtGLINOp0YLQtSDRgdC10LfRltC80YLQsNC7INKb0YvQu9Cw0LTRiyDQsdCw0LvQsNC90YsuINCh0L7QvdC00YvSm9GC0LDQvdC00LAg0LHQsNC70LDQu9Cw0YAg0q/RiNGW0L0g0L7RgdGLINCw0L3QsCDRgdKv0YLRltC90ZbSoyDSm9Kx0YDQsNC80Ysg06nRgtC1INC80LDSo9GL0LfQtNGLINCx0L7Qu9Cw0LTRiy7QkdCw0LvQsNC00LAg0YLQsNC80LDSm9GC0LDQvdGD0LTQsNC9INC60LXQudGW0L0g0LTQtdGDINGB0LXQsdC10ZYg0Y/Sk9C90LgsINC905nRgNC10YHRgtC10LTQtdCz0ZYg0LDRgdGC0Ysg0pvQvtGA0YvRgtGDINC00rHRgNGL0YEg0LXQvNC10YEg06nRgtC10LTRliDQtNC10LPQtdC9INGB06nQty4g0J7QtNCw0L0g0LHTqdC70LXQuiAyINCw0LnQu9GL0psg0L3TmdGA0LXRgdGC0LXQu9C10YDQtNC1INCx0ZbQtyDQsdGW0LvQtdGC0ZbQvdC00LXQuSDQsNGIIC0g0ZbRiNC10Log0LbQvtC70Ysg05nQu9GWINGC0L7Qu9GL0psg0LTQsNC80YvQvNCw0pPQsNC90LTRi9Kb0YLQsNC9INC+0LvQsNGA0pPQsCDQsNC90LAg0YHSr9GC0ZbQvdC00LXQuSDRgdKx0LnRi9KbINC10LzQtdGBINC60L7QvdGB0LjRgdGC0LXQvdGG0LjRj9C70Ysg0YLQsNC80LDSmyDSm9Cw0LHRi9C70LTQsNGDINKb0LjRi9C9LiDQr9KT0L3QuCwgMS3QtNC10L0g0LDQudGC0YvQvyDTqdGC0LrQtdC90LTQtdC5INC10LPQtdGAINCw0L3QsCDRgdKv0YLRliDQtNKx0YDRi9GBINOp0L3QtNC10LvQvNC10YHQtSDQsdCw0LvQsNKT0LAg0L7QuyDQsNGD0YvRgCDRgtC40LXQtNGWLiAg0JDQvdCw0YLQvtC80L4t0YTQuNC30LjQvtC70L7Qs9C40Y/Qu9GL0psg0LXRgNC10LrRiNC10LvRltCz0ZbQtNC1INC+0YHRi9C80LXQvSDQsdCw0LnQu9Cw0L3Ri9GB0YLRiyDQsdC+0LvQsNC00YsuINCv0pPQvdC4LCDQutOp0LHRltC90LUg0YLQtdC6INGB0rHQudGL0psg0YLQsNC80LDSmyDSm9Cw0LHRi9C70LTQsNC5INCw0LvRg9C70LDRgNGLLiDQntC00LDQvSDQsdOp0LvQtdC6INC20LDRgSDQsdCw0LvQsNC70LDRgNC00LAg05nQu9GWINC00rHRgNGL0YEg0LDRiC3RltGI0LXQuiDQtNCw0LzRi9C80LDRg9GL0L3QsCDQsdCw0LnQu9Cw0L3Ri9GB0YLRiyDQutC+0LvQuNC6INCx0L7Qu9GD0Ysg0LzSr9C80LrRltC9LiDQr9KT0L3QuCwg0LPQsNC30LTQsNGA0LTRi9KjINGI0YvSk9GD0YsuICAgICAgICAgICAgICAgIDEuINCfLtChLtCc0L7RidC40YfQsCDQsdC+0LnRi9C90YjQsCDQttKv0YDQtdC6INGI0YPQu9Cw0YDRiyDQutC70LDRgdGB0LjRhNC40LrQsNGG0LjRj9GB0Ysg0YHQuNGB0YLQvtC70LDQu9GL0pssINC00LjQsNGB0YLQvtC70LDQu9GL0pssINKb0YvQt9C80LXRgtGC0ZbQuiDQttOZ0L3QtSDSr9C30LTRltC60YHRltC3INC00LXQvyDQsdOp0LvRltC90LXQtNGWLiDQodC40YHRgtC+0LvQsNC70YvSmyDRiNGDINC20q/RgNC10Log0pvQsNGA0YvQvdGI0LDQu9Cw0YDRi9C90YvSoyDQttC40YvRgNGL0LvRg9GLINC60LXQt9GW0L3QtNC1INC/0LDQudC00LAg0LHQvtC70LDQtNGLLiDQntC70LDRgCDQsdGW0YLQtdC70LPQtdC9INC90LXQvNC10YHQtSDRgtCw0YDRi9C70pPQsNC9INC20LDSk9C00LDQudC00pPRiyDQutC70LDQv9Cw0L3QtNCw0YDQtNGL0qMg0L3QtdC80LXRgdC1INGC0LDQvNGL0YDQtNGL0qMg0LrSr9GI0ZYg0LDRgNKb0YvQu9GLINKb0LDQvdC90YvSoyDQutKv0Ygg0YHQsNC70YvQvyDRgdC+0pPRg9GL0L3QsNC9INCx0L7Qu9Cw0YLRi9C9INC70LDSm9GC0YvRgNGL0LvRgyDRiNGD0LvQsNGA0Ysg0LzQtdC9INCw0pPRi9C/INC20LDRgtKb0LDQvSDQutC70LDQv9Cw0L3QtNCw0pPRiyDQutC10YDRliDQsNKT0YMg0L3TmdGC0LjQttC10YHRltC90LTQtSDQv9Cw0LnQtNCwINCx0L7Qu9Cw0YLRi9C9INC40LzQv9GD0LvRjNGBINC90LXQvNC10YHQtSDRgNC10LPRg9C70Y/RhtC40LvRi9KbINCw0pPRi9C8INC905nRgtC40LbQtdGB0ZYg0LTQtdGB0LXQuiDQsdC+0LvQsNC00YsuINCU0LjQsNGB0YLQvtC70LDQu9GL0psg0LHQvtC70YHQsCDRgdOZ0LnQutC10YHRltC90YjQtSDQttKv0YDQtdC60YjQtdC70ZbRgNC00ZbSoyDQttC40YvRgNGL0LvRg9GLLCDQttOZ0L3QtSDSm9Cw0YDRi9C90YjQsNC70LDRgNC00YvSoyDQsdC+0YHQsNKT0YHRg9GLINC60LXQt9GW0L3QtNC1INC/0LDQudC00LAg0LHQvtC70LDQtNGLLiDSrtC30LTRltC60YHRltC3INGI0YMg0LTQtdCz0LXQvSDQsNGC0LDRg9GLINCx0LXQu9Cz0ZbQu9C10L8g0L7RgtKb0LDQvdC00LDQuSDQsdGW0YAg0pvQsNC70YvQv9GC0Ysg0q/Qt9C00ZbQutGB0ZbQtyDRgdC+0pPRgyDSm9Cw0YHQuNC10YLRli4g0JDQuyDRhNGD0L3RhtC40L7QvdCw0LvQtNGLINCx0pvQuyDQsNC00LDQvNC00LDSk9GLINC20q/RgNC10Log0LDRg9GA0YPRiyDQttC+0pssINC00LXQvdGWINGB0LDRgyDQsNC00LDQvNC00LAg0LHQvtC70LDRgtGL0L0g0LbSr9GA0LXQuiDRgdC+0pPRi9GB0Ysu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иженюм деген ?АФО -нақты емес; 2 сұрак қате</text:p>
          </table:table-cell>
          <table:table-cell office:value-type="float" office:value="0" table:style-name="ce1">
            <text:p>0</text:p>
          </table:table-cell>
          <table:table-cell table:number-columns-repeated="16376"/>
        </table:table-row>
        <table:table-row table:style-name="ro1">
          <table:table-cell office:value-type="float" office:value="1066854" table:style-name="ce1">
            <text:p>1066854</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7Qvy7RgS4g0JzQvtGJ0LjRh9CwINC60LvQsNGB0YHQuNGE0LjQutCw0YbQuNGP0YHRiyDQsdC+0LnRi9C90YjQsCDQttGD0YDQtdC6INGI0YPQu9Cw0YDRiyDQttOZ0L3QtSDQvtC90YvQvSDRgdC40YHRgtC+0LzQtNCw0YDRiy4g0L8u0YEu0LzQvtGJ0LjRh9CwINC60LvQsNGB0YHQuNGE0LjQutCw0YbQuNGP0YHRiyDQsdC+0LnRi9C90YjQsCDQsdGW0Lcg0LHRltGA0L3QtdGI0LUg0LbSr9GA0LXQuiDRgtC+0L3QtNCw0YDRi9C9INCw0LbRi9GA0LDRgtCw0LzRi9C3IC4g0YLRi9C90YvRgSDQsdGW0LfQtNC1INC60LDRgtGC0Ysg0LHQvtC70YvQvyDQutC10LvQtdC00ZYg0YHTmdCx0ZbQu9C10YDQtNC1IC4g0LDRiNGL0Log0YLQvtC90LTQsNGA0LTRiyDQttOZ0L3QtSDQttCw0LHRi9C6INGC0L7QvdC00LDRgNC00YsgLiAyLiDQsdCw0LvQsNC90YvQvSDQvNCw0LfQsNGB0YvQt9C00LDQvdGD0Ysg0YHQtdCx0LXQv9GC0LXRgNGLICDQsdGW0LfQtNC1INC+0LsgINGB05nQsdC10LnQtNGW0qMg0LDRgSDSm9C+0YDRi9GC0YMg0LbSr9C50LXRgdGW0L3RltKjINC00rHRgNGL0YEg0LbQsNGB0LDQvNCw0YPRi9C90LDQvSDQsdC+0LvRg9GLLiDQsNGIINGW0YjQtdC60YLQtdGA0ZbQvdGW0qMg0pvSsdGA0YvQu9GD0Ysg0LHRltC30LTQtSDQvtC9ICDQsdC10YHRltC90YjRliDQvtC9INCw0LvRgtGL0L3RiNCwINCw0L/RgtCw0LTQsCDSm9Kx0YDRi9C70YPRi9C9INCx0LDRgdGC0LDQudC00Ysg0L7QuyDQsdGW0LfQtNC1LiDSsdGI0ZbQvdGI0ZYg0YLRgNC4INC80LXRgdGC0YDQtNC1INC/0L7RgtC+0LvQvtCz0LjRj9C70LDRgNC00YvSoyDQsdC+0LvRg9GLINGB0LjQv9Cw0YLRgtCw0LvRg9GLINC80q/QvNC60ZbQvS4g0LDRiCDRltGI0LXQutGC0ZbQvSDQv9C10YDQuNGB0YLQsNC70YzRgtC40LrQsNGB0YvQvdGL0L0g0LTSsdGA0YvRgSDQttCw0YHQsNC80LDRg9GL0L3QsNC9INCx0LDQu9Cw0LTQsCDQvNCw0LfQsNGB0YvQt9C00LDQvdGDINCx0LXQu9Cz0ZbQu9C10YDRltC90ZbSoyDQutOp0YDRltC90YPRliDQsdCw0LnSm9Cw0LvQsNC00YsuINGB0L7QvdC00YvQutGC0LDQvSDQsdCw0LvQvdGL0L0g0LzQsNC30LDRgdGL0LfQtNCw0L3RgyDQsdC10LvQs9GW0LvQtdGA0ZYg0LDQvdCw0YHRi9C90YvSoyDRgdKv0YLRltC90LUg0LTQtdCz0LXQvSDQvNCw0LfQsNGB0YvQt9C00LDQvdGD0Ysg0LHQtdC70LPRltC70LXRgCAuINC80L7QttC90L4g0LzQvdC1INC/0L7QttCw0LvRg9GB0YLQsCDRhdC+0YLRjyDQsdGLINC90LAg0L/QtdGA0LXRgdC00LDRh9GDLCDQsdCw0YHQutCwINGB0YPRgNCw0LrRgtCw0YDQs9CwINC00LDQudGL0L3QtNGL0LvQs9Cw0L0g0LHQvtC70LDRgtGL0L3QvNC9LiAgICAgICAgICAgICAgICAgICAgICA=</text:p>
          </table:table-cell>
          <table:table-cell office:value-type="float" office:value="170348" table:style-name="ce1">
            <text:p>170348</text:p>
          </table:table-cell>
          <table:table-cell office:value-type="float" office:value="64" table:style-name="ce1">
            <text:p>64</text:p>
          </table:table-cell>
          <table:table-cell office:value-type="string" table:style-name="ce1">
            <text:p>жауап толық емес, көптеген тақырыптар қамтылмаған</text:p>
          </table:table-cell>
          <table:table-cell office:value-type="float" office:value="0" table:style-name="ce1">
            <text:p>0</text:p>
          </table:table-cell>
          <table:table-cell table:number-columns-repeated="16376"/>
        </table:table-row>
        <table:table-row table:style-name="ro1">
          <table:table-cell office:value-type="float" office:value="1066931" table:style-name="ce1">
            <text:p>1066931</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7Qny7QoS7QnNC+0YnQuNC90LAg0LrQu9Cw0YHRgdC40YTQuNC60LDRhtC40Y/RgdGLINCx0L7QudGL0L3RiNCwINC20YPRgNC10Log0YjRg9C70LDRgNGL0L0g0L7Qu9Cw0YDQtNGL0L0g0LrQu9C40L3QuNC60LDQu9GL0psg0LzQsNKj0YvQt9C00YvQu9GL0pPRiyDQvNC10L0g0YHQuNC/0LDQsNGC0YvQvdCwINC60LDRgNCw0Lkg0YLQvtC/0YLQsNGB0YLRi9GA0YMg0LbRg9C50LXRgdGWLiDQkdKx0Lsg0YLQvtC/0YLQsNGB0YLRi9GA0YMg0LHQvtC50YvQvdGI0LAg0LbRg9GA0LXQuiDRiNGD0LvQsNGA0Ysg0YLTqdGA0YIg0L3QtdCz0ZbQt9Cz0ZYg0YLQvtC/0pvQsCDQsdOp0LvQtdC90LXQtNGWLiDQkdGW0YDRltC90YjRltGB0ZYg0KTQuNC30LjQvtC70L7Qs9C40Y/Rj9C70YvSmyjQttGD0LnQutC1LdC20YPRgNC10LopINGI0YPQu9Cw0YDRiyDRgdC40L/QsNGC0YLQsNC80LDRgdGLOiDQkdKx0Lsg0YjRg9C70LDRgCDQttKv0YDQtdC60YLRltKjINKb0YPRgNGL0LvRi9C80LTRi9C70YvQuiDTqdC30LPQtdGA0ZbRltGB0YHRltC3LCDQutCw0LvRi9C/0YLRiyDQttGD0YDQtdC6INGC0L7QvdC00LDRgNGLINCw0YDQsNGB0YvQvdC00LAg0LXRgdGC0ZbQu9C10YLRltC9INC20YPQvNGB0LDSmyDQttOZ0L3QtSDQsNC50LrRi9C9INC10LzQtdGB0YEg0LTRi9Cx0YvRgdGC0LDRgC4g0J3QtdCz0ZbQt9Cz0ZYg0LXRgNC10LrRiNC10LvRltCz0ZY6INCw0YPRi9GA0YLQv9Cw0LvRi9C60YHRi9C3LCDRgtGL0L3Ri9GI0YLRi9C60YLQsCDQutKv0YjQtdC50ZbQvywg0pvQvtC30pPQsNC9INC60YPQudC00LUg05nQu9GB0ZbRgNC10LnQtNGWINC90LUg0LHQvtC70LzQsNGB0LAg0LbQvtKT0LDQu9Cw0LTRiy3QvNGL0YEuINCc0LDSo9GL0LfQtNGL0YHRizog0L/QsNGC0L7Qu9C+0LPQuNGP0YHRi9C3INC205nQvdC10LTQtSDQutCw0LvRi9C/0YLRiyDRhNC40LfQuNC+0LvQvtCz0LjRj9C70YvSmyDSm9Kx0LHRi9C70YvRgS4g0JXQutGW0L3RiNGW0YHRliDQttC10qPRltC7INC90LUg0LHQvtC70LzQsNGB0LAg0LrQu9C40L3QuNC60LDQu9GL0Log0LzQsNKj0YvQt9GLINCw0Lcg0YjRg9C70LDRgCDRgdC40L/QsNGC0YLQsNC80LDRgdGLOiDQsdKx0rHQuyDRiNGD0LvQsNGAINC606nQsdGW0L3QtdGB0LUg0LbRg9GA0LXQutGC0ZbSoyDQttC10qPRltC7INC60YPRgNGL0LvRi9C80LTRi9C6INCw0pvQsNGD0LvQsNGA0LzQtdC9INCx0LDQudC70LDQvdGL0YHRgtGLINCx0L7Qu9Cw0LTRiywg0LHRltGA0LDSmyDRgtCwINCz0LXQvNC+0LTQuNC90LDQvNC40LrQsNC90YvSoyDTmdGB0LXRgNGW0ZYg0YjQsNC80LDQu9GLLiDQnNGL0YHQsNC70YvSk9CwOiDQutGW0YjQutC10L3RgtCw0Lkg0LDQvtGA0YLQsNC70YvSmyDQvdC1INCx0L7Qu9C80LDRgdCwINOp0LrQv9C1INCw0YDRgtC10YDQuNC40Y/Qu9Cw0YDRi9C90YvSoyDQsdGD0LfRi9C70YvRgdGC0LDRgNGLLiDQnNCw0qPRi9C30Ys6INC60LvQuNC90LjQutCw0LvRi9KbINC20LDSk9C00LDQudGLINGC0rHRgNCw0pvRgtGLLCDQsNGA0L3QsNC50Ysg0LXQvNGB0ZbQtyDQsdCw0LrRi9C70LDRgyDQutCw0LbQtdGCLiDSrtGI0ZbQvdGW0YHRliDQvtGA0YLQsNGI0LAg0LTTmdGA0LXQttC10LvRliDQvdC10LzQtdGB0LUg0LrQu9C40L3QutCw0LvRi9C6INC80LDSo9GL0LfQtNGLINGI0YPQu9Cw0YAg0YHQuNC/0LDRgtGC0LDQvNCw0YHRizog0L7RgNGC0LDRiNCwINC60L7Qu9C10LzQtNGWINC20YPRgNC10Log0LHSsdC30YvQu9GL0YHRgtCw0YDRi9C90LTQsCDQsdCw0LnSm9Cw0LvQsNC00Yst0LzRi9GBLCDQttKv0YDQtdC6INKb0YvRi9C30LzQtdGC0ZbQvdC1INCw0LnRgtCw0YDQu9GL0LrRgtCw0Lkg05nRgdC10YDRliDQsdCw0YAu0JzRi9GB0LDQu9GL0pPQsDog0L7RgNGC0LDRiNCwINC606nQu9C10LzQtNGWINC20YPRgNC10Log0LrQsNC80LXRgNCw0LvQsNGA0YvQvdGL0qMg0LDRgNCw0LvRi9C6INC00LXRhNGE0LXQutGC0ZbQu9C10YDRliwg0LrQu9Cw0L/QsNC90LTQsNGA0LTQsNKT0Ysg06nQt9Cz0LXRgNGW0YHRgtC10YDRli4g0JzQsNKj0YvQt9C00YvRgdGLOiDQsdCw0LvQsNC90YvSoyDQttCw0pPQtNCw0LnRiyDQutCw0LvRi9C/0YLRiywg0LHQuNGA0LDQutGC0LAg0LbSr9C50LXQu9GWINC80LXQtNC40YbQuNC90LDQu9GL0Log0LHQsNC60YvQu9Cw0YPQtNGLINC205nQvdC1INC60LXQudC00LUg0LXQvNC00LXRg9C00ZYg0LrQsNC20LXRgiDQtdGC0LXQtNGWLiDQodC+0qPSk9GL0YHRiyDQkNGD0YvRgCDQtNOZ0YDQtdC20LXQu9GWINGI0YPQu9Cw0YAg0YHQuNC/0LDRgtGC0LDQvNCw0YHRizog0LbRg9GA0LXQuiDQutGL0LfQvNC10YLRliDQsNC50YLQsNGA0LvRi9C60YLQsNC5INCx0rHQt9GL0LvSk9Cw0L0g0LbQsNKT0LTQsNC50LTQsCzRiNGD0LvQsNGAINOp0YLQtSDSm9Cw0YLRgtGLICwg0LDRg9C60YvQvNC00Ysg0LbTmdC90LXQtNC1INOp0LfQs9C10YDQvNC10LvRliDQsdC+0LvQsNC00Yst0LzRi9GBLiDQnNGL0YHQsNC70YvSk9CwOiDQsNGD0YvRgCDQttGD0YDQtdC6INGI0YPQu9Cw0YDRiyAg0LbRg9GA0LXQuiDQttC10YLQutGW0LvRltC60YHRltC30LTRltCz0ZYg0LbQsNKT0LTQsNC50YvQvdC00LAuINCc0LDSo9GL0LfQtNGL0YHRizog0YLQtdC3INCw0YDQsNC00LAg0LTQuNCw0LPQvdC+0YHRgtC40LrQsCDQttOZ0L3QtdC00LUg0LXQvNC00LXRg9C00ZYg0YLQsNC70LDQvyDQtdGC0LXQtNGWLdC80YvRgS4gICAgICAgIDIuINCV0LrRliDQsNC50LvRi9C6INC905nRgNC10YHRgtC10LTQtdCz0ZYg0LXQvNGI0LXQuiDRgdKv0YLRltC90LXQvSDQutC10LnRltC90LPRliDQvNCw0LfQsNGB0YvQt9C00YvSmyDQttOZ0L3QtSDQsdCw0LvQsNC70LDRgNC00LDSk9GLINCw0Ygg0ZbRiNC10LrRgtC10YDQtNGW0qMg0LDQvdCw0YIuLdGE0LjQt9C40L7Qu9C+0LPQuNGP0LvRi9KbINC10YDQtdC60YjQtdC70ZbQutGC0LXRgNGWIDog06jSo9C10YjRgtGW0qMg0YHRhNC40L3QutGC0LXRgNGWOiDQvdOZ0YDQtdGB0YLQtdC70LXRgNC00LUg06nSo9C10YjRgtGW0qMg0YLTqdC80LXQvdCz0ZYg0YHRhNC40L3QutGC0LXRgNGWINGC0L7Qu9GL0Log0LTQsNC80YvQvNCw0pPQsNC9LCDQsdGD0Lsg0LDRgdC60LDQt9Cw0L3Sk9CwINGC0q/RgdC60LXQvSAg0YLQsNC80LDSm9GC0YvSoyDSm9Cw0LnRgtCwINOp0qPQtdGI0LrQtSDRiNGL0pPQsNGA0YvQu9GD0YvQvdCwLCDRj9KT0L3QuCDRgNC10YTQu9GO0LrRgdC60LUg05nQutC10LvQtdC00ZYuINCQ0YHQutCw0LfQsNC9INC606nQu9C10LzRljog0LrRltGI0LrQtdC90YLQsNC5INC205nQvdC10LTQtSDRgtC+0LvRi9C6INC10LzQtdGBINC00LDQvNGL0pPQsNCw0L0sINGB0L7QvdC00YvQutGC0LDQvSDQsNGB0pvQsNC30LDQvSDRgtC10Lcg0YLQvtC70LDQtNGLLiDQkNGB0LrQsNC30LDQvSDQvNC10L0g0ZbRiNC10Log0LzQvtGC0L7RgNC40LrQsNGB0Ys6INGC06nQvNC10L0sINGC0LDQvNCw0pvRgtGL0L0g06nQvdC00LXQu9GD0ZYg0LHQsNGP0YMsINGW0YjQtdC60YLRltKjINC60L7Qt9KT0LDQu9KT0YvRi9GI0YLRi9KT0YsgINC00rHRgNGL0YEg0LbQtdGC0ZbQu9C80LXQs9C10L0uINCQ0YEg0LrQvtGA0YvRgtGDINGE0LXRgNC80LXQvdGC0YLQtdGAOiDQu9Cw0LrRgtCw0LfQsCDQttOZ0L3QtSDQsdCw0YHQutCw0LTQsCDRhNC10YDQvNC10L3RgtGC0LXRgCDRgtC+0LvRi9C6INC20LXRgtGW0LvQvNC10LPQtdC9LCDQsNC90LAg0YHSr9GC0ZbQvSDRgdGW0qPRltGA0YMg0LHQsNGP0YMg0LbSr9GA0LXQtNGWLiDQhtGI0LXQutGC0ZbSoyDQvNC40LrRgNC+0YTQu9C+0YDQsNGB0Ys6INGC0L7Qu9GL0Log0LrQsNC70YvQv9GC0LDRgdC/0LDSk9Cw0L0sINC60LXQudC00LUg0LPQsNC30LTRi9KjINC/0LDQudC00LAg0LHQvtC70YPRi9C90LAg0L3QtSDQsdC+0LvQvNCw0YHQsCDRltGI0YLRltKjINC60LXQsdGD0ZbQvdC1INGB0LXQsdC10L/RiNGWINCx0L7Qu9Cw0LTRiy3QvNGL0YEuINCQ0L3QsCDRgdKv0YLRltC90LXQvSDQutC10LnRltC90LPRliDQvNCw0LfQsNGB0YvQt9C00YvSm9GC0YvSoyDRgdC10LHQtdC/0L/RgtC10YDRltC90LUgOiDRltGI0LXQuiDQutC+0LvQuNC60YLQtdGA0ZYg0LPQsNC3INC20LjQvdCw0LvRg9GLINC205nQvdC10LTQtSDRltGI0LXQuiDRgdC/0LDQt9C80YsuINCR0rHQuyDQvdOZ0YDQtdGB0YLQtdC90ZYg0pvQsNGC0YLRiyDQvNCw0LfQsNC70LDQudC00Ysg05nRgdGW0YDQtdGB0LUg0YLQsNC80LDSm9GC0LDQvSDQutC10LnRltC9LiDQk9Cw0YHRgtGA0L7RjdC30L7RhNCw0LPQtdCw0LvRjNC00Ysg0YDQtdGE0LvRjtC60YE6INOp0YLQutGW0YAg0LrRi9GI0LrRi9C70LTRi9C6INGA0LXRhNC70Y7QutGBINOp0qPQtdGI0YLRliDRgtGW0YLRltGW0YDQutC10L3QtNGW0YDQtdC00ZYuINCR0YPQuyDQutC10LfQtNC1INC905nRgNC10YHRgtC1INC80LDQt9Cw0YHRi9C30LTQsNC90LDQtNGLINC205nQvdC10LTQtSDQttGL0LvQsNGD0Ysg0LzSr9C80LrRltC9IC4g0JDQu9C70YDQtdCz0LjRj9C70YvQuiDRgNC10LDQutGG0LjRj9C70LDRgDog0LrQtdC5INC60LXQt9C00LUg0YHSr9GCINC60L7QvNC/0L7QvdC10L3RgtGC0LXRgNGW0L3QtSDRgNC10LDQutGG0LjRj9GB0YsuINCd0LXRgNCyINC20YPQudGB0LXRgdGW0L3RltKjINC20LXRgtGW0LvQvNC10YPRljog0LbSr9C50LrQtSDQttKv0LnQtdGB0ZYg0YLQvtC70YvQuiDQtNCw0LzRi9C80LDSk9Cw0L3QtNGL0LrRgtCw0L0g0YHRi9GA0YLQutGLINOZ0YHQtdGA0LvQtdGA0LPQtSDTqdGC0LUt06nRgtC1INGB0LXQt9GW0LzRgtCw0Lsu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95" table:style-name="ce1">
            <text:p>1067095</text:p>
          </table:table-cell>
          <table:table-cell office:value-type="string" table:style-name="ce1">
            <text:p>kazakh</text:p>
          </table:table-cell>
          <table:table-cell office:value-type="string" table:style-name="ce1">
            <text:p>Билет 8&amp;lt;br /&amp;gt; 1.П.С.Мощича классификациясы бойынша журек шулары және онын сипаттамасы.&amp;lt;br /&amp;gt; 2. Емханада анасы 2 айлық баламен, анасының шағымдары баланың ана сүттімен тамақтануынан кейін мазасыздануына.Балалардың аш ішектерінің анатомо-физиологиялық ерекшеліктерің білесіз? Баланың мазасыздануы немен байланысты?&amp;lt;br /&amp;gt;</text:p>
          </table:table-cell>
          <table:table-cell office:value-type="string" table:style-name="ce1">
            <text:p>MSkg0JzQvtGJ0LjRh9CwINC60LvQsNGB0YHQuNGE0LjQutCw0YbQuNGP0YHRiyDQsdC+0LnRi9C90YjQsCDQttGD0YDQtdC6INGI0YPQu9Cw0YDRi9C9IDQg0YLQvtC/0LrQsCDQsdOp0LvRltC/INKb0LDRgNCw0YHRgtGL0YDQsNC80YvQty4g0LXSoyDQsNC70LTRi9C80LXQvSDQvtGA0LPQsNC90LjQutCw0LvRi9KbINGI0YPQu9Cw0YAuINC+0Lsg0LbSr9GA0LXQuiDSm9Cw0LHQsNGC0YLQsNGA0YvQvdGL0qMg0LbTmdC90LUg0ZbRgNGWINGC0LDQvNGL0YDQu9Cw0YDQtNGL0qMg0L7RgNCz0LDQvdC40LrQsNC70YvSmyDRgtKv0YDQtNC1INC30LDSm9GL0LzQtNCw0L3Rg9GLINGC0YPRi9C90LTQsNKT0LDQvdC00LAg0LbQsNGC0pvRi9C30LDQvNGL0LcuPGJyIC8+DQrQutC10LvQtdGB0ZYg0YLQvtC/INC+0YDQs9Cw0L0t0YTRg9C90LrRhtC40L7QvdCw0LvQtNGL0pssINC+0YDQs9Cw0L0t0YTRg9C90LrRhtC40L7QvdCw0LvQtNGL0pstINCx0LDRgdKb0LAg0LDSk9C30LDQu9Cw0YAg0LzQtdC9INC20q/QudC10LvQtdGA0LTRltKjINCw0YPRgNGD0LvQsNGA0Ysg0LrQtdC30ZbQvdC00LUg0LHQvtC70LDRgtGL0L0g0LHSsdC30YvQu9GL0YHRgtCw0YDQtNGLINC20q/RgNC10Log0YTRg9C90LrRhtC40Y/RgdGL0L3Ri9KjINCx0rHQt9GL0LvRi9GB0YvQvSDQsNC50YLQsNC80YvQty4gPGJyIC8+DQrQutC10LvQtdGB0ZYg0YLQvtC/0LrQsCDRhNGD0L3RhtC40L7QvdCw0LvQtNGL0psg0YLQvtC/INC00LXQudC80ZbQty4g0L7Qu9Cw0YAg0LbSr9GA0LXQutGC0LXQvSDRgtGL0YEg0LDRg9GA0YPQu9Cw0YAg0LrQtdC30ZbQvdC00LUg0LbSr9GA0LXQuiDRhNGD0L3QutGG0LjRj9GB0YvQvdGL0qMg0LHSsdC30YvQu9GL0YHRiyDRgtGD0YvQvdC00LDSk9Cw0L3QtNCwINCw0L3Ri9Kb0YLQsNC70LDQtNGLLiA8YnIgLz4NCtC60LXQu9C10YHRliDRgtC+0L8g0L7QuyDRhNC40LfQuNC+0LvQvtCz0LjRj9C70YvSmyDQtNC10L8g0pvQsNGA0LDRgdGC0LDRgNGL0LzRi9C3LiDQvtC7INC20q/RgNC10Log0pvQsNC90YLQsNC80YvRgCDQttKv0LnQtdGB0ZbQvdGW0qMg0LDQvdCw0YLQvtC80LjRj9C70YvSmyDQttOZ0L3QtSDRhNC40LfQuNC+0LvQvtCz0LjRj9C70YvSmyDQtdGA0LXQutGI0LXQu9GW0LrRgtC10YDRltC90LUg0L3QtdCz0ZbQt9C00LXQu9C10YLRltC9LCDQtNC10L3RliDRgdCw0YMg0LDSk9C30LDQtNCw0pPRiyDQttKv0YDQtdC60YLRltKjINGB0LDRgyDQutC10LfRltC90LTQtSDQtNC1INC10YHRgtGW0LvQtdGC0ZbQvSDRiNGD0LvQsNGAINGC0L7QsdGLINC00LXQvyDQsNC50YLQsNC80YvQty4gPGJyIC8+DQrQntC70LDRgNC00Ysg0YHQuNC/0LDRgtGC0LDQuSDQutC10YLQtdGC0ZbQvSDQsdC+0LvRgdCw0psg0YTRg9C90LrRhtC40L7QvdCw0LvQtNGL0psg0YjRg9C70LDRgDog0YHQuNGB0YLQvtC70LDQu9GL0pstINC20q/RgNC10Log0YLQvtC90LTQsNGA0YvQvNC10L0g0LHQsNC50LvQsNGB0L/QsNC50LTRiywg0rHQt9Cw0psg0YPQsNKb0YvRgiDSm9Cw0LzRgtGL0LzQsNC50LTRiywg0q/QvdGWINC20rHQvNGB0LDSmyDTmdC70YHRltC3INCx0L7Qu9Cw0LTRiy7RiNC10LrRgtC10LvQs9C10L0g0LDQudC80LDSm9GC0LDRgNC00LDQvSDQtdGB0YLRltC70LXQtNGWLiDQttOZ0L3QtSDQtdGB0YLRltC70LPQtdC9INCw0LnQvNCw0pvRgtCw0L0g0LHQsNGB0pvQsCDQsNC50LzQsNKb0pvQsCDRgtCw0YDQsNC80LDQudGC0YvQvSDQsdC+0LvRi9C/INC60LXQu9C10LTRli4g0YLRi9C90YvRgSDQsNC70YMg0LrQtdC30ZbQvdC00LUg0YLQtdGA0LXSoyDRgtGL0L3Ri9GB0YLQsNKT0LDQvSDQutC10LfQtNC1INOZ0LvRgdGW0LfQtNC10L3QtSDRgtKv0YHQtdC00ZYg0L3QtdC80LXRgdC1INC20L7QudGL0LvRg9GLINC80q/QvNC60ZbQvSDQsdC+0LvQsNC00YsuICAgICAgICAgICAgICAgICAgPGJyIC8+DQo8YnIgLz4NCjIt0YHSsdGA0LDSmy4g0LHRg9C7INGB0LjRgtGD0LDRhtC40Y/Qu9GL0psg0LbQsNKT0LTQsNC50LTQsCAgIkp1amVudW0iINC00LXQs9C10L0g0LDQvdCw0YLQvtC80LjRj9C70YvSmyDQtdGA0LXQutGI0LXQu9GW0LPRltC9INCw0LnRgtGD0YvQvNGL0LfSk9CwINCx0L7Qu9Cw0LTRiy4gSnVqZW51bSAtINC+0Lsg0L7QvSDQtdC60ZYg0LXQu9GWINGW0YjQtdC6INC/0LXQvSDRiNCw0LbRi9GA0pvQsNC50LTRi9KjINCw0YDQsNGB0YvQvdC00LAg0L7RgNC90LDQu9Cw0YHSm9Cw0L0g0LbRltKj0ZbRiNC60LUg0ZbRiNC10LrRgtC10ZbSoyDQtdC60ZbQvdGI0ZYg0LHTqdC70ZbQs9GWINGA0LXRgtGW0L3QtNC1INKb0LDRgNCw0YHRgtGL0YDQsNC80YvQty4g0LDQvdCw0YLQvtC80LjRj9C70YvSmyDQttCw0pPRi9C90LDQvSDQsdGD0LsganVqZW51bSDQtdGA0LXQutGI0LXQu9GW0LPRliDQsdC+0LvQsNC00YsuICDQvNGL0YHQsNC70Ysg0L7QvdGL0qMg0pvQsNCx0YvRgNKT0LDRgdGLINKb0LDQu9GL0qMsINC70Y7Qu9C10LzRliDSr9C70LrQtdC90ZbRgNC10Log0LbTmdC90LUg0YjQsNC20YvRgNKb0LDQudKT0LAg0pvQsNGA0LDSk9Cw0L3QtNCwINC006nSo9Cz0LXQu9C10Log0pvQsNGC0L/QsNGA0LvQsNGA0Ysg0LHQvtC70LDQtNGLLiA8YnIgLz4NCtCw0Lsg0YTQuNC30LjQvtC70L7Qs9C40Y/Qu9GL0psg0LbQsNKT0YvQvdCw0L0g0LDQudGC0LDRgCDQsdC+0LvRgdCw0pssIGp1amVudW0gINC+0Lsg0LDRiCDRltGI0LXQutGC0LXQs9GWINKb0L7RgNC10LrRgtGW0Log0LfQsNGC0YLRi9GA0LTRiyDRgdC+0L3Ri9KjINGW0YjRltC90LTQtSDQutOp0LzRltGA0YHRg9C70LDRgNC00YssINCw0pvRg9GL0LfQtNCw0YDQtNGLLCDQvNCw0LnQu9Cw0YDQtNGL0qMg0YHRltKj0YPRltC90LUg0LbQsNGD0LDQvyDQsdC10YDQtdC00ZYuINCw0Lsg0L3RltGA0LXRgdGC0LXQu9C10YDQtNC1INC+0Lsg05nQu9GWINC00LUg0LTQsNC80YMg0q/RgdGC0ZbQvdC00LUg0LHQvtC70pPQsNC90LTRi9Kb0YLQsNC9INC70LDQutGC0L7Qt9CwICDRgdC10LrRltC70LTRliDQutC10LnQsdGW0YAg0LfQsNGC0YLQsNGA0pPQsCDRgdC10LfRltC70YLQsNC70LTRiyDQsdC+0LvQsNC00YsuINCx0rHQuyDQtdC80YjQtdC6INGB0q/RgtGW0L3QtdC9INC60LXQudGW0L3Qs9GWINC20LDQudGB0YvQt9C00YvSm9Kb0LAg0YHQtdCx0LXQvyDQsdC+0LvQsNC00YsuINC90LDRgNC10YHRgtC10LvQtdGAINC10LzRiNC10Log0YHSr9GC0ZYg0LDRgNKb0YvQu9GLINKb0L7RgNC10LrRgtGW0Log0LfQsNGC0YLQsNGAINCw0LvQsNC00YssINC70LDQutGC0L7Qt9CwINGB0LXQutGW0LvQtNGWLiDRgdC+0L3Ri9C80LXQvSDSm9Cw0YLQsNGALCDQvdOZ0YDQtdGB0YLQtdC70LXRgNC00LUg0LDRgdKb0LDQt9Cw0L0g0ZbRiNC10Log0pvRi9C30LzQtdGC0ZYg0YLQvtC70YvSmyDQttC10YLRltC70LzQtdCz0LXQvdC00ZbQutGC0LXQvSDSm9C+0YDQtdC60YLRltC6INC30LDRgtGC0LDRgCDSm9C+0YDRi9GC0YvQu9GD0Ysg0LHQsNGP0YMg0LHQvtC70LDQtNGLLCDQsdKx0Lsg0YLQsNC80LDSm9GC0LDQvdKT0LDQvdC90LDQvSDQutC10LnRltC9INCz0LDQtyDQttC40L3QsNC70YPRiyDRgdC10LrRltC70LTRliDQvdC10LzQtdGB0LUg0LrQvtC70LjQutC60LUg05nQutC10LvRg9GWINC80q/QvNC60ZbQvS4g0YHQvtC90YvQvNC10L0g0LHRg9C7INGB0LjRgtGD0LDRhtC40Y/Qu9GL0psg0LbQsNKT0LTQsNC50LTRiyDSm9Cw0LvRi9C/0YLRiyDQtNC10L8g0pvQsNGA0LDRgdGC0YvRgNGD0pPQsCDQsdC+0LvQsNC00YssINGB0LXQsdC10LHRliwg0LDRgSDSm9C+0YDRi9GC0YMg0LbSr9C50LXRgdGWINOZ0LvRliDQtNC1INC00LDQvNGDINKv0YHRgtGW0L3QtNC1INCx0L7Qu9KT0LDQvdC00YvSm9GC0LDQvSDRg9Cw0pvRi9GCINOp0YLQtSDQsNGBINKb0L7RgNGL0YLRi9C70YPRiyDQttCw0pvRgdCw0YDQsNC00Ysu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академиялық адалдыққа сәйкес плагиатқа қарсы баллдың төмендеуі</text:p>
          </table:table-cell>
          <table:table-cell office:value-type="float" office:value="7" table:style-name="ce1">
            <text:p>7</text:p>
          </table:table-cell>
          <table:table-cell table:number-columns-repeated="16376"/>
        </table:table-row>
        <table:table-row table:style-name="ro1">
          <table:table-cell office:value-type="float" office:value="915279" table:style-name="ce1">
            <text:p>915279</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IlwiLdCt0YLQuNC8INC30L3QsNC60L7QvCDQvtCx0L7Qt9C90LDRh9Cw0Y4g0L3QvtCy0YvQuSDQsNCx0LfQsNGGXDIpINCR0LXRgdC/0L7QutC+0LnRgdGC0LLQviDQstGL0LfQstCw0L3QviDQvtCx0YDQsNC30L7QstCw0L3QuNC10Lwg0LrQuNGI0LXRh9C90L7QuSDQutC+0LvQuNC60Lgg0Y3RgtC+INGB0LLRj9C30LDQvdC90L4g0YEg0YLQtdC8INGH0YLQviDQsiDQutC40YjQtdGH0L3QuNC60LUg0YHQutCw0L/Qu9C40LLQsNC10YLRgdGPINCz0LDQtyDQuCDQv9GA0LjRh9C10L3Rj9C10YIg0LTQuNGB0LrQvtC80YTQvtGALiDQoyDQtNC10YLQtdC5INGN0YLQvtCz0L4g0LLQvtC30YDQsNGB0YLQsCAg0YHQu9Cw0LHQviDRgNCw0LfQstC40YLQsNGPINGE0LXRgNC80LXQvdGC0LDRgtC40LLQvdCw0Y8g0YHQuNGB0YLQtdC80LAuINCY0Lct0LfQsCDRjdGC0L7Qs9C+INC80L7Qu9C+0LrQviDQvNCw0YLQtdGA0Lgg0L7QutC40YHQu9GP0LXRgtGB0Y8g0Lgg0LLRi9C00LXQu9GP0LXRgiDQstC+0LfQtNGD0YUg0Lgg0L/RgNC+0LjRgdGF0L7QtNC40YIg0L7QsdGA0LDQt9C+0LLQsNC90LjQtSDQstC+0LfQtNGD0YXQsCDQsiDQutC40YjQtdGH0L3QuNC60LUg0YfRgtC+INC4INC/0YDQuNCy0L7QtNC40YIg0Log0LTQuNGB0LrQvtC80YTQvtGA0YLRgy4g0J7QtNC90LDQutC+INGN0YLQviDRgtCw0LrQttC1INC80L7QttC10YIg0LHRi9GC0Ywg0YHQu9C10LTRgdGC0LLQuNC1INC30LDQs9C70LDRgtGL0LLQsNC90LjRjyDQstC+0LfQtNGD0YXQsCDQv9GA0Lgg0LrQvtGA0LzQu9C10L3QuNC1INGN0YLQvtC80YMg0LzQvtC20LXRgiDQv9GA0LjQstC+0LTQuNGC0Ywg0LbQsNC00L3QvtC1INGB0L7RgdCw0L3QuNC1INC40LvQuCDQvdC1INC/0L7Qu9C90L7QuSDQs9C10YDQvNC10YLQuNC30LDRhtC40Lgg0YHQvtGB0LrQsCDQv9GA0Lgg0LrQvtGA0LzQu9C10L3QuNC4ICjQvdC10L/RgNCw0LLQuNC70YzQvdC+0LUg0L/RgNC40LrQu9Cw0LTRi9Cy0LDQvdC40LUpLi/QodC70LXQv9Cw0Y8g0LrQuNGI0LrQsC3QvtGC0L3QvtGB0LjRgtC10LvRjNC90L4g0LzQtdC90YzRiNC1INGH0LXQvCDRgyDQstC30YDQvtGB0LvRi9GFINC/0L7RgdGC0LXQv9C10L3QvdC+INGD0LLQtdC70LjRh9C40LLQsNGP0YHRjCDQv9C+INC80LXRgNC1INGA0L7RgdGC0LAgINGA0LDRgdC/0L7Qu9C+0LbQtdC90LAg0LLRi9GB0L7QutC+INC+0YLQvdC+0YHQuNGC0LXQu9GM0L3QviDQsdC70LjQt9C60L4g0Log0L/QtdGH0LXQvdC4INC4INC/0L7RgdGC0LXQv9C10L3QvdC+INC+0L/Rg9GB0LrQsNC10YLRgdGPINCyINC90LjQtyDRgSDQstC+0LfRgNCw0YHRgtC+0LwuINCjINC90L7QstC+0YDQvtC20LTQtdC90L3Ri9GFINC40LzQtdC10YIg0YjQsNGA0L7QstC40LTQvdGD0Y4g0YTQvtGA0LzRgyDRgSDQstC+0LfRgNCw0YHRgtC+0Lwg0L/RgNC40L3QuNC80LDQtdGCINC80LXRiNC60L7QstC40LTQvdGD0Y4uINCR0L7Qu9C10LUg0L/QvtC00LLQuNC20L3QsCDQuNC3LdC30LAg0L3QtdC00L7RgNCw0LfQstC40YLQvtGB0YLQuCDRgdCy0Y/Qt9C+0YfQvdC+0LPQviDQsNC/0L/QsNGA0LDRgtCwLiDQn9C+0LLRi9GI0LXQvdC90LDRjyDRgdC60LvQvtC90L3QvtGB0YLRjCDQuiDQt9Cw0YHRgtC+0LnQvdGL0Lwg0Y/QstC70LXQvdC40Y/QvCDQuNC3LdC30LAg0YHQu9Cw0LHQvtC5INC80L7RgtC+0YDQuNC60Lgu0KMg0LTQtdGC0LXQuSDRgdC+0LTQtdGA0LbQtdGC0YHRjyDQsdC+0LvRjNGI0LUg0LvQuNC80YTQvtC40LTQvdC+0Lkg0YLQutCw0L3QuCDQutC+0YLQvtGA0LDRjyDQsNC60YLQuNCy0L3QviDRg9GH0LDQstGB0YLQstGD0LXRgiDQsiDQuNC80YPQvdC90L7QuSDRgNC10LDQutGG0LjQuC4g0KTQvtGA0LzQtdGA0L7QstCw0L3QuNC1INC90L7RgNC80LDQu9GM0L3QvtC5INC80LjQutGA0L7RhNC70L7RgNGLINC/0YDQvtC40YHRhdC+0LTQuNGCINCyINC/0LXRgNCy0YvQtSDQs9C+0LTRiyDQttC40LfQvdC4INC/0L7RgdC60L7Qu9C60YMg0L/RgNC4INGA0L7QttC00LXQvdC40Lgg0LrQuNGI0LXRh9C90LjQuiDRgdGC0LjRgNC40LvQtdC9LiDQktC+0YHQv9C+0LvQuNGC0LXQu9GM0L3Ri9C1INC/0YDRhtC10YHRgdGLINGA0LDQt9Cy0LjQstCw0Y7RgtGPINCx0YvRgdGC0YDQtdC1INCyINGB0LvQtdC00YHRgtCy0LjQuCDQsdC+0LPQsNGC0L7QuSDQstC+0LrRg9C70LXRgNC40LfQsNGG0LjQtdC5ICBcIDEp0KMg0LTQtdGC0LXQuSDQsiDQvdC+0YDQvNC1INC40LzQtdC10YLRgdGPIDMg0YLQvtC90LAgKNGN0YLQviDRgdGH0LjRgtCw0LXRgtGB0Y8g0L3QvtGA0LzQvtC5INC00L4g0LzQvtC80LXRgtCwINC00L7RgdGC0LXQttC10L3QuNGPINGA0LXQsdC10L3QutC+0Lwg0L/QvtC00YDQvtGB0YLQutC+0LLQvtCz0L4g0LLQvtC30YDQvtGB0YLQsCkuIDEg0YLQvtC9INGB0LjRgdGC0L7Qu9C40YfQtdGB0LrQuNC5INC/0YDQvtC40YHRhdC+0LTQuNGCINCyINGB0LvQtdC00YHRgtCy0LjQuCDQt9Cw0LrRgNGL0YLQuNGPINCc0LjRgtGA0LDQu9GM0L3QvtCz0L4g0Lgg0YLRgNC40LrRg9GB0L/QtdC00LDQu9GM0L3QvtCz0L4g0LrQu9Cw0L/QvtC90L7QsiDQsiDQstC+0LfRgNC+0YHRgtC1INCz0L7QtNCwINGB0YLQvtC90L7QstC40YLRgdGPINCx0L7Qu9C10LUg0LLRi9GA0LDQttC10L3QvdGL0Lwg0L3QsCDQstC10YDRhdGD0YjQutC1IDIg0YLQvtC9INC00LjQsNGB0YLQsNC70LjRh9C10YHQutC40Lkg0Y/QstC70Y/QtdGC0YHRjyDRgdC70LXQtNGB0YLQstC40LXQvCDQt9Cw0LrRgNGL0YLQuNGPINC/0L7Qu9C70YPQu9GD0L3Ri9GFINC60LvQsNC/0L7QvdC+0LIg0LIg0LLQvtC30YDQvtGB0YLQtSDQs9C+0LTQsCDRgdGC0L7QvdC+0LLQuNGB0Y8g0LHQvtC70LXQtSDQstGL0YDQsNC20LXQvdGL0Lwg0L3QsCDQvtGB0L3QvtCy0LDQvdC40Lgg0YHQtdGA0LTRhtCwIC4gMyDRgtC+0L0g0Y/QstC70Y/QtdGC0YHRjyDRgdC70LXQtNGB0YLQstC40LXQvCDRgdC70LjRiNC60L7QvCDQsdGL0YHRgtGA0L7Qs9C+INC90LDQv9C+0LvQvdC10L3QuNC10Lwg0LbQtdC70YPQtNC+0YfQutC+0LIg0Lgg0LjRhSDQvNCw0LvQvtCz0L4g0L7QsdGK0LXQvNCwLiDQotC+0L3RiyDQstGL0YHQu9GD0YjQuNCy0LDRjtGC0YHRjyDQsdC+0LvQtdC1INGH0LXRgtC60L4g0YfQtdC8INGDINCy0LfRgNC+0YHQu9GL0YUg0Y3RgtC+INGP0LLQu9C10Y/QtdGC0YHRjyDRgdC70LXQtNGB0YLQstC40LUg0LzQsNC70L7Qs9C+INGA0LDQt9C80LXRgNCwINCz0YDRg9C00L3QvtC5INC60LvQtdGC0LrQuCDQsdC+0LvRjNGI0LXQuSDQtdC1INC70L7RgdGC0LjRh9C90L7RgdGC0Lgg0Lgg0LzQtdC90YzRiNC10Lkg0YLQvtC70YnQuNC90L7QuSDQstGB0LUg0Y3RgtC+INC/0YDQuNCy0L7QtNC40YIg0Log0LHQvtC70YzRiNC1INC/0YDQvtCy0L7QtNC40LzQvtGB0YLQuCDQt9Cy0YPQutCwINC70YPRh9GI0LUg0LLRi9GB0LvRg9GI0LjQstCw0LXRgtGB0Y8g0LIg0L/QvtC70L7QttC10L3QuNC4INC90LAg0LvQtdCy0L7QvCDQsdC+0LrRgy4=</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второй вопрос не правильно. вопрос был про шумы сердца по классификации Мощича. Выописали тоны сердца.</text:p>
          </table:table-cell>
          <table:table-cell office:value-type="float" office:value="0" table:style-name="ce1">
            <text:p>0</text:p>
          </table:table-cell>
          <table:table-cell table:number-columns-repeated="16376"/>
        </table:table-row>
        <table:table-row table:style-name="ro1">
          <table:table-cell office:value-type="float" office:value="1066964" table:style-name="ce1">
            <text:p>1066964</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Mi4g0JHQtdGB0L/QvtC60L7QudGB0YLQstC+INC/0L7RgdC70LUg0LrQvtGA0LzQu9C10L3QuNGPINCz0YDRg9C00YzRjiDQvNC+0LbQtdGCINCx0YvRgtGMINCy0YvQt9Cy0LDQvdC90LDRjyDQv9C+INGA0LDQt9C70LjRh9C90YvQvCDQv9GA0LjRh9C40L3QsNC8INCyINGC0L7QvCDRh9C40YHQu9C1INC4INC40Lct0LfQsCDQvdC1ICDRgdGE0L7RgNC80LjRgNC+0LLQsNC90L3QvtC5INC00L4g0LrQvtC90YbQsCDQstGB0LXRhSDRhNC10YDQvNC10L3RgtC+0LIg0LIg0LrQuNGI0LXRh9C90LjQutC1INC4INC20LXQu9GD0LTQutC1ICwg0LAg0YLQsNC6INC20LUg0LjQty3Qt9CwINC90LUg0YHRhNC+0YDQvNGD0LvQuNGA0L7QstCw0L3QvdC+0Lkg0LTQviDQutC+0L3RhtCwINC/0LjRidC10LLQvtC00LAgLiDQp9GC0L4g0Y/QstC70Y/QtdGC0YHRjyDQvdC+0YDQvNC+0Lkg0LTQu9GPINC00LXRgtC10Lkg0LPRgNGD0LTQvdC+0LPQviDQstGB0LrQsNGA0LzQu9C40LLQsNC90LjRjyAsINGC0LDQuiDQutCw0Log0L/RgNC4INGB0L7RgdCw0L3QuNC4INGA0LXQsdC10L3QvtC6INC80L7QttC10YIg0LfQsNCz0LvQsNGC0YvQstCw0YLRjCDQstC+0LfQtNGD0YUg0LLQvNC10YHRgtC1INGBINC80L7Qu9C+0LrQvtC8INGH0YLQviDQvNC+0LbQtdGCICDQv9GA0LjQstC10YHRgtC4ICDQuiDQstC30LTRg9GC0LjRj9C8INC4INC60L7Qu9C40LrQsNC8IC4g0J/QvtGN0YLQvtC80YMg0YLQsNC6INC20LUg0LLQsNC20L3QviDQvdCw0YPRh9C40YLRjCDQvNCw0YLRjCDQutCw0Log0L/RgNCw0LLQuNC70YzQvdC+INC/0YDQuNC60LvQsNC00YvQstCw0YLRjCDQs9GA0YPQtNGMINGH0YLQvtCx0Ysg0L3QtSDQsdGL0LvQviDQv9GA0L7QsdC70LXQvCDRgdC+INCy0YHQutCw0YDQvNC70LjQstCw0L3QuNC10Lwg0Lgg0LbQsNC70L7QsdCw0LzQuCAuICAuINCQINC10YnQtSDQvNC+0LbQtdC8INC00L7QsdCw0LLQuNGC0Ywg0L/RgNC+INC60L7Qu9C40LrQuCDQutC+0YLQvtGA0YvQtSDRh9Cw0YHRgtC+INCy0YHRgtGA0LXRh9Cw0Y7RgtGB0Y8g0YMg0LTQtdGC0LXQuSDQuNC3LdC30LAg0LjQvdC+0LPQtNCwINGB0YTQvtGA0LzQuNGA0YPRjtGJ0LjRhdGB0Y8g0L/QtdGC0LvQtdC5INCyINC60LjRiNC10YfQvdC40LrQtSAuINCd0L4g0YLQsNC6INC20LUg0L3QtdC70YzQt9GPINC40YHQutC70Y7Rh9Cw0YLRjCDRh9GC0L4g0LHQtdGB0L/QvtC60L7QudGB0YLQstC+INC80L7Qs9C70L4g0LHRi9GC0Ywg0LLRi9C30LLQsNC90L4g0LjQty3Qt9CwINC/0YDQuNC80LXQvdC10L3QuNGPINGA0LDQt9C70LjRh9C90YvRhSDRgdC80LXRgdC10Lkg0Lgg0LTQvtCx0LDQstC+0LogLCDQvdC+INC4INC40L3QvtCz0LTQsCDQvdC10L/QtdGA0LXQvdC+0YHQuNC80L7RgdGC0Lgg0L7Qv9GA0LXQtNC10LvQtdC90L3Ri9GFINC/0YDQvtC00YPQutGC0L7QsiDRh9GC0L4g0Lgg0LLRi9C30YvQstCw0LXRgiDQsdC10YHQv9C+0LrQvtC50YHRgtCy0L4gLiDQodC40LzQv9GC0L7QvNCw0LzQuCDRg9C60LDQt9GL0LLQsNGO0YnQuNC1INC90LAg0L7QsdGA0LDQt9C+0LLQsNC90L3Ri9C1INC/0LXRgtC70Lgg0LIg0LrQuNGI0LrQsNGFINC80L7Qs9GD0YIg0LHRi9GC0YwgLCDQv9C+0LLRi9GI0LXQvdC40LUg0YLQtdC80L/QtdGA0LDRgtGD0YDRiyDRgtC10LvQsCAs0LjQt9C80LXQvdC10L3QuNC1INCw0L/Qv9C10YLQuNGC0LAg0YDQtdCx0LXQvdC60LAgLCDQutC+0LvQuNC60Lgg0Lgg0LjQt9C80LXQvdC10L3QuNGPINGG0LLQtdGC0LAg0YHRgtGD0LvQsCAsINC90LDRgNGD0YjQtdC90LjRjyDRgdC90LAuINCc0L7QttC90L4g0LTQvtCx0LDQstC40YLRjCDQv9GA0L4g0YLQviDRh9GC0L4g0YMg0LTQtdGC0LXQuSDRhtCy0LXRgiDQutCw0LvQsCDRh9Cw0YnQtSDQstGB0LXQs9C+INC40LzQtdC10YIg0LbQtdC70YLQvtCy0LDRgtGL0Lkg0L7RgtGC0LXQvdC+0Log0Lgg0LrQsNGI0LjRhtC10L7QsdGA0LDQt9C90YPRjiDQvNCw0YHRgdGDLCDQuCDQv9GA0Lgg0YDQsNC30LvQuNGH0L3Ri9GFINC30LDQsdC+0LvQtdCy0LDQvdC40Lkg0L/RgNC40L7QsdGA0LXRgtCw0LXRgiDQvtC/0YDQtdC00LXQu9C10L3QvdGL0Lkg0YbQstC10YIg0L7RgiDQt9C10LvQtdC90L7Qs9C+INC00L4g0YHQtdGA0L7QstCw0YLQvtCz0L4g0L7RgtGC0LXQvdC60LAg0Lgg0LjQvdC+0LPQtNCwINC80L7Qs9GD0YIg0LHRi9GC0Ywg0Lgg0YHQs9GD0YHRgtC60Lgg0YHQu9C40LfQuCDQsiDQv9C10YDQtdC80LXRiNC60YMg0YEg0LrQsNC70L7QvCAuINCjINC00LXRgtC10Lkg0LjQvNC10LXRgtGB0Y8g0LLRi9GB0L7QutCw0Y8g0L/RgNC+0L3QuNGG0LDQtdC80L7RgdGC0Ywg0YHQu9C40LfQuNGB0YLQvtC5INC+0LHQvtC70L7Rh9C60Lgg0YfRgtC+INC4INC/0YDQuNCy0L7QtNC40YIg0Log0YLQvtC80YMg0YfRgtC+INC+0LHRgNCw0LfRg9C10YLRgdGPINGA0LDQt9C70LjRh9C90YvQtSDQttCw0LvQvtCx0Ysg0L3QsCDRgdGH0LXRgiDQltCa0KIsINGC0LDQuiDQutCw0Log0YHQu9C40LfQuNGB0YLQsNGPINC+0LHQvtC70L7Rh9C60LAg0LHQvtC70LXQtSDRh9GD0LLRgdGC0LLQuNGC0LXQu9GM0L3QsCDQv9C+INGB0YDQsNCy0L3QtdC90LjRjiDRgSDRgdC70LjQt9C40YHRgtC+0Lkg0L7QsdC+0LvQvtGH0LrQuCDQstC30YDQvtGB0LvQvtCz0L4g0YfQtdC70L7QstC10LrQsCAuINC/0LXRgNC40YHRgtCw0LvRjNGC0LjQutCwINC60LjRiNC10YfQvdC40LrQsCDQvtGC0LvQuNGH0LDQtdGC0YHRjyDQvtGCINCy0LfRgNC+0YHQu9C+0LPQviDQuCDQvdC1INGC0LDQuiDRgdC40LvRjNC90L4g0YDQsNC30LLQuNGC0LAgLiDQkCDQtdGJ0LUg0YMg0LTQtdGC0LXQuSDRgtCw0Log0LbQtSDQuNC80LXQtdGC0YHRjyDRgtCw0LrQuNC1INGE0LXRgNC80LXQvdGC0Ysg0LrQsNC6ICDQsNC80LjQu9Cw0LfQsCAsINGC0YDQuNC/0YHQuNC9ICwg0L/QtdC/0YHQuNC9ICwg0Lgg0LvQuNC/0LDQt9CwIC4g0JDQvdCw0YLQvtC80L4t0YTQuNC30LjQvtC70L7Qs9C40YfQtdGB0LrQuNC1INC+0YHQvtCx0LXQvdC90L7RgdGC0Lgg0YMg0LTQtdGC0LXQuSDQvNC+0LbQtdC8INC00L7QsdCw0LLQuNGC0Ywg0L/RgNC+INGC0L4g0YfRgtC+INC/0LjRidC10LLQvtC0INC40LzQtdC10YIg0LTQu9C40L3RgyDRgyDQtNC10YLQtdC5INC+0LrQvtC70L4gMTEg0YHQvCDQuCDRgtC+INGH0YLQviDQv9C+INGB0YDQsNCy0L3QtdC90LjRjiDRgSDRgtC10LvQvtC8INGA0LXQsdC10L3QutCwINC+0L0g0LTQu9C40L3QvdC10LUgLCDQuCDQv9C10YfQtdC90Ywg0L3QsCAxLTEuNSDRgdC8INCy0YvQv9C40YDQsNC10YIg0LjQtyDQv9C+0LQg0YDQtdCx0LXRgNC90L7QuSDQtNGD0LPQuCDRh9GC0L4g0Y/QstC70Y/QtdGC0YHRjyDQvdC+0YDQvNC+0LkgLCDQsCDQu9C10LLQsNGPINC00L7Qu9GPINC/0LXRh9C10L3QuCDRh9Cw0YnQtSDQstGB0LXQs9C+INC90LXQvNC90L7Qs9C+INCx0L7Qu9GM0YjQtSDQuNC70Lgg0LbQtSDQvtC00LjQvdCw0LrQvtCy0LDRjyDRgSDQv9GA0LDQstC+0Lkg0LTQvtC70LXQuSDQv9C10YfQtdC90LggLiDQmCDRgtC+INGH0YLQviDQutGA0LDQvdC40LDQu9GM0L3QvtC1INC+0YLQstC10YDRgdGC0LjQtSDRgyDQtNC10YLQtdC5INGA0LDQt9Cy0LjRgtCwINGF0L7RgNC+0YjQviDQv9C+INGB0YDQsNCy0L3QtdC90LjRjiDRgSDQutCw0YDQtNC40LDQu9GM0L3Ri9C8INC+0YLQstC10YDRgdGC0LjQtdC8ICwg0L3QsNC00LPQvtGA0YLQsNC90L3QuNC60LAg0YfRgtC+INC80L7QttC10YIg0L/RgNC40LLQtdGB0YLQuCDQuiDQvdC10L/RgNC+0LjQt9Cy0L7Qu9GM0L3Ri9C8INC+0YLRgNGL0LbQutCw0Lwg0Lgg0LLRi9C/0LvQtdCy0YvQstCw0L3QuNGOINC80L7Qu9C+0LrQsCAsINCwINGC0LDQuiDQttC1INC80L7QttC10Lwg0LTQvtCx0LDQstC40YLRjCDRh9GC0L4g0YMg0LTQtdGC0LXQuSDQvNC+0LbQtdC8INCy0YHRgtGA0LXRgtC40YLRjCDRh9GC0L4g0YLQvtC90LrQsNGPINC60LjRiNC60LAg0LjQvNC10LXRgiDQtNC70LjQvdGDIDE1LTE4INGB0LwgLCDQsCDRgtCw0Log0LbQtSDQvNC+0YfQtdGC0L7Rh9C90LjQutC4INGDINC80LDQu9GM0YfQuNC60L7QsiDQuNC80LXRjtGCINC00LvQuNC90YMg0L7QutC+0LvQviA1LTYg0YHQvCAsINCwINGDINC00LXQstC+0YfQtdC6INC+0LrQvtC70L4gMS0xLjUg0YHQvCAuINCR0LXRgdC/0L7QutC+0LnRgdGC0LLQviDQvNC+0LbQtdGCINCx0YvRgtGMINCy0YvQt9Cy0LDQvdCwINC40Lct0LfQsCDRgNCw0LfQu9C40YfQvdGL0YUg0L/RgNC40YfQuNC9INGN0YLQviDQuNC3LdC30LAg0LrQvtC70LjQutC+0LIgLCDQt9Cw0L/QvtGA0LAg0Lgg0YLQvtGI0L3QvtGC0YsgLiDRh9GC0L4g0YHQutC+0YDQtdC1INCy0YHQtdCz0L4g0LLRi9C30LLQsNC90LAg0LjQty3Qt9CwINC90LUg0LTQviDQutC+0L3RhtCwINGB0YTQvtGA0LzQuNGA0L7QstCw0L3QvdC+0Lkg0YTQtdGA0LzQtdC90YLQsNGC0LjQstC90L7QuSDRgdC40YHRgtC10LzRiyAsINC+0LHRgNCw0LfQvtCy0LDQvdC40Lgg0L/QtdGC0LXQu9GMINCyINC60LjRiNC60LUgLCDQuNC3LdC30LAg0L3QtdC/0YDQsNCy0LjQu9GM0L3QvtCz0L4g0L/RgNC40LrQu9Cw0LTRi9Cy0LDQvdC40Y8g0LPRgNGD0LTQuCAsINC90LUg0YHRhNC+0YDQvNC40YDQvtCy0LDQvdC90L7QuSDQtNC+INC60L7QvdGG0LAg0YHRhNC40L3QutGC0LXRgNC+0LIg0Lgg0LPQu9C+0YLQutC4IC4g0JrRgNC+0LzQtSDRjdGC0L7Qs9C+INC80L7QttC10Lwg0LTQvtCx0LDQstC40YLRjCDQv9GA0L4g0YLQviDRh9GC0L4g0LIg0YLQvtGJ0LXQuSDQutC40YjQutC1INC80L7QttC10YIgPGJyIC8+DQo8YnIgLz4NCjEuINCo0YPQvNGLINGB0LXRgNC00YbQsCDQv9C+INC60LvQsNGB0YHQuNGE0LjQutCw0YbQuNC4INCfLtChINCc0L7RidC40YfQsCDQvNC+0LbQtdC8INC00L7QsdCw0LLQuNGC0Ywg0YfRgtC+INC40LzQtdC10YIg0L7Rh9C10L3RjCDQstCw0LbQvdGD0Y4g0YDQvtC70Ywg0L/RgNC4INC00LjQsNCz0L3QvtGB0YLQuNC60LUg0LfQsNCx0L7Qu9C10LLQsNC90LjQuSDRgdGB0YEg0YMg0LTQtdGC0LXQuSAsINC4INC/0YDQviDRgdCw0LzQuCDRiNGD0LzRiyDQuNC80LXRjtGC0YHRjyDQvdC10YHQutC+0LvRjNC60L4g0YLQuNC/0L7QsiDRiNGD0LzQvtCyINC60L7RgtC+0YDRi9C1INCy0YHRgtGA0LXRh9Cw0Y7RgtGB0Y8g0YMg0LTQtdGC0LXQuSDQuCDRgyDQstC30YDQvtGB0LvRi9GFIC4g0YLQsNC6INC20LUg0YLRgNC10YLQuNC5INGI0YPQvCDQutC+0YLQvtGA0YvQuSDQstGB0YLRgNC10YfQsNC10YLRgdGPINGC0L7Qu9GM0LrQviDRgyDQtNC10YLQtdC5INGC0LDQuiDQutCw0Log0YHQtdGA0LTQtdGH0L3QviDRgdC+0YHRg9C00LjRgdGC0LDRjyDRgdC40YHRgtC10LzQsCDQvdC1INC00L4g0LrQvtC90YbQsCDRgdGE0L7RgNC80YPQu9C40YDQvtCy0LDQvdCwIC4g0KLQsNC6INC20LUg0LjQvNC10LXRgtGB0Y8g0YHQtdGA0LTQtdGH0L3Ri9C5INGI0YPQvCDRhdCw0YDQsNC60YLQtdGA0LjQt9GD0Y7RidC40LnRgdGPINC/0YDQuCDQvdCw0YDRg9GI0LXQvdC40Lgg0L3QvtGA0LzQsNC70YzQvdC+0LPQviDQu9Cw0LzQuNC90LDRgNC90L7Qs9C+INGC0L7QutCwINCyINC/0L7Qu9C+0YHRgtGP0YUg0YHQtdGA0LTRhtCwINC40LvQuCDQttC1INC90LDRgNGD0YjQtdC90LjQuCDRgtC+0LrQsCDQsiDRgdC+0YHRg9C00LDRhSAuINCU0LDQu9C10LUg0LLRgtC+0YDQvtC5INGI0YPQvCDRhdCw0YDQsNC60YLQtdGA0LjQt9GD0LXRgtGB0Y8g0YLQtdC8INGH0YLQviAgLiDQutGA0L7QvNC1INGI0YPQvNC+0LIg0L/QviDQutC70LDRgdGB0LjRhNC40LrQsNGG0LjQuCDQnNC+0YnQuNGH0LAg0LzQvtC20LXQvCDQtNC+0LHQsNCy0LjRgtGMINC/0YDQviDQtNC40LDRgdGC0L7Qu9C40YfQtdGB0LrQuNC5ICwg0YHQuNGB0YLQvtC70LjRh9C10YHQutC40Lkg0Lgg0YLRgNC10YLQuNC5INGI0YPQvCDQutC+0YLQvtGA0YvQuSDQuNC80LXQtdGC0YHRjyDRgtC+0LvRjNC60L4g0YMg0LTQtdGC0LXQuSDQtNC+INC+0L/RgNC10LTQtdC70LXQvdC90L7Qs9C+INCy0L7Qt9GA0LDRgdGC0LAg0YLQsNC6INC60LDQuiDRg9C20LUg0YEg0LLQvtC30YDQsNGB0YLQvtC8INC90LDRh9C40L3QsNC10YIg0LfQsNGA0LDRgdGC0LDRgtGM0YHRjyAuINCc0L7QttC10Lwg0YLQsNC6INC20LUg0LTQvtCx0LDQstC40YLRjCDQv9GA0L4g0L7QstCw0LvRjNC90L7QtSDQvtGC0LLQtdGA0YHRgtC40LUg0LrQvtGC0L7RgNC+0LUg0YLQsNC6INC20LUg0LfQsNGA0LDRgdGC0LDQtdGC0YHRjyDQsiDRgtC10YfQtdC90LjQuCAgMi0zINC90LXQtNC10LvRjCDQuCDQsiDQutGA0LDQudC90LXQvCDRgdC70YPRh9Cw0Lgg0LIg0YLQtdGH0LXQvdC40LggMTUg0L3QtdC00LXQu9GMIC4g0LAg0LTQsNC70LXQtSDRg9C20LUg0L3QsNGH0LjQvdCw0LXRgtGB0Y8g0YHRh9C40YLQsNGC0YzRgdGPINC/0LDRgtC+0LvQvtCz0LjQtdC5IC4g0K3RgtC+0YIg0L/RgNC+0YLQvtC6INCyINGN0LzQsdGA0LjQvtC90LDQu9GM0L3QvtC8INC/0LXRgNC40L7QtNC1INC/0L7QvNC+0LPQsNC10YIg0YHQvNC10YjQuNCy0LDRgtGM0YHRjyDQutGA0L7QstC4LCDQsNGA0YLQtdGA0LjQsNC70YzQvdC+0Lkg0Lgg0LLQtdC90L7Qt9C90L7QuSDQutGA0L7QstC4IC4g0KjRg9C80Ysg0YHQtdGA0LTRhtCwINGC0LDQuiDQttC1INC80L7QttC10Lwg0LLRi9GB0LvRg9GI0LjQstCw0YLRjCAuINCi0L7Rh9C60Lgg0LDRg9GB0LrRg9C70YzRgtCw0YbQuNC4LCDQvdCwINGD0YDQvtCy0L3QtSA1INC80LXQttGA0LXQsdC10YDRjNGPINC90LAg0L7QtNC40L0g0Lgg0L/QvtC70YLQvtGA0LAg0YHQvCDQutC90YPRgtGA0Lgg0LLRi9GB0LvRg9GI0LjQstCw0LXQvCDQvdCw0LQg0YHQtdGA0LTQtdGH0L3QvtC5INGC0YPQv9C+0YHRgtGM0Y4g0LLRi9GB0LvRg9GI0LjQstCw0LXQvCDQvNC40YLRgNCw0LvRjNC90YvQuSDQutC70LDQv9Cw0L0g0Lgg0L/QtdGA0LLRi9C5INGC0L7QvSAsINC4INC90LAg0YPRgNC+0LLQvdC1IDItMyDQvNC10LbRgNC10LHQtdGA0YzRjyAg0L/QviDRgdGA0LXQtNC40L3QvdC+LdC60LvRjtGH0LjRh9C90L7QuSDQu9C40L3QuNC4INGB0L/RgNCw0LLQsCDQstGL0YHQu9GD0YjQuNCy0LDQtdC8INC70LXQs9C+0YfQvdGL0Lkg0LrQu9Cw0L/QsNC9IDIg0YLQvtC9INC4INC10LvQuCDRgdC70YvRiNC90YvQuSAzINGC0L7QvSDQutC+0YLQvtGA0YvQuSDQstGB0YLRgNC10YfQsNC10YLRgdGPINGDINC00LXRgtC10LkgLCDRgSDQu9C10LLQvtC5INGB0YLQvtGA0L7QvdGLINC90LAg0YPRgNC+0LLQvdC1IDItMyDQvNC10LbRgNC10LHQtdGA0YzRjyDRgtCw0Log0LbQtSDQv9C+INGB0YDQtdC00LjQvdC90L4t0LrQu9GO0YfQuNGH0L3QvtC5INC70LjQvdC40Lgg0LLRi9GB0LvRg9GI0LjQstCw0LXQvCDQsNC+0YDRgtCw0LvRjNC90YvQuSDQutC70LDQv9Cw0L0gLCDQsCDRgtCw0Log0LbQtSAxINGC0L7QvSAuINCf0L4g0YHRgNC10LTQuNC90L3QvtC5INC70LjQvdC40Lgg0L3QsCDRg9GA0L7QstC90LUgMy00INC80LXQttGA0LXQsdC10YDRjNGPINCy0YvRgdC70YPRiNC40LLQsNC10LwgMiDRgtC+0L0uIDEg0YLQvtC9ICDQv9C+INGB0YDQsNCy0L3QtdC90LjRjiDRgdC+INCy0YLQvtGA0YvQvCDRgtC+0L3QvtC8INC40LzQtdC10YIg0LHQvtC70LXQtSDQs9GA0L7QvNC60LjQuSDQuCDQv9GA0L7RgtGP0LbQvdGL0Lkg0LfQstGD0LogLCDQsCDQstGC0L7RgNC+0Lkg0YLQvtC9INC20LUg0LrQvtGA0L7RgtC60LjQuSDQuCDQsdC+0LvQtdC1INGC0LjRhdC40Lkg0YfQtdC8INC/0LXRgNCy0YvQuSAuIDMg0YLQvtC9INCy0YHRgtGA0LXRh9Cw0Y7RidC40LnRgdGPINGDINC00LXRgtC10Lkg0LjQvNC10LXRgiDQutC+0YDQvtGC0LrQuNC5INC40L3RgtC10YDQstCw0LsgLiA=</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В 1 ответе не сказано про АФО тощей кишки, Что петли лежат компактно, что слабая перистальтика, большое кол. газов.по 2 ответу не написана классификация. 4 группы.Органич, орг. функцион, функцион.и физиологич.</text:p>
          </table:table-cell>
          <table:table-cell office:value-type="float" office:value="0" table:style-name="ce1">
            <text:p>0</text:p>
          </table:table-cell>
          <table:table-cell table:number-columns-repeated="16376"/>
        </table:table-row>
        <table:table-row table:style-name="ro1">
          <table:table-cell office:value-type="float" office:value="1066982" table:style-name="ce1">
            <text:p>1066982</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MS4g0J/QviDQutC70LDRgdGB0LjRhNC40LrQsNGG0LjQuCDQnNC+0YnQuNGH0LAg0LjQvNC10LXRgtGB0Y8gNCDQstC40LTQsCDRiNGD0LzQvtCyINGB0LXRgNC00YbQsDogMSkg0YTRg9C90LrRhtC40L7QvdCw0LvRjNC90YvQtSAo0L/QsNGC0L7Qu9C+0LPQuNC4INGB0LXRgNC00YbQsCDQstC90LXRgdC10YDQtNC10YfQvdC+0LPQviDQv9GA0L7QuNGB0YXQvtC20LTQtdC90LjRjykgMikg0L7RgNCz0LDQvdC40YfQtdGB0LrQuNC1ICgg0L7RgNCz0LDQvdC40YfQtdGB0LrQvtC1INC/0L7RgNCw0LbQtdC90LjQtSDQvtCx0L7Qu9C+0YfQtdC6INGB0LXRgNC00YbQsCkgMykg0L7RgNCz0LDQvdC+LdGE0YPQvdC60YbQuNC+0L3QsNC70YzQvdGL0LUoINC/0LDRgtC+0LvQvtCz0LjQuCDRgdC10YDQtNGG0LAg0YHQstGP0LfQsNC90L3Ri9C1INGBINC90LDRgNGD0YjQtdC90LjQtdC8INC00YDRg9Cz0LjRhSDQvtGA0LPQsNC90L7QsiDQuCDRgdC40YHRgtC10LwgKSA0KSDRhNC40LfQuNC+0LvQvtCz0LjRh9C10YHQutC40LUgKNC/0YDQuCDQvdC+0YDQvNCw0LvRjNC90L7QvCDRgdC10YDQtNGG0LUsINCx0LXQtyDQsNC90LDRgtC+0LzQvi3RhNC40LfQuNC+0LvQvtCz0LjRh9C10YHQutC40YUg0L/QsNGC0L7Qu9C+0LPQuNC4KTxiciAvPg0KMi4gINCi0L7RidCw0Y8g0LrQuNGI0LrQsC0g0YfQsNGB0YLRjCDRgtC+0L3QutC+0Lkg0LrQuNGI0LrQuCDQvNC10LbQtNGDINC00LLQtdC90LDQtNGG0LDRgtC40L/QtdGA0YHRgtC90L7QuSDQuCDQv9C+0LTQstC30LTQvtGI0L3QvtC5INC60LjRiNC60LDQvNC4LiDQntC90LAg0L7RgtC90L7RgdC40YLQtdC70YzQvdC+INC00LvQuNC90L3QtdC1ICwg0YfQtdC8INC00LvQuNC90LAg0YLQtdC70LAuINCl0L7RgNC+0YjQviDQutGA0L7QstC+0YHQvdCw0LHQttC10L3QsCDQuCDQvtCx0LvQsNC00LDQtdGCINCy0YvRgdC+0LrQvtC5INC/0YDQvtC90LjRhtCw0YLQtdC70YzQvdC+0YHRgtGM0Y4uINCk0LjQt9C40L7Qu9C+0LPQuNGH0LXRgdC60Lgg0YLQvtGJ0LDRjyDQutC40YjQutCwINC+0YLQstC10YfQsNC10YIg0LfQsCDQsdC+0LvRjNGI0YPRjiDRh9Cw0YHRgtGMINCy0YHQsNGB0YvQstCw0L3QuNGPINCyINC/0LjRidC10LLQsNGA0LXQvdC40LguINCjINC00LXRgtC10Lkg0YPQv9C70L7RidC10L3QvdGL0Lkg0Y3Qv9C40YLQtdC70LjQuSwg0LPQu9GD0LHQvtC60LjQtSDQutGA0LjQv9GC0YssINGB0LrQu9Cw0LTQutC4INC90LXQv9C+0LvQvdC+0YHRgtGM0Y4g0L7QsdGA0LDQt9C+0LLQsNC90YssINCy0YHQsNGB0YvQstCw0L3QuNC1INGF0L7RgNC+0YjQviDQv9GA0L7QuNGB0YXQvtC00LjRgiwg0L3QtSDQv9C+0LvQvdC+0YHRgtGM0Y4g0YDQsNC30LLQuNGC0Ysg0YHQsNC70YzQvdC40LrQvtCy0YvQtSDQvtGC0YDQvtGB0YLQutC4LCDQvdC1INC00L4g0LrQvtC90YbQsCDRgdGE0L7RgNC80LjRgNC+0LLQsNC90Ysg0YTQtdGA0LzQtdC90YLRiyDQv9C40YnQtdCy0LDRgNC10L3QuNGPICjRgNCw0LfQvdC+0LPQviDRgNC+0LTQsCDQv9GA0L7RgtC10LDQt9GLLCDRhdC+0YDQvtGI0L4g0YDQsNC30LLQuNGCINGE0LXRgtCw0LvRjNC90YvQuSDQv9C10L/RgdC40L0pLCDRgyDQvNC70LDQtNC10L3RhtC10LIg0LIg0LrQuNGI0LXRh9C90L7QvCDRgdC+0LrQtSDRgtC1INC20LUg0YTQtdGA0LzQtdC90YLRiyAsINGH0YLQviDQuCDRgyDQstC30YDQvtGB0LvRi9GFLCDQvdC+INC40YUg0LDQutGC0LjQstC90L7RgdGC0Ywg0L3QuNC30LrQsNGPLiDQoyDQvdC40YUg0L/QvtC70YPRh9Cw0LXRgtGB0Y8g0L/QvtC90LjQttC10L3QsCDQsNC60YLQuNCy0L3QvtGB0YLRjCDRgtCw0LrQuNGFINGE0LXRgNC80LXQvdGC0L7QsiDQutCw0Log0LzQsNC70YzRgtCw0LfQsCwg0LvQsNC60YLQsNC30LAsINC/0LXQv9GC0LjQtNCw0LfQsCwg0L3QviDRgdC+INCy0YDQtdC80LXQvdC10Lwg0LDQutGC0LjQstC90L7RgdGC0Ywg0YPQstC10LvQuNGH0LjRgtGB0Y8uPGJyIC8+DQrQodC60L7RgNC10LUg0LLRgdC10LPQviDQsdC10YHQv9C+0LrQvtC50YHRgtCy0L4g0LLRi9C30LLQsNC90L4g0LjQty3Qt9CwINC90LXQtNC+0YHRgtCw0YLQvtGH0L3QvtC5INC30YDQtdC70L7RgdGC0Lgg0JbQmtCiINGDINC80LvQsNC00LXQvdGG0LXQsiwg0YfRgtC+INCy0YvQt9GL0LLQsNC10YIg0YLRgNGD0LTQvdC+0YHRgtC4INCyINC/0LjRidC10LLQsNGA0LXQvdC40LgsINC80L7Qs9GD0YIg0LTQsNC20LUg0LHRi9GC0Ywg0LzQtdGC0LXQvtGA0LjQt9C8INC4INC60L7Qu9C40LrQuCwg0YfRgtC+INC80L7QttC10YIg0LLRi9C30LLQsNGC0Ywg0LTQuNGB0LrQvtC80YTQvtGA0YIuINCi0LDQutC20LUg0LLQvtC30LzQvtC20L3QviDQuNC80LXQtdGC0YHRjyDQvdC10LTQvtGB0YLQsNGC0L7Rh9C90L7RgdGC0Ywg0LzQuNC60YDQvtGE0LvQvtGA0Ysg0LrQuNGI0LXRh9C90LjQutCwICjQtNC40YHQsdCw0LrRgtC10YDQuNC+0LcpLCDRh9GC0L4g0YLQvtC20LUg0LLRi9C30YvQstCw0LXRgiDQv9GA0L7QsdC70LXQvNGLINGBINC/0LjRidC10LLQsNGA0LXQvdC40LXQvC4g0JrQsNC6INC80Ysg0LfQvdCw0LXQvCDQu9Cw0LrRgtCw0LfQsCDRhNC10YDQvNC10L3Rgiwg0LrQvtGC0L7RgNGL0Lkg0L7RgtCy0LXRh9Cw0LXRgiDQt9CwINGA0LDRgdGJ0LXQv9C70LXQvdC40LUg0LvQsNC60YLQvtC30YssINGB0L7QtNC10YDQttCw0YnQtdC50YHRjyDQsiDQs9GA0YPQtNC90L7QvCDQvNC+0LvQvtC60LUsINC90LDRgNGP0LTRgyDRgSDQtNGA0YPQs9C40LzQuCDRhNC10YDQvNC10L3RgtCw0LzQuCwg0LrQvtGC0L7RgNGL0LUg0YDQsNGB0YnQtdC/0LvRj9GO0YIg0LLQtdGJ0LXRgdGC0LLQsCDQutC+0YLQvtGA0YvQtSDQv9C10YDQtdC00LDQtdGC0YHRjyDQvtGCINC80LDRgtC10YDQuCDRh9C10YDQtdC3INCz0YDRg9C00L3QvtC1INC80L7Qu9C+0LrQviDQuCDRjdGC0Lgg0YTQtdGA0LzQtdC90YLRiyDQvdC10YHRgtCw0LHQuNC70YzQvdGLINCyINGB0LLQvtC10Lkg0LDQutGC0LjQstC90L7RgdGC0LguINCf0L4g0Y3RgtC+0Lkg0L/RgNC40YfQuNC90LUg0LzQvtC70L7QutC+INCyINC60LjRiNC10YfQvdC40LrQtSDQvNC+0LbQtdGCINC/0L7QtNCy0LXRgNCz0L3Rg9GC0YzRgdGPINC/0YDQvtGG0LXRgdGB0YMg0LHRgNC+0LbQtdC90LjRjyDQvNC40LrRgNC+0YTQu9C+0YDQvtC5INC60LjRiNC10YfQvdC40LrQsCDQuCDQuNC3LdC30LAg0Y3RgtC+0LPQviDQv9GA0L7QtNGD0LrRgtGLINC80LXRgtCw0LHQvtC70LjQt9C80LAg0LHQsNC60YLQtdGA0LjQuSDQsiDQuNC30LHRi9GC0LrQtSDQvNC+0LPRg9GCINCy0YvQt9GL0LLQsNGC0Ywg0LzQtdGC0LXQvtGA0LjQt9C8LCDQutC+0LvQuNC60LgsINCyINC+0LHRidC10Lwg0YHQuNC80L/RgtC+0LzRiyDQutC40YjQtdGH0L3QvtC5INC00LjRgdC/0LXQv9GB0LjQuC4g0JrRgNC+0LzQtSDRjdGC0L7Qs9C+INGDINC80LvQsNC00LXQvdGG0LXQsiDQsiDRjdGC0L7RgiDQv9C10YDQuNC+0LQg0L3QtSDRgdC40LvRjNC90L4g0YDQsNC30LLQuNGC0LAg0LzRi9GI0LXRh9C90L7QuSDQvtCx0L7Qu9C+0YfQutCwINC20LXQu9GD0LTQutCwINC4INC60LjRiNC10YfQvdC40LrQsCwg0YfRgtC+INGB0LrQsNC30YvQstCw0LXRgtGB0Y8g0L3QsCDQv9C10YDQuNGB0YLQsNC70YzRgtC40LrQtSDQuCDQvNC+0LbQtdGCINCy0YvQt9Cy0LDRgtGMINC/0YDQvtCx0LvQtdC80Ysg0YEg0Y3QstCw0LrRg9Cw0YbQuNC10Lkg0LrQsNC70LAsINC/0L7Qu9GD0YfQsNC10YLRgdGPINC30LDQv9C+0YDRiy4g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61" table:style-name="ce1">
            <text:p>1067061</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MS7Qn9C+INC60LvQsNGB0YHQuNGE0LjQutCw0YbQuNC4INCc0L7RidC40YfQsCDRiNGD0LzRiyDQsiDRgdC10YDQtNGG0LUg0L/QvtC00YDQsNC30LTQtdC70Y/RjtGC0YHRjyDQvdCwINGE0YPQvdC60YbQuNC+0L3QsNC70YzQvdGL0LUg0Lgg0L7RgNCz0LDQvdC40YfQtdGB0LrQuNC1INC4INC60LDQttC00YvQuSDQuNC3INC90LjRhSDQuNC80LXQtdGCINGB0LLQvtC4INGF0LDRgNCw0LrRgtC10YDQvdGL0LUg0L7RgdC+0LHQtdC90L3QvtGB0YLQuCwg0LrQvtGC0L7RgNGL0LUg0L/QvtC80L7Qs9Cw0Y7RgiDQstGA0LDRh9GDINC/0YDQuCDQsNGD0YHQutGD0LvRjNGC0LDRhtC40Lgg0YHQtdGA0LTRhtCwINC+0L/RgNC10LTQtdC70LjRgtGMINC4INC60LvQuNC90LjRh9C10YHQutGD0Y4g0LfQvdCw0YfQuNC80L7RgdGC0YwuINCk0YPQvdC60YbQuNC+0L3QsNC70YzQvdGL0LUg0YjRg9C80Ysg0LLQvtC30L3QuNC60LDRjtGCINCyINGA0LXQt9GD0LvRjNGC0LDRgtC1INCy0YDQtdC80LXQvdC90YvRhSDQuCDQvtCx0YDQsNGC0LjQvNGL0YUg0LIg0LrRgNC+0LLQvtGC0L7QutC1INGH0LXRgNC10Lcg0YHQtdGA0LTRhtCwINC4INGB0L7RgdGD0LTRiyDQuCDRgdC+0L/RgNC+0LLQvtC20LTQsNGO0YnQuNGF0YHRjyDRgdGC0YDRg9C60YLRg9GA0L3Ri9C80Lgg0LjQt9C80LXQvdC10L3QuNGP0LzQuCDQvNC40L7QutCw0YDQtNCwLiDQrdGC0Lgg0YjRg9C80Ysg0L7QsdGL0YfQvdC+INC40LzQtdGO0YIg0LzRj9Cz0LrQuNC5INGF0LDRgNCw0LrRgtC10YAsINC90LjQt9C60LDRjyDQuNC90YLQtdC90YHQuNCy0L3QvtGB0YLRjCwg0LLRgNC10LzQtdC90L3QviDQu9C+0LrQsNC70LjQt9GD0Y7RgtGB0Y8g0YfQsNGB0YLQviDQsiDQvtCx0LvQsNGB0YLQuCDQstC10YDRhdGD0YjQutC4INGB0LXRgNC00YbQsCDQuNC70Lgg0YMg0L7RgdC90L7QstCw0L3QuNC4INGB0LXRgNC00YbQsC4g0J7QvdC4INGH0LDRgdGC0L4g0YHQstGP0LfQsNC90L4g0YEg0YTQuNC30LjQvtC70L7Qs9C40YfQtdGB0LrQuNC80Lgg0YHQvtGB0YLQvtGP0L3QuNGP0LzQuCwg0LjQu9C4INC60LDQuiDQu9C40YXQvtGA0LDQtNC60LAg0LDQvdC10LzQuNGPLCDRjdC80L7RhtC40L7QvdCw0LvRjNC90L7QtSDQstC+0LfQsdGD0LbQtNC10L3QuNGPINC4INC60YDQvtCy0L7RgtC+0LouINCk0YPQvdC60YbQuNC+0L3QsNC70YzQvdGL0LUg0YjRg9C80Ysg0L7QsdGL0YfQvdC+INC90LUg0YHQvtC/0YDQvtCy0L7QttC00LDRjtGC0YHRjyDQuNC30LzQtdC90LXQvdC40Y/QvNC4INGB0LXRgNC00YbQsCDQuCDQvdC1INCy0YvQt9GL0LLQsNGO0YIg0L3QtdC00L7RgdGC0LDRgtC+0YfQvdC+0YHRgtGMINGB0LXRgNC00YbQsC4g0J7RgNCz0LDQvdC40YfQtdGB0LrQuNC1INGI0YPQvNGLINGB0LLRj9C30LDQvdGLINGBINC/0L7RgNC+0LrQsNC80Lgg0LrQu9Cw0L/QsNC90L7QsiDQstGA0L7QttC00LXQvdC90YvQtSDQsNC90L7QvNCw0LvQuNGP0LzQuCDQstC+0YHQv9C40YLQsNGC0LXQu9GM0L3Ri9C80Lgg0L/RgNC+0YbQtdGB0YHQsCDQuNC70Lgg0LTQuNGB0YLRgNC+0YTQuNGH0LXRgdC60LjQvNC4INC40LfQvNC10L3QtdC90LjRj9C80Lgg0LzQuNC+0LrQsNGA0LTQsC4g0K3RgtC4INGI0YPQvNGLINC80L7Qs9GD0YIg0LHRi9GC0Ywg0YHQuNGB0YLQvtC70LjRh9C10YHQutC40LzQuCDQuNC70Lgg0LTQuNCw0YHRgtC+0LvQuNGH0LXRgdC60LjQvNC4LCDQuNC80LXQtdGCINGA0LDQt9C70LjRh9C90L7RgdGC0Ywg0L7RgiDRgdC70LDQsdC+0LPQviDQtNC+INCz0YDQvtC80LrQvtCz0L4sINGH0LDRgdGC0L4g0YHQvtC/0YDQvtCy0L7QttC00LDQtdGC0YHRjyDQuNC30LzQtdC90LXQvdC40Y/QvNC4INC/0LXRgNCy0L7Qs9C+INC4INCy0YLQvtGA0L7Qs9C+INGC0L7QvdCwINGB0LXRgNC00YbQsCwg0LzQvtCz0YPRgiDQuNGA0YDQvtC00LjRgNC+0LLQsNGC0Ywg0LIg0LTRgNGD0LPQuNC1INC+0LHQu9Cw0YHRgtC4INC4INGH0LDRgdGC0L4g0LDRgdGB0L7RhtC40LjRgNGD0Y7RgiDRgSDQutC70LjQvdC40YfQtdGB0LrQuNC80Lgg0YHQuNC80L/RgtC+0LzQsNC80LgtINGD0YHRgtCw0LvQvtGB0YLQuCDQuCDQtNGA0YPQs9C40LzQuCDQv9GA0LjQt9C90LDQutCw0LzQuCDRgdC10YDQtNC10YfQvdC+0Lkg0L3QtdC00L7RgdGC0LDRgtC+0YfQvdC+0YHRgtC4LiDQmtGA0L7QvNC1INGC0L7Qs9C+LCDQv9C+INC60LvQsNGB0YHQuNGE0LjQutCw0YbQuNC4INCc0L7RidC40YbQsCDQstGL0LTQtdC70Y/RjtGC0YHRjyDRiNGD0LzRiyDQv9C+INC40YUg0LvQvtC60LDQu9C40LfQsNGG0LjRjiDQuCDRhNCw0LfQsNC8LiDQoNC10LPRg9GA0LPQuNGC0LDRhtC40L7QvdC90YvQtSwg0LTQuNCw0YHRgtC+0LvQuNGH0LXRgdC60LjQtSDRiNGD0LzRiyDRgdCy0Y/Qt9Cw0L3RiyDRgSDQvtCx0YDQsNGC0L3Ri9C8INGC0L7QutC+0Lwg0LrRgNC+0LLQuCDRh9C10YDQtdC3INC60LvQsNC/0LDQvdGLINCwINC00LjQsNGB0YLQvtC70LjRh9C10YHQutC40LUg0YjRg9C80Ysg0LPQvtCy0L7RgNGP0YIg0L4g0YHRgtC10L3QvtC30LUg0LrQu9Cw0L/QsNC90L7QsiDQuNC70Lgg0L/QvtCy0YvRiNC10L3QvdC+0Lwg0LTQsNCy0LvQtdC90LjQuCDQsiDQutCw0LzQtdGA0LDRhSDRgdC10YDQtNGG0LAuPGJyIC8+DQoyLiDQotC+0YnQsNGPINC60LjRiNC60LAg0YMg0L3QvtCy0L7RgNC+0LbQtNC10L3QvdGL0YUg0L7RgtC90L7RgdC40YLQtdC70YzQvdC+INC00LvQuNC90L3QtdC1INC/0L4g0L7RgtC90L7RiNC10L3QuNGOINC6INC00LvQuNC90LUg0YLQtdC70LAsINGH0LXQvCDRgyDQstC30YDQvtGB0LvRi9GFINC10LUg0YHRgtC10L3QutCwINGC0L7QvdC60LDRjywg0YXQvtGA0L7RiNC+INC60YDQvtCy0L7RgdC90LDQsdC20LXQvdCwINC4INC+0LHQu9Cw0LTQsNC10YIg0L/QvtCy0YvRiNC10L3QvdC+0Lkg0L/RgNC+0L3QuNGG0LDQtdC80L7RgdGC0YzRjiwg0YHQu9C40LfQuNGB0YLQsNGPINC+0LHQvtC70L7Rh9C60LAg0LXRidC1INC90LUg0LfRgNC10LvQsNGPINC10LUg0YTQtdGA0LzQtdC90YLQsNGC0LjQstC90LDRjyDQsNC60YLQuNCy0L3QvtGB0YLRjCDQv9C+0YHRgtC10L/QtdC90L3QviDRhNC+0YDQvNC40YDRg9GO0YLRgdGPINC/0LXRgNCy0YvRhSDQvNC10YHRj9GG0LXQsiDQttC40LfQvdC4LiDQkiDRgtC+0YnQtdC5INC60LjRiNC60LUg0L/RgNC+0LTQvtC70LbQsNC10YLRgdGPINC/0LXRgNC10LLQsNGA0LjQstCw0L3QuNC1INC4INCy0YHQsNGB0YvQstCw0L3QuNC1INC/0LjRgtCw0YLQtdC70YzQvdGL0YUg0LLQtdGJ0LXRgdGC0LIsINC+0YHQvtCx0LXQvdC90L4g0YPQs9C70LXQstC+0LTQvtCyLCDQsdC10LvQutC+0LIsINGN0LvQtdC60YLRgNC+0LvQuNGC0L7Qsiwg0Lgg0LLQvtC00Ysg0L7QtNC90LDQutC+INGDINC90L7QstC+0YDQvtC20LTQtdC90L3Ri9GFINCw0LrRgtC40LLQvdC+0YHRgtGMINC/0LjRidC10LLQsNGA0LjRgtC10LvRjNC90YvRhSDRhNC10YDQvNC10L3RgtC+0LIsINGC0LDQutC40YUg0LrQsNC6INC70LDQutGC0LDQt9CwLCDQvNCw0LvRjNGC0L7Qt9CwLCDQv9C10L/RgtC40LTQsNC30Ysg0LXRidC1INC90LUg0YHRgtCw0LHQuNC70YzQvdC+LCDQuCDQv9C+0Y3RgtC+0LzRgyDQsiDQuNC30LHRi9GC0LrQtSDQs9GA0YPQtNC90L7Qs9C+INC80L7Qu9C+0LrQsCDQvNC+0LbQtdGCINCy0YvQt9GL0LLQsNGC0Ywg0LHRgNC+0LbQtdC90LjQtS4g0JrRgNC+0LzQtSDRgtC+0LPQviDRgyDQvNC70LDQtNC10L3RhtC10LIg0LIg0Y3RgtC+0YIg0L/QtdGA0LjQvtC0INC90LUg0L/QvtC70L3QvtGB0YLRjNGOINGB0YTQvtGA0LzQuNGA0L7QstCw0L3RiyDQvNC+0YLQvtGA0LjQutCwINC20LXQu9GD0LTQutCwINC4INC60LjRiNC10YfQvdC40LrQvtCyLiDQn9C10YDQuNGB0YLQsNC70YzRgtC40LrQsCDQvNC+0LbQtdGCINCx0YvRgtGMINGD0LzQtdGA0LjRgtC10LvRjNC90L7QuSwg0YfRgtC+INCy0YvQt9GL0LLQsNC10YIg0YHQutC+0L/Qu9C10L3QuNC1INCz0LDQt9C+0LIsINGA0LDRgdGC0Y/QttC10L3QuNC1INGB0YLQtdC90L7QuiDQutC40YjQtdGH0L3QuNC60LAg0Lgg0LLRi9C30YvQstCw0LXRgiDRgdC/0LDQt9C8LCDRjdGC0L4g0Lgg0YHRgtCw0L3QvtCy0LjRgtGB0Y8g0L/RgNC40YfQuNC90L7QuSDQsdC10YHQv9C+0LrQvtC50YHRgtCy0LAg0YDQtdCx0LXQvdC60LAg0L/QvtGB0LvQtSDQutC+0YDQvNC70LXQvdC40Y8uINCc0L7QttC10YIg0LrRgNC40YfQsNGC0Ywg0YfRgtC+INC80L7QttC10YIg0LLRi9C30YvQstCw0YLRjCDRgNCy0L7RgtGDLiDQotCw0LrQvtC1INGB0L7RgdGC0L7Rj9C90LjQtSDRh9Cw0YHRgtC+INC+0LHQvtC30L3QsNGH0LDQtdGC0YHRjyDQutCw0Log0YTRg9C90LrRhtC40L7QvdCw0LvRjNC90LDRjyDQutC40YjQtdGH0L3QvtC1INC60L7Qu9C40LrQsCwg0L3QtSDQv9Cw0YLQvtC70L7Qs9C40Y8sINCwINGE0LjQt9C40L7Qu9C+0LPQuNGH0LXRgdC60L7QtSDRgdC+0YHRgtC+0Y/QvdC40LUg0LTQviDQv9C+0LvQvdC+0YHRgtGM0Y4g0YTQvtGA0LzQuNGA0L7QstCw0L3QuNC1INGE0LXRgNC80LXQvdGC0L7Qsi4g0KfRgtC+INCy0LDQttC90L4g0YPRh9C40YLRi9Cy0LDRgtGMINGDINC90L7QstC+0YDQvtC20LTQtdC90L3Ri9GFINC4INC80LvQsNC00LXQvdGG0LXQsiDQvtGH0LXQvdGMINCy0YvRgdC+0LrQsNGPINGH0YPQstGB0YLQstC40YLQtdC70YzQvdC+0YHRgtGMINC60LjRiNC10YfQvdC40LrQsC0g0LLRi9GB0L7QutCw0Y8g0L7RgdC80L7Qu9GP0YDQvdC+0YHRgtGMLCDQv9C10YDQtdC10LTQsNC90LjQtSwg0YHQu9C40YjQutC+0Lwg0LHRi9GB0YLRgNC+0LUg0LjQu9C4INC+0LHQuNC70YzQvdC+0LUg0LrQvtGA0LzQu9C10L3QuNC1LCDQsCDRgtCw0LrQttC1INC/0YDQvtCz0LvQsNGC0YvQstCw0L3QuNC1INCy0L7Qt9C00YPRhdCwINCy0L4g0LLRgNC10LzRjyDQutC+0YDQvNC70LXQvdC40LUg0LzQvtC20LXRgiDQv9GA0LjQstC+0LTQuNGC0Ywg0Log0LHRi9GB0YLRgNC+0LzRgyDQs9Cw0LfQvtC+0LHRgNCw0LfQvtCy0LDQvdC40Y4g0Lgg0L/RgNC+0LLQvtGG0LjRgNC+0LLQsNGC0Ywg0LHQvtC70LXQstC+0Lkg0YHQuNC90LTRgNC+0LwuIC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01" table:style-name="ce1">
            <text:p>1067101</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MS4g0J/QviDQutC70LDRgdGB0LjRhNC40LrQsNGG0LjQuCDQny7QoS4g0JzQvtGJ0LjRh9CwINGI0YPQvNGLINGB0LXRgNC00YbQsCDQv9C+0LTRgNCw0LfQtNC10LvRj9GO0YLRgdGPINC90LAg0YLQsNC60LjQtSDQstC40LTRizog0J7QtNC40L0g0LjQtyDQvdC40YUg0LLQuNC0LSDRhNC40LfQuNC+0LvQvtCz0LjRh9C10YHQutC40LUg0YjRg9C80YssINC60L7RgtC+0YDRi9C1INC/0L4g0LTRgNGD0LPQvtC80YMg0L3QsNC30YvQstCw0Y7RgiDQtdGJ0LUg0L3QtdCy0LjQvdC90YvQvNC4LiDQrdGC0L7RgiDQstC40LQg0L3QtSDQvtGC0L3QvtGB0LjRgtGB0Y8g0Log0L/QsNGC0L7Qu9C+0LPQuNGH0LXRgdC60LjQvCDRiNGD0LzQsNC8LCDQuCDQv9GA0Lgg0LXQs9C+INCy0YvRgdC70YPRiNC40LLQsNC90LjQuCDQvdC10LvRjNC30Y8g0LPQvtCy0L7RgNC40YLRjCDQviDQvdCw0LvQuNGH0LjQuCDQv9Cw0YLQvtC70L7Qs9C40Lgg0YMg0YDQtdCx0LXQvdC60LAuINCe0YHQvtCx0LXQvdC90L4g0Y3RgtC+0YIg0YjRg9C8INCy0YvRgdC70YPRiNC40LLQsNC10YLRgdGPINC90LAg0YHQuNGB0YLQvtC70LUuINCYINC+0YHQvtCx0LXQvdC90L4g0YHQuNC70YzQvdC+INC/0YDQuCDQstC00L7RhdC1INGA0LXQsdC10L3QutCwLiDQotCw0LrQttC1INC00LvRjyDRjdGC0LjRhSDRiNGD0LzQvtCyINGF0LDRgNCw0LrRgtC10YDQvdC+INGC0L4sINGH0YLQviDQvtC90Lgg0LzQvtCz0YPRgiDQvNC10L3Rj9GC0YzRgdGPINC/0YDQuCDQuNC30LzQtdC90LXQvdC40Lgg0L/QvtC70L7QttC10L3QuNGPINGDINGA0LXQsdC10L3QutCwLiDQnNC+0LPRg9GCINC4INGB0L7QstGB0LXQvCDQuNGB0YfQtdC30L3Rg9GC0YwuINCh0LvQtdC00YPRjtGJ0LjQuSDQstC40LQtINGE0YPQvdC60YbQuNC+0L3QsNC70YzQvdGL0Lkg0YjRg9C8LCDRhdCw0YDQsNC60YLQtdGA0LXQvSDQv9GA0Lgg0L/QsNGC0L7Qu9C+0LPQuNGP0YUg0YHQtdGA0LTRhtCwLCDQsCDQuNC80LXQvdC90L4g0YTRg9C90LrRhtC40L7QvdCw0LvRjNC90L7QuSDQtdCz0L4g0YHQvtGB0YLQsNCy0LvRj9GO0YnQtdC5LiDQotGA0LXRgtC40Lkg0YLQuNC/LSDRjdGC0L4g0LrQvtCz0LTQsCDQsiDQvtGA0LPQsNC90LjQt9C80LUg0LjQvNC10LXRgtGB0Y8g0L/QsNGC0L7Qu9C+0LPQuNGPINC00YDRg9Cz0LjRhSDQvtGA0LPQsNC90L7QsiDQuNC70Lgg0YHQuNGB0YLQtdC8LCDQuCDRjdGC0L4g0L7QutCw0LfRi9Cy0LDQtdGCINC/0YDRj9C80L7QtSDQstC70LjRj9C90LjQtSDQvdCwINGB0LXRgNC00YbQtSDQuCDQstGL0YHQu9GD0YjQuNCy0LDQvdC40LUg0YjRg9C80L7QsiDQv9GA0Lgg0Y3RgtC+0LwuINCi0LDQutC+0Lkg0YLQuNC/INC90LDQt9GL0LLQsNC10YLRgdGPIC3QvtGA0LPQsNC90LjRh9C10YHQutC40LUuINCi0LDQutC20LUg0LjQvNC10LXRgtGB0Y8g0YjRg9C8LCDQutC+0YLQvtGA0YvQuSDRhdCw0YDQsNC60YLQtdGA0LjQt9GD0LXRgtGB0Y8g0YLQtdC8LCDRh9GC0L4g0YMg0YDQtdCx0LXQvdC60LAg0L3QtdC30LDQutGA0YvRgtC+INC+0LLQsNC70YzQvdC+0LUg0L7QutC90L4uINCh0LjQu9GM0L3QvtCz0L4g0LLQu9C40Y/QvdC40Y8g0L3QsCDQt9C00L7RgNC+0LLRjNC1INGA0LXQsdC10L3QutCwINC00LDQvdC90L7QtSDRj9Cy0LvQtdC90LjQtSDQvdC1INC+0LrQsNC30YvQstCw0LXRgiwg0L3QviDRiNGD0Lwg0LLRi9GB0LvRg9GI0LjQstCw0LXRgtGB0Y8uINCQINC+0LLQsNC70YzQvdC+0LUg0L7QutC90L4tINGN0YLQviDQvtGC0LLQtdGA0YHRgtC40LUg0LzQtdC20LTRgyDQv9GA0LXQtNGB0LXRgNC40Y/QvNC4LCDQsiDQvNC10LbQv9GA0LXQtNGB0LXRgNC00L3QvtC5INC/0LXRgNC10LPQvtGA0L7QtNC60LUuINCe0L3QviDQvdC10L7QsdGF0L7QtNC40LzQviDQtNC70Y8g0YLQvtCz0L4sINGH0YLQvtCx0Ysg0LrRgNC+0LLRjCDQuNC3INC/0YDQsNCy0L7Qs9C+INC/0YDQtdC00YHQtdGA0LTQuNGPINC/0L7RgdGC0YPQv9Cw0LvQsCDQvdCw0LvQtdCy0L4sINC40Lcg0LHQvtC70YzRiNC+0LPQviDQutGA0YPQs9CwINC60YDQvtCy0L7QvtCx0YDQsNGJ0LXQvdC40Y8g0LIg0LzQsNC70YvQuSwg0LzQuNC90YPRjyDQv9GA0Lgg0Y3RgtC+0Lwg0LvQtdCz0LrQuNC1LiDQotCw0Log0LrQsNC6INC+0L3QuCDQtdGJ0LUg0L3QtSDRhNGD0L3QutGG0LjQvtC90LjRgNGD0Y7Rgi4g0Jgg0L7QstCw0LvRjNC90L7QtSDQvtC60L3QviDQtNC+0LvQvdC+INC30LDQutGA0YvRgtGM0YHRjyDQsiDRgtC+INCy0YDQtdC80Y8sINC60LDQuiDRgNC10LHQtdC90L7QuiDQtNC10LvQsNC10YIg0L/QtdGA0LLRi9C5INCy0LTQvtGFINC4INC60LjRgdC70L7RgNC+0LQg0L/QvtC/0LDQtNCw0LXRgiDQsiDQu9C10LPQutC40LUuINCV0YHQu9C4INGN0YLQviDQvtC60L3QviDQvdC1INC30LDQutGA0YvQstCw0LXRgtGB0Y8g0LTQviDQv9C+0LvRg9GC0L7RgNCwINC70LXRgiwg0YLQviDRjdGC0L4g0YPQttC1INGP0LLQu9GP0LXRgtGB0Y8g0LLRgNC+0LbQtNC10L3QvdGL0Lwg0L/QvtGA0L7QutC+0Lwg0YHQtdGA0LTRhtCwLCDQutC+0YLQvtGA0YvQuSDQstC70LXRh9C10YIg0LfQsCDRgdC+0LHQvtC5INC/0LDRgtC+0LvQvtCz0LjRh9C10YHQutC40Lkg0YjRg9C8LiAgPGJyIC8+DQo8YnIgLz4NCjIuINCi0L7RidCw0Y8g0LrQuNGI0LrQsC0g0L7RgtC00LXQuyDRgtC+0L3QutC+0LPQviDQutC40YjQtdGH0L3QuNC60LAuINCe0L0g0YDQsNGB0L/QvtC70L7QttC10L0g0L/QtdGA0LXQtCDQv9C+0LTQstC30LTQvtGI0L3Ri9C8INC+0YLQtNC10LvQvtC8INC60LjRiNC60LguINCQ0L3QsNGC0L7QvNC+LSDRhNC40LfQuNC+0LvQvtCz0LjRh9C10YHQutC40LUg0L7RgdC+0LHQtdC90L3QvtGB0YLQuCDRgtC+0YnQtdC5INC60LjRiNC60Lgg0YMg0LTQtdGC0LXQuSDQt9Cw0LrQu9GO0YfQsNGO0YLRgdGPINCyINGC0L7QvCwg0YfRgtC+INGB0YLQtdC90LrQsCDQtNCw0L3QvdC+0LPQviDQvtGC0LTQtdC70LAg0LrQuNGI0LXRh9C90LjQutCwINCx0L7Qu9C10LUg0YLQvtC70YHRgtCw0Y8sINC/0YDQvtGB0LLQtdGCINC90LDQvtCx0L7RgNC+0YIg0YHRg9C20LXQvS4g0KLQsNC60LbQtSDRhdCw0YDQsNC60YLQtdGA0L3QviDRh9C10YLQutC40Lkg0LrQvtC90YLRg9GAINCy0LTQsNCy0LvQuNCy0LDQvdC40LksINC60L7RgtC+0YDRi9C5INGF0LDRgNCw0LrRgtC10YDQtdC9INC00LvRjyDRgtC+0YnQtdC5INC60LjRiNC60LguINCi0LDQutC20LUg0L7RgdC+0LHQtdC90L3QvtGB0YLRjCDQtNCw0L3QvdC+0LPQviDQvtGC0LTQtdC70LAg0LIg0YLQvtC8LCDRh9GC0L4g0YMg0L3QvtCy0L7RgNC+0LbQtNC10L3QvdGL0YUg0L/RgNC+0LjRgdGF0L7QtNC40YIg0LLRgdCw0YHRi9Cy0LDQvdC40LUg0LLRgdC10YUg0L/QuNGC0LDRgtC10LvRjNC90YvRhSDRjdC70LXQvNC10L3RgtC+0LIg0YfQtdGA0LXQtyDQstC+0YDRgdC40L3QutC4INGC0L7RidC10Lkg0LrQuNGI0LrQuC4g0J3QviDQvNGLINC/0YDQtdC60YDQsNGB0L3QviDQt9C90LDQtdC8LCDRh9GC0L4g0YMg0LTQtdGC0LXQuSDQttC10LvRg9C00L7Rh9C90L4t0LrQuNGI0LXRh9C90LDRjyDRgdC40YHRgtC10LzQsCDQv9GA0L7QtNC+0LvQttCw0LXRgiDRhNC+0YDQvNC40YDQvtCy0LDRgtGM0YHRjyDRgSDQstC+0LfRgNCw0YHRgtC+0LwuINCYINCyINC00LLRg9GF0LzQtdGB0Y/Rh9C90L7QvCDQstC+0LfRgNCw0YHRgtC1INCy0YHQtSDQtdGJ0LUg0YHRh9C40YLQsNC10YLRgdGPINC90LXQt9GA0LXQu9GL0LwuINCW0LDQu9C+0LHRiyDRgyDRgNC10LHQtdC90LrQsCDQvNC+0LPRg9GCINCy0L7Qt9C90LjQutCw0YLRjCDQv9C+INC90LXQutC+0YLQvtGA0YvQvCDQv9GA0LjRh9C40L3QsNC8LiDQn9C10YDQstCw0Y8tINC90LXQt9GA0LXQu9C+0YHRgtGMINC20LrRgi4g0JjQtyDRjdGC0L7Qs9C+INGB0LvQtdC00YPQtdGCINGC0LDQuiDQttC1INGC0L4sINGH0YLQviDRhNC10YDQvNC10L3RgtGLINC/0LjRidC10LLQsNGA0LXQvdC40Y8g0LXRgdGC0YwsINC90L4g0LIg0L3QtdCx0L7Qu9GM0YjQuNGFINC60L7Qu9C40YfQtdGB0YLQstCw0YUuINCYINCyINGG0LXQu9C+0LwsINC/0YDQtdC+0LHQu9Cw0LTQsNC10YIg0YTQtdGC0LDQu9GM0L3Ri9C5INC/0LXQv9GB0LjQvSwg0LrQvtGC0L7RgNGL0Lkg0YDQsNGB0YnQtdC/0LvRj9C10YIg0LLQtdGJ0LXRgdGC0LLQsCDRgtCw0LosINGH0YLQvtCx0Ysg0LjQvNC80YPQvdC+0LPQu9C+0LHRg9C70LjQvdGLINC80LDRgtC10YDQuCDQvNC+0LPQu9C4INCx0YvRgtGMINGB0L7RhdGA0LDQvdC10L3RiyDQuCDQvtC60LDQt9GL0LLQsNGC0Ywg0LjQvNGD0L3QvdC+0LfQsNGJ0LjRgtC90YPRjiDRhNGD0L3QutGG0LjRjiDQvdCwINC+0YDQs9Cw0L3QuNC30Lwg0YDQtdCx0LXQvdC60LAuINCi0LDQutC20LUg0LHQtdGB0L/QvtC60L7QudGB0YLQstC+INC80L7QttC10YIg0LHRi9GC0Ywg0YHQstGP0LfQsNC90L4sINC40LzQtdC90L3QviDRgSDRgtC10LwsINGH0YLQviDQv9GA0Lgg0LPRgNGD0LTQvdC+0Lwg0LLRgdC60LDRgNC80LvQuNCy0LDQvdC40Lgg0YDQtdCx0LXQvdC+0Log0LzQvtC20LXRgiDQt9Cw0LPQu9Cw0YLRi9Cy0LDRgtGMINCy0L7Qt9C00YPRhS4g0JIg0LTQsNC70YzQvdC10LnRiNC10Lwg0Y3RgtC+0YIg0LLQvtC30LTRg9GFINC/0YDQtdCy0YDQsNGJ0LDQtdGC0YHRjyDQsiDQttC10LvRg9C00LrQtSwg0L/QvtC0INC00LXQudGB0YLQstC40LXQvCDRhNC10YDQvNC10L3RgtC+0LIsINCyINC/0LXQvdGDLiDQmtC+0YLQvtGA0LDRjyDQuCDQt9Cw0YHRgtCw0LLQu9GP0LXRgiDRgNC10LHQtdC90LrQsCDQsdC10YHQv9C+0LrQvtC40YLRjNGB0Y8uINCY0Lcg0LfQsCDRjdGC0L7Qs9C+INGD0YXRg9C00YjQsNC10YLRgdGPINC/0LXRgNC40YHRgtCw0LvRjNGC0LjQutCwINC60LjRiNC10YfQvdC40LrQsC4g0KLQsNC60LbQtSDRgyDRgNC10LHQtdC90LrQsCwg0LjQvNC10L3QvdC+LCDQv9C+0Y3RgtC+0LzRgyDQv9C+0Y/QstC70Y/RjtGC0YHRjyDQutC+0LvQuNC60Lgg0Lgg0LPQsNC30YsuIC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20" table:style-name="ce1">
            <text:p>1067120</text:p>
          </table:table-cell>
          <table:table-cell office:value-type="string" table:style-name="ce1">
            <text:p>russian</text:p>
          </table:table-cell>
          <table:table-cell office:value-type="string" table:style-name="ce1">
            <text:p>Билет8&amp;lt;br /&amp;gt; 1.Перечислите шумы сердца по классификации П.С.Мощича и дайте им характеристику.&amp;lt;br /&amp;gt; 2. На приеме в поликлинике, мама с ребенком 2 месяцев с жалобами на беспокойство ребенка после кормления грудью. Какие анатомо-физиологические особенности тощей кишки у детей Вы знаете? Чем вызвано беспокойство?&amp;lt;br /&amp;gt;</text:p>
          </table:table-cell>
          <table:table-cell office:value-type="string" table:style-name="ce1">
            <text:p>MS4g0KMg0L3QsNGBINC10YHRgtGMINC60LvQsNGB0YHQuNGE0LjQutCw0YbQuNGPINGI0YPQvNC+0LIg0L/QviDQny7QoS4g0JzQvtGJ0LjRh9CwINC4INC+0L3QuCDQtNC10LvRj9GC0YHRjyDRgtCw0LogLSAxLiDQntGA0LPQsNC90LjRh9C10YHQutC40LUg0YjRg9C80YsgLCDQutC+0YLQvtGA0YvQtSDRgdCy0Y/Qt9Cw0L3QvdGL0LUg0YEg0LLQvdC10YHQtdGA0LTQtdGH0L3Ri9C80Lgg0LDQvdCw0YLQvtC80LjRh9C10YHQutC40LzQuCDQuNC30LzQtdC90LXQvdC40Y/QvNC4ICwg0YLQsNC60LjQtSDQutCw0Log0L/QtdGA0LXQs9C+0YDQvtC00LrQuCDQsiDQutGA0YPQv9C90YvRhSDRgdC+0YHRg9C00LDRhSwg0LAg0YLQsNC6INC20LUg0LLQvdGD0YLRgNC40YHQtdGA0LTQtdGH0L3Ri9C80Lgg0LjQt9C80LXQvdC10L3QuNGP0LzQuCDQutC70LDQv9Cw0L3QvtCyINC4INGB0LXRgNC00YbQtS4g0KXQsNGA0LDQutGC0LXRgNC40YHRgtC40LrQsCDRiNGD0LzQsCAtINC/0L7RgdGC0L7Rj9C90L3Ri9C1ICwg0LPRgNGD0LHQviDQtNGD0Y7RidC40LUsINC30LDQvdC40LzQsNC10YIg0L7Qv9GA0LXQtNC10LvQtdC90L3Rg9GOINGE0LDQt9GDICjQtNC40LDRgdGC0L7Qu9C40YfQtdGB0LrQuNC1INC40LvQuCDRgdC40YHRgtC+0LvQuNGH0LXRgdC60LjQtSkg0L3QviDRh9Cw0YnQtSDQstGB0LXQs9C+INC+0L/RgNC10LTQtdC70Y/QtdGC0YHRjyDRgdC40YHRgtC+0LvQuNGH0LXRgdC60LjQtSDRiNGD0LzRiyDQuCDRiNGD0Lwg0YfQsNGB0YLQviDRgdC+0L/RgNC+0LLQvtC20LTQsNGO0YLRgdGPINC/0YDQuNC30L3QsNC60LDQvNC4INGB0LXRgNC00LXRh9C90L7QuSDQvdC10LTQvtGB0YLQsNGC0L7Rh9C90L7RgdGC0LggLSDQstGA0L7QttC00LXQvdC90YvQtSDQv9C+0YDQvtC60LggKNC/0YDQuCDQvdC1INC30LDQutGA0YvRgtC40Lgg0L7RgtCy0LXRgNGB0YLQuNC4IC3QvtCy0LDQu9GM0L3QvtC1ICwg0LDRgNGC0LXRgNC40LDQu9GM0L3QvtC1INC4INCy0LXQvdC+0LfQvdC+0LU7INC00LXRhNC10LrRgiDQvNC10LbQv9GA0LXQtNGB0LXRgNC00L3QvtCz0L4vLdC20LXQu9GD0LTQvtGH0LrQvtCy0L7Qs9C+INC/0LXRgNC10LPQvtGA0L7QtNC60Lgg0Lgg0YLQtCkg0LjQu9C4INC/0YDQuNC+0LHRgNC10YLQtdC90L3Ri9C1IC0g0YHRgtC10L3QvtC30Ysg0Lgg0L3QtdC00L7RgdGC0LDRgtC+0YfQvdC+0YHRgtC4INC60LvQsNC/0LDQvdC+0LIuIDIu0YTRg9C90LrRhtC40L7QvdCw0LvRjNC90YvQtSDRiNGD0LzRiyAsINGB0LLRj9C30LDQvdC90YvQtSDRgSDQuNC30LzQtdC90LXQvdC40Y/QvNC4INGC0L7QutCwINC60YDQvtCy0Lgg0L/RgNC4INC+0YLRgdGD0YLRgdGC0LLQuNC4INGB0YLRgNGD0LrRgtGD0YDQvdGL0YUg0LjQt9C80LXQvdC10L3QuNC4LiDQntC90LggLSDQvNGP0LPQutC+INC00YPRjtGJ0LjQtSwg0LzRg9C30YvQutCw0LvRjNC90YvQtSwg0L3QtdC/0L7RgdGC0L7Rj9C90L3Ri9C1IC0g0YPRgdC40LvQuNCy0LDRjtGC0YHRjyDQv9GA0Lgg0YTQuNC30LjRh9C10YHQutC40YUg0L3QsNCz0YDRg9C30LrQsNGFICwg0YHQu9GD0YjQsNC10YLRgdGPINCyINC+0YHQvdC+0LLQvdC+0Lwg0YHQuNGB0YLQvtC70LjRh9C10YHQutC40LUg0YjRg9C80YssINC90LUg0LjRgNGA0LDQtNC40YDRg9C10YIuINCSINC+0YHQvdC+0LLQvdC+0Lwg0LLRgdGC0YDQtdGH0LDRjtGC0YHRjyDQv9GA0Lgg0LDQvdC10LzQuNC4ICwg0YLQsNGF0LjQutCw0YDQtNC40LgsINGD0YHQuNC70LXQvdC90L7QvCDRgNC+0YHRgtC1INC+0YDQs9Cw0L3QuNC30LzQsC4gMy4g0KTQuNC30LjQvtC70L7Qs9C40YfQtdGB0LrQuNC1INGI0YPQvNGLICwg0LrQvtGC0L7RgNGL0LUg0LIg0L7RgdC90L7QstC90L7QvCDQv9GA0L7Rj9Cy0LvRj9GO0YLRgdGPINCyINGA0LDQvdC90LXQvCDQstC+0LfRgNCw0YHRgtC1INC4INC70L7QutCw0LvQuNC30YPRjtGC0YHRjyDRh9Cw0YHRgtC+INCy0LTQvtC70Ywg0LvQtdCy0L7Qs9C+INC60YDQsNGPINCz0YDRg9C00LjQvdGLLiDQntC90Lgg0LzRj9Cz0LrQuNC1ICwg0YHQuNGB0YLQvtC70LjRh9C10YHQutC40LUg0Lgg0LjRgdGH0LXQt9Cw0Y7RgiDRgSDQstC+0LfRgNCw0YHRgtC+0LwuINCY0Lcg0YTQuNC30LjQvtC70L7Qs9C40YfQtdGB0LrQuNGFINCy0YHRgtGA0LXRh9Cw0Y7RgtGB0Y8g0YjRg9C8INCy0LXQvdC+0LfQvdC+0LPQviDQstC+0LfQstGA0LDRgtCwINC4INGI0YPQvCDQv9GD0LvRjNGB0LDRhtC40Lgg0LvQtdCz0L7Rh9C90L7QuSDQsNGA0YLQtdGA0LjQuC4g0JAg0YLQsNC60LbQtSDQtdGB0YLRjCDRgdC80LXRiNCw0L3QvdGL0LUg0YjRg9C80YsgLCDRgtC+INC10YHRgtGMINC/0YDQuNGB0YPRgtGB0YLQstGD0Y7RgiAyINGI0YPQvNCwINGB0YDQsNC30YMg0LzQtdC20LTRgyDRgtGA0LXQvC48YnIgLz4NCjxiciAvPg0KMi4g0JfQtNC10YHRjCDRgyDQtNC10YLQtdC5INGA0LDQvdC90LXQs9C+INCy0L7Qt9GA0LDRgdGC0LAg0LjQvNC10Y7RgtGB0Y8g0L3QtdGB0LrQvtC70YzQutC+INC+0YHQvtCx0LXQvdC90L7RgdGC0LXQuSDRgtC+0YnQtdC5INC60LjRiNC60LggLSAxLiDQnNGL0YjQtdGH0L3Ri9C5INGB0LvQvtC5INGB0LvQsNCx0L4g0YDQsNC30LLQuNGCINC4INC40Lct0LfQsCDRjdGC0L7Qs9C+INC80L7RgtC+0YDQuNC60LAg0LrQuNGI0LrQuCDQvtGB0LvQsNCx0LvQtdC90L3QsNGPIC0g0Y3RgtC+INC80L7QttC10YIg0L/RgNC40LLQvtC00LjRgiDQuiDRjdC/0LjQt9C+0LTQsNC8INGB0L/QsNGB0YLQuNGH0LXRgdC60LjRhSDRgdC+0LrRgNCw0YnQtdC90LjQuS4gMi4g0KHQu9C40LfQuNGB0YLQsNGPINGC0L7QttC1INCx0L7Qu9C10LUg0YDRi9GF0LvQsNGPINC4INC/0YDQvtC90LjRhtCw0LXQvNC+0YHRgtGMINC/0L7QstGL0YjQtdC90LAgIC0g0Y3RgtC+INGB0L/QvtGB0L7QsdGB0YLQstGD0LXRgiDQstGL0YHQvtC60YPRjiDQstGB0LDRgdGL0LLQsNC10LzQvtGB0YLRjCDQvdC+INCyINGC0L4g0LbQtSDQstGA0LXQvNGPINC/0L7QstGL0YjQsNC10YLRgdGPINGH0YPQstGB0YLQstC40YLQtdC70YzQvdC+0YHRgtGMINC6INGE0LXRgNC80LXQvdGC0LDQvCDQuCDQsNC70LvQtdGA0LPQtdC90LDQvC4gMy7QpNC10YDQvNC10L3RgtGLICjQu9Cw0LrRgtCw0LfQsCDQvNCw0LvRjNGC0LDQt9CwKSDQvdC10LTQuNGE0YTQtdGA0LXQvdGG0LjRgNC+0LLQsNC90YssINC90LUg0YHQv9C+0YHQvtCx0L3RiyDQv9C+0LvQvdC+0YHRgtGM0Y4g0YDQsNGB0YnQtdC/0LvRj9GC0Ywg0L/QuNGC0LDRgtC10LvRjNC90YvQtSDQstC10YnQtdGB0YLQstCwICjQs9GA0YPQtNC90L7QtSDQvNC+0LvQvtC60L4pICwg0Y3RgtC+INC80L7QttC10YIg0LLRi9C30LLQsNGC0Ywg0LHRgNC+0LbQtdC90LjQtSDQuCDQstC30LTRg9GC0LjQtSDQttC40LLQvtGC0LAuIDQuINCR0L7Qu9GM0YjQvtC1INC60L7Qu9C40YfQtdGB0YLQstC+INC70LjQvNGE0L7QuNC00L3QvtC5INGC0LrQsNC90LggLSDQvdCw0L/RgNC40LzQtdGAINGDINC80LDRgtC10YDQuCDQsdGD0LTQtdGCINC60YDQvtCy0Y/QvdCw0Y8g0LzQvtC70L7QutCwINC40LvQuCDRh9C1INGC0L4g0LTRgNGD0LPQvtC1ICwg0YLQviDRgyDQtNC10YLQtdC5INGB0YDQsNC30YMg0LDQutGC0LjQstC40YDRg9C10YLRgdGPINC40LzQvNGD0L3QvdCw0Y8g0YHQuNGB0YLQtdC80LAgNS7QndC1INC30YDQtdC70LDRjyDRgNC10LPRg9C70Y/RhtC40Y8g0LLQtdCz0LXRgtCw0YLQuNCy0L3QvtC5INC90LXRgNCy0L3QvtC5INGB0LjRgdGC0LXQvNGLIC0g0YLQvtGJ0LDRjyDQutC40YjQutCwINCx0L7Qu9C10LUg0YHQutC70L7QvdC90LAg0Log0LrQuNGI0LXRh9C90YvQvCDQutC+0LvQuNC60LDQvCDQuCDQtNC40YHQutC+0LzRhNC+0YDRgtC90YvQvCDQvtGJ0YPRidC10L3QuNGP0LwuIDxiciAvPg0K0JfQtNC10YHRjCDQvdCw0LjQsdC+0LvQtdC1INCy0LXRgNC+0Y/RgtC90LDRjyDQv9GA0LjRh9C40L3QsCAtINGE0LjQt9C40L7Qu9C+0LPQuNGH0LXRgdC60LjQtSDQutC40YjQtdGH0L3Ri9C1INC60L7Qu9C40LrQuCAsINC60L7RgtC+0YDRi9C1INCy0L7Qt9C90LjQutCw0Y7RgiDQv9GA0Lgg0L/QvtCy0YvRiNC10L3QvdC+0Lwg0LPQsNC30L7QvtCx0YDQsNC30L7QstCw0L3QuNC4ICwg0LLRgNC10LzQtdC90L3QvtC5INGE0LXRgNC80LXQvdGC0L3QvtC5INC90LXQtNC+0YHRgtCw0YLQvtGH0L3QvtGB0YLQuCAsINC/0L7QstGL0YjQtdC90L3QvtC5INGH0YPQstGB0YLQstC40YLQtdC70YzQvdC+0YHRgtC4INC60LjRiNC60LAg0LjQu9C4INC/0YDQuCDQuNC30LHRi9GC0L7Rh9C90L7QvCDQutC+0YDQvNC70LXQvdC40LggLCDQsCDRgtCw0LrQttC1INC10YHQu9C4INGA0LXQsdC10L3QvtC6INCy0L4g0LLRgNC10LzRjyDQutC+0YDQvNC70LXQvdC40Lgg0LfQsNCz0LvQsNGC0YvQstCw0LXRgiDQvNC90L7Qs9C+INCy0L7Qt9C00YPRhdCwICwg0YLQviDQvNC+0LbQtdGCINC/0YDQuNCy0L7QtNC40YIg0Log0LzQtdGC0LXQvtGA0LjQt9C80YMu</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по 1 вопросу не сказано о 4 группе функциональной, при внесердечных заболеваниях.</text:p>
          </table:table-cell>
          <table:table-cell office:value-type="float" office:value="0" table:style-name="ce1">
            <text:p>0</text:p>
          </table:table-cell>
          <table:table-cell table:number-columns-repeated="16376"/>
        </table:table-row>
        <table:table-row table:style-name="ro1">
          <table:table-cell office:value-type="float" office:value="915103" table:style-name="ce1">
            <text:p>915103</text:p>
          </table:table-cell>
          <table:table-cell office:value-type="string" table:style-name="ce1">
            <text:p>english</text:p>
          </table:table-cell>
          <table:table-cell office:value-type="string" table:style-name="ce1">
            <text:p>Ticket 8&amp;lt;br /&amp;gt; 1. List the heart murmurs according to the classification of P. S. Moschic and characterize them.&amp;lt;br /&amp;gt; 2. At the сonsultation, a mother with a 2-month-old baby complaining of anxiety of the baby after breastfeeding. What anatomical and physiological features of the jejunum in children do you know? What causes anxiety?&amp;lt;br /&amp;gt;</text:p>
          </table:table-cell>
          <table:table-cell office:value-type="string" table:style-name="ce1">
            <text:p>IE11bW1lcnkgYXJlIGV4dGVybmFsIGFjY29yZGluZyB0byBUSEUgY2xhc3NpZmljYXRpb24gb2YgUC5zIHVudXN2YWwgc291bmRtYWRlIGJ5IGJsb29kIGNpcmN1bGF0ZSAgdGhyb3VnaCB0aGUgaGVhcnQgY2hhbWJlcnMgb3IgdGhlIHZhbHZlIHRocm91Z2hibG9vZCB2ZXNzZWxzIG5lYXIuIHRoZSBoZWFydCB0eXBlcyBvZiBoZWFydCBtdW1tZXJzIGluY2x1ZGUgdGhlIGZvbGxvd2luZyAuIHN5c3RvbGljIG11bW1lcnMgYSBoZWFydCBtdW1tZXJzIHRoYXQgb2NjZXJzIGR1cmluZyBhIGhlYXJ0IG11c2NsZSBjb250cmFjdGlvbiAuIHN5c3RvbGljIG11bW1lcnMgYXJlIGRpdmRlZCBpbnRvIGVqZWN0aW9uIG11bW1lcnMoIG9mdGVuIGR1ZSB0byBibG9vZCBmbG93IHRocm91Z2ggYSBuYXJyb3dpbmcgdmVzc2VsIG9yIGlycmFndWxlciB2YWx2ZSApLiAgYW5kIHJlZ3VsYXRlcnkgbXVtbWVyeSAgdHlwaWNhbCBtdW1tZXIgMi4+ICBhdCB0aGUgbW90aGVyIGNvbnN1bHRhbnRpb24gYSBtb3RoZXIgd2l0aCAyIG1vbnRoIG9sZCBiYWJ5IGNvbXBsaWNhdGlvbiBvZiBhbnhpZXR5IG9mIHRoZSBiYWJ5IGF0IGJyZWF0aGluZyB3aGF0IGFuYXRvbWljYWwgdGhlIGplanVuYW0gaXMgdGhlIHNlY29uZGVyeSBwYXJ0IG9mIHRoZSBzbWFsbCBpbnRlcnRoaW4gYW5zIHBsYXlhcyAgYSB2aXRhbCAgcm9sZSBpbiBkaWdlc3Rpb24gYW5kIGFib3NidGlvbiBvZiBudXRyaWVudCBpbiBzdG9tYWNoIGlmIHlvdW5nIGluZmFjdCAuIHRoZSBqYWp1bnVtIGlzIHN0aWxsIGRldmxvdnBpbmcgYW5kIGl0IG1heSBub3QgYnV0IGZ1bGxmdW5jdGlvbiB3aGljaCAgdGhlIGxlYWQgZ2FzdGludGVzdGluYWwgdGhpcyBpcyBwYXJ0IHRvIGRldmlkZSB0byBmb29kIHRyYWN0IG9yIGdhcyBleGNoYW5nIHBhc3MgdGhheSBtYXkgbW9zdCBpbmZhdGlvbiBwYXJ0IG9mIHRocm90IG1heSBiZSBiYWN0aXJhbCBpbmZhY3Rpb24gdGhhdCByZXNvbiBkZWZpY2F1bHQgdG8gYnJlYXRoaW5nIGFuZCBtYXkgYmUgY2F1c2VkIHRvIGxha2Ugb2Ygb3h5Z2VuIHRoZW4gIGFueGl0eSAuIHRoYXQgY29tcGxpY2F0aW9uIG9mIGJyZWFzdGZlZWRpbmcgc29tZSBraW5kIGlmIGNsaWRyZW4gamVqdW51bSBwYXJ0IGlzIGJsb2tpbmcgb3IgbmFycm93aW5nIHRoYXQgcmVzb25lIGRlZmZpY3VsdHkgYW5kIC4gaW4gbWlsayBhIHNwYWNpYWwgcHJvdGVpbiBjYWNpbmUgaXQgaXMgc28gdGFrZSBlbmVyZ3kgdG8gZGlnZXN0aW9uIHRoYXQgbW9yZSBlbmVyZ3kgcHJvZHVzZSBibG9vZCBtYXkgbW9yZSBjaWN1bGF0ZSBpbiBkaWdlc3RpdmUgcGFydCB0aGF0IC8uIHRoZSBjYWN1c2Ugb2YgYW54aWV0eSBvciBpbiBoZWFkZGVjayAuQU5YSVRFWSogcGFpbiBpbiBleWUgb3Igc3RpZmZuZXMgaW4gYm9keSBsaWtlIGxvdyBwb3dlciBpdHMgYm9keSBhbmQgYW5kIGRpZmZjdWx0eSBpbiBicmVyYXRoaW5nIG9yIG1heSBiZSBkb3duIGJsb29kIHByZXNzdWVyIG9yIGFuZCBib2R5IGlzIGxvdyBkb3duIGxpa2Ugbm90IHByb3Blcmx5IGZ1bmN0aW9uIGVmZWN0IGJyYWluIHRoZSBhbnhpZXR5ICMgaW4gYXhpZXR5IG5vIGZ1bGx5IGNvbmNlc25lcyBib2R5IGhlYXJ0IGJlYXQgaXMgc28gaGlnaCBsaWtlICgxODAvOTApIGFuZCBsYWtlIG9mIGVuZXJneSBvciByZWd1bGVyeSBhbnhpZXR5IGRhbWdlcyBraWRlbnkgLGJyYWluLCBzb21lIG5lcnZvdXMgcGVyb2JsZW0gb3Igc29tZSB0aW1lIGZlYXIgdG8gb3RoZXIgc3ViamVjdCBpbiB0a2lzIG1lZGljYWwgY29uZGl0aW9uIHRha2UgbGlwb3Byb2wgdGVibGV0IGFuZCBtZW50YWwgZGlzb2RlciBpbiBjdW50ZW50IHRvIG1lbnRhbCBkb2N0b3IgIHBhZXQgb2YgYW54aWV0eSBpdHMgYmVjYXVtIGNlZ2VycyBpbiBtdWx0aXBhbCB0aW1lIGNlZ2VycyAgL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18" table:style-name="ce1">
            <text:p>1067118</text:p>
          </table:table-cell>
          <table:table-cell office:value-type="string" table:style-name="ce1">
            <text:p>english</text:p>
          </table:table-cell>
          <table:table-cell office:value-type="string" table:style-name="ce1">
            <text:p>Ticket 8&amp;lt;br /&amp;gt; 1. List the heart murmurs according to the classification of P. S. Moschic and characterize them.&amp;lt;br /&amp;gt; 2. At the сonsultation, a mother with a 2-month-old baby complaining of anxiety of the baby after breastfeeding. What anatomical and physiological features of the jejunum in children do you know? What causes anxiety?&amp;lt;br /&amp;gt;</text:p>
          </table:table-cell>
          <table:table-cell office:value-type="string" table:style-name="ce1">
            <text:p>SGVhcnQgbXVybXVyIGFjY29yZGluZyB0byB0aGUgY2xhc3NpZmljYXRpb24gb2YgUC5TIE1vc2NoaWMgYXJlOiAgICAgICAgICAgICAgICAgICAgICAgICAgICAgICAgICAgICAgICAgICAgICAgICAgICAgICAgICAgICAgICAgICAgICAgICAgICAgICAgICAgICAgICAgICAgICAgICAgICBTeXN0b2xpYyBNdXJtdXJzOiBEdXJpbmcgc3lzdG9saWMgcGhlbm9tZW5hIGFzIHZlbnRyaWNsZXMgZmlsbCBhbmQgcHJlc3N1cmUgaW5jcmVhc2UgICAgICAgICAgICAgICAgICAgICAgICAgICAgICAgICAgICAgICAgICAgICAgICAgICAgICAgICAgICAgICAgICAgICAgICAgICAgICAgICAgICAgICAgICAgICAgICAgICAgICAgICAgICAgICAgICAgICAgICAgICAgICAgICAgICAgYSlFamVjdGlvbiBtdXJtdXI6IHRoaXMgaXMgaGVhcmQgZHVyaW5nIHRoZSBjbG9zdXJlIG9mIHB1bG1vbmFyeSBhbmQgYW9ydGljIHNlbWlsdW5hciB2YWx2ZXMoc2lnbmlmaWNlcyBwdWxtb25hcnkgb3IgYW9ydGljIHN0ZW5vc2lzKSAgICAgICAgICAgICAgICAgICAgICAgICAgICAgICAgICAgICAgICAgICAgICAgICAgICAgICAgICAgICAgICAgICAgICAgICAgICAgICAgICAgICAgICAgICAgICAgICAgICAgICAgICAgICAgICAgICAgICAgICAgICAgICAgICAgICAgYilSZWd1cmdpdGFpb24gTXVybXVyOiB0aGlzIGlzIGhlYXJkIGR1cmluZyBpbXByb3BlciBjbG9zdXJlIG9mIGJpY3VzcHVpZCBhbmQgdHJpY3VzcGlkIHZhbHZlcyAoc2lnbmlmaWNlcyBBViByZWd1cmdpdGF0aW9uKSAgICAgICAgICAgICAgICAgICAgICAgICAgICAgICAgICAgICAgICAgICAgICAgICAgICAgICAgICBEaWFzdG9saWMgTXVybXVyOiBEdXJpbmcgcGhhc2Ugb2YgcmVsYXhhdGlvbiBhcyBib29kIGlzIGVqZWN0ZWQgb3V0ICAgICAgICAgICAgICAgICAgICAgICAgICAgICAgICAgICAgICAgICAgICAgICAgICAgICAgICAgICAgICAgICAgICAgICAgICAgICAgICAgICAgICAgICAgICAgICAgICAgICAgICAgICAgICAgICAgICAgICAgICAgYSlFYXJseSBkaWFzdG9saWMgbXVybXVyOiBvY2N1ciBhdCB0aGUgYmVnaW5pbmcgb2YgZGlhc3RvbGljIHBoZW5vbWVuYSAoc2lnbmlmaWNlcyBBViB2YWx2ZXMgc3Rlbm9zaXMpICAgICAgICAgICAgICAgICAgICAgICAgICAgICAgICAgICAgICAgICAgICAgICAgICAgICAgICAgICAgICAgICAgICAgICAgICAgICAgYilkZWxheS9sYXRlIG11cm11cjogb2NjdXIgZHVyaW5nIG1pZGRsZSBvZiBkaWFzdG9sZSBkdWUgdG8gKHJlZ3VyZ2l0YWF0aW9uIGF0IHNlbWlubHVhciB2YWx2ZXMpICAgICAgICAgICAgICAgICAgICAgICAgICAgICAgICAgICAgICAgICAgICAgICAgICAgICAgICAgICAgICAgICAgICAgICAgICBjb250aW51b3MgbXVybXVyOiAgICAgICAgICAgICAgICAgICAgICAgICAgICAgICAgICAgICAgICAgICAgICAgICAgICAgICAgICAgICAgICAgICAgICAgICAgICAgICAgICAgICAgICAgICAgICAgICAgICAgICAgICAgICAgICAgICAgICAgICAgICAgICAgICAgICAgICAgICAgICAgIHRoaXMgbXVybXVyIGFyZSBoZWFyZCB0aHJvdWdodCBzeXN0b2xlIGFuZCBkaWFzdG9sZSBhbmQgc2lnbmlmaWNlcyBwYXRlbnQgZHVjdHVzIGFydGVyaW9zdXMgICAgICAgICAgICAgICAgICAgICAgICAgICAgICAgICAgICAgICAgICAgICAgICAgICAgICAgICAgICAgICAgICAgICAgICAgICAgICAgICAgICAgICAgICAgICAgICAgMi4gQW5hdG9taWNhbCBhbmQgcGh5c2lvbG9naWNhbCBmZWF0dXJlcyBvZiB0aGUgamVqdW51bSBpbiBjaGlsZHJlbjogICAgICAgICAgICAgICAgICAgICAgICAgICAgICAgICAgICAgICAgICAgICAgICAgICAgICAgICAgICAgICAgICAgICAgICAgICAgICAgICAgICAgICAgICAgICAgICAgICAgICAgICAgICAgICAgICAgIGplanVudW0gaXMgdGhlIGNvbm5lY3Rpbmcgc3RydWN0dXJlIGJ3IGR1ZG9uZXVtIGFuZCBpbGV1bSBiYXNpY2FsbHkgY29ubmVjdGluZyBzdG9tYWNoIGZyb20gZHVkbmV1bSB0byBsYXJnZWludGVzdGluZSBjZWN1bSB2aWEgaWxldW0gaXRzIGFwcHJveCAyLjUgbSBsb25nLiAgICAgICAgICAgICAgICAgICAgICAgICAgICAgICAgICAgICAgICAgICAgICAgICAgICAgICAgICAgICAgICAgICAgICAgICAgICAgICAgICAgICAgICAgICAgICAgICAgICAgICAgICAgICAgICAgICAgICAgICAgICAgICAgICBmb2xsb3dpbmcgYXJlIHRoZSBmZWF0dXJlcyAgICAgICAgICAgICAgICAgICAgICAgICAgICAgICAgICAgICAgICAgICAgICAgICAgICAgICAgICAgICAgICAgICAgICAgICAgICAgICAgICAgICAgICAgICAgICAgICAgICAgICAgICBhKU11Y29zYWwgc3VyZmFjZSBhcmVhOiBpdCBoYXMgbGFyZ2Ugc3VyZmFjZSBhcmVhIGZvciBhYnNvcnB0aW9uIG9mIG51dHJpZW50cyAgICAgICAgICAgICAgICAgICAgICAgICAgICAgICAgICAgICAgICAgICAgICAgICAgICAgICAgICAgICAgICAgICAgICAgICAgICAgICAgICAgICAgICAgICAgICAgICAgICAgICAgICAgICAgICAgICAgICAgICAgICAgICAgICAgICAgICAgICAgYilNaWNyb3ZpbGxpIGFuZCB2aWxsaTogdGhlc2UgYXJlIHRpbnkgZmluZ2VyIGxpa2UgcHJvamVjdGVkIGJsb29kIHZlc3NlbHMgd2hpY2ggaXMgYXZhbGlhYmxlIGFidW5kdGFubHkgaW4gamVqdW51bSBmb3IgZWFzc3kgYWJzb3JwdGlvbiAgICAgICAgICAgICAgICAgICAgICAgICAgICAgICAgICAgICAgICAgICAgICAgICAgICAgICAgICAgICAgICAgICAgICAgICAgICAgICAgICAgICAgICAgICAgICAgICAgICAgICAgICAgICAgICAgICAgICAgICAgICAgICAgICAgICAgICAgICAgICAgICAgICAgICAgICAgICAgICAgICAgICAgICAgICAgICAgICAgICAgICAgICAgICAgPGJyIC8+DQpjKUJsb29kIHN1cHBseTp0aGUgamVqdW51bSBoYXMgYSByaWNoIGJsb29kIHN1cHBseSAgICAgICAgICAgICAgICAgICAgICAgICAgICAgICAgICAgICAgICAgICAgICAgICAgICAgICAgICAgICAgICAgICAgICAgICAgICAgICAgICAgICAgICAgICAgICAgZClwcmVzdGFsc2lzOiBkdWUgdG8gcHJlc2VuY2Ugb2YgY29udHJhY3RpaWxlIHNtb290aCBtdXNjbGUgYW5kIGxvbmdpdHVkaW5hbCB0aGVyZSBpcyBwZXJzdGFsc2lzIHRocm91Z2h0IHdoaWNoIG1ha2UgY2h5bWUgbW92ZSBmb3J3YXJkIGFuZCBkaWdlc3RpYmxlIGVhc3NpbHkgICAgICAgICAgICAgICAgICAgICAgICAgICAgICAgICAgICAgICAgICAgICAgICAgICAgICAgICAgICAgICAgICAgICAgICAgICAgICAgICAgICAgICAgICAgICA8YnIgLz4NCmZlYXR1cmVzIGNhc3VpbmcgYW54aWV0eTogICAgICAgICAgICAgICAgICAgICAgICAgICAgICAgICAgICAgICAgICAgICAgICAgICAgICAgICAgICAgICAgICAgICAgICAgICAgICAgICAgICAgICAgICAgICAgICAgICAgICAgICAgICAgICAgICAgICAgICAgICAgIG92ZXJzdGltdWxhdGlvbjogdGhlIGRpZ2VzdGl2ZSBzeXN0ZW0gb2YgbmV3IGJvcm4gY2FuIGJlIHN0aW11bGF0ZWQgZWFzaWx5IGFuZCBzaW5jZSBmZWVkaW5nIGlzIGZpcnN0IHRpbWUgcGhlbm9tZW5hIGl0IGNhdXNlcyBvdmVyc3RpbXVsYXRpb24gdmlhIG5lcnZvdXMgc3l0ZW0gYXQgZW50ZXJvY3l0ZSAgICAgICAgICAgICAgICAgICAgICAgICAgICAgICAgICAgICAgICAgICAgICAgICAgICAgICAgICAgICAgICAgICAgICAgICAgICAgICAgICAgICAgICAgICAgICAgICAgICAgICAgR2FzdHJvaW50ZXN0aW5hbCBkaXNjb21mb3J0OiBkdWUgdG8gd2VhayBkZXZlbG9wZWQgZGlnaGVzdGl2ZSBzeXN0ZW0gICAgICAgICAgICAgICAgICAgICAgICAgICAgICAgICAgICAgICAgICAgICAgICAgICAgICAgICAgICAgICAgICAgICAgICAgICAgICAgICAgICAgICAgICAgICAgICAgICAgICAgICAgICAgICAgICAgICAgIEh1bmdlcjogZnJlcXVlbnQgaHVuZ2VyIGluIGNoaWxkICAgICAgICAgICAgICAgICAgICAgICAgICAgICAgICAgICAgICAgICAgICAgICAgICAgICAgICAgICAgICAgICAgICAgICAgICAgICAgICAgICAgICAgICAgICAgICAgICAgICAgICAgICAgICAgICAgICAgICAgICAgICAgICAgICAgICAgICAgICAgICAgICAg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23" table:style-name="ce1">
            <text:p>1067123</text:p>
          </table:table-cell>
          <table:table-cell office:value-type="string" table:style-name="ce1">
            <text:p>english</text:p>
          </table:table-cell>
          <table:table-cell office:value-type="string" table:style-name="ce1">
            <text:p>Ticket 8&amp;lt;br /&amp;gt; 1. List the heart murmurs according to the classification of P. S. Moschic and characterize them.&amp;lt;br /&amp;gt; 2. At the сonsultation, a mother with a 2-month-old baby complaining of anxiety of the baby after breastfeeding. What anatomical and physiological features of the jejunum in children do you know? What causes anxiety?&amp;lt;br /&amp;gt;</text:p>
          </table:table-cell>
          <table:table-cell office:value-type="string" table:style-name="ce1">
            <text:p>QSBzeXN0b2xpYyBtdXJtdWVyIHNjcmVzZW5kbyBkZWNyZXNlbmRvIG11cm11ZXJzIG9jY3VycyBkdWUgdG8gdHVidWxlbnQgZmxvdyBjcm9zcyB0aGUgc2ltdWx1bmFyIHZhbHZlIGR1cmluZyB2ZW50cmljYWxlIHN5c3RvbGVzICBleGFtcGxlIGFyb3RpYyBzdGVuaW9zaXMgIHB1bG1vbmFyeSAuIHN0ZW5pb3NpcyAtIGIgLSByZWd1cmVnaWFudHMgdG8gdGhlIGhvbG9zeXN0b2xpYyAgbXVybWVycyBhcmUgc291bmRzIHByb2R1Y2Ugb2NjdXJzIGR1ZSB0byBiYWNrIGZsb3cgb2YgdGhlIGJsb29kIGZyb20gdGhlIGhpZ2hlciAgdG8gbG93IHByZXNzdXJlIGNoYW1iZXIgdGhyb3VnaHQgb3V0IHN5c3RvbGUgLCBleGFtcGxlcyBtaXRyYWwgdmFsdmUgcmVndXJnaXRhdGlvbiB0cnVjdXNwaWRlIHJlZ3VyaXRhdGlvbiAuIGItIG1pZCBkaWFzdG9saWMgbXVybXVycyBkdWUgdG8gdHVyYnVsZW50cyBmbG93IGFjcm9zcyBBViB2YWx2cyBkdWUgdG8gcmVwaWQgdmFudHJpY3VsYXIgZmlsbGluZyBhbmQgY29uZ2VzdHVpbiB0byB0aGUgY2hhbWJlciB0byB0aGUgZmFjZSB0cnVidWxlbnRzIC4gdGhlIGNvbmdhdGlvbiBvZiB0aGUgYmFjayBmbG93IG9mIHRoZSBibG9vZCBpcyB2ZXJ5IGRhbmdlcm91cyBmb3IgdGhlIGJhYnkgLiAgICAgICBleGFtcGxlIG1pdHJhbCBzdGVub3NpcyBhbmQgdHJpY3VzcGlkZSBzdGVub3NpcyAuIGMtIGNvbnRpbmVvdXMgbWVybXVycyBoYXJkZWQgdGpocm91Z2h0IHRoZSBzeXN0b2xlIGFuZCBkaWFzdG9sZSBjb3VzZWQgYnR5IGR1ZmZlcm50IHByZXNzdXJlICBkaWZmZXJhbmNlIGJldHdlZW4gc3RydWN0dXJlIC0gZXhhbXBsZSBwYXRlbnQgZHVjdCBhcnRlcmlvdXMgIGFydHJpb3Zlbm91cyBmaXN0dWxhIC4gZCBmdW5jdGlvbmFsIGFuZCBwaHlzaW87b2dpY2FsIG11cm11cnMgIHNvZnQgYW5kIHNob3J0cyBzeXN0b2xlcyBtdW1ybXVycyBub3QgYXNzb2NpYXRlZCB3aXRoIHN0cnVjdHVyYWwgaGVhcnQgZGVmZWN0cyAgLiBjb21tb24gaW4gY2hpbGRlcm4gLyAgICAgICAgICAgICAgICAgICAgICAgICAgMiBKRUpVTlVNIC0gcGFydHMgb2YgdGhlIHNtYWxsIGludGVzdGluZSBoYXMgc3BhY2lmaWMgZnVuY3Rpb24gaW10aGUgYWJkb21lbiBhbmQgYW5hdG9taWNhbCBhbmQgcGh5c2lvbG9naWNhbCBmZXR1cmVzIGluIHRoZSBjaGlsZHJlbiBpdHMgaXMgaW52b2x2ZXMgaW4gb2Jzb3JwdGlvcyBvZiBudXRyaWFudHMgYW5kIGhhcyBhIHJlbGF0aXZlbGl0eSBoaWdoZXIgYmxvb2QgcHJlc3VyZSBmbG93IGNwbXBhaXJlZCB0byB0aGUgaWxldW0gICAgICAgICAgIEdBU1RST0VTT1BIQUdFQUwgUkVGTFVYIC0gaXRzIGNvbW1vbiBpbiBpbmZhbnRzIHRvIGV4cHJlc3MgdGhlIHJlZmx1eCB3ZXJlIGJhY2tmbG93IGludG8gdGhlIGVzb3BoYWd1cyAuIHRoaXMgY2FuIGNvdXNlIGRpc2NvbWZydCBpcnJpdGFiaWxpdHkgLiAg</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16" table:style-name="ce1">
            <text:p>915216</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7QotCw0L3QvdC10YAg0LHQvtC50YvQvdGI0LAg0LbRi9C90YvRgdGC0YvSmyDQttC10YLRltC70YMg0LrQtdC30LXSo9C00LXRgNGWOiA1INC60LXQt9C10qPQs9C1INCx06nQu9C10LTRli4g0prRi9C30LTQsNGA0LTQsCAxINC60LXQt9C10qMg0J/RgNC10L/Rg9C/0LXRgNGC0LDQvdGC0YLRi9KbINGP0pPQvdC4INGB0q/RgiDQsdC10LfQtNC10YDRltC90ZbSoyDTqdGB0LUg0LHQsNGB0YLQsNGD0Ysg0LHRltGA0LDSmyDRgtKv0LrRgtC10YDQtNGW0qMg0pvQvtC70YLRi9KbINOZ0LvRliDQv9Cw0LnQtNCwINCx0L7Qu9GD0YsuINCV0LrRltC90YjRliDQutC10LfQtdKjINGB0q/RgiDQsdC10LfQtNGA0LXQvdGWINGC0LDSk9GL0LTQsCDTqdGB0YPRliDQsdGW0YDQsNKbINGC0q/QutGC0LXRgNC00ZbSoyDRiNGL0pPQsCDQsdCw0YHRgtCw0LvRg9GLLiAzINC60LXQt9C10qMg0YHSr9GCINCx0LXQt9C00LXRgNGW0L3RltKjINC10YDQtdGB0LXQutGC0LXRgNC00ZbSoyDQtNC10qPQs9C10LnRltC90LUg0LTQtdC50ZbQvSDTqdGB0ZbRgyDRgtKv0LrRgtC10YDQtNGW0qMg0pvQsNGA0LDRjtGLLiA1INC60LXQt9C10qMg0YLQvtC70YvSm9Kb0LDQvdC00Ysg0YLSr9C6INC205nQvdC1INGB0q/RgiDQsdC10LfQtNC10YDRltC90ZbSoyDRgtC+0LvRi9KbINC20LXRgtGW0LvRltC/INOp0YHRg9GWLiDQldGA0LvQtdGA0LTQtSAxINC/0YDQtdC/0YPQv9C10YDRgtCw0L3RgtGC0YvSmyDQsNGC0LDQu9GL0psg0LHQtdC30LTQtdGA0ZbQvdGW0qMg0rHQvNCw0LTQsCDTqdGB0LUg0LHQsNGB0YLQsNGD0Ysg0LbTmdC90LUg0LzSr9GI0LXQvdGW0qMg0YHTmdC7INOp0YHRg9GWLiAyINC60LXQt9C10qPRliDQsdCw0LvQsCDQttKv0L0g0Y/Sk9C90Lgg0LDQu9KT0LDRiNKb0Ysg0LbQsNC80LHQsNGBINCw0YDQsNGB0YvQvdC00LAg0pvQvtC70YLRi9KbINC20YvQvdGL0YEg0LzSr9GI0LXQu9C10YDRltC90LTQtSDRgtKv0LrRgtC10YDQtNGW0qMg0L/QsNC50LTQsCDQsdC+0LvRg9GLLiDQltGL0L3Ri9GBINC80q/RiNC10YHRltC90ZbSoyDQutGW0YjQutC10L3QtSDQttC10YLRltC70ZbQvyDTqdGB0YPRli4gMyDQutC10LfQtdKjINC/0LXQvdC40YHRgtGW0qMg0pvQsNGA0LDQudGL0L8g06nRgdGD0ZYg0YLSr9C60YLQtdGA0LTRltKjINKb0LDRgtCw0Y7Riy4gNCDQutC10LfQtdKjINCx0LDQu9Cw0LvQsNGA0LTQsCDQsNGC0LDQu9GL0psg0LHQtdC30LTQtdGA0ZYg0LzQtdC9INC/0LXQvdC40YHRgtGW0qMg0rHQu9KT0LDRjtGLLiDRgtKv0LrRgtC10YDQtNGW0qMg0pvQsNGC0LDRjtGLINCw0LnSsdKb0YvQvSDQsdCw0LnSm9Cw0LvQsNC00YsuIDUg0LrQtdC30LXSoyDRgtC+0LvRi9Kb0pvQsNC90LTRiyDQtdGA0LXRgdC10LrRgtC10YDQtNGW0L0g0LzSr9GI0LXRgdGWINGB0LjRj9Kb0YLRiyDQv9C10L3QuNGB0L/QtdC9INCw0YLQsNC70YvSmyDQsdC10LfQtNC10YDQtNGW0qMg0LTQsNC80YPRi9C90LAg0LbQtdGC0YPRli4g0JHQsNC70LDQvdGL0qMg0LbRi9C90YvRgdGC0YvSmyDQttC10YLRltC70YPRliDQutC10LfQtdKj0LTQtdGA0ZYg0L3QtdCz0ZbQt9GW0L3QtdC9INCR0LDQu9Cw0LvQsNGA0LTQsCDQttGL0L3Ri9GB0YLRi9KbINC20LXRgtGW0LvRgyDQutC10LfQtdKj0LTQtdGA0ZYg0pvRi9C30LTQsNGAINC80LXQvSDQtdGAINCx0LDQu9Cw0LvQsNGA0LTQsCDTmdGA0YLSr9GA0LvRliDQutOp0YDRltC90LXQtNGWLiDQnNGL0YHQsNC70Ysg0LXRgCDQsdCw0LvQsNC70LDRgNC00LAgMSDQttCw0YHSm9CwINC00LXQudGW0L0g0LDRgtCwINCx0LXQt9C00LXRgNGW0L3RltKjINKx0LzQsNKT0LAg0YLSr9GB0YPRliDQsdC+0LvQsNC00YsuINCa0LXQudGW0L0gMTEtMTMg0LbQsNGB0YLQsNGA0YvQvdC00LAg0LPQsNC80LXRgtC+0LPQtdC90LXQtyDQsNC50pvRi9C9INCx0LDQudKb0LDQu9Cw0LTRiyDRgtC10YHRgtC+0YHRgtC10YDQvtC9INCx06nQu9GW0L3QtSDQsdCw0YHRgtCw0LnQtNGLINCx0ZbRgNGW0L3RiNGWINGC0q/QutGC0LXRgCDQv9Cw0LnQtNCwINCx0L7Qu9Cw0LTRiy4g0JbRi9C90YvRgSDQvNKv0YjQtdC70LXRgNGW0L3RltKjINOp0YHRg9GWINCx0LDQudKb0LDQu9Cw0LTRiywg0LTQsNGD0YvRgdGL0L3Ri9KjINC20YPQsNC90LTQsNGD0Ysg0LrQtdKj0ZbRgNC00LXQutC00ZbSoyDRiNGL0pPRg9GLLiDSmtGL0LfQtNCw0YDQtNCwIDktMTUg0LbQsNGBINCw0YDQsNGB0YvQvdC00LAg0LHRltGA0ZbQvdGI0ZYg0LXRgtC10Log0LrRltGA0LvQtdGA0ZbQvdGW0qMg0LrQtdC70YPRliDQsdCw0LnSm9Cw0LvQsNC00YsuINCT0LXQvtCz0YDQsNGE0LjRj9C70YvSmyDQvNC10LrQtdC90LTQtdGDINCw0LnQvNCw0pvRgtCw0YDRi9C90LAg0LHQsNC50LvQsNC90YvRgdGC0Ysg0LrQtdC50LHRltGAINC20YvQu9GLINC60LvQuNC80LDRgtGC0Ysg0LbQtdGA0LTQtSDTqdC80ZbRgCDRgdKv0YDQtdGC0ZbQvSDRhdCw0LvRi9Kb0YLQsNGA0LTQsCDSm9GL0Lcg0LbTmdC90LUg0LXRgNC10YHQtdC6INCx0LDQu9Cw0LvQsNGA0LTQsCDQs9Cw0LzQtdGC0L7Qs9C10L3QtdC3INC10YDRgtC1INC20q/RgNC10LTRli4g0prRi9C30LTQsNGA0LTQsCDQtdGC0LXQuiDQutGW0YDRliDQutC10LvQs9C10L0g0YHQvtKjINC+0LzRi9GA0LDRg9C70LDRgNGL0L3Ri9KjINGP0pPQvdC4INGB0q/RgiDQsdC10LfQtNC10YDRltC90ZbSoyDTqdGB0YPRli4gICAgICAgICAgICAgICAgICAgICAgICAgICAgICAgICAgICAgICAgICAgICAgICAgICAgICAgICAgICAgICAgICAgICAgICAgICAgICAgICAgICAgICAgICAgICAgICAgICAgICAgICAgICAgICAgICAgICAgICAgICAgICAgICAgIDIuIDgg0LDQudC70YvSmyDQsdCw0LvQsNC90YvSoyDTqdC60L/QtdGB0ZbQvdC00LXQs9GWINGB0YvRgNGL0LvQtNCw0YDQtNGL0qMg0LXRgdGC0ZbQu9GDINGB0LXQsdC10LHRliDQsdCw0LvQsNC90YvSoyDTqdC60L/QtdGB0ZbQvdC00LXQs9GWINCx0YDQvtC90YXRgtCw0YDRi9C90YvSoyDSm9Cw0LHRi9C90YMg0LrQtdC30ZbQvdC00LUg0LHQvtC70LDQtNGLINGP0pPQvdC4INCx0YDQvtC90YXQvtC+0LHRgdGC0YDRg9C60YbQuNGP0pPQsCDQsdCw0LnQu9Cw0L3Ri9GB0YLRiy4g0JbTqdGC0LXQu9GWINC20LjRliDQttOZ0L3QtSDTqdC90ZbQvNGB0ZbQtyDSm9Cw0pvRi9GA0YvSk9GLINC606nQvyDQsdOp0LvRltC90LXQtNGWLiDSmtCw0pvRi9GA0YvSk9GLINCx0ZbQt9C00LUg0Y3QutGB0YPQtNCw0L3RgiDQsdC+0LvRi9C/INGC0rHRgCDRj9KT0L3QuCDSm9Cw0pvRi9GA0YvSm9GC0YvSoyDTmdGB0LXRgNGW0L3QtdC9INCx0ZbQt9C00LUg0YvRgdKb0YvRgNGL0pvRgtGLINC205nQvdC1INC+0YDRgtCwINC606nQv9GW0YDRiNGW0LrRgtGWINGL0LvSk9Cw0LvQtNGLINGB0YvRgNGL0LvQtNCw0YAg0LXRgdGC0ZbQu9C10LTRli4g0K/Sk9C90Lgg0LrTqdC/0ZbRgNGI0ZbQutGC0ZYg0YHRi9GA0YvQu9C00Ysg0LTQsNGD0YvRgdGC0YvSoyDQtdGB0YLRltC70YPRliDQsdGA0L7QvdGF0YLQsNGA0LTQsCDSm9Cw0pvRi9GA0YvSm9GC0YvSoyDQutC+0L3RhtC40YHRgtC10L3RhtC40Y/RgdGLINC20LDQsdGL0YHSm9Cw0psg0LrRltC70LXQs9C10LnQu9GWINCx0L7Qu9KT0LDQvdC00YvSm9GC0LDQvSDQsdCw0LvQsCDQtNC10Lwg0LDQu9KT0LDQvSDQutC10LfQtNC1INCw0YPQsCDQsdGA0L7QvdGF0YLQsNGAINCw0YDSm9GL0LvRiyDTqdC60L/QtSDTqdGC0LrQtdC90LTQtSDSm9Cw0pvRi9GA0YvSmyDQvtKT0LDQvSDQv9GA0LXQs9GA0LDQtNCwINGP0pPQvdC4INC60LXQtNC10YDQs9GWINCx0L7Qu9Cw0LTRiyDQttOZ0L3QtSDQsNGD0LDQvdGL0qMg0L3TmdGC0LjQttC10YHRltC90LTQtSDQutOp0L/RltGA0ZbQutGC0LXRgCDQv9Cw0LnQtNCwINCx0L7Qu9GL0L8g0YXQsNGA0LDQutGC0LXRgNC90YvQuSDQt9Cy0YPQuiDQv9Cw0LnQtNCwINCx0L7Qu9Cw0LTRiy4g0prQsNGA0LDQv9Cw0LnRi9C8INGC0ZbQu9C80LXQvSDQsNC50YLRgdCw0psg0LPQsNC30LTQsNC70pPQsNC9INGB0YPQtNGLINGL0LTRi9GB0pvQsCDSm9Kx0LnRgdCw0psg0LbTmdC90LUg0L7Sk9Cw0L0g0YLRgNGD0LHQvtGH0LrQsCDRgdCw0LvRi9C/INKv0YDRgdC10Log0LrTqdC/0ZbRgNGI0ZbQutGC0LXRgCDQv9Cw0LnQtNCwINCx0L7Qu9Cw0LTRiyDQsdCw0LvQsNC90YvSoyDQsdGA0L7QvdGF0YLQsNGA0YvQvdC00LAg0YLRi9C90YvRgSDQsNC70pPQsNC9INC60LXQt9C00LUg0L7RgdGL0L3QtNCw0Lkg0L/RgNC40L3RhtC40L/RgtC1INC606nQv9GW0YDRiNGW0LrRgtGWINGL0LvSk9Cw0LvQtNGLINGB0YvRgNGL0LvQtNCw0YAg0LXRgdGC0ZbQu9C10LTRli4g0prSsdGA0pPQsNKbINGL0YHSm9GL0YDRi9Kb0YLRiyDQtNGL0LHRi9GB0YLQsNGA0LTRi9KjINGI0YvSk9GD0Ysg0YHQtdCx0LXQsdGWINKb0LDRgNCw0L/QsNC50YvQvCDRgtGW0LvQvNC10L0g0LDQudGC0pvQsNC90LTQsCDRgdGC0YDRg9C90L3QsNGPINC30LLRg9GH0LDQvdC40Y8g0L/RgNC40L3RhtC40L/RltC90LTQtSDQsdC+0LvQsNC00Ysg0L7QuyDSm9Cw0LvQsNC5PyDSmtCw0pvRi9GA0YvSmyDQsdGW0LfQtNC1INCx0YDQvtC90YXRgtGL0qMg0pvSsdGA0YvQu9GL0YHRi9C90LAg0pvQsNGA0LDQuSDQttCw0LHRi9GB0YvQvyDQvtGA0L3QsNC70LDRgdCw0LTRiyDRj9KT0L3QuCDQttCw0YDRgtGL0LvQsNC5INGB0LDSm9C40L3QsNC70Ysg0LDQudC80LDSm9GC0LDRgNGL0L3QtNCwINC20LDQsdGL0YHRi9C/INGC0rHRgNKT0LDQvdC00LAg0LHRgNC+0L3RhdGC0LDRgCDQsNGA0pvRi9C70Ysg0LDRg9CwINOp0YLQutC10L3QtNC1INKb0rHRgNKT0LDSmyDRi9GB0pvRi9GA0YvSm9GC0Ysg0YHRi9GA0YvQu9C00Ysg0LTQsNGD0YvRgdGC0LDRgCDQtdGB0YLRltC70LXQtNGWLiDQkdKx0Lsg0LDRg9GA0YPSk9CwINC90LXQs9GW0LfRltC90LXQvSDQsdOp0YjQutC1INGC05nRgNGW0LfQtNGWINC60LXRg9C00LUg0LrQu9C10YLQutCw0YHRiyDRgtOZ0L0g0LHQvtC70YvQvyDQutC10LvQtdC00ZYuINKu0LvQutC10L0g0LDQtNCw0LzQtNCw0YDQtNCwINCl0J7QkdCbINC90LXQvNC10YHQtSDQsdCw0YHSm9Cw0LTQsCDRgdC+0LfRi9C70LzQsNC70Ysg06nQutC/0LUg0LDRg9GA0YPQu9Cw0YDRi9C80LXQvSDQsNGD0YvRgNCw0YLRi9C90LTQsNGA0LTQsCDQsdOp0YjQutC1INGC05nRgNGW0LfQtNGWINC60LXRg9C00LUg0YLQvtGA0Ysg0LrQtdC30LTQtdGB0LXQtNGWINCx0ZbRgNCw0psg0LHQsNC70LDQu9Cw0YDQtNCwINC+0Lsg0LHTqdGI0LrQtSDRgtOZ0YDRltC30LTRliDQutC10YPQtNC1INGC0L7RgNGLINCx0LDQu9Cw0LvQsNGA0LTRi9KjINCw0L3QsNGC0L7QvNC+INGE0LjQt9C40L7Qu9C+0LPQuNGP0LvRi9KbINC10YDQtdC60YjQtdC70ZbQs9GWINCx0L7Qu9GL0L8g0YLQsNCx0YvQu9Cw0LTRiy4gOCDQsNC50LvRi9KbINCx0LDQu9Cw0L3Ri9KjINOZ0LvRliDQutC10YPQtNC10YHRliDQsdOp0YjQutC1INGC05nRgNGW0LfQtNGWINCx0L7Qu9GL0L8g0LrQtdC70LXQtNGWINGB0LXQsdC10LHRliDQvtC7INOZ0LvRliDQttKv0YDRltC/INKv0LnRgNC10L3QsdC10LPQtdC9LiDQmtC10LnRltC9INGD0LDSm9GL0YIg06nRgtC1INC20q/RgNGW0L8g0q/QudGA0LXQvdCz0LXQvSDRgdC+0qMg0LrQtdGD0LTQtSDRgtC+0YDRiyDRgtKv0YHRltC/INKb0LDQu9GL0L/RgtGLINC20LDSk9C00LDQudKT0LAg0LrQtdC70LXQtNGWLiDQltOZ0L3QtSDQsdCw0LvQsNC00LAg0LHRgNC+0L3RhdC+0L7RgdCx0YLRgNGD0LrRhtC40Y/QvdGL0qMg0L7RgNGC0LAg0LDRg9GL0YDQu9GL0pvRgtCw0pPRiyDRgdCw0YLRi9GB0Ysg0LrTqdGA0ZbQvdGW0L8g0YLSsdGALiDQmtC10YPQtNC1INGC0L7RgNGL0L3Ri9KjINCx06nRiNC60LUg0YLTmdGA0ZbQt9GWINCx0L7Qu9GD0Ysg0LrTqdCx0ZbQvdC10YHQtSDQsNC90LDRgtC+0LzQviDRhNC40LfQuNC+0LvQvtCz0LjRj9C70YvSmyDQtdGA0LXQutGI0LXQu9GW0LPRliDQsdC+0LvRi9C/INC60LXQu9C10LTRli4g0JbTmdC90LUg0LrQtdGD0LTQtSDQutC70LXRgtC60LDRgdGL0L3QtNCwINKb0LDQsdGL0YDSk9Cw0LvQsNGA0Ysg0LrTqdC70LTQtdC90LXSoyDRgtKx0YDSk9GL0LTQsCDQvtGA0L3QsNC70LDRgdKb0LDQvSDQsdC+0LvRi9C/INC60LXQu9C10LTRliDQutC10LnRltC9INCx0LDQu9CwINC20q/RgNGD0LTRliDSr9C50YDQtdC90LPQtdC9INGB0L7SoyDSm9Cw0LHRi9GA0pPQsNC70LDRgNGL0L3Ri9KjINKb0LDQu9GL0L/RiyDSr9C70LrQtdC90LTQtdGA0LTRltKjINKb0LDQsdGL0YDSk9Cw0YHRiyDRgdC40Y/Sm9GC0Ysg0pvQsNC70YvQv9Kb0LAg0LrQtdC70LXQtNGWLiDQldC90YLRltCz0YPQs9C1INC60LXQu9C10YLRltC9INCx0L7Qu9GB0LDSmyDQsNC90LDQvNC90LXQt9C00LUg0YLRi9C90YvRgSDRiNGL0pPQsNGA0YMg0rHQt9Cw0YDSk9Cw0L0g0LTQtdCz0LXQvSDQsNKb0L/QsNGA0LDRgiDQsdCw0YAuINCd0LXQs9C1PyDRgdC10LHQtdCx0ZYg0LHRgNC+0L3RhSDQttC+0LvQtNCw0YDRi9C90LTQsCDRjdC60YHRg9C00LDQvdGCINGP0pPQvdC4INKb0LDSm9GL0YDRi9KbINGC0rHRgC4g0prQsNKb0YvRgNGL0psg0YLRi9C90YvRgSDQsNC70YPSk9Cw0LTQsCDQvtC90Ysg0YjRi9KT0LDRgNGD0pPQsNKT0LAg0LTQsCDQutC10LTRltGA0LPRliDQsdC+0LvRi9C/INGC0LDQsdGL0LvQsNC00YsuINCR0rHQuyDQsdCw0LvQsNC00Ysg0LHRltC30LTQtSDQtdC90YLRltCz0YPQtNGW0qMg0LjQvdGB0L/QuNGA0LDRgtGL0YDQu9GL0psg0YLSr9GA0ZYg0YHQtdCx0LXQsdGWINCx0YDQvtC90YXRgtCw0YDQtNGL0qMg0pvQsNKb0YvRgNGL0pvQv9C10L0g0LHRltGC0LXQu9GD0ZYg0L7RgNGL0L0g0LDQu9GL0L8g0LbQsNGC0YvRgC4g0K/Sk9C90Lgg0LjQvdGB0L/QuNGA0LDRgtGL0YDQu9GL0psg0YLRi9C90YvRgSDQsNC70YPSk9CwINCx0ZbQt9C00LUg06nQutC/0LUg0LDQu9GM0LLQtdC+0LvQsNC70LDRgCwg0LHRgNC+0L3RhdGC0LDRgCDQttCw0YLQsNC00Ysu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26" table:style-name="ce1">
            <text:p>915226</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3RgdKx0YDQsNKbLtCi0LDQvdC90LXRgCDQsdC+0LnRi9C90YjQsCDQttGL0L3Ri9GB0YLRi9KbINC20LXRgtGW0LvRg9C00ZbSoyA1INC60LXQt9C10qPRltC9INCw0LbRi9GA0LDRgtCw0LTRiy4gMSDQutC10LfQtdKjICDQv9GA0LXQv9GD0LHQtdGA0YLQsNC90YLRgtGL0psg0LrQtdC30LXSozog0pvRi9C3INCx0LDQu9Cw0LvQsNGA0LTQsCAtINGB0q/RgiDQsdC10LfQtNC10YDRliDSsdC00pPQsNC50LzQsNKT0LDQvSzQtdC80ZbQt9GW0LrRgtC10YDRliDQsdCw0LvQsCDQutC10LfQtNC10LPRltC00LXQuSDQutOp0YDRltC90ZbRgdGC0LXQttOZ0L3QtSDSm9Cw0YHQsNKT0LAg0LDQudC80LDSk9GL0L3QtNCwINGC0q/QuiDQsdC+0LvQvNCw0LnQtNGLLiAx0LrQtdC30LXSo9C00LUsINCx0rHQuyDQutC10LfQtdKjICDQv9GA0LXQv9GD0LHQtdGA0YLQsNC90YLRgtGL0psg0LrQtdC30LXSoywg0rHQuyDQsdCw0LvQsNC70LDRgNC00LAgLdCw0YLQsNC70YvSmyDQttGL0L3Ri9GBINC80q/RiNC10YHRliDQttOZ0L3QtSDQvtC90YvSoyDTqdC70YjQtdC80ZYg0LHQsNC70LAg0LrQtdC30LTQtdCz0ZbQtNC10LksINC20YvQvdGL0YEg0LzSr9GI0LXRgdGWINC80LXQvSDSsdC80LAg0LrTqdC70LXQvNGWINC60ZbRiNC60LXQvdGC0LDQuSDQsdC+0LvQsNC00YsgLjLQutC10LfQtdKj0LTQtSAxMC0xMdC20LDRgdGC0LAs0pvRi9C3INCx0LDQu9Cw0LvQsNGA0LTQsCDQtdC80ZbQt9C10LrRgtC10YAg0rHQu9KT0LDRjyDQsdCw0YHRgtCw0LnQtNGLLNGB0q/RgiDQsdC10LfQtNC10YDRliDRltGB0ZbQvdGW0L8gLNCw0LXRgNC+0LvQsNC70LDRgCDSr9C70LrQtdC50LXQtNGWLtKa0LDRgdCw0pPQsCDQsNC50LzQsNKT0YvQvdC00LAg0LDQu9KT0LDRiNKb0Ysg0YLSr9C30YMs0LbSsdC80YHQsNKbINGC0q/QuiDQv9Cw0LnQtNCwINCx0L7Qu9CwINCx0LDRgdGC0LDQudC00YsuINCQ0Lsg0rHQu9C00LDRgNC00LUgMiDQutC10LfQtdKj0LTQtSAxMS0xMiDQttCw0YHRgtCwLNCw0YLQsNC70YvSmyDQsdC10LfQtNC10YAg0LzQtdC9INKx0LzQsCDSsdC70pPQsNC50YvQvyDQsdCw0YHRgtCw0LnQtNGLLiAzINC60LXQt9C10qPQtNC1INKb0YvQtyDQsdCw0LvQsNC70LDRgNC00LAgMTItMTMg0LbQsNGBOtCh0q/RgiDQsdC10LfQtNC10YDRliDSsdC70pPQsNC50pPQsNC9ICzQsdGW0YDQsNKbINCw0LXRgNC+0LvQsCDRgdKv0YIg0LHQtdC30ZbQvdC10L0g0LDQttGL0YDQsNC80LDSk9Cw0L0u0prQsNGB0LDSk9CwINCw0LnQvNCw0pPRi9C90LTQsNKT0Ysg0YLSr9C6INKb0L7RjiDSm9Cw0YDQsCDRgtKv0YHQutC1INC10L3RltC/ICzRgtGL0pPRi9C30LTQsNC70LDQtNGLLjMg0LrQtdC30LXSo9C00LUg0rHQu9C00LDRgNC00LAgMTMg0LbQsNGBINCW0YvQvdGL0YEg0LzSr9GI0LXRgdGWINKx0LvSk9Cw0LnRi9C/LNCw0YLQsNC70YvSmyDQsdC10Lcg0rHQu9KT0LDRj9C00YsuINKb0LDRgdCw0pPQsCDQsNC50LzQsNKT0YvQvdC00LAg0YLSr9C6INC606nQsdC10LnRltC/ICzRgtCw0YDQsNC70LAg0LHQsNGB0YLQsNC50LTRiyAuIDQg0LrQtdC30LXSo9C00LUgMTMtMTTQttCw0YEg0pvRi9C3INCx0LDQu9Cw0LvQsNGA0LTQsCDRgdKv0YIg0LHQtdC30LTQtdGA0ZbQvdGW0qMg0rHQu9KT0LDQudGL0L8gLCDSm9Cw0YHQsNKT0LDQvdGL0qMg0LzQtdC00LjQsNC70YzQtNGLINC20LDSk9GL0L3QtNCwINGC0q/QutGC0LXRgNC00ZbSoyDTqdGB0YPRliDQttC40ZbQu9C10LnQtNGWLtCV0LrRltC90YjRliDRgNC10YLRgtGW0Log0LbRi9C90YvRgdGC0YvSmyDQsdC10LvQs9GW0LvQtdGA0LTRltKjINCw0LnSm9GL0L0g0LHQsNC50pvQsNC70YMg0LrQtdC30LXSo9GWLjQg0LrQtdC30LXSoyDSsdC7INCx0LDQu9Cw0LvQsNGA0LTQsCDQsNGC0LDQu9GL0psg0LbRi9C90YvRgSDQvNKv0YjQtdC70LXRgNGW0L3RltKjINKx0LvSk9Cw0Y7Riywg0LbRi9C90YvRgSDQvNKv0YjQtdGB0ZbQvdGW0qMg0LHQsNGB0YvQvdGL0qMg0q/Qu9C60LXQvdC00LXRgNC00ZbQutGW0L3QtNC10Lkg06nQt9Cz0JXRgNC1INCx0LDRgdGC0LDQudCU0KsgLCDQkdKw0JsgMTQg0JbQkNChINCo0JDQnNCQ0KHQq9Cd0JTQkCDQmtOo0KDQhtCd0JXQlNCGIC4gNNC60LXQt9C10qMg0rHQuyDQsdCw0LvQsNC70LDQu9Cw0YAg0LzQtdC9INKb0YvQtyDQsdCw0LvQsNC70LDRgNC00LDSk9GLINCx0L7Qt9Cx0LDQu9CwINC80LXQvSDQsdC+0LnQttC10YLQutC10L0g0YjQsNKb0pvQsCDRgdCw0Lkg0LrQtdC70LXQtNGWLjTQutC10LfQtdKj0LTQtSDQttGL0L3Ri9GBINCz0L7RgNC80L7QvdC00LDRgNGL0L3Ri9KjINCw0LnSm9GL0L0g05nRgdC10YDRliDQsdCw0LnSm9Cw0LvRi9C/ICzRgtC+0LvRi9GB0YPRiyDQttKv0YDQtdC00ZYuIDXQutC10LfQtdKj0LTQtSDSm9GL0Lcg0LHQsNC70LDQu9Cw0YDQtNCwINC20YvQvdGL0YEg0LzSr9GI0LXQu9C10YDRliDQvNC10L0g0LTQtdC90LUg0LHRltGC0ZbQvNGWINC10LrRltC90YjRliDRgNC10YLRgtGW0Log0LbRi9C90YvRgdGC0YvSmyDQttC10YLRltC70YPQtNC10L0g0LrQtdC50ZbQvdCz0ZYg06nQt9Cz0LXRgNGW0YHRgtC10YDQvNC10L0g0LrTqdGA0ZbQvdC10LTRliAuINKa0YvQtyDQsdCw0LvQsNC70LDQu9Cw0YDQtNCwIDUg0LrQtdC30LXSoyAxNC0xNSDQttCw0YHRi9C90LAg0YHQsNC5INC60LXQu9C10LTRli4g0rDQuyDQsdCw0LvQsNC70LDRgNC00YsgNSDQutC10LfQtdKjIDE1LTE2INC20LDRgdGC0LAg0LDQudKb0YvQvdC00LDQu9GL0L8gLNC20YvQvdGL0YHRgtGL0psg0LbQtdGC0ZbQu9GD0LTRltKjINKv0LvQutC10L3QtNC10YDQtNGW0LrRltC90LTQtdC5INCx0L7Qu9GD0Ysg0YLTmdC9INCx0L7Qu9Cw0LTRiyAuIDxiciAvPg0KPGJyIC8+DQoyLdCh0rDQoNCQ0po6INCR0LDQu9Cw0LTQsCDQsdGA0L7QvdGF0LjQsNC70LTRiyDQsNGB0YLQvNCwLCDQvtGA0YLQsNGI0LAg0LDRg9GL0YDQu9GL0psg0LTTmdGA0LXQttC10LTQtSAuINCi0LDQv9GB0YvRgNC80LDQtNCw0pPRiyDRgdKx0YDQsNKb0YLQsNGA0pPQsCDQttCw0YPQsNC/INCx0LXRgNGB0LXQvDog0prSsdGA0pPQsNKbINC206nRgtC10LvQtNGW0qMg0L/QsNC50LTQsCDQsdC+0LvRg9GLICAg0LbTqdGC0LXQu9C00ZbSoyAg06nQvdGW0LzRgdGW0Lcg0LHQvtC70YPQqywg0YjRi9GA0YvRiCDQvtCx0YHRgtGA0YPQutGG0LjRj9C70YvSmyDQttCw0pPQtNCw0LnQtNCwINCx06nQu9GW0L3Qs9C10L3QtNGW0LrRgtC10J0gLtCR0YDQvtC90YXRgdC/0LDQt9C8INC/0LDQudC00LAg0LHQvtC70pPQsNC90LTRi9Kb0YLQsNC9ICDQsdOp0LvRltC90LPRltC10L0g0YjRi9GA0YvRiCDRgtKx0YLSm9GL0YAg0LbTmdC90LUg0YHQvtC90LTRi9Kb0YLQsNC9INC+0L3Ri9KjINGI0YvSk9GD0Ysg0pvQuNGL0L3QtNCw0LnQtNGLIC4g0KLRi9C90YvRgSDQttC+0LvRi9C90LTQsNKT0Ysg0YDQtdGG0LXQv9GC0L7RgNC70LDRgNC00YvSoyDRgtGW0YLRltGA0LrQtdC90YPRltC90LXQvSDQsdGA0L7QvdGF0YLQsNGA0LTQsNKT0Ysg0LHQvtC60LDQuyDRgtOZ0YDRltC30LTRliDQttCw0YHRg9GI0LDQu9Cw0YAg0YLRltGC0ZbRgNC60LXQvdGW0L8g0L3TmdGC0LjQttC10YHRltC90LTQtSDRiNGL0YDRi9GIINCx06nQu9GW0L3QtdC00ZYuIC7Qn9Cw0LnQtNCwINCx0L7Qu9KT0LDQvSDRiNGL0YDRi9GIINGC0YvQvdGL0YEg0LbQvtC70YvQvdC00LAg0L7QsdGB0YLQoNGD0LrRhtC40Y8gLCDRj9KT0L3QuCDRgtGL0L3Ri9GBINC20L7Qu9GL0L3Ri9KjINCx0ZbRgtC10LvRg9GW0L0g0YLRg9GL0L3QtNCw0YLRi9C/ICwg0YLRi9C90YvRgSDQsNC70YPQtNGL0qMg0pvQuNGL0L3QtNCw0YPRi9C90LDQvSDRgtGL0L3Ri9GBINC20LXRgtC60ZbQu9GW0LrRgdGW0LfQtNGW0LPRliDRgtGD0LDQtNGLIC4g0J7RgNGC0LDRiNCwINC606nQv9GW0YDRiNGW0LrRgtGWINGB0YvRgNGL0LvQtNCw0YDQtNGL0qMg0LXRgdGC0ZbQu9GD0ZYg0YjRi9GA0YvRiNGC0YvSoyDQsdOp0LvRltC90YPRltC90LXQvSwgINGC0YvQvdGL0YEg0LbQvtC70LTQsNGA0YvQvdC00LAg0LDRg9Cw0L3Ri9KjINOp0YLRg9GW0L3RltKjINC20YvQu9C00LDQvNC00YvSk9GLINCw0YDRgtGD0YvQvdCw0L0g0LbTmdC90LUg0JHQoNCe0J3QpdCi0JDQoCDQotCe0JvQq9KaINCR0IbQotCV0JvQnNCV0JkgLCDQntCb0JDQoNCU0KvSoiDQltCw0YDRgtGL0LvQsNC5INCw0YjRi9KbINCx0L7Qu9GD0YvQvdCw0L0g0L/QsNC50LTQsCDQsdC+0LvQsNC00YsgLiDQkdKx0Lsg0LbQsNKT0LTQsNC50LTQsCDQsdCw0LvQsNKT0LAg0LHTqdGI0LrQtSDRgtOZ0YDRltC30LTRliDQutC10YPQtNC1INC60LvQtdGC0LrQsNGB0Ysg0YLTmdC9LCDQsdKx0Lsg0pvQsNCx0YvRgNKT0LDQu9Cw0YDQtNGL0qMg0YLQsNGA0YvQu9GD0YvQvdCw0L0g0LbTmdC90LUg06nQutC/0LXQtNC1INCw0YPQsNC90YvSoyDQttC40L3QsNC70YPRi9C90LDQvSDRgtGD0YvQvdC00LDQudC00YsgLiDQkdGA0L7QvdGF0L7QsdGB0YLRgNGD0LrRhtC40Y/Qu9GL0psg0LrQtdC30LXSo9C00LUg0Y3QutGB0L/QuNGA0LDRgtC+0YDQu9GL0psg0LXQvdGC0ZbQs9GDINCx0L7Qu9Cw0LTRiyAsINGC0YvQvdGL0YEg0LDQu9GDINKb0LjRi9C90LTQsNC/ICwg0YLRi9C90YvRgdGC0YvSoyDQvNC40L3Rg9GC0YLRi9KbINC606nQu9C10LzRliDQsNGA0YLQsNC00Ysu0KLRi9C90YvRgSDQsNC70YMg0LbQuNGW0LvRltCz0ZYgOCDQsNC50LvRi9KbINCx0LDQu9Cw0LTQsCAzMC00MCDRiNCw0LzQsNGB0YvQvdC00LAg0LHQvtC70LDQtNGLIC4g0K3QutGB0L/QuNGA0LDRgtC+0YDQu9GL0psg0LXQvdGC0ZbQs9GDINC60LXQt9GW0L3QtNC1INCx0rHQuyDQutOp0YDRgdC10YLQutGW0YggMSw1LTIg0LXRgdC10LPQtSDQtNC10LnRltC9INCw0YDRgtGD0Ysg0LzSr9C80LrRltC9IC4g0KLQvtC70YvSm9GC0YvRgNGL0L8g0LrQtdGC0YHQtdC8ICwg0LHRgNC+0L3RhdC+0LHRgdGC0YDRg9C60YbQuNGPINC60LXQt9GW0L3QtNC1INGC0YvQvdGL0YEg0LbQvtC70LTQsNGA0YvQvdGL0qMg0LHRltGC0LXQu9GD0ZbQvdC10L0gLNCx0YDQvtC90YXRgtCw0YDQtNGL0qMg0YHQv9Cw0LfQvNGLINGC0YPRi9C/ICzQvdOZ0YLQuNC20LXRgdGW0L3QtNC1INGC0YvQvdGL0YEg0LbQvtC70LTQsNGA0Ysg0YLQsNGA0YvQu9Cw0LTRiyAuINCi0YvQvdGL0YEg0LDQu9GDINKb0LjRi9C90LTQsNKT0LDQvdC00YvSm9GC0LDQvSAsINGC0ZbQvdC00ZbQuiDQttOZ0L3QtSDQttCw0YHRg9GI0LDQu9GL0psg0LTQtdKj0LPQtdC50LTQtSDQs9C40L/QvtC60YHQuNGPINGC0YPRi9C/ICzRgtGW0L3QtNGA0LPQtSDQvtGC0YLQtdC60YLRltKjINC20LXRgtGW0YHQv9C10YPRiNGW0LvRltCz0ZbQvdC10L0g0YbQuNCw0L3QvtC3LCDQtdKjINCw0LvQtNGL0LzQtdC9INC80rHRgNGL0L0t0LXRgNGW0L0g0LDQudC80LDSk9GL0L3QtNCwINC606nQs9C10YDRg9C70LXRgCDQv9Cw0LnQtNCwINCx0L7Qu9Cw0LTRiyAuINCW06nRgtC10LvQtNGW0qMg0L/QsNC50LTQsCDQsdC+0LvRg9GLINGI0YvRgNGL0YjRgtGL0qMg0LHRgNC+0L3RhdGC0LDRgNC00Ysg0YLRltGC0ZbRgNC60LXQvdC00ZbRgNGD0ZbQvdC10L0g0LTQsNC80LjQtNGLLtCW0LDSk9C00LDQudC00YvSoyDQsNC70LTRi9C9INCw0LvRgyDSr9GI0ZbQvSAg0LHRgNC+0L3RhdGC0LDRgNC00YvSoyDQutC10qPQtdC50YPRltC9INGC0YPRi9C90LTQsNGC0LDRgtGL0L0gLNCx0LXRgNC10LTRg9Cw0LssINGB0LDQu9GM0LHRg9GC0LDQvNC+0Lsg0YHQuNGP0pvRgtGLINC/0YDQtdC/0LDRgNCw0YLRgtCw0YDQtNGLINCx0LXRgNGD0LPQtSAs0LjQvdCz0LDQu9GM0Y/RhtC40Y/Qu9GL0psg0LbQvtC70LzQtdC9INC+0YLRgtC10Log0LHQtdGA0YPQs9C1INCx0L7Qu9Cw0LTRiy4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Жалпы студенттің жауабына 86 баға қойылған, бірақ техникалық интернеттің дұрыс істемегеніне байланысты 74 бағасы қойылып кеткен.</text:p>
          </table:table-cell>
          <table:table-cell office:value-type="float" office:value="0" table:style-name="ce1">
            <text:p>0</text:p>
          </table:table-cell>
          <table:table-cell table:number-columns-repeated="16376"/>
        </table:table-row>
        <table:table-row table:style-name="ro1">
          <table:table-cell office:value-type="float" office:value="915276" table:style-name="ce1">
            <text:p>915276</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4g0JHQsNC70LDQu9Cw0YDQtNCwINC20YvQvdGL0YHRgtGL0psg0LbQtdGC0ZbQu9GDINC60LXQt9C10qPQtNC10YDRliDTmdC00LXRgtGC0LUg0LXQutGW0L3RiNGWINC20YvQvdGL0YHRgtGL0psg0LHQtdC70LPRltC70LXRgNC00ZbSoyDRhNC40LfQuNC60LDQu9GL0psg0LTQsNC80YPRi9C9INCx0LDSk9Cw0LvQsNGDINC205nQvdC1INGB0LjQv9Cw0YLRgtCw0YMg0q/RiNGW0L0g0pvQvtC70LTQsNC90YvQu9Cw0LTRiy4g0KLQsNC90L3QtdGAINCx0L7QudGL0L3RiNCwINC20YvQvdGL0YHRgtGL0psg0LbQtdGC0ZbQu9GDINC60LXQt9C10qPQtNC10YDRltC90ZbSoyDQttKv0LnQtdGB0ZYg0rHQu9C00LDRgCDQvNC10L0g0pvRi9C30LTQsNGAINKv0YjRltC9INCx0LDRgSDQutC10LfQtdKj0LTQtdGA0LTRliDSm9Cw0LzRgtC40LTRiy4g0prRi9C30LTQsNGAINKv0YjRltC9INC90LXQs9GW0LfQs9GWINC60LXQt9C10qPQtNC10YDRltC9INKb0LDRgNCw0YHRgtGL0YDRgdCw0pssIDEt0LrQtdC30LXSoyjQv9GA0LXQv9GD0LHQtdGA0YLQsNGC0YLRi9KbINC60LXQt9C10qPRlik6INCh0q/RgiDQsdC10LfRliDQtNCw0LzRi9C80LDSk9Cw0L0sINKb0LDRgdCw0pPQsCDQsNC50LzQsNKT0YvQvdC00LAg0YLSr9C6INC/0LDQudC00LAg0LHQvtC70LzQsNC50LTRiy4gMi3QutC10LfQtdKjKNGB0q/RgiDQsdC10LfRltC90ZbSoyDQtNCw0LzRg9GLKTog0KHSr9GCINCx0LXQt9C00LXRgNGWINCx0q/RgNGI0ZbQutGC0LXRgNGWINC/0LDQudC00LAg0LHQvtC70LDQtNGLINC205nQvdC1INC00LUg0LXQvNGI0LXQuiDQsNC50LzQsNKT0Ysg0YHTmdC7INGC0L7QvNC/0LDQudGL0L8g0YLSsdGA0LDQtNGLLCDSm9Cw0YHQsNKT0LAg0LDQudC80LDSk9GL0L3QtNCwINKx0LfRi9C9LNC20ZbSo9GW0YjQutC1INCw0Lcg0YLSr9GC0ZbQutGC0LXRgCDQv9Cw0LnQtNCwINCx0L7Qu9Cw0LTRiy4gMy3QutC10LfQtdKjKNGB0q/RgiDQsdC10LfQtNC10YDRltC90ZbSoyDQvtC00LDQvSDTmdGA0ZYg06nRgdGD0ZYpOiDQodKv0YIg0LHQtdC30LTQtdGA0ZYg0L7QtNCw0L0g05nRgNGWINKv0LvQutC10LnQtdC00ZYs0LDQu9Cw0LnQtNCwINGI0LXQutCw0YDQsNC70LDRgNGLINCw0L3Ri9KbINC10LzQtdGBINCx0L7Qu9Cw0LTRiywg0pvQsNGB0LDSk9CwINCw0LnQvNCw0pPRi9C90LTQsCDRgtKv0LrRgtC10YAg0pvQvtGO0LvQsNC90YvQvyzQutOp0LHRltGA0LXQuiDQsdC+0LvRi9C/LCDQsdKx0LnRgNCwINCx0L7Qu9CwINCx0LDRgdGC0LDQudC00YsuIDQt0LrQtdC30LXSozog0KHSr9GCINCx0LXQt9C00LXRgNGWINGI0LXQutCw0YDQsNC70LDRgNGLLNGP0pPQvdC4INGE0L7RgNC80LDRgdGLINCw0LnSm9GL0L3QtNCw0LvQsCDRgtKv0YHQtdC00ZYsINCw0Lsg0pvQsNGB0LDSk9CwINCw0LnQvNCw0pPRi9C90LTQsNKT0Ysg0YLSr9C60YLQtdGAINGC0L7Qu9GL0psg0YLRi9KT0YvQt9C00LDQu9CwINGC0q/RgdC10LTRli4gNS3QutC10LfQtdKjKNCi0L7Qu9GL0psg0LTQsNC80YMpOtCh0q/RgiDQsdC10LfQtNC10YDRliDRgtC+0LvRi9KbINC00LDQvNGL0LnQtNGLINC205nQvdC1INC00LUg0LXRgNC10YHQtdC6INGE0L7RgNC80LDRgdGL0L3QsCDQttC10YLQtdC00ZYsINGC0q/QutGC0LXRgNGWINC10YDQtdGB0LXQutGC0LXRgNC00LUg0YHQuNGP0pvRgtGLINCx0L7Qu9GL0L8sINGW0YjRgtGW0qMg0L7RgNGC0LDRgdGL0L3QsCDSm9Cw0YDQsNC5INOp0YHQtdC00ZYuICDQkNC7INKx0LvQtNCw0YAg0q/RiNGW0L0g0L3QtdCz0ZbQt9Cz0ZYg0LrQtdC30LXSo9C00LXRgDogMS3QutC10LfQtdKjKNC/0YDQtdC/0YPQsdC10YDRgtCw0YLRgtGL0pspOiDQttGL0L3Ri9GBINCx0LXQt9C00LXRgNGWINC80LXQvSDQsNGC0LDQu9GL0psg0LHQtdC30LTQtdGA0ZYg0rHQu9KT0LDQudC80LDSk9Cw0L0g0LbTmdC90LUg0pvQsNGB0LDSk9CwINCw0LnQvNCw0pPRi9C90LTQsCDRgtKv0LrRgtC10YDRliDQsdC+0LvQvNCw0LnQtNGLLiAyLdC60LXQt9C10qMo0LDRgtCw0LvRi9KbINCx0LXQt9C00ZbSoyDSsdC70pPQsNGO0YspOtCQ0YLQsNC70YvSmyDQsdC10LfQtNC10YAg0LzQtdC9INKx0LzQsCDSr9C70LrQtdC50LUg0LHQsNGB0YLQsNC50LTRiywg0pvQsNGB0LDSk9CwINCw0LnQvNCw0pPRi9C90LTQsCDSsdC30YvQvSwg0LbRltKj0ZbRiNC60LUg0LbTmdC90LUg0LbSsdC80YHQsNKbINGC0q/QutGC0LXRgNGWINC/0LDQudC00LAg0LHQvtC70LDQtNGLLiAzLdC60LXQt9C10qMo0LbRi9C90YvRgSDQvNKv0YjQtdGB0ZbQvdGW0qMg06nRgdGD0ZYpOiDSsNC70LTRi9KjINC20YvQvdGL0YEg0LzSr9GI0LXRgdGWINC80LXQvSDQsNGC0LDQu9GL0psg0LHQtdC30ZYg0rHQt9GL0L3QtNGL0pPRiyDQvNC10L0g0pvQsNC70YvSo9C00YvSk9GLINKv0LvQutC10LnQtdC00ZYsINGC0q/QutGC0LXRgNGWINKb0L7RjtC70LDQvdGL0L8sINC606nQvyDQsdC+0LvQsCDQsdC+0LvQsNC00YsuIDQt0LrQtdC30LXSoyjQttGL0L3Ri9GBINC80q/RiNC10YHRltC90ZbSoyDQvtC00LDQvSDTmdGA0ZYg06nRgdGD0ZYpOtC20YvQvdGL0YEg0LzSr9GI0LXRgdGWINC80LXQvSDQsNGC0LDQu9GL0psg0LHQtdC30LTQtdGAINC10YDQtdGB0LXQutC60LUg0LbQsNKb0YvQvSDQutOp0LvQtdC80LPQtSDQttC10YLQtdC00ZYs0LDQuyDSm9Cw0YHQsNKT0LAg0LDQudC80LDSk9GL0L3QtNCw0pPRiyDRgtKv0LrRgtC10YDRliDRgtC+0LvRi9KbINGC0YvSk9GL0LfQtNCw0LvQsNC00YsuNS3QutC10LfQtdKjKNCi0L7Qu9GL0psg0LTQsNC80YMpOiDQttGL0L3Ri9GBINC80q/RiNC10YHRliAg0LzQtdC9INCw0YLQsNC70YvSmyDQsdC10LfRliDRgtC+0LvRi9KbINC20LXRgtGW0LvQs9C10L0s0LXRgNC10YHQtdC60LrQtSDRgtOZ0L0g0YTQvtGA0LzQsNC00LAg0pvQsNGB0LDSk9CwINCw0LnQvNCw0pPRi9C90LTQsNKT0Ysg0YLSr9C60YLQtdGAINC80LXQvSDRgdCw0L3Sk9CwINKb0LDRgNCw0Lkg0YLQsNGA0LDQu9GD0Ysg0LbSr9GA0LXQtNGWLiA8YnIgLz4NCjIuINCR0rHQuyDQttC10YDQtNC1IDgg0LDQudC70YvSmyDQsdCw0LvQsNC00LDSk9GLINGC0YvQvdGL0YEg0LDQu9GDINCx0LXQu9Cz0ZbQu9C10YDRliDQttOZ0L3QtSDRiNCw0pPRi9C80LTQsNGA0Ysg0LbQsNC50LvRiyDQsNC50YLRi9C70pPQsNC9LiDQkdKx0Lsg0LbQsNKT0LTQsNC5INCx0LDQu9Cw0LvQsNGA0LTQsNKT0Ysg0YLRi9C90YvRgSDQsNC70YMg0LbQvtC70LTQsNGA0YvQvdGL0qMg0YLTqdC80LXQvdCz0ZYg0LHTqdC70ZbQutGC0LXRgNGW0L3QtNC1INCx0L7Qu9Cw0YLRi9C9INCw0YPRgNGD0LvQsNGA0LTRiyDQsNC50YLRg9KT0LAg0LHQvtC70LDQtNGLLiDSmtKx0YDSk9Cw0psg0YHRi9GA0YvQu9C00LDRgCDRgtGL0L3Ri9GBINCw0LvRgyDQttC+0LvQtNCw0YDRi9C90LTQsCDQutC10LTQtdGA0LPRliDQsdC+0LvSk9Cw0L0g0LrQtdC30LTQtSDQv9Cw0LnQtNCwINCx0L7Qu9Cw0LTRiyDQttOZ0L3QtSDQvtC70LDRgCDSm9Cw0LHRi9C90YMs0ZbRgdGW0L3RgyDQvdC10LzQtdGB0LUg0LHRgNC+0L3RhdGC0LDRgNC00YvSoyDRgtCw0YDRi9C70YMg0L3TmdGC0LjQttC10YHRltC90LTQtSDRgtGD0YvQvdC00LDQudC00YsuINCV0L3RgtGW0LPRgywg0rHQt9Cw0YDRgtGL0LvSk9Cw0L0g0LTQtdC8INGI0YvSk9Cw0YDRg9GLINCx0YDQvtC90YXRgtCw0YDQtNGL0qMg0YLQsNGA0YvQu9GD0YvQvSDQutOp0YDRgdC10YLQtdC00ZYuINCR0YDQvtC90YXRgtCw0YAg0YLQsNGA0YvQu9GD0Ysg0LrQtdC30ZbQvdC00LUg0LDRg9CwINOp0YLQutC10L0g0LbQsNKT0LTQsNC50LTQsCDRiNGD0YvQuyDQv9Cw0LnQtNCwINCx0L7Qu9Cw0LTRiywg0LHSsdC7INKb0rHRgNKT0LDSmyDRgdGL0YDRi9C70LTQsNGA0LTRi9KjINC90LXQs9GW0LfQs9GWINGB0LXQsdC10LHRltC90LUg05nQutC10LvQtdC00ZYu0KvQu9KT0LDQu9C00Ysg0YHRi9GA0YvQu9C00LDRgCDSsdGB0LDSmyDQsdGA0L7QvdGF0YLQsNGAINC80LXQvSDQsdGA0L7QvdGF0LjQvtC70L7Qu9Cw0YDQtNCwINC/0LDQudC00LAg0LHQvtC70LDQtNGLLiDQntC7INC20LXRgNC00LUg0YjRi9GA0YvRiCwg0Y3QutGB0YHRg9C00LDRgiDQvdC10LzQtdGB0LUg0LHQsNGB0pvQsCDQtNCwINGB0rHQudGL0pvRgtGL0pvRgtCw0YAg0LbQuNC90LDQu9Cw0LTRiy4g0KvQu9KT0LDQu9C00Ysg0YHRi9GA0YvQu9C00LDRgCDTmdGA0YLSr9GA0LvRliDQsdC+0LvQsNC00Ysu0J7Qu9Cw0YAg0rHRgdCw0psg0LrTqdC/0ZbRgNGI0ZbQutGC0LXRgNC00LXQvSDQsdCw0YHRgtCw0L8g0ZbRgNGWINC606nQv9GW0YDRiNGW0LrRgtC10YDQs9C1INC00LXQudGW0L0g0LHQvtC70LDQtNGLLiDQr9KT0L3QuCDQvtC7INGB0rHQudGL0pvRgtGL0pvRgtGL0qMg0LrTqdC70LXQvNGWINC80LXQvSDQvtGA0L3QsNC70LDRgdGD0YvQvdCwINCx0LDQudC70LDQvdGL0YHRgtGLLiDQntGA0YLQsNGI0LAg0LrTqdC/0ZbRgNGI0ZbQutGC0ZYg0LTRi9Cx0YvRgSDTmdC00LXRgtGC0LUg0YHSsdC50YvSm9GC0YvSm9GC0YvSoyDQvtGA0YLQsCDQtNC10qPQs9C10LnQtNC1INC20LjQvdCw0LvSk9Cw0L3Ri9C9INC606nRgNGB0LXRgtC10LTRliwg0LHSsdC7INGI0YvRgNGL0YjRgtGL0qMg0L3QtdC80LXRgdC1INKb0LDQsdGL0L3Sk9Cw0L0g0LHRgNC+0L3RhdGC0LDRgCDQvNC10L0g0LHRgNC+0L3RhdC40L7Qu9Cw0LvQsNGA0LTRi9KjINGN0LrRgdGB0YPQtNCw0YLRiyDQsdC+0LvRg9GLINC80q/QvNC60ZbQvSDQsdC+0LvQsNC00YsuINCR0rHQuyDQsdC10LvQs9GW0LvQtdGAINC+0LHRgdGC0YDRg9C60YLQuNCy0YLRliDRgtGL0L3Ri9GBINCw0LvRgyDQttC+0LvQtNCw0YDRi9C90YvSoyDQsNGD0YDRg9C70LDRgNGL0L3QsCDRgtOZ0L0g0LHQvtC70YvQvyDQutC10LvQtdC00ZYuINCR0rHQuyDRgtGL0L3Ri9GBINC20L7Qu9C00LDRgNGL0L3Ri9KjINGC0LDRgNGL0LvRg9GLINGB0LDQu9C00LDRgNGL0L3QsNC9INC/0LDQudC00LAg0LHQvtC70LDQtNGLLCDRgdC10LHQtdCx0ZYg0pvQsNCx0YvQvdGDINC80LXQvSDRgdKx0LnRi9Kb0YLRi9Kb0YLRi9KjINC20LjQvdCw0LvRg9GLINCw0YPQsNC90YvSoyDRiNGL0pPRg9GL0L0g0pvQuNGL0L3QtNCw0YLQsNC00YssINOZ0YHRltGA0LXRgdC1INC40L3RhNC40LvRjNGC0YDQsNGC0YLQsNGAINC80LXQvSDRiNGL0YDRi9GIINC20LjQvdCw0pvRgtCw0LvSk9Cw0L0g0LbQsNKT0LTQsNC50LTQsCDRgtGD0YvQvdC00LDQudC00YsuINCR0rHQuyDQtNGL0LHRi9GBINKb0LDQsdGL0L3Rg9C00YvSoyDRgdCw0LvQtNCw0YDRi9C90LDQvSDTqdC60L/QtdC00LUg0LDRg9CwINCx0L7Qu9C80LDRg9GLINC90LXQvNC10YHQtSDQttC40L3QsNC70YPRi9C90LAg0LHQsNC50LvQsNC90YvRgdGC0Ysg0LHQvtC70LDQtNGLLiDQkNC7INKb0L7RgNCw0L/RgtGLINC00YvQsdGL0YEg06nQutC/0LXQvdGW0qMg0pvSsdGA0pPQsNKbINC90LXQvNC10YHQtSDRgdKx0LnRi9Kb0YLRi9KbINCx0L7Qu9GD0YvQvdCw0L0g0L/QsNC50LTQsCDQsdC+0LvQsNGC0YvQvSDTqdC30LPQtdGA0ZbRgdGC0LXRgNC00ZYg0LrTqdGA0YHQtdGC0LXQtNGWLiDQkdKx0Lsg0LDRg9GA0YMg0L7QsdGB0YLRgNGD0LrRgtC40LLRgtGWINGB0LjQv9Cw0YLRgtCwINCx0L7Qu9GD0YvQvdCwINCx0LDQudC70LDQvdGL0YHRgtGLLCDQutOp0LrRltGA0LXQuiDSm9GD0YvRgdGL0L3Ri9KjINKb0rHRgNGL0LvRi9GB0Ysg06nQt9Cz0LXRgNC10LTRli4g0J7QsdGB0YLRgNGD0LrRgtC40LLRliDQsNGD0YDRg9C70LDRgNC00LAg0LrTqdC60ZbRgNC10Log0pvRg9GL0YHRiyDQutOp0LHRltC90LXRgdC1INC60LXSo9C10LnQs9C10L0g0LHQvtC70LDQtNGLLCDTqdC50YLQutC10L3RliDTqdC60L/QtdC90ZbSoyDQs9C40L/QtdGA0LLQtdC90YLQtdC70Y/RhtC40Y/RgdGLINC20LDSk9C00LDQudGL0L3QtNCwINC/0LDQudC00LAg0LHQvtC70LDQtNGLLiDQmtOp0LrRltGA0LXQuiDSm9GD0YvRgdGL0L3Ri9KjINC606nQu9C10LzRliDTmdGB0ZbRgNC10YHQtSDQsdGA0L7QvdGF0LjQu9C40YIg0LrQtdC30ZbQvdC00LUg0rHQu9KT0LDQudGL0L8g0LrQtdGC0YPRliDQvNKv0LzQutGW0L0uINCh0L7QvdGL0LzQtdC9INKb0LDRgtCw0YAsINCx0LDQu9Cw0LvQsNGA0LTQsCDQutOp0LHRltC90LUg0pvQsNCx0YvRgNKT0LDQsNGA0LDQu9GL0psg0YLQsNGA0YvQu9GD0LvQsNGAINC606nRgNGW0L3QtdC00ZYsINCx0rHQuyDTqdC3INC60LXQt9C10LPRltC90LTQtSDRgtGL0L3Ri9GBINC20L7Qu9C00LDRgNGL0L3QtNCw0pPRiyDQttC+0pPQsNGA0Ysg0pvRi9GB0YvQvCDQvNC10L0g0pvQsNC70YvQv9GC0Ysg0LbQtdKj0ZbQu9C00LXRgtGD0LTRltKjINKb0LjRi9C90LTRi9Kb0YLQsNGA0YvQvSDQutOp0YDRgdC10YLQtdC00ZYuICDQkdKx0Lsg0L3QsNGD0pvQsNGBINCx0LDQu9Cw0L3Ri9KjINCx0LXQu9Cz0ZbQu9C10YDRliDQvNC10L0g0YHQuNC80L/RgtC+0LzQtNCw0YDRi9C90LAg0pvQsNGA0LDSk9Cw0L3QtNCwINCx0rHQuyDQvtCx0YHRgtGA0YPQutGC0LjQstGC0ZYg0LHRgNC+0L3RhdC40YLRgtGLINC90LXQvNC10YHQtSDQsdGA0L7QvdGF0LjQvtC70LjRgtGC0ZYg0LrTqdGA0YHQtdGC0LXQtNGWLiDQldCz0LXRgCDQtNC1INGG0LjQsNC90L7QtyDQsNC50pvRi9C9INCx0L7Qu9GB0LAg0LPQuNC/0L7QutGB0LjRjyDQsdC10LvQs9GW0YHRliDQsdC+0LvQsNC00YssINC+0Lsg0LDRg9GA0YMg0YLRi9C90YvRgSDQsNC70YMg0LbQtdGC0LrRltC70ZbQutGB0ZbQt9C00ZbQs9GW0L3QtdC9INGC0YPRi9C90LTQsNC50LTRiy4g0JDQu9Cw0LnQtNCwINCx0rHQuyDQtNC40LDQs9C90L7Qt9C00Ysg0YDQsNGB0YLQsNGDINKv0YjRltC9INKb0L7RgdGL0LzRiNCwINC30LXRgNGC0YLQtdGD0LvQtdGA0LTRliDSm9Cw0LbQtdGCINC10YLQtdC00ZY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35" table:style-name="ce1">
            <text:p>1066835</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4g0JbRi9C90YvRgdGC0YvSmyDQttC10YLRltC70YMt0L7QuyDQsdCw0LvQsNC70YvSmyDRiNCw0pvRgtCw0L0g0LXRgNC10YHQtdC6INC60LXQt9C10qPQs9C1INOp0YLRgyDQutC10LfQtdKj0ZbQvSDQsNC50YLQsNC00YsuINCR0rHQuyDQutC10LfQtNC1LCDQttCw0LvQv9GLINCz0L7RgNC80L7QvdC00LDRgNC00YvSoyDRltGB0LrQtSDSm9C+0YHRi9C70YPRiywg0rHQuyDQsdCw0LvQsCDQvNC10L0g0pvRi9C3INCx0LDQu9Cw0L3Ri9KjINOp0YHRgyDQtdGA0LXQutGI0LXQu9GW0LrRgtC10YDRltC90LUg0YHQsNC5INOp0LfQs9C10YDRltGB0YLQtdGA0LTRltKjINC00LDQvNGD0YvQvSDQutOp0YDQtSDQsNC70LDQvNGL0LcuINCc05nRgdC10LvQtdC9LCDSm9GL0Lcg0LHQsNC70LDQvdGL0qMg0LrQtdGD0LTQtdGB0ZbQvdC00LXQs9GWINOp0LfQs9C10YDRltGB0YLQtdGALCDQsdC+0LnQtNGL0qMg0LDQu9Cw0YHQsCDQsdC+0LvRg9GLINC80LXQvSDQttCw0LzQsdCw0YHRgtGL0qMg0LTTqdKj0LPQtdC70LXQutGC0LXQvdGD0ZYg0LDRgtGC0Ysg06nQt9Cz0LXRgNGW0YHRgtC10YAuINCQ0Lsg0rHQuyDQsdCw0LvQsNC00LAg0LXRgNC10LrRiNC10LvRltC60YLQtdGAINC60LXRiCDQsdC+0LvQsNC00YssINKb0YvQtyDQsdCw0LvQsNKT0LAg0pvQsNGA0LDSk9Cw0L3QtNCwLCDRj9KT0L3QuCDQtNCw0YPRi9GB0YLRi9KjINKb0LDRgNC70YvSk9GD0YssINCx0L7QudC00YvSoyDQsNC70LDRgdCwINCx0L7Qu9GD0YssINC80L7QudGL0L3QtNCw0pPRiyDRgdKv0LnQtdC60YjQtdC90ZbSoyDTqdGB0YPRltC80LXQvSDQtdGA0LXQutGI0LXQu9C10L3QtdC00ZYuINCe0Lsg0LHQsNC70LDQtNCw0pPRiyDQs9C+0YDQvNC+0L3QtNCw0YDQtNGL0qMg06nQt9Cz0LXRgNGW0YHRliwg0YLQtdGB0YLQtdGB0YLQtdGA0L7QvSwg0Y3RgdGC0YDQvtCz0LXQvSwg0L/RgNC+0LvQsNC60YLQuNC9INCz0L7RgNC80L7QvdC00LDRgNC00YvSoyDTqdC30LPQtdGA0YPRltC80LXQvSDQtdGA0LXQutGI0LXQu9C10L3QtdC00ZYuINCi0LDQvdC90LXRgCDQsdC+0LnRi9C90YjQsCwg0LXRgCDQsdCw0LvQsNC00LDSk9GLINC20YvQvdGL0YHRgtGL0psg0LbQtdGC0ZbQu9GDINC60LXQt9C10qPQtNC10YDRliwgMS3QutC10LfQtdKjINCx0L7QudGL0L3RiNCwLCDQttGL0L3Ri9GB0YLRi9KbINC80q/RiNC10LvQtdGA0LTRltKjINOp0YHRg9GWINC80LXQvSDQtNCw0LzRg9GLLiDQltGL0L3Ri9GB0YLRi9KbINGC0q/QutGC0LXQvdGDINCx0L7Qu9C80LDQudC00YsuINCQ0LsgMi3QutC10LfQtdKj0LTQtdCz0ZYg0YHQuNC/0LDRgtGC0LDRgCDQsdC+0LnRi9C90YjQsCwg0rHQvNCw0LTQsNKT0Ysg0YLQtdGA0ZbRgdGWINGB0LDQu9Cx0YvRgCDQttOZ0L3QtSDSm9GL0LfSk9GL0LvRgiDRgtKv0YHRltC80LXQvSDQtdGA0LXQutGI0LXQu9C10L3QtdC00ZYuINCh0LjRgNC10Log0LbTmdC90LUg0LrRltGI0ZbQs9GW0YDRltC8INC/0LjQs9C80LXQvdGC0YLQtdC70LPQtdC9INGC0q/QutGC0LXRgNGWINC20LDQt9GL0pvRgtCw0YMg0L3QtdC80LXRgdC1INGI0LDRiNGC0YvSoyDQsdC+0LvRg9GL0LzQtdC9INC205nQvdC1INCx0ZbRgNC10L0t0YHQsNGA0LDQvdGLINGB05nQuyDQsdKx0LnRgNCw0LvQsNC90pPQsNC9LCDQutOp0LHRltC90LUg0LHSsdC7INOp0LfQs9C10YDRltGB0YLQtdGAINC20YvQvdGL0YHRgtGL0psg0LzSr9GI0LUg0L3QtdCz0ZbQt9GW0L3QtNC1INCx0L7Qu9GD0Ysg0LzSr9C80LrRltC9LiAzLSDQutC10LfQtdKj0LTQtdCz0ZYg06nQt9Cz0LXRgNGW0YHRgtC10YDRliDQsdC+0LnRi9C90YjQsCwg0LDRgtCw0LvRi9KbINKx0YDRi9KbINC/0LXQvSDSsdC80LDQvdGL0qMg0LDRgNGLINKb0LDRgNCw0Lkg0LTQsNC80YPRi9C80LXQvSDQttOZ0L3QtSDQttGL0L3Ri9GB0YLRi9KbINC80q/RiNC10L3RltKjINC606nQu9C10LzRliDSsdC70pPQsNC50pPQsNC90YvQvSDQutOp0YDQtSDQsNC70LDQvNGL0Lcu0KLSr9C60YLQtdGA0ZYg0L/QuNCz0LzQtdC90YLRgtC10LvQs9C10L0sINGP0pPQvdC4INKb0L7So9GL0YDSm9Cw0Lkg0LHQvtC70YPRiy7QhtGA0ZYg0YLQsNC70YjRi9Kb0YLRiyzQttGD0LDQvSwg0LHQsNGA0LvRi9KbINGC0q/QutGC0LXRgNGWINCx0rHQudGA0LDQu9Cw0L3Sk9Cw0L0uINCi0q/QutGC0ZbSoyDTqdGB0YPRliDRgtGW0L/RgtGWINKb0LDRgdCw0YHRi9C90LAg0LTQtdC50ZbQvSDTqdGB0YPRliDQsdCw0LnSm9Cw0LvQsNC00YsuIDQt0LrQtdC30LXSo9GW0L3RltKjINGB0LjQv9Cw0YLRgtCw0YHQsNKbLCDQttGL0L3Ri9GB0YLRi9KbINC80q/RiNC10L3RltKjINC606nQu9C00LXQvdC10qMg0LTQuNCw0LzQtdGC0YDRliDQsdC+0LnRi9C90YjQsCDTqdGB0YPRliDQttOZ0L3QtSDQttGL0L3Ri9GB0YLRi9KbINGC0q/QutGC0LXQvdGDINC10YDQu9C10YAg0YLQuNC/0YLRltGB0ZbQvdC1INCw0YPRi9GB0YvQvywg0YHQsNC90L3Ri9KjINGW0YjQutGWINC20LDSk9GL0L3QsCDRgtCw0YDQsNC70LzQsNKT0LDQvS4gNS3QutC10LfQtdC90ZbSoyDRgdC40L/QsNGC0YLQsNGB0LDSmywg0LHSsdC7INC60LXQt9C00LUg0YHRi9GA0YLSm9GLINC20YvQvdGL0YHRgtGL0psg0LzSr9GI0LXQvdGW0qMg0LTQuNCw0LzQtdGC0YDQtNGW0qMg0L7QtNCw0L0g05nRgNGWINOp0YHRg9GWLiDQotKv0LrRgtC10L3RgyDRgdCw0L3QvdGL0qMg0ZbRiNC60ZYg0LbQsNKT0YvQvdCwINGC0LDRgNCw0LvSk9Cw0L0uINKa0YvQt9C00LDRgNC00YvSoyDQttGL0L3Ri9GB0YLRi9KbINC20LXRgtGW0LvRgyDQutC10LfQtdKj0LTQtdGA0ZYuMS3QutC10LfQtdKjLCDRgdKv0YIg0LHQtdC30LTQtdGA0ZYg0LTQsNC80YvQvNCw0pPQsNC9LtCW0YvQvdGL0YHRgtGL0psg0YLSr9C60YLQtdC90YMg05nQu9GWINC00LDQvNGL0LzQsNKT0LDQvS4g0LbRi9C90YvRgSDQsdC10LfQtNC10YDRliDSm9Cw0LvRi9C/0YLRi9C00LAuIDItINC60LXQt9C10qPQs9C1INGB0LDQuSwgINGB0q/RgiDQsdC10LfRltC90ZbSoyDQsdKv0LnRltC9INGB0LXQutGW0LvQtNGW0LPQtSDQtNC10LnRltC9INOp0YHRg9GWLtCi0q/QutGC0LXQvdGD0LTRltKjINC10L3QtNGWINCx0LDRgdGC0LDQu9GD0YssINKx0LfRi9C9LCDRgdC40YDQtdC6LCDQttKx0LzRgdCw0psgLCDTmdC70YHRltC3INC/0LjQs9C80LXQvdGC0YLQtdC70LPQtdC9LiDQotKv0LrRgtC10YDRliDQttCw0LfRi9Kj0pvRiywg0LrRltGI0LrQtdC90LUg0LrTqdC70LXQtNC1INCx0rHQudGA0LDQu9Cw0L3Rg9C00Ysg0LrTqdGA0LXQvNGW0LcuINCW0YvQvdGL0YHRgtGL0psg0LXRgNGW0L0g0LbQsNKT0YvQvdC00LAg0L7RgNC90LDQu9Cw0YHSm9Cw0L0uICAzLdC60LXQt9C10qPQtNC1LNGB0q/RgiDQsdC10LfRltC90ZbSoyDQsNGA0Ysg0pvQsNC70LDQuSDQutOp0LvQtdC80ZbQvdGW0qMg0rHQu9KT0LDRjtC80LXQvSDQttOZ0L3QtSDQutC+0L3RgtGD0YDRiyDRgtKv0LrRgtC10YDRltC90ZbSoyDTqdGB0YPRliDQsdCw0LnSm9Cw0LvSk9Cw0L0u0L/QuNCz0LzQtdC90YLRgtC10LvQs9C10L0sINKb0L7So9GL0YDSm9Cw0Lkg0LHQvtC70YPRiywg0ZbRgNGWINGC0LDQu9GI0YvSm9GC0Ysg0LHQvtC70YPRi9C80LXQvSDQtdGA0LXQutGI0LXQu9C10L3QtdC00ZYuIDQt0LrQtdC30LXSoywg0pvQsNGB0LDSk9CwINC20LDQudGL0LvSk9Cw0L0sINC+0L3Ri9KjINGC0q/QutGC0LXQvdGD0ZYg05nQudC10Lsg0YLQuNC/0YLRltCz0LUg0LDRg9GL0YHRg9GLLNGC0q/QutGC0LXQvdGD0ZYg0LHSsdGC0LDRgNCw0YHRi9C90LAg0LbQsNC50YvQu9C80LDSk9Cw0L0uINCR0LXQt9C10YMg0LzQtdC9INC80LXQvdCw0YDRhdC1INC60LXQt9C10qPRltC9INC00LDQvNGD0YvQvSDQutOp0YDQtdC80ZbQty4gNS0g0LrQtdC30LXSo9GWINCx0L7QudGL0L3RiNCwLCDRgdKv0YIg0LHQtdC30LTQtdGA0ZYg05nQudC10Lsg0YLQuNC/0YLRltCz0LUg0YHQsNC5INKx0LvSk9Cw0Y7Ri9C9LCDRgdKv0YIg0LHQtdC30ZbQvdGW0qMg0LrQvtC90YLRg9GA0YvQvNC10L0g0LHRltGA0ZbQutC60LXQvS4g0KLSr9C60YLQtdGA0ZbQvdGW0qMg06nRgdGD0ZYg0LHSsdGC0LDRgNCw0YHRi9C90LAg0LTQtdC50ZbQvSDRgtCw0YDQsNC80LTQsNC70YvQvyDTqdGB0YPRliDQsdCw0LnSm9Cw0LvQsNC00YsuINCV0YAg0LDQtNCw0LzQtNCw0YDQtNCwLCDQttGL0L3Ri9GB0YLRi9KbINC20LXRgtGW0LvRg9Cz0LUg0LHQsNC50LvQsNC90YvRgdGC0Ysg0LPQuNC/0L7QvdCw0LfQuNGPLCDQt9OZ0YAg0YjRi9KT0LDRgNGDINC60LDQvdCw0LvRi9C90YvSoyDRltGA0LPQtdGB0ZbQvdGW0qMg0YHQsNKj0YvQu9Cw0YPRi9C90LTQsCDQsdC+0LvQsNGC0YvQvSDTqdC30LPQtdGA0ZbRgdGC0LXRgC4g0K3Qv9C40YHQv9Cw0LTQuNGPLCDQt9OZ0YAg0YjRi9KT0LDRgNGDINC60LDQvdCw0LvRi9C90YvSoyDQttC+0pPQsNGA0pPRiyDRltGA0LPQtdGB0ZbQvdGW0qMg0YHQsNKj0YvQu9Cw0YPRiy4g0JbRi9C90YvRgdGC0YvSmyDQvNKv0YjQtdC90ZbSoyDQs9C40L/QvtC/0LvQsNC30LjRj9GB0YssINGP0pPQvdC4INC80LjQutGA0L7Qv9C10L3QuNGBLCDQv9Cw0LvRjNC/0LDQudC40Y/Qu9Cw0L3Sk9Cw0L3QtNCwINC80q/RiNC10LvQtdGA0LTRltKjINC60pvQu9C10LzRliDQvNC10L0g0LrQvtC90YHQuNGB0YLQtdC90YbQuNGP0YHRi9C90LAg0pvQsNGA0LDQuSDQsdCw0pPQsCDQsdC10YDRg9Cz0LUg0LHQvtC70LDQtNGLLiDTqNCw0LbQtdGCINC60LXQt9GW0L3QtNC1INKb0L7RgdGL0LzRiNCwINCw0L3QsNC70LjQt9C00LXRgCDQvNC10L0g0LfQtdGA0YLRgtC10YMg05nQtNGW0YHRgtC10YDRltC9INC20q/RgNCz0ZbQt9GD0ZbQs9C1INCx0L7Qu9Cw0LTRiy4g0JzTmdGB0LXQu9C10L0sINCj0JTQly0xINCw0YDSm9GL0LvRiyDQttGL0L3Ri9GB0YLRi9OpINCx0LXQt9C00LXRgNC00ZbSoyDRhNGD0L3QutGG0LjRj9GB0YvQvSDQsdCw0pPQsNC70LDRg9KT0LAg0LzSr9C80LrRltC90LTRltC6INCx0LXRgNC10LTRli4g0JPQvtC90LDQtNC+0YLRgNC+0L/QuNC90LTQtdGAINC80LXQvSDQttGL0L3Ri9GB0YLRi9KbINCz0L7RgNC80L7QvdC00LDRgNC00YvSoyDQutC+0L3RhtC10L3RgtGA0LDRhtC40Y/RgdGL0L0g0LTQsCDQsdCw0pPQsNC70LDRg9KT0LAg0pvQvtC70LbQtdGC0ZbQvNC00ZYuICAgICAgICAgICAgICAgICAgICAgICAgICAgICAgICAgICAgICAgICAgICAgICAgICAgICAgICAgICAgICAgICAgICAgICAgICAgICAgICAgICAgICAgICAgICAgICAgICAgICAgICAgICAgIDIuIDgg0LDQudC70YvSmyDQsdCw0LvQsCDQttCw0pPQtNCw0LnRiyDQvtGA0YLQsNGI0LAsINC80rHRgNGL0L0t0LXRgNGW0L0g0q/RiNCx0rHRgNGL0YjRi9C90LTQsCDRhtC40LDQvdC+0LfQtNGL0qMg0LHQvtC70YPRiyzQutOp0LPQtdGA0YPQtNGW0qMg0LHQvtC70YPRiywg0pvQsNC90LzQtdC9INKb0LDQvNGC0LDQvNCw0YHRi9C3INC10YLRltC70YPRliDQsdKx0LfRi9C70pPQsNC90LTQsCDQsNC90YvSm9GC0LDQu9KT0LDQvS4g0LXQvdGC0ZbQs9GDLSDQvtC7INGC0YvQvdGL0YHRgtGL0qMg0LbQtdGC0ZbRgdC/0LXRg9GWINGB0LjRj9Kb0YLRiyDRgdC10LfRltC80LTQtdGA0LTRltKjINCx0L7Qu9GD0Ysg0LzQtdC9INGC0YvQvdGL0YEg0LDQu9GDINC20LjRltC70ZbQs9GWINC80LXQvSDRgtC10YDQtdKj0LTRltCz0ZbQvdGW0qMg0LHSsdC30YvQu9GL0YHRiy44NS05MCDQv9Cw0LnRi9C3INC10L3RgtGW0LPRgyDQttCw0pPQtNCw0LnQu9Cw0YDRiywg0LHRgNC+0L3RhSDQtNC10LzRltC60L/QtdGB0ZYsINC/0L3QtdCy0LzQvtC90LjRjyDQttCw0pPQtNCw0LnQu9Cw0YDRi9C90LTQsCwg0JbQmNCQKNC20q/RgNC10LrRgtGW0L0g0LjRiNC10LzQuNGP0LvRi9KbINCw0YPRgNGD0YvQvdC00LApLCDQmNCR0JssINGB0L7Qt9GL0LvQvNCw0LvRiyDQttKv0YDQtdC6INC20LXRgtC60ZbQu9GW0LrRgdGW0LfQtNGW0LPRltC90LTQtSDQsdCw0LnSm9Cw0LvQsNC00YsuINCd0LDRg9Kb0LDRgdGC0LAg0YLQsNKT0Ysg0LTQsCwg0LrTqdC/0ZbRgNGI0ZbQutGC0ZYg0LbTmdC90LUg0YvQu9KT0LDQu9C00Ysg0YLRi9C90YvRgdGC0LDRgNC00YvSoyDQsdC+0LvRg9GLLCDQvtC7INGC0YvQvdGL0YEg0LbQvtC70LTQsNGA0YvQvdGL0qMg0LHRltGC0LXQu9GD0ZYg0LzQtdC9INC606nRgNGW0L3RltGBINGC0LDQsdCw0LTRiy4g0JDQuyDSm9Kx0YDSk9Cw0psg0YHRi9GA0YvQu9C00LDRgCwg0LTQtdC80ZbQutC/0LUg0LzQtdC9INCx0YDQvtC90YXQuNC+0LvQuNGCINC20LDSk9C00LDQudC70LDRgNGL0L3QtNCwLCDRgdC+0Lsg0LrQtdC30LTQtSDRgtGL0L3Ri9GBINCw0LvRg9GLINKb0LjRi9C90LTQsNC/LCDRgtGL0L3Ri9GBINCw0LvRgyDQttC+0LvQtNCw0YDRiyDQsdGW0YLQtdC70LXQtNGWLiDQkNGD0LDQvdGL0qMg06nRgtGD0ZYg0YLRg9GA0LHRg9C70LXQvdGC0YLRliDRgtC10LrRgtC10YEg0LHQvtC70YPRiyDQvNKv0LzQutGW0L0uINCh0L7QvdGL0qMg0L3TmdGC0LjQttC10YHRltC90LTQtSDRgtGL0L3Ri9GBINCw0LvSk9Cw0L3QtNCwINC90LDRg9Kb0LDRgSwg0pvQsNGC0YLRiyDRi9GB0pvRi9GA0YvSm9GC0Ysg0LbTmdC90LUg0pvQsNGC0pvRi9C7INC00YvQsdGL0YHRgtCw0YAg0LXRgdGC0ZbQu9C10LTRli4g0J7RgNGC0LDRiNCwINC606nQv9GW0YDRiNGW0LrRgtGWINGB0YvRgNGL0LvQtNCw0YAsINC60LXRgNGW0YHRltC90YjQtSDRgtGL0L3Ri9GBINCw0LvRgyDQttC+0LvQtNCw0YDRi9C90LTQsCDQsNGA0YLRi9KbINGB0rHQudGL0pvRgtGL0pvRgtGL0qMg0LHQvtC70YPRi9C80LXQvSAg0LXRgNC10LrRiNC10LvQtdC90ZbQvywgINC80rHQvdC00LAg0LHRgNC+0L3RhdC40YIg0L/QtdC9INGC0YvQvdGL0YEg0LbQvtC70LTQsNGA0YvQvdC00LDSk9GLINC40L3RhNC10LrRhtC40Y/QvdGL0qMg0LHQsNGAINC10LrQtdC90ZbQvSDQsdGW0LvQtNGW0YDQtdC00ZYuINCh0L7QvdC00YvSm9GC0LDQvSDQutOp0L/RltGA0YjRltC60YLRliDQttOZ0L3QtSDRi9C70pPQsNC70LTRiyDQtNGL0LHRi9GB0YLQsNGA0LTRi9KjINCx0L7Qu9GD0YvQvSDQsdCw0LnSm9Cw0LnQvNGL0LcuINCR0rHQuyA4INCw0LnQu9GL0psg0LHQsNC70LDQtNCwLCDSm9Cw0pvRi9GA0YvSm9GC0Yss0pvQvtGA0LDQv9GC0Ysg0LbTmdC90LUg0YLRi9C90YvRgdGLINKb0LDRgtKb0YvQuywg0LrTqdC/0ZbRgNGI0ZbQutGC0ZYg0LbTmdC90LUg0YvQu9KT0LDQu9C00Ysg0YHRi9GA0YvQu9C00LDRgNC00YvSoyDQsdC+0LvRg9GLINC+0Lsg0YLRi9C90YvRgSDQttC+0LvQtNCw0YDRi9C90YvSoyDQuNC90YTQtdC60YbQuNGP0YHRiyDQvtC90LTQsCDSm9Cw0LHRi9C90YMg0q/QtNC10YDRltGB0YLQtdGA0ZbQvSDQttOZ0L3QtSDQsdGA0L7QvdGF0YLRi9KjINCx0ZbRgtC10LvRg9GW0LzQtdC9INGB0LjQv9Cw0YLRgtCw0LvQsNGC0YvQvSDQsNGD0YDRgy4g0JHQsNC70LDQvdGLINCw0YDRiyDSm9Cw0YDQsNC5INGC0LXQutGB0LXRgNGDINKv0YjRltC9INC80LDQvNCw0L3QtNCw0YDQtNGL0qMg0LrTqdC80LXQs9GW0LzQtdC9INCx0LDSk9Cw0LvQsNGDINC80LDSo9GL0LfQtNGLLiDQodGD0YvSmyDRgtC40YMt0L7QuyDSm9Cw0pvRi9GA0YvSm9GC0Ysg0LbTqdGC0LXQu9C00ZbSoyDQsdC10LvQs9GW0YHRliDRgNC10YLRltC90LTQtSDQtNCw0LzRi9KT0LDQvS7SmtCw0LHRi9C90YMg0LHRgNC+0L3RhdGC0LAgLCDQvtC00LDQvSDTmdGA0ZYg0LDRgdKb0YvQvdGB0LAg0LHRgNC+0L3RhdC40L7Qu9Cw0pPQsCDQttOZ0L3QtSDQsNC70YzQstC10L7Qu9Cw0pPQsCDRgtCw0YDQsNC70LTRiy7QtdKjINC90LDRiNCw0YAg0LbQsNKT0LTQsNC50LTQsCAsINGL0LvSk9Cw0LvQtNGLINC206nRgtC10Lsg0L/QvdC10LLQvNC+0L3QuNGPINC20LDSk9C00LDQudGL0L3QtNCwINC+0YDRi9C9INCw0LvQsNC00YsuINKa0rHRgNKT0LDSmyDRgdGL0YDRi9C70LTQsNGA0LTRi9KjINCx0L7Qu9GD0YssINC+0Lsg0LDRg9Cw0L3Ri9KjINCx0YDQvtC90YUg0LDRgNKb0YvQu9GLINOp0YLQutC10L0g0LrQtdC30LTQtSDQsdCw0LnSm9Cw0LvQsNC00YsuINCe0Lsg0pvQsNKb0LDRi9GA0YvSm9C/0LXQvSDRgtC+0LvRgtGL0YDRi9C70YvQvywg0pvQsNKb0YvRgNGL0pvRgtGLINC206nRgtC10LvQvNC10L0g0LHRltGA0LPQtSDRiNGL0pPQsNGA0YvQu9Cw0LTRiy4g0JDQuyDRi9C70pPQsNC70LTRiyDRgdGL0YDRi9C70LTQsNGALCDQsdGA0L7QvdGF0YLQsCDQsdGW0YAg0pvQsNCx0YvQvdGDINKv0LTQtdGA0ZbRgdGC0LXRgNGWINCx0L7Qu9GB0LAg0pPQsNC90LAsINC90LXQvNC10YHQtSDRltGB0ZbQvdGDINC20LDSk9C00LDQudC70LDRgNGLINC+0L3Ri9KjINGB0rHQudGL0pvRgtGL0pPRiyDQttC40L3QsNC70YHQsCwg0pvQsNC9INC20LjQvdCw0LvRgdCwINC/0LDQudC00LAg0LHQvtC70LDQtNGLLiAg06jQutC/0LXRgdGW0L0g0L/QsNC70YzQv9Cw0YbQuNGP0LvQsNC90pPQsNC90LTQsCDQttKx0LzRgdCw0pssINGC0LDQt9CwLCDSm9C+0Lsg0LbRi9C70Ysg0LbTmdC90LUg0LbQsNGA0YvSmyDQsdC+0LvRg9GLINGI0LDRgNGCLiDSmtCw0LHRi9GA0pPQsNCw0LvRi9Kb0YLQsNGA0YvQvSDQv9Cw0LvRjNC/0LDRhtC40Y/Qu9Cw0LnQtNGLLiDTqNC60L/QtSDRgdC10YDQv9GW0LzRltC00ZbQu9GW0LPRltC9INGC0LXQutGB0LXRgNGW0L8g0LHQsNKT0LAg0LHQtdGA0LXQtNGWLCDSm9C+0YHRi9C80YjQsCDQsNC90LDQu9C40LfQtNC10YAg0LbTmdC90LUg0YDQtdC90YLQs9C10L0g0LzQtdC9INGE0LvRjtGA0LDQtNCwINGC0LXQutGB0LXRgNGW0LvRg9GWINGI0LDRgNGCL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Берілген 2-ші есептің сұрақтарына нақты дұрыс жауап жоқ. Неге құрғақ және орта көпіршікті сырылдар естіледі? Бұл ауруға қандай кеуде клеткасы тән? Бұл патологиялық жағдайда қандай ентігу болады? жауаптары жазылмаған.85-90 пайыз ентігу жағдайлары, бронх демікпесі, пневмония жағдайларында, ЖИА(жүректін ишемиялық ауруында), ИБЛ, созылмалы жүрек жеткіліксіздігінде байқалады бұл жауабыныз берілген сұраққа келіспейді. Науқаста тағы да, көпіршікті және ылғалды тыныстардың болуы, ол тыныс жолдарының бітелуі мен көрініс табады. Ал құрғақ сырылдар, демікпе мен бронхиолит жағдайларында, сол кезде тыныс алуы қиындап, тыныс алу жолдары бітеледі -жауап қате, бронх саңылауы тарылады.</text:p>
          </table:table-cell>
          <table:table-cell office:value-type="float" office:value="0" table:style-name="ce1">
            <text:p>0</text:p>
          </table:table-cell>
          <table:table-cell table:number-columns-repeated="16376"/>
        </table:table-row>
        <table:table-row table:style-name="ro1">
          <table:table-cell office:value-type="float" office:value="1066905" table:style-name="ce1">
            <text:p>1066905</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wg0LHQsNC70LDQu9Cw0YDQtNCw0pPRiyDQttGL0L3Ri9GB0YLRi9C6INC20LXRgtGW0LvRgyDQutC10LfQtdKj0LTQtdGA0Lgg05nQtNC10YLRgtC1INC10LrRltC90YjRliDQttGL0L3Ri9GB0YLRi9C6INCx0LXQu9Cz0LjQu9C10YDQtNGW0qMg0YTQuNC30LjQutCw0LvRi9C6INCx0LDSk9Cw0LvQsNGDINC205nQvdC1INGB0LjQv9Cw0YLRgtCw0YMg0YPRiNGW0L0g0pvQvtC70LTQsNC90YvQu9Cw0LTRiy4g0YLQsNC90L3QtdGAINCx0L7QudGL0L3RiNCwINC20YvQvdGL0YHRgtGL0psg0LbQtdGC0ZbQu9GDINGD0LvQtNCw0YAg0LzQtdC9INKb0YvQt9C00LDRgCDRg9GI0ZbQvSA1INC60LXQt9C10qPQtNGWINKb0LDQvNGC0LjQtNGLLiDQtdGAINCx0LDQu9C70LDRgNC00LDSk9GLINC20YvQvdGL0YHRgtGL0psg0LbQtdGC0ZbQu9GDINC60LXQt9C10qPQtNC10YDRltC4LiAxINC60LXQt9C10qMg0LbRi9C90YvRgSDQvNGD0YjQtdGB0ZYgLNCw0YLQsNC70YvQuiDQsdC10LfRliAsINGD0LzQsNGB0Ysg0LHQsNC70LDQu9GL0Log0LrQtdC30LXSo9Cz0LUg0YHQsNC5INC20YvQvdGL0YHRgtGL0psg0YLRg9C60YLQtdC90YMg0LbQviAuIDIg0LrQtdC30LXSozog0LDRgtCw0LvRi9KbINCx0LXQt9GWINC80LXQvSDRg9C80LDRgdGLINKx0LvSk9Cw0Y/QtNGLINC20YvQvdGL0YHRgtGL0psg0LzRg9GI0LXRgdGWINGD0LvQs9Cw0LnQvNCw0LnQtNGLLiDRg9C80LAg0YLQtdGA0ZbRgdGWINGB0LDQu9Cx0YvRgNCw0qPQutGLINKb0YvQt9Cz0YvQuyDRgtGD0YHRgtGWLCDRgtGD0LrRgtC10YDRliDRgdC40YDQtdC6INGD0LfRi9C9INOZ0LvRgdGW0Lcg0YHQuNCz0LzQtdC90YLRgtC10LvQs9C10L0sINCx0ZbRgNC10qMg0YHQsNGA0LDSoyDQsdGD0LnRgNCw0LvQsNC90pPQsNC9LiDQutOp0LHRltC90LUg0LbRi9C90YvRgdGC0YvQuiDQvNGD0YjQtdGB0ZbQvdGW0qMg0L3QtdCz0ZbQt9GW0L3QtNC1INC+0YDQvdC70LDRgdC60LDQvdKvLiAzINC60LXQt9C10qM60LDRgtCw0LvRi9KbINGD0YDRi9KbINC/0LXQvSDRg9C80LAg0LDRgNGLINKb0LDRgNCw0Lkg0LTQsNC80LjQtNGLLCDQttGL0L3Ri9GBINC80YPRiNC10YHRliDRg9C70pPQsNC50YvQvyDSsdC30LDRgNCw0LTRiywg0YLRg9C60YLQtdGA0ZYg0LrQvtKj0YvRgNC70LDQvdCw0LTRiyzQsdGD0LnRgNCw0LvQsNC90pPQsNC9INCx0L7Qu9GL0L8g0LrQsNGC0LDSk9CwINKb0LDRgNCw0Lkg0YLQsNGA0LDQu9Cw0LTRiy4gNCDQutC10LfQtdKjOyAg0LDRgtCw0LvRi9C6INCx0LXQtyDQsdC10L0g0YPQvNCwINGD0LvSk9Cw0LnQsNC00YsgLCDQttGL0L3Ri9GBINC80YPRiNC10YHRltC90ZbSoyDQtNC40L7QvNC10YLRltGA0ZYg0YPQu9KT0LDRj9C00YsgLCDQttGL0L3Ri9GB0YLRi9KTINGC0YPQutGC0LXQvdGDINC10YDQu9C10YAg0YLQuNC/0YLRliDQsdGW0YDQsNKbINGB0LDQvdC90YvSoyDRltGI0LrQuCDQttCw0LPRi9C90LAg0YLQsNGA0LDQu9C80LDSk9Cw0L0uIDUg0LrQtdC30LXSozog0YHRi9GA0YLSm9GLINC20YvQvdGL0YEg0LzRg9GI0LXRgdGWINC10YDQtdGB0LXQutGC0LXRgNC00ZbQutGWINGB0LjRj9Kb0YLRiywg0YLRg9C60YLQtdC90YMg0YHQsNC90L3Ri9KjINGW0YjQutGWINC20LDSk9GL0L3QsCDRgtCw0YDQsNKT0LDQvS4gICAg0pvRi9C30LTQsNGA0LTQsNKT0Ysg0LbRi9C90YvRgdGC0YvSmyDQttC10YLRltC70YMg0LrQtdC30LXSo9C00LXRgNGWIDEg0LrQtdC30LXSozog0YHRg9GCINCx0LXQt9C00LXRgNGWINC00LDQvNGL0LzQsNKT0LDQvSDQtdC80YjQtdC60YLRltC6INGD0YjRgtCw0YDRiyDQutOp0YLQtdGA0ZbSo9C60ZYgLCDQutCw0YHQsNKT0LAg0YPRgdGC0ZbQvdC00LUg0YLRg9C60YLQtdC90YMg0LbQvtC6LjIg0LrQtdC30LXSozog0YHRg9GCINCx0LXQt9GW0L3RltKjINCx0YPQudGW0L0g0LrTqdC70LXQvNC40L3QtSAg0LTQtdC50ZbQvSDTqdGB0YPRliDRgtGD0LrRgtC10L3Rg9C00ZbSoyDQsdCw0YHRgtCw0LvRg9GLINC20YPRgNC10LTRliAuINGC0YPQutGC0LXRgNGWINGB0LjRgNC10Log0YPQt9GL0L0gLCDTmdC70YHQuNC3INC/0LjQs9C80LXQvdGC0YLQtdC70LPQtdC9INC205nQvdC1INC20LDQt9GL0Log0LHQuNGA0LXQvSDRgdCw0YDQsNC90YvSk9Cw0L3QsCDQsdGD0LnRgNCw0LvQsNC90pPQsNC9INC20LXQvdC1INC20YvQvdGL0YHRgtGL0Log0LXRgNC90LXRgyDQsdC+0LnRi9C90LTQsCDQvtGA0L3QsNC70LDRgdKb0LDQvS4zINC60LXQt9C10qM7INGB0YPRgiDQsdC10LfRltC90ZbSoyDQsNGA0Ysg0pvQsNGA0LDQuSDRg9C70pPQsNGO0YsgINCw0YDQtdC+0LDRgdGL0L3Ri9KjINC60L7QvdGL0YDRiyDQsdOp0LvRltC90LHQtdCz0LXQvSwg0YLRg9C60YLQtdGA0ZYg0LrQvtKj0YvRgNC70LDQvdCw0LTRiyDQttOZ0L3QtSDQuNGA0Lgg0YLQsNC70YjRi9Kb0YLRiyDQsdC+0LvRi9C/INKb0LDRgdCw0pPQsNKT0LAg0LbQsNC50YvQu9Cw0LTRiywg0LrQvtC70YLRi9C6INCw0YHRgtGLINGC0YPQutGC0LXQvdC1INCx0LDRgdGC0LDQudC00YvSry40INC60LXQt9C10qMgINGB0YPRgiDQsdC10LfRltC90ZbSoyDQutC+0L3RgtGL0YDRiyDRg9GB0YLRltC90LXQvSDQsNGA0LXQvtC70LDQvdGL0qMg0LbTmdC90LUg0LXQvNGI0LXQuiDRg9GI0YvQvdGL0qMg0YjRi9KT0YvQvdC60Ysg0LHQvtC70YPRi9C90LDQvSDQtdC60ZbRiNC40LvQuNC6INCx0YPQtNGL0YAg0L/QsNC50LTQsCDQsdC+0LvQsNC00Ysu0pvQsNGB0LDSk9CwINGC0YPQutGC0LXQvdGD0ZYg05nQudC10Lsg0LbRi9C90YvRgSDRgtC40L/RgtGWINCx0LjRgNCw0Log0LHRg9C0INCw0YDQsNGB0YvQvdCwINC205nQvdC1INGB0LDQvdC90YvSoyDRltGI0LrRliDQsNC50LzQsNKT0YvQvdCwINC20LDQudGL0LvQvNCw0pPQsNC9LiDQsdC10LfQtdGDINC/0LDQudC00LAg0LHQu9Cw0LTRiyAg0LzQtdC90LDRgNGF0LUsIDUg0LrQtdC30LXQvTog0KHQo9CiINCR0JXQl9CGICDRg9C70LrQtdC9INOZ0LnQtdC70LTQtdGA0LTRltC60ZYg0YHQuNGP0pvRgtGLINCw0YDQtdC+0LvQsNGB0Ysg0YHRg9GCINCx0LXQt9GW0L3RltKjINC60L7QvdGA0Ysg0LzQtdC9INGC0YPRgtCw0YHSk9Cw0L0uINGC0YPQutGC0LXQvdGD0ZYg0YHQsNC90L3Ri9KjINC40YjQutGWINCx0LXRgtC40L3QtSDRgtCw0YDQsNC70pPQsNC9LCDQtdGC0LXQuiDQutGW0YDRliDRgNC10YLRgtGWLiAgICAgICAgICAgIDgg0LDQudC70YvSmyDQsdCw0LvQsNC90YvSoyDTqdC60L/QtdGB0ZbQvdC00LUg0LrRg9GA0pPQsNC6INC205nQvdC1INC606nQv9GW0YDRiNGW0LrRgtGWINGL0LvSk9Cw0LTRiyDRgdGL0YDRi9C70LTQsNGA0LTRi9KjINC10YHRgtGW0LvRg9GWINC+0L3Ri9KjINGC0YvQvdGL0YEg0LDQu9GDINC20L7Qu9C00LDRgNGL0L3QtNCw0pPRiyDQv9Cw0YLQu9C+0LPQuNGP0LvRi9C6INGD0LTQtdGA0ZbRgdGC0LXRgNC80LXQvSDQsdCw0LnQu9Cw0L3Ri9GB0YLRiyAuINC60YPRgNKT0LDQuiDRgdGL0YDRi9C70LTQsNGAINC60LXQt9GW0L3QtNC10LPRliDQsdGA0L7QvdGF0YLQsNGA0LTRi9KjINC60LDQsdGL0YDSk9Cw0LvQsNGA0YvQvdC00LDQs9GLINGW0YHRltC90YMgICDQsdGD0Lsg0LHRgNC+0L3RhdCw0LvRi9KbINGB0L/QsNC30Lwg0L3QtdC80LXRgdC1INC60L7RjiDQutCw0pvRi9GA0YvSm9GC0YvSoyDQttC40L3QsNC70YPRiyDRgtGL0L3Ri9GBINC20L7Qu9C00LDRgNGL0L3Ri9KjINGC0LDRgNGL0LvRg9GL0L3QsCDQsNC70YvQvyDQutC10LvQtdC00ZYuINCw0YPQsCDRgtCw0YDRi9C70pPQsNC9INCx0YDQvtC90YUg0LDRgNC60YvQu9GLINOp0YLQutC10LTQtSDQsNGD0LAg0LDSk9GL0L3Ri9C90YvSoyAgINGC0YPRgNCx0L7Qu9C10L3QvdGC0ZbQu9GW0LPRliDQutGD0YjQtdC50ZbQvyDQutGD0YDSk9Cw0Log0YHRi9GA0YvQu9C00LDRgCDQv9Cw0LnQtNCwINCx0L7Qu9Cw0LTRiy4g0LHRg9C7INGB0YvRgNGL0LvQtNCw0YAg05nQtNC10YLRgtC1INC00LXQvCDRiNGL0LPQsNGA0YMg0LrQtdC30ZbQvdC00LUg0LrRg9GI0YLQuNGA0LXQuiDQtdGB0YLRltC70LXQtNGWLCDRgdC+0LTQsNC9INCw0LHRgdGC0YDRg9C60YLQuNCy0YLRliAg0LHRgNC+0L3RhdC40YIg0L3QtdC80LXRgdC1INCx0YDQvtC90YXQuNGP0LvQuNGCINC/0LDQudC00LAg0LHQvtC70LDQtNGLIC4g0YvQu9KT0LDQu9C00Ysg0YHRi9GA0YvQu9C00LDRgCDRgtGL0L3Ri9GBINCw0LvRgyDQttC+0LvQtNCw0YDRi9C90LTQsCDRgdGD0LnRi9Kb0YLRi9Kb0YLRi9KjINGP0pPQvdC4INC60LDSm9GL0YDRi9KbINGN0LrRgdGD0LTQsNGCINC20LjQvdCw0LvRg9GLINC80LXQvSDQsdCw0LnQu9Cw0L3Ri9GB0YLRiy4g0L7RgNGC0LDRiNCwINCx0YDQvtC90YXRgtCw0YDQtNCwINKb0LDSm9GL0YDRi9C60YLRi9KjINCx0L7Qu9GD0Ysg0LDRg9Cw0L3Ri9KjINGB0YPQudGL0LrRgtGL0Log0LDRgNKb0YvQu9GLINOp0YLRg9GW0L3QtSDTmdC60LXQu9C10LTRli4g0LHRg9C7INC60LXQt9C00LUg0LrTqdC/0ZbRgNGI0ZbQutGC0LXRgNC00ZbSoyDQttCw0YDRi9C70YPRi9C90LDQvSDQv9Cw0LnQtNCwINCx0L7Qu9Cw0YLRi9C9INC00YvQsdGL0YEg0LXRgdGC0ZbQu9C10LTRli4g0LHRg9C7INGB0YvRgNGL0LvQtNCw0YAg0LrTqdCx0LjQvdC10YHQtSDSm9Cw0LHRi9C90YMg0YPQtNC10YDQuNGB0YLQtdGA0ZbQvNC10L0g0LzRi9GB0LDQu9GLINCx0YDQvtC90YXQuNGCLCDQv9C10L3QtdCy0LzQsNC90LjRjyDQvdC10LzQtdGB0LUg0YHQtdC60YDQtdC60YbQuNGP0L3Ri9KjICDQutOp0L8g0LHTqdC70ZbQvdGD0ZbQvNC10L0g0LHQsNC50LvQsNC90YvRgdGC0YsuICAgICAgICAgICAgICAgICAgICAg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ге құрғақ және орта көпіршікті сырылдар естіледі? Бұл ауруға қандай кеуде клеткасы тән? Бұл патологиялық жағдайда қандай ентігу болады?берілген сұрақтарға нақты толық жауап жоқ</text:p>
          </table:table-cell>
          <table:table-cell office:value-type="float" office:value="0" table:style-name="ce1">
            <text:p>0</text:p>
          </table:table-cell>
          <table:table-cell table:number-columns-repeated="16376"/>
        </table:table-row>
        <table:table-row table:style-name="ro1">
          <table:table-cell office:value-type="float" office:value="1066910" table:style-name="ce1">
            <text:p>1066910</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0JDQkCAxKS4g0KLQsNC90L3QtdGAINCx0L7QudGL0L3RiNCwINC20YvQvdGL0YHRgtGL0psg0LbQtdGW0LvRgyDQsdC70LDQu9Cw0YDQtNCw0pPRiyDQttGL0L3Ri9GB0YLRi9KbINC20LXRgtGW0LvRgyDQutC10LfQtdKj0LTQtdGA0ZYg05nQtNC10YLQtSDSm9Cw0LnRgtCw0LvQsNC80LAg0LbRi9C90YvRgdGC0YvSmyDQsdC10LvQs9GW0LvQtdGA0LTRltKjINGE0LjQt9C40LrQsNC70YvSmyDQtNCw0LzRg9GL0L0g0LHQsNKT0LDQu9Cw0YMg0LbTmdC90LUg0YHQuNC/0LDRgtGC0LDRgyDSr9GI0ZbQvSDSm9Cw0LbQtdGCLiDQotCw0L3QvdC10YAg0LHQvtC50YvQvdGI0LAg0LbRi9C90YvRgdGC0YvSmyDQttC10YLRltC70YMg0LXRgCDQsdCw0LvQtNCw0YAg0LzQtdC9INKb0YvQt9C00LDRgNC00LAg0LbQsNC70L/RiyA1INC60LXQt9C10qPQvdC10L0g0LbSr9GA0LXQtNGWLiDQldGAINCx0LDQu9C00LDRgNC00LAgMS3RiNGWINC60LXQt9C10qM6INCW0YvQvdGL0YHRgtGL0psg0LzSr9GI0LXRgdGWLCDQsNGC0LDQu9GL0psg0LHQtdC30ZYsINKx0LzQsNGB0Ysg0LHQsNC70LDQu9Cw0YDSk9CwINGC05nQvSwg0YLSr9C60YLQtdC90YPRliDQttC+0psuIDIt0YjRliDQutC10LfQtdKjOiDQkNGC0LDQu9GL0psg0LHQtdC3INCx0LXQvSDSsdC80LDRgdGLINKx0LvSk9Cw0LnSk9Cw0L0sINCw0Lsg0LzSr9GI0LXRgdGWINKx0LvSk9Cw0LnQvNCw0pPQsNC9LiDSsNC80LAg0YLQtdGA0ZbRgdGWINGB0LDQu9Cx0YvRgNGL0qPSm9GLLCDSm9GL0LfRi9C7INGC0q/RgdGC0ZYg0LHQvtC70LDQtNGLLiDQnNKx0L3QtNCwINGB0LjRgNC10LosINKx0LfRi9C9LCDTmdC70YHRltC3INC/0LjQs9C80LXQvdGC0YLQtdC70LPQtdC9LCDQsdGW0YDQtdKjINGB0LXRgNC10qMg0LHSr9C50YDQsNC70LDQvdKT0LDQvSDRgtKv0LrRgtC10L3Rg9GWINCx0L7Qu9Cw0LTRiy4g0J7QuyDRgtKv0LrRgtC10L3Rg9GWINC20YvQvdGL0YHRgtGL0psg0LzSr9GI0LXRgdGW0L3RltKjINC90LXQs9GW0LfRltC90LTQtSDQsdC+0LvQsNC00YsuIDMt0YjRliDQutC10LfQtdKjOiDQkNGC0LDQu9GL0psg0LHQtdC30ZYg0LzQtdC9INKx0LzQsNC90YvSoyDTmdGA0ZYg0pvQsNGA0LDQuSDQtNCw0LzRg9GLINGB0L7QvdGL0LzQtdC9INCx0ZbRgNCz0LUsINC80q/RiNC10L3RltKjINKx0LvSk9Cw0Y7RiyDQsdCw0LnSm9Cw0LvQsNC00YsuINCi0q/QutGC0LXQvdGD0ZYg06nQt9Cz0LXRgNGW0L8g0pvQsNGB0LDSk9Cw0pPQsCDSm9Cw0YDQsNC5INOp0YHQtSDQsdCw0YHRgtCw0LnQtNGLLiA0LdGI0ZYg0LrQtdC30LXSozog0JDRgtCw0LvRi9KbINCx0LXQt9GWINC80LXQvSDSsdC80LAg0rHQu9KT0LDRjyDRgtKv0YHQtdC00ZYuINCW0YvQvdGL0YHRgtGL0psg0LzSr9GI0LXQvdGW0qMg0LrTqdC70LTQtdC90LXRliDRj9KT0L3QuCDQtNC40LDQvNC10YLRgNGW0L3RltKjINKx0LvSk9Cw0Y7RiyDQttKv0YDQtdC00ZYuINCi0q/QutGC0LXQvdGD0ZYg0LXRgNC70LXRgCDRgtC40L/RgtGWLCDRgdCw0L3QvdGL0qMg0ZbRiNC60ZYg0LbQsNKT0YvQvdCwINKb0LDRgNCw0Lkg06nRgdC1INCx0LDRgdGC0LDQudC00YsuIDUt0YjRliDQutC10LfQtdKjOiDQkNGC0LDQu9GL0psg0LHQtdC30ZYsINKx0LzQsCwg0LbRi9C90YvRgdGC0YvSmyDQvNKv0YjQtdGB0ZYg0q/Qu9C60LXQvdC00LXRgNC00ZbQutGW0L3QtNC10LkuINCi0q/QutGC0LXQvdGD0ZYg0LXRgNC70LXRgCDRgtC40L/RgtGWINGC0L7Qu9GL0psg0pvQsNC70YvQv9GC0LDRgdCw0LTRiy4g0prRi9C30LTQsNGA0LTQsCAxLdGI0ZYg0LrQtdC30LXSozog0KHSr9GCINCx0LXQt9C00LXRgNGWINKx0LvSk9Cw0LnQvNCw0pPQsNC9LCDQtdC80YjQtdC6INKx0YjRiyDQutOp0YLQtdGA0ZbSo9C60ZYg0LbTmdC90LUg0YLSr9C60YLQtdC90YPRliDQttC+0psg0LHQvtC70LDQtNGLLiAyLdGI0ZYg0LrQtdC30LXSozog0KHSr9GCINCx0LXQt9C00LXRgNGW0L3RltKjINCx0q/QudGW0L0g0LrTqdC70LXQvNGW0L3QtSDQtNC10LnRltC9INOp0YHRg9GWLCDRgtKv0LrRgtC10L3Rg9GWINGB0LjRgNC10LosINC10L3QtNGWINC00LDQvNGL0L8sINKx0LfRi9C9LCDQsdGW0YDQtdKjINGB0LDRgNCw0qMg0pPQsNC90LAg0LHSsdC50YDQsNC70LDQvdKT0LDQvSDQsdC+0LvQsNC00YsuIDMt0YjRliDQutC10LfQtdKjOiDQodKv0YIg0LHQtdC30LTQtdGA0ZbQvdGW0qMg0rHQu9KT0LDRjtGLINC205nQvdC1INCw0YDQtdC+0LvQsNGB0YvQvdGL0qMg0LrQvtC90YLRg9GA0Ysg0LHTqdC70ZbQvdCx0LXQs9C10L0g0LHQvtC70LDQtNGLLiDQotKv0LrRgtC10L3Rg9GWINOp0YHRltC/LCDSm9Cw0YHQsNKT0LDSk9CwINKb0LDRgNCw0Lkg0YLQsNGA0LDQu9CwINCx0LDRgdGC0LDQudC00YsuIDQt0YjRliDQutC10LfQtdKjOiDQodKv0YIg0LHQtdC30LTQtdGA0ZbQvdGW0qMg0LrQvtC90YLRg9GA0Ysg0LDRgNC10L7Qu9Cw0LvQsNGA0LTRi9KjINC205nQvdC1INC10LzRiNC10Log0rHRiNGL0L3Ri9KjINGI0YvSk9GL0qPSm9GLINCx0L7Qu9GD0YvQvNC10L0g0LXQutGW0L3RiNGW0LvRltC6INCx0rHQtNGL0YDRiyDQv9Cw0LnQtNCwINCx0L7Qu9GD0Ysg0LHQvtC70LDQtNGLLiDQotKv0LrRgtC10L3Rg9GWINC20YvQvdGL0YEg0YLQuNC/0YLRliDSm9Cw0YHQsNKT0LDQtNCw0L0g0LDRgNGLINKb0LDRgNCw0Lkg0YHQsNC90L3Ri9KjINCw0LnQvNCw0pPRi9C90LAg0YLQsNGA0LDQu9GD0Ysg0LHQvtC70LDQtNGLLiDQkdC10LfQtdGDINC/0LDQudC00LAg0LHQvtC70LDQtNGLLiA1LdGI0ZYg0LrQtdC30LXSozog0KHSr9GCINCx0LXQt9GWINKv0LvQutC10L3QtNC10YDQtNGW0LrRltC90LXQuSwg0LDRgNC10L7Qu9Cw0LvQsNGA0Ysg0YLQvtC70YvSk9GL0LzQtdC9INGC0rHRgtCw0YHSm9Cw0L0uINCi0q/QutGC0LXQvdGD0ZYg0YHQsNC90L3Ri9KjINGW0YjQutGWINCx0LXRgtGWINC20LDSk9GL0L3QsCDRgtCw0YDQsNC70pPQsNC9LiDQldGC0LXQutC60ZbRgNGWINGA0LXRgtGC0ZYg0LrQtdC70YPRliDQsdC+0LvQsNC00YsuINCR0rHQuyDQttGL0L3Ri9GB0YLRi9KbINC20LXRgtGW0LvRg9C00ZbSoyDQutC10LfQtdKj0LTQtdGA0ZYg05nRgCDQsNC00LDQvNC90YvSoyDTqdC30ZbQvdC00ZbQuiDQtdGA0LXQutGI0LXQu9GW0LrRgtC10YDRltC80LXQvSDQsdGW0YDQs9C1INOZ0YDRgtKv0YDQu9GWINOp0YLQtdC00ZYuIDxiciAvPg0KMikuINCW0LDQu9C/0Ysg0LHSsdC7INC20LDSk9C00LDQudC00LAg0pvSsdGA0pPQsNKbINC205nQvdC1INC+0YDRgtCwINC606nQv9GW0YDRiNGW0LrRgtGWINGB0YvRgNGL0LvQtNCw0YDQtNGL0qMg0LXRgdGC0ZbQu9GD0ZYg0pvQsNCx0YvQvdGDINKv0LTQtdGA0ZbRgdGW0LzQtdC9INCx0LDQudC70LDQvdGL0YHRgtGLINC00LXQvyDQsNC50YLQsCDQsNC70LDQvNGL0LcuINCW0LDQu9C/0Ysg0LHSsdC7INC20LXRgNC00LUg0LHQsNC70LDQu9Cw0YDQtNCwINCx0rHQuyDRgdGL0YDRi9C70LTQsNGA0YvSoyDQsdC+0LvRg9GLINCw0L3QsNGC0L7QvNC40Y8g0LbTmdC90LUg0YTQuNC30LjQvtC70L7Qs9C40Y/Qu9GL0psg0LXRgNC10LrRiNC10LvRltC60YLQtdGA0ZbQvdC1INCx0LDQudC70LDQvdGL0YHRgtGLINCx0L7Qu9Cw0LTRiy4g0K/Sk9C90Lgg0LrRltGI0LrQtdC90YLQsNC5INCx0LDQu9Cw0LvQsNGA0LTQsCDQsdGW0LfQtNC1INC+0LvQsNGA0LTRi9KjINCw0LvRjNCy0LXQvtC70LDQu9Cw0YAg0YHQsNC90Ysg0LDQtyDQsdC+0LvQsNC00YssINGB0L7QvdGL0LzQtdC9INKb0LDRgtCw0YAg0LHRgNC+0L3RhdGC0LDRgNC00YvSoyDSm9GD0YvRgdGL0L3Ri9KjINGC0LDRgCDQsdC+0LvRg9GL0LzQtdC9INCx0LDQudC70LDQvdGL0YHRgtGLINCx0L7Qu9GL0L8g0YLQsNCx0YvQu9Cw0LTRiy4g0JHQsNC70LDQu9Cw0YDQtNCwINC00LDQvNGDINCx0LDRgNGL0YHRi9C90LTQsCDQvtKjINC20LDSm9GC0LDSk9GLINCx0YDQvtC90YUg0LHSsdGC0LDSm9GC0LDRgNGLINGC0ZbQutC10LvQtdC5INOp0LrQv9C10LzQtdC9INCx0LDQudC70LDQvdGL0YHRgdCwLCDRgdC+0Lsg0LbQsNKb0YLRiyDQsdGA0L7QvdGFINCx0rHRgtCw0pvRgtCw0YDRiyDRgtGA0LDRhdC10Y/QvNC10L0g0LbQsNC70pPQsNGB0Ysg0LHQvtC70pPQsNC90LTRi9Kb0YLQsNC9INC+0LvQsNGAINC+0qPSk9CwINKb0LDRgNCw0pPQsNC90LTQsCDRgtCw0YAg0LHQvtC70LDQtNGLLiDQodC+0L3Ri9C80LXQvSDSm9Cw0YLQsNGALCDQsdGA0L7QvdGF0YLQsNGA0LTQsNKT0Ysg0JrQu9Cw0YAg0LbQsNGB0YPRiNCw0LvQsNGA0LzQtdC9INGI0YvRgNGL0YjRgtGLINKb0LDQsdCw0YLRiyDRgtC+0LvRi9KbINC00LDQvNGL0LzQsNKT0LDQvdC00YvSm9GC0LDQvSDQvtC70LDRgCDTqdGC0LUg0YLQtdC3INC30LDSm9GL0LzQtNCw0LvQsNC00YsuINCX0LDSm9GL0LzQtNCw0LvSk9Cw0L3QvdCw0L0g0LrQtdC50ZbQvSDQvtC70LDRgCDSm9Cw0LHRi9C90YvQvyDRgtCw0YDRi9C70LDQtNGLLiDQkNC7INCw0LvRjNCy0LXQvtC70LDQu9Cw0YDQtNCw0pPRiyDQsdC10LvRgdC10L3QtNGWINC30LDRgiDRgdGD0YDRhNCw0LrRgtCw0L3RgiDQvtC70LDRgNC00LDSk9GLINKb0LDQsdGL0L3RgyDQv9GA0L7RhtC10YHRltC9INCx0LDRgdGD0pPQsCDSm9Cw0LHRi9C90YMg0YDQtdCw0LrRhtC40Y/Qu9Cw0YAg0LzQtdC9INC40LzQvNGD0L3QviDQutC+0LzQv9C70LXQutGB0YLRliDRiNCw0pvRi9GA0LAg0LHQsNGB0YLQsNC50LTRiyDQtNCwLCDRiNGL0YDRi9GI0YLRiyDQutOp0L8g0LzTqdC70YjQtdGA0LTQtSDQsdOp0LvQtSDQsdCw0YHRgtCw0LnQtNGLLiDQntGB0Ysg0YLRi9C90YvRgSDQttC+0LvQtNCw0YDRi9C90YvSoyDRgtCw0YDRi9C70YPRi9C90LDQvSDQsNGD0LAg0rvRgtC60ZbQt9GD0ZYg0YLRg9GA0LHRg9C70LXQvdGC0YLRliDQsdC+0LvQsNC00Ysg0LTQsCwg0pvSsdGA0pPQsNKbINC205nQvdC1INC+0YDRgtCwINC606nQv9GW0YDRiNGW0LrRgtGWINGB0YvRgNGL0LvQtNCw0YAg0LXRgdGC0ZbQu9C10LTRli4g0J7RgdGL0LvQsNC50YjQsCDQsdCw0LvQsNC70LDRgNC00LAg0pvSsdGA0pPQsNKbINC205nQvdC1INC606nQv9GW0YDRiNGW0LrRgtGWINGB0YvRgNGL0LvQtNCw0YAg0LHQvtC70LDQtNGLLiDQkdKx0Lsg0LDRg9GA0YPSk9CwINCx0ZbQt9C00LUg0LrQtdGD0LTQtSDQutC70LXRgtC60LDRgdGL0L3QtNCw0pPRiyDQsdGA0L7QvdGF0YLQsNGAINGC05nQvSDQtNC10L8g0LDQudGC0LAg0LDQu9Cw0LzRi9C3LiDQodC10LHQtdCx0ZYsINCx0ZbQt9C00LUg0LHSsdC7INC/0YDQvtGG0LXRgdGC0ZbSoyDQsdCw0YDQu9GL0pPRiyDQsdGA0L7QvdGF0YLQsNGA0LTQsCDQsdC+0LvRi9C/INC20LDRgtGL0YAg0LbTmdC90LUg0LHRgNC+0L3RhdGC0LDRgNC00LDSk9GLINC10YDQtdC60YjQtdC70ZbQutC60LUg0LHQsNC50LvQsNC90YvRgdGC0Ysg0LHQvtC70LDQtNGLLiDQkdKx0Lsg0L/QsNGC0L7Qu9C+0LPQuNGP0LvRi9KbINC20LDSk9C00LDQuSDQttCw0LvQv9GLINCx0ZbQt9C00LUg0Y3QutGB0L/QuNGA0LDRgtC+0YDQu9GL0psg0LXQvdGC0ZbQs9GDINC60LXQt9GW0L3QtNC1INCx0L7Qu9Cw0LTRiy4g0JHQsNC70LDQvdGL0qMg0ZbRiNC60ZYg0LTQtdC8INCw0LvRg9GLINC+0qPQsNC5INCx0L7Qu9Cw0LTRiyDQtNCwLCDRgdGL0YDRgtKb0LAg0YjRi9KT0LDRgNCw0YLRi9C9INC60LXQt9GW0L3QtNC1INC+0YLRgtC10LPRliDQsNC70LzQsNGB0YPRiyDSm9C40YvQvdC00LDQvyDQtdC90YLRltCz0YMg0L/QsNC50LTQsCDQsdC+0LvQsCDQsdCw0YHRgtCw0LnQtNGLL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2" table:style-name="ce1">
            <text:p>1066912</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kg0KLQsNC90L3QtdGAINCx0L7QudGL0L3RiNCwINC20YvQvdGL0YHRgtGL0psg0LbQtdGC0ZbQu9GDINCx0LDQu9C00LDRgNC00Ysg0rHQvNCw0pPQsCwg0LbRi9C90YvRgSDQvNKv0YjQtdGB0ZbQvdC1INCx0LDQudC70LDQvdGL0YHRgtGLINCw0Lsg0pvRi9C30LTQsNGA0LTQsCDRgdKv0YIg0LHQtdC30LTQtdGA0ZbQvdC1LCDQttGL0L3Ri9GBINC80q/RiNC10LvQtdGA0ZbQvdC1INCx0LDQudC70LDQvdGL0YHRgtGLINC00LDQvNGD0YvQvSDQsNC90YvSm9GC0LDQudC00YsuINCV0YAg0LHQsNC70LTQsNGA0LTQsDogMS3QutC10LfQtdKjINC/0YDQtdC/0YPQsdC10YDRgtCw0LssINC20YvQvdGL0YHRgtGL0psg0YLSr9C60YLQtdC90YMg0LbQvtKbLiAyLdC60LXQt9C10qMg0LDRgtCw0LvRi9Kb0LHQtdC3INCx0LXQvSDSsdC80LDRgdGLINKx0LvSk9Cw0LnSk9Cw0L0g0LDQuyDQttGL0L3Ri9GB0YLRi9KbINC80q/RiNC10YHRliDSsdC70pPQsNC50LzQsNKT0LDQvSwg0YHQutGA0L7RgtGD0Lwg0L/QuNCz0LzQtdC90YLQsNGG0LjRj9GB0YsuINKw0LzQsCDRgtC10YDRltGB0ZYg0YHQsNC70LHRi9GA0LDSk9Cw0L0uIDMg0LrQtdC30LXSoyDQkNGC0LDQu9GL0rEg0L/QtdC9INKx0LzQsNC90YvSoyDTmdGA0ZYg0pvQsNGA0LDQuSDQtNCw0LzRg9GLLCDQltGL0L3Ri9GB0YLRi9KbINC80q/RiNC10L3RltKjINKx0LvSk9Cw0Y7Ri9GC0q/RgdGWINKb0L7So9GL0YDQu9Cw0L3QsNC00YsuIDQgLSDQutC10LfQtdKjINCw0YLQsNC70YvSmyDQsdC10Lcg0LHQtdC9INKv0LzQsNGB0Ysg0rHQu9KT0LDRj9C0LCDQttGL0L3Ri9GB0YLRi9KbINC80q/RiNC10YHRliDQtNC40LDQvNC10YLRgNGW0L3QtSDSsdC70pPQsNGP0LTRiywg0YLSr9C60YLQtdGAINGB0LDQvdC90YvSoyDRltGI0ZbQvdC1INKb0LDRgNCw0Lkg0YLQsNGA0LDQu9CwINCx0LDRgdGC0LDQudC00YsuIDUt0LrQtdC30LXSoyDRgdGL0YDRgtKb0Ysg0LbRi9C90YvRgSDQvNKv0YjQtdGB0ZYg0rHQvNCw0YHRiyDQttGL0L3Ri9GBINC80q/RiNC10YHRliDSr9C70LrQtdC90LTQtdGA0LTRltC60ZbQvdC00LXQuSDTqdC70YjQtdC80LPQtSDQutC10LvQtdC00ZYuINKa0YvQt9C00LDRgNC00Ys6IDEg0LrQtdC30LXSoyDQodKv0YIg0LHQtdC30LTQtdGA0ZYg0LTQsNC80YvQvNCw0pPQsNC9INC10LzRiNC10Log0q/RiNGLINC606nRgtC10YDRltKj0LrRliwg0pvQsNGB0LDSmyDSr9GB0YLRliDRgtKv0LrRgtC10L3Rg9GWINC20L7Smy4gMiDQutC10LfQtdKjINCh0q/RgiDQsdC10LfRliDQsdKv0LnRltC9INC00LXRltCz0LXQudGW0L3QtSDQtNC10LnRltC9INOp0YHRg9GWLCDRgtKv0LrRgtC10L3RgyDQsdCw0YHRgtCw0LvRg9GLLiAzLdC60LXQt9C10qMg0KHSr9GCINCx0LXQt9GWINGC0LDSk9GLINKx0LvSk9Cw0Y/QtNCwINCw0YDQsNGB0Ysg0LHTqdC70ZbQvdCx0LXQs9C10L0sINGC0q/RgtC10YDRliDSm9C+0qPRi9GA0LvQsNGB0LDQtNGLLiAgNC3QutC10LfQtdKjINCh0q/RgiDQsdC10LfQtNC10YDRliDTmdGA0ZYg0pvQsNGA0LDQuSDTqdGB0LXQtNGW0LXQvNGI0LXQuiDSsdGI0YLQsNGA0YvQvdGL0qMg0YjRi9KT0YPRiyDQtdC60ZbQvdGI0ZbQu9GW0Log0LHSsdC00YvRgCDQv9Cw0LnQtNCwINCx0L7Qu9Cw0LTRiywg0YLSr9C60YLQtdC90YPRliwg0LHQtdC30LXRgyDQv9Cw0LnQtNCwINCx0L7Qu9Cw0LTRiywg0LzQtdC90LDRgNGF0LUuIDUt0LrQtdC30LXSoyDRgdKv0YIg0Y7QtdC30LTQtdGA0ZYg0q/Qu9C60LXQvSDTmdC50LXQu9C00LXRgNC00ZbQutGW0L3QtNC10LkuINC10YLQtdC60LrRltGAINGA0LXRgtGC0ZYuINKw0LvQtNCw0YDQtNCw0LTQsCDSm9GL0LfQtNCw0YDQtNCw0LTQsCDTmdGAINC60LXQt9C10qPQtNC1INC20YvQvdGL0YEg0LbQtdGC0ZbQu9GD0LTRltKjINCw0LnSm9GL0L0g0LHQtdC70LPRltC70LXRgNGWINC+0LvQsNGAINC20YvQvdGL0YEg0LzSr9GI0LXQu9C10YDRltC90ZbSoyDQutOp0LvQtdC80ZbQvdGW0qMg0LbQsNGB0YvQvdCwINGB0LDQuSDSsdC70pPQsNGO0YsuINCf0LDQu9C/0LDRhtC40Y8g0LDRgNKb0YvQu9GLINGC0LXQutGB0LXRgNC10LTRliDQtdGAINCx0LDQu9Cw0LvQsNGA0LTQsCDSsdC80LDQvdGL0qMg0LrTqdC70LXQvNGW0L3QtSDQttKx0LzRgdCw0pvRgtGL0pPRi9C90LAsINC60L7QvdGB0LjRgdGC0LXQvdGB0LjRj9GB0YvQvdCwLCDQsNGD0YvRgNGB0YvQvdGD0YvQvdCwINC205nQvdC1INGCLtCxINCx0LXQu9Cz0ZbQu9C10LPQtSDSm9Cw0YDQsNC50LTRiywg0LrQtdGA0LXQuiDQsdC+0LvSk9Cw0L0g0LbQsNKT0LTQsNC50LTQsCDQo9CU0Jcg0LbQsNGB0LDRg9KT0LAg0LHQvtC70LDQtNGLLiDQkNC7INKb0YvQt9C00LDRgNC00LAg0q/Qu9C60LXQvSDQutGW0YjRliDQtdGA0L3QtdGD0LvQtdGA0ZbQvdGW0qMg0LHRltGA0ZbQs9GD0ZbQvdC1LCDSm9GL0LfQv9C10YDQtNC10YHRltC90LUg0L7QvdGL0qMg0LHSr9GC0ZbQvdC00ZbQs9GW0L3QtSDSm9Cw0YDQsNC50LTRiy48YnIgLz4NCjIpINCV0L3RgtGW0LPRgyDQsdKx0Lsg0LDSk9C30LDSk9CwINC+0YLRgtC10Log0LbQtdGC0ZbRgdC/0LXQs9C10L0g0LbQsNKT0LTQsNC50LTQsCDQutC+0LzQv9C10L3RgdCw0YLQvtGA0LvRi9KbINC80LXRhdCw0L3QuNC30Lwg0YDQtdGC0ZbQvdC00LUg06nQutC/0LUg0YLRi9C90YvRgSDQsNC70YMg0LbQuNGW0LvRltCz0ZbQvSDQsNGA0YLRgtGL0YDRgy4g0L7QuyDQutOp0LHRltC90LXRgdC1INGC0YvQvdGL0YEg0LDQu9GDINC20L7Qu9C00LDRgNGL0L3QtNCwINC60LXQtNC10YDQs9GWINCx0L7Qu9GB0LAg0Y/Sk9C90Lgg0LDRg9Cw0L3Ri9KjINCw0YPQsCDQttC+0LvQtNCw0YDRi9C90LDQvSDTqdGC0YPRliDSm9C40YvQvdC00LDRgdCwINC/0LDQudC00LAg0LHQvtC70LDQtNGLLiDQodGL0YDRi9C70LTQsNGA0LTRi9KjINCx0L7Qu9GD0Ysg0YLRi9C90YvRgSDQttC+0LvQtNCw0YDRi9C90LTQsCDQutC10LTQtdGA0LPRltC90ZbSoyDQsdC+0LvRg9GL0L0g0LHRltC70LTRltGA0LXQtCwg0YLQvtGB0pvQsNGD0YvQu9C00LDRgCDQsNGD0LDQvdGL0qMg0YLRg9GA0LHRg9C70LXQvdGC0YLRliDQttKv0YDRg9GW0L3QtSDTmdC60LXQu9GW0L8g0YHRi9GA0YvQu9C00LDRgCDQv9Cw0LnQtNCwINCx0L7Qu9Cw0LTRiy4g0JrQtdC00LXRgNCz0ZbQu9C10YAg0L7Qu9Cw0YAg0YjRgNGL0YjRgtCw0YAg0L3QtdC80LXRgdC1INC40L3RhNC10LrRhtC40Y/Qu9GL0psg0pvQsNCx0YvQvdGDINCx0L7Qu9GB0LAg0YLRi9C90YvRgSDQttC+0LvQtNCw0YDRi9C90YvSoyDSm9Cw0LHRi9GA0pPQsNC70LDRgNGL0L3QtNCw0pPRiyDRgtCw0LzRi9GA0LvQsNGA0LTQsCDQs9C40L/QtdGA0LXQvNC40Y8g0LHQvtC70YvQvyDQsNGD0LAg0LbQvtC70YvQvSDRgtCw0YDRi9C70YLQsNC00YsuINCR0rHQuyDQttCw0LvQv9GLINCx0YDQsNC90YXRgtCw0YDQtNGL0qMg0pvQsNCx0YvQvdGD0Ysg0LHRgNC+0L3RhdC+0LDQsdGB0YLRgNGD0LrRhtC40Y/QtNCwINC90LXQvNC10YHQtSDQtdKjINC20LDQvNCw0L0g0LbQsNKT0LTQsNC50LTQsCDQv9C90LXQstC80L7QvdC40Y8g0LHQvtC70YPRiyDQvNKv0LzQutGW0L0g0YHQvtC90LTRi9Kb0YLQsNC9INOZ0YDRliDSm9Cw0YDQsNC5INC30LXRgNGC0YLQtdGDINC20q/RgNCz0ZbQt9GDINC60LXRgNC10Log0LHQvtC70LDQtNGLLiAg0L7RgNGC0LDRiNCwINC606nQv9GW0YDRiNGW0LrRgtGWINGB0YvRgNGL0LvQtNCw0YAg0L7Qu9Cw0YAg0YjQsNKT0YvRgCDQvdC10LzQtdGB0LUg0L7RgNGC0LAg0LrQvtC70LjQsdGA0LvSoyDQsdGA0L7QvdGF0YLQsNGA0LTQsCDQt9Cw0pvRi9C80LTQsNC90YPRi9C90LDQvSDQsdC+0LvQsNC00YsuINCU0LXQvCDRiNGL0pPQsNGA0YPQtNGL0qMg0rHQt9Cw0YDRg9GLINGN0LrQvNC/0LjRgNCw0YLQvtGA0LvRi9KbINC00LjRgdC/0L3QvtGNINGC05nQvS7QodKx0LnRi9KbINKb0LDSm9GL0YDRi9KbINCx0YDQvtC90YXRgtCw0YAg0LzQtdC9INCw0LvRjNCy0LXQvtC70LDQu9Cw0YDQtNCwINCx0L7Qu9KT0LDQvdC00LAg0LXRgdGC0ZbQu9C10LTRli4gINC60LXRg9C00LUg0LrQu9C10YLQutCw0YHRiyDQttKx0LzRgdCw0psg0LjQutC10LzQtNGW0LHQvtC70LDQtNGLLCDSm9C+0YDQsNC/INGC0q/RgNC00LXQs9GWINC00YvQsdGL0YEg06nQutC/0LXQtNC1INC606nQsdGW0YDQtdC6INCw0YPQsCDQttC40L3QsNC70YHQsCDRgdC+0L3QtNCw0Lkg0LHQvtC70LDQtNGLLCDRj9KT0L3QuCDQutC10YPQtNC1INKb0YPRi9GB0Ysg0LHTqdGI0LrQtSDRgtOZ0YDRltC30LTRliDQsdC+0LvRg9GLINC80q/QvNC60ZbQvS4g0YLRi9C90YvRgSDQsNC70YMg0LrQtdC30ZbQvdC00LUg0ZbRiNC60ZYg0pvQsNCx0YvRgNKT0LDQsNGA0LvRi9KbINCx0rHQu9GI0LDSm9C10YLRgtC10YAg0YLQsNGA0YvQu9GD0YsuINCi0YvQvdGL0YEg0LDQu9GDINGB0LjQv9Cw0YLRiyDQttC40ZYg0YLRi9C90YvRgSDRgtCw0YXQuNC/0L3QvtGNINC00LXQvCDRiNGL0pPQsNGA0YMg0rHQt9Cw0YDQsNC00Ysg0Y3QutGB0L/QuNGA0LDRgtC+0YDQu9GLINC10L3RgtGW0LPRgy4g0JzSsdGA0YvQvSDQtdGA0ZbQvSDSr9GI0LHSsdGA0YvRiNGC0LDRgNGL0L3Ri9KjINC606nQs9C10YDRg9GWINC+0Lsg0YbQuNCw0L3QvtC3INCx0LHQtdC70LPRltGB0ZYg0Y/Sk9C90Lgg0pvQsNC90LTQsCDQutOp0LzRltGA0pvRi9GI0pvRi9C7INCz0LDQt9GLINC806nQu9GI0LXRgNGWINC606nQsdC10LnQs9C10L0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80" table:style-name="ce1">
            <text:p>1066980</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kg0KLQsNC90L3QtdGAINGI0LrQsNC70LDRgdGLIC3QsdCw0LvQsNC70LDRgCDQvNC10L0g0LbQsNGB06nRgdC/0ZbRgNGW0LzQtNC10YDQtNGW0qMg0LbRi9C90YvRgdGC0YvSmyDQtNCw0LzRg9GL0L3Ri9KjIDUg0YHQsNGC0YvRgdGL0L0g0YHQuNC/0LDRgtGC0LDQudGC0YvQvSDQutC70LjQvdC40LrQsNC70YvSmyDQttGW0LrRgtC10YMuINCR0rHQuyDRiNC60LDQu9CwINC20YvQvdGL0YHRgtGL0psg0LHQtdC70LPRltC70LXRgNC00ZbSoyDQtNCw0LzRg9GL0L3QsCDQvdC10LPRltC30LTQtdC70LPQtdC9LiDQotCw0L3QvdC10YAg0LHQvtC50YvQvdGI0LAg0LHQsNC70LDQu9Cw0YDQtNGL0qMg0LbRi9C90YvRgdGC0YvSmyDQttC10YLRltC70YMg0LrQtdC30LXSo9C00LXRgNGWINC20YvQvdGL0YHRgtGL0psg0LHQtdC70LPRltC70LXRgNC00ZbSoyDQtNCw0LzRgyDQtNOZ0YDQtdC20LXRgdGW0L3QtSDSm9Cw0YDQsNC5INCx0LXRgSDQutC10LfQtdKj0LPQtSDQsdOp0LvRltC90LXQtNGWLiDSmtGL0Lcg0LFh0LvQsNC70LDRgNC00LAg0LHRltGA0ZbQvdGI0ZYg0LrQtdC30LXSoyAo0LHQsNC70LDQu9GL0psg0YjQsNKbKTog0YHSr9GCINCx0LXQt9C00LXRgNGWINC00LDQvNGL0LzQsNKT0LDQvSwg0pvQsNGB0LDSk9CwINGC0q/QutGC0LXRgNGWINC20L7Smy4g0JXQutGW0L3RiNGWINC60LXQt9C10qMgKNCx0LDRgdGC0LDQv9Kb0Ysg0LbRi9C90YvRgdGC0YvSmyDQttC10YLRltC70YMpOiDRgdKv0YIg0LHQtdC30LTQtdGA0ZbQvdGW0qMg0LXQvNGW0LfRltC6INCw0YHRgtGL0L3QtNCwINC60ZbRiNC60LXQvdC1INGC0L7QvNC/0LDRjtGLINC/0LDQudC00LAg0LHQvtC70LDQtNGLLiDSmtCw0YHQsNKT0LAg0LDQudC80LDSk9GL0L3QtNCwINGB0LjRgNC10LosINC20rHQvNGB0LDSmywg0LDRiNGL0psg0YLSr9GB0YLRliDRgtKv0YHRgtC10YAg0LHQsNC50pvQsNC70LAg0LHQsNGB0YLQsNC50LTRiy4g0q7RiNGW0L3RiNGWINC60LXQt9C10qM6INGB0q/RgiDQsdC10LfRliDSr9C70LrQtdC50LXQtNGWLCDQsNGA0LXQvtC70LAg0LzQtdC9INCx0LXQtyDRgtGW0L3RliDQsdGW0YDRgtKx0YLQsNGBLiDSmtCw0YHQsNKT0LAg0YLSr9Cz0ZYg0pvQvtGO0LvQsNC90YvQvywg0LHSsdC50YBh0LvQsNC90LDQtNGLLiDQotOp0YDRgtGW0L3RiNGWINC60LXQt9C10qPQtNC1INCw0YDQtdC+0LvQsCDQvNC10L0g0LXQvNGW0LfRltC6INGB0q/RgiDQsdC10LfRltC90LXQvSDQsdOp0LvRltC90ZbQvywg0YLQvtC80L9h0LnRi9C/INC606nRgNGW0L3QtdC00ZYuINKa0LDRgdCw0pPQsCDRgtKv0LPRliDRgtGL0pPRi9C3LCDQsdGW0YDQsNKbINGI0LXQutCw0YDQsNGB0Ysg0LDQvdGL0psg0LXQvNC10YEuINCR0LXRgdGW0L3RiNGWINC60LXQt9C10qMgKNGC0L7Qu9GL0psg0LbQtdGC0ZbQu9GDKSDQutC10LfQtdKj0ZbQvdC00LUg0YHSr9GCINCx0LXQt9GWINC10YDQtdGB0LXQutGC0LXRgNC00LXQs9GW0LTQtdC5INC/0ZbRiNGW0L3Qs9C1INC40LUsINGC0L7Qu9GL0psg0LbQtdGC0ZbQu9Cz0LXQvS4g0prQsNGB0LDSk9CwINGC0q/Qs9GWINGC0YvSk9GL0LcsINKb0LDRgNCwINCx0rHQudGA0LAg0LXRgNC10YHQtdC60YLQtdGA0LTQtdCz0ZbQvdC00LXQuSwg0LHRltGA0LDSmyDRgdCw0L3Sk9CwINGC0LDRgNCw0LvQvNCw0LnQtNGLLiDQkNC7INKx0Lsg0LHQsNC70LDQu9Cw0YDQtNCwINCx0ZbRgNGW0L3RiNGWINC60LXQt9C10qMgKNCx0LDQu9Cw0LvRi9KbINGI0LDSmyk6INC20YvQvdGL0YEg0L3Sr9C60YLQtdC70LXRgNGWINCx0LDQu9Cw0pPQsCDRgtOZ0L0sINC00LDQvNGDINCx0LXQu9Cz0ZbQu9C10YDRliDQttC+0psuINKa0LDRgdCw0pPQsCDRgtKv0LrRgtC10YDRliDQttC+0psuINCV0LrRltC90YjRliDQutC10LfQtdKj0LTQtSDQsNGC0LDQu9GL0psg0LHQtdC30LTQtdGAINKv0LvQutC10LnRltC/LCDRgdC60YDQvtGC0YPQvCDRgtC10YDRltGB0ZYg0LbSsdKb0LDRgNCwINCx0LDRgdGC0LDQudC00YsuINKa0LDRgdCw0pPQsNC00LAg0YHQuNGA0LXQuiDRgtKv0LfRgywg0LDRiNGL0psg0YLSr9GB0YLRliDRgtKv0LrRgtC10YAg0L/QsNC50LTQsCDQsdC+0LvQsNC00YsuINKu0YjRltC90YjRliDQutC10LfQtdKj0LTQtSDQv9C10L3QuNGBINKx0LfQsNGA0YvQvywg0LDRgtCw0LvRi9KbINCx0LXQt9C00LXRgCDQvNC10L0g0YHQutGA0L7RgtGD0Lwg0q/Qu9C60LXRjtGW0L0g0LbQsNC70pPQsNGB0YLRi9GA0LDQtNGLLiDSmtCw0YHQsNKT0LAg0YLSr9Cz0ZYg0pvQvtGO0LvQsNC90YvQvywg0LHSsdC50YBh0LvQsNC90LAg0LHQsNGB0YLQsNC50LTRiy4g0KLTqdGA0YLRltC90YjRliDQutC10LfQtdKj0LTQtSDQv9C10L3QuNGBINKb0LDQu9GL0qPQtNCw0L8sINKx0LfQsNGA0LDQtNGLLiDQodC60YDQvtGC0YPQvCDQv9C40LPQvNC10L3RgtCw0YbQuNGP0LvQsNC90LDQtNGLINC205nQvdC1INKb0LDRgtC/0LDRgNC70LDQvdCw0LTRiy4g0prQsNGB0LDSk9CwINGC0q/Qs9GWINGC0YvSk9GL0LfQtNCw0LvQsNC00YssINCx0ZbRgNCw0psg0YjQtdC60LDRgNCw0YHRiyDQvdCw0pvRgtGLINC10LzQtdGBLiDQkdC10YHRltC90YjRliDQutC10LfQtdKj0LTQtSDQttGL0L3Ri9GBINC80q/RiNC10LvQtdGA0ZYg0LXRgNC10YHQtdC60YLQtdGA0LTRltC60ZbQvdC00LXQuSDQsdC+0LvQsNC00YsuINKa0LDRgdCw0pPQsCDRgtKv0LPRliDRgtGL0pPRi9C3LCDQtdGA0LXRgdC10Log0LDQtNCw0LzSk9CwINGC05nQvSwg0YjQtdC60LDRgNCw0YHRiyDRgdCw0L3Sk9CwINGC0LDRgNCw0LvQvNCw0LnQtNGLLjxiciAvPg0KPGJyIC8+DQoyKSDQkdKx0Lsg0LrQu9C40L3QuNC60LDQu9GL0psg0LrTqdGA0ZbQvdGW0YEg0YLTqdC80LXQvdCz0ZYg0YLRi9C90YvRgSDQttC+0LvQtNCw0YDRi9C90YvSoyDQttC10LTQtdC7INKb0LDQsdGL0L3Rg9GL0LzQtdC9LCDRj9KT0L3QuCDQsdGA0L7QvdGF0LjQvtC70LjRgtC/0LXQvSDQvdC10LzQtdGB0LUg0LHRgNC+0L3RhdC+0L7QsdGB0YLRgNGD0LrRgtC40LLRgtGWINGB0LjQvdC00YDQvtC80LzQtdC9INCx0LDQudC70LDQvdGL0YHRgtGLINC00LXQvyDQsNC50YLQsCDQsNC70LDQvNGL0LcuINCQ0YJh0LvSk9Cw0L0g0LXQutGWINGC0q/RgNC70ZYg0YHRi9GA0YvQuyDRgtKv0YDRliDTqdC60L/QtdC00LUg05nRgNGC0q/RgNC70ZYg0L/QsNGC0L7RhNC40LfQuNC+0LvQvtCz0LjRj9C70YvSmyDSr9C00LXRgNGW0YHRgtC10YDQtNGWINCx0ZbQu9C00ZbRgNC10LTRliDQttOZ0L3QtSDQsdGW0YDRltC9LdCx0ZbRgNGWINGC0L7Qu9GL0pvRgtGL0YDRi9C/INGC0rHRgNCw0LTRiy4g0prSsdGA0pPQsNKbINGB0YvRgNGL0LvQtNCw0YAg0LHRgNC+0L3RhdGC0LDRgNC00YvSoyDRltGI0LrRliDSm2HQsdGL0YDSk9Cw0YHRi9C90YvSoyDRltGB0ZbQvdGD0ZbQvdC10L0sINGI0YvRgNGL0YjQv9C10L0g0LHRltGC0LXQu9GD0ZbQvdC10L0sINCx0YDQvtC90YXQvtGB0L/QsNC30LzQvdCw0L0g0YLRg9GL0L3QtNCw0LnQtNGLLiDQotCw0YDRi9C70pPQsNC9INCx0YDQvtC90YXRgtCw0YDQtNCw0L0g0LDRg9CwINOp0YLQutC10L0g0LrQtdC30LTQtSDQtNGW0YDRltC7INC/YdC50LTQsCDQsdC+0Lth0LTRiywg0LHSsdC7LdC00YvQsdGL0YHRgtGL0psg0pvSsdGA0pPQsNKbINGB0YvRgNGL0Lsg0YDQtdGC0ZbQvdC00LUg0LXRgdGC0ZbQu9C10LTRli4g05jQtNC10YLRgtC1INC00LXQvCDRiNGL0pPQsNGA0YMg0YTQsNC30LDRgdGL0L3QtNCwINC60q/RiNC10LnRltC/INC10YHRgtGW0LvQtdC00ZYuINCa06nQsdGW0L3QtdGB0LUg0rHRgdCw0psg0LbTmdC90LUg0L7RgNGC0LDRiNCwINC60LDQu9C40LHRgNC70ZYg0LHRgNC+0L3RhdGC0LDRgNC00LAg0LHQsNC50pvQsNC70LDQtNGLLiDQntGA0YLQsNGI0LAg0LrTqdC/0ZbRgNGI0ZbQutGC0ZYsINGL0LvSk2HQu9C00Ysg0YHRi9GA0YvQu9C00LDRgCAg0LHRgNC+0L3RhdGC0LDRgCDQvNC10L0g0LHRgNC+0L3RhdC40L7Qu9Cw0LvQsNGA0LTRi9KjINGW0YjRltC90LTQtSDRgdKx0LnRi9Kb0YLRi9KbICjRiNGL0YDRi9GILCDRjdC60YHRgdGD0LTQsNGCKSDQttC40L3QsNC70YPRi9C80LXQvSDQsdCw0LnQu9Cw0L3Ri9GB0YLRiy4g0JbQuNC90LDSm9GC0LDQu9KT0LDQvSDRgdKx0LnRi9Kb0YLRi9Kb0YLQsCDQsNGD0LAg0LrTqdC/0ZbRgNGI0ZbQutGC0LXRgCDRgtKv0LfQtdC00ZYt0L7Qu9Cw0YAg0pvQvtC30pPQsNC70pPQsNC90LTQsCDQttOZ0L3QtSDQttCw0YDRi9C70pPQsNC90LTQsCDQutOp0L/RltGA0YjRltC60YLRliDRi9C70pPQsNC70LTRiyDRgdGL0YDRi9C70LTQsNGAINC/YdC50LTQsCDQsdC+0LvQsNC00YsuINOY0LTQtdGC0YLQtSDQuNC90YTQtdC60YbQuNGPINC60LXQt9GW0L3QtNC1INGC0YvQvdGL0YEg0LbQvtC70LTQsNGA0YvQvdGL0qMg0YjRi9GA0YvRiNGC0Ysg0pvQsNCx0YvSk9GLINGI0YvRgNGL0YjQv9C10L0g0pvQsNCx0YvQvdGDINGN0LrRgdGB0YPQtNCw0YLRi9C9INC606nQvyDQsdOp0LvQtdC00ZYuINCR0rHQuyDTmdGB0ZbRgNC10YHQtSDQstC40YDRg9GB0pvQsCDQsdCw0LnQu9Cw0L3Ri9GB0YLRiyDQsdGA0L7QvdGF0LjQvtC70LjRgtGC0LUg0LbQuNGWINCx0LDQudKb0LDQu9Cw0LTRiy4g0JTQtdC8INGI0YvSk9Cw0YDRg9C00YvSoyDSsdC30LDRgNGD0Ysg0LHRgNC+0L3RhdC40LDQu9GM0LTRiyDQvtCx0YHRgtGA0YPQutGG0LjRj9C90YvSoyDQsdC10LvQs9GW0YHRliwg0LDRg9CwINGC0LDRgNGL0LvSk9Cw0L0g0YLRi9C90YvRgSDQttC+0LvQtNCw0YDRi9C90LDQvSDRiNGL0pPRg9KT0LAg0LrTqdC/INGD0LDSm9GL0YIg0LrQtdGC0ZbRgNC10LTRliwg0YHQvtC90LTRi9Kb0YLQsNC9INC00LXQvCDRiNGL0pPQsNGA0YMg0YTQsNC30LDRgdGLINKx0LfQsNGA0pPQsNC9LiDQodC+0L3QtNGL0pvRgtCw0L0sINCx0rHQuyBh0YPRgNGD0pPQsCDQtNC10Lwg0YjRi9KT0LDRgNGD0LTRi9KjINKb0LjRi9C90LTQsNGD0YssINGP0pPQvdC4INGN0LrRgdC/0LjRgNCw0YLQvtGA0LvRi9KbINC10L3RgtGW0LPRgyDRgtOZ0L0uINCf0LXRgNC60YPRgdGB0LjRj9C00LAg0YLQuNC80L/QsNC90LjQutCw0LvRi9KbLCDSm9C+0YBh0L/RgtGLINC00YvQsdGL0YEg0LXRgdGC0ZbQu9Cz0LXQvdC00ZbQutGC0LXQvSDSm9C+0YDQsNC/INGC05nRgNGW0LfQtNGWINC60LXRg9C00LUg0LrQu9C10YLQutCw0YHRiyDRgtOZ0L0uINCR0rHQuyDTqdC60L/QtSDQs9C40L/QtdGA0LjQvdGE0LvRj9GG0LjRj9GB0YvQvdGL0qMg0LHQtdC70LPRltGB0ZYuINCe0LHRgdGC0YDRg9C60YbQuNGPINC60LXQt9GW0L3QtNC1INCw0YPQsCDTqdC60L/QtdCz0LUg0LrRltGA0ZbQvywg0LHRltGA0LDSmyDRgtC+0LvRi9KbINGI0YvSk9CwIGHQu9C80LDQudC00YssINGB0L7QvdGL0qMg0LXRgdC10LHRltC90LXQvSBh0LvRjNCy0LXQvtC70LDQu9Cw0YAg0YjQsNC80LDQtNCw0L0g0YLRi9GBINC60LXRgNGW0LvRltC/LCDQutC10YPQtNC1INGC0L7RgNGLINKb0L7RgNCw0L8g0YLTmdGA0ZbQt9C00ZYg0LHQvtC70YvQvyDQutOp0YDRltC90LXQtNGWL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1-ші сұрақта менархе туралы мүлдем жазылмаған. Жауап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05" table:style-name="ce1">
            <text:p>1067005</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dGI0ZYg0YHSsdGA0LDSmy4g0KLQsNC90L3QtdGAINCx0L7QudGL0L3RiNCwINC20YvQvdGL0YHRgtGL0psg0LbQtdGC0ZbQu9GDINKx0LvQtNCw0YDQtNCwINC00LAsINKb0YvQt9C00LDRgNC00LAg0LTQsCA1INC60LXQt9C10qPQvdC10L0g0YLSsdGA0LDQtNGLLiDSsNC70LTQsNGA0LTQsDogMSDQutC10LfQtdKj0LTQtSDQttGL0L3Ri9GBINC80q/RiNC10YHRlizQsNGC0LDQu9GL0psg0LHQtdC30ZYsICDSsdC80LDRgdGLINCx0LDQu9Cw0LvQsNGA0pPQsCDRgtOZ0L0sINC606nQu9C10LzRliDSsdC70pPQsNC50LzQsNKT0LDQvSzQtdGA0LvQtdGA0LPQtSDRgtOZ0L0g0YLSr9C60YLQtdGA0ZYg0YjRi9Kb0L/QsNKT0LDQvS4gMiDQutC10LfQtdKj0LTQtSDSsdC80LAg0LzQtdC9INCw0YLQsNC70YvSmyDQsdC10LfRliDSsdC70pPQsNGP0LTRiywg0LHRltGA0LDSmyDQttGL0L3Ri9GB0Ysg0rHQu9KT0LDQudC80LDSk9Cw0L0sICDRgtKv0LrRgtC10YDRliDRiNGL0pvQv9Cw0pPQsNC9LiDSsNC80LDQvdGL0qMg0YLQtdGA0ZbRgdGWINGB0LDQu9Cx0YvRgNCw0qPSm9GLINC60LXQu9Cz0LXQvSwg0YLQtdGA0ZbRgdGW0L3RltKjINGC0q/RgdGWINKb0YvQt9KT0YvQu9GC0YLQsNC90pPQsNC90Ysg0LHQsNC50pvQsNC70LDQtNGLLiAzINC60LXQt9C10qPQtNC1INC20YvQvdGL0YEg0LzSr9GI0LXRgdGWLCDSsdC80LAg0LzQtdC9INCw0YLQsNC70YvSmyDQsdC10Lcg05nRgNGWINKb0LDRgNCw0Lkg0LTQsNC80YvQvywg0rHQu9KT0LDRj9C00YssINKb0LDRgdCw0pPQsCDQsNC50LzQsNKT0YvQvdC00LAg0YLSr9C60YLQtdGA0ZYg0LHRltGA0LXSoyDRgdCw0YDQsCDQsdKx0LnRgNCw0LvQsNC90LAg06nRgdC60LXQvS4gNCDQutC10LfQtdKjINCw0YLQsNC70YvSmyDQsdC10Lcg0LHQtdC9INKx0LzQsCDQvtC00LDQvSDTmdGA0ZYg0rHQu9KT0LDRjyDRgtKv0YHQutC10L0sINC20YvQvdGL0YEg0LzSr9GI0LXRgdGW0L3RltKjINC00LjQsNC80LXRgtGA0ZYg0LbRg9Cw0L3QtNCw0pPQsNC9LCDQttGL0L3Ri9GB0YLRi9KbINGC0q/QutGC0LXQvdGDINC10YDQu9C10YAg0YLQuNC/0YLRliDQsdC+0LvRiywg0L7QuyDRgdCw0L0g0LDQudC80LDSk9GL0L3QsCDRgtCw0YDQsNC80LDSk9Cw0L0uIDUg0LrQtdC30LXSo9C00LUg0YHRi9GA0YLSm9GLINC20YvQvdGL0YHRiyDQvNKv0YjQtdC70LXRgNGWINC10YDQtdGB0LXQutGC0LXRgNC00ZbQutGW0L3QtNC10LkgLiDQltGL0L3Ri9GB0YLRi9KbINGC0q/QutGC0LXRgCDRgdCw0L0g0LDQudC80LDSk9GL0L3QsCDRgtCw0YDQsNC70YvQvyDTqdGB0LrQtdC9LiAg0prRi9C30LTQsNGA0LTQsDogMSDQutC10LfQtdKj0LTQtSDRgdKv0YIg0LHQtdC30LTQtdGA0ZYg0LTQsNC80YvQvNCw0pPQsNC9LCDQtdC80YjQtdC6INKx0YjRiyDQutOp0YLQtdGA0ZbQu9GW0L8g0YLSsdGA0LDQtNGLLiAyINC60LXQt9C10qPQtNC1INGB0q/RgiDQsdC10LfRltC90ZbSoyDQutOp0LvQtdC80ZYg0LHRg9GC0L7QvSDRgdC40Y/Sm9GC0YssINGC0q/QutGC0LXRgNGWINCx0ZbRgNC10qMg0YHQsNGA0LDSoyDTqdGB0LUg0LHQsNGB0YLQsNKT0LDQvSwg0L7Qu9Cw0YAg0LrTqdCx0ZbQvdC1INC20YvQvdGL0YEg0LXRgNGW0L3QtNC10YDRltC90ZbSoyDQsdC+0LnRi9C90LTQsCDQvtGA0L3QsNC70LDRgdKb0LDQvSwgINGC0q/RgdGWINCw0YjRi9KbLiAzINC60LXQt9C10qPQtNC1INGB0q/RgiDQsdC10LfRliDQutOp0LvQtdC80ZYg0rHQu9KT0LDRjyDRgtKv0YHQutC10L0sINCw0YDQtdC+0LvQsNC90YvSoyDQttC40LXQs9GWINC606nRgNGW0L3QtSDQsdCw0YHRgtCw0pPQsNC9LCDRgtKv0LrRgtC10YAg0YHQsNC90L3Ri9KjINGW0YjQutGWINCw0LnQvNCw0pPRi9C90LTQsCDQtNCwINOp0YHQtSDQsdCw0YHRgtCw0pPQsNC90Ysg0LrTqdGA0ZbQvdC10LTRli4gNCDQutC10LfQtdKj0LTQtSDRgdKv0YIg0LHQtdC30ZYg0LrTqdC70LXQvNGWINC+0LTQsNC9INOZ0YDRliDSsdC70pPQsNC50YvQvywg0LDRgNC10L7Qu9Cw0L3Ri9KjINC/0LjQs9C80LXQvdGC0YLQtdC70LUg0YLSr9GB0LrQtdC90ZYg0LbTmdC90LUg0LXQutGW0L3RiNGW0LvRltC6INCx0rHQtNGL0YDQtNGL0qMg0L/QsNC50LTQsCDQsdC+0LvSk9Cw0L3RiyDQsdCw0LnSm9Cw0LvQsNC00YsuIDUg0LrQtdC30LXSo9C00LUg0YHSr9GCINCx0LXQt9GW0L3RltKjINC606nQu9C10LzRliDQtdGA0LXRgdC10Log05nQudC10LvQtNC10YDQtNGW0LrRltC90LTQtdC5LCDRgtKv0LrRgtC10YDRliDSm9Cw0L3Ri9KbINC/0LjQs9C80LXQvdGC0YLQtdC70ZbQvyDQvtC70LDRgCDSm9Cw0YHQsNKT0LAg0LDQudC80LDSk9GL0L3QtNCwLCDQttGL0L3Ri9GBINC80LDSo9GL0L3QtNCwINC20LDQudGL0LvQsCDTqdGB0LrQtdC90ZYg0LHQsNC50pvQsNC70LDQtNGLLiAy0YjRliDRgdKx0YDQsNKbLiDQkdCw0LvQsNC90Ysg0YLQtdC60YHQtdGA0LPQtdC90LTQtSDSm9Kx0YDSk9Cw0psg0LbTmdC90LUg0L7RgNGC0LDRiNCwINC606nQv9GW0YDRiNGW0LrRgtGWINGB0YvRgNGL0LvQtNCw0YDQtNGL0qMg0LXRgdGC0ZbQu9GDINGB0LXQsdC10LHRliDQsdCw0LvQsNC70LDRgNC00LAg0LXRgNC10YHQtdC60YLQtdGA0LPQtSDSm9Cw0YDQsNKT0LDQvdC00LAg0YLRi9C90YvRgSDQsNC70YMg0LbQvtC70LTQsNGA0YssINGP0pPQvdC4INCx0YDQvtC90YXRgtCw0YAg0LzQtdC9INCx0YDQvtC90YXQuNC+0LvQsNC70LDRgNC00YvSoyDQtNC40LDQvNC10YLRgNGWINGB0LDQu9GL0YHRgtGL0YDQvNCw0LvRiyDRgtKv0YDQtNC1INC60ZbRiNGWINCx0L7Qu9GL0L8g0LrQtdC70LXQtNGWLiDQntGB0YvSk9Cw0L0g0LHQsNC50LvQsNC90YvRgdGC0Ysg0YHQtdC60YDQtdGC0YLQtdGA0LTRltKjLCDRgdC/0LDQt9C8INC80LXQvSDRltGB0ZbQutGC0LXRgNC00ZbSoyDTmdGB0LXRgNGW0L3QtdC9INC+0qPQsNC5INCx0ZbRgtC10LvQtdC00ZYuICDQntGB0YvQvdGL0qMg05nRgdC10YDRltC90LXQvSDRgtGL0L3Ri9GBINGI0YvSk9Cw0YDRg9GLINKx0LfQsNGA0YvQvywg0LrTqdC/0ZbRgNGI0ZbQutGC0ZYg0YHRi9GA0YvQu9C00LDRgNC00YvSoyDQtdGB0YLRltC70YPRliDQsdCw0LnSm9Cw0LvQsNC00YsuINCR0LDQu9Cw0LvQsNGA0pPQsCDQutC10YPQtNC1INGC0L7RgNGL0L3Ri9KjINC60ZbRiNGWINCx0L7Qu9GD0Ysg0YLTmdC9LiAg0J7RgdGL0L3Ri9KjINOZ0YHQtdGA0ZbQvdC10L0g0YLRi9C90YvRgSDQsNC70YMg0pvQvtC30pPQsNC70YvRgdGC0LDRgNGLINGI0LXQutGC0LXQu9GW0L8sINGC0YvQvdGL0YEg0LDQu9GDINGA0LXQt9C10YDQstGD0LDRgNGL0L3Ri9KjINCw0LfRjtGL0L3QsCDQsNC70YvQvyDQutC10LvQtdC00ZYuINCR0rHQuyDQv9Cw0YLQvtC70LPQuNGP0LvRi9KbINC20LDSk9C00LDQudC00LAg0Y3QutGB0L/QuNGA0LDRgtC+0YDQu9GL0psg0LXQvdGC0ZbQs9GDINC+0YDRi9C9INCw0LvQsNC00YsuINOo0LnRgtC60LXQvdGWINCx0YDQvtC90YXQuNC+0LvQsNC70LDRgCDRgtCw0YAsINC40L3RhNC10LrRhtC40Y8g05nRgdC10YAg0LXRgtC60LXQvdC00LUg0L7Qu9Cw0YDQtNGL0qMg0ZbRiNC60ZYg0pvQsNCx0LDRgtGLINGW0YHRltC90ZbQvywg0LHRgNC+0L3RhdC40L7Qu9Cw0LvQsNGAINC+0LTQsNC9INOZ0YDRliDRgtCw0YDRi9C70YvQvyDRgtGL0L3Ri9GBINGI0YvSk9Cw0YDRg9KT0LAg0LrQtdC00LXRgNCz0ZYg0LrQtdC70YLRltGA0LXQtNGWLiA=</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быныз қате- қасаға аймағында түктері бірең сара бұйралана өсуі ер балаларда 2 кезеңңен басталады. Қыз балаларда жыныстық жетілу- менархе мүлдем жазылмаған. 1-ші сұраққа жауабыныз толық емес. 2-ші есепте берілген сұрақтарға- Неге құрғақ және орта көпіршікті сырылдар естіледі? Бұл ауруға қандай кеуде клеткасы тән? жауап толық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1067047" table:style-name="ce1">
            <text:p>1067047</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iDRgdKx0YDQsNKbLjgg0LDQudC70YvSmyDQsdCw0LvQsNC90YvSoyDTqdC60L/QtdGB0ZbQvdC00LUgINKb0rHRgNKT0LDSmyDQttOZ0L3QtSDQvtGA0YLQsNGI0LAg0LrTqdC/0ZbRgNGI0ZbQutGC0ZYg0YvQu9KT0LDQu9C00YsgIGPRi9GA0YvQu9C00LDRgNC00YvSoyDQtWPRgtGW0LvRg9GWINC+0L3Ri9KjINGC0YvQvdGL0YEg0LDQu9GDINC20L7Qu9C00LDRgNGL0L3QtNCw0pPRiyDQv9Cw0YLQvtC70LPQvtC40Y/Qu9GL0psgINKx0LTQtdGA0ZbRgdGC0LXRgNC80LXQvSDQsdCw0LnQu9Cw0L3Ri9GB0YLRiy7SmtKw0YDSk9Cw0psgY9GL0YDRi9C70LTQsNGAICDQutC10LfRltC90LTQtdCz0ZYg0LHRgNC+0L3RhdGC0LDRgNC00YvSoyAg0pvQsNCx0YvRgNKT0LDQu9Cw0YDRi9C90LTQsNKT0YsgINGWY9GW0L3RgyDQsdKx0LvRiNGL0pvSm9C10YLRgtC10YDQtNGW0qMgY9C/0LDQt9C80Ysg0L3QtdC80LXRgdC1ICDSm9C+0Y4g0pvQsNKb0YvRgNGL0pvRgtGL0qMg0LbQuNC90LDQu9GD0YsgINGC0YvQvdGL0YEg0LbQvtC70LTQsNGA0YvQvdGL0qMg0YLQsNGA0YvQu9GD0YvQvdCwINCw0LvRi9C/INC60LXQu9C10LTRli4gINCQ0YPQsCDRgtCw0YDRi9C70pPQsNC9ICDQsdGA0L7QvdGFINCw0YDSm9GL0LvRiyAg06nRgtC60LXQvdC00LUsINCw0YPQsCDQsNKT0YvQvdGL0L3Ri9KjICDRgtGD0YDQsdGD0LvQtdC90YLRgtGW0LvRltCz0ZYg0LrSr9GI0LXQudGW0L8sINKb0rHRgNKT0LDSmyAgY9GL0YDRi9C70LTQsNGAINC/0LDQudC00LAg0LHQvtC70LDQtNGLLtCR0rHQuyDRgdGL0YDRi9C70LTQsNGAINOZ0LTQtdGC0YLQtSAg0LTQtdC8INGI0YvSk9Cw0YDRgyDQutC10LfRltC90LTQtSDQutKv0YjRgtGW0YDQtdC6INGW0YHRgtC10LvQtdC00ZYuINCh0L7QtGHQvSDQvtGB0LHRgtGA0YPQutGC0LjQstGC0ZYg0LHRgNC+0L3RhdC40YIg0L/QsNC50LTQsCDQsdC+0LvQsNC00YsuINCr0LvSk9Cw0LvQtNGLINGB0YvRgNGL0LvQtNCw0YAtICDRgtGL0L3Ri9GBINCw0LvRgyDQttC+0LvQtNCw0YDRi9C90LTQsCBj0rHQudGL0pvRgtGL0pvRgtGL0qMg0LbQuNC90LDQu9GD0YvQvNC10L0g0LHQsNC50LvQsNC90YvRgdGC0Ysg0LHQvtC70LDQtNGLLiDQntCg0YLQsNGI0LAg0LHRgNC+0L3RhdGC0LDRgNC00LAg0pvQsNGL0YDRi9Kb0YLRi9KjINCx0L7Qu9GD0Ysg0LDRg9Cw0L3Ri9KjIGPSsdC50YvSm9GC0YvSmyBh0YDSm9GL0LvRiyDTqdGC0YPRltC90LUg05nQutC10LvQtdC00ZYsINCx0rHQuyDQutC10LfQtNC1INC606nQv9GW0YDRiNGW0LrRgtC10YDQtNGW0qMg0LbQsNGA0YvQu9GD0YvQvWHQvSDQv9Cw0LnQtNCwINCx0L7Qu2HRgtGL0L0g0LTRi9Cx0YvRgSDQtdGB0YLRltC70LXQtNGWLiDQkdKx0Lsg0LTRi9Cx0YvRgdGC0LDRgCDQutOp0LHRltC90LXRgdC1INKb0LDQsdGL0L3RgyDSr9C00LXRgNGW0YHRgtC10YDRltC80LXQvSDQsdCw0LnQu9Cw0L3Ri9GB0YLRiyDQtNCw0LzQuNC00Ysg0JzRi2PQsNC70YssINCx0YDQvtC90YXQuNGCLNC/0LvQtdCy0YDQuNGCINCw0YPRgNGD0LvQsNGA0Ysg0LrQtdC30ZbQvdC00LUg0L3QtdC80LXRgdC1INGB0LXQutGA0LXRhtC40Y/QvdGL0qMg0LrTqdC/INCx06nQu9GW0L3Rg9GW0LzQtdC9INCx0LDQudC70LDQvdGL0YHRgtGLLiDQmtOp0YDRgdC10YLRltC70LPQtdC9INCx0LDQu9Cw0LvQsNGA0LTQsNKT0Ysg0LXQvdGC0ZbQs9GDINGB0LjQvNC/0YLQvtC80LTQsNGA0Ysg0LrTqdC/INKb0LDSm9GL0YDRi9Kb0YLRiyAg0LbTqdGC0LXQuywgIGHRg9GB0LrRg9C70YzRgtCw0YLQuNCy0YLRliDRgdGL0YDRi9C70LTQsNGAINC80LXQvSDRi9C70pPQsNC70LTRiyDRgdGL0YDRi9C70LTQsNGAINGC0YvQvdGL0YEg0LDQu9GDINC20L7Qu9C0YdGA0YvQvdGL0qMg0LjQvdGE0LXQutGG0LjRj9GB0YvQvSDQvdC10LzQtdGB0LUg0LHRgNC+0L3RhdGC0YvSoyAg0LHRltGC0LXQu9GD0ZbQvdC1INOZ0LrQtdC70LXRgtGW0L0g0pvQsNCx0YvQvdGD0LTRiyDQsdC+0LvQttCw0LnQtNGLLtCRYdC7YdC90Ysg05nRgNGWINKb0LDRgNCw0Lkg0LHQsNKT0LDQu9Cw0YMg0LbTmdC90LUg0YLQuNGW0YHRgtGWINCx0LDRgdKb0LDRgNGDINKv0YjRltC9INC/0LXQtNC40LDRgtGAICDQvNCw0LzQsNC90L3Ri9KjINCx0LDSk9Cw0LvQsNGD0Ysg0LzQsNKj0YvQt9C00Ysg0LTQtdC/INC+0LnQu9Cw0LnRi9C9LiA8YnIgLz4NCjEg0YHSsdGA0LDSmy4g0KLQsNC90L3QtdGAINCx0L7QudGL0L3RiNCwINC20YvQvdGL0YHRgtGL0psg0LbQtdGC0ZbQu9GD0ZYg0LrQtdC30LXSo9C00LXRgNGW0L3RltKjINC10YAg0LDQtNCw0LzQtNCw0YAg0LzQtdC9INKb0YvQtyDQsdCw0LvQsNC70LDRgCDQsNGA0LDRgdGL0L3QtNCwINOp0LfQsNGA0LAgYdC9YdGC0L7QvNC+LdGE0LjQt9C40L7Qu9C+0LPQuNGP0LvRi9KbINC10YDQtdC60YjQtdC70ZbQutGC0LXRgNGWINCx0L7Qu9Cw0LTRiy4g0JXRgCDQsdCw0LvQsNC70LDRgNC00LDSk9GLINC20YvQvdGL0YHRgtGL0psg0LbQtdGC0ZbQu9GD0ZYg0LrQtdC30LXSo9C00LXRgNGWIDUg0LrQtdC30LXSo9C90LXQvSDRgtKx0YDQsNC00YsuIDEg0LrQtdC30LXSoy3QttGL0L3Ri9GBINC80q/RiNC10YHRliwg0LDRgtCw0LvRi9KbINCx0LXQt9GWINC205nQvdC1INKx0LzQsNGB0Ysg0LHQsNC70LDQu9GL0psg0LrQtdC30LXSo9Cz0LUgY2HQuSDQsdC+0LvRi9C/INC60LXQu9C10LTRli7Qr9KT0L3QuCDQttGL0L3Ri9GB0YLRi9KbINGC0q/QutGC0LXQvdGD0ZYg0LbQvtKbLjIg0LrQtdC30LXSoy0g0LDRgmHQu9GL0psg0LHQtdC30ZYg0LbTmdC90LUg0rHQvNCw0YHRiyDSsdC70pPQsNGP0LTRiy7QkNC7INC20YvQvdGL0YHRgtGL0psg0LzSr9GI0LXRgdGWINKx0LvSk9Cw0LnQvNCw0LnQtNGLLiDSsNC80LAg0YLQtdGA0ZZj0ZYgY9Cw0LvQsdGL0YDRi9Kj0pvRiywg0pvRi9C30pPRi9C70YIg0YLSr9GB0YLRli7QotKv0LrRgtC10YDRliDQsNC3IGPQuNGA0LXQuiwg0rHQt9GL0L0g05nQu9GB0ZbQtyDQv9C40LPQvNC10L3RgtGC0LXQu9Cz0LXQvSDQttOZ0L3QtSDQttCw0LfRi9KbLCDQsdGW0YDQtdC9INGB0LDRgNCw0L0g0pPQsNC90LAg0LHSsdC50YDQsNC70LDQvdKT0LDQvS7QmtOp0LHRltC90LXRgdC1INC20YvQvdGL0YHRgtGL0psg0LzSr9GI0LXRgdGW0L3RltKjINC90LXQs9GW0LfRltC90LTQtSDQvtGA0L3QsNC70LBj0pvQsNC9LjMg0LrQtdC30LXSoy0g0LDRgtCw0LvRi9KbINCx0LXQtyDQttOZ0L3QtSDSsdC80LBj0Ysg05nRgNGWINKb0LDRgNCw0Lkg0rHQu9KT0LDQudGL0L8g0LTQsNC80LjQtNGLLiDQotKv0LrRgtC10YDRliDSm9C+0qPRi9GA0LvQsNC90LDQtNGLINC205nQvdC1INGW0YDRliDRgtCw0LvRiNGL0pvRgtGLINCx0rHQudGA0LDQu9Cw0L3Sk9Cw0L0g0LbRi9C90YvRgdGC0YvSmyDQvNKv0YjQtdCz0LUg0pth0YDQsNC5INCx0LDSk9GL0YLRgtCw0LvQsCBv0YDQvWHQu9Cw0YHQsNC00Ysu0Y/Sk9C90Lgg0pvQsNGB0LDSk9Cw0pPQsCDSm9Cw0YDQsNC5INGC0LDRgNCw0LvQsNC00YsuIDQg0LrQtdC30LXSoy0g0LDRgtCw0LvRi9KbINCx0LXQtyDQttOZ0L3QtSDSsdC80LAg0rHQu9KT0LDRjyDRgtKv0YHQtdC00ZYu0JbRi9C90YvRgSDQvNKv0YjQtWPRltC90ZbSoyDQtNC40LDQvNC10YLRgNGWINKx0LvSk9Cw0Y/QtNGLLtCi0q/QutGC0LXQvdGD0ZYg0LXRgNC70LXRgCDRgtC40L/RgtGWINCx0L7Qu9GL0L8g0LrQtdC70LXQtNGWLiDQkdGW0YDQsNKbINGB0LDQvdC90YvSoyDRltGI0LrRliDQttCw0pPRi9C90LAg0pvQsNGA0LDQuSDRgtCw0YDQsNC70LzQsNKT0LDQvS41INC60LXQt9C10qMt0YHRi9GA0YLSm9GLINC20YvQvdGL0YEg0LzSr9GI0LXRgdGWINC10YDQtWPQtdC6INCw0LTQsNC80LTQsNGA0LTRi9C60ZbQvdC00LXQuSDQsdC+0LvQsNC00YsuINCi0q/QutGC0LXQvdGDIGPQsNC90L3Ri9KjINGW0YjQutGWINC20LDSk9GL0L3QsCDSm9Cw0YDQsNC5INGC0LDRgNCw0LvSk9Cw0L0g0LHQvtC70LDQtNGLLtKa0YvQtyDQsdCw0LvQsNC70LDRgNC00LDSk9GLINC20YvQvdGL0YHRgtGL0psg0LbQtdGC0ZbQu9GD0ZYg0LrQtdC30LXSo9GWIDUg0LrQtdC30LXSo9C90LXQvSDRgtKx0YDQsNC00YsuMSDQutC10LfQtdKjLWPSr9GCINCx0LXQt9C00LXRgNGD0ZYg0LTQsNC80YvQvNCw0pPQsNC9LtCV0LzRiNC10Log0rHRiNGC0LDRgNGLINC606nRgtC10YDRltKj0LrRliwg0pvQsGPQsNKT0LAg0q/RgdGC0ZbQvdC00LUg0YLSr9C60YLQtdC90YPRliDQttC+0psuIDIg0LrQtdC30LXSoy0gIGPSsdGCINCx0LXQt9GW0L3RltKjINCx0q/QudGW0L0g0LrTqdC70LXQvNGW0L3QtSDQtNC10LnRltC9INOp0YHRg9GWLCDRgtKx0LrRgtC10L3Rg9C00ZbSoyDQsdCw0YHRgtCw0LvRg9GLINCx0L7Qu9Cw0LTRiy4g0KLSr9C60YLQtdGA0ZYg0YHQuNGA0LXQuiwg0rHQt9GL0L0g05nQu9GB0ZbQtyDQv9C40LPQvNC10L3RgtGC0LXQu9Cz0LXQvSDQttOZ0L3QtSDQttCw0LfRi9KbINCx0ZbRgNC10L0g0YHQsNGA0LDQvSDSk9Cw0L3QsCDQsdKv0LnRgNCw0LvQsNC90pPQsNC9LtCW05nQvdC1INC20YvQvdGL0YHRgtGL0psg0LXRgNC90LXRgyDQsdC10YLRltC90LTQtSDQvtGA0L3QsNC70LDRgdKb0LDQvS4zINC60LXQt9C10qMtINGB0q/RgiDQsdC10LfRltC90ZbSoyDTmdGA0ZYg0pvQsNGA0LDQuSDSsdC70pPQsNGO0YssINCw0YDQtW/Qu9Cw0YHRi9C90YvSoyDQutC+0L3RgtGD0YDRiyDQsdOp0LvRltC90LHQtdCz0LXQvS4g0YLSr9C60YLQtdC90YPQtNGW0qMg0LbQsNC70pPQsGPRg9GLLCDRgtKv0LrRgtC10YAg0pvQvtKj0YvRgNC70LDQvdCw0LTRiyDQttOZ0L3QtSDRltGA0ZYg0YLQsNC70YjRi9Kb0YLRiyDQsdKx0LnRgGHQu2HQvdKT0LDQvSDQsdC+0LvRi9C/INKb0LDRgdCw0pPQsCDSr9GB0YLRltC90LTQtSBv0YDQvdCw0LvQsNGB0LDQtNGLLtCW05nQvdC1INKb0L7Qu9GC0YvSm9Cw0YHRgtGLINGC0q/QutGC0LXQvdC1INCx0LDRgdGC0LDQudC00YsuIDQg0LrQtdC30LXSoy0g0YHSr9GCINCx0LXQt9GW0L3RltKjINC60L7QvdGC0YPRgNGLINKv0YHRgtGW0L3QtdC9ICDQsNGA0LXQvtC70LDQu9C90YvSoyDQttOZ0L3QtSDQtdC80YjQtdC6INKx0YjRi9C90YvSoyDRiNGL0pPSo9GL0qPQutGLINCx0L7Qu9GD0YvQvNC90LUg0LXQutGW0L3RiNGJ0ZbQu9GW0Log0LHSsdC00YvRgCDQv9Cw0LnQtNCwINCx0L7Qu9Cw0LTRiy4g0prQsNGB0LDSk9CwINGC0q/QutGC0LXQvdGD0ZYg05nRhtC10Lsg0LbRi9C90YvRgSDRgtC40L/RgtGWLCDQsdGW0YDQsNKbINCx0pvRgiDQsNGA0LDRgdGL0L3QsCDQttOZ0L3QtSDRgdCw0L3QvdGL0qMg0ZbRiNC60ZYg0LDQudC80LDSk9GL0L3QsCDQttCw0LnRi9C70LzQsNKT0LDQvS7QkdC10LfQtdGDINC/0LDQudC00LAg0LHQvtC70LDQtNGLLjUg0LrQtdC30LXSoy0g0YHSr9GCINCx0LXQt9GWINCw0YDQtdC+0LvQsNGB0Ysg05nQudC10LvQtNC10YDQtNGW0LrRliBj0LjRj9Kb0YLRiyDQsNGA0LXQvtC70LDRgdGLIGPSsdGCINCx0LXQt9GW0L3RltKjINC60L7QvdGC0YPRgNGL0LzQtdC9INGC0rHRgtCw0YHSm9Cw0L0u0KLSr9C60YLQtdC90YPRliDRgdCw0L3QvdGL0qMg0ZbRiNC60ZYg0LHQtdGC0ZbQvdC1INC20LDQudGL0LvSk9Cw0L0s0JXRgtC10LrQutGW0YDRliDRgNC10YLRgtGWLtCW0YvQvdGL0YHRgtGL0psg0LDSk9C30LDQu9Cw0YDRi9C9INKbYdGAYdKT0LDQvdC00LAgINC+0LvQsNGA0LTRi9KjINKb0rHRgNGL0LvRi9GB0YvQvdGL0qMg0YJv0LvRi9Kb0pvQsNC90LTRi9C70YvSk9GL0L3QsCDQutOp0qPRltC7INCx06nQu9C10LzRltKj0LcuINCV0YAg0LHQsNC70LvQsNGA0LTQsCDQs9C40L/QvtC90LDQt9C40Y8g0LbTmdC90LUg0Y3Qv9C40L/QsNGB0LTQuNGPICwg0LbRi9C90YvRgdGC0YvSsSDQvNKv0YjQtdGB0ZbQvdGW0qMg0LPQuNC/0L7Qv9C70LDQt9C40Y/RgdGLINGB0LjRj9Kb0YLRiyAg0LDQvdC+0LzQsNC70LjRj9C70LDRgNC00Ysg0YLQsNCx0YPSk9CwINCx0L7Qu9Cw0LTRiy4g0J/QsNC70YzQv9Cw0YbQuNGP0LvQsNKT0LDQvdC00LAg0LXRgCDQsdCw0LvQsNC70LDRgNC00YvSoyDQsNGC0LDQu9GL0psg0LHQtdC30ZbQvSDQttOZ0L3QtSDSsdC80LDRgdGL0L3Ri9KjINC606nQu9C10LzRltC9LCDQutC+0L3RgdC40YHRgtC10L3RhtC40Y/RgdGL0L0g0LDQvdGL0pvRgtCw0LnQtNGLLtKa0YvQtyDQsdCw0LvQu9Cw0YDQtNCwINGI0q/RgNGC0ZYg0LPQuNC/0LXRgNGC0YDQvtGE0LjRj9GB0YssINKv0LvQutC10L0gINC205nQvdC1INC60ZbRiNGWINC10YDQvdC10YPQu9C10YDQtNGW0qMg0LHRltGA0ZbQs9GD0ZYs0pvRi9C30LTRi9Kb0L/QtdGA0LTQtdC90ZbSoyDRgtC10YHRltC70LzQtdGD0ZYsINC10YDQvdC10YPQu9C10YDQtNGW0qMg0LbTmdC90LUg0pvRi9C3INC/0LXRgNC00LUg0LDQv9C70LDQt9C40Y/RgdGLIGPQuNGP0pvRgtGLINCw0L3QvtC80LDQu9C40Y/Qu9Cw0YDQttC00Ysg0LrQtdC30LTQtWPRgtGW0YDRg9Cz0LUg0LHQvtC70LDQtNGLLiDSmtCw0LbQtdGC0ZbQvdC00LUg0LrRltGI0ZYg0LbQsNC80LHQsNGBINGW0YjRliDQsNKT0LfQsNC70LDRgNGL0L3Ri9KjICDQtdGAINCx0LDQu9Cw0LvQsNGA0LTQsCDQsNGC0LDQu9GL0psg0LHQtdC30ZbQvdGW0qMg0KPQlNCXLdGWINC20LDRgdCw0LvQsNC00Ysu0JbRi9C90YvRgdGC0YvSmyDQsdC10Lcg0YTRg9C90LrRhtC40Y/RgdGL0L0g0LDQvdGL0pvRgtCw0YPSr9GI0ZbQvSDQs9C+0L3QsNC00L7RgtGA0L7Qv9C40L3QtdGA0LTRltKjINC205nQvdC1INC20YvQvdGL0YHRgtGL0psg0LPQvtGA0LzQvtC90LTQsNGA0LTRi9KjINKb0LDQvdC00LDSk9GLINC60L7QvdGG0LXQvdGC0YDQsNGG0LjRj9GB0YvQvSDQsNC90YvSm9GC0LDQudC00Ys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2-ші есепте -Неге құрғақ және орта көпіршікті сырылдар естіледі? Бұл ауруға қандай кеуде клеткасы тән? Бұл патологиялық жағдайда қандай ентігу болады?жауаптары ашылып толық жазылмаған.</text:p>
          </table:table-cell>
          <table:table-cell office:value-type="float" office:value="0" table:style-name="ce1">
            <text:p>0</text:p>
          </table:table-cell>
          <table:table-cell table:number-columns-repeated="16376"/>
        </table:table-row>
        <table:table-row table:style-name="ro1">
          <table:table-cell office:value-type="float" office:value="1067194" table:style-name="ce1">
            <text:p>1067194</text:p>
          </table:table-cell>
          <table:table-cell office:value-type="string" table:style-name="ce1">
            <text:p>kazakh</text:p>
          </table:table-cell>
          <table:table-cell office:value-type="string" table:style-name="ce1">
            <text:p>Билет 9&amp;lt;br /&amp;gt; 1.Таннер бойынша жыныстық жетілу кезеңдерінің белгілері.&amp;lt;br /&amp;gt; 2. 8 айлық бала. Шағымдары ентігуге, жөтелге, мазасыздануға. Қарағанда: бронхообструкцияға байланысты жағдайы орта ауырлықта. Бала мазасыз. Тері жамылғысы таза, мұрын-ерін үшбұрышының көгеруі байқалады. Жөтелі жиі, өнімсіз, қақырығы көп бөлінеді, Өкпесін перкуссиялағанда қорапты түрдегі өкпелік дыбыс. Аускультативті: тынысы қатқыл, барлық аймақта құрғақ ысқырықты және орта көпіршікті ылғалды сырылдар естіледі. Тыныс шығару ұзарған.Неге құрғақ және орта көпіршікті сырылдар естіледі? Бұл ауруға қандай кеуде клеткасы тән? Бұл патологиялық жағдайда қандай ентігу болады?&amp;lt;br /&amp;gt;</text:p>
          </table:table-cell>
          <table:table-cell office:value-type="string" table:style-name="ce1">
            <text:p>MS4g0KLQsNC90L3QtdGAINC20q/QudC10YHRliDQsdC+0LnRi9C90YjQsCDQtdGAINCx0LDQu9CwINC80LXQvSDSm9GL0Lcg0LHQsNC70LAg0q/RiNGW0L0g0LbRi9C90YvRgdGC0YvSmyDQttC10YLRltC70YMg0LrQtdC30LXSo9GW0L0gNSDQutC10LfQtdKj0LPQtSDQsdOp0LvQtdC00ZYuINKa0YvQt9C00LDRgCDSr9GI0ZbQvSDRgdKv0YIg0LHQtdC30ZYg0LbTmdC90LUg0LbQsNC80LHQsNGBINKv0LvQutC10Y7RltC80LXQvSDQutOp0YDRltC90ZbRgSDRgtCw0LHQsNC00Ys6IDEg0LrQtdC30LXSoyDQv9GA0LXQv9GD0LHQtdGA0YLQsNGC0YLRi9KbINC60LXQt9C10qMgLSDRgdKv0YIg0LHQtdC30ZYg0L3QtdC80LXRgdC1INC20LDQvNCx0LDRgSDRgtKv0LrRgtC10YDRliDQttC+0psuIDIg0LrQtdC30LXSoyDRgdKv0YIg0LHQtdC30ZbQvdGW0qMg0LTQsNC80YPRiyDQutC10LfQtdKj0ZYgLSDRgdKv0YIg0LHQtdC30ZYg0LzQtdC9INCw0YDQtdC+0LvQsCDQsNC30LTQsNC/INC606nRgtC10YDRltC70LXRliwg0LHSr9GA0YjRltC6INGC0q/RgNGW0L3QtNC1LiDQltC10qPRltC7INCw0LfQtNCw0pPQsNC9INGC0q/Qt9GDINC/0LjQs9C80LXQvdGC0YLQtdC70LPQtdC9INGC0q/QuiDRiNGL0pPQsCDQsdCw0YHRgtCw0YPRiywg0L3QtdCz0ZbQt9GW0L3QtdC9INKv0LvQutC10L0g0LbRi9C90YvRgSDQtdGA0L3QtdGD0LvQtdGA0ZbQvdC00LUgMyDQutC10LfQtdKjIC0g0YHSr9GCINCx0LXQt9C00LXRgNGWINOp0YHRg9GWINC20LDQu9KT0LDRgdGL0L8g0LbQsNGC0YvRgCwg0YHQvtC90YvSoyDTmdGB0LXRgNGW0L3QtdC9INC60LXRg9C00LUg06nRgdC10LTRliwg0LHRltGA0LDSmyDQsNGA0LXQvtC70LAg0LHTqdC70LXQuiDQtdC80LXRgS4g0LbQsNC80LHQsNGB0YLQsNKT0Ysg0YLSr9C60YLQtdGAINKb0LDRgNCwLCDQsdKx0LnRgNCwINOZ0YDRliDQtNOp0YDQtdC60ZYg0LHQvtC70LAg0LHQsNGB0YLQsNC50LTRiy4gNCDQutC10LfQtdKjIC0g0LDRgNC10L7Qu9CwINC80LXQvSDQtdC80ZbQt9GW0Log0LTTqdKj0LXRgdC60LUg0LDQudC90LDQu9Cw0LTRiyA1INC60LXQt9C10qMg0YLQvtC70YvSmyDQtNCw0LzRg9GLIC0g0YHSr9GCINCx0LXQt9C00LXRgNGWINOp0LfQtNC10YDRltC90ZbSoyDQtdGA0LXRgdC10Log06nQu9GI0LXQvNGW0L3QtSDQttC10YLRltC/LCDQttCw0LzQsdCw0YHRi9C90LTQsNKT0Ysg0YLSr9C60YLQtdGAINGW0YjQutGWINC20LDQvNCx0LDRgdKb0LAg0LTQtdC50ZbQvSDRgdC+0LfRi9C70LDQtNGLLiDSsNC70LTQsNGA0pPQsDogMSDQutC10LfQtdKjINC/0YDQtdC/0YPQsdC10YDRgtCw0YLRgtGL0psgLSDQsNGC0LDQu9GL0psg0LHQtdC3INCx0LXQvSDSsdC80LAg0rHQu9KT0LDQudC80LDQudC00YssINGC0q/QutGC0LXRgCDQttC+0psuIDIg0LrQtdC30LXSoyAtINCw0YLQsNC70YvSmyDQsdC10Lcg0LzQtdC9INKx0LzQsCAo0LzQvtGI0L7QvdC60LApINKx0LvSk9Cw0Y/QtNGLLCDRgdC40YDQtdC6INCw0Lcg0L/QuNCz0LzQtdC90YLRgtGWINGC0q/QutGC0LXRgCDQttCw0LzQsdCw0YHRgtCwINC/0LDQudC00LAg0LHQvtC70LAg0LHQsNGB0YLQsNC50LTRiy4gMyDQutC10LfQtdKjIC0g0LbRi9C90YvRgSDQvNKv0YjQtdGB0ZYg0L/QtdC90LjRgSDTqdGB0LUsINKx0LfQsNGA0LAg0LHQsNGB0YLQsNC50LTRiywg0LDRgtCw0LvRi9KbINCx0LXQtyDQsdC10L0g0LzQvtGI0L7QvdC60LAg05nRgNGWINKb0LDRgNCw0Lkg0rHQu9KT0LDRjtC00LAuINGC0q/QutGC0LXRgCDSm9C+0Y7Qu9Cw0L3Ri9C/INCx0rHQudGA0LDQu9Cw0L3QsCDQsdCw0YHRgtCw0LnQtNGLLiA0INC60LXQt9C10qMgLSDQttGL0L3Ri9GBINC80q/RiNC10YHRliDSsdC70pPQsNGO0LTQsCwg0LHQsNGB0Ysg0LPQu9Cw0L3RgSDSm9Cw0LvRi9C/0YLQsNGB0LDQtNGLLCDRgtC10YDRltGB0ZYg0pvQsNGC0L/QsNGA0LvRiyDQsdC+0LvQsNC00YsuINGC0q/QutGC0LXRgCAg0pvQsNGA0LAg05nRgNGWINCx0rHQudGA0LAg0LbQsNC80LHQsNGB0YLRi9KjINC606nQvyDQsNC50LzQsNKT0YvQvSDQttCw0YPRi9C/INC20LDRgtCw0LTRiywg0LHRltGA0LDSmyDRgdCw0L3Sk9CwINOp0YLQv9C10LnQtNGWLiA1INC60LXQt9C10qMgLSDQttGL0L3Ri9GBINC80q/RiNC10LvQtdGA0ZYg0YLQvtC70YvSmyDQtdGA0LXRgdC10Log06nQu9GI0LXQvNGW0L3QtSDQttC10YLQtdC00ZYuINGC0q/QutGC0LXRgCDQtdGA0LXRgdC10Log0q/Qu9Cz0ZbQtNC1LCDRgdCw0L3QvdGL0qMg0ZbRiNC60ZYg0LHQtdGC0ZbQvdC1INC00LXQudGW0L0g0YLQsNGA0LDQu9Cw0LTRiy4gMy00INC60LXQt9C10qPQtNC1INC00LDRg9GL0YHRiyDQttGD0LDQvdC00LDQvywgNC01INC60LXQt9C10qPQtNC1INCx0rHQu9GI0YvSm9C10YIg0LzQsNGB0YHQsNGB0Ysg0LDRgNGC0YvQvyAsINC40YvSmyDQutC10qPQtdC50LXQtNGWLCDRgdC/0LXRgNC80LDRgtC+0LPQtdC90LXQtyDQvtGB0Ysg0LrQtdC30LTQtSDQv9Cw0LnQtNCwINCx0L7Qu9Cw0LTRiyAgICAgIDIg0YHSsdGA0LDSmzog0JHSsdC7INC/0LDRhtC40LXQvdGC0YLQtdCz0ZYg0LrQu9C40L3QuNC60LDQu9GL0psg0LrTqdGA0ZbQvdGW0YEg0LHRgNC+0L3RhdC+0L7QsdGB0YLRgNGD0LrRgtC40LLRgtGWINGB0LjQvdC00YDQvtC80LzQtdC9INC20LXQtNC10Lsg0LHRgNC+0L3RhdC40L7Qu9C40YIg0L3QtdC80LXRgdC1INCx0YDQvtC90YXQuNGCLCDQsNC90YvSmyDQtNC40LDQs9C90L7QtyDSr9GI0ZbQvSDSm9Cw0YDQsNGD0LTRiyDQttCw0LvSk9Cw0YHRgtGL0YDRgyDSm9Cw0LbQtdGCLiDSm9Kx0YDSk9Cw0psg0YHRi9GA0YvQuyDRgdC10LHQtdCx0ZY6INCx0YDQvtC90YUg0YLQsNGA0YvQu9KT0LDQvSAo0LHRgNC+0L3RhdC+0YHQv9Cw0LfQvCwg0ZbRgdGW0L3Rgywg0YjRi9GA0YvRiNGC0Ysg0LbQuNC90LDQu9GD0YspINC60LXQt9GW0L3QtNC1INC/0LDQudC0INCx0L7Qu9Cw0LTRiy4g0JDRg9CwINGC0LDRgNGL0LvSk9Cw0L0g0LbQvtC70LTQsCDQsNGA0pvRi9C70Ysg06nRgtC60LXQvdC00LUg0LTRltGA0ZbQuyDRgtGD0YvQvdC00LDQvywg0YvRgdKb0YvRgNGL0psgINC90LXQvNC10YHQtSDRgdGL0pvRi9GA0LvRiyDQtNCw0YPRi9GBINGC0YPQtNGL0YDQsNC00YsuINC+0YDRgtCwINC606nQv9GW0YDRiNGW0LrRgtGWINGL0LvSk9Cw0LvQtNGLINGB0YvRgNGL0Ls6INCx0YDQvtC90YXRgtCwINGB0rHQudGL0pvRgtGL0psg0LHQvtC70YMg05nRgdC10YDRltC90LXQvSDQv9Cw0LnQtNCwINCx0L7Qu9Cw0LTRiy4g0JHSsdC7INCw0YPRgNGD0pPQsCDSmtC+0YDQsNCx0YjQsCDRgtOZ0YDRltC30LTRliDQutC10YPQtNC1INGC0L7RgNGLINGC05nQvS4g0YHQtdCx0LXQsdGWINCx0LDQu9Cw0LTQsCDRjdC60YHQv9C40YDQsNGC0L7RgNC70Ysg0LXQvdGC0ZbQs9GDLCDQs9C40L/QtdGA0LjQvdGE0LvRj9GG0LjRjyDQsdC+0LvRi9C/INC20LDRgtGL0YAuINCR0rHQuyDQv9Cw0YLQvtC70LPQuNGPINC60LXQt9GW0L3QtNC1INGN0LrRgdC/0LjRgNCw0YLQvtGA0LvRi9KbINC10L3RgtGW0LPRgyDQsdC+0LvQsNC00YsgLSDRgtGL0L3Ri9GBINGI0YvSk9Cw0YDRg9GLINKx0LfQsNGA0LDQtNGLLiDRgdC10LHQtdCx0ZYsINKx0YHQsNKbINC205nQvdC1INC+0YDRgtCwINCx0YDQvtC90YXRgtCw0YDQtNGL0qMg0YLQsNGA0YvQu9GD0YssINCx0YDQvtC90YXQvtGB0L/QsNC30Lwg0LbTmdC90LUg0YjRi9GA0YvRiNC/0LXQvSDQsdGW0YLQtdC70YMg05nRgdC10YAg0LXRgtC10LTRli4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жауаптар толық ашалып жазылмаған. Жыныстық жетілу- Менархе туралы, бой мен дене бітімі, дауыс өзгерістері мүлдем жазылмаған</text:p>
          </table:table-cell>
          <table:table-cell office:value-type="float" office:value="0" table:style-name="ce1">
            <text:p>0</text:p>
          </table:table-cell>
          <table:table-cell table:number-columns-repeated="16376"/>
        </table:table-row>
        <table:table-row table:style-name="ro1">
          <table:table-cell office:value-type="float" office:value="915389" table:style-name="ce1">
            <text:p>915389</text:p>
          </table:table-cell>
          <table:table-cell office:value-type="string" table:style-name="ce1">
            <text:p>russian</text:p>
          </table:table-cell>
          <table:table-cell office:value-type="string" table:style-name="ce1">
            <text:p>Билет 9&amp;lt;br /&amp;gt; 1.Стадии полового созревания у детей по Таннеру.&amp;lt;br /&amp;gt; 2.Ребенку 8 месяцев. Жалобы на одышку, кашель, беспокойство. Объективно: состояние средней тяжести за счет бронхообструкции. Ребенок беспокоен. Кожные покровы чистые, цианоз носогубного треугольника. Кашель частый, с обилием мокроты, непродуктивный. В легких коробочный оттенок. Аускультативно жесткое дыхание, по всем полям выслушиваются сухие свистящие и ср/ пузырчатые влажные хрипы. Выдох удлинен. Почему выслушиваются сухие и ср/ пузырчатые хрипы? &amp;lt;br /&amp;gt;</text:p>
          </table:table-cell>
          <table:table-cell office:value-type="string" table:style-name="ce1">
            <text:p>0KHRgtCw0LTQuNC4INGA0LDQt9Cy0LjRgtC40Y8g0L/QvtC70L7QstC+0LPQviDRgdC+0LfRgNC10LLQvdCw0L3QuNGPINGDINC80LDQu9GM0YfQuNC60L7QsiDRjdGC0L4g0LHRg9C00YPRgi3Qv9C10YDQstCw0Y8g0YHRgtCw0LTQuNGPINC30LTQtdGB0Ywg0Y/QuNGH0LrQuCzQv9C+0LvQvtCy0L7QuSDRh9C70LXQvSDQsCDRgtCw0LrQttC1INC80L7RiNC+0L3QutCwINGD0LLQtdC70LjRh9C10L3RiyDQvdC1INCx0YPQtNGD0YIu0J/QvtC70L7QstC+0LPQviDQvtCy0L7Qu9C+0YHQtdC90LXQvdC40Y8g0YLQsNC6INC20LUg0L3QtSDQsdGD0LTQtdGCLtCS0L4g0LLRgtC+0YDQvtC5INGB0YLQsNC00LjQuCDRgtCw0Lwg0LHRg9C00LXRgiDRg9Cy0LXQu9C40YfQtdC90LjQtSDQvNC+0YjQvtC90LrQuCDQsCDRgtCw0LrQttC1INGP0LjRh9C10Los0L/QvtC70L7QstC+0Lkg0YfQu9C10L0g0LbQtSDQvdC1INCx0YPQtNC10YIg0YPQstC10LvQuNGH0LXQvS7QnNC+0YjQvtC90LrQsCDQttC1INCx0YPQtNC10YIg0YLQsNC60L7Qs9C+INC60YDQsNGB0L3QvtCy0LDRgtC+0LPQviDRhtCy0LXRgtCwINC+0L3QsCDQsdGD0LTQtdGCINC/0YDQvtCy0LjRgdCw0YLRjC7QotCw0LrQttC1INCx0YPQtNGD0YIg0L/QvtGP0LLQu9GP0YLRjNGB0Y8g0LLQvtC70L7RgdGLINGC0L7QvdC60LjQtSDRgNC10LTQutC40LUg0L3QtSDRgdC40LvRjNC90L4g0L/QuNCz0LzQtdC90YLQuNGA0L7QstCw0L3QvdC+0LPQviDRhtCy0LXRgtCwLCDQv9GA0Y/QvNGL0LUsINGA0LXQtNC60L4g0L7QvdC4INCz0LTQtSDQsdGD0LTRg9GCINCy0YzQuNGC0YHRjyAs0YDQsNGB0YLQuCDQvtC90Lgg0LHRg9C00YPRgiDQsiDQvtCx0LvQsNGB0YLQuCDQvtGB0L3QvtCy0LDQvdC40Y8g0L/QvtC70L7QstC+0LPQviDRh9C70LXQvdCwLtCd0LAg0YLRgNC10YLRjNC10Lkg0YHRgtCw0LTQuNC4INCx0YPQtNC10YIg0YPQstC10LvQuNGH0LXQvdC40LUg0LzQvtGI0L7QvdC60Lgg0Y/QuNGH0LXQuiDQuCDQv9C+0LvQvtCy0L7Qs9C+INGH0LvQtdC90LAg0LIg0LTQu9C40L3RgyzQvNC+0YjQvtC90LrQsCDRg9C20LUg0LHRg9C00LXRgiDRgtC10LzQvdC+0LPQviDRhtCy0LXRgtCwLtCS0L7Qu9C+0YHRiyDRg9C20LUg0LHRg9C00YPRgiDQsdC+0LvQtdC1INCz0YPRgdGC0YvQtSzRhdC+0YDQvtGI0L4g0L/QuNCz0LzQtdC90YLQuNGA0L7QstCw0L3RiyAs0LHRg9C00YPRgiDRhdC+0YDQvtGI0L4g0LLRjNGO0YnQuNC10YHRjy7Qo9C20LUg0LHRg9C00YPRgiDQv9C10YDQtdGF0L7QtNC40YLRjCDQvdCwINC30L7QvdGDINC70L7QsdC60LAu0JIg0YfQtdGC0LLQtdGA0YLQvtC5INGB0YLQsNC00LjQuCDQsdGD0LTQtdGCINGD0LLQtdC70LjRh9C10L3QuNC1INGP0LjRh9C10Log0LzQvtGI0L7QvdC60Lgg0LAg0YLQsNC60LbQtSDRg9Cy0LXQu9C40YfQtdC90LjQtSDQv9C+0LvQvtCy0L7Qs9C+INGH0LvQtdC90LAg0LIg0LTQuNCw0LzQtdGC0YDQtS7QntCy0L7Qu9C+0YHQtdC90LXQvdC40LUg0L7QvdC+INCx0YPQtNC10YIg0L/RgNC+0LjRgdGF0L7QtNC40YLRjCDQv9C+INC80YPQttGB0LrQvtCz0L4g0YLQuNC/0YMu0J3QviDQvdC1INCx0YPQtNC10YIg0LXRidC1INC/0LXRgNC10YXQvtC00LjRgtGMINC90LAg0LLQvdGD0YLRgNC10L3QvdGO0Y4g0YfQsNGB0YLRjCDQsdC10LTRgNCwINCwINGC0LDQutC20LUg0Y/Qs9C+0LTQuNGG0Ysu0J3QsCDQv9GP0YLQvtC5INC20LUg0YHRgtCw0LTQuNC4LdCx0YPQtNGD0YIg0L3QsNGA0YPQttC90YvQtSDQv9C+0LvQvtCy0YvQtSDQvtGA0LPQsNC90Ysg0YPQttC1INC60LDQuiDRgyDQstC30YDQvtGB0LvQvtCz0L4g0LzRg9C20YfQuNC90Ysu0JAg0LLQvtGCINC+0LLQvtC70L7RgdC10L3QtdC90LjQtSDQv9C10YDQtdC50LTQtdGCINC90LAg0LLQvdGD0YLRgNC10L3QvdGO0Y4g0L/QvtCy0LXRgNGF0L3QvtGB0YLRjCDQsdC10LTRgNCwLtCh0YLQsNC00LjQuCDRgdC+0LfRgNC10LLQsNC90LjRjyDRgyDQtNC10LLQvtGH0LXQui3RjdGC0L4g0L/QtdGA0LLQsNGPINGB0YLQsNC00LjRjy3QvNC+0LvQvtGH0L3QsNGPINC20LXQu9C10LfQsCDQsdGD0LTQtdGCINC90LUg0YDQsNC30LLQuNGC0LAg0LXRidC1INCwINGB0L7RgdC+0Log0LLQvtGCINCx0YPQtNC10YIg0L/RgNC40L/QvtC00L3Rj9GCLNC+0LLQvtC70L7RgdC10L3QuNC1INC/0L7QutCwINC10YnQtSDQvdC1INCx0YPQtNC10YIu0JLQviDQstGC0L7RgNC+0Lkg0YHRgtCw0LTQuNC4INCx0YPQtNC10YIg0YPQttC1INGD0LLQtdC70LjRh9C10L3QuNC1INC80L7Qu9C+0YfQvdGL0YUg0LbQtdC70LXQtyDQv9C+INGC0LjQv9GDINCx0YPRgtC+0L3QsCzQstC+0LvQvtGB0Ysg0YPQttC1INCx0YPQtNGD0YIg0YDQsNGB0YLQuCDQvdC+INGC0L7QvdC60LjQtSDQuCDRgNC10LTQutC40LUg0LAg0YLQsNC60LbQtSDQv9C70L7RhdC+INC/0LjQs9C80LXQvdGC0LjRgNC+0LLQsNC90Yss0YDQtdC00LrQviDQvtC90Lgg0LHRg9C00YPRgiDQt9Cw0LLQuNCy0LDRgtGM0YHRjyzQsdGD0LTRg9GCINGA0LDRgdGC0Lgg0LLQtNC+0LvRjCDQv9C+0LvQvtCy0YvRhSDQs9GD0LEu0J3QsCDRgtGA0LXRgtGM0LXQuSDRgdGC0LDQtNC40Lgg0LbQtSDQsdGD0LTQtdGCINGD0LLQtdC70LjRh9C10L3QuNC1INC20LXQu9C10Lcg0LLQvNC10YHRgtC1INGBINCw0YDQtdC+0LvQvtC5INCx0LXQtyDQutCw0LrQvtCz0L4g0LvQuNCx0L4g0YfQtdGC0LrQvtCz0L4g0LrQvtC90YLRg9GA0LAs0L7QstC+0LvQvtGB0LXQvdC90LXQvdC40LUg0YPQttC1INCx0YPQtNC10YIg0L/QtdGA0LXRhdC+0LTQuNGC0Ywg0L3QsCDQt9C+0L3RgyDQu9C+0LHQutCwICzQstC+0LvQvtGB0Ysg0YHRgtCw0L3Rg9GCINC70YPRh9GI0LUg0L/QuNCz0LzQtdC90YLQuNGA0L7QstCw0L3RiyDQsdC+0LvRjNGI0LUg0LHRg9C00YPRgiDQstGM0LjRgtGM0YHRjyAu0KLQsNC60LbQtSDQv9C+0Y/QstC40YLRjNGB0Y8g0L/QvtC00LzRi9GI0LXRh9C90L7QtSDQvtCy0L7Qu9C+0YHQtdC90LXQvdC40LUg0YLQviDQtdGB0YLRjCDRgNC+0YHRgiDQstC+0LvQvtGBINCyINC/0L7QtNC80YvRiNC10YfQvdC+0Lkg0LLQv9Cw0LTQuNC90LUu0JTQsNC70LXQtSDQvdCwINGH0LXRgtCy0LXRgNGC0L7QuSDRgdGC0LDQtNC40Lgg0YPQttC1INCx0YPQtNC10YIg0L7QstC+0LvQvtGB0LXQvdC40LUg0L/QviDQttC10L3RgdC60L7QvNGDINGC0LjQv9GDINCwINCy0L7RgiDQstC+0LvQvtGB0Ysg0L3QtSDQsdGD0LTRg9GCINGA0LDRgdGC0Lgg0LXRidC1INC90LAg0L/RgNC+0LzQtdC20L3QvtGB0YLQuCDQsCDRgtCw0LrQttC1INCy0L3Rg9GC0YDQtdC90L3QtdC5ICDRh9Cw0YHRgtC4INCx0LXQtNGA0LAg0Lgg0YLQsNC60LbQtSDQv9C+0Y/QstC40YLRgdGPINC80LXQvdCw0YDRhdC1LdGC0L4g0LXRgdGC0Ywg0L/QtdGA0LLRi9C1INC80LXQvdGB0YLRgNGD0LDQu9GM0L3Ri9C1INC00L3QuCDRgtCw0LrQttC1INC/0L7Rj9Cy0LjRgtGB0Y8g0YPQs9GA0Lgu0Jgg0YLQsNC60LbQtSDQsdGD0LTQtdGCINC/0YDQvtC40YHRhdC+0LTQuNGC0Ywg0LLRi9GB0YLRg9C/INCw0YDQtdC+0LvRiyDQstC80LXRgdGC0LUg0YEg0YHQvtGB0LrQvtC8INC60LDQuiDQsdGLINGBINGE0L7RgNC80LjRgNC+0LLQsNC90LjQtdC8INC60LDQuiDQsdGLINCx0YPQs9C+0YDQutCwINC90LDQtCDQvNC+0LvQvtGH0L3QvtC5INC20LXQu9C10LfQvtC5LtCd0LAg0L/Rj9GC0L7QuSDRgdGC0LDQtNC40Lgg0YPQttC1INC80L7Qu9C+0YfQvdGL0LUg0LbQtdC70LXQt9GLINCx0YPQtNGD0YIg0LrQsNC6INGDINCy0LfRgNC+0YHQu9C+0Lkg0LbQtdC90YnQuNC90Ysg0LAg0LLQvtGCINC+0LLQvtC70L7RgdC10L3QuNC1INC/0LXRgNC10LnQtNC10YIg0L3QsCDQstC90YPRgtGA0LXQvdC90Y7RjiDRh9Cw0YHRgtGMINCx0LXQtNGA0LAg0Lgg0LzQtdGB0Y/Rh9C90YvQtSDQtNC90Lgg0YPQttC1INCx0YPQtNGD0YIg0L/QvtGB0YLQvtGP0L3QvdGL0LzQuC4yINCy0L7Qv9GA0L7RgSnQodGD0YXQuNC1INGF0YDQuNC/0Ysg0L7QvdC4INC/0L7Rj9Cy0LvRj9GO0YLRgdGPINC+0LHRi9GH0L3QviDQv9GA0Lgg0LHRgNC+0L3RhdC40LDQu9GM0L3QvtC5INCw0YHRgtC80LUg0LvQuNCx0L4g0LbQtSDQsdGA0L7QvdGF0LjQvtC70LjRgtC1LNGC0L4g0LXRgdGC0Ywg0L7QvdC4INC/0L7Rj9Cy0LvRj9GO0YLRgdGPINC/0YDQuCDRgdGD0LbQtdC90LjQuCDQtNGL0YXQsNGC0LXQu9GM0L3Ri9GFINC/0YPRgtC10Lkg0Y3RgtC+INCx0YvQstCw0LXRgiDQv9GA0Lgg0LLQvtGB0L/QsNC70LXQvdC40Lgs0L7RgtC10LrQtS7QotC+INC10YHRgtGMINC/0YDQvtC40YHRhdC+0LTQuNGC0Ywg0YHRg9C20LXQvdC40LUg0Lgg0LTQsNC70LXQtSDQv9GA0L7QuNGB0YXQvtC00LjRgiDRgtGD0YDQsdGD0LvQtdC90YLQvdC+0YHRgtGMINCy0L7Qt9C00YPRhdCwINC/0L7RjdGC0L7QvNGDINC/0L7Rj9Cy0LvRj9C10YLRgdGPINGB0LLQuNGB0YLRj9GJ0LjQuSDQt9Cy0YPQuiDQv9GA0Lgg0LTRi9GF0LDQvdC40Lgg0YDQtdCx0LXQvdC60LAu0JAg0LLQvtGCINCy0LvQsNC20L3Ri9C1INC4INGB0YDQtdC00L3QtdC/0YPQt9GL0YDRh9Cw0YLRi9C1INGF0YDQuNC/0Ysg0L/QvtGP0LLQu9GP0Y7RgtGB0Y8g0L/RgNC4INC90LDQutC+0L/Qu9C10L3QuNC4INC60LDQutC+0LPQviDQu9C40LHQviDRjdC60YHRg9C00LDRgtCwICzRgtC+INC10YHRgtGMINGC0LDQvCDRgdC70LjRiNC60L7QvCDQvNC90L7Qs9C+INGB0LvQuNC30Lgs0LjQu9C4INC20LUg0LbQuNC00LrQvtGB0YLQuCzQv9C+0Y3RgtC+0LzRgyDQt9Cy0YPQuiDQsdGD0LTQtdGCINC/0L7RhdC+0LYg0L3QsCDQsdGD0LvRjNC60LDQvdC40LUg0L/Rg9C30YvRgNGM0LrQvtCyLtCe0L3QuCDQsdGL0LLQsNGO0YIg0L7QsdGL0YfQvdC+INC/0YDQuCDQuNC90YTQtdC60YbQuNC4INC40LvQuCDQttC1INCx0YDQvtC90YXQuNGC0LUu0J/RgNC4INCy0L7RgdC/0LDQu9C10L3QuNC4INC40LTQtdGCINC+0YfQtdC90Ywg0LHQvtC70YzRiNCw0Y8g0LPQuNC/0LXRgNGB0LXQutGA0LXRhtC40Y8g0YHQu9C40LfQuCDQvtC90LAg0LLQtdC00LXRgiDQuiDQvtGC0LXQutGDLNC4INC00LDQu9C10LUg0YDQtdCx0LXQvdC60YMg0LHRg9C00LXRgiDRgtGP0LbQtdC70L4g0LTRi9GI0LDRgtGMLtCa0L7Qs9C00LAg0L/RgNC+0LjRgdGF0L7QtNC40YIg0YPQtNC70LjQvdC10L3QuNC1INCy0YvQtNC+0YXQsCDRjdGC0L4g0LHRg9C00LXRgiDQvdCw0LfRi9Cy0LDRgtGM0YHRjyDRjdC60L/QuNGA0LDRgtC+0YDQvdCw0Y8g0L7QtNGL0YjQutCwLtCS0LXRgNC+0Y/RgtC90LXQtSDQstGB0LXQs9C+INC80L7Qs9GDINC/0YDQtdC00L/QvtC70L7QttC40YLRjCDRh9GC0L4g0Y3RgtC+INC60LDQutCw0Y8g0YLQviDRgNC10YHQv9C40YDQsNGC0L7RgNC90LDRjyDQuNC90YTQtdC60YbQuNGPINC60L7RgtC+0YDQsNGPINC/0YDQuNCy0L7QtNC40YIg0Log0YHRg9C20LXQvdC40Y4g0YLQviDQtdGB0YLRjCDQvtCx0YHRgtGA0YPQutGG0LjQuCDQtNGL0YXQsNGC0LXQu9GM0L3Ri9GFINC/0YPRgtC10Lk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14" table:style-name="ce1">
            <text:p>915414</text:p>
          </table:table-cell>
          <table:table-cell office:value-type="string" table:style-name="ce1">
            <text:p>russian</text:p>
          </table:table-cell>
          <table:table-cell office:value-type="string" table:style-name="ce1">
            <text:p>Билет 9&amp;lt;br /&amp;gt; 1.Стадии полового созревания у детей по Таннеру.&amp;lt;br /&amp;gt; 2.Ребенку 8 месяцев. Жалобы на одышку, кашель, беспокойство. Объективно: состояние средней тяжести за счет бронхообструкции. Ребенок беспокоен. Кожные покровы чистые, цианоз носогубного треугольника. Кашель частый, с обилием мокроты, непродуктивный. В легких коробочный оттенок. Аускультативно жесткое дыхание, по всем полям выслушиваются сухие свистящие и ср/ пузырчатые влажные хрипы. Выдох удлинен. Почему выслушиваются сухие и ср/ пузырчатые хрипы? &amp;lt;br /&amp;gt;</text:p>
          </table:table-cell>
          <table:table-cell office:value-type="string" table:style-name="ce1">
            <text:p>Mi4g0Jgg0YLQsNC6LCDRgyDQv9Cw0YbQuNC10L3RgtCwINCyIDgg0LzQtdGB0Y/RhtC10LIg0LLQtdGA0L7Rj9GC0L3QtdC1INCy0YHQtdCz0L4g0LzRiyDQstGL0YHQu9GD0YjQuNCy0LDQtdC8INGB0YPRhdC40LUg0Lgg0YHRgNC10LTQvdC10L/Rg9C30YvRgNGH0LDRgtGL0LUg0YXRgNC40L/RiyDQstGB0LLRj9C30Lgg0YHQviDRgdGC0YDQvtC10L3QuNC10Lwg0LHRgNC+0L3RhdC+0LIg0YLQuNC/0LjRh9C90YvRhSDQsiDQtdCz0L4g0LLQvtC30YDQsNGB0YLQtS4g0JzQsNC70YvRiCAsINC10YnQtSDQvdC1INC/0L7Qu9C90L7RgdGC0YzRjiDQvNC+0LbQtdGCINC60L7QvdGC0YDQvtC70LjRgNC+0LLQsNGC0Ywg0LrQsNGI0LXQu9GMLiDQvNGLINCy0LjQtNC40Lwg0YLQviwg0YfRgtC+INC/0LDRhtC40LXQvdGCINC60LDRiNC70LXQtdGCINGBINC80L7QutGA0L7RgtC+0LkgLiDQvNGLINC30L3QsNC10Lwg0YEg0LDQvdCw0YLQvtC80LjQuCDRgtC+LCDRh9GC0L4g0L/RgNC+0YHQstC10YLRiyDQsdGA0L7QvdGF0L7QsiDQvdC1INCx0L7Qu9GM0YjQuNC1INC4INCyINGB0LLRj9C30Lgg0YEg0Y3RgtC40Lwg0LLQutC70Y7Rh9Cw0LXRgtGB0Y8g0LrQvtC80L/QtdC90YHQsNGC0L7RgNC90YvQuSDQvNC10YXQsNC90LjQt9C8INC4INC/0LDRhtC40LXQvdGCINC/0YvRgtCw0LXRgtGB0Y8g0LLRi9C60LvRj9GI0LXRgtGMINGC0L4sINGH0YLQviDQt9Cw0YHRgtGA0Y/Qu9C+INCyINC80LXQu9C60LjRhSDQsdGA0L7QvdGF0LjQvtC7LiDQndC+INCyIDgg0LzQtdGB0Y/RhtC10LIg0LXRidC1INC90LUg0YDQsNC30LLQuNGC0LAg0Y3RgtC+INGE0YPQvdC60YbQuNGPINC4INCyINGB0LLRj9C30Lgg0YEg0Y3RgtC40Lwg0L3QsNC60LDQv9C70LXQvdC40LUg0Y3RgtC40YUg0LzQvtC60YDQvtGCINC4INC90LUg0L/RgNC+0LTRg9C60YLQuNCy0L3QvtCz0L4g0LrQsNGI0LvRjyDQv9GA0LjQstC+0LTRj9GCINC6INGB0YPRhdC40Lwg0Lgg0YHRgNC10LTQvdC10L/Rg9C30YvRgNGH0LDRgtGL0Lwg0YXRgNC40L/QsNC8LiDQkiDQstC+0LfRgNCw0YHRgtC1IDgg0LzQtdGB0Y/RhtC10LIg0L7QtNGL0YjQutCwINGA0LDQt9Cy0LjQstCw0LXRgtGB0Y8g0LIg0YHQstGP0LfQuCDRgSDQutC+0LzQv9C10L3RgdCw0YLQvtGA0L3Ri9C8INC80LXRhdCw0L3QuNC30LzQvtC8ICDQuCDQsiDRgdCy0Y/Qt9C4INGBINC90LXRhdCy0LDRgtC60L7QuSDQutC40YHQu9C+0YDQvtC00LAuINC90LUg0LfQsNCx0YvQstCw0LXQvCAs0YfRgtC+INCyINGC0LDQutC+0Lwg0LzQsNC70L7QvCDQstC+0LfRgNCw0YHRgtC1INGH0YHRgSDQvtGC0LvQuNGH0LXRgtGB0Y8g0L7RgiDQstC30YDQvtGB0LvQvtCz0L4g0L/RgNC40LLRi9GH0L3QvtCz0L4g0L3QsNC8LiDRgyDQtNC10YLQtdC5INGN0YLQvtCz0L4g0LLQvtC30YDQsNGB0YLQsCDRh9GB0YEgMTIwLTE0MCDQsiDQvNC40L3Rg9GC0YMuINCwINCQ0JQg0L3QsNC+0LHRgNC+0YIg0L3QtSDRgNCw0LLQvdC+0LUg0YHQvtC/0YDQuNGC0LXQstC70LXQvdC40Y4g0YfRgdGBLiDQotC+0LHQuNGIIDEwMC82MC04MC4g0JIg0YHQstGP0LfQuCDRgSDRjdGC0LjQvCDQv9Cw0YbQuNC10L3RgiDQvdC1INC80L7QttC10YIg0YTQuNC30LjRh9C10YHQutC4INC60L7QvNC/0LXQvdGB0LjRgNC+0LLQsNGC0Ywg0L7QtNGL0YjQutGDICzQstC+0LfQvdC40LrQsNGO0YnRg9GOIC4g0JzRiyDQt9C90LDQtdC8LCDRh9GC0L4g0YLQvtC70YzQutC+INC/0YDQuCDRgNC+0LbQtNC10L3QuNC4INGDINC/0LDRhtC40LXQvdGC0LAg0LLQutC70Y7Rh9Cw0LXRgtGB0Y8g0LzQsNC70YvQuSDQutGA0YPQsyDQutGA0L7QstC+0L7QsdGA0LDRidC10L3QuNGPICzQvdC+INC+0L0g0L3QtSDRgdGC0LDQsdC40LvQtdC9LiDQotCw0LrQttC1ICzQuNC30YPRh9Cw0Y8g0LTQvtC/0L7Qu9C90LjRgtC10LvRjNC90YPRjiDQuNC90YTQvtGA0LzQsNGG0LjRjiDRjyDRg9C30L3QsNC70LAsINGH0YLQviDQsiDQtNC+INC60L7QvdGG0LAg0L/QtdGA0LLQsNCz0LAg0L/QtdGA0LjQvtC00LAg0YjQutC+0LvRjNC90L7Qs9C+INCy0L7Qt9GA0LDRgdGC0LAg0LzQsNC70YvQuSDQutGA0YPQsyDQutGA0L7QstC+0L7QsdGA0LDRidC10L3QuNGPINC90LUg0YHRgtCw0LHQuNC70LXQvSAg0Lgg0LzQvtC20LXRgiDQstGL0LfQstCw0YLRjCDQvdC1INGB0YLQsNCx0LjQu9GM0L3QvtC1INGB0L7QvNGB0YLQvtGP0L3QuNC1INGDINGA0LXQsdC10L3QutCwKCDRgtCw0YXQuNC60LDRgNC00LjRjyAsINGB0LXRgNC00LXRh9C90L7QuSDQvdC10LTQvtGB0YLQsNGC0L7Rh9C90L7RgdGC0Lgg0Lgg0LzQvdC+0LPQvtC1INC00YDRg9Cz0L7QtSksINC90L4g0LLRgdC1INGN0YLQviDQutC+0LzQv9C10L3RgdC40YDRg9C10YLRgdGPINCyINCy0L7Qt9GA0LDRgdGC0L7QvCAsINGC0L7QsdC40Ygg0L/RgNC+0YXQvtC00LjRgiAuINC60L7Qs9C00LAg0LDQvdCw0YLQvtC80L4t0YTQuNC30LjQvtC70L7Qs9C40YfQtdGB0LrQuNC1INGB0L/QvtGB0L7QsdC90L7RgdGC0Lgg0L/QsNGG0LjQtdC90YLQsCDQv9C+0LvQvdC+0YHRgtGM0Y4g0YHRhNC+0YDQvNC40YDQvtCy0LDQvdGLLiDQm9C+0LPQuNGH0L3QviDQsdGD0LTQtdGCINC/0YDQtdC00L/QvtC70L7QttC40YLRjCwg0YfRgtC+INCx0LXRgdC/0L7QutC+0LnRgdGC0LLQviDQstGL0LfRi9Cy0LDQtdGC0YHRjyDQsiDRgdCy0Y/Qt9C4INGBINGC0LXQvCwg0YfRgtC+INC10YjQtSDRgNC10LHQtdC90L7QuiDQvdC1INC+0YHQvtC30L3QsNC10YIg0LXQs9C+INGB0L7RgdGC0L7Rj9C90LjQtS4g0LrQsNC6INC80LjQvdC40LzRg9C8INC90LDQstGL0LrQuCDQv9GB0LjRhdC+0LvQvtCz0LjRh9C10YHQutC40LUtINC90LXQstGA0L7Qu9C+0LPQuNGH0LXRgdC60LjQtSDRhNC+0YDQvNC40YDRg9GO0YLRgdGPINC6IDIwINCz0LDQtNCw0LwuINCyINC10LPQviDQstC+0LfRgNCw0YHRgtC1INC00LDQttC1INC90LUg0LLRgdC1INGA0LXRhNC70LXQutGB0Ysg0L/QvtC70L7QttC40YLQtdC70YzQvdGL0LUuINCm0LjQsNC90L7QtyDQvdC+0YHQvtCz0YPQsdC90L7Qs9C+INGC0YDQtdGD0LPQvtC70LjQutCwICwg0LPQvtCy0L7RgNC40YIg0L3QsNC8INC+ICDRgtC+0LwsINGH0YLQviDRgyDQvdC10LPQviDQsiDRgdCy0Y/Qt9C4INGBINC+0LTRi9GI0LrQvtC5ICwg0L3QsCDRhNC+0L3QtSDRgdCy0LjRgdGC0Y/RidC40YUg0Lgg0YHRgNC10LTQvdC10L/Rg9C30YvRgNGH0LDRgtGL0YUg0LLQu9Cw0LbQvdGL0YUg0YXRgNC40L/QvtCyINC/0YDQvtGP0LLQu9GP0LXRgtGB0Y8g0YHQvdC40LbQtdC90LjQtSDRgdCw0YLRg9GA0LDRhtC40LguINGF0L7RgtC10LvQvtGB0Ywg0LHRiyDQtdGJ0LUg0LTQvtCx0LDQstC40YLRjCAsINGH0YLQviDQtNCw0L3QvdGL0LUg0YHQuNC80YLQvtC80Ysg0L/QvtC60LDQt9Cw0YLQtdC70Lgg0L3QsNC70LjRh9C40Y8g0YHQu9C40LfQuCDQuCDQttC40LTQutC+0YHRgtGP0YUg0LIg0LTRi9GF0LDRgtC10LvRjNC90YvRhSDQv9GD0YLRj9GFICwg0YLQtdC8INGB0LDQvNGL0Lwg0L/RgNC+0Y/QstC70Y/RjtGC0YHRjyDQsdGD0LvRjNC60LDRjtGJ0LjQtSDQt9Cy0YPQutC4INC40LvQuCDQtdCz0L4g0L/QvtGC0YDQtdGB0LrQsNGO0YnQtdCz0L4g0LfQstGD0LrQsC4g0Lgg0Y3RgtC+INCy0YHQtSDQutCw0Log0LLRgdC10LPQtNCwINC/0YDQuNC30L3QsNC6INCy0L7RgdC/0LDQu9C10L3QuNGPLiDQstGL0LLQvtC0LCDRjdGC0L4g0LvQuNCx0L4g0LHRgNC+0L3RhdC40LDQu9GM0L3QsNGPINCw0YHRgtC80LAsINC70LjQsdC+INCx0YDQvtC90YXQvtC70LjRgi4gLiDQutC+0LPQtNCwINC/0YDQvtC40YHRhdC+0LTQuNGCINGB0YPQttC10L3QuNC1INC00YvRhdCw0YLQtdC70YzQvdGL0YUg0L/Rg9GC0LXQuSDQuCDQstC+0LfQtNGD0YUg0YHRgtCw0L3QvtCy0LjRgtGB0Y8g0YLRg9GA0LHRg9C70LXQvdGC0L3Ri9C8LCDRh9GC0L4g0L/RgNC+0LjRhdGB0L7QtNC40YIg0LLRi9GB0L7QutC+0YfQsNGB0YLQvtGC0L3QvtC80YMg0YHQstC40YHRgtGP0YnQtdC80YMg0LfQstGD0LrRgy4gPGJyIC8+DQoxLiDQndCw0YfQvdC10Lwg0YEg0LzQvtC10LPQviDRgdCw0LzQvtCz0L4g0LvRjtCx0LjQvNC+0LPQviwg0L/QtdGA0LjQvtC00L7QvCDQutC+0LPQtNCwINGA0LXQsdC10L3QvtC6INC10YnQtSDQvdCw0YXQvtC00LjRgtGB0Y8g0LLQviDQstC90YPRgtGA0LjRg9GC0YDQvtCx0L3Qvi4g0JLRgdC1ICzRh9GC0L4g0LXRgdGCINC80LDQvNCw0YfQutCwLCDQv9C10YDQtdC20LjQstCw0LXRgiDRjdGC0L4g0LLRgdC1INC/0LXRgNC10LTQsNC10YLRgdGPINC6INC00LXRgtGP0LwuINGPINCy0LDQvCDQsdC+0LvQtdC1INGB0LrQsNC20YMsINCx0YvQstCw0LXRgiDRgtCw0LosINGH0YLQviDQutCw0LfQsNC70L7RgdGMINCx0Ysg0YDQtdCx0LXQvdC+0Log0LXRidC1INC80LDQu9C10L3RjNC60Lgg0LksINGC0LDQvCAzICwgNCAg0LzQtdGB0Y/RhtCwLCDQvdC+INGD0LbQtSDQuNC80LXQtdGCINCx0L7Qu9C10LfQvdC10L3QvdGL0LUg0YHQvtGB0LrQuCDQuNC70Lgg0L/RgNC+0LHQu9C10LzRiyDRgSDRg9GA0L7QstC90LXQvCDQs9C+0YDQvNC+0L3QvtCyICzQsCDQtNC10LvQviDQsiDRgtC+0LwsINGH0YLQviDRh9C10YDQtdC3INCx0L7Qu9GM0YjQvtC5INC60YDRg9CzINC60YDQvtCy0L7QvtCx0YDQsNGJ0LXQvdC40Y8gLNGH0LXRgNC10Lcg0L/Qu9Cw0YbQtdC90YLRgyDQvNC+0LbQtdGCINC/0LXRgNC10LTQsNGC0YzRgdGPINGN0YHRgtGA0L7Qs9C10L3Riy4g0LIg0LzQsNC70L7QvCAs0L3QviDQtdCz0L4g0LrQvtC70LjRh9C10YHRgtCy0LUuINCQINGC0LDQutC20LUgLCDQtdGB0YLRjCDRgtC10L7RgNC40Y8g0L4g0YLQvtC8ICwg0YfRgtC+INC10YHQu9C4INC80LDQvNCwINC/0LjRgtCw0LXRgtGB0Y8g0L7RgdGC0YDQvtC5INC10LTQvtC5INC4INGC0LDQutC20LUg0YHRgtGA0LXRgdGB0YPQtdGCINC+0YfQtdC90Ywg0YfQsNGB0YLQviAsINGC0L4g0YDQtdCx0LXQvdC+0Log0LzQvtC20LXRgiDRgNC+0LTQuNGC0YzRgdGPINC00L7QstC+0LvRjNC90L4g0LLQvtC70L7RgdCw0YLRi9C8LiDQuiDQutC+0L3RhtGDINC/0LXRgNCy0L7Qs9C+INGC0YDQuNC80LXRgdGC0LAg0LHQtdGA0LXQvNC10L3QvdC+0YHRgtC4INGD0LfQvdCw0Y7RgiDQv9C+0Lsg0LzQsNC70YvRiNCwLiDQt9Cw0LrQu9Cw0LTQutCwINCy0YLQvtGA0LjRh9C90YvRhSDQv9C+0LvQvtCy0YvRhSDQv9GA0LjQt9C90LDQutC+0LIg0LfQsNGF0L7QtNC40YIg0L3QsCA2LTcg0L3QtdC00LXQu9C4INCx0LXRgNC10LzQtdC90L3QvtGB0YLQuC7QotCw0LrQttC1ICwg0Y8g0YXQvtGC0LXQu9CwINCx0Ysg0YPQutCw0LfQsNGC0Ywg0L3QsCDRgtC+LCDRh9GC0L4g0LrQvtCz0LTQsCDQvNCw0LzQsCDQvdCwINCT0JIoINCz0YDRg9C00L3QvtC8INCy0YHQutCw0YDQvNC70LjQstCw0L3QuNC4KSAsINGC0L4g0YEg0LzQvtC70L7QutC+0Lwg0L/QtdGA0LXQtNCw0Y7RgtGB0Y8g0L3QtSDRgtC+0LvRjNC60L4g0LzQuNC60YDQvtGN0LvQtdC80LXQvdGC0YssINC90L4g0Lgg0LPQvtGA0LzQvtC90Ysg0L3QtdC+0LHRhdC+0LTQuNC80YvQtSDQtNC70Y8g0YTQvtGA0LzQuNGA0L7QstCw0L3QuNGPINC/0L7Qu9C90L7RhtC10L3QvdC+0LPQviDRh9C70LXQvdCwINC+0LHRidC10YHRgtCy0LAuINCi0YPRgiDRjyDRhdC+0YfRgyDRgdC00LXQu9Cw0YLRjCDRgNC10LzQtdC50LouINCT0JItINGN0YLQviDRjdGC0LDQu9C+0L0g0YTQvtGA0LzQuNGA0L7QstCw0L3QuNGPINC30LTQvtGA0L7QstC+0LPQviDQvtCx0YnQtdGB0YLQstCwLCDQvdGDINC60L7QvdGH0L3QviDQtdGB0LvQuCDRgyDQvNCw0LzRiyDQuNC70Lgg0YDQtdCx0LXQvdC60LAg0L3QtdGCINCw0LHRgdC+0LvRjtGC0L3Ri9GFINC/0YDQvtGC0LjQstC+0L/QvtC60LDQt9Cw0L3QuNC5LtCd0LDRh9C90LXQvCDRgSDQvNCw0LvRjNGH0LjQutC+0LIuINCjINC90LjRhSDQvdCw0YfQuNC90LDQtdGC0YHRjyAxINGB0YLQsNC00LjRjyAuINC60L7Qs9C00LAg0LXRidC1INCy0YHQtSDQvtGC0YHRg9GC0YHRgtCy0YPQtdGCIC4g0L3QuCDRj9C40YfQvdC40LrQvtCyLCDQvdC4INGH0LvQtdC90LAg0L3QuNGH0LXQs9C+LCDQv9C+0LvQvtCy0L7Qs9C+INC+0LLQvtC70L7RgdC10L3QtdC90LjRjy0uINC00LDQu9C10LUgMiDRgdGC0LDQtNC40Y8sINC/0YDQuCDQutC+0YLQvtGA0L7QvCDQv9GA0L7QuNGB0YXQvtC00LjRgiDRg9Cy0LXQu9C40YfQtdC90LXQvdC40LUg0Y/QuNGH0LXQuiDQuCDQvNC+0YjQvtC90LrQuC4g0L/RgNC+0LjRgdGF0L7QtNC40YIg0YXQvtGC0Ywg0Lgg0YDQtdC00LrQuNGFICwg0L3QviDRgNC+0YHRgiDQtNC70LjQvdC90YvRhSDQstC+0LvQvtGBLCDRgdC70LDQsdC+0L/QuNCz0LzQtdC90YLQuNGA0L7QstCw0L3QvdGL0YUuINCe0L3QuCDQtNC70LjQvdC90YvQtSwg0YDQtdC00LrQviDQstGM0Y7RgtGB0Y8g0LIg0L7RgdC90L7QstC90L7QvCDQsiDQvtCx0LvQsNGB0YLQuCDQv9C+0LvQvtCy0L7Qs9C+INC+0YDQs9Cw0L3QsC4g0LTQsNC70LXQtSAzINGB0YLQsNC00LjRjyAuINCf0YDQvtC40YHRhdC+0LTQuNGCINC00LDQu9GM0L3QtdC50YjQtdC1INGD0LLQtdC70LjRh9C10L3QuNC1INGP0LjRh9C10Log0Lgg0LzQvtGI0L7QvdC60LggINC4INGD0LLQtdC70LjRh9C10L3QuNC1INGB0LDQvNC+0LPQviDQv9C+0LvQvtCy0L7Qs9C+INC+0YDQs9Cw0L3QsC4g0JXRgdGC0Ywg0L3QtdC60LDRjyDRgtC10L7RgNC40Y8gLCDRh9GC0L4g0LLQvtC+0LHRidC1INC/0L7Qu9C+0LLQvtC5INC+0YDQs9Cw0L0gLCDRgtC+0LHQuNGIINGH0LvQtdC9INGA0LDRgdGC0LXRgiDQtNC+IDI1INC70LXRgiwg0LAg0L/QvtC70YHQtSA1MCDRg9C60LDRgNCw0YfQuNCy0LDQtdGC0YHRjy4g0L3QviDQstC10YDQvdC10LzRgdGPINC6INC00LXQu9GDLiDRg9C20LUg0LogNSDQu9C10YIg0L7QvSDQv9C+0L3QuNC80LDQtdGCICwg0YfRgtC+INC80LDQu9GM0YfQuNC6INC4INC/0L7Qu9GB0LUg0Y3RgtC+0LPQviDRhNC+0YDRhNC40YDRg9C10YLRgdGPINCz0LXQvdC00LXRgNC90L7QtSDQv9C+0L3Rj9GC0LjQtS4g0KLQsNC60LbQtSwg0YfRgtC+INC90LUg0LzQsNC70L4g0LLQsNC20L3QviDRgyDQvNCw0LvRjNGH0LjQutC+0LIg0Y3RgtC+INC/0YDQvtC40YHRhdC+0LTQuNGCINCy0YHQtSDQvNC10LTQu9C10L3QvdC10Lkg0YfQtdC8INGDINC00LXQstC+0YfQtdC6LiDQvdC+INGDINC80LDQu9GM0YfQuNC60L7QsiDRhNC+0YDQvNC40YDQvtCy0LDQvdC40LUg0L/RgNC+0LjRhdC+0LTRj9GCINGP0YDQutC40LzQuC4g0JTQsNC70LXQtSA0INGB0YLQsNC00LjRjy4g0LfQtNC10YHRgtGMINGB0YLQvtC40YIg0YHQutCw0LfQsNGC0YwsINGH0YLQviDRhNC+0YDQvNC40YDRg9C10YLRgdGPINCy0YLQvtGA0LjRh9C90YvQtSDQv9C+0LvQvtCy0YvQtSDQv9GA0LjQt9C90LDQutC4IC4g0Y3RgtC+INGA0L7RgdGCLCDQs9C+0LvQvtGBINC80LXQvdGP0LXRgtGB0Y8g0L7QvSDQvdC40LfQutC40LkgLiDQs9C+0LvQvtGBICIg0LvQvtC80LDQtdGC0YHRjyAiINGBIDE0INC/0L4gMTUsNSDQu9C10YIg0LXQu9GB0Lgg0LzQvdC10Log0L3QtSDQuNC30LzQtdC90Y/QtdGCINC/0LDQvNGP0YLRjC4g0JrQvtC20LAg0LzQvtGI0L7QvdC60Lgg0L3QsNGH0LjQvdCw0LXRgiDRgtC10LzQvdC10YLRjCAgLiDQv9GA0L7QuNGB0YXQvtC00LjRgiDQv9C+0LvQvtCy0L7QtSDQvtCy0L7Qu9C+0YHQtdC90LXQvdC40LUg0L/QviDQvNGD0LbRgdC60L7QvNGDINGC0LjQv9GDLiAsINC90L4g0L3QtSDRgNCw0YHQv9GA0L7RgdGC0YDQsNC90LXQvdGLINC/0L4g0LLQvdGD0YLRgNC10L3QvdC10Lkg0YfQsNGB0YLQuCDQsdC10LTQtdGALiDQkCDRgtC10L/QtdGA0Ywg0L/RgNC40YHRgtGD0L/QuNC8INC6INC/0YDQtdC60YDQsNGB0L3QvtC80YMg0LbQtdC90YHQutC+0LzRgyDQv9C+0LvRgy4gMSDRgdGC0LTQuNGPLiDQv9GA0L7QuNGB0YXQvtC00LjRgiDRgNCw0LfQstC40YLQuNC1INC80L7Qu9C+0YfQvdGL0YUg0LbQtdC70LXQtyDQtNC+INGB0YLQsNC00LjQuCAoINCx0YPRgtC+0L3QsCkgLCDQvdCw0YfQsNC70L4g0L7QstC+0LvQvtGB0LXQvdC10L3QuNC1INGA0L7RgdGCINGA0LXQtNC60LjRhSAsINC00LvQuNC90L3Ri9GFICwg0YHQu9Cw0LHQvtC/0LjQs9C80LXQvdGC0LjRgNC+0LLQsNC90L3Ri9GFICDQstGL0YDQsNC20LXQvdC40LkuINC4INGA0LDRgdC/0L7Qu9C+0LPQsNGO0YLRgdGPINCy0LTQvtC70Ywg0L/QvtC70L7QstGL0YUg0LPRg9CxLiAyINGB0YLQsNC00LjRjy4g0KLRg9GCINC/0YDQvtC40YXQvtC00LjRgtGD0LLQtdC70LjRh9C10L3QuNC1INGA0L7RgdGC0LAg0Y/QuNGH0L3QuNC60L7Qsiwg0LzQvtC70L7Rh9C90YvRhSDQttC10LvQtdC3IC4g0JLQvtC70L7RgdGLINGC0LXQvNC90LXRjtGCICwg0YHRgtCw0L3QvtCy0Y/RgtGB0Y8g0LHQvtC70LXQtSDQs9GA0YPQsdGL0LzQuCDQtdGB0LvQuCDRgtCw0Log0LzQvtC20L3QviDRgdC60LDQt9Cw0YLRjC4gLCDRgNCw0YHQv9GA0L7RgdGC0YDQsNC90Y/RjtGC0YHRjyDQvdCwINC70L7QsdC+0LogLiDQsCDQtdGJ0LUsINCy0L7Qt9C90LjQutCw0LUg0L7QstC+0LvQvtGB0LXQvdC10L3QtdC40LUg0LIg0L7QsdC70LDRgdGC0Lgg0L/QvtC00LzRi9GI0LXQui4gMy00INGB0YLQsNC00LjRjy4g0JLRi9GB0YLRg9C/0LvQtdC90LjQtSDQsNCy0YDQtdC+0Lsg0Lgg0YHQvtGB0LrQvtCyICAuINC/0L7Qu9C90L7QtSDRhNC+0YDQvNC40YDQvtCy0LDQvdC40LUg0LzQvtC70L7Rh9C90YvRhSDQttC10LvQtdC3INC4INC/0L7Qu9C+0LLRi9GFINC+0YDQs9Cw0L3QvtCyLCDQn9GA0L7QuNGB0YXQvtC00LjRgiDQvtCy0L7Qu9C+0YHQtdC90LXQvdC40LUg0L/QviDQttC10L3RgdC60L7QvNGDINGC0LjQv9GDLiDQn9C+0Y/QstC70LXQvdC40LUg0YPQs9GA0LXQuS4g0JAg0LXRidC1ICwg0LzQvtC90LDRgNGF0LUg0YLQsNC6INC90LDQt9GL0LLQsNC10LzRi9C1LiDQndGDINC4INGE0LjQvdC40YggNSDRgdGC0LDQtNC40Y8uINC80L7Qu9C+0YfQvdGL0LUg0LbQtdC70LXQt9GLINGB0L7QvtGC0LLQtdGC0YHRgtCy0YPRjtGCINGC0LrQsNC90LXQstGL0Lwg0L/RgNC10LTRgNCw0YHQv9C+0LvQvtC20LXQvdC40LXQvCDQttC10L3RidC40L3Riywg0LLRi9GA0LDQsdC+0YLQutC4INC80LXQvdGB0YLRgNGD0LDQu9GM0L3QvtCz0L4g0YHRgtCw0LHQuNC70YzQvdC+0LPQviDRhtC40LrQu9CwLiDQvtCy0L7Qu9C+0YHQtdC90LXQvdC40LUg0YDQsNGB0L/RgNC+0YHRgtGA0LDQvdC10L3RiyDQvdCwINCy0YHRjiDQstC90YPRgtGA0LXQvdC90Y7RjiDRh9Cw0YHRgtGMINCx0LXQtNGA0LAuICDQpNC+0YDQvNC40YDQvtCy0LDQvdC40LUg0L/RgNC40Y/RgtC90L7Qs9C+INCz0L7Qu9C+0YHQsC4g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12" table:style-name="ce1">
            <text:p>1067012</text:p>
          </table:table-cell>
          <table:table-cell office:value-type="string" table:style-name="ce1">
            <text:p>russian</text:p>
          </table:table-cell>
          <table:table-cell office:value-type="string" table:style-name="ce1">
            <text:p>Билет 9&amp;lt;br /&amp;gt; 1.Стадии полового созревания у детей по Таннеру.&amp;lt;br /&amp;gt; 2.Ребенку 8 месяцев. Жалобы на одышку, кашель, беспокойство. Объективно: состояние средней тяжести за счет бронхообструкции. Ребенок беспокоен. Кожные покровы чистые, цианоз носогубного треугольника. Кашель частый, с обилием мокроты, непродуктивный. В легких коробочный оттенок. Аускультативно жесткое дыхание, по всем полям выслушиваются сухие свистящие и ср/ пузырчатые влажные хрипы. Выдох удлинен. Почему выслушиваются сухие и ср/ пузырчатые хрипы? &amp;lt;br /&amp;gt;</text:p>
          </table:table-cell>
          <table:table-cell office:value-type="string" table:style-name="ce1">
            <text:p>MSDQstC+0L/RgNC+0YE6INGDINC00LXRgtC10Lkg0LXRgdGC0Ywg0L/QtdGA0LjQvtC00Ysg0LbQuNC30L3QuCwg0LrQvtGC0L7RgNGL0LUg0LTQtdC70Y/RgtGB0Y8g0L3QsCDQv9C10YDQstGL0LksINC60L7RgtC+0YDRi9C5INC90LDRh9C40L3QsNC10YLRgdGPINGBINGA0L7QttC00LXQvdC40Y8g0LTQviAxINCz0L4g0LPQvtC00LAuINCX0LDRgtC10Lwg0L/RgNC10LTQtNC+0YjQutC+0LvRjNC90YvQuSwg0L7RgiAxINCz0L7QtNCwINC00L4gMyDQu9C10YIuINCU0L7RiNC60L7Qu9GM0L3Ri9C5INGBIDMg0LTQviA3INC70LXRgi4g0J3QsNGH0YfQsNC70YzQvdGL0Lkg0YjQutC+0LvRjNC90YvQuSDRgSA3INC00L4gMTEg0Lgg0L/QvtC30LTQvdC10YjQutC+0LvRjNC90YvQuSDRgSAxMSDQtNC+IDE4LiDQmNC80LXQvdC90L4g0LIg0YDQsNC90L3QtdC8INC4INC/0L7Qt9C00L3QtdC8INGI0LrQvtC70YzQvdC+0Lwg0L/QtdGA0LjQvtC00LUg0L3QsNGH0LjQvdCw0LXRgtGB0Y8g0L/QvtC70L7QstCw0Y8g0LTQuNGE0YTQtdGA0LXQvdGG0LjRgNC+0LLQutCwINC00LXRgtC10LkuINCf0L7Qu9C+0LLQvtC1INGB0L7Qt9GA0LXQstCw0L3QuNC1INC60L7QvdGC0YDQvtC70LjRgNGD0Y7RgiDRjdC/0LjRhNC40Lcg0Lgg0LPQuNC/0L7RgtCw0LvQsNC80YPRgSAsINCz0LjQv9C+0YTQuNC3INC4INCz0L7QvdCw0LTRiy4g0K3Qv9C40YTQuNC3INGC0L7RgNC80L7Qt9C40YIg0LTQviAxMC0xMiDQu9C10YIg0L/QvtC70L7QstC+0LUg0YDQsNC30LLQuNGC0LjQtSDRgyDQtNC10LLQvtGH0LXQuiDQuCDQvtGCIDEyINC00L4gMTQg0LvQtdGCINGDINC80LDQu9GM0YfQuNC60L7Qsi4g0KHQvtCx0Y7RgdGC0LLQtdC90L3QviDQotCw0L3QvdC10YAg0YDQsNC30LTQtdC70LjQuyDRgdGC0LDQtNC40Lgg0L/QvtC70L7QstC+0LPQviDRgNCw0LfQstC40YLQuNGPINC90LAgNSDRiNGC0YPQui4gMdGB0YLQsNC00LjRjyDRhdCw0YDQsNC60YLQtdGA0LjQt9GD0LXRgtGB0Y8g0L/QvtC70L7QstGL0LzQuCDQvtGA0LPQsNC90LDQvNC4LCDQutC+0YLQvtGA0YvQtSDRhdCw0YDQsNC60YLQtdGA0L3RiyDQtNC+INC/0YPQsdC10YDRgtCw0YLQvdC+0LPQviDQv9C10YDQuNC+0LTQsC4g0KLQsNC60LbQtSDQvtGC0YHRg9GC0YHQstC40LUg0YDQvtGB0YLQsCDQvNC+0LvQvtGH0L3Ri9GFINC20LXQu9GR0Lcg0YMg0LTQtdCy0L7Rh9C10LosINGDINC90LjRhSDQvtC90Lgg0YLQsNC60LjQtSDQttC1LCDQutCw0Log0Lgg0YPQtNC10YLQtdC5LiDQodC+INCy0YLQvtGA0L7QuSDRgdGC0LDQtNC40Lgg0L3QsNGH0LjQvdCw0LXRgtGB0Y8g0YDQsNC30LLQuNGC0LjQtSDQvNC+0LvQvtGH0L3Ri9GFINC20LXQu9GR0Lcg0YMg0LTQtdCy0L7Rh9C10Los0L7RgNC10L7Qu9GLINC90LDRh9C40L3QsNGO0YIg0YHQu9Cw0LHRg9GOINC/0LjQs9C80LXQvdGC0LDRhtC40Y4uINCjINC80LDQu9GM0YfQuNC60L7QsiDQsiDRjdGC0L7RgiDQv9C10YDQuNC+0LQg0L3QtdC80L3QvtCz0L4g0YPQstC10LvQuNGH0LjQstCw0Y7RgtGB0Y8g0L/QvtC70L7QstGL0LUg0L7RgNCz0LDQvdGLINC4INCz0L7QvdCw0LTRiywg0L/QvtGP0LLQu9GP0Y7RgtGB0Y8g0LLQtdC70YPRgdGB0LrQvtCy0YvQtSDQstC+0LvQvtGB0Ysg0L3QsCDQu9C+0LHQutC1LiDQoyDQtNC10LLQvtGH0LXQuiDQstC10LvRg9GB0YHQutC+0LLRi9C1INCy0L7Qu9C+0YHRiyDQvdCw0YfQuNC90LDRjtGCINGA0LDRgdGC0Lgg0YEg0LHQvtC70YzRiNC40YUg0L/QvtC70L7QstGL0YUg0LPRg9CxLCDQstC+0LfQvNC+0LbQvdC+INC90LDRgdGC0YPQv9C70LXQvdC40Y8g0LzQtdC90YHRgtGA0YPQsNGG0LjQuS4g0J3QsCDRgtGA0LXRgtGM0LXQuSDRgdGC0LDQtNC40Lgg0YMg0LzQsNC70YzRh9C40LrQvtCyINC30LDQvNC10YLQvdC+INGD0LLQtdC70LjRh9C40LLQsNC10YLRgdGPINC00LvQuNC90LAg0L/QtdC90LjRgdCwLCDQstC+0LvQvtGB0Ysg0LzQvtCz0YPRgiDQv9C10YDQtdC50YLQuCDRgSDQu9C+0LHQutCwINC90LAg0LzQvtGI0L7QvdC60YMuINCjINC00LXQstC+0YfQtdC6INCy0L7Qu9C+0YHRiyDRgSDQv9C+0LvQvtCy0YvRhSDQs9GD0LEg0L/QtdGA0LXRhdC+0LTRj9GCINC90LAg0LvQvtCx0L7Quiwg0L7QsdGL0YfQvdC+INCyINGN0YLQvtC5INGB0YLQsNC00LjQuCDQv9C+0YfRgtC4INGDINCy0YHQtdGFINC00LXQstC+0YfQtdC6INC90LDRh9C40L3QsNGO0YLRgdGPINC80LXQvdGB0YLRgNGD0LDRhtC40LgsINC80L7Qu9C+0YfQvdGL0LUg0LbQtdC70LXQt9GLINC/0YDQvtC00L7Qu9C20LDRjtGCINGB0LLQvtC5INGA0L7RgdGCLiDQndCwIDQg0YHRgtCw0LTQuNC4INGDINC80LDQu9GM0YfQuNC60L7QsiDQuCDRgyDQtNC10LLQvtGH0LXQuiDQsdC+0LvRjNGI0LjQvdGB0YLQstC+INCy0L7Qu9C+0YEg0L/RgNC10YXQvtC00Y/RgiDRgSDQstC10LvRg9GB0YHQutC+0LLRi9GFINCyINGC0LXRgNC80LjQvdCw0LvRjNC90YvQtS4g0JLQvtC70L7RgdGLINGDINC80LDQu9GM0YfQuNC60L7QsiDRgNCw0YHQv9GA0L7RgdGC0YDQsNC90Y/RjtGC0YHRjyDQv9C+INC80YPQttGB0LrQvtC80YMg0YLQuNC/0YMsINGC0L4g0LXRgdGC0Ywg0L3QsCDQsdC10LTRgNCwINC4INCy0LLQtdGA0YUg0Log0LbQuNCy0L7RgtGDLCDQv9C10L3QuNGBINGD0LLQtdC70LjRh9C40LLQsNC10YLRgdGPINCyINC00LjQsNC80LXRgtGA0LUg0Lgg0L3QtdC80L3QvtCz0L4g0YLQtdGA0Y/QtdGCINCyINC00LvQuNC90LUuINCjINC00LXQstC+0YfQtdC6INGC0L7QttC1INC30LDQutCw0L3Rh9C40LLQsNC10YLRgdGPINC+0LLQvtC70L7RgdC10L3QuNC1LCDQvdC+INC+0L3QviDQtdGJ0ZEg0L3QtSDQsdC70LjQt9C60L4g0Log0YHQvtGB0YLQvtGP0L3QuNGOINCy0LfRgNC+0YHQu9C+0LPQvi4g0JzQvtC70L7Rh9C90YvQtSDQttC10LvQtdC30Ysg0L/RgNC+0LTQvtC70LbQsNGO0YIg0YDQsNGB0YLQuCzQsNGA0LXQvtC70Ysg0YHQvtGB0LrQvtCyINC80LDQutGB0LjQvNCw0LvRjNC90L4g0L/QuNCz0LzQtdC90YLRgNC40YDQvtCy0LDQvdGLLiA1INGB0YLQsNC00LjRjy3RgdC+0YHRgtC+0Y/QvdC40LUg0L/QvtC70L7QstC+0LPQviDRgNCw0LfQstC40YLQuNGPINCy0LfRgNC+0YHQu9C+0LPQviDRh9C10LvQvtCy0LXQutCwLiDQntCy0L7Qu9C+0YHQtdC90LXQvdC40LUg0LzQsNC60YHQuNC80LDQu9GM0L3QvtC1LCDQs9C+0L3QsNC00Ysg0YMg0LzQsNC70YzRh9C40LrQvtCyINCyINGN0YLQvtC8INCy0L7Qt9GA0LDRgdGC0LUg0L/QviDRgNCw0LfQvNC10YDRgyDQutCw0Log0Lgg0YMg0LLQt9GA0L7RgdC70L7Qs9C+LDUtNiDRgdC8LiDQoyDQtNC10LLQvtGH0LXQuiDQvdCwINGN0YLQvtC5INGB0YLQsNC00LjQuCDQs9GA0YPQtNC90YvQtSDQttC10LvQtdC30Ysg0LTQvtGB0YLQuNCz0LDRjtGCINC80LDQutGB0LjQvNCw0LvRjNC90L7Qs9C+INGA0LDQt9C80LXRgNCwLCDQutC+0LbQsCDQsNGA0LXQvtC7INGB0LvQuNCy0LDQtdGC0YHRjyDRgSDQvtC60YDRg9C20LDRjtGJ0LXQuSDQutC+0LbQtdC5LCDQvtCy0L7Qu9C+0YHQtdC90LXQvdC40LUg0YLQvtC20LUg0YHRgtCw0L3QvtCy0LjRgtGB0Y8g0LzQsNC60YHQuNC80LDQu9GM0L3Ri9C8LNC90LDRgNGD0LbQvdGL0LUg0L/QvtC70L7QstGL0LUg0L7RgNCz0LDQvdGLINC00LXQstC+0YfQtdC6INGB0L7QvtGC0LLQtdGC0YHQstGD0Y7RgiDRgNCw0LfQvNC10YDQsNC8INC/0L7Qu9C+0LLRi9GFINC+0YDQs9Cw0L3QvtC8INCy0LfRgNC+0YHQu9C+0Lkg0LbQtdC90YnQuNC90YsuINCS0YHQtSDQuNC30LzQtdC90LXQvdC40Y8g0L/RgNC+0LjRgdGF0L7QtNGP0YIg0L/QvtC0INC00LXQudGB0YLQstC40LXQvCDQv9C+0LvQvtCy0YvRhSDQs9C+0YDQvNC+0L3QvtCyLiDQoyDQvNCw0LvRjNGH0LjQutC+0LIg0Y3RgtC+INCw0L3QtNGA0L7Qs9C10L3Riywg0YLQtdGB0YLQvtGB0YLQtdGA0L7QvSzQtNC40LPQuNC00YDQvtGC0LXRgdGC0L7RgdGC0LXRgNC+0L0sINCw0L3QtNGA0L7RgdGC0LXQvdC00LjQvtC7LNC00LXQs9C40LTRgNC+0LDQvdC00YDQvtGB0YLQtdC90LTQuNC+0LsuINCjINC00LXQstC+0YfQtdC6INGN0YHRgtGA0L7Qs9C10L3Riywg0Y3RgdGC0YDQsNC00LjQvtC7LNGN0YHRgtGA0L7QvSzRjdGB0YLRgNC40L7Quy4g0K3RgtC4INCz0L7RgNC80L7QvdGLINC00LXQudGB0YLQstGD0Y7RgiDQvdCwINC/0L7Qu9C+0LLRi9C1INC+0YDQs9Cw0L3Riywg0YfRgtC+INC4INGB0L/QvtGB0L7QsdGB0YLQstGD0LXRgiDQuNGFINGA0LDQt9Cy0LjRgtC40Y4uINCd0L4g0LrQu9C10YLQutC4INC80LjRiNC10L3QuCDQvdC1INGC0L7Qu9GM0LrQviDQv9C+0LvQvtCy0YvQtSDQvtGA0LPQsNC90YssINC90L4g0Lgg0L/RgNC40LTQsNGC0LrQuCDQutC+0LbQuCwg0LrQvtGB0YLQuCwg0LzRi9GI0YbRiywg0Lgg0YHQsNC80L7QtSDQs9C70LDQstC90L7QtSDQvNC+0LfQsy4g0J/QvtGN0YLQvtC80YMg0YEg0L/QvtC70L7QstGL0Lwg0YHQvtC30YDQtdCy0LDQvdC40LXQvCDQvNC10L3Rj9GO0YLRgdGPINC90LUg0YLQvtC70YzQutC+INC/0L7Qu9C+0LLRi9C1INC+0YDQs9Cw0L3Riywg0L3QviDQuCDQstGB0ZEg0YLQtdC70L4sINCwINCz0LvQsNCy0L3QvtC1INGB0L7Qt9C90LDQvdC40LUuIDIg0LLQvtC/0YDQvtGBOiDRgyDRgNC10LHRkdC90LrQsCDRgNCw0LfQstC40LvQsNGB0Ywg0LHRgNC+0L3RhdC+0L7QsdGB0YLRgNGD0LrRhtC40Y8uINCi0LDQuiDQutCw0Log0LTQtdGC0Lgg0LzQtdC90YzRiNC1INC/0L7QtNCy0LXRgNC20LXQvdGLINCy0LvQuNGP0L3QuNGOINCy0YDQtdC00L3Ri9GFINC/0YDQuNCy0YvRh9C10Log0LLQt9GA0L7RgdC70YvRhSwg0YLQviDQtdGB0YLRjCDQutGD0YDQtdC90LjRjiwg0YLQviDQvtGB0L3QvtCy0L3QvtC5INC/0YDQuNGH0LjQvdC+0Lkg0LHRgNC+0L3RhdC+0L7QsdGB0YLRgNGD0LrRhtC40Lgg0LHRg9C00LXRgjrQsNGB0YLQvNCwLCDQsdGA0L7QvdGF0LjRgtGLLCDQv9C+0L/QsNC00LDQvdC40LUg0LjQvdC+0YDQvtC00L3Ri9GFINGC0LXQuyDQuCDRgdC60L7Qv9C70LXQvdC40Y8g0LzQvtC60YDQvtGC0YsuINCd0LAg0LHRgNC+0L3RhdC+0L7QsdGB0YLRg9GA0LrRhtC40Y4g0YPQutCw0LfRi9Cy0LDQtdGCINGD0LTQu9C40L3RkdC90L3Ri9C5INCy0YvQtNC+0YUsINGC0L4g0LXRgdGC0Ywg0Y3QutGB0L/QuNGA0LDRgtC+0YDQvdCw0Y8g0L7RgtC00YvRiNC60LAuINCn0YLQviDQutCw0YHQsNC10LzQviDRhdGA0LjQv9C+0LIsINGC0L4g0YHRg9GF0LjQtSDRhdGA0LjQv9GLINC80L7QttC90L4g0L7QsdGK0Y/RgdC90LjRgtGMINC60LDQuiDRgNCw0Lcg0YLQsNC60Lgg0LHRgNC+0L3RhdC+0L7QsdGB0YLRgNGD0LrRhtC40LXQuS4g0J/QvtGC0L7QuiDQstC+0LfQtNGD0YXQsCDQsiDQvtCx0YHRgtGA0YPQutGC0LjRgNC+0LLQsNC90L3QvtC8INCx0YDQvtC90YXQtSDQuNC80LXQvdGR0L3QvdGL0LkuINCf0YDQvtGB0LLQtdGC0Ysg0LHRgNC+0L3RhdC+0LIg0YHRg9C20LXQvdGLINC40LvQuCDQuNC30LzQtdC90LXQvdGLLCDQv9C+0Y3RgtC+0LzRgyDQstC+0LfQtNGD0YUg0L/RgNC40L7QsdGA0LXRgtCw0LXRgiDQsdC+0LvQtdC1INGC0YPRgNCx0YPQu9C10L3RgtC90YvQuSDRhdCw0YDQsNC60YLQtdGALiDQrdGC0Lgg0YPRgdC40LvQtdC90L3Ri9C1INCy0LjQsdGA0LDRhtC40Lgg0L/QtdGA0LXQtNCw0Y7RgtGB0Y8g0L3QsCDRgdGC0LXQvdC60YMg0LPRgNGD0LTQvdC+0Lkg0LrQu9C10YLQutC4INC4INC80Ysg0YHQu9GL0YjQtdC8INGN0YLQviDQutCw0Log0YHRg9GF0L7QuSDRhdGA0LjQvy4g0JLQu9Cw0LbQvdGL0LUg0YHRgNC10LTQvdC10L/Rg9C30YvRgNGH0LDRgtGL0LUg0YXRgNC40L/RiyDQvNC+0LbQvdC+INC+0LHRitGP0YHQvdC40YLRjCDRgtC10LwsINGH0YLQviDRgyDQtNC10YLQtdC5INGN0YLQvtCz0L4g0LLQvtC30YDQsNGB0YLQsCDQsNC60YLQuNCy0L3QsNGPINC00LXRj9GC0LXQu9GM0L3QvtGB0YLRjCDQsdC+0LrQsNC70L7QstC40LTQvdGL0YUg0LrQu9C10YLQvtC6LCDRgtC+INC10YHRgtGMINCx0YDQvtC90YXQuCDQtNC10YLQtdC5INCyINC/0L7QstGL0YjQtdC90L3QvtC8INC+0LHRitGR0LzQtSDQstGL0LTQtdC70Y/RjtGCINGB0LvQuNC30Ywg0LLQviDQstGA0LXQvNGPINCw0LrRgtC40LLQvdC+0LPQviDQstC+0YHQv9Cw0LvQuNGC0LXQu9GM0L3QvtCz0L4g0L/RgNC+0YbQtdGB0YHQsC4g0JLRgdC70LXQtNGB0YLQstC40Lgg0Y3RgtC+0LPQviDRgdC70LjQt9C40YHRgtCw0Y8g0L/QvtC60YDRi9GC0LAg0YHQu9C+0LXQvCDRgdC70LjQt9C4LiDQmCDQutC+0LPQtNCwINGA0LXQsdGR0L3QvtC6INC00YvRiNC40YIsINGC0L4g0LLQvtC30LTRg9GFINC/0YDQvtGF0L7QtNGPINGH0LXRgNC10Lcg0YLQsNC60LjQtSDQstC+0YHQv9Cw0LvRkdC90L3Ri9C1INCx0YDQvtC90YXQuCDRgdC80LXRiNC40LLQsNC10YLRgdGPINC4INCy0L3QtdC00YDRj9C10YLRgdGPINCyINGN0YLRgyDRgdC70LjQt9GMLiDQktGB0LvQtdC00YHRgtCy0LjQuCDRjdGC0L7Qs9C+INC+0LHRgNCw0LfRg9GO0YLRgdGPINC/0YPQt9GL0YDRjNC60Lgg0LLQvdGD0YLRgNC4INGB0LvQuNC30LguINCf0L7RgtC+0LwsINC/0L7RgdC70LUg0YLQvtCz0L4sINC60LDQuiDRgNC10LHRkdC90L7QuiDQstGL0LTRi9GF0LDQtdGCLCDRgtC+INC/0L7RgtC+0Log0LLQvtC30LTRg9GF0LAg0LvQvtC/0LDQtdGCINGN0YLQuCDQv9GD0LfRi9GA0Lgg0LIg0LHRgNC+0L3RhdCw0YUuINCYINC60LDQuiDRgdC70LXQtNGB0YLQstC40Lgg0LrQsNC6INGA0LDQtyDRgtCw0LrQuCDRgtCw0LrQvtC1INGP0LLQu9C10L3QuNC1INC+0LHRitGP0YHQvdGP0LXRgiDQv9C+0YfQtdC80YMg0LzRiyDRgdC70YvRiNC40Lwg0LjQvNC10L3QvdC+INCy0LvQsNC20L3Ri9C1INC/0YPQt9GL0YDRh9Cw0YLRi9C1INGF0YDQuNC/0YssINC/0YPQt9GL0YDQv9C4INC4INGB0LvQuNC30Ywg0L/QtdGA0LXQtNCy0LjQs9Cw0Y7RgtGB0Y8sINCy0LjQsdGA0LDRhtC40Y8g0L/QtdGA0LXQtNCw0ZHRgtGB0Y8g0L3QsCDRgdGC0LXQvdC60YMg0LPRgNGD0LTQvdC+0Lkg0LrQu9C10YLQutC4LCDQuCDQvNGLINC/0L7Qu9GD0YfQsNC10Lwg0LLQu9Cw0LbQvdGL0Lkg0YXRgNC40L8g0L/RgNC4INCw0YPRgdC60YPQu9GM0YLQsNGG0LjQuC4g0J/QvtC80LjQvNC+INGB0YDQtdC00L3QtdC/0YPQt9GL0YDRh9Cw0YLRi9GFINGF0YDQuNC/0L7QsiDQsdGL0LLQsNGO0YIg0LzQtdC70LrQviDQuCDQutGA0YPQv9C90L7Qv9GD0LfRi9GA0YfQsNGC0YvQtSDRhdGA0LjQv9GLLiDQlNC40YTRhNC10YDQtdC90YbQuNGA0L7QstC60LAg0LLQu9Cw0LbQvdGL0YUg0YXRgNC40L/QvtCyINC/0L7Qt9Cy0L7Qu9GP0LXRgiDQvdCw0Lwg0L7RhtC10L3QuNGC0Ywg0LIg0LrQsNC60L7QuSDRh9Cw0YHRgtC4INCx0YDQvtC90YXQuNCw0LvRjNC90L7Qs9C+INC00LXRgNC10LLQsCDRgNCw0LfQstC40LLQsNC10YLRgdGPINCy0L7RgdC/0LDQu9C10L3QuNC1LiDQktC70LDQttC90YvQtSDRhdGA0LjQv9GLINGA0LDQt9C90L7QuSDQv9GD0LfRi9GA0YfQsNGC0L7RgdGC0Lgg0L/QvtC30LLQvtC70Y/RjtGCINC90LDQvCDQvtC/0YDQtdC00LXQu9C40YLRjCDRgdCw0Lwg0YPRgNC+0LLQtdC90YwsINCz0LvQsNCy0L3Ri9C5INGN0YLQviDQsdGA0L7QvdGFLCDRgdC10LPQvNC10L3RgtCw0YDQvdGL0Lkg0LjQu9C4INCy0L7QvtCx0YnQtSDRgNC10YHQv9C40YDQsNGC0L7RgNC90YvQuSDQsdC70LjQttC1INC6INCw0LvRjNCy0LXQvtC70LDQvC4g0KLQsNC60LbQtSDRgdGC0L7QuNGCINC00L7QsdCw0LLQuNGC0YwsINGH0YLQviDRgdGD0YXQuNC1INGF0YDQuNC/0Ysg0LHQvtC70YzRiNC1INGF0LDRgNCw0LrRgtC10YDQvdGLINC00LvRjyDQsNGB0YLQvNGLINC4INCy0YDQvtC20LTQtdC90L3Ri9GFINC40LfQvNC10L3QtdC90LjRj9GFINCyINCx0YDQvtC90YXQsNGFLiDQkCDQstC70LDQttC90YvQtSDRhdCw0YDQsNC60YLQtdGA0L3RiyDQtNC70Y8g0LHRgNC+0L3RhdC40YLQsCwg0L/QvdC10LLQvNC+0L3QuNC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29" table:style-name="ce1">
            <text:p>1067029</text:p>
          </table:table-cell>
          <table:table-cell office:value-type="string" table:style-name="ce1">
            <text:p>russian</text:p>
          </table:table-cell>
          <table:table-cell office:value-type="string" table:style-name="ce1">
            <text:p>Билет 9&amp;lt;br /&amp;gt; 1.Стадии полового созревания у детей по Таннеру.&amp;lt;br /&amp;gt; 2.Ребенку 8 месяцев. Жалобы на одышку, кашель, беспокойство. Объективно: состояние средней тяжести за счет бронхообструкции. Ребенок беспокоен. Кожные покровы чистые, цианоз носогубного треугольника. Кашель частый, с обилием мокроты, непродуктивный. В легких коробочный оттенок. Аускультативно жесткое дыхание, по всем полям выслушиваются сухие свистящие и ср/ пузырчатые влажные хрипы. Выдох удлинен. Почему выслушиваются сухие и ср/ пузырчатые хрипы? &amp;lt;br /&amp;gt;</text:p>
          </table:table-cell>
          <table:table-cell office:value-type="string" table:style-name="ce1">
            <text:p>IDEpINGB0YLQsNC00LjQuCDQv9C+0LvQvtCy0L7Qs9C+INGB0L7Qt9GA0LXQstCw0L3QuNGPINGDINC00LXRgtC10Lkg0L/QviDQotCw0L3QvdC10YDRgyDQvtGC0LvQuNGH0LDRjtGC0YHRjyDRgyDQvNCw0LvRjNGH0LjQutC+0LIg0Lgg0YMg0LTQtdCy0L7Rh9C10LogLijQoyDQnNCQ0JvQrNCn0JjQmtCe0JIp0J/QtdGA0LLQsNGPINGB0YLQsNC00LjRjyDQvNC+0YjQvtC90LrQsCzRj9C40YfQutC4INC4INC/0L7Qu9C+0LLQvtC5INGH0LvQtdC9INC00LXRgtGB0LrQuNGFINGA0LDQt9C80LXRgNC+0LIs0L3QtdGCINC+0LLQvtC70L7RgdC10L3QtdC90LjRjyDQktGC0L7RgNCw0Y8g0YHRgtCw0LTQuNGPIC0g0LzQvtGI0L7QvdC60LAg0Lgg0Y/QuNGH0LrQuCDQv9GA0L7QtNC+0LvQttCw0Y7RgiDRgNCw0YHRgtC4LNC/0YDQuNC+0LHRgNC10YLQsNGO0YIg0LrRgNCw0YHQvdC+0LLQsNGC0YvQuSDRhtCy0LXRgiAsINCi0YDQtdGC0YzRjyDRgdGC0LDQtNC40Y8tINC/0L7Qu9C+0LLQvtC5INGH0LvQtdC9INC90LDRh9C40L3QsNC10YIg0YDQsNGB0YLQuCDQsiDQtNC70LjQvdGDLCDQv9C+0Y/QstC70Y/RjtGC0YHRjyDRgNC10LTQutC40LUs0YHQu9C10LPQutCwINC40LfQstC40YLRi9C1LNGB0LvQsNCx0L7Qv9C40LPQvNC10L3RgtC40YDQvtCy0LDQvdC90YvQtSDQstC+0LvQvtGB0Ysg0YMg0L7RgdC90L7QstCw0L3QuNGPINC/0L7Qu9C+0LLQvtCz0L4g0YfQu9C10L3QsCDQp9C10YLQstC10YDRgtCw0Y8g0YHRgtCw0LTQuNGPLSDQstC+0LvQvtGB0Ysg0YHRgtCw0L3QvtCy0Y/RgtGB0Y8g0LbQtdGB0YLRh9C1LCDRgtC10LzQvdC10LUs0LzQvtGI0L7QvdC60LAg0Lgg0Y/QuNGH0LrQuCDQv9GA0LjQvtCx0YDQtdGC0LDRjtGCINC60L7RgNC40YfQvdC10LLRi9C5INGG0LLQtdGCLNC/0L7Qu9C+0LLQvtC5INGH0LvQtdC9INGD0LLQtdC70LjRh9C40LLQsNC10YLRgdGPINCyINC00LjQsNC80LXRgtGALNCy0L7Qu9C+0YHRiyDRgNCw0YHQv9GA0L7RgdGC0YDQsNC90LXQvdGLINC90LAg0LvQvtCx0L7QuiAs0L3QviDQvdC10YIg0L3QsCDQstC90YPRgtGA0LXQvdC90LXQuSDQv9C+0LLQtdGA0YXQvdC+0YHRgtC4INCx0LXQtNGA0LAg0J/Rj9GC0LDRjyDRgdGC0LDQtNC40Y8g0L7QstC+0LvQvtGB0LXQvdC10L3QuNC1INC00L7RgdGC0LjQs9Cw0LXRgiDQstC90YPRgtGA0LXQvdC90Y7RjiDQv9C+0LLQtdGA0YXQvdC+0YHRgtGMINCx0LXQtNGA0LAs0LzQvtGI0L7QvdC60LAgLNGP0LjRh9C60Lgs0L/QvtC70L7QstC+0Lkg0YfQu9C10L0g0LTQvtGB0YLQuNCz0LDQtdGCINCy0LfRgNC+0YHQu9C+0LPQviDRgNCw0LfQvNC10YDQsCDQv9C+INC80YPQttGB0LrQvtC80YMg0YLQuNC/0YMgKNCjINCU0JXQktCe0KfQldCaKdCf0LXRgNCy0LDRjyDRgdGC0LDQtNC40Y8g0L3QtdGCINC+0LLQvtC70L7RgdC10L3QtdC90LjRjyzQvNC+0LvQvtGH0L3Ri9C1INC20LXQu9C10LfRiyDQvdC1INC90LDQsdGD0YXRiNC40LUg0JLRgtC+0YDQsNGPINGB0YLQsNC00LjRjyAtINC80L7Qu9C+0YfQvdGL0LUg0LbQtdC70LXQt9GLINC90LDRh9C40L3QsNGO0YIg0YDQsNGB0YLQuCzQvdCw0LHRg9GF0LDRjtGCLNCyINCy0LjQtNC1INCx0YPRgtC+0L3QsCzRgNC+0YHRgiDRgNC10LTQutC40YUg0LTQu9C40L3QvdGL0YUg0Lgg0YHQu9Cw0LHQvtC/0LjQs9C80LXQvdGC0LjRgNC+0LLQsNC90L3Ri9GFINCy0L7Qu9C+0YEg0LLQtNC+0LvRjCDQv9C+0LvQvtCy0YvRhSDQs9GD0LEs0YHQu9C10LPQutCwINC40LfQstC40YLRi9C1INCi0YDQtdGC0YzRjyDRgdGC0LDQtNC40Y8tINC00LDQu9C10LUg0YPQstC10LvQuNGH0LjQstCw0LXRgtGB0Y8g0LzQvtC70L7Rh9C90LDRjyDQttC10LvQtdC30LAgINC4INCw0YDQtdC+0LvQsCDQsdC10Lcg0YfQtdGC0LrQvtCz0L4g0YDQsNC30LTQtdC70LXQvdC40Y8g0LrQvtC90YLRg9GA0LAs0LLQvtC70L7RgdGLINGC0LXQvNC90LXRjtGCLNGB0YLQsNC90L7QstGP0YLRgdGPINCx0L7Qu9C10LUg0LPRgNGD0LHRi9C80Lgs0LLRjNGO0YLRgdGPINC4INGA0LDRgdC/0YDQvtGB0YLQsNC90Y/RjtGC0YHRjyDQvdCwINC70L7QsdC+0Log0Lgg0LLQvtC30L3QuNC60LDQtdGCINC/0L7QtNC80YvRiNC10YfQvdC+0LUg0L7QstC+0LvQvtGB0LXQvdC10L3QuNC1INCn0LXRgtCy0LXRgNGC0LDRjyDRgdGC0LDQtNC40Y8gLdCy0YvRgdGC0YPQv9Cw0L3QuNC1INCw0YDQtdC+0Lsg0Lgg0YHQvtGB0LrQsCDRgSDQvtCx0YDQsNC30L7QstCw0L3QuNC10Lwg0LLRgtC+0YDQuNGH0L3QvtCz0L4g0LHRg9Cz0L7RgNC60LAg0L3QsNC0INC60L7QvdGC0YPRgNC+0Lwg0LbQtdC70LXQt9GLLNC/0L7Rj9Cy0LvRj9GO0YLRgdGPINGD0LPRgNC4LNC+0LLQvtC70L7RgdC10L3QtdC90LjQtSDQvdC1INC00L7RhdC+0LTQuNGCINC00L4g0LLQvdGD0YLRgNC10L3QvdC10Lkg0L/QvtCy0LXRgNGF0L3QvtGB0YLQuCDQsdC10LTRgNCwINCf0Y/RgtCw0Y8g0YHRgtCw0LTQuNGPLSDQvNC+0LvQvtGH0L3Ri9C1INC20LXQu9C10LfRiyDQv9C+INCy0LfRgNC+0YHQu9C+0LzRgyDRgtC40L/RgyzQsNGA0LXQvtC70Ysg0LLQv9C40YHRi9Cy0LDRjtGC0YHRjyDQsiDQvtCx0YnQuNC5INC60L7QvdGC0YPRgCDQttC10LvQtdC30YsgLCDQvtCy0L7Qu9C+0YHQtdC90LXQvdC40LUg0YDQsNGB0L/RgNC+0YHRgtGA0LDQvdGP0Y7RgtGB0Y8g0L3QsCDQstGB0Y4g0LLQvdGD0YLRgCDQv9C+0LLQtdGA0YXQvdC+0YHRgtGMINCx0LXQtNGA0LAg0Lgg0L3QsNGH0LjQvdCw0Y7RgtGB0Y8g0YDQtdCz0YPQu9GP0YDQvdGL0LUg0LzQtdGB0Y/Rh9C90YvQtSAyKdCd0LDQu9C40YfQuNC1INGB0YPRhdC40YUg0Lgg0YHRgNC10LTQvdC1INC/0YPQt9GL0YDRh9Cw0YLRi9GFINCy0LvQsNC20L3Ri9GFINGF0YDQuNC/0L7QsiDRgdCy0LjQtNC10YLQtdC70YzRgdGC0LLRg9GO0YIg0L7QsSDQuNC90YTQtdC60YbQuNC4INC4INCy0L7RgdC/0LDQu9C10L3QuNC4INC00YvRhdCw0YLQtdC70YzQvdGL0YUg0L/Rg9GC0LXQuSAu0YHRg9GF0LjQtSDRhdGA0LjQv9GLINCz0L7QstC+0YDRj9GCINC+0LEg0L7QsdGB0YLRgNGD0LrRhtC40Lgg0LTRi9GF0LDRgtC10LvRjNC90YvRhSDQv9GD0YLQtdC5ICzQv9GA0L7RhdC+0LbQtNC10L3QuNC1INCy0L7Qt9C00YPRhdCwINGC0YPRgNCx0YPQu9C10L3RgtC90L7QtSDQuCDQv9GA0LjQstC+0LTQuNGCINC6INCy0YvRgdC+0LrQvtGH0LDRgdGC0L7RgtC90YvQvCDQuCDRgdCy0LXRgdGC0Y/RidC40Lwg0LfQstGD0LrQsNC8INCy0YvRgdC70YPRiNC40LLQsNC10LzRi9C1INCy0L4g0LLRgNC10LzRjyDQsNGD0YHQutGD0LvRjNGC0LDRhtC40Lgu0KHRgNC10LTQvdC1INC/0YPQt9GL0YDRh9Cw0YLRi9C1INGF0YDQuNC/0Ysg0LLQvtC30L3QuNC60LDRjtGCINC40Lcg0LfQsCDRgdC60L7Qv9C70LXQvdC40LUg0YHQu9C40LfQuCDQtNGL0YXQsNGC0LXQu9GM0L3Ri9GFINC/0YPRgtGP0YUs0YLQsNC6INC60LDQuiDQv9GA0Lgg0LLQvtGB0L/QsNC70LXQvdC40Lgg0LLQvtC30L3QuNC60LDQtdGCINC+0YLQtdC6INC4INCx0L7QutCw0LvQvtCy0LjQtNC90YvQtSDQutC70LXRgtC60Lgg0LLRi9C00LXQu9GP0Y7RidC40LUg0YHQu9C40LfRjCDQvdCw0YfQuNC90LDRjtGCINGA0LDQsdC+0YLQsNGC0Ywg0LXRidC1INCx0L7Qu9GM0YjQtS7QstGB0LvQtdC00YHRgtCy0LjQuCDRgdC60L7Qv9C70LXQvdC40LUg0LbQuNC00LrQvtGB0YLQuCDQuNC30LTQsNC10YIg0LfQstGD0LrQuCDQsdGD0LvRjNC60LDRjtGJ0LXQs9C+LNC/0L7RgtGA0LXRgdC60LjQstCw0Y7RidC10LPQvtGB0Y8g0LfQstGD0LrQsCDQv9GA0Lgg0LTRi9GF0LDQvdC40Lgu0JIg0LTQsNC90L3QvtC8INGB0LvRg9GH0LDQtdGCINC+0LTRi9GI0LrQsCzQutCw0YjQtdC70Ywg0YEg0LzQvtC60YDQvtGC0L7QuSDQuCDQsNGD0YHQutGD0LvRjNGC0LDRgtC40LLQvdGL0LUg0L/RgNC40LfQvdCw0LrQuCDRgdCy0Y/Qt9Cw0L3RiyDRgSDRgNC10YHQv9C40YDQsNGC0L7RgNC90L7QuSDQuNC90YTQtdC60YbQuNC10Lkg0YMgONC80LXRgdGP0YfQvdC+0LPQviDRgNC10LHQtdC90LrQsCAs0LrQvtGC0L7RgNCw0Y8g0L/RgNC40LLQtdC70LAg0Log0LLQvtGB0L/QsNC70LXQvdC40Y4g0Lgg0L7QsdGB0YLRgNGD0LrRhtC40Lgg0LTRi9GF0LDRgtC10LvRjNC90YvRhSDQv9GD0YLQtdC5IC4=</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762" table:style-name="ce1">
            <text:p>914762</text:p>
          </table:table-cell>
          <table:table-cell office:value-type="string" table:style-name="ce1">
            <text:p>english</text:p>
          </table:table-cell>
          <table:table-cell office:value-type="string" table:style-name="ce1">
            <text:p>Ticket 9&amp;lt;br /&amp;gt; 1. Stages of puberty in children according to Tanner.&amp;lt;br /&amp;gt; 2. The child is 8 months old. Comes by ambulance to the hospital with complaints of shortness of breath, cough, anxiety. Objectively: the state of moderate severity due to bronchial obstruction.The child is restless.The skin is clean, cyanosis of the nasolabial triangle. Cough frequent, with an abundance of sputum, unproductive. In the percussion of lungs - box sound. Auscultatory hard breathing, dry wheezing and medium-bubbly moist rales are heard in all areas. The exhalation is extended. Why are dry and medium-bubbly moist rales heard?&amp;lt;br /&amp;gt;</text:p>
          </table:table-cell>
          <table:table-cell office:value-type="string" table:style-name="ce1">
            <text:p>VGhlIGNsaW5pY2FsIGZpbmRpbmdzIGRlc2NpYmUgaW5jdWRpbmcgZHJ5IHdlZXpobmcgYW5kIG1lZGl1bSBidWJieSBtb2lzdCByYWxlcyByZWZsdHMgdGhlIHBoeXNpb2djYWwgY2huZ2VzIG9jY3VyaW5nIGluIHRoZSByZXNwaXRyeSB0cmN0IGR1ZSB0byB0aGUgYnJvbmNoaWwgb2JzdHJ1Y3Rpb24gYW5kIGluZmxtYXRpb24gIGxpa2VseSBjYXVzZWQgYnkgdGhlIGNvbmRpdGlvbiBzdWNoIGFzIGFjdXRlIGJyb25jaGlsdGlzIG9yIHZpcmFsIGxvd2VyIHJlc3BpdHJ5ICB0cmFjdCBpbmZlY3Rpb24gaGVyZSBhcmUgc29tZSBvdmVydmlldyAxLSBkcnkgd2hlZXppbmcgLSBkcnkgd2hlZXppbmcgaXMgY2F1ZXNkIGJ5IHRoZSBhaXJmbG93IG9ic3RydWN0aW9uIHRocm91Z2ggbmFycm93IGFpcndheSBvZmV0ZW4gZHVlIHRvIHRoZSBicm9uY2hvc2FtIGluZmxtdGlvbiBvciBtdWN1cyBwdWxnaW5nIHRoaXMgaXMgbGVhZCB0byBiZSB0dXJibGVudCBhaXJmbG93IHByb2R1Y2VkIGhpZ2ggcGl0Y2hlZCBtdXNjaWFscyBzb3VuZHMgMi1sb2NhbGl6YXRpb24gLSBjYW4gb2NjdXIgaW4gdGhlIGFsbCB0aGUgbHVuZ3MgZmllbGQgYnV0IG1vcmUgcHJvbWluZXQgaW4gdGhlIGFyZWEgd2l0aCBtdWN1cyBhY2N1bXVrYXRpb24gOyAzLUFzc29jaWF0aW9uIC10aHNlcyBzb3VuZHMgc3VnZ2VzdCBleGVyc2l2ZSBzZXJ0aW9uIG9mIHRociByZXNvaXRyeSAgdHJhY3QgYSBoYWxsbWFyayBvZiB0aGUgY29uZGl0aXVvbiBsaWtlIGJyb2NobGl0aXMgd2hpbGUgY2F1c2VzIGluZmxhbXRpb24gYW5kIG11Y3VzIG92ZXJwdGlvZHVjdGlvbiBhY2Njb3JkaW5nIHRvIHRoZSBjbGluaWNhbCBjYWVzIGhlcmUgYXJlIG92ZXJhbGwgdGhlIGNsaW5jYWwgcGljdHVyZXMgLSBicm9wY2hpYWwgb2JzcnR1Y3Rpb24gbGVhZHMgdG8gaGFyZCBicmVhdGluZ3MgZXh0ZW50ZHMgbGVhZHMgdG8gdGhlIGV4aGF0aW9uYWwgYW5kIGluaGFsYXRpb25zIGV4eHNlaXZlIHNlcnRpb24gdW5wcm9kdWN0aW5nIGNvZ2ggYW5kIG1lZGl1bSBidWJieSBtb2lzdCBFeHRlbmRzIGV4aGFsdGlvbnMgLSBpbmRpY2F0ZSB0aGUgYWlyZmxvdyBpbmZpbHRhcnRlIGFuZCB0aGUgdHJhcHBpbmcgdHlwaWNhbCB0aGUgO2xvd2VyIGFpcndheSBvYnN0cnVjdGlvbiB0aGUgZGlhZ25vc2UgYW5kIHRoZSBtYW5hZ21lbnQgdGhlIGNsaW5hY2wgcGljdHVyZXMgY29tYmluZWQgd2l0aCB0aGUgc3ltcHRvbXMgc3VjaCBhcyBjb3VnaCBhbmQgc3luY29zaXMgaW4gY29uc2l0cyB3aXRoIHRoZSBhY3V0ZSBicm9uY2hsdGlzIG1vc3QgY29tbW5seSBjYXVzZWQgYnkgdGhlIHJlc3BpdHJ5IHZpcnVzIGluIHRoZSBpbmZlbnRzIG1hbmFnbWVudHMgZm9jb3VzIG9uIHRoZSBtb25pdGVyaW5nIGFuZCB0aGUgb3h5Z2VuIHRoZXJwaHkgaWYgbmVlZHMgaHlkcmF0aW9uIGFuZCB0aGUgY2xlcm5jZSBvZiB0aGUgYWlyd2F5cyBzZXJ0aW9ucyBicm9jaG9kaWF0ZXJzIGlmIGJyb25jaHNwYW1zIGlzIHRoZSBzaW5naWNpYW50IGFuZCB0aGUgbGFzdCBtb25pdGVyaW5nIHRoZSByZXNwaXRycnkgZGlzdGVyc3MgZXNjbGF0aW5nIGNhcmUgaWYgcmVxdWlyZWQgYW5kIHRoZSBtb3N0IGltcG9ydGFudCB0aGluZ3Mgd2Ugc2hvdWxkIHByb3RlY3RzIHRoZSBwYXRpZW50IG9mIHRoZSBoYXJtZnVsIGJhY3RyaWVzIGFuZCB0aGUgdmlydWVzIGFuZCBhbmQgd2Ugc2hvdWxkIGZvY3VzIGluIHRoZSB3ZWxsIG1hbmVyIGRpZWQgYW5kIHdlIHNob3VsZCBpbnRha2Ugc3VmZmljZW50IHdhdGVyIGRpZXQgYW5kIHdlIHNob3VsZCBnaXZlcyBzb21lIGRydWdzIG9mIHRoZSBwYXRpZW50IGxpa2UgTlNBSURTIGFuZCB0aGUgZ3JvdXBzIG9mIHRoZWNvcnRpY29zdHJpb2RzIGRydWdzIGxpa2UgZGV4dHJtZXRoem9uZSBhbmQgaWJ1cHJvZmVuIGFuZCAgYW5kIGdpdmUgYnJvY2hvIGRpYWxhdGVycyBsaWtlIHNhbGJ1dGFtb2wgYW5kIHRoZSB0dXJidXRhbW9sIGFuZCBvdGhlcmUgdGhlIGlwcmF0cm9waXVtIGFuZCB0aGUgbXlvdHJvaXVtIGFuZCAgdGhlIHNhbGJ1dGFtb2wgZHJ1Z3Mgb2YgY2hvaWNlIGluIHRoaXMgY2FzZXMgYW5kIGlzIHRoZSBjb21tb20gYnJvY2hvZGlsYXRlcnMgYW5kIHdlIHNob3VsZCBnaXZlcyBzb21lIGRydWdzIGxpa2UgdGhlIGJyb2FkIHNwZWN0cnVtIGFudGliaXRpZXMgbGlrZSBhbW94Y2lsbG4gYW5kIGNpdHJhemluZSBhbmQgcGVuaWNpbGxlbnMgYW5kIHRoZSBkcnkgY291Z2ggd2UgY2FuIGdpdmUgR3VhaW5hc2VmZXJvbnMgYW5kIHRoIG1vc3QgRWZmZWN0aXZlIGFnYWluc3QgdGhlIGJhY3RyaWEgaXMgdGhlIG1vbnRlbHVjYXN0IGFuZCB0aGUgbW9zdCBpbXBvcnRhbnQgdGhpbmcgdGhhdCAgdGhlIHBhdGllbnQgc2hvdWxkIGRpZ25vc2UgdGltZSB0byB0aW1lIC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69" table:style-name="ce1">
            <text:p>915269</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MS4g0K3RgNC40YLQtdC80LAgLSDRgtC10YDRltC00LUg06nRgtC1INC60LXSoyDRgtKv0YDQtNC1INGC0LDRgNCw0LvQsNGC0YvQvSDSm9GL0LfQsNGA0YPQtNGL0qMg0YLSr9GA0ZYg0LHQvtC70YvQvyDRgtCw0LHRi9C70LDQtNGLLiDQltCw0qPQsCDRgtGD0pPQsNC9INCx0LDQu9Cw0LvQsNGA0LTQsCDRjdGA0LjRgtC10LzQsCDSm9GL0LfRi9C7INC90LXQvNC10YHQtSDSm9GL0LfSk9GL0LvRgiDQtNCw0pvRgtCw0YAgKNCx06nRgNGC0L/QtSkg0YLSr9GA0ZbQvdC00LUg0LrQtdC30LTQtdGB0LXQtNGWLCDRj9KT0L3QuCDQvtGB0Ysg0LHQtdC70LPRltC70LXRgNC80LXQvSDSm9C+0YHQsNGA0LvQsNC90LAg0LbSr9GA0LXRgtGW0L0g0YLRgNC+0L3Qt9C40YLQvtGA0LvRiyDSm9GL0LfQsNGA0YMg0LHQvtC70YvQvyDRgtCw0LHRi9C70LDQtNGLLiDQodC+0Lsg0YHQtdCx0LXQv9GC0ZYg0LTQtSDQvtC70LDRgCDRltGI0YLQtSwg0LHQtdGC0YLQtSwg0LrQtdGD0LTQtSDQttOZ0L3QtSDQsNGP0pst0pvQvtC70LTQsNGA0LTQsCDQu9C+0LrQsNC70LjQt9Cw0YbQuNGP0LvQsNC90LDQtNGLLiDQodC+0L3Ri9C80LXQvSDSm9Cw0YLQsNGALCDRgtC10YDRltC90ZbSoyDSm9Cw0LvRi9KjINCx06nQu9GW0LrRgtC10YDRltC90LTQtSDRj9KT0L3QuCwg0LDQu9Cw0pvQsNC9INC80LXQvSDRgtCw0LHQsNC90LTQsCDTqdGC0LUg0YHQuNGA0LXQuiDQutC10LfQtNC10YHQtdC00ZYuINCa0LvQuNC90LjQutCw0LvRi9KbINC606nRgNGW0L3RltGB0ZYg0LHQvtC50YvQvdGI0LAg0LDQu9KT0LDRiNKb0YsgMS0zINC60q/QvdC00LUg0L/QsNC50LTQsCDQsdC+0LvRi9C/LCA1LTcg0LrSr9C90LTQtSDQttC+0pPQsNC70LAg0LHQsNGB0YLQsNGD0Ysg0pvQsNC20LXRgi4g0KHQtdCx0LXQsdGWLCDQvtC7INC20LDRgtGL0YDRltGI0ZbQu9GW0Log0LbTmdC90LUg0LbQsNGC0YvRgNC00LDQvSDRgdGL0YDRgtKb0Ysg0L7RgNGC0LDQtNCw0pPRiyDRgtC10LzQv9C10YDQsNGC0YPRgNCw0LvRi9KbINCw0LnRi9GA0LzQsCDQsdC+0LnRi9C90YjQsCDRgdC40L/QsNGC0YLQsNC70LDQtNGLLiDQn9C10YDQuNGE0LXRgNC40Y/Qu9GL0psg0YLQsNC80YvRgNC70LDRgNC00LDSk9GLLCDQttGL0LvRi9GC0YMg0L/RgNC+0YbQtdGB0YHRltC90ZbSoyDQttKv0YDRg9GW0L3QtSDQsdCw0LnQu9Cw0L3Ri9GB0YLRiyDRgtC10YDRliDQsdOp0LvRltCz0ZYg0pvRi9C30LDRgNCwINCx0LDRgdGC0LDQudC00YsuINCQ0Lsg0YLQvtC60YHQuNC60LDQu9GL0psg0Y3RgNC40YLQtdC80LAg0Y3RgtC40L7Qu9C+0LPQuNGP0YHRiyDQsdC+0LnRi9C90YjQsCwgINC40LzQvNGD0L3QtNGL0psg0LbSr9C50LXQvdGW0qMg06nQvNGW0YDQs9C1INGC0rHRgNCw0pvRgtCw0LvRg9GLICjQsNC00LDQv9GC0LDRhtC40Y8pINC905nRgtC40LbQtdGB0ZbQvdC00LUg0LHQvtC70LDQtNGLLCDQttOZ0L3QtSDRgtC10YDRltC90ZbSoyDSm9Cw0YLRgtGLINGB0LXQt9GW0LzRgtCw0LvQtNGL0LvRi9KT0Ysg0LTQsCDQttCw0YLQsNC00YsuINCR0rHQuyDQutOp0YDRgdC10YLQutGW0YjRgtC10YAg0L3TmdGC0LjQttC10YHRltC90LTQtSDRgtC10YDRltCz0LUg0LbTmdC90LUg0LjQvNC80YPQvdC00Ysg0LbSr9C50LXQs9C1INCx0LDQudC70LDQvdGL0YHRgtGLINCw0LvQu9C10YDQs9C40Y/Qu9GL0psg0L/RgNC+0YbQtdGB0YEg0LbSr9GA0LXQtNGWLiDQltOZ0L3QtSDQsdKx0Lsg0L/RgNC+0YbQtdGB0YEg0YLRg9KT0LDQvSDQutC10LfQtNC10L0g0LHQsNGB0YLQsNC/INCw0L/RgtCw0LvQsNGAINCx0L7QudGLINGB0LjQv9Cw0YLRgtCw0LvRg9GLINC80q/QvNC60ZbQvS4g0JDQu9C70LXRgNCz0LjRj9KT0LAg0pvQsNGC0YvRgdCw0YLRi9C9INC20LDRgdGD0YjQsNC70LDRgNC00YvSoyDQsdKx0LfRi9C70YvRgdGLINC905nRgtC40LbQtdGB0ZbQvdC00LUg0LHTqdC70ZbQvdC10YLRltC9INCx0ZbRgNC90LXRiNC1INC80LXQtNC40LDRgtC+0YDQu9Cw0YAg0LzQtdC9INCw0LvQu9C10YDQs9C10L3QtNC10YDQs9C1INCx0LDQudC70LDQvdGL0YHRgtGLINGC0LDQvNGL0YDQu9Cw0YDQtNGL0qMg0LrQtdKj0LXRjtGWLiAg0KLQtdGA0ZbQvdGW0qMg0LzQvtGA0YTQvtC70L7Qs9C40Y/Qu9GL0psg0Y3Qu9C10LzQtdC90YLRgtGWINCx0L7QudGL0L3RiNCwINGN0L/QuNC00LXRgNC80LjRgSDQv9C10L0g0LTQtdGA0LzQsNC90Ysg0pvQsNC80YLQuNGC0YvQvSDQsdC+0LvQsNC00YsuINCR0LDQu9Cw0LvQsNGA0LTQsCwg0Y3Qv9C40LTQtdGA0LzQuNGBINC80LXQvSDQtNC10YDQvNCw0L3Ri9KjINC+0YDRgtCw0YHRi9C90LTQsCDQvtGA0L3QsNC70LDRgdKb0LDQvSDQsdCw0LfQsNC70YzQtNGLINC80LXQvNCx0YDQsNC90LAg0LbSsdC80YHQsNKbICjQvdOZ0LfRltC6INC60LXQu9Cz0LXQvSkg0LHQvtC70LDQtNGLLCDQvtGB0YvSk9Cw0L0g0LHQsNC50LvQsNC90YvRgdGC0Ysg0Y3Qv9C40LTQtdGA0LzQuNGBINC/0LXQvSDQtNC10YDQvNCwINCw0YDQsNGB0YvQvdC00LAg0LHQsNC50LvQsNC90YvRgSDQsNC70YjQsNKb0YLQsNC70YvQvyDSm9Cw0LvRg9GLINC00LAg0LzSr9C80LrRltC9LiDSmtC+0YDRi9GC0YvQvdC00YvQu9Cw0Lkg0LrQtdC70LUsINCx0LDQu9Cw0LvQsNGA0LTQsNKT0Ysg0YLQtdGA0ZYg0LrSr9GC0ZbQvNGW0L3RltKjINC80LDSo9GL0LfQtNGL0LvRi9KT0YvQvSDQsNC50YLSm9GL0Lwg0LrQtdC70LXQtNGWLiDQkdCw0LvQsNC70LDRgNC00LDSk9GLINGC0LXRgNGWINKb0LDQsdGL0L3RgyDQv9GA0L7RhtC10YHRgtC10YDRltC90LUg0YHQtdC30ZbQvNGC0LDQuyDQutC10LvQtdC00ZYsINGB0LXQsdC10LHRliwg0L7QuyDQttC10YDQtNC10LPRliDRgNCdINC+0YDRgtCwINCx0LDQutGC0LXRgNC40Y/Qu9GL0psg0YLSr9GA0LTQtSDSm9C+0LvQsNC50LvRiyDQvtGA0YLQsCDRgtGD0LTRi9GA0LDQtNGLLiDQodC+0L3Ri9C80LXQvSDSm9Cw0YLQsNGALCDQsdCw0LvQsNC70LDRgCA0MCUg0YLQtdGA0ZbRgdGWINCw0YDSm9GL0LvRiyDQtNC10Lwg0LDQu9Cw0YLRi9C90LTRi9Kb0YLQsNC9INC205nQvdC1INC20L7Sk9Cw0YDRiyDRgdC10LfRltC80YLQsNC70LTRi9KbINCx0L7Qu9GD0YvQvdCwINCx0LDQudC70LDQvdGL0YHRgtGLINC10YDQtdC60YjQtSDQutKv0YLRltC8INKb0LDQttC10YIg0LXRgtGW0LvQtdC00ZYuICAyLiDSmtCw0LHRi9C90YMg0L/RgNC+0YbQtdGB0YHRliDQutC10LfRltC90LTQtSDQtdKjINCx0LDRgdGC0Ysg0LrRgNC40YLQtdGA0LjQudC70LXRgNC00ZbSoyDQsdGW0YDRliDQvtC7INCw0YPRi9GA0YMg0YHQuNC90LTRgNC+0LzRiyDQsdC+0LvRi9C/INGC0LDQsdGL0LvQsNC00YsuINCe0YHRiyDQutGA0LjRgtC10YDQuNC5INCx0L7QudGL0L3RiNCwLCAg0LrTqdCx0ZbQvdC10YHQtSDQsNGC0LjQv9C40Y/Qu9GL0psg0LDRg9GA0YMg0YHQuNC90LTRgNC+0LzRiyDQsdC+0LnRi9C90YjQsCDRiNCw0pPRi9C80LTQsNGA0LzQtdC9INC60LXQu9C10LTRli4g0JHSsdC7INC20LDSk9C00LDQudC00LAg0LXQs9C20LXQuSDRgtC10LrQttC10LnQu9GWINGW0Ygg0pvSsdGA0YvQu9GL0LzQtNCw0YDRi9C90YvSoyDQsdCw0YDQu9GL0pPRi9C90LAg0LzTmdC9INCx0LXRgNGW0LvRg9GWINGC0LjRltGBLiDQodC10LHQtdCx0ZYsINCx0LDQu9Cw0LvQsNGA0LTRi9KjINGW0YjQutGWINCw0pPQt9Cw0LvQsNGA0Ysg0LXRgNC10LrRiNC1INCw0L3QsNGC0L7QvNC40Y/Qu9GL0pst0YTRg9C90LrRhtC40L7QvdCw0LvQtNGL0psg0LXRgNC10LrRiNC10LvRltC60YLQtdGA0LzQtdC9INGB0LjQv9Cw0YLRgtCw0LvSk9Cw0L0uINCe0YHRi9KT0LDQvSDRgdOZ0LnQutC10YEg0LHQsNC70LDQu9Cw0YDQtNCw0pPRiyDRgdC+0pvRi9GAINGW0YjQtdC60YLRltKjINCw0L3QsNGC0L7QvNC40Y/Qu9GL0psg0LXRgNC10LrRiNC10LvRltCz0ZbQvdC1INGC0L7Sm9GC0LDQu9GB0LDQvDog0L7QuyDQsNC50pvRi9C9INCx0ZbRgCDQttC10YDQtNC1INC+0YDQvdCw0LvQsNGB0L/QsNGD0YsgKNCw0YLQuNC/0LjRj9C70YspINCx0L7Qu9GL0L8g0YLQsNCx0YvQu9Cw0LTRiy4g0J7RgNC90LDQu9Cw0YHRgyDQvNKv0LzQutGW0L3QtNGW0LrRgtC10YDRljog0ZbRiCDSm9GD0YvRgdGL0L3Ri9KjINCw0LnQvNCw0pvRgtCw0YDRiyDQsdC+0LnRi9C90YjQsDog0LbQvtKT0LDRgNGL0LTQsCAo0L7SoyDQttCw0psg0pvQsNCx0YvRgNKT0LAg0LDRgdGC0YvQvdC00LApOyDRgtOp0LzQtdC9ICjQttCw0LzQsdCw0YEg0pvRg9GL0YHRiyDQvNC10L0g0YjQsNC/INCw0LnQvNCw0pPRi9C90LTQsCk7INC+0YDRgtCw0qPSk9GLICjQutGW0L3QtNGW0Log0LzQsNKj0YvQvdC00LApINCx06nQu9GW0LrRgtC10YDQtNC1INC+0YDQvdCw0LvQsNGB0LDQtNGLLCDQttOZ0L3QtSDSm9Cw0LHRi9C90YMg0LDQudC80LDSk9GLINC+0YHRiyDQsNC50LzQsNKb0YLQsNGA0LTQsCDQvtGA0L3QsNC70LDRgdGD0YvQvdCwINCx0LDQudC70LDQvdGL0YHRgtGLINCw0YPRi9GA0YHRi9C90YMg0YHQuNC90LTRgNC+0LzRi9C9INGI0LDSm9GL0YDQsNC00YsuINCR0rHQuyDTmdGA0YLSr9GA0LvRliDQvtGA0L3QsNC70LDRgdGD0YvQvdCwINCx0LDQudC70LDQvdGL0YHRgtGLINCw0YPRgNGDINGC0q/RgNGW0L0g0LDRgtC40L/QuNGP0LvRiyDQtNC10L8g0YLQtSDQsNGC0LDRg9KT0LAg0LHQvtC70LDQtNGLLiDQkNC7LCDQtdGA0LXRgdC10Log0LDQtNCw0LzQtNCw0YDQtNCwINC205nQvdC1IDEzLTE1INC20LDRgdGC0LDRgNC00LAg0L7QuyDSm9Cw0LvRi9C/0YLRiyDQvtGA0L3Ri9C90LAg0Y/Sk9C90LgsINC+0qMg0LbQsNKbINGC06nQvNC10L3Qs9GWICDQvNGL0pvRi9C9INCw0LnQvNCw0pPRi9C90LTQsCDQvtGA0L3QsNC70LDRgdCw0LTRiy4g0KHQvtC90YvQvNC10L0g0pvQsNGC0LDRgCwg0LHQsNC70LDQu9Cw0YDQtNCwINGW0Ygg0LzQvtGC0L7RgNC40LrQsNGB0Ysg0L3QtdC80LXRgdC1INGC0L7Qu9GL0psg0LTQsNC80YMg0LbSr9GA0LzQtdCz0LXQvdC00ZbQutGC0LXQvSDRltGIINCx06nQu9GW0LPRltC90LTQtSDQvtGA0L3QsNC70LDRgdKb0LDQvSDQvNKv0YjQtdC70LXRgCDSm9C+0LfSk9Cw0LvQvNCw0LvRiyDQutKv0LnQtNC1INCx0L7Qu9Cw0LTRiyAo0LbTmdC90LUg0LbRltKj0ZbRiNC60LUg0ZbRiNC10LrRgtC10YAg0rHQt9GL0L3Ri9GA0LDSmyDQsdC+0LvRg9GL0L3QsCDQsdCw0LnQu9Cw0L3Ri9GB0YLRiykuINCe0YHRiyDQv9Cw0YDQsNC80LXRgtGAINCx0L7QudGL0L3RiNCwLCDQsNGD0YvRgNGB0YvQvdGDINGB0LjQvdC00YDQvtC80Ysg05nRgNGC0q/RgNC70ZYg0LHTqdC70ZbQutGC0LUg0YHQtdC30ZbQu9GW0L8sINCw0YLQuNC/0LjRj9C70Ysg0LHQvtC70YPRiyDQvNKv0LzQutGW0L0uINCd0LXRgNCy0YLRltKjINC40L3QvdC10YDQstCw0YbQuNGP0L3Ri9KjINC00rHRgNGL0YEg0LbQtdGC0ZbQu9C80LXRg9GW0L3QtSDQsdCw0LnQu9Cw0L3Ri9GB0YLRi9C00LAg0LDRgtC40L/QuNGP0LvRiyDQvdC10LzQtdGB0LUg0LTQuNGE0YTRg9C30LTRiyDQsNGD0YvRgNGB0YvQvdGD0LvQsNGAINCx0LDQudKb0LDQu9GD0Ysg0LzSr9C80LrRltC9LiDQotCw0pPRiyDQsdGW0YAg0LrTqdGA0YHQtdGC0LrRltGIINC+0Lsg0ZbRiNC10LrRgtC10YDQtNC1INC70LjQvNGE0L7QuNC00YLRiyDRgtGW0L3QvdGW0qMg0LHQsNGB0YvQvCDQsdC+0LvRg9GLLiDQkdKx0Lsg0LrTqdGA0YHQtdGC0LrRltGIINKb0LDQsdGL0L3RgyDQv9GA0L7RhtC10YHRgdGW0L3RltKjINC60q/RgNC00LXQu9C10L3Rg9GW0L0g0L3QtdC80LXRgdC1INC20LjRliDQsdC+0LvRg9GL0L0g0LrSr9GI0LXQudGC0LUg0LDQu9Cw0LTRiy4g0prQsNCx0YvQvdGDINC/0YDQvtGG0LXRgdGB0ZbQvdGW0qMg05nRgNGC0q/RgNC70ZYg0LbQtdGA0LTQtSDQttKv0YDRg9GWINC00LUg0LrTqdGA0ZbQvdGD0ZYg0LzSr9C80LrRltC9LCDQttOZ0L3QtSDQsdKx0Lsg0LbQsNKT0LTQsNC50LTQsCDQsNGD0YvRgNGB0YvQvdGDINCw0YLQuNC/0LjRj9C70Ysg0LHQvtC70LDQtNGLLiDSmtC+0YDRi9GC0YvQvdC00YvQu9Cw0Lkg0LrQtdC70LUsINCx0LDQu9Cw0LvQsNGA0LTQsNKT0Ysg0pvSsdGA0YHQsNKbINKb0LDQsdGL0YDSk9Cw0YHRi9C90YvSoyDQtdGA0LXRgdC10LrRgtC10YDQs9C1INKb0LDRgNCw0pPQsNC90LTQsCDQttKx0pvQsCDQvtGA0L3QsNC70LDRgdCw0YLRi9C90LTRi9KT0YvQvSDQsNC50YLSm9GL0Lwg0LrQtdC70LXQtNGWLCDQsdKx0Lsg0LHSsdC70YjRi9Kb0LXRgtGC0LXRgNC00ZbSoyDSm9GL0YHSm9CwINOZ0YDRliDQs9C40YHRgtC+0LvQvtCz0LjRj9C70YvSmyDQutC+0LzQv9C+0L3QtdC90YLRgtC10YDRliDQsdC+0LnRi9C90YjQsCDQttC40YvRgNGL0LvRgyDSm9GL0LfQvNC10YLRltC90ZbSoywg0L7Sk9Cw0L0g0pvQsNGC0YvRgdGC0Ysg0LHQtdC70L7QutGC0LDRgNC00YvSoyDQsdC+0LvQvNCw0YPRi9C9INCw0LbRi9GA0LDRgtCw0LzRi9C3LiDQkdKx0LvRiNGL0psg0LXRgiDRgtC+0L3Rg9GB0YvQvdGL0qMg05nQu9GB0ZbQtyDQsdC+0LvRg9GLINGB0LXQsdC10LHRltC90LXQvSDQtNC1INCw0YPRi9GA0YHRi9C90YMg0LHQtdC70LPRltC70LXRgNGWINCw0YLQuNC/0LjRj9C70Ysg0YLSr9GA0LTQtSDRgtCw0YDQsNC70YvQvywg0LrTqdGA0ZbQvdGW0YEg0LHQtdGA0YPRliDQvNKv0LzQutGW0L0uINCh0L7QvdGL0LzQtdC9INKb0LDRgtCw0YAsINCx0rHQuyDQttCw0pPQtNCw0Lkg0LHQsNGA0YvRgdGL0L3QtNCwICjSm9Cw0LHRi9C90YMpINC00rHRgNGL0YEg0LTQuNCw0LPQvdC+0Lcg0LbTmdC90LUg0LXQvCDSm9C+0LvQtNCw0L3RgyDSr9GI0ZbQvSDRgtC+0LvRi9KbINGC0LXQutGB0LXRgNGW0LvRg9C00LXQvSDTqdGC0YMg0pvQsNC20LXRgiDQtdGC0ZbQu9C10LTRli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0" table:style-name="ce1">
            <text:p>915280</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IDEt0JbQsNKj0LAg0YLSsdKT0LDQvSDQsdCw0LvQsNC00LAg0LHSsdC7INGC0L7QutGB0LjQutCw0LvRi9KbINGN0YDQuNGC0LXQvNCwINOp0LzRltGA0ZbQvdGW0qMg0LDQu9KT0LDRiNKb0Ysg0LrSr9C90ZbQvdC00LUgINC/0LDQudC00LAg0LHQvtC70LDRgtGL0L0g0LbQsNC70L/RiyDRgtC10YAg0LDRg9GA0YPRiy7QntC7INCx0LXRgtGC0LUg0LzQsNCz0LjRgdGC0YDQsNC70YzQtNCwINCx06nQu9GW0LPRltC90LTQtSDQttOZ0L3QtSDQsNGP0psg0pvQvtC70LTQsNGA0LTQsCwg0LrQtdGD0LTQtSDQsNC50LzQsNKb0YLQsNGA0YvQvdC00LAg0L7RgdGL0L3QtNCw0LkgINC00LDSmyDQv9Cw0LnQtNCwINCx0L7Qu9Cw0LTRiy4gIC7QotCe0LrRgdC40LrQsNC70YvSmyDRjdGA0LjRgtC10LzQsCAg0LrRltGI0LrQtdC90YLQsNC5INGC0LXRgNGW0LTQtdCz0ZYg0LTQsNKbLCDQv9Cw0L/Rg9C70LAg0L3QtdC80LXRgdC1INC/0YPRgdGC0YPQu9CwINGC0q/RgNGW0L3QtNC1INC606nRgNGW0L3RltGBINCx0LXRgNC10LTRli7QotC10YDRltC00LUg0pvRi9C30YvQuyDQvdC10LzQtdGB0LUg0pvRi9C30pPRi9C70YvRgiDQtNCw0pvRgtCw0YAg0L/QsNC50LTQsCDQsdC+0LvRi9C/LCDQvtC70LDRgNC00YvSoyDQvtGA0YLQsNGB0YvQvdC00LAg0LrRltGI0LrQtdC90LUg0LDSm9GI0YvQuyDRgdCw0YDRiyDRgtGD0LnRltC90LTQtdGAINGC0q/RgNGW0L3QtNC1INGB0LjQv9Cw0YLRgtCw0LvQsNC00YsuINCW0LDQu9C/0Ysg0LHSsdC7INC20LDSk9C00LDQuSAyLTMg0LrSr9C9INGW0YjRltC90LTQtSDQv9Cw0LnQtNCwINCx0L7Qu9GL0L8gNy0xMCDQutKv0L0g0ZbRiNGW0L3QtNC1INC10LzQtNC10YPRgdGL0LcgICDQttC+0LnRi9C70YvQvyDQutC10YLQtdC00YsuICDQkdKx0Lsg0YLQvtC60YHQuNC60LDQu9GL0psg0Y3RgNC40YLQtdC80LDSk9CwINGC0LXRgNGW0L3RltKjINC80L7RgNGE0L7Qu9C+0LPQuNGP0LvRi9KbINGN0LvQtdC80LXQvdGC0YLQtdGA0ZYg0LTSsdGA0YvRgSDQvNC10YLQvtCx0L7Qu9C40LfQvCDQttKv0YDQvNC10Lkg0LHRltGC0LXQu9GW0L8g0pvQsNC70YPRi9C90YvQvSwg0pvQsNCx0YvQvdGD0LTRiyDRgtGD0YvQvdC00LDRgtCw0LTRiyAsINC20LXRgtGW0LvQvNC10LPQtdC9INC/0L7RgiDQsdC10LfQtNC10YDRliAsINGI0LDRiCDRhNC+0LvQuNC60YPQu9C00LDRgNGLLiDQltCw0LvQv9GLINCx0rHQuyDRjdGA0LjRgtC10LzQsCDQsdCw0LvQsCDRgtGD0YvQu9KT0LDQvdC90LDQvSDQutC10LnRltC9INC20LDRgtGL0YDQtNCw0L0g0YLRi9GBINC20LDSo9CwINC+0YDRgtCw0pPQsCDQsdC10LnRltC80LTQtdC70YPRltC90LUg0LHQsNC50LvQsNC90YvRgdGC0Ysg0LbTmdC90LUg0L/QvtC70LjQvNC+0YDRhNGC0YsgINCx06nRgNGC0L/QtdC80LXQvSDRltC70LXRgdC1INC20q/RgNC10YLRltC9INGC0LXRgNGW0L3RltKjICDRgtGA0LDQvdC30LjRgtC+0YDQu9GL0psg0pvRi9C30LDRgNGD0Ysg0LTQtdC/INCw0LnRgtGB0LDSmyDQsdC+0LvQsNC00Ysu0J3QtdCz0ZbQt9Cz0ZYg0YHQuNC80L/RgtC+0LzQtNGLINCw0LnRgtGB0LDSmyDRgtC10YDRliDQttCw0LzRi9C70pPRi9GB0YvQvdGL0qMg0pvRi9C30LDRgNGD0Ysu0KHQtdCx0LXQsdGWINC20LDSo9CwINOp0LzRltGA0LPQtSDQutC10LvQs9C10L0g0YHQvtKjINCw0YPQsNC00LDSk9GLINGC0LXQvNC/0LXRgNCw0YLRg9GA0LDSk9CwINOZ0YAg0YLSr9GA0LvRliDQuNC90YTQtdC60YbQuNGPICwg0LDQu9C70LXRgNCz0LXQvdC00LXRgNCz0LUg0LHQsNC50LvQsNC90YvRgdGC0Ysg0YLRg9GL0L3QtNCw0LnQtNGLLtGB0LXQsdC10LHRliDQsdCw0LvQsNC00LAgINC40LzQvNGD0L3QtNGL0psg0LbSr9C50LUg05nQu9GWINGC0L7Qu9GL0psg0pvQsNC70YvQv9GC0LDRgdC/0LDSk9Cw0L0g0LDSk9C30LDSk9CwINGC0q/RgdC60LXQvSDQuNC90YTQtdC60YbQuNGP0pPQsCDQttCw0YPQsNC/INKb0LDQudGC0LDRgNGD0Ysg05nQu9GB0ZbQt9C00ZbQs9GW0L3QtdC9LCDRgtCw0pPRi9C00LAg0LHQsNC70LAg0LDQvdCw0L3Ri9KjINC20LDRgtGL0YDRi9Kj0LTQsCDQttCw0YLSm9Cw0L0g0LrQtdC30ZbQvdC00LUg0L/Qu9Cw0YbQtdC90YLQsCDQsNGA0pvRi9C70Ysg05nRgNGC0q/RgNC70ZYg0LPQvtGA0LzQvtC90LTQsNGA0LzQtdC9INKb0LDQvNGC0LDQvNCw0YHRi9C3INC10YLRltC70LXQtNGLLCDTqdC80ZbRgNCz0LUg0LrQtdC70LPQtdC9INGB0L7SoyDQsNC90LDQtNCw0L0g0LHQsNC70LDSk9CwINCx0LXRgNGW0LvQvNC10LnQtNGLLCDQvtGB0Ysg0YHQtdCx0LXQsdGC0LXRgNC00ZbSoyDQvdOZ0YLQuNC20LXRgdGW0L0g0pvQvtGB0pvQsNC90LTQsCDQsdCw0LvQsNC90YvSoyDQttCw0qPQsCDTqdC80qPRgNCz0LUg0LHQtdC50ZbQvNC00LXQu9GDINC+0YHRi9C90LTQsNC5INGC0L7QutGB0LjQutCw0LvRi9KbINGN0YDQuNGC0LXQvNCwINC205nQvdC1INC00LUg0LHQsNGB0pvQsCDQutOp0YDRltC90ZbRgdGC0LXRgCDQsdC10YDRg9GLINC80q/QvNC60ZbQvS4gIDItINGB0rHRgNCw0pvSm9CwINC20LDRg9Cw0L8uINC20LDQu9C/0Ysg0YHQvtKb0YvRgCDRltGI0LXQuiAg0ZbRiNGC0ZbSoyDQvtC9INC20LDSmyDQsdOp0LvRltCz0ZbSo9GW0qMg0YLTqdC80LXQvdCz0ZYg0LHTqdC70ZbQs9GW0L3QtNC1ICDQvtGA0L3QsNC70LDRgdKb0LDQvSAuINCR0rHQuyDRgtC+0psg0ZbRiNC10LrQutC1INCx0LXQutGW0YLRltC70LPQtdC9INKx0YHQsNKbINKb0rHRgNGC0YLTmdGA0ZbQt9C00ZYg0pvQvtGB0YvQvNGI0LAgINKb0rHRgNGL0LvRi9C8INCx0L7Qu9GL0L8g0YLQsNCx0YvQu9Cw0LTRiyAu0J3QtdCz0ZbQt9GW0L3QtdC9INCx0LDQu9Cw0YDQtNCwINGW0Ygg0pvSsdGL0YHRi9C90LDQvSAg0YHTmdC7INC20L7Sk9Cw0YDRiywg0LHQsNGD0YvRgNKT0LAg0LbQsNKb0YvQvSDQvtGA0L3QsNC70LDRgdCw0LTRiy4g0LHSsdC7INGW0YjQtdC60YLRltKjINKb0LDQsdGL0L3Rg9GLINC20LXQtNC10LsgINCw0L/Qv9C10L3QtNC10YbQuNGCINC00LXQvyDQsNGC0LDQu9Cw0LTRiy4g0JHSsdC7INC00LjQsNCz0L3QvtC30LTRiyDRgNCw0YHRgtCw0YMg0q/RiNGW0L0g0rHQu9GM0YLRgNCwINC00YvQsdGL0YHRgtGL0psg0LHQtdC50L3QtdC70YMsINCa0YIg0YHQuNGP0pvRgtGLINGC0LXQutGB0LXRgNGD0LTQtdC9INOp0YLQutGW0LfRgyDQutC10YDQtdC6LiDQsdKx0Lsg0LbQsNKT0LTQsNC50LTQsCDQsdCw0LvQsNC90Ysg0pvQsNGA0LDRgyDQsdCw0YDRi9GB0YvQvdC00LAg0ZbRiNGC0ZbQvSDQvtC9INC20LDSmyDRgtOp0LzQtdC90LPRliDQsdOp0LvRltCz0ZbQvdKjINCw0YPRgNGB0YvQvdGD0Ysg0LHSsdC7ICDQsNC/0L/QtdC90LTQtdGG0LjRgiAg0LTQtdC/INC00LjQsNCz0L3QvtC3INKb0L7QudGD0pPQsCDQsdC+0LvQsNC00Ysu0JHSsdC7INC20LDSk9C00LDQuSDRhdC40YDRg9GA0LPQuNGP0LvRi9KbINC+0L/QtdGA0LDRhtC40Y8g0LbQsNGB0LDRgyDQutC10YDQtdC6INC10LrQtdC90ZbQvSDQsdGW0LvQtNGW0YDQtdC00YsuICDQldGA0LXRgdC10LrRgtC10YDQs9C1INKb0LDRgNCw0pPQsNC90LTQsCDQsdCw0LvQsNC70LDRgNC00LAg0LDQv9C10L3QtNC40YbQuNGCINC20LjRliDTmdGA0ZYg0YLQtdC3INC00LDQvNC40LTRi9C00LAg05nRgNGWINKb0LDRgNCw0LkgINC/0LXRgNC40YLQvtC90LjRgtC60LUg0Y/Sk9C90Lgg0L7QtNCw0L0g0pvQsNGC0YLRiyDQsNGD0YAg0pvQsNCx0YvQvdGD0pPQsCAg0YPQu9Cw0YHRi9C/INC60LXRgtGDINKb0LDRg9C/0Ysg0LHQsNGALiDQvdC10LPRltC30ZbQvdC10L0g0LDQv9C10L3QtNC40YbQuNGCINKb0LDQsdGL0L3Rg9GLINGC0LXQtyDQsdCw0YHRgtCw0LvRi9C/INC60ZbQvdC00ZbQuiDQsNC50LzQsNKT0YvQvSwg0ZbRiCDQsNC50LzQsNKT0YvQvdC00LAg0LDRg9GA0YHRi9C90YMg0LHQvtC70LDQtNGLICwg0pvSsdGB0YMsINC905nQttGW0YHRgtGL0qMg0LrQtdGI0ZbQs9GD0YsgLNGC0LXQvNC/0LXRgNCw0YLRg9GA0LAg0LrTqdGC0LXRgNGW0LvRgyDRgdC40Y/Sm9GC0Ysg0YHQuNC80L/RgtC+0LzQv9C00LDRgCDQsdC+0LvRg9GLICDQvNGD0LzQutGW0L0u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588" table:style-name="ce1">
            <text:p>915588</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Mi4g0KXQuNGA0YPRgNCzIDUg0LbQsNGB0LDRgCDQsdCw0LvQsNKT0LAg0pvQsNGA0LDSk9Cw0L0g0LrQtdC30LTQtSDQttC10LTQtdC7INCw0L/Qv9C10L3QtNC40YbQuNGCINCw0L3Ri9Kb0YLQsNC70pPQsNC9IC0g0LHRg9C7INGB0L7Sm9GL0YAg0ZbRiNC10LrRgtGW0qMg0pvSsdGA0YIg0YLTmdGA0ZbQt9C00ZYg06nRgdGW0L3QtNC00ZbRgdGW0L3RltKjINKb0LDQsdGL0L3Rg9GLINCx0L7Qu9GL0L8g0YLQsNCx0YvQu9Cw0LTRiyDQttOZ0L3QtSDQtNC1INC20LXQtNC10Lsg0YXQuNGA0YPRgNCz0LjRj9C70YvSmyDQsNGA0LDQu9Cw0YHRg9C00Ysg0YLQsNC70LDQvyDQtdGC0LXRgtGW0L0g0LHQsNC70LDQu9Cw0YAg0LbQsNGB0YvQvdC00LDSk9GLINKb0rHRgNGB0LDSmyAg0pvRg9GL0YHRi9C90YvSoyDQtdKjINC20LjRliDQsNGD0YDRg9C70LDRgNGL0L3Ri9KjINCx0ZbRgNGWIC4g0JHQsNC70LAg0LrQtdC30ZbQvdC00LUg0LDQv9C/0LXQvdC00LjRhtC40YIg06nRgtC1INGC0LXQtyDQtNCw0LzQuNC00Ysg0LbTmdC90LUg0LbQuNGWINC/0LXRgNC40YLQvtC90LjRgtGC0LUg0LDRg9GA0YPQtNGL0qMg0LDRg9GL0YAg0LDRgdKb0YvQvdGD0YvQvdCwINOZ0LrQtdC70LXQtNGWICwg0LXRgNC10YHQtdC60YLQtdGA0LTQtSDTmdGB0ZbRgNC10YHQtSDTqdC80ZbRgNGW0L3RltKjINCw0LvSk9Cw0YjSm9GLINC20LDRgdGC0LDSk9GLINCx0LDQu9Cw0LvQsNGA0LTQsCAuINCW0LXQtNC10Lsg0LDQv9C/0LXQvdC00LjRhtC40YLRgiDQutC10Lcg0LrQtdC70LPQtdC9INC20LDRgdGC0LAg0LHQvtC70YPRiyDQvNKv0LzQutGW0L0gLiDQmtOp0LHRltC90LXRgdC1IDcg0LbQsNGB0YLQsNC9INC60LXQudGW0L0g0LHQsNC50pvQsNC70LDQtNGLIC4g0rDQu9C00LDRgCDQvNC10L0g0pvRi9C30LTQsNGAINC20LjRliDQsNGD0YvRgNCw0LTRiyAuIDMg0LbQsNGB0YLQsNC9INCw0YHSm9Cw0L0g0LHQsNC70LDQu9Cw0YDQtNCwINC20ZbRgtGWINCw0L/Qv9C10L3QtNC40YbQuNGCINCx0ZbRgNGC0ZbQvdC00LXQvyDQsdCw0YHRgtCw0LvQsNC00YsgLiDQndC10LPRltC30LPRliDRgdC40L/QvNGC0L7QvNC00LDRgNGL0L3QsCDRgtC+0pvRgtCw0LvQsNGC0YvQvSDQsdC+0LvRgdCw0LwgLSAg0LDRg9GL0YDRgdGD0L3RgyDQttC40ZYg0LrRltC90LTRltC6INC20LDQvdGL0L3QtNCwINGB0L7QtNCw0L0g0LrQtdC50ZbQvSDQsdKv0LrRltC7INGW0YjRgtGWINCx0LDRgdGL0L8gLCDRgtC10Log0LHRltGA0L3QtdGI0LUg0YHQsNKT0LDRgtGC0LDQvSDQutC10LnRltC9INC+0qMg0LbQsNKbINC80YvSm9GL0L0g0LDQudC80LDSk9GL0L3QtNCwINCw0YPRi9GA0YHRi9C90LDQtNGLIC4g05jQtNC10YLRgtC1INCw0YPRi9GA0YHRi9C90YMg0YLSsdGA0LDSm9GC0Ysg0YLSr9GA0LTQtSDQttKx0YDQtdC00ZYgLiDSmtKx0YHRgyDTmdC00LXRgtGC0LUg0LHRltGAINGA0LXRgiDQsdC+0LvQsNC00YsgLiDQmtC10LnQsdGW0YAg0LHQsNC70LDQu9Cw0YDQtNCwINC905nQttGW0YEg0LrQtdGI0ZbQs9GD0ZYg0LHQsNC50pvQsNC70LDQtNGLIC4g0JHRltGA0ZbQvdGJ0ZYg0YHQsNKT0LDRgtGC0LDSk9GLINC00LXQvdC1INGC0LXQvNC/0LXRgNCw0YLRg9GA0LDRgdGLINC20ZbRgtGWINCw0L/Qv9C10L3QtNC40YbQuNGC0YLRltKjINCw0YHSm9GL0L3QtNCw0pPQsNC9INGC0q/RgNGW0L3QtNC1INKb0LDQu9GL0L/RgtGLIC4g0J3QtdC80LXRgdC1INGI0LDQvNCw0LvRiyDQttC+0pPQsNGA0Ysg0LHQvtC70LDQtNGLIC4g05jQtNC10YLRgtC1INKx0LnSm9GLINCx0rHQt9GL0LvQtNCw0LTRiyAsINGC05nQsdC10YIg0YLTqdC80LXQvdC00LXQudC00ZYg0L3QtdC80LXRgdCy0LUg0LzSr9C70LTQtdC8INCx0L7Qu9C80LDQudC00YsgLiDQndOZ0YDQtdGB0YLQtdC70LXRgNC00ZbSoyDSm9Kx0YDRgiDRgtOZ0YDRltC30LTRliDTqdGB0ZbQvdC00ZbRgdGWINKb0L7So9GL0YAg0LrQvtC90YIg0YLTmdGA0ZbQt9C00ZYg0LHQvtC70YvQvyDQutC10LvQtdC00ZYgLCDSsdC30YvQvSDRiNCw0LbRi9GA0pvQsNC50YvQvdGL0qMg0LHQvtC70YPRi9C80LXQvSAgINC20L7Sk9Cw0YDRiyDSm9C+0LfSk9Cw0LvRi9GB0YHSm9CwINC40LUg0LbTmdC90LUg0ZbRiCDSm9GD0YvRgdGL0L3Ri9KjINC60LXQtyDQutC10LvQs9C10L0g0LbQtdGA0ZbQvdC00LUg0L7RgNC90LDQu9GD0Ysg0LzSr9C80LrRltC9IC4g0KHQvtC90YvQvNC10L0g0pvQsNGC0LDRgCAsINGA0LXRgtGA0L7RgdC10YLQsNC70LTRiyAgLiDQntKT0LDQvSDQutGW0YDRgyDQttC+0LvRiyDQutC10qMg0LDRiNGL0LvSk9Cw0L0g0LHRltGA0ZbQvdGI0YjRliDQttCw0YHRgtCwINKb0LDSm9C/0LDSm9GI0LAg0pvQsNC70YvQv9GC0LDRgdCw0LTRiyAuINCW0LDSo9CwINGC0YPRi9C70pPQsNC9INCx0LDQu9Cw0LvQsNGA0LTRi9KjINGB0L7Sm9GL0YAg0ZbRiNC10LPRliDSsdC30YvQvSDQutC10qPQtNC10YMg0LHQvtC70LDQtNGLIC7QqNCw0LzQsNC80LXQvSDQtdGA0LXRgdC10Log0LDQtNC70LDQvNC90YvRltKjINGB0L7Sm9GL0YAg0ZbRiNC10LPRliDQttGD0LDQvSDRltGI0LXQutGC0ZbSoyDSsdC30YvQvdC00YvSk9GL0L3Ri9KjIDIwINC00LDQvSDQsdGW0YAg0LHTqdC70ZbQs9GWINC60LXSoyDQsdC+0LvQsNC00YsgLiDQkNC7INC905nRgNC10YHRgtC10L3RltKjINGB0L7Sm9GL0YAg0ZbRiNC10LPRliDQttGD0LDQvSDRltGI0LXQs9GW0L3RltKjINC+0L3QvdCw0L0g0LHRltGAINCx06nQu9GW0LPRltC90LTQtdC5IC4g0J7QvdGL0qMg0q/RgdGC0ZbQvdC1INGB0L7Sm9GL0YAg0ZbRiNC10LrRgtGW0qMg0LXRgiDSm9Cw0LHQsNGC0YzRgtCw0YDRiyDQsdGW0YDQutC10LvQutGWINCx0L7Qu9C80LDQudC00YsgLiDTmNGB0ZbRgNC10YHQtSDQvtC90YvSoyDQsNC50L3QsNC70LzQsNC70Ysg0LXRgiDSm9Cw0LHQsNGC0Ysg0LHQvtGB0YLQsNGDINCx0L7Qu9Cw0LTRiyAuINCQ0LsgLCDQvtC90YvSoyDSsdC30YvQvdC90LDQvSDQsdC+0LnQu9Cw0Lkg0L7RgNC90LDQu9Cw0YHSm9Cy0LDQvSDQtdGCINKb0LDQsdCw0YLRiyDTqdGC0LUg0L3RltC30ZbQuiAuINCV0YIg0pvQsNCx0LDRgtGL0L3Ri9KjINC+0YHRi9C70LDQudGI0LAg0L7RgNC90LDQu9Cw0YHRg9GL0L3QsNC9INC20LDSo9CwINGC0YPRi9C70pPQsNC9INGC0L3TmdGA0LXRgdGC0YzQtdC90ZbSoyDRgdC+0pvRi9GAINGW0YjQtdCz0ZYg0LHRltGAINC20LDSk9GL0L3QsNC9INKb0q/SsdGA0YLSm9CwINKx0pvRgdCw0L8g0YjRi9KT0LDQstC00YsgLiDQntC90YvSoyAtINGW0YjRltC90LUg0LXRgiDSm9Cw0LHQsNGC0YvQvdGL0qMg05nRgNGC0q/RgNC70ZYg0LbQuNC90LDQu9GD0YvQvdCw0L0g0YHQvtKb0YvRgCDRltGI0LXQutGC0LjRltKjINC60LXQudCx0ZbRgCDQsdOp0LvRltC90LXQvSDRltGI0LrRliDRgdGW0LvQtdC60LXQuSDSm9Cw0LHQsNGC0Ysg0LrTqdC60LbQuNC10Log0pvQsNCx0LDRgtGL0L3QsCDTqdGC0LUg0YLRi9KT0YvQtyDQttCw0YLRjNCw0LTRiyAuINCc0rHQvdGL0qMg06nQt9GWINKb0LDQsdGL0L3RgyDQv9GA0L7RhtC10YHRgdGWINC60LXQt9GW0L3QtNC1ICDRgdC+0pvRi9GAINGW0YjQtdC60YLRltKjINGC0LXQtyDRgtC10YHRltC70ZbQvyDQutOp0LrQttC40LXQutGC0ZbSoyDQttGL0LvQtNCw0Lwg0pvQsNCx0YvQvdGD0YvQvdCw0L0g0pvQu9Cw0YHQsNC00YsgLiDQodC+0pvRi9GAINGW0YjQtdC60YLRltKjINKb0LDQsdGL0L3Rg9GL0L3QsCDQvtC90YvSoyDSm9Cw0LHQsNGC0YLQsNGA0YvQvdC00LAg0L7RgNC90LDQu9Cw0YHSm9Cw0L0g0LHQtdC30LTRliDRgtC60LDQvdGM0LTQtdGA0LTRltKjINC70LjQvNGE0L7QuNC00YLRiyDQutC70LXRgtC60LDQu9Cw0YDRi9C90YvSoyDQttC10YLRltC70YPRliDSr9C70LrQtdGO0ZbQvNC10L0gLCDRltGB0ZbQvdGD0ZbQvdC10L0g0YHQvtKb0YvRgCDRltGI0LXQuiDSm9Cw0LLQsdGL0L3QsCDQsdCw0YHRgtCw0LnQtNGLIC4g0K/Sk9C90LPQuCAsINC90LXSk9Kx0YDQu9GL0Lwg0ZbRgdGB0LUg0LvQuNC80YTQvtC40LTRgtGLINGC0LrQsNC90YzQtNC10YDQtNGW0qMg0LrQu9C10YLQutCw0LvQsNGA0Ysg0LrTqdC/INCx0L7Qu9GB0LAgLCDSm9Cw0LHRi9C90YMg0L/RgNC+0YbQtdGB0YHRliDQtNC1ICDRgdC+0pPSsdGA0LvRi9C8INC00q/RgNGD0ZYg0YvSm9GC0LjQvNCw0LsgLiAzINC20LDRgdKb0LAg0LTQtdC50ZbQvdCz0ZYg0LHQsNC70LDQu9Cw0YDQtNCwINGB0L7Sm9GL0YAg0ZbRiNC10Log0LDRg9GA0YPRi9C90YvSoyDSm9GC0LUg0YHQuNGA0LXQuiDQutC10LfQtNC10YHRg9GWIC0gLCDQsNC7IDEg0LbQsNGB0pvQsCDQtNC10LnRltC90LPRliDQsdCw0LvQsNC00LvQsNGA0LTQsCDQvtC90YvSoyAg0LrQtdGF0LfQtNC10YHQv9C10YPRliDQvtGB0Ysg0LvQuNC80YTQvtC40LQg0YLQutCw0L3RjNC00LXRgNGWINC60LvQtdGC0LrQsNC70LDRgNGL0L3Ri9KjINCw0LfQtNGL0pPRi9C90LAg0LHRjNCw0LnQu9Cw0L3Ri9GB0YLRiyDQtdC60LXQvdC10L3RliDQsdC10LvQs9GW0LvRliDQsdC+0LvQsNC00YsgLiDQsNGIINGW0YjQtdC6INC90LXQvNC10YHQtSAg0ZbRiNC10LrRgtGW0qMg0YnQsNC80LDQvNC10L0gMi01INC80YvSm9GL0L0g0ZbRiNC10LosIDMtNSDSsdC30YvQvdC00YvSk9GL0L0g0pvSsdGA0LDQudC00Ysg0J7QvSDQtdC60ZYg0LXQu9GWINGW0YjQtdC60YLRliDSm9C+0YHQv9Cw0pPQsNC90LTQsCAuINCc0YvSm9GL0L0g0ZbRiNC10Log0LjQu9C10L7RgtC10LrQsNC70LTRi9KbINKb0LDSm9C/0LDSm9GI0LDQvNC10L0g0LDRj9Kb0YLQsNC70LDQtNGLIC4g0JHQsNGD0LPRg9C90LjRjyDQttCw0L/Sm9GL0YjRiyAuINCV0YDRgtC1INC20LDRgdGC0LDSk9GLINCx0LDQu9Cw0LvQsNGA0LTQsCDQuNC70LXQvtGC0LXQutCw0LvQtNGL0psg0pvQsNKb0L/QsNKb0YjQsNC80LXQvSDRgdCw0LvRi9GB0YzRgtGL0YDQvNCw0LvRiyDTmdC70YHRltC3IC4g0KHQvtC90LTRi9Kb0YLQsNC9ICwg0ZbRiNC10LrRgtGW0qMg0LHQsNC60YLQtdGA0LjRj9C70YvSmyDRhNC70L7RgNCw0pPQsCDQsdCw0Lkg0LbQsNGC0LDQtNGLINC80YvSm9GL0L0g0ZbRiNC10LrQutC1INGC0LXRgNGW0YEg0YLSr9GB0YPRliDQvNKv0LzQutGW0L0gLCDQvtC90YvSoyDRgtC10YDQvNC40L3QsNC70LTRiyDQsdOp0LvRltC80ZbQvdGW0ZbSoyDSm9Cw0LHRi9C90YPRi9C90LAg0YHQtdCx0LXQvyDQsdC+0LvRg9GLINC80q/QvNC60ZbRltC9IC4g0JDQvdCw0YLQvtC80LjRj9C70YvSsSDQtdGA0LXQutGI0LXQu9GW0LrRgtC10YDRliDQsdC+0LnRi9C90YjQsCDRgdC+0pvRi9GAINGW0YjQtdC6ICDTqdGB0LrRltC90ZbQvdGW0qMg0ZbRiNC10LrQv9C10L0g0LbQsNC70pPQsNGB0pvQsNC9INC20LXRgNGW0L3QtNC10LPRliDSm9Cw0LvSm9Cw0L3RiNCw0L3Ri9KjINC006nSo9Cz0LXQu9C10LrRgtGWINCx0L7Qu9GD0Ysg0LbQsNGC0LDQtNCy0YsgLiDQntGB0YvQvdGL0qMg05nRgdC10YDTmdC90LXQvSDRgtCw0LzQsNKb0YLRi9KjINKb0LDQu9C00YvSsdKb0YLQsNGA0YsgLCDTmdGA0YLSr9GA0LvRliDSm9Kx0YDRgtGC0LDRgCDRgdC+0pvRi9GAINGW0YjQtdC6INOp0YHQutGW0L3RltC90ZbSoyDRltGI0ZbQvdC1INGC0q/RgdGW0L8gICAsINC+0L3RiyDSm9Cw0LHRi9C90LTRi9GA0YPSk9CwINGL0pvRgtC40LzQsNC7ICAuICAgINCG0YjQtdC60YLQtdCz0ZYg0YjQsNGA0LHRiyDQvNCw0Lkg0LDQtNCw0Lwg0ZbRiNGW0L3QtNC10LPRliDRgi7RgNC70ZYg0LDRgdKb0YvQvdGD0LzQtdC9INKb0LDQsdGL0L3Rg9C00YvSoyDRgtCw0YDQsNC70YPRi9C90LAg0LbQvtC7INCx0LXRgNC80LXQudGC0ZbQvSDSm9C+0YDSk9Cw0YPRiNGLINC+0YDQs9Cw0L0gLiDQltCw0qPQsCDRgtGD0YvQu9KT0LDQvSDQsdCw0LvQsNC70LDRgNC00LAg0L7QuyDQvdC10LPRltC30ZbQvdC10L0gNCDSm9Cw0LHQsNGCINC606nQutC10YLRgtC10L0g0YLSsdGA0LDQtNGLIC4g0J7RgdGLINC606nQutC10YLRgtC10LrRgNC00ZbSoyDQvtGA0YLQsNGB0YvQvdC00LAg0LzQsNC5INC60LvQtdGC0LrQsNC70LDRgNGL0L3Ri9KjICDQsNC30LTQsNKT0LDQvSDQttC40YvQvdGC0YvSk9GLINCx0LDRgCAuINCR0LDQu9Cw0LvQsNGA0LTRi9KjINGW0YjQtdCz0ZbQvdGW0L3SoyDQsNC50L3QsNC70YMg0L/RgNC+0YbQtdGB0YHRliAsINC20L/QsNKj0LAg0YLRg9KT0LDQvSDQvdOZ0YDQtdGB0YLQtdC70LXRgNC00LUg0ZbRidGI0LXQs9GW0L3QtNC1IDMvNCDQttCw0YHSm9CwINC00LXQudGW0L0g0YLQvtC70YvSmyDQsNGP0pvRgtCw0LvQvNCw0LnQtNGLIC4g0YHQvtC90YvSoyDTmdGB0LXRgNGW0L3QtdC60L0g0YHQvtKb0YvRgCDRltGI0LXQuiDTqdC30ZbQvdGW0qMg06nRgdC60ZbQvdGW0L3QtdC9INOZ0YDRgtKv0YDQu9GWINCx0LDSk9GL0YLRgtCwICDSm9C+0LfSk9Cw0LvRi9C/INGC0rHRgNGD0Ysg0LzSr9C80LrRltC9IC4g0L7QuyDRgdGL0YDRgtKb0Ysg0ZbRiNGC0ZbSoyDRgdC+0Lsg0LbQsNKbINC20LDRgNGC0YvRgdGL0L3QtNCwINC00LAg0LbQsNGC0YPRiyDRi9Kb0YLQuNC80LDQuyAuINGB0L7QvdC00YvSm9GC0LDQvSDQtNCwICwg0YHQvtKb0YvRgCDRltGI0LXQutGC0ZbSoyDQvtGA0L3Ri9C90LDQvSDRgdC+0LfRi9C/INC+0YLRi9GA0YPRiyDQsNGD0YDRgyDQsdC10LvQs9GW0YHRltC90ZbSoyDTmdGA0YLSr9GA0L/Qu9GWINCw0YLQvtC/0LjRj9GB0Ysg0LHQvtC70YPRi9C90LAg05nRgdGH0LXRgCDQtdGC0LXQtNGWIC4g0JHQsNC70LDQu9Cw0LLRgNC00LDSk9GLINGB0L7Sm9GL0YAg0ZbRiNC10Log0LDRg9GA0YPRi9C90YvSoyDQsdKv0LvRltC90YPRltC90LUg0ZbRiNGC0ZbSoyDSr9GB0YLRltKj0LPRliDSm9Cw0LHQsNGC0YvQvdC00LDSk9GLINC+0YDQs9Cw0L3QtNCw0YDQtNGL0qMg0LXRgNC90LXQutGI0LXQu9GW0LrRgtC10YDRltOZ0L3QtSDTmdGB0LXRgCDQtdGC0LXQtNGWIC4g0JHQsNC70LDQu9Cw0YDQvtC00YvSoyDRgtC10YDRltGB0ZYgICDQttKx0pvQsCAsINGC0LXRgNGWINCw0YHRgtGL0L3QtNCw0pPRiyDQvNCw0Lkg0pvQsNCx0LDRgtGLINCw0LfQtNCw0YMgLiDQldGCINKb0LDQsdCw0YLRgtCw0YDRiyDQsdGW0YAg0LHRltGA0ZbRgNC90LXQvSDQttCw0pvRgdGLINCw0LbRi9GA0LDRgtGL0LvQvNCw0pPQsNC9ICwg0LDQuyDQutOp0Log0LXRgtGC0ZbSoyDQsNC70LTRi9C90LTQsNKT0Ysg0LzQsNC50Ysg0LbQvtKb0pvQsCDRgtOZ0L0g0LHQvtC70YvQvyDQutC10LTQu9C10LTRliAuICAg0JzSsdC90YvSoyDTqdC30ZYg0LrTqdC6INC10YLRgtC10YDQtNGW0qMg0pvQsNCx0YvQvdGD0YvQvSDRgtGW0LrQtdC70LXQuSDRltGI0YLRliDQttCw0YPRi9C/INGC0rHRgNKT0LDQvSDSm9Cw0LHQsNGC0YvQvdCwINCx0LXRgNC10LTRliAuICAgICAgICAgICAgICAgICAgICAxINGB0rHRgNCw0psgOiDQotC+0LrRgdC40LrQsNC70YvSmyDRjdGA0LjRgtC10LzQsCAtINCx0rHQuyDQttCw0qPQsCDRgtGD0YvQu9KT0LDQvSDQvdOZ0YDQtdGB0YLQtdC70LXRgNC80LXQvSDQsdCw0LvQsNC70LDRgNC00LAg0LbQuNGWINC60LXQt9C00LXRgdC10YLRltC9INGC0LXRgNGWINCw0YPRgNGD0YsgLiDTmNGB0ZbRgNC10YHQtSAsINOp0LzRltGA0ZbQvdGW0qMg0LDQu9KT0LDRiNKb0Ysg0LrSr9C90LTQtdGA0ZbQvdC00LUg0L3QtdC80LXRgdC1INCw0L/RgtCw0LvQsNGA0YvQvdC00LAg0LHSsdC7INC60q/QuSDRgtC10YDRltC00LUg0pvRi9C30YvQuyDQtNCw0pvRgtCw0YAg0L3QtdC80LXRgdC1INCx06nRgNGC0L/QtdC70LXQtdGA0LTRltKjINC/0LDQudC00LAg0LHQvtC70YPRi9C80LXQvSDRgdC40L/QsNGC0YLQsNC70LDQtNGLIC4g0J7Qu9Cw0YAg0LrRltGI0LrQtdC90YLQsNC5INC606nQv9GW0YDRiNGW0LrRgtC10YDQvNC10L0g0L3QtdC80LXRgdC1INGW0YDRltKj0LTRliDRgtKv0LnRltC90LTQtdGA0LzQtdC9INC20LDQsdGL0LvRg9GLINC80q/QvNC60ZbQvSAuINOY0LTQtdGC0YLQtSDRgtC+0LrRgdC40LrQsNC70YvSmyDRjdGA0LjRgtC10LzQsCDQsdC10YLRgtC1ICwg0LzQvtC50YvQvdC00LAgLCDQutC10YPQtNC1INC90LXQutC80LXRgdC1INCw0YDSm9Cw0LTQsCDQv9Cw0LnQtNCwINCx0L7Qu9Cw0LTQtNGLIC4g0LbTmdC90LUg0LHRltGA0L3QtdGI0LUg0LrSr9C90L3QtdC9INC60LXQudGW0L0g0LXQvNC00LXRgyDSm9Cw0LbQtdGC0YLQtSDQsdC+0LvQsNC00YsgLiDQotCe0LrRgdC40LrQsNC70YvSmyDRjdGA0LjRgtC10LzQsNC90YvSoyDQvdC10LPRltC30LPRliDQsdOp0LvRltC80LTQtdGA0ZYgLSAxINCi0LXRgNGW0LTQtSDSm9GL0LfRi9C7INC00LDSm9GC0LDRgCDQvdC10LzQtdGB0LUg0YLQsNGC0YPQu9Cw0LvQsNGAINC+0YDRgtCw0YHRi9C90LTQsCDQutGW0YjQutC10L3RgtCw0Lkg0LrTqdC/0ZbRgNGI0ZbQutGC0LXRgNGWINCx0LDRgCAuIDIg0prSsdGB0YMg0L3QtdC80LXRgdC1INCw0YPRi9GA0YHRi9C90YPQtNGL0qMg0LHQvtC70LzQsNGD0Ysg0LHSsdC7INC+0L3RiyAg0LHQsNGB0pvQsCDRgtC10YDRliDQsNGD0YDRg9C70LDRgNGL0L3QsNC9INC80LDRhtGL0YDQsNC00YsgLiAzICAg0JHTqdGA0YLQv9C10LvQtdGA0LTRltKjIC0tIDItMyAg0YjRliDQutKv0L3QtNC10YDRliDQv9Cw0LnQtNCwINCx0L7Qu9GD0Ysg0L3QtdCz0ZbQt9GW0L3QtdC9INC20LDSo9CwINGC0YPRi9C70pPQsNC9INC905nRgNC10YHRgtC10LvQtdGA0LTQtSDRgtC+0LrRgdC40LrQsNC70YvSmyDRjdGA0LjRgtC10LzQsNC90YvSoyDRgdC10LHQtdC/0YLQtdGA0ZYg0YLQvtC70YvSmyDQsNC90YvSm9GC0LDQu9C80LDSk9Cw0L3QuCAsINCx0ZbRgNCw0psg0LHSsdC00Lsg0LDSk9C30LDQvdGL0qMg0LjQvNC80YPQvdC00YvSmyDQttKv0LnQtdGB0ZbQvdGW0qMg0pvQsNC70YvQv9Kb0LAg0LrQtdC70YPRltC90LUg0L3QtdC80LXRgdC1INGB0YvRgNGC0pvRiyDRhNCw0LrRgtC+0YDQu9Cw0YDRi9C90YvSoyDTmdGB0LXRgNGW0L3QtSAsINCc0YvRgdCw0LvRiyDRgtC10LzQv9C10YDQsNGC0YPRgNCw0L3Ri9KjINOp0LfQs9C10YDRg9GWINC90LXQvNC10YHQtSDTmdGA0YLSr9GA0LvRliAg0LfQsNGC0YLQsNGA0LzQtdC9ICDQsdCw0LnQu9Cw0L3Ri9GB0YPRiyDRgNC10LDQutGG0LjRjyDRgNC10YLRltC90LTQtSDSm9Cw0YDQsNGB0YLRi9GA0YvQu9Cw0LTRiyAuINCW0LDSo9CwINGC0YPSk9Cw0L0g0L3TmdGA0LXRgdGC0LXQu9C10YDRltKjINGN0YDQuNGC0LXQvNCw0YHRiyDQsdCw0LvQsNC90YvSoyDSm9Kx0YDRgdCw0pvRgtCw0L0g0YLRi9GBINOp0LzRltGA0LPQtSDQsdC10LnRltC80LTQtdC70YPRltC90LUg0LHQsNC50LvQsNC90YvRgdGC0YsgLiDQttOZ0L3QtSDQv9C+0YDQu9C40LzQvtGA0YTRgtGLINCx06nRgNGC0L/QtdC80LXQvSDRltC70LXRgdC1INC20q/RgNC10YLRltC9INGC0LXRgNGW0L3RltKjINGC0YDQsNC90LfQuNGC0L7RgNC70YvSmyDSm9GL0LfQsNGA0YPRiyAuINCd0LXQs9GW0LfQs9GWICDRgdC40LzQv9GC0L7QvCAtINGC0LXRgNGWINC20LDQvNGL0LvSk9GL0YHRi9C90YvSoyDSm9GL0LfSk9GL0LvRgiDSm9GL0LfRi9C7INGC0q/RgdGWIC4g0JHQsNGB0YLQsNC/0pvRiyDQutOp0YDRltC90ZbRgdGC0LXRgCDQutOp0LHRltC90LXRgdC1INC20LDRgtGL0YDQtNGL0qMg0LbTmdC90LUg0LrQvtGA0YjQsNKT0LDQvSDQsNGD0LDQvdGL0qMg0YLQtdC80L/QtdGA0LDRgtGD0YDQsNGB0YvQvdGL0qMg0LDQudGL0YDQvNCw0YHRi9C80LXQvSDQsdCw0LnQu9Cw0L3Ri9GB0YLRiyAuINGB0L7QvdGL0qMg0YHQsNC70LTQsNGA0YvQvdCw0L0g0LHQsNC70LDQvdGL0qMg0YjQtdGC0LrRliDRgtCw0LzRi9GA0LvQsNGA0YsgLNKb0LDQvSDQsNKT0YvQvNGLINKv0YjRltC9INC205nQvdC1INC60LXRgNGW0YHRltC90YjQtSAg0LbRi9C70YvRgtGDINKv0YjRltC9INC60LXSo9C10LnQtdC00ZYgLiDQodC+0L3QtNGL0pvRgtCw0L0gLCDRgtC10YDRliDSr9GB0YLRliDSm9GL0LfQsNGA0LDQtNGLIC4g0JHSsdC7INGE0LjQt9C40L7Qu9C+0LPQuNGP0LvRi9KbINGN0YDQuNGC0LXQvNCwINCx0L7Qu9GL0L8g0YLQsNCx0YvQu9Cw0LTRiyAuINCk0LjQt9C40L7Qu9C+0LPQuNGP0LvRi9KbINGN0YDQuNGC0LXQvNCwINCx0LDQu9Cw0L3Ri9KjINOp0LzRltGA0ZbQvdGW0qMg0LDQu9KT0LDRiNKb0Ysg0YHQsNKT0LDRgtGC0LDRgNGL0L3QtNCwINCw0LvQsNKb0LDQvdC80LXQvSDRgtCw0LHQsNC9INCw0LnQvNCw0pPRi9C90LTQsCDQutOp0L8g0LrTqdGA0ZbQvdC10LTRliAuINCW0LDSo9CwINGC0YPRi9C70pPQsNC9INC905nRgNC10YHRjNGC0LXQu9C10YDQtNGW0qMg0YPRi9GC0YLRiyDRjdGA0LjRgtC10LzQvNCw0YHRiyAtINCx0rHQuyDQttCw0qPQsCDRgtGD0pPQsNC9INGB05nQsdC40LTRltKjINCw0LvQu9C10YDQs9C40Y8g0LzQtdC00LjQsNGC0L7RgNC70LDRgNGL0L3Ri9KjINCw0LvQu9C10YDQs9C40Y/Qu9GL0psg0YDQtdCw0LrRhtC40Y/Qu9Cw0YDSk9CwINKb0LDRgtGL0YHQsNGC0YvQvSDQttCw0YHRg9GI0LDQu9Cw0YDQtNGL0qMg0LHSsdC30YvQu9GD0Ysg0LrQvdC10LfRltC90LTQtSDQsdOp0LvRltC90LXRgtGW0L0g0LHQuNC+0LvQvtCz0LjRj9C70YvSmyDQsdC10LvQvtGB0LXQvdC00ZYg0LfQsNGC0YLQsNGAINC606nQvyDQvNOp0LvRiNC10YDQtNC1INCx06nQu9GW0L3Rg9GW0L3RltKjINGB0LDQu9C00LTQsNGA0YvQvdCw0L0g0YLQtdGA0ZYg0LDQudC80LDSk9GL0L3Ri9KjINKb0YvQt9Cw0YDRg9GLICwgINC+0Lsg06nQvNGW0YDQtNGW0qMg0LDQu9KT0LDRiNKb0Ysg0LrSr9C90LTQtdGA0ZYg0LzQtdC9INCw0L/RgtCw0LvQsNGA0YvQvdC00LAg0LHQsNC70LDQvdGL0qMg0LDSk9C30LDRgdGL0L3QtNCwINGE0LjQt9C40L7RgNC70L7Qs9C40Y/Qu9GL0psg0YLSr9GA0ZYgLiDSmtCw0L3QtNCw0Lkg0LTQsCAsINCx0ZbRgCDQsNGD0YDRg9C00YvSoyDQsdC10LvQs9GW0YHRliDQtdC80LXRgSAuINCR0LDQu9Cw0L3Ri9KjINGI0LXQutCw0YDQsNC70YvSmyDQttCw0Lkg0LrSr9C50ZbQvdC1ICwg0LHQsNC70LDQvdGL0qMg0pvSsdGA0YHQsNKb0YLQsNC9INGC0YvRgSDTqdC80ZbRgCDQttCw0pPQtNCw0LnRi9C90LAg0LHQtdC50ZbQvNC00LXQu9GD0ZbQvdC1INCx0LDQudC70LDQvdGL0YHRgtGLICDSr9C00LXRgNGW0YHRgtC10YDQs9C1INC20LDRgtCw0LTRiyAuINC20LDSo9CwINGC0YPRi9C70pPQsNC9INC905nRgNC10YHRgtC10LvQtdGA0LTQtSAyMC01MCDQv9Cw0LnRi9C30LTQsCDRg9GL0YLRgtGLINGN0YDQuNGC0LXQvNCwINCx0L7Qu9Cw0LTRiyAuIDItNCDRgtOZ0YPQu9GW0LrRgtC1INC/0LDQudC00LAg0LHQvtC70LDQttC00YsgLCAg0LHRltGAINCw0L/RgtCw0LTQsCDQttC+0LnRi9C70LDQtNGLIC4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1. Негізі студенттің жауабына 86 қойылған,техникалық интернеттің дұрыс істемегеніне байланысты 78 баға қойылып кеткен.</text:p>
          </table:table-cell>
          <table:table-cell office:value-type="float" office:value="0" table:style-name="ce1">
            <text:p>0</text:p>
          </table:table-cell>
          <table:table-cell table:number-columns-repeated="16376"/>
        </table:table-row>
        <table:table-row table:style-name="ro1">
          <table:table-cell office:value-type="float" office:value="1066839" table:style-name="ce1">
            <text:p>1066839</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MS4g0K3RgNC40YLQtdC80LAg0LTQtdCz0LXQvdGW0LzRltC3INGC0LXRgNGW0LPQtSDRiNGL0pPQsNGC0YvQvSDQsdOp0YDRgtC/0LXQu9C10YAg0LHQvtC70YvQvyDRgtCw0LHRi9C70LDQtNGLLtCt0YDQuNGC0LXQvNCwINC20LDSo9CwINGC0YPSk9Cw0L0g0L3TmdGA0LXRgdGC0LXQu9C10YDQtNGW0qMg0pvSsdGA0YHQsNKb0YLQsNC9INGC0YvRgSDQsdC10LnRltC80LTQtdC70YPRltC90LUg0LHQsNC50LvQsNC90YvRgdGC0Ysg0LbTmdC90LUg0L/QvtC70LjQvNC+0YDRhNGC0Ysg0LHTqdGA0YLQv9C10LzQtdC9INKb0LDRgtCw0YAg0LbSr9GA0LXRgtGW0L0g0YLQtdGA0ZbQvdGW0qMg0YLRgNCw0L3Qt9C40YLQvtGA0LvRi9KbINKb0YvQt9Cw0YDRg9GLLiDQndC10LPRltC30LPRliDRgdC40LzQv9GC0L7QvNGLINGP0pPQvdC4INGC0LXRgNGW0L3RltKjINKb0YvQt9KT0YvQu9GCINC90LXQvNC10YHQtSDSm9GL0LfRi9C7INCx0L7Qu9GD0YvQvdC00LAuINCe0Lsg0YLQtdC6INKb0LDQvdCwINKb0YvQt9Cw0YDRi9C/INKb0LDQvdCwINKb0L7QudC80LDQuSDQsdOp0YDRgtC/0LXQvNC10L0g0pvQsNGC0LDRgCDQttKv0YDQtdGC0ZbQvSDQsdC+0LvRi9C/INGC0LDQsdGL0LvQsNC00YsuINCR0LDRgdGC0LDQv9Kb0Ysg0LHQtdC70LPRltC70LXRgNGWINC606nQsdGW0L3QtdGB0LUg0LbQsNGC0YvRgNC00YvSoyDQttOZ0L3QtSDSm9C+0YDRiNCw0pPQsNC9INC+0YDRgtCw0L3Ri9KjINGC0LXQvNC/0LXRgNCw0YLRg9GA0LDRgdGL0L3Ri9KjINCw0YPQsNGB0YvQvdGL0qMg0LDQudGL0YDQvNCw0YjRi9C70YvSk9GL0L3QsCDQsdCw0LnQu9Cw0L3Ri9GB0YLRiyDQsdC+0LvQsNC00YsuINCh0L7QvdGL0qMg0YHQsNC70LTQsNGA0YvQvdCw0L0g0LHQsNC70LDQvdGL0qMg0YjQtdGC0LrRliDRgtCw0LzRi9GA0LvQsNGA0Ysg0pvQsNC9INCw0LnQvdCw0LvRi9C80Ysg0LbTmdC90LUg0L7QvdGL0qMg0LbRi9C70YvQvdGD0Ysg0q/RiNGW0L0g0LrQtdKj0LXQudC10LTRli4g0KHQvtC7INKv0YjRltC9INC00LXQvdC10L3RltKjINGC0q/RgdGWINKb0YvQt9Cw0YDQsNGC0YvQvSDQsdC+0LvQsNC00YsuINCR0rHQuyDRhNC40LfQuNC+0LvQvtCz0LjRj9C70YvSmyDRjdGA0LjRgtC10LzQsCDQtNC10L8g0LDRgtCw0LvQsNC00YsuINCR0rHQuyDRjdGA0LjRgtC10LzQsCDQsdCw0LvQu9Cw0YDQtNGL0qMg06nQvNGW0YDRltC90ZbSoyDQsNC70pPQsNGI0pvRiyDQvNC40L3Rg9GC0YLQsNGA0YvQvdC00LAg0LbTmdC90LUg0YHQsNKT0LDRgtGC0LDRgNGL0L3QtNCwINCw0LvQsNKb0LDQvSDQvNC10L0g0YLQsNCx0LDQvSDQsNC50LzQsNKb0YLQsNGA0YvQvdC00LAg0LrTqdC/0YLQtdC/INC606nRgNGW0L3QtdC00ZYuINCR0ZbRgNCw0psg0L7Qu9Cw0YAg0LHRltGA0ZbQvdGI0ZYg0YLTmdGD0LvRltC60YLRltKjINOp0LfRltC90LTQtSDQttC+0pPQsNC70YvQvyDQutC10YLQtdC00ZYuINCQ0Lsg0LbQsNKj0LAg0YLRg9KT0LDQvSDQsdCw0LvQu9Cw0YDQtNGL0qMg0YLQvtC60YHQuNC60LDQu9GL0psg0Y3RgNC40YLQtdC80LDQu9Cw0YDRiyDQsNC70LvQtdGA0LPQuNGPINC80LXQtNC40LDRgtC+0YDQu9Cw0YDRi9C90YvSoyDQutOp0L8g0LzTqdC70YjQtdGA0LTQtSDQsdOp0LvRltC90YPRltC90ZbSoyDRgdCw0LvQtNCw0YDRi9C90LDQvSDRgtC10YDRltC90ZbSoyDQutC10LnQsdGW0YAg0LbQtdGA0LvQtdGA0ZbQvdGW0qMg0pvRi9C30LDRgNGD0Ysg0LHQvtC70YvQvyDRgtCw0LHRi9C70LDQtNGLLiDQkNC70LvQtdGA0LPQuNGP0LvRi9KbINC80LXQtNC40LDRgtC+0YDQu9Cw0YAg0LTQtdCz0LXQvdGW0LzRltC3INCw0LvQu9C10YDQs9C40Y/Qu9GL0psg0YDQtdCw0LrRhtC40Y/Qu9Cw0YDSk9CwINC20LDRg9Cw0L8g0LHQtdGA0LXRgtGW0L0g0LbQsNGB0YPRiNCw0LvQsNGA0LTRi9KjINCx0rHQt9GL0LvSk9Cw0L3Ri9C90LTQsCDQsdOp0LvRltC90LXRgtGW0L0g0LHQuNC70LTQu9Cz0LjRj9C70YvSmyDQsdC10LvRgdC10L3QtNGWINC30LDRgtCw0YAg0LHQvtC70YvQvyDRgtCw0LHRi9C70LDQtNGLLiDQkdKx0Lsg0LXRiNKb0LDQvdC00LDQuSDQsNGD0YDRg9C00YvSoyDQsdC10LvQs9GW0YHRliDQtdC80LXRgS4g0JbQsNKj0LAg0YLRg9KT0LDQvSDQvdOZ0YDQtdGB0YLQtdC70LXRgNC00ZbSoyAyMC01MCDQv9Cw0LnRi9C30YvQvdC00LAg0YLQvtC60YHQuNC60LDQu9GL0psg0Y3RgNC40YLQtdC80LAg0LrQtdC30LTQtdGB0LXQtNGWLiAyLiDQodC+0pvRi9GA0ZbRiNC10Log0L3QtdC80LXRgdC1INCw0L/Qv9C10L3QtNC10YbQuNGCINC00LXQs9C10L3RltC80ZbQtyDQsdKx0Lsg0YHQvtKb0YvRgCDRltGI0LXQutGC0ZbSoyDSm9Kx0YDRgiDRgtOZ0YDRltC30LTRliDTqdGB0ZbQvdC00ZbRgdGW0L3RltKjINKb0LDQsdGL0L3Rg9GLINCx0L7Qu9GL0L8g0YLQsNCx0YvQu9Cw0LTRiy4g0JHSsdC7INC606nQsdGW0L3QtdGB0LUg0LbQsNGBINCx0LDQu9Cw0LvQsNGA0LTRi9KjINCw0YDQsNGB0YvQvdC00LAg0LrTqdC/INC60LXQt9C00LXRgdGD0ZYg0LzSr9C80LrRltC9LiDQodC10LHQtdCx0ZYg0LbQsNGBINC60LXQt9C00LUg0LDQv9C/0LXQvdC00LXRhtC40YIg0YLQtdC3INC00LDQvNC40LTRiy4g0JbTmdC90LUg0LrTqdCx0ZbQvdC10YHQtSDQsNGD0YDRg9C00YvSoyDQsNGD0YvRgCDQsNGB0pvRi9C90YPRi9C90LAg0LDQu9GL0L8g0LrQtdC70LXQtNGWINC80YvRgdCw0LvSk9CwINC/0LXRgNC40YLQvtC90LjRgiDQtNC10LPQtdC90LTQtdC5LiDSmtGL0LfQtNCw0YAg0LzQtdC9INKx0LvQtNCw0YAg0LHRltGA0LTQtdC5INC20LjRltC70ZbQutGC0LUg0LDRg9GL0YDQsNC00YsuINCa06nQsdOZ0L3QtdGB0LUgNyDQttCw0YHRgtCw0L0g0LDRgdKb0LDQvSDQsdCw0LvQsNC70LDRgCDQutOp0LHRltGA0LXQuiDQsNGD0YvRgNCw0LTRiy4gM9C20LDRgdKb0LAg0LTQtdC50ZbQvdCz0ZYg0LHQsNC70LvQsNGA0LTQsCDQsNGD0YDRgyDQttC10LTQtdC7INCx0LDRgdGC0LDQu9C80LDQudC00Ysg0LHRltGA0YLRltC90LTQtdC/INCx0LDRgdGC0LDQu9Cw0LTRiy4g0J3QtdCz0ZbQt9Cz0ZYg0YHQuNC80L/RgtC+0LzRiyDQsNGD0YvRgNGB0YvQvdGGINGB0LjQvNC/0YLQvtC80Ysg0LHQvtC70L7Ri9C/INGC0LDQsdGL0LvQsNC00YsuINCW0LjRliDQutGW0L3QtNGW0Log0LDQudC80LDSk9GL0L3QtNCwINCw0YPRi9GA0YHRi9C90YMg0LHQsNGB0YLQsNC70LDQtNGLLCDQvtC00LDQvSDQutC10LnRltC9INCx0LDRgNC70YvSmyDRltGIINCw0LnQvNCw0pPRi9C90LAg0YLQsNGA0LDQu9Cw0LTRiy4g0JHRltGA0L3QtdGI0LUg0YHQsNKT0LDRgtGC0LDQvSDQutC10LnRltC9INC+0qMg0LbQsNKbINC80YvSm9GL0L0g0LDQudC80LDQs9GL0L3QsCDRgtCw0YDQsNC70LDRgtGL0L0g0LHQvtC70LDQtNGLLiDQkNGD0YvRgNGB0YvQvdGGINGC0rHRgNCw0pvRgtGLINGC0q/RgNC00LUg0LbSr9GA0LXQtNGWLiDQkdCw0YHSm9CwINGB0LjQvNC/0YLQvtC80LTQsNGAINC80YvRgdCw0LvSk9CwINKb0rHRgdGDINGC0LXQuiDQsdGW0YAg0LvQtdGCINCx0L7Qu9GD0Ysg0LzSr9C80LrRltC9INC90LXQvNC10YHQtSDQvtC00LDQvSDQutOp0L8uINCa0LXQudCx0ZbRgCDQsdCw0LvQsNC70LDRgNC00LAg0L3TmdC20ZbRgdGC0ZbSoyDQutC10YjRltCz0YPRliDQttKv0YDQtdC00ZYg0LDQuyDQutC10LnQsdGW0YDRltC90LTQtSDQutC10YDRltGB0ZbQvdGI0LUg0LrTqdC/0YLQtdC/INGI0YvSk9Cw0YLRi9C9INCx0L7Qu9Cw0LTRiy4g0JHSk9GA0ZbQvdGI0ZYg0YHQsNKT0LDRgtGC0LDRgNC00LAg0LTQtdC90LUg0YLQtdC80L/QtdGA0LDRgtGD0YDQsNGB0Ysg0pvQsNC70YvQv9GC0Ysg0LTQtdKj0LPQtdC50LTQtSDQsdC+0LvQsNC00Ysg0L3QtdC80LXRgdC1INGI0LDQvNCw0LvRiyDQttC+0pPQsNGA0Ysg0LHQvtC70LDQtNGLLiDTmNC00LXRgtGC0LUg0rHQudKb0Ysg0LHSsdC30YvQu9Cw0LTRiyDRgtOZ0LHQtdGCINC00rHRgNGL0YEg0LHQvtC70LzQsNC50LTRiyDQvdC10LzQtdGB0LUg0LzSr9C70LTQtdC8INC20L7Smy4g0J3TmdGA0LXRgdGC0LXQu9C10YDQtNC1INKb0rHRgNGCINGC05nRgNGW0LfQtNGWINOp0YHRltC90LTRliDQutC+0L3Rg9GBINGC05nRgNGW0LfQtNGWINCx0L7Qu9GL0L8g0LrQtdC70LXQtNGWLiDQltOZ0L3QtSDQvtC7INGI0LDQttGL0YDSm9Cw0LnQtNGL0qMg0LHQvtC70YPRi9C90LAg0LHQsNC50LvQsNC90YvRgdGC0Ysg0pvQvtC30pPQsNC70YvRgdGLINC20L7Sk9Cw0YDRiyDQsdC+0LvRi9C/INC60LXQu9C10LTRli4g0JbTmdC90LUg0L7QuyDRgNC10YLRgNC+0YbQtdC60LDQu9GM0LTRliDQsdC+0LvRi9C/INC60LXQu9C10LTRli4g0K/Sk9C90Lgg0L7Sk9Cw0L0g0LrRltGA0LXRgtGW0L0g0LbQvtC70Ysg0LDRiNGL0psg0LHQvtC70YvQvyDRgtCw0LHRi9C70LDQtNGLLCDRj9KT0L3QuCDQutC10LTQtdGA0LPRltGB0ZbQty4g0JbQsNKj0LAg0YLRg9KT0LDQvSDQsdCw0LvQsNC90YvSoyDRgdC+0pvRi9GAINGW0YjQtdCz0ZYg0rHQt9GL0L0gINC205nQvdC1INC60LXSoyDQsdC+0LvRi9C/INC60LXQu9C10LTRli4g0KHQvtC90YvQvNC10L0g0pvQsNGC0LDRgCDRgdC+0pvRi9GAINGW0YjQtdC60YLRltKjINC10YIg0pvQsNCx0LDRgtGC0LDRgNGLINCx0ZbRgNC60LXQu9C60ZYg0LHQvtC70LzQsNC50LTRiywg0L7RgNGC0LDSo9KT0Ysg0pvQsNCx0LDRgtGL0L3QtNCw0pPRiyDQsNC50L3QsNC70LzQsNC70Ysg0pvQsNCx0LDRgtGLINCx0L7RgSDQsdC+0LvRi9C/INC60LXQu9C10LTRli4g0KHQvtKb0YvRgCDRltGI0LXQutGC0ZbSoyDSm9Cw0LHRi9C90YPRi9C90LAg0L7QvdGL0qMg0ZbRiNGW0L3QtNC10LPRliDQsdC10LfQtNGWINC60LvQtdGC0LrQsNC70LDRgNC00YvSoyDQttC10YLRltC70YPRliDRgdC10LHQtdC/INCx0L7Qu9Cw0LTRiywg0Y/Sk9C90Lgg0L7Qu9Cw0YDQtNGL0qMg0q/Qu9C60LXRjtGWINGW0YHRltC90YPRltC90LXQvSDRgdC+0pvRi9GAINGW0YjQtdC6INKb0LDQsdGL0L3Ri9C/INCx0LDRgdGC0LDQudC00YsuINCv0pPQvdC4INC90LXSk9Kx0YDQu9GL0Lwg0ZbRiNC10LrRgtC1INC70LjQvNGE0L7QuNC00YLRiyDRgtGW0L3QtNC10YAg0LrTqdC/INCx0L7Qu9GB0LAg0YHQvtKT0rHRgNC70YvQvCDSm9Cw0LHRi9C90YMg0L/RgNC+0YbQtdGB0ZYg0YLQtdC3INCx0L7Qu9Cw0LTRiyDQttOZ0L3QtSDQsdCw0YHRgtCw0LvQsNC00YsuINKu0Ygg0LbQsNGB0pvQsCDQtNC10LnRltC90LPRliDQsdCw0LvQu9Cw0YDQtNCwINGB0L7QuyDQu9C40LzRhNC+0LjQtCDRgtGW0L3QtNC10YDRltC90ZbSoyDQsNC30LTRi9KT0YvQvdCwINCx0LDQudC70LDQvdGL0YHRgtGLINC+0LvQsNGA0LTQsNKT0Ysg0YHQvtKb0YvRgCDRltGI0LXQutGC0ZbSoyDQsdC+0LvRg9GLINGB0LjRgNC10Log0LrQtdC30LTQtdGB0LXQtNGWLiDQkdCw0LvQu9Cw0YDQtNCwINGW0YjQtdCz0ZbQvdGW0qMg0LDQudC90LDQu9GDINC/0YDQvtGG0LXRgdGWINGC0L7Qu9GL0psg0pvQsNC70YvQv9GC0LDRgdC/0LDQudC00YsuINCh0L7QuyDRgdC10LHQtdC/0YLRliDRgdC+0pvRi9GAINGW0YjQtdC6INOp0LfRltC90ZbSoyDTqdGB0LrRltC90ZbQvNC10L0g05nRgCDRgtKv0YDQu9GWINCx0LDSk9GL0YLRgtCwINKb0L7Qt9KT0LDQu9GL0L8g0YLSsdGA0LDQtNGLLiDQntC7INGC0ZbQv9GC0ZYg0ZbRiNGC0ZbSoyDRgdC+0Lsg0LbQsNKbINCw0LnQvNCw0pPRi9C90LDQtNCwINCw0YPRi9GB0YPRiyDQvNKv0LzQutGW0L0uINCh0L7QvdC00YvSm9GC0LDQvdC00LAg0YHQvtKb0YvRgCDRltGI0LXQutGC0ZbSoyDQvtGA0L3Ri9C90LDQvSDTmdGAINGC0q/RgNC70ZYg0LbQtdGA0LPQtSDQttGL0LvQttGL0L8g0L7RgtGL0YDRg9GLINCw0YPRi9GA0YHRi9C90YMg0LHQtdC70LPRltGB0ZbQvdGW0qMg05nRgNGC0q/RgNC70ZYg0Y/Sk9C90Lgg0LDRgtC40L/QuNGP0LvRiyDQsdC+0LvRg9GL0L3QsCDTmdGB0LXRgCDQtdGC0LXQtNGWLiDQhtGI0YLRltKjINKv0YHRgtGW0qPQs9GWINCw0LnQvNCw0pPRi9C90LTQsNKT0YvQtNCwINC+0YDQvdCw0LvQsNGB0pvQsNC9INC80q/RiNC10LvQtdGA0LTRltKj0LTQtSDQvtGA0L3QsNC70LDRgdGD0Ysg0YHQvtKb0YvRgCDRltGI0LXQutGC0ZbSoyDQsNGD0YvRgNGB0YvQvdGD0YvQvdCwINOZ0YHQtdGAINC10YLQtdC00ZYuINCc0YvRgdCw0LvSk9CwINCx0LDQu9Cw0LvQsNGA0LTRi9KjINGC0LXRgNGW0YHRliDQttKx0pvQsCDQvdOZ0LfRltC6INCx0L7Qu9GL0L8g0LrQtdC70LXQtNGWLiDQotC10YDRliDQsNGB0YLRiyDRiNC10Lsg0LzQsNC50Ysg0LDQt9C00LDRgyDSm9Cw0LvRi9C/0YLQsNGB0pvQsNC9LCDQsNC7INC10YIg0pvQsNCx0LDRgtGC0LDRgNGLINCx0ZbRgCDQsdGW0YDRltC90LXQvSDQtNKx0YDRi9GBINCw0LbRi9GA0LDRgtGL0LvQvNCw0pPQsNC9LiDQkNC7INC606nQutC10YLRgtGW0qMg0LDQu9C00YvSo9KT0Ysg0LzQsNC5INKb0LDQsdCw0YLRi9C00LAg0LTSsdGA0YvRgSDSm9Cw0LvRi9C/0YLQsNGB0L/QsNKT0LDQvSDQvdC10LzQtdGB0LUg0LbQvtKbINCx0L7Qu9GL0L8g0LjQutC10LvQtdC00ZY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52" table:style-name="ce1">
            <text:p>1066852</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0JbQsNKj0LAg0YLRg9KT0LDQvSDQsdCw0LvQsNC70LDRgNC00LDSk9GLINGC0L7QutGB0LjQutCw0LvRi9KbINGN0YDQuNGC0LXQvNCwLdCw0LvSk9Cw0Ygg0YLRg9KT0LDQvSDQutKv0L3QtNC10YDQtNC1INC/0LDQudC00LAg0LHQvtC70LDRgtGL0L0g0YLQtdGA0ZbQvdGW0qMg0LDRg9GA0YPRiyzQvtC7INCx0LXRgtGC0LUg0LzQsNCz0LjRgdGC0YDQsNC70LTRiyDQttOZ0L3QtSDQsNGP0psg0pvQvtC70LTQsNGA0LTQsCDQv9Cw0LnQtNCwINCx0L7Qu9GD0Ysg0LzSr9C80LrRltC9INKb0YvQt9GL0Lsg0LbTmdC90LUg0ZbRgdGW0L3Qs9C10L0g0L/QsNC/0YPQu9CwINC90LXQvNC10YHQtSDQv9GD0YHRgtGD0LvQtNCw0YDQvNC10L0g0LrTqdGA0ZbQvdGW0YEg0LHQtdGA0LXQtNGWINCx0rHQuyDQvdOZ0YDQtdGB0YLQtSDRgtC10YDRltGB0ZbQvdGW0qMg0YPRi9GC0YLRiyDRjdGA0LjRgtGA0LXQvNCw0YHRiyDRgtC10YDRltC90ZYg0LbQsNGD0YvQvyDSm9Cw0LHRi9C90YMg0YjQsNKb0YvRgNGDINC80q/QvNC60ZbQvSDQttC10YLRltC70LzQtdCz0LXQvSDQsdC10LfQtNC10YAg0LzQtdC9INGC0LXRgNGWINGE0L7Qu9C40LrRg9C70LDQu9Cw0YDRiy7QkdGD0Lsg0LbQsNCz0LTQsNC50LTQsCDRjdGA0LjRgtGA0LXQvNCwINGC0L7QutGB0LjQutGD0Lwg0L3QtdC+0L3QsNGC0L7RgNGD0Lwg0LTQtdC/INCw0YLQsNC70LDQtNGLINCx0LDQutGC0LXRgNC40Y/Qu9Cw0YAg0LzQtdC9INKb0L7RgNGI0LDSk9Cw0L0g0L7RgNGC0LDQvdGLINCw0LvQtdGA0LPQtdC90LTQtdGA0LTRliDSm9C+0YHRi9C/INCw0LvSk9Cw0L3QtNCwINKb0LDQsdGL0L3RgyDRgNC10LDQutGG0LjRj9GB0Ysg0LHQvtC70YvQvyDRgtCw0LHRi9C70LDQtNGLLNCx06nRgNGC0L/QtSDTmdC00LXRgtGC0LUg0LXQvNC00LXRg9GB0ZbQtyDQsdGW0YDQvdC10YjQtSDQutKv0L0g0ZbRiNGW0L3QtNC1INC20L7QudGL0LvQsNC00Ysg0Y3RgNC40YLRgNC10LzQsCDRgtC+0LrRgdC40LrRg9C8INOZ0LTQtdGC0YLQtSDQttCw0qPQsCDRgtGD0pPQsNC9INC905nRgNC10YHRgtC10LTQtSDQv9Cw0LnQtNCwINCx0L7Qu9Cw0LTRiyDQttOZ0L3QtSDQsdGW0YAg0LDQv9GC0LAg0ZbRiNGW0L3QtNC1INOp0LfQtNGW0LPRltC90LXQvSDQutC10YLQtdC00ZYs0Y3RgNC40YLQtdC80LAg0LHQsNC70LDQvdGL0qMg0pvSsdGA0YHQsNKb0YLQsNC9INGC0YvRgSDTqdC80ZbRgNCz0LUg0LHQtdC50ZbQvNC00LXQu9GD0ZbQvdC1INCx0LDQudC70LDQvdGL0YHRgtGLINC205nQvdC1INC/0L7Qu9C40LzQvtGA0YTRgtGLINCx06nRgNGC0L/QtdC70LXRgNC80LXQvSDRltC70LXRgdC1INC20q/RgNC10YLRltC9INGC0LXRgNGW0L3RltKjINGC0YDQsNC90LjQt9C+0YLQvtGA0LvRi9KbINKb0YvQt9Cw0YDRg9GLINC90LXQs9GW0LfRltCz0ZYg0YHQuNC80YLQvtC8INGC0LXRgNGW0L3RltKjINKb0YvQt9KT0YvQu9GCINGC0q/RgdGC0ZYg0LHQvtC70YPRiyzQvdC10LPRltC30LPRliDRgdC10LHQtdC/INCw0L3QsCDQsdCw0LvQsNC90Ysg0YLRg9Cw0YAg0LDQu9C00YvQvdC00LDSk9GLINC20LDRgtGL0YDQtNGL0qMg0LbTmdC90LUg0pvQvtGA0YjQsNKT0LDQvSDQsNGD0LDQvdGL0qMg0YLQtdC80L/QtdGA0LDRgtGD0YDQsNGB0Ysg0LHQvtC70YPRiyDQvNKv0LzQutGW0L0g0YHQvtC7INGB0LXQsdC10L/RgtGWINCx0LDQu9Cw0LTRiyDRiNC10YLQutC10YDRliDSm9Cw0L0g0YLQsNC80YvRgNC70LDRgCDQsdCw0LvQsNC90Ysg0LbRi9C70YvRgtGDINKv0YjRltC9INC60LXSo9C10LnQtdC00ZYg0YHQvtC7INGB0LXQsdC10L/RgtGWINGC0LXRgNGWINGC0q/RgdGWINKb0YvQt9Cw0YDQsNC00Yss0LHSsdC7INGE0LjQt9C40L7Qu9C+0LPQuNGP0LvRi9KbINGN0YDQuNGC0LXQvNCwINCx0L7Qu9GL0L8g0YHQsNC90LDQu9Cw0LTRiyDQttCw0qPQsCDRgtGD0pPQsNC9INGB05nQsdC40LvQtdGA0LTRltKjIDIwLTUwINC/0LDQudGL0LfRi9C90LTQsCDRg9GL0YLRgtGLINGN0YDQuNGC0YDQtdC80LAgMi00INC60q/QvdGW0L3QtNC1INC/0LDQudC00LAg0LHQvtC70YvQvyAxINCw0L/RgtCw0LTQsNC9INGB0L7SoyDQttC+0pPQsNC70LDQtNGLIDxiciAvPg0KMiDRgdKx0YDQsNKbLSA1INC20LDRgdGC0LDSk9GLINCx0LDQu9Cw0LvQsNGA0LTQsCDRgdC+0pvRi9GAINGW0YjQtdC60YLRltKjINCw0YLQuNC/0YLRliDQvtGA0L3QsNC70LDRgdGD0Ysg0YHQvtKb0YvRgCDRltGI0LXQutGC0ZbSoyDRhNC40LfQuNC+0LvQvtCz0LjRj9C70YvSmyDQtdGA0LXQutGI0LXQu9GW0LrRgtC10YDRltC90LUg0LHQsNC50LvQsNC90YvRgdGC0Ysg0LHQvtC70YPRiyDQvNKv0LzQutGW0L0g0YHQvtKb0YvRgCDRltGI0LXQuiDRltGI0YLRltKjICDQvtKjINC20LDSmyDRgtOp0LzQtdC90LPRliDQsdOp0LvRltCz0ZbQvdC00LUg0YLQvtKbINGW0YjQtdC60LrQtSDRgtKv0YLRltC6INGC05nRgNGW0LfQtNGWINCx0LXQutGW0L3Qs9C10L0g0pvQvtGB0YvQvNGI0LAg0LzSr9GI0LUg0LrQtdC50LTQtSDQvtC7INC20LDQvNCx0LDRgSDRgtGW0L/RgtGWINC+0qMg0LXQvNC10YEg0YHQvtC7INC20LDSm9GC0LAg0L7RgNC90LDQu9Cw0YHRg9GLINC80q/QvNC60ZbQvSDQsNC00LDQvCDRhNC40LfQuNC+0LvQvtCz0LjRj9C70YvSmyDQtdGA0LXQutGI0LXQu9GW0LrRgtC10YDRltC90LUg0LHQsNC50LvQsNC90YvRgdGC0Ysg0LrQtdC50LTQtSDQsNC/0LXQvdC10LTRhtC40YIg0LDRgtC40L/QuNC60LDQu9GL0psg0LbQtdGA0LTQtSDQvtGA0L3QsNC70LDRgdGD0Ysg0LzSr9C80LrRltC9INCx0rHQuyDQsNC/0LjQvdC00LjRhtC40YIg0LTQuNCw0LPQvdC+0LfRi9C9INKb0LjRi9C90LTQsNGC0LDQtNGLINCx0LDQu9C70LDRgNC00LAg0LDQv9C10L3QtNC10YbQuNGCINGW0Ygg0pvRg9GL0YHRi9C90LDQvSDQttC+0pPQsNGA0YvRgNCw0psg0LHQsNGD0YvRgNKT0LAg0LbQsNKb0YvQvSDQvtGA0L3QsNC70LDRgdGD0Ysg0LTQuNCw0LPQvdC+0Lcg0pvQvtC50YPQtNGLINKb0LjRi9C90LTQsNGC0YPRiyDQvNKv0LzQutGW0L0g0LzSsdC90LTQsNC5INC20LDSk9C00LDQudC00LAg0LTQuNCw0LPQvdC+0LfQtNGLINC90LDSm9GC0YvQu9Cw0YMg0q/RiNGW0L0g0LbTmdC90LUg0YXQuNGA0YPRgNCz0LjRj9C70YvSmyDQsNGA0LDQu9Cw0YHRg9KT0LAg0LTQsNC50YvQvdC00LDQu9GDINKv0YjRltC9INCx0LDQu9Cw0L3RiyDRg9C70YzRgtGA0LDQtNGL0LHRi9GB0YLRi9KbLNC90LXQvNC10YHQtSDQmtCiINGB0LjRj9Kb0YLRiyDQt9C10YDRgtGC0LXRgyDTmdC00ZbRgdGC0LXRgNGW0L3QtSDQttGW0LHQtdGA0ZbQvyDQsNC/0LXQvdC00LXRhtC40YLRgtGW0qMg0L3QsNKb0YLRiyDQvtGA0L3QsNC70LDRgdGD0YvQvSDQsNC90YvSm9GC0LDQvyDQsNC70LDQvNGL0Lcs0LDQv9C10LTQtdGG0LjRgiDQvdC10LPRltC30LPRliDQsdC10LvQs9GW0LvQtdGA0ZYg0L7SoyDQttCw0psg0ZbRiCDQsdOp0LvRltC80ZbQvdGW0qMg0LDRg9GL0YDRgdGL0L3RgyDQttC10LTQtdC7INCw0L/QtdC00LXRhtC40YIg0LHSsdC7INGB0L7Sm9GL0YAg0ZbRiNC10LrRgtGW0qMg0pvQsNGA0YvQvSDRgtOZ0YDRltC30LTRliDTqdGB0ZbQvdC00ZbRgdGW0L3RltKjINKb0LDQsdGL0L3Rg9GLINC205nQvdC1INC20LXQtNC10Lsg0YXQuNGA0YPRgNCz0LjRj9C70YvSmyDQsNGA0LDQu9Cw0YHRg9C70LDRgNC00Ysg0YLQsNC70LDQvyDQtdGC0LXQtNGWINCx0LDQu9Cw0LvQsNGA0LTQsCDSm9Kx0YDRgdCw0psg0pvRg9GL0YHRi9C9INC10qMg0LbQuNGWINC60LXQt9C00LXRgdC10YLRltC9INCw0YPRgNGD0LvQsNGA0YvQvdGL0qMg0LHRltGA0ZYg0LHQvtC70YvQvyDRgdCw0L3QsNC70LDQtNGLLNC10YDQtdGB0LXQutGC0LXRgNC00LXQvSDQsdGW0YDQvdC10YjQtSDQsNC50YvRgNC80LDRiNGL0LvRi9KT0Ysg0LHQsNGAINCx0LDQu9CwINC60LXQt9C00LUg0LDQv9C10L3QtNC10YbQuNGCINC20LjRliDQtNCw0LzQuNC00Ysg0LbTmdC90LUg0LHSsdC7INC/0LXRgNC40YLQvtC90LjRgtC60LUg05nQutC10LvQtdC00ZYsINC10YDQtdGB0LXQuiDQutC10LfQtNC1INC20LDRgdGC0YvSmyDRiNCw0pvRgtGL0qMg0LrQtdC3INC60LXQu9Cz0LXQvSDRg9Cw0pvRi9GC0YvQvdC00LAg0LTQsNC80LjQtNGLINC606nQsdGW0L3QtdGB0LUgNyDQttCw0YHRgtCw0L0g0LDRgdKb0LDQvdC00LAsNSDQttCw0YHRgtCw0L0g0LDRgdKb0LDQvSDQsdCw0LvQsNC70LDRgNC00LAg0LbRltGC0ZYg0LDQv9C10L3QtNC10YbQuNGCINCx0ZbRgNGC0ZbQvdC00LXQvyDQsdCw0YHRgtCw0LvQsNC00Ysg0LDQu9KT0LDRiNKb0Ysg0YHQuNC80YLQvtC80Ysg0LDRg9GL0YDRgdGL0L3RgyDQttC40ZYg0LrRltC90LTRliDQttCw0L3Ri9C90LTQsCDQutC10LnRltC90ZbRgNC10Log0YLQvtC70YvSmyDRltGI0YLRltCx0LDRgdGL0L8g0YLQtdC6INCx0ZbRgNC90LXRiNC1INGB0LDSk9Cw0YLQsNC9INC60LXQudGW0L0g0L7SoyDQttCw0psg0LzRi9Kb0YvQvdKT0LAg0pvQsNGA0LDQuSDQsNGD0YvRgNGB0YvQvdGDINC+0pvRiNCw0YPQu9Cw0L3QsNC00Ysg05nQtNC10YLRgtC1INKb0rHRgdGDINC60LXQuSDQsdGW0YAg0LHQsNC70LDQu9GA0LTQsCDQvdOZ0LbRltGB0YLRltKjINC60LXRiNGW0LPRg9GWINCw0LvSk9Cw0YjSm9GLINGB0LDSk9Cw0YLRgtCw0YDQtNCwINGC0LXQvNC/0LXRgNCw0YLRg9GA0LDQvdGL0qMg0LrTqdGC0LXRgNGW0LvRg9GWINCx0L7Qu9Cw0LTRiyDQsNC7INGB0L7Sm9GL0YAg0ZbRiNC10LrRgtGW0qMg0L7RgNC90LDQu9Cw0YHRg9GLINCw0L3QsNGC0L7QvNC40Y/Qu9GL0psg0LXRgNC10LrRiNC1INCx0L7Qu9KT0LDQvdGL0LzQtdC9INGB0LjQvNGC0L7QvNC00LDRgNGLINCx0ZbRgCDQsdGW0YDRltC90LUg0YHTmdC50LrQtdGBINC60LXQu9C10LTRliDQttOZ0L3QtSDRgtC+0LvRi9KbINGF0LjRgNGD0YDQs9C40Y/Qu9GL0psg0LDRgNCw0LvQsNGB0YPQu9Cw0YDQtNGLINGC0LDQu9Cw0L8g0LXRgtC10LTRli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9" table:style-name="ce1">
            <text:p>1066909</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MSkg0JbQsNKj0LAg0YLRg9KT0LDQvSDQsdCw0LvQsNC00LAg0YLQvtC60YHQuNC60LDQu9GL0psg0Y3RgNC40YLQtdC80LAg0LTQtdCz0LXQvdGW0LzRltC3INCx0rHQuyDRgtC10YDRltC00LUg0LHQvtC70LDRgtGL0L0g0LDSm9Cw0YPQu9GL0psg0LDRg9GA0YPQu9Cw0YAuINCR0rHQuyDRgtC10YDRliDQtNC20LDQsdGL0L3QtNGL0LvQsNGA0YssINCw0Y/Smy3Sm9C+0LvQtNCwINCx0L7Qu9Cw0LTRiy4g0J7QuyDQsdGW0LfQtNC1INGB0YvRgNGC0pvRiyDQsdC10LnQvdC10YHRltC90LTQtSDSm9GL0LfRi9C7INC90LXQvNC10YHQtSDQutOp0LPQtdGA0LPQtdC9INC60LXQuSDQttCw0pPQtNCw0LnQtNCwINC/0YPRgdGC0YPQu9Cw0LvQsNGA0LzQtdC9INGB0LjQv9Cw0YLRgtCw0LvRi9C/INC606nRgNGW0L3QtdC00ZYuINCQ0LvSk9Cw0YjSm9GL0LTQsCDQsdKx0Lsg0LDQudKb0YvQvSDQsdC10LvQs9GW0LvQtdGAINKb0YvQt9GL0Lsg0YLSr9GB0YLQtdGBINCx0L7Qu9GL0L8g0YjRi9KT0LDQtNGLLiDQkdOp0YDRgtC/0LUg0YLQtdC60YLQtdGBINGI0YvSm9Kb0LDQvdC00YvSm9GC0LDQvSDQsdGW0LfQtNC1INCw0YLQsCDQsNC90LDQu9Cw0YAg0L7QvdGLINCx0LDQu9CwINC80LDQt9Cw0YHRi9C30LTRi9KT0Ysg0LbTmdC90LUg0LDRgtCwINCw0L3QsNC70LDRgNC00YvSoyDQutKv0LzTmdC9INGC0YPSk9GL0LfRg9GL0L3QsNC9INC60LXQudGW0L0g0pPQsNC90LAg0LHRltC30LTQtSDSm9Cw0YDQsNC70LDQtNGLLiDQotCe0LrRgdC40LrQsNC70YvSmyDRjdGA0LjRgtC80LjRjyDQsdGW0LfQtNC1INGC0LXRgNGWINC20LDQsdGL0L3QtNGL0LvQsNGA0YvQvdC00LAg0YPRi9GC0YLRiyDRgtKv0YDQtNC1INC/0LDQudC00LAg0LHQvtC70LDQtNGLLiDQodC+0pPQsNC9INCx0LDQudC70LDQvdGL0YHRgtGLINGC0LXRgNGW0L3RltKjINOp0LfRltC90LTRltC6INC80L7RgNGE0L7Qu9C+0LPQuNGP0LvRi9KbINKb0rHRgNGL0LvRi9C80LTQsNGA0Ysg0LHRltGC0LXQu9GW0L8sINKb0LDQsdGL0L3RgyDQvtGI0LDSm9GC0LDRgNGL0L0g0YLRg9C00YvRgNGD0Ysg0q/QvNC60ZbQvSjQttC10YLRltC70LzQtdCz0LXQvSDRhNC+0LvQu9C40LrRg9C70LTQsNGAINC80LXQvSDRgtC10YDRliDRhNC+0LvQuNC60YPQu9C00LDRgNGL0L3Ri9KjINKb0LDQsdGL0L3Rg9GLINC60LXQt9C00LXRgdC10LTRli4pLiDQldCz0LXRgNC00LUg0YjQsNGIINC20LDSo9CwINGC0LXRgCDRhNC+0LvQuNC40LrRg9C70LTQsNGA0YvQvdC00LAg0pvQsNCx0YvQvdGDINCx0L7Qu9GB0LAg0L7QuyDQsdGW0LfQtNC1INGN0YDQuNGC0LXQvNCwINGC0L7QutGB0LjQutGD0Lwg0L3QtdC+0L3QsNGC0YPRgNGD0Lwg0LTQtdC/INCw0YLQsNC70LDQtNGLLiDQndC10LPRltC30ZbQvdC10L0g0YLQvtC60YHQuNC60LDQu9GL0psg0Y3RgNC40YLQtdC80LDQvdGL0qMg0L/QsNC50LTQsCDQsdC+0LvRg9GL0L3QsCDRgdC10LHQtdC/INCx0L7Qu9Cw0YLRi9C9OiDQsdCw0LrRgtC10YDQuNGP0LvQsNGALCDQstC40YDRg9GB0YLQsNGAINC205nQvdC10LTQtSDQsNC70LvQtdGA0LPQtdC90LTQtdGAINOZ0YHQtdGAINCx0LXRgNC10LTRli4g0JbQsNC70L/Ri9C70LDQuSDQsNC50YLSm9Cw0L3QtNCwINKb0L7RgNGI0LDSk9Cw0L0g0L7RgNGC0LDQvdGL0qMg0pvQvtC30LTRi9GA0YPRiNGLINGE0LDQutGC0L7RgNC70LDRgNGLLiDQrdGA0LjRgtC10LzQsCDRgtC+0LrRgdC40LrRg9C8INC90LXQvtC90YLRg9GA0YPQvNKT0LAg0L7RgNCw0LvQsNGC0YvQvSDQsdC+0LvRgdCw0psuINCe0Lsg0LHRltC30LTQtSDQttCw0qPQsCDRgtGD0pPQsNC9INC905nRgNC10YHRgtC10LvQtdGA0LTRltKjINGC0LXRgNGWINC20LDQsdGL0L3QtNGL0LvQsNGA0YvQvdC00LAg0LbQuNGWINC60LXQt9C00LXRgdC10LTRli4g0J7QuyDQsdGW0LfQtNC1INC80L7RgNGE0L7Qu9C+0LPQuNGP0LvRi9KbINGC0rHRgNKT0YvQtNCwINC90L7RgNC80LDQu9GL0psg0LbQsNKT0LTQsNC5INCx0L7Qu9GL0L8g0YHQsNC90LDQu9Cw0LTRiy4g0J7QvdGL0qMg0L/QsNC50LTQsCDQsdC+0LvRgyDRgdC10LHQtdCx0ZYg0LbQsNKj0LAg0L3TmdGA0LXRgdGC0LXQvdGW0qMg0YHRi9GA0YLSm9GLINKb0L7RgNGI0LDSk9Cw0L0g0L7RgNGC0LDSk9CwINCx0LXQudGW0LzQtNC10LvRg9GW0L3QtdC9INC/0LDQudC00LAg0LHQvtC70LDQtNGLLiDQkdGW0LfQtNC1INGC0L7QutGB0LjQutCw0LvRi9KbINGN0YDQuNGC0LXQvNCw0LTQsNC9INCx06nQu9C10Log0pvQsNGC0LDRgCDQttKv0YDQtdGC0ZbQvSDRgtGA0LDQvdC30LjRgtC+0YDQu9GL0psg0pvRi9C30LDRgNGD0LTQsCDQsdC+0LvRg9GLINC80q/QvNC60ZbQvS4g0KLQvtC60YHQuNC60LDQu9GL0psg0Y3RgNC40YLQtdC80LAg0L3QtdCz0ZbQt9Cz0ZYg0LDQudKb0YvQvSDQutOp0YDRltC90YPRliAyLTQg0LDQv9GC0LAg0ZbRiNGW0L3QtNC1INC/0LDQudC00LAg0LHQvtC70LDQtNGLLiDQltOZ0L3QtSAxINCw0L/RgtCw0L3Ri9KjINGW0YjRltC90LTQtSDQttC+0LnRi9C70LDQtNGLLiDQntC90YvSoyDQutOp0YDRltC90ZbRgdGW0L3QtSDRgdC40L/QsNGC0YLQsNC80LAg0LHQtdGA0YHQtdC6INC+0Lsg0pvRi9C30pPRi9C70YIt0pvRi9C30YvQuyDRgtKv0YHRgtC10YEg0LHQvtC70YvQvyDQutOp0YDRltC90LXQtNGWLiDQkdCw0LvQsCDSm9C+0YDRiNCw0pPQsNC9INC+0YDRgtCw0pPQsCDRiNGL0pvSm9Cw0L3QtNGL0pvRgtCw0L0g0L7QvdGL0qMg0YjQtdGC0LrQtdGA0ZYg0YLQsNC80YvRgNC70LDRgNGLINGW0YHRltC90LXQtNGWINKx0LvSk9Cw0LnQsNC00YsuINKw0LvSk9Cw0LnRgyDRgdC10LHQtdCx0ZYg0YLQtdC80L/QtdGA0LDRgtGD0YDQsNC90Ysg0pvQsNC70YvQv9GC0Ysg0YHQsNKb0YLQsNGDINC205nQvdC1INKb0LDQvSDQsNKT0YvQvNGL0L0g0YDQtdGC0YLQtdGDLiDQotC+0LrRgdC40LrQsNC70YvSmyDRjdGA0LjRgtC10LzQsCAyMC01MCDQv9Cw0LnRi9C3INCx0LDQu9Cw0LTQsCDQvdC+0YDQvNCw0LvQtNGLINGC0q/RgNC00LUgMi00INCw0L/RgtCw0LTQsCDQv9Cw0LnQtNCwINCx0L7Qu9GL0L8gMSDQsNC/0YLQsNC00LAg0LbQvtC50YvQu9Cw0LTRiy4gPGJyIC8+DQo8YnIgLz4NCjIpIDUtINC20LDRgdCw0YAg0LHQsNC70LDQtNCwINGC0L7SmyDRltGI0LXQutGC0LUg0LDRgtC40L/QuNGPINC+0YDQvdCw0LvQsNGB0pvQsNC90LTRi9KT0YvQvdCwINCx0LDQudC70LDQvdGL0YHRgtGLINCw0L3QsNGC0L7QvNC40Y/Qu9GL0psg0LXRgNC10LrRiNC10LvRltC60YLQtdGAINCx0L7Qu9GD0Ysg0LzSr9C80LrRltC9LiDQkNGC0LjQv9C40Y8g0LHQsNC70LDQtNCwINGC0L7SmyDRltGI0LXQutGC0ZbSoyDQvtKjINC20LDSmyDRgtOp0LzQtdC90LPRliDQsdOp0LvRltC80ZbQvdC00LUg0L7RgNC90LDQu9Cw0YHSm9Cw0L0g0YLSr9GC0ZbQutGC0ZYg0pvSsdGA0YvQu9GL0LwuINCd0LXQs9GW0LfRltC90LXQvSDQsdKx0Lsg0pvQvtGB0YvQvNGI0LDQvdGL0qMg0LHQvtC70YPRiywg0YLSsdKb0YvQvCDSm9GD0LDQu9Cw0YPQtNCw0L0g05nRgCDRgtKv0YDQu9GWINCx0L7Qu9GD0Ysg0LzSr9C80LrRltC9LiDQmtC10LnQsdGW0YAg0LbQsNKT0LTQsNC50LvQsNGA0LTQsCDRgdC+0Lsg0LbQsNKb0YLQsCDSm9C+0YHRi9C80YjQsNC90YvSoyDQsdC+0LvRg9GL0LTQsCDQvNKv0LzQutGW0L0uINCa0LXQuSDQttCw0pPQtNCw0LnQtNCwINCw0YLQuNC/0LjRjyDQsNC/0L/QtdC90LTQuNGG0LjRgtGC0ZbSoyDQvtGA0L3Ri9C90LTQsCDQvtGA0L3QsNC70LDRgdGD0Ysg0LzSr9C80LrRltC9LiDQkdKx0Lsg0pvQsNC70YvQv9GC0LAg0L7RgNC90LDQu9Cw0YHRg9GLINCw0L/Qv9C10L3QtNC40YbQuNGC0YLRltKjINC00LjQsNCz0L3QvtGB0YLQuNC60LDRgdGL0L0g0YLQsNCx0YPSk9CwINC205nQvdC1INCw0L3Ri9Kb0YLQsNGD0pPQsCDQutC10YDRliDTmdGB0LXRgNGW0L0g0LHQtdGA0YPRliDQvNKv0LzQutGW0L0uINCR0rHQvdC00LDQuSDQttCw0pPQtNCw0LnQu9Cw0YDQtNCwINGF0LjRgNGD0YDQs9C40Y/Qu9GL0psg05nQtNGW0YHRgtC10YDQtNGWINC20LDRgdCw0YPSk9CwINC00LjQsNCz0L3QvtGB0YLQuNC60LDQu9Cw0YMg0q/RiNGW0L0sINGD0LvRjNGC0YDQsCDQtNGL0LHRi9GB0YLRi9KbINC30LXRgNGC0YLQtdGDINC90LXQvNC10YHQtSDQutC+0LzQv9GO0YLQtdGA0LvRltC6INGC0L7QvNC+0LPRgNCw0YTQuNGPINC20LDRgdCw0LvRg9GLINC80q/QvNC60ZbQvS4g0JHSsdC7INC00LjQsNCz0L3QvtGB0YLQuNC60LDQu9Cw0YAg0L3QsNKb0YLRiyDQtNC10YDQtdC60YLQtdGAINC60LXQu9GC0ZbRgNGW0L8g0LHQtdGA0LXQtNGWLiDQkdCw0LvQsNC00LAg0ZbRiNGC0ZbSoyDQvtKjINC20LDSmyDRgtOp0LzQtdC90LPRliDQsdOp0LvRltC80ZYg0LDRg9GL0YDRg9GLINC90LXQs9GW0LfRltC90LXQvSDQsNC/0L/QtdC90LTQuNGG0LjRgiDQsdC+0LvRi9C/INCw0L3Ri9Kb0YLQsNC70LDQtNGLLiDQndC10LPRltC30ZbQvdC10L0g0LDQv9C/0LXQvdC00LjRhtC40YIg0LHQsNC70LDQu9Cw0YDQtNCwINC20LjRliDQtNCw0LzQuNC00Ysg0LbTmdC90LUg0YLQtdC3INKb0LDQsdGL0L3Sk9Cw0L3QtNGL0pvRgtCw0L0g0L/QtdGA0LjRgtC+0L3QuNGC0LrQtSDQsNGD0YvRgdGD0Ysg0LzSr9C80LrRltC9LiDQkdCw0LvQsNC70LDRgNC00LAg0LDQv9C/0LXQvdC00LjRhtC40YLRgtGW0qMg0LbQtdC00LXQuyDSm9Cw0LHRi9C90YMg0LXRgNC10YHQtdC60YLQtdGA0LTQtdC9INKb0LDRgNCw0pPQsNC90LTQsCDQsNC50YvRgNC80LDRiNGL0LvRi9KT0Ysg0L7QuyDQttCw0YEg0LXRgNC10LrRiNC10LvRltCz0ZYg0LHQvtC70YvQvyDRgdCw0L3QsNC70LDQtNGLLiDQltC10LTQtdC7INCw0L/Qv9C10L3QtNC40YbQuNGCINC90LXQs9GW0LfRltC90LXQvSDTmdGAINC20LDRgdGC0LAg0LHQvtC70YPRiyDQvNKv0LzQutGW0L0uINCa06nQvyDQttCw0pPQtNCw0LnQtNCwIDcg0LbQsNGB0YLQsNC9INCx0LDRgdGC0LDQvyDQutOp0L/RgtC10L8g0LrQtdC30LTQtdGB0LXQtNGWLiDQkNC7IDMg0LbQsNGB0YLQsNC9INCw0YHSm9Cw0L0g0LHQsNC70LDQu9Cw0YDQtNCwINGB0LjRgNC10Log0LrQtdC30LTQtdGB0LXQtNGWLiDQntC90YvSoyDRgdC40LzQv9GC0L7QvNC00LDRgNGLINC60ZbQvdC00ZbQuiDQsNC50LzQsNKT0YvQvdGL0qMg0LDRg9GL0YDRgdGL0L3Rg9GLINCx0LvQvtGL0L8g0LXRgdC10L/RgtC10LvQtdC00ZYuINCe0LTQsNC9INCx06nQu9C10LogMSDRgNC10YLRgtGW0Log0pvSsdGB0YMsINC60LXQuSDQttCw0pPQtNCw0LnQtNCwINC905nQttGW0YHRgtGW0qMg0rHQt9Cw0psg0YPQsNKb0YvRgiDQsdC+0LvQvNCw0YPRiy4g0JbQtdC00LXQuyDRgtKv0YDRltC90LTQtSDRgtC10LzQv9C10YDQsNGC0YPRgNCw0L3Ri9KjINC606nRgtC10YDRltC70YPRliDQutC10LfQtNC10YHRg9GWINC80q/QvNC60ZbQvS4g0JbTmdC90LUg0rHQudKb0Ysg0LHSsdC30YvQu9Cw0LTRiywg0YLTmdCx0LXRgtGWINC20L7Sk9Cw0LvQsNC00Ys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77" table:style-name="ce1">
            <text:p>1066977</text:p>
          </table:table-cell>
          <table:table-cell office:value-type="string" table:style-name="ce1">
            <text:p>kazakh</text:p>
          </table:table-cell>
          <table:table-cell office:value-type="string" table:style-name="ce1">
            <text:p>Билет 10&amp;lt;br /&amp;gt; 1.Жаңа түған балаларда токсикалық эритема терінің қандай морфологиялық элементеріне жатады. Нешіңші кұніңде айқын болады. Сипаттама беріңіз.&amp;lt;br /&amp;gt; 2. Хирург 5-жасар баланы қараған. Соқыр ішегінің ауытып орналасқанын болжамдаған. Балалардың соқыр ішек қабынуында ауырсынудын атипиялы болуы қандай анатомиялық ерекшеліктермен байланысты&amp;lt;br /&amp;gt;</text:p>
          </table:table-cell>
          <table:table-cell office:value-type="string" table:style-name="ce1">
            <text:p>MSDRgdKx0YDQsNKb0pvQsCDQttCw0YPQsNC/OiAgICAgICAgICAgICAgICAgICAgICAgICAgICAgICAgICAgICAgICAgICAgICAgICAgICAgICAgICAgICAgICAgICAgICAgICAgICAgICAgICAgICAgICAgICAgICAgICAgICAgICAgICAgICAgIDxiciAvPg0KINCW0LDSo9CwINGC0YPSk9Cw0L0g0L3TmdGA0LXRgdGC0LXQu9C10YDQtNC1INOp0LzRltGA0ZbQvdGW0qMg0LDQu9KT0LDRiNKb0Ysg0LrSr9C90LTQtdGA0ZbQvdC00LUg0L/QsNC50LTQsCDQsdC+0LvQsNGC0YvQvSDRgtC10YDRltC00LXQs9GWINC20LDQu9C/0YvQu9Cw0LzQsCDQv9Cw0YLQvtC70L7Qs9C40Y/Sk9CwINC20LDRgtCw0LTRiy7QntC90YvSoyDQvtGA0L3QsNC70LDRgdGD0Ysg0LrTqdC/INC20LDSk9C00LDQudC70LDRgNC00LAg0L3TmdGA0LXRgdGC0LXQvdGW0qMg0LHQtdGC0YLQtdGA0ZbQvdC00LUsINGC0LXRgNGWINKb0LDRgtC/0LDRgNC70LDRgNGL0L3QtNCwICwg0LDRj9KT0YvQvNC10L3QtdC9INKb0L7Qu9C00LDRgNGL0L3QtNCwINCx0L7Qu9Cw0YLRi9C9INC60ZbRiNC60LXQvdGC0LDQuSDSk9Cw0L3QsCDSm9GL0LfRi9C7INC205nQvdC10LTQtSDRgdC+0L3Ri9C80LXQvSDSm9Cw0YLQsNGAINC606nRgtC10YDRltKj0LrRliDQv9Cw0L/Rg9C70LDQu9Cw0YAg0L3QtdC80LXRgdC1INC/0YPRgdGC0YPQu9Cw0LvQsNGA0LzQtdC9INC606nRgNGW0L3RltGB0ZbQvSDQsdC10YDQtdC00ZYuINCR0rHQuyDQsdOp0YDRgtC/0LXQu9C10YAg05nQtNC10YLRgtC1INCw0L3Ri9KbINC20LjQtdCz0ZYg0YjQtdC60YLQtdC70LPQtdC9INCx0L7Qu9GL0L8g0LrQtdC70LXQtNGWLiDQntC90YvSoyDQvNC+0YDRhNC+0LvQvtCz0LjRj9C70YvSmyDSm9Kx0YDRi9C70YvQvNGL0L3Ri9KjINC10YDQtdC60YjQtdC70ZbQutGC0LXRgNGWINC80YvQvdCw0LTQsNC5OiDQsdGW0YLQtdC70ZbQvyDQvdC10LzQtdGB0LUg05nQu9GWINC00rHRgNGL0YEg0LTQsNC80YvQvyDQttC10YLRltC70LzQtdCz0LXQvSDRgtC10YAg0LHQtdC30LTQtdGA0ZYg0LbTmdC90LXQtNC1INC905nRgNC10YHRgtC1INGI0LDRiNGL0L3Ri9KjINGE0L7Qu9C40LrRg9C70LvQtNCw0YDRiyDQsdC+0LvRg9GLINC80q/QvNC60ZbQvS4g0JDQu9KT0LDRiNGL0L3QtNCwINCx0rHQuyDTqdC30LPQtdGA0ZbRgdGC0LXRgCDQutCw0L/QuNC70LvRj9GA0LvQsNGA0LTRi9KjINCw0LnRgtCw0YDQu9GL0pvRgtCw0Lkg0LrQtdKj0LXRjtGWINC905nRgtC40LbQtdGB0ZbQvdC00LUg0L/QsNC50LTQsCDQsdC+0LvQsNGC0YvQvSDSm9GL0LfQsNGA0YMg0pvQvtC70LTRi9KjINCx0LDRgdGL0L3QtNCwLCDRgtCw0LHQsNC90YvQvdC00LAgINCx0ZbRgNC90LXRiNC1INGB0LDSk9Cw0YLRgtCw0L0g0YHQvtKjIDItMyDRgtOZ0YPQu9GW0LrQutC1INC00LXQudGW0L0g0YHQsNKb0YLQsNC70LDQtNGLLiAgINCh0L7Qu9Cw0LnRiNCwINCx0rHQuyDQv9Cw0YLQvtC70L7Qs9C40Y8g0LbQsNC70L/RiyBFVE4g0Y/Sk9C90Lgg0Y3RgNC40YLQtdC80LAg0YLQvtC60YHQuNC60YPQvCDQvdC10L7QvdCw0YLQsNGA0YPQvCDQtNC10L8g0LDRgtCw0YPRi9C80YvQt9KT0LAg0LTQsCDQsdC+0LvQsNC00Ysg0LXQutC10L0uINCe0L3Ri9KjINGN0YLQuNC+0L/QsNGC0L7Qs9C10L3QtdC30ZYg0pvQvtGA0YjQsNKT0LDQvSDQvtGA0YLQsCDQsdCw0LrRgtC10YDQuNGP0LvQsNGAINC90LXQvNC10YHQtSDQsNC70LvQtdGA0LPQtdC90LTQtdGAINOZ0YHQtdGA0ZbQvdC1INC905nRgNC10YHRgtC1INCw0pPQt9Cw0YHRi9C90YvSoyDQutC10YDRliDRgNC10LDQutGG0LjRj9GB0Ysg0LHQvtC70YvQvyDRgdCw0L3QsNC70LDQtNGLLiDQltCw0qPQsCDRgtGD0pPQsNC9INC905nRgNC10YHRgtC10LvQtdGA0LTQtSDQttC40ZYg0LrQtdC30LTQtdGB0LXQtNGWIC4g0J3TmdGA0LXRgdGC0LXQvdGW0qMg0pvQvtGA0YjQsNKT0LDQvSDQvtGA0YLQsNKT0LAg0LHQtdC50ZbQvNC00LXQu9GD0ZbQvdGW0qMg0YHQvtC90YvQvNC10L0g0pvQsNGC0LDRgNC70LDRgdCwINC20q/RgNC10YLRltC9INC/0L7Qu9C40LzQvtGA0YTRgtGLINCx06nRgNGC0L/QtdC70LXRgNC00ZbSoyDRgtGA0LDQvdC30LjRgtC+0YDQu9GLINKb0YvQt9Cw0YDRg9GLLiDQkdKx0Lsg0LXQvNC00LXRg9C00ZYg0pvQsNC20LXRgiDQtdGC0L/QtdC50YLRltC9INOp0LfQs9C10YDRltGBINCx0L7Qu9GL0L8g0YLQsNCx0YvQu9Cw0LTRiy4g0JHRltGA0L3QtdGI0LUg0LrSr9C9INGW0YjRltC90LTQtSDSm9Cw0LnRgtCwINC20L7QudGL0LvQsNC00YsuINCU0LXRgdC10LTQtSDQsNGC0LAg0LDQvdCw0LvQsNGA0LzQtdC9INGC05nRgNCx0LjQtdC70LXRg9GI0ZbQu9C10YDQtNGWINCw0LvQsNKj0LTQsNGC0YPRiyDQvNKv0LzQutGW0L0uICAgICAgICAgICAgICAgICAgICAgICAgICAgICAgICAgICAgICAgICAgICAgICAgICAgICAgICAgICAgICAgICAgICA8YnIgLz4NCiAgICAgICAgICAgICAgICAgICAgICAgICAgICAgICAgICAgICAgICAgICAgICAgICAgICAgICAgICAgICAgICAgICAgICAgICAgICAgICAgICAgICAgICAgICAgICAgICAgICAgICAgICAgICAgICAgICAgICAgICAgICAgICAgICA8YnIgLz4NCjIg0YHSsdGA0LDSm9Kb0LAg0LbQsNGD0LDQvzogICAgICAgICAgICAgICAgICAgICAgICAgICAgICAgICAgICAgICAgICAgICAgICAgICAgICAgICAgICAgICAgICAgICAgICAgICAgICAgICAgICAgICAgICAgICAgICAgICAgICAgICAgICAgICAgPGJyIC8+DQogICDQodC+0pvRi9GAINGW0YjQtdC6INCw0L3QsNGC0L7QvNC40Y/Qu9GL0psg0YLSsdGA0pPRi9C00LDQvSDQutOp0LvQtNC10L3QtdKjINC20LjQtdC6INGW0YjQtdC60YLRltKjINCx0LDRgdGC0LDRgyDQsNC70LDRgtGL0L0g0YLSsdGB0YvQvdC00LAg0pvSsdGA0YIg0YLTmdGA0ZbQt9C00ZYg0L3QtdC80LXRgdC1INGC0q/RgtGW0Log0ZbRgdC/0LXRgtGC0LXRgSDSm9Kx0YDRi9C70YvQvCDQttOZ0L3QtSDSm9Kx0YDRgdCw0psg0pvRg9GL0YHRi9C90YvSoyDQvtKjINC20LDSmyDRgtOp0LzQtdC90LPRliDQsdKx0YDRi9GI0YvQvdC00LAg0L7RgNC90LDQu9Cw0YHSm9Cw0L0uINCh0L7QuyDRgdC10LHQtdC/0YLQtdC9INGB0L7Sm9GL0YAg0ZbRiNC10LrRgtGW0qMg0L/QsNGC0L7Qu9C+0LPQuNGP0LvQsNGA0Ysg0pvQsNCx0YvQvdGDINC20LDSk9C00LDQudC70LDRgNGLINC60LXQt9GW0L3QtNC1INCw0YLQsNC70pPQsNC9INC70L7QutCw0LvQuNC30LDRhtC40Y/QtNCw0L0g0YTQuNC30LjQutCw0LvQtNGLINOZ0LTRltGB0YLQtdGAINC60LXQt9GW0L3QtNC1INCx0LXQu9Cz0ZbQu9C10YAg0LDQvdGL0pvRgtCw0LvRg9GLINC60LXRgNC10LouINCQ0LvQsNC50LTQsCwg0YHQvtKb0YvRgCDRltGI0LXQutGC0ZbSoyDQsNGC0LjQv9C40Y/Qu9GL0psg0Y/Sk9C90Lgg0LDRgtCw0LvSk9Cw0L0g0L7RgNC90YvQvdCw0L0g0LHQsNGB0pvQsCDQsNC50LzQsNKb0YLQsCDQvtGA0L3QsNC70LDRgdGD0Ysg0YHQvtC7INC20LDSm9GC0LAsINC90LXQvNC10YHQtSDQttCw0LzQsdCw0YEg0LDRgdGC0LDRgyDSm9GD0YvRgdGL0L3QtNCwINC90LXQvNC10YHQtSDQttC+0pPQsNGA0Ysg0pvQsNGA0LDQuSDQsdCw0YPRi9GA0LTRi9KjINC20LDQvdGL0L3QtNCwINC+0YDQvdCw0LvQsNGB0YPQu9Cw0YDRiyAg0LTQuNCw0LPQvdC+0YHRgtC40LrQsNC70LDRgyDQttOZ0L3QtdC00LUg0L7Qv9C10YDQsNGG0LjRj9C70YvSmyDQsNGA0LDQu9Cw0YHRg9C70LDRgCDQutC10LfRltC90LTQtSDSm9C40YvQvdC00YvSm9GC0LDRgCDRgtGD0pPRi9C30LDQtNGLLiDQntCbINGC0ZbQutC70LXQuSDQsdCw0LvQsNC90YvSoyDRltGI0LXQs9GW0L3RltKjINCw0LnQvdCw0LvRg9GL0L3QsCDQsdCw0LnQu9Cw0L3Ri9GB0YLRiywg0LHQsNC70LDRgNC00LAgMy00INC20LDRgdGC0LDRgNGL0L3QsCDQtNC10LnRltC9INCx0rHQuyDQv9GA0L7RhtC10YEg0YLQvtC70YvSk9GL0LzQtdC9INCw0Y/Sm9GC0LDQu9GL0L8g0q/Qu9Cz0LXRgNC80LXQudC00ZYsINC+0YHRi9C90YvSoyDTmdGB0LXRgNGW0L3QtdC9INCx0LDQu9Cw0YDQtNCwINGB0L7Sm9GL0YAg0ZbRiNC10LrRgtC10YDRliDTmdGA0YLSr9GA0LvRliDQsdCw0pPRi9GC0YLQsCDSm9C+0LfSk9Cw0LvRi9C/INGC0rHRgNGD0Ysg0LbQsNKT0LTQsNC50LvQsNGA0Ysg0L7RgNGL0L0g0LDQu9Cw0LTRiy4gINCc0YvRgdCw0LvRiyDQvNKx0L3QtNCw0Lkg0LTQuNCw0LPQvdC+0LfQtNGLINGA0LDRgdGC0LDRgyDSr9GI0ZbQvSDQo9CU0Jcg0LbTmdC90LUg0LTQtSDSm9C40YvQvSDQttCw0pPQtNCw0LnQu9Cw0YDQtNCwINCa0KIgINCw0YHQv9Cw0L/RgtGL0psg0LfQtdGA0YLRgtC10YMg05nQtNGW0YHRgtC10YDRliDQttKv0YDQs9GW0LfRltC70YPRliDRi9Kb0YLQuNC80LDQuy4gINCh0L7Sm9GL0YAg0ZbRiNC10LrRgtGW0qMg0pvQsNCx0YvQvdGD0Ysg0LrQtdC30ZbQvdC00LUg0LHQsNC70LDQu9Cw0YDQtNCwINOZ0LTQtdGC0YLQtSA3INC20LDRgdGC0LDQvSDQsdCw0YHRgtCw0LvQsNC00Ysu0JHRltGA0LDSmyDQsdC10LvQs9GW0LvRliDQsdC10YAg0YHQtdCx0LXQv9GC0LXRgNCz0LUg0LHQsNC50LvQsNC90YvRgdGC0Ysg0LHSsdC7INC80LXRgNC30ZbQvCDQtdGA0YLQtSDQvdC10LzQtdGB0LUg0LrQtdGIINCx0L7Qu9GD0Ysg0LzSr9C80LrRltC9LiDQkNC/0LXQvdC00LjRhtC40YLRgtGW0qMg0LXRgNC10YHQtdC60YLQtdGA0LzQtdC9INCx0LDQu9Cw0LvQsNGA0LTQsCDQsdC+0LvRgyDQttCw0pPQtNCw0LnQu9Cw0YDRi9C90YvSoyDTqdC30ZbQvdC00ZbQuiDQtdGA0LXQutGI0LXQu9GW0LrRgtC10YDRliDQsdCw0YDRiNGL0LvRi9KbINCx0LDQu9CwINC60LXQt9C00LUg0LbRi9C70LTQsNC8INGC0LXQtyDQtNCw0LzRi9C/INC606nQvyDQttCw0pPQtNCw0LnQu9Cw0YDQtNCwINC/0LXRgNC40YLQvtC90LjRgtC60LUg0rHQu9Cw0YHRi9C/INCw0YHSm9GL0L3QsNC00YsuINCQ0LsgMyDQttCw0YHRgtCw0L0g0LDRgdKb0LDQvSDQsdCw0LvQsNGA0LTQsCDQsdCw0Y/RgyDQtNCw0LzQuNC00YsuINCR0rHQuyDQv9Cw0YLQvtC70L7Qs9C40Y8g0LrQtdC30ZbQvdC00LUg0LDRg9GL0YDRgdGL0L3RgyDRgdC40LzRgtC+0LzRi9C90YvSoyDQu9C+0LrQsNC70LjQt9Cw0YbQuNGP0YHRiyDQutGW0L3QtNGW0LrRgtGW0qMg0LbQsNC90YvQvdC00LAg0LbTmdC90LXQtNC1INCx0ZbRgNC90LXRiNC1INGB0LDSk9Cw0YLRgtCw0L0g0LrQtdC50ZbQvSDRltGIINCw0LnQvNCw0pPRi9C9INCw0LHQtNC+0LzQuNC90LDQu9C00Ysg0LDRg9GL0YDRgdGL0L3Rg9C80LXQvdC10L0g0YLSr9Cz0LXQuyDSm9Cw0LzRgtGL0L8g0YHQvtC00LDQvSDQutC10LnRltC9INC+0qMg0LbQsNKbINC80YvSm9GL0L0g0LDQudC80LDSk9GL0L3QsCDRiNC+0pPRi9GA0LvQsNC90LDQtNGLLiDQotCw0pPRiyDQsdGW0YAg0LDRgtC40L/QuNGP0LvRi9KbINC+0YDQvdCw0LvQsNGB0YPRi9C90LAg0YHQtdCx0LXQvyDQttCw0qPQsCDRgtGD0pPQsNC9INC905nRgNC10YHRgtC10LvQtdGA0LTRliDQsNC/0L/QtdC90LTQuNC60YEg0L/RltGI0ZbQvdGWINC60L7QvdGD0YEg0YLTmdGA0ZbQt9C00LXRgSDQvtC90YvSoyDSm9Kx0YDRgiDRgtOZ0YDRltC30LTRliDTqdGB0ZbQvdC00ZbRgdGW0L3RltKjINGI0LDQttGL0YDQsNKb0LDQudGLINC10LTTmdGD0ZbRgCDSr9C70LrQtdC9INCx0rHQuyDQvtC90YvSoyDQtdGA0LrRltC9INKb0L7Qt9KT0LDQu9GD0YvQvdCwINCx0ZbRgNC00LXQvSDQsdGW0YAg0YHQtdCx0LXQv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7" table:style-name="ce1">
            <text:p>915287</text:p>
          </table:table-cell>
          <table:table-cell office:value-type="string" table:style-name="ce1">
            <text:p>russian</text:p>
          </table:table-cell>
          <table:table-cell office:value-type="string" table:style-name="ce1">
            <text:p>Билет 10&amp;lt;br /&amp;gt; 1.К каким морфологическим элементам кожи относится токсическая эритема кожи новорожденного? Дайте характеристику элементу сыпи&amp;lt;br /&amp;gt; 2.Ребенку 5 лет. Осмотрен хирургом. высказано предположение об атипичном расположении воспаленного червеобразного отростка. С какими анатомо-физиологическими особенностями это связано?&amp;lt;br /&amp;gt;</text:p>
          </table:table-cell>
          <table:table-cell office:value-type="string" table:style-name="ce1">
            <text:p>MSnQrdGA0LjRgtGA0LXQvNCwINC90L7QstC+0YDQvtC20LTQtdC90L3Ri9GFLSDRjdGC0L4g0YLRgNCw0L3Qt9C40YLQvtGA0L3QvtC1INC/0L7QutGA0LDRgdC90LXQvdC40LUg0LrQvtC20Lgg0LrQvtGC0L7RgNC+0LUg0YHQstGP0LfQsNC90L4g0YEg0LDQtNCw0L/RgtCw0YbQuNC10Lkg0YDQtdCx0LXQvdC60LAg0Log0LbQuNC30L3QuCDQstC90LUg0YPRgtGA0L7QsdCwLCDQvNCw0YLQutC4INC4INC+0L3QsCDRgdC+0L/RgNC+0LLQvtC20LTQsNC10YLRgdGPINC/0L7Qu9C40LzQvtGA0YTQvdC+0Lkg0YHRi9C/0YzRji4g0KLQvtC60YHQuNGH0LXRgdC60LDRjyDRjdGA0LjRgtC10LzQsCDRjdGC0L4g0L/QvtC60YDQsNGB0L3QtdC90LjQtSDRg9GH0LDRgdGC0LrQsCDQutC+0LbQuCDQuNC3INC30LAg0LHQvtC70YzRiNC+0LPQviDQutC+0LvQuNGH0LXRgdGC0LLQsCDQvNC10LTQuNCw0YLQvtGA0L7QsiDQsNC70LvQtdGA0LPQuNC5INC90L7QstC+0YDQvtC20LTQtdC90L3QvtCz0L4g0LrQvtGC0L7RgNC+0LUg0YTQuNC30LjQvtC70L7Qs9C40YfQtdGB0LrQuNC5INC/0YDQvtC40YHRhdC+0LTQuNGCINCyINC/0LXRgNCy0YvQtSDQtNC90Lgg0Lgg0L3QtdC00LXQu9C4INC20LjQt9C90LguINCi0L7QutGB0LjRh9C10YHQutCw0Y8g0Y3RgNC40YLRgNC10LzQsCDQvtGC0L3QvtGB0LjRgtGB0Y8g0Log0L/QtdGA0LLQuNGH0L3Ri9C8INC80L7RgNGE0L7Qu9C+0LPQuNGH0LXRgdC60LjQvCDRjdC70LXQvNC10L3RgtCw0Lwg0LrQvtC20Lgu0J7RgdC90L7QstC90L7QuSDRjdC70LXQvNC10L3RgiDQv9GA0Lgg0LTQsNC90L3QvtC8INGB0L7RgdGC0L7Rj9C40Lkg0Y3RgtC+INC/0Y/RgtC90LAuINCf0Y/RgtC90LAtINGA0LDQt9C80LXRgCDQvtGCINC80LXQu9C60L7RgtC+0YfQtdGH0L3Ri9GFINC00L4g0LrRgNGD0L/QvdGL0YUsINGG0LLQtdGCINC+0YIg0YDQvtC30L7QstC+0LPQviDQtNC+INC60YDQsNGB0L3QvtCz0L4sINC40LzQtdC10YIg0YfQtdGC0LrQuNC1INC40LvQuCDRgdC70LXQs9C60LAg0YDQsNC30LzRi9GC0YvQtSDQs9GA0LDQvdC40YbRiyzRh9Cw0YnQtSDQstGB0LXQs9C+INC90LAg0LvQuNGG0LUsINGC0YPQu9C+0LLQuNGJ0LUg0Lgg0L3QsCDQutC+0L3QtdGH0L3QvtGB0YLRj9GFLiDQodGL0L/RjCDQv9C+0Y/QstC70Y/QtdGC0YHRjyDRh9Cw0YnQtSDQstGB0LXQs9C+INC90LAgMi0zINC00LXQvdGMINC20LjQt9C90Lgg0Lgg0LjRgdGH0LXQt9Cw0LXRgiDQsdC10Lcg0LvQtdGH0LXQvdC40Y8g0YfQtdGA0LXQtyA1LTcg0LTQvdC10LkuINC80LXQtNC40LDRgtC+0YDRiyDQsNC70LvQtdGA0LPQuNC5INGN0YLQviDQsdC40L7Qu9C+0LPQuNGH0LXRgdC60Lgg0LDQutGC0LjQstC90YvQtSDQstC10YnQtdGB0YLQstCwINC60L7RgtC+0YDRi9C1INCy0YvQtNC10LvRj9GO0YLRgdGPINC/0YDQuCDRgNCw0LfRgNGD0YjQtdC90LjQuSDQutC70LXRgtC+0Log0YPRh9Cw0YHRgtCy0YPRjtGJ0LjRhSDQsiDQsNC70LvQtdGA0LPQuNGH0LXRgdC60LjRhSDRgNC10LDQutGG0LjRj9GFLiAyKdCn0LXRgNCy0LXQvtCx0YDQsNC30L3Ri9GFINC+0YLRgNC+0YHRgtC+0Lot0LrQvtC90YPRgdC+0LLQuNC00L3QvtC5INGE0L7RgNC80Ysg0LIg0YHQu9C40LfQuNGB0YLQvtC5INC+0LHQu9Cw0YHRgtC4INC40LzQtdC10YIg0YPQs9C70YPQsdC70LXQvdC90YvQtSDQutGA0LjQv9GC0Ysg0LAg0YLQsNC60LbQtSDQv9C70L7RgdC60LjQuSDRjdC/0LjRgtC10LvQuNC5LiDQoyDQtNC10YLQtdC5IDUg0LvQtdGCINCw0YLQuNC/0LjRh9C90L7QtSDRgNCw0YHQv9C+0LvQvtC20LXQvdC40LUg0LLQvtGB0L/QsNC70LXQvdC90L7Qs9C+INGH0LXRgNCy0LXQvtCx0YDQsNC30L3QvtCz0L4g0L7RgtGA0L7RgdGC0LrQsCDQvNC+0LbQtdGCINCx0YvRgtGMINGB0LLRj9C30LDQvdCwINGBINCw0L3QsNGC0L7QvNC+LdGE0LjQt9C40L7Qu9C+0LPQuNGH0LXRgdC60LjQvNC4INC+0YHQvtCx0LXQvdC90L7RgdGC0Y/QvNC4INGC0LDQutC40LUg0LrQsNC6OiAxLtCS0LDRgNC40LDQsdC10LvRjNC90L7RgdGC0Ywg0YDQsNGB0L/QvtC70L7QttC10L3QuNGPINGH0LXRgNCy0LXQvtCx0YDQsNC30L3QvtCz0L4g0L7RgtGA0L7RgdGC0LrQsC0g0YLQviDQtdGB0YLRjCDRgyDQtNC10YLQtdC5INGH0LXRgNCy0LXQvtCx0YDQsNC30L3Ri9C5INC+0YLRgNC+0YHRgtC+0Log0LjQtyDQt9CwINC90LXQtNC+0YHRgtCw0YLQvtGH0L3QvtCz0L4g0YDQsNC30LLQuNGC0LjRjyDRhNC40LrRgdC40YDRg9GO0YnQtdCz0L4g0LDQv9C/0LDRgNCw0YLQsCDQsdGA0Y7RiNC90L7QuSDQv9C+0LvQvtGB0YLQuCDQvNC+0LbQtdGCINC30LDQvdC40LzQsNGC0Ywg0YDQsNC30L3Ri9C1INC/0L7Qu9C+0LbQtdC90LjQtSDRgtCw0LrQuNC1INC60LDQui3RgtCw0LfQvtCy0L7QtSDQv9C+0LvQvtC20LXQvdC40LUg0LIg0L7QsdC70LDRgdGC0Lgg0LzQsNC70L7Qs9C+INGC0LDQt9CwLCDRgNC10YLRgNC+0YbQtdC60LDQu9GM0L3QvtC1LdGC0L4g0LXRgdGC0Ywg0LfQsCDRgdC70LXQv9C+0Lkg0LrQuNGI0LrQvtC5LCDRgNC10YLRgNC+0L/QtdGA0LjRgtC+0L3QtdCw0LvRjNC90L4g0L/QvtC30LDQtNC4INCx0YDRjtGI0LjQvdGLLCDQvNC10LTQuNCw0LvRjNC90L7QtSDRgtC+INC10YHRgtGMINC6INGB0YDQtdC00L3QtdC5INC70LjQvdC40Lkg0LbQuNCy0L7RgtCwLjIuINCS0L7Qt9GA0LDRgdGC0L3Ri9C1INC+0YHQvtCx0LXQvdC90L7RgdGC0LgtINGDINC00LXRgtC10Lkg0YHRgtC10L3QutCwINGH0LXRgNCy0LXQvtCx0YDQsNC30L3QvtCz0L4g0L7RgtGA0L7RgdGC0LrQsCDRj9Cy0LvRj9C10YLRgdGPINCx0L7Qu9C10LUg0YLQvtC90LrQvtC5INC4INC/0YDQvtC90LjRhtCw0LXQvNC+0LksINC70LjQvNGE0LDRgtC40YfQtdGB0LrQuNC1INGE0L7Qu9C70LjQutGD0LvRiyDRgNCw0LfQstC40YLRiyDRgdC70LDQsdC+INGN0YLQviDQvNC+0LbQtdGCINC/0L7QstC70LjRj9GC0Ywg0L3QsCDQstC+0YHQv9Cw0LvQuNGC0LXQu9GM0L3Ri9C5INC/0YDQvtGG0LXRgdGBINC4INC10LPQviDRgdC60L7RgNC+0YHRgtGMLjMuINCd0LXQtNC+0YHRgtCw0YLQvtGH0L3QsNGPINGE0LjQutGB0LDRhtC40Y8g0L7RgNCz0LDQvdC+0LIg0LHRgNGO0YjQvdC+0Lkg0L/QvtC70L7RgdGC0LgtINC40Lcg0LfQsCDRgtC+0LPQviDRh9GC0L4g0YMg0LTQtdGC0LXQuSDQvdC1INC30LDQstC10YDRiNC10L0g0YDQsNC30LLQuNGC0LjQtSDRgdCy0Y/Qt9C+0YfQvdGL0Lkg0LDQv9C/0LDRgNCw0YIg0YMg0L3QuNGFINC60LjRiNC10YfQvdC40Log0LHQvtC70LXQtSDQv9C+0LTQstC40LbQtdC9INC4INGN0YLQviDQvNC+0LbQtdGCINGB0YLQsNGC0Ywg0L/RgNC40LfQvdCw0LrQvtC8INCw0YLQuNC/0LjRh9C90L7Qs9C+INGA0LDRgdC/0L7Qu9C+0LbQtdC90LjRjyDRh9C10YDQstC10L7QsdGA0LDQt9C90L7Qs9C+INC+0YLRgNC+0YHRgtC60LAuIDQuINCi0LDQutC20LUg0YMg0LTQtdGC0LXQuSDRgNCw0L3QvdC10LPQviDQstC+0LfRgNCw0YHRgtCwINGB0LjQvNC/0YLQvtC80Ysg0LzQvtCz0YPRgiDQsdGL0YLRjCDQvdC1INC30LDQvNC10YLQvdGLINC40Lcg0LfQsCDRgtC+0LPQviDRh9GC0L4g0LzQtdC90LjQtSDRgdC/0LXRhtC10YTQuNGH0LXRgdC60LDRjyDQv9C10YDQtdC00LDRh9CwINCx0L7Qu9C10LLRi9GFINC+0YnRg9GI0LXQvdC40Lkg0LjQu9C4INC40LzQv9GD0LvRjNGB0L7Qsi4g0KLQviDQtdGB0YLRjCDQstC+0YHQv9Cw0LvQtdC90LjQtSDQvNC+0LbQtdGCINGB0L7Qv9GA0LDQstC+0LbQtNCw0YLRjNGB0Y8g0LHQvtC70YzRjiDQsiDQttC40LLQvtGC0LUg0LAg0L3QtSDRh9C10YLQutC+INC70L7QutCw0LvQuNC30L7QstCw0YLRjNGB0Y8g0LIg0L/RgNCw0LLQvtC5INC/0L7QstC30LTQvtGI0L3QvtC5INC+0LHQu9Cw0YHRgtC4LiA1LtCi0LDQutC20LUg0LjQtyDQt9CwINGA0LDQt9Cy0LjRgtC40Y8g0L/QtdGA0L7RgtCw0L3QuNGC0LAtINGDINC00LXRgtC10Lkg0LLQvtC70YHQv9C+0LvQtdC90LjQtSDQsdGL0YHRgtGA0L4g0YDQsNGB0L/RgNC+0YHRgtGA0L7QvdGP0LXRgtGB0Y8g0L3QsCDQsdGA0Y7RiNC40L3RgyDQuNC3INC30LAg0YHQu9Cw0LHQvtC5INC30LDRidC40YLRiyDQuCDRgtC+0L3QutC+0Lkg0YHRgtC10L3QutC4INC60LjRiNC60Lgg0Lgg0LzQvtC20LXRgiDQsdGL0YLRjCDQvdC10L/QvtC90Y/RgtC90LAg0LvQvtC60LDQu9C40LfQsNGG0LjRjyDQsdC+0LvQuC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91" table:style-name="ce1">
            <text:p>915291</text:p>
          </table:table-cell>
          <table:table-cell office:value-type="string" table:style-name="ce1">
            <text:p>russian</text:p>
          </table:table-cell>
          <table:table-cell office:value-type="string" table:style-name="ce1">
            <text:p>Билет 10&amp;lt;br /&amp;gt; 1.К каким морфологическим элементам кожи относится токсическая эритема кожи новорожденного? Дайте характеристику элементу сыпи&amp;lt;br /&amp;gt; 2.Ребенку 5 лет. Осмотрен хирургом. высказано предположение об атипичном расположении воспаленного червеобразного отростка. С какими анатомо-физиологическими особенностями это связано?&amp;lt;br /&amp;gt;</text:p>
          </table:table-cell>
          <table:table-cell office:value-type="string" table:style-name="ce1">
            <text:p>0J7QotCS0JXQoiDQndCQINCS0J7Qn9Cg0J7QoSAjMTog0JrQsNC6INC80Ysg0LfQvdCw0LXQvCDQtNC10YLQuCDQstC90YPRgtGA0LjRg9GC0YDQvtCx0L3QviDRgNCw0LfQstC40LLQsNGO0YLRgdGPINCyINGD0YHQu9C+0LLQvdC+INGB0YLQtdGA0LjQu9GM0L3QvtC5INGB0YDQtdC00LUsINCz0LTQtSDQuNGFINCy0L3Rg9GC0YDQtdC90L3QuNC1INC+0YDQs9Cw0L3RiyDQvdC1INC/0YDQuNGB0L/QvtGB0L7QsdC70LXQvdGL0Lwg0Log0YPRgdC70L7QstC40Y/QvCDQstC90LXRiNC90LXQuSDRgdGA0LXQtNGLLdCy0L3QtdGD0YLRgNC+0LHQvdGL0YUg0YPRgdC7LdC40LkuINCf0YDQuCDRgNC+0LbQtNC10L3QuNC4LCDRgi7QtS4g0L/QtdGA0LjQvtC00LUg0L3QvtCy0L7RgNC+0LbQtNC10L3QvdC+0YHRgtC4INGBINGG0LXQu9GM0Y4g0LDQtNCw0L/RgtCw0YbQuNC4LdC/0YDQuNGB0L/QvtGB0L7QsdC70LXQvdC90L7RgdGC0Lgg0L3QvtCy0L7Qs9C+INC+0YDQs9Cw0L3QuNC30LzQsCDQuiDQvdC+0LLRi9C8INGD0YHQu9C+0LLQuNGP0LwsINC/0YDQvtC40YHRhdC+0LTQuNGCINGA0Y/QtCDQuNC30LzQtdC90LXQvdC40LkgINC4INC/0YDQvtGP0LLQu9C10L3QuNC1INC/0LXRgNC10YXQvtC00L3Ri9GFICjQv9C+INC00YDRg9GD0LPQvtC80YMtINGC0YDQsNC90LfQuNGC0L7RgNC90YvRhSDRgdC+0YHRgtC+0Y/QvdC40LkpOiDRhNC40LfQuNC+0LvQvtCz0LjRh9C10YHQutCw0Y8g0LbQtdC70YLRg9GF0LAsINGE0LjQt9C40L7Qu9C+0LPQuNGH0LXRgdC60LDRjyDRjdGA0LjRgtC10LzQsCwg0YLQvtC60YHQuNGH0LXRgdC60LDRjyDRjdGA0LjRgtC10LzQsCwg0L7Qu9C40LPRg9GA0LjRjywg0YTQuNC30LjQvtC70L7Qs9C40YfQtdGB0LrQsNGPINGC0LDRhdC40LrQsNGA0LTQuNGPINC4INGC0LDQuiDQtNCw0LvQtdC1LiDQmtCw0Log0YDQsNC3INC+0LTQvdC40Lwg0LjQtyDQv9GA0L7Rj9Cy0LvQtdC90LjQuSDQtNCw0L3QvdC+0LPQviDRgdC+0YHRgtC+0Y/QvdC40Y8sINC60LDRgdCw0Y7RidC10LPQvtGB0Y8g0L7RgNCz0LDQvdCwLSDQutC+0LbQuCwg0L7RgtC90L7RgdC40YLRgdGPINGC0L7QutGB0LjRh9C10YHQutCw0Y8g0Y3RgNC40YLQtdC80LAuINCt0YLQviDQstC40LQg0L/QtdGA0LXRhdC+0LTQvdC+0LPQviDRgdC+0YHRgtC+0Y/QvdC40Y8sINCz0LTQtSDQvNC+0YDRhNC+0LvQvtCz0LjRh9C10YHQutC40Lwg0Y3Qu9C10LzQtdC90YLQvtC8INGB0LvRg9C20LjRgiDQv9GP0YLQvdC40YHRgtC+LSDQv9Cw0L/Rg9C70LvQtdC30L3QsNGPINGB0YvQv9GMLCDQutC+0YLQvtGA0LDRjyDQstC40LfRg9Cw0LvRjNC90L4g0L7Rh9C10L3RjCDQvtGC0LvQtdGH0LjQvNCwINC90LAg0YLQtdC70LUg0L3QvtCy0L7RgNC+0LbQtNC10L3QvdC+0LPQviwg0LjQty3Qt9CwINGH0LXQs9C+INC80LDRgtC10YDQuCDRgNC10LHQtdC90LrQsCDQvNC+0LPRg9GCINGH0LDRgdGC0L4g0L7QsdGA0LDRidCw0YLRjNGB0Y8g0LIg0LHQvtC70YzQvdC40YbRgyDQuNC3LdC30LAg0LHQtdGB0L/QvtC60L7QudC90L7RgdGC0LguINCU0LDQvdC90YvQtSDRgtGA0LDQvdC30LjRgtC+0YDQvdGL0LUg0YHQvtGB0YLQvtGP0L3QuNGPINC90LUg0L7RgtC90L7RgdGP0YLRgdGPINC6INC/0LDRgtC+0LvQvtCz0LjRh9C10YHQutC40LwsINGB0YfQuNGC0LDRjtGC0YHRjyDQvdC+0YDQvNCw0LvRjNC90YvQvCDQv9GA0L7Rj9Cy0LvQtdC90LjQtdC8INC00LvRjyDQvdC+0LLQvtGA0L7QttC00LXQvdC90YvRhS4g0KHRi9C/0Ywg0L/RgNC10LTRgdGC0LDQstC70LXQvdCwINGN0YDQuNGC0LXQvNCw0YLQvtC30L3Ri9C80LggKNC60YDQsNGB0L3Ri9C80LgpINC/0Y/RgtC90LDQvNC4LCDQs9C00LUg0L7QsdC90LDRgNGD0LbQuNCy0LDQtdGC0YHRjyDQttC10LvRgtC+0LLQsNGC0L7Qs9C+INGG0LLQtdGC0LAg0L7QsdGA0LDQt9C+0LLQsNC90LjQtSDQsiDRhtC10L3RgtGA0LUsINGH0YLQviDQuCDQvdC10YHQtdGCINC90LDQt9Cy0LDQvdC40LUg0L/QsNC/0L/Rg9C70LvRiyAo0YfQsNGJ0LUg0LjQvNC10L3QvdC+INC+0L3QuCksINC60L7RgtC+0YDRi9C1INCy0L7Qt9Cy0YvRiNCw0Y7RgtGB0Y8g0YHQu9C10LPQutCwINC90LDQtCDQutC+0LbQvdC+0Lkg0L/QvtCy0LXRgNGF0L3QvtGB0YLRjNGOLiDQntGC0LvQuNGH0LjQtSDQvtGCINC+0LHRi9GH0L3Ri9GFINCy0LjQt9GD0LDQu9GM0L3Ri9GFINC/0YPQt9GL0YDRjNC60L7QsiDRgtC+LCDRh9GC0L4g0L7QvdC4INC+0LrRgNGD0LbQtdC90Ysg0L/QtdGA0LjRhNC10YDQuNGH0LXRgdC60LjQvCDQutGA0LDRgdC90L7QstCw0YLRi9C8ICjRgi7QtS4g0LPQuNC/0LXRgNC40LzQuNGA0L7QstCw0L3QvdGL0LwpINCy0LXQvdGH0LjQutC+0Lw7INCyINC+0YfQtdC90Ywg0YDQtdC00LrQuNGFINGB0LvRg9GH0LDRj9GFINC/0YDQvtGP0LLQu9GP0Y7RgtGB0Y8g0LrQsNC6INC/0LDRgdGC0YPQu9C70YsuINCU0LDQvdC90LDRjyDRgdGL0L/RjCDQuNC80LXQtdGCINCyINGB0YDQtdC00L3QtdC8INGA0LDQt9C80LXRgNGLINCyINC00LjQsNC80LXRgtGA0LUg0L7RgiAy0YUg0LTQviAz0YUg0LzQuNC70LvQuNC80LXRgtGA0L7Qsi4g0JLRgNC10LzRjyDQv9GA0L7Rj9Cy0LvQtdC90LjRjyDQv9GA0LjRhdC+0LTQuNGC0YHRjyDQvtCx0YvRh9C90L4g0L3QsCAzLCA0INC40LvQuCA1INC00LXQvdGMINC20LjQt9C90Lgg0L3QvtCy0L7RgNC+0LbQtNC10L3QvdC90L7Qs9C+INC4INC90LUg0L7RgdGC0LDQstC70Y/RjyDRgdC70LXQtNC+0LIg0YHQv9C+0LrQvtC50L3QviDQuNGB0YfQtdC30LDQtdGCINC/0YDQuNC80LXRgNC90L4g0YfQtdGA0LXQtyAyINC40LvQuCAzINC00L3RjyDQv9C+0YHQu9C1INC/0YDQvtGP0LLQu9C10L3QuNGPOyDQuNC90L7Qs9C00LAg0L/RgNC+0YbQtdGB0YEg0LzQvtC20LXRgiDQt9Cw0YLRj9C90YPRgtGM0YHRjyDQvdCwINC90LXQtNC10LvRji4g0JvQvtC60LDQu9C40LfQsNGG0LjRjyDRgdGL0L/QuCDQvdCw0LjQsdC+0LvRjNGI0LDRjyDQsiDRgdC70LXQtNGD0Y7RidC40YUg0YPRh9Cw0YHRgtC60LDRhTog0LvQuNGG0L4sINC/0LXRgNC10LTQvdGP0Y8g0Lgg0LHQvtC60L7QstCw0Y/RjyDQv9C+0LLQtdGA0YXQvdC+0YHRgtGMINCz0YDRg9C00L3QvtC5INC60LvQtdGC0LrQuCwg0Y/Qs9C+0LTQuNGG0Ys7INGA0LXQttC1INC20LUg0LLQvtC30L3QuNC60LDRjtGCINCyINC+0LHQu9Cw0YHRgtC4INC70LDQtNC+0L3QtdC5INC4INGB0YLQvtC/LSDQvtC90Lgg0L7RgtGB0LDRjtGC0YHRjyAi0YfQuNGB0YLRi9C80LgiINC+0YIg0YHRi9C/0LguINCc0L7QttC90L4g0LTQvtCx0LDQstC40YLRjCDQviDRgdGF0L7QttC10YHRgtC4INC00LDQvdC90L7QuSDRgdGL0L/QuCDRgSDRgtGA0LDQvdC30LjRgtC+0YDQvdGL0Lwg0Lgg0YEg0L/QsNGC0L7Qu9C+0LPQuNGH0LXRgdC60LjQvNC4INGB0L7RgdGC0L7Rj9C90LjRj9C80LguINCh0YXQvtC20LXRgdGC0Ywg0YEg0YLRgNCw0L3Qty3QvNC4OiAxKdC80LjQu9C40LAtINGC0LDQutC20LUg0L7QsdGALdC40LUg0L/Rg9C30YvRgNGM0LrQvtCyLCDQvdC+INCx0LXQtyDQv9C10YDQtdGE0LXRgNC40YfQtdGB0LrQvtCz0L4g0LPQuNC/0LXRgNC40LzQuNGA0L7QstCw0L3QvdC+0LPQviDQstC10L3Rh9C40LrQsCwg0L/RgNC40YfQuNC90LAtINC30LDQutGD0L/QvtGA0LrQsCDRgdCw0LvRjNC90YvRhSDQttC10LvQtdC30LcsINC70L7QutCw0LvQuNC30YPQtdGC0YHRjyDRh9Cw0YnQtSDQvdCwINC90L7RgdC+0LLQvtC5INC/0L7QstC10YDRhdC90L7RgdGC0LguIDIp0L/QvtGC0L3QuNGG0LAtINC/0YDQvtGP0LLQu9C10L3QuNC1INC/0YPQt9GL0YDRjNC60L7Qsiwg0LfQsNC/0L7Qu9C90LXQvdC90YvRhSDQv9C+0LfRgNCw0YfQvdC+0Lkg0LbQuNC00LrQvtGB0YLRjNGOINC10LHQtyDQv9C10YDQuNGELdCz0L4gINC60YDQsNGB0L3QvtCz0L4g0LLQtdC90YfQuNC60LAsINC/0YDQuNGH0LjQvdCwLSDRh9Cw0YnQtSDQstGB0LXQs9C+INC30LDRgtGA0YPQtNC90LXQvdC40LUg0LjRgdC/0LDRgNC10L3QuNGPINC/0YDQuCDQv9C10YDQtdC90LDQs9GA0LXQstCw0L3QuNC4INGA0LXQsdC10L3QutCwLCDRgNCw0YHQv9C+0LvQvtC20LXQvdCwINGH0LDRidC1INCyINGB0LrQsNC70LTQutCw0YUg0LrQvtC20LguINCh0YXQvtC20LXRgdGC0Ywg0YEg0L/QsNGC0L7Qu9C+0LPQuNGH0LXRgdC60LjQvNC4OiAxKdC/0LjQvtC00LzQtdGA0LzQuNGPLSDQv9Cw0L/Rg9C70LvRiyDRgSDQv9C10YDQuNGE0LXRgNC40YfQtdGB0LrQuNC8INC60YDQsNGB0L3Ri9C8INCy0LXQvdGH0LjQutC+0LwsINC+0YLQu9C40YfQuNC1INC+0YIg0YLQvtC60YEt0L7QuSDRjdGA0LjRgtC10LzRiywg0L/QsNGC0YPQu9C70Ysg0LjQvNC10Y7RgiDQs9C90L7QudC90YvQuSDRgtC40L8g0YHQvtC00LXRgNC20LDQvdC40Y8gKNCz0L3QvtC50L3QuNGH0LrQuCkuIDIp0LPQtdGA0L/QtdGBLSDQvtGC0LvQuNGH0LjQtS0g0L/Rg9C30YvRgNGM0LrQuCDQt9Cw0L/QvtC70L3QtdC90L3Ri9C1INC20LjQtNC60L7RgdGC0YzRji4gLy8vLy8vLy8vINCe0KLQktCV0KIg0J3QkCDQktCe0J/QoNCe0KEgIzI6INCT0L7QstC+0YDRjyDQvtCxINCQ0KTQniwg0L/RgNC40LLQvtC00Y/RidC40Lwg0Log0LDRgtC40L/QuNGH0L3QvtC80YMg0YDQsNGB0L/QvtC70L7QttC10L3QuNGOINCw0L/Qv9C10L3QtNC40LrRgdCwLCDQvNC+0LbQvdC+INC/0LXRgNC10YfQuNGB0LvQuNGC0Ywg0YHQu9C10LQt0LXQtTogMSnQvdC10LTQvtGB0YLQsNGC0L7Rh9C90L4g0YDQsNC30LLQuNGC0LDRjyDQsdGA0YvQttC10LnQutCwLCDQutC+0YLQvtGA0LDRjyDQv9GA0Lgg0LLQt9GA0L7RgdC70LXQvdC40Lgg0L7RgNCz0LDQvdC40LfQvNCwINC4INC00L4g0LLRgdC10LPQviDQv9C10YDQuNC+0LTQsCDQttC40LfQvdC4INGE0LjQutGB0LjRgNGD0LXRgiDQvtGA0LPQsNC90Ysg0LHRgNGO0YjQvdC+0Lkg0L/QvtC70L7RgdGC0Lgg0Log0L/QvtC30LLQvtC90L7Rh9C90L7QvNGDINGB0YLQvtC70LHRgywg0L/RgNC40LrRgNC10L/Qu9GP0Y/RgdGMINC6INC90LXQuS4g0J7QvdCwINC/0L4g0LTQu9C40L3QtSDRj9Cy0Lst0YHRjyDQutC+0YDQvtGC0LrQvtC5LCDQndCeINC/0YDQuCDRjdGC0L7QvCDQvtGH0LXQvdGMINGA0LDRgdGC0Y/QttC40LzQvtC5LCDRh9GC0L4g0L7QsdGD0YHQu9Cw0LLQsNC10YIg0YHQstC+0LHQvtC00L3QvtC1INC/0LXRgNC10LzQtdGJ0LXQvdC40LUg0YfQtdGA0LLQtdC+0LHRgNCw0LfQvdC+0LPQviDQvtGC0YDQvtGB0YLQutCwINCyINCx0YDRjtGI0L3QvtC5INC/0L7Qu9C+0YHRgtC40LguIDIp0L3QtdC00L7RgdGC0LDRgtC+0YfQvdC+0YHRgtGMINGA0LDQt9Cy0LjRgtC40Y8g0LbQuNGA0L7QstC+0Lkg0YLQutCw0L3QuC4g0J7QvdCwINGC0LDQutC20LUg0LrQsNC6INC4INCx0YDRi9C20LXQudC60LAg0YPRh9Cw0YHRgtCy0YPQtdGCINCyINGE0LjQutGB0LDRhtC40LgsINC+0LrRgNGD0LbQsNGPINC80L7QttC90L4g0YHQutCw0LfQsNGC0Ywg0L7RgNCz0LDQvdGLINCx0YDRjtGI0L3QvtC5INC/0L7Qu9C+0YHRgtC4INC4INC30LDQvdC40LzQsNGPINC00L7RgdGC0LDRgtC+0YfQvdC+0LUg0L/RgNC+0YHRgtGA0LDQvdGB0YLQstC+LCDQvtCz0YDQsNC90LjRh9C40LLQsNC10YLRgiDQv9C10YDQtdC00LLQuNC20LXQvdC40LUg0LHRgNGO0YjQvdGL0YUg0L7RgNCz0LDQvdC+0LIgKNCyINGC0L7QvCDRh9C40YHQu9C1INC00LDQttC1INC4INC30LDQsdGA0Y7RiNC40L3QvdGL0YUtINC/0L7Rh9C60Lgg0LjQty3Qt9CwINC90LjQt9C60L4t0YDQsNC30LLQuNGC0L7QuSDQvtC60L7Qu9C+0L/QvtGH0LXRh9C90L7QuSDQttC40YDQvtCy0L7QuSDRgdGC0YAt0YDRiyksINGC0LXQvCDRgdCw0LzRi9C8INCx0L7Qu9GM0YjQtSDQv9GA0L7RgdGC0YDQsNC90YHRgtCy0LAg0LTQu9GPINC/0LXRgNC10LzQtdGJ0LXQvdC40Y8uIDMp0L/Qu9C+0YLQvdC+0LUg0L/RgNC40LvQtdCz0LDQvdC40LUg0L/QtdGC0LvQtdC5INGC0L7QvdC60L7QuSDQutC40YjQutC4INCy0YHQu9C10LTRgdGC0LLQuNC1INCx0L7Qu9C10LUg0LHQvtC70YzRiNC40YUg0YDQsNC30LzQtdGA0L7QsiDQv9C10YfQtdC90Lgg0L/QviDRgdGA0LDQstC90LXQvdC40Y4g0YHQviDQstC30YDQvtGB0LvRi9C8INC+0YDQs9Cw0L3QuNC30LzQvtC8KCDQsiDQvdC+0YDQvNC1INGDINC00LXRgtC10Lkg0LTQviAz0YUg0LvQtdGC0L3QtdCz0L4g0LLQvtC30YDQsNGB0YLQsCDQstGL0YXQvtC00LjRgiDQt9CwINC/0YDQtdC00LXQu9GLINGA0LXQsdC10YDQvdC+0Lkg0LTRg9Cz0Lgg0L/QviDRgdGA0LXQtNC90LUt0LrQu9GO0Yct0L7QuSDQu9C40L3QuNC4INC90LAgMS0xLjUg0YHQvCksINGC0LXQvCDRgdCw0LzRi9C8INC60LDQuiDQuCDQstGC0L7RgNCw0Y8g0L/RgNC40YfQuNC90LAsINGB0LvRg9C20LjRgiDQvtCx0YDQsNC30L7QstCw0L3QuNC10Lwg0L/RgNC+0YHRgtGA0LDQvdGB0YLQstCwINC00LvRjyDQv9C10YDQtdC80LXRidC10L3QuNGPLiDQmNGC0L7Qs9C+0Lwg0LLRgdC10YUg0L/RgNC40LLQtdC00LXQvdC90YvRhSDQkNCk0J4sINGH0LXRgNCy0LXQvtCx0YAt0YvQuSDQvtGC0YDQvtGB0YLQvtC6ICjQsNC/0L/QtdC90LTQuNC60YEpINC80L7QttC10YIg0YHQvNC10YnQsNGC0YzRgdGPINC40Lcg0L7QsdGL0YfQvdC+0LPQviDQv9C+0LvQvtC20LXQvdC40Y8gKNC/0YDQsNCy0LDRjyDQv9C+0LTQstC30LTQvtGI0L3QsNGPINC+0LHQu9Cw0YHRgtGMKSDQsiDQvNCw0LvRi9C5INGC0LDQtywgINCyINC70LXQstGD0Y4g0L/QvtC00LLQt9C00L7RiNC90YPRjiDQvtCx0LvQsNGB0YLRjCwg0YDQtdGC0YDQvtGG0LjQutCw0LvRjNC90L4gKNGCLtC1LiDQt9CwINGB0LvQtdC/0L7QuSDQutC40YjQutC+0LksINC60L7RgtC+0YDQsNGPINGP0LLQuy3RgdGPINGB0LvQtdC00Y7RidC40Lwg0L7RgtC00LXQu9C+0Lwg0YLQvtC70YHRgtC+0LPQviDQutC40YjQtdGH0L3QuNC60LApLCDQv9C+0LTQv9C10YfQtdC90L7Rh9C90L4sINGH0YLQviDQsiDQtNCw0LvRjNC90LXQudGI0LXQvCDQt9Cw0YLRgNGD0LTQvdGP0LXRgiDQtdCz0L4g0LTQuNCw0LPQvdC+0YHRgtC40LrRgy4g0KLQsNC60LbQtSDQvNC+0LbQvdC+INC00L7Qv9C+0LvQvdC40YLRjCDQvdCw0YHRh9C10YIg0LLQvtGB0L/QsNC70LXQvdC40Y8uINCjINC00LXRgtC10Lkg0YDQuNGB0Log0LLQvtGB0L/QsNC70LXQvdC40Y8g0LLRi9GI0LUg0LIg0YHQstGP0LfQuCDRgdC+INGB0L3QuNC20LXQvdC90L7QuSDQuNC80LzRg9C90L3QvtC5INGE0YPQvdC60YbQuNC10LksINGC0LDQutC20LUg0LLQvtGB0L/QsNC70LXQvdC40LUg0LzQvtC20LXRgiDQv9C10YDQtdC00LDRgtGM0YHRjyDQvdCwINC/0L7QtNCy0LfQtNC+0YjQvdGD0Y4g0LrQuNGI0LrRgywg0LjQty3Qt9CwINGC0L7Qs9C+INGH0YLQviDQuNC70LXQvtGG0LXQutCw0LvRjNC90YvQuSDQutC70LDQv9Cw0L0g0L3QtSDRgNCw0LfQstC40YIg0LIg0LTQvtGB0YLQsNGC0L7Rh9C90L7QuSDRgdGC0LXQv9C10L3QuCwg0YfRgtC+INC40LzQtdC10YIg0YHQv9C10YbQuNGE0LjRh9C10YHQutC+0LUg0L3QsNC30LLQsNC90LjQtS0g0LjQu9C10L7RhtC10LrQsNC70YzQvdGL0Lkg0YDQtdGE0LvRjtC60YEsINC4INC90LAg0LTRgNGD0LPQuNC1INCy0LHQu9C40LfQuCDQu9C10LbQsNGJ0LjQtSDQvtGA0LPQsNC90YssINGH0YLQviDRgtCw0LrQttC1INGP0LLQuy3RgdGPINCQ0KTQniDQv9C40YnQtdCy0LDRgNC40YLQtdC70YzQvdC+0Lkg0YHQuNGB0YLQtdC80Ysg0LTQtdGC0LXQuS4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8" table:style-name="ce1">
            <text:p>915358</text:p>
          </table:table-cell>
          <table:table-cell office:value-type="string" table:style-name="ce1">
            <text:p>russian</text:p>
          </table:table-cell>
          <table:table-cell office:value-type="string" table:style-name="ce1">
            <text:p>Билет 10&amp;lt;br /&amp;gt; 1.К каким морфологическим элементам кожи относится токсическая эритема кожи новорожденного? Дайте характеристику элементу сыпи&amp;lt;br /&amp;gt; 2.Ребенку 5 лет. Осмотрен хирургом. высказано предположение об атипичном расположении воспаленного червеобразного отростка. С какими анатомо-физиологическими особенностями это связано?&amp;lt;br /&amp;gt;</text:p>
          </table:table-cell>
          <table:table-cell office:value-type="string" table:style-name="ce1">
            <text:p>0JLQvtC/0YDQvtGBIDEuINCe0YLQstC10YI6INCi0L7QutGB0LjRh9C10YHQutCw0Y8g0Y3RgNC40YLQtdC80LAsINCyINC+0YLQu9C40YfQuNC1INC+0YIg0YTQuNC30LjQvtC70L7Qs9C40YfQtdGB0LrQvtC5ICjRgtC+INC10YHRgtGMINC90L7RgNC80YspLCDQsdC+0LvRjNGI0LUg0Y/QstC70Y/QtdGC0YHRjyDQv9Cw0YLQvtC70L7Qs9C40YfQtdGB0LrQvtC5OyDQv9GA0L7Rj9Cy0LvRj9C10YLRgdGPINC+0L3QsCDQvdCwIDItNCDQtNC10L3RjCDQuCDQtNC+0LvQttC90LAg0YPQudGC0Lgg0L/RgNC40LzQtdGA0L3QviDRh9C10YDQtdC3INC/0LDRgNGDINC00L3QtdC5LCDQtdGB0LvQuCDQsdC+0LvRjNGI0LUgNC01LCDRgtC+INGB0YDQvtGH0L3QviDRgdGC0L7QuNGCINC+0LHRgNCw0YLQuNGC0YzRgdGPINC6INC/0LXQtNC40LDRgtGA0YMuINCi0L7QutGB0LjRh9C10YHQutCw0Y8g0Y3RgNC40YLQtdC80LAg0LIg0L7RgtC70LjRh9C40LUg0L7RgiDRhNC40LfQuNC+0LvQvtCz0LjRh9C10YHQutC+0Lkg0Y/QstC70Y/QtdGC0YHRjyDQsiDQv9C+0YHQu9C10LTRgdGC0LLQuNC4INCy0LvQuNGP0L3QuNGPINGH0LXQs9C+LdGC0L4g0L3QsCDQutC+0LbRgyDRgNC10LHQtdC90LrQsCwg0Log0L/RgNC40LzQtdGA0YMg0LzQtdC00LjQsNGC0L7RgNC+0LIg0LLQvtGB0L/QsNC70LXQvdC40Y8g0LjQu9C4INCw0LvQu9C10YDQs9C40LgsINGN0YLQviDRgNCw0LfQvdC+0LPQviDRgNC+0LTQsCDQuCDQv9GA0LjRgNC+0LTRiyDRhtC40YLQvtC60LjQvdGLLCDQuNC90YLQtdGA0LvQtdC50LrQuNC90YssINGE0LDQutGC0L7RgNGLINC90LXQutGA0L7Qt9CwINC+0L/Rg9GF0L7Qu9C4INC4INGC0LDQuiDQtNCw0LvQtdC1LCDQuNC70Lgg0LbQtSDQutCw0LrQvtC5LdGC0L4g0YLRgNC40LPQs9C10YAg0LTQu9GPINC60L7QttC4ICjRgdC40LvRjNC90L7QtSDRgtGA0LXQvdC40LUg0L7QtNC10LbQtNGLINC40LvQuCDRgtC60LDQvdC4INC80LXQsdC10LvQuCDQuCDRgi7QtC4pLiDQpNC40LfQuNC+0LvQvtCz0LjRh9C10YHQutCw0Y8g0Y3RgNC40YLQtdC80LAg0L/RgNC+0Y/QstC70Y/QtdGC0YHRjyDQv9C+INCy0YHQtdC5INC60L7QttC1INC4INGP0LLQu9GP0LXRgtGB0Y8g0LrQsNC6INCw0LTQsNC/0YLQsNGG0LjQvtC90L3Ri9C5INC80LXRhdCw0L3QuNC30Lwg0YDQtdCx0LXQvdC60LAg0Log0L7QutGA0YPQttCw0Y7RidC10Lkg0YHRgNC10LTQtSDQuCDRgtC10LzQv9C10YDQsNGC0YPRgNC1LCDQsCDRgtC+0LrRgdC40YfQtdGB0LrQsNGPINGN0YDQuNGC0LXQvNCwINCy0YvQs9C70Y/QtNC40YIg0LrQsNC6INC90LXQsdC+0LvRjNGI0LjQtSDQstGL0L/Rj9GH0LjQstCw0L3QuNGPINC4INC/0YPRgdGC0YPQu9GLLCDRgSDQstC40LTQuNC80YvQvCDRgNC+0LfQvtCy0YvQvCDQstC10L3RhtC+0Lwg0LLQvtC60YDRg9CzLiDQkdGL0LLQsNC10YIg0YDQsNC30L3Ri9GFINGA0LDQt9C80LXRgNC+0LIg0L7RgiDQvNC10LvQutC40YUg0LLRi9GB0YvQv9Cw0L3QuNC5INC00L4g0LrRgNGD0L/QvdGL0YU7ICDQu9C+0LrQsNC70LjQt9C40YDRg9C10YLRgdGPINC/0L4t0YDQsNC30L3QvtC80YMsINCyINC30LDQstC40YHQuNC80L7RgdGC0Lgg0L7RgiDRjdGC0LjQvtC70L7Qs9C40Lgg0L/QvtGP0LLQu9C10L3QuNGPINGN0YDQuNGC0LXQvNGLLiDQntCx0YvRh9C90L4g0YLQvtC60YHQuNGH0LXRgdC60LDRjyDRjdGA0LjRgtC10LzQsCDQvdCw0YXQvtC00LjRgtGB0Y8g0L3QtSDQvdCwINC/0L7QstC10YDRhdC90L7RgdGC0Lgg0Y3Qv9C40LTQtdGA0LzQuNGB0LAsINCwINCx0LvQuNC20LUg0Log0LTQtdGA0LzQtSwg0YLQviDQtdGB0YLRjCDQs9C70YPQsdC20LUsINC4INC70LjRiNGMINCy0YvQv9GP0YfQuNCy0LDQvdC40LUg0LzQvtC20LXRgiDQutCw0Lot0YLQviDRgdCy0LjQtNC10YLQtdC70YzRgdGC0LLQvtCy0LDRgtGMINC+INC10LUg0L3QsNGF0L7QttC00LXQvdC40Lgg0LIg0LrQvtC20LUg0YDQtdCx0LXQvdC60LAuIDxiciAvPg0KPGJyIC8+DQrQktC+0L/RgNC+0YEgMi4g0J7RgtCy0LXRgjog0KfQtdGA0LLQtdC+0LHRgNCw0LfQvdGL0Lkg0L7RgtGA0L7RgdGC0L7Quiwg0LjQu9C4INC20LUg0LDQv9C/0LXQvdC00LjQutGBLCDRj9Cy0LvRj9C10YLRgdGPINC+0YLRgNC+0YHRgtC60L7QvCDRgdC70LXQv9C+0Lkg0LrQuNGI0LrQuCwg0L/QvtGN0YLQvtC80YMg0LXQs9C+INCw0YLQuNC/0LjRh9C90L7QtSDQv9C+0LvQvtC20LXQvdC40LUg0LfQsNC60LvRjtGH0LDQtdGC0YHRjyDQsiDQkNCk0J4g0L/QuNGJ0LXQstCw0YDQuNGC0LXQu9GM0L3QvtC5INGB0LjRgdGC0LXQvNGLLCDRgtCw0LrQttC1INCw0L/Qv9C10L3QtNC40LrRgSDQuNC80LXQtdGCINCyINGB0LXQsdC1INC70LjQvNGE0L7QuNC00L3Rg9GOINGC0LrQsNC90YwsINC/0L7RjdGC0L7QvNGDINC40LzQtdC10YIg0YLQsNC60YPRjiDRhNGD0L3QutGG0LjRjiwg0LrQsNC6INCy0YvRgNCw0LHQsNGC0YvQstCw0YLRjCDQuNC80LzRg9C90L3Ri9C5INC+0YLQstC10YIg0L3QsCDQutCw0LrQvtC5LdGC0L4g0L/QsNGC0L7Qs9C10L0sINGH0YLQviDQuCDQv9GA0L7QuNC30L7RiNC70L4g0YMg0LzQsNC70YzRh9C40LrQsC4g0JLQvtGB0L/QsNC70LXQvSDRgyDQvdC10LPQviDRh9C10YDQstC10L7QvtCx0YDQsNC30L3Ri9C5INC+0YLRgNC+0YHRgtC+0Log0LjQty3Qt9CwINCy0L7Qt9C80L7QttC90L7Qs9C+INCw0L/Qv9C10L3QtNC40YbQuNGC0LAgKNC+0YHRgtGA0LDRjyDQstC+0YHQv9Cw0LvQuNGC0LXQu9GM0L3QsNGPINGA0LXQsNC60YbQuNGPKSwg0LrQvtGC0L7RgNGL0Lkg0LzQvtC20LXRgiDQv9GA0L7Rj9Cy0LvRj9GC0YzRgdGPINC40Lct0LfQsCDRgNCw0LfQvdGL0YUg0L/RgNC40YfQuNC9OiDQuNC90YTQtdC60YbQuNC+0L3QvdCw0Y8g0LjQu9C4INCx0LDQutGC0LXRgNC40LDQu9GM0L3QsNGPINGN0YLQuNC+0LvQvtCz0LjRjywg0L3QtdC/0YDQsNCy0LjQu9GM0L3QvtC1INC/0LjRgtCw0L3QuNC1LCDRgtGA0LDQstC80LAsINCy0L7RgdC/0LDQu9C10L3QuNC1INGB0LvQtdC/0L7QuSDQutC40YjQutC4INC4INC/0LXRgNC10YXQvtC0INC80LXQtNC40LDRgtC+0YDQvtCyINCy0L7RgdC/0LDQu9C10L3QuNGPINCyINCw0L/Qv9C10L3QtNC40LrRgSDQuCDRgi7QtC4g0JXQs9C+INCw0YLQuNC/0LjRh9C90L7QtSDRgNCw0YHQv9C+0LvQvtC20LXQvdC40LUg0LLQvtC30LzQvtC20L3QviDQuNC3LdC30LAg0YLQvtCz0L4sINGH0YLQviDQsCkg0LrQuNGI0LXRh9C90LjQuiDQsiDRgtCw0LrQvtC8INCy0L7Qt9GA0LDRgdGC0LUg0LzQvtC20LXRgiDQsdGL0YLRjCDQvdC10LfQsNGE0LjQutGB0LjRgNC+0LLQsNC9INCyINC+0LTQvdC+0Lwg0LzQtdGB0YLQtSDQuCDQsdGL0YLRjCDQv9C+0LTQstC40LbQvdGL0LwsINGC0LDQuiDQutCw0Log0LEpINC+0YLRgdGD0YLRgdGC0LLRg9C10YIg0LTQvtC70LbQvdC+0LUg0YDQsNC30LLQuNGC0LjQtSDQttC40YDQvtCy0L7QuSDQutC70LXRgtGH0LDRgtC60LggKNC40Lct0LfQsCDQvNCw0LvQvtCz0L4g0LLQvtC30YDQsNGB0YLQsCksINCwINC+0L3QsCDQsiDRgdCy0L7RjiDQvtGH0LXRgNC10LTRjCDQutCw0Log0YDQsNC3INGE0LjQutGB0LjRgNGD0LXRgiDQstC10YHRjCDQutC40YjQtdGH0L3QuNC6INCyINC+0L/RgNC10LTQtdC70LXQvdC90L7QvCDQv9C+0LvQvtC20LXQvdC40LgsINC/0L7RjdGC0L7QvNGDINCw0L/Qv9C10L3QtNC40LrRgSDQvNC+0LbQtdGCINCx0YvRgtGMINCx0L7Qu9C10LUg0LrQstC10YDRhdGDINC40LvQuCDQutC90LjQt9GDINC+0YIg0L3QvtGA0LzQsNC70YzQvdC+0LPQviDQv9C+0LvQvtC20LXQvdC40Y8g0LjQu9C4INCx0LvQuNC30LrQviDQv9GA0LjQttCw0YLRi9C8INC6INGB0LvQtdC/0L7QuSDQutC40YjQutC1LiDQltC40YDQvtCy0LDRjyDQutC70LXRgtGH0LDRgtC60LAg0LzQvtC20LXRgiDQsdGL0YLRjCDQv9C70L7RhdC+INGA0LDQt9Cy0LjRgtCwINC40Lct0LfQsCDRgtC10LvQvtGB0LvQvtC20LXQvdC40Y8g0YDQtdCx0LXQvdC60LAgKNC90LDQv9GA0LjQvNC10YAsINCw0YHRgtC10L3QuNGH0LXRgdC60L7QtSwg0LfQvdCw0YfQuNGCINC20LjRgNC+0LLQsNGPINC60LvQtdGC0YfQsNGC0LrQsCDRgdC70LDQsdC+0YDQsNC30LLQuNGC0LAg0L/QviDQstGB0LXQvNGDINGC0LXQu9GDKSwg0LjQty3Qt9CwINC90LXQv9GA0LDQstC40LvRjNC90L7Qs9C+INC/0LjRgtCw0L3QuNGPINC4INGCLtC0LiDQsikg0KLQsNC60LbQtSDQv9GA0LjRh9C40L3QvtC5INCw0YLQuNC/0LjRh9C90L7Qs9C+INGA0LDRgdC/0L7Qu9C+0LbQtdC90LjRjyDRh9C10YDQstC10L7QsdGA0LDQt9C90L7Qs9C+INC+0YLRgNC+0YHRgtC60LAg0LzQvtC20LXRgiDQsdGL0YLRjCDQsiDRgdGC0YDQvtC10L3QuNC4INGB0LDQvNC+0LPQviDQutC40YjQtdGH0L3QuNC60LAgKNC60LDQuiDQvNGLINC30L3QsNC10Lwg0YLQvtC90LrQuNC5INC4INGC0L7Qu9GB0YLRi9C5INC60LjRiNC10YfQvdC40Log0YMg0LTQtdGC0LXQuSDQvdCw0LzQvdC+0LPQviDQtNC70LjQvdC90LXQtSwg0YfQtdC8INGDINCy0LfRgNC+0YHQu9GL0YUpLCDQv9C+0Y3RgtC+0LzRgyDQv9GA0Lgg0LDQutGC0LjQstC90L7QvCDQuCDQv9C+0LTQstC40LbQvdC+0Lwg0L7QsdGA0LDQt9C1INC20LjQt9C90Lgg0YDQtdCx0LXQvdC60LAgKyDQvdC10YDQsNC30LLQuNGC0LDRjyDQttC40YDQvtCy0LDRjyDQutC70LXRgtGH0LDRgtC60LAsINC80L7Qs9GD0YIg0L/RgNC40LLQtdGB0YLQuCDQuiDRgdC80LXQvdC1INC/0L7Qu9C+0LbQtdC90LjRjyDRh9C10YDQstC10L7QsdGA0LDQt9C90L7Qs9C+INC+0YLRgNC+0YHRgtC60LAuINCzKSDQkNC90L7QvNCw0LvRjNC90L7QtSDRgNCw0LfQstC40YLQuNC1INGB0LDQvNC+0LPQviDRh9C10YDQstC10L7QsdGA0LDQt9C90L7Qs9C+INC+0YLRgNC+0YHRgtC60LAgLSDQsdC+0LvQtdC1INC60L7RgNC+0YLQutC40Lkg0LjQu9C4INCx0L7Qu9C10LUg0LTQu9C40L3QvdGL0LksINC/0LvQvtGF0L4g0YDQsNC30LLQuNGC0YvQuSwg0Y3RgtC+INGC0L7QttC1INCy0LvQuNGP0LXRgiDQvdCwINGB0LzQtdC90YMg0LjQtyDQvdC+0YDQvNCw0LvRjNC90L7Qs9C+INC/0L7Qu9C+0LbQtdC90LjRjyDQsiDQsNGC0LjQv9C40YfQvdC+0LU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60" table:style-name="ce1">
            <text:p>914660</text:p>
          </table:table-cell>
          <table:table-cell office:value-type="string" table:style-name="ce1">
            <text:p>english</text:p>
          </table:table-cell>
          <table:table-cell office:value-type="string" table:style-name="ce1">
            <text:p>Ticket 10&amp;lt;br /&amp;gt; 1. What morphological elements of the skin are related to toxic erythema of the skin of a newborn? Characterize the rash.&amp;lt;br /&amp;gt; 2. The child is 5 years old. Inspected by a surgeon. An atypical location of the inflamed appendix is suggested. What anatomical physiological features is this related to?&amp;lt;br /&amp;gt;</text:p>
          </table:table-cell>
          <table:table-cell office:value-type="string" table:style-name="ce1">
            <text:p>WzFdIFRveGljIEVyeXRoZW1hIG9mIHRoZSBuZXdib3JuOiBUb3hpYyBlcnl0aGVtYSBjb21tb25seSBrbm93biBhcyBlcnl0aGVtYSB0b3hpY3VtIG5lb25hdHJ1bSwgaXMgYSBjb21tb24gcmFzaCBpbiBuZXcgYm9ybnMuIE1vcnBob2xvZ2ljYWwgZWxlbWVudHMgcmVsYXRlZCB0byB0aGlzIGNvbmRpdGlvbi8gaW5jbHVkZSB0aGUgRXJ5dGhlbWF0b3VzIHBhcHVsZXVzIDogU21hbGwsIHJlZCwgcmFpc2VkIGJ1bXBzIG9uIHRoZSBza2luLiBQdXN0dWxzZXMgOiBvY2Fzc2lvbmxheSBwdXN0dWxlcyBtYXkgYmUgcHJlc2VudCBhdCB0aGUgY2VudHJlIG9mIHRoZSBwYXB1bGVzLiBXaGl0ZSBvciB5ZWxsb3dpc2ggaGFsby4gU3Vycm91bmRpbmcgZWFjaCBQYXB1bGUgY3JlYXRpbmcgYSBkaXN0aW5pdGl2ZSBhcHBlYXJlbmNlLiBUcmFuc2llbnR0IE5hdHVyZTogVGhlIGFyc2ggaXMgZ2VuZXJhbGx5IHRyYW5zaWVudCBhbmQgZ2VuZXJhbGx5IGRpc29sdmVzIG9uIGl0cyBvd24gd2l0aG91dCBhbnkgc3BlY2lhbCB0cmVhdG1lbnQuIHRveGljIGVyeXRoZW1hIGlzIGJlZ2FpbiBhbmQgZG8gbm90IHJlcXVpcmUgYW55IHNwZWNpZmljIGludGVydmVudGF0aW9uLiBJdCBpcyB0aG91Z2h0IHRvIGEgcmVzcG9uc2UgdG8gdGhlIG5ld2Jvcm5zIGFkYXB0aW9uIHNraWVuIHRvIHRoZSBlbnZpcm1lbnQuIFsyXS0gVHlwaWNhbCBsb2NhdGksb24gb2YgdGhlIGluZmxhbWFlZCBhcHBlbmRpeCBpbiBhIDUgeWVhciBvbGQgOiAgQW4gYXR5cGljbGwgbG9jYXRpb24gb2YgdGhlIGFwcGVuZGl4IGlzIHN1Z2dlc3RpdmUgb2YgYXBlbmRpc2l0aXMuICBJbmZsYW1lZCBhcHBlbmRleCBpbiBhIDUgeWVhciBvbGQgbWF5IGJlIGFzc29jaWF0ZWQgaW4gdmFyaWlibGUgYW5hdG9taWNhbCBwb3NpdGlvbnMgb2YgdGhnZSBhcHBlbmRpeC4gV2hpbGUgdGhlIGFwcGVuZGV4IHR5cGljYWxseSByZXNpZGVzIGluIHRoZSBsb3dlciByaWdlaHQgcXVhZHJlbnQgb2YgdGhlIGFiZG9tZW4sIHZhcmlhdGlvbnMgY2FuIGFsdGVyIGl0cyBwb2lzaXRpb24uIEFuYXRvbWljYWwgYXNuZCBwaHlzaW9sb2dpY2FsIGZlYXR1cmVzIHJlbGF0ZWQgb2YgYXR5cGljYWxsIHBwb3N0aW9ucyBvZiB0aGUgYXBwZW5kaXggbWF5IGluY2xpdWRlIGFibm9ybWFsIHJvdGF0aW9uIG9mIHRoZSBHSVQgZHVyaW5nIGVtYnJ5b25pY3MgZGV2ZWxvcG1lbnQsIHZhcmlhdGlvbiBpbiBHSVQgYnJveWF0aW9uIG1heSBsZWFkIHRvIGRpc2xvYWN0aW9uIG9mIHRoZSBhcHBlbmRpeC4gTG9uZyBvciBtb2liaWxlIGFwcGVuZGl4LSBUaGUgbGVuZ2h0aCBhbmQgbW9iaWxpdHkgb2YgdGhlIGFwcGVuZGl4IGNhbiB2YXJ5IGFsbG93aW5ncyBpdCB0byBldGVuZCB0byBhdHlwaWNhbGwgYXJlYXMuIEluZGl2aWR1YWxzIGFuYXRvbWljYWwgZGlmZnJlbmNlczogTm9ybWFsIGFuYXRvbWljYWwgZGlmZnJlbmNlczogbm9ybWFsIGFuYXRvbWlhbCB2YXJpYXRpb25zIGFtb25nIGluZGl2aWR1YWxzIG1heSBsZWFkIHRvIGRldmlhdGlvbiBpbiB0aGUgcG9zaXRpb24gb2YgdGhlIGFwcGVuZGl4LiA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693" table:style-name="ce1">
            <text:p>914693</text:p>
          </table:table-cell>
          <table:table-cell office:value-type="string" table:style-name="ce1">
            <text:p>english</text:p>
          </table:table-cell>
          <table:table-cell office:value-type="string" table:style-name="ce1">
            <text:p>Ticket 10&amp;lt;br /&amp;gt; 1. What morphological elements of the skin are related to toxic erythema of the skin of a newborn? Characterize the rash.&amp;lt;br /&amp;gt; 2. The child is 5 years old. Inspected by a surgeon. An atypical location of the inflamed appendix is suggested. What anatomical physiological features is this related to?&amp;lt;br /&amp;gt;</text:p>
          </table:table-cell>
          <table:table-cell office:value-type="string" table:style-name="ce1">
            <text:p>IzEgbW9ycGhvbG9naWNhbCBlbGVtZW50cyBvZiB0aGUgc2tpbiBhcmUgcmVsYXRlZCB0byB0b3hpYyBlcnl0aGVtYSBvZiB0aGUgc2tpbiBsZXNvbiAgICAgICAgICAgICAgICAgICAgICAgICAgICAgICAgICAgICAgICAgICAgICAgICAgICAgICAgICB0b3hpYyBlcnl0aGVtYSBvZiB0aGUgbmV3Ym9ybiAgICAgICAgICAgICAgICAgICAgICAgICAgICAgICAgICAgICAgICAgICAgICAgICAgICAgICAgICAgICAgICAgICAgICAgICAgICAgICAgICAgICAgICAgICAgICAgICAgICAgICAgICAgICAgICAgICAxIG1vcnBob2xvZ2ljYWwgZWxlbWVlbnRzXiB0aGUgcHJpbWFyeSBza2luIGxlc3NvbiAgaW4gdG94aWMgIGVyeXR5dGhlbWEgYXJlICBlcnl0aGVtYXR1cyAgbWFjbGVzICBwYXB1bGVzIGFuZCBzb25ldGltZSAgcHVzdHVsZSAgICAgICAgICAgICAgICAgICAgdGhlc2UgbGVzaW9uICBhcmUgZ2VuZXJhbGx5ICBzdXJyb3VuZGVkIGJ5ICBkaWZmdXNlIGVyeXRlbWEgICAgICAgICAgICAgICAgICAgICAgICAgICAgICAgICAgICAgICAgICAgICAgICAgICAgICAgICAgICAgICAgICAgICAgICAgICAgICAgICAgICAgICAgICAgICAgICAgICAgICAgICAgICAgICAgICAgICAgICAgICAgICAgICAgICAgICAgICAgICAgICAgICAgICAgICAgICAgICAgICAgICAgICAgIDIgY2hhcmFjdGVyaXphdGlvbiAgb2YgdGhlIHJhc2ggKiB0aGUgcHJpbWFyeSB0aGUgcmFzaCB0aXBwY2FseSBhcHBlYXJzIDEgdG8gMyBkYXlzIGFmdGVyIGJpcnRoIGFuZCByZXNvbHZlICBzcG9udGFuZW91c2x5ICB3aXRoaW4gYSBmZXcgZGF5ICB0byBhIHdlZWsgICAgICAgICAgICAgICAgICAgICAgICAgICAgICAgICAgICAgICAgICAgICAgICAgICAgICAgICAgICAgICAgICAgICAgICAgICAgICAgICAgICAgICAgICAgICAgICAgICAgICAgICAgICAgICAgICAgICAgICAgICAgICAgICBsZXNpb25zICBhcmUgbW9zdCAgY29tbW9ubHkgIGRpc3R1cmJpbmcgIG9uIHRoZSBmYWNlIHRydW5rIGFuZCAgbGltYnMgIHNwYXJpbmcgIHRoZSBwYWxtICBhbmQgc29sZXMgdGhlIHB1c3R1bGVzICBhcmUgc3RlcmlsZSBhbmQgIG1pY3Jvc2NvcGljIGV4YW1pbmF0aW9uICByZXZlbHMgIGVvc2lub3Bob2lsICAgICAgICAgICAgICAgICAgICAgICAgICAgICAgICAgICAgICAgICAgICAgICAgICAgICAgICAgICAgICAgICAgICAgICAgICAgICAgICAgICAgICAgICAgICAgICAgICAgICAgICAgICAgICAgICAgICAgICAgICAgICAgICBpdHMgaXMgIGEgYmVuaWduICBhbmQgc2VsZiAgIGxpbWl0aW5nIGNvbmRpdGlvbiAgY2F1c2VkIGJ5ICBhbiBpbW1hdHVyZSAgaW1tdW5lIHJlc3BvbnNlICBvciAgYWRhcHRhdGlvbiAgb2YgdGhlICBza2luIHRvIHRoZSAgZXhyZXJuYWwgZW52aW91cm1lbnQ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jMiBhdHlwaW5nIGxvY2F0aW9uICBvZiB0aGUgaW5mbGFtZWQgIGFvb2VuZGl4IGluIGEgNSB5ZWFyIG9sZCAgICAgICAgICAgICAgICAgICAgICAgICAgICAgICAgICAgICAgICAgICAgICAgICAgICAgICAgICAgICAgICAgICAgICAgICAgICAgICAgICAgICAgICAgICAgICAgICAgICAgICAgIDEgIGFuYXRvbWljYWwgcGh5c2lvbG9neSBmZWF0dXJlcyAgYXNzb2NpYXRlZCB3aXRoIGFuIGF0eXBpY2FsICBhcHBlbmRpeCBsb2N0aW9uICAgICAgICAgICAgICAgICAgICAgICAgICAgICAgICAgICAgICAgICAgICAgICAgICAgICAgICAgICAgICAgICAgICAgICAgICAgICAgICAgICAgICAgIGhpZ2ggdmFyaWFibGUgIGluIGFvb2VuZGl4ICBwb3NpdGlvbiAgdGhlYiBhcGVuZGl4ICBjYW4gYmUgcmV0cm9jZWNhbCBtb3N0IGNvbW1hbiAgcGVsdmljICBzdWJjZWNhbCAgcHJlaWxlYWwgb3IgcG9zdGlsZWFsICBpbiBjaGlsZHJlbiAgdGhlIHBvc3RlcmlhbCAgYWNhdml0eSAgaXMgcmVsYXRpdmx5ICBzbWFsbCB3aGljaCAgY2FuIGxlYWQgIHRvIG1vcmUgIHByb25vdW5jZWRtbyBiaWxpdHkgIG9mIGFwcGVuZGl4ICAgICAgICAgICAgICAgICAgICAgICAgICAgICAgICAgICAgICAgICAgICAgICAgICAgICAgICAgICAgICAgICAgICAgICAgICAgICAgICAgICAgICAgICAgICAgICAgICAgICAgICAgICAgICAgICAgICAgICAgICAgICAgICAgICAgICAgICAgICAgICAgICAgICBpbmNvbXBsZXQgZml4YXRpb24gIG9mIHRoZSBjZXJ1bSAgZHVyaW5nICBmZXRhbCAgZGV2ZWxvcG1lbnQgIChmYWxpZXIgb2YgaW5zdGVzdGluYWwgcm90YXRpb24gKSBjYW4gIHRyZXN1bHQgIGluIGFuIHVuc3VhbCAgYXBwZW5kaXggIHBvc2l0aW9uICB0aGUgbWVzb2FwcGVuZGl4ICBpbiBjaGlsZHJlbiBtYXkgYWxsb3cgZm9yIGdyZWF0ZXIgIG1vYmlsaXR5ICAgICAgICAgICAgICAgICAgICAgICAgICAgICAgICAgICAgICAgICAgICAgICAgICAgICAgICAgIGxpbXBob2lkICB0aXN1ZSB3aXRoaW4gdGhlICBhb29lbmRpeCAgY29udGludWUgIHRvIGdyb3cgdW50aWwgIGFkb2xlc2VuY2UgIHdoaWMgbWF5ICBpbmZ1bGVuY2UgIGluZmxhbWF0b3J5ICBwcmVzZW50YXRpb24gICAgICAgICAgICAgICAgICAgICAgICAgICAgICAgICAgICAgICAgICAgICAgICAgICAgICAgICAgICAgICAgICAgICAgICAgICAgICAgICAgICAgICAgICAgICAgICAgICAgICAgICAgICAgICAyIGNsaW5pY2FsIGltcGxpY2F0aW9uIG9mIGFuICBhdHlwaWNhbCAgcG9zaXRpb24gICBzeW1wdG9tcyBvZiBhcHBlbmRpY2l0ZXMgIGVnICBwYWluIGFuZCB0ZW5kZXJuZXNzICkgbWF5IHByZXNlbnQgIGluIHVudXN1YWwgbG9jYXRpb24gc3VjaCBhcyB0aGUgcGVsdmlzIG9yIGJhY2sgIGZlb2VuZGluZyBvbiB0aGUgIGFwcGVuZGl4IHBvc2l0aW9uICAgICAgICAgICAgICAgICAgICAgICAgICAgICAgICAgICAgICAgICAgICAgICAgICAgICAgICAgICAgICAgICAgICAgICAgICAgbWlzaW50ZXJwcmV0aXRvaW9uIG9mIHN5bXB0b20gY2FuIGxlYWQgdG8gZGVseWVkICBkaWFnbm9zaXMgIG9yIG1pbWljIG90aGVyIGNvbmRpdGlvbnMgbGlrZSB1cmluYXJ5IHRyYWNrICBpbmZlY3Rpb24gYW5kIHBlbHZpYyBpbmZsYW1hdGlvb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03" table:style-name="ce1">
            <text:p>914703</text:p>
          </table:table-cell>
          <table:table-cell office:value-type="string" table:style-name="ce1">
            <text:p>english</text:p>
          </table:table-cell>
          <table:table-cell office:value-type="string" table:style-name="ce1">
            <text:p>Ticket 10&amp;lt;br /&amp;gt; 1. What morphological elements of the skin are related to toxic erythema of the skin of a newborn? Characterize the rash.&amp;lt;br /&amp;gt; 2. The child is 5 years old. Inspected by a surgeon. An atypical location of the inflamed appendix is suggested. What anatomical physiological features is this related to?&amp;lt;br /&amp;gt;</text:p>
          </table:table-cell>
          <table:table-cell office:value-type="string" table:style-name="ce1">
            <text:p>MS4gVGhlIG1vcnBob2xvZ3kgZWxlbWVudHMgb2YgdGhlIHNraW4gYXJlIHJlbGF0ZWQgdG8gdG94aWMgZXJ0aHltYSBpcyByZWxhdGVkIHRvIHRoZSBhY3Rpb24gb2YgdGhlIHdlICAgIHRveGljIGVyeXRobWVhIGlzIGNvbW1vbiBiZWduaW5nIHNraW4gY29uZGl0aW9uIHRoZSBhcHBlYXJlbmNlcyBpbiBmaXJzdCBmZXcgZGF5cyBvZiBsaWZlIC4gaXQgaXMgYSBjaGFyYWN0ZXJzdGljIGJ5IGEgcmFzaCB0aGF0IGlzIG9mdGVuIHNlbGYgbGltaXRlZCBhbmQgPGJyIC8+DQpyZXNvbHZlcyB3aXRob3V0IHRyZWF0bWVudCAuIHRoZSBtb3JwaG9sb2d5IG9mIHRoZSBza2luIGludm9sdmVkIGluIHRoZSBjb25kaXRpdW9uIGluY2x1ZGUgLSBtYWN1bGVzICh0aGVzZSBhcmUgZmxhdCByZWQgcGF0Y2hlcyBvciBvciBzcG90cyB0aGF0IGFwcGVhcnMgb24gdGhlIHNraW4gKSxwYXB1bGVzKCBpdCBpcyByYWlzZWQgcmVkIG9yIHNraW4gY29sb3VyZWQgYnVtcCBvbiB0aGUgc2tpbiApLCBlcnl0aG1hKCByZWRuZXNzIG9mIHRoZSBza2luIHdoaWNoIGlzIGNhdXNlZCBieSB0aGUgaW5jcmVhc2UgaW4gdGhlIGJsb29kIGZsb3cgdG8gdGhlIGFyZWEgICkgcHVzdHVsZSggc21hbGwgd2hpdGUgYW5kIHllbGxvaXNoIGZsdWlkIGZpbGxlZCBidW1wIGFwcGVhcmVuY2UgYXQgdGhlIGNlbnRlciBvZiB0aGUgcmVkIG1hY3VsZXMgYW5kIHBhcHVsZXMgKS4gY2hhcmF0ZXJzdGljcyBvZiB0aGUgcmFzaC0gaW5jbHVkZXMgcmVkbmVzcyB0aGFlIHJhc2ggdXN1YWxseSBiZWdpbnMgd2l0aCAyNC03NGhvdXJzICBhZnRlciBiaXJ0aCBhbmQgdHlwaWNhbGx5IGFwcGVhcnMgb24gdGhlIGZhY2UgLCBjaGVzdCBhbmQgbGltYnMuIGl0IGNvbnRhaW4gZXJ5dGhlbWF0b3VzIG11c2NsZXMgd2l0aCBzbWFsbCB5ZWxsb3dpc2ggcHVzdHVsZXMgaW4gdGhlIGNlbnRyZSBvZiB0aGUgbGVzb25zIC4gdGhlIHJhc2ggbWF5IGJlIHdpdGhzcHJlZCBhbmQgcHVzdHVsZXMgbWF5IGV2ZW50dWxseSByZXZvbHZlIGxlYXZpbmcgbm8gc2NhcnJpbmcuIHRoZSBjb25kdGlvbiBpcyBnZW5lcmFzbGx5IHNlbGYgbGltbWl0ZWQgYW5kIHJlc29sdmVzIHdpdGggaXRzIG93biB3aXRoaW4gaW4gYSBmZXcgZGF5cyB0byB3ZWVrcyB3aXRob3V0IHNwZWNpZmljIHRyZWF0bWVudC4gdG94aWMgZXJ5dGhtZWEgaXMgb2ZmdGVuIHNlZW4gaW4gYSBoZWFsdGh5IGNoaWxkcmVzIGFuZCBpcyBub3QgYXNzb2NpYXRlZCB3aXRoIGFueSB1bmRlcmx5aW5nIGRpc2VzcyBvciBpbmZlY3Rpb24gLiAgIDIuIGxvY2F0aW9uIG9mIHRoZSBhcHBlbmRpeCBpbiB0aGUgYWJkb21lbiBjYW4gdmFyeSBzaWduaWZpY2FudGFsbHkgd2hpbGUgdGhlIGFwcGVuZGl4IGlzIHR5cGljYWxseSBsb2NhdGVkIGluIHRoZSByaWdodCBsb3dlciBxdWFkZXJlbnQgLCBhbmF0b21pY2FsIGFuZCBwaHlzaW9sb2dpY2FsIGZlYXR1cmVzIGlzIHRoaXMgcmVhbHRlZCB0byB0aGlzIGlzIGFuYXRvbWljYWwgdmFzY3VsaXR5IGluIHlvdW5nIGNoaWxkcmVuLCB0aGUgYXBwZW5kaXggY2FuIGJlIGxvY2F0ZWQgaW4gdmFyaW91cyBwb3NpdGlvbnMgZHVlIHRvIHRoZSBpbW1hdHVyZSBiYWJkb21pbmFsIGFuYXRvbXkuaXQgbWF5IGJlIGZvdW5kIGluIHRoZSAgcGVsdmljIHJlZ2lvbiAsdXBwZXIgYWJkb21lbiBldmVuIGJlaGluZCB0aGUgY2FjZXVtIC5pbiB0aGVzZSBjYXVzZSBzeW1wdG9tcyBtYXkgYmUgYXR5cGljYWwgc3VjaCBhcyBwYWluIGluIHRoZSBsb3dlciBhYmRvbWVuIG9yIGV2ZW4gcGFpbiByZWZmZXJkIHRvIHRoZSBiYWNrLiBpbW1hdHVyZSBhYmRvbWluYWwgb3JnYW4gLCBpbiBjaGxpZHJlbiB1bmRlciA1IHllYXIgb2xkIHRoZSBhYmRvbWluYWwgb3JnYW5zIGFyZSBub3QgZnVsbHkgZml4ZWQgaW4gcGxhY2UgYW5kIHRoZSBhYmRvbWluYWwgbW9iaWxpdHkgbWF5IHJlc3VsdCBpbiB0aGUgdmFyaWF0aW9uIGluIHRoZSBsb2NhdGlvbiBpbiB5aGUgYXBwZW5kaXggLiB0aGUgYXBwZW5kaXggbWF5IGJlIHRoZSBsZWZ0IGxvd2VyIHF1YWRlcm50IC5vciBpbiB0aGUgc29tZSBjYXNlcyByZXRlcm9jZWNhbCBvciByZXRlcm9wZXJ0b25pYWwgcG9zaXRpb24uIHRoaXMgZHVlIHRvIHRoZSBmbGV4aWJpbGl0eSBvZiB0aGUgYW5hdG9taWNhbCBzdHJjdHVyZSBpbiBjaGlsZHJlbiAsaW5mZmxhbWF0aW9uIG9mIHRoZSBhcHBlbmRpeCBtYXkgY2F1c2UgZGlmZmVybnQgZGlmZmVybnQgY2xpbmljYWwgbWFpZmVzdGF0aW9uIHRoYXQgYXJlIG5vdCB0eXBpY2FsbHkgYXMgaW4gYWR1bHQu</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46" table:style-name="ce1">
            <text:p>914746</text:p>
          </table:table-cell>
          <table:table-cell office:value-type="string" table:style-name="ce1">
            <text:p>english</text:p>
          </table:table-cell>
          <table:table-cell office:value-type="string" table:style-name="ce1">
            <text:p>Ticket 10&amp;lt;br /&amp;gt; 1. What morphological elements of the skin are related to toxic erythema of the skin of a newborn? Characterize the rash.&amp;lt;br /&amp;gt; 2. The child is 5 years old. Inspected by a surgeon. An atypical location of the inflamed appendix is suggested. What anatomical physiological features is this related to?&amp;lt;br /&amp;gt;</text:p>
          </table:table-cell>
          <table:table-cell office:value-type="string" table:style-name="ce1">
            <text:p>QU5TV0VSLTEpIFRPWElDIEVSWVRIRU1BIElOICBUSEUgU0tJTiBPRiBBIE5FV0JPUk4gSVQgIElTIEEgQ09NTU9OIEFORCBUSEUgQkVHSU5TIFNLSU4gQ09ORElUSU9OIFdISUNIIE9DQ1VSUyBJTiBJTiBUSEUgRklSU1QgRkVXIERBWVMgT0YgTElGRSAuIFRIRSBNT1JQSE9MT0dJQ0FMIEVMRU1FTlRTIE9GIFRIRSBTS0lOIEFSRSA6IEVSWVRIRU1BVE9VUyBNQUNVTEVTIC0gUkVEICwgRkxBVCBBUkVBUyBPTiBUSEUgU0tJTiAuIFBBUFVMRVMtIFNNQUxMLCBSQUlTRUQgTEVTSU9OUyBPRlRFTiBBUFBFQVIgT04gVEhFIFRPUCBPRiBUSEUgRVJZVEhFTUFUT1VTIEJBU0UuIFBVU1RVTEVTIC0gV0hJVEUgT1IgWUVMTE9XSVNIIFBVU1RVTEFSIExFU0lPTlMgSU4gVEhFIENFTlRFUiBPRiBUSEUgVEhFIFJFRCBNQUNVTEVTIE9SIFBBUFVMRVMgLiBESVNUUklCVVRJT04gLSBUSEUgUkFTSCBDT01NT05MWSBBUFBFQVJTIE9OVE8gVEhFIFRSVU5LLCBGQUNFICwgTElNQlMgQU5EIEJVVFRPQ0tTIC4gVEhFIFJBU0ggT0YgVE9YSUMgRVJZVEhFTUEgSVMgQ0FVU0VEIEJZIEFOIElNTVVORSBSRUFDVElPTiBJTiBUSEUgU0tJTiAsIElOVk9MVklORyBUSEUgSU5GSUxURVJBVElPTiBPRiBFT1NJTk9QSElMUyBJTlRPIFRIRSBBRkZFQ1RFRCBBUkVBUyAuIFRISVMgUkVBQ1RJT04gSVMgVEhPVUdIVCBUTyBCRSBSRUxBVEVEIFRPIFRIRSBBREpVU1RNRU5UUyBPRiBUSEUgTkVXQk9STlMgSU1NVU5FIFNZU1RFTS4gMikgQVRZUElDQUwgTE9DQVRJT04gT0YgVEhFIElORkxBTUVEIEFQUEVORElYIElOIFRIRSA1IFlFQVIgT0xEIENISUxEICwgRkVBVFVSRVMgQVJFIDogRU1CUllPTE9HSUNBTCBERVZFTE9QTUVOVC0gRFVSSU5HIFRIRSBGRVRBTCBERVZFTE9QTUVOVCBUSEUgQVBQRU5ESVggT1JJR0lOQVRFUyBGUk9NIFRIRSBNSURHVVQgQVMgQU4gT1VUR1JPV1RIIE9GIFRIRSBDRUNVTS4gVEhFIFBPU0lUSU9OIE9GIFRIRSBBUFBFTkRJWCBDQU4gVkFSWSBBUyBJVCBERVBFTkQgT04gVEhFIERFR1JFRSBPRiBST1RBVElPTiBBTkQgRklYQVRJT04gT0YgVEhFIE1JREdVVC4gSVMgU09NRSBPRiBUSEUgTUFOWSBDQVNFUyBUSEUgSU5DT01QTEVURSBST1RBVElPTiAsIExFQURTIFRPIEFUWVBJQ0FMIExPQ0FUSU9OIFNVQ0ggQVMgUkVUUk9DRUNBTCAsIFBFTFZJQywgT1IgU1VCSEVQVElDIFBPU0lUSU9OUyAuIFJFVFJPQ0VDQUwtIEJFSElORCBUSEUgQ0VDVU0gLCBXSElDSCBJVCBJUyBUSEUgTU9TVCBIQVBQRU5JTkcgQVRZUElDQUwgTE9DQVRJT04gLiBQRUxWSUMtIFdISUNIIElUIElTIEVYVEVORElORyBJTlRPIFRIRSBUUlVFIFBFTFZJUyAuIFNVQkhFUEFUSUMgLSBJVCBJUyBCRUxPVyBUTyBUSEUgTElWRVIgLCBXSElDSCBNQVkgT0NDVVJTIFdIRU4gVEhFIENFQ1VNIEdFVCBGQUlMUyBUTyBERUNFTkQgUFJPUEVSTFkgRFVSSU5HIFRIRSBERVZFTE9QTUVOVC4gVEhFIEFUWVBJQ0FMIExPQ0FUSU9OIE9GIEFQUEVORElYIElOIFRIRSA1IFlFQVIgT0xEIENISUxEIElTIFBSSU1BUkxZIFJFTEFURUQgVE8gVEhFIElOQ09NUExFVEUgREVWRUxPUE1FTlQgQU5EIEZJWEFUSU9OIE9GIFRIRSBDRUNVTSBBTkQgQVBQRU5ESVggRFVSSU5HIEVNQlJZT0dFTkVTSVMu</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54" table:style-name="ce1">
            <text:p>915254</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MS3QodKx0YDQsNKbOiDQltCw0LvQv9GLINCw0LvSk9Cw0L3QtNCwIDEwINC60q/QvdC00ZbQuiDQttCw0qPQsCDRgtGD0pPQsNC9INC905nRgNC10YHRgtC10LvQtdGA0LTRltKjINGB0q/RgiDQsdC10LfQtNC10YDRltC90ZbSoyDQsdGW0YLQtdC70YPRliwg0L7Qu9Cw0YDQtNGL0qMg0q/RgdGC0ZbQvdC00LXQs9GWINGC0LXRgNGW0L3RltKjINCz0LjQv9C10YDQtdC80LjRj9GB0Ysg0LbQsNC90LUg0YPRi9C3INGB0q/RgtGW0L3QtSDSsdKb0YHQsNGBINGB0LXQutGA0LXRhtCw0LvQsNGAINC90LXQvtC90LDRgtCw0LvRjNC00ZYg0YHSr9GCINCx0LXQt9GW0L3RltKjINCz0LjQv9C10YLRgNC+0YTQuNGP0YHRi9C80LXQvSDQsdCw0LnQu9Cw0L3Ri9GB0YLRiyDQsdC+0LvRg9GLINOZ0LHQtNC10L0g0LzSr9C80LrRltC9INCx0L7Qu9GL0L8g0LrQtdC70LXQtNGWLtCR0YPQuyDQttCw0L3QsCDRgtGD0LPQsNC9INC60YvQt9C00LDRgNC00LAg0LbQuNGWINC60LXQt9C00LXRgdC10YLRltC9INC20LDQvdC1INC60LDRgtC10YDRgdGW0Lcg0LbQsNCz0LTQsNC5INC+0Lsg0LbRg9C60YLRltC70ZbQuiDQutC10LfRltC90LTQtSDQsNC90LAg0LPQsNGA0LzQvtC90LTQsNGA0YvQvdGL0qMg0LDRgdGW0YDQtdGB0LUg0Y3QutGB0YLRgNC+0LPQtdC90L3RltKjINC90LDRgNC10YHRgtC10LPQtSDQsdC10YDRltC70YPRltC90LXQvSDRgtGD0YvQvdC00LDQudC00Ysu0JHRg9C7INCz0LDRgNC80L7QvdC00LDRgCDQttCw0L3QsCDRgtGD0LPQsNC9INGC0LDRgNC10YHRgtC10LvQtdGA0LTQtSDQtNC1LCDQsNC50LXQu9C00LXRgNC00LUg0LTQtSDRgdGD0YIg0LHQtdC30ZYg0YLRltC90ZbRgtGW0qMg06nRgdGD0ZbQvSDRi9C90YLQsNC70LDQvdC00YvRgNGD0Ysg0LzRg9C80ZbQvSwg0LHRltGA0LDSm9GC0LAg0LHRg9C7INKb0YvQt9C00LDRgNC00LAg0LrTqdCx0ZbRgNC10Log0LHQsNC50LvQsNC90YvRgdGC0Ysg0LHQvtC70YvQvyDQutC10LvQtdC00ZYu0KHRg9GCINCx0LXQt9GWINGC0ZbQvdGW0L3RltKjINCx0ZbRgtC10LvRg9GWINCz0LjQv9C10YDQtdC80LjRjyDQvdC10LzQtdGB0LUg0LrQtdGD0LTQtSDRgtC10YDRltC90ZbSoyDSr9GB0YLRltC90LTQtdCz0ZYg0LrRi9C30LDRgNGD0YvQvSDQttCw0L3QtSDQtdC80ZbQt9GW0LrRiNC10LvQtdGA0LTQtdC9INGD0YvQtyDRgdKv0YLRltC90LUg0rHQutGB0LDRgSDRgdC10LrRgNC10YbQuNGP0LvQsNGA0LTRiyDRgtGD0LTRi9GA0YPRiyDQvNKv0LzQutGW0L0g0LHQvtC70YvQvyDRgtCw0LHRi9C70LDQtNGLLtCR0YPQuyDQsdC10LvQs9GW0LvQtdGAINCw0LTQtdGC0YLQtSDTqdC30ZbQvS3TqdC30ZYg0YjQtdC60YLQtdC50LTRliDQttCw0L3QtSDQsdGW0YDQvdC10YjQtSDQsNC/0YLQsNC00LDQvSDQsdGW0YDQvdC10YjQtSDQsNC50LPQsCDQtNC10LnRltC9INC10LzQtNC10LvRg9GB0ZbQtyDQttC+0LnRi9C70LDQtNGLLCDTqdC50YLQutC10L3RliDQsNC90LAg0LPQsNGA0LzQvtC90LTQsNGA0Ysg0L3QsNGA0LXRgdGC0LUg0LbSr9C50LXRgdGW0L3QtdC9INGI0YvSk9Cw0YDRi9C70LDQtNGLLjIt0KHSsdGA0LDSmzog0KHRg9GA0YTQsNC60YLQsNC90YIg0LHQsNGB0pvQsNGI0LAg0LDQudGC0LDRgtGL0L0g0LHQvtC70YHQsNC8INCR0LXRgtGC0ZbQui3QsdC10LvRgdC10L3QtNGWINC30LDRgiDQtNC10L/RgNC1INCw0YLQsNC50LTRiy7QkdGD0Lsg06nQutC/0LXQtNC1INGC0YPQt9GW0LvQtdGC0ZbQvSDQttCw0L3QtSDQsNC70YzQstC10L7Qu9Cw0LvQsNGA0LTRi9KjINCx0LXRgtGC0ZbQuiDQutC10YDRltC70YPRltC9INCw0LfQsNC50YLRg9Cz0LAg0LrTqdC80LXQutGC0LXRgdC10YLRltC9INC30LDRgizQvtC70LDRgCDTqdC60L/QtSDQs9Cw0Lcg0LDQu9C80LDRgdGD0Ysg0LbRg9GA0LXRgtGW0L0g0YjQsNCz0YvQvSDQsNGD0LAg0LrQsNC/0YjRi9C60YLQsNGA0Ysg0LHQvtC70YvQvyDRgtCw0LHRi9C70LDQtNGLLtCR0LXRgtGC0ZbQuiDQsdC10LvRgdC10L3QtNGWINC30LDRgiDQu9C40L/QuNGC0YLQtdGAINC80LXQvSDQsNKb0YPRi9C30LTQsNGA0LTQsNC9INGC0rHRgNCw0LTRiyDQttCw0L3QtSDTqdC60L/QtdC90ZbSoyDSm9Cw0LvRi9C/0YLRiyDSm9GL0LfQvNC10YLRltC9INKb0LDQvNGC0LDQvNCw0YHRi9C3INC10YLRltC/INGC0YPRgNGDINKv0YjRltC9INKb0LDQttC10YIg0LHQvtC70YvQvyDRgtCw0LHRi9C70LDQtNGLLtCh0YPRgNGE0LDQutGC0LDQvdGC0YLRi9KjINC90LXQt9GW0LPQt9GWINKb0YvQt9C80LXRgtGC0ZYtINC20LDRgNCw0LzQtNGL0LvRi9C6INC80LXRgNC30ZbQvNGWINGW0YjRltC90LTQtSDQsNC70YzQstC10L7Qu9Cw0LvQsNGA0LTRi9KjINC60LDQu9GD0YvQvSDQsdC+0LvQtNGL0YDQvNCw0YMu0JbQsNC70L/RiyDQsNC70pPQsNC90LTQsCDQsdGW0Lcg0LTQtdC8INGI0YvSk9Cw0YDSk9Cw0L0g0LrQtdC30LTQtSDQsNC70YzQstC10L7Qu9Cw0LvQsNGA0LTQsNKT0Ysg0pvRi9GB0YvQvCDRgtOp0LzQtdC90LTQtdC50LTRlizQsNC7INCx0LXRgtGC0ZbQui3QsdC10LvRgdC10L3QtNGWINC30LDRgtGB0YvQtyDQsNC70YzQstC10L7Qu9Cw0LvQsNGA0LTRi9KjINCx0LXRgtGC0ZbQuiDQutC10YDRltC70YPRliDRi9C00YvRgNCw0L8g0pvQsNC70YPRi9C90LAg0LbQsNC90LUg0LHRltGALdCx0ZbRgNGW0LzQtdC9INC20LDQsdGL0YHRi9C/INKb0LDQu9GD0YvQvdCwINCw0LvRi9C/INC60LXQu9C10LTRli7QkdGD0Lsg0pvQsNC50YLQsNC00LDQvSDRgtGL0L3Ri9GB0YLRi9KjINCw0LvRg9GL0L3QsCDSm9C40YvQvdC00YvSmyDRgtGD0LTRi9GA0LDQtNGLINC20LDQvdC1INGB0L7QvdGL0LzQtdC9LdKb0LDRgtCw0YAg0YLRi9C90YvRgSDQsNC70YPQtNGL0qMg0LHRg9C30YvQu9GD0YvQvdCwINCw0LvRi9C/INC60LXQu9C10LTRli7QodGD0YDRhNCw0LrRgtCw0L3RgiDRgdC+0L3QtNCw0Lkt0LDSmyDQsNC70YzQstC10L7Qu9Cw0LvQsNGA0LTRi9KjINGC0YPRgNCw0pvRgtGL0LvRi9KT0YvQvSDRgdCw0pvRgtCw0YPSk9CwINC606nQvNC10LrRgtC10YHQtdC00ZYg0LbQsNC90LUg06nQutC/0LXQtNC1INGB0rHQudGL0pvRgtGL0pvRgtGL0qMg0LbQuNC90LDQu9GL0L8g0pvQsNC70YPRi9C9INCx0L7Qu9C00YvRgNC80LDQudC00Ysu0JHRg9C7INCw0YHRltGA0LXRgdC1INGI0LDQu9CwINGC0YPSk9Cw0L0g0L3QsNGA0LXRgdGC0LXQu9C10YDQtNGW0qMg06nQutC/0LXRgdGW0L3QtNC6INKb0LDQu9GL0L/RgtGLINC20YPQvNGL0YEg0ZbRgdGC0LXRgyDRg9GI0ZbQvSDTqdGC0LUg0LzQsNKj0YvQt9C00Ysg0LHQvtC70YvQvyDRgtCw0LHRi9C70LDQtNGLLNC+0LvQsNGAINOp0LfQtNGW0LPRltC90LXQvSDQttC10YLQutGW0LvRltC60YLRliDQsdC10YLRgtGW0Log0LHQtdC70YHQtdC90LTRliDQt9Cw0YLRgtGLINGI0YvQs9Cw0YDRg9GLINC80q/QvNC60ZbQvSDQttCw0L3QtSDRgtGL0L3Ri9GBINCw0LvRg9GL0L3QsCDQutOp0LzQtdC60YLQtdGB0YMg0q/RiNGW0L0g0LHQtdGC0YLRltC6LdCx0LXQu9GB0LXQvdGC0ZYg0LfQsNGC0YLRiyDQsNC70LzQsNGB0YLRi9GA0LDRgtGL0L0g0YLQtdGA0L/QuNGP0L3RiyDSm9Cw0LvRi9C/0YLQsNGB0YLRi9GA0YPRiyDQvNKv0LzQutGW0L0g0LHQvtC70YvQvyDQutC10LvQtdC00ZYu0J3QtdCz0ZbQt9C00LXQuSDQutC10YLQtdGC0ZbQvSDQsdC+0LvRgdCw0Lwg0YHRg9GA0YTQsNC60YLQsNC90YIg0L7QuyDQvdC10LPRltC30LPRliDQsdC+0LvRi9C/INGC0LDQsdGL0LvQsNC00Yss0L7Qu9Cw0YAg0LDQu9GM0LLQtdC+0LvQsNC70LDRgNC00YvSoyDQsdGW0YAt0LHRltGA0ZbQvNC10L0g0LbQsNCx0YvRgdGL0L8g0pvQsNC70YPRi9C9INCx0L7Qu9C00YvRgNC80LDRg9GL0L3QsNC9INCx06nQu9C10LrRgtC1INOp0LfRltC90LTRltC6INGE0YPQvdGG0LjRj9GB0YvQvNC10L0g06nQutC/0LXQtNC10LPRliDTqdC30ZbQvdC00ZbQuiDSm9GL0LfQvNC10YLQutC1INC20LDRg9Cw0L8g0LHQtdGA0ZbQvyDRgtKx0YDQsNC00Ysu</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9" table:style-name="ce1">
            <text:p>915329</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MSDRgdKx0YDQsNKbPGJyIC8+DQrQltCw0qPQsCDRgtGD0YvQu9KT0LDQvSDQsdCw0LvQsNC90YvSoyDRgdKv0YIg0LHQtdC30LTQtdGA0ZbQvdGW0qMg0pvQsNGC0LDQudGL0L8s0YLQtdGA0ZYg0YLSr9GB0ZbQvdGW0qMg06nQt9Cz0LXRgNGW0L8g0YPRi9C3INCw0pPRg9GLINC+0Lsg0pvQsNC70YvQv9GC0Ysg0YTQuNC30LjQvtC70L7Qs9C40Y/Qu9GL0psg0LbQsNKT0LTQsNC5INC00LXQvyDQtdGB0LXQv9GC0LXQu9GW0L3QtdC00ZYs0KHQtdCx0LXQsdGWINCw0L3QsCDQttKv0LrRgtGW0LvRltC6INC60LXQt9GW0L3QtNC1INCx0LDQu9Cw0pPQsCDQsNC90LDQvdGL0qMg0LPQsNGA0LzQvtC90LTQsNGA0YvQvdGL0qMg06nRgtGD0ZbQvdC10L0g0Y/Sk9C90LggINGB0L7QvdGL0qMg0ZbRiNGW0L3QtNC1INGN0YHRgtGA0L7Qs9C10L3QtNC10YDQtNGW0qMg06nRgtGD0ZbQvdC10L0g0YLRg9GL0L3QtNCw0LnRgtGL0L0g0LbQsNKT0LTQsNC5LtCR0rHQuyDRjdGB0YLRgNC+0LPQtdC9INC20LDSo9CwINGC0YPRi9C70pPQsNC9INKb0YvQt9C00LDRgCDQvNC10L0g0rHQu9C00LDRgNC00LAg0LTQsCDQutC10LfQtNC10YHQtdGC0ZbQvSDQttCw0pPQtNCw0Lkg0LDQu9Cw0LnQtNCwINKb0YvQt9C00LDRgNC00LAg0LHQsNGB0YvQvNGL0YDQsNKbINC60LXQt9C00LXRgdC10LTRli7QkdKx0Lsg0pvQsNC70YvQv9GC0Ysg0LbQsNKT0LTQsNC5INGD0LDSm9GL0YIg06nRgtC1INC60LXQu9C1INCx0LDQu9CwINGB0YvRgNGC0pvRiyDQvtGA0YLQsNKT0LAg0LHQtdC50ZbQvNC00LXQu9GW0L8g0ZbRiNC60ZYg0L7RgNCz0LDQvdC00LDRgNGLINC80LXQvSDQttKv0LnQtdC70LXRgNGWINC90L7RgNC80LDSk9CwINC60LXQu9Cz0LXQvdC00LUg06nQt9C00ZbQs9GW0L3QtdC9INC20L7QudGL0LvQsNC00Yss0LXRiNKb0LDQvdC00LDQuSDRhNC40LfQuNC+0LvQvtCz0LjRj9C70YvSmyDQutKv0Ygg0YLSr9GB0ZbRgNGW0L8g0YHRi9KT0YPQtNGL0qMg0pvQsNC20LXRgtGWINC20L7SmyDRgdC10LHQtdCx0LHRliDQvtC7INCx0LDQu9CwINGB0q/RgiDQsdC10LfQtNC10YDRltC90ZbSoyDQuNC90YTQtdC60YbQuNGPINGC0q/RgdGDINC905nRgtC40LbQtdGB0ZbQvdC10L0g0pvQsNCx0YvQvdGDINGC0YPQtNGL0YDRg9GLINC80q/QvNC60ZbQvS7QmtOp0L8g0LDRgtCwINCw0L3QsCDRgdGL0pPRi9C/INC20LXRgNCz0ZbQu9GW0LrRgtGWINC80LDQt9GM0LTQsNGAINC20LDSk9GD0pPQsCDRgtGL0YDRi9GB0LDQtNGLINCx0rHQuyDQtNKx0YDRi9GBINC10LzQtdGBLiDQodC+0Lsg0YHQtdCx0LXQsdGC0ZYg0LXSoyDQsNC70LTRi9C80LXQvSDQv9C10LTQuNCw0YLRgCDQvNCw0LzQsNC90YvQvdCw0L0g0LrQtdKj0LXRgSDQsNC70YvQvyDQvtGC0YvRgNKT0LDQvSDQttOp0L0u0KHSr9GCINCx0LXQt9C00LXRgNGW0L3RltKjINGW0YHRltC90YPRliDTmdC00LXRgtGC0LUg0LXQutGWINC20LDSm9GC0Ysg0LHQvtC70LDQtNGLINGP0pPQvdC4INGB0LjQvNC80LXRgtGA0LjRj9C70Ysg0LHQvtC70LDQtNGLLNC+0Lsg0LHQsNC70LAg0YLRg9GL0LvSk9Cw0L3QvdCw0L0g0LrQtdC50ZbQvSAzLDQg0LrSr9C90LTQtdGA0ZYg0L/QsNC50LTQsCDQsdC+0LvRi9C/INC10qMg0LbQvtKT0LDRgNKT0Ysg06nQt9Cz0LXRgNGW0YHRliA4LDEwINC60q/QvdGWINC606nRgNGW0L3QtdC00ZYg0L7QtNCw0L0g0LrQtdC50ZbQvSDTqdC3INKb0LDQu9C/0YvQvdCwINKb0LDQudGC0LDQtNGLLtCa0LXQudC00LUg0ZbRgdGW0L3Rg9C70LXRgCDQttC+0pPQsNGA0Ysg0LTTmdGA0LXQttC10LTQtSDQsdC+0LvRi9C/INOp0YDRltC6INC/0ZbRiNGW0L3Qs9C1INC40LUg0LHQvtC70LDQtNGLLiDQhtGB0ZbQvdCz0LXQvSDQsdC10Lcg0pvQvtC30pPQsNC70LzQsNC70Yss0YLQtdGA0YHRltC90ZbSoyDRgtKv0YHRliDSm9Cw0LvRi9C/0YLRi9KT0LAg0YHQsNC5LCDRiNGL0pvSm9Cw0L0g0YHSsdC50YvSm9GC0YvSmyDRgdKv0YLQutC1INKx0pvRgdCw0YEuINCa0LXQudGW0L0g0LHQsNC70LAg0LTQtdC90LXRgdGWINCw0L3QsNC70YvSmyDQs9Cw0YDQvNC+0L3QtNCw0YDQtNCw0L0g0LHQvtGB0LDRgtGL0LvSk9Cw0L3QvdCw0L0g0LrQtdC50ZbQvSDQsdCw0YDQu9GL0pPRiyDTqdC3INKb0LDQu9C/0YvQvdCwINC60LXQu9C10LTRli7QkdKx0Lsg0L/RgNC+0YbQtdGB0YEg0YTQuNC30LjQvtC70L7Qs9C40Y/Qu9GL0psg0LzQsNGB0YLQuNGCINC00LXQvyDQsNGC0LDQu9Cw0LTRiyDQtdC80LTQtdGD0LTRliDSm9Cw0LbQtdGCINC10YLQv9C10LnQtNGWLjxiciAvPg0KMiDRgdKx0YDQsNKbPGJyIC8+DQrQodGD0YDRhNCw0LrRgtCw0L3RgiDQvtC7INCx0LXRgtGC0ZbQuiDQsdC10LvRgdC10L3QtNGWINC30LDRgizTqdC60L/QtdC00LUg0YLSr9C30ZbQu9C10YLRltC9INGB0L7QvdGL0LzQtdC9INKb0LDRgtCw0YAg0LPQsNC3INCw0LvQvNCw0YHRgyDQttKv0YDQtdGC0ZbQvSDTqdC60L/QtSDQsNC70LLQtdC+0LvQsNC70LDRgNGL0L3Ri9KjINCx0LXRgtGW0L3QtNC1INC+0YDQvdCw0LvQsNGB0pvQsNC9LCDQsdC10YLRgtGW0Log0LrQtdGA0ZbQu9GD0LTRliDQsNC30LDQudGC0LDRgtGL0L0g0LfQsNGCLtCe0Lsg0LvQuNC/0LjRgtGC0LXRgCDQvNC10L0g0LHQtdC70L7QutGC0LDRgNC00LDQvSDRgtKx0YDQsNC00Ysg06nQutC/0LXQvdGW0qMg0pvQsNC70YvQv9GC0Ysg0YTQuNC30LjQvtC70L7Qs9C40Y/Qu9GL0psg0pvRi9C30LzQtdGC0ZbQvSDQttCw0pvRgdCw0YDRgtCw0LTRiyDQuCDRgdCw0pvRgtCw0LnQtNGLLtCh0YPRgNGE0LDQutGC0LDQvdGC0YLRi9KjINC90LXQs9GW0LfQs9GWINKb0YvQt9C80LXRgtGWINC+0Lsg0LTQtdC8INGI0YvSk9Cw0YDRgyDRg9Cw0pvRi9GC0YvRgdGL0L3QtNCwINCw0LvQstC10L7Qu9Cw0LvQsNGA0LTRi9KjINKb0LDQsdGL0YHRi9C/INKb0LDQu9GD0YvQvdCw0L3Ri9KjINCw0LvQtNGL0L0g0LDQu9Cw0LTRiy7QlNC10Lwg0YjRi9KT0LDRgNGDINGD0LDSm9GL0YLRi9GB0YvQvdC00LAg0LDQu9Cy0LXQvtC70LDQu9Cw0YDQtNCwINKb0YvRgdGL0Lwg0YLTqdC80LXQvdC00LXQudC00ZYs0LDQuyDRgdGD0YDRhNCw0LrRgtCw0L3RgiDQsdC+0LvQvNCw0YHQsCDQvtC70LDRgCDQttCw0LHRi9GB0YvQvyDRhNGD0L3QutGG0LjRj9GB0YvQvSDQttC+0pPQsNC70YLQsNC00Yss0LHSsdC7INKb0LDQudGC0LAg0YLRi9C90YvRgSDQsNC70pPQsNC90LTQsCDQsNGD0YvRgNC70YvSmyDQv9C10L0g0pvQuNGL0L3QtNGL0pvRgtGLINGC0YPRi9C90LTQsNGC0LDQtNGLINC205nQvdC1INOp0LrQv9C10L3RltKjINC+0YLRgtC10LPRliDQvNC10L0g0pvQsNC90YvSk9Cw0YLRi9C9INCw0YPQtNCw0L3Ri9Kj0YvSoyDQutGW0YjRltGA0LXQudGD0ZbQvdC1INCw0LvRi9C/INC60LXQu9C10LTRli4g0KHRg9GA0YTQsNC60YLQsNC90YIg0YHQvtC90YvQvNC10L0g0pvQsNGC0LDRgCDQsNC70LLQtdC+0LvQsNC70LDRgNC00YvSoyDQv9GW0YjRltC90ZbQvSDRgdCw0pvRgtCw0LnQtNGLINC205nQvdC1INOp0LrQv9C10LPQtSDRgdKx0LnRi9Kb0YLRi9KbINGC0L7Qu9GD0YvQvdGL0qMg0LDQu9C00YvQvSDQsNC70LDQtNGLINC205nQvdC1INC80L7Qu9C10LrRg9C70LDQu9GL0psg0LHQtdGC0YLRltC6INC60LXRgNGW0LvRg9C00ZYg0YLTqdC80LXQvdC00LXRgtC10LTRli7QkdKx0Lsg05nRgdGW0YDQtdGB0LUg0YjQsNC70LAg0YLRg9GL0LvSk9Cw0L0g0LHQsNC70LDQu9Cw0YDQtNCwINKb0LDQu9GL0L/RgtGLINOp0LrQv9C1INKb0YvQt9C80LXRgtGWINKv0YjRltC9INC60LXRgNC10Log0L7Qu9Cw0YAg06nQt9C00ZbQs9GW0L3QtdC9INCx0LXRgtGC0ZbQuiDQsdC10LvRgdC10L3QtNGWINC30LDRgiDQsdOp0LvQtSDQsNC70LzQsNKT0LDQvdC90LDQvSDRgdC+0qMg0LbTmdC90LUg0L7Qu9Cw0YDQtNGL0qMg0LTQtdC8INCw0LvRg9GL0L3QsCDQutOp0LzQtdC60YLQtdGB0YMg0q/RiNGW0L0g0YLQtdGA0LDQv9C40Y8g0LbSr9GA0LPRltC30ZbQu9C10LTRli7QodGD0YDRhNCw0LrRgtCw0L3RgtGC0YsgMiDRgtC40L/RgtGWINCw0LvQstC10L7QsNGG0LjRgiDQv9C10L0g0LrQu9Cw0YAg0LbQsNGB0YPRiNCw0LvQsNGA0Ysg06nQvdC00ZbRgNC10LTRli4g0KHRg9GA0YTQsNC60YLQsNC90YLRgtGL0qMg06nQvdC00ZbRgNGW0LvRg9GWINC20LDRgtGL0YDQtNCwINC+0YDRi9C9INCw0LvQsNC00YsgMTgg0LHQtdC9IDIwINCw0L/RgtCw0LvQsNGA0LTQsCDQsdCw0YHRgtCw0YMg0LDQu9Cw0LTRiyzQsNC7IDI4INCw0L/RgtCw0LTQsCDQsNC70LLQtdC+0LvQsNC70LDRgCDRiNGL0pPQsNGA0YvQu9GL0L8g05nRgNC10LrQtdGCINC10YLQtdC00ZYuMzQsMzUg0LDQv9GC0LDSk9CwINC00LXQudGW0L0g0LbQtdGC0ZbQu9C10LTRli4g0KHRg9GA0YTQsNC60YLQsNC90YLRgtGL0qMg0YLSr9C30ZbQu9GD0ZYg0q/RiNGW0L0g0LPQsNGA0LzQvtC90LTQsNGA0LTRi9KjINC606nQvNC10LPRliDTqdGC0LUg0LfQvtGAINC+0LvQsNGAINKb0LDQu9Kb0LDQvdGI0LAg0LHQtdC30ZYs0LbRi9C90YvRgdGC0YvSmyDRgdGC0LXRgNC+0LnRgtGC0LDRgCDQvNC10L0g0LPQu9GO0LrQvtC60LDRgNGC0LjQutC+0LjQtNGC0LDRgCDQsNGA0pvRi9C70Ysg0LrTqdCx0LXQudC10LTRli4=</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8" table:style-name="ce1">
            <text:p>915348</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MTAg0LrSr9C90LTRltC6INCx0LDQu9Cw0LzQtdC9INCw0L3QsNGB0Ysg0L/QtdC00LjQsNGC0YDSk9CwINKb0LDRgNCw0LvQtNGLLtCd05nRgNC10YHRgtC10L3RltKjINGB0q/RgiDQsdC10LfRltC90ZbSoyDSm9Cw0YLQsNC50YPRiyzRgdC+0Lsg0YLSr9GB0YLRltKjINGC0LXRgNGW0YHRltC90ZbSoyDSm9GL0LfQsNGA0YPRiyDQttOZ0L3QtSDRg9GL0Lcg0YLTmdGA0ZbQt9C00LXRgSDQsdOp0LvRltC90LTRliDQv9Cw0LnQtNCwINCx0L7Qu9GD0Ysg0LDQvdCw0YHRi9C9INCw0LvQsNKj0LTQsNGC0LDQtNGLLtCe0YHRiyDTqdC30LPQtdGA0ZbRgSDQvdC10LzQtdC9INCx0LDQudC70LDQvdGL0YHRgtGLOiAyLtCh0YPRgNGE0LDQutGC0LDQvdGCINGC0YPRgNCw0LvRiyDRgtKv0YHRltC90ZbQuiDQttOZ0L3QtSDQvtC7INKb0LDQvdC00LDQuSDRhNGD0L3QutGG0LjRj9C90Ysg0LDRgtKb0LDRgNCw0LTRiy7QltCw0qPQsCDRgtGD0YvQu9KT0LDQvSAxMCDQutKv0L3QtNGW0Log0L3TmdGA0LXRgdGC0LUg0YHSr9GCINCx0LXQt9C00LXRgNGW0L3RltKjINGC0L7Qu9GL0L8g0LrQtdGC0YPRlizQvtC70LDRgNC00YvSoyDSr9GB0YLRltC90LTQtdCz0ZYg0YLQtdGA0ZbRgdGW0L3SoyDQs9C40L/QtdGA0LXQvNC40Y/RgdGLINC205nQvdC1INGB0q/RgiDQsdC10LfQtNC10YDRltC90ZbSoyDRgdC10LrRgNC10YbQuNGP0YHRiyDQttCw0qPQsCDRgtGD0pPQsNC9INC905nRgNC10YHRgtC10LvQtdGA0LTRltKjINGB0q/RgiDQsdC10LfQtNC10YDRltC90ZbSoyDQs9C40L/QtdGA0YLRgNC+0YTQuNGP0YHRi9C80LXQvSDQsdCw0LnQu9Cw0L3Ri9GB0YLRiyDQsdC+0LvRg9GLINC80q/QvNC60ZbQvS7QsdKx0Lsg0LbQsNKj0LAg0YLRg9KT0LDQvSDSm9GL0LfQtNCw0YDQtNGLINC20q/QutGC0ZbQu9GW0Log0LrQtdC30ZbQvdC00LUg0L3TmdGA0LXRgdGC0LXQs9C1INCw0L3QsNC70YvSmyDQs9C+0YDQvNC+0L3QtNCw0YDQtNGL0qMs05nRgdGW0YDQtdGB0LUg0Y3RgdGC0YDQvtCz0LXQvSDQsNGD0YvRgdGD0YvQvdCw0L0g0YLRg9GL0L3QtNCw0LnRgtGL0L0g0LbQuNGWINC60LXQt9C00LXRgdC10YLRltC9INC205nQvdC1INC20LDSm9GB0Ysg0LbQsNKT0LTQsNC5LtCx0rHQuyDQs9C+0YDQvNC+0L3QtNCw0YAg0LXRgNC70LXRgCDQvNC10L0g05nQudC10LvQtNC10YDQtNGW0qMg0LbQsNKj0LAg0YLRg9KT0LDQvSDQvdOZ0YDQtdGB0YLQtdC70LXRgNGW0L3QtNC10LPRliDRgdKv0YIg0LHQtdC30ZbQvdGW0qMg0YLRltC90ZbQvdGW0qMg06nRgdGD0ZbQvSDRi9C90YLQsNC70LDQvdC00YDRg9GLINC80q/QvNC60ZbQvSDQtdC60LXQvSzQsdGW0YDQsNKbINC+0Lsg0pvRi9C30LTQsNGA0LTRiyDQsdCw0LnSm9Cw0LvQsNC00YsgLtGB0q/RgiDQsdC10LfRltC90ZbSoyDRgtGW0L3RltC90ZbSoyDRgtC+0LvRi9C/INC60LXRgtGD0ZYg0YHSr9GCINCx0LXQt9C00LXRgNGW0L3RltKjINGC0LXRgNGW0YHRltC90ZbSoyDQs9C40L/QtdGA0LXQvNC40Y/RgdGL0L0g0L3QtdC80LXRgdC1INKb0YvQt9Cw0YDRg9GL0L0g0LbTmdC90LUg0LXQvNGW0LfRltC60YjQtdC70LXRgNC00LXQvSDRg9GL0Lcg0YHSr9GC0ZYg0YLTmdGA0ZbQt9C00ZYg0YHQtdC60YDQtdGG0LjRj9C70LDRgNC00Ysg0YLRg9C00YvRgNGD0Ysg0LzSr9C80LrRltC9LtCR0rHQuyDRgdC40LzQv9GC0L7QvNC00LDRgNGLINOZ0LTQtdGC0YLQtSDTqdC30LTRltCz0ZbQvdC10L0g0LbQvtC50YvQu9Cw0LTRiyzQttOZ0L3QtSDQtdC80LTQtdC70LzQtdC5INCx0ZbRgNC90LXRiNC1INCw0L/RgtCw0LTQsNC9INCx0ZbRgNC90LXRiNC1INCw0LnSk9CwINC10LzQtNC10LvQtdC00ZYgLNOp0LnRgtC60LXQvdGWINCw0L3QsNC70YvSmyDQs9C+0YDQvNC+0L3QtNCw0YDQvdOZ0YDQtdGB0YLQtSDQttKv0LnQtdGB0ZbQvdGW0LXQvSDRgtC+0LvRi9Kb0YLQsNC5INC20L7QudGL0LvQsNC00Ysu0YTQuNC30LjQvtC70L7Qs9C40Y/Qu9GL0psg0LzQsNGB0YLQuNGCINGB0q/RgiDQsdC10LfQtNC10YDRltC90ZbSoyDRltGB0ZbQvdGD0Ysg0LbRi9C90YvRgdGL0L3QsCDSm9Cw0YDQsNC80LDRgdGC0LDQvSDQutC10LnQsdGW0YAg0LbQsNKj0LAg0YLRg9KT0LDQvSDQvdOZ0YDQtdGB0YLQtdC70LXRgNC00LUg0LHQsNC50pvQsNC70LDQtNGLIC7QkdKx0Lsg0L/RgNC10L3QsNGC0LDQu9C00Ysg0LrQtdC30LXSo9C00LUg0Y3RgdGC0YDQvtCz0LXQvSDQs9C+0YDQvNC+0L3QtNCw0YDRi9C90YvSoyDQsNC90LDQvdGL0qMg0rHRgNGL0pvSm9CwINOp0YLRg9GW0L3QtdC9INGC0YPRi9C90LTQsNC50LTRiyAu0KHSr9GCINCx0LXQt9C00LXRgNGW0L3RltKjINGW0YHRltC90YPRliDTmdC00LXRgtGC0LUg0LXQutGWINC20LDSm9GC0Ysg0LHQvtC70LDQtNGLINGC0YPSk9Cw0L3QvdCw0L0g0LrQtdC50ZbQvSDQsNC70pPQsNGI0pvRiyAzLTQg0LrSr9C90LTQtSDQv9Cw0LnQtNCwINCx0L7Qu9Cw0LTRiyA4LTEwINC60q/QvdC00LUg0LzQsNC60YHQuNC80LDQu9C00Ysg0LTQtdC90LPQtdC50LPQtSDQttC10YLQtdC00ZYu0JrQtdC50LTQtSDRltGB0ZbQvdGDINC10LvQtdGD0YHRltC3INCx0L7Qu9Cw0LTRiyDQsNC7INC60LXQudCx0ZbRgCDQttCw0pPQtNCw0LnQu9Cw0YDQtNCwINC+0Lsg0pvQsNGA0LAg06nRgNGW0Log0L3QtdC80LXRgdC1INC+0LTQsNC90LTQsCDQutOp0L8g0LHQvtC70YPRiyDQvNKv0LzQutGW0L0g0IbRgdGW0L3Qs9C10L0g0LHQtdC30LTQtdGAINKb0L7Qt9KT0LDQu9C80LDQu9GLICzQvtC70LDRgNC00YvSoyDSr9GB0YLRltC90LTQtdCz0ZYg0YLQtdGA0ZYg05nRgNC00LDQudGL0Lwg0pvQsNC70YvQv9GC0Ysg0YLSr9GB0YLRliAu0JXQvNGW0LfRltC6INGD0YvQtyDRgdKv0YLRltC90LUg0rHSm9GB0LDQudGC0YvQvSDRgdKx0LnRi9Kb0YLRi9Kb0YLRiyDRiNGL0pPQsNGA0YPRiyDQvNKv0LzQutGW0L0u0JTQtdC90LUg0LDQvdCw0LvRi9KbINCz0L7RgNC80L7QvdC00LDRgNC00LDQvSDQsdC+0YHQsNGC0YvQu9KT0LDQvdC00YvSm9GC0LDQvSAs0LHQtdC30LTQtdGA0LTRltKjINGW0YHRltC90YPRliDQttC+0pPQsNC70LDQtNGLLtCR0LXQt9C00LXRgNC00ZbSoyDQttCw0YDQsNKb0LDRgtGC0LDQvdGD0YsgLNC40L3RhNC10LrRhtC40Y8g0LzQtdC9INGW0YDRltKj0LTQtdGDINKb0LDRg9C/0ZbQvdC1INCx0LDQudC70LDQvdGL0YHRgtGLINC60LXQtyDQutC10LvQs9C10L0g0pvRi9GB0YvQvNKT0LAg0pvQsNGC0LDSoyDRgtGL0LnRi9C8INGB0LDQu9GL0L3QsNC00Ysu0KTQuNC30LjQvtC70L7Qs9C40Y/Qu9GL0psg0LzQsNGB0YLQuNGCINC10LzQtNC10YPQtNGWINKb0LDQttC10YIg0LXRgtC/0LjQtNGWLtCh0YPRgNGE0LDQutGC0LDQvdGCINOp0LrQv9C10LTQtSDRgtKv0LfRltC70LXRgtGW0L0g0LbTmdC90LUg0LPQsNC3INCw0LvQvNCw0YHRg9GLINC20q/RgNC10YLRltC9INOp0L/QtdC00LXQs9GWINGI0LDSk9GL0L0g0LDRg9CwINKb0LDQv9GI0YvSm9GC0LDRgNGLINCx0L7Qu9GL0L8g0YHQsNC90LDQu9Cw0YLRi9C9INCw0LvRjNCy0LXQvtC70LDQu9Cw0YDQtNGL0qMg0LHQtdGC0YLRltC6INC60LXRgNGW0LvRg9GW0L0g0LDQt9Cw0LnRgtGD0pPQsCDQutOp0LzQtdC60YLQtdGB0LXQtNGWINC10LrQtdC9LtCh0YPRgNGE0LDQutGC0LDQvdGCINCw0pvRg9GL0LfQtNCw0L0g0YLSsdGA0LDQtNGLICzQttOZ0L3QtSDQvtC90YvSoyDTqdC60L/QtdC90ZbSoyDSm9Cw0LvRi9C/0YLRiyDQttKx0LzRi9GB0YvQvSDRgdCw0pvRgtCw0YMg0q/RiNGW0L0g06nRgtC1INC80LDSo9GL0LfQtNGLIC7QodGD0YDRhNCw0LrRgtCw0L3RgtGC0YvSoyDQvdC10LPRltC30LPRliDSm9GL0LfQvNC10YLRliDQtNC10Lwg0YjRi9KT0LDRgNGDINC60LXQt9GW0L3QtNC1INCw0LvRjNCy0LXQvtC70LDQu9Cw0YDQtNGL0qMg0pvSsdC70LDRg9GL0L0g0LHQvtC70LTRi9GA0LzQsNGDINCx0L7Qu9GL0L8g0YLQsNCx0YvQu9Cw0LTRiy7QkdGW0Lcg0LTQtdC8INGI0YvSk9Cw0YDSk9Cw0L0g0LrQtdC30LTQtSDQsNC70YzQstC10L7Qu9Cw0LvQsNGA0LTQsCDSm9GL0YHRi9C8INGC06nQvNC10L3QtNC10LnQtNGWLNCw0Lsg0YHRg9GA0YTQsNC60YLQsNC90YIg0LHQvtC70LzQsNGB0LAg0LDQu9GM0LLQtdC+0LvQsNC70LDRgNC00YvSoyDSm9Kx0LvQsNC/INCx0ZbRgC3QsdGW0YDRltC90LUg0LbQsNCx0YvRgdGL0L8g0pvQsNC70LDQtNGLLtCR0rHQuyDSm9Cw0LnRgtCw0LTQsNC9INGC0YvQvdGL0YEg0LDQu9GD0LTRiyDSm9C40YvQvdC00LDRgtCw0LTRiyDQttOZ0L3QtSDRgtGL0L3Ri9GBINCw0LvRg9C00YvSoyDQsdKx0LfRi9C70YPRi9C90LAg05nQutC10LvQtdC00ZYgLtCh0YPRgNGE0LDQutGC0LDQvdGCINGB0L7QvdGL0LzQtdC9INKb0LDRgtCw0YAg0LDQu9GM0LLQtdC+0LvQsNC70LDRgNC00YvSoyDRgtKx0YDQsNKb0YLRi9C70YvSk9GL0L0g0YHQsNKb0YLQsNGD0pPQsCDQutOp0LzQtdC60YLQtdGB0LXQtNGWINC205nQvdC1INOp0LrQv9C10LTQtSDRgdKx0LnRi9Kb0YLRi9Kb0YLRi9KjINC20LjQvdCw0LvRg9GL0L0g0LHQvtC70LTQsNGA0LzQsNC50LTRiyAu0JHSsdC7INOZ0YHRltGA0LXRgdC1INC20LDSo9CwINGC0YPSk9Cw0L0g0L3TmdGA0LXRgdGC0LXQu9C10YDQtNGW0qMg0pvQsNC70YvQv9GC0Ysg06nQutC/0LUg0pvRi9C30LzQtdGC0ZYg0q/RiNGW0L0gINOp0YLQtSDQvNCw0qPRi9C30LTRiyAs0L7Qu9Cw0YAg06nQt9C00ZbQs9GW0L3QtdC9INC20LXRgtC60ZbQu9GW0LrRgtGWINGB0YPRgNGE0LDQutGC0LDQvdGC0YLRiyDRiNGL0pPQsNGA0LAg0LDQu9C80LDQudC00Ysg0LbTmdC90LUg0L7Qu9Cw0YDQtNGL0qMg0YLRi9C90YvRgSDQsNC70YPRi9C90LAg0LrTqdC80LXQutGC0LXRgdGDINKv0YjRltC9INGB0YPQv9GE0LDQutGC0LDQvdGC0Ysg0LDQu9C80LDRgdGC0YvRgNCw0YLRi9C9INGC0LXRgNCw0L/QuNGPINCx0L7Qu9GD0Ysg0LzSr9C80LrRltC9LtCh0YPRgNGE0LDQutGC0LDQvdGCINC80L7Qu9C10LrRg9C70LDQu9Cw0YAg0LHQtdGC0YLRltC6INC60LXRgNGW0LvRg9C00ZYg0YLTqdC80LXQvdC00LXRgtC10LTRliDRgdGD0YDRhNCw0LrRgtCw0L0g0LzQsNC60YDQviDQsNCz0YDQtdCz0LDRgiDQvNC+0LvQtdC60YPQu9Cw0YHRiyDQsdC+0LvRi9C/INGC0LDQsdGL0LvQsNC00Ysg0LbTmdC90LUg0L7QvdGLIDLRgtC40L/RgtGWINC/0L3QtdCy0LzQvtGG0LjRgiDQv9C10L0g0JrQu9Cw0YDQsCDQttCw0YHRg9GI0LDQu9Cw0YDRiyDRiNGL0pPQsNGA0LDQtNGLIC7QntC70LDRgNC00YvSoyDSm9Kx0YDQsNC80YvQvdC00LAg0L3QtdCz0ZbQt9GW0L3QtdC9INGE0L7RgdGE0L7Qu9C40L/QuNC00YLQtdGAICzQsNC7INC90LXQs9GW0LfQs9GW0YHRliDQu9C10YbQuNGC0LjQvSDQtNC40L/QsNC70YzQvNC40YLQvtC40LvRhNC+0YHRhNCw0YLQuNC00LjQu9GF0L7Qu9C40L0g0LbTmdC90LUg0YTQuNCx0YDQuNC9INCw0pvRg9GL0LfRiyDQttOZ0L3QtSDQvNGD0LrQvtC/0L7Qu9C40YHQsNGF0LDRgNC40LQu0KHRg9GA0YTQsNC60YLQsNC90YIg05nRgNC10LrQtdGC0ZYg0JvQsNC/0LvQsNGBINC30LDSo9GL0L3QsCDRgdOZ0LnQutC10YEg0LrQtdC70LXQtNGWIC7QodGD0YDRhNCw0LrRgtCw0L3RgiDRgdGD0LTRi9KjINCx0LXRgtGW0L0g0LbQsNCx0LDQtNGLINC205nQvdC1INCw0YPQsCDRgdKx0LnRi9Kb0YLRi9KT0YvQvdGL0qMg0LjQvdGC0LXRgNGE0LXQudGB0ZbQvSDQsNC30LDQudGC0LDQtNGLLtCh0YPRgNGE0LDQutGC0LDQvdGC0YLRi9KjINGB0LjQvdGC0LXQt9GWINC20LDRgtGL0YDQtNGL0qMgMTgtMjAg0YjRiyDQsNC/0YLQsNC70LDRgNGL0L3QtNCwINCx0LDRgdGC0LDQu9Cw0LTRiyAs0LHRltGA0LDSmyAyOCDQsNC/0YLQsNC70LDRgNC00LAg0LDQu9GM0LLQtdC+0LvQsNC70LDRgNC00LAg0YjRi9KT0LDRgNGL0LvQsNC00Ysg0LbTmdC90LUg05nRgNC10LrQtdGCINC10YLQtdC00ZYgLjM0LTM3INCw0L/RgtCw0pPQsCDQtNC10LnRltC9INC20LXRgtGW0LvRgyAu0prQsNC70pvQsNC90YjQsCDQsdC10LfRlizQttGL0L3Ri9GB0YLRi9KbINGB0YLQtdGA0L7QudC00YLQsNGAINC205nQvdC1INCz0LvRjtC60L7QutC+0YDRgtC40LrQvtC50LTRgtCw0YAg0LDRgNKb0YvQu9GLINGB0YPRgNGE0LDQutGC0LDQvdGCINC606nQsdC10LnQtdC00ZYgLtCh0YPQv9GE0LDQutGC0LDQvdGCINCx0LXRgtGC0ZbQuiDQutC10YDRltC70YPQtNGWINGC06nQvNC10L3QtNC10YLQtdC00ZYg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6" table:style-name="ce1">
            <text:p>915356</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0JHQsNC70LAg0YLRg9GL0LvSk9Cw0L3QvdCw0L0g0LrQtdC50ZbQvSDQs9C+0YDQvNC+0L3QtNGL0psg0LbTmdC90LUg0LbRi9C90YvRgdGC0YvSmyDQutGA0LjRgdGBINC/0LDQudC00LAg0LHQvtC70LDQtNGLLiDQntC7INCw0L3QsNGB0YvQvdGL0qMgINGN0YHRgtGA0L7Qs9C10L0g0LPQvtGA0LzQvtC90YvQvdCw0L0g0LHQsNC70LAg0LDQudGL0YDRi9C70pPQsNC9INC60LXQt9C00LUg0YLRg9GL0L3QtNCw0LnQtNGLICzRj9KT0L3QuCDQsdCw0LvQsCDQsNKT0LfQsNGB0YvQvdC00LAg0Y3RgdGC0YDQvtCz0LXQvSDQtNC10qPQs9C10LnRliDQttOZ0L3QtSDQtNC1INC/0YDQvtCz0LXRgdGC0LXRgNC+0L0g0LPQvtGA0LzQvtC90LTQsNGA0YvQvdGL0qMg0pvQsNC9INKb0rHRgNCw0LzRi9C90LTQsNGA0YvQvdC00LAg0LrSr9GA0YLRgtC10L0gINGC06nQvNC10L0g0LHQvtC70YPRiyAg0LbTmdC90LUgINGB0L7QvdGL0LzQtdC9INKb0LDRgtCw0YAg0L/RgNC+0LvQsNC60YLQuNC90L3RltKjINC20L7Sk9Cw0YDRiyDQsdC+0LvRg9GLINC+0YHRi9C90LTQsNC5INGB0LjQvNC/0YLQvtC80L7QutC+0LzQv9C70LXQutGB0YLRliDQsdC10LnQvdC10LvQtdC50LTRliAu0JHSsdC7INCx0ZbQt9C00LUg0YLRgNCw0L3Qt9C40YLQvtGA0LvRi9KbINC60LXQt9C10L3QvdGW0qMg0LHRltGA0ZYg0LHQvtC70YvQvyDRgtCw0LHRi9C70LDQtNGLLCDQttOZ0L3QtSDRgdC+0Lsg0YHQtdCx0LXQv9GC0ZYg0LDQvdCw0YHRiyDSm9Cw0LvRi9C/0YLRiyDQttCw0pPQtNCw0Lkg0YDQtdGC0ZbQvdC00LUg0LHSsdC7INC20LDSk9C00LDQudC00Ysg0pvQsNCx0YvQu9C00LDRg9GLINKb0LDQttC10YIgLtCh0q/RgiDQsdC10LfQtNC10YDRltC90ZbSoyDSm9Cw0LnRgtCwINKb0LDQu9C/0YvQvdCwINC60LXQu9GD0ZYgMSDQsNC/0YLQsCDRiNCw0LzQsNC70LDRgNGL0L3QtNCwINC20q/RgNC10LTRli7QodGD0YDRhNCw0LrRgtCw0L3RgiAg0YLRg9GA0LDQu9GLINGC0q/RgdGW0L3RltC60LrQtSDQutC10LvQtSDQutC10YLRgdC10LogLdC+0Lsg0LHQtdGC0YLRltC6INCx0LXQu9GB0LXQvdC00ZYg0LfQsNGCICwyINGI0ZYg0YLQuNC/0YLRliDQsNC70YzQstC10L7RhtC40YLRgtC10YDQvNC10L0g0LbTmdC90LUg0LTQtSDQutC70LDRgNCwINC20LDRgdGD0YjQsNC70LDRgNGL0LzQtdC9INGB0LjQvdGC0LXQt9C00LXQu9GW0L3QtdC00ZYg0L7Qu9Cw0YAg0Y/Sk9C90Lgg0YLQvtC70pvRi9C90YHRi9C3INCx0YDQvtC90YXQuNC+0LvRj9GA0LvRiyDQttCw0YHRg9GI0LDQu9Cw0YAgLiDQodGD0YDRhNCw0LrRgtCw0L3RgtGC0YvSoyA5MCDQv9Cw0LnRi9C30Ysg0LvQuNC/0LjQtNGC0LXRgNC00LXQvSDRgtKx0YDQsNC00Ysg0LbTmdC90LUg0L7Qu9Cw0YDQtNGL0qMg0ZbRiNGW0L3QtNC10LPRliA4MCDQv9Cw0LnRi9C30Ysg0L3QtdCz0ZbQt9Cz0ZYg0LrQvtC80L/QvtC90LXQvdGC0ZYg0LHQvtC70YvQvyDRgtCw0LHRi9C70LDRgtGL0qMgINGE0L7RgdGE0L7Qu9C40L/QuNC00YLQtdGALNGE0L7RgdGE0LDQuNC00LjQu9GF0L7Qu9C40L0gKNC70LXRgdC40YbQuNC9KSzQsNC7IDEwINC/0LDQudGL0LfRiyDQsdC10LnRgtCw0YDQsNC/INC70LjQv9C40LTRgtC10YAg0LHQvtC70YvQvyDRgtCw0LHRi9C70LDQtNGLLiA4INC/0LDQudGL0Lcg0pvSsdGA0pPQsNKbINGB0LDQu9C80LDSmyDRgdGD0YDRhNCw0LrRgtCw0L3RgtGLINCQ0JLQoSDQv9GA0L7RgtC10LjQvdC00LXRgNGW0L3QtdC9INGC0rHRgNCw0LTRiyAu0KHRg9GA0YTQsNC60YLQsNC90YLRgtGL0qMg0YTRg9C90LrRhtC40Y/Qu9Cw0YDRi9C90LAg0LrQtdC70LUg0LrQtdGC0YHQtdC6IDEg0YjRltGB0ZYtINC+0LsgINOp0LrQv9C1INGN0L/QtdGC0LXQu9C40LnRltC9INC30LDSm9GL0LzQtNCw0LvRg9GL0L3QsNC9INKb0L7RgNKT0LDQudC00Ysg0LbTmdC90LUg0LzRg9C60L7RhtC40LvQuNCw0YDQu9GL0psg0LrQu9C40LXQvdC60LUg0pvQsNGC0YvRgdCw0LTRiyAuMiDRiNGWINGE0YPQvdC60YbQuNGP0YHRiyAt0JPQoCvQsdCw0LrRgtC10YDQuNGP0LvQsNGA0pPQsCDQsdCw0Lkg0LHQvtC70YvQvyDRgtCw0LHRi9C70LDQtNGLINC205nQvdC1INC00LUg06nQutC/0LXQvdGW0qMg0LzQsNC60YDQvtGE0LDQs9Cw0LvRjNC00Ysg0LbSr9C50LXRgdGW0L0g0YvQvdGC0LDQu9Cw0L3QtNGL0YDQsCDQvtGC0YvRgNGL0L8s06nQutC/0LXQtNC1INC205nQvdC1INOp0YLQutGW0LfQs9GW0YjRgtGW0LrRgtC1INC80LjQutGA0L7RhtC10YDQutGD0LvRj9GG0LjRj9C90Ysg0YDQtdGC0YLQtdGD0LPQtSDSm9Cw0YLRi9GB0LDQtNGLIC4zINGI0ZYg0YTRg9C90LrRhtC40Y/RgdGLIC3QvtC7INOp0LrQv9C1ICDRltGB0ZbQs9GW0L3RltKjINC00LDQvNGD0YvQvdCwINC60LXQtNC10YDQs9GWIC7QodGD0YDRhNCw0LrRgtCw0L3RgiAyMC0yNCDQsNC/0YLQsNC00LDQvSDQsdCw0YHRgtCw0L8g0rHRgNGL0pvSm9CwINOp0L3QtNGW0YDRltC70LXQtNGW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4" table:style-name="ce1">
            <text:p>1066874</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MSkgMTAg0LrSr9C90LTRltC6INC905nRgNC10YHRgtC10LTQtSDRgdKv0YIg0LHQtdC30LTQtdGA0ZbQvdGW0qMg0rHQu9KT0LDRjtGLLCDRgdC+0Lsg0YLSsdGB0YLRi9KjINGC0LXRgNGW0YHRltC90ZbSoyDSm9GL0LfQsNGA0YPRiyDQttOZ0L3QtSDRg9GL0Lcg0YLTmdGA0ZbQt9C00ZYg0LHTqdC70ZbQvdC00ZbQvdGW0qMg0L/QsNC50LTQsCDQsdC+0LvRg9GLINGE0LjQt9C40L7Qu9C+0LPQuNGP0LvRi9KbINC80LDRgdGC0L7Qv9Cw0YLQuNGP0L3RiyDQutOp0YDRgdC10YLQtdC00ZYuINCR0rHQuyDSm9Cw0LvRi9C/0YLRiyDRhNC40LfQuNC+0LvQvtCz0LjRj9C70YvSmyDQttCw0pPQtNCw0Lkg0LHQvtC70YvQvyDRgdCw0L3QsNC70LDQtNGLLiDQkdKx0Lsg0LrTqdGA0ZbQvdGW0YHRgtGW0qMg0L/QsNC50LTQsCDQsdC+0LvRgyDRgdC10LHQtdCx0ZYg0LHQsNC70LAg0pvSsdGA0YHQsNKb0YLQsCDQttCw0YLSm9Cw0L3QtNCwINC/0LvQsNGG0LXQvdGC0LAg0LDRgNKb0YvQu9GLINGN0YHRgtGA0L7Qs9C10L0sINC/0YDQvtCz0LXRgdGC0LXRgNC+0L0g0YHQuNGP0pvRgtGLINCw0L3QsCDQs9C+0YDQvNC+0L3QtNCw0YDRi9C90YvSoyDQsdCw0LvQsCDQvtGA0LPQsNC90LjQt9C80ZbQvdC1INGI0LDQvNCw0LTQsNC9INGC0YvRgSDTqdGC0ZbQvyDQutC10YLRg9GW0LzQtdC9INCx0LDQudC70LDQvdGL0YHRgtGLINCx0L7Qu9Cw0LTRiy4g0KLRg9KT0LDQvdC90LDQvSDQutC10LnRltC9INCx0rHQuyDQs9C+0YDQvNC+0L3QtNCw0YDQtNGL0qMg0LbQvtKT0LDRgNGLINC00LXSo9Cz0LXQudGWINCx0LDQu9CwINKb0LDQvdGL0L3QtNCwINCx0ZbRgNCw0Lcg0YPQsNKb0YvRgiDRgdCw0pvRgtCw0LvQsNC00YssINCx0rHSk9Cw0L0g0pvQvtGB0LAg06nQt9GW0L3RltKjINC00LUg0Y3QvdC00L7QutGA0LjQvdC00ZbQuiDQttKv0LnQtdGB0ZYg0ZbRgdC60LUg0pvQvtGB0YvQu9Cw0LTRiy4g0J3TmdGA0LXRgdGC0LUg0LDSk9C30LDRgdGL0L3QtNCwINCw0L3QsCDQs9C+0YDQvNC+0L3QtNCw0YDRiyDQutOp0LHQtdC50ZbQvyDQutC10YLRg9GW0L3QtdC9INGB0q/RgiDQsdC10LfQtNC10YDRltC90ZbSoyDSm9Cw0YLQsNC50YvQvywg0ZbRgdGW0L3Rg9GWINC606nRgNGW0L3QtdC00ZYuINCR0rHQvdC00LDQuSDTqdC30LPQtdGA0ZbRgdGC0LXRgCDSm9GL0Lcg0LHQsNC70LDQtNCwINC00LAsINKx0Lsg0LHQsNC70LDQtNCwINC00LAg0LHQvtC70YPRiyDQvNKv0LzQutGW0L0uINCR0rHQuyDSm9Kx0LHRi9C70YvRgSDQsNGA0L3QsNGG0Ysg0LXQvNC00ZYg0pvQsNC20LXRgiDQtdGC0L/QtdC50LTRliDQttOZ0L3QtSDQsdCw0LvQsCDTqdC80ZbRgNGWINKv0YjRltC9INKb0LDRg9GW0L/RgtGWINC10LzQtdGBLiAyLTQg0LDQv9GC0LAg0ZbRiNGW0L3QtNC1INOp0LfQtNGW0LPRltC90LXQvSDQttC+0LnRi9C70LDQtNGLLiDQn9C10LTQuNCw0YLRgCDRgNC10YLRltC90LTQtSDQsNC90LDRgdGL0L3QsCDQsdKx0Lsg0pvSsdCx0YvQu9GL0YHRgtGL0qMg0pvQsNC70YvQv9GC0Ysg0LXQutC10L3RltC9INC205nQvdC1INC606nQvyDRgdOZ0LHQuNC70LXRgNC00LUg0LrQtdC30LTQtdGB0LXRgtGW0L3RltC9INGC0q/RgdGW0L3QtNGW0YDRg9GW0LzRltC3INC60LXRgNC10LouIDIpINCh0YPRgNGE0LDQutGC0LDQvdGCLSDTqdC60L/QtSDQsNC70YzQstC10L7Qu9Cw0LvQsNGA0Ysg0LDRgNCw0YHRi9C90LTQsCDQsdC+0LvQsNGC0YvQvSDSm9C+0LnQvNCw0LvQttGL0L0g0LHQtdGC0LrQtdC50LvRltC6INCx0LXQu9GB0LXQvdC00ZYg0LfQsNGCLiDQntC7INC20LDRgtGL0YAg0ZbRiNGW0LvRltC6INC00LDQvNGD0LTRi9KjIDE4LTIwINCw0L/RgtCw0LvQsNGA0YvQvdCw0L0g0LHQsNGB0YLQsNC/INGC0q/Qt9GW0LvQtdC00ZYsIDI4LdCw0L/RgtCw0LTQsNC9INCx0LDRgdGC0LDQvyAyLdGI0ZYg0YDQtdGC0YLRltC6INCw0LvRjNCy0LXQvtC70LDRhtC40YLRgtC10YDQtNC10L0g06nQvdC00ZbRgNGW0LvQtSDQsdCw0YHRgtCw0LnQtNGLLiDQodGD0YDRhNCw0LrRgtCw0L3RgtGC0YvSoyDRgtCw0LHQuNKT0LDRgtGLINC70LjQv9C+0L/RgNC+0YLQtdC40LTRgtGC0LXRgCDRgtC+0LHRi9C90LAg0LbQsNGC0LDQtNGLLCDQvtC7INGE0L7RgdGE0L7Qu9C40L/QuNC00YLQtdGAINC80LXQvSDQsNKb0YPRi9C30LTQsNGA0LTQsNC9INGC0rHRgNCw0LTRiy4g0JHQsNGB0YLRiyDSm9GL0LfQvNC10YLRliDRgtGL0L3Ri9GBINCw0LvRgyDQsdCw0YDRi9GB0YvQvdC00LAg0LDQu9GM0LLQtdC+0LvQsNC70LDRgNC00YvSoyDSm9Cw0LHRi9GB0YvQvywg0LbQsNCx0YvRgdGL0L8g0pvQsNC70YPRi9C9INCx0L7Qu9C00YvRgNC80LDQudC00YssINCx0LXRgtGC0ZbQuiDQutC10YDRltC70YPQtNGWINGC06nQvNC10L3QtNC10YLQtdC00ZYuINCQ0LvRjNCy0LXQvtC70LDQu9Cw0YDQtNGL0qMg0YLSsdGA0LDSm9GC0YvQu9GL0pPRi9C9INGB0LDSm9GC0LDQvywg06nQutC/0LXQs9C1INGB0rHQudGL0pvRgtGL0pvRgtGL0qMg0LbQuNC90LDQu9GD0YvQvSDQsdC+0LvQtNGL0YDQvNCw0LnQtNGLLiDQodC+0L3Ri9C80LXQvSDSm9Cw0YLQsNGAINC80YPQutC+0YbQuNC70LjQsNGA0LvRi9KbINKb0YvQt9C80LXRgtGC0ZYg0LTQtSDRltGB0LrQtSDSm9C+0YHQsNC00YssINGP0pPQvdC4INOp0LrQv9C10LPQtSDRgtKv0YHQutC10L0g0LHTqdCz0LTQtSDQt9Cw0YLRgtCw0YDQtNGL0qMg0YjRi9GA0YvRiCDQsNGA0pvRi9C70Ysg0LrQtdGA0ZYg0YHRi9GA0YLSm9CwINGI0YvSk9Cw0YDRi9C70YPRi9C9INKb0LDQvNGC0LDQvNCw0YHRi9C3INC10YLQtdC00ZYuINCc0LDQutGA0L7RhNCw0LPQsNC70YzQtNGLINC20q/QudC10L3RltKjINC00LUg0pvRi9C30LzQtdGC0ZbQvSDRi9C90YLQsNC70LDQvdC00YvRgNCw0LTRiywg0LHQsNC60YLQtdGA0LjQvtGG0LjQtNGC0ZbQuiDSm9GL0LfQvNC10YIg0LrTqdGA0YHQtdGC0LXQtNGWLiDQndOZ0YDQtdGB0YLQtSDRgtGD0YvQu9KT0LDQvdC00LAg0LHQsNGB0YLQsNC/0pvRiyDQutKv0L3QtNC10YDRliDQsNC3INC00LXSo9Cz0LXQudC00LUg06nQvdC00ZbRgNGW0LvQtdC00ZYuINCa0LXQudGW0L0g0LHQsNC70LDQvdGL0qMg0LDQu9GM0LLQtdC+0LvQsNC70LDRgNGL0L3Ri9KjINGB0LDQvdGLINC606nQsdC10LnQs9C10L0g0YHQsNC50YvQvSwg06nQutC/0LUg0YLQvtC70YvSmyDQtNCw0LzRi9KT0LDQvSDQutC10LfQtNC1INGB0YPRgNGE0LDQutGC0LDQvdGCINCx06nQu9GW0L3Rg9GWINC00LUg0LrSr9GI0LXQudC10LTRli4g0KHRg9GA0YTQsNC60YLQsNC90YLRgtGL0qMg0pvQsNC70YvQv9GC0Ysg06nQvdC00ZbRgNGW0LvRg9GWINC60L7Qu9C70LDQv9GBINGB0LjRj9Kb0YLRiyDQv9Cw0YLQvtC70L7Qs9C40Y/Qu9GL0psg0LbQsNKT0LTQsNC50LvQsNGA0LTRi9KjINCw0LvQtNGL0L0g0LDQu9Cw0LTRiy4g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жауап толық емес</text:p>
          </table:table-cell>
          <table:table-cell office:value-type="float" office:value="0" table:style-name="ce1">
            <text:p>0</text:p>
          </table:table-cell>
          <table:table-cell table:number-columns-repeated="16376"/>
        </table:table-row>
        <table:table-row table:style-name="ro1">
          <table:table-cell office:value-type="float" office:value="1066926" table:style-name="ce1">
            <text:p>1066926</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0JbQsNKj0LAg0YLRg9GL0LvSk9Cw0L0gMTAg0LrSr9C90LTRltC6INKb0YvQtyDQsdCw0LvQsNC90YvSoyDRgdKv0YIg0LHQtdC30LTQtdGA0ZbQvdGW0qMg0pvQsNGC0LDRjtGLINC+0LvQsNGA0LTRi9KjINGW0YjRltC90LTQtdCz0ZYg0YLQtdGA0ZbQvdGW0qMg0LPQuNC/0LXRgNC10LzQuNGP0YHRiyDQttOZ0L3QtSDRgdKv0YIg0LHQtdC30LTQtdGA0ZbQvdGW0qMg0YHQtdC60YDQtdGG0LjRj9GB0Ysg0LPQuNC/0LXRgNGC0YDQvtGE0LjRj9KT0LAg0LHQsNC50LvQsNC90YvRgdGC0Ysg0LHQvtC70YPRiyDQvNKv0LzQutGW0L0uINCR0rHQuyDQttCw0qPQsCDRgtGD0YvQu9KT0LDQvSDSm9GL0LfQtNCw0YDQtNCwINC20q/QutGC0ZbQu9GW0LogINC905nRgNC10YHRgtC10LTQtSDQsNC90LDQu9GL0psg0LPQvtGA0LzQvtC90LTQsNGA0LTRi9KjINOZ0YHRltGA0LXRgdC1INGN0YHRgtGA0L7Qs9C10L3QtNC10YDQtNGW0qMg0LDRg9GL0YHRg9GL0L3QsNC9INGC0YPRi9C90LTQsNC50YLRi9C9INC20LjRliDQutC10LfQtNC10YHQtdGC0ZbQvSDQttOZ0L3QtSDQttCw0pPQtNCw0LkuINCc0rHQvdC00LDQuSDQttCw0pPQtNCw0Lkg0LbQsNKj0LAg0YLRg9KT0LDQvSDQvdOZ0YDQtdGB0YLQtdC70LXRgNC00LUg0L3QtdC+0L3QsNGC0LDQu9GM0LTRliDQttCw0qPQsCDRgtGD0pPQsNC9INCx0LDQu9Cw0pPQsCDRgtOZ0L0uINCT0L7RgNC80L7QvdC00YvSmyDQutGA0LjQtyDQtNC10L8g0LDRgtCw0LvQsNC00Ysg0LHSsdC7INGE0LjQt9C40L7Qu9C+0LPQuNGP0LvRi9KbINKb0rHQsdGL0LvRi9GBINGP0pPQvdC4INKb0LDQu9GL0L/RgtGLINC20LDSk9C00LDQuSwg0L/QsNGC0L7Qu9C+0LPQuNGPINC10LzQtdGBLiDQndC10LvRltC60YLQtdC9INC10LrQtdC90ZYg0LDQvdCwINCz0L7RgNC80L7QvdC00LDRgNGL0L3Ri9KjINOZ0YHQtdGA0ZYsINC205nQvdC1INC+0LvQsNGA0LTRi9KjINOZ0YHQtdGAINC10YLRgyDQvNC10YXQsNC90LjQt9C80ZbQvdC00LUuINCW0q/QutGC0ZbQu9GW0Log0LrQtdC30ZbQvdC00LUg0LDQvdCwINCw0pPQt9Cw0YHRi9C90LTQsNKT0Ysg0Y3RgdGC0YDQvtCz0LXQvSDQvNC10L0g0L/RgNC+0LPQtdGB0YLQtdGA0L7QvSDRgdC40Y/Sm9GC0Ysg0LPQvtGA0LzQvtC90LTQsNGAINC/0LvQsNGG0LXQvdGC0LAg0LDRgNKb0YvQu9GLINCx0LDQu9CwINCw0pPQt9Cw0YHRi9C90LAg06nRgtC10LTRli4g0KLRg9KT0LDQvSDRgdC+0L0g0LDQvdCwINCz0L7RgNC80L7QvdC00LDRgNGLINC60LXQvdC10YLRgtC10L0g0LDQt9Cw0LnRi9C/LCDQvdOZ0YDQtdGB0YLQtdC90ZbSoyDTqdC3INCz0L7RgNC80L7QvdGL0LzQtdC9INKb0L7RgdGL0LvQsCDQsdCw0YHRgtCw0LnQtNGLLiDQntGB0Ysg0LPQvtGA0LzQvtC90LTRi9KbINCw0YPRi9GC0pvRgyDRgtC10LbQtdC70LXQvdCz0LXQvSDRgdKv0YIg0LHQtdC30LTQtdGA0ZYg0YPQsNKb0YvRgtGI0LAg0rHQu9KT0LDRjtGLINC80q/QvNC60ZbQvSDQutC10LnQtNC1INC+0Lsg0L3QtdC+0L3QsNGC0LDQu9GM0LTRliDQs9Cw0LvQvtC60YLQvtGA0LjRjyDQtNC10L8g0LDRgtCw0LvQsNC00YsuINCQ0YDRiyDSm9Cw0YDQsNC5INGD0YvRgSDRgtOZ0YDRltC30LTRliDQsdOp0LvRltC90YPQu9C10YAg0L/QsNC50LTQsCDQsdC+0LvQsNC00YssINCz0LjQv9C10YDQtdC80LjRjyDSmtCQ0J0g0JDQmdCd0JDQm9Cr0JzQq9Cd0KvSoiDQutKv0YjQtdGO0ZbQvdC10L0g0L/QsNC50LTQsCDQsdC+0LvQsNGC0YvQvSDSm9GL0LfQsNGA0YMsINCx0rHQuyDQtNCwINCz0L7RgNC80L7QvdC00YvSmyDTmdGB0LXRgNC00LXQvS4g0prQsNGD0ZbQv9GB0ZbQtyDQtdCz0LXRgC3RgdKv0YIg0LHQtdC30LTQtdGA0ZYg0LbSsdC80YHQsNKbLCDSm9GL0LfRg9GLINC20L7Smywg0ZbRgNGW0qPQtNGWINCx06nQu9GW0L3QtNGW0LvQtdGAINC90LXQvNC10YHQtSDRltGB0ZbQuiDQsdC10LvQs9GW0LvQtdGA0ZYg0LbQvtKbINCx0L7Qu9GB0LAt0LHSsdC7INKb0LDQu9GL0L/RgtGLINGE0LjQt9C40L7Qu9C+0LPQuNGP0LvRi9KbINC606nRgNGW0L3RltGBLiDQodKv0YIg0pvQsNC/0YjRi9Kb0YLQsCDRj9KT0L3QuCDQvNC80LzQsNC00LAg0ZbRgdGW0L3Rgywg0ZbRgNGW0qPQtNC10YMg0LrTqdGA0ZbQvdGW0YHRgtC10YDRliDQutOp0YDRltC90YPRliDQvNKv0LzQutGW0L0uINCd0LUg0ZbRgdGC0LXRgyDQutC10YDQtdC6INGB0q/RgiDQsdC10LfQtNC10YDRltC9INGB0YvSk9GD0pPQsCwg0pvRi9GB0YPSk9CwINCx0L7Qu9C80LDQudC00YssINCx0rHQuyDQuNC90YTQtdC60YbQuNGP0pPQsCDTmdC60YPQtdC70YPRliDQvNKv0LzQutGW0L0uINCQ0YDQvdCw0LnRiyDQtdC8INKb0LDQttC10YIg0LXQvNC10YEsINGC0LXQuiDQs9C40LPQuNC10L3QsNC70YvSmyDQutKv0YLRltC8INKb0LDQttC10YIuINCW0LDSk9C00LDQuSAxLTIg0LDQv9GC0LAg0ZbRiNGW0L3QtNC1INOp0LfQtNGW0LPRltC90LXQvSDQttC+0LnRi9C70LDQtNGLLiA8YnIgLz4NCtCh0YPRgNGE0LDQutGC0LDQvdGCINC+0Lsg0LHSsdC7INOp0LrQv9C1INCw0LvQstC10L7Qu9Cw0LvQsNC70LDRgNGL0L3QtNCwINCw0YPQsCDQutOp0L/RltGA0YjRltC60YLQtdGA0ZbQvdC00LUg0L7RgNC90LDQu9Cw0YHSm9Cw0L0g0LHQtdGC0LrQtdC50LvRltC6INCx0LXQu9GB0LXQvdC00ZYg0LfQsNGCLiDQntC7INC20LDQu9C/0Ysg0LDQu9GM0LLQtdC+0LvQuNGC0YLQtdGA0LTRltKjIDIg0YLQuNC/0ZYg0LTQtdC/INCw0YLQsNC70LDQtNGLLiDQltCw0YHRg9GI0LDQu9Cw0YDQtNCwINOp0L3QtNGW0YDRltC70LXQtNGWINKb0rHRgNCw0LzRiyDRhNC+0YHRhNC+0LvQuNC/0LjQtNGC0LXRgCwg05nRgdGW0YDQtdGB0LUg0LPQuNC/0L7Qu9C90LXRgtC+0LjQuywg0YTQvtGB0YTQvtC00LjRhdC+0LvQuNC9LCDQsdC10LvQvtC60YLQsNGAINGC0LDSk9GLINC00LAg0LPQu9C40LrQvtC/0YDQvtGC0LXQuNC90LTQtdGAINKb0YvQt9C80LXRgtGC0LXRgNGWINC20LDQu9C/0Ysg0LDQvdCz0LjQviDRltGI0LrRliDQsdC10YLQutC10LnQu9GW0Log0LrQtdGA0ZbQu9GD0ZbQvSDRgtOp0LzQtdC90LTQtdGC0LXQtNGWLiDQkdKx0Lsg0LDQu9GM0LLQtdC+0LvQsNC70LDRgCDQtNC10LzQsNC70YMg0LrQtdC30ZbQvdC00LUg0LDRgNGC0YvSmyDSm9Cw0LvRg9GL0L3QsCDQvNKv0LzQutGW0L3QtNGW0Log0LHQtdGA0LXQtNGWLiDQldCz0LXRgCDRgdGD0YDRhNCw0LrRgtCw0L3RgiDQsdC+0LvQvNCw0YHQsCDQsNC70YzQstC10L7Qu9Cw0LvQsNGAINC20LDQsdGL0LvRi9C/LCDQttCw0LHRi9GB0YvQvywg0LPQsNC3INCw0LvQvNCw0YHRgyDRgtC+0pvRgtCw0L8g0pvQsNC70LDQtNGLLiDTqNC60L/QtdC90ZbSoyDRgdC+0LfRi9C70pPRi9GI0YLRi9KT0YvQvSDQsNGA0YLRgtGL0YDQsNC00YssINOp0LrQv9C10L3RltKjINC+0qPQsNC5INC60LXSo9C10Y7RltC90LUg0LrTqdC80LXQutGC0LXRgdC10LTRli4g0JTQldCcINCQ0JvQoyDQltCV0qLQhtCb0JTQldCZ0JTQhiwg06jQmtCf0JUg0JrQntCb0JvQkNCf0KHQq9Cd0KvSoiDQkNCi0JXQm9CV0JrQotCQ0JfQlNCr0qIg0K/SktCd0Jgg0JDQm9CU0KvQnSDQkNCb0JDQlNCrLiDQltCQ0qLQkCDQotCj0pLQkNCdINCd05jQoNCV0KHQotCV0JTQm9CV0KDQlNCVINOY0KHQhtCg0JXQodCVINC80LXRgNC30ZbQvNGW0L3QtdC9INCx0rHRgNGL0L0g0YLRg9KT0LDQvdC00LDRgNC00LAg0YHRg9GA0YTQsNC60YLQsNC90YLRgtGL0qMg0LbRltC60YLQtdGD0ZYt0YLRi9C90YvRgSDQttC10YLQutGW0LvRltC60YHRltC30LTRltCz0ZbQvdC1INOZ0LrQtdC70YPRliDQvNKv0LzQutGW0L0uINCY0LzQvNGD0L3QtNGL0psg0pvQvtGA0pPQsNC90YvRgSDRgdGD0YDRhNCw0LrRgtCw0L3RgiDSm9Kx0YDQsNC80YvQvdC00LDSk9GLINC60LXQudCx0ZbRgCDQsdC40L7Qu9C+0LPRgtCw0YAg0LHQsNC60YLQtdGA0LjRj9C70LDRgCDQvNC10L0g0LLQuNGA0YPRgdGC0LDRgNKT0LAg0pvQsNGA0YHRiyDSm9C+0YDSk9Cw0L3Ri9GBINGA0LXRgtGW0L3QtNC1INKb0L7Qu9C00LDQvdCw0LTRiy4g0JrQu9C40L3QuNC60LDQu9GL0psg0LzQsNKj0YvQt9GLINC80LXRgNC30ZbQvNC90LXQvSDRgtGD0pPQsNC9INCx0LDQu9Cw0LvQsNGA0LTQsCDRgdGD0YDRhNCw0LrRgtCw0L3RgiDQttC10YLRltGB0L/QtdGD0YjRltC70ZbQs9GWINGA0LXRgdC/0LjRgNCw0YLQvtGA0LvRi9KbINC00LjRgdGB0YLRgNC10YHRgSDRgdC40L3QtNGA0L7QvNKT0LAg05nQutC10LvQtdC00ZYuINCc0rHQvdC00LDQuSDQsdCw0LvQsNC70LDRgNKT0LAg0LbQsNGB0LDQvdC00Ysg0YHRg9GA0YTQsNC60YLQsNC90YIg0LjQvdCz0LDQu9GP0YbQuNGP0LvRi9KbINC20L7Qu9C80LXQvSDQtdC90LPRltC30ZbQu9C10LTRli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4" table:style-name="ce1">
            <text:p>1066944</text:p>
          </table:table-cell>
          <table:table-cell office:value-type="string" table:style-name="ce1">
            <text:p>kazakh</text:p>
          </table:table-cell>
          <table:table-cell office:value-type="string" table:style-name="ce1">
            <text:p>Билет 11&amp;lt;br /&amp;gt; 1.10 күндік баламен анасы педиатрға қаралды.Нәрестенің сүт безінің қатайуы,сол түстің терісінің қызаруы және уыз тәріздес бөлінді пайда болуы анасын аландатады.Осы өзгеріс немен байланысты?&amp;lt;br /&amp;gt; 2.Сурфактант туралы тұсіңік және ол қандай функцияны атқарады?&amp;lt;br /&amp;gt;</text:p>
          </table:table-cell>
          <table:table-cell office:value-type="string" table:style-name="ce1">
            <text:p>MS4g0JbQsNKj0LAg0YLRg9KT0LDQvSDQvdOZ0YDQtdGB0YLQtdC90ZbSoyDRgdKv0YIg0LHQtdC30ZbQvdGW0qMg0pvQsNGC0LDQudGD0YssINGB0L7QuyDRgtKv0YHRgtGW0qMg0YLQtdGA0ZbRgdGW0L3RltKjINKb0YvQt9Cw0YDRg9GLKNCz0LjQv9C10YDQtdC80LjRj9GB0YspINC205nQvdC1INGB0q/RgiDQsdC10LfQtNC10YDRltC90LXQvSDRg9GL0Lcg0YLTmdGA0ZbQt9C00ZYg0LHTqdC70ZbQvdC00ZbQvdGW0qMg0L/QsNC50LTQsCDQsdC+0LvRg9GLINGB0q/RgiDQsdC10LfQtNC10YDRltC90ZbSoyDQs9C40L/QtdGA0YLRgNC+0YTQuNGP0YHRi9C90LAg0LHQsNC50LvQsNC90YvRgdGC0Ysg0LHQvtC70YPRiyDQvNKv0LzQutGW0L0uINCR0ZbQt9C00LUg0LHQsNC70LAgMTAg0LbQsNGB0YLQsCwg0Y/Sk9C90Lgg0LHSsdC7INC20LDSo9Cw0LTQsNC9INGC0YPRi9C70pPQsNC9INKb0YvQt9C00LDRgNC00LAg0LbSr9C60YLRltC70ZbQuiDQutC10LfRltC90LTQtSDQutC10LfRltC90LTQtSDQvdOZ0YDQtdGB0YLQtdCz0LUg0LDQvdCw0LvRi9KbINCz0L7RgNC80L7QvdC00LDRgNC00YvSoywg05nRgdGW0YDQtdGB0LUg0Y3QutGB0YLRgNC+0LPQtdC90LTRgNC00ZbSoyDQsNC70LzQsNGB0YPRi9C90LDQvSDRgtGD0YvQvdC00LDQudGC0YvQvSDQttC40ZYg0LrQtdC30LTQtdGB0LXRgtGW0L0g0LbQsNKT0LTQsNC5LiDQkdKx0Lsg0LPQvtGA0LzQvtC90LTQsNGAINC20LDSo9CwINGC0YPRi9C70pPQsNC9INC905nRgNC10YHRgtC10LvQtdGA0LTQtdCz0ZYg0YHSr9GCINCx0LXQt9GWINGC0ZbQvdGW0L3RltKjINOp0YHRg9GW0L0g0YvQvdGC0LDQu9Cw0L3QtNGL0YDRg9GLINC80q/QvNC60ZbQvS4g0KHSr9GCINCx0LXQt9GWINGC0ZbQvdGW0L3RltKjINGC0L7Qu9GL0L8g0LrQtdGC0YPRliDRgdKv0YIg0LHQtdC30LTQtdGA0ZbQvdC00LUg0YLQtdGA0ZbQvdGW0qMg0LPQuNC/0LXRgNC10LzQuNGP0YHRi9C9KNKb0YvQt9Cw0YDRg9GL0L0pINC205nQvdC1INC10LzRltC30ZbQutGI0LXQu9C10YDQtNC10L0g0YPRi9C3INGC05nRgNGW0LfQtNGWINGB0LXQutGA0LXRgiDQsdOp0LvRltC90YPRltC9INGC0YPQtNGL0YDRg9GLINC80q/QvNC60ZbQvS4g0JHSsdC7INGB0LjQvNC/0YLQvtC80LTQsNGAINOZ0LTQtdGC0YLQtSDTqdC30LTRltCz0ZbQvdC10L0g0LbQvtC50YvQu9Cw0LTRiyDQttOZ0L3QtSDQsdGW0YDQvdC10YjQtSDQsNC/0YLQsNC00LDQvSDQsdGW0YDQvdC10YjQtSDQsNC50LvQsNGA0pPQsCDQtNC10LnRltC9INC20L7QudGL0LvQsNC00YssINGB0LXQsdC10LHRliDQsNC90LDQu9GL0psg0LPQvtGA0LzQvtC90LTQsNGAINC905nRgNC10YHRgtC1INC20q/QudC10YHRltC90LXQvSDRgtCw0LfQsNGA0YLRi9C70LDQtNGLLiDQpNC40LfQuNC+0LvQvtCz0LjRj9C70YvSmyDQvNCw0YHRgtC40YIo0YHSr9GCINCx0LXQt9GW0L3RltKjINKb0LDQsdGL0L3Rg9GLKSwg0YHSr9GCINCx0LXQt9GW0L3RltKjINGW0YHRltC90YPRliDQttGL0L3Ri9GB0YvQvdCwINKb0LDRgNCw0LzQsNGB0YLQsNC9INC60LXQudCx0ZbRgCDQttCw0qPQsCDRgtGD0YvQu9KT0LDQvSDQvdOZ0YDQtdGB0YLQtdC70LXRgNC00LUg0LHQsNC50pvQsNC70LDQtNGLLiDQkdKx0Lsg0L/RgNC10L3QsNGC0LDQu9GM0LTRiyDQutC10LfQtdKj0LTQtSDRjdC60YHRgtGA0L7Qs9C10L0g0LPQvtGA0LzQvtC90LTQsNGA0YvQvdGL0qMg0LDQvdCwINC+0YDQs9Cw0L3QuNC30LzRltC90LXQvSDQsdCw0LvQsNKT0LAg06nRgtGD0ZbQvdC10L0g0YLRg9GL0L3QtNCw0LnQtNGLLiA8YnIgLz4NCjIuINCh0YPRgNGE0LDQutGC0LDQvdGCLSDQsNC70YzQstC10L7Qu9Cw0LvQsNGA0LTRi9KjINGC0rHRgNCw0pvRgtGL0LvRi9KT0YvQvSDRgdCw0pvRgtCw0YPSk9CwINC606nQvNC10LrRgtC10YHQtdGC0ZbQvSDQttOZ0L3QtSDTqdC60L/QtdCz0LUg0YHSsdC50YvSm9GC0YvSm9GC0YvSoyDQttC40L3QsNC70YPRi9C9INCx0L7Qu9C00YvRgNC80LDQudGC0YvQvSDQsdC10YLRgtGW0Log0LHQtdC70YHQtdC90LTRliDQt9Cw0YIuINCe0Lsg05nRgdGW0YDQtdGB0LUg0YjQsNC70LAg0YLRg9KT0LDQvSDQvdOZ0YDQtdGB0YLQtdC70LXRgNC00ZbSoyDSm9Cw0LvRi9C/0YLRiyDTqdC60L/QtSDSm9GL0LfQvNC10YLRliDSr9GI0ZbQvSDTqdGC0LUg0LzQsNKj0YvQt9C00Ysg0LHQvtC70YvQvyDRgdCw0L3QsNC70LDQtNGLLiDQntC70LDRgCDTqdC30LTRltCz0ZbQvdC10L0g0LbSr9C60YLRltC70ZbQutGC0LUg0YHRg9GA0YTQsNC60YLQsNC90YLRgtGLINGI0YvSk9Cw0YDQsCDQsNC70LzQsNC50LTRiy4g0KHRg9GA0YTQsNC60YLQsNC90YIg0LHQsNC70LDQvdGL0qMg0YLRi9C90YvRgSDQsNC70YPRi9C90LAg0LrTqdC80LXQutGC0LXRgdGDINKv0YjRltC9INGA0LXRgtGC0ZbQuiDQsdC10LvRgdC10L3QtNGWINC30LDRgtGC0Ysg0LDQu9C80LDRgdGC0YvRgNGDINKv0YjRltC9INKb0LDQttC10YIg0LHQvtC70LDRgtGL0L0g0YLQtdGA0LDQv9C40Y8g0YLSr9GA0ZYuIDxiciAvPg0K0JHQtdGC0YLRltC6INCw0LrRgtC40LLRgtGWINC20LDRgSDQvNC+0LvQtdC60YPQu9Cw0LvQsNGAINCx0LXRgtGC0ZbQuiDRgtC10YDRg9GW0LvQtNGWINGC06nQvNC10L3QtNC10YLQtdC00ZYuINCR0LXRgtGC0ZbQuiDQsNC60YLQuNCy0YLRliDQt9Cw0YIg0LzQsNC60YDQvtCw0LrRgtC40LLRgtGWINC30LDRgiDQvNC+0LvQtdC60YPQu9Cw0YHRiyDQsdC+0LvRi9C/INGC0LDQsdGL0LvQsNC00Ysg0LbTmdC90LUg0L7QvdGLINC10LrRltC90YjRliDRgtC40L/RgtGWINC/0L3QtdCy0LzQvtGG0LjRgtGC0LXQvSDQmtC70LDRgCDQttCw0YHRg9GI0LDQu9Cw0YDRiyDTqdC90LTRltGA0ZbQvyDRiNGL0pPQsNGA0LDQtNGLLiDQodGD0YDRhNCw0LrRgtCw0L3RgtGC0YvSoyDSm9Kx0YDQsNC80YvQvdC00LAg0L3QtdCz0ZbQt9GW0L3QtdC9INGE0L7RgdGE0L7Qu9C40L/QuNC00YLQtdGALCDQsNC7INC90LXQs9GW0LfQs9GW0YHRli3Qu9C40L/QuNC00LjQvSDQttOZ0L3QtSDRhNC40LHRgNC40L0g0LDSm9GD0YvQt9GLLCDRgdC+0L3QtNCw0Lkt0LDSmyDQvNGD0LrQvtC/0L7Qu9C40YHQsNGF0LDRgNC40LTRgtC10YAuINCR0LXRgtGC0ZbQuiDQsdC10LvRgdC10L3QtNGWINC30LDRgtGC0YvSoyDTmdGA0LXQutC10YLRliDQm9Cw0LHQsNGBINC30LDSo9GL0L3QsCDRgdOZ0LnQutC10YEg0LrQtdC70LXQtNGWLiDQkdC10YLRgtGW0Log0LHQtdC70YHQtdC90LTRliDQt9Cw0YIg0YHRg9C00YvSoyDQsdC10YLRltC9INC20LDQsdCw0LTRiyDQttOZ0L3QtSDQsNGD0LAg0YHSsdC50YvSm9GC0YvSk9GL0L3Ri9KjINC40L3RgtC10YDRhNC10LnRgdGW0L0g0LbTmdC90LUg0LHQtdGC0YLRltC6INC60LXRgNGW0LvRg9C00ZYg0LDQt9Cw0LnRgtCw0LTRiy4g0JHQtdGC0YLRltC6INCx0LXQu9GB0LXQvdC00ZYg0LfQsNGC0YLRi9KjINOp0L3QtNGW0YDRltGB0ZYg0LbQsNGC0YvRgNGW0YjRltC70ZbQuiAxOC0yMCDQsNC/0YLQsNC70LDRgNGL0L3QtNCwINCx0LDRgdGC0LDQu9Cw0LTRiy4g0JHRltGA0LDSmyAyOC3QsNC/0YLQsNC00LAg0LDQu9GM0LLQtdC+0LvQsNC70LDRgNC00LAg0YjRi9KT0LDRgNGL0LvQsNC00Ysg0LbTmdC90LUg05nRgNC10LrQtdGCINC10YLQtdC00ZYuIDM0LTM1INCw0L/RgtCw0pPQsCDQtNC10LnRltC9INKb0LDQu9Kb0LDQvdGI0LAg0LHQtdC30ZbQvdGW0qMg0LPQvtGA0LzQvtC90LTQsNGA0YssINGB0L7QvdC00LDQuS3QsNKbICDQttGL0L3Ri9GB0YLRi9KbINGB0YLQtdGA0L7QuNC00YLQsNGAINC205nQvdC1INCz0LvRjtC60L7QutC+0YDRgtC40LrQvtC40LTRgtCw0YAg0LDRgNKb0YvQu9GLINGB0YPRgNGE0LDQutGC0LDQvdGCINC606nQsdC10LnQtdC00ZYuINCR0LXRgtGC0ZbQuiDQsdC10LvRgdC10L3QtNGWINC30LDRgtGC0YvSoyjRgdGD0YDRhNCw0LrRgtCw0L3RgtGC0YvSoykg0pvRi9C30LzQtdGC0YLQtdGA0ZY6PGJyIC8+DQot0LHQtdGC0YLRltC6INC60LXRgNGW0LvRg9C00ZYg0YLTqdC80LXQvdC00LXRgtGDOzxiciAvPg0KLdCa0L7Qu9C70LDQv9GBINC205nQvdC1INOp0LrQv9C10L3RltKjINGW0YHRltC90YPRltC90ZbSoyDQsNC70LTRi9C9INCw0LvRgyzQs9C40LDQu9C40L3QtNGWINC80LXQvNCx0YDQsNC90LAg0LDRg9GA0YPRizs8YnIgLz4NCi3RgdOZ0LnQutC10YHRgtGW0LrRgtGWINCw0YDRgtGC0YvRgNGD0Ys7PGJyIC8+DQot0YLRi9C90YvRgSDQsNC70YPQtNGLINC20LXSo9GW0LvQtNC10YLRgzs8YnIgLz4NCi3Qv9Cw0YLQvtCz0LXQvdC00LXRgNC00ZYg0LbQvtGOLCDRgdC+0L3Ri9C80LXQvSDSm9Cw0YLQsNGAINC+0LvQsNGA0LTRi9KjINOp0LfQsNGA0LAg05nRgNC10LrQtdGC0YLQtdGB0YMsINC60LXQudGW0L3QvdC10L0g0L7Qu9Cw0YDQtNGL0qMg0YLQsNGA0LDQu9GD0YvQvSDQsdC+0LvQtNGL0YDQvNCw0YM7PGJyIC8+DQot0LjQvNC80YPQvdC00YvSmyDQttCw0YPQsNC/0YLRiyDQvNC+0LTRg9C70YzRj9GG0LjRj9C70LDRgzs8YnIgLz4NC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95" table:style-name="ce1">
            <text:p>1066995</text:p>
          </table:table-cell>
          <table:table-cell office:value-type="string" table:style-name="ce1">
            <text:p>russian</text:p>
          </table:table-cell>
          <table:table-cell office:value-type="string" table:style-name="ce1">
            <text:p>Билет 11&amp;lt;br /&amp;gt; 1.Вы врач педиатр. на приеме мама 10 дневной новорожденной девочки, которая обеспокоена нагрубанием молочных желез у ребенка, гиперемией кожи над ними и выделением молозиво подобного секрета. С чем можно связать данное состояние?&amp;lt;br /&amp;gt; 2.Дайте определение сурфактанта и какую функцию он выполняет?&amp;lt;br /&amp;gt;</text:p>
          </table:table-cell>
          <table:table-cell office:value-type="string" table:style-name="ce1">
            <text:p>MS7QrdGC0L4g0YHQvtGB0YLQvtGP0L3QuNC1INC90LDQt9GL0LLQsNC10YLRjNGB0Y8gLdGE0LjQt9C40L7Qu9C+0LPQuNGH0LXRgdC60LDRjyDQvNCw0YHRgtC+0L/QsNGC0LjRjy7QrdGC0L4g0Y/QstC70Y/QtdGC0YzRgdGPINCy0LDRgNC40LDQvdGC0L7QvCDRhNC40LfQuNC+0LvQvtCz0LjRh9C10YHQutC+0Lkg0L3QvtGA0LzRiy7QsiDQv9C10YDQstGL0LUgMi0zINC00L3RjyDQtNC+INC60L7QvdGG0LAgMi0zINC90LXQtNC10LvQuCDQv9GA0L7QuNGB0YXQvtC00LjRgtGMINC90LDQs9GA0YPQsdCw0L3QuNC1INC4INGD0LLQtdC70LjRh9C10L3QuNC1INGA0LDQt9C80LXRgNC/0L7QsiDQvNC+0LvQvtGH0L3Ri9GFINC20LXQu9C10Lcs0LPQuNC/0LXRgNC10LzQuNGPINC60L7QttC4INC90LDQtCDQvdC40LzQuC7QrdGC0L4g0YHQvtGB0YLQvtGP0L3QuNC1INC90LDQsdC70Y7QtNCw0LXRgtGM0YHRjyDQv9C+0YfRgtC4INGDINCy0YHQtdGFINC00LXQstC+0YfQtdC6INC4IDUwINC/0YDQvtGG0LXQvdGC0L7QsiDQv9Cw0YDQvdC10Lku0K3RgtC+INGB0L7RgdGC0L7Rj9C90LjQtSDRgdCy0Y/Qt9Cw0L3QviDRgSDRgtC10Lwg0YfRgtC+INC/0YDQuCDQstC90YPRgtGA0LjRg9GC0YDQvtCx0L3QvtC8INC/0LXRgNC40L7QtNC1INCyINC/0LvQsNGG0LXQvdGC0LUg0L3QsNGF0L7QtNC40YLRjNGB0Y8g0LHQvtC70YzRiNC40LUg0LrQvtC90YbQtdC90YLRgNCw0YbQuNC4INCz0L7RgNC80L7QvdC+0LIg0LzQsNGC0LXRgNC4LNCwINC40LzQtdC90L3QviDRjdGB0YLRgNC+0LPQtdC90LAg0Lgg0L/RgNC+0LvQsNC60YLQuNC90LAu0Jgg0L/QvtGB0LvQtSDRgNC+0LTQvtCyINGDINC90L7QstC+0YDQvtC20LTQtdC90L3QvtCz0L4gINC/0YDQvtC40YHRhdC+0LTQuNGC0Ywg0LDQtNCw0L/RgtCw0YbQuNGPINC6INCy0L3QtdGI0L3QuNC8INGD0YHQu9C+0LLQuNGP0Lwg0LbQuNC30L3QuC7QmCDQuNC00LXRgiDQvNC+0YnQvdGL0Lkg0LPQvtGA0LzQvtC90LDQu9GM0L3Ri9C5INC60YDQuNC3LNGC0LDQuiDQutCw0Log0LrQvtC90YbQtdC90YLRgNCw0YbQuNC4INCz0L7RgNC80L7QvdC+0LIg0YDQtdC30LrQviDRgdC90LjQttCw0LXRgtGB0Y8uINCY0Lct0LfQsCDRjdGC0L7Qs9C+INGDINC90L7QstC+0YDQvtC20LTQtdC90L3QvtCz0L4g0LTQsNC90L3QvtC1INGB0L7RgdGC0L7Rj9C90LjQtSDQuCDRjdGC0L4g0YHRh9C40YLQsNC10YLRjNGB0Y8g0YTQuNC30LjQvtC70L7Qs9C40YfQtdGB0LrQvtC5INC90L7RgNC80L7QuSDQuCDQvdC40LrQsNC60LjRhSDQstC80LXRiNCw0YLQtdC70YzRgdGC0LIg0L3QtSDRgtGA0LXQsdGD0LXRgi7QmtC70LjQvdC40YfQtdGB0LrQuNC1INC/0YDQvtGP0LLQu9C10L3QuNGPINC00LDQvdC90L7Qs9C+INGB0L7RgdGC0L7Rj9C90LjRjzrQndCw0LPRgNGD0LHQsNC90LjQtSDQvNC+0LvQvtGH0L3Ri9GFINC20LXQu9C10Lcs0YPQstC10LvQuNGH0LXQvdC40LUg0YDQsNC30LzQtdGA0L7QsizRh9Cw0YnQtSDQstGB0LXQs9C+INGB0LjQvNC80LXRgtGA0LjRh9C90L4g0L7QsdC10LjRhSDQvNC+0LvQvtGH0L3Ri9GFINC20LXQu9C10LcgLNGA0LXQttC1INC+0LTQvdC+0LPQvi4g0J/RgNC+0LjRgdGF0L7QtNC40YLRjCDQs9C40L/QtdGA0LXQvNC40Y8g0LrQvtC20Lgg0L3QsNC0INC90LjQvC7Qn9C+0Y/QstC70Y/QtdGC0YHRjyDQvNC+0LvQvtC30LjQstC+INC/0L7QtNC+0LHQvdGL0Lkg0YHQtdC60YDQtdGCLNC20LXQu9GC0L7Qs9C+INC40LvQuCDQsdC10LvQvtCy0LDRgtC+0LPQviDRgdCy0LXRgtCwKNCyINGB0L7RgdGC0LDQstC1INGB0LXQutGA0LXRgtCwINCy0YvRhdC+0LTQuNGC0Ywg0LjQt9Cx0YvRgtC+0Log0LPQvtGA0LzQvtC90L7QsiAs0Y3RgdGC0YDQvtCz0LXQvdC+0LIpLtCa0L7Qu9C40YfQtdGB0YLQstC+INCy0YvQtNC10LvQtdC90LjRjyDRgdC60YPQtNC90L7QtS7QndCw0LQg0LrQvtC20LXQuSDQvNC+0LvQvtGH0L3QvtC5INC20LXQu9C10LfRiyDQvtGC0YHRg9GB0YLQstGD0LXRgiDQvtGC0LXQutC4LNC70LjRhdC+0YDQsNC00LrQsCzQsdC+0LvQuC4g0JLQsNC20L3QviDQvdCw0L/QvtC80L3QuNGC0Ywg0LzQsNC80LUgLNGH0YLQviDQvdC10LvRjNC30Y8g0LLRi9C00LDQstC70LjQstCw0YLRjCDQstGL0LTQtdC70LXQvdC40LUg0LjQtyDQvNC+0LvQvtGH0L3QvtC5INC20LXQu9C10LfQuCzQvNCw0YHRgdCw0LbQuNGA0L7QstCw0YLRjCwg0YHQtNC10LvQsNGC0Ywg0YLQtdC/0LvRi9C5INC60L7QvNC/0YDQtdGB0YEuINCi0LDQuiDQutCw0Log0Y3RgtC+INGD0LLQtdC70LjRh9C40LLQsNC10YIg0YDQuNGB0Log0LjQvdGE0LjRhtC40YDQvtCy0LDQvdC40Y8uINCV0YHQu9C4INC/0YDQvtC40YHRhdC+0LTQuNGC0Ywg0LjQvdGE0LjRhtC40YDQvtCy0LDQvdC40Y8g0L/QvtGP0LLQu9GP0Y7RgtGM0YHRjyAg0LrQu9Cw0YHRgdC40YfQtdGB0LrQuNC1INC/0YDQuNC30L3QsNC60Lgg0LLQvtGB0L/QsNC70LXQvdC40Y8g0Lgg0YPQttC1INGN0YLQviDRgdC+0YHRgtC+0Y/QvdC40LUg0YLRgNC10LHRg9C10YIg0LLQvNC10YjQsNGC0LXQu9GM0YHRgtCy0LAuPGJyIC8+DQo8YnIgLz4NCjxiciAvPg0KMi7QodGD0YDRhNCw0LrRgtCw0L3Rgi3RjdGC0L4g0L/QvtCy0LXRgNGF0L3QvtGB0YLQvi3QsNC60YLQuNCy0L3Ri9C1INCy0LXRidC10YHRgtCy0LAg0LvQuNC/0L7Qv9GA0L7RgtC10LjQtNC90L7QuSDRhNC+0YDQvNGLLtCe0L3QuCDQvdCw0YfQuNC90LDRjtGCINGB0LjQvdGC0LXQt9C40YDQvtCy0LDRgtGM0YHRjyDQvdCwIDcgLdC5INC80LXRgdGP0YbQtSDQstC90YPRgtGA0LjRg9GC0YDQvtCx0L3QvtCz0L4g0YDQsNC30LLQuNGC0LjRjyDQsiDRgNC10YHQv9C40YDQsNGC0L7RgNC90L7QvCDQvtGC0LTQtdC70LUg0LDQu9GM0LLQtdC+0LvQvtGG0LjRgtCw0LzQuCAyLdGC0LjQv9CwLiDQntC90Lgg0L7QsdC70LDQtNCw0Y7RgiDQv9C+0LLQtdGA0YXQvdC+0YHRgtC90L4t0LDQutGC0LjQstC90YvQvCDRgdCy0L7QudGB0YLQstC+0Lwg0Lgg0YHQvdC40LbQsNC10YIg0L/QvtCy0LXRgNGF0L3QvtGB0YLQvdC+0LUg0L3QsNGC0Y/QttC10L3QuNC1INCw0LvRjNCy0LXQvtC7INC4INGB0YLQsNCx0LjQu9C40LfQuNGA0YPQtdGCINCw0LvQstC10L7Qu9GLLtCV0YHQu9C4INC90LUg0LHRg9C00LXRgiDRgdGD0YDRhNCw0LrRgtCw0L3RgtCwINGC0L4g0LDQu9GM0LLQtdC+0LvRiyDQsdGD0LTRg9GCINGB0LvQuNC/0LDRgtGM0YHRjyDQuCDRjdGC0L4g0L/RgNC40LLQtdC00LXRgiDQuiDQutC+0LvQu9Cw0L/RgdGDLiDQotCw0LrQttC1INGB0YPRgNGE0LDQutGC0LDQvdGCINC+0LHQu9Cw0LTQsNC10YIg0LDQvdGC0LjQsdCw0LrRgtC10YDQuNGG0LjQtNC90YvQvCDQtNC10LnRgdGC0LLQuNC10Lws0YPRgdC40LvQuNCy0LDQtdGCINC80LXRgdGC0L3Rg9GOINC80LDQutGA0L7RhNCw0LPQsNC70YzQvdGD0Y4g0YDQtdCw0LrRhtC40Y4s0Lgg0YPQu9GD0YfRiNCw0LXRgiDQvNGD0LrQvtGG0LjQu9C40LDRgNC90YvQuSDQutC70LjRgNC10L3RgS7QsCDRgtCw0LrQttC1INC+0L0g0YPRh9Cw0YHRgtCy0YPQtdGCICDQsiDRgdGC0LDQsdC40LvQuNC30LDRhtC40Lgg0LvQtdCz0L7Rh9C90L7QuSDQv9Cw0YDQtdC90YXQuNC80YsuPGJyIC8+DQog0KHQsNC8INGB0YPRgNGE0LDQutGC0LDQvdGCINGB0L7RgdGC0L7QuNGCINC40Lcg0YTQvtGB0YTQvtC70LjQv9C40LTQvtCyICjQsCDQuNC80LXQvdC90L4g0LjQtyDRhNC+0YHRhNC+0YLQuNC00LjQu9GF0L7Qu9C40L3QsCDQuCDRhNC+0YHRhNCw0YLQuNC00LjQu9Cz0LvQuNGG0LXRgNC+0LvQsCkgLNC90LXQudGC0YDQsNC70YzQvdC40YUg0LvQuNC/0LjQtNC+0LIs0LHQtdC70LrQvtCyKNC/0YDQvtGC0LXQuNC90L7QsiDQkNCS0KHQlCkuINCSINC00LXRgtGB0LrQvtC8INCy0L7Qt9GA0LDRgdGC0LUg0LjQvNC10LXRgtGB0Y8g0LTQtdGE0LjRhtC40YIg0YHRg9GA0YTQsNC60YLQsNC90YLQsCAs0LjQtyDQt9CwINGN0YLQvtCz0L4g0YMg0L3QvtCy0L7RgNC+0LbQtNC10L3QvdGL0YUg0L/QvtCy0LXRgNGF0L3QvtGB0YLQvdC+0LUg0LTRi9GF0LDQvdC40LUs0YLQsNC6INC60LDQuiDQu9C10LPQutC40LUg0L/QvtC70L3QvtGB0YLRjNGOINC90LUg0YDQsNGB0L/RgNCw0LLQu9GP0Y7RgtGM0YHRjywg0Lgg0YMg0L3QvtCy0L7RgNC+0LbQtNC10L3QvdGFINC/0L7QstGL0YjQtdC90L4g0KfQlNCULiDQrdGC0L4g0LPQvtCy0L7RgNC40YIg0L4g0LLQsNC20L3QvtGB0YLQuCDRhNGD0L3QutGG0LjQuCDRgdGD0YDRhNCw0LrRgtCw0L3RgtCw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722" table:style-name="ce1">
            <text:p>914722</text:p>
          </table:table-cell>
          <table:table-cell office:value-type="string" table:style-name="ce1">
            <text:p>english</text:p>
          </table:table-cell>
          <table:table-cell office:value-type="string" table:style-name="ce1">
            <text:p>Ticket 11&amp;lt;br /&amp;gt; 1. You are a pediatrician. On consultation, the mother with a 10-day-old newborn girl, is worried about engorgement of the mammary glands in the child, hyperemia of the skin over them and the colostrum-like secretions. What can this condition be associated with?&amp;lt;br /&amp;gt; 2.Give a definition of surfactant and what function does it perform?&amp;lt;br /&amp;gt;</text:p>
          </table:table-cell>
          <table:table-cell office:value-type="string" table:style-name="ce1">
            <text:p>KDEpLiB0aGUgbmVub25hdGFsIGJyZWFzdCBoeXBlcnRyb3BoeSBvY2NvdXIgaW4gbmV3Ym9ybnMgYm90aCBtYWxlcyBhbmQgZmVtYWxlcyBkdWUgdG8gTUFURVJOQUwgSEFSTU9ORSBJTkZMVU5DRSBwZXJ0aWN1bGFybHkgZXN0cm9nZW4gYW5kIHByb2xlY3RpbiB3aGljaCBjcm9zcyB0aGUgcGxhY2VudGEgYmVmb3JlIGJpcnRoLiB0aGUgRU5HT1JHRU1FTlQgYW5kIHNlY3JhdGluIGZyb20gdGhlIG1hbW1hcnkgZ2xhbmRzIGlzIGEgcGh5c2lvbG9naWNhbCBwaGVub21lbm9uIGFuZCBub3QgcGF0aG9sb2dpY2FsLiAjQ0FVU0VTLSBkdXJpbmcgdGhlIGZpbmFsIHdlZWtzIG9mIHByZWduYW5jeSBtYXRlcm5hbCBlc3Ryb2dlbiBzdGltdWxhdGVzIHRoZSBkb3ZlbG9wbWVudCBvZiB0aGUgbmV3Ym9ybnMgbWFtbWFyeSB0aXNzdWVzLiBhZnRlciBiaXJ0aCB0aGUgd2l0aGRyYXdsIG9mIG1hdGVybmFsIGZyb20gdGhlIGluZmFudHMgYmxvb2RzdHJlYW1jYW4gdHJpZ2dlciBlbmdvcmdlbWVudGFuZCBjb2xvdXN0cmVtIGxpa2Ugc2VjcmF0aW9uLiAjU1lNUFRPTVMtIHN3ZWxsaW5nIGFuZCBvciBlbmxhcmdlbWVudCBvZiB0aGUgbWFtbWFyeSBnbGFuZHMsIGh5cGVyZW1pYShyZWRuZXNzKSBvZiB0aGUgc2tpbiBvdmVybHlpbmcgdGhlIGdsYW5kcy4gbWlsa2V5IGRpc2NoYXJnZSByZXNlbWJsaW5nIGNvbG91c3RydW0uICNDTElOSUNBTCBDT1VSU0UtIHRoZSBjb25kaXRpb24gaXMgc2VsZiBsaW1pdGluZyBhbmQgdGlwaWNhbGx5IHJlc29sdmUgaW4gMi0zIHdlZWtzIHRvIGEgZmV3IG1vbnRocyBhcyBoYXJtb25lIGxldmVscyBub3JtYWxpemVzLiBubyBpbnRlcnZlbnRpb24gaXMgbmVjZXNzZXJyeSB1bmxlc3MgdGhlcmUgYXJlIGNvbXBsaWNhdGlvbnMuICMgQ09NUExJQ0FUSU9OUyhSQVJFTFkpLSBpZiB0aGUgYnJlYXN0IHRpc3N1ZSBiZWNvbWVzIHRlbmRlciwgd2FybSBhbmQgZXJ0aGVtYXRvdXN3aXRoIHNpZ25zIG9mIGluZmVjdGlvbnMgaXQgbWF5IGluZGljYXRlIE1BU1RJVElTKGluZmVjdGlvbiBvZiB0aGUgYnJlYXN0IHRpc3N1ZSkgaW4gdGhpcyBjYXNlIGFudGliaW90aWNzIGFyZSBwcmVzY3JpYmVkLCBhdm9pZCBzcXVlZXppbmcgdGhlIGJyZWFzdCB0aXNzdWVzYXMgdGhpcyBjYW4gaW5yb2R1Y2UgaW5mZWN0aW9uLiAjUEFSRU5UQUwgR1VJREFOQ0UtIHBhcmVudHMgc2hvdWxkIGJlIHJlYXN1cmUgdGhhdCBpdHMgaXMgbm9ybWFsIGFuZCBkb2VzIG5vdCByZXF1aXJlIGFueSB0cmVhdG1lbnQsIGFkdmljZSB0aGVtIGFnYWluc3Qgc3F1ZWV6aW5nIG9kIG1hc3NhZ2luZyBicmVhc3QgdGlzc3Vlcy4gICAgICAgICAgICAgICAgICAgICAgICAgICAgICAgICAgICAgICAgICAgICAgICAgICAgICAgICAgICAgICAgICAgICAgICAgICAgICAgICAgICAgICgyKS4gU1VSRkFDVEFOVC0gREVGSU5BVElPTi1zdXJmYWN0YW50IGlzIGEgY29tcGxleCBtaXh0dXJlIG9mIGxpcGlkcyBhbmQgcHJvdGllbnMgc2VjcmVhdGVkIGJ5IHR5cGUgMiBhbHZlb2xhciBlcGl0aGlsaWFsIGNlbGxzIGluIHRoZSBsdW5ncyB0aGUgbWFpbiBjb21wb25lbnQgaXMgRFBQQyBwaG9zcGhvbGlwaWQgdGhhdCByZWR1aWNlcyBzdXJmYWNlIHRlbnNpb24uICNDT01QT05FTlRTIE9GIFNVUkZBQ1RBTlQtIDFwaG9zcGhvbGlwaWRzIDkwJSBpbmNsdWRlICBwaG9zcGhvbGlwaWRzLihEUFBDIHRoZSBtb3N0IGltcCBvbmUpIDIuIHByb3RpZW5zIHJvdWdobHkgMTAlIGFyZSBtYWRlIG9mIHN1cmZhY3RhbnQgYXNzb2N4aWF0ZWQgcHJvdGllbnMgKFNQLUEsIFNQLUQpLiAjRlVOQ1RJT05TIE9GIFNVUkZBQ1RBTlQtIDEgcmVkdWNpbmcgdGhlIGFsdmVvbGVyIHN1cmZhY2UgdGVuc2lvbiBpdCBoZWFscHMgaW4gYWxsb3dpbmcgdGhlIGFsdm9saWUgdG8gcmVvcG5pbmcgYWZ0ZXIgZXhwaXJhdGlvbi4gMi4gaW1wcm92ZSBsdW5nIGNvbXBsaWFuY2UgYnkgYWxsb3dpbmcgbHVuZ3MgdG8gZXhwYW5kIHdpdGggbGVzcyBlZmZvcnQuIDMgcHJldmFudCBhdGxlY3Rhc2lzLiA0IHN1cHBvcnRzIGdhcyBleGNoYW5nZSBieSBrZWVwaW5nIGFsdm9saWUgb3Blbi4gNSBpbW11bmUgZGVmZW5zZSBzdXJmYWN0YW50cyBwcm90aWVucyAoU1BfQSwgU1AtRCkgcHJvdmlkZXMgcHJvdGVjdGlvbnMgYWdhaW5zdCBpbmZlY3Rpb25zLiAjY2xpbmljYWwgcmVsZXZlbmNlIG9mIHN1cmZhY3RhbnQtIDEgcmVzcGlyYXRvcnkgZGlzdHJlc3Mgc3luZHJvbWUgcHJlbWF0dXJlIGluZmFudHMuIDIgc3VyZmFjdGFudHMgZGVmaWNpZW5jeSBpbiBhZHVsdHMgc2VlbiBpbiBjb25kaXRpb25zIGxpa2UgYWN1dGUgcmVzcGlyYXRvcnkgZGlzdHJlc3Mgc3luZHJvbWUgKEFSRFMpIGNhdXNlIGltcGFpcmVkIGdhcyBleGNoYW5nZSBhbmQgcmVzcGlyYXRvcnkgZmFsaXVyZS4gICAgICAgICAgICAgICAgICAgICAgICAgICAgICAgICAgICAgICAgICAgICAgICAgICAgICAgICAgICAgICAgICAgICAgICAgICAgICAgICAgICAg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87" table:style-name="ce1">
            <text:p>915087</text:p>
          </table:table-cell>
          <table:table-cell office:value-type="string" table:style-name="ce1">
            <text:p>english</text:p>
          </table:table-cell>
          <table:table-cell office:value-type="string" table:style-name="ce1">
            <text:p>Ticket 11&amp;lt;br /&amp;gt; 1. You are a pediatrician. On consultation, the mother with a 10-day-old newborn girl, is worried about engorgement of the mammary glands in the child, hyperemia of the skin over them and the colostrum-like secretions. What can this condition be associated with?&amp;lt;br /&amp;gt; 2.Give a definition of surfactant and what function does it perform?&amp;lt;br /&amp;gt;</text:p>
          </table:table-cell>
          <table:table-cell office:value-type="string" table:style-name="ce1">
            <text:p>YSBwZWRpYXRyaWNpYW4gaXMgYSBkb2N0b3Igb2YgY2hpbGRyZW4gd2hvIGFzaXN0cyB0aGVtIGFuZCBkaWFnbm9zc2VzIHRoZW0uIG9uIGNvbnN1bGx0YXRpb24gdGhlIG1vdGhlciB3aXRoIGEgMTAgZGF5IG9sZCBuZXdib3JuIGdpcmwgaXMgd29ycmllZCBhYm91dCBlbmdvcmdtbnQgb2YgdGhlIG1hbWFyeSBnbGFuZHMgaW4gdGhlIGNoaWxkICwgaHlwZXJtaWEgb2YgdGhlIHNraW4gb3ZlciB0aGVtIGFuZCB0aGUgY29sbG9zdHJ1bSBsaWtlIHNlY3JldGlvbiAuIHRoZSBjb25kaXRpb24gaXMgYXNvY2lhdGVkIHdpdGggTkVPTkFUQUxMIEJSRUFTVCBIWVBFUlRFTlRJT04gLSBJdCBpcyBhIGNvbW1vbiBhbmQgYmVuaWdnbiBjb25kaXRpb24gdGhhdCBvY2N1cnMgaW4gYm90aCBtYWxlcyBhbmQgZmVtYWxlcyBuZXdib3Juc3MgY2hhcmFjdGVyaXNkIGJ5IHRoZSB0ZW1wb3JyYXJ5IGVubGFyZ2VtbnQgb2YgYnJlYXN0IHRpc3N1ZSBkdWUgdG8gZXhwb3VzcmUgdG8gbWF0ZXJuYWwgaG9ybW9uZXMgZHVlIHRvIHByZWduYW5jeS4gVGhlIGluY3JlYXNlZCBlc3Ryb2dlbiBsZXZlbHMgaW4gdGhlIG1vdGhlcnMgYmxvZHN0cmVhbSBjcm9zcyB0aGUgcGxhY2VudGEgYW5kIHN0aW11bGxhdGUgdGhlIGRldmVsb3BtZW50IG9mIGJyZWFzdCB0aXNzdWUgaW4gdGhlIG5ld2Jvcm4uIHRoaXMgY29uZGl0aW9uIGlzIHNlbGYtbGltaXRpbmcgYW5kIGFuZCB0eXBpY2FsbHkgcmVzb2x2ZXMgb24gaXRzIG93biB3aXRoaW4gYSBmZXcgd2Vla3MgdG8gbW9udGhzYXMgdGhlIGluZmx1ZW5jZSBvZiBtYXRlcm5hbCBob3Jtb25lcyBkaW1pbmlzaHMuIGl0IGlzIGltcG9ydGFudCB0byByZWFzdXJlIHRoZSBwYXJlbnRzIHRoYXQgbmVvbm5hdGFsIGJyZWFzdCBoeXBlcnRyb3BoeXkgaXMgYSBub3JtYWxsIGFuZCB0cmFuc2llZW50IHBoZW5vbW5vbi4g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gICAgIDIuIFNVUkZBQ1RBTlQgLSBJdCBpcyBhIGNvbXBsZXggbWl4dHVyZSBvZiBsaXBpZGRzIGFuZCBwcm90aWVucyB0aGF0IGlzIHByb2R1Y2VzIGJ5IHRoZSBzcGVjaWFsaXplZGQgY2VsbHMgaW4gdGhlIGx1bmdzIGtub3duIGFzIHR5cGUgMiBwbmV1bW9jeXRlcy4gdGhlIHByaW1hcnkgZnVuY3RvbiBvZiB0aGUgc3VyZmFjY3RhbnQgaXMgdG8gcmVkdWNlIHRoZSBzdXJmYWMgdGVuc2lvbm4gd2l0aGluIHRoZSBhbHZlb2xpIG9mIHRoZSBsdW5ncy4gc3VyZmFjZSB0ZW5zc2lvbiB0ZW5kcyB0aGUgYWx2ZW9sbGkgdG8gY29sYXBzZSBtYWtpbmcgaXQgZGlmaWN1bHQgZm9yIHRoZSBsdW5zIHRvIGV4cGFuZGQgYW5kIGZvciBlZmljaWVudCBnYXMgZXhjaGFuZyB0byBvY2N1ci4gc3VyZmFjdGFudCBhY3RzIHRvIGRlY3Jlc2Ugc3VyZmFjIHRlbnNzaW9uICwgcHJldmVudGluZyBhbHZlb2xsYXIgY29sYXBzZSBkdXJpbmcgZXhoYWxhdGlvbiBhbmQgcHJvbW90aW5nIHRoZSBtYWludGVuYW5jZSBvZiBhbHZlb2xhciBzdGFiaWxpdHkgZHVyaW5nIHRoZSByZXNwcGlyYXRpb24gY3ljbGUuIFRoaXMgY3J1Y2lhbCByb2xlIG9mIHN1cmZhY3RudCBpcyBwYXJ0dGljdWxhcmx5IHNpZ25pZmljYW50IGZvciB0aGUgaW5mbGxhdGlvbiBvZiB0aGUgbHVuZ3MgYW5kIHRoZSBwcmV2ZW50aW9uIG9mIGF0dGVsZWN0YXNpcyAgdGhhdCBpcyBsdW5nIGNvbGFwc2UuIFN1cmZhY3RudCBkZWZmaWNpZW5jeSBpcyBvZnRlbiBzZWVuIGluIFBSRU1BVFRVUkUgSU5GQU5UUyBjYW4gbGVhZCB0byByZXBpcmF0dG9yeSBkaXN0cmVzIHN5bmRyb21lIFJEUyBhbmQgb3RoZXIgcmVzcGlyYXRvcnkgY29tcGxpY2F0dGlvbnMuIEVOR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102" table:style-name="ce1">
            <text:p>915102</text:p>
          </table:table-cell>
          <table:table-cell office:value-type="string" table:style-name="ce1">
            <text:p>english</text:p>
          </table:table-cell>
          <table:table-cell office:value-type="string" table:style-name="ce1">
            <text:p>Ticket 11&amp;lt;br /&amp;gt; 1. You are a pediatrician. On consultation, the mother with a 10-day-old newborn girl, is worried about engorgement of the mammary glands in the child, hyperemia of the skin over them and the colostrum-like secretions. What can this condition be associated with?&amp;lt;br /&amp;gt; 2.Give a definition of surfactant and what function does it perform?&amp;lt;br /&amp;gt;</text:p>
          </table:table-cell>
          <table:table-cell office:value-type="string" table:style-name="ce1">
            <text:p>MS4gdGhlIG5ldyBib3JlbiAxMCB5ZWFyIG9sZCBnaXJscyBtb3RoZXIgY29uc3VsdGF0aW9uIGFzIGEgcGVkaWF0cmljaWFuIGkgd291bGQgZXhwbGFpbiB0byB0aGUgbW90aGVyIHRoYXQgZW5nb3JnZW1lbnQgb2YgdGhlIG1hbW1heSBnbGFuZCAgb2YgdGhlIG5ld2Jvcm4gYSBub3JtYWwgcGh5c2lvbG9naWNhbCBwcm9jY2VzIHRoYXIgb2NjdXIgZHVlIHRvIHRoZSBpbmZsdWVuY2Ugb2YgdGhlIG1ldGFybmFsIGhvcm1vbmUgZHVyaW5nIHByZWduYW5jeSB0aGUgbW90aGVycyBib2R5IHByb2R1Y2UgaG9ybW9uZSB0aGF0IHN0dW11bGV0IHRoZSBkZXZlbG9wbWVudCBvZiB0aGUgbWFtbWFyeSBnbGFuZCBpbiB0aGUgZmV0dXNlIGFmdGVyIGJpcnRoIHRoZSBpbmZlbnQgYm9keSBpcyBzdGlsZSBleHBvc2UgdG8gdGhlc2UgaG9ybW9uZSB3aGljaCBjYW4gY2F1c2UgdGhlIG1hbW1hcnkgZ2xhbmQgdG8gYmVjb20gZW5sYXJnZSBhbmQgZW5nb3JnZWQgLiB0aGUgaHlwZXJtaWEgb2YgdGhlIHNraW4gb3ZlciB0aGUgbWFtbXJ5IGdsYW5kIGlzIGFsc28gYSBub3JuYWwgZmluZGluZyBhbmQgaXQgcmVsZXRlZCB0byB0aGUgaW5jcmVzZWQgYmxvb2QgZmxvb3cgdG8gdGhlIGFyZWEgLiB0aGlzZSBub3JtYWxseSByZXNvbHZlIG9uIHRoaXNlIG92ZW4gd2hpdGhvdXQgYW55IHRyZXRtZW50IC4gdGhlIGNvbG9zdHJ1bSBsaWtlIHNlY3JldGlvbiBmcm9tIHRoZSBtYW1tcnkgZ2xhbmQgYXJlIGFsc28gbm9ybWFsIGFuZCBhcmVlIGEgc2luZ2ggdGhhdCB0aGUgZ2xhbmQgYXJlIGZ1bmN0aW9uaW5nIHByb3Blcmx5IGNvbG9zdHJ1bSBpcyB0aGUgZmlyc3QgbWlsayB0aGF0IGlzIHByb2R1c2VkIGJ5IHRoZSBtb3RoZXJzIGJyZWFzdCBhZnRlciBiaXJ0aCBvZiB0aGUgYmFieSBkdWUgdG8gdGhlIHNlY3JldGlvbiBvZiBwcm9sZWN0aW5nIGFuZCBtaWxrIGVqZWN1bGV0IGJ5IHRoZSBzZWNyZWN0aW9uIG9mIHRoZSBveHl0b3NpbiAuYW5kIGl0cyBjb250ZW50IGltcG9ydGFudCBudXRyZW50cyBhbmQgYW50aWJpb3RpY3MgZm9yIHRoZSBpbW11bmUgc3lzdGVtIC4gLiBpIHdvdWxkIHJlYXNzdXIgdGhlIG1vdGhlciB0aGF0IHRoZXNlIGZpbmRpbmcgaXMgbm9ybWFsIGFuZCBkbyBub3QgcmVxdWVyIGFueSB0cmV0bWVudCAuaG93ZXZlciB0aGUgZW5nb3JnZW1lbnQgYmVjb20gdmVyeSBwYWluZnVsIGFuZCBpbnRlcmZlciB3aXRoIHRoZSBicmVhc3QgZmlkaW5nIC5pIHdvdWxkIHJlY29tZW5kIHRoYXQgc2hlIHNwZWFrIHdpdGggZG9jdG9yZSBhbmQgZmluZCB0aGUgcmVhc29uIG9mIHRoZSBwcm9ibGVtIGFuZCBnZXQgcHJvcGVyIHRyZWF0bWVudCAuICAgICAgICAgICAgICAgICAgICAgICAgICAgICAgICAgICAgICAgICAgICAgICAgICAgICAgICAgICAgICAgICAgICAgICAgICAgICAgICAgICAgICAgICAgICAgICAgICAgICAgICAgICAgICAgICAgIDIuIHN1cmZhY3RhbnQgb2Z0ZW4gYSBjb21wbGV4IG1ldHJpeCBvZiBhIGxpcXVpZCBhbmQgcHJvdGVpbiB0aGF0IHJlZHVjZXNkIHN1cmZhY2UgdGVudGlvbiBhdCB0aGUgYWlyIGxpcGlkIGludGVyZmFjZSB3aXRoaW4gdGhlIHRoZSBhbHZpb2xpIG9mIHRoZSBsdW5ncyAuaXRzIHByaW1hcnkgZnVuY3Rpb24gaXMgcmVkdWNlIHRoZSBjb2xlcHMgb2YgdGhlIGFsdmlvbGkgZHVyaW5nIGV4cGlyYXRpb24gLiBzdXJmYWNhY2UgdGVudGlvbiByZWR1Y2luZyBzdXJmYWN0ZW50IG1vbGVjdWxlIGxpbmUgdGhhdCB0aGUgYWx2aW9sYXIgc3VyZmFjZSAucHJldmVudCBhbHZpb2xpIHRvIHRoZSBjb2xsZXBzaW5nIGNvbXBsZXRseSBkdXJpbmcgZXhjcmV0aW9uIG1haW50YWluaW5nIHRoZXJlIHBldGVuY3kgaW1wcm92ZWQgbHVuZyBjb21wbGVuY2UgLmJ5IHJlZHVjaW5nIHN1cmZhY2UgdGVudGlvbiBzdXJmYWN0YW50IGltcHJ1dmUgbHVuZyAuc3VyZmVjdGVudCBpcyBhIGNyZXV0aWFsIGZvciBwcmV2ZW50aW5nIGF0ZWxlY3RldGlvbiB0aGUgY29sbGVwcyBvZiB0aGUgbHVuZ3MgdGlzc3VlIC5wZXRpY3VsYXJseSBpbiBwcmVtYXR1cmUgaW5mZW50ICB3aG8gbWx1bmcgbWF5IGhhdmUgbGVzcyBzdWZpY2VudCAu</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56" table:style-name="ce1">
            <text:p>915256</text:p>
          </table:table-cell>
          <table:table-cell office:value-type="string" table:style-name="ce1">
            <text:p>kazakh</text:p>
          </table:table-cell>
          <table:table-cell office:value-type="string" table:style-name="ce1">
            <text:p>Билет 12&amp;lt;br /&amp;gt; 1. Үлкен еңбек қандай тігістер және сүйектер арасында орналасқан, үлкен еңбектің жабылуы мерізімі, көлемі қаңша?&amp;lt;br /&amp;gt; 2. Үрықтын негізгі фетальды қан айналым ерекшелігін атаныз. &amp;lt;br /&amp;gt;</text:p>
          </table:table-cell>
          <table:table-cell office:value-type="string" table:style-name="ce1">
            <text:p>0q7Qu9C60LXQvSDQtdKj0LHQtdC6INCx0LDQu9Cw0L3Ri9KjINCx0LDRgSDRgdKv0LnQtdCz0ZbQvdGW0qMg0pvQsNC70YvQv9GC0LDRgdGDINCx0LDRgNGL0YHRi9C90LTQsCDQv9Cw0LnQtNCwINCx0L7Qu9Cw0YLRi9C9INC20rHQvNGB0LDSmyDQvNC10LzQsdGA0LDQvdCwINCx0L7Qu9GL0L8g0YLQsNCx0YvQu9Cw0LTRiy4g0q7Qu9C60LXQvSDQtdKj0LHQtdC6INGC05nQtiDQttOZ0L3QtSDRgdCw0LPQuNGC0LDQuyDRgtGW0LPRltGB0YLQtdGAINCw0YDQsNGB0YvQvdC00LAg0L7RgNC90LDQu9Cw0YHSm9Cw0L0u0J7QuyDQsdCw0YEg0YHSr9C50LXQs9GW0L3RltKjINC20L7Sk9Cw0YDRiyDQsdOp0LvRltCz0ZbQvdC00LUgINC80LDSo9C00LDQuSDQttOZ0L3QtSDRgtOp0LHQtSDRgdKv0LnQtdC60YLQtdGAINCw0YDQsNGB0YvQvdC00LAg0L7RgNC90LDQu9Cw0YHSm9Cw0L0u0JzQsNKj0LTQsNC5INGB0q/QudC10LPRliBvcyBmcm9udGFsaXMsINC10LrRliDQttCw0YDRgtGL0YHRi9C90LDQvSDRgtKx0YDQsNGC0YvQvSDQvNCw0qPQtNCw0Lkg0YHSr9C50LXQutGC0LXRgCDQsNGA0LDQu9GL0pPRi9C90LTQsCDQsdC+0LvQsNC00YsuIG9zIHBhcmlldGFsaXMg0YHQsNC80LDQuSDRgdKv0LnQtdCz0ZbQvNC10L0g0YjQtdC60YLQtdGB0ZbQvyDQvtGB0Ysg0q/Qu9C60LXQvSDQtdKj0LHQtdC60YLRliDSm9Kx0YDQsNGD0pPQsCDSm9Cw0YLRi9GB0LDQtNGLLtCe0L3Ri9KjINKx0LfRi9C90LTRi9KT0YsgNC01INGB0Lwg0LHQvtC70YHQsCDQsNC7INC10L3RliAyLTMg0YHQvCDQsdC+0LvQsNC00Ysu0J7QvdGL0qMg0YHSr9C50LXQutGC0LXRgCDQsNGA0LDRgdGL0L3QtNCw0pPRiyDQvtGA0L3QsNC70LDRgdKb0LDQvSDQutOp0LvQtdC80ZYgMSw1KjMg0LrQtdC50ZbQvSAzKjMg0YHQvCDQsNGA0LDRgdGL0L3QtNCwINCx0L7Qu9Cw0LTRiyDQtdC60LXQvS7SrtC70LrQtdC9INC10qPQsdC10Log0LHQsNC70LDQtNCwINCx0ZbRgCDQvdC10LzQtdGB0LUg0LHRltGAINC20LDRgNGL0Lwg0LbQsNGB0YvQvdC00LAg0LbQsNCx0YvQu9Cw0LTRiy4gIDIu0rDRgNGL0pvRgtCwINGE0LXRgtCw0LvQtNGLINKb0LDQvSDQsNC50L3QsNC70YvQvNGLINC10YDQtdGB0LXQutGC0LXRgNC00LXQvSDQtdGA0LXQutGI0LXQu9C10L3QtdC00ZYuINKw0YDRi9Kb0YLRi9KjIDMtNCDQsNC/0YLQsNGB0YvQvdCw0L0g0LHQsNGB0YLQsNC/INC/0LvQsNGG0LXQvdGC0LDQu9GL0psg0pvQsNC9INCw0LnQvdCw0LvRi9C8INC00LDQvNC40LTRiyDQtdC60LXQvS7SsNGA0YvSmyDQutGW0L3QtNGW0Log0LHQsNGD0LTRi9KjINC606nQvNC10LPRltC80LXQvSDQsNC90LAg0pvQsNC9INCw0LnQvdCw0LvRi9C80YvQvNC10L0g0LHQsNC50LvQsNC90YvRgSDSm9Kx0YDQsNC50LTRiy7QmtGW0L3QtNGW0Log0LLQtdC90LDRgdGLINCx0LDRg9GL0YDSk9CwINCx0LDRgNGL0L8gLNC+0Lsg0LbQsNKb0LAg0LHQsNGD0YvRgNC00Ysg0pvQsNC90LzQtdC9INKb0LDQvNGC0LDQvNCw0YHRi9C3INC10YLRltC/INCx0ZbRgNC90LXRiNC1INGC0LDRgNC80LDSm9GC0LDRgCDQsdC10YDQtdC00ZYu0JHRltGA0LDSmyDSm9Cw0L3QvdGL0qMg0LrTqdC/INCx06nQu9GW0LPRliDRgtOp0LzQtdC90LPRliDSm9GD0YvRgSDQstC10L3QsNKT0LAg0YLSr9GB0ZbQvyDQvtC7ICDQvtKjINC20q/RgNC10LrRiNC10LPQtSDQsdCw0YDQsNC00Ysu0JXRgNC10YHQtdC60YLQtdGA0LTQtdC9INGC0LDSk9GLINCx0ZbRgCDQtdGA0LXQutGI0LXQu9GW0LPRliDRgdC+0Lsg0LbSr9GA0LXQutGI0LUg0LzQtdC9INC+0qMg0LbSr9GA0LXQutGI0LUg0LDRgNCw0LvRi9KT0YvQvdC00LAg0YHQvtC/0LDSm9GI0LAg0YLQtdGB0ZbQutGC0ZbSoyDQsNGI0YvSmyDQsdC+0LvRg9GLLtCv0pPQvdC4INC60LXQu9GW0L8g0YLSr9GB0LrQtdC9INKb0LDQvSDQsdGW0YDQtNC10L0g0L7SoyDQttCw0psg0LbSr9GA0LXQutGI0LXQtNC10L0g0YHQvtC7INC20LDSmyDQttKv0YDQtdC60YjQtdCz0LUg0pvSsdC50YvQu9GL0L8g0L7QuyDQttCw0pvRgtCw0L0g0LDQvtGA0YLQsNKT0LAg0pvQsNGA0LDQuSDSm9Kx0LnRi9C70LDQtNGLLiDQntGB0YvQvdGL0qMg0LXRgdC10LHRltC90LXQvSDSsdGA0YvSm9GC0YvSoyDRgtGW0L3QtNC10YAg0LzQtdC9INC80q/RiNC10LvQtdGA0ZYg0pvQsNC90LzQtdC9INGC0L7Qu9GL0psgINKb0LDQvNGC0LDQvNCw0YHRi9C3INC10YLRltC70LXQtNGWLiDQltOZ0L3QtSDSsdGA0YvSm9GC0LAgSEIgRiA2NS04NSDQv9Cw0LnRi9C30Ysg0LHQvtC70YPRi9C80LXQvSDQutOp0YDRltC90LXQtNGWLCDQsdCw0LvQsNC70LDRgNC00LAg0LXRgNC10YHQtdC60YLQtdGA0YLRltC60ZbQvdC10L0g0LXRgNC10LrRiNC1IC7QntC90YvSoyDTqdC30ZbQvdC1INC+0YLRgtC10LPRltC90ZYg0pvQsNCx0YvQu9C00LDRgyDQvNKv0LzQutGW0L3QtNGW0LPRliDQttC+0pPQsNGA0YsgLtCe0L3Ri9KjINCx0LDRgdGC0Ysg0LXRgNC10LrRiNC10LvRltCz0ZYg0L7QuyDQsNC70YzRhNCwINC205nQvdC1INCz0LDQvNC80LAg0YHRg9Cx0LHRltGA0LvRltC60YLQtSDRgtKx0YDRg9GL0L3QtNCwLtCe0YLRgtC10LPRltC80LXQvSDQsdCw0LnQu9Cw0L3Ri9GB0YMg0pvQsNCx0ZbQu9C10YLRgtGWINC10YDQtdGB0LXQutGC0LXRgNCz0LUg0pvQsNGA0LDSk9Cw0L3QtNCwIDIg0LXRgdC10LTQtdC5INC20L7Sk9Cw0YDRiyDQsdC+0LvRg9GL0LzQtdC9INGB0LjQv9Cw0YLRgtCw0LvQsNC00Ysu0KHQtdCx0LXQsdGWINKx0YDRi9Kb0YLQsCDQs9Cw0LfQtNCw0YAg0pvRi9GB0YvQvNGLINGC06nQvNC10L0g0LHQvtC70LDQtNGLLtKw0YDRi9Kb0YLQsCDQsdCw0LvQsCDSm9Cw0L0g0LDQudC90LDQu9GL0LzRiyDRgtC+0LvRi9KbINC00LDQvNGL0L8g0LbQtdGC0ZbQu9C80LXQs9C10L0gLtCR0LDQu9CwINKb0L7RgNC10LrRgtGW0Log0LfQsNGC0YLQsNGA0LTRiywg0L7RgtGC0LXQs9GW0L3RliDRgtCw0pPRi9C00LAg0LHQsNGB0pvQsCDQsdC40L7Qu9C+0LPQuNGP0LvRi9KbINCx0LXQu9GB0LXQvdC00ZYg0LfQsNGC0YLQsNGA0LTRiyDSsdGA0YvSmyDRgdGL0YDRgtGL0L3QtNCw0pPRiyDQv9C70LDRhtC10L3RgtCwINCw0YDSm9GL0LvRiyDQutGW0L3QtNGW0Log0LHQsNGD0LTRi9KjINC606nQvNC10LPRltC80LXQvSDQsNC90LDQvdGL0qMg0pvQsNC9INCw0LnQvdCw0LvRi9C80YvQvdCw0L0g0LDQu9Cw0LTRiyDQtdC60LXQvS7SsNGA0YvSm9GC0LAg0pvQsNC9INCw0LnQvdCw0LvRi9C8INC20q/QudC10YHRltC90LTQtSDQtdKjINC80LDSo9GL0LfQtNGL0LvQsNGA0Ysg0LHQvtC70YvQvyDQsNC70pPQsNGI0pvRiyDQstC10L3QvtC30LTRi9KbINGC0q/RgtGW0Log0YLTmdGA0ZbQt9C00ZYg0YjRg9C90YLRgtCw0LvSk9Cw0L0gINGC0q/RgNC00LUg0LHQvtC70LDQtNGLLtCi0q/RgtGW0LrRgtGW0Log0LDRgNGC0LXRgNC40Y/Qu9Cw0YAg0LrTqdC80LXQs9GW0LzQtdC9INCw0L3QsNC90YvSoyDSm9Cw0L3Ri9C90LAg0LHQsNC50LvQsNC90YvRgdCw0LTRiy4g0L7RgdGLINKb0LDQvSDQsNC50L3QsNC70YvQvCDQsNGA0pvRi9C70Ysg0rHRgNGL0pvRgtCwINCw0LvSk9Cw0YjSm9GLINC20q/QudC10LvQtdGA0LTRltKjINKb0YvQt9C80LXRgtGC0LXRgNGWINGP0pPQvdC4INKb0rHRgNCw0Lwg0LHTqdC70ZbQutGC0LXRgNGWINKb0LDQu9GL0L/RgtCw0YHQsCDQsdCw0YHRgtCw0LnQtNGLLtKw0YDRi9Kb0YLQsCDTqdC60L/QtSDRgtC+0LvRi9KbINKb0LDQu9GL0L/RgtCw0YHQv9Cw0pPQsNC9INGB0LXQsdC10L/RgtC10L0g0LrRltGI0ZYg0pvQsNC9INCw0LnQvdCw0LvRi9C8INC20q/QudC10YHRltC00LUg0YHTmdC50LrQtdGB0ZbQvdGI0LUg0ZbRgdC60LUg0pvQvtGB0YvQu9C80LDSk9GL0L0u0J7RgdGL0pPQsNC9INGB0LDQuSDSsdGA0YvSm9GC0LAg0L7SoyDQttCw0psgINC20q/RgNC10LrRiNC10LPQtSDSm9Kx0LnRi9C70pPQsNC9INKb0LDQvSDQttKv0YDQtdC60YLRltKjINCw0L3QsNGC0L7QvNC40Y/Qu9GL0pst0YTQuNC30LjQvtC70L7Qs9C40Y/Qu9GL0psg0LXRgNC10LrRiNC10LvRltCz0ZbQvdC1INGB0LDQuSDRgdC+0L/QsNKb0YjQsCDRgtC10YHRltC6INCx0L7Qu9GD0YvQvNC10L0g0LrTqdGA0ZbQvdGW0YEg0LHQtdGA0ZbQvyDRgdC+0Lsg0LbQsNKbINC20q/RgNC10LrRiNC10LPQtSDSm9Kx0LnRi9C70LDQtNGLLtCh0L7Qv9Cw0pvRiNCwINGC0LXRgdGW0LrRgtGW0qMg0LbQsNCx0YvQu9GD0Ysg0YjQsNC80LDQvNC10L0gMTQg0LrSr9C9INCw0YDQsNC70YvSk9GL0L0g0pvQsNC80YLQuNC00Ysg0LXQutC10L0uINCe0YHRi9C90YvSoyDQtdGB0LXQsdGW0L3QtdC9IHNlcHR1bSBpbnRlcmF0cmFsZSDQttKv0YDQtdC60YjQtdCw0YDQsNC70YvSmyDSm9Cw0LvSm9Cw0L3QvdGL0qMg0L/QsNC50LTQsCDQsdC+0LvRg9GL0L0g0LrTqdGA0LUg0LDQu9Cw0LzRi9C3LtCR0rHQuyAg0LbQsNKj0LAg0YLRg9KT0LDQvSDQvdOZ0YDQtdGB0YLQtSDTqdC80ZbRgNGW0L3RltKjINCw0LvSk9Cw0YjSm9GLINC60q/QvdC00LXRgNGWINCx0L7Qu9Cw0LTRiy7QkdCw0LvQsCDQutGW0L3QtNGW0Log0LHQsNGDINCw0YDSm9GL0LvRiyDQsNC90LDQtNCw0L0g0pvQvtGA0LXQuiDQsNC70YMg0LXRgdC10LHRltC90LXQvSDRgdOZ0LnQutC10YHRltC90YjQtSDQvtC90YvSoyDQtNCwINKb0LDQvSDQsNC50L3QsNC70YvQvCDSm9C+0LfSk9Cw0LvRi9GB0Ysg0LbRi9C70LTQsNC8LNCw0LnQtNCw0YMg0pvQsNCx0ZbQu9C10YLRgtGW0LvRltCz0ZYg06nRgtC1INGC0LXQtyDQsNGA0LDQtNCwINCx0L7Qu9Cw0LTRiyDQtdC60LXQvS7QltCw0qPQsCDRgtGD0pPQsNC9INC905nRgNC10YHRgtC10LTQtSDRgtC+0LvRi9KbINOp0LrQv9C10YHRliDSm9Cw0LvRi9C/0YLQsNGB0L/QsNGDINC10YHQtdCx0ZbQvdC10L0g0LTQtSDSm9Cw0L3QvdGL0qMgMTAg0L/QsNC50YvQt9GLINKT0LDQvdCwINGC0q/RgdC10LTRliDQtdC60LXQvS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90" table:style-name="ce1">
            <text:p>1066990</text:p>
          </table:table-cell>
          <table:table-cell office:value-type="string" table:style-name="ce1">
            <text:p>kazakh</text:p>
          </table:table-cell>
          <table:table-cell office:value-type="string" table:style-name="ce1">
            <text:p>Билет 12&amp;lt;br /&amp;gt; 1. Үлкен еңбек қандай тігістер және сүйектер арасында орналасқан, үлкен еңбектің жабылуы мерізімі, көлемі қаңша?&amp;lt;br /&amp;gt; 2. Үрықтын негізгі фетальды қан айналым ерекшелігін атаныз. &amp;lt;br /&amp;gt;</text:p>
          </table:table-cell>
          <table:table-cell office:value-type="string" table:style-name="ce1">
            <text:p>0q7Qu9C60LXQvSDQtdKj0LHQtdC6INC20LDSo9CwINGC0YPSk9Cw0L0g0L3TmdGA0LXRgdGC0LXQu9C10YDQtNGW0qMg0LHQsNGBINGB0q/QudC10LPRltC90LTQtdCz0ZYg0LbSsdC80YHQsNKbINOZ0LvRliDSm9Cw0YLQsNC50YvQvyDSr9C70LPQtdGA0LzQtdCz0LXQvSDQvNC10LzQsdGA0LDQvdCw0LvRi9KbINCw0LnQvNCw0psuINCe0Lsg0LzQuNC00YvSoyDTqdGB0YPRltC9INKb0LDQvNGC0LDQvNCw0YHRi9C3INC10YLQtdGC0ZbQvSDQttOZ0L3QtdC00LUg0LHQvtGB0LDQvdGDINC60LXQt9GW0L3QtNC1INCx0LDRgSDRgdKv0LnQtdCz0ZbQvdGW0qMg0LjQutC10LzQtNGW0LvRltCz0ZbQvSDQsNGA0YLRgtGL0YDQsNC00YsuINCe0Lsg0YHSr9C50LXQuiDQv9C70LDRgdGC0LjQvdC60LDQu9Cw0YDRi9C90YvSoyDQsdKv0LPRltC70YPRltC90LUg0LzSr9C80LrRltC90LTRltC6INCx0LXRgNC10YLRltC9INKb0rHRgNGL0LvRi9C8LiDQltOZ0L3QtSDQvdOZ0YDQtdGB0YLQtdC90ZbSoyDQsNC70pPQsNGI0pvRiyDQsNC50LvQsNGA0YvQvdC00LAg0LzQuNGL0L3Ri9KjINKb0LDRgNKb0YvQvdC00Ysg06nRgdGD0ZbQvdC1INC+0YDQsNGB0LDQvSDQt9C+0YAg0q/Qu9C10YEg0pvQvtGB0LDQtNGLLiAg0LHQsNGBINGB0q/QudC10LPRltC90ZbSoyDQttC+0pPQsNGA0pPRiyDQttCw0pPRi9C90LTQsCwg0YLTmdC2INC205nQvdC10LTQtdC1INGB0LDQs9C40YLQsNC70YzRjNC00Ysg0YLRltCz0ZbRgdGC0LXRgNC00ZbSoyDQsNGA0LDRgdGL0L3QtNCwINC+0YDQvdCw0LvQsNGB0pvQsNC9LiDQkdKx0Lsg0LHQsNGBINGB0q/QudC10LPRltC90ZbSoywg0LrTqdCx0ZbQvdC1INGA0L7QvNCxINGC05nRgNGW0LfQtNGWINC+0YDRgtCw0YjQsCDTqdC70YjQtdC80ZYg0YjQsNC80LDQvNC10L0g0rHQt9GL0L3QtNGL0pPRiyDRgtOp0YDRgiDQsdC10YEg0YHQsNC90YLQuNC80LXRgtGALCDQtdC90ZYg0LXQutGWINKv0Ygg0YHQsNC90YLQuNC80LXRgtGALiDSr9C70LrQtdC9INC10qPQsdC10Log0LHRltGAINC20LDRgSDQvdC10LzQtdGB0LUg0LHRltGAINC20LDRgNGL0Lwg0LbQsNGBINCw0YDQsNGB0YvQvdC00LAg0LbQsNCx0YvQu9Cw0LTRiy4g0JTQtdCz0LXQvdC80LXQvSDQvtC7INC905nRgNC10YHRgtC10L3RltKjINOp0LfRltC90LTRltC6INC00LDQvNGDINOp0YHRg9GW0L3QtdC00LUg0LHQsNC50LvQsNC90YvRgdGC0Ysg0LHQvtC70LDQtNGLLiAg0LrQtdC50LHRltGAINC905nRgNC10YHRgtC10LvQtdGA0LTQtSDQsdKx0Lsg0LzQtdGA0LfRltC80L3QtdC9INC60LXRiCDQvdC10LzQtdGB0LUg0LXRgNGC0LUg0LbQsNCx0YvQu9GDINGL0pvRgtC40LzQsNC70LTRi9C70YvSk9GL0LTQsCDQsdCw0YAuINCo0LDQvNCw0LzQtdC9INC+0L0g0YHQtdCz0ZbQtyAsINC20LjRi9GA0LzQsCDRgtOp0YDRgiDQsNC50pPQsCDQtNC10LnRltC9INC+0Lsg0YLQvtC70YvSk9GL0LzQtdC9INC20LDQsdGL0LvQsNC00YsuINCh0LXQsdC10LHRliDRgdKv0LnQtdC6INC00LDQvNGL0L8g0LHRltGC0ZbRgdGW0L8g0LHRltGA0ZbQutGC0ZbRgNGW0LvRg9GWINC20q/RgNC10LTRli4g0JTQsNC80YvQv9C/INC60LXQu9C1INC20LDRgtKb0LDQvSDRhNGA0L7QvdGC0LDQu9GM0LTRiyDQttOZ0L3QtSDQv9Cw0YDQuNC10YLQsNC70YzQtNGLINGB0q/QudC10LrRgtC10YAg0LDRgNCw0YHRi9C90LTQsCDQvtGA0L3QsNC70LDRgdCw0LTRiy4gMi4g0rDRgNGL0pvRgtGL0qMg0L3QtdCz0ZbQt9GW0L3QtdC9INKb0LDQvSDQsNC50L3QsNC70YvQvCDQtdGA0LXQutGI0LXQu9GW0LrRgtC10YDRliDQvtC7INCx0ZbRgNC90LXRiNC1INCw0YHQv9C10LrRgtGW0LvQtdGA0LTQtdC9INGC0rHRgNCw0LTRiyDQtNC10L8g0LDRgtCw0YHQsNKb0YLQsCDQsdC+0LvQsNC00YsuINCk0LXRgtCw0LvRjNC00YvSmyDQsdCw0LnQu9Cw0L3Ri9GB0YLQsNGA0LTRi9KjINGP0pPQvdC4INCw0LnRgtCw0YLRi9C9INCx0L7Qu9GB0LDSmyDQsdCw0LvQsCDRgtGD0YvQu9KT0LDQvdC90LDQvSDRgdC+0qMg06nQtyDRhNGD0L3QutGG0LjRj9GB0YvQvSDQttC+0pPQsNC70YLQsNGC0YvQvSDRgtC10Log0rHRgNGL0pvSm9CwINGC05nQvSDSm9Kx0YDRi9C70YvQvNC00LDRgNC00YvSoyDQsdC+0LvRg9GLLCDQvtC70LDRgNKT0LAg0LHRltC3INCx0L7RgtCw0LvQu9C+0LIg0YLQtdGB0ZbQs9GWLCDRgdC+0L/QsNKb0YjQsCDRgtC10YHRltC6ICwg0LrRltC90LTRltC6INGC0LDQvNGL0YDQu9Cw0YDRi9C9INC20LDRgtKb0YvQt9Cw0LzRi9C3LiAg0L7RgtGC0LXQs9GW0LPQtSDSm9Cw0L3QvdGL0pvSm9Cw0L0g0pvQsNC9INKx0YDRi9Kb0pvQsCDQv9C70LDQvdGG0LXRgtCw0LTQsNC9INCw0L/QsNGA0LDRgtGL0L0g0LrRltC90LTRltC6INCy0LXQvdCw0YHRiyDQsNGA0pvRi9C70Ysg0LHQsNGA0LDQtNGLLiDSmtCw0L3QvdGL0qMg0LHRltGA0LDQtyDQsdOp0LvRltCz0ZYg0LHQsNGD0YvRgNC00Ysg0LDQudC90LDQu9GL0L8g06nRgtGC0ZbQvyDQutGW0L3QtNGW0Log0LLQtdC90LDRgdGL0L0g0YLTqdC80LXQvdCz0ZYg0pvRg9GL0YHRgtGLINCy0LXQvdCw0LzQtdC9INCx0LDQudC70LDQvdGL0YHRgtGL0YDQsNGC0YvQvSwg0LLQtdC90L7Qt9C00YvSmyDRgtKv0YLRltC6INCw0YDSm9GL0LvRiyDRiNGD0L3RgtGC0LDQu9Cw0LTRiy4g0J7SoyDQttCw0psg0pvQsNGA0YvQvdGI0LDQvdGL0qMg0pvQsNC90Ysg06nQutC/0LUg0LXRgNGC0LXRgNC40Y/RgdGL0L0g0LDQvtGA0YLQsNC80LXQvSDQsdCw0LnQu9Cw0L3Ri9GB0YLRi9GA0LDRgtGL0L0g0LDRgNGC0LXRgNC40L7QtyDRgtKv0YLRltCz0ZYg0LDRgNKb0YvQu9GLINOp0LrQv9C10LTQtdC9INCx0LDRgdKb0LAg0LbQsNKb0LAg0LHQsNKT0YvRgtGC0LDQu9Cw0LTRiy4g0rDRgNGL0pvRgtCwINC60ZbRiNGWINKb0LDQvSDQsNC50L3QsNC70YvQvNGLINC20rHQvNGBINC20LDRgdCw0LzQsNC50LTRiywg0YHQvtC7INGB0LXQsdC10LHRgtGWINOp0LrQv9C10L3RltKjINKb0LDQvdC80LXQvSDRgtC+0LvRi9KT0YvQvNC10L0g0pvQsNC80YLQsNC80YvQtyDQtdGC0ZbQu9GD0ZYg0LHQvtC70LzQsNC50LTRiy7QntC7INKb0LDQvdC00Ysg0L7RgtGC0LXQs9GW0LzQtdC9INKb0LDQvNGC0LDQvNCw0YHRi9C3INC10YLRg9Cz0LUg0pvQsNGC0YvRgdC/0LDQudC00YssINGB0rHQudGL0pvRgtGL0pvSm9CwINGC0L7Qu9GC0YvRgNGL0LvSk9Cw0L0g0LbTmdC90LXQtNC1INKb0LDQvSDQsNKT0YvQvNGL0L3QsCDRgtOp0LfRltC80LTRltC70ZbQs9GWINC20L7Sk9Cw0YDRiy4g0KHQvtC7INGB0LXQsdC10LHRgtGWINC+0qMg0LbSr9GA0LXQutGI0LXQtNC1INKb0YvRgdGL0Lwg0LbQvtKT0LDRgNGLINCx0L7Qu9Cw0LTRiy4gICAgICAgINCe0qPQttOZ0L3QtSDRgdC+0Lsg0LbSr9GA0LXQutGI0LXQu9C10YAg0LDRgNCw0YHRi9C90LTQsNKT0Ysg0pvQsNC70pvQsNCw0LTQsNKT0Ysg0YLQtdGB0ZbQuiwg0YHQvtC/0LDSm9GI0LAg0YLQtdGB0ZbQuiDQsdGW0YDQsNC3INKb0LDQvdC90YvSoyDTqdC60L/QtdC90ZYg0LDQudC90LDQu9GL0L8g06nRgtGW0L8gLCDQttKv0YDQtdC60YLRltKjINGB0L7QuyDQttCw0pPRi9C90LAg0LXQvdGD0ZbQvdC1INC80q/QvNC60ZbQvdC00ZbQuiDQsdC10YDQtdC00ZYuINCh0L7QtNCw0L0g0LrQtdC50ZbQvSDSm9Cw0L0g0YHQvtC7INKb0LDRgNGL0L3RiNCw0pPQsCDQsNC50LTQsNC70LDQtNGL0LTQsCDQtNC10L3QtdCz0LUg0YLQsNGA0LDQu9Cw0LTRi9GLLiDQntGC0YLQtdCz0ZbRgdGW0Lcg0pvQsNC9INC60ZbQvdC00ZbQuiDQsNGA0YLQtdGA0LjRj9C70LDRgNGLINCw0YDSm9GL0LvRiyDQv9C70LDRhtC10L3RgtCw0pPQsCDSm9Cw0LnRgtCwINC+0YDQsNC70LDQtNGLLiDQntGB0YvQu9Cw0YAg0rHRgNGL0pvRgtGL0qMg0LbQsNGC0YvRgCDRltGI0ZbQvdC00LUg0LTQsNC80YPRi9C80LXQvSDTqdGB0YPRliDSr9GI0ZbQvSDSm9Cw0LbQtdGC0YLRliDQvtGC0YLQtdCz0ZbQvNC10L0g0pvQvtGA0LXQutGC0ZYg0LfQsNGC0YLQsNGA0LzQtdC9INKb0LDQvNGC0LDQvNCw0YHRi9C3INC10YLRltC/INC+0YLRi9GA0LDQtNGLLiDRgdC+0Lsg0YHQtdCx0LXQsdGC0ZYg0pvQsNC9INCw0LnQvdCw0LvRi9C8INKx0YDRi9Kb0YLRi9KjINC00LDQvNGD0YvQvdC00LAg0LzQsNKj0YvQt9C00Ysg0YDTqdC7INCw0YLSm9Cw0YDQsNC00YsuINCR0LDQu9CwINC00q/QvdC40LXQs9C1INC60LXQu9Cz0LXQvdC90LXQvSDQutC10LnRltC9INKb0LDQvSDQsNC50L3QsNC70YvQvCDTqdC30LPQtdGA0LXQtNGWLiDQkNGA0YLQtdGA0LjRj9C70YvSmyDRgtKv0YLRltC60L/QtdC90LXQvSDRgdC+0L/QsNKb0YjQsCDRgtC10YHRltGW0Log0LbQsNCx0YvQu9Cw0LTRi9C00LAg0pvQsNC9INOp0LrQv9C10L3RltC00LUg0pvQsNC80YLQuNGC0YvQvSDQsdC+0LvQsNC00Ysu0rDRgNGL0pvRgtCwINKb0LDQvSDQsNC50L3QsNC70YvQvCDQttKv0LnQtdGB0ZYg0LrRltC90LTRltC6INGC0LDQvNGL0YDQu9Cw0YAg0LDRgNKb0YvQu9GLINC20q/Qt9C10LPQtSDQsNGB0YvRgNGL0LvRi9C/INC+0YLRi9GA0LDQtNGLLiDSsNGA0YvSm9GC0YvSoyDSr9GI0ZbQvdGI0ZYg0LbRltC90LUg0YLTqdGA0YDRgtGW0L3RiNGWINCw0L/RgtCw0YHRi9C90LDQvSDQsdCw0YHRgtCw0L8g0L/Qu9Cw0YbQtdC90YLQsNGA0LvRi9KbINKb0LDQvSDQsNC50L3QsNC70YvQvCDQtNCw0LzQuNC00YsuINCR0rHQuyDQtNC10LPQtdC9INCz0LDQtyDQsNC70LzQsNGB0YMg0LzQtdC9INKb0LDQvSDQsNC50L3QsNC70YvQvCDQttKv0YDQtSDQsdCw0YHRgtCw0LnQtNGLINC00LXQs9C10L0g0YHTqdC3LtCe0YLRgtC10LPRltC80LXQvSDSm9C+0YDQtdC60YLRltC60LfQsNGC0YLQsNGA0pPQsCDQsdCw0Lkg0pvQsNC90LTRiyDQutGW0L3QtNGW0Log0LLQtdC90LAg0LDRgNKb0YvQu9GLINKx0YDRi9KbINCw0LvRi9C/INC+0YLRi9GA0LDQtNGLLiDQntC7INCy0LXQvdCwINKx0YDRi9Kb0YLQsCDQsdCw0YPRi9GA0pPQsCDQutGW0YDQtdGAINC20L7Qu9C00LAg0LXQutGWINGC0LDRgNC80LDSm9Kb0LAg0LHTqdC70ZbQvdC10LTRli4g0J7Qu9Cw0YAg0LrQtdKjINC205nQvdC1INKb0YvRgdKb0LAg0LLQtdC90LDQu9GL0psg06nQt9C10LrRgtC10YDRliDQsdC+0LvQsNC00Ysu0prQsNC90L3Ri9KjINC90LXQs9GW0LfQs9GWINCx06nQu9GW0LPRliDQvtGB0Ysg06nQt9C10Log0LDRgNKb0YvQu9GLINOp0YLRltC/INGC06nQvNC10L3Qs9GWINKb0YPRi9GB0YLRiyDQstC10L3QsNKT0LAg0LDSk9GL0L8sINC+0L3QtNCwINC/0LvQsNGG0LXQvdGC0LDRgNC70Ysg0pvQsNC9INC20LDQvNCx0LDRgSDQvNKv0YjQtdC70LXRgNGW0L3QtdC9INCx0LDRg9GL0YDQtNCw0L0sINGW0YjQtdC60YLQtdGA0LTQtdC9INC205nQvdC1INCw0Y/Sm9GC0LDRgNC00LDQvSDQutC10LvQs9C10L0g0LLQtdC90L7Qt9C00YvSmyDSm9Cw0L3QvdC80LXQvSDQsNGA0LDQu9Cw0YHQsNC00YsuICDQsdCw0YPRi9GA0pPQsCDQvtGC0YLQtdCz0ZbQs9C1INKb0LDQvdGL0pvSm9Cw0L0g0pvQsNC9INCx0LDRgNCw0LTRiy4g0prQsNC9INCx0LDRg9GL0YDQtNCw0L0g06nRgtC60LXQvSDRgdC+0qMg0YLTqdC80LXQvdCz0ZYg0pvRg9GL0YHRgtGLINCy0LXQvdCw0pPQsCDQsdCw0YDQsNC00YsuICDQkNGA0LDQu9Cw0YHSm9Cw0L0g0pvQsNC9INGC06nQvNC10L3Qs9GWINKb0YPRi9GB0YLRiyDQstC10L3QsNGB0Ysg0LDRgNKb0YvQu9GLINC+0qMg0LbSr9GA0LXQutGI0LXQs9C1INC60LXQu9GW0L8g0pvSsdGP0LTRiy4g0J7QvdC00LAg0LbQvtKT0LDRgNKT0Ysg0pvRg9GL0YHRgtGLINCy0LXQvdCwINCw0YDSm9GL0LvRiyDQttC+0pPQsNGA0pPRiyDQsdOp0LvRltC60YLRltKjINKb0LDQvdGLINC60LXQu9GW0L8g0pvSsdC50YvQu9Cw0LTRiy4g0LHRltGA0LDSm9GC0LDQvdC00LAg0LHSsdGAINC10LrRliDSsdCw0L0g0LDRgNCw0LvQsNGB0L/QsNC50LTRiy4g0LbQvtKT0LDRgNKT0Ysg0pvRg9GL0YHRgtGLINCy0LXQvdCw0L3QtNCw0L0g0pvQsNC9INC+0qMg0LbSr9GA0LXQutGI0LXQtNC10L0g0L7SoyDSm9Cw0YDRi9C90YjQsNKT0LAg06nRgtC10LTRltC00LUg06nQutC/0LUg0LDRgNGC0LXRgNC40Y/RgdGL0L3QsCDTqdGC0LXQtNGWLiDTqNC60L/QtdCz0LUg0L7QvSDQv9Cw0LnRi9C30LTQsNC9INC606nQvyDSm9Cw0L0g0LHQsNGA0LzQsNC50LTRiy4g0prQsNC70pPQsNC9INKb0LDQvSDQsdC+0YLQsNC70LvQvtCyINOp0LfQtdCz0ZYg0LDRgNKb0YvQu9GLINKb0L7Qu9Kb0LDQvdC90YvSoyDRgtOp0LzQtdC90LTQtdCz0LXQvSDQsdOp0LvRltCz0ZbQvdC1INOp0YLRltC/INKx0YDRi9KbINC00LXQvdC10YHRltC90ZbSoyDRgtOp0LzQtdC90LPRliDQsdOp0LvRltCz0ZbQvdC1INGC0LDRgNCw0LvQsNC00YsuINCQ0Lsg0YLTqdC80LXQvdCz0ZYg0pvRg9GL0YvRgdGC0Ysg0LLQtdC90LDQvdGL0qMg0LDRgNCw0LvQsNGBINKb0LDQvdGLINC10LrRliDQttKv0YDQtdC60YjQtdC90ZbSoyDQsNGA0LDRgdGL0L3QtNCwINC+0YDQvdCw0LvQsNGB0pvQsNC9INGB0L7Qv9Cw0pvRiNCwINGC0LXRgdGW0Log0LDRgNKb0YvQu9GLINC+0qMg0LbQsNKbINC20q/RgNC10LrRiNC10LTQtdC9INGB0L7QuyDQttCw0psg0LbSr9GA0LXQutGI0LXQs9C1INOp0YLQtdC00ZYuINCe0Lsg0LbQsNKb0YLQsNC9INKb0LDRgNGL0L3RiNCw0pPQsCDRgtKv0YHRltC/INKb0L7Qu9Kb0LDQvdGL0qMg06nRgNC70LXQvNC10LvRliDQsdOp0LvRltC80ZbQvdC1INKb0LDQvSDTqdGC0LXQtNGWLiDQntC90LTQsCDQsdKx0pPQsNC90LAsINC205nQvdC1INKx0LnSm9GLINCw0YDRgtC10YDQuNGP0LvQsNGA0Ysg0LDRgNKb0YvQu9GLINC00LXQvdC10L3RltKjINC20L7Sk9Cw0YDRiyDQsdOp0LvRltC60YLQtdGA0ZYg0pvQsNC90LzQtdC9INKb0LDQvNGC0LDQvNCw0YHRi9C3INC10YLRltC70LXQtNGWLiDSmtC+0LvSm9Cw0L3Ri9KjINGC06nQvNC10L3QtNC10LPQtdC9INCx06nQu9GW0LPRltC90LTQtdCz0ZYg0pvQsNC9INC60ZbQvdC00ZbQuiDQsNGA0YLQtdGA0LjRj9C70LDRgNGLINCw0YDSm9GL0LvRiyDQv9C70LDRhtC10L3RgtCw0pPQsCDSm9Cw0LnRgtCw0LTRiy4g0rDRgNGL0pvRgtGL0qMg0LHQsNGA0LvRi9KbINC80q/RiNC10LvQtdGA0ZbQvSDQsNGA0LDQu9Cw0YEg0pvQsNC90LzQtdC9INKb0LDQvNGC0LDQvNCw0YHRi9C3INC10YLQtdC00ZYuINC+0YLRgtC10LPRltC80LXQvSDQutOp0LHRltGA0LXQuiDSm9Cw0L3Ri9Kb0pvQsNC9INKb0LDQvSDQsdCw0YPRi9GA0pPQsCwg0LzQuCAsINC20L7Sk9Cw0YDSk9GLINGB0LjRgNCw0pvRgtCw0YDSk9CwINCx0LDRgNCw0LTRiy4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тарыныз, әсіресе 2-ші сұрақтың жауабы - Акамедическая политика сүйене отыра, плагиат көрсеткіштеріне сай бағаланады.</text:p>
          </table:table-cell>
          <table:table-cell office:value-type="float" office:value="0" table:style-name="ce1">
            <text:p>0</text:p>
          </table:table-cell>
          <table:table-cell table:number-columns-repeated="16376"/>
        </table:table-row>
        <table:table-row table:style-name="ro1">
          <table:table-cell office:value-type="float" office:value="915314" table:style-name="ce1">
            <text:p>915314</text:p>
          </table:table-cell>
          <table:table-cell office:value-type="string" table:style-name="ce1">
            <text:p>russian</text:p>
          </table:table-cell>
          <table:table-cell office:value-type="string" table:style-name="ce1">
            <text:p>Билет 12&amp;lt;br /&amp;gt; 1.Между какими швами и костями черепа располагается Большой родничок. Укажите размеры и сроки его закрытия у здорового ребенка.&amp;lt;br /&amp;gt; 2.Назовите наиболее важные особенности фетального кровообращения плода.&amp;lt;br /&amp;gt;</text:p>
          </table:table-cell>
          <table:table-cell office:value-type="string" table:style-name="ce1">
            <text:p>MS7QkdC+0LvRjNGI0L7QuSDRgNC+0LTQvdC40YfQvtC6INGA0LDRgdC/0L7Qu9Cw0LPQsNC10YLRgdGPINC80LXQttC00YMg0LvQvtCx0L3QvtC5INC4INC30LDRgtGL0LvQvtGH0L3QvtC5INC60L7RgdGC0YzRjiwg0YLQsNC60LbQtSDQvNC10LbQtNGDINC00LLRg9C80Y8g0YLQtdC80LXQvdC90YvQvNC4INC60L7RgdGC0Y/QvNC4LiDQntCx0YDQsNC30L7QstCw0L0g0LzQtdC20LTRgyDRgdCw0LPQuNGC0YLQsNC70YzQvdGL0Lwg0Lgg0LLQtdC90LXRh9C90YvQvNC4INGI0LLQsNC80LguINCg0LDQt9C80LXRgDogMi0zINGB0Lwg0L/QviDQtNC40LDQvNC10YLRgNGDLiDQntCx0YDQsNC30L7QstCw0L0g0YHQvtC10LTQuNC90LXQvdC40Y/QvNC4INC60L7RgdGC0LXQuSwg0LAg0YLQsNC60LbQtSDQuNC80LXQtdGCINCz0LvQsNC00LrRg9GOINGB0YLRgNGD0LrRgtGD0YDRiyDQuCDQv9C+0LrRgNGL0YIg0Y3Qu9Cw0YHRgtC40YfQvdC+0Lkg0LzQtdC80LHRgNCw0L3QvtC5INC90LAg0LzQvtC80LXQvdGCINGA0L7QttC00LXQvdC40Y8u0J3QsCDQvtGJ0YPQv9GMINC80Y/Qs9C60LDRjywg0Y3Qu9Cw0YHRgtC40YfQvdCw0Y8g0YHRgtGA0YPQutGC0YPRgNCwLiDQodC+INCy0YDQtdC80LXQvdC10Lwg0YDQsNC30LLQuNGC0LjRjyDRgNC10LHQtdC90LrQsCDQvdCw0YfQuNC90LDQtdGC0YHRjyDQtdCz0L4g0L7RgdGC0LXQvtGE0LjQutCw0YbQuNGPICjQvtC60L7RgdGC0LXQvdC10L3QuNC1KS4g0J3QsCAxMi0xOCDQvNC10YHRj9GGINC/0L7Qu9C+0YHRgtGM0Y4g0LfQsNC60YDRi9Cy0LDQtdGC0YHRjyDRgyDQt9C00L7RgNC+0LLQvtCz0L4g0YDQtdCx0LXQvdC60LAuIDxiciAvPg0KMi7QndCw0LjQsdC+0LvQtdC1INCy0LDQttC90YvQtSDQvtGB0L7QsdC10L3QvdC+0YHRgtC4INGE0LXRgtCw0LvRjNC90L7QtSDQutGA0L7QstC+0L7QsdGA0LDRidC10L3QuNGPINC/0LvQvtC00LA6PGJyIC8+DQoxKdCd0LDQu9C40YfQuNC1INC/0LvQsNGG0LXQvdGC0LDRgNC90L7Qs9C+INC60YDQvtCy0L7QvtCx0YDQsNGJ0LXQvdC40Y8tINC+0LHQtdGB0L/QtdGH0LjQstCw0LXRgiDQv9C40YLQsNGC0LXQu9GM0L3Ri9C80Lgg0LLQtdGJ0LXRgdGC0LLQsNC80Lgg0Lgg0LrQuNGB0LvQvtGA0L7QtNC+0Lwg0L7RgiDQvNCw0YLQtdGA0Lgg0YDQtdCx0LXQvdC60LAg0YfQtdGA0LXQtyDQv9GD0L/QvtGH0L3Rg9GOINCw0YDRgtC10YDQuNGOLCDRgtCw0LrQttC1INCy0YvQstC+0LTQuNGCINC/0YDQvtC00YPQutGC0Ysg0LzQtdGC0LDQsdC+0LvQuNC30LzQsCDQuNC3INC+0YDQs9Cw0L3QuNC30LzQsCDQv9C70L7QtNCwINGH0LXRgNC10Lcg0L/Rg9C/0L7Rh9C90YvQtSDQstC10L3Riy4g0KLQsNC60LbQtSDQsdC+0LvRjNGI0L7QuSDQtNGL0YXQsNGC0LXQu9GM0L3Ri9C5INC/0LvQvtGJ0LDQtNGMINC/0LvQsNGG0LXQvdGC0YsuPGJyIC8+DQoyKdCe0LHRhdC+0LQg0LrRgNC+0LLQvtC+0LHRgNCw0YnQtdC90LjRjyDQvNCw0LvQvtCz0L4g0LrRgNGD0LPQsCDRgtCw0Log0LrQsNC6INC70LXQs9C60LjQtSDQvdC1INGE0YPQvdC60YbQuNC+0L3QuNGA0YPRjtGCINCy0L4g0LLRgNC10LzRjyDRjdC80LHRgNC40L7QvdCw0LvRjNC90L7Qs9C+INGA0LDQt9Cy0LjRgtC40Y8uPGJyIC8+DQozKdCd0LDQu9C40YfQuNC1INGE0LXRgtCw0LvRjNC90L7Qs9C+INCz0LXQvNC+0LPQu9C+0LHQuNC90LAgKNCz0LXQvNC+0LPQu9Cw0LHQuNC9YSBGKS0g0YTQtdGC0LDQu9GM0L3Ri9C5INCz0LXQvNC+0LPQu9C+0LHQuNC9INC40LzQtdC10YIg0YHRgNC+0LTRgdGC0LLQviDQuiDQutC40YHQu9C+0YDQvtC00YMg0LIgNCDRgNCw0LfQsCDQsdC+0LvRjNGI0LUg0YfQtdC8INCy0LfRgNC+0YHQu9GL0Lkg0LPQtdC80L7Qs9C70L7QsdC40L0o0JAxLNCQMikuINCX0LAg0YHRh9C10YIg0L7RgdC+0LHQtdC90L3QvtGB0YLQuCDQtdCz0L4g0YHRgtGA0YPQutGC0YPRgNGLLCDQtdGB0LvQuCDQstC30YDQvtGB0LvRi9C5INCz0LXQvNC+0LPQu9C+0LHQuNC9INC40LzQtdC10YIgMiDQsNC70YzRhNCwINC4IDIg0LHQtdGC0LAg0YbQtdC/0LXQuSwg0YLQviDRhNC10YLQsNC70YzQvdGL0Lkg0LPQtdC80L7Qs9C70L7QsdC40L0g0LjQvNC10LXRgiAyINCw0LvRjNGE0LAg0LggMiDQs9Cw0LzQvNCwINGG0LXQv9C10LksINGH0YLQviDQtNC10LvQsNC10YIg0LXQs9C+INGE0YPQvdC60YbQuNC+0L3QsNC70YzQvdC+0YHRgtGMINCx0L7Qu9GM0YjQtSgg0YHQstGP0LfRi9Cy0LDQvdC40LUg0YEg0LrQuNGB0LvQvtGA0L7QtNC+0Lwg0LvRg9GH0YjQtSkuPGJyIC8+DQo0KSDQndCw0LvQuNGH0LjQtSDQtNCy0YPRhSDRiNGD0L3RgtC+0LI6INCQ0YDRgtC10YDQuNCw0LvRjNC90YvQuSjQkdC+0YLQsNC70L7Qsikg0L/RgNC+0YLQvtC6LSDQv9GA0L7RgtC+0Log0LzQtdC20LTRgyDQu9C10LPQvtGH0L3Ri9C80Lgg0LDRgNGC0LXRgNC40Y/QvNC4INC4INCw0L7RgNGC0L7QuSwg0J7QstCw0LvRjNC90L7QtSDQvtC60L3Qvi0g0L/RgNC+0YLQvtC6INC80LXQttC00YMg0LTQstGD0LzRjyDQv9GA0LXQtNGB0LXRgNC00LjRj9C80LguINCt0YLQuCDQv9GA0L7RgtC+0LrQuCDQvtCx0LXRgdC/0LXRh9C40LLQsNGO0YIg0L7QsdGF0L7QtCDQutGA0L7QstC+0YHQvdC+0LHQttC10L3QuNGPINC80LDQu9C+0LPQviDQutGA0YPQs9CwINGC0LDQuiDQutCw0Log0LXQtSDRhNGD0L3QutGG0LjRjyDRgdC90LjQttC10L3QsCDQuCDQstGB0LXQvCDQvtGA0LPQsNC90LDQvCDQtNC+0YHRgtCw0LLQu9GP0LXRgtGB0Y8g0YHQvNC10YjQsNC90L3QsNGPINC60YDQvtCy0YwuINCd0LXQvtCx0YXQvtC00LjQvNC+INC30LDQvNC10YLQuNGC0Ywg0YfRgtC+INCx0L7Qu9C10LUg0L7QutGB0LXQs9C10L3QuNGA0LjRgNC+0LLQsNC90L3Rg9GOINC60YDQvtCy0Ywg0L/QvtC70YPRh9Cw0LXRgiDQvNC+0LfQsyDQuCDRgdC10YDQtNGG0LUuIDxiciAvPg0KNSkg0KHQtdGA0LTRhtC1INC90LDRh9C40L3QsNC10YIg0YPRh9Cw0YHRgtCy0L7QstCw0YLRjCDQutGA0L7QstC+0L7QsdGA0LDRidC10L3QuNC4INC90LAgOCDQvdC10LTQtdC70LUg0Y3QvNCx0YDQuNC+0L3QsNC70YzQvdC+0LPQviDRgNCw0LfQstC40YLQuNGPINC4INGD0YHQuNC70LXQvdC40LUg0LrRgNC+0LLQvtC+0LHRgNCw0YnQtdC90LjRjyDQt9CwINGB0YfQtdGCINC00YvRhdCw0YLQtdC70YzQvdGL0YUg0LTQstC40LbQtdC90LjQuCDRgtCw0Log0LrQsNC6INCz0YDRg9C00L3QvtC5INC60LvQtdGC0LrQtSDQvtCx0YDQsNC30YPQtdGC0YHRjyDQvtGC0YDQuNCw0YbRgtC10LvRjNC90L7QtSDQtNCw0LLQu9C10L3QuNC1L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В первом вопросе: затылочная кость не участвует в образовании большого родничка. Во втором вопросе неточности:ОО- это не проток, это отверстие. Пупочная вена!--одна!, а артерии- две!</text:p>
          </table:table-cell>
          <table:table-cell office:value-type="float" office:value="0" table:style-name="ce1">
            <text:p>0</text:p>
          </table:table-cell>
          <table:table-cell table:number-columns-repeated="16376"/>
        </table:table-row>
        <table:table-row table:style-name="ro1">
          <table:table-cell office:value-type="float" office:value="915325" table:style-name="ce1">
            <text:p>915325</text:p>
          </table:table-cell>
          <table:table-cell office:value-type="string" table:style-name="ce1">
            <text:p>russian</text:p>
          </table:table-cell>
          <table:table-cell office:value-type="string" table:style-name="ce1">
            <text:p>Билет 12&amp;lt;br /&amp;gt; 1.Между какими швами и костями черепа располагается Большой родничок. Укажите размеры и сроки его закрытия у здорового ребенка.&amp;lt;br /&amp;gt; 2.Назовите наиболее важные особенности фетального кровообращения плода.&amp;lt;br /&amp;gt;</text:p>
          </table:table-cell>
          <table:table-cell office:value-type="string" table:style-name="ce1">
            <text:p>MSkuINCR0L7Qu9GM0YjQvtC5INGA0L7QtNC90LjRh9C+0LogLSDQvNC10LzQsdGA0LDQvdC90L7QvtCx0YDQsNC30L3QsNGPINC/0L7Qu9C+0YHRgtGMINC90LAg0YfQtdGA0LXQv9C1LCDQv9C+0LrRgNGL0YLQsCDQutC+0LbQtdC5LiDQoNC+0LTQvdC40YfQutC4INC+0LHQtdGB0L/QtdGH0LjQstCw0Y7RgiDQv9C+0LTQstC40LbQvdC+0YHRgtGMINC60L7RgdGC0LXQuSDRh9C10YDQtdC/0LAg0L/RgNC4INGA0L7QtNC+0LLQvtC5INC00LXRj9GC0LXQu9GM0L3QvtGB0YLQuCAo0L/RgNC+0YXQvtC20LTQtdC90LjQtSDQs9C+0LvQvtCy0Ysg0YDQtdCx0LXQvdC60LAg0YfQtdGA0LXQtyDRgNC+0LTQvtCy0YvQtSDQv9GD0YLQuCksINC+0LHQtdGB0L/QtdGH0LjQstCw0LXRgiDQutC+0LzQv9C10L3RgdCw0YbQuNGOINC80L7Qt9Cz0L7QstC+0LPQviDRgNC+0YHRgtCwLCDRgtCw0LrQttC1LCDQvtCx0LXRgdC/0LXRh9C40LLQsNC10YIg0LTQuNCw0LPQvdC+0YHRgtC40LrRgyDQv9Cw0YLQvtC70L7Qs9C40LkgKNCd0LDQv9GA0LjQvNC10YAsINCz0LjQtNGA0L7RhtC10YTQsNC70LjRjykuINCjINC00L7QvdC+0YjQtdC90L3QvtCz0L4g0YDQtdCx0LXQvdC60LAg0LfQsNC60YDRi9GC0LjQtSDRgNC+0LTQvdC40YfQutCwINC90LDRh9C40L3QsNC10YLRgdGPINC90LAgNi04INC80LXRgdGP0YbQtSDQv9C+0YHQu9C1INGA0L7QttC00LXQvdC40Y8uINCf0L7Qu9C90L7RhtC10L3QvdC+0LUg0LfQsNC60YDRi9GC0LjQtSDRgNC+0LTQvdC40YfQutCwINC/0YDQvtC40YHRhdC+0LTQuNGCINCyINCy0L7Qt9GA0LDRgdGC0LUgMS0xLDUg0LPQvtC00LAuINCR0L7Qu9GM0YjQvtC5INGA0L7QtNC90LjRh9C+0Log0LjQvNC10LXRgiDRgNC+0LzQsdC+0LLQuNC00L3Rg9GOINGE0L7RgNC80YMuINCR0L7Qu9GM0YjQvtC5INGA0L7QtNC90LjRh9C+0Log0YDQsNGB0L/QvtC70LDQs9Cw0LXRgtGB0Y8g0LzQtdC20LTRgyDQotC10LzQtdC90L3Ri9C80Lgg0Lgg0LvQvtCx0L3Ri9C80Lgg0LrQvtGB0YLRj9C80LguINCR0L7Qu9GM0YjQvtC5INGA0L7QtNC90LjRh9C+0Log0L3QsNGF0L7QtNC40YLRgdGPINC80LXQttC00YMg0LLQtdC90LXRh9C90YvQvCDRiNCy0L7QvCAo0KHQvtC10LTQuNC90Y/RjtGJ0LjQuSDQu9C+0LHQvdGL0LUg0Lgg0YLQtdC80LXQvdC90YvQtSDQutC+0YHRgtC4KSDQuCDRgdCw0LPQuNGC0YLQsNC70YzQvdGL0Lwg0YjQstC+0LwgKNCh0L7QtdC00LjQvdGP0Y7RidC40Lkg0YLQtdC80LXQvdC90YvQtSDQutC+0YHRgtC4KS4g0KDQsNC30LzQtdGA0Ysg0YDQvtC00L3QuNGH0LrQsDogMSw10YUyLTPRhTMg0YHQvC4gINCf0YDQuNGH0LjQvdCw0LzQuCDQvdC1INC30LDQutGA0YvQstGI0LXQs9C+0YHRjyDRgNC+0LTQvdC40YfQutCwINC80L7Qs9GDINCx0YvRgtGMOiDQn9C+0LLRi9GI0LXQvdC90L7QtSDQstC90YPRgtGA0LjRh9C10YDQtdC/0L3QvtC1INC00LDQstC70LXQvdC40LUsINCd0LDRgNGD0YjQtdC90LjRjyDQsiDQv9GA0L7RhtC10YHRgdC1INC+0YHRgtC10L7Qs9C10L3QtdC30LAg0Lgg0L7QutC+0YHRgtC10L3QtdC90LjRjywg0LfQsNC00LXRgNC20LrQsCDRgNC+0YHRgtCwINCz0L7Qu9C+0LLRiywg0L3QtdCy0YDQvtC70L7Qs9C40YfQtdGB0LrQuNC1INC90LDRgNGD0YjQtdC90LjRjy4g0KLQsNC60LbQtSwg0LHRi9Cy0LDRjtGCINGB0LvRg9GH0LDQuCDQv9GA0LXQttC00LXQstGA0LXQvNC10L3QvdC+0LPQviDQvtC60L7RgdGC0LXQvdC10L3QuNGPINGA0L7QtNC90LjRh9C60L7Qsi4gMikuINCS0LDQttC90LXQudGI0LjQtSDQvtGB0L7QsdC10L3QvdC+0YHRgtC4INGE0LXRgtCw0LvRjNC90L7Qs9C+INC60YDQvtCy0L7QvtCx0YDQsNGJ0LXQvdC40Y86ICAxLiDQn9C70LDRhtC10L3RgtCw0YDQvdC+0LUg0LrRgNC+0LLQvtC+0LHRgNCw0YnQtdC90LjQtSAo0J/Qu9Cw0YbQtdC90YLQsCDQuNC80LXQtdGCINCx0L7Qu9GM0YjRg9GOINC/0LvQvtGJ0LDQtNGMINC/0L7QstC10YDRhdC90L7RgdGC0LgsINGH0YLQviDQvtCx0LXRgdC/0LXRh9C40LLQsNC10YIg0Y3RhNGE0LXQutGC0LjQstC90YvQuSDQvtCx0LzQtdC9INC60LjRgdC70L7RgNC+0LTQsDsg0LIg0L/Qu9Cw0YbQtdC90YLQtSDQv9C+0LLRi9GI0LXQvdC90L7QtSDQs9C40LTRgNC+0YHRgtCw0YLQuNGH0LXRgdC60L7QtSDQtNCw0LLQu9C10L3QuNC1OyDQv9GA0LXQuNC80YPRidC10YHRgtCy0LXQvdC90L4g0YTQtdGC0LDQu9GM0L3Ri9C5INCz0LXQvNC+0LPQu9C+0LHQuNC9LCDRgtCw0Log0LrQsNC6INC+0L0g0LjQvNC10LXRgiDQsdC+0LvRjNGI0LXQtSDRgdGA0L7QtNGB0YLQstC+INC6INC60LjRgdC70L7RgNC+0LTRgywg0YfQtdC8INCy0LfRgNC+0YHQu9GL0Lkg0LPQtdC80L7Qs9C70L7QsdC40L0g0JAuKSwyLiDQndC1INGE0YPQvdC60YbQuNC+0L3QsNC70YzQvdC+0YHRgtGMINC80LDQu9C+0LPQviDQutGA0YPQs9CwINC60YDQvtCy0L7QvtCx0YDQsNGJ0LXQvdC40Y8gKNC70LXQs9C60LjQtSDQt9Cw0L/QvtC70L3QtdC90Ysg0LbQuNC00LrQvtGB0YLRjNGOINC4INC90LUg0YPRh9Cw0YHRgtCy0YPRjtGCINCyINC60YDQvtCy0L7QvtCx0YDQsNGJ0LXQvdC40LgpLCDQv9GA0L7QuNGB0YXQvtC00LjRgiDQv9C+0YHRgtGD0L/Qu9C10L3QuNC1INC60YDQvtCy0Lgg0LIg0LHQvtC70YzRiNC+0Lkg0LrRgNGD0LMg0LzQuNC90YPRjyDQvNCw0LvRi9C5INC30LAg0YHRh9C10YIg0YjRg9C90YLQvtCyICjQstC10L3QvtC30L3Ri9C5INCw0YDQsNC90LjRhtC10LIg0L/RgNC+0YLQvtC6LSDQvtCx0LXRgdC/0LXRh9C40LLQsNC10YIg0YLRgNCw0L3RgdC/0L7RgNGCINC+0LHQvtCz0L7RidC10L3QvdC+0Lkg0LrQuNGB0LvQvtGA0L7QtNC+0Lwg0LrRgNC+0LLQuCDQuNC3INC/0YPQv9C+0YfQvdC+0Lkg0LLQtdC90Ysg0LIg0L3QuNC20L3RjtGOINC/0L7Qu9GD0Y4g0LLQtdC90YMsINC80LjQvdGD0Y8g0L/QtdGH0LXQvdGMOyDQntCy0LDQu9GM0L3QvtC1INC+0LrQvdC+IC0g0YDQsNGB0L/QvtC70L7QttC10L3QviDQvNC10LbQtNGDINC/0YDQsNCy0L7Qs9C+INC4INC70LXQstC+0LPQviDQv9GA0LXQtNGB0LXRgNC00LjRjywg0L/QvtC30LLQvtC70Y/QtdGCINC80LjQvdC+0LLQsNGC0Ywg0LzQsNC70YvQuSDQutGA0YPQsyDQutGA0L7QstC+0L7QsdGA0LDRidC10L3QuNGPOyDQkNGA0YLQtdGA0LjQsNC70YzQvdGL0Lkg0JHQsNGC0LDQu9C70L7QsiDQv9GA0L7RgtC+0LogLSDQodC+0LXQtNC40L3Rj9C10YIg0LvQtdCz0L7Rh9C90YPRjiDQsNGA0YLQtdGA0LjRjiDQuCDQsNC+0YDRgtGDLCDRgtCw0LrQttC1LCDQvNC40L3Rg9GPINC80LDQu9GL0Lkg0LrRgNGD0LMg0LrRgNC+0LLQvtC+0LHRgNCw0YnQtdC90LjRjykuIDMuINCj0LLQtdC70LjRh9C10L0g0LzQuNC90YPRgtC90YvQuSDQvtCx0YrQtdC8INCx0L7Qu9GM0YjQvtCz0L4g0LrRgNGD0LPQsCDQutGA0L7QstC+0L7QsdGA0LDRidC10L3QuNGPICjRgtCw0Log0LrQsNC6INC70LXQs9C60LjQtSDQuCDQvNCw0LvRi9C5INC60YDRg9CzINC60YDQvtCy0L7QvtCx0YDQsNGJ0LXQvdC40Y8g0L3QtSDRg9GH0LDRgdGC0LLRg9GO0YIg0LIg0L/RgNC+0YbQtdGB0YHQtSk7IDQuINCQ0YDRgtC10YDQuNCw0LvRjNC90L7QtSDQtNCw0LLQu9C10L3QuNC1INCyINCw0YDRgtC10YDQuNGP0YUg0Lgg0LDQvtGA0YLQtSDQvtC00LjQvdCw0LrQvtCy0L7QtTsgNS4g0KHQvNC10YjQsNC90L3Ri9C5INGF0LDRgNCw0LrRgtC10YAg0LrRgNC+0LLQuCAo0JrRgNC+0LLRjCDRgdC80LXRiNC40LLQsNC10YLRgdGPINCyINC/0YDQsNCy0L7QvCDQv9GA0LXQtNGB0LXRgNC00LjQuCwg0LDQvtGA0YLQtSDQuCDQvdC40LbQvdC10Lkg0L/QvtC70L7QuSDQstC10L3QtTsgNi4g0J/Rg9C/0L7Rh9C90YvQtSDRgdC+0YHRg9C00Ys6INC/0YPQv9C+0YfQvdCw0Y8g0LDRgNGC0LXRgNC40Y8gKNCe0YLQstC+0LTQuNGCINC60YDQvtCy0Ywg0YEg0L3QuNC30LrQuNC8INGB0L7QtNC10YDQttCw0L3QuNC10Lwg0LrQuNGB0LvQvtGA0L7QtNCwINC+0YIg0L/Qu9C+0LTQsCDQsiDQv9C70LDRhtC10L3RgtGDKSDQuCDQv9GD0L/QvtGH0L3QsNGPINCy0LXQvdCwICjQtNC+0YHRgtCw0LLQu9GP0LXRgiDQvtCx0L7Qs9Cw0YnQtdC90L3Rg9GOINC60LjRgdC70L7RgNC+0LTQvtC8INC60YDQvtCy0Ywg0L7RgiDQv9C70LDRhtC10L3RgtGLINC6INC/0LvQvtC00YMpLg==</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закрытие Б.родничка не начинается на 6-8 месяце после рождения!!!</text:p>
          </table:table-cell>
          <table:table-cell office:value-type="float" office:value="0" table:style-name="ce1">
            <text:p>0</text:p>
          </table:table-cell>
          <table:table-cell table:number-columns-repeated="16376"/>
        </table:table-row>
        <table:table-row table:style-name="ro1">
          <table:table-cell office:value-type="float" office:value="1067035" table:style-name="ce1">
            <text:p>1067035</text:p>
          </table:table-cell>
          <table:table-cell office:value-type="string" table:style-name="ce1">
            <text:p>russian</text:p>
          </table:table-cell>
          <table:table-cell office:value-type="string" table:style-name="ce1">
            <text:p>Билет 12&amp;lt;br /&amp;gt; 1.Между какими швами и костями черепа располагается Большой родничок. Укажите размеры и сроки его закрытия у здорового ребенка.&amp;lt;br /&amp;gt; 2.Назовите наиболее важные особенности фетального кровообращения плода.&amp;lt;br /&amp;gt;</text:p>
          </table:table-cell>
          <table:table-cell office:value-type="string" table:style-name="ce1">
            <text:p>MSnQkdC+0LvRjNGI0L7QuSDRgNC+0LTQvdC40YfQvtC6INGA0LDRgdC/0L7Qu9C+0LbQtdC9INC80LXQttC00YMg0LvQvtCx0L3Ri9C8INC4INGC0LXQvNC10L3QvdGL0LzQuCDQutC+0YHRgtGP0LzQuCwg0LXQs9C+INGA0LDQt9C80LXRgNGLINC+0YIg0L/QvtC70YLQvtGA0LAg0Lgg0LTQstCwINC00L4gMyDQuCAzINGB0LDQvdGC0LjQvNC10YLRgNC+0LIuINCd0LDRhdC+0LTQuNGC0YHRjyDQvNC10LbQtNGDINGB0LDQs9C40YLRgtCw0LvRjNC90L7QuSDQuCDQstC10L3QtdGH0L3Ri9C80Lgg0YjQstCw0LzQuCDQuCDQt9Cw0LrRgNGL0LLQsNC10YLRgdGPINC6INC/0L7Qu9GC0L7RgNCwINC00LLRg9C8INCz0L7QtNCw0LwuINCc0L7QttC90L4g0YLQsNC60LbQtSDQtNC+0L/QvtC70L3QuNGC0Ywg0L/RgNC+INC80LDQu9GL0Lkg0YDQvtC00L3QuNGH0L7QuiDQvdCw0YXQvtC00LjRgtGB0Y8g0LzQtdC20LTRgyDQt9Cw0YLRi9C70L7Rh9C90YvQvCDQuCDRgtC10LzQtdC90L3Ri9C80Lgg0LrQvtGB0YLRj9C80Lgu0J7QvSDQt9Cw0LrRgNGL0YIg0LrQviDQvNC+0LzQtdC90YLRgyDRgNC+0LbQtNC10L3QuNGPINGDINC00L7QvdC+0YjQtdC90L3Ri9GFINC00LXRgtC10LksINCwINGDINC90LXQtNC+0L3QvtGI0LXQvdC90YvRhSDQt9Cw0LrRgNGL0LLQsNC10YLRgdGPINC6INCy0YLQvtGA0L7QvNGDINC80LXRgdGP0YbRgyDQttC40LfQvdC4LiDQotCw0LrQttC1INCx0L7QutC+0LLRi9C1INGA0L7QtNC90LjRh9C60Lgg0LfQsNC00L3QuNC1INC60LvQuNC90L7QstC40LTQvdGL0LUg0Lgg0YHQvtGB0YbQtdCy0LjQtNC90YvQtSDQvtC90Lgg0Log0YDQvtC20LTQtdC90LjRjiDRg9C20LUg0LfQsNC60YDRi9GC0YsuINCf0L4g0YDQvtC00L3QuNGH0LrQsNC8INC80L7QttC90L4g0YHQtNC10LvQsNGC0Ywg0KPQl9CYINCz0L7Qu9C+0LLQvdC+0LPQviDQvNC+0LfQs9CwLCDQtdGB0LvQuCDRgNC+0LTQvdC40YfQvtC6INCy0YvQsdGD0YXQsNC10YIg0YLQviDRjdGC0L4g0LrQsNC60L7QtSDRgtC+INCy0L7RgdC/0LDQu9C10L3QuNC1LCDQvNC10L3QuNC90LPQuNGC0Ysg0Y3QvdGG0LXRhNCw0LvQuNGC0Ysg0L/QvtCy0YvRiNC10L3QuNC1INGH0LXRgNC10L/QvdC+0LPQviDQtNCw0LLQu9C10L3QuNGPLCDQsCDQtdGB0LvQuCDRgNC+0LTQvdC40YfQvtC6INCy0L/QsNC00LDQtdGCINGC0L4g0Y3RgtC+INC80L7QttC10YIg0LHRi9GC0Ywg0L7QsdC10LfQstC+0LbQuNCy0LDQvdC40LUuIDIp0KHQuNGB0YLQtdC80LAg0LrRgNC+0LLQvtC+0LHRgNCw0YnQtdC90LjRjyDQv9C70L7QtNCwINGA0LDQt9Cy0LjQstCw0LXRgtGB0Y8g0Log0LLQvtGB0YzQvNC+0LzRgyDQuCDQtNCy0LXQvdCw0LTRhtCw0YLQvtC5INC90LXQtNC10LvQtSDQstC90YPRgtGA0LjRg9GC0YDQvtCx0L3QvtCz0L4g0YDQsNC30LLQuNGC0LjRjy4g0JjQvNC10Y7RgtGB0Y8g0YHQstC+0Lgg0L7RgdC+0LHQtdC90L3QvtGB0YLQuCDQv9C+0LvRg9GH0LDQtdGC0YHRjyDQutGA0L7QstGMINGH0LXRgNC10Lcg0L/Qu9Cw0YbQtdC90YLRgyDQv9GD0L/QvtGH0L3Rg9GOINCy0LXQvdGDINC/0L7RgdGC0YPQv9Cw0LXRgiDQsiDQv9C10YfQtdC90Ywg0Lgg0L/QviDQvdC40LbQvdC10Lkg0L/QvtC70L7QuSDQstC10L3QtSDQstC/0LDQtNCw0LXRgiDQsiDQv9GA0LDQstC+0LUg0L/RgNC10LTRgdC10YDQtNC40LUg0LfQsNGC0LXQvCDRh9C10YDQtdC3INC+0LLQsNC70YzQvdC+0LUg0L7QutC90L4g0LIg0LvQtdCy0L7QtSDQv9GA0LXQtNGB0LXRgNC00LjQtSDQuCDQsiDQstC+0YHRhdC+0LTRj9GJ0YPRjiDQsNC+0YDRgtGDINC4INC/0L4g0LzQvtC30LPQvtCy0YvQvCDRgdC+0YHRg9C00LDQvCDQtNC+0YHRgtC40LPQsNC10YIg0LPQvtC70L7QstC90L7Qs9C+INC80L7Qt9Cz0LAuINCQINGB0LDQvNC+INGB0LXRgNC00YbQtSDQvtCx0YDQsNC30YPQtdGC0YHRjyDQuNC3ICDQvNC10LfQvtC00LXRgNC80Ysg0L3QsCDRgtGA0LXRgtGM0LXQuSDQvdC10LTQtdC70LUg0LLQvdGD0YLRgNC40YPRgtGA0L7QsdC90L7Qs9C+INGA0LDQt9Cy0LjRgtC40Y8g0Lgg0LXQs9C+INGB0L7QutGA0LDRidC10L3QuNGOINGB0L/QvtGB0L7QsdGB0YLQstGD0LXRgiDQtNGL0YXQsNGC0LXQu9GM0L3Ri9C1INC00LLQuNC20LXQvdC40LUg0L/Qu9C+0LTQsCDRhNC+0YDQvNC40YDRg9GO0YnQuNC10YHRjyDQvdCwINC00LLQtdC90LDQtNGG0LDRgtC+0Lkg0L3QtdC00LXQu9C1LCDRgtC+INC10YHRgtGMINC40Lcg0LfQsCDQvtGC0YDQuNGG0LDRgtC10LvRjNC90L7Qs9C+INC00LDQstC70LXQvdC40LUg0LIg0LPRgNGD0LTQvdC+0Lkg0L/QvtC70L7RgdGC0LgsINC60YDQvtCy0Ywg0L/QvtGB0YLRg9C/0LDQtdGCINCyINGB0LXRgNC00YbQtS4g0J7RgdC+0LHQtdC90L3QvtGB0YLQuCDRjdGC0L4g0L3QsNC70LjRh9C40LUg0L7QstCw0LvRjNC90L7Qs9C+INC+0LrQvdCwINC80LXQttC00YMg0L/RgNCw0LLQvtC8INC4INC70LXQstC+0Lwg0L/RgNC10LTRgdC10YDQtNC40Y/QvNC4LCDQvdCw0LvQuNGH0LjQtSDQsNGA0YLQtdGA0LjQsNC70YzQvdC+0LPQviDQv9GA0L7RgtC+0LrQsCDQkdCw0YLQsNC70L7QstCwINC/0YDQvtGC0L7QutCwINC80LXQttC00YMg0LvQtdCz0L7Rh9C90L7QuSDQsNGA0YLQtdGA0LjQtdC5INC4INCw0L7RgNGC0L7QuSwg0YLQviDQtdGB0YLRjCDQvdC1INGE0YPQvdC60YbQuNC+0L3QuNGA0YPRjtGJ0LjQuSDQvNCw0LvRi9C5INC60YDRg9CzINC60YDQvtCy0L7QvtCx0YDQsNGJ0LXQvdC40Y8sINC90LDQu9C40YfQuNC1INGB0LzQtdGI0LDQvdC90L7QuSDQutGA0L7QstC4INCx0L7Qu9C10LUg0LrQuNGB0LvQvtGA0L7QtCDRgdC+0LTQtdGA0LbQsNGJ0LDRjyDQutGA0L7QstGMINC/0L7RgdGC0YPQv9Cw0LXRgiDQsiDQv9C10YfQtdC90Ywg0Lgg0LPQvtC70L7QstC90L7QuSDQvNC+0LfQsywg0YLQsNC60LbQtSDRjdGC0L4g0L/RgNC10LLRi9GI0LXQvdC40LUg0LzQuNC90YPRgtC90L7Qs9C+INC+0LHRitC10LzQsCDQsdC+0LvRjNGI0L7Qs9C+INC60YDRg9Cz0LAg0L3QsNC0INC80LDQu9GL0Lwg0LrRgNGD0LPQvtC8INC60YDQvtCy0L7QvtCx0YDQsNGJ0LXQvdC40Y8g0Lgg0L7QtNC40L3QsNC60L7QstC+0LUg0LTQsNCy0LvQtdC90LjQtSDQsiDQu9C10LPQvtGH0L3QvtC5INCw0YDRgtC10YDQuNC4INC4INCw0L7RgNGC0LUsINGC0LDQutC20LUg0Y3RgtC+INC90LDQu9C40YfQuNC1INGE0LXRgtCw0LvRjNC90L7Qs9C+INCz0LXQvNC+0LPQu9C+0LHQuNC90LAg0LrQvtGC0L7RgNGL0Lkg0LjQvNC10LXRgiDQstGL0YHQvtC60L7QtSDRgdGA0L7QtNGB0YLQstC+INC6INC60LjRgdC70L7RgNC+0LTRgywg0YfQtdC8INCz0LXQvNC+0LPQu9C+0LHQuNC9INCy0LfRgNC+0YHQu9C+0LPQvi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76" table:style-name="ce1">
            <text:p>914676</text:p>
          </table:table-cell>
          <table:table-cell office:value-type="string" table:style-name="ce1">
            <text:p>english</text:p>
          </table:table-cell>
          <table:table-cell office:value-type="string" table:style-name="ce1">
            <text:p>Ticket 12&amp;lt;br /&amp;gt; 1. Between what sutures and bones of the skull is the Large fontanel located? Indicate the size and timing of its closure in a healthy child.&amp;lt;br /&amp;gt; 2. What are the most important features of fetal blood circulation? blood enters the liver, brain and upper limbs)&amp;lt;br /&amp;gt;</text:p>
          </table:table-cell>
          <table:table-cell office:value-type="string" table:style-name="ce1">
            <text:p>MS4pIFRoZSBsYXJnZSBmb250YW5lbCAsIGlzIGFsc28ga25vd24gYXMgdGhlIEFudGVyaW9yIGZvbnRhbmxlIG9yIGZyb250YWwgZnJvbnRhbmVsbGUgLiBpdCBpcyBsb2NhdGVkIGJldHdlZW4gdGhlIGZyb250YWwgYW5kIHBhcmlldGFsIGJvbmVzIG9mIHNrdWxsIC4gaXQgaXMgc2l0dXRhdGVkIGF0IHRoZSBpbnRlcnNlY3Rpb24gb2YgdGhlIGNvcm9uYWwgc2FnaXR0YWwgYW5kIGZyb250YWwgc3V0dXJlcyAuICAgICAgICAgICAgICAgICAgICAgICAgICAgICAgICAgICAgICAgICAgICAgIDxiciAvPg0KIHNpemUgYW5kIHRpbW1pbmcgb2YgY2xvc3VyZSBpbiBhIGhlYWx0aHkgY2hpbGQgOiAgICAgICAgICAgICAgICAgICAgICAgICAgICAgICAgICAgICAgICAgICAgICAgICAgICAgICAgICAgICAgICAgICAgICAgICAgICA8YnIgLz4NCjEpU2l6ZSAtIEluIGEgbm9ybWFsIGhlYWx0aHkgY2hpbGQgd2l0aCBubyBjb25naW5pdGFsIGRlZm9ybWF0aWVzICwgc2l6ZSBvZiBMYXJnZSBmb250YW5lbCBpcyBtZWFzdXJlZCBhYm91dCAyLjUgdG8gMy41IGNlbnRpbWV0ZXJzIGluIHRyYW5zdmVyc2UgZGlhbWV0ZXIgLCBhbmQgaW4gYW50ZXJpby1wb3N0ZXJpb3IgMiBjZW50aW1ldGVyIHRvIDQgY2VudGltZXRlciAuICAgICAgICAgICAgICAgICAgICAgICAgICAgICAgICAgICAgICAgICAgICAgICAgICAgICAgICAgICAgICAgICAgICAgICAgICAgICAgICAgICAgICAgICAgICAgICAgICAgICAgIDxiciAvPg0KMil0aW1pbmcgb2YgY2xvc3VyZSBpbiBhIGhlYWx0aHkgY2hpbGQgIDogdGhlIGZvbnRhbmVsIHVzdWFsbHkgY2xvc2UgYnkgMTIgdG8gMTggbW9udGhzIG9mIGFnZSBpbiBjaGlsZCAsIGhvd2V2ZXIgY2xvc3VyZSBjYW4gdmFyeSB3aXRoIHNvbWUgY2hpbGRlcmVucyBjbG9zaW5nIGFzIGVhcmx5IGFzIDkgbW9udGhzIG9yIGxhdGUgYXMgMjQgbW9udGhzIC4gdGhlIHNpemUgZ3JhZHVhbGx5IGRlY3JlYXNlIGFzIHRoZSBib25lcyBvZiB0aGUgc2t1bGwgZnVzZXMgdG9nZXRoZXIgLiAgICAgICAgICAgICAgICAgICAgICAgICAgICAgICAgICAgICAgICAgICAgICAgICAgICAgICAgICAgICAgICAgICAgICAgICAgICAgICAgICAgICAgICAgICAgICAgICAgICAgICAgICAgICAgICA8YnIgLz4NCjIuKSAxKSBwbGFjZW50YWwgY2lyY3VsYXRpb24gYW5kIG94eWdlbmF0aW9uIG9yZ2FuICAtSW4gYSBoZWFsdHkgYW5kIGRldmVsb3BpbmcgZmV0dXMgLCBveHlnZW50YWlvbiBkbyBub3Qgb2NjdXJzIGluIGx1bmdzIGFzIHRoZXkgYXJlIG5vdCBmdWxseSBkZXZlbG9wZWQgYW5kIGFyZSBub3QgY2FwYWJsZSBmb3IgcHJvcGVyIGZ1bmN0aW9uaW5nIGJ1dCBpdCBoYXBwZW5zIHRocm91Z2ggcGxhY2VudGEgYW5kIHVtYmljYWxsIGNvcmQgLCBhcyB0aGV5ICBhY3QgYXMgYSBiYXJyaWVyIGJldHdlZW4gdGhlIG1vdGhlciBhbmQgdGhlIGZldHVzICwgdGhleSBhcmUgc2VsZWN0aXZlIGJhcnJpZXIgYmV0d2VlbiBtYXRlcm5hbCBibG9vZCBhbmQgZmV0YWwgYmxvb2QgLiB0aHJvdWdoIHBsYWNlbnRhIGZldHVzIGlzIGFibGUgdG8gZ2V0IHRoZSBudXRyaWVudHMgcmVxdWlyZWQgZm9yIHRoZSBmdXJ0aGVyIGRldmVsb3BtZW50IG9mIGZldHVzICwgaXQgYWxzbyBhY3QgYXMgYSBwYXRoIGZvciBleGNyZXRpb24gZm9yIGZldHVzICwgYXMgYWxsIHRoZSBleGNyZXQgfChzdWNoIGFzIGNvMikgb2YgZmV0dXMgaXMgaXMgZXhjZWF0ZWQgdGhvdWdoIGl0IGFuZCB0aGVuIGV4Y3JldGVkIG91dCB0aHJvdWdoIG1hdGVybmFsIGJvZHkgLiAgICAgICAgICAgICAgICAgICAgICAgICAgICAgICAgICAgICAgICAgICAgICAgICAgICAgPGJyIC8+DQogICAgMikgZHVjdHVzIHZlbm91cyA6IGl0IGlzIHNodW50IGluIGZldHVzIGxpdmVyIHRoYXQgYWxsb3cgbGFyZ2UgcHJvcG9ydGlvbiBvZiBveHlnZW4gcmljaCBibG9vZCBmcm9tIHVtYmxpY2FsIGNvcmQgdG8gYnkgcGFzcyB0aGUgbGl2ZXIgYW5kIGdvIGRpcmVjdGx5IGluIHRoZSBibG9vZHN0cmVhbSBvZiBmZXR1cyB2ZW5hY2F2YSBkaXJlY3RseSBzdXBwbGluZyBsYXJnZSBhbW91bnQgb2Ygb3h5Z2VuIHJpY2ggYmxvb2QgdG8gYnJhaW4gYW5kIGhlYXJ0IC4gPGJyIC8+DQogICAgMykgZm9yYW1lbiBvdmFsZSA6IGl0IGlzIGEgaG9sZSBwcmVzZW50IG9uIHNlcHR1bSBiZXR3ZWVuIHJpZ2h0IGFuZCBsZWZ0IGF0cmlhIG9mIGZldGFsIGhlYXJ0IC4gaXRzIHB1cnBvc2UgaXMgdG8gYWxsb3cgcGFzc2FnZSBvZiBveHlnZW4gcmljaCBibG9vZCBkaXJlY3RseSBmcm9tIHJpZ2h0IGF0cml1bSB0byBsZWZ0IGF0cml1bSBvZiBmZXRhbCBoZWFydCBhcyB0aGUgaGVhcnQgb2YgZmV0dXMgaXMgc3RpbGwgZGV2ZWxvcGluZyAuIDxiciAvPg0KICAgIDQpIER1Y3R1cyBBbnRlcmlvdXMgOiBpdCBpcyBhIGJsb29kIHZlc3NlbCBjb25uZWN0aW5nIHB1bG1vbmFyeSBhcnRlcnkgdG8gYXJvdGEgb2YgZmV0dXMgYW5kIHZlbmEgY2F2YSAsIGFsbG93aW5nIGJsb29kIHRvIGJ5cGFzcyB0aGUgZmV0YWwgbHVuZ3MgYW5kIGRpcmVjdGx5IHRvIHRoZSBzeXN0ZW1pYyBjaXJjdWxhdGlvbiBvZiB0aGUgZmV0dXMgL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21" table:style-name="ce1">
            <text:p>915021</text:p>
          </table:table-cell>
          <table:table-cell office:value-type="string" table:style-name="ce1">
            <text:p>english</text:p>
          </table:table-cell>
          <table:table-cell office:value-type="string" table:style-name="ce1">
            <text:p>Ticket 12&amp;lt;br /&amp;gt; 1. Between what sutures and bones of the skull is the Large fontanel located? Indicate the size and timing of its closure in a healthy child.&amp;lt;br /&amp;gt; 2. What are the most important features of fetal blood circulation? blood enters the liver, brain and upper limbs)&amp;lt;br /&amp;gt;</text:p>
          </table:table-cell>
          <table:table-cell office:value-type="string" table:style-name="ce1">
            <text:p>MS5USEUgTEFSR0UgRk9OVEFORUwgQk9ORSBBTFNPIEtOT1dOTiBBUyBUSEUgQU5URVJJT1JSIEJPTkVFIElTIExPQ0FURUREIEJFVFdFRU4gVEhFIEZST05UQUwgQU5EIFBBUklFVEFMTCBCT05FIElOIFRIRSBORVdCT1JOU1MuVEhFIFNQRUNJRklDQyBTVVRVUkVTUyBJTkNMVURFUyBGUk9OVEFMTCBTQUdJVEFMTCBBTkQgVEhFIENPUk9OQUxMIFNVVFVSRVNTLklUIElTIERJQU1PTkREIFNIQVBFRCAyLTMgQ00gSU4gIFRIRSBBTlRFUklPLVBPU1RFUklPUiBESUFNRVRFUiBBTkQgMy00IENNIElOIFRSQU5TVkVSU0VFIERJQU1FVEVSUi5JVCBJUyBQUkVTRU5UVCBJTiBUSEUgTkVXQk9STk4gRFVSSU5HRyBUSEUgVElNRSBPRiBUSEUgQklSVEhIIEJVVCBBUyBUSEUgTkVXUUJPUk5OIFNUQVJUU1MgVE8gR1JPVyBJVCBHUkFEVUFMTFkgRElTQVBQRUFSU1MgQkVDQVVTRUUgSVQgTUVSR0VTIElOVE8gT05FLlRIRSBUSU1JTkcgT0YgSVRTIENMT1NVUkUgVkFSWSBJTiBJTkRJVklEVUFMTFMgQlVUIElOIE1PU1QgQ0FTRVNTIFRIRSBGT05UQU5FTEwgQk9ORSBJUyBDT01QRVRFTFlZIENMT1NFREQgRFVSSU5HRyBUSEUgQUdFIE9GIDIgWUVBUlNTLlJFR1VMQVJSIENIRUNLVVBQIEJZIFRIRSBQRURJQVRSSUNJQU5OIElTIE5FQ0VTQUFSWVkgQkVDQVVTRUUgSUYgVEhFUkUgSVMgUFJPQkxFTU0gSU4gVEhFIENMT1NVUkVFIE9GIFRIRSBCT05FIE9JVCBDQU4gTEVBRCBUTyBTRVZFUkFMIERJU0FCSUxJVElFU1MgQU5EIERFRk9STUFMSVRJRVNTIElOIFRIRSBDSElMTEQuQU5EIFJFR1VMQVJSIENIRUNLVVBQIElTIExTTyBORUNFU1NBUllZIEZPUiBUSEUgTk9STUFMIEtVTEwgREVWRUxPUE1FTlRUIE9GIFRIRSBDSElMREQuICAgICAgICAgICAgICAgICAgICAgICAgICAgICAgICAgICAgICAgICAgICAgICAgICAgICAgICAgICAgICAgICAgICAgICAgICAgICAgICAgICAgICAgICAgICAgICAgICAgICAgICAgICAgIDxiciAvPg0KMi5NT1NUIElNUE9SVEFOVFQgRkVBVFVSRVNTIE9GIEZFVEFMIEJMT09PRCBDSVJDVUxBVElJT04gQVJFOjxiciAvPg0KRFVDVFVTIFZFTk9TVVM6VEhJU1MgVkFTQ1VMQVJSIFNIVU5UIERJUkVDVFNTIEEgUE9SVElPTk4gT0YgT1hZR0VOQVRFREQgQkxPT0QgRlJPTSBUSEUgVU1CTElDQUxMIFZFSU5OIERJUkVDVExZWSBUTyBUSEUgSU5GRVJJSU9SUiBWRU5BIENBVkEgQllQQVNTSU5HIFRIRSBGRVRBTCBMSVZFUlIuVEhJUyBJUyBWRVJZIE5FQ0VTQUFSWSBBUyBJVCBTQVZFU1MgVEhFIFVOTkVDRVNBQVJZIFdBU1RFVyBPRiBOVVRSSUVOVFNTLjxiciAvPg0KRk9SQU1FTiBPVkFMRTpUSElTIE9QRU5JTk5HIElOIFRIRSBJTlRFUkFSWVRFUklBTEwgU0VQVFVNTSBBTE9PV1MgQkxPT0QgVE8gRkxPVyBESVJFQ1RMTFkgRlJPTU0gVEhFIFJJR0hUVCBBVFJJVU1NIFRPIFRIRSBMRUZUIEFUUklVTU0gSU4gVEhFIEZFVEFMTCBJVCBJUyBWRVJZIE5FQ0VTU0FSWVlZIEZPUiBUSEUgUFJPUEVSIEJMT09EIFNVUExMWSBJSU4gVEhFIEZFVFVTUy48YnIgLz4NCkRVQ1RVU1MgQVJURVJJT1NVUzpUSElTIFZFU1NFTCBDT05ORUNUUyBUSEUgUFVMTU9OQVJZWSBBUlRFUllZIFRPIFRIRSBERVNDRU5ESU5ORyBBT1JUQUEgQUxPV1dJTkdHIE1PU1QgT0YgVEhFIEJMT09EIEZST01NIFRIRSBSSUdIVFQgVkVOUklDTEVFIFRPIEJZUEFTUyBCWSBGRVRBTEwgTFVOR0dTIEFORCBGTE9XVyBESVJFQ1RJTFlZIElOVE8gVEhFIENJQ1JVTEFUSUlPTiBTWVNURU1NLjxiciAvPg0KVU1CTElDQUxMIEFSVEVSSUVTUyBBTkQgVkVJTjpUSEUgVU1CTElDQUxMIEFURVJJRVNTIENBUlJZIFVOT1hZR0VOQVRFRUQgQkxPT0QgRlJPTU0gVEhFIEZFVFVTUyBUTyBUSEUgUExBQ0VOVEEgQUFORCBUSEUgVU1CTElDQUxMIFZFSU4gQ0FSUklFU1MgT1hZR0VOQVRFREQgQkxPT0QgRlJPTSBUSEUgUExBQ0VOVEFBIFRPIFRIRSBGRVRVUy48YnIgLz4NClRIRVNFIEZFQVRVUkVTUyBDT0xMRUNUSVZFTExZIENPTlRSSUJVVEVTUyBUTyBUSEUgRUZGSUNJRU5UVCBFWENIQU5HRUUgT0YgTlVUUklFTlRTUyBBTkQgT1RIRVIgRVNTRU5USUFMTCBDT01QT05FTlRTUyBCRVRXRU4gVEhFIEZFVEFMIEFORCBUSEUgTU9USEVSUi5USEVTRSBTVFJVQ1RVUkVTUyBBUkUgVkVSWSBORUNFU1NBUlkgRk9SIFRISVMgRVhDSEFOR0VFIElGIFRIRVJFIElTIEFOWSBERUZFQ1QgSU4gVEhFU0UgU1RSVUNUVVJFRVMgVEhBTiBJVCBDQU4gTEVBRCBUTyBJTlNVRkZJQ0lFTlRUIFNVUExMWSBUTyBUSEUgRkVUVVMgV0hJQ0ggQ0FOIEhBVkUgSEFSTUZVTEwgQ09OU0VRVUVOQ0VTUy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62" table:style-name="ce1">
            <text:p>915062</text:p>
          </table:table-cell>
          <table:table-cell office:value-type="string" table:style-name="ce1">
            <text:p>english</text:p>
          </table:table-cell>
          <table:table-cell office:value-type="string" table:style-name="ce1">
            <text:p>Ticket 12&amp;lt;br /&amp;gt; 1. Between what sutures and bones of the skull is the Large fontanel located? Indicate the size and timing of its closure in a healthy child.&amp;lt;br /&amp;gt; 2. What are the most important features of fetal blood circulation? blood enters the liver, brain and upper limbs)&amp;lt;br /&amp;gt;</text:p>
          </table:table-cell>
          <table:table-cell office:value-type="string" table:style-name="ce1">
            <text:p>KCAxICkgdGhlIGxhcmdlIGZyb250YWwgYXNsbyBrbm93biBhcyB0aGUgYW50ZXJpb3IgZm9udGFuZWwgaXMgbG9jYXRlZCBiZXR3ZWVuIHRoZSBmcm9udGFsIGFuZCBwYXJpZXRhbCBib25lIG9mIHRoZSBza3VsbCBpdCBpcyB0aGUgbGFyZ3N0IGZyb250YWwgYW5kIGlzIGRpYW1vbmQgc2hhcGVkIGluIGEgaGVhbHRoeSBjaGlsZCB0aGUgbGFyZ2UgZnJvbnRhbHR5cGljYWxseSBtZWFzdXJlIGFib3V0IDIgdG8gNGNtIGF0IGl0cyAgd2lkZXN0IHBvaW50IHRoZSB0aW1pbmcgb2YgdGhlIGNsb3N1cmUgaXMgdmFyaWFibGUgYnV0IG9mdGVuIG9jY3VycyBieSAxOCBtb250aHMgb3IgMiB5ZWFyIG9mIGFnZSB0aGUgY2xvc3VyZSBvZiB0aGUgZnJvbnRhbCBpcyB0aGUgIG5vcm1hbCBwYXJ0IG9mIHRoZSBjcmFuaWFsIGJvbmUgZGV2ZWxvcG1lbnQgYW5kIG1hdHVyYXRpb24gKCAyICkgIGZlYXR1cmVzIG9mIHRoZSBmZXRhbCBibG9vZCBjaXJjdWxhdGlvbiA6dGhlIGZldGFsIGJsb29kIGNpcmN1bGF0aW9uIGRpZmZlcnMgc2lnbmlmaWNhbnQgZnJvbSB0aGUgcG9zdG5hdGFsIGNpcmN1bGF0aW9uIGFkYXBhdGluZyB0aGUgdW5pcWUgZW52aXJvbm1lbnQgb2YgdGhlIHdvLG1iIGtleSBmZWF0dXJlczogICggMSApOmR1Y3R1cyB2ZW5vdXN1cyA6IGNvbm5lY3QgdGhlIHVtYmxpY2FsIHZlaW4gdG8gdGhlIGluZmVyaW9yIHZlbmEgY2F2YSBhbGxvd3MgdGhlIG94eWdlbmF0ZWQgYmxvb2QgZnJvbSB0aGUgcGxhY2VudGEgdG8gdGhlIGZldGFsIGxpdmVyIGFuZCBmbG93IGRpcmVjdGx5IHRvIHRoZSBoZWFydCAoIDIgKSAgZm9yYW1lbiBvdnVsZSA6IGFuIG9wZW5pbmcgYmV0d2VlbiB0aGUgYXRyaWFsIG9mIHRoZWhlYXJ0IGFsbG93aW5nIGJsb29kIHRvIGJ5cGFzcyB0aGUgbm9uIGZ1bmN0aW9uYWwgZmV0YWwgbHVuZ3MgaXQgZGlyZWN0cyB0aGUgb3h5Z2VuYXRlZCBibG9vZCBmcm9tIHRoZSByaWdodCBhdHJpdW0gdG8gIHRoZSBsZWZ0IGF0cml1bSAuICggMyApIGR1dHVzIGFydGVpb3N1bSA6IGNvbm5lY3RzIHRoZSBwdWxtb25hcnkgYXJ0ZXJ5IHRvIHRoZSBhb3J0YSBmYWNpbGF0YXRpbmcgdGhlIHJlZGlyZWN0aW9uIG9mIHRoZSBibG9vZCAgYXdheSBmcm9tIHRoZSBub24gZnVuY3Rpb25hbCBmZXRhbCBsdW5ncyAgLiB1bWJsaWNhbCBjaXJjdWxhdGlvbiA6ICBibG9vZCBmbG93IHRvIGFuZCBmcm9tIHRoZSBwbGFjZW50YSB2aWEgdGhlIHVtYmxpY2FsIGFydGVyaWVzIGFuZCB2ZWluIC4gb3h5Z2VuIGFuZCBudXRyaWVudHMgYXJlIGV4Y2hhbmdlIGluIHRoZSBwbGFjZXRhIGFuZCBkZW94eWdlbmF0ZWQgYmxvb2QgcmV0dXJuIHRvIHRoZSBmZXR1cyAu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334" table:style-name="ce1">
            <text:p>915334</text:p>
          </table:table-cell>
          <table:table-cell office:value-type="string" table:style-name="ce1">
            <text:p>kazakh</text:p>
          </table:table-cell>
          <table:table-cell office:value-type="string" table:style-name="ce1">
            <text:p>Билет 13&amp;lt;br /&amp;gt; 1. Ерте жастағы балалардың организміндегі паратгормоның функциясы қандай?&amp;lt;br /&amp;gt; 2.Қүрсақ ішіңде өкпенің даму кезендері қандай? &amp;lt;br /&amp;gt;</text:p>
          </table:table-cell>
          <table:table-cell office:value-type="string" table:style-name="ce1">
            <text:p>MS4g0JXRgNGC0LUg0LbQsNGB0YLQsNKT0Ysg0LHQsNC70LDQu9Cw0LDQtNGL0qMg0L7RgNCz0LDQvdC40LfQvNGW0L3QtNC10LPRliDQv9Cw0YDQsNGC0LPQvtGA0LzQvtC90L3Ri9KjINGE0YPQvdC60YbQuNGP0YHRiy3SmtCw0LvSm9Cw0L3RiNCwINC80LDSo9GLINCx0LXQt9GWINKb0LDQu9Kb0LDQvdGI0LAg0LHQtdC30ZbQvdGW0qMg0LDRgNGC0pvRiyDQsdC10YLQutC10LnRliDQsdOp0LvRltCz0ZbQvdC00LUg0L7RgNC90LDQu9Cw0YHSm9Cw0L0g0L7QstCw0LvRjNC00Ysg0LTQtdC90LXRiNGW0LrRgtC10YAuINKa0LDQu9Kb0LDQvdGI0LAg0LzQsNKj0Ysg0LHQtdC30ZYg0pvQsNC90YjQsCDQv9Cw0YDQsNGC0LPQvtGA0LzQvtC90LTRiyDRiNGL0pPQsNGA0LDQtNGLLCDQvtC90YvSoyDQvdC10LPRltC30LPRliDRhNGD0L3QutGG0LjRj9GB0Ysg0LrQsNC70YzRhtC40Lkg0LbTmdC90LUg0YTQvtGB0YTQsNGCINC40L7QvdC00LDRgNGL0L3Ri9KjINC60L7QvdGB0LXQvdGC0YDQsNGG0LjRj9GB0Ysg0pvQsNC90LTQsCDRgdCw0pvRgtCw0L8g0YLSsdGA0LDQtNGLLiDQn9Cw0YDQsNGC0LPQvtGA0LzQvtC9INKb0LDQvSDRgdCw0YDRi9GB0YPRi9C90LTQsNKT0Ysg0LrQsNC70YzRhtC40Lkg0LjQvtC90LTQsNGA0YvQvdGL0qMg0LrQvtC90YHQtdC90YLRgNCw0YbQuNGP0YHRi9C9LCDQvtGB0YLQtdC+0LrQu9Cw0YHRgdGC0LDRgNC80LXQvSDRgdGD0LnQtdC6INGA0LXQt9C+0YDQsdGG0LjRj9GB0YvQvdGL0qMg0q/Qu9C60LXRjtGWINCw0YDSm9Cw0YHRi9C90LTQsCwg0YHQvtC90LTQsNC5INCw0psg0LrQsNC70YzRhtC40Lkg0LjQvtC90LTQsNGA0YvQvdGL0qMg0LHSr9C50YDQtdC6INKb0rHQsdGL0YDQu9Cw0YDRi9C90YvSoyDQtNC40YHRgtCw0LvRjNC00Ysg0LHTqdC70ZbQs9GW0L3QtNC1INKb0LDRgNKb0YvQvdC00Ysg0YDQtdCw0LHRhtC+0YDQsdGG0LjRj9GB0YvQvdGL0qMg0LDRgNKb0LDRgdGL0L3QtNCwINC20L7Sk9Cw0YDRi9C70LDRgtCw0LTRiy4g0J/QsNGA0L/RgtCz0L7RgNC80L7QvSDQv9GA0L7QutGB0LjQvNCw0LvRjNC00Ysg0LrQsNC90LDQu9GI0LDQu9Cw0YDQtNCwINC60LDQu9GM0YbQuNGC0YDQuNC+0LvRjNC00YvSoyDRgtKv0LfRltC70YPRltC9INGB0YLRg9C80YPQu9GP0YbQuNGP0LvQsNC50LTRiyzRgdC+0L3QtNGL0pvRgtCw0L0g0ZbRiNC10LrRgtC1INC60LDQu9GM0YbQuNC50LTRi9KjINGC0LDRgNGL0LvRg9GLINC60q/RiNC10LnQtdC00ZYuINCR0ZbRgNCw0psg0LrQsNC70YzRhtC40LnQtNGL0L0g0LHSr9C50YDQtdC60YLQtdCz0ZYg0YDQtdC30L7RgNCx0YbQuNGP0YHRiyAyLjI0INC/0YDQvtGG0LXQvdGCINCx0L7Qu9Cw0LTRiy7QntC7INCw0LnRgtCw0YDQu9GL0pvRgtCw0Lkg0LrTqdC/INC10LzQtdGBLiDQkNC7INC/0LDRgNCw0YLQs9C+0YDQvNC+0L3QvdGL0qMg0LrQsNC70YzRhtC40YLRgNC40L7RjNC00YvSoyDRgdC40L3RgtC10LfRltC90LUg0pvQsNGC0YvRgdGL0L8g0L7QvdGLINGW0YjQtdC60YLQtdCz0ZYg0Y/Sk9C90Lgg0LrQsNC70YzRhtC40LTRi9KjIDQwINC/0YDQvtGG0LXQvdGC0LrQtSDQtNC10LnRltC9INGB0ZbSo9GW0YDQu9GD0ZbQvdC1INKv0LvQutC10L0g0q/Qu9C10YEg0pvQvtGB0LDQtNGLLiDSsNC30LDSmyDRg9Cw0pvRi9GCINCx0rHQuyDQs9C+0YDQvNC+0L3QvdGL0qMg0LbQtdGC0LrRltC70ZbQutGB0ZbQt9C00ZbQs9GWINGB0q/QudC10LrRgtC10YDQtNGW0qMg0L7RgdGC0LXQvtC70LjQt9GW0L3QtSDTmdC60LXQu9C10LTRli4g0JrQsNC70YzRhtC40LTRltKjINC00LXSo9Cz0LXQudGW0L3RltKjINGC06nQvNC10L3Qs9C00LXRg9GWINC/0LDRgNCw0YLQs9C+0YDQvNC+0L0g0YHQuNC90YLQtdC30ZbQvSDRgdGC0LzRg9C70YzQtNCw0LnQtNGLLiAg0J/QsNGA0LDRgtCz0L7RgNC80L7QvSDQsdOp0LvRltC90YPRltC90ZbSoyDQsdKx0LfRi9C70YvRgdGL0L3Ri9KjIDIg0LbQsNKT0LTQsNC50YvQvSAg0pvQsNGA0LDRgdGC0YvRgNCw0LzRi9C3LiDQntC70LDRgCDQs9C40L/QviDQttOZ0L3QtSDQs9C40L/QtdGA0YLQtdGA0LjQvtC3LiDQldC60ZYg0LbQsNKT0LTQsNC50LTQsNC00LAg0LrTqdC/0YLQtdCz0LXQvSDQv9C+0YLQvtC70L7Qs9C40Y/Qu9Cw0YDSk9CwINOZ0LrQtdC70LXQtNGWLtKa0LDQu9Kb0LDQvdGI0LDQvNCw0qPRiyDQsdC10LfRltC90ZbSoyDQtNCw0LzRg9GLIDPRiNGWIDTRiNGWINC20LXQu9Cx0LXQt9C10Log0pvQsNC70YLQsNGI0LDQu9Cw0YDRi9C90LDQvSDQsdCw0YHRgtCw0LvQsNC00YssINC20q/QutGC0ZbQu9GW0LrRgtGW0qMgNS020YjRiyDQsNC/0YLQsNGB0YvQvdC00LAg0LHQtdC30LTRltKjINGC0ZbQvdGWINKb0LDQu9GL0L/RgtCw0YHQsCDQsdCw0YHRgtCw0LnQtNGLLiDQotOp0LzQtdC90LPRliDQsdOp0LvRltCz0ZYgM9GI0ZYg0pvQsNC70YLQsNGI0LDQtNCw0L0g0LbQvtKT0LDRgNKT0Ysg0LHTqdC70ZbQs9GWIDTRiNGWINKb0LDQu9GC0LDRiNCw0LTQsNC9INCx0LDRgdGC0LDRgyDQsNC70LDQtNGLLiA3LTnRiNGLINCw0L/RgtCw0LvQsNGA0LTQsCDQvtC7INGE0YPQvdGG0LjRj9C90LDQu9C00LDQvdGL0L8g0LHQsNGB0YLQsNC50LTRiy4g0KLQvtC70YvSmyDQttKx0LzRi9GBINCw0YLSm9Cw0YDQsCDQsNC70YPRiyAxNNGI0ZYg0LDQv9GC0LDQtNCwINCx0LDRgdGC0LDQu9Cw0LTRiywg0Y3QvNCx0YDQvtC90LDQu9C00Ysg0LTQsNC80YMg0LrQtdC30LXSo9GWINKb0LDQu9Kb0LDQvdGI0LDQvNCw0qPRiyDQsdC10LfRltC90ZbSoyDSm9Cw0LvRi9C/0YLQsNGB0YvQvyDQvtC90YvSoyDSm9GL0LfQvNC10YIg0LDRgtKb0LDRgNCwINCw0LvRg9GL0L3QsCDQtNC10LnRltC9INC20LDSk9C00LDQuSDQttCw0YHQsNC70LDQtNGLLiDQkNC7INGC0YPRi9C70pPQsNC90L3QsNC9INC60LXQudGW0L0gMi0zINC20LDRgdGC0LAg0LTQsNC80YPRiyDQsNGP0pvRgtCw0LvQsNC00Ysu0prQvtGA0YvRgtCwINC60LXQu9C1INCx0LDQu9Cw0L3Ri9KjINC00LDQvNGD0Ysg0LbQsNC70L/RiyDTqdGB0YMg0LHQsNGA0YvRgdGL0L3QtNCwLCDQsdCw0LvQsNC90YvSoyDRgdKv0LnQtdC60YLQtdGA0ZYsINC00LXQvdC1INCx0ZbRgtGW0LzRliwg0LHQvtC50YssINGB0LDQu9C80LDSk9GLINC00rHRgNGL0YEg0pvQsNC70YvQv9GC0LDRgdGD0YvQvdCwINC/0LDRgNCw0YLQs9C+0YDQvNC+0L3QtNCw0YDQtNGL0qMg0LzQsNKj0YvQt9GLINOp0YLQtSDQt9C+0YAuPGJyIC8+DQoyLiDQrdC80LHRgNC40L7Qs9C10L3QtdC30LTQtdCz0ZYg06nQutC/0LXQvdGW0qMg0LTQsNC80YPRi9C9INCx0ZbRgNC90LXRiNC1INC60LXQt9C10qPQs9C1INCx06nQu9GD0LPQtSDQsdC+0LvQsNC00YstIDHRiNGWINCt0LzQsdGA0LjQvtC90LDQu9GM0LTRiyDQutC10LfQtdKjKDEtNiDQsNC/0YLQsCktINCR0rHQuyDQutC10LfQtdKj0LTQtSDQsNC70LTRi9Kj0pPRiyDRltGI0LXQutGC0LXQvSDRgtGL0L3Ri9GBINCw0LvRgyDQtNC40LLQtdGA0YLQuNC60YPQu9GLINKb0LDQu9GL0L/RgtCw0YHQsCDQsdCw0YHRgtCw0LnQtNGLLCDQvtC7INCx0YDQvtC90YXRgtGLINC205nQvdC1INOp0LrQv9C10L3RliDQsdC10YDQtdC00ZYuINOo0LrQv9C1INCx0q/RgNGI0ZbQutGC0LXRgNGWINGC0YvQvdGL0YEg0LDQu9GDINC00LjQstC10YDRhtC40LrRg9C70L7QvdGL0L3Ri9KjINOp0YHRltC90LTRltC70LXRgNGWINGC0q/RgNGW0L3QtNC1INC606nRgNGW0L3QtdC00ZYuINCa0LXQu9C10YHRliDQutC10LfQtdKjINC/0YHQtdCy0LTQvtCz0LvQsNC90YPQu9GP0YDQu9GL0psg0LrQtdC30LXSoy0gNi0xNiDQsNC/0YLQsNC90Ysg0pvQsNC80YLRi9C00YsuINCR0rHQuyDQutC10LfQtdKj0LTQtSDTqdC60L/QtdC90ZbSoyDTqdGC0LrRltC30LPRltGIINGC0YvQvdGL0YEg0LbQvtC70LTQsNGA0YssINGB0L7QvdGL0qMg0ZbRiNGW0L3QtNC1INCx0YDQvtC90YXQuNC+0LvQsNC70LDQu9Cw0YAg0LzQtdC9INGC0LXRgNC80LjQvdCw0LvQtNGL0psg0LHRgNC+0L3RhdC40L7Qu9Cw0LvQsNC70LDRgCDQtNCw0LzQuNC00YsuINOo0LrQv9C1INKx0LvQv9Cw0YHRiyDQsNKT0LDRiCDRgtOZ0YDRltC30LTQtdGBINKb0rHRgNGL0LvRi9C8INGC0q/Qt9C1INC+0YLRi9GA0YvQvywg0pvQsNGA0pvRi9C90LTRiyDRgtCw0YDQvNCw0pvRgtCw0LvQsCDQsdCw0YHRgtCw0LnQtNGLLiDQotKv0YLRltC60YjQtdC70ZbQui0g0LrQtdC30LXSoyAxNi0yMNCw0L/RgtCw0L3RiyDSm9Cw0LzRgtC40LTRiy0g0JHSsdC7INC60LXQt9C10qPQtNC1INGC0LXRgNC80LjQvdCw0LTRi9KbINCx0YDQvtC90YXQuNC+0LvQsNC70LDRgNC70LDRgCDQkNC70YzQstC40L7Qu9Cw0LvQsNGA0LzQtdC9INKb0LDQv9GC0LDQu9KT0LDQvSDRgtGL0L3Ri9GBINCw0LvRgyDQsdGA0L7QvdGF0LjQvtC70LDQu9Cw0YDRi9C90LAg0LHTqdC70ZbQvdC10LTRli4g0JDQu9GM0LLQtdC+0LvQsNC70LDRgNC00YvSoyDQsNC50L3QsNC70LDRgdGL0L3QtNCwINKb0LDQvSDRgtCw0LzRi9GA0LvQsNGA0YvQtNCwINKb0LDQu9GL0L/RgtCw0YHQsCDQsdCw0YHRgtCw0LnQtNGLLiDQodCw0LrQutGD0LvRj9GA0LvRi9KbINC60LXQt9C10qMgLTI2INCw0L/RgtCwLSDQsdKx0Lsg0LrQtdC30LXSo9C00LUg0LDQu9GM0LLQuNC+0LvQsNC70LDRgCDQsdOp0LvRltC90YPQtNGWINC20LDQu9KT0LDRgdGC0YvRgNCw0LTRiyDQttOZ0L3QtSDQs9Cw0Lcg0LDQu9C80LDRgdGDINKv0YjRltC9INKv0LvQutC10L3RltGA0LXQuiDQsdC10YLRgtGWINKb0LDQvNGC0LDQvNCw0YHRi9C3INC10YLQtdC00ZYuINCh0LDQutC60YPQu9GP0YDQu9GL0psg0LrQtdC30LXSoyDRjdC80LHRgNCw0L3QuNCw0LvQtNGLINC00LDQvNGD0LTRi9C9INC10qMg0L3QtdCz0ZbQt9Cz0ZYg0LzQsNC90YvQt9C00Ysg0LrQtdC30LXSo9C00LXRgNC00ZbSoyDQsdGW0YDRli4g0KHQtdCx0LXQsdC1INCx0YPQuyDQutC10LfQtdC90LTQtSDRgdGD0YDRhNCw0LrRgtCw0L3RgtGC0YvQvSDSm9Cw0LnRgtCwINC20LDQvdCw0YDRg9C80LXQvSDQsdOp0LvRltC90YPRliDQttKv0YDQtdC00ZYuINCQ0LvRjNCy0LXQvtC70LDQu9Cw0YDQtNGL0qMg0LDQudC90LDRgdGL0L3QtNCw0pPRiyDQutCw0L/QuNC70Y/RgNC70YvRgNC00LAg0LrTqdCx0LXQudGW0L8sINCw0LvRjNCy0LXQvtC70LAg0pvQsNCx0YvRgNKT0LDQu9Cw0YDRi9C80LXQvSDRgtGL0pPRi9C3INCx0LDQudC70LDQvdGL0YHQsNC00YsuINCQ0LvRjNCy0LXQvtC70Y/RgNC70YvSmyDQutC10LfQtdKjLSAo0YLRg9GL0LvSk9Cw0L3QvdCw0L0gOCDQttCw0YHSm9CwINC00LXQudGW0L0pIC0g0LHSsdC7INC60LXQt9C10qPQtNC1INCw0LvRjNCy0LXQvtC70LDQu9Cw0YAg0LbQtdGC0ZbQu9GD0LTRliDQttCw0LvSk9Cw0YHRgtGL0YDQsNC00Ysg0LbTmdC90LUg0L7Qu9Cw0YDQtNGL0qMg0YHQsNC90Ysg0LDRgNGC0LDQtNGLLCDRiNCw0LzQsNC80LXQvSAyLDMg0LbQsNGB0YLQsCDQvNCw0LrRgdC40LzQsNC70YzQtNGLINGB0LDQvdGL0L3QsCDQttC10YLQtdC00ZYuINCR0rHQuyDQutC10LfQtdKj0LTQtSDTqdC60L/QtdC00LUg0q/Qu9C60LXQudC1INCx0LXRgNC10LTRliwg0LXRgNGC0LUg0LXRgdC10LnQs9C10L0g0LrQtdC30LTQtSDQtdGA0LXRgdC10LrRgtC10YDQs9C1INC20LXRgtC10LTRli7SmtKx0YDRgdCw0psg0ZbRiNGW0LvRltC6INC00LDQvNGD0YvQvdGL0qMgN9GI0ZYg0LDQudGL0L3QtNCwINGC0YvQvdGL0YEg0LDQu9GD0pPQsCDSm9Cw0YLRi9GB0LDRgtGL0L0g0LzQsNKj0YvQt9C00LAg0LfQsNGC0YLRi9KjINCx0ZbRgNGWINGB0YPRgNGE0LDQutGC0LDQvdGCINGB0LjQvdGC0LXQt9C00LXQu9C1INCx0LDRgdGC0LDQudC00Ysu0JHSsdC7INC30LDRgiDQsNC70YzQstC10L7Qu9Cw0YDQtNGL0qMg0LHQtdGC0LrRliDQutC10YDQvdC10YPRltC9INCw0LfQsNC50YLRi9C/LCDQsNC70YzQstC10L7Qu9Cw0LvQsNGA0LTRi9KjINCx0ZbRgCDQsdGW0YAg0LHRltGA0ZbQvdC1INC20LDQsdGL0YHRi9C/LNKb0LDQsdGL0YHRi9C/INKb0LDQu9C70LTQsNC9INGB0LDSm9GC0LDQudGC0YvQvSDQu9C40L/QuNC00YLQtdGA0LTQtdC9INKb0rHRgNCw0LvSk9Cw0L0g0LfQsNGCINCx0L7Qu9GL0L8g0YLQsNCx0YvQu9Cw0LTRiy4g0KHQvtC7INKv0YjRltC9IDfQsNC50LvRi9KbINCx0L7Qu9GL0L8g0YLRg9GL0LvSk9Cw0L0g0LHQsNC70LDQvdGL0qMg06nQvNGW0YAg0YHSr9GA0YMg0LzSr9C80LrRltC90YjRltC70ZbQs9GWIDjQsNC5INCx0L7Qu9GL0L8g0YLRg9GL0LvSk9Cw0L0g0LHQsNC70LDQtNCw0L0g0LrTqdCx0ZbRgNC10Log0LHQvtC70LDQtNGL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07" table:style-name="ce1">
            <text:p>915307</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MS7QpNGD0L3QutGG0LjQuCDQv9Cw0YDQsNGC0LPQvtGA0LzQvtC90LA6IDEt0YDQtdCz0YPQu9GP0YbQuNGPINGD0YDQvtCy0L3RjyDQutCw0LvRjNGG0LjRjyzRgi7QuiDQsiDRgNCw0L3QvdC10Lwg0LLQvtC30YAuINC/0YDQvtC40YHRhdC+0LTQuNGCINCw0LrRgtC40LLQvdGL0Lkg0YDQvtGB0YIg0YHQutC10LvQtdGC0LAsINC/0LDRgNCw0YLQs9C+0YDQvNC+0L0g0YDQtdCz0YPQuy4g0YPRgNC+0LLQtdC90Ywg0LrQsNC70YzRhtC40Y8g0LIg0LrRgNC+0LLQuCzRjdGC0L4g0LLQsNC20L3QviDQtNC70Y8g0LzQuNC90LXRgNCw0LvQuNC30LDRhi4g0LrQvtGB0YLQtdC5LCDQtdGJ0LUg0LrQsNC70YzRhtC40Lkg0YPRh9Cw0LLRgdGC0LLRg9C10YIg0LIg0L/QtdGA0LXQtNCw0YfQtSDQvdC10YDQstC90YvRhSDQuNC80L/Rg9C70YzRgdC+0LIg0Lgg0YHQvtC60YDQsNGJLiDQvNGL0YjRhiwg0L3QviDRg9GA0L7QstC10L3RjCDQtdCz0L4g0LTQvtC70LbQtdC9INCx0YvRgtGMINC90L7RgNC80LDQu9GM0L3Ri9C8LjIu0J/QsNGA0LDRgtCz0L7RgNC80L7QvSDQsNC60YLQuNCyLiDQvtGB0YLQtdC+0LrQu9Cw0YHRgtGLLNGN0YLQuCDQutC70LXRgtC60Lgg0LrQvtGC0L7RgNGLINGA0LDQt9GA0YPRiNCw0Y7RgiDQutC+0YHRgi4g0YLQutCw0L3RjCDRjdGC0L4g0YHQv9C+0L7QsdGB0YLQstGD0LXRgiDQstGL0LTQtdC70LXQvdC40Y4g0LrQsNC70YzRhtC40Y8g0LjQtyDQutC+0YHRgtC4INCyINC60YDQvtCy0Yws0YLQtdC8INGB0LDQvNGL0Lwg0L/QvtC00LTQtdGA0LbQuNCy0LDRgtC10YHRjyDQvdC+0YDQvC4g0YPRgNC+0LLQtdC90YwuINCSINC/0YDQvtGG0LXRgdGB0LUg0YDQvtGB0YLQsCDQuCDRhNC40Lcu0LDQutGC0LjQstC90L7RgdGC0Lgg0L/QsNGA0LDRgtCz0L7RgNC80L7QvSDQv9C+0LzQvtCz0LDQtdGCINCw0LTQsNC/0YLQuNGA0L7QstCw0YLRjCDQutC+0YHRgtC90YPRjiDRgdC40YHRgtC10LzRgyDQuiDQuNC30LzQtdC90LXQvdC40Y/QvCwg0Y3RgtC+INCy0LDQttC90L4uMy7Qo9Cy0LXQu9C40YfQtdC90LjQtSDRgNC10LDQsdGB0L7RgNCx0YPQuNC4INCh0LAg0LIg0L/QvtGH0LrQsNGFLCDQv9Cw0YDQsNGC0LPQvtGA0LzQvtC9INGB0L3QuNC20LDQtdGCINGN0LrRgdC60YAuINC60LDQu9GM0YbQuNGPLCDRg9Cy0LXQuy4g0YDQtdCw0LHRgdC+0YDRhtC40Y4g0KHQsCDQsiDQv9C+0YfQutCw0YUsINCwINGC0LDQutC20LUg0L/RgNC10LTQvtGC0LIuINC10LPQviDQv9C+0YLQtdGA0Y4g0YEg0LLQvtC00L7QuS4gNC7QodC40L3RgtC10Lcg0LDQutGC0LjQstC90L7QuSDRhNC+0YDQvNGLINCy0LjRgi7QlCzQn9CT0YHRgtC40LzRg9C70LjRgNGD0LXRgiDQv9GA0LXQvtCx0YDQsNC30L7QstCw0L3QuNC1INCy0LjRgiDQlCDQsiDQtdCz0L4g0LDQutGC0LjQstC90YPRjiDRhNC+0YDQvNGDINC60LDQu9GM0YbQuNGC0YDQuNC+0LvQsCzQtNCw0L3QvdCw0Y8g0LDQutGC0LjQsi4g0YTQvtGA0LzQsCDRg9Cy0LXQuy4g0LDQsdGB0L7RgNCx0YbQuNGOINC80LjQvdC10YDQsNC70L7QsiDQsiDQutC40YjQtdGH0L3QuNC60LUsINCh0LAg0Lgg0YTQvtGB0YTQvtGA0LAsINGN0YLQviDQv9C+0LfQstC+0LsuINC00LXQu9Cw0YLRjCDQuNGFINC00L7RgdGC0YPQv9C90YvQvNC4INC00LvRjyDQuNGB0L8uINCyINC+0YDQs9Cw0L3QuNC30LzQtS4gNS7QoNC10LPRg9C70Y/RhtC40Y8g0YPRgNC+0LLQvdGPINGE0L7RgdGE0L7RgNCwLCDQv9Cw0YDQsNGC0LPQvtGA0LzQvtC9INGD0LLQtdC7LiDQstGL0LLQtdC00LXQvdC40LUg0YTQvtGB0YTQvtGA0LAg0YEg0LzQvtGH0L7QuSwg0Y3RgtC+INC/0L7QvNC+0LPQsNC10YIg0L/QvtC00LTQtdGA0LbQuNCy0LDRgtGMINCx0LDQu9Cw0L3RgSDQvNC10LbQtNGDINCh0LAg0Lgg0YTQvtGB0YTQvtGA0LAgINC90LXQvtCx0YXQvtC0LiDQtNC70Y8g0LfQtNC+0YDQvtCy0YzRjyDQutC+0YHRgtC10LkuINCd0LDQv9GA0LjQvNC10YAsINC40LfQsdGL0YLQvtC6INC40LvQuCDQvdC10LTQvtGB0YLQsNGC0L7QuiDQs9C+0YDQvNC+0L3QsCwg0LzQvtC20LXRgiDQv9GA0LjQstC10YHRgtC4INC6INCz0LjQv9C+0L/QsNGA0LDRgtC40YDQtdC+0LfRgywg0LPQuNC/0L7QutCw0LvRjNGG0LjQtdC80LjQuCzQv9C+0YHQu9C10LTRgdGC0LLQuNC1OtC80L7QttC10YIg0L/RgNC40LLQtdGB0YLQuCDQuiDQvNGL0YjQtdGH0L3Ri9C8INGB0YPQtNC+0YDQvtCz0LDQvCDQuCDQtNGALtC90LDRgNGD0YjQtdC90LjRj9C8LiDQk9C40L/QtdGA0L/QsNGA0LDRgtC40YDQtdC+0LcgLdC40LfQsdGL0YLQvtGH0L3QvtC1INGA0LDQt9GA0YPRiC4g0LrQvtGB0YLQvdC+0Lkg0YLQutCw0L3QuCDQuCDQv9C+0LLRi9GILiDQodCwINCyINC60YDQvtCy0Lgs0Y3RgtC+INC90LXQs9Cw0YLQuNCy0L3QviDRgdC60LDQt9GL0LLQsNC10YLRgdGPINC90LAg0YDQtdCx0LXQvdC60LUuPGJyIC8+DQo8YnIgLz4NCiAyLiDQldGB0YLRjCA1INGB0YLQsNC00LjQuSDRgNCw0LfQstC40YLQuNGPINC70LXQs9C60LjRhSDQsiDRjdC80LHRgNC40L7Qs9C10L3QtdC30LUuPGJyIC8+DQoxINGB0YLQsNC00LjRjy3RjdC80LHQuNC+0L3QsNC70YzQvdCw0Y8gNC03INC90LXQtNC10LvRjCwg0L3QsCDRjdGC0L7QuSDRgdGC0LDQtNC40Lgg0LjQtyDQstC10L3RgtGA0LDQuy4g0YHRgtC10L3QutC4INC60LjRiNC60Lgg0L/QtdGA0LXQtNC90LXQuSwg0LLRi9GA0LDRgdGC0LDQtdGCINGA0LXRgdC/0LjRgC4g0LTQuNCy0LXRgNGC0LjQutGD0Lsg0LvQuNCx0L4g0LbQtSjQu9C10LPQvtGH0L3Ri9C5INC30LDRh9Cw0YLQvtC6KSwg0L7QvSDQsdGL0YHRgtGA0L4g0YDQsNGB0YLQtdGCINC60LDRg9C00LDQu9GM0L3QviDQuCDQtNCw0LvQtdC1INGA0LDQt9C00LXQu9GP0LXRgtGB0Y8g0L3QsCAyINC30LDRh9Cw0YLQutCwINCz0LvQsNCy0L0uINCx0YDQvtC90YXQvtCyLCDQsiDQutC+0L3RhtC1OtGE0L7RgNC80LjRgC4g0LfQsNGH0LDRgtC60Lgg0LTQvtC70LXQstGL0YUg0LHRgNC+0L3RhdC+0LIsINGC0LrQsNC90Ywg0LvQtdCz0LrQvtCz0L4g0L3QsNC/0L7QuNC90LDQtdGCINC20LXQu9C10LfQuNGB0YLRg9GOLiA8YnIgLz4NCiAgMi4g0J/RgdC10LLQtNC+0LbQtdC70LXQt9C40YHRgtCw0Y8gOC0xNiDQvdC10LQsINGE0L7RgNC80LjRgC4g0LLRgdC10YUg0L7RgdC90L7QstC90YvRhSDRjdC70LXQvNC10L3RgtC+0LIg0LTRi9GFLtC/0YPRgtC10LksINC/0L7RgdC70LUg0L7Qv9C70L7QtNC+0YLQstC+0YAuINGE0L7RgNC80LjRgC4g0LLRgdC1INCx0YDQvtC90YXQvtC70LXQs9C+0YfQvdGL0LUg0YHQtdCz0LzQtdC90YLRiyzQsNC70YzQstC10L7Qu9GP0YDQvdC+LdC60LDQv9C40LsuINC80LXQvNCx0YDQsNC90LAg0L3QtSDRgdGE0L7RgNC80LjRgC4g0YLRg9GCINC20LUg0L/RgNC+0LTQvtC70LYuINCy0LXQvdGC0LLQu9C10L3QuNC1INCx0YDQvtC90YXRgtCw0LvRjNC90L7Qs9C+INC00LXRgNC10LLQsCDQstC/0L7Qu9GMINC00L4g0L7QsdGA0LDQt9C+0LLQsNC90LjQtSDRjNGC0LXRgNC80LjQvdCw0LvRjNC90YvRhSDQsdGA0L7QvdGF0LjQvtC7LiDQm9C10LPQutC+0LUg0L3QsCDRjdGC0L7QuSDRgdGC0LDQtNC40Lgg0LPQuNGB0YLQvtC70L7Qsy4g0L3QsNC/0L7QvNC40L3QsNC10YIg0LbQtdC70LXQt9GDLCDRgNCw0LfQstC40LIuINGB0L7RgdGD0LQu0YHQtdGC0Ywg0LvQtdCz0LrQuNGFLCDQtNGL0YXQsNGC0LXQu9GM0L3Ri9C1INC+0YLQtNC10LvRiyDQtdGJ0LUg0L3QtSDRgdGE0L7RgNC80LjRgNC+0LLQsNC90YssINC/0L7RjdGC0L7QvNGDINGB0LDQvNC+0YHRgtC+0Y/RgtC10LvRjNC90L7QtSDQtNGL0YXQsNC90LjQtSDQvdC1INCy0L7Qt9C80L7QttC90L4uPGJyIC8+DQozINGB0YLQsNC00LjRjy4g0JrQsNC90LDQu9C40LrRg9C70Y/RgNC90LDRjyDRgdGC0LDQtNC40Y8sIDE3LTI2INC90LXQtNC10LvRjywg0YLQtdGA0LzQuNC90LDQu9GM0L3Ri9C1INCx0YDQvtC90YXQuNC+0LvRiyDQtNC10LvRj9GC0YHRjyDQvdCwINGA0LXRgdC/0LjRgNCw0YIuINCx0YDQvtC90YXQvtC70Ysg0LjQtyDQutC+0YLQvtGA0YvRhSDRhNC+0YDQvNC40YAu0LDQu9GM0LLQtdC+0LvRj9GA0L3Ri9C1INGF0L7QtNGLINC4INC80LXRiNC+0YfQutC4LCDQsiDRjdC/0LjQtdC70LjQuCDQv9C+0Y/QsNC70Y/RjtGC0YHRjyDQv9C90LXQstC80L7QvtGG0LjRgtGLIDIg0YLQuNC/0LAsINGB0LjQvdGC0LXQty7RgdGD0YDRhNCw0LrRgtCw0L3Rgiwg0Log0LrQvtC90YbRgyDRgdGC0LDQtNC40LgtINC/0LvQvtC0INC20LjQt9C90LXRgdC/0L7RgdC+0LHQtdC9LCDRhdC+0YLRjyDQu9C10LPQutC40LUg0L3QtSDQv9C+0LvQvdC+0YHRgtGM0Y4g0LfRgNC10LvRi9C1LCDRgdGD0YDRhNCw0LrRgtCw0L3RgtCwINC90LXQtNC10L7RgdGC0LDRgtC+0YfQvdC+LjxiciAvPg0KIDQg0YHRgtCw0LTQuNGPLSDQodCw0LrRg9C70Y/RgNC90LDRjywgMjctMzYg0L3QtdC00LXQu9GPLCDQutC+0Lst0LLQviDQsNC70YzQstC10L7Qu9GP0YDQvdGL0YUg0LzQtdGI0LrQvtCyINGD0LLQtdC70LjRhy4s0YTQvtGA0LzQuNGALiDRgtC+0L3QutC40Lkg0LDRjdGA0L7Qs9C10LzQsNGC0LjRh9C10YHQutC40Lkg0LHQsNGA0YzQtdGAINGN0YLQviDRgdC/0L7QvtCx0YHRgtCy0YPQtdC60YIg0LPQsNC30L7QvtCx0LzQtdC90YMsINC/0YDQvtC00L7Qu9C20LDQtdGC0YHRjyDQtNC40YTRhNC10YDQtdC90YYuINC/0L3QtdCy0LzQvtGG0LjRgtC+0LIg0Lgg0L/RgNC+0LTRg9C60YbQuNC4INGB0YPRgNGE0LDQutGC0LDQvdGC0LAsINC6INC60L7QvdGG0YM60LvQtdCz0LrQuNC1INC00L7RgdGC0LjQs9Cw0Y7RgiDQtNC+0YHRgtCw0YLQvtGHLiDQt9GA0LXQu9C+0YHRgtC4INC00LvRjyDQvtCx0LXRgdC/0LXRhy7Qs9Cw0LfQvtC+0LHQvNC10L3QsCDQv9C+0YHQu9C1INGA0L7QttC00LXQvdC40Y8uPGJyIC8+DQo1INGB0YLQsNC00LjRjy3QkNC70YzQstC10L7Qu9GP0YDQvdCw0Y8g0YHRgtCw0LTQuNGPLDM3LTjQu9C10YIsINGB0YLQsNC00LjRjyDQtNC+INGA0L7QttC00LXQvdC40Y8g0L3QsNGH0LjQvdCw0LXRgtGB0Y8g0Lgg0L/RgNC+0LTQvtC70LbQsNC10YLRgdGPINC/0L7RgdC70LUg0L3QtdCz0L4sINGF0LDRgNCw0LrRgtC10YAuINC00LDQu9GM0L3QtdC50YjQuNC8INGA0LDQt9Cy0LjRgtC40LXQvCDQuCDQtNC40YTRhNC10YDQtdC90YYuINCw0LvRjNCy0LXQvtC7LCDRg9Cy0LrQu9C40YfQuNCy0LDQtdGC0YHRjyDQutC+0Lst0LLQviDQsNC70YzQstC10L7QuyDQuCDQuNGFINGA0LDQt9C80LXRgCwg0LjRhSDRhNC+0YDQvNC40YDQvtCy0LDQvdC40LUg0L/RgNC+0LTQvtC70LbQsNC10YLRgdGPINC00L4gOCDQu9C10YIuINC/0YDQvtC00L7Qu9C20LDQtdGC0YHRjyDRgNCw0LfQuNGC0LjQtSDQtNC40YHRgtCw0LvRjNC90YvRhSDQvtGC0LTQtdC70L7QsiDQtNGL0YUu0L/Rg9GC0LXQuSwg0LLQtNC+0LvRjCDRgNC10YHQv9C40YDRgtC+0YAuINCx0YDQvtC90YXQuNC+0Lsg0Lgg0LDQu9GM0LLQtdC+0LvRgNC90YvRhSDQvNC10YjQutC+0LIg0YTQvtGA0LzQuNGA0YPQtdGJ0LXQtSDQt9Cw0YfQsNGC0L7Rhy4g0LDQu9GM0LLQtdC+0LvRiy4g0Jog0LzQvtC80LXQvdGC0YMg0LbQuNC30L3QuCDQsiDQu9C10LPQutC40YUg0YDQtdCx0LXQvdC60LAg0L/RgNC40YHRg9GC0YHQstGCIDI0INC80LvQvS7QsNC70YzQstC10L7Qu9GA0L3Ri9GFINC80LXRiNC+0YfQutC+0LIg0Lgg0LDQu9GM0LLQtdC+0LsuINCX0LDQstC10YDRiNCw0LXRgtGB0Y8g0YHQvtC30YDQtdCy0LDQvdC40LUg0LDQu9GM0LLQtdC+0LvRj9GA0L3Qvi3QutCw0L8uINC80LXQvNCx0YDQsNC90YssINGB0YPRgNGE0LDQutGC0LDQvdGCINGB0LXQutGA0LXRgiDQsiDQvdC+0YDQvC7QvtCx0YzQtdC80LUg0LTQu9GPINC20LjQt9C90LXQtNC10Y/Rgiwg0LLQvtC30LzQvtC20L3QviDRgdCw0LzQvtGB0YIu0LTRi9GF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1" table:style-name="ce1">
            <text:p>915321</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MSDQstC+0L/RgNC+0YEu0Y3RgtC+0YIg0LPQvtGA0LzQvtC9INCy0YvQtNC10LvRj9C10YLRgdGPINC/0LDRgNCw0YnQuNGC0L7QstC40LTQvdGL0LzQuCDQttC10LvQtdC30LDQvNC4LtGN0YLQvtGCINCz0L7RgNC80L7QvSDQv9C+0LTQtNC10YDQttC40LLQsNC10YIg0YPRgNC+0LLQtdC90Ywg0LrQsNC70YzRhtC40Y8g0Lgg0YTQvtGB0YTQsNGA0LDQsiDQutGA0L7QstC4LtC/0L7QtNC00LXRgNC20LjQstCw0LXRgiDQs9C+0LzQtdC+0YHRgtCw0LcuINCw0LrRgtC40LLQuNGA0YPQtdGCINC/0YDQvtGG0LXRgdGB0Ysg0LrQvtGB0YLQvdC+0Lkg0YDQtdC30L7RgNCx0YbQuNC4LiDRg9Cy0LXQu9C40YfQuNCy0LDQtdGCINCy0YHQsNGB0YvQstCw0L3QuNC1INCh0LAg0LIg0LrQuNGI0LXRh9C90LjQutC1LCDRgdC90LjQttCw0LXRgiDQtdCz0L4g0LLRi9Cy0LXQtNC10L3QuNC1INC/0L7Rh9C60LDQvNC4LtC+0L0g0LjQs9GA0LDQtdGCINC60LvRjtGH0LXQstGD0Y4g0YDQvtC70Ywg0LIg0YTQvtGA0LzQuNGA0L7QstCw0L3QuNC4INC60L7RgdGC0L3QvtC5INGC0LrQsNC90Lgg0Lgg0YDQsNC30LLQuNGC0LjQuCDRgdC60LXQu9C10YLQsC4g0YHRgtC40LzRg9C70Y/RhtC40Y8g0YDQtdC30L7RgNCx0YbQuNC4INC60LDQu9GM0YbQuNGPINC40Lcg0LrQvtGB0YLQuC4g0L7QvSDQsNC60YLQuNCy0LjRgNGD0LXRgiDQvtGB0YLQtdC+0LrQu9Cw0YHRgtGLLNGH0YLQviDQv9GA0LjQstC+0LTQuNGCINC6INGA0LDQt9GA0YPRiNC10L3QuNGOINC60L7RgdGC0L3QvtC5INGC0LrQsNC90Lgg0Lgg0LLRi9GB0LLQvtCx0L7QttC00LDRgiDQodCwINCyINC60YDQvtCy0Yws0LAg0YLQsNC60LbQtSDQvNC+0LbQvdC+INGB0LrQsNC30LDRgtGMINC00LvRjyDQvtCx0YDQsNC30L7QstCw0L3QuNGPINC90L7QstC+0Lkg0LrQvtGB0YLQvdC+0Lkg0YLQutCw0L3QuCwg0YfRgtC+0LHRiyDQvdC1INGB0LrQvtC/0LjQu9C+0YHRjCDQvdCw0LLQtdGA0YUg0YHRgtCw0YDQvtC5INC60L7RgdGC0L3QvtC5INGC0LrQsNC90Lgg0LTQu9GPINC/0YDQtdC00LLRgNCw0YnQtdC90LjRjyDQutCw0LzQtdC90L3QvtC5INC60L7RgdGC0LguINGC0LDQutC20LUg0L7QtNC90LAg0LLQsNC20L3QsNGPINGE0YPQvdC60YbQuNGPOiDRg9Cy0LXQu9C40YfQtdC90LjRjyDRgNC10LDQsdGB0L7RgNCx0YbQuNC4INCh0LAg0LIg0L/QvtGH0LrQsNGFLtGN0YLQvtGCINCz0L7RgNC80L7QvSDRgdC90LjQttCw0LXRgiDQstGL0LLQtdC00LXQvdC40LUg0KHQsCDRgSDQvNC+0YfQvtC5LNGH0YLQviDRgdC+0YXRgNCw0L3Rj9C10YIg0LIg0L7RgNCz0LDQvdC40LfQvNC1INC4INGB0L/QvtGB0L7QsdGB0YLQstGD0LXRgiDQtdCz0L4g0LLQvtC30LLRgNCw0YLRgyDQsiDQutGA0L7QstGMLtGC0LDQutC20LUg0Y3RgtC+0YIg0LPQvtGA0LzQvdC+INGB0L/QvtGB0L7QsdGB0YLQstGD0LXRgiDQtNC70Y8g0L3QvtGA0LzQsNC70LjQt9Cy0LDRhtC40Lgg0YDQtdC80L7QtNC10LvQuNGA0L7QstCw0L3QuNGPINC60L7RgdGC0Lgg0Lgg0L/QvtC00LTQtdGA0LbQuNCy0LDQvdC40Y8g0LzQtdC20LTRgyDQutC+0YHRgtC90L7QuSDRgNC10LfQvtGA0LHRhtC40LXQuSDQuCDRhNC+0YDQvNC40YDQvtCy0LDQvdC40LXQvCDQvdC+0LLQvtC5INC60L7RgdGC0L3QvtC5INGC0LrQsNC90Lgu0YLQsNC60LbQtSDRjdGC0L7RgiDQs9C+0YDQvNC+0L0g0YPRh9Cw0YHRgtCy0YPQtdGCINCy0LzQtdGB0YLQtSDRgSDQstC40YLQsNC80LjQvdC+0Lwg0LQg0Lgg0LrQsNC70YzRhtC40YLQvtC90LjQvdC+0Lw6INC00LvRjyDQv9C+0LTQtNC10YDQttCw0L3QuNGPINC+0L/RgtC40LzQsNC70YzQvdC+0LPQviDRg9GA0L7QstC90Y8g0KHQsCDQuCDRhNC+0YHRhNC+0YDQsC4gLjIg0LLQvtC/0YDQvtGBLiAxKdC20LXQu9C10LfQuNGB0YLQsNGPINGB0YLQsNC00LjRjy4g0YEgNSDQvdC10LTQtdC70Ywg0LTQviA0INC80LXRgSDQstC90YPRgtGA0LjRg9GC0YDQvtCx0L3QvtCz0L4g0YDQsNC30LLQuNGC0LjRjy4g0L3QsNGH0LjQvdCw0LXRgtGB0Y8g0LfQsNC60LvQsNC00LrQsCDQtNGL0YXQsNGC0LXQu9GM0L3Ri9GFINC/0YPRgtC10Lkg0Lgg0YTQvtGA0LzQuNGA0L7QstCw0L3QuNC1INCx0YDQvtC90YXQuNCw0LvRjNC90L7Qs9C+INC00LXRgNC10LLQsC4g0LTRi9GF0LDRgtC10LvRjNC90YvQtSDQv9GD0YLQuCDQvdCw0YfQuNC90LDRjtGCINC30LDQutC70LDQtNGL0LLQsNGC0YzRgdGPINC40Lcg0LLQtdC90YLRgNCw0LvRjNC90L7QuSDRh9Cw0YHRgtC4INC/0LXRgNC10LTQvdC10Lkg0LrQuNGI0LrQuC4g0LLRgtC+0YDQsNGPINGB0YLQsNC00LjRjzrQutCw0L3QsNC70LjQutGD0LvRj9GA0L3QsNGPINGB0YLQsNC00LjRjy7RgSA0LTYg0LzQtdGBINCy0L3Rg9GC0YDQuNGD0YLRgNC+0LHQvdC+0LPQviDRgNCw0LfQstC40YLQuNGPLiDRhNC+0YDQvNC40YDQvtCy0LDQvdC40LUg0LHRgNC+0L3RhdC+0LIg0L3QsNGH0LDQu9C+0YHRjCDQuCDQt9Cw0LrQu9Cw0LTRi9Cy0LDRjtGC0YHRjyDRgNC10YHQv9C40YDQsNGC0L7RgNC90YvQtSDQsdGA0L7QvdGF0LjQvtC70YsuINGC0YDQtdGC0YzRjyDRgdGC0LDQtNC40Y86INCw0LvRjNCy0LXQvtC70Y/RgNC90LDRjyDRgdGC0LDQtNC40Y8uINGBIDYg0LzQtdGB0Y/RhtC10LIg0LTQviDQstC90YPRgtGA0LjRg9GC0YLRgNC+0LHQvdC+0LPQviDRgNCw0LfQstC40YLQuNGPINC00L4gOC0g0LvQtdGC0L3QtdCz0L4g0LLQvtC30YDQsNGB0YLQsC4g0LfQtNC10YHRjCDQvdCw0YfQuNC90LDQtdGC0YHRjyDRgNCw0LfQstC40YLQuNC1INC+0YHQvdC+0LLQvdC+0Lkg0LzQsNGB0YHRiyDQsNC70YzQstC10L7Qu9GP0YDQvdGL0YUg0YXQvtC00L7QsizQsNC70YzQstC10L7Quy4g0LfQsNC60LvQsNC00LrQsCDQtNGL0YXQsNGC0LXQu9GM0L3Ri9GFINC/0YPRgtC10LXQuSDQuCDQv9Cw0YDQtdC90YXQuNC80Ysg0LvQtdCz0LrQuNGFINC90LDRh9C40L3QsNC10YLRgdGPINC90LAgMjIg0LggMjYg0Ysg0LTQvdC4INCy0L3Rg9GC0YDQuNGD0YLRgNC+0LHQvdC+0LPQviDRgNCw0LfQstC40YLQuNGPLiDQutCw0Log0Y8g0YHQutCw0LfQsNC70LAg0YEg0L/QtdGA0LLQvtC5INGB0YLQsNC00LjQuCDQsiDRjdC80LHRgNC40L7Qs9C10L3QtdC30LUg0L7QvdC4INC90LDRh9C40L3QsNGO0YIg0LfQsNC60LvQsNC00YvQstCw0YLRjNGB0Y8g0LjQtyDQstC40YHRhtC10YDQsNC70YzQvdC+0LPQviDQu9C40YHRgtC60LAg0L/QtdGA0LXQtNC90LXQuSDQutC40YjQutC4LtC40LTQtdGCINGE0L7RgNC80LjRgNC+0LLQsNC90LjQtSDRjdC30L7RhNCw0LPQvtGC0YDQsNGF0LXQsNC70YzQvdC+0LPQviDQtNC40LLQtdGA0YLQuNC60YPQvNCwLiDQv9C+0LfQttC1INGN0YLQsCDRh9Cw0YHRgtGMINGA0LDQt9C00LXQu9GP0LXRgtGB0Y8g0L3QsCAyINGH0LDRgdGC0Lgo0LLQuNGB0YbQtdGA0LDQu9GM0L3QsNGPINC4INC00L7RgNGB0LDQu9GM0L3QsNGPKS7RgtCw0Lwg0LIg0LzQtdGB0YLQtSDQtNC10LvQtdC90LjQtSDQvtCx0YDQsNC30YPQtdGC0YHRjyDQv9C10YDQtdCz0L7RgNC+0LTQutCwLiDQtNC10LvQuNGC0YHRjyDQvdCwINC00LLQtSDQu9C10LPQvtGH0L3Ri9C1INC/0L7Rh9C60Lgu0L/RgNCw0LLQsNGPINC4INC70LXQstCw0Y8u0L3QsNGH0LjQvdCw0LXRgtGB0Y8g0LLQtdGC0LLQu9C10L3QuNC1LiDQv9GA0LDQstCw0Y8g0YHQvtC00LXRgNC20LjRgiAzINGC0YDRg9Cx0LrQuCDQsCDQu9C10LLQsNGPINC00LLQtS4g0LLQuNGB0YbQtdGA0LDQu9GM0L3QsNGPINC4INC00L7RgNGB0LDQu9GM0L3QsNGPLiDQsiDQstC40YHRhtC10YDQsNC70YzQvdC+0Lkg0YfQsNGB0YLQuDrQtNGL0YXQsNGC0LXQu9GM0L3Ri9C1INC/0YPRgtC4INC4INC70LXQs9C60LjQtS4g0LTQvtGA0YHQsNC70YzQvdC+0Lk6INC/0LjRidC10LLQvtC0LiDQtNCw0LvQtdC1INCy0LXRgtCy0LvQtdC90LjQtSDQv9GA0L7QtNC+0LvQttCw0LXRgtGB0Y8g0Lgg0YTQvtGA0LzQuNGA0YPQtdGC0YHRjyDQsdGA0L7QvdGFINC00LXRgNC10LLQvi4gNC3RhSDQvNC10YHRj9GH0L3Ri9C5INC/0LvQvtC0INGD0LbQtSDQuNC80LXQtdGCINCy0L7Qt9C00YPRhdC+0L3QvtGB0L3Ri9C1INC/0YPRgtC4INGH0YLQviDQuCDQstC30YDQvtGB0LvRi9C5LtGA0LDQt9Cy0LjRgtC40LUg0LDQu9GM0LLQtdC+0Lsg0L/RgNC+0LjRgdGF0L7QtNC40YIg0LIg0L/QvtGB0YLQvdCw0YLQsNC70YzQvdC+0Lwg0L/QtdGA0LjQvtC00LUuINC+0L3QuCDRgtC+0LbQtSDQv9C+0YHRgtC10L/QtdC90L3QviDRg9Cy0LXQu9C40YfQuNCy0LDRjtGC0YHRjyDRgSDQstC+0LfRgNCw0YHRgtC+0LwuINCyINC90LDRh9Cw0LvQtSDQtNC+IDbQvdC10LTQtdC70Ywg0YDQsNC30LLQuNGC0LjRjyDQvtCx0YnQtdC1INC60L7Qu9C40YfQtdGB0YLQstC+INCw0LvRjNCy0LXQvtC7INGB0L7RgdGC0LDQstC70Y/QtdGCIDI0INC80LvQvS4g0LAg0Log0YDQvtC20LTQtdC90LjRjiA2MCDQvNC70L0uINC/0L7RgdC70LUg0YDQvtC20LTQtdC90LjRjyDQtNC+IDEyINC70LXRgtC90LXQs9C+INCy0L7Qt9GA0LDRgdGC0LAg0L/QvtGB0YLQtdC/0LXQvdC90L4g0YPQstC10LvQuNGH0LjQstCw0LXRgtGB0Y8g0Lgg0LTQvtGB0YLQuNCz0LDQtdGCIDIwMCDQvNC70L0g0LrQsNC6INGDINCy0LfRgNC+0YHQu9C+0LPQviDRh9C10LvQvtCy0LXQutCwLiDQsiA3INC80LXRgdGP0YbQtSDQstC90YPRgtGA0LjRg9GC0YDQvtCx0L3QvtCz0L4g0YDQsNC30LLQuNGC0LjRjyDQsiDQtNGL0YXQsNGC0LXQu9GM0L3Ri9GFINC/0YPRgtGP0YUg0YHQuNC90YLQtdC30LjRgNGD0LXRgtGB0Y8g0YHRg9GA0YTQsNC60YLQsNC90YIu0LTQsNC70LXQtSDQt9Cw0LrQvtC90YfQuNGC0YHRjyDQstC10YLQstC70LXQvdC40LUg0LHRgNC+0L3RhSDQtNC10YDQtdCy0LAg0Lgg0L7QsdGA0LDQt9C+0LLQsNC90LjRjyDQsNC70YzQstC10L7Quy7QsCDQv9C+0YHQu9C1INGA0L7QttC00LXQvdC40Y8g0YHRg9GA0YTQsNC60YLQsNC90YIg0LHRg9C00LXRgiDQstGL0L/QvtC70L3Rj9GC0Ywg0YHQstC+0Y4g0YTRg9C90LrRhtC40Y4sINCx0YPQtNC10YIg0YPRh9Cw0YHRgtCy0L7QstCw0YLRjCDQsiDQsNC60YLQtSDQtNGL0YXQsNC90LjRj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00" table:style-name="ce1">
            <text:p>915400</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0LLQvtC/0YDQvtGBMTog0L/QsNGA0LDRgtCz0L7RgNC80L7QvSDQuNC70Lgg0LbQtSDQs9C+0YDQvNC+0L0g0L/QsNGA0LDRidC40YLQvtCy0LjQtNC90L7QuSDQttC10LvQtdC30YssINGH0YLQviDQsiDQvtGA0LPQsNC90LjQt9C80LUg0LLQt9GA0L7RgdC70L7Qs9C+LCDRh9GC0L4g0YMg0LTQtdGC0LXQuSDQuNC80LXQtdGCINGA0LXQs9GD0LvQuNGA0YPRjtGJ0LjQtSwg0YTRg9C90LrRhtC40Lgg0L7QsdC80LXQvdCwINC4INCy0YvQstC10LTQtdC90LjRjy4gINCU0LDQvdC90YvQuSDQs9C+0YDQvNC+0L0g0YHQv9C+0YHQvtCx0YHRgtCy0YPQtdGCINGA0LXQs9GD0LvRj9GG0LjQuCDQutCw0LvRjNGG0LjQuS3RhNC+0YHRhNC+0YDQvdC+0LPQviDQvtCx0LzQtdC90LAsINGA0LXQs9GD0LvRj9GG0LjQuCDRgdC+0LTQtdGA0LbQsNC90LjRjyDQtNCw0L3QvdGL0YUg0LjQvtC90L7QsiDQsiDQutGA0L7QstC4LCDRg9Cy0LXQu9C40YfQtdC90LjRjiDQstGB0LDRgdGL0LLQsNC90LjRjyDQstC40YLQsNC80LjQvdCwINC0INCyINC60LjRiNC10YfQvdC40LrQtSwg0YHQv9C+0YHQvtCx0YHRgtCy0YPQtdGCINCy0L7QstC70LXRh9C10L3QuNGOINC60LDQu9GM0YbQuNGPICDRgSDQv9C+0LzQvtGJ0YzRjiDQvtGB0YLQtdC+0LrQu9Cw0YHRgtC+0LIg0Lgg0YLQsNC60LbQtSDRg9Cy0LXQu9C40YfQtdC90LjRjiDRgNC10LfQvtGA0LHRhtC40Lgg0LrQvtGB0YLQtdC5LCDRgdC/0L7RgdC+0LHRgdGC0LLRg9C10YIg0L/QvtCy0YvRiNC10L3QuNGOINC+0LHRgNCw0YLQvdC+0LPQviDQstGB0LDRgdGL0LLQsNC90LjRjyDQutCw0LvRjNGG0LjRjyDQsiDQtNC40YHRgtCw0LvRjNC90YvRhSDQutCw0L3QsNC70YzRhtCw0YUg0L/QvtGH0LXQuiDRgyDQtNC10YLQtdC5LCAsINGB0L/QvtGB0L7QsdGB0YLQstGD0LXRgiDRgNC10LfQvtGA0LHRhtC40LggINC60LDQu9GM0YbQuNC5INC40Lcg0YHQuNGB0YLQtdC80Ysg0LrQvtGB0YLQvdGL0YUg0YLQutCw0L3QtdC5LiDQndC+INC/0YDQuCDRjdGC0L7QvCDQtNCw0L3QvdGL0Lkg0LPQvtGA0LzQvtC9INC+0LHRgNCw0YLQvdC+INC00LXQudGB0YLQstGD0LXRgiDQvdCwINGE0L7RgdGE0LDRgtGLINCyINC+0YDQs9Cw0L3QuNC30LzQtSwg0YLQviDQtdGB0YLRjCDRhNC+0YHRhNCw0YLQvtCyINC/0L7QtCDQtNC10LnRgdGC0LLQuNC10Lwg0LPQvtGA0LzQvtC90LAg0LLRi9C80YvQstCw0LXRgtGB0Y8g0LjQtyDQutC+0YHRgtC10Lkg0Lgg0LLRi9Cy0L7QtNC40YLRjNGB0Y8g0LjQtyDQutCw0L3QsNC70YzRhtC10LIg0L/QvtGH0LXQuiDQv9C+0YHRgNC10LTRgdGC0LLQvtC8INGB0L3QuNC20LXQvdC40Y8g0YDQtdCw0LHRgdC+0YDQsdGG0LjQuCDQtNCw0L3QvdC+0LPQviDQuNC+0L3QsCDQsiDQv9C+0YfQutCw0YUuINCYINC30LAg0YHRh9C10YIg0YPQv9GA0LDQstC70LXQvdC40Y8g0LzQtdGC0LDQsdC+0LvQuNC30LzQvtC8INC60LDQu9GM0YbQuNGPINC/0LDRgNCw0YLQs9C+0YDQvtC80L7QvSDRgNC10LPRg9C70LjRgNCy0LXRgiDQvdC+0YDQvNCw0LvRjNC90YvQuSDRgNC+0YHRgiDQutC+0YHRgtC10Lkg0Lgg0LjRhSDRgNCw0LfQstC40YLQuNC1LiDQn9C+0LvRg9GH0LDQtdGC0YHRjyDQvtC9INC00LXRgNC20LjRgiDQsdCw0LvQsNC90YEg0LzQtdC20LTRgyDQvtGB0YLQtdC+0LHQu9Cw0YLRgdCw0LzQuC0g0YDQtdCz0YPQu9GP0YbQuNC4INC+0LHRgNCw0LfQvtCy0LDQvdC40Y8g0L3QvtCy0YvRhSDQutC+0YHRgtC90YvRhSDRgtC60LDQvdC10Lkg0Lgg0L7RgdGC0LXQutC70LDRgdGC0LDQvNC4LSDRgNC10LfQvtGA0YbQuNC10LksINC30LDQvNC10YnQtdC90LjQtdC8INC4INC+0LHQvdC+0LLQu9C10L3QuNC10Lwg0YHRgtCw0YDRi9GFINC60L7RgdGC0L3Ri9GFINGB0YLRgNGD0LrRgtGD0YAuINCa0LDQuiDQuCDQstC+INCy0LXRgSDQv9GA0L7RhtC10YHQsNGFINC90LDRiNC10LPQviDQvtGA0LDQs9C90LjQt9C80LAg0LLQtdC30LTQtSDQvdGD0LbQtdC9INCx0LDQu9Cw0L3RgSwg0YLQsNC60LbQtSDQuCDRgSDQv9GC0LMtINC10LPQviDQutC+0LvQtdCx0LDQvdC40Y8g0YHQv9C+0YHQvtCx0YHQstGC0YPQtdGCINC00LXQvNC40L3QtdGA0LDQu9C40LfQsNGG0LjQuC4g0J/QvtC80LjQvNC+INC+0LHRidC10Lkg0YDQtdCz0YPQu9GP0YbQuNC4INC80LXRgtCw0LHQvtC70LjQt9C80LAg0Lgg0LzQtdGC0LDQsdC+0LvQuNC30LzQsCDQutC+0YHRgtC10LksINC/0YLQsyDRgNC10LPRg9C70LjRgNC10YIg0LzQuNC90LXRgNCw0LvQuNC30LDQstCw0LjRjiAg0Lgg0YDQsNC30LLQuNGC0Lgg0LfRg9Cx0L7QsiDRgyDQtNC10YLQtdC5LSDRh9GC0L4g0YLQvtC20LUg0L3QtSDQvNCw0LvQviDQstCw0LbQvdC+LiDQntGB0L7QsdC10L3QvdC+0YHRgtGM0Y4g0LIg0YHQuNC90YLQtdC30LUg0LPQvtGA0LzQvtC90LAg0LvQtdC20LjRgiwg0YLQviDRh9GC0L4g0LIg0YDQsNC90L3QtdC8INCy0L7Qt9GA0LDRgdGC0LUg0YMg0LTQtdGC0L7QuiDQuNC3LdC30LAg0YTQvtGA0LzQuNGA0L7QstCw0L3QuNGPINC60L7RgdGC0L3Ri9GFINGB0YLRgNGD0LrRgtGD0YAg0Lgg0L/QvtCy0YvRiNC10L3QvdC+0LzRgyDRgNCw0LfQstC40YLQuNGOINC40YUsINGF0L7RgNC+0YjQsNGPINGA0LDQsdC+0YLQsCDQv9Cw0YDQsNGJ0LjRgtC+0LLQuNC00L3QvtC5INC20LXQu9C10LfRiyDQuCDQvdC+0YDQvNCw0LvRjNC90YvQuSDRgdC40L3RgtC10Lcg0LPQvtGA0LzQvtC90LAg0LbQuNC30L3QtdC90L3QviDQstCw0LbQvdGLLiDQn9C+0YLQsNC80YMg0YfRgtC+INC00LXRhNC40YbRgiDQv9GA0LjQstC10LTQtdGCINC6INCz0LjQv9C+0LrQsNC70YzRhtC40LXQvdC10LzQuNC4LSDRgdGD0LTQvtGA0L7Qs9C4LCDQt9Cw0LTQtdGA0LbQutCwINGA0LDQt9Cy0LjRgtC40Y8g0Lgg0YDQvtGB0YLQsCwg0LAg0LjQt9Cx0YvRgtC+0LotINCz0LjQv9C10YDQutCw0LvRjNGG0LjQtdC90LXQvNC40LgtINCx0YPQtNC10YIg0L7RgtC60LDQu9C00YvQstCw0YLRjNGB0Y8g0LrQsNC70YzRhtC40Lkg0L3QsCDQvNGP0LPQutC40LUg0YLQutCw0L3QuCwg0LTQtdC80LjQvdC40YDQsNC70LjQt9Cw0YbQuNGPINC60L7RgdGC0LXQuS4gPGJyIC8+DQrQktC+0L/RgNC+0YEyOiDQn9GA0L7RhtC10YHRgSDQt9Cw0LrQu9Cw0LTQutC4INCy0L7Qt9C00YPRiNC90YvRhSDQv9GD0YLQtdC5INC/0YDQvtC40YHRhdC+0LTQuNGCINC40Lcg0LLQtdC90YLRgNCw0LvRjNC90L7QuSDRh9Cw0YHRgtC4INC/0LXRgNC10LTQvdC10Lkg0LrQuNGI0LrQuCDQsiDRgdGA0L7QutC4INGBIDIyINC/0L4gMjYgINGB0YPRgtC60Lgg0LLQvdGD0YLRgNC40YPRgtGA0L7QsdC90L7Qs9C+INGA0LDQt9Cy0LjRgtC40Y8tINCyINC40YLQvtCz0LUg0L7QsdGA0LDQt9GD0LXRgtGB0Y8g0YDQtdGB0L/QuNGA0LDRgtC+0YDQvdGL0Lkg0LTQuNCy0LXRgNGC0LjQutGD0LssINC00LDQu9C10LUg0L7QvSDQtNC10LvQuNGC0YHRjyDQvdCwINCy0LXQvdGC0YDQsNC70YzQvdGL0LksINC60L7RgtC+0YDRi9C5INC00LDQu9C10LUg0L7QsdGA0LDQt9GD0LXRgiDRgtGA0LDRhdC10Y4g0LggMiDQu9C10LPQvtGH0L3Ri9C1INC/0L7Rh9C60Lgg0Lgg0LTQvtGA0YHQsNC70YzQvdGD0Y4gLSDQv9C40YnQtdCy0L7QtCAtINGH0LDRgdGC0LguINCU0LvQtdC1INC/0YDQsNCy0LDRjyDQu9C10LPQvtGH0L3QsNGPINC/0L7Rh9C60LAg0YDQsNC30LTQtdC70Y/QtdGC0YHRjyDQvdCwIDMsINCwINC70LXQstCw0Y8g0L3QsCDQtNCy0LUg0YLRgNGD0LHQutC4LCDQsCDQuNC3INC90LjRhSDQtNCw0LvQtdC1INC+0LHRgNCw0LfRg9C10YLRgdGPINGC0YDQuCDQtNC+0LvQuCDQv9GA0LDQstC+0LPQviDQuCDQtNCy0LUg0LTQvtC70Lgg0LvQtdCy0L7Qs9C+INC70LXQs9C60L7Qs9C+LiDQn9C+INGB0YPRgtC4INCy0LXRgtC70LXQvdC40LUg0L/RgNC+0LTQvtC70LbQsNC10YLRgdGPINC4INGBINC+0LHRgNCw0LfQvtCy0LDQvdC40LXQvCDQsdGA0L7QvdGF0LjQsNC70YzQvdC+0LMg0LTQtdGA0LXQstCwLiDQldGB0LvQuCDQttC1INCz0L7QstC+0YDQuNGC0Ywg0L4g0YDQsNC30LLQuNGC0LjQuCDRjdC/0LjRgtC10LvQuNGPINGDINC00YvRhdCw0YLQtdC70YzQvdGL0YUg0L/Rg9GC0LXQuSwg0YLQviDRgdGC0YDQvtC40YLQtdC70YzQvdGL0Lwg0LzQsNGC0LXRgNC40LDQu9C+0Lwg0LHRg9C00LXRgiDQtNC70Y8g0L3QtdCz0L4g0L/QtdGA0LjRhdC+0L3QtNGA0LjQsNC70YzQvdCw0Y8g0L/Qu9Cw0YHRgtC40L3QutCwLCDQsCDQvtGB0YLQsNC70YzQvdC+0LUtINC80LXQt9C10L3RhdC40LzQsC4gIDMg0YHRgtCw0LTQuNC4INGA0LDQt9Cy0LjRgtC40Y8g0LvQtdCz0LrQuNGFOiAxKSDQltC10LvQtdC30LjRgdGC0LDRjyAo0YEgNSDQvdC10LTQtdC70Lgg0LTQviA0INC80LXRgdGP0YbQsCktINGB0YLQsNC00LjRjyDQt9Cw0LrQu9GO0YfQsNC10YIg0LIg0YHQtdCx0LUg0YTQvtGA0LzQuNGA0L7QstCw0L3QuNC1INCx0YDQvtC90YXQuNCw0LvRjNC90L7Qs9C+INC00LXRgNC10LLQsCAuIDIpINCa0LDQvdCw0LvQuNC60YPQu9GP0YDQvdCw0Y8gKDQtNiDQvNC10YHRj9GGKS0g0YTQvtGA0LzQuNGA0L7QstCw0L3QuNC1INGA0LXRgdC/0LjRgNCw0YLQvtGA0L3Ri9GFINCx0YDQvtC90YXQuNC+0LsuIDMpINCQ0LvRjNCy0LjQvtC70Y/RgNCw0Y8gKNGBIDYg0LzQtdGB0Y/RhtCwINC00L4gOCDQu9C10YLQvdC10LPQviDQstC+0LfRgNCw0YHRgtCwKS0g0LIg0LTQsNC90L3Rg9GOINGB0YLQsNC00LjRjiDQuNC00LXRgiDRhNC+0YDQvNC40YDQvtCy0LDQvdC40LUg0LDQu9GM0LLQtdC+0LvRj9GA0L3Ri9GFINC80LXRiNC+0YfQutC+0LIg0Lgg0LTQsNC70YzQvdC10LnRiNC10LUg0LjRhSDRgNCw0LfQstC40YLQuNC1INC4INC/0YDQuNGB0L/QvtGB0L7QsdC70LXQvdC40LU7INGBINC80L7QvNC10L3RgtCwINC90LDRh9Cw0LvQsCAzINGB0YLQsNC00LjQuCDQuCDQtNC+INGA0L7QttC00LXQvdC40Y8g0YMg0YDQtdCx0LXQvdC60LAg0L7QutC+0LvQviA2MCDQvNC40LvQu9C40L7QvdC+0LIg0YHRhNC+0YDQvNC40YDQvtCy0LDQstGI0LjRhdGB0Y8g0L/QtdGA0LLQuNGH0L3Ri9GFINCw0LvRjNCy0LXQvtC7LCDQtNC+IDIg0LvQtdGCINC60L7Qu9C40YfQtdGB0LLRgtC+INGB0YLRgNC10LzQuNGC0LXQu9GM0L3QviDRgNCw0YHRgtC10YIg0Lgg0LTQsNC70LXQtSDRg9C20LUg0LfQsNC80LXQtNC70LXRgtGB0Y8sINCwINGD0LbQtSDQuiA4LTExINCz0L7QtNCw0Lwg0LrQvtC70LjRh9GB0LXRgtCy0L4g0LTQvtGB0YLQuNCz0LDQtdGCINCy0YvRgdC+0LrQuNGFINC/0L7QutCw0LfQsNGC0LXQu9C10LktIDM3NSDQvNC40LvQu9C40L7QvdC+0LItINGB0L7QvtGC0LLQtdGB0YLQstC10L3QvdC+INCy0LfRgNC+0YHQu9GL0Lwg0L/QvtC60LDQt9Cw0LXRgtC70Y/QvCAuICDQkCDQtdGB0LvQuCDQs9C+0LLQvtGA0LjRgtGMINC+INGB0YPRgNGE0LDQutGC0LDQvdGC0LUgKNC/0L7QstC10YDRhdC90L7RgdGC0L3QvtC1INCw0LrRgtC40LLQvdC+0LUg0LLQtdGJ0LXRgdGC0LLQviwg0L/QvtC60YDRi9Cy0LDRjtGJ0LXQtSDQsNC70YzQstC10L7Qu9GLINC90LAgMyUsINGB0L/QvtGB0L7QsdGB0YLQstGD0Y7RidC10LUg0L/RgNC10LTQvtGC0LLRgNCw0YLQuNGC0Ywg0YHQv9Cw0LTQsNC90LjQtSDQsNC70YzQstC10L7QuyDQvdCwINCy0YvQtNC+0YXQtSDQuCDQuNC80LXRjtGJ0YPRjiDQsdC+0LvQtdC1INC70LjQv9C40LTQvdC+0LUg0L/RgNC+0LjRgdGF0L7QttC00LXQvdC40LUtIDkwJSDQu9C40L/QuNC00L7QsiDQuCAxMCUg0LHQtdC70LrQsCwg0YHRgtGA0L7QtdC90LjQtSAg0YMg0L3QuNGFIC0g0Y/QtNGA0L4g0YEg0YXQstC+0YHRgtC40LrQvtC8LSDRhdCy0L7RgdGC0LjQuiDQsiDQv9GA0L7RgdCy0LXRgtC1INCw0LvRjNCy0LXQvtC7LCDQvtC9INC10YnQtSDQt9Cw0YnQuNGJ0LDQtdGCINGN0L/QuNGC0LXQu9C40Lkg0LDQu9GM0LLQtdC+0LssINC40LzQtdC10YIg0LHQsNC60YLQtdGA0LjQvtGG0LjQtNC90L7QtSDQtNC10LnRgdGC0LLQuNC1INC/0YDQvtGC0LjQsiDQvdC10LrQvtGC0L7RgNGL0YUg0L/QsNGC0L7Qs9C10L3QvtCyINC90LDQv9GA0LjQvNC10YAg0LPRgCssINGD0YfQsNGB0YLQstGD0LXRgiDQvNC40LrRgNC+0YbQuNGA0LrRg9C70Y/RhtC40LgpLCDRgtC+INC+0L0g0L3QsNGH0LjQvdCw0LXRgtGB0Y8g0YHQuNC90YLQtdC30LjRgNC+0LLQsNGC0Ywg0Lgg0YTQvtGA0LzQuNGA0L7QstCw0YLRjNGB0Y8g0LIgNyDQvNC10YHRj9GG0LUg0LLQvdGD0YLRgNC40YPRgtGA0L7QsdC90L7Qs9C+INGA0LDQt9Cy0LjRgtC40Y8gINC80LDQutGB0LjQvNCw0LvRjNC90L4g0L3QsNGH0LjQvdCw0LXRgiDQstGL0YDQsNCx0LDRgtGL0LLQsNGC0YzRgdGPINCyINC80L7QvNC10L3RgiDRgNC+0LbQtNC10L3QuNGPLiAg0JrQvtCz0LTQsCDQvNCw0LvRi9GIINGD0LbQtSDRgNC+0LTQuNC70YHRjyDQstGB0LUg0YHRgtGA0YPQutGC0YPRgNC90YvQtSDRjdC70LXQvNC10L3RgtGLICDQsiDQvdC+0YDQvNC1INC4INGB0L/QvtC+0YHQsdC90Ysg0LLRi9C/0L7Qu9C90Y/RgtGMINGB0LLQvtGOINGA0LDQsdC+0YLRgywg0L3QviDQsNGG0LjQvdGD0YHRiyDQtdGJ0LUg0L3QtSDQtNC+INC60L7QvdGG0LAg0YDQsNC30LLQuNGC0YsuINCSINC/0LXRgNC40L7QtCDQv9C+0YHRgtC90LDRgtCw0LvRjNC90L7Qs9C+INGA0LDQt9Cy0LjRgtC40Y8gMyDRgdGC0LDQtNC40Lgg0LjQtNC10YIg0YPQttC1INC00L7RgNCw0LfQstC40YLQuNC1INCw0LvRjNCy0LXQvtC70Y/RgNC90YvRhSDRhdC+0LTQvtCyLCDRjdC70LDRgdGC0LjRh9C10YHQutC+0LPQviDQutCw0YDQutCw0YHQsC4g0JIg0L/QtdGA0LjQvtC0INGBIDIg0LPQvtC00LjQutC+0LIg0LTQviA0INC40LTQtdGCINC40L3RgtC10L3RgdC40LLQvdC+0LUg0YDQsNC30LLQuNGC0LjQtSDQuNC80LXQvdC90L4g0LzRi9GI0LXRh9C90YvRhSDRjdC70LXQvNC10L3RgtC+0LIg0LHRgNC+0L3RhdC+0LIsINC6IDEyINCz0L7QtNCw0Lwg0LvQtdCz0LrQuNC1INGD0LbQtSDQutCw0Log0YMg0LLQt9GA0L7RgdC70L7Qs9C+L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27" table:style-name="ce1">
            <text:p>915427</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MS7Qn9Cw0YDQsNGC0LPQvtGA0LzQvtC9INCyINC+0YDQs9Cw0L3QuNC30LzQtSDRgNC10LHQtdC90LrQsCDQstGL0YDQsNCx0LDRgtGL0LLQsNC10YLRgdGPINCw0LTQtdC90L7Qs9C40L/QvtGE0LjQt9C+0LwsINCU0LvRjyDQvtGA0LPQsNC90LjQt9C80LAg0LLRi9C/0L7Qu9C90Y/QtdGCINGE0YPQvdC60YbQuNC4INGA0L7RgdGC0LAsINC+0YLQstC10YLRgdGC0LLQtdC90L3Ri9C8INC30LAg0LjQvNC80YPQvdC40YLQtdGCLCDQsCDRgtC+0YfQvdC10LUg0YPQstC10LvQuNGH0LjQstCw0Y8g0LjQvNC80YPQvdC90YvQtSDRgNC10LDQutGG0LjQuCDRgNC10LHQtdC90LrQsCDQvdCwINCy0L7Qt9Cx0YPQtNC40YLQtdC70LgsINGA0L7RgdGCINC60L7RgdGC0LXQuSwg0LzRi9GI0YYsICDRgdC/0L7RgdC+0LHRgdGC0LLRg9C10YIg0L3QvtGA0LzQsNC70YzQvdC+0LzRgyDRgNCw0LfQstC40YLQuNGOINC+0YDQs9Cw0L3QuNC30LzQsCwg0JTQsNC70LXQtSDRh9Cw0YHRgtGMINGN0YLQvtCz0L4g0LPQvtGA0LzQvtC90LAg0LLRi9C00LXQu9GP0LXRgtGB0Y8g0LIg0YnQuNGC0L7QstC40LTQvdC+0Lkg0LbQtdC70LXQt9C1INGB0L/QvtGB0L7QsdGB0YLQstGD0Y8g0YDQsNC30LLQuNGC0LjRjiDQvNC10YLQsNCx0L7Qu9C40YfQtdGB0LrQuNGFINC/0YDQvtGG0LXRgdGB0L7QsiDQtNC70Y8g0L7RgNCz0LDQvdC40LfQvNCwINC90LAg0YDQsNC90L3QtdC8INC/0LXRgNC40L7QtNC1INC20LjQt9C90LguINCt0YLQviDQvtGB0L7QsdC10L3QvdC+INCy0LDQttC90L4sINGC0LDQuiDQutCw0Log0LIg0L/QtdGA0LLRi9C1INC/0L7QuyDQs9C+0LTQsCDQttC40LfQvdC4INGA0LXQsdC10L3QvtC6INC90LDRhdC+0LTQuNGC0YHRjyDQsiDQsdGL0YHRgtGA0L7QuSDRhNCw0LfQtSDRgNC+0YHRgtCwLCDQtdCz0L4g0L7RgNCz0LDQvdC40LfQvCDRgNC+0YHRgtC10YIuINCe0L0g0LDQutGC0LjQstC90L4g0L3QsNCx0LjRgNCw0LXRgiDQvtCx0YnRg9GOINC80LDRgdGB0YMsINGC0LDQuiDQttC1INGD0LLQtdC70LjRh9C40LLQsNGO0YLRgdGPINGA0LDQt9C80LXRgNGLINC60L7RgdGC0L3Ri9GFINGB0YLRgNGD0LrRgtGD0YAsINGA0LDQt9Cy0LjRgtC40LUg0LLQvdGD0YLRgNC10L3QvdC40YUg0L7RgNCz0LDQvdC+0LIuINCf0LDRgNCw0YLQs9C+0YDQvNC+0L0g0LLQsNC20LXQvSDQt9CwINGB0YfQtdGCINCw0LrRgtC40LLQvdC+0LPQviDRg9GH0LDRgdGC0LjRjyDQsiDRgNC+0YHRgtC1INC4INGA0LDQt9Cy0LjRgtC40Lgg0L7RgNCz0LDQvdC40LfQvNCwLiDQktCw0LbQvdGD0Y4g0YDQvtC70Ywg0YLQsNC6INC20LUg0LfQsNC90LjQvNCw0Y7RgiDRgtC10YDQuNC+0LTQvdGL0LUg0LPQvtGA0LzQvtC90YssINC+0L3QuCDQstGL0YDQsNCx0LDRgtGL0LLQsNGO0YLRgdGPINCyINCp0LjRgtC+0LLQuNC00L3QvtC5INC20LXQu9C10LfQtSwg0LIg0L7RgNCz0LDQvdC40LfQvNC1INC+0YLQstC10YfQsNGO0YIg0LfQsCDQvtGB0LLQvtC10L3QuNC1INC4INGF0YDQsNC90LXQvdC40LUg0L7QudC00LAsINC00LjRhNGE0LXRgNC10L3RhtC40YDQvtCy0LrRgyDQuNC80LzRg9C90L3Ri9GFINC60LvQtdGC0L7Quiwg0YHQv9C+0YHQvtCx0YHRgtCy0YPRjtGCINGA0L7RgdGC0YMg0L7RgNCz0LDQvdC40LfQvNCwINC4INGA0LXQs9GD0LvQuNGA0YPRjtGCINC80LXRgtCw0LHQvtC70LjQt9C8INCx0LXQu9C60L7Qsiwg0LbQuNGA0L7QsiDQuCDRg9Cz0LvQtdCy0L7QtNC+0LIuINCf0YDQuCDQvdC10LTQvtGB0YLQsNGC0LrQtSDQv9Cw0YDQsNGC0LPQvtGA0LzQvtC90LAsINGDINC00LXRgtC10Lkg0L7RgtC80LXRh9Cw0LXRgtGB0Y8g0L3QsNGA0YPRiNC10L3QuNC1INGA0L7RgdGC0LAsINGB0L3QuNC20LXQvdC40LUg0LjQvNC80YPQvdC40YLQtdGC0LAsINC90LDQu9C40YfQuNC1INC/0LDRgtC+0LvQvtCz0LjRhSDQuiDQv9GA0LjQvNC10YDRgyDQsiDQutC+0YHRgtC90YvRhSDRgdGC0YDRg9C60YLRg9GA0LDRhSwg0L/RgNC40LLQvtC00LjRgiDQuiDQv9C+0Y/QstC70LXQvdC40Y4g0YHQuNGB0YLQtdC80L3Ri9GFINC30LDQsdC+0LvQtdCy0LDQvdC40LkuICAgPGJyIC8+DQoyLiDQoSDRgNCw0LfQstC40YLQuNC10Lwg0LvQtdCz0L7Rh9C90YvRhSDQsiDRjdC80LHRgNC40L7QvdCw0LvRjNC90L7QvCDQv9C10YDQuNC+0LTQtSDQstGL0LTQtdC70Y/RjtGCIDMg0YHRgtCw0LTQuNC4LiAgPGJyIC8+DQoxKdCW0LXQu9C10LfQuNGB0YLQsNGPIC0g0Y/QstC70Y/QtdGC0YHRjyDQvdCw0YfQsNC70YzQvdC+0Lkg0YHRgtCw0LTQuNC10LksINCyINC60L7RgtC+0YDQvtC5INC/0YDQvtC40YHRhdC+0LTRj9GCINC/0LXRgNCy0LjRh9C90L7QtSDRgNCw0LfQstC40YLQuNC1INC4INC30LDQutC70LDQtNC60LAg0L7RgdC90L7QstC90YvRhSDQtNGL0YXQsNGC0LXQu9GM0L3Ri9GFINGB0YLRgNGD0LrRgtGD0YAuIDxiciAvPg0KMinQmtCw0L3QuNC60YPQu9GP0YDQvdCw0Y8g0YHRgtCw0LTQuNGPIC0g0YXQsNGA0LDQutGC0LXRgNC40LfRg9C10YLRgdGPINGC0LXQvCDRh9GC0L4g0YLRgyDQvtCx0YDQsNC30YPRjtGC0YHRjyDQvNC40L3QuNCw0YLRjtGA0YvQtSDQtNGL0YXQsNGC0LXQu9GM0L3Ri9C1INC/0YPRgtC4IDxiciAvPg0KMynQkNC70YzQstC10L7Qu9GP0YDQvdCw0Y8g0YHRgtCw0LTQuNGPIC0g0Y/QstC70Y/QtdGC0YHRjyDRgdGC0LDQtNC40LXQuSDQv9C+0Y/QstC70LXQvdC40LXQvCDRgdGD0YDRhNCw0LrRgtCw0L3RgtCwLCDQvtC90LAg0L/RgNC+0LTQvtC70LbQsNC10YLRgdGPINC4INC/0L7RgdC70LUg0YDQvtC20LTQtdC90LjRjyDRgNC10LHQtdC90LrQsCDQuCDQsiDQv9C70L7RgtGMINC00L4gOC0xMCDQu9C10YIgIC4g0LrQvtC70LjRh9C10YHRgtCy0L4g0LDQu9GM0LLQtdC+0Lsg0LTQvtC70LbQvdC+INGB0L7RgdGC0L7QstC70Y/RgtGMINC+0LrQvtC70L4gNjDQvNC40LvQu9C40L7QvdC+0LIuIDxiciAvPg0K0KEgNCDQvdC10LTQtdC70Lgg0LLQvdGD0YLRgNC10YPRgtGA0L7QsdC90L7Qs9C+INGA0LDQt9Cy0LjRgtC40Y8g0L/Qu9C+0LQg0L/QtdGA0LXRhdC+0LTQuNGCINC90LAg0L/Qu9Cw0YbQtdC90YLQsNGA0L3QvtC1INC60YDQvtCy0L7QvtCx0YDQsNGJ0LXQvdC40LUsINGH0LXRgNC10Lcg0L/Rg9C/0L7Rh9C90YPRjiDQsNGA0YLQtdGA0LjRjiDQsiDQvtGA0LPQsNC90LjQt9C8INC/0L7RgdGC0YPQv9Cw0LXRgiDQsdC+0LPQsNGC0LDRjyDQutC40YHQu9C+0YDQvtC00L7QvCDQutGA0L7QstGMLCDQvtCx0LXRgdC/0LXRh9C40LLQsNGPINC00YvRhdCw0L3QuNC1INC00L4g0YDQvtC20LTQtdC90LjRjy4gPGJyIC8+DQrQvtCx0YnQsNGPINGF0LDRgNCw0LrRgtC10YDQuNGB0YLQuNC60LAg0LvQtdCz0LrQvtCz0L4uPGJyIC8+DQrQn9GA0Lgg0YDQvtC20LTQtdC90LjQuCDQu9C10LPQutC40LUg0YDQtdCx0LXQvdC60LAg0L3QtSDQtNC+INC60L7QvdGG0LAg0YDQsNC30LLQuNGC0YvQtS4g0KMg0LTQtdGC0LXQuSDRgNCw0L3QvdC10LPQviDQstC+0LfRgNC+0YHRgtCwINC/0YDQuNGB0YPRgtGB0LLRgtGD0LXRgiDQv9Cw0YLQvtC70L7Qs9C40YfQtdGB0LrQvtC1INC00YvRhdCw0L3QuNC1IC0g0J/Rg9GN0YDQuNC70YzQvdC+0LUuINCb0LXQs9C60LjQtSDRhdCw0YDQsNC60YLQtdGA0LjQt9GD0Y7RgtGB0Y8g0L3QsNC70LjRh9C40LXQvCDQvdC40LfQutC+0Lkg0LrQvtC90YbQtdC90YLRgNCw0YbQuNC4INGB0YPRgNGE0LDQutGC0LDQvdGC0LAsINC80LXQvdGM0YjQuNC8INC60L7Qu9C40YfQtdGB0YLQstC+0Lwg0LDQu9GM0LLQtdC+0Lsg0Lgg0YHQu9C+0LbQvdC+0YHRgtGM0Y4g0LjRhSDRgNCw0YHQv9GA0LDQstC70LXQvdC40Y8sINGN0YLQviDRgdCy0Y/Qt9Cw0L3QviDRgSDRgtC10Lwg0YfRgtC+INCyINC60L7QvdGG0LXQstGL0YUg0L7RgtC00LXQu9Cw0YUg0L7QtdCz0L7Rh9C90YvRhSDRgdGC0YDRg9C60YLRg9GAINC90LDRhdC+0LTQuNGC0YHRjyDQvdC1INCw0YbQuNC90YPRgSwg0Lgg0L/RgNC10LTRgdGC0LDQstC70LXQvdC90YvQtSDQsiDQstC40LTQtSDQstC40L3QvtCz0YDQsNC00LAg0LTRi9GF0LDRgtC10LvRjNC90YvQtSDRgdGC0YDRg9C60YLRg9GA0YssINCwINC80LXRiNC+0YfQtdC6LiDQp9GC0L4g0Lgg0LLRi9C30YvQstCw0LXRgiDQt9Cw0YLRgNC10LTQvdC10L3QvdC+0LUg0LTRi9GF0LDQvdC40LUuINCz0LvQsNCy0L3Ri9C1INC4INGB0YDQtdC00L3QuNC1INCx0YDQvtC90YXQuCDRgNCw0LfQstC40YLRiyDQvtGC0L3QvtGB0LjRgtC10LvRjNC90L4g0YXQvtGA0L7RiNC+LCDQvdCwINC40YUg0LLQvdGD0YLRgNC10L3QvdC10Lkg0L/QvtCy0LXRgNGF0L3QvtGB0YLQuCDRgdC+0LTQtdGA0LbQuNGC0YHRjyDQvdC40LfQutC+0LUg0LrQvtC70LjRh9C10YHRgtCy0L4g0LzRg9C60L7QudC00L3QvtCz0L4g0LLQtdGJ0LXRgdGC0LLQsCwg0LrQvtGC0L7RgNC+0LUg0LTQstC40LbQtdGC0YHRjyDRgdC+INGB0LrQvtGA0L7RgdGC0YzRjiDQsiAwLDI1LTAsNdGB0Lwv0LwuINGB0LvQsNCx0L4g0YDQsNC30LLQuNGC0YvQvCDRgtCw0Log0LbQtSDQvtGB0YLQsNC10YLRgdGPINGC0L7QvdGD0YEg0LTRi9GF0LDRgtC10LvRjNC90YvRhSDQvNGL0YjRhi4g0KLRgNCw0YXQtdGPINC00LXQu9C40YLRgdGPINC90LAgMiDQs9C70LDQstC90YvRhSDQsdGA0L7QvdGF0LAsINC70LXQs9C60L7QtSDQuNC80LXQtdGCINC00L7Qu9GM0YfQsNGC0L7QtSDRgdGC0YDQvtC10L3QuNC1LCDQutCw0LbQtNCw0Y8g0LTQvtC70Y8g0YDQsNC30LTQtdC70LXQvdCwINC80LXQttC00YMg0YHQvtCx0L7QuSDRgtC+0L3QutC40LzQuCDQsdC+0YDQvtC30LTQsNC80LguIDxiciAvPg0K</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не подробно описана каждая стадия эмбриогенеза легких.Не подробно описана функция паратгармона.</text:p>
          </table:table-cell>
          <table:table-cell office:value-type="float" office:value="0" table:style-name="ce1">
            <text:p>0</text:p>
          </table:table-cell>
          <table:table-cell table:number-columns-repeated="16376"/>
        </table:table-row>
        <table:table-row table:style-name="ro1">
          <table:table-cell office:value-type="float" office:value="915688" table:style-name="ce1">
            <text:p>915688</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MS4g0J/QsNGA0LDRgtCz0L7RgNC80L7QvSAo0J/QotCTOyDQv9Cw0YDQsNGC0LjRgNC10L7QuNC00L3Ri9C5INCz0L7RgNC80L7QvSkgLSDQs9C+0YDQvNC+0L0g0L/QsNGA0LDRidC40YLQvtCy0LjQtNC90L7QuSDQttC10LvQtdC30YssINC+0YLQstC10YfQsNGO0YnQuNC5INC30LAg0L/QvtC00LTQtdGA0LbQsNC90LjQtSDRg9GA0L7QstC90Y8g0LrQsNC70YzRhtC40Y8g0LIg0LrRgNC+0LLQuC4g0J/QotCTINC+0YHRg9GJ0LXRgdGC0LLQu9GP0LXRgiDQv9C+0YHRgtC+0Y/QvdGB0YLQstC+INGD0YDQvtCy0L3RjyDQutCw0LvRjNGG0LjRjyDQsiDQutGA0L7QstC4INC30LAg0YHRh9C10YIg0LLQu9C40Y/QvdC40Y8g0L3QsCDQvNC10YLQsNCx0L7Qu9C40LfQvCDQsiDQutC+0YHRgtC90L7QuSDRgtC60LDQvdC4LCDQsCDRgtCw0LrQttC1INC90LAg0YDQtdCw0LHRgdC+0YDQsdGG0LjRjiDQutCw0LvRjNGG0LjRjyDQsiDQv9GA0L7QutGB0LjQvNCw0LvRjNC90YvRhSDQutCw0L3QsNC70YzRhtCw0YUg0L/QvtGH0LXQuiDQuCDQvdCwINC/0L7QstGL0YjQtdC90LjQtSDQsNCx0YHQvtGA0LHRhtC40Lgg0LrQsNC70YzRhtC40Y8g0LjQtyDQltCa0KIgKNC+0LTQvdCw0LrQviwg0L3QsNC40LHQvtC70LXQtSDQstGL0YDQsNC20LXQvdC+INCy0LvQuNGP0L3QuNC1INCf0KLQkyDQvdCwINC60L7RgdGC0L3Rg9GOINGC0LrQsNC90YwpLiDQn9GA0Lgg0L/QvtC90LjQttC10L3QuNC4INGD0YDQvtCy0L3RjyDQutCw0LvRjNGG0LjRjyDQsiDQutGA0L7QstC4LCDQn9Ci0JMg0YHQtdC60YDQtdGC0LjRgNGD0LXRgtGB0Y8g0LIg0LrRgNC+0LLRjC4g0JTQvtGB0YLQuNCz0L3Rg9CyINC60L7RgdGC0L3QvtC5INGC0LrQsNC90LgsINC+0L0g0LDQutGC0LjQstC40YDRg9C10YIg0L7RgdGC0LXQvtC60LvQsNGB0YLRiyAo0LLRgdC70LXQtNGB0YLQstC40LUg0L/QtdGA0LLQuNGH0L3QvtC5INCw0LrRgtC40LLQsNGG0LjQuCDQvtGB0YLQtdC+0LHQu9Cw0YHRgtC+0LIg0YEg0L/QvtGB0LvQtdC00YPRjtGJ0LjQvCDQstGL0LTQtdC70LXQvdC40LXQvCDQuNC80LggUkFOSy3Qu9C40LPQsNC90LTQsCwg0LrQvtGC0L7RgNGL0LksINCyINGB0LLQvtGOINC+0YfQtdGA0LXQtNGMLCDRgdGC0LjQvNGD0LvQuNGA0YPQtdGCINC+0YHRgtC10L7QutC70LDRgdGC0YspLCDRh9GC0L4g0L/RgNC40LLQvtC00LjRgiDQuiDQstGL0YDQsNCx0L7RgtC60LUg0LjQvNC4INC/0YDQvtGC0LXQvtC70LjRgtC40YfQtdGB0LrQuNGFINGE0LXRgNC80LXQvdGC0L7QsiAo0Y3Qu9Cw0YHRgtCw0LfRiywg0LrQvtC70LvQsNCz0LXQvdCw0LfRiyksINGH0YLQviwg0LIg0LrQvtC90LXRh9C90L7QvCDRgdGH0LXRgtC1LCDQv9GA0LjQstC+0LTQuNGCINC6INC00LXQvNC40L3QtdGA0LDQu9C40LfQsNGG0LjQuC/RgNC10LfQvtGA0LHRhtC40Lgg0LrQvtGB0YLQvdC+0Lkg0YLQutCw0L3QuCwg0LgsINC60LDQuiDRgdC70LXQtNGB0YLQstC40LUsINC6INC/0L7QstGL0YjQtdC90LjRjiDRg9GA0L7QstC90Y8g0LrQsNC70YzRhtC40Y8g0LIg0LrRgNC+0LLQuC4g0J7QtNC90LDQutC+LCDRhNC+0YHRhNC+0YAg0Lgg0YTQvtGB0YTQsNGC0YssINC80L7QsdC40LvQuNC30LjRgNGD0LXQvNGL0LUg0LjQtyDQutC+0YHRgtC4INC90LDRgNGP0LTRgyDRgSDQutCw0LvRjNGG0LjQtdC8LCDQvdC1INC30LDQtNC10YDQttC40LLQsNGO0YLRgdGPINCyINC+0YDQs9Cw0L3QuNC30LzQtSDQuCDQstGL0LLQvtC00Y/RgtGB0Y8g0L/QvtGH0LrQsNC80LggKNCf0KLQkyDQstC70LjRj9C10YIsINC/0YDQtdC40LzRg9GJ0LXRgdGC0LLQtdC90L3Qviwg0L3QsCDRgNC10LDQsdGB0L7RgNCx0YbQuNGOINC70LjRiNGMINC60LDQu9GM0YbQuNGPLCDRgtC+0LPQtNCwINC60LDQuiDQstC70LjRj9C90LjQtSDQvdCwINGA0LXQsNCx0YHQvtGA0LHRhtC40Y4g0YTQvtGB0YTQvtGA0LAg0L3QtdC30L3QsNGH0LjRgtC10LvRjNC90L4sINGC0LXQvCDRgdCw0LzRi9C8INCf0KLQkyDQstC70LjRj9C10YIg0L3QsCDQv9C+0L3QuNC20LXQvdC40LUg0YPRgNC+0LLQvdGPINGE0L7RgdGE0LDRgtC+0LIg0LrQsNC6INCyINC60L7RgdGC0L3QvtC5INGC0LrQsNC90LgsINGC0LDQuiDQuCDQsiDQutGA0L7QstC4KS4g0J/QvtCy0YvRiNC10L3QvdCw0Y8g0L/QvtGC0YDQtdCx0L3QvtGB0YLRjCDQsiDQutCw0LvRjNGG0LjQuCDQuCDQtdCz0L4g0L3QtdC00L7RgdGC0LDRgtC+0Log0LIg0LrRgNC+0LLQuCDQvdC+0LLQvtGA0L7QttC00LXQvdC90L7Qs9C+INC80L7QttC10YIg0LLQvtC30L3QuNC60L3Rg9GC0Ywg0LfQsCDRgdGH0LXRgiDQvdC10LTQvtGB0YLQsNGC0LrQsCDQstC40YLQsNC80LjQvdCwINCUMyAo0YDQtdCx0LXQvdC+0Log0YDQtdC00LrQviDQsdGL0LLQsNC10YIg0L3QsCDRgdC+0LvQvdGG0LUgKNC90LXQtNC+0YHRgtCw0YLQvtC6INGD0LvRjNGC0YDQsNGE0LjQvtC70LXRgtCwKSwg0L3QtdC00L7RgdGC0LDRgtC+0Log0LzQsNCz0L3QuNGPIC0g0LrQvtGE0LXRgNC80LXQvdGC0LAg0LPQuNC00YDQvtC60YHQuNC70LDQtyDQv9C10YfQtdC90Lgg0Lgg0L/QvtGH0LXQuiwg0L7RgtCy0LXRh9Cw0Y7RidC40YUg0LfQsCDQvNC10YLQsNCx0L7Qu9C40LfQvCDQstC40YLQsNC80LjQvdCwINCUKSwg0LAg0YLQsNC60LbQtSDQvNC+0LbQtdGCINCx0YvRgtGMINCw0LvQuNC80LXQvdGC0LDRgNC90L7Qs9C+INCz0LXQvdC10LfQsCAo0L3QtdC00L7RgdGC0LDRgtC+0Log0L/QvtGB0YLRg9C/0LvQtdC90LjRjyDQvNC40L3QtdGA0LDQu9C+0LIsINGC0LDQutC40YUg0LrQsNC6INC60LDQu9GM0YbQuNC5LCDQvNCw0LPQvdC40LksINC80LXQtNGMINC4INC00YAuINGBINC/0LjRidC10LksLSDQtdGB0LvQuCDRgNC10LHQtdC90L7QuiDQvdCw0YXQvtC00LjRgtGB0Y8g0L3QsCDQuNGB0LrRg9GB0YHRgtCy0LXQvdC90L7QvCDQstGB0LrQsNGA0LzQu9C40LLQsNC90LjQuCDQuCDQvdC1INC/0L7Qu9GD0YfQsNC10YIg0LTQvtC/0L7Qu9C90LjRgtC10LvRjNC90YvRhSDQsdC40L7Qu9C+0LPQuNGH0LXRgdC60Lgt0LDQutGC0LjQstC90YvRhSDQtNC+0LHQsNCy0L7QuikuINCj0YHQuNC70LXQvdC90LDRjyDQtNC10LzQuNC90LXRgNCw0LvQuNC30LDRhtC40Y8v0YDQtdC30L7RgNCx0YbQuNGPINC60L7RgdGC0L3QvtC5INGC0LrQsNC90LggKNCyINGH0LDRgdGC0L3QvtGB0YLQuCwg0LfQsCDRgdGH0LXRgiDQstC70LjRj9C90LjRjyDQn9Ci0JMpINC80L7QttC10YIg0L/RgNC40LLQtdGB0YLQuCDQuiDQvtC00L3QvtC5INC40Lcg0YTQvtGA0Lwg0L/QsNGC0L7Qu9C+0LPQuNC4INC60L7RgdGC0L3Qvi3RgdGD0YHRgtCw0LLQvdC+0Lkg0YHQuNGB0YLQtdC80YssLSDQvtGB0YLQtdC+0LzQsNC70Y/RhtC40LggKNC/0L7QstGL0YjQtdC90L3QsNGPINCz0LjQsdC60L7RgdGC0Ywg0LrQvtGB0YLQtdC5KS4g0J3QsNC40LHQvtC70LXQtSDRh9Cw0YHRgtC+INGDINC80LDQu9C10L3RjNC60LjRhSDQtNC10YLQvtC6INC00LDQvdC90LDRjyDQv9Cw0YLQvtC70L7Qs9C40Y8g0L/RgNC+0Y/QstC70Y/QtdGC0YHRjyDQsiDQstC40LTQtSDRgNCw0YXQuNGC0LAgKNC/0LDRgtC+0LvQvtCz0LjRh9C10YHQutCw0Y8g0LTQtdGE0L7RgNC80LDRhtC40Y8g0LrQvtGB0YLQtdC5INGB0LrQtdC70LXRgtCwINCyINCy0LjQtNC1INCy0LDRgNGD0YHQvdGL0YUg0L3QvtCzICgwLdC+0LHRgNCw0LfQvdGL0LUpLCDQutC40LvQtdCy0LjQtNC90L7QuSAo0LrRg9GA0LjQvdC+0LkpINCz0YDRg9C00LgsINC/0LDRgtC+0LvQvtCz0LjRh9C10YHQutC40YUg0LjRgdC60YDQtdCy0LvQtdC90LjQuSDQv9C+0LfQstC+0L3QvtGH0L3QuNC60LAgKNCz0LjQv9C10YDQu9C+0YDQtNC+0LcsINCz0LjQv9C10YDQutC40YTQvtC3KSDQuCDQtNGAKS4g0JLRi9GA0LDQttC10L3QvdGL0Lkg0L3QtdC00L7RgdGC0LDRgtC+0Log0LLQuNGC0LDQvNC40L3QsCDQlDMg0LgsINC60LDQuiDRgdC70LXQtNGB0YLQstC40LUsINC60LDQu9GM0YbQuNGPLCDQv9GA0LjQstC+0LTQuNGCINC6INCy0YLQvtGA0LjRh9C90L7QvNGDINCz0LjQv9C10YDQv9Cw0YDQsNGC0LjRgNC10L7QuNC00LjQt9C80YMgKNC/0L7QstGL0YjQtdC90L3QsNGPINGB0LXQutGA0LXRhtC40Y8g0J/QotCTIC0g0YPRgdC40LvQtdC90LjQtSDRgNC10LfQvtGA0LHRhtC40Lgg0LrQvtGB0YLQuCkuINCf0L7QvNC40LzQviDQv9Cw0YLQvtC70L7Qs9C40Lkg0LrQvtGB0YLQvdC+0Lkg0YHQuNGB0YLQtdC80YssINC90LXQtNC+0YHRgtCw0YLQvtC6INC60LDQu9GM0YbQuNGPINC80L7QttC10YIg0L/RgNC40LLQtdGB0YLQuCDQuiDRj9Cy0LvQtdC90LjRjiDRgdC/0LDQt9C80L7RhNC40LvQuNC4LCDQv9GA0Lgg0LrQvtGC0L7RgNC+0Lkg0L7Qv9GA0LXQtNC10LvRj9GO0YLRgdGPINC/0L7Qu9C+0LbQuNGC0LXQu9GM0L3Ri9C1INGB0LjQvNC/0YLQvtC80Ysg0KXQstC+0YHRgtC10LrQsCwg0KLRgNGD0YHRgdC+ICjQvdCw0YDRg9GI0LXQvdC40LUg0LTQtdGP0YLQtdC70YzQvdC+0YHRgtC4INGB0LDRgNC60L7QvNC10YDQvtCyINC80YPRgdC60YPQu9Cw0YLRg9GA0Ysg0L7RgNCz0LDQvdC40LfQvNCwKS4g0JTQtdC50YHRgtCy0LjQtSDQn9Ci0JMg0L3QsNC/0YDQsNCy0LvQtdC90L4g0L3QsCDQuNGB0LrQu9GO0YfQtdC90LjQtSDQstGL0YjQtdC/0LXRgNC10YfQuNGB0LvQtdC90L3Ri9GFINC/0LDRgtC+0LvQvtCz0LjRh9C10YHQutC40YUg0LjQt9C80LXQvdC10L3QuNC5LCDQsiDQv9C10YDQstGD0Y4g0L7Rh9C10YDQtdC00YwsINC30LAg0YHRh9C10YIg0L/QvtC00LTQtdGA0LbQsNC90LjRjyDQvtC/0YLQuNC80LDQu9GM0L3QvtCz0L4g0YPRgNC+0LLQvdGPINC60LDQu9GM0YbQuNGPINCyINC60YDQvtCy0LguICAgMi4g0JIg0YDQsNC30LLQuNGC0LjQuCDQu9C10LPQutC40YUg0LIg0Y3QvNCx0YDQuNC+0LPQtdC90LXQt9C1INCy0YvQtNC10LvRj9GO0YIgMyDQvtGB0L3QvtCy0L3Ri9GFINGB0YLQsNC00LjQuDog0JbQtdC70LXQt9C40YHRgtCw0Y8gKDQt0LDRjyDQvdC10LTQtdC70Y8gLSA1LdGL0Lkg0LzQtdGB0Y/RhiDQstC90YPRgtGA0LjRg9GC0YDQvtCx0L3QvtCz0L4g0YDQsNC30LLQuNGC0LjRjykgLSDQsiDQtNCw0L3QvdC+0Lkg0YHRgtCw0LTQuNC4INGE0L7RgNC80LjRgNGD0LXRgtGB0Y8g0LHRgNC+0L3RhdC40LDQu9GM0L3QvtC1INC00LXRgNC10LLQvi4g0JrQsNC90LDQu9C40LrRg9C70Y/RgNC90LDRjyAoNC02INC80LXRgdGP0YYpIC0g0LIg0LTQsNC90L3QvtC5INGB0YLQsNC00LjQuCDQt9Cw0LrQu9Cw0LTRi9Cy0LDRjtGC0YHRjyDRgNC10YHQv9C40YDQsNGC0L7RgNC90YvQtSDQsdGA0L7QvdGF0LjQvtC70YsuINCQ0LvRjNCy0LXQvtC70Y/RgNC90LDRjyAoNi3QvtC5INC80LXRgdGP0YYg0LLQvdGD0YLRgNC40YPRgtGA0L7QsdC90L4gLSA4INC70LXRgiDQv9C+0YHQu9C1INGA0L7QttC00LXQvdC40Y8pIC0g0YTQvtGA0LzQuNGA0L7QstCw0L3QuNC1INC4INGA0LDQt9Cy0LjRgtC40LUg0LDQu9GM0LLQtdC+0LssINC60L7QvdC10YfQvdC+0LUg0YDQsNC30LLQuNGC0LjQtSDQsNGG0LjQvdGD0YHQvtCyLiAg0JPQvtGA0YLQsNC90Ywg0Lgg0YLRgNCw0YXQtdGPINGA0LDQt9Cy0LjQstCw0Y7RgtGB0Y8g0L3QsCAzLTQg0L3QtdC00LXQu9C1INC4INCx0LXRgNGD0YIg0YHQstC+0LUg0L3QsNGH0LDQu9C+INC40Lcg0LLRi9C/0Y/Rh9C40LLQsNC90LjRjyDQstC10L3RgtGA0LDQu9GM0L3QvtC5INGB0YLQtdC90LrQuCDQv9C10YDQtdC00L3QtdC5INC60LjRiNC60LgsINC30LDQutC70LDQtNGL0LLQsNGO0YLRgdGPINC40Lcg0LXQtSDQv9GA0L7QutGB0LjQvNCw0LvRjNC90L7QuSDRh9Cw0YHRgtC4LCDRgtC+0LPQtNCwINC60LDQuiDQuNC3INC10LUg0LTQuNGB0YLQsNC70YzQvdC+0Lkg0YfQsNGB0YLQuCDQstGL0L/Rj9GH0LjQstCw0L3QuNC1INC30LDRh9Cw0YLQutCwINCyINCy0LjQtNC1IDIt0YUg0LzQtdGI0L7Rh9C60L7QsiDRgdC+0L7RgtCy0LXRgtGB0YLQstGD0LXRgiDQv9GA0LDQstC+0LzRgyDQuCDQu9C10LLQvtC80YMg0LvQtdCz0LrQuNC8LiDQndC10Y3Qv9C40YLQtdC70LjQsNC70YzQvdGL0LUg0Y3Qu9C10LzQtdC90YLRiywg0YLQsNC60LjQtSDQutCw0Log0YHQvtC10LTQuNC90LjRgtC10LvRjNC90L7RgtC60LDQvdC90YvQtSDRgdGC0YDRg9C60YLRg9GA0Ysg0LvQtdCz0LrQuNGFLCDQsdGA0L7QvdGF0L7QsiDQuCDRgtGA0LDRhdC10LgsINCwINGC0LDQutC20LUg0YHQvtGB0YPQtNGLLCDRhdGA0Y/RidC10LLRi9C1INC/0L7Qu9GD0LrQvtC70YzRhtCwL9C60L7Qu9GM0YbQsCwg0LPQu9Cw0LTQutCw0Y8g0LzRg9GB0LrRg9C70LDRgtGD0YDQsCDQsdGA0L7QvdGF0L7QsiDRhNC+0YDQvNC40YDRg9GO0YLRgdGPINC40Lcg0L7QutGA0YPQttCw0Y7RidC10Lkg0LzQtdC30LXQvdGF0LjQvNGLLCDRgtC+0LPQtNCwINC60LDQuiDRjdC/0LjRgtC10LvQuNC5INC00YvRhdCw0YLQtdC70YzQvdGL0YUg0L/Rg9GC0LXQuSwg0L/RgNC10LTRgdGC0LDQstC70LXQvdC90YvQuSDQvtC00L3QvtGB0LvQvtC50L3Ri9C8INC/0YHQtdCy0LTQvtGB0YLRgNCw0YLQuNGE0LjRhtC40YDQvtCy0LDQvdC90YvQvCDQvNC10YDRhtCw0YLQtdC70YzQvdGL0LwsINC30LDQutC70LDQtNGL0LLQsNC10YLRgdGPINC40Lcg0L/RgNC10YXQvtGA0LTQsNC70YzQvdC+0Lkg0L/Qu9Cw0YHRgtC40L3QutC4LiDQkdGA0L7QvdGF0LjQsNC70YzQvdC+0LUg0LTQtdGA0LXQstC+INGE0L7RgNC80LjRgNGD0LXRgtGB0Y8g0LfQsCDRgdGH0LXRgiDQtNC10LvQtdC90LjRjyDQsdGA0L7QvdGF0L7QsiDQtNC40YXQvtGC0L7QvNC40YfQtdGB0LrQuCwg0YfRgtC+INC+0LHRg9GB0LvQvtCy0LvQuNCy0LDQtdGCINCy0LXRgtCy0LvQtdC90LjRjyDQsdGA0L7QvdGF0L7QsiDQv9C+0YHQu9C10LTQvtCy0LDRgtC10LvRjNC90L4g0L3QsCDQsdC+0LvQtdC1INC80LXQu9C60LjQtSDQutCw0LvQuNCx0YDRiy4g0JjQt9C90LDRh9Cw0LvRjNC90L4g0LHRgNC+0L3RhdC40L7Qu9GLINGA0LDQt9Cy0LjQstCw0Y7RgtGB0Y8g0LIg0LLQuNC00LUg0Y3Qv9C40YLQtdC70LjQsNC70YzQvdGL0YUg0YLRgNGD0LHQvtGH0LXQuiwg0LHQtdGA0YPRidC40YUg0YHQstC+0LUg0L3QsNGH0LDQu9C+INGC0LDQuiDQttC1INC40Lcg0L/RgNC10YXQvtGA0LTQsNC70YzQvdC+0Lkg0L/Qu9Cw0YHRgtC40L3QutC4LiDQnNC10LfQvtGC0LXQu9C40Lkg0L/Qu9C10LLRgNGLICjQstC40YHRhtC10YDQsNC70YzQvdC+0Lkg0Lgg0L/QsNGA0LjQtdGC0LDQu9GM0L3QvtC5KSwg0LIg0YHQstC+0Y4g0L7Rh9C10YDQtdC00YwsINC/0YDQvtC40YHRhdC+0LTQuNGCINC40Lcg0YHQv9C70LDQvdGF0L3QvtGC0L7QvNCwLiDQktCw0LbQvdGL0Lwg0LDRgdC/0LXQutGC0L7QvCDRj9Cy0LvRj9C10YLRgdGPINGB0LjQvdGC0LXQtyDRgdGD0YDRhNCw0LrRgtCw0L3RgtCwLCDQvdCw0YfQuNC90LDRjtGJ0LjQudGB0Y8g0L3QsCAzMS0zMiDQvdC10LTQtdC70LUg0LLQvdGD0YLRgNC40YPRgtGA0L7QsdC90L7Qs9C+INGA0LDQt9Cy0LjRgtC40Y8uINCh0YLQvtC40YIg0L7RgtC80LXRgtC40YLRjCwg0YfRgtC+INGA0LDQt9Cy0LjRgtC40LUg0LvQtdCz0LrQuNGFINC/0YDQvtC40YHRhdC+0LTQuNGCINC60LDQuiDQsNC90YLQtdC90LDRgtCw0LvRjNC90L4sINGC0LDQuiDQuCDQv9C+0YHRgtC90LDRgtCw0LvRjNC90L4sINGH0YLQviDRgdCy0Y/Qt9Cw0L3QviDRgSDRg9GB0LrQvtGA0LXQvdC90YvQvCDRgNC+0YHRgtC+0Lwg0LLRgdC10LPQviDQvtGA0LPQsNC90LjQt9C80LAg0L/QvtGB0LvQtSDRgNC+0LbQtNC10L3QuNGPLCDQsdC+0LvRjNGI0LXQuSDQv9C+0YLRgNC10LHQvdC+0YHRgtGM0Y4g0YLQutCw0L3QtdC5INCyINGN0L3QtdGA0LPQuNC4INC4INC60LjRgdC70L7RgNC+0LTQtS4g0JIg0LLQvtC30YDQsNGB0YLQtSDQvtC60L7Qu9C+IDEyLdGC0Lgg0LvQtdGCINGB0YLRgNC+0LXQvdC40LUg0LvQtdCz0LrQuNGFINGA0LXQsdC10L3QutCwINGB0L7QvtGC0LLQtdGC0YHRgtCy0YPQtdGCINGC0LDQutC+0LLQvtC80YMg0YMg0LLQt9GA0L7RgdC70L7Qs9C+INGH0LXQu9C+0LLQtdC60LA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1" table:style-name="ce1">
            <text:p>1066921</text:p>
          </table:table-cell>
          <table:table-cell office:value-type="string" table:style-name="ce1">
            <text:p>russian</text:p>
          </table:table-cell>
          <table:table-cell office:value-type="string" table:style-name="ce1">
            <text:p>Билет 13&amp;lt;br /&amp;gt; 1. Назовите функцию паратгормона в организме у детей раннего возраста. &amp;lt;br /&amp;gt; 2.Какие выделяют стадии в развитии легких в эмбриогенезе? &amp;lt;br /&amp;gt;</text:p>
          </table:table-cell>
          <table:table-cell office:value-type="string" table:style-name="ce1">
            <text:p>MSDQstC+0L/RgNC+0YEuINCT0L7RgNC80L7QvSDQv9Cw0YDQsNGJ0LjRgtC+0LLQuNC00L3QvtC5INC20LXQu9C10LfRiyAtINGN0YLQviDQv9Cw0YDQsNGC0LPQvtGA0LzQvtC9LCDQuNC70Lgg0L/QsNGA0LDRgtC40YDQtdC+0LjQtNC90YvQuSDQs9C+0YDQvNC+0L0sINCf0KLQky4g0J/RgNC10LbQtNC1INCy0YHQtdCz0L4sINC10LPQviDRhNGD0L3QutGG0LjRjyDQt9Cw0LrQu9GO0YfQsNC10YLRgdGPINCyINGC0L7QvCwg0YfRgtC+INC+0L0g0YDQtdCz0YPQu9C40YDRg9C10YIg0YPRgNC+0LLQtdC90Ywg0YHQvtC00LXRgNC20LDQvdC40Y8g0LjQvtC90L7QsiDQutCw0LvRjNGG0LjRjyAo0KHQsDIrKSDQuCDRhNC+0YHRhNCw0YLQvtCyINCyINC60YDQvtCy0LguINCh0LXQutGA0LXRhtC40Y8g0L/QsNGA0LDRgtC40YDQtdC+0LTQuNC90L7Qs9C+INCz0L7RgNC80L7QvdCwINGB0L7QstC10YDRiNCw0LXRgtGB0Y8g0LIg0L7RgtCy0LXRgiDQvdCwINGB0L3QuNC20LXQvdC40LUg0YPRgNC+0LLQvdGPINCh0LAyKyDQsiDQutGA0L7QstC4INC+0YDQs9Cw0L3QuNC30LzQsCDQtNC10YLQtdC5INGA0LDQvdC90LXQs9C+INCy0L7Qt9GA0LDRgdGC0LAuINCi0LDQuiwg0J/QotCTINGB0L/QvtGB0L7QsdGB0YLQstGD0LXRgiwg0L/RgNC10LbQtNC1INCy0YHQtdCz0L4sINGD0LLQtdC70LjRh9C10L3QuNGOINC60L7QvdGG0LXQvdGC0YDQsNGG0LjQuCDQodCwMisg0YEg0L/QvtC80L7RidGM0Y4g0L7RgdGC0LXQvtC60LvQsNGB0YLQvtCyLCDRgNCw0LfRgNGD0YnQsNGO0YnQuNGFINC60L7RgdGC0L3Rg9GOINGC0LrQsNC90YwsINC4LCDQutCw0Log0YHQu9C10LTRgdGC0LLQuNC1LCDQv9GA0LjQstC+0LTQuNGCINC6INGD0YHQuNC70LXQvdC40Y4g0YDQtdC30L7RgNCx0YbQuNC4INC60L7RgdGC0LXQuS4g0KLQsNC60LjQvCDQvtCx0YDQsNC30L7QvCwg0L/RgNC+0LjRgdGF0L7QtNC40YIg0LLRi9GB0LLQvtCx0L7QttC00LXQvdC40LUg0KHQsDIrINC40Lcg0LrQvtGB0YLQvdC+0Lkg0YLQutCw0L3QuCDQsiDQutGA0L7QstC+0YLQvtC6LCDQt9CwINGB0YfQtdGCINGH0LXQs9C+INGB0L7QtNC10YDQttCw0L3QuNC1INC60LDQu9GM0YbQuNGPINCyINC60YDQvtCy0Lgg0L/QvtCy0YvRiNCw0LXRgtGB0Y8uINCa0YDQvtC80LUg0YLQvtCz0L4sINCf0KLQkyDRgdGC0LjQvNGD0LvQuNGA0YPQtdGCINC/0L7QstGL0YjQtdC90LjQtSDQutC+0L3RhtC10L3RgtGA0LDRhtC40Lgg0LrQsNC70YzRhtC40Y8g0LIg0LrRgNC+0LLQuCDQt9CwINGB0YfQtdGCINC/0L7QstGL0YjQtdC90LjRjyDQvtCx0YDQsNGC0L3QvtCz0L4g0LLRgdCw0YHRi9Cy0LDQvdC40Y8g0LjQvtC90L7QsiDQutCw0LvRjNGG0LjRjyDQv9C+0YHRgNC10LTRgdGC0LLQvtC8INC/0L7Rh9C10LogLSDQsCDQuNC80LXQvdC90L4g0LTQuNGB0YLQsNC70YzQvdGL0LzQuCDQutCw0L3QsNC70YzRhtCw0LzQuCDQv9C+0YfQtdC6LiDQn9Cw0YDQsNGC0LPQvtGA0LzQvtC9INC90LAg0YTQvtGB0YTQvtGAINC+0LrQsNC30YvQstCw0LXRgiDRgdC+0LLQtdGA0YjQtdC90L3QviDQv9GA0L7RgtC40LLQvtC/0L7Qu9C+0LbQvdGL0Lkg0Y3RhNGE0LXQutGCLCDRgdC/0L7RgdC+0LHRgdGC0LLRg9C10YIg0YHQvdC40LbQtdC90LjRjiDRgNC10LDQsdGB0L7RgNCx0YbQuNC4INGE0L7RgdGE0LDRgtC+0LIg0LIg0L/QvtGH0LrQsNGFLCDQstGL0LzRi9Cy0LDQvdC40Y4g0LXQs9C+INC40Lcg0LrQvtGB0YLQtdC5LiDQoyDQtNC10YLQtdC5INGA0LDQvdC90LXQs9C+INCy0L7Qt9GA0LDRgdGC0LAg0YPRgNC+0LLQtdC90Ywg0LrQsNC70YzRhtC40Y8g0LIg0LrRgNC+0LLQuCDQuNC80LXQtdGCINGA0LXRiNCw0Y7RidC10LUg0Lgg0L7RgdC90L7QstC+0L/QvtC70LDQs9Cw0Y7RidC10LUg0LfQvdCw0YfQtdC90LjQtS4g0JrQsNC70YzRhtC40Lkg0L3QtdC+0LHRhdC+0LTQuNC8INC00LvRjyDRgtC+0LPQviwg0YfRgtC+0LHRiyDQv9GA0L7QuNGB0YXQvtC00LjQu9C+INGB0LLQvtC10LLRgNC10LzQtdC90L3QvtC1INGA0LDQt9Cy0LjRgtC40LUg0LrQvtGB0YLQvdC+0Lkg0YLQutCw0L3QuCwg0LzRi9GI0YYg0Lgg0YLQsNC60LbQtSDQvdC10YDQstC90L7QuSDRgdC40YHRgtC10LzRiy4g0JrQsNC70YzRhtC40Lkg0L3QtdC+0LHRhdC+0LTQuNC8INC00LvRjyDQvNC90L7Qs9C40YUg0LrQsNGB0LrQsNC00L3Ri9GFINC/0YPRgtC10Lkg0Lgg0LLQvdGD0YLRgNC40LrQu9C10YLQvtGH0L3Ri9GFINC80LXRhdCw0L3QuNC30LzQvtCyLiDQn9C+0Y3RgtC+0LzRgyDQtdCz0L4g0L3QtdC00L7RgdGC0LDRgtC+0Log0LLQtdC00LXRgiDQuiDQvdCw0YDRg9GI0LXQvdC40Y4g0LzQtdGC0LDQsdC+0LvQuNGH0LXRgdC60LjRhSDQv9GA0L7RhtC10YHRgdC+0LIg0LIg0L7RgNCz0LDQvdC40LfQvNC1INGA0LXQsdC10L3QutCwINC4INC6INGA0LDQt9Cy0LjRgtC40Y4g0YDQsNC30LvQuNGH0L3Ri9GFINC30LDQsdC+0LvQtdCy0LDQvdC40LkuINCk0LjQt9C40L7Qu9C+0LPQuNGH0LXRgdC60LjQuSDRg9GA0L7QstC10L3RjCDQn9Ci0JMg0LIg0LrRgNC+0LLQuCDQutGA0LDQudC90LUg0LLQsNC20LXQvSwg0YLQsNC6INC60LDQuiDQvtC9INGB0L/QvtGB0L7QsdGB0YLQstGD0LXRgiDQvdC+0YDQvNCw0LvRjNC90L7QvNGDINC60L7RgdGC0LXQvtCx0YDQsNC30L7QstCw0L3QuNGOLCDRgi7QtS4g0L7QvSDQvtC60LDQt9GL0LLQsNC10YIg0LjQvNC10L3QvdC+INCw0L3QsNCx0L7Qu9C40YfQtdGB0LrQuNC5INGN0YTRhNC10LrRgi4g0J/RgNC4INC40LfQsdGL0YLQutC1INCf0KLQkyDRgyDQtNC10YLQtdC5INGA0LDQvdC90LXQs9C+INCy0L7Qt9GA0LDRgdGC0LAg0L3QsNCx0LvRjtC00LDQtdGC0YHRjyDQtNC10LzQuNC90LXRgNCw0LvQuNC30LDRhtC40Y8g0LrQvtGB0YLQtdC5LiDQotCw0LrQvtC1INGP0LLQu9C10L3QuNC1INC/0YDQuCDQv9C+0YHRgtC+0Y/QvdC90L7QvCDRgtC10YfQtdC90LjQuCDQvNC+0LbQtdGCINC/0YDQuNCy0L7QtNC40YLRjCDRgNCw0LfQstC40YLQuNGOINGA0LDRhdC40YLQsCwg0L7RgdGC0LXQvtC80LDQu9GP0YbQuNC4LiDQntGB0L7QsdC10L3QvdC+INGA0LDQt9Cy0LjRgtC40LUg0LTQsNC90L3Ri9GFINC30LDQsdC+0LvQtdCy0LDQvdC40Lkg0L/RgNC+0LjRgdGF0L7QtNC40YIg0L/RgNC4INC00LXRhNC40YbQuNGC0LUg0LLQuNGC0LDQvNC40L3QsCDQlC4g0JjQt9Cx0YvRgtC+0Log0J/QotCTINC/0YDQuNCy0L7QtNC40YIg0Log0YDQsNC30LLQuNGC0LjRjiDQs9C40L/QtdGA0L/QsNGA0LDRgtC40YDQtdC+0LfQsC4g0J/RgNC4INC90LXQtNC+0YHRgtCw0YLQutC1INCf0KLQkyDRgyDQutGA0L7QstC4IC0g0YMg0L3QvtCy0L7RgNC+0LbQtNC10L3QvdGL0YUg0LzQvtC20LXRgiDQvdCw0LHQu9GO0LTQsNGC0YzRgdGPINC/0L7Rj9Cy0LvQtdC90LjQtSDQs9C40L/QvtC60LDQu9GM0YbQuNC10LzQuNGH0LXRgdC60LjRhSDRgdGD0LTQvtGA0L7QsyDQsiDRgNC10LfRg9C70YzRgtCw0YLQtSDRgdC90LjQttC10L3QuNGPINGD0YDQvtCy0L3RjyDQodCwMisg0LIg0LrRgNC+0LLQuC4g0J3QtdC00L7RgdGC0LDRgtC+0Log0L/QsNGA0LDRgtCz0L7RgNC80L7QvdCwINC/0YDQuNCy0L7QtNC40YIg0Log0LfQsNCx0L7Qu9C10LLQsNC90LjRjiAtINCz0LjQv9C+0L/QsNGA0LDRgtC40YDQtdC+0LfRgy4g0KLQsNC60LjQvCDQvtCx0YDQsNC30L7QvCwg0L/QsNGA0LDRgtCz0L7RgNC80L7QvSDQuNCz0YDQsNC10YIg0LLQsNC20L3Rg9GOINGA0L7Qu9GMINCyINGA0LXQs9GD0LvRj9GG0LjQuCDRg9GA0L7QstC90Y8g0KHQsCsg0LIg0LrRgNC+0LLQuCDQv9GD0YLQtdC8INGD0LLQtdC70LjRh9C10L3QuNGPINC60L7QvdGG0LXQvdGC0YDQsNGG0LjQuCDQtdCz0L4g0LIg0LrRgNC+0LLQuCwg0Lgg0YLQsNC60LbQtSDRgdC/0L7RgdC+0LHRgdGC0LLRg9C10YIg0YHQvdC40LbQtdC90LjRjiDRg9GA0L7QstC90Y8g0YTQvtGB0YTQsNGC0L7Qsi48YnIgLz4NCjIg0LLQvtC/0YDQvtGBLiDQktGL0LTQtdC70Y/RjtGCIDMg0YHRgtCw0LTQuNC4INGA0LDQt9Cy0LjRgtC40Y8g0LvQtdCz0LrQuNGFINGDINC/0LvQvtC00LAg0LIg0Y3QvNCx0YDQuNC+0LPQtdC90LXQt9C1LiAxLdGPINGB0YLQsNC00LjRjyAtINC20LXQu9C10LfQuNGB0YLQsNGPINGB0YLQsNC00LjRjy4g0J7QvdCwINC/0YDQvtC40YHRhdC+0LTQuNGCINChIDUg0L3QtdC00LXQu9C4INC00L4gNCDQvNC10YEg0LLQvdGD0YLRgNC40YPRgtGA0L7QsdC90L7Qs9C+INGA0LDQt9Cy0LjRgtC40Y8uINCSINGN0YLRgyDRgdGC0LDQtNC40Y4g0YHQvtCy0LXRgNGI0LDQtdGC0YHRjyDRhNC+0YDQvNC40YDQvtCy0LDQvdC40LUg0LHRgNC+0L3RhdC40LDQu9GM0L3QvtCz0L4g0LTQtdGA0LXQstCwLiAyLdGPINGB0YLQsNC00LjRjyAtINC60LDQvdCw0LvQuNC60YPQu9GP0YDQvdCw0Y8g0YHRgtCw0LTQuNGPLiDQntC90LAg0YHQvtCy0LXRgNGI0LDQtdGC0YHRjyDQvdCwIDQtNiDQvNC10YEg0LLQvdGD0YLRgNC40YPRgtGA0L7QsdC90L7Qs9C+INGA0LDQt9Cy0LjRgtC40Y8uINCS0L4g0LLRgtC+0YDRg9GOINGB0YLQsNC00LjRjiDQv9GA0L7QuNGB0YXQvtC00LjRgiDQt9Cw0LrQu9Cw0LTQutCwINGA0LXRgdC/0LjRgNCw0YLQvtGA0L3Ri9GFINCx0YDQvtC90YXQuNC+0LsuIDMt0Y8g0YHRgtCw0LTQuNGPIC0g0LDQu9GM0LLQtdC+0LvRj9GA0L3QsNGPINGB0YLQsNC00LjRjy4g0J3QsNCx0LvRjtC00LDQtdGC0YHRjyDRgSA2INC80LXRgdGP0YbQsCDQstC90YPRgtGA0LjRg9GC0YDQvtCx0L3QvtCz0L4g0YDQsNC30LLQuNGC0LjRjyDQuCDQv9GA0L7QtNC+0LvQttCw0LXRgtGB0Y8g0LLQv9C70L7RgtGMINC00L4gOCDQu9C10YLQvdC10LPQviDQstC+0LfRgNCw0YHRgtCwINGA0LXQsdC10L3QutCwLiDQkiDQtNCw0L3QvdGD0Y4g0YHRgtCw0LTQuNGOINC/0YDQvtC40YHRhdC+0LTQuNGCINGE0L7RgNC80LjRgNC+0LLQsNC90LjQtSDQsNC70YzQstC10L7Qu9GP0YDQvdGL0YUg0YXQvtC00L7QsiAt0LjRhSDQvtGB0L3QvtCy0L3QvtC5INC80LDRgdGB0YssINC4INGC0LDQutC20LUg0LDQu9GM0LLQtdC+0LsuINCT0L7RgNGC0LDQvdGMLCDRgtGA0LDRhdC10Y8sINCx0YDQvtC90YXQuCDQvdCw0YfQuNC90LDRjtGCINGB0LLQvtC1INGE0L7RgNC80LjRgNC+0LLQsNC90LjQtSDQvdCwIDMtNCDQvdC10LTQtdC70LUg0LLQvdGD0YLRgNC40YPRgtGA0L7QsdC90L7Qs9C+INGA0LDQt9Cy0LjRgtC40Y8uINCt0YLQuCDQvtGA0LPQsNC90YsgINGE0L7RgNC80LjRgNGD0Y7RgtGB0Y8g0LjQtyDQstGL0L/Rj9GH0LjQstCw0L3QuNGPINCy0LXQvdGC0YDQsNC70YzQvdC+0Lkg0YHRgtC10L3QutC4INC/0LXRgNC10LTQvdC10Lkg0LrQuNGI0LrQuC4g0JjQtyDQtdC1INCy0LXRgNGF0L3QtdC5INGH0LDRgdGC0Lgg0LfQsNC60LvQsNC00YvQstCw0Y7RgtGB0Y8g0LPQvtGA0YLQsNC90Ywg0Lgg0YLRgNCw0YXQtdGPLiDQmNC3INC90LjQttC90LXQuSDRh9Cw0YHRgtC4LCDQsiDRgdCy0L7RjiDQvtGH0LXRgNC10LTRjCwg0Y3RgtC+0YIg0LfQsNGH0LDRgtC+0Log0LTQtdC70LjRgtGB0Y8g0L3QsCAyINC80LXRiNC60LAuINCt0YLQuCAyINC80LXRiNC60LAg0Y/QstC70Y/RjtGC0YHRjyDQt9Cw0YfQsNGC0LrQsNC80Lgg0LTQu9GPINC/0YDQsNCy0L7Qs9C+INC4INC70LXQstC+0LPQviDQu9C10LPQutC+0LPQviwg0YHQvtC+0YLQstC10YLRgdGC0LLQtdC90L3Qvi4g0J3QsCA4INC90LXQtNC10LvQtSDQsdC10YDQtdC80LXQvdC90L7RgdGC0Lgg0YMg0L/Qu9C+0LTQsCDQv9GA0L7QuNGB0YXQvtC00LjRgiDRhNC+0YDQvNC40YDQvtCy0LDQvdC40LUg0LHRgNC+0L3RhdC40L7Quy4g0J7QvdC4INGE0L7RgNC80LjRgNGD0Y7RgtGB0Y8g0LjQtyDRjdC/0LjRgtC10LvQuNCw0LvRjNC90YvRhSDRgtGA0YPQsdC+0YfQtdC6LiDQoNC+0YHRgiDQsdGA0L7QvdGF0LjQvtC7LCDQsiDRgdCy0L7RjiDQvtGH0LXRgNC10LTRjCwg0LHRg9C00LXRgiDRgdC+0L/RgNC+0LLQvtC20LTQsNGC0YzRgdGPINC00LjRhdC+0YLQvtC80LjRh9C10YHQutC40Lwg0LTQtdC70LXQvdC40LXQvCAtINGC0LDQutC40Lwg0L7QsdGA0LDQt9C+0Lwg0YDQsNC30LLQuNCy0LDQtdGC0YHRjyDQsdGA0L7QvdGF0LjQsNC70YzQvdC+0LUg0LTQtdGA0LXQstC+LiDQndCwINC60L7QvdGG0LDRhSDQutC+0L3QtdGH0L3Ri9GFINCy0LXRgtCy0LXQuSDQsdGD0LTRg9GCINC30LDQutC70LDQtNGL0LLQsNGC0YzRgdGPINC30LDRh9Cw0YLQutC4INCw0LvRjNCy0LXQvtC7LiDQrdGC0L4g0L/RgNC+0LjRgdGF0L7QtNC40YIg0L/RgNC40LzQtdGA0L3QviDQvdCwIDcg0LzQtdGB0Y/RhtC1INCx0LXRgNC10LzQtdC90L3QvtGB0YLQuCDQttC10L3RidC40L3Riy4g0J3QtdGN0L/QuNGC0LXQu9C40LDQu9GM0L3Ri9C1INGN0LvQtdC80LXQvdGC0YssINCyINGB0LLQvtGOINC+0YfQtdGA0LXQtNGMLCDRhNC+0YDQvNC40YDRg9GO0YLRgdGPINC40Lcg0LzQtdC30LXQvdGF0LjQvNGLLiDQkCDRgdC/0LvQsNC90YXQvdC+0YLQvtC8INGE0L7RgNC80LjRgNGD0LXRgiDQv9C70LXQstGA0YMg0LvQtdCz0LrQuNGFLiDQlNCw0LvQtdC1INGB0YLQvtC40YIg0YPQv9C+0LzRj9C90YPRgtGMINC+INGB0LjQvdGC0LXQt9C1INGB0YPRgNGE0LDQutGC0LDQvdGC0LAuINCV0LPQviDRhNC+0YDQvNC40YDQvtCy0LDQvdC40LUg0L/RgNC+0LjRgdGF0L7QtNC40YIg0LIg0YDQtdGB0L/QuNGA0LDRgtC+0YDQvdGL0YUg0L7RgtC00LXQu9Cw0YUg0YEgNyDQvNC10YHRj9GG0LAg0LPQtdGB0YLQsNGG0LjQuC4g0J3QsNGH0LjQvdCw0LXRgtGB0Y8g0LXQs9C+INGB0LjQvdGC0LXQtyDQtdGJ0LUg0L3QsCAyMC0yNSDQvdC10LQg0LLQvdGD0YLRgNC40YPRgtGA0L7QsdC90L7Qs9C+INGA0LDQt9Cy0LjRgtC40Y8sINC90L4g0LDQutGC0LjQstC90LDRjyDQtdCz0L4g0LLRi9GA0LDQsdC+0YLQutCwINC/0YDQvtC40YHRhdC+0LTQuNGCINC90LAgMzUtMzYg0L3QtdC00LXQu9C1LiDQodGD0YDRhNCw0LrRgtCw0L3RgiAtINGN0YLQviDQv9C+0LLQtdGA0YXQvdC+0YHRgtC+LdCw0LrRgtC40LLQvdC+0LUg0LLQtdGJ0LXRgdGC0LLQviwg0LrQvtGC0L7RgNC+0LUg0YHQvdC40LbQsNC10YIg0L/QvtCy0LXRgNGF0L3QvtGB0YLQvdC+0LUg0L3QsNGC0Y/QttC10L3QuNC1INCw0LvRjNCy0LXQvtC7LCDQuCDQv9GA0LXQtNC+0YLQstGA0LDRidCw0LXRgiDQutC+0LvQu9Cw0L/RgSDQsNC70YzQstC10L7QuyDRgtCw0LrQuNC8INC+0LHRgNCw0LfQvtC8LiDQntGB0L7QsdC10L3QvdC+INCy0LDQttC10L0g0L/QtdGA0LLRi9C5INCy0LTQvtGFINC90L7QstC+0YDQvtC20LTQtdC90L3QvtCz0L4sINC60L7Qs9C00LAg0LDQu9GM0LLQtdC+0LvRiyDQtNC+0LvQttC90Ysg0YDQsNGB0LrRgNGL0YLRjNGB0Y8g0Lgg0YDQtdCx0LXQvdC+0Log0YHQvtCy0LXRgNGI0LjRgiDRgdCy0L7QuSDQv9C10YDQstGL0Lkg0LLQtNC+0YUuINCjINC90LXQtNC+0L3QvtGI0LXQvdC90YvRhSDQtNC10YLQtdC5ICjQvdCwIDM2LTM3INC90LXQtNC10LvQtSkg0YHRg9GA0YTQsNC60YLQsNC90YIg0LzQvtC20LXRgiDQsdGL0YLRjCDRgdC40L3RgtC10LfQuNGA0L7QstCw0L0g0LIg0L3QtdC00L7RgdGC0LDRgtC+0YfQvdC+0Lwg0LrQvtC70LjRh9C10YHRgtCy0LUuINCi0LDQutC+0LUg0Y/QstC70LXQvdC40LUg0LzQvtC20LXRgiDQv9C+0YHQv9C+0YHQvtCx0YHRgtCy0L7QstCw0YLRjCDRgNCw0LfQstC40YLQuNGOINGA0LXRgdC/0LjRgNCw0YLQvtGA0L3QvtCz0L4g0LTQuNGB0YLRgNC10YHRgSDRgdC40L3QtNGA0L7QvNCwINC90L7QstC+0YDQvtC20LTQtdC90L3Ri9GFICjQoNCU0KHQnSkuINCi0LDQutC40Lwg0L7QsdGA0LDQt9C+0LwsINGN0LzQsdGA0LjQvtCz0LXQvdC10Lcg0LvQtdCz0LrQuNGFINC/0YDQtdC00YHRgtCw0LLQu9GP0LXRgiDRgdC+0LHQvtC5INGB0LvQvtC20L3Ri9C5INC4INC/0L7RgdC70LXQtNC+0LLQsNGC0LXQu9GM0L3Ri9C5INC/0YDQvtGG0LXRgdGBLCDQutC+0YLQvtGA0YvQuSDQvdCw0YfQuNC90LDQtdGC0YHRjyDQsiDQv9C10YDQuNC+0LQg0LPQtdGB0YLQsNGG0LjQuCDQuCDQv9GA0L7QtNC+0LvQttCw0LXRgtGB0Y8g0LLQviDQstC90LXRg9GC0YDQvtCx0L3QvtC8ICjQv9C+0YHRgtC90LDRgtCw0LvRjNC90L7QvCkg0L/QtdGA0LjQvtC00LUg0LLQv9C70L7RgtGMINC00L4gOCDQu9C10YIuINCaIDEyINCz0L7QtNCw0Lwg0LvQtdCz0LrQuNC1INGA0LXQsdC10L3QutCwINGB0YLQsNC90L7QstGP0YLRgdGPINC/0L7QtNC+0LHQvdGLINCy0LfRgNC+0YHQu9C+0LzRgywg0LrQsNC6INCz0LjRgdGC0L7Qu9C+0LPQuNGH0LXRgdC60LgsINGC0LDQuiDQuCDRhNC40LfQuNC+0LvQvtCz0LjRh9C10YHQutC4L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97" table:style-name="ce1">
            <text:p>914697</text:p>
          </table:table-cell>
          <table:table-cell office:value-type="string" table:style-name="ce1">
            <text:p>english</text:p>
          </table:table-cell>
          <table:table-cell office:value-type="string" table:style-name="ce1">
            <text:p>Ticket 13&amp;lt;br /&amp;gt; 1. What is the function of parathyroid hormone in the body in young children.&amp;lt;br /&amp;gt; 2. What are the stages in the development of the lungs in embryogenesis?&amp;lt;br /&amp;gt;</text:p>
          </table:table-cell>
          <table:table-cell office:value-type="string" table:style-name="ce1">
            <text:p>MSkgQU5TV0VSIDogIHRoZSBmdW5jYXRpb24gb2YgcGVyYXRoeXJvaWQgaG9ybW9uZSBpbiB0aGUgYm9keSAgb2YgeW91bmcgY2hpbGRyZW5zICBwZXJhdGh5cm9pZCBob3Jtb25lIGEgcGxheSBhIGNyaXRpY2FsIHJvbGUgb2YgY2FsY2l1bSBhbmQgIHBob3NwaGFydXMgaG9taW9zdGF0aXMgIGluIHRoZSBib2R5IG9mIHlvdW5nIGNoaWxkcmVucyAgaXRzIHByaWltZXJ5IGZ1bmNhdGlvbiAgb2YgdGhlIHBlcmF0aHlyb2lkIGhvcm1vbmUgIGluY2x1ZGUgY2FsY2l1bSAgcmVndWxhdGlvbiBwZXJhdGh5cm9pZCBpbmNyZWFzZSBibG9vZCBjYWxjaXVtIGxldmVsIGJ5ICBwcm9tb3RpbmcgdGhlICByZWxpYXNlIHRoZSBjYWxjaXVtIGZyb20gdGhlIGJvbmUgIChib25lIHJlYWJzb3JwdGlpb24gKSBhbmQgIGFuZCBlbmhhbmNlZCBjYWxjaXVtIGFic29ycHRpb24gIGluIHRoZSBpbnRlc3RpbmUgICB0aGUgYW5vdGhlciBmdW5jYXRpb24gb2YgcGVyZXRoeXJvaWQgaG9ybW9uZSBpbiB0aGUgYm9keSBvZiBjaGlsZHJlbiBpcyB0aGV5IHJlZ3VsYXRlZCB0aGUgcGhvc3Bob3J1cyBsZXZlbCBvZiB0aGUgYm9keSAgYW5kIHBob3NwaG9ydXMgcmVndWxhdGlvbiBpbiB0aGUgcGFyYXRoeXJvaWQgaG9ybW9uZSAgZGVjcmVhc2UgcGhvc3Bob3J1cyBsZXZlbCBpbiB0aGUgYm9keSAgYnkgcHJvbW90aW4gdGhlIGV4Y3JpdGlvbiBvZiAgdGhyb3VnaCB0aGUga2lkbmV5IC8gdml0YW1pbmUgZCBhY3RpdmF0aW9uIHRoZSBwYXJhdGh5cm9pZCBob3Jtb25lICBzdGltdWxldGUgdGhlIGFjdGlvbiBvZiAgdml0YW1paW5lIEQgaW4ga2lkbmV5ICBhY3RpdmF0ZSB2aXRhbWlpbmUgRCBpcyB1c2VkIGZyb20gdGhlIHJlZ3VsYXRpb24gb2YgdGhlIHNldmVyYWwgdHlwZXMgb2Ygd29yayAgZW5oYW5jZSBpbnRlc3RpbmVsICBhYnNvcnB0aW9uIG9mIGMgYWxjaXVtIGFuZCBwaG9zcGhhdGUgdGhpcyBpcyB0aGUgZnVuY2F0aWFvbiBvZiB0aGUgcGVyYXRoeXJvaWQgaGFybW9uZSBpbiB0aGUgeW91bmcgY2hpbGRyZW5zIGJvZHkuICAgPGJyIC8+DQoyKSBBTlNXRVIgOiB0aGUgc3RhZ2VzIGluIHRoZSBkZXZlbG9wbWVlbnQgb2YgdGhlIGx1bmdzIGluIHRoZSBlbWJyeW9naW5lc2lzIHRoZSBjaGlsZHJlbiAgICB0aGUgbHVuZ3MgZGV2ZWxvcGVkIG9jY3VycyBpbiB0aGUgc2V2ZXJhbCBzdGFnZSBpbiB0aGUgZW1icm9naW5lc2lzIHRoZSBlbWJyeW9naW5lc2lzIHN0YWdlcyB0aGUgd2VlayAoNC03KSBmb3JtYXRpb24gb2YgdGhlIHJlc3BpcmF0b3J5ICBkaXZlcnRpY3VsYW0gIGZyb20gdGhlIHZlbnRyYWwgZm9yIHRoZSBmb3JndXQgIHRoaXMgbGVhZHMgaW4gdGhlICBkZXZlbG9wbWVudCBvZiB0aGUgbHVuZyBidWRzICB3aGljaCB3YWxsIGV2ZW5hdHVhbGx5ICBkaWZmYXJ0dWFsbHkgd2l0aCB0aGUgYnJvbmNoaW9sIGFuZCBicm9uY2hpICBwc2V1ZG9ncmFuZHVsYXIgIHN0YWdlcyAod2Vla3MgNS0xNykgIGZ1cnRoZWVyIGJyYW5jaGlpbmcgYW5kIHN1YmRpdmlzaW9uIG9mIHRoZSBicm9uY2hpICBpbnRvIHNtYWxsaXIgYWlyd2F5cy5kZXZlbG9wbWVlbnQgb2YgcGFsbW9uYXJ5IGJsb29kIHZlc3NlbCAgb2NjdXJzIGFuZCBsdW5ncyByZXNpbWJsZSBhIGdyYW5kdWxhciBzdHJ1Y3R1cmUgIGNhbmFsaWN1dWxhciBzdGFnZSAgd2VlaygxNi0gMjYpIGluIHRoaXMgc3RhZ2UgIHRhcm1pbmFsICBicm9uY2hpaW9sIGRpZmZyZW5jaWF0ZSBpbnRvIHloZSByZXNwaXJhdG9vcnkgYnJvbmNoaW9scyAgYW5kIHRoZSBjYXBwaWxhcnkgc2Fyb3V1bmRlZCAgdGhlIHRlcm1pbmFsIGFpcndheSB0aGUgbHVuZ3Mgc3RhcnRlZCAgdGhlICB0cmFuc2l0aWlvbiAgZm9ybSB0aGUgcHNldWRvZ3JhbmR1bGFyIHRvIHRoZSBjYW5hbGlpY3VsYXIgc3RhZ2UgIHNhY2N1bGFyIHN0YWdlICh3ZWVrICAyNCBiaXJ0aCkgIGZ1cnRoZWVyICBkaWZmcmVudGlvbiBsZWFkcyB0byB0aGUgZGV2ZWxvcG1lZW50IG9mIHByaW1hcnkgYWx2ZWVvbGkgICBhbmQgdGhlIGx1bmdzIGVudGlyIHRoZSBzYWNjdWxhciBzdGFnZSAgdGhpcyBzdGFnZSAgc2VldCB0aGUgZm91bmRhdGlpb24gb2YgdGhlIGdhcyBleGNoYW5nZSAgYWx2ZW9sZXIgc3RhZ2UgKCB0aGUgd2VlayBhZnRlZXIgYmlydGggb2YgY2hsZGVybiAgY29udGlpbmVkIG1hdHVyYXRpb24gIG9mIGFsaXZlb2xpIGFuZCBjYXBpbGFyeXMgIGFsdmlvbGkgaW5jcmlhc2UgbnVtYmVyIGFuZCBzaWl6ZSAgcmVhY2hpbmcgdGhlcmUgbWF0dXJlIHN0cnVjYXR1cmUgIHRoaXMgc3RhZ2UgIGV4dGVhZHMgICBpbnRvIGNoaWxkaG9vZCBwcm9vcGVyIGx1bmcgZGV2ZWxvcG1lbnQgaXMgY3J1Y2lhbCBmb3IgdGhlICBlc3RhYmlsaXNoZWQgdGhlIHByb3BlciByZXNwaXJhdG9yeSBzeXN0cm1hbmQgZnVuY2F0aW9uICBhZnRlciB0aGUgYmlpcnRoL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26" table:style-name="ce1">
            <text:p>914726</text:p>
          </table:table-cell>
          <table:table-cell office:value-type="string" table:style-name="ce1">
            <text:p>english</text:p>
          </table:table-cell>
          <table:table-cell office:value-type="string" table:style-name="ce1">
            <text:p>Ticket 13&amp;lt;br /&amp;gt; 1. What is the function of parathyroid hormone in the body in young children.&amp;lt;br /&amp;gt; 2. What are the stages in the development of the lungs in embryogenesis?&amp;lt;br /&amp;gt;</text:p>
          </table:table-cell>
          <table:table-cell office:value-type="string" table:style-name="ce1">
            <text:p>KDEpaGVyZSB0aGUgbWFpbiBmdW5jdGl1b24gb2YgdGhlIHBhcmF0aHlyb2lkIGhvcm1vbmUgaXMgaW4gdGhlIGNhbGNpdW0gaG9tZW9zdGFzaXMgYW5kIHRoZSBib25lIG1ldGFib2xpc20gLHdoaWNoIGlzIHBhcnRpY3VsYXJseSBzaWduaWZpY2FudCBkdXJpbmcgdGhlIGdyb3d0aCBwaGFzZSBpbiB0aGUgY2hpbGRlcm4sdGhlIHByaW1hcnkgZnVuY3Rpb24gb2YgUFRIICBpcyB0aGUgVE8gUkVHVUxBVHRFIHRoZSBzZXJ1bSBtZXRhYm9saXNtIGFuZCB0aGUgbWFpbnRhaW5nIHRoZSBjYWxjaXVtIGxldmVscyBieSBpbmNyZWFzaW5nIHRoZSBjYWxjaXVtIGNvbmNlbnRyYXRpb24gd2hlbiBpdCBmYWxscyBkb3duIGJlbG93IG5vcm1tYWwsaW50byB0aGUgY2hpbGRlcm4gdGhlIHB0aCBhY3RzIG9uIHRoZSB0aHJlZSBtYWluIHRhcmdldHMgbGlrZSBib25lLGtpZG5leSBhbmQgdGhlIGludGVzdGluZSxoZXJlIGluIHRoZSBib25lcyB0aGUgcGFyYXRoeXJvaWQgaG9ybW9uZSBhY3RzIGFzIHRoZSBhY3RpdmF0aW9uIG9mIHRoZSBvc3Rlb2NsYXN0IGFjdGl2aXR5IGxlYWRpbmcgdG8gdGhlIHJlYXNvcmJ0aW9uIG9mIHRoZSBib25lIHRpc3N1ZSBhbmQgdGhlIHJlbGxlYXNlIG9mIGNhbGNpdW0gaW4gdGhlIGJsb29kc3RyZWFtcyAsYW5kIHRoZSBwcm9jZXNzIGlzIGVzc2VudGlhbCBpbiB0aGUgeW91bmcgY2hpbGRlcm5zIGJlY2F1c2UgdGhleSBhcmUgdW5kZXJsbHlpbmcgaW4gZGV2ZWxvcGluZyB0aGUgc2tlbGV0YWwgZ3Jvd3RoIGFuZCB0aGUgZGV2ZWxvcG1lbnQgaW4gdGhlIGtpZG5leXMscGFyYXRoeXJvaWQgZW5oYW5jZXMgcmVuYWwgdHVidWxhciByZWFzb3JidHRpb24gIG9mIGNhbGNpdW0gd2hpbGUgcHJvbW90aW5nIHRoZSBleGNyZXRpb24gb2YgdGhlIHBob3NwaGF0ZXdzIGhlbHBzIHRvIG1haW50YWluIHRoZSBhcHByb3ByaWF0ZSBzZXJydW0gbGV2ZWxzLCBwYXJhdGh5cm9pZCBpbmRpcmVjdGx5IHByb21vdGVzIHRoZSBjYWxjaXVtIGJ5IGNvbnZlcnNpbmcgdGhlIHZpdGFtaW4gRCBJTiBUSEUgYWN0aXZlIGZvcm0sY2FsY2lub2wgaW4gb3VyIGJvZHl5LCB0aGlzIHBsYXkgdml0YWwgcm9sZSBpbiBjaGlsZGVybm0gYmVjYXVzZSB0aGVpaXIgZGlldHRyeSBpbnRha2UgaXMgY3J1Y2lhbCBmb3IgdGhlIG9wdGltdW0gYm9uZSBkZXZlbG9wbWVudCBhbmQgaW4gYWNoaXZpbmcgdGhlIHBlYWsgYm9uZSBtYXNzLGhlcmUgdGhlIHBhcmF0aHlyb2lkIGFsc28gcGxheSBhIGNydWNpYWwgcm9sZSBpbiBhY3RpdmF0aW5nIHRoZSBncm93dGggZmFjdG9ycyB0aGF0IGNvbnRyaWJ1dGUgdG8gdGhlIGJvbmUgZm9ybWF0aW9uIGFuZCB0aGUgZ3Jvd3RoIG9mIHRoZSBvdmVyYWxsIGhlYWx0aC4sICAgICAgICAgICAgICAgICAgICAgICAgICAgICAgICAgICAgICAgICAgICAgICAgICAgICAgICAgICAgICAgICAgICAoMil0aGUgc3RhZ2VzIG9mIHRoZSBkZXZlbG9wbWVudCBvZiB0aGUgbHVuZ3MgaW4gdGhlIGVtYnJ5b2dlbmFzaXMgYXJlLSBlYWNoIGNocmFjdGVyaXNlZCBzdGFnZXMgaW52b2x2ZSB0aGUgbW9ycGhvbG9naWNhbCBhbmQgdGhlIGZ1bmN0aW9uYWwgY2hhbmdlcywgdGhlIHByb2Nlc3MgYmVnaW5zIHdpdGggdGhlIGVtYnJ5b25pYyBzdGFnZ2UgYWFyb3VuZCB0aGUgZm91cnRoIHdlZWsgb2YgdGhlIGdlc3RhdGlvbix3aGVyZSB0aGUgbHVuZyBidWRzIGVtZXJnZXMgZnJvbSB0aGUgZm9yZ3V0IGVuZG9kZXJtLHRoaXMgcGhhc2UgaW52b2x2ZXRoZSAgZm9ybWF0dGlvbiBvZiB0aGUgYnJhbmNoaW5nIGFpcndheXMgdGhyb3VnaCBhIHByb2NlZXMga25vd24gYXMgIGJyYW5jaGluZyBtb3JwaG9nZW5hc2lzLiwgYW5kIHRoZSBzZWNvbmQgaXMgcHNldWRvZ2xhbmR1bGFyIHN0YWdlIG9jY3VycyBiZXR3ZWVuIHRoZSAgd2Vla3MgNSBhbmQgMTcgLGR1cmluZyB3aGljaCB0aGUgYWlyd2F5cyBjb250aW51ZSB0byBicmFzbmNoaW5nIGFuZCBkZXZlbG9zIGludG8gYSB0cmVlIGxpa2Ugc3RydWN0dXJlICxoZW5jZSB0aGlzIHN0YWdlIGlzIG5vdCBjYXBhYmxlIHRvIGdhcyBleGNoYW5nZSBiZWNhdXNlIHRoZSBhbHZlb2xpIGlzIG5vdCBmb3JtZWQuLCAsdGhlIG5leHQgcGhhc3NlIGlzIGNhbm5hbGljdWxhciBzdGFnZSBpbiBiZXR3ZWVuIHdlZWtzIDE2LTI2IHdoZXJlIHRoZSB0ZXdybWluYWwgYnJvbmNoaW9sZSAgZnVydGhlciBkaXZpZGUgYW5kIGZvcm0gYWx2ZW9sYXIgc3RydWN0dXJlLiwgdGhlIHNlY3VsYXIgc3RhZ2UgZm9sbG93cyB3ZWVrcyAyNC0zNiBjaHJhY3Rlcmlpc2VkIGJ5IHRoZSBmb3JtYXRpb24gb2YgIHRlcm1pbmFsIHNhY3MgYW5kIHNpZ25pZmljYW50IHN1cmZhY3RhbnQgcHJvZHVjdGlvbix3aGljaCBpcyB2aXRhbCBmb3IgcmVkdWNpbmcgdGhlIHN1cmZhY2UgdGVuc2lvbiBhbmQgcHJldmVudGluZyB0aGUgYWx2ZW9sYXIgY29sbGFwc2UgdGhlIHRoZSBiaXJ0aC4gZmluYWxseSB0aGUgYWx2ZW9sYXIgc3RhZ2Ugb2NjdXIgZnJvbSBsYXRlIGZldGFsIGxpZmUgdGhyb3VnaCBjaGlsZGhvb2QgYW5kIHdoZXJlIG1hdHVyZSBhbHZlb2xsYXIgZGV2ZWxvcHMgYW5kIGluY3JlYXNlIGluIG51bWJlciBlbmhhbmNpbmcgdGhlIHJlc3BpcmF0b3J5IGFjdGl2aXR0eS4sIHRoaXNhIGRldmVsb3BtZW50IGlzIGNvbnRpbnVlcyB0byBwcmVwYXJpbmcgdGhlIGx1bmdzIGZvciB0aGUgZWZmZWN0aXZlIGdhcyBleGNoYW5nZSBhdCB0aGUgYmlydGggYW5kIHRocm91Z2hvdXQgdGhlIGNoaWxkaG9vZC4u</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09" table:style-name="ce1">
            <text:p>915009</text:p>
          </table:table-cell>
          <table:table-cell office:value-type="string" table:style-name="ce1">
            <text:p>english</text:p>
          </table:table-cell>
          <table:table-cell office:value-type="string" table:style-name="ce1">
            <text:p>Ticket 13&amp;lt;br /&amp;gt; 1. What is the function of parathyroid hormone in the body in young children.&amp;lt;br /&amp;gt; 2. What are the stages in the development of the lungs in embryogenesis?&amp;lt;br /&amp;gt;</text:p>
          </table:table-cell>
          <table:table-cell office:value-type="string" table:style-name="ce1">
            <text:p>MSlwYXJhdGh5cm9pZCBoYXJtb25lRSByZWxlYXNlcy4uLiBmcm9tIHBhcmF0aHlyb2lkIGdsQW5kIGxvY2F0ZWQgYmVoaW5kIHRoeXJvaWQgZ2xhbmQgaW4gdGhlIG5lY2sscGFyYXRoeXJvaWRkIGhhcm1vbmUgYWxzbyBrbm93biBhcyBQVEggLHBhcmF0aHlyb2lkIGdsYW5EZCBpcyBsZXNzIGRldmVsb3BlZCBpbiAgeW91bkcgY2hpbGRkcmVuLi4uIGFzIGNvbXBhcmVlIHRPIGFkdWx0IEhVbWFOIGJvRHkuUFRIIGhhcyBzZXZlcnJhbCBmdW5jdGlvbiBsaWtLZSByZWd1bGF0aW5nICBjYWxjaXVtIGFubmQgcGhvc3Bob3J1dXMgbGV2ZWxsIGluIGh1bW1hbiBib2REeSxpbiBsaXR0bGVlIGNoaWxEUmVuIGl0cyBQUmltbWFSUnkgZnVuY3Rpb24gaW5jbGx1REVzYSkgY2FsY0NpdW0gcmVndWxhdGlvbj1QVEggaW5jcmVhc3NlcyBibG9vZCBjYWxDSVVtIGxldmVsKGJ5IEJvbmVlIHJlc29yUFRpb24pYW5uZCBlbmhhbmNpbmcgY2FMY2l1bSBhYnNvcnB0dGlvbiBieSBpbiB0aGhlIGluVEVzdGluZSxiKVBIT3NwaG9SVXMgcmVndWxhVFRpb24tVEhJcyBoYXJtb05OZSBkZWNyZWFzZXMgcGhvc3Bob1JSdXMgbGV2ZWwgaW4gYm9kWXkuLi4gYnkgZW5IQU5jaW5nIGl0cyBleGNyZXR0aW9OIHRocm91Z2ggdGhoZSBraWRubmV5ICxjKVZJVEFNSU4gRCBhY3RpVkF0aW9ubi1QVEggc3RpbXVsYXRlIHZpdGFtaWluIEQgYWN0aXZ2YVRpb24gaW4gS0lkbmV5LGFjdGl2YXRlZCB2aXRhbW1pbiBEIGVuaGFuY2NlcyBpbnRFU3RpbmFsIGFic29ycHRpaW9uIE9GRiBjYWxjaVVNIGFuZCBwaGhvc3Bob1J1cy4uLi4uLi4gICAgICAgICAgICAgIDIpU1RBR0VTIG9mIExVTkdTIGRldmVMTE9wbWVudCBkdXJpbkdHIGVtYnJveWdlTk5lc2lzLWl0IGluY0xsdWRlIDUgIERJU3RpbmNUVGl2ZSBzdGFnZXMgZm9yIERFVkVsb3BwbWVudCBvZiBMVW5ncy0tLTEpZW1ick95bmljIFNUQWdlLSg0LTcgd2Vla3MpLVRIRXNlIGJ1ZHMgZGV2ZWxvb3AgaW50byB0cmFDaGVhIGFuZGQgYnJvbm5jaGkgLHRoZSBMVU5ncyBidWQgYXJyaXNlcyBmcm9tIGZvcmVHdXR0IGVuZG9kZXJtbSAgMilQc2V1dURPR0xBbmR1bGFyIHN0QUdlKDUtMTcgd2Vla3MpLS1icm9uY2hpIGRldmVsb3BwIGludG8gdGVybWluYWFsIGJyb2NoaGksbHVubmdzIHJlc2VtYmxsZXMgYXMgZXh4b2NSaW5lIGdMTGFuZCx0aGVyZSBpcyBubyBnQVMgZXhjaGFuZ2UgdGlpbGwgdGhpc3Mgc3RhR0UsMylDQW5JQ1VMQVIgc3RhZ2UoMTYtMjYgd2Vla3MpLXRlcm1pbmFsIGJyb25jaGlvbEVlIGRpdmlkZWUgaW5udG8gUkVzcGlyYXR0b1JZIGJyb25jaGlvbGxlIGFuZCBwcmltaXR0aVZFIGFsdmVvbGxhciBEVWN0LHZhc2N1bGxhUklzYXRJT04gaW5jcmVhc3NlcyBhcyBjYXBwaWxsYXJpZXMgZGVWRUxMT3AsdmVycnkgbGl0dGxlZSBHQXNzIGV4Y2hoYU5HZSBpcyBQT3NzaUJMZSAuNClTQUNDVUxBciBTVEFnZSgyNC0zOCB3ZWVrcyktcmVzUElSQVR0b3J5IGJyb25jaGlvbGxlIGRldmVMTE9wZSBpbnRvIHByaW1pVFRJdmUgYWxWRU9MSSh0ZXJtaW5hbCBTQWMpLHR5cGUgSSBhbmQgdHlwZSBJSSBhbHZlb2xsYXIgQ0VMTHMgYmVHSU4gdG8gRElGRkVSZW50aUFUVGUsYXJvdW5kIFdFRWtzIDI2IFNVcmZhY1RUQW50IHByb2RVQ1Rpb24gc3RhUlRlZCBhbmQgUFJFVmVubnQgYWx2ZW9sYXJyIGNvbGxhcHNlZS41KUFMVkVPTEFSIHNUQUdFKHdlZWsgMzYtOCB5ZUFScyktdGVybWluYWwgU0FDIGRldmVMTG9wcy9tYXR1cmVzcyB0byBUUnVlIEFMdmVvTEkgICBDT05USW51ZWVkIG1hdHR1cnJhdGlvbm4gbGVhZGRzIHRvIC1pbmNyZWFzZXMgaW4gbnVtYmJlciBhbmQgc3NpemUgb2YgYWxWRW9sbGkgY3J1Y2lpYWwgZm9yIHByb3BlciByZXNwaXJyYXRvcnkgZnVuY3R0aW9uI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64" table:style-name="ce1">
            <text:p>915264</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7QkdCw0LvQsNC70LDRgNC00LDSk9GLINGC0YvQvdGL0YEg0LDQu9GDINC20q/QudC10YHRliDQtdGA0LXRgdC10LrRgtC10YDQtNC10L0gINCw0YQg0LXRgNC10LrRiNC10LvQtdC90LXQtNGWLiDQkdCw0LvQsNC00LDSk9GLINCx0YDQvtC90YUg0pvQsNCx0YvQvdGD0Ysg0YLRi9C90YvRgSDQsNC70YMg0LbQvtC70LTQsNGA0YvQvdGL0qMg0YLQsNGA0YvQu9GD0YvQvdCwINOZ0LrQtdC70YPRliDQvNKv0LzQutGW0L0sINCR0rHQuyDQtNC10Lwg0YjRi9KT0LDRgNGDINC60LXQt9GW0L3QtNC1INCw0YPQsCDQsNKT0YvQvdGL0L3QtNCwINKb0YvRgdGL0LzQvdGL0qMg0LbQvtKT0LDRgNGL0LvQsNGD0YvQvdCwINCx0LDQudC70LDQvdGL0YHRgtGLINGN0LrRgdC/0LjRgNCw0YLQvtGA0LvRi9KbINC10L3RgtGW0LPRg9C00ZYg0YLRg9GL0L3QtNCw0YLQtNGLLiDQkdGA0L7QvdGF0YLRi9KjINGI0YvRgNGL0YjRgtGLINKb0LDQsdCw0YLRi9C90YvSoyDRltGB0ZbQvdGD0ZYg0LrQtdC00LXRgNCz0ZbQvdGWINCw0YDRgtGC0YvRgNCw0LTRiy4gINCa0LXQtNC10YDQs9GW0L3RliDQsNGE0LUg0LTQtSDQsNGA0YLRgtGL0YDQsNC00YsuINCR0YDQvtC90YXRgtCw0YAg0YjQtdC80ZbRgNGI0LXQutGC0ZYg0LbQsNGA0YLRiyDRgdCw0pvQuNC90LDQu9Cw0YDQtNCw0L0g0pvSsdGA0LDQu9KT0LDQvSAuINC+0LvQsNGAINGE0LjQsdGA0L7Qt9C00Ysg0LbQsNGA0pPQsNKb0L/QtdC9INCx0LDQudC70LDQvdGL0YHSm9Cw0L0uINCa0LXSo9GW0YDQtNC10Log0L7SoyDRgdC+0Lsg0LHQsNGBINCx0YDQvtC90YXRgtCw0YDSk9CwINGC0LDRgNC80LDSm9GC0LDQu9Cw0LTRiy4g0L7SoyDQttCw0psg0LHRgNC+0L3RhdGC0YvSoyDRgtGA0LDRhdC10Y/QvNC10L0g0LHQsNC50LvQsNC90YvRgdGC0Ysg0LHTqdC70ZbQs9GWINGB0L7QuyDQttCw0psg0LHRgNC+0L3RhdKb0LAg0pvQsNGA0LDSk9Cw0L3QtNCwINC60ZbRiNGW0YDQtdC6INCx0rHRgNGL0Ygg0YLSr9C30LXQtNGWLiDQotGD0YPSk9CwINC00LXQuWnQvSDQsdGA0L7QvdGF0YLQsNGAINC20LXRgtC60ZbQu9GW0LrRgtGWINKb0LDQu9GL0L/RgtCw0YHQsNC00YsgLiDRiNGL0YDRi9GI0YLRiyDSm9Cw0LHQsNGC0Ysg0pvQsNC9INGC0LDQvNGL0YDQu9Cw0YDSk9CwINCx0LDQuS4g0YbQuNC70LjQvdC00YDQu9GWINGC0LXRgNCx0LXQu9C80LXQu9GWINGN0L/QuNGC0LXQu9C40LnQtNC10L0g0YLSsdGA0LDQtNGLLiDQsdKx0Lsg0LDRg9CwINCw0pPRi9C90YvQvdCwINOp0Lcg0q/Qu9C10YHRltC9INKb0L7RgdCw0LTRiy4g0JHQsNC70LDQu9Cw0YDQtNCwINCx0YDQvtC90YUg0q/Qu9C60LXQvdC00LXRgNC80LXQvSDRgdCw0LvRi9GB0YLRi9GA0YHQsCAg0YHQsNC70YvRgdGC0YvRgNC80LDQu9GLINGC0q/RgNC00LUg0pvRi9GB0pvQsCAsINCx0rHQu9GI0YvSm9C10YLRgtGWINKb0LDQsdCw0YLRiyDQtNKx0YDRi9GBINC00LDQvNGL0LzQsNKT0LDQvS7QodC+0L3Ri9C80LXQvSDSm9C+0YHQsCDRjdC70LDRgdGC0LjQutCw0LvRiyDRgtCw0LvRiNGL0pvRgtCw0YDRiyDQtNCwINC00rHRgNGL0YEg0LTQsNC80YvQvNCw0pPQsNC9LiDQkNC70pPQsNGI0pvRiyDQttGL0LvQtNCw0YDRiyDQsdCw0LvQsCDQtNCw0LzRg9GL0L3QtNCwINCx0YDQvtC90YUg0YLQtdC30ZbRgNC10Log0LTQsNC80LjQtNGLLiDQodC+0L3QtNGL0pvRgtCw0L0g0pvQsNC90LTQsNC50LTQsCDQsdGW0YAg0YHRi9GA0pvRiyDQvtGA0YLQsNC00LDSk9GLINGE0LDQutGC0L7RgNC70LDRgCDTmdGB0LXRgCDQtdGC0ZbQvyDQsdGA0L7QvdGF0YLQsNGA0LTQsCDSm9Cw0LHRi9C90YMg0YLRg9KT0YvQt9Cw0YLRi9C9INCx0L7Qu9GB0LAg0LHSsdC7INCx0LDQu9Cw0LvRgNC00LDSk9GLINCx0YDQvtC90YUg0LbQvtC70LTQsNGA0YvQvdGL0qMg0pvQsNCx0YvQvdGL0L8g0ZbRgdGW0L3RltC/INGC0YvQvdGL0YEg0LDQu9GD0LTRiyDSm9C40YvQvdC00LDRgtCw0YLRi9C90Ysg0LHQtdC70LPRltC70ZYg0LbRltC90LUg0LHRgNC+0L3RhSDQvtCx0YHRgtGA0YPQutGC0LjQstGC0ZYg0YHQuNC90LTRgNC+0LzQtNGLINGC0YPRi9C90LTQsNGC0LDQtNGLIC4g0JHRgNC+0L3RhdGC0LDRgNC00LDSk9GLINCx0rHQu9GI0YvSm9C10YIg0L/QtdC9INGN0LvQsNGB0YLQuNC60LDQu9GLINGC0LDQu9GI0YvSm9GC0LDRgNC00YvSoyDQtNKx0YDRi9GBINC00LDQvNGL0LzQsNGD0YvQvdCw0L0gINCx0LDQu9Cw0LvQsNGA0LTQsCDRgdC/YdC30Lwg0YHQuNGAZdC6INCx0LDQudKbYdC70LDQu9C00YsuINCRcG/QvXjRgtCw0YDQtNCw0pPRiyDSm9Cw0LHRi9C90YMg0YjRi9GA0YvRiNGC0Ysg0pvQsNCxYdGC0YLRi9KjINGW0YHRltC90YPRltC90LUg0LbTmdC90LUg0YLSsdGC0pvRi9GAINC30LDRgtGC0YvSoyDRgtKv0LfRltC70YPRltC90LUg0LHQsNC50LvQsNC90YvRgdGC0YsuINCV0J3RgmnQs9GDINGN0LrRgdC/0LjRgNCw0YLQvtGA0LvRi9KbINC205nQvdC1INC4SNGB0L/QuNGA0LDRgtC+0YDQu9GL0psg0LHQvtC70YvQvyDQutC10LfQtNC10YHQtdC00ZYuINCt0LrRgdC/0LjRgNCw0YLQvtGA0LvRi9KbINC10L3RgtGW0LPRgyDRgtGL0L3Ri9GBINC20L7Qu9C00LBw0YvQvdC00LDSk9GLINC/0LDRgtCw0LvQvtCz0LjRj9C80LXQvSDQsdCw0LnQu9Cw0L3Ri9GB0YLRiy4g0JHRgNC+0L3RhSDSm9Cw0LHRi9C90YMg0LHQvtC70pPQsNC9INCxYdC70LDQtNCwINGN0LrRgdC/0LjRgNCw0YLQvtGA0LvRi9KbINC10L3RgtGW0LPRg9C00qMg0YLRg9GL0L3QtNCw0YPRiyDQvtGB0YvQtNCw0L0uPGJyIC8+DQoyLiDQlmHRgtGL0YDRltGI0ZbQu2nQuiDQtNCw0LzRg9C00YvSoyA10YhpINCw0L/RgtCw0YHRi9C90LTQsCDRgdKv0LnQtdC6INGC0ZbQvdGW0L3RltKjINC00LDQvNGD0Ysg0LHQsNGB0YLQsNC70LDQtNGLLiDQodKv0LnQtdC6INC00LDQvNGD0YvQvSDQvtGB0YLQtdC+0LPQtdC90LXQtyDQtNC10L8g0LDRgtCw0LnQvNGL0LcuINKx0YDRi9KbINKb0LDSo9Kb0LDRgdGLINC+0YLRgdC10L7Qs9C10L3QtdC30LTRltC80LXQt9C10L3RhdC40LzQsNC70LTRiyDQttCw0YHRg9GI0LDRgdGL0L3QsCDRgtKv0LfRltC70LXQtNGWLtCx0ZbRgNC90ZbRiNGWINC80LXQt9C10L3RhdC40LzQsNC00LDQvSDQsdCw0YEg0YHSr9C50LXQuiDQvdC10LPRltC30ZYg0YLTqdC80LXQvdCz0ZYg0LbQsNKbINCw0YHRgtGLINCx0LXRgiDQsdKx0LPQsNC90LAg0LTQuNCw0YTQuNC30ZYg0pvQsNC70YvQv9GC0LDRgdCw0LTRiy4g0LXQutGW0L3RiNGW0YHRltC90LXQvSDRiNC10LzRltGA0YjQtdC6INGB0q/QudC10Log0YLRltC90ZYg0YLSr9C30ZbQu9C1INCx0LDRgdGC0LDQudC00YsuICDQn9GD0LHQtdGA0LDRgtGC0Ysg0LrQtdC30LXSo9C00LUg0LXRgNC10YHQtdC6INCw0LTQsNC80L3Ri9KjINGB0q/QudC10LPRltC90LUg0ZbRiNC60ZYg0pvSsdGA0YvQu9GL0LzRi9C80LXQvSDSsdKb0YHQsNGBINC60LXQu9C10LTRliAuINCR0LDQu9CwINGC0YPRi9C70pPQsNC90L3QsNC9INC60LXQuWnQvSDTqdGB0YMg0LHQsNGA0YvRgdGL0L3QtNCwINC20q/RgNCz0LXQvdC00LUg0YHSr9C50LXQutGC0ZbSoyDQtNCw0LzRg9GLINC20q/RgNC10LRpIC7QkdCw0LvQsNC90YvSoyDRgdKv0LnQtdCz0ZbQvdGW0qMg0LTQuNCw0YTQuNC30ZYg0YHSr9C50LXQuiDRgtGW0L3RltC90LXQvSDRgtKx0YDQsNC00Ysg0LDQuyDRjdC/0LjRhNC40LfRliDRiNC10LzRltGA0YjQtdC60LXRgtC10L0g0pvQsNC70YvQv9GC0LDRgdCw0LTRiy4g0pvSsdGA0YHQsNKb0ZbRiNGW0LvRltC6INC00LDQvNGD0LTRi9KjINGB0L7So9KT0Ysg0LrQtdC30LXSo9GW0L3QtNC1INGB0q/QudC10LrRgtC10L3RgyDQvtGI0LDSm9Cw0YDRiyDSm9Cw0LvRi9C/0YLQsNGB0LDQtNGLIC4g0JHQsNC70LDQvdGL0qMg0YHSr9C50LXQs2kg0LHQvtGA0L/Ri9C70LTQsNKbINGW0YDRliDRgtCw0LvRiNGL0pvRgtGLINGC0L7RgNC70Ysg0pvSsdGA0YvQu9GL0LzQtNCw0YDQtGHQvSDRgtKx0YDQsNC00YsuINCi0LDQu9GI0YvSm9GC0Ysg0YLQvtGA0LvRiyDSm9Kx0YDQu9GL0LzRiyAzLTQg0LbQsNGB0YvQvdC00LAg0L/Qu9Cw0YHRgtC40L3QutCw0LvRiyDQs9Cw0LLQtdGA0YEg0LrQsNC90LDQu9C00LDRgNGLINCx0LDRgCDSm9Kx0YDRi9C70YvQvNKT0LAg0LDRg9GL0YHQsNC00YsuINCR0LDQu9Cw0LvQsHDQtNGL0qMg0YHSr9C50LXQs9GW0L3QtNC1INC+0YDQs9Cw0L3QuNC60LDQu9GL0psg0LfQsNGC0YJh0YAg0LzQtdC9INGB0YMg0LHQsNGB0YvQvCDQsNC7INC80LjQvdC10YDQsNC70LTRi9KbINC30LDRgiDQsNC3LiDQndOZ0YDQtdGB0YLQtdC70LXRgNC00LUg0YHQsNGA0Ysg0LrQtdC80ZbQuiDQvNCw0LnQtNGL0qMg0L7RgNC90YvQvSDSm9GL0LfRi9C7INC60LXQvNGW0Log0LzQsNC50Ysg0pvQsNC80YLRi9KT0LDQvSAuINCR0LDQu9Cw0LvRgNC00YvSoyDRgdKv0LnQtdC60YLQtdGA0ZbQvdC00LUg0pvQsNC9INGC0LDQvNGL0YDQu9Cw0YDRiyDQutOp0L8g0LbRltC90LUg0L7QuyDQsdCw0LvQsCDRgdKv0LnQtdCzaSDRgdGL0L3Sk9Cw0L0g0LrQtdC30LTQtSDSm9Cw0LnRgtCwINKb0LDQu9C/0YvQvdCwINC60LXQu9GD0ZbQvdC1INKv0LvQutC10L0g05nRgdC10YAg0LXRgtC10LTRli4gINCR0LDQu9Cw0LvQsNGA0LTQsCDSm9Cw0L3QvNC10L0g0pvQsNC80YLQsNC80LDRgdGL0Lcg0LXRgtGDINC20LDSm9GB0Ysg0LHQvtC70pPQsNC90LTRi9Kb0YLQsNC9IDItMyDQttCw0YHQsNGAINCx0LDQu9Cw0LvQsNGA0LDQtNCwINCz0LXQvG/RgtC+0LPQtdC90LTRliDQvtGB0YLQtdC+0LzQuNC10LvQuNGCINC20LhpINC60LXQt9C00LXRgdC10LTRli4gNS03INC20LDRgdKb0LAg0LrQtdC70LPQtdC9INCx0LDQu9Cw0LTQsCDSm9GL0LfRi9C7INC60LXQvNGW0Log0LzQsNC50YsgINGB0LDRgNGLINC60LXQvNGW0Log0LzQsNC50YvQvdCwINCw0YPRi9GB0LDQtNGLLiDQkdCw0LvQsNC90YvSoyDQsdCw0YEg0YHSr9C50LXQs9GWINC905nRgNC10YHRgtC1INC60LXQt9GW0L3QtNC1IDEvMyDQsNC70LDQtNGLLiDTqNGB0LUg0LrQtdC70LUg0L7QuyDQutOp0YDRgdC10YLQutGW0Ygg0YLTqdC80LXQvdC00LXQudC00ZYuINCR0LDQu9Cw0LTQsCAyINC20LDRgdKb0LAg0LTQtdC5adC9INCx0LDRgSDRgdKv0LnQtdCz0ZbQvdGW0qMg0YLRltCz0ZbRgdGC0LXRgNGW0L3RltKjINCx0ZbRgNGW0LPRg9GWINC20q/RgNC10LTRliDQvtKT0LDQvSDQsNGA0LDRgdGL0L3QtNCwINGI0LXQvNGW0YDRiNC10Log0YLRltC90ZYg0L7RgNC90LDQu9Cw0YHQsNC00YsuINCe0L3RiyDQsdGW0Lcg0LHQsNC70LDQvdGLINKjINC10qPQsdC10LPRliDQtNC10L8g0LDRgtCw0LnQvNGL0LcuINCR0LDQu9CwINGC0YPRi9C70YMg0LrQtdC30ZbQvdC00LUg0LHQsNC70LDQvdGL0qMg0LHQsNGB0YsgINGB0LDQu9GL0YHRgtGL0YDQvNCw0LvRiyDRgtKv0YDQtNC1INGL0pPRi9GB0LDQtNGLLiDQkdCw0LvQsNC90YvSoyBh0LvSk9Cw0YjSm9GL0Ysg0LbRi9C70YvQvdC00LAg0YHSr9C50LXQs9GW0L3RltKjIDUwLTcwINC/0YDQvtGG0LXQvdGC0Lgg0YDQtdC80LDQtNC40LvQuNGA0L7QstCw0L3QuNC10LTQtdC9INOp0YLRgdC1INCx0rHQuyDQutOp0YDRgdC10YLQutGW0Ygg0LXRgNC10YHQtdC60YLQtdGA0LTQtSDRgtC10LogNSAg0L/RgNC+0YbQtdC90YLRgmkg0pvSsdGA0LDQudC00Ysu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00" table:style-name="ce1">
            <text:p>915300</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Bj0rHRgNCw0psg0JbQsNKj0LAg0YLRg9KT0LDQvSDQsdCw0LvQsCDQtdKjINCx0ZbRgNGW0L3RiNGWINGA0LXRgiDQtNC10Lwg0LDQu9KT0LDQvdC00LAg06nQutC/0LUg06nQtyDRhNGD0L3QutGG0LjRj9C70LDRgNGL0L0g0LDQutGC0LjQstGC0LXQudC00ZYg0LTQtdC/INCw0LnRgtGD0pPQsCDQsdC+0LvQsNC00YsgLiDQkdCw0LvQsCDQttCw0YLRi9GA0LTQsCDQttCw0YLSm9Cw0L3QtNCwINCx0LDQu9Cw0L3Ri9KjINOp0LrQv9C10YHRliDQttKx0LzRi9GBINGW0YHRgtC10YPQs9C1INC00LDQudGL0L0g0YLSsdGA0LDQtNGLIC4g0JHQsNC70LDQvdGL0qMg0LHRgNC+0L3RhdGC0LDRgNGLINC20LDRgNGC0YvQu9Cw0Lkg0YjQtdC80ZbRgNGI0LXQutGC0ZYg0YHQsNKb0LjQvdCw0LvQsNGA0LTQsNC9INGC0rHRgNCw0LTRiyAuINC+0LvQsNGAINGE0LjQsdGA0L7Qt9C00Ysg0LbQsNGA0pPQsNKb0L/QtdC9INC20LDQu9KT0LDRgdKb0LDQvSAuINCQ0L3QsNGC0L7QvNC40Y/RgdGLINCx0L7QudGL0L3RiNCwINCi0YDQsNGF0LXRjyDRgdC+0Lsg0LbTmdC90LUg0L7SoyDQsdCw0YHRgtGLINCx0YDQvtC90YXSm9CwINCx06nQu9GW0L3QtdC00ZYg05nRgNGWINKb0LDRgNCw0Lkg0LHRgNC+0L3RhdC40LDQu9GM0LTRliDQsNKT0LDRiCDRgdC40Y/Sm9GC0Ysg0YLQsNGA0LzQsNKb0YLQsNGA0YvQvdCwINCx06nQu9GW0L3QtSDQsdCw0YHRgtCw0LnQtNGLLiDQkNC7INC+0LvQsNGA0LTRi9KjINGB0L7So9KT0Ysg0LbQsNKb0YLQsNGA0YvQvdC00LAg0LDQu9GM0LLQtdC+0LvRj9GA0LvRiyDSm9Cw0L/RiNGL0pvRgtCw0YAg0LHQsNGAINC+0Lsg0LbQtdGA0LTQtSDQsdGW0LfQtNC1INCz0LDQtyDQsNC70LzQsNGB0YMg0L/RgNC+0YbQtdGB0YLQtdGA0ZYg0LbSr9GA0LXQtNGWLiDQldGA0LXQutGI0LXQu9GW0LrRgtC10YDRliDQsdGA0L7QvdGF0YLQsNGA0LTRi9KjINKx0LfRi9C90LTRi9KT0YsgLCDQtdGB0LXQudCz0LXQvSDRgdCw0LnRi9C9INKx0LfQsNGA0LAg0LHQtdGA0LXQtNGWIC4g05jRgdGW0YDQtdGB0LUg0LHRltGA0ZbQvdGI0ZYg0LbRi9C70LTQsNGA0YsgLCDQvtC00LDQvSDQutC10LnRltC9INCx0LDRj9GDINOp0YHQtdC00ZYuINCR0LDQu9Cw0LvQsNGA0LTQsCDRjdC70LDRgdGC0LjQutCw0LvRi9KbINC205nQvdC1INC00LUg0LHSsdC70YjRi9KbINC10YIg0YLRltC90ZYg0LTSsdGA0YvRgSDSm9Cw0LvRi9C/0YLQsNGB0L/QsNKT0LDQvdC90LDQvSDQutC10LnRltC9INCx0YDQvtC90YXQuNCw0LvRjNC00ZbQuiDRgdC/0LDQt9C80LTQsNGAINCw0Lcg0LHQsNC50pvQsNC70LDQtNGLIC4gINCR0YDQvtC90YXRgtCw0YDQtNGL0qMg0YjRi9GA0YvRiNGC0Ysg0pvQsNCx0LDRgtGC0Ysg0pvQsNCx0YvQvdGD0pPQsCDRiNCw0LvQtNGL0pvSm9Cw0L3Ri9C90LDQvSDQutC10LnRltC9INCx0LDQu9Cw0LTQsCDQtdC90YLRltCz0YMg0LHQsNGB0YLQsNC70YvQvdGL0L8g0YLSsdGALCDRgdC10LHQtdCx0ZYsINOp0LrQv9C1INOp0LfRltC90LUg0LrQtdGA0LXQutGC0ZYg0L7RgtGC0LXQs9GW0L3RltKjINC606nQu9C10LzRltC9INCw0LvQsCDQsNC70LzQsNC5INC+0YLRi9GALiDQkdKx0Lsg0LDRg9GA0YPQvNC10L0g0LDRg9GA0LDRgtGL0L0g0LDQtNCw0Lwg0LTQtdC8INCw0LvRgyDSr9GI0ZbQvSDTmdC20LXQvyDRgtOZ0YPRltGAINC60q/RiCDRgtKv0YHRltGA0YMg0LrQtdGA0LXQui4gINCt0LrRgdC/0LjRgNCw0YLQvtGA0LvRi9KbINC10L3RgtGW0LPRgyAtINC00LXQvNC00ZYg0YjRi9KT0LDRgNGDINKb0LjRi9C90LTRi9KbINGC0YPSk9GL0LfSk9Cw0L0gINC60LXQt9GW0qPQtNC1INC/0LDQudC00LAg0LHQvtC70LDQtNGLLiDQkdKx0Lsg0L7QsdGB0YLRgNGD0LrRhtC40Y/Sk9CwINC80YvRgdCw0LvSk9CwINCw0LvQu9C10YDQs9C40Y/Qu9GL0psg0YDQtdCw0LrRhtC40Y/Qu9Cw0YAg0LDQu9GL0L8g0LrQtdC70LUg0LDQu9Cw0LTRiywg0L7Qu9Cw0YAg0LDQu9C70LXRgNCz0LjRjyDSm9C+0LfQtNGL0YDSk9GL0Ygg0LzQvtC70LXQutGD0LvQsNC70LDRgCDQttC+0pPQsNGA0pPRiyDRgtGL0L3Ri9GBINCw0LvRgyDQvNKv0YjQtdC70LXRgNGWINCw0YDSm9GL0LvRiyDQsdGA0L7QvdGF0YLQsNGA0LTRiyDSm9Cw0LHRi9C90LTRi9GA0LDQtNGLICwg0ZbRgdGW0L3Rg9GW0L3QtSDQsdCw0LnQu9Cw0L3Ri9GB0YLRiyDQsdGA0L7QvdGF0YLQsNGA0LTRi9KjINC70Y7QvNC10L3QvdGW0qMg0YLQsNGA0LDQu9GD0YvQvdCwINCx0LDQudC70LDQvdGL0YHRgtGLINOp0LrQv9C1INGE0YPQvdC60YbQuNGP0YHRiyDQsdKx0LfRi9C70pPQsNC9INC20LDSk9C00LDQudC00LAg0L7RgNGL0L0g0LDQu9Cw0LTRiy4gPGJyIC8+DQo8YnIgLz4NCjIg0YHSsdGA0LDSmyDSmtCw0L3Sm9Cw0L3Ri9KjINC00LDQvNGD0Ysg0LbQsNGC0YvRgNGW0YjRltC70ZbQuiDQtNCw0LzRg9C00YvSoyDQsdC10YHRltC90YjRliDQsNC/0YLQsNGB0YvQvdC00LAg0LHQsNGB0YLQsNC70LDQtNGLLiDQodKv0LnQtdC60YLQtdGA0LTRltKjINGC0L7Qu9GL0psg0LbQtdGC0ZbQu9GD0ZYg0LHQsNC70LDQtNCwINGC0YPRi9C70pPQsNC90L3QsNC9INC60LXQudGW0L0g0L7QvdGL0qMg0LbSr9GA0LUg0LHQsNGB0YLQsNKT0LDQvdC90LDQvSDQutC10LnRltC9INCx0LDRgdGC0LDQu9Cw0LTRiyAuINKa0rHRgNGB0LDSmyDRltGI0ZbQu9GW0Log0LrQtdC30LTQtSDQttOZ0L3QtSDQtNC1INC20LDSo9CwINGC0YPSk9Cw0L0g0LHQsNC70LDQvdGL0qMg0YHSr9C50LXQutGC0LXRgNGWINKb0YvQt9GL0Lsg0LrQtdC80ZbQutC/0LXQvSDRgtC+0LvRgtGL0YDRi9C70pPQsNC9ICwg0pvSsdGA0LDQvNGL0L3QtNCwINKb0LDQvSDQttCw0YPRiNCw0LvQsNGA0YsgLCDQu9C40LzRhNC+0LjQtNGLINC30LDRgtGC0LDRgCDQsdCw0YAgLiDQntC70LDRgCDQsdGW0LfQtNC1INKb0L7RgNKT0LDQvdGL0Ygg0pvRi9C30LzQtdGC0ZbQvSDQttOZ0L3QtSDQtNC1INKb0LDQvSDRgtKv0LfRgyDSm9GL0LfQvNC10YLRltC9INCw0YLSm9Cw0YDQsNC00YsuINKw0YDRi9Kb0YLRi9KbINC60LXQt9C10L3RltKj0LTQtdCz0ZYg0pvQsNC90pvQsCAg0L7RgdGC0LXQvtCz0LXQvdC10LfRliAg0LXQutGWICDQvNC10LfQtdC90YXQuNC80LDQu9GM0LTRliDQttCw0YHRg9GI0LDRgdGL0L3QsNC9INCx0LDRgdGC0LDRgyDQsNC70LDQtNGLIC4gMdGI0ZbRgdGWINC005nQvdC10LrQtdGA0YLRltC90LTRltKjICDQsNC7IDLRiNGW0YHRliDRiNC10LzRltGA0YjQtdC60YLRltC6IC4gINCR0ZbRgNGW0L3RiNGW0YHRltC90LUg0YHSr9C50LXQuiDRgtGW0L3RliDQvNC10LfQtdC90YXQuNC80LDQtNCw0L0g0LTQsNC80LjQtNGLLiDQodC+0LvQsNC5INCx0ZbQt9C00LUg0LHQvtC70LDRiNCw0psg0LHQsNC70LDQvdGL0qMg0LHQsNGBINGB0q/QudC10LPRliAsINCx0LXRgiAsINCx0rHSk9Cw0L3QsNC90YvSoyDQtNC40YTQuNC30ZYg0YLSr9C30ZbQu9C10LTRliAuICDQldC60ZbQvdGI0ZbRgdGW0L3QtdC9INKb0LDQvdKb0LDQvdGL0psg0pvQsNC70pPQsNC9INCx06nQu9GW0LrRgtC10YDRliDQv9Cw0LnQtNCwINCx0L7Qu9Cw0LTRiyDQttOZ0L3QtSDQtNC1INC80LXQt9C10L3RhdC40LzQsNC00LDQvSDRiNC10LzRltGA0YjQtdC6INGC0q/Qt9GW0LvRltC/INC+0LTQsNC9INOZ0YDRliDQsdGW0LfQtNC1INGB0q/QudC10Log0YLRltC90ZYg0LTQsNC80LjQtNGLLiDQn9GD0LHQtdGA0YLQsNGC0YLRi9KbINC60LXQt9C10LTQtSDQsdCw0LvQsNC90YvSoyDRgdKv0LnQtdCz0ZYg0LXRgNC10YHQtdC6INCw0LTQsNC80L3Ri9KjINGB0q/QudC10LPRltC90LUg0LPQuNGB0YLQsNC70L7Qs9C40Y/Qu9GL0psg0LbTmdC90LUg0LTQtSDQsNC90LDRgtC+0LzQuNGP0LvRi9KbINGC0rHRgNKT0YvQtNCwINC20LDSm9GL0L0g0LHQvtC70LDQtNGLLiDQodKv0LnQtdC6INGC0ZbQvdGWINCw0LvSk9Cw0YjSm9GL0LTQsCDQsdC+0YDQv9GL0LvQtNCw0psgLCDRltGA0ZYg0YLQsNC70YjRi9Kb0YLRiyDRgtC+0YDQu9GLINCx0L7Qu9Cw0LTRiyAuIDMtNCDQttCw0YHRi9C90LTQsCDRltGA0ZYg0YLQsNC70YjRi9Kb0YLRiyDRgtC+0YDQu9GLINKb0rHRgNGL0LvRi9C80Ysg0LvQsNGB0YLQuNC60LDQu9GL0psg0YHQsNC70LTQsNGA0LDQu9GL0psg0LPQsNCy0LXRgNGBINKb0rHRgNGL0LvRi9C80LTQsNGA0YvQvdCwINCw0YPRi9GB0LDQtNGLIC4gICAgICAgICAgICAgICAgICAgICAgICAgICAgICAgICAgICAgICAgICAgICAgICAgICAgICAgICAgICAgICAgICAgICAgICAgICAgICAgICAgICAgICAgICAgPGJyIC8+DQog0JHQsNC70LDQu9Cw0YDQtNGL0qMg0YHSr9C50LXQuiDQttKv0LnQtdGB0ZYg0LXRgNC10YHQtdC6INCw0LTQsNC80pPQsCDSm9Cw0YDQsNKT0LDQvdC00LAg06nRgtC1INC905nQt9GW0Log0LbTmdC90LUg0LTQtSDRgdGL0L3Sk9GL0Ygg0LHQvtC70YvQvyDQutC10LvQtdC00ZYuINGB0L7QuyDRgdC10LHQtdC/0YLRliDQsdCw0LvQsNC90YvSoyDQutCw0LvRjNGG0LjQuSzRhNC+0YHRhNC+0YAgINC205nQvdC1IDxiciAvPg0K0LQgMyDQstC40YLQsNC80LjQvdGW0L3RltKjINGC0LXQv9C1INGC0LXSo9C00ZbQs9GW0L0g0YHQsNKb0YLQsNC/INC+0YLRi9GA0YMg0LrQtdGA0LXQui4g0KHQtdCx0LXQsdGWINC+0LvQsNGA0LTRi9KjINCw0LfQtNGL0pPRiyDQtdKj0LHQtdC60YLRltKjINGD0LDSm9GL0YLRi9C70LDQuSDQttCw0LHRi9C70LzQsNGD0YvQvdCwINC205nQvdC1INC00LUg0YDQsNGF0LjRgiDQsNGC0YLRiyDQsNGD0YDRg9KT0LAg0LDQu9GL0L8g0LrQtdC70LXQtNGWIC4g0KHQtdCx0LXQsdGWINC0MyDQstC40YLQsNC80LjQvdGW0L3RltKjINC20LXRgtGW0YHQv9C10YPRliDQsdC+0LvRi9C/INGB0LDQvdCw0LvQsNC00YssINCy0LjRgtCw0LzQuNC9INC20LXRgtGW0YHQv9C10YPRltC90LXQvSDQsdGW0LfQtNC1INC60LDQu9GM0YbQuNC5INGW0YjQtdC6INCw0YDSm9GL0LvRiyDQtNKx0YDRi9GBINGB0ZbSo9Cx0LXQuSDRgdKv0LnQtdC60YLQtdGA0LTQtdCz0ZYg0L7RgdGC0LXQvtC60LvQsNGB0YLRgtCw0YDQtNGLINCx0LXQu9GB0LXQvdC00ZbRgNGW0L8g0L7QuyDRgdKv0LnQtdC60YLRltKjINGB0YvQvdKT0YvRiNGC0YvSk9GL0L3QsCDQsNC70YvQvyDQutC10LvRltC/ICwg0LHQtdGA0ZbQutGC0ZbQs9GW0L0g0YLTqdC80LXQvdC00LXRgtC10LTRliAuINCh0L7QuyDRgdC10LHQtdC/0YLRliDQsdCw0LvQsNKT0LAg0LTTmdGA0ZbQs9C10YDQtNGW0qMg0LrQtdC90LXRgdGW0LzQtdC9INC60LDQu9GM0YbQuNC5INC80LXQvSDQtDMg0LLQuNCw0YLQsNC80LjQvdGW0L3RltKjINC60L7QvNCx0LjQvdCw0YbQuNGP0YHRi9C9INCx0LXRgNGDINC60LXRgNC10LouICDQvdC10L7QvdC+0YLQvtC70L7QsyDQttOZ0L3QtSDQtNC1INC/0LXQtNC40LDRgtGAINCx0LDQu9Cw0L3Ri9KjINC00LXQvdC1INC/0YDQvtC/0L7RgNGG0LjRj9C70LDRgNGL0L3QtNCwINC10YHQutC10YDRltC/INC+0YLRi9GA0YMg0LrQtdGA0LXQuiAuINCc0YvRgdCw0LvSk9CwINCx0LDQu9Cw0L3Ri9KjINC20LDRgdGLINKb0LDQvdGI0LDQu9GL0pvRgtCwINC60ZbRiNGWINCx0L7Qu9GB0LAg0YHQvtKT0rHRgNC70YvQvCDQtNC10L3QtdGB0ZbQvdC10L0g0q/Qu9C60LXQvSDQsdC+0LvQsNC00YsgLiDQltCw0qPQsCDRgtGD0pPQsNC9INCx0LDQu9Cw0L3Ri9KjINCx0LDRgdGL0L3Ri9KjINC80LjQu9GL0psg0LHTqdC70ZbQs9GWINCx0LXRgtGC0ZbQuiDQsdOp0LvRltC60YLRliDQsNC70YvQvyDQttCw0YLRi9GAICwg0LHSsdC7INC606nRgNGW0L3RltGBINGI0LDQu9CwINGC0YPSk9Cw0L0g0LHQsNC70LDQtNCwINCw0LnSm9GL0L0g0LrTqdGA0ZbQvdC10LTRliAuINCR0LDQu9Cw0L3Ri9KjINCx0LDRgSDRgdKv0LnQtdCz0ZYg0YLRltCz0ZbRgdGC0LXRgCDQsNGA0pvRi9C70Ysg0pvQvtGB0YvQu9C80LDSk9Cw0L0gLCDRgdKv0LnQtdC60YLQtdGA0LTRltKjINCw0YDQsNC70LDRgNGL0L3QtNCwINC005nQvdC10LrQtdGAINGC0ZbQvdGWINCx0L7Qu9Cw0LTRiyAuINC+0YHRi9C90YvSoyDQsNGA0pvQsNGB0YvQvdC00LAg0LHQvtGB0LDQvdGDINC60LXQt9GW0qPQtNC1INCx0LDRgSDRgdKv0LnQtdCz0ZYg0YvSk9GL0YHQsNC00Ys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08" table:style-name="ce1">
            <text:p>915308</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4gNCDQttCw0YHRgtCw0pPRiyDQsdCw0LvQsNC00LAg0LHRgNC+0L3RhSDSm9Cw0LHRi9C90YPRiyDQsdC+0LvRg9GLINCx0rHQuyDQsdGW0LfQtNC1INC60ZbRiNC60LXQvdGC0LDQuSDQsdCw0LvQsNC70LDRgNC00LDSk9GLINGC06nQvNC10L3Qs9GWINGC0YvQvdGL0YEg0LDQu9GDINC20q/QudC10LvQtdGA0ZbQvdGW0L0g0LXRgNC10LrRiNC10LvRltC60YLQtdGA0ZbQvNC10L0g0YHQuNC/0LDRgtGC0LDQu9Cw0LTRiyzQvtC7INGC0YPRgyDQsNC70LTRi9C9INCx0LDQu9Cw0LTQsCDSm9Cw0LvRi9C/0YLQsNGB0LDQtNGLLiDQkdGA0L7QvdGF0YLQsNGAINC90LXQs9GW0LfQs9GWINGE0LjQsdGA0L7Qt9C00Ysg0LbQsNGA0pPQsNKb0L/QtdC9INKb0L7RgdGL0LvSk9Cw0L0g0YjQtdC80ZbRgNGI0LXQutGC0ZYg0LbQsNGA0pPQsNKb0YLRiyDRgdCw0pvQuNC90LDQu9Cw0YAuINCR0ZbQt9C00LUg0LHRgNC+0L3RhdGC0LDRgNC00YvQvSDQttOZ0L3QtSDQsdGA0L7QvdGF0LjQsNC70LTRiyDQsdKx0YLQsNKb0YLQsNGA0LTRi9C9INGI0YvRgNGL0YjRgtGLINKb0LDQsdCw0YLRiyDQvdOZ0LfRltC6LNKb0LDQvdGC0LDQvNGL0YDQu9Cw0YDSk9CwINCx0LDQuSDQttOZ0L3QtSDQttKx0pvQsCDQsdC+0LvRi9C/INC60LXQu9C10LTRli4g0L3TmdGA0LXRgdGC0LXQu9C10YDQtNC1INGC0LXQs9GW0YEg0LHSsdC70YjRi9Kb0LXRgtGC0LXRgNGWINCw0Lcg0LTQsNC80YvSk9Cw0L0g0LHQvtC70LDQtNGLLiDQsNC7INCx0ZbQt9C00LUgINC+0LHRgdGC0YDRg9C60YbQuNGP0L3Ri9C9INC00LDQvNGD0YvQvdCwINOZ0YHQtdGAINC10YLQtdGC0ZbQvSDQtdGA0LXQutGI0LXQu9GW0LrRgtC10YDRliDQvtC7INC905nRgNC10YHRgtC10LvQtdGA0LTQtSDQsdGA0L7QvdGF0YLQsNGA0LTRi9C9INC60ZbRiNC60LXQvdGC0LDQuSDQvNOp0LvRiNC10YDQtNC1INCx0L7Qu9GD0YsgLCDSm9Cw0LHRi9GA0pPQsNC70LDRgNGL0L3QtNCwINGI0LXQvNGW0YDRiNC10LrRgtC10YDRltC90ZbQvSDQsdC+0LvRg9GLINC205nQvdC1INKb0LDQsdGL0L3Rg9KT0LAs0LjQvdGE0LXQutGG0LjRj9C70LDRgNKT0LAg0L3QtdC80LXRgdC1INCx0LDRgdKb0LAg0YTQsNC60YLQvtGA0LvQsNGA0pPQsCDRgdC10LfRltC80YLQsNC7INCx0L7Qu9GD0Ysg0YLQtdCz0ZbRgSDQsdKx0LvRiNGL0psg0LXRgiDRgtC+0L3Rg9GB0YvQvdGL0L0g0LbQvtKT0LDRgNC70LDRg9GL0L3QsCDTmdC60LXQu9C10LTRli4g0JTQtdC80LXQuiDQsdKx0LvRiNGL0psg0LXRgiDRgtC+0L3Rg9GB0YvQvdGL0L0g0LbQvtKT0LDRgNC70LDRg9GLINGC0YvQvdGL0YEg0LDQu9GDINC20L7Qu9Cw0LTRgNGL0L3Ri9C9INC00LjQsNC80LXRgtGA0ZbQvdGW0L0g06nQt9C10LPRg9GW0L3QtSDTmdC60LXQu9GW0L8sINCw0YPQsNC90YvQvSDRiNGL0pPRg9GL0L3QsCDQutC10LTQtdGA0LPRliDQutC10LvRgtGW0YDQtdC00ZYuINCe0LvQsNGA0LTRi9C9INGC0LDRgCDQsdC+0LvRg9GLINC60LXQtyDQutC10LvQs9C10L0g0ZbRgdGW0L3RgyDQttOZ0L3QtSDSm9Cw0LHRi9C90YMg0LrQtdC30ZbQvdC00LUg0LDRg9CwINCw0pPRi9C90YvQvdCwINOZ0YHQtdGAINC10YLRg9GWINC80q/QvNC60ZbQvS4g0JbTmdC90LXQtNC1INCR0YDQvtC90YUg0pvQsNCx0YvRgNKT0LDQu9Cw0YDRi9C90YvQvSAg0YjQtdC80ZbRgNGI0LXQutGC0LXRgNGWICDQutC10LnQsdGW0YAg0pvSsdGA0YvQu9GL0LzQtNCw0YDQtNGLICDQutCw0LzRgtCw0LzQsNGB0YvQtyDQtdGC0LXQtNGWLCAg0LHRltGA0LDSmyDQsNGD0LAg0LDSk9GL0L3Ri9C90YvQvSDSm9Cw0LbQtdGC0YLRltC70ZbQs9GW0L3RltC9INOp0LfQs9C10YDRg9GW0L3QtSDQttCw0YPQsNC/INGA0LXRgtGW0L3QtNC1INC+0LvQsNGA0LTRi9C9INC60LXSo9C10Y7RltC9INC90LXQvNC10YHQtSDQttC40YvRgNGL0LvRgyDSm9Cw0LHQu9C10YLRltC9INGI0LXQutGC0LXRg9GWINC80q/QvNC60ZbQvS7QkNC7INKb0LDQsdGL0L3RgyDQvdC10LzQtdGB0LUg0LHQsNGB0pvQsNC00LAg0YLRgNC40LPQtdGA0LvQtdGALNGE0LDQutGC0L7RgNC70LDRgNKT0LAgINCx0LDQudC70LDQvdGL0YHRgtGLINGC0LXQs9GW0YEg0LHSsdC70YjRi9KbINGC0L7QvdGD0YHRi9C90YvQvSDQttC+0pPQsNGA0LvQsNGD0Ysg0LrQtdC00LXRgNCz0ZbQs9C1INGL0pvQv9Cw0Lsg0LXRgtC10LTRliwg0LHQsNC70LDQtNCwINGI0YvRgNGL0YjRgtGLINGN0LrRgdGD0LTQsNGC0YLRi9C9INC20LjQvdCw0LvRg9GL0L3QsCDTmdC60LXQu9C10LTRliwg0LDQuyDQsdCw0LvQsNC70LDRgCDQvtC90Ysg06nQt9C00LXRgNGWINGI0YvSk9Cw0YDQsCDQsNC70LzQsNKT0LDQvdC00YvSm9GC0LDQvSDQsdGA0L7QvdGC0LDRgNC00YvQvSDQsdGW0YLQtdC70YPRliwg0LTQtdC8INGI0YvSk9Cw0YDSk9Cw0L3QtNCwINCw0YPQsNC90Ysg0YjRi9KT0LDRgNGD0LTRiyDSm9C40YvQvdC00LDRgtCw0LTRiy4g0K3QutGB0L/QtdGA0LDRgtC+0YDQu9GLINC10L3RgtGW0LPRgyDRgtGL0L3Ri9GBINCw0LvRgyDQttC+0LvQtNCw0YDRi9C90YvQvSDRgtCw0YDRi9C70YPRiyDQvdC10LzQtdGB0LUg0LHRltGC0LXQu9GD0ZYg0LrQtdC30ZbQvdC00LUg0L/QsNC50LTQsCDQsdC+0LvQsNGC0YvQvSDRgtGL0L3Ri9GBINCw0LvRg9C00YvQvSDSm9C40YvQvdC00LDRg9GLLiDQkdKx0Lsg0LTQtdC8INGI0YvSk9Cw0YDRgyDQutC10LfRltC90LTQtSDSm9GL0YHRi9C70YMg0L3QtdC80LXRgdC1INGB0YvRgNGL0LvQtNCw0YAg0YHQtdC30ZbQvNC90LUg05nQutC10LvQtdC00ZYuINCh0LXQsdC10LHRliwg0LDRg9CwINGC0LDRgNGL0LvSk9Cw0L0g0L3QtdC80LXRgdC1INCx0ZbRgtC10LvRltC/INKb0LDQu9KT0LDQvSDRgtGL0L3Ri9GBINCw0LvRgyDQttC+0LvQtNCw0YDRiyDQsNGA0pvRi9C70Ysg0YjRi9KT0YPRiyDSm9C40YvQvdC00LDQudC00YsuPGJyIC8+DQoyLtCR0LDQu9Cw0LvQsNGA0LTQsCDRgdKv0LnQtdC6INC20q/QudC10YHRliDQtNCw0LzRg9GLINC10YDQtdC60YjQtdC70ZbQutGC0LXRgNGWINC+0LssINC+0Lsg0YHSr9C50LXQutGC0LXRgNC00ZbQvSDQsdCw0YHRgtCw0L/Sm9GL0LTQsCDSm9Cw0LvRi9C/0YLQsNGB0YPRiyDQttOZ0L3QtSDQvNC40L3QtdGA0LDQu9C40LfQsNGG0LjRjyDQv9GA0L7RhtC10YHRgtC10YDRltC90ZbSoyDQtNCw0LzRg9GL0LzQtdC9INC20q/RgNC10LTRli7QodKv0LnQtdC60YLQtdGAINCx0LDRgdGC0LDQv9C60YvQtNCwINGI0LXQvNGW0YDRiNC10Log0YLSr9GA0ZbQvdC00LUg0pvQsNC70YvQv9GC0LDRgdCw0LTRiyzQutC10LnRltC9INGB0q/QudC10Log0YLRltC90ZbQvNC10L0g0LHRltGA0YLRltC90LTQtdC/ICDQvtGB0LjRhNC40LrQsNGG0LjRjyDQv9GA0L7RhtC10YHRliDQsNGA0pvRi9C70Ysg0YHSr9C50LXQutGC0LXQvdC10LTRli7SsNC30YvQvSDRgdKv0LnQtdC60LXRgtC10YDQtNGW0L0g0rHRiNGC0LDRgNGL0L3QsCDQttCw0pvRi9C9INC+0YDQvdCw0LvQsNGB0LrQsNC9INGI0LXQvNGW0YDRiNC10Log0LDQudC80LDSm9GC0LDRgNGLINCx0L7Qu9GL0L8g0YLQsNCx0YvQu9Cw0YLRi9C9INOp0YHRgyDRgtCw0pvRgtCw0LvQsNGA0Ysg0LHQvtC50LvRi9KbINGB0q/QudC10LrRgtC10YDQtNGW0L0g06nRgdGD0ZbQvdC1INC20LDRg9Cw0L8g0LHQtdGA0LXQtNGWINC205nQvdC1INC20YvQvdGL0YHRgtGL0psg0LbQtdGC0ZbQu9GD0LTRltKjINGB0L7QvdGL0L3QsCAg0LTQtdC505nQvSDSm9GL0LfQvNC10YIg0LDRgtKb0LDRgNCw0LTRiy7QkdCw0YHRgtCw0L/Sm9GL0LTQsCDRgdKv0LnQtdC60YLQtdGAINOZ0LvRgdGW0Lcs0L3TmdC30ZbQuiDQttOZ0L3QtSDQutC10YPQtdC60YLRliDQsdC+0LvRi9C/INC60LXQu9C10LTRli7QkdGW0YDQsNKbICDQvNC40L3QtdGA0LDQu9C00LDQvdGDINC/0YDQvtGG0LXRgdGWINC606nQvNC10LPRltC80LXQvSDRgtGL0pPRi9C30LTQsNC70LDQtNGLLiDQkdKx0Lsg0LbQtdGA0LTQtSDQutCw0LvRjNGG0LjQuSDQttOZ0L3QtSDRhNC+0YHRhNC+0YAg0LDQu9C80LDRgdGD0Yss0LbTmdC90LUg0L7Sk9Cw0L0g05nRgdC10YAg0LXRgtC10YLRltC9INC606nQv9GC0LXQs9C10L0g0LPQvtGA0LzQvtC90LTQsNGAINC80LXQvSDQtNOZ0YDRg9C80LXQvdC00LXRgNC00ZbQvSDQutOp0LzQtdCz0ZbQvNC10L0g0YDQtdGC0YLQtdC70LXQtNGWLiDQntC7INKb0LDQu9Kb0LDQvdGI0LAg0LHQtdC30ZbQvdC10L0g0LHTqdC70ZbQvdC10YLRltC9INC60LDQu9GM0YbQuNGC0L7QvdC40L0g0LbTmdC90LUg0pvQsNC70pvQsNC90YjQsCDQvNCw0L3RiyDQsdC10LfRltC90ZbQvSDRgSDQttCw0YHRg9GI0LDQu9Cw0YDRi9C90LDQvSDQsdOp0LvRltC90LXRgtGW0L0g0L/QsNGA0LDRgtCz0L7RgNC80L7QvSDQttKv0LnQtdC70LXRgNGW0L0g0LHRltGAINCx0ZbRgNGW0LzQtdC9INGC0LXQv9C1INGC0LXQvdC00ZbQutGC0LUg0LHQvtC70YPRiyDQvNCw0qPRi9C30LTRiyDQsdC+0LvRi9C/INC60LXQu9C10LTRli7QodC10LHQtdCx0ZYs0LXQs9C10YDQtNC1INC60LDQu9GM0YbQuNGC0L7QvdC40L0g0LzTqdC70YjQtdGA0ZYg0LDRgNGC0YvQvyDQutC10YLRgdC1INGB0q/QudC10Log0YDQtdC30L7QsdGB0YbQuNGP0YHRiyDRgtOp0LzQtdC90LTQtdC/LNGB0q/QudC10LrRgtGW0L0g0YLRi9KT0YvQt9C00LDQu9GD0YvQvdCwINOZ0LrQtdC70LXQtNGWLNC005nQuyDRgdC+0LvQsNC5INC/0LDRgNCw0YLQs9C+0YDQvNC+0L0g0LrQsNC70YzRhtC40LTRltC9INCx06nQu9GW0L3Rg9GW0L0g0LDRgNGC0YLRi9GA0YvQvywg0YHSr9C50LXQuiDRgNC10LfQvtCx0YHRhtC40Y/RgdGL0L0g0LrSr9GI0LXQudGC0LXQtNGWLtCU05nQuyDRgdC+0LvQsNC5INC0INCy0LjRgtCw0LzQuNC90ZYg0LHQsNC70LDQtNCwINC60LDQu9GM0YbQuNC00ZbQvSDRltGI0LXQuiDQsNGA0pvRi9C70Ysg0YHRltKj0ZbRgNGW0LvRg9GW0L3QtSDSm9Cw0YLRi9GB0LDRgtGL0L0g0LzQsNKj0YvQt9C00Ysg0L/RgNC+0YbQtdGB0YEuINC205nQvdC10LTQtSDQsdGW0LfQtNC1INCx0LDRgSDRgdKv0LnQtdC60YLQtdGA0ZYg0LHQvtGB0LDQvdGDINC60LXQt9GW0L3QtNC1INC40LrQtdC80LTRltC70ZbQutGC0ZYg0pvQsNC80YLQsNC80LDRgdGL0Lcg0LXRgtC10YLRltC9INC10L3QsdC10LrRgtC10YDQvNC10L0g0LHTqdC70ZbQvdCz0LXQvSDQsdC+0LvRi9C/INC60LXQu9C10LTRli4g0JXQvdCx0LXQutGC0LXRgCDQutC10LnRltC9INCx0ZbRgNGW0LPQtSDTqdGB0LXQtNGWINC205nQvdC1INCx0LDQu9Cw0L3Ri9C9IDEyLTE4INCw0LnRi9C90LTQsCDQttCw0LHRi9C70YPRiyDQutC10YDQtdC6LtCV0LPQtdGA0LTQtSDQtdKj0LHQtdC60YLQtdGAINC20LDQsdGL0LvQvNCw0LnRgtGL0L0g0LHQvtC70YHQsCDQsdC10LvQs9GW0LvRliDQv9Cw0YLQvtC70L7Qs9C40Y/Qu9Cw0YDSk9CwINOZ0LrQtdC70LXRgtGW0L0g0LHQvtC70LDQtNGLLiDQntGB0Ysg0L/RgNC+0YbQtdGB0YLQtdGAINCw0YDSm9GL0LvRiyDQsdCw0LvQsNC00LAg0YHSr9C50LXQuiDQttKv0LnQtdGB0ZbQvdGW0qMg0LTQsNC80YPRiyDQttKv0YDQtdC00ZYu0JHRltGA0LDSmyDTqdGB0LUg0LrQtdC70LUg0LHQsNC70LDQvdGL0L0g0YHSr9C50LXQutGC0LXRgNGW0L3QtNC1INOp0LfQs9C10YDRltGB0YLQtdGAINCx0L7Qu9Cw0YLRi9C90YvQvSDQsNC50YLQsNC/INCw0LnRgtKb0LDQvSDQttOp0L0sINGP0pPQvdC4INGB0q/QudC10LrRgtC10YDQtNGW0L0g0LbSsdC80YHQsNKbINGC0ZbQvdC00LXRgNGW0L3QtSDQsdCw0LnQu9Cw0L3Ri9GB0YLRiyDTqdGB0LUg0LrQtdC70LUg0YHQsNC90Ysg0LDQt9Cw0Y/RgtGL0L3RiyDQttOZ0L3QtSDQttGL0L3Ri9GB0YLRi9KbINC20LXRgtGW0LvRgyDQutC10LfRltC90LTQtSDQs9C+0YDQvNC+0L3QtNGL0psg06nQt9Cz0LXRgNGW0YHRgtC10YDQs9C1INCx0LDQudC70LDQvdGL0YHRgtGLINOp0LfQs9C10YDRg9GWINC205nQvdC1INCx0LDQu9Cw0L3Ri9C9INOp0LzRltGAINGB0LDQu9GC0YvQvdCwLCDRgtCw0LzQsNKb0YLQsNC90YPRiywg0YTQuNC30LjQutCw0LvRi9KbINCx0LXQu9GB0LXQvdC00ZbQu9GW0LPRltC90LUg0LHQsNC50LvQsNC90YvRgdGC0Ysg0LHQsNC70LDQtNCwINGB0q/QudC10Log0LbSr9C50LXRgdGWINC00LDQvNGL0L8s06nQt9Cz0LXRgNGW0L8g0L7RgtGL0YDQsNC00Ys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6" table:style-name="ce1">
            <text:p>915346</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3RgdKx0YDQsNKbLjQg0LbQsNGB0YLQsNKT0Ysg0LHQsNC70LDQu9Cw0YDQtNCwINCx0YDQvtC90YLQsNGA0LTRi9KjINCw0L3QsNGC0L7QvNC40Y/Qu9GL0psg0LbTmdC90LUg0YTQuNC30LjQvtC70L7Qs9C40Y/Qu9GL0psg0LXRgNC10LrRiNC10LvRltC60YLQtdGA0ZYg0L7Qu9Cw0YDQtNGL0qMg0YLRi9C90YvRgSDQsNC70YMg0LbQvtC70LTQsNGA0YvQvdGL0qMg0LjQvdGE0LXQutGG0LjRj9C70YvSmyDQvdC10LzQtdGB0LUg0LrQsNCx0YvQvdGDINC/0YDQvtGG0LXRgdGC0LXRgNGW0L3QtSDQtdGA0LXQutGI0LUg0YHQtdC30ZbQvNGC0LDQuyDQsdC+0LvRg9GL0L3QsCDQsdCw0LnQu9Cw0L3Ri9GB0YLRiyDQsdGA0L7RhdC40LDQu9C00Ysg0L7QsdGB0YLRgNGD0LrRhtC40Y/Qu9GL0L0g0YLQtdC3INC00LDQvNGD0YvQvdCwINGL0pvQv9Cw0LDQuyDQtdGC0LXQtNGWLiDQntGB0YvQvdC00LDQuSDQttCw0pPQtNCw0LnQu9Cw0YDQtNCwINCx0LDQudKb0LDQu9Cw0YLRi9C9INCx0YDQvtC90YXQuNGCINC60LXQt9GW0L3QtNC1INGN0LrRgdC/0LjRgNCw0YLQvtGA0LvRi9KbINC10L3RgtGW0LPRg9C00ZbSoyzRj9KT0L3QuCDRgtGL0L3Ri9GBINGI0YvSk9Cw0YDRg9C00L0g0LrQuNGL0L3QtNCw0YPRiyDQv9Cw0LnQtNCwINCx0L7Qu9GD0YvQvdGL0qMg0L3QtdCz0ZbQt9Cz0ZYg0YHQtdCx0LXQv9GC0LXRgNGWINC60LXQu9C10YHRliDRhNCw0LrRgtC+0YDQu9Cw0YDSk9CwINCx0LDQudC70LDQvdGL0YHRgtGLLtCR0YDQvtC90YXQuNCw0LvQtNGLINC+0LHRgdGC0YDRg9C60YbQuNGPINC00LXQs9C10L3RltC80ZbQtyDQsdKx0Lsg0LHRgNC+0L3RhdGC0LDRgNC00YvSoyDQu9GO0LzQtdC90ZbQvdGW0qMg0LHRltGC0LXQu9GD0ZYg0L3QtdC80LXRgdC1INGC0LDRgNGL0LvRg9GLLNC+0Lsg0LrQtdC30LXSo9C00LUg0LDRg9CwINCw0pPRi9C90YvQvdGL0qMg06nQutC/0LXQs9C1INC60ZbRgNGD0ZYg0L3QtdC80LXRgdC1INGI0YvSk9GD0Ysg0LrQuNGL0L3QtNCw0LnQtNGLLjEgINCR0YDQvtC90YXRgtCw0YDQtNGL0qMg0LDQvdCw0YLQvtC80LjRj9C70YvSmyDQtdGA0LXQutGI0LXQu9GW0LrRgtC10YDRljot0LTQuNCw0LzQtdGC0YDQtNGL0qMg0YLQsNGA0YvQu9GD0Ys6INCx0LDQu9Cw0LvQsNGA0LTQsCDTmdGB0ZbRgNC10YHQtSA0INC20LDRgdKb0LAg0LTQtdC50ZbQvSDQsdGA0L7QvdGF0YLQsNGAINC00LjQsNC80LXRgtGA0ZYg0YLQsNGA0YvQu9Cw0LTRiy7QodC+0L3Ri9C80LXQvSDQutC+0YHQsCDRiNGL0YDRi9GI0YLRiyDQutCw0LHQsNGCINGW0YHRltC90LPQtdC9INC60LXQt9C00LUg0L7Qu9Cw0YDQtNGL0qMg06nRgtC60ZbQt9Cz0ZbRiNGC0ZbQs9GWINCw0LnRgtCw0YDQu9GL0pvRgtCw0Lkg0YLTqdC80LXQvdC00LXQudC00ZYu0JzRi9GB0LDQu9GLOtCR0YDQvtC90YUg0LTQuNCw0LzQtdGC0YDRltC90ZbSoyAx0LzQvCDRgtCw0YDRi9C70YPRiyAg0LHQsNC70LDQu9Cw0YDQtNCwINCw0YPQsCDQsNKT0YvQvNGL0L0gNTAg0L/QsNC50YvQt9KT0LAg0LTQtdC50ZbQvSDRgtOp0LzQtdC90LTQtdGD0ZbQvdC1INCw0LvRi9C/INC60LXQu9GD0ZYg0LzSr9C80LrRltC9Li3QqNGL0YDRi9GI0YLRiyDQutCw0LHQsNGC0YLRi9KjINCx0L7RgNC/0YvQu9C00LDSm9GC0YvSk9GLOiDQsdCw0LvQsNC70LDRgNC00LAg0LHRgNC+0L3RhdGC0LDRgNGL0L3Ri9KjINGI0YvRgNGL0YjRgtGLINC60LDQsdCw0YLRiyDQsdC+0YDQv9GL0LvQtNCw0Log0LHQvtC70YPRiyDQtdGB0LXQsdGW0L3QtdC9INC60LDQsdGL0L3RgyDQutC10LfRltC90LTQtSDRltGB0ZbQvdGDINGC0LXQtyDQtNCw0LzRi9C/INGC0LDRgNGL0LvRg9GL0L3QsCDQsNC60LXQu9C10LTRli4t0KjQtdC80ZbRgNGI0LXQuiDQutKx0YDRi9C70YvQvNGL0L3Ri9KjINGC0L7Qu9GL0psg0LbQtdGC0ZbQu9C80LXRg9GWOtCR0YDQvtC90YXRgtCw0YDQtNGL0qMg0LrQsNCx0YvRgNKT0LDRgdGL0L3QtNCw0pPRiyDRiNC10LzRltGA0YjQtdC6INGB0LXRgNC/0ZbQvNC00ZbQu9GW0LPRliDRgtOp0LzQtdC9INC205nQvdC1INOZ0LvRgdGW0Lcs0YHQvtC7INGB0LXQsdC10L/RgtC10L0g0LrQsNCx0YvQvdGDINC90LXQvNC10YHQtSDRgdC/0LDQt9C8INGB0LDQu9C00LDRgNC90YvQsNC9INCx0YDQvtC90YXRgtCw0YDQtNGL0qMg0YLQtdC3INCx0LDRgdGL0LvRi9C/INC60LDQu9GD0YvQvdCwINGL0LrQv9Cw0Lsg0LXRgtC10LTRli4t0JHRgNC+0L3RhSDQutCw0LHRi9GA0pPQsNGB0YvQvdC00LDSk9GLINCx0rHQu9GI0YvSmyDQtdGCINGC0ZbQvdC90ZbSoyDTmdC70YHRltC30LTRltCz0ZY6INGC0LXQs9GW0YEg0YHQsNC70LDQu9GLINCx0rHQu9GI0YvSmyDQtdGCINGC0L7Qu9GL0psg0LbQtdGC0ZbQu9C80LXQs9C10L3QtNGW0LrRgtC10L0g0LHRgNC+0L3RhdGC0LDRgNC00YvSoyDQutCw0LHRi9GA0pPQsNC70LDRgNGLINC60LDQsdGL0L3RgyDQvNC10L0g0YHRi9GA0YLSm9GLICDQutGL0YHRi9C80pPQsCDRgdC10LfRltC80YLQsNC7INCx0L7Qu9Cw0LTRiy4g0JHSsdC7INCx0YDQvtC90YXQvtGB0L/QsNC30LzQvdGL0qMg0LTQsNC80YPRi9C9INGI0LDSm9GL0YDRg9GLINC80q/QvNC60ZbQvS4yINCk0LjQt9C40L7Qu9C+0LPQuNGP0LvRi9KbINC10YDQtdC60YjQtdC70ZbQutGC0LXRgNGWOi3RgtGL0L3Ri9GBINCw0LvRgyDQttC+0LvQtNCw0YDRi9C90YvSoyDRgtCw0YAg0LHQvtC70YPRizrQsdCw0LvQsNC70LDRgNC00LAg0YLRi9C90YvRgSDQsNC70YMg0LbQvtC70LTQsNGA0YvQvdGL0qMg0LbQsNC70L/RiyDQtNC40LDQvNC10YLRgNGWINGC0LDRgCDQsdC+0LvQsNC00Yss0YHQvtC90LvQtNGL0pvRgtCw0L0g0LHRgNC+0L3RhdGC0LDRgNC00LDQvSDQsNGD0LDQvdGL0qMg06nRgtGD0ZYg0LHQtdC70LPRltC70ZYg0LHRltGAINC60LXQtNC10YDQs9GW0LvQtdGAINCx0L7Qu9KT0LDQvSDQttCw0pPQtNCw0LnQtNCwINOp0YLRg9GWINC90LDRiNCw0YDQu9Cw0LnQtNGLLtCR0rHQuyDRjdC60YHQv9C40YDQsNGC0L7RgNC70YvSmyDQtdC90YLRltCz0YPQtNGWINGC0YPRi9C90LTQsNGC0LDQtNGLLi3QqNGL0YDRi9GIINOp0L3QtNGW0YDRg9C00ZbSo9GWINC20L7Sk9Cw0YDRi9C70LDRg9GLOtCx0LDQu9Cw0LvQsNGA0LTRi9KjINGI0YvRgNGL0YjRgtGLINC60LDQsdCw0YLRgtCw0YDRiyDQutCw0LHRi9C90YMg0LrQtdC30ZbQvdC00LUg0LrTqdC/INC806nQu9GI0LXRgNC00LUg0YjRi9GA0YvRiCDTqdC90LTRltGA0LXQtNGWLNGB05nQudC60LXRgdGW0L3RiNC1INGI0YvRgNGL0Ygg0LHRgNC+0L3RhdGC0LDRgNC00YvSoyDQu9GO0LzQtdC90ZbQvSDQsdGW0YLQtdC/INCw0YPQsCDQsNKT0YvQvdGL0L0g0YjQtdC60YLQtdC50LTRli4t0JrRltC70LXQs9C10LnQu9GWINGN0L/QuNGC0LXQu9C40LnQtNGW0qMg0pvRi9C30LzQtdGC0ZbQvdGW0qMg0LbQtdGC0LrRi9C70ZbQutGB0ZbQt9C00ZbQs9GWOtCR0LDQu9Cw0LvQsNGA0LTQsCDQutGW0LvQtdCz0LXQudC70ZYg0Y3Qv9C40YLQtdC70LjQudC00ZbSoyDQutGW0YDQv9GW0LrRiNC10LvQtdGA0ZYg0YLQvtC70YvSmyDQttC10YLRltC70LzQtdC50LTRliwg0LHSsdC7INGI0YvRgNGL0YjRgtGLINC205nQvdC1INCx06nQs9C00LUg0LfQsNGC0YLQsNGA0LTRiyDQsdGA0L7QvdGF0YLQsNC9INGI0YvSk9Cw0YDRg9C00YsgINC60LjRi9C90LTQsNGC0LDQtNGLLi3QotGL0L3Ri9GBINCw0LvRgyDQsdKx0LvRiNGL0psg0LXRgtGC0LXRgNGW0L3RltKjINC20LXRgtGW0LvQvNC10YPRljrQotGL0L3Ri9GBINCw0LvRgyDQsdKx0LvRiNGL0psg0LXRgtGC0LXRgNGWINKb0LDQsdGL0YDSk9Cw0LvRi9KbINC205nQvdC1INC00LjQsNGE0YDQsNCz0LzQsNC70YvSmyDQsdKx0LvRiNGL0psg0LXRgtGC0LXRgNGWINOZ0LvRgdGW0LcuINCt0LrRgdC/0LjRgNCw0YLQvtGA0LvRi9KbINGE0LDQt9CwINC60LXQt9GW0L3QtNC1INC60LXRg9C00LUg0LrRg9GL0YHRi9C90YvSoyDQutOp0LvQtdC80ZbQvSDRgtC+0LvRi9KbINCw0LfQsNC50YLRgyDQutC40YvQvSDQsdC+0LvQsNC00YssINGB0L7Sk9Cw0L0g0YHTmdC50LrQtdGBINCw0YPQsNC90YvSoyDTqdC60L/QtdC00LXQvSDRgtC+0LvRi9KbINGI0YvSk9Cw0YDRi9C70LzQsNGD0YvQvdCwINOZ0LrQtdC70LXQtNGWLjxiciAvPg0KICAgICAgICAgIDIt0YHSsdGA0LDSmzog0LHQsNC70LDQu9Cw0YDQtNCwINGB0q/QudC10Log0LbSr9C50LXRgdGW0L3RltKjINC00LDQvNGD0Ysg0LXRgNC10LrRiNC10LvRltC60YLQtdGA0ZY6INCR0LDQu9C70LDRgNC00YvSoyDRgdKv0LnQtdC6INC20q/QudC10YHRliDQtdGA0LXRgdC10LrRgtC10YDQs9C1INKb0LDRgNCw0pPQsNC90LTQsCDQsdGW0YDQutCw0YLQsNGAINCw0L3QsNGC0L7QvNC40Y/Qu9GL0pst0YTQuNC30LjQvtC70L7Qs9C40Y/Qu9GL0psg0LbTmdC90LUg0LHQuNC+0YXQuNC80LjRj9C70YvSmyDQtdGA0LXQutGI0LXQu9GW0LrRgtC10YDQs9C1INC40LUu0JHSsdC7INC10YDQtdC60YjQtdC70ZbQutGC0LXRgCDTqdGB0YPQtNGW0qMsINC00LDQvNGD0LTRi9KjINC205nQvdC1INGB0YvRgNGC0pvRiyDQsNGB0LXRgNC70LXRgNCz0LUg0LHQtdC50ZbQvNC00LXQu9GD0ZbQtNC1INC20LDRgtGL0YAu0JHQsNC70LDQu9Cw0YDQtNCwINGB0q/QudC10Log0YLRltC90ZbQvdGW0qMg0LrRg9GA0YvQu9GL0LzRi9C80LXQvSDQutGL0LfQvNC10YLRgtGWINC20LDRgdGL0L3QsCDRgdOZ0LnQutC10YEg06nQt9Cz0LXRgNGW0L8g0L7RgtGL0YDQsNC00Yss0LDQuyDQvtC90YvSoyDQttC10YLRltC70YPRliAyMC0yNSDQttCw0YHSm9CwINC00LXQudGW0L0g0LbQsNC70pPQsNGB0LDQtNGLLtCR0LDQu9Cw0LvQsNGA0LTQsNKT0Ysg0YHSr9C50LXQuiDQttKv0LnQtdGB0ZbQvdGW0qMg0LXRgNC10LrRiNC10LvRltC60YLQtdGA0ZY6IDHQodKv0LnQtdC6INGC0ZbQvdGW0L3RltKjINKb0rHRgNGL0LvRi9C80Ys6INCh0q/QudC10Log0YLRltC90ZbQvdGW0qMg0LbQtdGC0LXQu9C80LXQs9C10L3QtNGW0LPRli7QkdCw0LvQsNC70LDRgNC00LAg0YHSr9C50LXQuiDRgtGW0L3RliDQsdC+0YDQv9GL0LvQtNCw0psg0LbTmdC90LUg0LbSsdC80YHQsNC6LNGB0LXQsdC10LHRliDQvtC90YvSoyDSm9Kx0YDQsNC80YvQvdC00LAg0L7RgNCz0LDQvdC40LrQsNC70YvSmyDQt9Cw0YLRgtCw0YAg0LrTqdC/LNCw0LvQsNC50LTQsCDQvNC40L3QtdGA0LDQu9C00Ysg0LDQtzrQsdKx0Lsg0YHSr9C50LXQutGC0LXRgNC00ZYg0LjQutC10LzQtNGWINC10YLRltC/INC20LjRliDQvNCw0LnRi9GB0YPSk9CwINC205nQvdC1INGB0YvQvdGD0pPQsCDRgtOp0LfRltC80LTRliDQtdGC0LXQtNGWLtCe0YDQs9Cw0L3QuNC60LDQu9GL0psg0LfQsNGC0YLQsNGA0YsgNTAg0L/QsNC50Lcg0LzQuNC90LXRgNCw0LvQtNGLINC30LDRgi0zNS00MCDQv9Cw0LnRi9C3Li3Qn9C10YDQuNC+0LTRgtGL0qMg0LrQsNC70YvSo9C00YvSk9GLOtCx0LDQu9Cw0LvQsNGA0LTQsCDQv9C10YDQuNC+0LQs0Y/Sk9C90Lgg0YHSr9C50LXQutGC0ZYg0pvQvtGA0YjQsNC50YLRi9C9INC60LDQsdGL0Log0LXRgNC10YHQtdC60YLQtdGA0LPQtSDQutCw0YDQsNKT0LDQvdC00LAg0LrQsNC70YvQvSDTmdGA0ZYg0LHQtdC70YHQtdC90LTRli7QkdKx0Lsg0L/QtdGA0LjQvtC0INC20LDSo9CwINC+0YHRgtC10L7QsdC70LDRgdGC0YLQsNGA0LTRiyDQttCw0YHQsNC/LNGB0YvQvdKT0LDQvSDRgdKv0LnQtdC60YLQtdGA0LTRliDRgtC10Lcg0LbQsNC30YvQu9GD0YvQvdCwINGL0pvQv9Cw0Lsg0LXRgtC10LTRli4t0KHSr9C50LXQuiDQutC10LzRltCz0ZY60LHQsNC70LDQu9Cw0YDQtNCwINGB0q/QudC10Log0LrQtdC80ZbQs9GW0L3RltKjINC606nQvyDQsdOp0LvRltCz0ZYg0LrRi9C30YvQuyDQttGW0LvRltC6INC80LDQudGL0L3QsNC9INGC0rHRgNCw0LTRiyzQvtC7INOp0Lcg0LrQtdC30LXQs9GW0L3QtNC1INKb0LDQvSDQttCw0YHRg9GI0LDQu9Cw0YDRi9C9INCx0LXQu9GB0LXQvdC00ZYg0YLSr9GA0LTQtSDTqdC90LTRltGA0LXQtNGWLjIu0KHSr9C50LXQutGC0ZbSoyDTqdGB0YPRiyDQvNC10L0g0LTQsNC80YPRizot06nRgdGDINCw0LnQvNCw0pvRgtCw0YDRiyDQsdCw0LvQsNC70LDRgNC00LAg0YHSr9C50LXQutGC0LXRgNC00ZbSoyDSsdC30YvQvdC00YvSk9GL0L3QsCDTqdGB0YPRliDRiNC10LzRltGA0YjQtdC60YLRliDQutCw0LHQsNGC0YLRi9C9INCx0LXQu9GB0LXQvdGD0ZbQvNC10L0g0LbSr9GA0LXQtNGWLtCR0rHQuyDTqdGB0YMg0LDQudC80LDSm9GC0LDRgNGLINGB0q/QudC10LrRgtC10YDQtNGW0qMg0rHRiNGL0L3QtNGLINC+0YDQvdCw0LvQsNGB0YvQvyzSm9Cw0YDSm9GL0L3QtNGLINC20LDRgdGD0YjQsNC70YvSmyDQsdOp0LvRltC90YMg0LDRgNKb0YvQu9GLINC20LDSo9CwINGB0q/QudC10Log0LbQsNGB0YPRiNCw0YHRi9C9INC60LDQu9GL0L/RgtCw0YHRgtGL0YDQsNC00YsuLdCh0q/QudC10LrRgtGW0qMg0pvQsNC70YvSo9C00LDRg9GL0L3Ri9KjINOp0YHRgy4t0prQsNGC0LDQudGL0L8g0LbQtdGC0LvRg9GWLtCR0LDQu9Cw0LvQsNGA0LTRi9KjINGB0q/QudC10LrRgtC10YDRltC90ZbSoyDQtNOZ0L3QtdC60LXRgCDRgtGW0L3RliDRiNC10LzRltGA0YjQtdC6INGC0ZbQvdGWINC606nQvyzQsdKx0Lsg0YHSr9C50LXQutC60LUg0LjQutC10LzQtNGW0LvRltC6INCx0LXRgNC10LTRli7QqNC10LzRltGA0YjQtdC6INGC0ZbQvdGWINC20LXRgtGW0LvQs9C10L0g0YHQsNC50YvQvSDRgdKv0LnQtdC60LrQtSDQsNC50L3QsNC70LDQtNGLLiAzLdCx0LDRgSDRgdKv0LnQtdC6INC10YDQtdC60YjQtdC70ZbQutGC0LXRgNGWLdC20LDSo9CwINGC0YPSk9Cw0L0g0L3QsNGA0LXRgdGC0LXQtNC1INCx0LDRgSDRgdKv0LnQtdC60YLRltKjINOp0YHRg9GW0L0g0LbTmdC90LUg0LrQuNC80YvQu9C00LDRg9C9INC60LDQvNGC0LDQvNCw0YHRi9C3INC10YLQtdGC0ZbQvSDQtdKj0LHQtdC60YLQtdGA0ZYg0LHQvtC70LDQtNGLLtCQ0LvQtNGL0qPSk9GLINC10qPQsdC10Log0YjQsNC80LDQvNC10L0gMTItMTgg0LDQudC00LAg0LbQsNCx0YvQu9GD0Ysg0LbSr9GA0LXQtNGWLi3QkdCw0LvQsNC70LDRgNC00YvSoyDQsdCw0YEg0YHSr9C50LXQutGC0LXRgNGWINGC0ZbQs9GW0YHRgtC10YAg0LDRgNKb0YvQu9GLINKb0L7RgdGL0LvSk9Cw0L0uNC3QntC80YvRgNGC0pvQsCDQtdGA0LXQutGI0LXQu9GW0LrRgtC10YDRljrQltCw0qPQsCDRgtGD0pPQsNC9INC90LDRgNGB0LXRgtC10LvQtdGA0LTQtSDQvtC80YvRgNGC0pvQsNGB0Ysg0YLSr9C30YMg0LHQvtC70YvQvyDQutC10LvQtdC00ZYu06jRgdGDINCx0LDRgNGL0YHRi9C90LTQsCDQvNC+0LnRi9C9INC70L7RgNC00L7Qt9GLLNC60LXRg9C00LUg0LrQuNGE0L7Qt9GLLNCx0LXQuyDQu9C+0YDQtNC+0LfRiyDRgdC40Y/Sm9GC0Ysg0L7QvNGL0YDRgtKb0LAg0LjRltC70ZbQvNC00LXRgNGWINC60LDQu9GL0L/RgtCw0YHQsNC00Ysu0KHQvtC90YvQvNC10L0g0LrQsNGC0LDRgCDQtNC40YHQutGW0ZbQu9C10YDRliDQutCw0LvRi9KjINC205nQvdC1INGB0LXRgNC/0ZbQvNC00ZbQu9GW0LPRliDQttC+0pPQsNGA0Ysg0LHQvtC70YvQvyDQutC10LvQtdC00ZYuNS7SmtC+0Lsg0LDRj9KbINGB0q/QudC10LrRgtC10YDRliA60LHQsNC70LDQu9Cw0YDQtNCwINGC0q/RgtGW0LrRgtGWINGB0q/QudC10LrRgtC10YDRltC90ZbSoyDQttC10LvRltC90YjQtdC6INC205nQvdC1INCx0ZbQu9C10LfRltC6INGN0L/QuNGE0LjQt9C00LXRgNGWINGC0L7Qu9GL0psg0LbQtdGC0ZbQu9C80LXQs9C10L0g0LbTmdC90LUg0YjQtdGB0ZbRgNGI0LXQuiDRgtGW0L3RltC90LXQvSDRgtKx0YDQsNC00Ysu0JHSsdC7INGB0q/QudC10LrRgtGW0qMg0rHQt9Cw0YDRi9C/INOp0YHRg9GW0L3QtSDRgdC10L/RgtGW0LPRltC9INGC0LjQs9GW0LfQtdC00ZYuNi7QnNC10YLQvtCx0L7Qu9C40LfQvCDRjdC70LXQvNC10L3RgtGC0LXRgNGWOiDQodKv0LnQtdC6INGC0ZbQvdGW0L3RltKjINC80LjQvdC10YDQsNC70LjQt9Cw0YbQuNGP0YHRiyDQsdC10LvRgdC10LXQvdC00ZYg0YLSr9GA0LTQtSDQttKv0YDRltC/LNC60LDQu9GG0LjQuSDQpNCe0KHRhNC+0YAg0LbTmdC90LUg0LQg0LLQuNGC0LDQvNC40L3QvdGW0qMg0LbQtdGC0ZbRgdC/0LXRg9GWINGA0LDRhdC40YIg0YHQuNGP0pvRgtGLINCw0YPRgNGD0LvQsNGA0pPQsCDQsNC60LXQu9GW0YMg0LzSr9C80LrRltC9LtCR0LDQu9Cw0LvQsNGA0LTQsCDRgdKv0LnQtdC6INGC0ZbQvdGW0L3RltKjINC20LDSo9Cw0YDRgyDQttGL0LvQtNCw0LzQtNGL0pPRiyDTqdGC0LUg0LbQvtKT0LDRgNGLINCx0L7Qu9GL0L8g0LrQtdC70LXQtNGWLtCh0L7QuyDSr9GI0ZbQvdC00LUg0YHSr9C50LXQuiDRgtGW0L3RltC90ZbSoyDQttGL0LvQtNCw0Lwg0pvQsNC70L/Ri9C90LAg0LrQtdC70YPRltC90LUg0LbTmdC90LUg06nRgdGD0LTRltKjINCx0LXQu9GB0LXQvdC00ZYg0LHQvtC70YPRi9C90LAg0LzSr9C80LrRltC90LTRltC6INCx0LXRgNC10LTRli4=</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0" table:style-name="ce1">
            <text:p>915350</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IDEg0YHSsdGA0LDSmy4gNCDQttCw0YHRgtCw0pPRiyDQsdCw0LvQsNC70LDRgNC00LAg0LHRgNC+0L3RhdGC0LDRgNC00YvSoyAg0pvQsNCx0YvQvdGD0Ysg0LbQuNGWINC60LXQt9C00LXRgdC10YLRltC9INGC0YvQvdGL0YEg0LDQu9GDINC20L7Qu9C00LDRgNGL0L3Ri9KjINCw0YPRgNGD0Ysg0LHQvtC70YvQvyDRgtCw0LHRi9C70LDQtNGLLiDQsdKx0Lsg0LDRg9GA0YMg0LLQuNGA0YPRgSDRgtCw0YAg05nRgdC10YDRltC90LXQvSDQtNCw0LzQuNC00YssINCw0LvQsNC50LTQsCDQutC10LnQtNC1INCx0rHQuyDQsNGD0YDRgyDSm9C+0LfQtNGL0YDSk9GL0YjRgtCw0YDRi9C90LDQsiDQsdCw0LrRgtC10YDQuNGP0LvQsNGAINC90LUg0LDQu9C70LXRgNCz0LjRjyDQtNCwINGB0LXQsdC10L8g0LHQvtC70YPRiyDQvNKv0LzQutGW0L0uINCx0YDQvtC90YXQuNGCINC10LrTmSDRgtKv0YDQs9C1INCx06nQu9GW0L3QtdC00ZY6INC20LXQtNC10Lsg0LbTmdC90LUg0YHQvtC30YvQu9C80LDQu9GLLiAg0Y3QutGB0L/QuNGA0LDRgtC+0YDQu9GL0psg0LXQvdGC0ZbQs9GDINGC0YvQvdGL0YEg0LbQvtC70LTQsNGA0YvQvdGL0qMg0YLQsNGA0YvQu9GD0Ysg0L3QtSDQsdGW0YLQtdC70YPRliDQutC10LfRltC90LTQtSDQv9Cw0LnQtNCwINCx0L7Qu9GD0Ysg0LzSr9C80LrRltC9INGC0YvQvdGL0YEg0LDQu9GD0LTRi9KjINKb0LjRi9C90LTQsNC90YPRi9C90LAg0LbQsNGC0LDQtNGLLiDQvtC7INGC0YvQvdGL0YEg0YjRi9KT0LDRgNGDINC60LXQt9GW0L3QtNC1INKb0YvRgdGL0LvRgyDQvdC1INGL0YHSm9GL0YDRi9Kb0YIg0YvRgtGL0L3Ri9GBINCw0LvRgyDRgdC10LfRltC80ZbQvdC1INOZ0LrQtdC70YPRltGWINC80q/QvNC60ZbQvS4g06nQudGC0LrQtdC90ZYg0LDRg9CwINGC0LDRgNGL0LvSk9Cw0L0g0L3QtSDQsdGW0YLQtdC70ZbQvyDSm9C70pPQsNC9INGC0YvQvdGL0YEg0LbQvtC70LTQsNGA0Ysg0LDRgNKb0YvQu9GLINOp0YLQtdC00ZYuINGN0LrRgdC/0LjRgNCw0YLQvtGA0LvRi9KbINC10L3RgtGW0LPRgyDQsdKx0Lsg0LDRg9Cw0L3RiyDRiNGL0pPQsNGA0YMg0pvQuNGL0L0g0LHQvtC70LDRgtGL0L0g0L/QsNGC0L7Qu9C+0LPQuNGP0LvRi9KbINC20LDSk9C00LDQuS4g0LHSsdC7INCw0L3QsNC80L7Qu9C40Y8g0pvQsNCx0YvQvdGDINC/0L7RhtC10YHRgtGC0LXRgNGWINC90LUg0LDQu9C70LXRgNCz0LjRj9C70YvSmyDRgNC10LDQutGG0LjRj9C70LDRgCDQutC10LfRltC90LTQtSDQsdCw0LnSm9Cw0LvQsNGC0YvQvSDQvtC70LDRgNC00YvSoyDRltGB0ZbQvdGD0ZbQvdC1INCx0LDQudC70LDQvdGL0YHRgiDRi9Cx0YDQvtC90YXRgtCw0YDQtNGL0qMg0LTQuNCw0LzQtdGC0YDRltC90ZbSoyDRgtCw0YDRi9C70YPRi9C90LAg0LHQsNC50LvQsNC90YvRgdGH0YLRiyAs06nQutC/0LUg0YTRg9C90LrRhtC40Y/RgdGLINCx0rHQt9GL0LvSk9Cw0L0g0LbQsNKT0LTQsNC50LTQsCDQvtGA0YvQvSDQsNC70LDQtNGLLiDQsdKx0Lsg0LDRg9GW0YDRg9C80LXQvSDQsNGD0YDQsNGC0LLRi9C9INC90LDRg9Kb0LDRgSDQsNGD0LDQvdGLINGI0YvSk9Cw0YDRgyDSr9GI0ZbQvSDQsNC50YLQsNGA0LvRi9Kb0YLQsNC5INC60q/RiCDRgdCw0LvRg9C00Ysg0pvQsNC20LXRgiDQtdGC0LXQtNGWLiDQsdKx0Lsg0L/QsNGC0L7Qu9C+0LPQuNGPINGC05nRg9C10LvRgdGW0Lcg0LDRg9GA0YMg0LXQvNC10YEuINCx0ZbRgNCw0psg0L3QtdCz0ZbQt9Cz0ZYg0LDRg9GA0YPQtNGL0qMg0YHQuNC80L/RgtC+0LzQsNGC0LjQutCw0LvRi9KbINC606nRgNGW0L3RltGB0YLRltGA0LXQvdGWINGB0ZbQu9GC0LXQvNC1INC20LDRgdCw0LnQtNGLLiDQsdKx0Lsg0LXRgNC10YHQtdC60YLQtdGA0LTQtSDQtNC1INC20LjRliDQutC10LfQtNC10YHQtdC00ZYuINGN0YLQuNC+0LvQvtCz0LjRj9GB0YvQvdCwINCx0q/QuyDQv9Cw0YLQvtC70L7Qs9C40Y/QvdGL0qMg0YLRi9C90YvRgSDQsNC70YMg0LbSr9C50LXRgdGW0L3QtSDQttCw0YLQsNGC0YvQvSDQsNGD0YDRg9C70LDRgNC00YvSoyDQutOp0L/RiNGW0LvRltCz0ZbQvdC00LUg0LHQsNC50pvQsNGD0pPQsCDQsdC+0LvQsNC00YsuINCw0YLQsNC/INCw0LnRgtCw0YLQsNGL0L0g0LHQvtC70YHQsNC8LCDRgdC+0LfRi9C70LzQsNC70Ysg0L7QsdGB0YLRgNGD0LrRgtC40LLRgtGWINOp0LrQv9C1INCw0YPRgNGD0LvQsNGA0YssINOp0LrQv9C10L3RltKjINC20LXQtNC10Lsg0L7QsdGB0YLRgNGD0LrRgtC40LLRgtGWINCw0YPRgNGD0YssINGC0YPQsCDQsdGW0YLQutC10L0g0L3QtSDQttKv0YDQtdC6INC/0LDQudC00LAg0LHQvtC70pPQsNC9INGC0YvQvdGL0YEg0LDQu9GDINC80q/RiNC10LvQtdGA0ZbQvdGW0qMg0LDRg9GA0LDQu9Cw0YDRiywg0LHRgNC+0L3RhSDQtNC10LzRltC60L/QtdGB0ZYsINC20LXQtNC10Lsg0LHRgNC+0L3RhdC40L7Qu9C40YIsINGN0LzRhNC40LfQtdC80LAsINCx0ZbQtyDSm9C40YvQvSDQtNC10Lwg0YjRi9KT0LDRgNGD0LTRi9KjINGB0LjQvNC/0YLQvtC80LDRgtC40LrQsNC70YvSmyDQutOp0YDRltC90ZbRgdGC0LXRgNGW0L3QtSDRgdC40L/QsNGC0YLQsNC70LDRgtGL0L0g0LDRg9GA0YPQu9Cw0YDQtNGL0qMg0L3QtdCz0ZbQt9Cz0ZYg0YHQtdCx0LXQv9GC0LXRgNGW0L0g0LDQvdGL0pvRgtCw0Lkg0LDQu9Cw0LzRi9C3LiDQvtC70LDRgCDRgtGL0L3Ri9GBINCw0LvRgyDQttC+0LvQtNCw0YDRi9C90YvSoyDQuNC90YTQtdC60YbQuNGP0LvQsNGA0YssICDRgtOZ0YDRgtGW0L/RgtGW0Log0pvQsNC70YvQvywg0Y3QutC+0LvQvtCz0LjRj9C70YvSmyDRhNCw0LrRgtC+0YAsINOp0LrQv9C1INGW0YHRltC60YLQtdGA0ZYsINGC0YvQvdGL0YEg0LDQu9GDINC20q/QudC10YHRltC90LTQtdCz0ZYg0L/QsNGC0L7Qu9C+0LPQuNGP0LvRi9KbINCw0YPRgNGD0LvQsNGALCDRgtGL0L3Ri9GBINCw0LvRgyDQttKv0LnQtdGB0ZbQvdC00LUg0LHTqdCz0LTQtSDQt9Cw0YIsINKb0LDQsdGL0L3RgyDQv9C+0L7RhtC10YHRgdGC0LXRgNGWLiDRltGB0ZbQvdGDINC606nQvyDQvNOp0LvRiNC10YDQtNC1INKb0LDSm9GL0YDRi9KbINCx06nRltC90LXQtNGWLCDQs9GA0LjQv9C/INCy0LjRgNGD0YHRjNCw0YDRiywg0LPQsNC30LTQsNC90LTRi9GA0YMsINCw0LTQtdC90L7QstC40YDRg9GB0YLQsNGALCDRgNC10L3QvtCy0LjRgNGD0YHRgtCw0YAsINCz0LXRgNC/0LXRgSDQstC40YDRg9GB0YssICDQttCw0YLQsNC00YsuINCw0L3QsNGC0L7QvNC40Y/Qu9GL0psg0YTQuNC30LjQvtC70L7Qs9C40Y/Qu9GL0rEg0LXRgNC10LrRiNC10LvRltC60YLQtdGA0ZbQvdC1OiDQsdCw0LvQsNC70LDRgNC00YvSoyDQsdGA0L7QvdGF0YLQsNGAINC80LXQvSDQsdGA0L7QvdGF0LjQvtC70LDQu9Cw0YDQtNGL0ZYg0LTQuNC80LDQtdGC0YDQuNGWINC10YDQtdGB0LXQutGC0LXRgNC80LXQvSDRgdCw0LvRi9GB0YLRi9GA0pPQsNC90LTQsCDTmdC70LTQtdKb0LDQudC00LAg0YLQsNGALCDRgtGW0L/RgtGWINCw0LfQtNCw0pPQsNC9INGW0YHRltC90YMg0L3QtdC80LXRgdC1INGI0YvRgNGL0Ygg0LbQuNC90LDQu9GDINCx0YDQvtC90YXRgtCw0YDQtNGL0qMg0YLQsNGA0YvQu9GD0YvQvdCwINOZ0LrQtdC70LXQtNGWLiDQsdGA0L7QvdGFINKb0LDQsdGL0YDSk9Cw0YHRi9C90YvSoyDQuNC60LXQvNC00ZbQu9GW0LPRli3QsdCw0LvQsNC70LDRgNC00YvSoyDQsdGA0L7QvdGFINKb0LDQsdGL0YDSk9Cw0LvQsNGA0YvQvdGL0qMg0YjQtdC80ZbRgNGI0LXQuiDSm9Kx0YDRi9C70YvQvNGLINGC0L7Qu9GL0psg0pvQsNC70YvQv9GC0LDRgdC/0LDSk9Cw0L0g0LbTmdC90LUgINC20rHQvNGB0LDSmyDQsdC+0LvQsNC00YsuINCx0rHQuyDQsdGA0L7QvdGFINC+0qPQsNC5INCx0ZbRgtC10LvRg9GW0L3QtSDQvdC1INGC0LDRgNGL0LvQsCDRgtKv0YHRg9GW0L3QtSDQttCw0pPQtNCw0Lkg0LbQsNGB0LDQudC00YsuICDQutC10LvQtdGB0ZYg0LHQtdGC0LrQtdC5INGN0L/QuNGC0LXQu9C40Lkg0pvQsNCx0LDRgtGL0L3Ri9KjINC905nQt9GW0LrRgtGW0LPRliDQvtC7INCx0YDQvtC90YXRgtGL0ZYg0ZbRiNC60ZYg0pvQsNCx0LDRgtGL0L0g0pvQsNC/0YLQsNC50YLRi9C9INGN0L/QuNGC0LXQu9C40Lkg0LbQsNGB0YPRiNCw0LvQsNGA0Ysg06nRgtC1INC905nQt9GW0Log0LbTmdC90LUg0pvQsNCx0YvQvdGD0pPQsCDQsdC10LnSo9C8INCx0L7Qu9Cw0YvQvyDQutC10LvQtdC00ZYuINCy0LjRgNGD0YHRgtGL0rEg0L3QtSDQsdCw0LrRgtC10YDQuNGP0LvRi9KbINC40L3RhNC10LrRhtC40Y8g0LrQtdC30ZbQvdC00LUg0LHSsdC7INKb0LDQsdCw0YIg0L7So9Cw0Lkg0LfQsNKb0YvQvNC00LDQu9Cw0YLRi9C9INCx0L7Qu9GL0L8g0LrQtdC70LXQtNGWLCDRltGB0ZbQvdC10LTRli4g0L7RgdGL0pPQsNC9INCx0LDQudC70LDQvdGL0YHRgiDRiNGL0YjRi9GA0YjRgtGLINCx06nQu9GW0L3Rg9GW0L0g0LDRgNGC0YLRi9GA0LDRgNGC0YvQvSDQsdC+0LvRi9C/INC60LXQu9C10LTRli4g0YjRi9GA0YvRiCDQsdC10LfQtNC10YDRltC90ZbSoyDQutOp0L/RgtGW0LPRliDQtNC1INCx0YDQvtC90YXRgtCw0YDQtNGL0qMg0L7QsdGB0YLRgNGD0LrRhtC40Y/RgdGL0L3QsCDTmdC60LXQu9C10YLRltC9INCx0L7Qu9GL0L8g0LrQtdC70LXQtNGWLiDQsdGW0YDQsNKxINC+0L3Ri9KjINGI0YvSk9GD0YvQvSDSm9Cw0LzRgtCw0LzQsNGB0YvQtyDQtdGC0LXRgtGW0L0g0LrRltGA0ZbQv9C60YjQtdC70ZYg0Y3Qv9C40YLQtdC70LjQuSDTmdC70YHRltC3INCx0L7QsNGL0L8g0LrQtdC70LXQtNGWLiDQsdKx0Lsg0YjRi9GA0YvRiNGC0YvSoyDQttC40L3QsNC70YPRi9C90LAg05nQutC10LvQtdGC0ZbQvSDQsdC+0LvQsNC00YsuINGC0YvQvdGL0YEg0LDQu9GDINCx0rHQu9GI0YvSm9C10YLRgtC10YDRltC9INOZ0LvRgdGW0LfQtNGW0LPRliDQtNC1INC+0LHRgdGC0YDRg9C60YbQuNGPLtCwINGB0LDQsdCw0LXQvyDQsdC+0LvQsNC00YsuINGC0L7Qu9GL0psg0LTQsNC80YvSk9Cw0L0g0LHQvtC70LDQtNGLLiDQsdKx0Lsg0pvQsNKb0YvRgNGL0pvRgiDRi9GC0LjRltC80LTRliDRgtKv0YDQtNC1INGB0YvRgNKb0LAg0YLSu9GI0YvSk9Cw0YDQsCDQsNC70LzQsNGD0YvQvdCwINOZ0LrQtdC70LXQtNGWLiDQuNC80LzRg9C90LjRgtC10YIg05nQu9GB0ZbQt9C00ZbQs9GWINC00LUg0LHQsNC70LDQu9Cw0YDQtNCwINC40LzQvNGD0L3QtNGL0psg0LbSr9C50LUg0YLQvtC70YvSmyDQttC10YLRltC70LzQtdCz0LXQvdC00ZbQutGC0LXQvSDQuNC90YTQtdC60YbQuNGP0pPQsCDSm9Cw0YDRgdGLINGC0rHRgNGDINKb0LDQsdGW0LvQtdGC0ZYg0YLTqdC80LXQvSwg0LHSsdC7INKb0LDQsdGL0L3RgyDRgNC10LDQutGG0LjRj9GB0YvQvdCwINC60q/RiNC10LnRgtC10LTRli4g0LbTmdC90LUg0LHRgNC+0L3RhdGC0LDRgCDRltGB0ZbQvdGD0ZbQvSDQsNGA0YLRgtGL0YDQsNGC0YvQvSDQsdC+0LvRi9C/INC60LXQu9C10LTRli4g0L7QsdGB0YLRg9C60YbQuNGP0pPQsCDRi9Kb0L/QsNC7INC10YLQtdGC0ZbQvSDQvdC10LPRltC30LPRliDRhNCw0LrRgtC+0YDQu9Cw0YA6INCx0YDQvtC90YUg0pvQsNCx0YvRgNKT0LDRgdGL0L3Ri9KjINGW0YHRltC90YPRliAsINGB0YvRgNGC0pvRiyDSm9Cw0LHRi9KbINKb0LDQsdGL0L3Rg9GL0pMg0YjRi9GI0YvRgNGI0YLRi9GWINCw0YDRgtGL0psg0LHTqdC70ZbQvdGD0ZYg0LbTmdC90LUg0L7QvdGL0qMg0YjRi9KT0LDRgNGL0LvRg9GL0ZbQvdGW0qMg0pvQuNGL0L3QtNGL0pPRiywg0LHRgNC+0L3RhdC+0YHQv9Cw0LfQvC4g0LbSsdC80YHQsNKbINGI0LXQvNGW0YDRiNC10Log0LbTmdC90LUg0YLQsNGAINCx0YDQvtC90YXRgtCw0YAg05nRgdGW0YDQtdGB0LUg0LXRgNGC0LUg0LbQsNGB0YLQsNKT0Ysg0LHQsNC70LDQu9Cw0YDQtNCwLiAg0LHRgNC+0L3QvdGF0YLQsNGA0LTRi9KjINC00LjQsNC80LXRgtGA0ZYg0LbQsNGBINCx0L7QudGL0L3RiNCwINC10YDQtdC60YjQtdC70ZbQutGC0LXRgNGWOiAg0LbQsNKj0LAg0YLRg9KT0LDQvSDQvdOZ0YDQtdGB0YLQtdC70LXRgNC00LUtNC010LzQvCwgMS0yINC20LDRgdGC0LDSk9GLINCx0LDQu9Cw0LvQsNGA0LTQsCAtNS02INC80LwsIDQtOCDQttCw0YHRgtCw0pPRiyAtNi040LzQvCDSm9Kx0YDQsNC50YLRi9C9INCx0L7Qu9GL0L8g0LrQtdC70LXQtNGWLiDQsNC7INC10YDQtdGB0LXQutGC0LXRgNC00LUgMTAtMTXQvNC8INKb0rHRgNCw0LnQtNGLLiDRgdC+0L3Ri9C80LXQvSDQsdCw0LvQsNGA0LvQsNGA0LTQsCDRgtGL0L3Ri9GBINCw0LvRgyDQttC+0LvQtNCw0YDRi9C90YvSoyDQvtCx0YHRgtGA0YPQutGG0LjRj9GB0Ysg0LbQuNGWINC60LXQt9C10LTQtdGB0LXQtNGWLjxiciAvPg0KMiDRgdKx0YDQsNKbLiDQsdCw0LvQsNC70LDRgNC00YvSoyDSm9Cw0L3Sm9CwINC20q/QudC10YHRliDTqdGB0YMgINC205nQvdC1INC00LDQvNGDINC60LXQt9C10qPQtNC10YDRltC90LTQtSDQsNC50YLQsNGA0LvRi9Kb0YLQsNC5INOp0LfQs9C10YDRltGB0LrQtSDSsdGI0YvRgNCw0LnQtNGLLiDQsdCw0LvQsNC70LDRgNC00YvSoyDSm9Cw0qPSm9CwINC00LDQvNGD0YvQvdGL0qMg0LrQtdCx0LnRltGAINC10YDQtdC60YguINGB0q/QudC10Log0YLRltC90ZYg0YLRltC60LXQu9C10Lkg0LzQtdC30LXQvdGF0LjQvNCw0LTQsNC9INC20LDRgNKT0LDSm9GC0Ysg0L7RgdGC0LXQvtC10LPQtdC90LXQtyDQvdC1INGI0LXQvNGW0YDRiNC10Log0LzQvtC00LXQu9GWINC90LXQs9GW0LfRltC90LTQtSDQtNCw0LzQuNC00YsuINGB0q/QudC10Log0LbSr9C50LXRgdGW0L3RltKjINC90LXQs9GW0LfQs9GWINGB0LDRgNCw0L/RgtCw0LvRg9GLINC20q/QutGC0ZbQu9GW0LrRgtGW0qMgNC04INCw0L/RgtCw0YHRi9C90LTQsCDQttKv0YDQtdC00ZYuICDRgdKv0LnQtdC6INGC0ZbQvdGWINCw0LTQsNC8INKb0LDQvdKT0LAg0L3QtdCz0ZbQt9GW0L0g0pvSsdGA0LDQudGC0YvQvSDQtNOZ0L3RltC60LXRgNC1INGC0ZbQvdC90ZbSoyDQsdGW0YAg0YLSr9GA0ZYuINCx0LDQu9CwINGB0q/QudC10LPRltC90ZbSoyDQsNC90LDRgtC+0Lwt0YTQuNC30LjQvtC70L7Qs9C40Y/Qu9GL0psg0LXRgNC10LrRiNC10LvRltC60YLQtdGA0ZYsINCx0LDQu9Cw0LvQsNGA0LTRi9KjINGB0q/QudC10Log0YLRltC90ZbQvdC00LUg0LrTqdC/INC+0YDQs9Cw0L3QuNC60LDQu9GL0psg0LfQsNGC0YLQsNGA0LzQtdC9INC205nQvdC1INCw0Lcg0LzTqdC70YjQtdGA0LTQtSDQvNC40L3QtdGA0LDQu9C00Ysg0LfQsNGC0YLQsNGAINKb0rHRgNCw0LnQtNGLLiDQvtGB0YvSk9Cw0L0g0LHQsNC50LvQsNC90YvRgdGC0Ysg0LHQsNC70LDQu9Cw0YAg0YHSr9C50LXQs9GWINC40ZbQu9Cz0ZbRiCwg0LrTqdC/INGB0YvQvdCx0LDQudC00YsuINC00LDQvNGD0Ysg0LXRgNC10LrRiNC10LvRltC60YLQtdGA0ZbQvdC1IDogMSDQutC10LfQtdKjINGW0YjRgtC10LPRliDQtNCw0LzRgyDQutC10LfQtdKj0ZYgOiDRiNC10LzRltGA0YjQtdC60YLQtdC9INCx0LDRgdGC0LDQu9GDINC205nQvdC1INGB0q/QudC10LrRgtC10L3RgyDQsdCw0YHRgtCw0LvRg9GLLiDRiNC10LzRltGA0YjQtdC60YLQtdC9INCx0LDRgdGC0LDQu9GDINC00LXQs9C10L0g0LHQsNC70LAg0YHSr9C50LXQutGC0LXRgNGWINKx0YDRi9Kb0YLRi9KbINC60LXQt9C10qPQtNC1INC90LXQs9GW0LfRltC90LXQvSDRiNC10LzRltGA0YjQtdC60YLQtdC9INGC0rHRgNCw0YLRi9C90YvQvSDQsdGW0LvQtdC80ZbQtywg0L7QuyDQuNC60LXQvNC00ZbQu9GW0Log0LHQvtGB0LDQvdGDINC60LXQt9GW0L3QtNC1INC20LDRgNCw0pvQsNGC0YLRiyDQsNC30LDQudGC0LDQtNGLLCDRgdKv0LnQtdC60YLQtdC90YMg0LHQsNGB0YLQsNC70YPRiyDRgdKv0LnQtdC60YLQtdC90YMg0L/RgNC+0YbQtdGB0YHRliDQttKv0LrRgtGW0LvRltC60YLRltKjIDYtOCDQsNC/0YLQsNGB0YvQvdC00LAg0LHQsNGB0YLQsNC70LDQtNGLLiDSsdGA0YvSm9GC0LAg0LDQu9C00YvQvNC10L0g0LHQsNGBINGB0q/QudC10Log0L/QtdC9INKx0LfRi9C9INGB0q/QudC10LrRgtC10YDRltC9INC+0YDRgtCw0LvRi9KbINCx06nQu9GW0LrRgtC10YDRltC90LTQtSDQtNC40LDRhNC40Lcg0YHSr9C50LXQutGC0LXQvdGDINC60pvRgNGW0L3RltGB0YLQtdGA0ZYg0L/QsNC50LTQsCDQsdC+0LvQsNC00YsuIDIg0LrQtdC30LXSoy0g0L3TmdGA0LXRgdGC0LXQu9GW0Log0LrQtdC30LXSoyAwLTEg0LbQsNGBINCw0YDQsNC70YvSk9GL0L3QtNCwINCx0LDRgSDRgdKv0LnQtdC60YLQtdGA0ZbQvdGW0qMg0LXSo9Cx0LXQutGC0LXRgNGWIDsg0L3TmdGA0LXRgdGC0LXQu9C10YDQtNGW0qMg0LHQsNGBINGB0q/QudC10LrRgtC10YDRliDQsNGA0LDRgdGL0L3QtNCwINC20q/QvNGB0LDSmyDQsNC50LzQsNKb0YLQsNGAINC10qPQsdC10LrRgtC10YAg0LHQvtC70LDRgtGL0L3Ri9C9INCx0ZbQu9C10LzRltC3INCw0LvQtNGL0qPSk9GLINC10qPQsdC10LPRliDRiNCw0LzQsNC80LXQvSAxMi0xOCDQsNC50LTQsCDQttCw0LHRi9C70LDQtNGLLiDQvtC7INCx0LDRgSDQvNC40YvQvSDTqdGB0YPRltC9INKb0LDQvNGC0LDQvNCw0YHRi9C3INC10YLQtdC00ZYuINC10YDQtSDQsdCw0LvQsNC70YvSmyDRiNCw0psg0LrQtdC30LXSo9GWIDEtMyDQttCw0YEg0LDRgNCw0LvRi9KT0Ysg0L7QuyDQutC10LfQtNC1INGB0q/QudC10LrRgtC10L3RgyDQv9GA0L7RhtC10YHRgdGW0L3RltKjINC20LDQu9KT0LDRgdGLINCx0L7Qu9Cw0LTRiywg0LHQsNGBINGB0q/QudC10Log0YLRltCz0ZbRgdGC0LXRgNGW0L3RltKjINGC0L7Qu9GL0psg0LbQsNCx0YvQu9C80LDRg9GLLiA0INC60LXQt9C10qMgMy03INC20LDRgSDQsNGA0LDQu9GL0pPRi9C90LTQsCDRgdKv0LnQtdC60YLQtdGA0LTRltKjINC90YvSk9Cw0Y7RiyDQttKv0YDQtdC00ZYsINC+0LzRi9GA0YLSm9GLINC90YvSk9Cw0Y7Riywg0pvQuNC80YvQuyDSm9C+0LfSk9Cw0LvRi9GBINCx0LXRgdC70LXQvdC00ZYg0LTQsNC80YPRiy4gNSDQutC10LfQtdKjINC80LXQutGC0LXQvyDQttCw0YHRiyA3LTEyINC20LDRgS0g0YLSr9GBINGC0ZbRgdGC0LXRgNGW0LTRltKjINGC0rHRgNCw0pvRgtGLINGC0ZbRgdGC0LXRgNCz0LUg0LDRg9GL0YHRg9GLINC20q/RgNC10LTRli02LTcg0LbQsNGB0YLQsNC9INCx0LDRgdGC0LDQvyDRgtKx0YDQsNKx0YLRiyDRgtGW0YEg0YjRi9KT0LAg0LHQsNGB0YLQsNC50LTRiywg0L7QuyDQv9GA0L7RhtC10YHRgSAxMC0xMiDQttCw0YHRgtCwINCw0Y/Sm9GC0LDQu9Cw0LTRiy4gLCDQttGL0L3Ri9GB0YLRi9KbINC20LXRgtGW0LvRg9Cz0LUg0LTQsNC50YvQvdC00YvSmy0g0YHSr9C50LXQuiDQvNC40L3QtdGA0LDQu9C00LDQvdGD0Ysg0LDRgNGC0LDRgtGL0L0g0LHQvtC70YvQvyDQutC10LvQtdC00ZYsINCx0ZbRgNCw0psg06nRgdGWINC/0YDQvtGG0LXRgdGB0ZYg0YLQvtC70YvSmyDQsNGP0pvRgtCw0LvQvNCw0LnQtNGLLiDQsdKx0Lsg0LrQtdC30LXSo9C00LUg0YHSr9C50LXQutGC0LXRgNC00ZbSoyDSsdC30YvQvdC00YvSk9GLINC80LXQvSDSm9Cw0LvRi9Kj0LTRi9KT0Ysg0LDRgNGC0LDQtNGLLCDSsdC30YvQvSDRgdKv0LnQtdC60YLQtdGA0LTQtdCz0ZYg06nRgdGDINC/0LDQu9Cw0YHRgtC40L3QutCw0LvQsNGA0Ysg0LHQtdGB0LXQvdC00ZYg0LbSsdC80YvRgSDRltGB0YLQtdC00ZYuIDYg0LrQtdC30LXSoyDQttCw0YEt0YHQv9GW0YDRltC80LTRltC6INC60LXQt9C10qMgIDEyLTE4INC20LDRgS0g0L7QuyDQutC10LfQtNC1INGB0q/QudC10LrRgtC10L3Rg9C00ZbSoyDQsNGP0pvRgtCw0LvRg9GLINC20q/RgNC10LTRli4g0Y3Qv9C40YTQuNC30LDRgNC70YvSmyDQv9C70LDQvdGB0YLQuNC90LDQu9Cw0YAg0LHRltGA0YLRltC90LTQtdC/INGB0q/QudC10LrRgtC10L3QtdC00ZYsINCx0rHQuyDRgdKv0LnQtdGD0LrRgtC10YDQtNGW0qMg0rHQt9GL0L3QtNGL0pvSm9CwINOp0YHRg9GW0L0g0YLQvtKb0YLQsNGC0LDQtNGLLiDQsdKx0Lsg0L/RgNC+0YbQtdGB0YEg0pvRi9C30LTQsNGA0LTQsCAxNi0xOCDQttCw0YHRgtCwLCDQsNC7INKx0LvQtNCw0YDQtNCwIDE4LTIwINC20LDRgdKb0LAg0LTQtdC50ZbQvSDQttCw0LvSk9Cw0YHQsNC00YsuINGB0L7QvdGL0LzQtdC9INCx0LDQu9Cw0LvQsNGA0LTRi9KjINGB0q/QudC10Log0LTQsNC80YPRiyDQttKv0LrRgtGW0LvRltC60YLRltKjIDQtOCDQsNC/0YLQsNGB0YvQvdC20LAg0LbSr9GA0LXQtNGWLiDQvtC70LDRgCDRiNC10LzRltGA0LXQutGI0YLRliDQttOZ0L3QtSDRgdKv0LnQtdC60YLRltC6INC00LXQvyDQsdOp0LvRltC90ZbQvywg0LTQsNC80LjRgtGL0L0g0LHQvtC70LDQtNGLL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30" table:style-name="ce1">
            <text:p>1066830</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0JbQsNC70L/RiyDQsdCw0LvQsNC70LDRgNC00LAg0LHRgNC+0L3RhdGC0LDRgNC00YvQvSDSm9Cw0LHRi9C90YPRiyDQttC40ZYg0LHQsNC50pvQsNC70LDQtNGLLCDTmdGB0ZbRgNC10YHQtSDQtdGA0YLQtSDQttCw0YHRgtCw0YDQtNCwLiDQntC7INC+0L3Ri9KjINC00rHRgNGL0YEg0LTQtdC8INCw0LvQvNCw0YPRi9C80LXQvSDQvdC10LzQtdGB0LUg0LXRgNGC0LUg0LrQtdC30LTQtSDSm9Cw0LHRi9C90YMg0L/RgNC+0YbQtdGB0YHRgtC10YDQtNGW0qMg0LXRgNGC0LUg0LHQsNGB0YLQsNC70YvQvyDQutC10YLRg9GW0LzQtdC9INCx0LDQudC70LDQvdGL0YHRgtGLINCx0L7Qu9Cw0LTRiy4g0Y/Sk9C90Lgg0LHRgNC+0L3RhdGC0LDRgNC00YvSoyDRgtCw0YDRi9C70YPRiyDQttKv0YDQtdC00ZYuICDQkdCw0LvQsNC70LDRgNC00LAg0LHRgNC+0L3RhdGC0LDRgNC00YvSoyDQtdGA0LXRgdC10Log0LDQtNCw0LzQtNCw0YDQtNCw0L0g0LDQudGL0YDQvNCw0YjRi9C70YvSk9GLINCx0LDRgC4g0L7QvdGL0qMg0LbQsNC70L/RiyDSsdC30YvQvdC00YvSk9GL0L3QsCDQsdCw0LnQu9Cw0L3Ri9GB0YLRiywg0LrTqdC70LXQvNGW0L3QtSDQsdCw0LnQu9Cw0L3Ri9GB0YLRiyDQsdC+0LvRi9C/INC60LXQu9C10LTRli4g0LHQsNC70LDQu9Cw0YDQtNCwINCx0YDQvtC90YXRgtCw0YDQtNGL0qMg0LTQuNCw0LzQtdGC0YDRliDQtdGA0LXRgdC10LrRgtC10YDQs9C1INKb0LDRgNCw0pPQsNC90LTQsCDRgtCw0YAg0LHQvtC70YvQvyDQutC10LvQtdC00ZYsINGB0L7QvdC00YvSm9GC0LDQvdC00LAg0YjRi9GA0YvRiNGC0YvSoyDQttC40L3QsNC70YPRiyDQsdGA0L7QvdGF0YLQsNGA0LTRi9KjINGW0YHRltC90YPRltC90LUg0LDQu9GL0L8g0LrQtdC70LXQtNGWLiDQsdCw0LvQsNC70LDRgNC00LAg0YjRi9GA0YvRiNGC0Ysg0pvQsNCx0LDRgtGC0YvQvSDSm9Cw0L3QvNC10L0g0pvQsNC80YLQsNC80LDRgdGL0Lcg0LXRgtGW0LvRg9GWINC20L7Sk9Cw0YDRiy4g0YHQvtC90LTRi9Kb0YLQsNC9INKb0LDQsdGL0L3RgyDQv9GA0L7RhtC10YHRgdGWINGC0LXQtyDQttKv0YDRg9GWINC80q/QvNC60ZbQvS4gINCx0LDQu9Cw0LvQsNGA0LTRi9KjINCx0YDQvtC90YUg0pvQsNCx0YvRgNKT0LDRgdGLINC205nQvdC1INGI0LXQvNGW0YDRiNC10LrRgtC10YDRliDTmdC70ZbQtyDQttOZ0L3QtSDRgdC10YDQv9GW0LzQtNGW0LvRltCz0ZYg0YLTqdC80LXQvSwg0LHSsdC7INKb0LDQsdGL0L3RgyDQutC10LfRltC90LTQtSDQvtCx0YHRgtGA0YPQutGG0LjRj9C90YvSoyDQttC10qPRltC7INC00LDQvNGD0YvQvdCwINC606nQvNC10Log0LHQtdGA0LXQtNGWLiDRgtGL0L3Ri9GBINCw0LvRgyDQsdKx0LvRiNGL0pvQtdGC0YLQtdGA0ZYg0LTQtSDTmdC70YHRltC3INCx0L7Qu9Cw0LTRiywg0LHSsdC7INC00LAg0YLRi9C90YvRgSDQttC10YLQutGW0LvRltC60YHRltC30LTRltCz0ZbQvdC1INCw0LvRi9C/INC60LXQu9GD0ZYg0LzSr9C80LrRltC9LiDRgdC+0L3Ri9C80LXQvSDSm9Cw0YLQsNGAINCx0LDQu9Cw0LvQsNGA0LTRi9KjINCx0YDQvtC90YXRgtCw0YDRi9C90LTQsCDRiNGL0YDRi9GI0YLRiyDQsdC10LfQtNC10YAg0LbQsNKb0YHRiyDQttCw0LzRi9KT0LDQvSwg0LHRltGA0LDSmyDRiNGL0YDRi9GI0YLRiyDRiNGL0pPQsNGA0LDRgtGL0L0g0LzQtdGF0LDQvdC40LfQvNC00LXRgCDTmdC70ZYg0YLQvtC70YvSmyDQttC10YLRltC70LzQtdCz0LXQvSDQsdC+0LvRi9C/INC60LXQu9C10LTRli4g0LHSsdC7INGI0YvRgNGL0YjRgtGL0L0g0LbQuNC90LDQu9GL0L8g0LHRgNC+0L3RhSDRgdCw0qPRi9C70LDRg9GL0L0g0LbQsNGD0YvQvywg0L7QvdGL0qMg0YLQsNGA0YvQu9GD0YvQvdCwINCw0LvRi9C/INC60LXQu9C10LTRli4g0LHRgNC+0L3RhSDQvtCx0YHRgtGA0YPQutGG0LjRj9GB0Ysg0LrQtdC30ZbQvdC00LUg06nQutC/0LXQtNC1INCw0YPQsCDRgtKx0YDRi9C/INKb0LDQu9Cw0LTRiywg06nQutC/0LUg0Y3QvNGE0LjQt9C10LzQsNGB0YvQvdCwINC205nQvdC1INGC0YvQvdGL0YEg0LbQtdGC0ZbRgdC/0LXRg9GI0ZbQu9GW0LPRltC90LUg0LDQu9GL0L8g0LrQtdC70YPRliDQvNKv0LzQutGW0L0uINCx0LDQu9Cw0LvQsNGA0LTQsCDSm9Cw0LHRi9C90YMg0L7QuyDQttC40ZYg0L7RgdGLINGI0YvRgNGL0YjRgtGLINKb0LDQsdCw0YLRgtCw0YDQtNGL0qMg0LfQsNKb0YvQvNC00LDQu9GD0Ysg0LrQtdC30ZbQvdC00LUg0LHQsNC50pvQsNC70LDQtNGLLiDSm9Cw0LHRi9C90YMg0L7QuyDRgtGW0L/RgtGWINKb0LDQvdC00LDQudC00LAg0LHRltGAINC40L3RhNC10LrRhtC40Y8sINCx0LDQutGC0LXRgNC40Y8g05nRgdC10YDRltC90LXQvSDQsdC+0LvRg9GLINC00LAg0LzSr9C80LrRltC9LCDRiNGL0YDRi9GI0YLRiyDSm9Cw0LHQsNGC0YLQsNGA0YvQvdCwINC20LjQvdCw0LvRi9C/INKb0LDQsdGL0L3RgyDQv9GA0L7RhtC10YHRgSDRgtGD0pPRi9C30YPRiyDQvNKv0LzQutGW0L0sINC+0YHRi9KT0LDQvSDQsdCw0LnQu9Cw0L3Ri9GB0YLRiyDQsdCw0LvQsNC70LDRgNC00LAg0LTQtdC80L3RltKjINCw0LvRg9GLINC90LXQvNC10YHQtSDRiNGL0pPQsNGA0YvQu9GD0Ysg0pvQuNGL0L3QtNCw0LnQtNGLLiDRj9KT0L3QuCDSm9Cw0LHRi9C90YMg0L/RgNC+0YbQtdGB0YEg0ZbRgdGW0L3RgyDRgtGD0pPRi9C30LTRi9GA0YvQvyDQtdC90YLRltGD0LPQtSwg05nRgdGW0YDQtdGB0LUg0Y3QutGB0L/QuNGA0LDRgtC+0YDQu9GL0psg0LXQvdGC0ZbQs9GD0LPQtSDQsNC70YvQvyDQutC10LvQtdC00ZYuIDIgLSDQsdCw0LvQsNC70LDRgNC00YvSoyDRgdKv0LnQtdC6INC20q/QudC10YHRltC90ZbSoyDQtNCw0LzRgyDQtdGA0LXQutGI0LXQu9GW0LrRgtC10YDRliDQsdCw0LvQsCDQutC10LfRltC90LXQvSDSr9C70LrQtdC9INGA06nQuyDQsNGC0pvQsNGA0LDQtNGLLiDQvtC70LDRgCDSr9C30LTRltC60YHRltC3INOp0YHRltC/INC20LDRgtC60LDQvdC90LDQvSDQvtC70LDRgNC00YvSoyDSm9Kx0YDRi9C70YvQvNGLINC80LXQvSDSm9GL0LfQvNC10YLRliDQtdGA0LXRgdC10Log0LDQtNCw0LzQtNCw0YDSk9CwINKb0LDRgNCw0pPQsNC90LTQsCDQtdGA0LXQutGI0LXQu9C10L3QtdC00ZYuICDQntC70LDRgNC00YvQvSDQtNCw0LzRg9GLINC20q/QutGC0ZbQu9GW0LrRgtGW0L0gNC04INCw0L/RgtCw0LvQsNGA0YvQvdC00LAg0LbSr9GA0LUg0LHQsNGB0YLQsNC50LTRiy4g0L7QuyDQvNC10LfQtdC90YXQuNC80LDQtNCw0L0g0LTQsNC80YvQvyDQvtGB0YLQtdC+0LPQtdC90LXQt9C00LUg0YHSr9C50LXQutGC0ZbQvSDRiNC10LzRltGA0YjQtdC60YLRliDQvNC+0LTQtdC70ZYg0YDQtdGC0ZbQvdC00LUg0pvQsNC70YvQv9GC0LDRgdGL0L8g0LrQtdC50ZbQvSDRgdKv0LnQtdC60YLQtdC90YMg0L/RgNC+0YbQtdGB0YHRliDQttKv0YDQtdC00ZYuINC+0YHRi9KT0LDQvSDQsdCw0LnQu9Cw0L3Ri9GB0YLRiyDQsdCw0LvQsNC70LDRgNC00LAg0LrTqdCx0ZbQvdC1INGB0q/QudC10Log0YjQtdC80ZbRgNGI0LXQuiDRgtGW0L3RltC90LXQvSDQutOp0LHRltGA0LXQuiDRgtKx0YDQsNC00Ysg0LXQutC10L0uINGB0q/QudC10LrRgtC10L3RgyDQv9GA0L7RhtC10YHRgdGWINC90LXQs9GW0LfRg9C90LXQvSDRgtGD0pPQsNC90L3QsNC9INC60LXQudGW0L3QtNC1INC20LDQu9KT0LDRgdCwINCx0LXRgNC10LTRli4g0LHRltGA0ZbQvdGI0ZbQtNC10L0g0rHQt9GL0L0g0YHSr9C50LXQutGC0LXRgNC00ZbSoyDRjdC/0LjRhNC40LfRliwg0YHQvtC00LDQvSDQutC10LnRltC9INC00LjQsNGE0LjQt9C00LXRgNGWINGB0q/QudC10LrRgtC10L3QtdC00ZYuINGB0L7QvdC00YvSm9GC0LDQvSDQsdCw0LvQsNC70LDRgNC00YvQvSDRgdKv0LnQtdC60YLQtdGA0ZYg0YHQtdGA0L/RltC80LTRliwg0LbSsdC80YHQsNKbINCx0L7Qu9GL0L8g0LrQtdC70LXQtNGWLiDRgdC+0L3Ri9C80LXQvSDSm9Cw0YLQsNGAINCx0LDQu9Cw0LvQsNGA0LTQsCDQtdGA0LXRgdC10LrRgtC10YDQs9C1INKb0LDRgNCw0pPQsNC90LTQsCDQvNC40L3QtdGA0LDQu9C00Ysg0LfQsNGC0YLQsNGAINCw0Lcg0LHQvtC70YvQvyDQutC10LvQtdC00ZYsINCw0Lsg0L7RgNCz0LDQvdC40LrQsNC70YvSmyDQt9Cw0YLRgtCw0YAg0LzQtdC9INGB0YPQu9Cw0YAg0LrQtdGA0ZbRgdGW0L3RiNC1INC606nQvyDQsdC+0LvRi9C/INC60LXQu9C10LTRli4g0LDQuyDRgdC10YDQv9GW0LzQtNGW0LvRltCz0ZbQvdGW0qMg0LbQvtKT0LDRgNGLINCx0L7Qu9GD0Ysg0L7QuyDRgtCw0LvRiNGL0pvRgtGLINKb0rHRgNGL0LvRi9C80Ysg0LzQtdC9INGF0LjQvNC40Y/Qu9GL0psg0pvSsdGA0YvQu9GL0LzQvdGL0L0g0LDRgNKb0LDRgdGL0L3QtNCwINCx0L7Qu9GL0L8g0YLQsNCx0YvQu9Cw0LTRiy4gINCx0LDQu9Cw0LvQsNGA0LTRi9C9INGB0q/QudC10Log0pvQsNCx0Ysg0YHQvtC90YvQvNC10L0g0pvQsNGC0LDRgCDQtdGA0LXRgdC10LrRgtC10YDQs9C1INKb0LDRgNCw0pPQsNC90LTQsCDSm9Cw0LvRi9KjINCx0L7Qu9GL0L8g0LrQtdC70LXQtNGWINC205nQvdC1INC+0L3Ri9KjINKb0YvQt9C80LXRgtGWINC20L7Sk9Cw0YDRiyDQsdC+0LvRi9C/INC60LXQu9C10LTRli4g0pvSsdGA0YHQsNKb0ZbRiNGW0LvRltC6INC60LXQt9C10L3QtNC1INC205nQvdC1INC20LDSo9CwINGC0YPSk9Cw0L0g0L3TmdGA0LXRgdGC0LXQtNC1INCx0LDRgNC70YvSmyDRgdKv0LnQtdC60YLQtdGAINKb0YvQt9GL0Lsg0LrQtdC80ZbQutC/0LXQvSDRgtC+0LvRgtGL0YDRi9C70pPQsNC9INCx0L7Qu9GL0L8g0LrQtdC70LXQtNGWLCDSm9Kx0YDQsNC80YvQvdC00LAg0LrTqdC/INC20LDRgdGD0YjQsNC70LDRgCDQvNC10L0g0LvQuNC80YTQvtC40LTRgtGLINGN0LvQtdC80LXQvdGC0YLQtdGAINCx0L7Qu9Cw0LTRiy4g0L7Qu9Cw0YAg0pvQsNC9INGC0q/Qt9GDINC205nQvdC1INKb0L7RgNKT0LDQvdGL0YEg0pvRi9C30LzQtdGCINCw0YLSm9Cw0YDQsNC00YsuINC80LXQutGC0LXQvyDQttCw0YHRi9C90LAg0LTQtdC50ZbQvSDRgdKv0LnQtdC60YLQtdGAINGC0LXQtyDTqdGB0LXQtNGWLCDTmdGB0ZbRgNC10YHQtSDQvtC80YvRgNGC0pvQsCDQvNC1LNC9INCw0Y/Smy3Sm9C+0Lsg0YHSr9C50LXQutGC0LXRgNGWLiDQttCw0qPQsCDRgtGD0pPQsNC9INC905nRgNC10YHRgtC10LvQtdGA0LTQtSDQsdCw0YDQu9GL0psg0YHSr9C50LXQutGC0LXRgNC00ZbSoyDSm9Kx0YDQsNC80YvQvdC00LAg0LDQudGC0YvQvyDQutC10YLQutC10L3QtNC10Lkg0pvRi9C30YvQuyDQvNCw0Lkg0LHQvtC70LDQtNGLLCDQutC10LnRltC9INC+0Lsg0LbQsNGB0YvQuyDQvdC10LzQtdGB0LUg0YHQsNGA0pPRi9GIINGC0q/RgdC60LUg0LDQudC90LDQu9Cw0LTRiy4g0prQvtGA0YvRgtCwINC60LXQu9C1INCx0LDQu9Cw0LvQsNGA0LTRi9C9INGC0YvQvdGL0YEg0LbQvtC70LTQsNGA0Ysg0YLQsNGALCDRiNGL0YDRi9GI0YLRiyDSm9Cw0LHQsNGC0Ysg0L3TmdC30ZbQuiDQttOZ0L3QtSDRgtC10Lcg0ZbRgdGW0L3QtdGC0ZbQvSDQsdC+0LvSk9Cw0L3QtNGL0pvRgtCw0L0sINCx0YDQvtC90YXQuNGCINC60LXQt9GW0L3QtNC1INC+0LHRgdGC0YDRg9C60YbQuNGP0pPQsCDQsdC10LnRltC8INCx0L7Qu9Cw0LTRiy4g0LDQuyDRgdKv0LnQtdC6INC20q/QudC10YHRliDRgdC10YDQv9GW0LzQtNGWLCDQvNC40L3QtdGA0LDQu9C00LDQvdGD0Ysg0YLQvtC70YvSmyDQtdC80LXRgSwg0YHQvtC90LTRi9Kb0YLQsNC9INC+0Lsg0LTQsNC80YPQtNGL0qMg0LHQtdC70YHQtdC90LTRliDQutC10LfQtdC90ZbQvdC00LUg0LHQvtC70LDQtNGLLiA=</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1-сұрақ экспираторлы одышканын клиникалық көрінісі, себебі нақтыланбаған, жалпы жазылған.</text:p>
          </table:table-cell>
          <table:table-cell office:value-type="float" office:value="0" table:style-name="ce1">
            <text:p>0</text:p>
          </table:table-cell>
          <table:table-cell table:number-columns-repeated="16376"/>
        </table:table-row>
        <table:table-row table:style-name="ro1">
          <table:table-cell office:value-type="float" office:value="1066858" table:style-name="ce1">
            <text:p>1066858</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DRgdGD0YDQsNC6LiDQkdCw0LvQsNC70LDRgNC00LAg0LHRgNC+0L3RhdGC0YvSoyDSm9Cw0LHRi9C90YPRiyDRgtGL0L3Ri9GBINCw0LvRgyDQttC+0LvQtNCw0YDRi9C90YvSoyDRgtCw0YDRi9C70YvQu9GD0YvQvdCwINCw0LvRi9C/INC60LXQu9Cz0LXQvSDQsdC+0LvRg9GLINC80q/QvNC60ZbQvS4g0LHRg9C7INC00LXQvCDRiNGL0pPQsNGA0YMg0LrQtdC30ZbQvdC00LUg0LDRg9CwINCw0pPRi9C90YvQvdCwINKb0LDRgNGB0YvQu9GL0pvRgtGL0qMg0LbQvtKT0LDRgNC70LDRg9GL0L3QsCDQsdCw0LnQu9Cw0L3Ri9GB0YLRiyDRjdC60YHQv9C40YDQsNGC0L7RgNC70YvQuiDQtdC90YLRi9Cz0YPQtNGLINGC0YPQtNGL0YDRi9C/INC20LDRgtGL0YAuINCR0YDQvtC90YXRgtGL0qMg0YjRi9GA0YvRiNGC0Ysg0pvQsNCx0YvSk9GL0L3Ri9KjINGW0YHRltC90YPRliDQsdKx0Lsg0LrQtdC00LXRgNCz0ZbQvdGWINC+0LTQsNC9INOZ0YDRliDQutKv0YjQtdC50YLRg9Cz0LUg0YHQtdCx0LXQvyDQsdC+0LvQsNC00YsuINCe0YHRiyDQutC10LTQtdGA0LPRltC70LXRgNC00ZbSoyDQtNCw0LzRg9GL0L3QsCDRi9Kb0L/QsNC7INC10YLRltC/INGC0rHRgNKT0LDQvSDQsdGA0L7QvdGF0YLQsNGA0LTRi9KjINCw0L3QsNGC0L7QvNC+LdGE0LjQt9C40L7Qu9C+0LPQuNC40Y/Qu9GL0psg0YHQuNC/0LDRgtGC0LDQvNCw0LvQsNGA0YvQvdCwINGP0pPQvdC4INCx0YDQvtC90YXRgtCw0YDQtNGL0qMg0LrRltGI0LrQtdC90YLQsNC5INC806nQu9GI0LXRgNGWLCDQttOZ0L3QtSDSm9Cw0LHRi9GA0pPQsNC70LDRgNGL0L3QtNCwINGI0LXQvNGW0YDRiNC10LrRgtGW0qMg0LHQvtC70YPRiyDRgdC+0L3Ri9C80LXQvSDSm9C+0YHQsCDSm9Cw0LHRi9C90YMg0LHQvtC70YvQvyDQttCw0YLSm9Cw0L3QtNGL0pvRgtCw0L0g0YLQtdCz0ZbRgSDQsdKx0LvRiNGL0pvQtdGC0YLQtdGA0ZbQvdGW0qMg0YLRgNC40LPQs9C10YDQu9C10YDRltC90ZbSoyDSm9Cw0LHRi9C90YPSk9CwINC20LDRg9Cw0L8g0YDQtdGC0ZbQvdC00LUg0YLQvtC90YPRgdGL0L3Ri9C90qMg0LbQvtKT0LDRgNC70LDRg9GLINC20LDRgtCw0LTRiy4g0JHQsNC70LDRgNC70LDRgNC00LAg0LXRgNC10YHQtdC60YLQtdGA0LPQtSDSm9Cw0YDQsNKT0LDQvdC00LAg0LHRgNC+0L3RhdGC0LDRgNGLINGB0LDQu9GL0YHRgtGL0YDQvNCw0LvRiyDRgtKv0YDQtNC1INGC0LDRgCDQsdC+0LvRi9C/INGB0LDQvdCw0LvQsNC00YsuINGP0LPQvdC4INC60LXQty3QutC10LvQs9C10L0g0LrQsNCx0YvQvdGDINC205nQvdC1INGW0YHRltC90YMg0LHQvtC70YvQvyDQttCw0YLQutCw0L3RiyDQsNGD0LAg0LDSk9GL0LzRi9C90LAg0LrTqdCx0ZbRgNC10Log05nRgdC10YAg0LXRgtGD0ZYg0LzSr9C80LrRltC9LiDQkdGA0L7QvdGF0YLQsNGA0LTRi9KjINKb0LDQsdGL0YDSk9Cw0LvQsNGA0YvQvdC00LDSk9GLINGI0LXQvNGW0YDRiNC10Log0LrQtdC50LHRltGAINKb0rHRgNGL0LvRi9C80LTRi9KbINKb0L7Qu9C00LDRg9C00Ysg0pvQsNC80YLQsNC80LDRgdGL0Lcg0LXRgtGW0L8g0L7RgtGL0YDQsNC00YsuINCR0ZbRgNCw0psg0YHQvtC90YvQvNC10L0g0pvQvtGB0LAg0LDRg9CwINCw0pPRi9C90YvQvdGL0qMg06nQt9Cz0LXRgNGD0ZYg0YjQtdC80ZbRgNGI0LXQutGC0LXRgNC00ZbSoyDQutC10L3QtdGO0ZYg0L3QtdC80LXRgdC1INC+0LvQsNGA0LTRi9KjINC20LjRi9GA0YvQu9GDINKb0LDQsdGW0LvQtdGC0ZbQvdGW0qMg06nQt9Cz0LXRgNGD0ZbQvdC1INCw0LvRi9C/INC60LXQu9GD0Ysg0LzRg9C80LrRi9C9LiDQodC+0L3Ri9C90LTQsCwg0LHRgNC+0L3RhSDSm9Cw0LHRi9GA0pPQsNC70LDRgNGL0L3QtNCw0pPRiyDRgtC10LPRltGBINCx0q/Qu9GI0YvSm9C10YIg0YLQsNGA0YvQu9GL0L8g0LHQvtGB0LDSo9GB0YvQvyDQutC10YLRg9GWINGL0pvRgtC40LzQsNC7LiDQkdKx0Lsg06nQt9Cz0LXRgNGW0YHRgtC10YAg0YLRi9C90YvRgSDQsNC70YMg0LbQvtC70LTQsNGA0YvQvdGL0qMg0LTQuNCw0LzQtdGC0YDRltC90ZbSoyDTqdC30LPQtdGA0ZbRgdGC0LXRgNGW0L3QtSDTmdC60LXQu9C10LTRli4g0K3QutGB0L/QuNGA0LDRgtC+0YDQu9GL0psg0LXQvdGC0ZbQs9GDIC0g0YLRi9C90YvRgSDQsNC70YMg0LbQvtC70LTQsNGA0YvQvdGL0qMg0YLQsNGA0YvQu9GD0Ysg0L3QtdC80LXRgdC1INCx0ZbRgtC10LvRg9GWINC60LXQt9GW0L3QtNC1INC/0LDQudC00LAg0LHQvtC70YPRiyDQvNGD0LzQutGL0L0sINCx0YPQuyDQtNC10LPQtdC90ZbQvNGW0Lcg0YLRi9C90YvRgSDQsNC70YPQtNGL0qMg0pvQuNGL0L3QtNCw0YPRi9C90LAg05nQutC10LvQtdC00ZYuINCR0rHQuyDRgtGL0L3Ri9GBINGI0YvSk9Cw0YPRgCDQutC10LfRltC90LTQtSDSm9GL0YHRi9C70YMg0L3QtdC80LXRgdC1INGL0YHSm9GL0YDRi9Kb0YLRiyDRgtGL0L3Ri9GBINCw0LvRgyDRgdC10LfRltC80ZbQvdC1INOZ0LrQtdC70ZbQvyDRgdC+0LPRg9GLINC80YPQvNC60YvQvSwg06nQudGC0LrQtdC90ZYg0LDRg9CwINGC0LDRgNGL0LvSk9Cw0L0g0LbTmdC90LUg0pvRi9GB0YvQu9KT0LDQvSDRgtGL0L3Ri9GBINCw0LvRgyDQttC+0LvQtNCw0YDRiyDQsNGA0pvRi9C70Ysg0L7RgtC10LTRli4g0prQsNCx0YvQvdGDINC/0YDQvtGG0LXRgdGC0LXRgNGWINC90LXQvNC10YHQtSDQsNC70LvQtdGA0LPQuNGP0LvRi9KbINGA0LXQsNC60YbQuNGP0LvQsNGAINC60LXQt9GW0L3QtNC1INC+0YHRiyDQsdGA0L7QvdGF0YLQsNGA0LTRi9KjINC70Y7QvNC10L3RltC90ZbSoyDRgtCw0YDRi9C70YPRi9C90LAg0LDQu9GL0L8g0LrQtdC70LrQtNGWLiDQvtGB0Ysg0LrQtdC30LTQtSDRjdC60YHQv9C40YDQsNGC0L7RgNC70YvSmyDQtdC90YLRltCz0YMg0L/QsNGC0L7Qu9C+0LPQuNGP0YHRiyDQvtGA0YvQvSDQsNC70LDQtNGLLiDQkdKx0Lsg0LDRg9GA0YPQvNC10L0g0LDRg9GL0YDQsNGC0YvQvSDQvdCw0YPSm9Cw0YEg0LHQsNC70LAg0LDRg9Cw0L3RiyDRiNGL0pPQsNGA0YMg0q/RiNGW0L0g0LDQudGC0LDRgNC70YvSm9GC0LDQuSDQutKv0Ygg0YHQsNC70LDQtNGLLiDQkdGD0Lsg0LDRg9GA0YMg0LTQtdGA0LHQtdGBINCw0YPRgNGDINC10LzQtdGBINCw0LvQsNC50LTQsCDQsdCw0YHSm9CwINC90LXQs9GW0LfQs9GWINCw0YPRgNGD0LTRi9KjINGB0LjQvNC/0YLQvtC80LDRgtC40LrQsNC70YvSmyDQutOp0YDRltC90ZbRgdGC0LXRgNGW0L3QtSDRgdOZ0LvRgtC10LzQtSDQsdC10YDQtdC00ZYuIDIg0YHRg9GA0LDQui4g0JHQsNC70LDQu9Cw0YDQtNCwINKb0LDSo9Kb0LAg0LbSr9C50LXRgdGWINOp0YHRgyDQttOZ0L3QtSDQtNCw0LzRgyDQutC10LfQtdKj0ZbQvdC00LUg0LDQudGC0LDRgNC70YvSm9GC0LDQuSDTqdC30LPQtdGA0ZbRgdGC0LXRgNCz0LUg0rHRiNGL0YDQsNC50LTRiy4g0JHQsNC70LDQu9Cw0YDQtNCw0pPRiyDSm9Cw0qPSm9CwINC00LDQvNGD0YvQvdGL0qMg0LrQtdC50LHRltGAINC10YDQtdC60YjQtdC70ZbQutGC0LXRgNGW0L3QtSDQvNGL0L3QsNC70LDRgCDQttCw0YLQsNC00YsuINCR0ZbRgNGW0L3RiNGWINGB0q/QudC10LrRgtC10YAg0LHQsNGB0YLQsNC/0pvRi9C00LAg0YjQtdC80ZbRgNGI0LXQuiDSr9C70LPRltC70LXRgNGWINGA0LXRgtGW0L3QtNC1INKb0LDQu9GL0L/RgtCw0YHQsNC00Ysg0L7Qu9Cw0YDQtNCwINGB0q/QudC10LrRgtC10L3RgyDSr9C00LXRgNGW0YHRliDQttGD0YDRltC/INCx0ZbRgNGC0ZbQvdC00LXQvyDRgdKv0LnQtdC6INGC0ZbQvdGW0L3QtSDQsNGD0YvRgdCwINCx0LDRgdGC0LDQudC00YsuINKw0LfRi9C9INGB0YPQudC10LrRgtC10YDQtNGW0qMg0rHRiNGC0LDRgNGL0L3QsCDQttCw0pvRi9C9INC+0YDQvdCw0LvQsNGB0pvQsNC9INGI0LXQvNGW0YDRiNC10Log0LDQudC80LDSm9GC0LDRgNGLINCx0L7Qu9GL0L8g0YLQsNCx0YvQu9Cw0YLRi9C9INOp0YHRgyDRgtCw0LrRgtCw0LvQsNGA0Ysg0LHQvtC50LvRi9C6INGB0q/QudC10LrRgtC10YDQtNGW0qMg06nRgdGD0ZbQvdC1INC20LDRg9Cw0L8g0LHQtdGA0LXQtNGWLiDQltOZ0L3QtSDQttGL0L3Ri9GB0YLRi9KbINC20LXRgtGW0LvRg9C00ZbSoyDRgdC+0qPRi9C90LAg0LTQtdC50ZbQvSDQsdC10LvRgdC10L3QtNGWINCx0L7Qu9GL0L8g0LrQtdC70LXQtNKj0ZYuINCh0q/QudC10LrRgtC10YAg0LHQsNGB0YLQsNC/0LrRiyDQutC10LfQtdC90LTQtdGA0LTQtSDRgdCw0LvRi9GB0YLRi9GA0LzQsNC70Ysg0YLRg9GA0LTQtSDTmdC70YHRltC3INC205nQvdC1INC60LXRg9C10LrRgtGLINCx0L7Qu9GL0L8g0LrQtdC70YHQtSDRg9Cw0pvRi9GCINC+0YLQtSDQutC10LvQtSDQvNC40L3QtdGA0LDQu9C00LDQvdGDINC/0YDQvtGG0LXRgdGWINC20q/RgNGW0L8g0YHSr9C50LXQutGC0LXRgCDQutKv0YjQtdC50ZbQvyDRgtGL0pPRi9C30LTQsNC70LAg0LHQsNGB0YLQsNC50LTRiy4g0JHQsNGBINGB0q/QudC10LPRltC90ZbSoyDRgdKv0LnQtdC60YLQtdGA0ZYg0LHQsNGB0YLQsNC/0pvRiyDQutC10LfQtNC1INGE0L7QvdGC0LDQvdC10Lsg0LTQtdC/INCw0YLQsNC70LDRgtGL0L0g0YLQsNC70YjRi9Kb0YLRiyDQvNC10LzQsdGA0L3QsNC70LDRgCDQsNGA0pvRi9C70Ysg0LHTqdC70ZbQvdC10LTRli4g0J7Qu9Cw0YAg0LHQvtGB0LDQvdGDINC60LXQt9GW0L3QtNC1INC205nQvdC1INCx0L7RgdCw0L3Sk9Cw0L3QvdCw0L0g0LrQtdC50ZbQvSDQsNC70LPQsNGI0LrRiyDQutC10LfQtdC90LTQtdGA0LTQtSDQtdGA0YLQtSDTqdC80ZbRgNC00LUg0LHQsNC70LDQu9Cw0YDQs9CwINCx0ZbRgNGI0LDQvNCwINC40LrQtdC80LTRltC70ZbQutC60LUg0LzSr9C80LrRltC90LTRltC6INCx0LXRgNC10LTRli4gMTItMTgg0LbQsNGB0YLQsCDQsdGD0Lsg0LbQsNCx0YvQu9Cw0LTRiy4g0KHSr9C50LXQutGC0ZbSoyDQttKx0LzRgdCw0psg0YLRltC90LPQtSDSm9Cw0YLRi9C90LDRgdGLINCx0ZbRgNGC0ZbQvdC00LXQvyDRg9Cw0pvRi9GCINC+0YLQutC10L0g0YHQsNC50YvQvSDTqdC30LPQtdGA0LXQtNGWLiDQr9KT0L3QuCDRgdKv0LnQtdC60YLRltKjINC20rHQvNGB0LDSmyDRgtGW0L3QtNC10YDQs9C1INKb0LDRgtGL0L3QsNGB0Ysg0LDRgNGC0LDQtNGLLiDQkdKx0Lsg0pvQsNGC0YvQvdCw0YHRgtGL0qMg0LDRgNGC0YPRiyDRltGI0LrRliDQvNKv0YjQtdC70LXRgNC00ZbSoyDSm9C+0YDSk9Cw0L3Ri9GI0YvQvdGL0qMg0LDRgNGC0YPRi9C90LAsINC00LXQvdC10L3RltKjINC90LXQs9GW0LfRltC9INKb0LDQvNGC0LDQvNCw0YHRi9C3INC10YLRg9Cz0LUsINC205nQvdC1INC60L7Qt9Cz0LDQu9Cz0YvRiNGC0YvQutGC0YsgINKb0LDQvNGC0LDQvNCw0YHRi9C3INC10YLQtdC00ZYuINCh0YPQudC10Log0LbSr9C50LXRgdGWINC80LXQt9C+0LTQtdGA0LzQsNC70YzQtNGLINKx0YDRi9KbINKb0LDQsdCw0YLRi9C90LDQvSDQttOZ0L3QtSDQttKv0LnQutC1INGC06nQsdC10YHRltC90LXQvSDQv9Cw0LnQtNCwINCx0L7Qu9KT0LDQvSDQvNC10LfQtdC90YXQuNC80LDQtNCw0L0g0LTQsNC80LjQtNGLLiDSmtCw0qPSm9CwINC20q/QudC10YHRltC90ZbSoyDQtNCw0LzRg9GLINC20LDRgtGL0YDRltGI0ZbQu9GW0Log0LTQsNC80YPQtNGL0qMgNS3RiNGWINCw0L/RgtCw0YHRi9C90LTQsCDQttKv0YDQtdC00ZYu0rDRgNGL0pvRgtGL0qMg0pvQsNKj0pvQsNGB0Ysg0L7RgdGC0LXQvtCz0LXQvdC10LfQtNGW0qMgMiDQvNC10LfQtdC90YXQuNC80LDQu9C00Ysg0LbQsNGB0YPRiNCw0YHRi9C90LDQvSDRgtGD0LfRltC70LXQtNGWLiDQntC70LDRgCDQtNOZ0L3QtdC60LXRgCDRgtGW0L3QtNGW0Log0LbTmdC90LXQtNC1INGI0LXQvNGW0YDRiNC10LrRgtGW0LouINCx0ZbRgNGW0L3RiNGW0YHRltC90LXQvSDRj9KT0L3QuCDQtNOZ0L3QtdC60LXRgCDRgtGW0L3QtNGW0Log0LbQsNGB0YPRiNCw0LvQsNGA0LTQsNC9INCx0LDRgSDRgdKv0LnQtdCz0ZbQvdGW0qMg0L3QtdCz0ZbQt9GWLCDRgtOp0LzQtdC90LPRliDQttCw0psg0LDRgdGC0YssINCx0LXRgiDQttOZ0L3QtSDQsdKx0pPQsNC90LAg0YHSr9C50LXQs9GW0L3RltKjINC00LjQsNGE0LjQt9GWINGC0q/Qt9GW0LvRgdC1LCDQsNC7INC10LrRltC90YjRltGB0ZbQvdC10L0g0Y/Qs9C90Lgg0YjQtdC80ZbRgNGI0LXQutGC0ZbQuiDRgtKv0YDRltC90LXQvSDSm9Cw0qPSm9Cw0L3Ri9KjINKb0LDQu9KT0LDQvSDQsdOp0LvRltC60YLQtdGA0ZYg0YjQtdC80ZbRgNGI0LXQuiDQttOZ0L3QtSDRgdKv0LnQtdC6INGC0ZbQvdGWINC00LDQvNC40LTRiy4g0KHSr9C50LXQutGC0ZbSoyDRgtC+0LvRi9KbINC00LDQvNGD0Ysg0LHQsNC70LAg0YLRg9GL0LvQs9Cw0L3QvdCw0L0g0LrQtdC50ZbQvSDQttOZ0L3QtSDQttKv0YDQtSDQsdCw0YHRgtCw0pPQsNC90LTQsCDRjNC+0LvQsNC00YsuICDQn9Cj0LHQtdGA0YLQsNGC0YLRi9KbINC60LXQt9C10L3QtNC1INGB0q/QudC10Log0YLRltC90ZYg0LXRgNC10YHQtdC6INCw0LTQsNC80L3Ri9KjINGB0q/QudC10LPRltC90ZbSoyDRltGI0LrRliDSm9Kx0YDRi9C70YvQvNGLINC80LXQvSDQs9C40YHRgtC+0LvQvtCz0LjRj9C70YvSmyDSm9Kx0YDRi9C70YvQvNGL0L3QsCDQttCw0pvRi9C9INCx0L7Qu9CwINCx0LDRgdGC0LDQudC0LiAg</text:p>
          </table:table-cell>
          <table:table-cell office:value-type="float" office:value="170348" table:style-name="ce1">
            <text:p>170348</text:p>
          </table:table-cell>
          <table:table-cell office:value-type="float" office:value="90" table:style-name="ce1">
            <text:p>90</text:p>
          </table:table-cell>
          <table:table-cell office:value-type="string" table:style-name="ce1">
            <text:p>Экспираторный одлышканың клиникасы,нақтыланбаған жалпы жазылған№</text:p>
          </table:table-cell>
          <table:table-cell office:value-type="float" office:value="0" table:style-name="ce1">
            <text:p>0</text:p>
          </table:table-cell>
          <table:table-cell table:number-columns-repeated="16376"/>
        </table:table-row>
        <table:table-row table:style-name="ro1">
          <table:table-cell office:value-type="float" office:value="1066884" table:style-name="ce1">
            <text:p>1066884</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3RgdKx0YDQsNKbOiDQsdCw0LvQsNC00LAg0LHRgNC+0L3RhdGC0LDRgCDSm9Cw0LHRi9C90YPRiyDQsdC+0LvRi9C/INGC0rHRgCwg0LHQsNC70LDQtNCw0pPRiyDQsdGA0L7QvdGFINKb0LDQsdGL0L3Rg9GLINC+0L3Ri9KjINGC0YvQvdGL0YEg0LDQu9GD0YvQvdCwINCw0YLQsNC/INCw0LnRgtKb0LDQvdGI0LAg0YjRi9KT0LDRgNGD0YvQvdCwLNGP0pPQvdC4INCx0LDQu9Cw0LTQsCDRjdGB0L/QuNGA0LDRgtC+0YDQu9GL0psg0LXQvdGC0ZbQs9GDINCx0LDRgCwg0L7QuyDQtNC10LPQtdC90ZbQvNGW0Lcg0YLRi9C90YvRgSDRiNGL0pPQsNGA0pPQsNGD0LTRi9KjINKb0LjRi9C90LTQsNGD0Ysg0LHQvtC70YvQvyDRgtCw0LHRi9C70LDQtNGLLiDQttCw0LvQv9GLINCx0YDQvtC90YXRgtCw0YDQtNCwINCx0L7Qu9Cw0YLRi9C9INCw0L3QsNGC0L7QvNC40Y8t0YTQuNC30LjQvtC70L7Qs9C40Y/Qu9GL0psg0LXRgNC10LrRiNC10LvRltC60YLQtdGA0ZbQvdC1INGC0L7Sm9GC0LDQu9GB0LDQvDog0LHRgNC+0L3RhdGC0LDRgCDQtdGA0LXRgdC10LrRgtC10YDQs9C1INKb0LDRgNCw0pPQsNC90LTQsCDQsdCw0LvQsNC70LDRgNC00LAg0YLQsNGAINC205nQvdC1INKb0YvRgdKb0LDQu9Cw0YMg0LrQtdC70LXQtNGWLCDRgdC+0L3QtNGL0pvRgtCw0L0g0LHRgNC+0L3RhdGC0LAgMSDQvNC8INGW0YHRltC90YMg0LHQvtC70YHQsCDQvtC7INCx0YDQvtGF0YLRi9KjINC10LvRgyDQv9Cw0LnRi9C3INGC0LDRgNGL0LvRg9GL0L3QsCDTmdC60LXQu9C10YLRltC9INCx0L7Qu9Cw0LTRiywg05nRgdGW0YDQtdGB0LUgNSDQttCw0YHSm9CwINC00LXQudGW0L3Qs9GWINCx0LDQu9Cw0LvQsNGA0LTQsCDQtdGA0LXRgdC10LrRgtC10YDQs9C1INKb0LDRgNCw0pPQsNC90LTQsCDQsdGA0L7QvdGF0YLQsNGAINOZ0LvQtNC10pvQsNC50LTQsCDRgtCw0YAuINGB0L7QvNC10L0g0LHRltGA0LPQtSDRiNGL0YDRi9GI0YLRiyDSm9Cw0LHQsNGC0YvQvdGL0qMg0ZbRgdGW0L3Rg9GWINC90LUg0YHTmdC7INKb0LDQsdGL0L3RgyDQsdC+0LvRgdCwINGB0LDSo9GL0LvQsNGD0Ysg0LDQudGC0LDRgNC70YvSm9GC0LDQuSDRgtCw0YDRi9C70LDQtNGLLiDQsdCw0LvQsNGA0LTQsCDQsdGA0L7QvdGF0YLRi9KjINGI0LXQvNGW0YDRiNC10Log0YHQsNKb0LjQvdCw0LvQsNGA0Ysg05nQu9GB0ZbQtyDQutC10LvQtNGWINGB0L7QvdC00YvSm9GC0LDQvSDQtNCwINC60ZbRiNC60LXQvdC1INKb0LDQsdGL0L3RgyDQsdGA0L7QvdGF0YLRi9KjINC+0L/Ri9GA0YvQu9GL0L8g0L3QtdC80LXRgdC1INC20LDQsdGL0LvRi9C/INKb0LDQu9GD0YvQvdCwINOZ0LrQtdC70LXQtNGWLiDRiNGL0YDRi9GI0YLRiyDSm9Cw0LHQsNGC0YvQvdGL0qMg0pvQsNC90LzQtdC9INKb0LDQvNGC0LDQvNCw0YHRi9C3INC10YLRltC70YPRliDQttCw0pvRgdGLINC00LDQvNGL0pPQsNC9INC205nQvdC1INOp0YLQtSDRgdC10LfRltC80YLQsNC7INC60LXQu9C10LTRliwg0YHQvtC7INGB0LXQsdC10L/RgtGWINKb0LDQsdGL0L3RgyDQutC10LfRltC90LTQtSDRgdC10LrRgNC10YbQuNGPINCx06nQu9GDINCw0YDRgtCw0LTRiywg0Y/Sk9C90Lgg0LPQuNC/0LXRgNGB0LXQutGA0LXRhtC40Y/RgdGLINCx0L7Qu9Cw0LTRiy4g0YLQsNKT0Ysg0LbTqdGC0LXQu9GDINGA0LXRhNC70LXQutGB0ZYg0LTQsNC80YvQvNCw0pPQsNC9INGB0L7QvdC00YvSm9GC0LDQvSDRiNGL0YDRi9GIINC90LUg0YHSsdC50YvSm9GC0YvSm9GC0Ysg0YHRi9GA0pvRiyDRiNGL0pPQsNGA0YMg0pvQuNGL0L0sINCx0rHQu9C00LAg0L7QsdGB0YLRg9C60YbQuNGP0L3RiyDTqdC3INCw0LvQtNGL0L3QsCDSm9C40YvQvdC00LDRgtCw0LTRiy4gMi3RgdKx0YDQsNKbOiDQsdCw0LvQsNC70LDRgNC00LAg0YHSr9C50LXQuiDQttKv0LnQtdGB0ZbQvdGW0qMg0LTQsNC80YMg0LXRgNC10LrRiNC10LvQs9GW0LPRljog0pvSsdGA0YHQsNKbINGW0YjRltC70ZbQuiDQtNCw0LzRg9C00YvSoyDSr9GI0ZbQvdGI0ZYg0LDQv9GC0LDRgdGL0L3QtNCwINCx0LDRgdGC0LDQu9Cw0LTRiy4g0L7QuyDQvtGB0YLQtdC+0LPQtdC90LXQt9C00LUg0LXQutGWINC80LXQt9C10L3RhdC40LzQsNC70LTRiyDQttCw0YHRg9GI0LDQtNCw0L0g0YLSr9C30ZbQu9C10LTRliwg0LTTmdC90LXQutC10YAg0YLRltC90ZYg0LbTmdC90LUg0LTQtSDRiNC10LzRltGA0YjQtdC60YLRltC6LiDQsdGW0YDRltC90YjRltGB0ZbQvdC10L0g0LHQsNGBINGB0q/QudC10Log0L3QtdCz0ZbQt9GWLCDRgtOp0LzQtdC90LPRliDQttCw0pssINCx0LXRgiwg0LHSsdKT0LDQvdCwINGB0q/QudC10LPRltC90ZbSoyDQtNC40LDRhNC40LfRliDRgtKv0LfRltC70LXQtNGWLiDQtdC60ZbQvdGI0ZbRgdGW0L3QtdC9INKb0LDQu9KT0LDQvSDSm9Cw0qPSm9CwINCx06nQu9GW0LrRgtC10YDRliDRiNC10LzRltGA0YjQtdGC0LXQvSDRgtKv0LfRltC70LXQtNGWINC60LXQudGW0L0g0YHSr9C50LXQuiDRgtGW0L3RliDRgtKv0LfRltC70LXQtNGWLiDSm9Kx0YDRgdCw0psg0ZbRiNGW0LvRltC6INC00LDQvNGD0LTRi9KjINGB0L7So9KT0Ysg0LDQudGL0L3QtNCwINGB0q/QudC10LrRgtC10YDQtNGW0qMg0LTQsNC80YMg0L3Sr9C60YLQtdC70LXRgNGWINKb0LDQu9GL0L/RgtCw0YHQsNC00YsuINC/0YPQsdC10YDRgtCw0L3RgtGLINC60LXQt9C10qPQtNC1INGB0q/QudC10Log0YLRltC90ZYg0LXRgNC10YHQtdC6INCw0LTQsNC80LTQsNGAINGB0q/QudC10LrRgtC10YDRltC90ZbSoyDSm9Kx0YDRi9C70YvQvNC00YvSmyDQttOZ0L3QtSDQs9C40YHRgtC+0LvQvtCz0LjRj9C70YvSmyDQttCw0pPRi9C90LDQvSDQttCw0pvRi9C9INCx0L7Qu9CwINCx0LDRgdGC0LDQudC00YsuINCw0LvSk9Cw0YjSm9GLINC20YvQu9C00LDRgNGLINGB0q/QudC10Log0LbSsdC80YHQsNKbINC205nQvdC1INC40ZbQu9GW0LzQtNGWINC60LXQu9C10LTRliwg0L7RgdGLINC60LXQt9C00LUg0LHQsNC70LAg0LTSsdGA0YvRgSDRgtCw0LzQsNKb0YLQsNC90YPRiyDQutC10YDQtdC6INGB0LXQsdC10LHRliDQvNC40L3QtdGA0LDQu9C00LDRgCDSm9Cw0LbQtdGCINCx0L7Qu9GL0L8g0YLQsNCx0YvQu9Cw0LTRiy4g0L7Qu9Cw0YAg0LQs0YEs0LAs0LIg0LLQuNGC0LDQvNC40L3QtNC10YDRliwg0YTQvtGB0YTQvtGALCDQutCw0LvRjNGG0LjQuSDQttOZ0L3QtSDQvNC40LrRgNC+0Y3Qu9C10LzQtdC90YLRgtC10YAuINCx0LDQu9CwINC00LXQvdC10YHRliDQvdC1INKb0rHRgNGL0LvRi9C8INC60ZbRiNGWINCx0L7Qu9GB0LAg0LHQsNGB0Ysg0YHQvtKT0rHRgNC70YvQvCDSr9C70LrQtdC9INCx0L7Qu9Cw0LTRiy4g0LbQsNKj0LAg0YLRg9KT0LDQvSDQsdCw0LvQsNC00LAg0LHQsNGB0YLRi9KjINC80LjQu9GL0psg0LHTqdC70ZbQs9GWINCx0LXRgtGC0ZbQuiDQsdOp0LvRltCz0ZbQvSDQsNC70YvQvyDQttCw0YLQsNC00YssINGI0LDQu9CwINGC0YPRi9C70pPQsNC9INCx0LDQu9Cw0LTQsCDQsNC50pvRi9C9INC606nRgNGW0L3QtdC00ZYuINCx0LDQu9CwINGC0YPRi9C70pPQsNC9INGB0L7SoyDQsNGA0LDRgdGL0L3QtNCw0pPRiyDQttGW0LrRgtC10YAg0YLQvtC70YvSmyDQttC10YLRltC70LzQtdCz0LXQvSDQsdC+0LvQsNC00Ysg0L7QuyDQttC10YDQtNC1INC005nQvdC10LrQtdGAINGC0ZbQvdGWINCx0L7Qu9Cw0LTRiy4g0YHQvtC80LXQvSDSm9Cw0YLQsNGAINCx0LDRgdGC0LAg0q/Qu9C60LXQvSDQttOZ0L3QtSDQutGW0YjRliDQtdKj0LHQtdC60YLQtdGAINCx0L7Qu9Cw0LTRiywg0LrRltGI0ZYg0LXSo9Cx0LXQuiDQtdC60ZYt0q/RiCDQsNC50LTQsCDQttCw0LHRi9C70YHQsCwg0q/Qu9C60LXQvSDQtdKj0LHQtdC6INC10LrRliDQttCw0YHSm9CwINC00LXQudGW0L0g0YLQvtC70YvSmyDQttCw0LHRi9C70LDQtNGLLiDQsdCw0LvQsCDQvtC80YvRgNGC0pvQsNGB0YvQvdC00LAg0LjRltC70ZbQvNC00LXRgCDQsdC+0LvQvNCw0LnQtNGLINCx0LDRgdGL0L3QtNCwICwg0Y/Sk9C90Lgg0YLRg9KT0LDQvdC00LAg0L7QvNGL0YDRgtKb0LAg0YLRltC60LUg0LHQvtC70LDQtNGLLiDQutC10LnRltC9IDItMyDQsNC50LTQsCDQvNC+0LnRi9C9INC70LDRgNC00L7Qt9GLINCx0LDQu9CwINCx0LDRgdGL0L0g0LrTqdGC0LXRgNCz0LXQvdC00LUg0pvQsNC70YvQv9GC0LDRgdCw0LTRiywg0LDQu9GC0YvQvdGI0Ysg0LDQudC00LAg0LrQtdGD0LTQtSDQutC40YTQvtC30Ysg0LHQsNC70LAg0L7RgtGL0YDSk9Cw0L3QtNCwINKb0LDQu9GL0L/RgtCw0YHQsNC00YssINGC0L7Sk9GL0Lct0L7QvSDQtdC60ZYg0LDQudC00LAg0LHQtdC7INC70LDRgNC00L7Qt9GLINKb0LDQu9GL0L/RgtCw0YHQsNC00YssINGB0LXQs9GW0LfQutOp0Lcg0LrQuNGE0L7Qt9GLINGC0YPSk9Cw0L3QvdCw0L0g0LHQtdGA0ZYg0LHQvtC70LDQtNGLLiDRgdKv0LnQtdC6INOp0YHRg9GWINKx0LfRi9C90LTRi9KT0Ysg0Y3Qv9C40YTQuNC3INCw0YDSm9Cw0YHRi9C90LTQsCwg0pvQsNC70YvSo9C00YvSk9GLINGB0q/QudC10Log0pvQsNCx0YvSk9GLINCw0YDSm9Cw0YHRi9C90LTQsCDQttKv0LfQtdCz0LUg0LDRgdCw0LTRiy4g0YHQvtC90YvQvNC10L0g0LHRltGA0LPQtSDQvdOZ0YDQtdGB0YLQtdC70LXRgNC00LUg0YHSr9C50LXQuiDRgtGW0L3RliDQsdC+0YDQv9GL0LvQtNGL0psg0ZbRgNGWINGC0LDQu9GI0YvSm9GC0Ysg0YLQvtGA0LvRiyDQutC10LvQtdC00ZYuINKv0Ygg0LDQuSDQvNC10L0g0q/RiCDQttCw0YHSm9CwINC00LXQudGW0L0g0YHSr9C50LXQuiDQttKv0LnQtdGB0ZbQvdGW0qMg0pvQsNGA0pvRi9C90LTRiyDQtNCw0LzRg9GLINC20q/RgNC10LTRliwg0YHQvtC90LTRi9Kb0YLQsNC9INCx0rHQuyDQutC10LfQtNC1INC60LDQu9GM0YbQuNC5INC80LXQvSDRhNC+0YHRhNC+0YAg0LDQu9C80LDRgdGD0Ysg06nRgtC1INC80LDSo9GL0LfQtNGLLiDQtdCz0LXRgCDQsdCw0LvQsNC00LAg0L7RgdGLINC60LDQu9GG0LjQuSDQvNC10L0g0YTQvtGB0YTQvtGAINC20LXRgtGW0YHQv9C10YHQtSDQttOZ0L3QtSDQtCDQstC40YLQsNC80LjQvSDRgtCw0L/RiNGLINCx0L7Qu9GB0LAg0LHQsNC70LDQtNCwINC80LXRiNC10Lss0Y/Sk9C90Lgg0YDQsNGF0LjRgiDQsNGD0YvRgNGD0Ysg0LTQsNC80LjQtNGLLiDQvtC7INC60LXQt9C00LUg0LHQsNC70LDQtNCwINGB0q/QudC10Log0LbSr9C50LXRgdGW0L3RltKjINC00LDQvNGD0Ysg0YLQtdC20LXQu9C10LTRliwg0LrQtdGD0LTQtSDRgtCw0YPRi9KbINGC06nRgdGWINGB0LjRj9GC0YvSmyDQtNC10YTQvtGA0LzQsNGG0LjRj9C70LDQvdCw0LTRiywg0LHQsNGB0YLQsCDRhNGA0L7QvdGC0LDQu9C00Ysg0LbTmdC90LUg0L/QsNGA0LXRgtCw0LvQtNGLINGC06nQvNC/0LXRiNGW0LrRgtC10YAg0L/QsNC50LTQsCDQsdC+0LvQsNC00YsuINCx0LDQu9Cw0LvQsNGA0LTQsCDTqdC80ZbRgNGW0L3RltKjINCw0LvSk9Cw0YjSm9GLINC20YvQu9C00LDRgNGLINC10LvRgy3QttC10YLQv9GW0YEg0L/QsNC50YvQtyDRgdKv0LnQtdC6INGC0ZbQvdGW0L3RltKjINKb0LDQudGC0LAg0pvSsdGA0YvQu9GD0Ysg0LbSr9GA0LXQtNGWLCDQsNC7INC10YDQtdGB0LXRgtC10YDQtNC1INC20YvQu9GL0L3QsCDQsdC10YEg0L/QsNC50YvQtyDSk9Cw0L3QsC4=</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88" table:style-name="ce1">
            <text:p>1066888</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zQkdC10YDRltC70LPQtdC9INGB0rHRgNCw0pvRgtCwIDQg0LbQsNGB0YLQsNKT0Ysg0LHQsNC70LDQtNCw0pPRiyDQsdGA0L7QvdGF0YLQsNGA0LTRi9KjINKb0LDQsdGL0L3Rg9GLINCx0LDRgCDQtdC60LXQvdGWINC20LDQudC70Ysg0LDQudGC0YvQu9KT0LDQvS7QkdCw0LvQsNC70YDQtNCw0pPRiyDQsdGA0L7QvdGF0YLQsNGA0LTRi9KjINKb0LDQsdGL0L3Rg9GLINC60q/RgNC00LXQu9GWINKb0rHQsdGL0LvRi9GBINC+0Lsg0LrQtdC30LTQtSDQsdCw0LvQsNC70YDQtNCwINCx0YDQvtC90YXRgtCw0YDQtNGL0qMg0YHQu9C40LfQuNGB0YLRi9C5INC+0LHQvtC70L7Rh9C60LDRgdGL0L3Ri9KjINGW0YHRltC90YPRltC90LXQvSDRgtGL0L3Ri9GBINCw0LvRg9GLINCx0rHQt9GL0LvRg9GLINC80q/QvNC60ZbQvS4g0J7QvdGLINGN0LrRgdC/0LjRgNCw0YLQvtGA0LvRi9KbINC10L3RgtGW0LPRgyDQtNC10L8g0LDRgtCw0LnQvNGL0LcuINCR0rHQuyDQtNC10LPQtdC90ZbQvNGW0Lcg0YLRi9C90YvRgdGC0YvSoyDRiNGL0pPQsNGA0YvQu9GD0YvQvdC00LAg0LHQvtC70LDRgtGL0L0g0ZbRgNC60ZbQu9GDINC/0YDQvtGG0LXRgdGWLtCR0LDQu9Cw0LvQsNGA0LTQsNKT0Ysg0LjQvNC80YPQvdC40YLQtdGCINKv0LvQutC10L3QtNC10YDQs9C1INKb0LDRgNCw0pPQsNC00LAg0YLTqdC80LXQvSDQsdC+0LvQsNC00YsuINCQ0YPQsCDQttKx0YLRgyDQsdCw0YDRi9GB0YvQvdC00LAg0LHRgNC+0L3RhdGC0YvSoyDRiNGL0YDRi9GI0YLRiyDSm9Cw0LHQsNGC0YvQvSDSm9Cw0LHRi9C90YPRiyDQvtC90YvSoyDQsNC70YHQuNC3INCw0YDRiyDQvdOZ0LfRltC60YLQtdCz0ZbQvNC10L0g0LTQtSDQsdCw0LnQu9Cw0L3Ri9GB0YLRiy4g0JHQsNC70LDQu9GA0LTQsNKT0Ysg06nQutC/0LUg0LXRgNC10YHQtdC60YLQtdGA0LTQtdCz0LjQtNC10Lkg0YHQtdCz0LzQtdC90YLQsNGA0LvRiyDQsdC+0LvQsNC00Ysg0LDQu9Cw0LnQtNCwINCw0YbQuNC90YPRgdGC0LDRgNGLINGC0L7Qu9GL0Log0LbQtdGC0LjQu9C80LXQs9C10L0uINCR0YDQvtC90YXRgtCw0YDRiyDQvNC10L0g0LHRgNC+0L3RhdC40L7Qu9Cw0LvQsNGA0Ysg0L3QsNC30LjQuiAsINC60LDQvSDRgtCw0LzQuNGA0LvQsNGA0YvQvdCwINCx0LDQuSDTmdGA0ZYg0LbSsdKb0LAg0LHQvtC70YPRi9C80LXQvSDQtdGA0LXQutGI0LXQu9C10L3QtdC00LguINCR0YDQvtC90YXRgtGL0Log0L7QsdGB0YLRgNGD0LrRhtC40Y/QvdGL0L0g0L/QsNC50LTQsCDQsdC+0LvRg9GLINC60L7Qv9GC0LXQs9C10L0g0LbQsNKT0LTQsNC50LTQsCDRiNGL0YDRi9GI0YLRiyDQutCw0LHQsNGC0YvQvdGL0qMg0ZbRgdGW0L3Rg9GW0LzQtdC9INC20ZbQvdC1INGC0rHRgtKb0YvRgCDRgdKx0LnRi9Kb0YLRi9Kb0YLRi9KjINC20LjQvdCw0LvRg9GL0LzQtdC9INCx0LDQudC70LDQvdC40YHRgtGLLiDQkdCw0LvQsNC70LDRgNC00LAg0LHRgNC+0L3RhdC40YIg0LTQtdGA0LHQtdGBINGC0YPRgNC00LUg0LbQsNC90LUg0YHQuNGA0LXQuiDQtNCw0LzQuNC00YsuINCW0LjRliDQttCw0pPQtNCw0LnQu9Cw0YDQtNCwINC20ZbRgtGWINGA0LXRgdGB0L/QuNGA0LDRgtC+0YDQu9GL0psg0LLQuNGA0YPRgdGC0YvSmyDQuNC90YTQtdC60YbQuNGP0LvQsNGAINCx0YDQvtC90YXQuNGC0YLRi9C9INGB0LXQsdC10LHRliDQsdC+0LvRi9C/INGC0LDQsdGL0LvQsNC00YsuINCh0L7QvdGL0LzQtdC9INKb0LDRgtCw0YAg0YDQtdGG0LXQtNC40LLRgtGWLCDRgdC40YDQtdC6INC60LfQtNC10YHQtdGC0LjQvS3QsdCw0LrRgtC10YDQuNGP0LvRi9KbLCDQsNC70LvQtdGA0LPQuNGH0LXRgdC60LjQuSDQsdGA0L7QvdGF0LjRgiDRgtGD0YDQu9C10YDQuCDQtNC1INCx0LDQsNGALtCe0LHRgdGC0YDRg9C60YbQuNGP0L3Ri9KjINCx0L7Qu9GD0YvQvdC00LDSk9GLINGB0LXQsdC10L/RgtC10YA6INC60LDQsdGL0L3Rg9C00YvSoyDTmdGB0LXRgNGWLCDQsNC70LvQtdGA0LPQuNC40Y8gLCAg0LjQvdGE0LXQutGG0LjRjywg0YLQvtC60YHQuNC60LDQu9GL0psg0LDRgdC10YDQu9C10YAg0LTQtSDQsdC+0LvRg9GLINC80q/QvNC60ZbQvSDQtdC60LXQvdGW0L0g0rHQvNGL0YLQv9Cw0pPQsNC90YvQvNGL0Lcg0LbTqdC9LiDQodC+0L3QtNCw0Lkg0LDSmyDRgtGL0L3Ri9GB0YHRgtGLINCw0LvRgyDQttC+0LvRi9C90LTQsNKT0Ysg0LPQuNC/0LXRgNC/0LvQsNC30LjRj9C70LDRgCDQvdC10LzQtdGB0LUg0YvRgdGL0L3Rg9C70LXRgCDQtNC1INOZ0YHQtdGAINC10YLQtdC00ZYuINCR0LDQu9Cw0LvQsNGA0LTQsCDRgtGL0L3Ri9GBINCw0LvRgyDQttKv0LnQtdGB0ZbQvdC00LXQs9GWINGC0LDSk9GLINCx0ZbRgCDQtdGA0LXQutGI0LXQu9GW0Log0LTQsNC90LXQutC10YAg0YLRltC90LPQtSDTqdGC0LUg0LHQsNC5INKb0LDQvdGC0LDQvNGL0YDQu9Cw0YDRiyDQvNC+0Lsg0LHRi9GA0LDSmyDRjdC70LDRgdGC0LjQutCw0LvRi9KbINGC0ZbQvSDQtNKx0YDRi9GBINC20LXRgtC40LvQvNC10LPQtdC9INCx0L7Qu9GL0L8g0LrQtdC70LXQtNGWLiDQkdGA0L7QvdGF0YLQsNGA0pPQsCDRgtOZ0L0g0LHSsdC7INCx0LXQu9Cz0ZbQu9C10YDQs9C1INKb0L7RgdCwINC60LXRgtC10YLRltC9INCx0L7Qu9GB0LDQvCDQsdGA0L7QvdGF0YLQsNGA0LTRi9KjINC20rHSm9CwINGI0YvRgNGL0YvRiNGC0Ysg0pvQsNCx0LDRgtC/0LXQvSDQttCw0LHRi9C70pPQsNC9INCx0L7Qu9GL0L8g0LrQtdC70LXQtNGWINC205nQvdC1INGC0LXRgNCx0LXQu9C80LXQu9C4INC606nQv9Kb0LDRgtCw0YDQu9GLINGN0L/QuNGC0LXQu9C40LjQuSDRgtGW0L3RltC80LXQvSDQttCw0LHRi9C70pPQsNC9IC4g0JHSsdC7ICDQutGW0LvQtdCz0LXQudC70LXRgNC00LjQvSDRgtCw0YHRi9C80LDQu9C00LDQvdGD0YvQvSDSm9Cw0LzRgtCw0LzQsNGB0YvQtyDQtdGC0LXQtNGWLjxiciAvPg0KPGJyIC8+DQogPGJyIC8+DQoyLtCR0LDQu9Cw0LvRgNC00YvSoyDRgdKv0LnQtdC60YLQtdGA0ZbQvdC00LXQs9GWINC00LDQvNGDINC10YDQtdC60YjQutC70ZbQutGC0LXRgNGW0L3QtSDRgtC+0pvRgtCw0LvQsNGC0YvQvSDQsdC+0LvRgdCw0LwgLNCx0LDQu9Cw0pvQsNC5INGC0YPRi9C70pPQsNC9INC60LXQt9GW0L3QtNC1INGB0q/QudC10LrRgtC10YDRltC90ZbSoyDQttKv0LnQtdGB0ZbQvdC00LUg0L7RgdGB0LjRhNC40LrQsNGG0LjRj9GB0Ysg0YLQvtC70YvSmyDSm9Cw0LvRi9C/0YLQsNGB0L/QsNC50LTRiy7QotGD0pPQsNC9INC60LXQt9C00LXQvSDQutC10LnRltC9INGB0q/QudC10LrRgtC10YDRltC90ZbSoyDTqdGB0YPRliDSm9Cw0YDSsdGL0L3QvdC00Ysg0YLSr9GA0LTQtSDQttKv0YDQtdC00ZYuINCh0q/QudC10LrRgtC10YDRltC90ZbSoyDTqdGB0YPRltC90LUg06nRgdGDINCw0LnQvNCw0pPRiyDTmdGB0LXRgCDQtdGC0LXQtNGWINCw0Lsg0pvQsNC70YvSo9C00YvSk9GL0L3Ri9KjINCw0YDRgtGD0Ysg0YHSr9C50LXQutGC0LXRgNC00LjQvSDSm9Cw0LHRi9KT0YvQvdGL0qMg0LDRgNKb0LDRgdGL0qPQtNCwINC20q/Qt9C10LPQtSDQsNGB0LDQtNGLLiDQmtGW0YjQutC10L3RgtCw0Lkg0L3TmdGA0LXRgdGB0YLQtdC70LXRgNC00LjQvSDRgdKv0LnQtdC60YLQtdGA0LjQvdGW0qMg0YLRltC90ZYg0LHQvtGA0L/Ri9C70LTQsNKbINGW0YDRliDRgtCw0LvRiNGL0pvRgtCw0YDRiyDQsdCw0YAg0L3QtdC80LXRgdC1INCx0YPQtNCw0LvRiyDSm9Kx0YDRi9C70YvQvNC00Ysg0LHQvtC70LDQtNGLINC00LXQvyDQsNC50YLRgdCw0pvRgtCwINCx0L7Qu9Cw0LTRiy4g0q7Qu9C60LXQvdC00LXRgCDQvNC10L0g0LHQsNC70LDQu9Cw0YDQtNC40L0g0YHSr9C50LXQutGC0LXRgNGW0L3RltKjINCw0LnRi9GA0LzQsNGI0YvQu9GL0pPRiy0g0LzQuNC90LXRgNCw0LvQtNGL0psg0LfQsNGC0YLQsNGA0YvRi9KjINCw0Lcg0LHQvtC70LDRgtGL0L3QtNGL0pPRi9C90LTQsCDQsdC+0LvRi9C/INC60LXQu9C10LTRli4g0JDQuyDRgdGDINC205nQvdC1INOZ0YDRgtKv0YDQu9GWINC+0YDQs9Cw0L3QuNC60LDQu9GL0psg0LfQsNGC0YLRgNC00YvSoyDQtNC10qPQs9C10LnRliDQttC+0LPQsNGA0Ysg0LHQvtC70YvQvyDQutC10LvQtdC00Lgu0KHQvtC90YvQvNC10L0g0pvQsNGC0LDRgCDQttC+0pPQsNGA0pPRiyAg0YHQtdGA0L/RltC80LTRltC70ZbQutC60LUg0LjQtSDQsdC+0LvRi9C/INC60LXQu9C10LTRli4g0J7QuyDRgtCw0LvRiNGL0pvRgtGLINKb0rHRgNGL0LvRi9C80YvQvdCwINCx0LDQudC70LDQvdGL0YHRgtGLLiDQmtGW0YjQutC10L3RgtCw0Lkg0LHQsNC70LDQu9GA0LTQsNKT0Ysg0pvQsNKj0pvQsCDQttOZ0L3QtSDRgdKv0LnQtdC6INC20q/QudC10YHRltC90ZbSoyDQtdGA0LXQutGI0LXQu9GW0LPRliDQtNC10L3QtSDQv9GA0L7Qv9C+0YDRhtC40Y/Qu9Cw0YDRi9C90YvQvSDQsdGW0YDRgtGW0L3QtNC10L8g06nRgdGD0ZYg0LbTmdC90LUg0LbQtdGC0ZbQu9GD0ZYg0LHQvtC70YvQvyDRgtCw0LHRi9C70LDQtNGLLtCR0LDQu9CwINC90LXSk9Kx0YDQu9GL0Lwg0LbQsNGBINCx0L7Qu9Cw0YLRi9C9INCx0L7Qu9GB0LAg0LHQsNC70LDSm9Cw0LnQtNGL0qMg0LHQsNGB0YvQvdGL0qMg0LzTqdC70YjQtdGA0ZYg0LTQtdC90LXRgdGW0L3RltKjINOp0LvRiNC10LzRltC80LXQvSDRgdCw0LvRi9GB0YLRi9GA0pPQsNC90LTQsCDSr9C70LrQtdC90ZbRgNC10Log0LHQvtC70YvQvyDQutC10LvQtdC00ZYuINCR0LDQu9Cw0L3Ri9KjINC00q/QvdC40LXQs9C1INC60LXQu9Cz0LXQvSDRg9Cw0pvRi9GC0YvQvdC00LAg0LHQsNGB0Ysg0YjQsNC80LDQu9Cw0L8g0LDQudGC0pvQsNC90LTQsCDQttCw0LvQv9GLINC00LXQvdC10YHRltC90LXQvSDRgtOp0YDRgtGC0LXQvSDQsdGW0YDRltC9INCw0Lsg0LXQutGWLdKv0Ygg0LbQsNGB0YLQsCDQsdC10YHRgtC10L0g0LHRltGAINCw0Lsg0LDQu9GC0Ysg0LbQsNGB0YvQvdC00LAg0LDQu9GC0YvQtNCw0L0g0LHRltGAINCx06nQu9GW0LPRltC9INCw0Lsg0LzQtdC60YLQtdC/0LrQtSDQsdCw0YDQsCDQsdCw0YHRgtCw0pPQsNC9INGD0LDSm9GL0YLRi9C90LTQsCA3XDEg0LHTqdC70ZbQs9GW0L0g0pvQsNC80YLQuNC00Ysu0JHQsNGBINGB0q/QudC10LrRgtC10YDRltC90LTQtdCz0ZYg0YLQsNKT0Ysg0LHRltGAINC10YDQtdC60YjQtdC70ZbQs9GWIC0g0LbRltC60YLQtdGA0ZbQvdGW0qMg0LHRltGA0ZbQutC/0LXQs9C10L0g0LDRgNCw0LvQsNGA0YvQvdC00LDSk9GLINC10qPQsdC10LrRgtC10YDRltGW0L3RltKjINCx0L7Qu9GD0YsuINCh0L7QvdGL0LzQtdC9INKb0LDRgtCw0YAg0L3TmdGA0LXRgdGC0LXQu9C10YDQtNC1INC80L7QudGL0L0g0YHSr9C50LXQs9GW0L3RltKjINOZ0LvRgdGW0Lcg0LHQvtC70YPRi9C90LDQvSDQsdCw0LvQsCDQsdCw0YHRi9C9INKx0YHRgtCw0Lkg0LDQu9C80LDRg9GLLiDQkdCw0LvQsNC70YDQtNCw0pPRiyDRgtCw0pPRiyDQsdGW0YAg0LXRgNC10LrRiNC10LvRltCz0ZYg0YHSr9C50LXQutGC0LXRgNGW0L3RltKjINGB0LXRgNC/0ZbQvNC00ZbQu9GW0LPRltC90ZbSoyDQttC+0pPQsNGA0Ysg0LHQvtC70YPRiyDQttOZ0L3QtSDRgtGL0pPRi9C30LTRi9KT0YvQvdGL0qMg0YLTqdC80LXQvdC00ZbQs9GW0L3QtNC1L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2-ші сұрақ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74" table:style-name="ce1">
            <text:p>1067074</text:p>
          </table:table-cell>
          <table:table-cell office:value-type="string" table:style-name="ce1">
            <text:p>kazakh</text:p>
          </table:table-cell>
          <table:table-cell office:value-type="string" table:style-name="ce1">
            <text:p>Билет 14. &amp;lt;br /&amp;gt; 1. 4-жастағы балада бронхтардын қабынуы. Бронхтардын шырышты қабаттының ісіңуіне байланысты экспираторлық ентігу бар. Бронхтардын қандай анатомо-физиологиялық ерекшеліктері обструкцияға әкеледі? &amp;lt;br /&amp;gt; 2.Балалардың сүйек жүйесінің даму ерекшеліктері қандай?&amp;lt;br /&amp;gt;</text:p>
          </table:table-cell>
          <table:table-cell office:value-type="string" table:style-name="ce1">
            <text:p>MS4g0JHQsNC70LDQtNCwINCx0YDQvtC90YXRgtCw0LTRi9KjINKb0LDQsdGL0L3Rg9GLINGC0YvQvdGL0YEg0LDQu9GDINC20L7Qu9C00LDRgNGL0L3Ri9KjINGW0YHRltC90YPRltC90LUg0LbTmdC90LUg0L7Qu9Cw0YDQtNCwINC60ZbQtNGW0YDRltGB0YLRltKjINGC0YPRi9C90LTQsNGD0YvQvdCwINOZ0LrQtdC70YPRliDQvNKv0LzQutGW0L0uINCR0rHQuyDQtNC10Lwg0YjRi9KT0LDRgNGDINC60LXQt9GW0L3QtNC1INGC0YPRi9C90LTQsNC50YLRi9C9INKb0LDRgNGB0YvQu9Cw0YHRgtGL0pvSm9CwINCx0LDQudC70LDQvdGL0YHRgtGLINGN0LrRgdC/0LjRgNCw0YLQvtGA0LvRi9KbINC10L3RgtGW0LPRg9C00ZbSoyDQv9Cw0LnQtNCwINCx0L7Qu9GD0YvQvdCwINOZ0LrQtdC70LXQtNGWLiDQkdGA0L7QvdGF0YLQsNGA0LTRi9KjINC80YPQutC+0LfQtNGLINKb0LDQsdCw0YLRi9C90YvSoyDRltGB0ZbQvdGD0ZYg0LHSsdC7INC10L3RgtGW0LPRg9C00ZYg0LbTmdC90LUg0LTQtdC8INGI0YvSk9Cw0YDRgyDQutC10LfRltC90LTQtdCz0ZYg0pvQsNGA0YHRi9C70LDRgdGC0YvSm9GC0Ysg0L7QtNCw0L0g05nRgNGWINC60q/RiNC10LnRgtC10LTRli4g0JXQvdGC0ZbQs9GD0LTRltKjINGC0YPRi9C90LTQsNGD0YvQvdCwINKb0L7Qt9C00YvRgNKT0YvRiNKT0LAg0L3QtdC80LXRgdC1INKb0LDQsdGL0L3Rg9KT0LAg0YLQvtC90YPRgdGL0L3Ri9KjINC20L7Sk9Cw0YDRi9C70LDRg9GLINCw0YDSm9GL0LvRiyDQttCw0YPQsNC/INCx0LXRgNC10YLRltC9INGC0LXQs9GW0YEg0YHQsNC70LDQu9GLINCx0rHQu9GI0YvSm9C10YLRgtC10YDQtNC1INOZ0YHQtdGAINC10YLQtdC00ZYuINCR0LDQu9Cw0LvQsNGA0LTRi9KjINCx0YDQvtC90YXRgtCw0YDRiyDQttOZ0L3QtSDQsNGD0LAg0YjRi9KT0LDRgNGDINC20L7Qu9C00LDRgNGLINCw0L3QsNGC0L7QvNC40Y/Qu9GL0psg0LbTmdC90LUg0YTQuNC30LjQu9C+0LPQuNGP0LvRi9KbINGC0q/RgNC00LUg0LrRltC90YjQutC10L3RgtCw0Lkg05nRgNGWINGC0L7Qu9GL0psg0LbQtdGC0ZbQu9C80LXQs9C10L0g0LHQvtC70YvQvyDQtdGB0LXQv9GC0LXQu9C10LTRli4g0KHQvtC90LTRi9Kb0YLQsNC9INC60LXQtyDQutC10LvQs9C10L0g0ZbRgdGW0L3Rgywg0pvQsNCx0YvQvdGDINC90LXQvNC10YHQtSDQsdOp0LPQtdGC0YLRltKjINC/0LDQudC00LAg0LHQvtC70YPRiyDQtNC10Lwg0LDQu9GDINC205nQvdC1INC00LXQvCDRiNGL0pPQsNGA0YMg0L/RgNC+0YbQtdGB0YHRltC90LUg0LDQudGC0LDRgNGL0pvRgtCw0Lkg0LrQtdC00LXRgNCz0ZYg0YLRg9KT0YvQt9Cw0LTRiy4g0JbQsNKj0LAg0YLRg9KT0LDQvSDQvdOZ0YDQtdGB0YLQtdC70LXRgNC00ZbSoyDQsdGA0L7QvdGF0LjQvtC70LvQsNC70LDRgNGL0L3Ri9KjINC00LjQsNC80LXRgtGA0ZYg0YjQsNC80LDQvNC10L0gMCwxINC80LwgKNC10YDQtdGB0LXQutGC0LXRgNC00LUg0YjQsNC80LDQvNC10L0gMCw10LzQvCksINGB0L7QuyDSr9GI0ZbQvSDQsdGA0L7QvdGF0YLQsNGA0LTRi9KjIDEg0LzQvCDQs9C1INGW0YHRltC90YPRliDQsNGD0LAg0LbQvtC70LTQsNGA0YvQvdC00LDSk9GLINKb0LDRgNGB0YvQu9Cw0YHRgtGL0pvRgtGLIDE2INC10YHQtSDQsNGA0YLRgtGL0YDQsNGLLiAo0LDQuyDQtdGA0LXRgdC10LrRgtC10YDQtNC1INGC0LXQuiAyLTMg0LXRgdC1INKT0LDQvdCwKS4g0JHRgNC+0L3RhSDSm9Cw0LHRi9GA0pPQsNC70LDRgNGL0L3Ri9KjINGN0L/QuNGC0LXQu9C40Lkg0pvQsNCx0LDRgtGLINC20rHSm9CwINOZ0YDRliDQu9C+0LrQsNC70LTRiyDQuNC80LzRg9C90LTRiyDRgNC10LDQutGG0LjRj9C70LDRgNC00YvSoyDRgtC+0LvRi9KbINC20LXRgtGW0LvQvNC10LPQtdC90LTRltCz0ZYg0pvQsNCx0YvQvdGD0pPQsCDQttOZ0L3QtSDRgdC+0L3Ri9KjINOZ0YHQtdGA0ZbQvdC10L0g0ZbRgdGW0L3Rg9C00ZbSoyDRgtGD0YvQvdC00LDRg9GL0L3QsCDTmdC60LXQu9C10LTRli4g0JHQsNC70LDQu9Cw0YDQtNCwINGI0YvRgNGL0YjRgtGLINKb0LDQsdCw0YLRgtGL0qMg0YHQtdC60YDQtdGC0L7RgNC70YvSmyDQsdC10LvRgdC10L3QtNGW0LvRltCz0ZYg0LbQvtKT0LDRgNGLINCx0L7Qu9GL0L8g0YLQsNCx0YvQu9Cw0LTRiy4g0JHQsNC70LDQu9Cw0YDQtNCwINCx0YDQvtC90YUg0pvQsNCx0YvRgNKT0LDQu9Cw0YDRiyDTmdC70ZYg0LbQtdGC0LrRltC70ZbQutGC0ZYg0pvQsNGC0LDQudC80LDSk9Cw0L3QtNGL0pvRgtCw0L0g0LHSsdC7INC+0LvQsNGA0LTQsCDQutC+0LvQu9Cw0L/RgSDRgtGD0YvQvdC00LDRg9GL0L3QsCDQvNKv0LzQutGW0L0uINKa0L7RgNGL0YLRi9C90LTRi9C70LDQuSDQutC10LvQtTog0Y3QutGB0L/QuNGA0LDRgtC+0YDQu9GL0psg0LXQvdGC0ZbQs9GDINGC0YvQvdGL0YEg0LDQu9GDINC20L7Qu9C00LDRgNGL0L3Ri9KjINGC0LDRgNGL0LvRg9GLINC90LXQvNC10YHQtSDQsdGW0YLQtdC70YPRliDQutC10LfRltC90LTQtSDQvtGA0YvQvSDQsNC70LDRgtGL0L0g0LTQtdC8INCw0LvRgyDQsNC60YLRltGB0ZbQvdGW0qMg0pvQuNGL0L3QtNCw0YPRiy4g0JHSsdC7INGC0YvQvdGL0YEg0YjRi9KT0LDRgNGDINC60LXQt9GW0L3QtNC1INGL0YHSm9GL0YDRi9Kb0YLRiyDQtNCw0YPRi9GB0YLRi9KjINGI0YvSk9GD0YvQvdCwINOZ0LrQtdC70YPRliDQvNKv0LzQutGW0L0uINOo0LnRgtC60LXQvdGWINGC0YvQvdGL0YEg0YjRi9KT0LDRgNGDINC60LXQt9GW0L3QtNC1INC60LXRg9C00LUg0pvRg9GL0YHRi9C90LTQsCDSm9GL0YHRi9C8INCw0YDRgtCw0LTRiyDQsNC7INCx0rHQuyDRgtCw0YDRi9C70pPQsNC9INCx0YDQvtC90YXRgtCw0YDQtNCw0L0g0LDRg9CwINOp0YLRg9GW0L0g0L7QtNCw0L0g05nRgNGWINKb0LjRi9C90LTQsNGC0LDQtNGLLiDQotGL0L3Ri9GBINGI0YvSk9Cw0YDRg9C00YvSoyDRgtC+0LvRi9KbINCx0L7Qu9C80LDRg9GLLCDQsNC70LLQtdC+0LvQsNC70LvQsNGA0LTQsCDQsNGD0LDQvdGL0qMg0rHRgdGC0LDQu9GL0L8g0pvQsNC70YPRiy3TqdC60L/QtdC90ZbSoyDQs9C40L/QtdGA0LLQtdC90LjRgtC70Y/RhtC40Y/RgdGL0L0g0YLRg9GL0L3QtNCw0YLQsNC00YsuICAgICAgICAgICAgICAgICAgICAgICAgICAgICAgICAgICAgICAgICAgICAgICAgICAgICAgICAgICAgICAgICAgICAgICAgICAgICAgICAgICAgIDIuINCR0LDQu9Cw0LvQsNGA0LTQsNKT0Ysg0YHSr9C50LXQuiDQttKv0LnQtdGB0ZbQvdGW0qMg0LTQsNC80YMg0LXRgNC10LrRiNC10LvRltC60YLQtdGA0ZY6INCh0q/QudC10Log0YLRltC00LXRgNGWINC90LXQs9GW0LfRliDQvNC10LXQvdGF0LjQvNCw0LTQsNC9INC00LDQvNC40LTRiy4g0JzQtdC80LHRgNCw0L3QsNC70YvSmyDQttCw0YDSk9Cw0pvRgtGLKNCx0LDRgSDRgdKv0LnQtdCz0ZYpINC+0YHRgtC10L7Qs9C10L3QtdC3INGI0LXQvNGW0YDRiNC10LrRgtGWINGC0q/RgtGW0LrRiNC10LvQtdGAINGA0LXRgtGW0L3QtNC1INC00LDQvNC40LTRiy4g0JHQsNC70LDQu9Cw0YDQtNGL0qMg0YHSr9C50LXQuiDQttKv0LnQtdGB0ZYg0LXRgNC10YHQtdC60YLQtdGA0LTQtdC9INC90LXQs9GW0LfQs9GWINCw0LnRi9GA0LzQsNGI0YvQu9GL0pPRiyDQvtC70LDRgCDRiNC10LzRltGA0YjQtdC60YLRliDRgtGW0L3QvdC10L0g0YLSsdGA0LDQtNGLLiDQodKv0LnQtdC6INC20q/QudC10YHRltC90ZbSoyDQvdC10LPRltC30LPRliDQtNC40YTRhNC10YDQtdC90YbQuNGA0L7QstC60LDRgdGLINC20q/QutGC0ZbQu9GW0LrRgtGW0qMgNC04INCw0L/RgtCw0YHRi9C00LAg0L7RgNGL0L0g0LDQu9Cw0LTRiy4g0prQsNKj0pvQsCDRgdKv0LnQtdC60YLQtdGA0ZYgMyDQtNCw0LzRgyDQutC10LfQtdKj0ZbQvdC10L0g06nRgtC10LTRljogMS4g0LzQtdC80LHRgNCw0L3QsNC70YvSmyDQttKv0LrRgtGW0LvRltC6IDEg0LDQudGL0L3QtNCwLiAyLiDRiNC10LzRltGA0YjQtdC60YLRliDRjdC80LHRgNC40LPQtdC90LXQt9C00ZbSoyA1INCw0L/RgtCw0YHRi9C90LTQsCDQsdCw0YHRgtCw0LvQsNC00YsuIDMuINGB0q/QudC10LrRgtGW0Lot0Y3QvNCx0YDQuNC+0LPQtdC90LXQt9C00ZbSoyA4INCw0L/RgtCw0YHRi9C90LDQvSDTqdC80ZbRgNC00ZbSoyAgMjAtMjEg0LbQsNGB0YvQvdCwINC00LXQudGW0L0g0LbQsNC70pPQsNGB0LDQtNGLLiDQkNC70LTRi9C80LXQvSDRiNC10LzRltGA0YjQtdC60YLRliDQvtGB0YLQtdC+0LPQtdC90LXQt9C00LUg0YHSr9C50LXQutGC0LXQvdGD0LTRltKjINGI0LXQvNGW0YDRiNC10LrRgtGWINC80L7QtNC10LvRliDSm9Cw0LvRi9C/0YLQsNGB0LDQtNGLLiDQntC00LDQvSDQutC10LnRltC9INC/0LXRgNC40L7RgdGC0LXQvdCw0LvQtNGLINC205nQvdC1INGN0L3QtNGF0L7QvdC00YDQsNC70YzQtNGLINGB0q/QudC10LrRgtC10L3RgyDQvtGA0YvQvSDQsNC70LDQtNGLLiDQkdCw0LvQsNC70LDRgNC00YvSoyDSm9Cw0qPSm9CwINGB0q/QudC10LrRgtC10YDRliDTqdGB0YMg0LbTmdC90LUg0LTQsNC80YMg0LHQsNGA0YvRgdGL0L3QtNCwINCw0LnRgtCw0YDQu9GL0pvRgtCw0Lkg06nQt9Cz0LXRgNGW0YHRgtC10YDQs9C1INKx0YjRi9GA0LDQudC00YsuINCV0YDQtdC60YjQtdC70ZbQutGC0LXRgNCz0LUg0LbQsNGC0LDQtNGLOiDQodKv0LnQtdC60YLQtdGAINCw0LvQtNGL0LzQtdC9INGI0LXQvNGW0YDRiNC10LrRgtGWINC80L7QtNC10LvRjNC00LXQvSDRgtKx0YDQsNC00YssINC+0LvQsNGAINC60LXQudGW0L3QvdC10L0g0pPQsNC90LAg0YHSr9C50LXQutGC0LXQvdC10LTRli4gMi4g0rDQt9GL0L0g0YHSr9C50LXQutGC0LXRgNC00ZbSoyDQttC40LXQutGC0LXRgNGW0L3QtSDQttCw0pvRi9C9INC+0YDQvdCw0LvQsNGB0pvQsNC9INGI0LXQvNGW0YDRiNC10Log0YLQsNKb0YLQsNC70LDRgNGLINC+0LvQsNGA0LTRi9KjINOp0YHRg9GW0L3QtSDQttCw0YPQsNC/INCx0LXRgNC10LTRli4gMy4g0KHSr9C50LXQutGC0LXRgCDQsdCw0YHRgtCw0L/Sm9GL0LTQsCDRgdCw0LvRi9GB0YLRi9GA0LzQsNC70Ysg0YLSr9GA0LTQtSDTqdGC0LUg0LbSsdC80YHQsNKbLCDTmdC70YHRltC3INOZ0YDRliDQutC10YPQtdC60YLRliDQsdC+0LvQsNC00YsuINCa0LXQudGW0L0g0L7Qu9Cw0YDQtNCwINC80LjQvdC10YDQsNC70LTQsNC90YMg0L/RgNC+0YbQtdGB0ZYg0L7RgNGL0L0g0LDQu9GL0L8sINC+0LvQsNGAINGC0YvSk9GL0LfQtNCw0LvRi9C/INCx0LXRgNGW0LrRgtC10L3QtSDRgtKv0YHQtdC00ZYuIDQuINCR0LDRgSDRgdKv0LnQtdC60YLQtdGA0ZbQvdC00LUg0YLRg9GL0LvSk9Cw0L3QvdCw0L0g0LrQtdC50ZbQvdCz0ZYg0LHQsNGB0YLQsNC/0pvRiyDQutC10LfQtdKj0LTQtdGA0LTQtSDRgNC+0LTQvdC40YfQvtC6INC90LXQvNC10YHQtSDQtdKj0LHQtdC6INC00LXQvyDQsNGC0LDQu9Cw0YLRi9C9INKb0YDRi9C70YvQvNC00LDRgCDQsdC+0LvQsNC00YsuINC+0LvQsNGAINOp0YLQtSDQttKx0LzRgdCw0psg0LbTmdC90LUg0YLQsNC70YjRi9Kb0YLRiyDQvNC10LzQsdGA0LDQvdCw0LvQsNGAINCw0YDSm9GL0LvRiyDQsdOp0LvRltC90LXQtNGWLiDQldKj0LHQtdC6INCx0LDQu9CwINCx0L7RgdCw0pPQsNC9INC60LXQt9C00LUg0LbQsNGC0YvRgNC00LDQvSDRiNGL0pPRgyDQutC10LfRltC90LTQtSDSm9Cw0YPRltC/0YHRltC3INCx0L7Qu9GD0Ysg0q/RiNGW0L0g0pvQsNC20LXRgi4g0KHQvtC90YvQvNC10L0g0pvQsNGC0LDRgCDQvNC40LTRi9KjINOp0YHRltC90LUg0LbTmdC90LUg0YLRg9GL0LvSk9Cw0L3QvdCwINC60LXQudGW0L3Qs9GWINCx0LDRgSDRgdKv0LnQtdC60YLRltKjINC40LrQtdC80LTQtdC70YPRltC90LUg0LzSr9C80LrRltC90LTRltC6INCx0LXRgNC10LTRli4g0JXSo9Cx0LXQutGC0LXRgCDRg9Cw0pvRi9GCINOp0YLQtSDQutC10LvRltC/INKb0LDRgtCw0Y/QtNGLINC00LAgMTItMTgg0LDQudC70YvSmyDQutC10LfQtdKj0ZbQvdC00LUg0LbQsNCx0YvQu9Cw0LTRiy4gNS4g0KHSr9C50LXQutGC0ZbSoyDQttKx0LzRgdCw0psg0YLRltC90LPQtSDSm9Cw0YLRi9C90LDRgdGLINCx0LDRgNKT0LDQvSDRgdCw0LnRi9C9INOp0LfQs9C10YDQtSDRgtKv0YHQtdC00ZYuINCR0LDQu9CwINOp0YHQutC10L0g0YHQsNC50YvQvSDRgdKv0LnQtdC60YLRltC6INGC0ZbQvSDQsNGA0YLQsNC00YssINGB0LDQu9C80LDSk9GLINC606nQsdC10LnQtSDRgtKv0YHQtdC00ZYuINCR0rHQuyDSm9C+0LfSk9Cw0LvSk9GL0YjRgtGL0pvRgtGLLCDRhNGD0L3QutGG0LjQvtC90LDQu9C00YvSm9GC0Ysg0LbTmdC90LUg0ZbRiNC60ZYg0L7RgNCz0LDQvdC00LDRgNC00YvSoyDSm9C+0YDSk9Cw0LvRg9GL0L0g0pvQsNC80YLQsNC80LDRgdGL0Lcg0LXRgtC10LTRli4g0prQvtGA0YvRgtGL0L3QtNCw0LvQsNGAINCx0L7Qu9GB0LDSmzog0LHQsNC70LDQu9Cw0YDQtNCwINGB0q/QudC10Log0LbSr9C50LXRgdGW0L3QtNC10LPRliDQtNCw0LzRg9C00YvSoyDQvdC10LPRltC30LPRliDQtdGA0LXQutGI0LXQu9GW0LrRgtC10YDRliDQvtC70LDRgCDQsNC70pPQsNGI0YvQvdC00LAg0LrTqdCx0ZbQvdC1INGI0LXQvNGW0YDRiNC10LrRgtC10L0g0YLSsdGA0LDRgtGL0L0g0LHQvtC70YvQvyDQutC10LvQtdC00ZYg0YLQtdC6INC60LXQudGW0L3QvdC10L0g0pPQsNC90LAg0LHQsNC70LAg06nRgdGW0L3QtSDQsdCw0LnQu9Cw0L3Ri9GB0YLRiyDRgdKv0LnQtdC60YLQtdGAINC80LjQvdC10YDQsNC70LTQsNC90YvQvywg0pvQsNGC0LDQudGL0L8g0LbTmdC90LUg0LbSsdC80YHQsNKbINGC0ZbQvdCz0LUg0pvQsNGC0YvRgdGC0Ysg0LzQsNGB0YHQsNGB0Ysg0LrTqdCx0LXQudC1INGC0q/RgdC10LTRli4=</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2" table:style-name="ce1">
            <text:p>915312</text:p>
          </table:table-cell>
          <table:table-cell office:value-type="string" table:style-name="ce1">
            <text:p>russian</text:p>
          </table:table-cell>
          <table:table-cell office:value-type="string" table:style-name="ce1">
            <text:p>Билет 14. &amp;lt;br /&amp;gt; 1.У ребенка 4-х лет воспаление бронхов. На фоне воспаления появилась экспираторная одышка вследствие отека слизистой оболочки бронхов. Какие анатомо-физиологические особенности бронхов привели к развитию обструкции? &amp;lt;br /&amp;gt; 2.Назовите особенности развития костной системы у детей? &amp;lt;br /&amp;gt;</text:p>
          </table:table-cell>
          <table:table-cell office:value-type="string" table:style-name="ce1">
            <text:p>0J7RgdC90L7QstCwINCx0YDQvtGF0L7QsiDRgyDQtNC10YLQtdC5ICAt0Y3RgtC+INGF0YDRj9GJ0LXQstGL0LUg0L/QvtC70YPQutC+0LvRjNGG0LAu0YLRgNCw0YXQtdGPINGA0LDQt9C00LXQu9GP0LXRgtGB0Y8g0L3QsCDQs9C70LDQstC90YvQuSDQv9GAINC4INC70LXQstGL0Lkg0LHRgNC+0L3RhSzQvNC10YHRgtC+INGA0LDQt9C00LXQu9C10L3QuNGPINC90LDQt9GL0LLQsNC10YLRgdGPINCx0LjRhNGD0YDQutCw0YbQuNGPINGC0YDQsNGF0LXQuC7QodC70LjQtyDQvtCx0L7Qu9C+0YfQutCwINGDINCx0YDQvtC90YXQvtCyICDQvtGH0LXQvdGMINC90LXQttC90LDRjyDQuCDQuNC80LXQtdGCINCx0L7Qu9GM0YjQvtC1INC60L7Qu9C40YfQtdGB0YLQstC+INC60YDQvtCy0LXRgdC90L7RgdC90YvRhSDRgdC+0YHRg9C00L7QsiAu0J/QvtC60YDRi9GC0LjQtS3RjdGC0L4g0YLQvtC90LrQuNC5INGB0LvQvtC5INGB0LvQuNC30Lgs0LLRi9GB0YLQu9Cw0L3QvdCwINGG0LjQu9C40L3QtNGA0LjRh9C10YHQutC40Lwg0LzQvdC+0LPQvtGA0Y/QtNC90YvQvCDQvNC10YDRhtCw0YLQtdC70YzQvdGL0Lwg0Y3Qv9C40YLQtdC70LjQtdC8ICzRjdGC0L7RgiDRgdC70L7QuSDQvtCx0LXRgdC/0LXRh9C40LLQsNC10YIg0L/QtdGA0LXQvNC10YnQtdC90LjQtSDQuNC70Lgg0Y3QstCw0LrRg9Cw0YbQuNGOINGB0LvQuNC30LggLtCjINC80LvQsNC00LXQvdGG0LXQsiDQvNCw0LvQtdC90YzQutC+0LUg0LrQvtC70LjRh9C10YHRgtCy0L4g0LPQu9Cw0LTQutC40YUg0LzRi9GI0YYgLNGB0LTQsNCy0LvQtdC90LjQtSDQv9GA0L7QuNGB0YXQvtC00LjRgiDQuNC30LLQvdC1LdGB0L3QsNGA0YPQttC4LtCY0L3QvtGA0L7QtNC90L7QtSDRgtC10LvQviDQv9GA0Lgg0LDRgdC/0LjRgNCw0YbQuNC4INC/0YDQvtC40YHRhdC+0LTQuNGCINC40Lcg0L/RgNCw0LLQvtCz0L4g0LHRgNC+0L3RhdCwLNC/0L7RgtC+0LzRgyDRh9GC0L4g0LDQvdCw0YLQvtC80LjRh9C10YHQutC4INC/0YAg0LHRgNC+0L3RhSDRj9Cy0LvRj9C10YLRgdGPINC/0YDQvtC00L7Qu9C20LXQvdC40LXQvCDRgtGA0LDRhdC10Lgg0Lgg0YLQsNC8INCx0L7Qu9C10LUg0L/RgNGP0LzQvtC5INGD0LPQvtC7LtCY0Lct0LfQsCDQvdC10LTQvtGA0L7Qt9Cy0LjRgtC+0Lkg0LzRi9GI0LXRh9C90L7QuSDRgdC40YHRgtC10LzRiyDQuCDRjdC70LDRgdGC0LjRh9C10YHQutC40YUg0LLQvtC70LrQvtC9INGC0LDQutC40LUg0Y/QstC70LXQvdC40Y8g0LrQsNC6INGB0L/QsNC30Lwg0LHRgNC+0L3RhdC+0LIg0L7Rh9C10L3RjCDQvNCw0LvQviDQstGL0YDQsNC20LXQvdGLLNC90L4g0L/RgNC4INGN0YLQvtC8INGD0LzQtdC90YzRiNCw0LXRgtGB0Y8g0YHQv9C+0YHQvtCx0L3QvtGB0YLRjCDQsdGA0L7QvdGF0L7QsiDQv9C+0LTQtNC10YDQttC40LLQsNGC0Ywg0YHQvtCx0YHRgtCy0LXQvdC90YvQuSDQv9GA0L7RgdCy0LXRgiDQv9GA0Lgg0L7RgtC10LrQtS7QkdGA0L7QvdGF0LjQsNC70YzQvdCw0Y8g0L7QsdGB0YLRgNGD0LrRhtC40Y8gLdGN0YLQviDQv9Cw0YLQvtC70LPQuNGPINGB0LLRj9C30LDQvdC90LDRjyDRgSDQvtGC0LXQutC+0Lwg0YHQu9C40Lcu0L7QsSDQuCDQstGL0LTQtdC70LXQvdC40LXQvCDQstGP0LfQutC+0LPQviDRgdC10LrRgNC10YLQsCjQs9C40L/QtdGA0YHQtdC60YDQtdGG0LjQuCks0YLQsNC6INC60LDQuiDQttC10LvQtdC30Ysg0YMg0LTQtdGC0LXQuSDQsNC60YLQuNCy0L3QviDRhNGD0L3QutGG0LjQvtC90LjRgNGD0Y7RgiDRjdGC0L4g0L/RgNC40LLQvtC00LjRgiDQuiDQsdGA0LDQt9C+0LLQsNC90LjRjiDQuNC30LHRi9GC0L7Rh9C90L7QvNGDINC60L7Quy3QstC+INC80L7QutGA0L7RgtGLLtCc0L7QutGA0L7RgtCwINC/0YDQuCDRjdGC0L4g0YHQutCw0L/Qu9C40LLQsNC10YLRgdGPINCyINC/0YDQvtGB0LLQtdGC0LUg0LHRgNC+0L3RhdC+0LIg0Lgg0YLQtdC8INGB0LDQvNGL0Lwg0YPRgdC40LvQuNCy0LDRjyDRgdC+0YHRgtC+0Y/QvdC40LUg0L7QsdGB0YLRgNGD0LrRhtC40LjQotCw0LrQttC1INGDINC00LXRgtC10Lkg0L3QtdC30YDQtdC70YvQuSDQvNGD0LrQvtGG0LjQsNC70YzRgNC90YvQuSDQutC70LjRgNC10L3RgS7QpNGD0L3QutGG0LjRjyDQstGL0LLQtdC00LXQvdC40LUg0YHQu9C40LfQuCDQuNC3INC00YvRhdCw0YLQtdC70YzQvdGL0YUg0L/Rg9GC0LXQuSDRgyDRjdC/0LjRgtC10LvQuNGPINGA0LXRgdC90LjRgtGH0LDRgtC+0LPQviDQvNC10L3QtdC1INCy0YvRgNCw0LbQtdC90L3QsNGPINGH0LXQvCDRgyDQstC30YDQvtGB0LvRi9GFLtCS0YLQvtGA0LDRjyDRh9Cw0YHRgtGMLiDQkdC+0LvRjNGI0LDRjyDRh9Cw0YHRgtGMINC60L7RgdGC0LXQuSDRgyDQtNC10YLQtdC5INGA0LDQt9Cy0LjQstCw0Y7RgtGB0Y8g0LIg0YLQtdGH0LXQvdC40Lgg0YLRgNC10YUg0YHRgtCw0LTQuNC5IC7Qv9C10YDQstCw0Y8gLdGN0YLQviDQv9C10YDQtdC/0L7QvdGH0LDRgtCw0Y8g0YHRgtCw0LTQuNGPINC/0YDQvtGF0L7QtNGP0YnQsNGPINC/0YDQuNC80LXRgNC90L4g0L3QsCA1INC90LXQtNC10LvQtSDRgNCw0LfQstC40YLQuNGPIC7QldC1INC+0YHQvtCx0LXQvdC90L7RgdGC0Lgg0Y3RgtC+INGB0LPRg9GJ0LXQvdC40LUg0LrQu9C10YLQvtC6INC80LXQt9C10L3RhdC40LzRiyAu0JLRgtC+0YDQsNGPINGB0YLQsNC00LjRjyAt0YXRgNGP0YnQtdCy0LDRjyDQv9GA0LjQvNC10YDQvdC+IDYg0L3QtdC00LXQu9GPINGN0LzQsdGA0LjQvtCz0LXQvdC10LfQsC7QkdC+0LvRjNGI0LDRjyDRh9Cw0YHRgtGMINGB0L7QtdC00LjQvdC40YLQtdC70YzQvdC+0YLQutCw0L3Ri9GFINC+0LHRgNCw0LfQvtCy0LDQvdC40Lkg0LfQsNC80LXRidCw0LXRgtGB0Y8g0L3QsCDRhdGA0Y/RidC10LLRg9GOINGC0LrQsNC90Yws0YLQtdC8INGB0LDQvNGL0Lwg0L/QvtGP0LLQu9GP0Y7RgtGB0Y8g0YXRgNGP0YnQtdCy0YvQtSDQvNC+0LTQtdC70Lgg0LHRg9C00YPRidC40YUg0LrQvtGB0YLQvdGL0YUg0YHRgtGA0YPQutGC0YPRgC4zINGB0YLQsNC00LjRjyAt0LrQvtGB0YLQvdCw0Y8gLtCf0YDQvtGF0L7QtNC40YIg0LIgNi04INC90LXQtNC10LvRjiDRgNCw0LfQstC40YLQuNGPINGN0LzQsdGA0LjQvtCz0LXQvdC10LfQsC7QsiDRjdGC0L7QuSDRgdGC0LDQtNC40Lgg0YXRgNGP0YnQtdCy0YvQtSDQvNC+0LTQtdC70Lgg0LfQsNC80LXQvdGP0Y7RgtGB0Y8g0L3QsCDQutC+0YHRgtC90YvQtS7Qn9C+0YHQu9C10LUg0YDQvtC20LTQtdC90LjRjyDQv9GA0L7RhtC10YHRgSDRhNC+0YDQvNC40YDQvtCy0LDQvdC40Y8g0LrQvtGB0YLQvdC+0Lkg0YLQutCw0L3QuCDQtdGJ0LUg0LTQviDQutC+0L3RhtCwINC90LUg0LfQsNCy0LXRgNGI0LXQvS7QoyDRgtGA0YPQsdGH0LDRgtGL0YUg0LrQvtGB0YLQtdC5INC00LjQsNGE0LjQt9GLINC/0YDQtdC00YHRgtCw0LLQu9C10L3RiyDQutC+0YHRgtC90L7QuSDRgtC60LDQvdGM0Y4gLtCQINC/0L7QtNCw0LLQu9GP0Y7RidC10LUg0LHQvtC70YzRiNC40L3RgdGC0LLQviDRjdC/0LjRhNC40LfQvtCyLNCy0YHQtSDQs9GD0LHRh9Cw0YLRi9C1INC60L7RgdGC0Lgg0LrQuNGB0YLQuCAs0LAg0YLQsNC60LbQtSDRh9Cw0YHRgtGMINC60L7RgdGC0LXQuSDRgdGC0L7Qv9GLINGB0L7RgdGC0L7Rj9GCINC40Lcg0YXRgNGP0YnQtdCy0L7QuSDRgtC60LDQvdC4IC7QntC60L7RgdGC0LXQvdC40Y8g0YLRh9C60Lgg0L3QsNGH0LjQvdCw0Y7RgtGB0Y8g0L/RgNC+0Y/QstC70Y/RgtGB0Y8g0YLQvtC70YzQutC+INC90LAg0L/QvtGB0LvQtdC00L3QtdC8INC80LXRgdGP0YbQtSDRjdC80LHRgNC40L7Qs9C10L3QtdC30LAu0J/QvtGB0LvQtSDQv9C+0Y/QstC70LXQvdC40Y8g0L3QsCDRgdCy0LXRgiDQutC+0YHRgtC4INC90LDRh9C40L3QsNGO0YIg0LjQvdGC0LXQvdGB0LjQstC90YvQuSDRgNC+0YHRgi7Ql9CwINGB0YfQtdGCINC90LDQu9C40YfQuNGPINGN0L/QuNGE0LjQt9Cw0YDQvdC+0LPQviDRhdGA0Y/RidCwKNGN0YLQviDQvNCw0LvQtdC90YzQutCw0Y8g0L/RgNC+0YHQu9C+0LnQutCwINGF0YAu0YLQutCw0L3QuNC80LXQttC00YMg0L7QutC+0YHRgtC10L3QuNCy0LDRjtGJ0LjQvCDRjdC/0LjRhNC40LfQvtC8INC4INC00LjQsNGE0LjQt9C+0LwgKSDQv9GA0L7QuNGB0YXQvtC00LjRgiDRgNC+0YHRgiDQutC+0YHRgtC10Lkg0LIg0LTQu9C40L3Rgy7QoyDQtNCw0L3QvdC+0LPQviDRhdGA0Y/RidCwINGE0YPQvdC60YbQuNGPIC3QutC+0YHRgtC10L7QsdGA0LDQt9GD0Y7RidCw0Y8g0LTQviDQtNC+0YHRgtC40LbQtdC90LjRjyDQutC+0YHRgtC4INC/0L7Qu9C90L7Qs9C+INGA0LDQt9C80LXRgNCwINC00L4g0L7QutC+0L3Rh9Cw0L3QuNGPINC/0L7Qu9C+0LLQs9C+INGB0L7Qt9GA0LXQstCw0L3QuNGPICjQv9GA0LjQvNC10YDQvdC+INC00L4gMTctMjUg0LvQtdGCKS7QlNCw0LvQtdC1INGN0YLQviDQvtCx0YDQsNC30L7QstCw0L3QuNC1INC40YHRh9C10LfQsNC10YIgLNC30LDQvNC10YnQsNGP0YHRjCDQvdCwINC60L7RgdGC0L3Rg9GOINGC0LrQsNC90Ywg0Lgg0YHRgNCw0YHRgtCw0Y/RgdGMINGBINGN0L/QuNGE0LjQt9C+0Lwu0KDQvtGB0YIg0LrQvtGB0YLQvdGL0YUg0L7QsdGA0LDQt9C+0LLQsNC90LjQuSDQsiDRgtC+0LvRidC40L3RgyDQv9GA0L7QuNGB0YXQvtC00LjRgiDQt9CwINGB0YfQtdGCINC90LDQtNC60L7RgdGC0L3QuNGG0YsgLNCy0L4g0LLQvdGD0YLRgNC10L3QvdC10Lwg0YHQu9C+0LUg0LzQvtC70L7QtNGL0LUg0LrQu9C10YLQutC4INC60L7RgdGC0L3QvtC5INGC0LrQsNC90Lgo0L7RgdGC0LXQvtCx0LvQsNGB0YLRiykgINGE0L7RgNC80LjRgNGD0Y7RgiDQv9C70LDRgdGC0LjQvdC60YMgLdGN0YLQviDRj9Cy0LvRj9C10YLRgdGPINC/0LXRgNC40L7RgdGC0LDQu9GM0L3Ri9C5INGB0L/QvtGB0L7QsSDRgNCw0LfQstC40YLQuNGPINC60L7RgdGC0L3QvtC5INGC0LrQsNC90Lgu</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Индекс подобия 15%</text:p>
          </table:table-cell>
          <table:table-cell office:value-type="float" office:value="0" table:style-name="ce1">
            <text:p>0</text:p>
          </table:table-cell>
          <table:table-cell table:number-columns-repeated="16376"/>
        </table:table-row>
        <table:table-row table:style-name="ro1">
          <table:table-cell office:value-type="float" office:value="1066960" table:style-name="ce1">
            <text:p>1066960</text:p>
          </table:table-cell>
          <table:table-cell office:value-type="string" table:style-name="ce1">
            <text:p>russian</text:p>
          </table:table-cell>
          <table:table-cell office:value-type="string" table:style-name="ce1">
            <text:p>Билет 14. &amp;lt;br /&amp;gt; 1.У ребенка 4-х лет воспаление бронхов. На фоне воспаления появилась экспираторная одышка вследствие отека слизистой оболочки бронхов. Какие анатомо-физиологические особенности бронхов привели к развитию обструкции? &amp;lt;br /&amp;gt; 2.Назовите особенности развития костной системы у детей? &amp;lt;br /&amp;gt;</text:p>
          </table:table-cell>
          <table:table-cell office:value-type="string" table:style-name="ce1">
            <text:p>MS4g0KDQsNC30LLQuNGC0LjQtSDQtNGL0YXQsNGC0LXQu9GM0L3QvtC5INGB0LjRgdGC0LXQvNGLINGDINC00LXRgtC10Lkg0L/RgNC+0LTQvtC70LbQsNC10YLRgdGPINCyINC/0L7RgdGC0L3QsNGC0LDQu9GM0L3QvtC8INC/0LXRgNC40L7QtNC1INC00L4gNi04INC70LXRgiwg0YfRgtC+INC30L3QsNGH0LjRgiwg0YXQvtGC0Ywg0LLRgdC1INC+0YHQvdC+0LLQvdGL0LUg0L7RgNCz0LDQvdGLINC4INGB0YTQvtGA0LzQuNGA0L7QstCw0L3Riywg0L3QviDRhNGD0L3QutGG0LjQvtC90LDQu9GM0L3QviDQvtC90Lgg0LXRidC1INC90LXQt9GA0LXQu9GL0LUuINCjINC00LXRgtC10Lkg0YDQsNC90L3QtdCz0L4g0LLQvtC30YDQsNGB0YLQsCDQuNC80LXRjtGC0YHRjyDRgNGP0LQg0LDQvdCw0YLQvtC80L4t0YTQuNC30LjQvtC70L7Qs9C40YfQtdGB0LrQuNGFINC+0YHQvtCx0LXQvdC90L7RgdGC0LXQuSwg0YfRgtC+INGB0L/QvtGB0L7QsdGB0YLQstGD0Y7RgiDQu9C10LPQutC+0LzRgyDRgNCw0LfQstC40YLQuNGOINC+0LHRgdGC0YDRg9C60YbQuNC4INC4INGN0LrRgdC/0LjRgNCw0YLQvtGA0L3QvtC5INC+0LTRi9GI0LrQuCwg0YHQvtC+0YLQstC10YLRgdGC0LLQtdC90L3QviDQuCDQs9C40L/QvtC60YHQuNC4LiDQktC+LdC/0LXRgNCy0YvRhSwg0YMg0LTQtdGC0LXQuSDQvtGC0L3QvtGB0LjRgtC10LvRjNC90L4g0LLQt9GA0L7RgdC70YvRhSDQv9GA0L7RgdCy0LXRgiDQtNGL0YXQsNGC0LXQu9GM0L3Ri9GFINC/0YPRgtC10LksINC40YUg0LTQuNCw0LzQtdGC0YAg0L3QsNC80L3QvtCz0L4g0YPQttC1ICjQtNC+IDUg0LzQvCkuINCS0L4t0LLRgtC+0YDRi9GFLCDRgdC70LjQt9C40YHRgtCw0Y8g0L7QsdC+0LvQvtGH0LrQsCDQtNC10YLQtdC5INCx0L7Qu9C10LUg0YDRi9GF0LvQsNGPLCDRh9GC0L4g0LTQsNC10YIg0LLQvtC30LzQvtC20L3QvtGB0YLRjCDRgNCw0LfQstC40YLQuNGOINC+0YLQtdC60LAuINCi0LDQutC20LUg0Y3RgtC+0LzRgyDRgdC/0L7RgdC+0LHRgdGC0LLRg9C10YIg0YPRgdC40LvQtdC90L3QvtC1INC60YDQvtCy0L7RgdC90LDQsdC20LXQvdC40LUg0LHRgNC+0L3RhdC+0LIg0Lgg0LXQtSDRgdC70LjQt9C40YHRgtC+0LksINCwINC/0L7QvNC40LzQviDRjdGC0L7Qs9C+INC4INC/0L7QstGL0YjQtdC90L3QsNGPINC/0YDQvtC90LjRhtCw0LXQvNC+0YHRgtGMINGB0LvQuNC30LjRgdGC0L7QuSDRg9GB0YPQs9GD0LHQu9GP0LXRgiDRgdC40YLRg9Cw0YbQuNGOLiDQlNC+0L/QvtC70L3QuNGC0LXQu9GM0L3QviDQuiDRjdGC0L7QvNGDINCyINC00YvRhdCw0YLQtdC70YzQvdGL0YUg0L/Rg9GC0Y/RhSDQtNC10YLQtdC5INGF0L7RgNC+0YjQviDRgNCw0LfQstC40YLQsCDQttC10LvQtdC30LjRgdGC0LDRjyDRgtC60LDQvdGMINC4INCw0LrRgtC40LLQvdC+INC/0YDQvtC40YHRhdC+0LTQuNGCINGB0LXQutGA0LXRhtC40Y8g0YHQu9C40LfQuCwg0YfRgtC+INGB0L/QvtGB0L7QsdGB0YLQstGD0LXRgiDRgdGD0LbQtdC90LjRjiDQv9GA0L7RgdCy0LXRgtCwINC00YvRhdCw0YLQtdC70YzQvdGL0YUg0L/Rg9GC0LXQuS4g0JIt0YLRgNC10YLRjNC40YUsINGF0L7RgtGMINCz0LvQsNC00LrQvtC80YvRiNC10YfQvdGL0LUg0LrQu9C10YLQutC4INC00LXRgtC10Lkg0LXRidC1INC90LXQt9GA0LXQu9GL0LUsINC90L4g0L7QvdC4INC70LXQs9C60L4g0YDQsNC30LTRgNCw0LbQuNC80YssINC/0L7RjdGC0L7QvNGDINCyINC+0YLQstC10YIg0L3QsCDQutCw0LrQvtC5INC70LjQsdC+INGA0LDQt9C00YDQsNC20LjRgtC10LvRjCAo0L/Ri9C70YwsINGA0LXQt9C60LjQtSDQt9Cw0L/QsNGF0LgsINC/0YvQu9GM0YbQsCkg0L7QvdC4INGA0LXQt9C60L4g0YHQv9Cw0LfQvNC40YDRg9GO0YLRgdGPLCDQstGL0LfRi9Cy0LDRjyDQvtCx0YHRgtGA0YPQutGG0LjRjiDQsdGA0L7QvdGF0L7Qsi4g0KLQsNC60LbQtSDQvNC+0LbQvdC+INC+0YLQvNC10YLQuNGC0Ywg0YLQviwg0YfRgtC+INC80LXRgdGC0L3Ri9C5INC40LzQvNGD0L3QuNGC0LXRgiDQtNGL0YXQsNGC0LXQu9GM0L3QvtC5INGB0LjRgdGC0LXQvNGLINC10YnQtSDQvdC1INC00L4g0LrQvtC90YbQsCDRgNCw0LfQstC40YIgKNC90LXQtNC+0YHRgtCw0YLQvtGH0L3QsNGPINGB0LXQutGA0LXRhtC40Y8gSWdBLCDQu9C40LfQvtGG0LjQvNCwLCDQvNC10YHRgtC90YvRhSDQutC70LXRgtC+0Log0LjQvNC80YPQvdC40YLQtdGCINC4INGCLtC0LiksINC70Y7QsdC+0Lkg0LHQsNC60YLQtdGA0LjQsNC70YzQvdGL0Lkg0L/QsNGC0L7Qs9C10L0g0YHQv9C+0YHQvtCx0YHRgtCy0YPQtdGCINGA0LDQt9Cy0LjRgtC40Y4g0LLQvtGB0L/QsNC70LXQvdC40Y8g0Lgg0YHRg9C20LXQvdC40Y4g0L/RgNC+0YHQstC10YLQsC4g0J7QsdGB0YLRgNGD0LrRhtC40Y8g0YMg0LTQtdGC0LXQuSDQstGL0YDQsNC20LDQtdGC0YHRjyDQsiDQstC40LTQtSDRjdC60YHQv9C40YDQsNGC0L7RgNC90L7QuSDQvtC00YvRiNC60LgsINC/0YDQuCDQutC+0YLQvtGA0L7QvCDRg9C00LvQuNC90Y/QtdGC0YHRjyDQstGL0LTQvtGFLiDQntGB0LvQvtC20L3QtdC90LjRjyDQtNCw0Y7RgiDQv9C10YDQutGD0YHRgdC40L7QvdC90L4g0LrQvtGA0L7QsdC+0YfQvdGL0Lkg0LfQstGD0LosINCz0LjQv9C+0LrRgdC40Y8sINGG0LjQsNC90L7QtyDQuCDRgi7QtC4gICAgICAgICAgICAgICAgICAgICAgICAgICAgICAgICAgICAgICAgICAgICAgICAgICAgICAgICAgICAgICAgICAgICAgICAyLiDQoNCw0LfQstC40YLQuNC1INC60L7RgdGC0L3QvtC5INGB0LjRgdGC0LXQvNGLICjQutC+0YHRgtC4INGH0LXRgNC10L/QsCwg0L7RgdC10LLQvtCz0L4g0YHQutC10LvQtdGC0LAg0Lgg0YIu0LQuKSDQv9GA0L7QuNGB0YXQvtC00Y/RgiDQstC+INCy0L3Rg9GC0YDQuNGD0YLRgNC+0LHQvdC+0Lwg0L/QtdGA0LjQvtC00LUg0L/QviDRhdGA0Y/RidC10LLQvtC80YMg0YLQuNC/0YMuINCe0LTQvdCw0LrQviDQtdC1INCw0LrRgtC40LLQvdC+0LUg0YDQsNC30LLQuNGC0LjQtSDQv9GA0L7QtNC+0LvQttCw0LXRgtGB0Y8g0Lgg0L/QvtGB0LvQtSDRgNC+0LbQtNC10L3QuNGPLiDQntGB0L7QsdC10L3QvdC+0YHRgtGP0LzQuCDRgNCw0LfQstC40YLQuNGPINGP0LLQu9GP0LXRgtGB0Y8g0YLQviwg0YfRgtC+INC40LfQvdCw0YfQsNC70YzQvdC+INC00LXRgtGB0LrQuNC1INC60L7RgdGC0Lgg0YHQvtC00LXRgNC20LDRgiDQsiDRgdC10LHQtSDQsdC+0LvRjNGI0LUg0L7RgNCz0LDQvdC40YfQtdGB0LrQuNGFINGB0L7QtdC00LjQvdC10L3QuNC5ICjQsdC10LvQutC4LCDQutC+0LvQu9Cw0LPQtdC9INC4INGCLtC0Likg0L7QutC+0LvQviA4NSUsINC4INGC0L7Qu9GM0LrQviDQv9C+INC80LXRgNC1INCy0LfRgNC+0YHQu9C10L3QuNGPINCx0L7Qu9GM0YjQsNGPINGH0LDRgdGC0Ywg0LrQvtGB0YLQuCDQt9Cw0LzQtdGJ0LDQtdGC0YHRjyDQvNC40L3QtdGA0LDQu9GM0L3Ri9C80Lgg0YHQvtC10LTQuNC90LXQvdC40Y/QvNC4ICjRgdC+0LvRj9C80LgsINC60LDQu9GM0YbQuNC5INC4INGCLtC0LikuINCh0LrQtdC70LXRgiDQtNC10YLQtdC5INGA0LDQvdC90LXQs9C+INCy0L7Qt9GA0LDRgdGC0LAg0L/RgNC10LTRgdGC0LDQstC70LXQvdCwINGF0YDRj9GJ0LDQvNC4LCDRgdC+0LXQtNC40L3QuNGC0LXQu9GM0L3QvtC5INGC0LrQsNC90YzRjiwg0LjQvNC10L3QvdC+INC/0L7RjdGC0L7QvNGDINC+0L3QuCDQvdCw0LjQsdC+0LvQtdC1INGN0LvQsNGB0YLQuNGH0L3Ri9C1INC4INCz0LjQsdC60LjQtS4g0K3RgtC+INC+0LHRitGP0YHQvdGP0LXRgiwg0L/QvtGH0LXQvNGDINC/0LXRgNC10LvQvtC80Ysg0YMg0LTQtdGC0LXQuSDQstGB0YLRgNC10YfQsNGO0YLRgdGPINGA0LXQtNC60L4sINCwINC10YHQu9C4INC4INCy0YHRgtGA0LXRh9Cw0Y7RgtGB0Y8sINGC0L4g0LfQsNC20LjQstCw0Y7RgiDQtNC+0LLQvtC70YzQvdC+INCx0YvRgdGC0YDQviwg0L/QviDRgdGA0LDQstC90LXQvdC40Y4g0YHQviDQstC30YDQvtGB0LvRi9C80LggKNC/0LXRgNC10LvQvtC8INC/0L4g0YLQuNC/0YMgItC30LXQu9C10L3QvtC5INC/0LDQu9C60LgiKS4g0JrQvtGB0YLQuCDRgNCw0YHRgtGD0YIg0YMg0LTQtdGC0LXQuSDQvdCw0LjQsdC+0LvQtdC1INCw0LrRgtC40LLQvdC+INC/0LXRgNCy0YvQtSDQs9C+0LTRiyDQttC40LfQvdC4INCyINC00LvQuNC90YMsINC/0L7QtCDQtNC10LnRgdGC0LLQuNC10Lwg0YHQvtC80LDRgtC+0YLRgNC+0L/QvdC+0LPQviDQs9C+0YDQvNC+0L3QsCAo0LPQvtGA0LzQvtC9INC/0LXRgNC10LTQvdC10Lkg0LTQvtC70Lgg0LPQuNC/0L7RhNC40LfQsCksINC4INGC0L7Qu9GM0LrQviDQv9C+0YHQu9C1INGN0YLQvtCz0L4g0LHQu9Cw0LPQvtC00LDRgNGPINC00LXQu9C10L3QuNGOINC+0YHRgtC10L7QsdC70LDRgdGC0L7QsiDQsiDQvdCw0LTQutC+0YHRgtC90LjRhtC1ICjRgSDQtdC1INCy0L3Rg9GC0YDQtdC90L3QtdC5INC/0L7QstC10YDRhdC90L7RgdGC0LggItC/0LXRgNC40L7RgdGC0LDQu9GM0L3Ri9C5INGC0LjQvyDRgNC10LzQvtC00LXQu9C40YDQvtCy0LDQvdC40Y8iKSwg0LrQvtGB0YLQuCDRgNCw0YHRgtGD0YIg0LIg0YLQvtC70YnQuNC90YMuINCe0LrQvtGB0YLQtdC90LXQvdC40Y4g0LrQvtGB0YLQtdC5INGB0L/QvtGB0L7QsdGB0YLQstGD0LXRgiDRgtC+0YfQutC4INC+0YHRgdC40YTQuNC60LDRhtC40LgsINC40LvQuCDRj9C00YDQsCDQvtC60L7RgdGC0LXQvdC10L3QuNGPICjQv9C10YDQstGL0LUg0YLQvtGH0LrQuCDQv9C+0Y/QstC70Y/RjtGC0YHRjyDQvdCwINC/0L7RgdC70LXQtNC90LjRhSDQvNC10YHRj9GG0LDRhSDQstC90YPRgtGA0LjRg9GC0YDQvtCx0L3QvtCz0L4g0YDQsNC30LLQuNGC0LjRjykuINChINCy0L7Qt9GA0LDRgdGC0L7QvCDQutC+0LvQuNGH0LXRgdGC0LLQviDRjdGC0LjRhSDRj9C00LXRgCDRg9Cy0LXQu9C40YfQuNCy0LDQtdGC0YHRjy4g0KDQsNC30LLQuNGC0LjQtSDQutC+0YHRgtC90L7QuSDRgdC40YHRgtC10LzRiyDRgyDQtNC10YLQtdC5INC90LDRh9C40L3QsNC10YLRgdGPINGBIDUg0L3QtdC00LXQu9C4INCy0L3Rg9GC0YDQuNGD0YLRgNC+0LHQvdC+0LPQviDRgNCw0LfQstC40YLQuNGPLCDQuCDRjdGC0LAg0YHRgtCw0LTQuNGPINC90LDQt9GL0LLQsNC10YLRgdGPINC/0LXRgNC10L/QvtC90YfQsNGC0L7QuSwg0L/RgNC+0LjRgdGF0L7QtNC40YIg0YPQv9C70L7RgtC90LXQvdC40LUg0LrQu9C10YLQvtC6INC80LXQt9C10L3RhdC40LzRiyDQsiDQvNC10YHRgtCw0YUg0LHRg9C00YPRidC40YUg0LrQvtGB0YLQtdC5LiDQn9C+0YHQu9C1INC/0LXRgNC10L/QvtC90YfQsNGC0L7QuSDRgdGC0LDQtNC40Lgg0L3QsNGB0YLRg9C/0LDQtdGCINGF0YDRj9GJ0LXQstCw0Y8g0YHRgtCw0LTQuNGPLCDQsiDQutC+0YLQvtGA0L7QuSDQvNC10LfQtdC90YXQuNC80LAg0LzQtdC90Y/QtdGCINGB0LLQvtGOINGB0YLRgNGD0LrRgtGD0YDRgyDQvdCwINGF0YDRj9GJ0LXQstGD0Y4g0YLQutCw0L3RjC4g0Jgg0L3QsCDRgtGA0LXRgtGM0LXQuSDRgdGC0LDQtNC40LgsINC60L7RgtC+0YDQsNGPINGB0L7QvtGC0LLQtdGC0YHRgtCy0YPQtdGCIDYtOCDQvdC10LTQtdC70Y/QvCDQstC90YPRgtGA0LjRg9GC0YDQvtCx0L3QvtCz0L4g0YDQsNC30LLQuNGC0LjRjywg0YXRgNGP0YnQtdCy0LDRjyDRgtC60LDQvdGMINC/0L7RgdGC0LXQv9C10L3QvdC+INC30LDQvNC10YnQsNC10YLRgdGPINC90LAg0LrQvtGB0YLQvdGD0Y4uINCf0L7RjdGC0L7QvNGDINC00LjQsNGE0LjQt9GLINGC0YDRg9Cx0YfQsNGC0YvRhSDQutC+0YHRgtC10Lkg0YHQvtGB0YLQvtGP0YIg0LjQtyDQutC+0YHRgtC90L7QuSDRgtC60LDQvdC4LCDRgtC+0LPQtNCwINC60LDQuiDRjdC/0LjRhNC40LfRiywg0LPRg9Cx0YfQsNGC0YvQtSDQutC+0YHRgtC4INC60LjRgdGC0LXQuSDQuCDRgdGC0L7Qv9GLINGB0L7RgdGC0L7Rj9GCINC40Lcg0YXRgNGP0YnQtdCy0L7QuSDRgtC60LDQvdC4LiDQntC60L7QvdGH0LDRgtC10LvRjNC90L7QtSDRgNCw0LfQstC40YLQuNC1INC60L7RgdGC0L3QvtC5INGB0LjRgdGC0LXQvNGLINC90LDRgdGC0YPQv9Cw0LXRgiDRgtC+0LvRjNC60L4g0LIgMTgtMjUg0LvQtdGCLiDQntGB0L7QsdC10L3QvdC+0YHRgtGM0Y4g0YDQsNC30LLQuNGC0LjRjyDQutC+0YHRgtC90L7QuSDRgdC40YHRgtC10LzRiyDQtNC10YLQtdC5INGC0LDQutC20LUg0Y/QstC70Y/QtdGC0YHRjyDRgtC+LCDRh9GC0L4g0YDQtdC80L7QtNC10LvQuNGA0L7QstCw0L3QuNC1INC60L7RgdGC0L3QvtC5INGC0LrQsNC90Lgg0YMg0LTQtdGC0LXQuSDQv9GA0L7QuNGB0YXQvtC00LjRgiDQvdCw0LzQvdC+0LPQviDQsNC60YLQuNCy0L3QtdC1INGH0LXQvCDRgyDQstC30YDQvtGB0LvRi9GFLiDQldCh0LvQuCDQt9CwINC/0LXRgNCy0YvQuSDQs9C+0LQg0LbQuNC30L3QuCDRgyDRgNC10LHQtdC90LrQsCDQvtCx0L3QvtCy0LvRj9C10YLRgdGPINC+0LrQvtC70L4gNTAtNzAlINC60L7RgdGC0L3QvtC5INGC0LrQsNC90LgsINGDINCy0LfRgNC+0YHQu9GL0YUg0LbQtSDQt9CwINCz0L7QtCDQvtCx0L3QvtCy0LvRj9C10YLRgdGPINGC0L7Qu9GM0LrQviA1JS4g0K3RgtC+INC80L7QttC90L4g0L7QsdGK0Y/RgdC90LjRgtGMINGC0LXQvCwg0YfRgtC+INC60YDQvtCy0L7RgdC90LDQsdC20LXQvdC40LUg0LrQvtGB0YLQtdC5INC90LDQvNC90L7Qs9C+INC+0LHQuNC70YzQvdC10LUg0Lgg0LjQvdGC0LXQvdGB0LjQstC90LXQtSDRh9C10Lwg0YMg0LLQt9GA0L7RgdC70YvRhS4g0J3QviDRjdGC0L4g0LbQtSDQuCDRj9Cy0LvRj9C10YLRgdGPINGD0YHQu9C+0LLQuNC10Lwg0LTQu9GPINC/0YDQvtC90LjQutC90L7QstC10L3QuNGPINC40L3RhNC10LrRhtC40Lgg0LIg0LrQvtGB0YLQuCDQuCDQtNCw0LvRjNC90LXQudGI0LXQs9C+INCy0L7RgdC/0LDQu9C10L3QuNGPLCDQuNC80LXQvdC90L4g0L/QvtGN0YLQvtC80YMg0YMg0LTQtdGC0LXQuSDRh9Cw0YnQtSDQstGB0LXQs9C+INCx0YvQstCw0LXRgiDQvtGB0YLQtdC+0LzQuNC10LvQuNGCLiDQlNCb0Y8g0L3QvtGA0LzQsNC70YzQvdC+0LPQviDRgNCw0LfQstC40YLQuNGPINC60L7RgdGC0L3QvtC5INGB0LjRgdGC0LXQvNGLLCDQvdC10L7QsdGF0L7QtNC40LzQviwg0YfRgtC+0LHRiyDRgNC10LHQtdC90L7QuiDQv9C+0LvRg9GH0LDQuyDQstGB0LUg0L3Rg9C20L3Ri9C1INCy0LjRgtCw0LzQuNC90Ysg0Lgg0LzQuNC90LXRgNCw0LvRiywg0LIg0L7RgdC+0LHQtdC90L3QvtGB0YLQuCDQstC40YLQsNC80LjQvSDQlCDQuCDQutCw0LvRjNGG0LjQuS4g0JjRhSDQtNC10YTQuNGG0LjRgiDQvNC+0LbQtdGCINC/0YDQuNCy0LXRgdGC0Lgg0Log0YDQsNGF0LjRgtGD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02" table:style-name="ce1">
            <text:p>1067002</text:p>
          </table:table-cell>
          <table:table-cell office:value-type="string" table:style-name="ce1">
            <text:p>russian</text:p>
          </table:table-cell>
          <table:table-cell office:value-type="string" table:style-name="ce1">
            <text:p>Билет 14. &amp;lt;br /&amp;gt; 1.У ребенка 4-х лет воспаление бронхов. На фоне воспаления появилась экспираторная одышка вследствие отека слизистой оболочки бронхов. Какие анатомо-физиологические особенности бронхов привели к развитию обструкции? &amp;lt;br /&amp;gt; 2.Назовите особенности развития костной системы у детей? &amp;lt;br /&amp;gt;</text:p>
          </table:table-cell>
          <table:table-cell office:value-type="string" table:style-name="ce1">
            <text:p>MSnQuiDQvNC+0LzQtdC90YLRgyDRgNC+0LbQtNC10L3QuNGPINGDINGA0LXQsdC10L3QutCwINGD0LbQtSDQv9C+0LvQvdC+0YHRgtGM0Y4g0YHRhNC+0YDQvNC40YDQvtCy0LDQvdCwINCx0YDQvtC90YXQuNCw0LvRjNC90L7QtSDQtNC10YDQtdCy0L4gLNC+0YHQvdC+0LLRgyDQsdGA0L7QvdGF0L7QsiDRgdC+0YHRgtCw0LLQu9GP0LXRgiDRhdGA0Y/RidC10LLRi9C1INC/0L7Qu9GDINC60L7Qu9GM0YbQsCwg0YHQvtC10LTQuNC90LXQvdC90YvQtSDQvNC10LbQtNGDINGB0L7QsdC+0Lkg0YHQvtC10LTQuNC90LjRgtC10LvRjNC90L7QuSDRgtC60LDQvdC90YvQvNC4INC/0LXRgNC10LzRi9GH0LrQsNC80LggLtCi0YDQsNGF0LXRjyDQtNC10LvQuNGC0YHRjyDQvdCwINC00LLQsCDQs9C70LDQstC90YvRhSDQsdGA0L7QvdGF0LAt0L/RgNCw0LLRi9C5INC4INC70LXQstGL0Lks0L/RgNC4INGC0L7QvCDQv9GA0LDQstGLINC+0YLRhdC+0LTQuNGCINC/0L7QtCDQvNC10L3RjNGI0LUg0YPQs9C70L7QvCAs0L/QviDRjdGC0L7QvNGDINC40LzQtdC90L3QviDQsiDQvdC10LPQviDRh9Cw0YnQtSDQv9C+0L/QsNC00LDRjtGCINC40L3QvtGA0L7QtNC90YvQtSDRgtC10LvQsCDQv9C4INCw0YHQv9C40YDQsNGG0LjQuC7QodC70LjQt9C40YHRgtCw0Y8g0L7QsdC+0LvQvtGH0LrQsCDQsdGA0L7QvdGF0L7QsiDQuCDQsdGA0L7QvdGF0LjQvtC7INGDINC90L7QstC+0YDQvtC20LTQtdC90L3Ri9GFINC+0YLQu9C40YfQsNC10YLRgdGPINC80Y/Qs9C60L7RgdGC0YzRjizQvtCx0LjQu9C40LXQvCDQutGA0L7QstC10L3QvtGB0L3Ri9GFINGB0L7RgdGD0LTQvtCyINC4INGC0L7QvdC60LjQvCDRgdC70L7QtdC8INGB0LvQuNC30LggLtCe0L3QsCDQv9C+0LrRgNGL0YLQsCDQvNC90L7Qs9C+0YDRj9C00L3Ri9C8INGA0LXRgdC90LjRhtGH0LjRgtGL0Lwg0YbQuNC70LvQuNC90LTRgNC40YfQtdGB0LrQuNC8INGN0L/QuNGC0LXQu9C40LXQvCAs0LrQvtGC0L7RgNGL0Lkg0L7QsdC10YHQv9C10YfQuNCy0LDRjtGCINCy0YvQstC10LTQtdC90LjQtSDRgdC70LjQt9C4INC4INGH0YPQttC10YDQvtC00L3Ri9GFINGH0LDRgdGC0LjRhiAu0KMg0LTQtdGC0LXQuSDRgNCw0L3QvdC10LPQviDQstC+0LfRgNCw0YHRgtCwINCz0LvQsNC00LrQvtC80YvRiNC10YfQvdGL0LUg0Lgg0Y3Qu9Cw0YHRgtC40YfQtdGB0LrQuCDRjdC70LXQvNC10L3RgtGLINGA0LDQt9Cy0LjRgtGLINGB0LvQsNCx0L4gLNC/0L4g0Y3RgtC+0LzRgyDQv9GA0Lgg0LfQsNCx0L7Qu9C10LLQsNC90LjRj9GFINC00YvRhdCw0YLQtdC70YzQvdGL0YUg0L/Rg9GC0LXQuSDQsdGA0L7QvdGF0LjQsNC70YzQvdCw0Y8g0L7QsdGB0YLRgNGD0LrRhtC40Y8g0YfQsNGJ0LUg0L7QsdGD0YHQu9C+0LLQu9C10L3QsCDQvtGC0YLQtdC60L7QvCDRgdC70LjQt9C40YHRgtC+0Lkg0Lgg0YHQutC+0L/Qu9C10L3QuNC10Lwg0YLRj9C20LrQvtCz0L4g0YHQtdC60YDQtdGC0LAgLNCwINC90LUg0YHQv9Cw0LfQvNC+0LwgLjxiciAvPg0KMikxKdC80LjQvdC10YDQsNC70LjQt9Cw0YbQuNGPINC60L7RgdGC0LXQuSDQvdC1INC30LDQstC10YDRiNC10L3QsC3RgyDQtNC10YLQtdC5INC60L7RgdGC0L3QsNGPINGC0LrQsNC90Ywg0L/RgNC+0LTQvtC70LbQsNC10YIg0YTQvtGA0LzQuNGA0L7QstCw0YLRjNGB0Y8g0Lgg0L3QsNGB0YvRidCw0YLRjNGB0Y8g0LzQuNC90LXRgNCw0LvQsNC80Lgg0LTQviDQv9C+0LTRgNC+0YHRgtC60L7Qs9C+INCy0L7Qt9GA0LDRgdGC0LAgLtCSINGA0LDQvdC90LXQvCDQstC+0LfRgNCw0YHRgtC1INCyINC60L7RgdGC0Y/RhSDQv9GA0LXQvtCx0LvQsNC00LDQtdGCINGF0YDRj9GJ0LXQstCw0Y8g0YLQutCw0L3RjCAs0LAg0YPRgNC+0LLQtdC90Ywg0LzQuNC90LXRgNCw0LvQuNC30LDRhtC40Lgg0L3QuNC30LrQuNC5ICzQv9C+INGN0YLQvtC80YMg0LXRgdC70Lgg0LrQvtGB0YLQuCDQvtGC0LvQuNGH0LDRjtGC0YHRjyDRjdC70LDRgdGC0LjRh9C90L7RgdGC0YzRjiDQuCDQstC80LXRgdGC0LUg0L/QvtC00LTQsNGO0YLRgdGPINC00LXRhNC+0YDQvNCw0YbQuNGP0Lwg0L/RgNC4INGC0YDQsNCy0LzQsNGFLjIp0KDQvtGB0YIg0YDQsNGB0YLQtdGCINCyINGN0L/QuNGE0LjQt9Cw0YDQvdGL0YUg0YXRgNGP0YnQtdC5IC3Rg9C00LvQuNC90LXQvdC40LUg0LrQvtGB0YLQtdC5INGDINC00LXRgtC10Lkg0L7QsdC10YHQv9C10YfQuNCy0LDRjtGC0YHRjyDRgNC+0YHRgtC60L7QstGL0LzQuCAo0Y3Qv9C40YTQuNC30LDRgNC90YvQvNC4ICnRhdGA0Y/RidCw0LzQuCAs0KDQsNGB0L/QvtC70L7QttC10L3QvdGL0LzQuCDQvdCwINC60L7QvdGG0LDRhSDQtNC70LjQvdC90YvRhSDQutC+0YHRgtC10LkgLtCt0YLQuCDRhdGA0Y/RidC4INCw0LrRgtC40LLQvdC+INC00LXQu9GP0YLRgdGPINC4INC/0L7RgdGC0LXQv9C10L3QvdC+INC30LDQvNC10YfQsNGO0YLRgdGPINC60L7RgdGC0L3QvtC5INGC0LrQsNC90YzRjiAs0L/QviDRgNC+0YHRgtGDINGB0LrQtdC70LXRgtCwIC4zKdCk0L7RgNC80LjRgNC+0LLQsNC90LjQtSDQutC+0YHRgtC10LkgLdCyINC00LXRgtGB0LrQvtC8INCy0L7Qt9GA0LDRgdGC0LUg0L/RgNC+0LjRgdGF0L7QtNC40YIg0LTQstCwINGC0LjQv9CwINC+0YHRgtC10L7Qs9C10L3QtdC30LAt0Y3QvdC00L7RhdGA0L7QvdC00LDQu9GM0L3Ri9C5KNGH0LXRgNC10Lcg0YXRgNGP0YnQtdCy0YPRjiDRgdGC0LDQtNC40Y4gKSDQuCDQvNC10LzQsdGA0LDQvdC+0LfQvdGL0LkgKNC/0YDRj9C80L7QtSDQvtCx0YDQsNC30L7QstCw0L3QuNC1INC60L7RgdGC0Lgp0Y3RgtC4INC/0YDQvtGG0LXRgdGB0Ysg0LjQs9GA0LDRjtGCINC60LvRjtGH0LXQstGD0Y4g0YDQvtC70Ywg0LIg0YDQsNC30LLQuNGC0LjQuCDRgdC60LXQu9C10YLQsC40KdC/0L7QstGL0YjQtdC90L3QsNGPINC/0L7QtNCy0LjQttC90L7RgdGC0Ywg0YHRg9GB0YLQsNCy0L7Qsi3RgdGD0YHRgtCw0LLRiyDRgyDQtNC10YLQtdC5INCx0L7Qu9C10LUg0LPQuNCx0LrQuNC1INC4INC30LAg0L/QvtCy0YvRiNC10L3QvdC+0LPQviDRgdC+0LTQtdGA0LbQsNC90LjQtSDQutC+0LvQu9Cw0LPQtdC90LAg0LIg0LrQsNC/0YHRg9C70LDRhSAu0K3RgtC+INC00LXQu9Cw0LXRgiDQuNGFINC80LjQvdC4INGD0YHRgtC+0LnRh9C40LLRi9C80Lgs0L3QviDQvtCx0LXRgdC/0LXRh9C40LLQsNGO0YIg0YjQuNGA0L7QutGD0Y4g0LDQvNC70LjRgtGD0LTRgyDQtNCy0LjQttC10L3QuNC5ICzQvtGB0L7QsdC10L3QvdC+INC00L4gMTItMTUg0JvQtdGCIDUp0KDQuNGB0Log0KDQsNGF0LjRgtCwINC4INC00LXRhNC+0YDQvNCw0YbQuNC4IC3QvdC10LTQvtGB0YLQsNGC0L7QuiDQstC40YLQsNC80LjQvdCwIEQg0Lgg0LrQsNC70YzRhtC40Y8gLNC80L7QttC10YIg0L/RgNC40LLQtdGB0YLQuCDQuiDRgNCw0YXQuNGC0YMgLdC90LDRgNGD0YjQtdC90LjRjiDQvNC40L3QtdGA0LDQu9C40LfQsNGG0LjQuCDQutC+0YHRgtC10LkgLNGH0YLQviDQv9GA0L7Rj9Cy0LvRj9C10YLRgdGPINC40YUg0YDQsNC30LzRj9Cz0YfQtdC90LjQtdC8INC40YHQutGA0LXQstC70LXQvdC40LXQvCzQvdCw0L/RgNC40LzQtdGAICzQkiDQstC40LTQtSDQntC40LvQuNGFLdC+0LHRgNCw0LfQvdGL0Lkg0YTQvtGA0LzRiyDQvdC+0LMgLjYp0L7QutC+0L3Rh9Cw0L3QuNC1INGA0L7RgdGC0LAt0YDQvtGB0YIg0LrQvtGB0YLQuCDQv9GA0L7QtNC+0LvQttCw0LXRgtGB0Y8g0LTQviDQv9C10YDQuNC+0LTQsCDQv9C+0LvQvtCy0L7Qs9C+INGB0L7Qt9GA0LXQstCw0L3QuNGPICzQv9C+0YHQu9C1INGH0LXQs9C+INGA0L7RgdGC0LrQvtCy0YvQtSDQt9C+0L3RiyAo0Y3Qv9C40YTQuNC30LDRgNC90YvQtSDRhdGA0Y/RidC4ICnQt9Cw0LrRgNGL0LLQsNGO0YLRgdGPICzQuCDRgNC+0YHRgiDQutC+0YHRgtC10Lkg0L/RgNC10LrRgNCw0YnQsNC10YLRgdGPIC4gICAg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31" table:style-name="ce1">
            <text:p>1067131</text:p>
          </table:table-cell>
          <table:table-cell office:value-type="string" table:style-name="ce1">
            <text:p>russian</text:p>
          </table:table-cell>
          <table:table-cell office:value-type="string" table:style-name="ce1">
            <text:p>Билет 14. &amp;lt;br /&amp;gt; 1.У ребенка 4-х лет воспаление бронхов. На фоне воспаления появилась экспираторная одышка вследствие отека слизистой оболочки бронхов. Какие анатомо-физиологические особенности бронхов привели к развитию обструкции? &amp;lt;br /&amp;gt; 2.Назовите особенности развития костной системы у детей? &amp;lt;br /&amp;gt;</text:p>
          </table:table-cell>
          <table:table-cell office:value-type="string" table:style-name="ce1">
            <text:p>0J7RgdC+0LHQtdC90L3QvtGB0YLQuCDRgNCw0LfQstC40YLQuNGPINC60L7RgdGC0L3QvtC5INGB0LjRgdGC0LXQvNGLINGDINC00LXRgtC10LkuINCe0YHQvtCx0LXQvdC90L7RgdGC0Y/QvNC4INGA0LDQt9Cy0LjRgtC40Y8g0Y/QstC70Y/RjtGC0YHRjyDQvdC1INGA0LDQt9Cy0LjRgtC+0YHRgtGMINGB0LLRj9C30L7Rh9C90L7Qs9C+INCw0L/Qv9Cw0YDQsNGC0LAsINGB0YPRgdGC0LDQstC90YvQtSDRgdGD0LzQutC4LCDRgdCy0Y/Qt9C60LgsINGB0LjQvdC+0LLQuNCw0LvRjNC90LDRjyDQvtCx0L7Qu9C+0YfQutCwINGA0LDQt9Cy0LjRgtGLINC90LXQtNC+0YHRgtCw0YLQvtGH0L3QviDRhdC+0YDQvtGI0L4sINCy0YHQu9C10LTRgdGC0LLQuNC1INGH0LXQs9C+INGDINC00LXRgtC4INGH0LDRidC1INC/0L7QtNCy0LXRgNC20LXQvdGLINCy0YvQstC40YXQsNC8INCyINGB0YPRgdGC0LDQstCw0YUuINCi0LDQutC20LUg0L7RgdC+0LHQtdC90L3QvtGB0YLRjNGOINGA0LDQt9Cy0LjRgtC40Y8g0Y/QstC70Y/RjtGC0YHRjyDQvdCw0LvQuNGH0LjQtSDRgNC+0LTQvdC40YfQutC+0LIg0YfQtdGA0LXQv9CwLCDQstGL0LTQtdC70Y/RjtGCINC90LXRgdC60L7Qu9GM0LrQviDRgNC+0LTQvdC40YfQutC+0LIsINCx0L7Qu9GM0YjQuNC90YHRgtCy0L4g0LjQtyDQutC+0YLQvtGA0YvRhSDRg9C20LUg0LfQsNC60YDRi9Cy0LDRjtGC0YHRjyDRgdGA0LDQt9GDINC/0L7RgdC70LUg0YDQvtC20LTQtdC90LjRjywg0L3QviDRgdCw0LzRi9C5INCx0L7Qu9GM0YjQvtC5INGA0L7QtNC90LjRh9C+0Log0L3QsNGF0L7QtNC40YLRgdGPINC80LXQttC00YMg0YHQsNCz0LjRgtGC0LDQu9GM0L3Ri9C8INC4INC/0L7Qv9C10YDQtdGH0L3Ri9C8INGI0LLQvtC8INC4INC30LDQutGA0YvQstCw0LXRgtGB0Y8g0YLQvtC70YzQutC+INC6IDEtMS41INCz0L7QtNCw0LwuICDQotCw0LrQttC1INC+0YHQvtCx0LXQvdC90L7RgdGC0YzRjiDRj9Cy0LvRj9C10YLRgdGPINCz0L7RgNC80L7QvdCw0LvRjNC90LDRjyDRgNC10LPRg9C70Y/RhtC40Y8uINGC0LXRgdGC0L7RgdGC0LXRgNC+0L0g0YHQv9C+0YHQvtCx0YHRgtCy0YPQtdGCINGA0L7RgdGC0YMg0LrQvtGB0YLQvdC+0Lkg0YHQuNGB0YLQtdC80Ysg0LTQviDQv9C+0LTRgNC+0YHRgtC60L7QstC+0LPQviDQstC+0LfRgNCw0YHRgtCwLiDQoyDQtNC10YLQtdC5INC60L7RgdGC0Lgg0YHQvtC00LXRgNC20LDRgiDQsdC+0LvRjNGI0LUg0L7RgNCz0LDQvdC40YfQtdGB0LrQuNGFINCy0LXRidC10YHRgtCyLCDQvdC10LbQtdC70Lgg0L3QtdC+0YDQs9Cw0L3QuNGH0LXRgdC60LjRhSwg0LzQuNC90LXRgNCw0LvQuNC30LDRhtC40Y8g0LrQvtGB0YLQtdC5INC90LUg0YDQsNC30LLQuNGC0LAsINCy0YHQu9C10LTRgdGC0LLQuNC1INGN0YLQvtCz0L4g0LrQvtGB0YLQuCDQtNC10YLQtdC5INCx0L7Qu9C10LUg0LPQuNCx0LrQuNC1INC4INC80LXQvdGM0YjQtSDQv9C+0LTQstC10YDQttC10L3RiyDQv9C10YDQtdC70L7QvNCw0LwuINCQ0LrRgtC40LLQvdC+INGA0LDQsdC+0YLQsNGO0YIg0L7RgdGC0LXQvtCx0LvQsNGB0YLRiywg0LfQsNC60LvQsNC00YvQstCw0Y8g0LrQvtGB0YLQvdGL0Lkg0LzQsNGC0YDQuNC60YEsINCyINGC0L7QvCDRh9C40YHQu9C1INC60L7Qu9C70LDQs9C10L0gMSDRgtC40L/QsCDQuCDQvtGB0YLQtdC+0LrQsNC70YzRhtC40L0uINCX0L7QvdCwINC+0YHRgdC40YTQuNC60LDRhtC40Lgg0L3QsNGF0L7QtNC40YLRgdGPINCyINC+0LHQu9Cw0YHRgtC4INGN0L/QuNGE0LjQt9Cw0YDQvdGL0YUg0YXRgNGP0YnQtdC5LCDQutC+0YHRgtC4INGA0LDRgdGC0YPRgiDQsiDQtNC70LjQvdGDINGC0LDQutC40Lwg0L7QsdGA0LDQt9C+0LwsINCwINCyINGI0LjRgNC40L3RgyDQt9CwINGB0YfQtdGCINC90LDQtNC60L7RgdGC0L3QuNGG0YsuINCT0L7RgNC80L7QvdCw0LvRjNC90LDRjyDRgNC10LPRg9C70Y/RhtC40Y8g0YLQsNC60LbQtSDQvtGB0YPRidC10YHRgtCy0LvRj9C10YLRgdGPINC/0L7RgdGA0LXQtNGB0YLQstC+0Lwg0LPQvtGA0LzQvtC90LAg0YDQvtGB0YLQsCAtINGB0L7QvNCw0YLQvtGC0YDQvtC/0LjQvdCwLCDRg9GB0LjQu9C10L3QvdC+INCy0L4g0LLRgNC10LzRjyDRgdC90LAuINCi0LjRgNC+0LrRgdC40L0g0YHQv9C+0YHQvtCx0YHRgtCy0YPQtdGCINGD0YHQutC+0YDQtdC90LjRjiDQtNC40YTRhNC10YDQtdC90YbQuNGA0L7QstC60Lgg0L7RgdGC0LXQvtCx0LvQsNGB0YLQvtCyLiDQn9C+0LvQvtCy0YvQtSDQs9C+0YDQvNC+0L3RiyAtINGN0YHRgtGA0L7Qs9C10L3RiyDQuCDRgtC10YHRgtC+0YHRgtC10YDQvtC9INGD0YHQutC+0YDRj9GO0YIg0LzQuNC90LXRgNCw0LvQuNC30LDRhtC40Y4g0LrQvtGB0YLQtdC5LiDQn9Cw0YDQsNGC0LPQvtGA0LzQvtC9INGB0L/QvtGB0L7QsdGB0YLQstGD0LXRgiDQvtCx0L3QvtCy0LvQtdC90LjRjiDQutC+0YHRgtC90L7Qs9C+INC80LDRgtGA0LjQutGB0LAsINC+0YHRg9GJ0LXRgdGC0LLQu9GP0Y8g0YHQstC+0Y4g0LTQtdGP0YLQtdC70YzQvdC+0YHRgtGMINGA0LXRhtC40L/RgNC+0LrQvdC+INGBINC60LDQu9GM0YbQuNGC0L7QvdC40L3QvtC8LiA8YnIgLz4NCtCQ0L3QsNGC0L7QvNC+LdGE0LjQt9C40L7Qu9C+0LPQuNGH0LXRgdC60LjQtSDQvtGB0L7QsdC10L3QvdC+0YHRgtC4INCx0YDQvtC90YXQvtCyLCDQutC+0YLQvtGA0YvQtSDQv9GA0LjQstC10LvQuCDQuiDRgNCw0LfQstC40YLQuNGOINC+0LHRgdGC0YDRg9C60YbQuNC4LiDQoyDQtNC10YLQtdC5INGE0L7RgNC80LAg0LPRgNGD0LTQvdC+0Lkg0LrQu9C10YLQutC4INC40LzQtdC10YIg0LHQvtGH0LrQvtC+0LHRgNCw0LfQvdGD0Y4g0YTQvtGA0LzRgywg0YHQsNCz0LjRgtGC0LDQu9GM0L3Ri9C5INC4INC/0L7Qv9C10YDQtdGH0L3Ri9C1INGA0LDQt9C80LXRgNGLINC/0L7Rh9GC0Lgg0YDQsNCy0L3RiyDQsiDQstC+0LfRgNCw0YHRgtC1INC00L4gNyDQu9C10YIsINCjINGA0LXQsdC10L3QutCwINC00LDQvdC90L7Qs9C+INCy0L7Qt9GA0LDRgdGC0LAsINC/0YPRjdGA0LjQu9GM0L3QvtC1INC00YvRhdCw0L3QuNC1LCDQv9C10YDQtdGF0L7QtNGP0YnQtdC1INGB0L4g0LLRgNC10LzQtdC90LXQvCDQsiDQstC10LfQuNC60YPQu9GP0YDQvdC+0LUsINC/0YDQuCDQsNGD0YHQutGD0LvRjNGC0LDRhtC40Lgg0LzQvtC20L3QviDRg9GB0LvRi9GI0LDRgtGMINC00L7Qv9C+0LvQvdC40YLQtdC70YzQvdGL0LUg0YjRg9C80YssINGC0LDQutC20LUg0LPRgNGD0LTQvdCw0Y8g0LrQu9C10YLQutCwINCyINGN0YLQvtC8INCy0L7Qt9GA0LDRgdGC0LUg0LjQvNC10LXRgiDQtNC+0LLQvtC70YzQvdC+INGC0L7QvdC60YPRjiDRgdGC0LXQvdC60YMsINC/0L7RjdGC0L7QvNGDINC/0YDQuNC00YvRhdCw0L3QuNC4INCy0YvRgdC70YPRiNC40LLQsNGO0YLRgdGPINGI0YPQvNGLLiDQkdGA0L7QvdGF0Lgg0YMg0YDQtdCx0LXQvdC60LAg0LzQtdC90YzRiNC10LPQviDQtNC40LDQvNC10YLRgNCwLCDQuNC80LXRjtGCINGD0LfQutC40Lkg0L/RgNC+0YHQstC10YIsICDQv9C+INGB0YDQsNCy0L3QtdC90LjRjiDRgdC+INCy0LfRgNC+0YHQu9GL0LzQuC4g0J/RgNCw0LLRi9C5INCx0YDQvtC90YUg0LHQvtC70LXQtSDQutC+0YDQvtGC0LrQuNC5INC4INCx0L7Qu9GM0YjQtdCz0L4g0LTQuNCw0LzQtdGC0YDQsCDQv9C+INGB0YDQsNCy0L3QtdC90LjRjiDRgSDQu9C10LLRi9C8INCz0LvQsNCy0L3Ri9C8INCx0YDQvtC90YXQvtC8LCDQuCDRj9Cy0LvRj9C10YLRgdGPICDQutCw0Log0LHRiyDQv9GA0L7QtNC+0LvQttC10L3QuNC10Lwg0YLRgNCw0YXQtdC4LCDQv9GA0L7QtNC+0LvQttCw0Y/RgdGMINC/0L7QtCDRgtGD0L/Ri9C8INGD0LPQu9C+0Lwg0YfQsNGB0YLQviDQstC+0LfQvNC+0LbQvdCwINC+0LHRgdGC0YDRg9C60YbQuNGPINC00YvRhdCw0YLQtdC70YzQvdGL0Lwg0L/Rg9GC0LXQuSDQuNC80LXQvdC90L4g0LIg0Y3RgtC+0Lwg0LzQtdGB0YLQtS4gICDQodC70LjQt9C40YHRgtCw0Y8g0L7QsdC+0LvQvtGH0LrQsCDQsdGA0L7QvdGF0L7QsiDQstGL0LTQtdC70Y/QtdGCINGH0LDRgdGC0L4g0Lgg0LIg0LHQvtC70YzRiNC10Lwg0LrQvtC70LjRh9C10YHRgtCy0LUg0YHQu9C40LfQuCwg0LAg0LzQtdGA0YbQsNGC0LXQu9GM0L3Ri9C1INC60LvQtdGC0LrQuCDRgNCw0LfQstC40YLRiyDRgdC70LDQsdC+INCy0YHQu9C10LTRgdGC0LLQuNC1INGH0LXQs9C+INGH0LDRgdGC0L4g0YMg0LTQtdGC0LXQuSDQstC+0LfQvdC40LrQsNC10YIg0YTQuNC30LjQvtC70L7Qs9C40YfQtdGB0LrQsNGPINC+0LHRgdGC0YDRg9C60YbQuNGPINC90LAg0YTQvtC90LUg0L7QsdC40LvRjNC90L7Qs9C+INCy0YvQtNC10LvQtdC90LjRjyDRgdC70LjQt9C4INC80YPQutC+0YbQuNC70LjQsNGA0L3Ri9C80Lgg0LrQu9C10YLQutCw0LzQuCwg0L/RgNC40LLQvtC00Y/RidCw0Y8g0Log0Y3QutGB0L/QuNGA0LDRgtC+0YDQvdC+0Lkg0L7QtNGL0YjQutC1L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 сказано об остеогенезе хрящевом и перепончатом .И не полный ответ по АФО бронха.</text:p>
          </table:table-cell>
          <table:table-cell office:value-type="float" office:value="0" table:style-name="ce1">
            <text:p>0</text:p>
          </table:table-cell>
          <table:table-cell table:number-columns-repeated="16376"/>
        </table:table-row>
        <table:table-row table:style-name="ro1">
          <table:table-cell office:value-type="float" office:value="914692" table:style-name="ce1">
            <text:p>914692</text:p>
          </table:table-cell>
          <table:table-cell office:value-type="string" table:style-name="ce1">
            <text:p>english</text:p>
          </table:table-cell>
          <table:table-cell office:value-type="string" table:style-name="ce1">
            <text:p>Ticket 14. &amp;lt;br /&amp;gt; 1. Child 4 years old, has inflammation of the bronchi. On the background of inflammation, expiratory dyspnea appeared due to edema of the bronchial mucosa. What anatomical and physiological characteristics of the bronchi led to the development of obstruction? The concept of expiratory dyspnea.&amp;lt;br /&amp;gt; 2. What are the features of the development of the skeletal system in children? &amp;lt;br /&amp;gt;</text:p>
          </table:table-cell>
          <table:table-cell office:value-type="string" table:style-name="ce1">
            <text:p>QU5TV0VSIC0xLiBBbmF0b21pY2FsIGFuZCBwaHlzaW9sb2dpY2FsIGNoYXJhc3RlcmlzdGlzIG9mIEJST05DSElJIExFQURJTkcgVE8gIG9ic3RydWN0aW9uIDo6IGluIGEgNCB5ZWFyIG9sZCBjaGlsZCB3aXRoIHRoZSBicm9uY2hpYWwgaW5mbGFtYWF0aW9uICwgdGhlIGRldmVsb3BtZW50IG9mIG9ic3RydWN0cmlvbiAsIHBhcnRpY3VsYXJseSBleHBpcmF0b3J5IERZU1BORUEgLCBjbiBiZSBhdHRyaWlidXRlZCB0byBzZXZlcmFsIGZhY3RvcnMgc3VjaCBhYXMgICoqU01BTExFUiBhaXJ3YXkgZGlhbWV0ZXIgLCBjaGlsZHJlbiBoYXZlIGEgc21hbGxlciBhbmQgbW9yZSBjb2xsYXBzaWJsZSBhaXJ3YXkgdGhhbiBhZHVsdHMgLiAqKklORkxBTUFUSU9OICBvZiB0aGUgYnJvbmNoaSAsIGNvbW1vbiBpbiBjb25kaXRpb24gbGlrZSBicm9uY2hpdGlzICwgY2FuIGxlYWQgdG8gZnVydGhlciBuYXJyb3dpbmcgb2YgdGhlc2Ugc21hbGxlciBhaXJ3YXlzIC4gKippbmNyZWFzZWQgbXVjb3NhbCBhZWRlbWEgLCBpbmZsYW1hdGlvbiByZXN1bHRzIGluIGluY3Jlc2VkIG11Y29zYWwgZWRlbWEgb3Igc3dlbGxpbW5nIG9mIHRoZSBicm9uY2hpYWwgbGluaW5nIC4gdGhpcyBzd2VsaW5nIGNvbWJpbmVkIHdpdGggYWxyZWFkeSBzbWFsbGVyIGRpYW1ldGVyICwgY29udHJpYnV0ZXMgdG8gYWlyd2F5IG9ic3RydWN0aW9qbiAuIEVYUElSQVRPUlkgRFlTUE5FQTo6IGV4cGlyYXRvcnkgZHlzcG5lYSByZWZlcnMgdG8gZGlmZmljdWx0eSBpbiBleGhhaWxpbmcgYWlyIC4gdGhlIGluZmxhbWF0aW9uIGFuZCBlZGVtYSBjYXVzZSBpbmNyZXNlZCByZXNpc3RhbmNlIGR1cmluZyBleHBpcmF0aW9uICwgbWFraW5nIGl0IGNoYWxsZW5pbmcgZm9yIHRoZSBjaGlsbGQgdG8gZWZmaWN0aXZlbHkgZXhwZWwgYWllIGZyb20gbHVuZ3NzICwgKkJST05DSE9TUEFTTSAtIGluZmxhbWF0dG9yeSBwcm9jZXNzZXMgY2FuIHRyaWdlciBicm9uY2hvc3Bhc20gLCB3aGVyZSB0aGUgc21vb3RoIG11c2NsZXMgb2YgdGhlIGJyb25jaGkgYmNvbnN0cmljdCAuIHRoaXMgZnVydGhlcnIgZXhhY2VyYmF0ZXMgdGhlIG9ic3RydWN0aW9uIGR1cmluZyBleHBpcmF0aW9uIC48YnIgLz4NCjxiciAvPg0KQU5TV0VSIC0gMi4gRmVhdHVyZXMgb2YgdGhlIFNLRUxFVEFMIFNZU1RFTSBkZXZlbG9wbWVudCBpbiB0aGUgY2hpbGQgOjogKipPU1NJRklDQVRJT04gLS0gQk9ORVMgSU5JVElBTExZICBmb3JtIHRocm91Z2ggdGhlIHByb2Nlc3MgY2FsbGxlZCBvc3NpZmljYWF0aW9uICwgc3RhcnRpbmcgd2l0aCBjYXJpbGFnZSB0aGF0IGdyYWR1YWxseSB0cmFuc2Zvcm0gaW50byBib25lIHRpc3N1ZSAuIHRoaXMgcHJvY2VzcyBjb250aW51ZXMgdGhyb3VnaG91dCB0aGUgY2hpbGRob29kLCAqKkdST1dUSCBQTEFURVMgLS0gdGhlIGVuZHMgb2YgbG9uZyBib25lcyBjb250YWlucyAgZ3Jvd3RoIHBsYXRlIHdoZXJlIGJvbmUgZWxvbmdhdGlvbiBvY2N1cnMgLiB0aGVzZSBwbGF0ZXMgYXJ0ZSBjcnVjaWFsIGZvciBoZWlnaHQgZGV2ZWxvcG1lbnQgYW5kIGNsb3NlXHNodXRvZmYgd2hlbiBoZWlnaHQgaXMgY29tbGV0ZSAuICoqIEJPTkUgREVOU0lUWSAtLSBCb25lIGRlbnNpdHkgaW5jcmVzZXMgYXMgdGhlIGNoaWxkIGdyb3cgcmVhY2hpbmcgYXQgaXRzIHBlYWsgaW4gZWFybHkgY2hpbGRoaG9kICxhZGVxdWF0ZSBudXRyaXRpb24gLCBpbmNsdWRpbmcgY2FsY2l1bSAoQ2ErKykgYW5kIHZpdGFtaW4gLUQgaXMgZXNzZW50aWFsIGZvciBvcHRpbWFsIGFzIHdlbGwgYXMgbm9ybWFsIGJvbmUgZGVuc2l0eSAsLioqU1BJTkFMIERFVkVMT1BNRU5UIC0tIFRIRSBTUElORSAgZGV2ZWxvcHMgaXRzIGN1cnZhdHVyZSAoY2VydmljYWwgLCB0aG9yYXNjaWMgLGR1cmluZyBjaGlsZGhvb2QgLiBwcm9wZXIgcG9zdHVyZSBhbmQgc3VwcG9ydCBhcmUgY3J1Y2lhbCBkdXJpbmcgdGhlIHBlcmlvZCBvciBpbnRlcnZhbCAuICoqSk9JTlQgREVWRUxPUE1FTlQgLS0gSk9JTlQgTUFUVVJFIEFORCBMSUdBTUVOVCAgc3RyZW5naHRlbiAsIGVuaGFuY2luZyBpdCdzIHN0YWJpbGl0eXkgJiBmbGV4aWJpbGl0eSAuIHRoZSBkZXZlbG9wbWVudCBvZiBtb3RvciBza2lsbHMgaXMgY2xvc2VseSBsaW5rZWQgdG8gYSBza2VsZXRhbCBhbmQgam9pbnQgZGV2ZWxvcG1lbnQgLi4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48" table:style-name="ce1">
            <text:p>915248</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MS4g0J3QtdCz0ZbQt9GWINCx0LDQu9Cw0L3Ri9KjINC305nRgNGWINGC0q/RgdGB0ZbQt9Cz0LUg0LbQsNKb0YvQvSwg0LzTqdC70LTRltGAINCx0L7Qu9Cw0LTRiy4g0KHQtdCx0LXQsdGWLCDQsdCw0LvQsNC70LDRgNC00LAg0YTQuNC70YzRgtGA0LDRhtC40Y8g0LbSr9C50LXRgdGWINOZ0LvRliDQtNCw0LzRi9C80LDSk9Cw0L3QtNGL0pvRgtCw0L0sINC305nRgNGWINCw0Lcg0LrQvtC90YbQtdC90YLRgNCw0YbQuNGP0LvRiyDQsdC+0LvRg9GLINC60LXRgNC10LouINCh0L7QvdC00YvSm9GC0LDQvSDQt9OZ0YAg0YHSsdC50YvSmyDQttOZ0L3QtSDRgtKv0YHRliDQsNGI0YvSmyDQsdC+0LvQsNC00YsuINCR0ZbRgNCw0pssINKb0LDQu9GL0L/RgtGLINC00LXQvyDQtdGB0LXQv9GC0LXQuSDQsNC70LDRgtGL0L0g06nQt9Cz0LXRgNGW0YHRgtC10YAg0LTQtSDQsdC+0LvQsNC00YsuINCd05nRgNC10YHRgtC10LTQtdCz0ZYg0pvRi9C30pPRi9C70YIt0LrRltGA0L/RltGIINGC0q/RgdGC0LXRgSDQtNCw0psg0pvQsNC70YPRiyDRgtCw0LHQuNKT0Lgg0LrRgNC40YHRgtCw0LvQtNCw0YDQtNGL0qMg0LHQvtC70YPRi9C80LXQvSDQsdCw0LnQu9Cw0L3Ri9GB0YLRiyDQsdC+0LvQsNC00YsuINCX05nRgNC00LXQs9GWINC305nRgCDSm9GL0YjSm9GL0LvRi9C90YvSoyDQutC+0L3RhtC10L3RgtGA0LDRhtC40Y/RgdGLINC606nQvyDQsdC+0LvSk9Cw0L3QtNCwLCDRg9GA0LDRgtGC0LDRgCDQutOp0L/RgtC10L8g0YLSr9C30ZbQu9C10LTRli7QkdKx0Lsg0LbQsNKj0LAg0YLRg9KT0LDQvSDQvdOZ0YDQtdGB0YLQtdC70LXRgNC00LUg0LrTqdC/0YLQtdC/INC60LXQt9C00LXRgdC10LTRli4g0J7RgdGL0pPQsNC9INCx0LDQudC70LDQvdGL0YHRgtGLINC305nRgNC00ZbSoyDRgtKv0YHRliDSm9GL0LfRi9C7LCDSm9GL0LfSk9GL0LvRgiDRgdCw0YDRiyDQvdC10LzQtdGB0LUg0LrRltGA0L/RltGIINGC0q/RgdGC0ZYg0LHQvtC70LDQtNGLLiDQkdKx0Lsg05nQtNC10YLRgtC1INC30LjRj9C90YHRi9C3INC205nQvdC1INGD0LDSm9GL0YLRiNCwINC20LDSk9C00LDQuS4g0KHTmdCx0LjQtNGW0qMg0LDRgtCwLdCw0L3QsNGB0YvQvdCwINGD0LDQudGL0LzQtNCw0YPQtNGL0qMg0pvQsNC20LXRgtGWINC20L7SmyDQtdC60LXQvdGW0L0g0YLSr9GB0ZbQvdC00ZbRgNGDINC60LXRgNC10LouIDIuINCR0rHQuyDQttCw0pPQtNCw0LnQtNCwLCDQv9Cw0YLQvtC70L7Qs9C40Y/QvdGL0qMg0LHQvtC70LzQsNGD0YssINKb0L7QuyDSm9C40LzRi9C70Ysg0YHQsNKb0YLQsNC70pPQsNC9LCDRgtGC0LXQuiDQv9Cw0LvRjNC/0LDRhtC40Y/Qu9Cw0pPQsNC90LTQsCDQsNGD0YvRgNGDINGB0LXQt9GW0LzRliDQsdC+0LvRi9C/INGC0rHRgCDQtNC10L8g0LHQtdGA0ZbQu9Cz0LXQvS4g0K/Sk9C90LgsINCx0ZbQtyDQsdKx0Lsg0LbQsNKT0LTQsNC50LTRiyDSm9Cw0YLQtdGA0YHRltC3INC00LXQvyDSm9Cw0LHRi9C70LTQsNGB0LDSmyDQsdC+0LvQsNC00YsuINCQ0L3QsNGC0L7QvNC40Y/Qu9GL0pst0YTQuNC30LjQvtC70L7Qs9C40Y/Qu9GL0psg0LXRgNC10LrRiNC10LvRltC60YLQtdGA0ZbQvdC1OiDQv9C10YDQuNC+0YHRgtC40YPQvCDRgdOZ0LHQuNC70LXRgNC00LUg0pvQsNC70YvSo9GL0YDQsNKbINC205nQvdC1INKb0LDQvdC80LXQvSDQttCw0pvRgdGLINKb0LDQvNGC0LDQvNCw0YHRi9C3INC10YLRltC70LXQtNGWLCDRgdKv0LnQtdC60YLQtdGA0LTQtSDQvtGA0LPQsNC90LjQutCw0LvRi9KbINC30LDRgtGC0LDRgNGLINC606nQsdGW0YDQtdC6INGC0LUsINC80LjQvdC10YDQsNC70LTRiyDQt9Cw0YLRgtCw0YAg0LDQt9GL0YDQsNKbLiDQkdCw0LvQsNC70LDRgNC00LDSk9GLINGB0YvQvdGL0pvRgtCw0YAgItC20LDRgdGL0Lsg0LHSsdGC0LDSmyIsINGP0pPQvdC4INC40ZbQu9Cz0LXQvSwg0LbQsNC50YvQu9KT0LDQvSDQutKv0LnQtNC1INCx0L7Qu9Cw0LTRiy4g0JHSsdC7INC10YDQtdC60YjQtdC70ZbQutGC0LUsINC/0LXRgNC40L7RgdGC0LXRg9C8INGB0q/QudC10LrRgtGWINKb0LDRgtGC0Ysg0rHRgdGC0LDQvyDRgtKx0YDSk9Cw0L3QtNGL0pvRgtCw0L0sINCx0ZbRgCDQttCw0pvRgtGLINGB0YvQvdGD0LvQsNGAINCx0L7Qu9Cw0LTRiy4g0JHRltGA0LDSmywg0LHQsNC70LDQu9Cw0YDQtNGL0qMg0YHSr9C50LXQutGC0LXRgNGWINGN0LvQsNGB0YLQuNC60LDQu9GL0pssINC20rHQvNGB0LDSm9GC0LDRgywg0LjRltC70LPRltGIINCx0L7Qu9GL0L8g0LrQtdC70LXQtNGWLiDQndC10LPRltC30ZbQvdC00LUg0LHQsNC70LAg0YHSr9C50LXQs9GW0L3QtNC1INGB0YvQvdGD0LvQsNGAINC606nQvyDQsdC+0LvQvNCw0LnQtNGLLCDTqdGC0LUg0YHQuNGA0LXQui4g0JbQuNGW0YDQtdC6INC20LDRgNGL0pvRgtCw0YAg0LHQvtC70YPRiyDQvNKv0LzQutGW0L0uINCR0YPRi9C90LTQsNGA0LTRiyDSsdGB0YLQsNC/INGC0rHRgNCw0YLRi9C9INCx0LDQudC70LDQvNC00LDRgNC00YvSoyDQsNGA0pvQsNGB0YvQvdC00LAg0pvQvtC70YvQvdGL0qMg0pvQuNC80YvQu9GLINGB0LDSm9GC0LDQu9GL0L8g0YLSsdGA0YPRiyDQvNKv0LzQutGW0L0uINCR0rHQuyDQttCw0pPQtNCw0LnQtNCwINCw0YPRi9GA0YHRi9C90YPSk9CwINGB0LXQsdC10L8g0YDQtdGC0ZbQvdC00LUg0LHRg9GL0L3QtNCw0YDQtNGLINKx0YHRgtCw0L8g0YLSsdGA0pPQsNC9INCx0LDQudC70LDQvNC00LDRgNC00YvSoyDQsNGD0YvRgNGB0YvQvdGD0Ysg0LzSr9C80LrRltC9INC90LXQvNC10YHQtSDQvdC10YDQstGC0ZbQuiDTqdGA0ZbQvNC00LXRgNC00ZbSoyDQu9C+0LrQsNC70LjQt9Cw0YbQuNGP0LvQsNC90YMg0YHQtdCx0LXQsdGW0L3QtdC9INC20rHQvNGB0LDSmyDRgtGW0L3QtNC10YDQtNGW0qMg0LbQsNGA0LDSm9Cw0YLRi9C90LDQvSDRgdC10LfRltC70YPRliDQvNKv0LzQutGW0L0g0LTQtdC/INKb0LDRgNCw0YHQsNKbINCx0L7Qu9Cw0LTRiy4g0prQvtGA0pPQsNC90YvRgdGC0YvSmyDRgNC10YTQu9C10LrRgdGC0LXRgNC00ZbSoyDTmdGB0LXRgNGW0L3QtdC9INCx0L7Qu9GD0Ysg0LzSr9C80LrRltC9LCDRj9KT0L3QuCDQuNC90YHRgtC40L3QutGC0Ysg0YLSr9GA0LTQtS4g0JHQsNC70LDQtNCw0pPRiyDTmdGA0ZYg0pvQsNGA0LDQuSDQttCw0YDQsNKb0LDRgtGC0LDRgNC00YvSoyDQsdCw0YAg0LbQvtKT0YvQvSDQsdGW0LvRgyDSr9GI0ZbQvSwg0YLQsNKT0Ysg0LTQsCDQt9C10YDRgtGC0LXRg9C70LXRgCDQttKv0YDQs9GW0LfRg9GW0LzRltC3INC60LXRgNC10LouINCh0LXQsdC10LHRliwg0LrQtdC50LTQtSDQsdCw0LvQsCDQvtC90Ysg0LDQudGC0LAg0LDQu9C80LDRg9GLINC90LXQvNC10YHQtSDQsdCw0YHSm9Cw0YjQsCDRgdC10LfRltC90YPRliDQvNKv0LzQutGW0L0uINCh0L7QvdC00YvSm9GC0LDQvSwg0YHTmdGD0LvQtdC70ZYg0LTQuNCw0LPQvdC+0YHRgtC40LrQsNC70LDRgCDQsNGA0YLRi9KbINC10YLQv9C10LnQtNGWINC00LXQs9C10L0g0L7QudC00LDQvNGL0L0uICA=</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1-ші сұрақта Осы өзгеріс себебін атаныз және бұл не болуы мүмкін-деген сұрақтың жауабы толық емес бұл жағдай зәрқышқылды инфаркт деп аталатыны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40" table:style-name="ce1">
            <text:p>1066840</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MS4g0JbQsNGBINCw0YLQsCDQsNC90LDQvdGL0qMg0L3TmdGA0LXRgdGC0LXRgdGW0L3RltKjINC305nRgNGW0L3QtdC9INC60LXQudGW0L0g0LbTqdGA0LPQtdC60YLQtSDSm9Cw0LvSk9Cw0L0g0LrRltGA0L/RltGIINGC0q/RgdGC0LXRgSDQtNCw0pvRgtCw0YAg0L7QvdGLINCw0LvQsNKj0LTQsNGC0LDQtNGLLtCR0rHQuyDQvtGA0YvQvSDQsNC70pPQsNC9INC20LDSk9C00LDQuSDQttCw0qPQsCDRgtGD0pPQsNC9INC905nRgNC10YHRgtC10L3RltKjINC305nRgCDSm9GL0YjSm9GL0LvRiyDQuNC90YTQsNGA0LrRgtGW0YHRliDQtNC10L8g0LDRgtCw0LvQsNC00Ysu0JHSsdC7INC905nRgNC10YHRgtC10L3RltKjINCw0LvSk9Cw0YjSm9GLINGC05nRg9C70ZbQutGC0LXRgNGW0L3QtNC1INCw0pPQt9Cw0YHRi9C90YvSoyDRgdGL0YDRgtKb0Ysg0L7RgNGC0LDQtNCwINCx0L7Qu9GL0L8g0LbQsNGC0pvQsNC9INC20LDSk9C00LDQudC70LDRgNKT0LAg0LHQtdC50ZbQvNC00LXQu9GD0ZbQvdC10L0g0YLRg9GL0L3QtNCw0LnRgtGL0L0g0YPQsNKb0YvRgtGI0LAg0YTQuNC30LjQvtC70L7Qs9C40Y/Qu9GL0psg0L/RgNC+0YbQtdGB0YEu0JHSsdC7INC20LDSk9C00LDQuSDQtdGI0pvQsNC90LTQsNC50LTQsCDQv9Cw0YLQvtC70L7Qs9C40Y8g0LHQvtC70YvQvyDRgtCw0LHRi9C70LzQsNC50LTRiywg0LHSsdC7INGB0YvRgNGC0pvRiyDQvtGA0YLQsNC00LAg0LHQvtC70YvQvyDQttCw0YLSm9Cw0L0g0LbQsNKT0LTQsNC50LvQsNGA0pPQsCDQsdC10LnRltC80LTQtdC70YMg0L/RgNC+0YbQtdGB0ZYg0LDRj9GB0YvQvdC00LAg0YLRg9GL0L3QtNCw0LnRgtGL0L0g0pvQsNC70YvQv9GC0Ysg0L3TmdGA0YHQtS4g0JfTmdGAINKb0YvRiNKb0YvQu9GLINC40L3RhNCw0YDQutGC0ZbRgdGWINC905nRgtC40LbQtdGB0ZbQvdC00LUg0LfTmdGA0LTQtSDQt9OZ0YAg0pvRi9GI0pvRi9C70Ysg0YLSsdC30LTQsNGA0YvQvdGL0qMg06nRgtC1INC606nQvyDRgtKv0LfRltC70YPRltC90LTQtSDQttOZ0L3QtSDRiNGL0pPQsNGA0YvQu9GD0YvQvdC00LAg0LbQsNGC0YvRgC7QndOZ0YDQtdGB0YLQtSDRgtGD0YvQu9KT0LDQvSDQutC10LfRltC90LTQtSDQsNC70pPQsNGI0pvRiyDRgtOZ0YPQu9GW0LrRgtC10YDRltC90LTQtSDQsNKT0LfQsNGB0YvQvdC00LAg0YTQuNC30LjQvtC70L7Qs9C40Y/Qu9GL0psg0L/RgNC+0YbQtdGB0YHRgtC10YAg0LbSr9GA0LXQtNGWLCDQvNGL0YHQsNCw0LvSk9CwINCw0LnRgtGB0LDSmyDQtNC10L3QtSDRgdCw0LvQvNCw0pPRi9C90YvSoyDRgtOp0LzQtdC90LTQtdGD0ZYsINC00LXQs9C40LTRgNCw0YLQsNGG0LjRj9C70YvSmyDQttCw0pPQtNCw0LnQu9Cw0YAsINCx0rHQuyDSm9Cw0L3QvdGL0qMg0pvQvtGO0LvQsNC90YMg0L/RgNC+0YbQtdGB0ZbQvdC1INCw0LvRi9C/INC60LXQu9C10LTRli4g0JHSr9C50YDQtdC60YLQtdGAINCw0LvSk9Cw0YjSm9GLINC60LXQt9C00LUg0YHRi9GA0YLSm9CwINC+0YDRgtCw0pPQsCDQsdC10LnRltC80LTQtdC70LzQtdCz0LXQvSDQsdC+0LvQsNC00Ysg0LTQsCwg0LrTqdC/INC806nQu9GI0LXRgNC00LUg0LfTmdGAINKb0YvRiNKb0YvQu9C00LDRgNGL0L0g0YjRi9KT0LDRgNCwINCx0LDRgdGC0LDQudC00YsuINCR0rHQuyDQu9C10LnQutC+0YbQuNGC0YLQtdGA0LTRltKjINC606nQvyDQttC+0pPQsNC70YPRi9C90LDQvSDQsdC+0LvQsNC00YssINC905nRgtC40LbQtdGB0ZbQvdC00LUg0L/Rg9GA0LjQvdC00LXRgCDRj9KT0L3QuCDQt9OZ0YAg0pvRi9GI0pvRi9C70YvQvdGL0qMg0L/RgNC10LrRg9GA0YHQvtGA0LvQsNGA0Ysg0LHTqdC70ZbQvdC1INCx0LDRgdGC0LDQudC00Ysu0J7RgdGL0L3Ri9KjINC90LXQs9GW0LfRltC90LTQtSDQsdCw0LvQsNC90YvSoyDSm9Cw0L3Ri9C90LAg0LrTqdC/INC806nQu9GI0LXRgNC00LUg0YPRgNCw0YLRgtCw0YAg0LbQuNC90LDQu9CwINCx0LDRgdGC0LDQudC00YsuINCd05nRgNC10YHRgtC10L3RltKjINCw0LvSk9Cw0YjSm9GLINGC05nRg9C70ZbQutGC0LXRgNGW0L3QtNC10LPRliDRgtCw0LzQsNKb0YLQsNC90YMg0YDQsNGG0LjQvtC90YvQvdGL0qMg0LXRgNC10LrRiNC10LvRltC60YLQtdGA0ZYg0LTQtSDQt9OZ0YAg0pvRi9GI0pvRi9C70Ysg0LjQvdGE0LDRgNC60YLRltGB0ZYg0LHQvtC70YPRi9C90LAg0LbQsNKT0LTQsNC5INC20LDRgdCw0LnQtNGLLiDQkNKT0LfQsNC00LDSk9GLINGB0rHQudGL0pvRgtGL0pvRgtGL0qMg0LbQtdGC0ZbRgdC/0LXRg9GI0ZbQu9GW0LPRliDQt9OZ0YAg0LzTqdC70YjQtdGA0ZbQvdGW0qMg0LDQt9Cw0Y7Ri9C90LAg0LDQu9GL0L8g0LrQtdC70LXQtNGWLCDQsdKx0Lsg0LfTmdGAINKb0YvRiNKb0YvQu9GL0L3Ri9KjICDSm9Cw0L3QtNCw0pPRiyDQutC+0L3RhtC10L3RgtGA0LDRhtC40Y/RgdGL0L3Ri9KjINOp0YHRg9GW0L3QtSDQsNC/0LDRgNCw0LTRiy4g0J7RgdGL0LTQsNC9INC305nRgCDTqdGC0LUg0LrQvtC90YbQtdC90YLRgNC70LXQvdCz0LXQvSDQsdC+0LvRi9C/LCDRgtKv0YHRliAg05jQtNC10YLRgtC1IDctMTAg0YLTmdGD0LvRltC60YLQtdC9INC60LXQudGW0L0sINC905nRgNC10YHRgtC1INCw0L3QsCDRgdKv0YLRltC9INC606nQsdGW0YDQtdC6INKb0LDQsdGL0LvQtNCw0pPQsNC90LTQsCwg0LfTmdGAINKb0YvRiNKb0YvQu9GLINCw0LvQvNCw0YHRg9GLINCw0pPQt9Cw0LTQsCDQvdC+0YDQvNCw0pPQsCDQutC10LvQtSDQsdCw0YHRgtCw0LnQtNGLLiDQkdKv0LnRgNC10LrRgtC10YAg0LTQtSDRgdGL0YDRgtKb0LAg0L7RgNGC0LAg0LbQsNKT0LTQsNC50LvQsNGA0YvQvdCwINCx0LXQudGW0LzQtNC10LvQtSDQsdCw0YHRgtCw0LnQtNGLLCDQt9OZ0YAg0pvSsdGA0LDQvNGLINC90L7RgNC80LDSk9CwINC60LXQu9C10LTRli4g0J3TmdGA0LXRgdGC0LXQtNC1INC305nRgNGW0L3QtNC1IDUtMTDQvNCzL9C60LMg0LfTmdGAINKb0YvRiNKb0YvQu9GLINCw0LfQvtGC0Ysg0LHQvtC70LDQtNGLLCDQvtC7INC10YDQtdGB0LXQutGC0LXRgNC00LXQvSAyLTMg0LXRgdC1INCz0LUg0LTQtdC50ZbQvSDQttC+0pPQsNGA0YsuICDQkNGC0LAg0LDQvdCw0YHRi9C90LAg0L3TmdGA0LXRgdGC0LXQvdGW0qMg0LTQtdC90YHQsNGD0LvRi9KT0YvQvdCwINC90LDQt9Cw0YAg0LDRg9C00LDRgNGD0LTRiywg0pvQsNC20LXRgtGC0ZYg0YHSsdC50YvSm9GC0YvSmyDQvNOp0LvRiNC10YDRltC9INCx0LXRgNGDINKx0YHRi9C90YvQu9Cw0LTRiy48YnIgLz4NCjIu0JHQsNC70LDQu9Cw0YDQtNGL0qMg0YHSr9C50LXQuiDQttKv0LnQtdGB0ZYg0q/Qu9C60LXQvdC00LXRgNCz0LUg0pvQsNGA0LDSk9Cw0L3QtNCwINOZ0LvQtNC10pvQsNC50LTQsCDQuNC60LXQvNC00ZYg05nRgNGWINC20rHQvNGB0LDSmyDQsdC+0LvRi9C/INC60LXQu9C10LTRliwg0LzSsdC90YvSoyDRgdC10LHQtdCx0ZYg0pvSsdGA0LDQvNGL0L3QtNCwINGB0q/QudC10LrQutC1INCx0LXRgNGW0LrRgtGW0Log0LHQtdGA0LXRgtGW0L0g0LzQuNC90LXRgNCw0LvQtNGLINC30LDRgtGC0LDRgNC00YvSoyDQsNC30LTRi9KT0YvQvdC00LAo0LrQsNC70YzRhtC40Lkg0LbTmdC90LUg0YTQvtGB0YTQvtGALCDQutC+0LvQu9Cw0LPQtdC9KS4g0JHSsdC7INCx0LDQu9Cw0LvQsNGA0LTRi9KjINGB0YvQvdC00YvRgNGL0L8g0LDQu9GDINC80q/QvNC60ZbQvdC00ZbQs9GW0L0g0YLTqdC80LXQvdC00LXRgtC10LTRliwg0LHRltGA0LDSmyDRgtCwINGB0YvQvdGL0pvRgtCw0YAg0LbQuNGWINCx0L7Qu9GL0L8sINC20LDRgdGL0Lsg0LHSsdGC0LDSmyDRgtOZ0YDRltC30LTQtdGBINGB0YvQvdGDINC00LXQudGC0ZbQvSDRgtKv0YDRliDQsNC90YvSm9GC0LDQu9GD0Ysg0LzSr9C80LrRltC9LiDQkdKx0Lsg0YHRi9C90YPQtNCwINGB0q/QudC10Log0YLQvtC70YvSmyDRgdGL0L3QsdCw0LksINC20LDRgNGC0YvQu9Cw0Lkg0pPQsNC90LAg0LHSsdC30YvQu9GL0YHSm9CwINKx0YjRi9GA0LDQudC00YssINC20LjRliDQsdCw0LvQsNC90YvSoyDSm9C+0Lsg0LDQudC80LDSm9GC0LDRgNGL0L3QtNCwINCx0LDQudKb0LDQu9Cw0LTRiy7QntGB0YLQtdC+0LPQtdC90LXQtzog0JHQsNC70LDQu9Cw0YDQtNGL0qMg0YHSr9C50LXQuiDQv9C10L0g0LHRg9GL0L3QtNCw0YDRiyDTmdC70ZYg0YLQvtC70YvSmyDQttC10YLRltC70LzQtdCz0LXQvSwg0Y3Qv9C40YTQuNC30LTQtdGA0ZYg05nQu9GWINGC0L7Qu9GL0psg0LbQsNCx0YvQu9C80LDQuSDRiNC10LzRltGA0YjQtdC60YLQtdC9INGC0rHRgNCw0LTRiywgINGB0L7QvdC00YvSm9GC0LDQvSDQvtC70LDRgCDQuNC60LXQvNC00ZYsINGB0LXRgNC/0ZbQvNC00ZYg0LHQvtC70LDQtNGLLiDQnNGL0YHQsNC70Ysg0LHQsNC70LDQvdGL0qMg0LHRltC70LXQt9GW0Log0YHSr9C50LXQs9GW0L3QtNC1INC+0YHRi9C90LTQsNC5INGB0LXQutGW0LvQtNGWINC20rHQvNGB0LDSm9GC0YvSmyDQttCw0YDQsNKb0LDRgtGC0LDQvdKT0LDQvdC00LAsINKb0LDRgtGC0Ysg0LDRg9GL0YDRgdGL0L3RgyDQsdC+0LvQvNCw0LnQtNGLLCDQsdGW0YDQsNKbINGB0YvQvdGL0pvRgtCw0YAg0LHQvtC70YPRiyDQvNKv0LzQutGW0L0uINCR0LDQu9Cw0L3Ri9KjINC20q/QudC60LUg0LbSr9C50LXRgdGW0LTQtSDRgtC+0LvRi9KbINC20LXRgtGW0LvQvNC10LPQtdGB0ZbQvSDQsNGD0YvRgNGB0YvQvdGD0pPQsCDQtNC10LPQtdC9INGB0LXQt9GW0LzRgtCw0LvQtNGL0pPRiyDTmdGA0YLSr9GA0LvRliDSm9Cw0LHRi9C70LTQsNC90YPRiyDQvNKv0LzQutGW0L0u0JHSsdC7INCx0LDQu9Cw0LvQsNGA0LTRi9KjINCx0L7Qu9KT0LDQvSDQttCw0YDQsNKb0LDRgtKb0LAg0LbQsNGD0LDQvyDQsdC10YDRg9C00LUg0LXRgNC10LrRiNC10LvRltC60YLQtdGA0ZYg0LHQsNGAINC00LXQs9C10L3QtNGWINCx0ZbQu9C00ZbRgNC10LTRli4g0JrQtdC50LTQtSDQsdCw0LvQsCDQsNGD0YvRgNGB0YvQvdGD0LTRiyDQsNC3INGB0LXQt9GW0L3Rg9GWLCDQutC10LnQtNC1INCw0YPRi9GA0YHRi9C90YPQtNGLINC606nRgNGB0LXRgtC/0LXRg9GWINC80q/QvNC60ZbQvS4g0JHQsNC70LDQtNCwINGB0L7QuyDQttCw0psg0LHRltC70LXQuiDQsNGD0YvRgNGB0LAg0LTQsCwg0pvQvtC30pPQsNC70YvRgdGC0YvSoyDRgtC+0LvRi9KbINCx0L7Qu9GD0YssINCx0rHQt9GL0LvRgyDRgdC40LzQv9GC0L7QvNC00LDRgNGLINCx0L7Qu9C80LDRg9GLINCx0YPRi9C90LTQsNGA0LTRi9KjINC205nQvdC1INGB0q/QudC10LrRgtC10YDQtNGW0qMg0YLQvtC70YvSmyDRgdGL0L3QsdCw0pPQsNC90YvQvSDQutOp0YDRgdC10YLQtdC00ZYuINCR0rHQuyDQttCw0pPQtNCw0LnQtNCwINC20LDRgdGL0Lsg0LHSsdGC0LDSmyDRgdGL0L3Rg9GLINC90LXQvNC10YHQtSDQttKx0LzRgdCw0psg0YLRltC90LTQtdGAINC30LDSm9GL0LzRiyDRi9Kb0YLQuNC80LDQuy4g0KHSr9C50LXQuiDQttKv0LnQtdGB0ZYgMjUg0LbQsNGB0YLQsNC9INC60LXQudGW0L0g0YLQvtC70YvSmyDQttC10YLRltC70ZbQvyDSm9Cw0YLQsNGP0LTRiy4g0JXQs9C10YAg0LbQsNC70pPQsNGB0LDRgtGL0L0g0LDRg9GL0YDRgdGL0L3RgyDQvdC1INCx0L7Qu9C80LDRgdCwINGW0YHRltC90YMg0LHQsNC50pvQsNC70YHQsCwg0pvQvtGB0YvQvNGI0LAg0YLQtdC60YHQtdGA0ZbRgdGC0LXQvSDTqdGC0YPRliDQutC10YDQtdC6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67" table:style-name="ce1">
            <text:p>1066867</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0JbQsNKj0LAg0YLRg9KT0LDQvSDQvdOZ0YDQtdGB0YLQtdC00LUg0LfTmdGAINGI0YvSk9Cw0YDRg9C00LDQvSDQutC10LnRltC9INC206nRgNCz0LXQutGC0LUg0LrRltGA0L/RltGIINGC0q/RgdGC0ZYg0LTQsNKb0YLQsNGA0LTRi9KjINC/0LDQudC00LAg0LHQvtC70YPRiyDRg9GA0LDRgiDQutGA0LjRgdGC0LDQu9C00LDRgNGL0L3Ri9KjINCx0L7Qu9GD0YvQvdCwINCx0LDQudC70LDQvdGL0YHRgtGLINCx0L7Qu9GD0Ysg0LzSr9C80LrRltC9LtCW0LDSo9CwINGC0YPSk9Cw0L0g0L3TmdGA0LXRgdGC0LXQvdGW0qMg0LfTmdGA0ZbQvdC00LUg0YPRgNCw0YLRgtCw0YAg0Y/Sk9C90Lgg0LfTmdGAINKb0YvRiNKb0YvQu9GL0L3Ri9KjINGC0rHQt9C00LDRgNGL0L3Ri9KjINC806nQu9GI0LXRgNGWINC20L7Sk9Cw0YDRiyDQsdC+0LvQsNC00Ysu0J7Qu9Cw0YAg0LfTmdGA0LzQtdC9INCx0ZbRgNCz0LUg0LHTqdC70ZbQvdGW0L8s0LDRg9Cw0LzQtdC9INC20LDQvdCw0YHSm9Cw0L3QtNCwINC60ZbRgNC/0ZbRiCDRgtKv0YHRgtGWINC00LDSm9GC0LDRgNC00Ysg0pvQsNC70LTRi9GA0LDRgtGL0L0g0LHQvtC70LDQtNGLLtCR0rHQuyDQvdOZ0YDQtdGB0YLQtdC90ZbSoyDQsdKv0LnRgNC10Log0pvRi9C30LzQtdGC0YLQtdGA0ZbQvdGW0qMg0LbQtdGC0ZbQu9GDINC/0YDQvtGG0LXRgdGW0L3QtSDQsdCw0LnQu9Cw0L3Ri9GB0YLRiyDRg9Cw0pvRi9GC0YjQsCDQttCw0pPQtNCw0Lku0prRi9C30pPRi9C70YIs0LrSr9GA0LXSoyDRgtKv0YHRgtC10YEg0LTQsNKb0YLQsNGAINC305nRgNC00LUg0LHQvtC70LDRgtGL0L0g0YPRgNCw0YIg0YLSsdC30LTQsNGA0Ysg0LXQutC10L3RltC9INC90LDSm9GC0Ysg0LDQudGC0LAg0LDQu9Cw0LzRi9C3LtCe0Lsg0YPRgNCw0YLRgtCw0YAg0LzQtdGC0LDQsdC+0LvQuNC30LzQvdGW0qMg0LHQtdC70YHQtdC90LTRliDQttKv0YDRg9GWINC80LXQvSDQt9OZ0YAg0YjRi9KT0LDRgNGDINC20q/QudC10YHRltC90ZbSoyDTmdC70ZYg0YLQvtC70YvSmyDQttC10YLRltC70LzQtdCz0LXQvdC00ZbQs9GW0L3RltKjINGB0LXQsdC10LHRltC90LXQvSDQv9Cw0LnQtNCwINCx0L7Qu9GD0Ysg0LzSr9C80LrRltC9LtCR0rHQuyDTqdC30LPQtdGA0ZbRgdGC0LXRgNC00ZbSoyDRgtGD0YvQvdC00LDRg9GL0L3QsCDTmdGB0LXRgCDQtdGC0LrQtdC9INC90LXQs9GW0LfQs9GWINGE0LDQutGC0L7RgNC70LDRgNKT0LAg0YLQvtC70YvSm9GC0LDQuSDRgtC+0pvRgtCw0LvQsNGAINCx0L7Qu9GB0LDQvDog0LDQu9C00YvQvNC10L0g0LbQsNKj0LAg0YLRg9KT0LDQvSDQvdOZ0YDQtdGB0YLQtdC70LXRgNC00ZbSoyDQt9OZ0YDRltC90LTQtSDQt9OZ0YAg0pvRi9GI0pvRi9C70YvQvdGL0qMg0LrRgNC40YHRgtCw0LvQu9C00LDRgNGL0L3Ri9KjINC606nQvyDQsdC+0LvRg9GL0L3QsNC9LNGP0pPQvdC4INCx0rHQuyDRgdOZ0LHQuNC70LXRgNC00ZbSoyDQtNC10L3QtdGB0ZbQvdC00LUg0LzQtdGC0LDQsdC+0LvQuNC30LzQvdGW0qMg0LHQtdC70YHQtdC90LTRliDRgtKv0YDQtNC1INC20q/RgNGW0L8g0LbQsNGC0pvQsNC90YvQvdGL0qMg0LbTmdC90LUg0LTQtSDQt9OZ0YAg0YjRi9KT0LDRgNGDINC20q/QudC10YHRltC90ZbSoyDTmdC70ZYg0YLQvtC70YvSm9GC0LDQuSDQttC10YLRltC70LzQtdCz0LXQvdC00ZbQs9GW0L3RltKjINCx0LXQu9Cz0ZbRgdGWLtCh0L7QvdGL0LzQtdC9INKb0LDRgtCw0YAsINC905nRgNC10YHRgtC10L3RltKjINOp0LzRltGA0ZbQvdGW0qMg0LDQu9KT0LDRiNKb0Ysg0LrSr9C90LTQtdGA0ZbQvdC00LUg0LDQvdCwINGB0q/RgtGW0L3RltKjINC20LXRgtC60ZbQu9GW0LrRgtGWINCx0L7Qu9C80LDRg9GL0L3Ri9KjINC905nRgtC40LbQtdGB0ZbQvdC00LUg0YHSsdC50YvSm9GC0YvSm9GC0YvSoyDQsdCw0LvQsCDQvtGA0LPQsNC90LjQt9C80ZbQvdC00LUg0YLQsNC/0YjRi9C70YvSk9GL0L3QsCDTmdC60LXQu9C10LTRli7QodC+0LTQsNC9INC305nRgNC00LUg0YPRgNCw0YLRgtCw0YAg0LTQtdKj0LPQtdC50ZYg0LrTqdCx0LXQudGW0L8s0YLSsdC90LHQsNKT0LAg0YLSr9GB0LXQtNGWLtCh0L7QvdGL0LzQtdC9INKb0LDRgtCw0YAg0LbQsNKj0LAg0YLRg9KT0LDQvSDQvdOZ0YDQtdGB0YLQtdC70LXRgNC00ZbSoyDQsdKv0LnRgNC10LPRliDTmdC70ZYg0YLQvtC70YvSm9GC0LDQuSDQttC10YLRltC70LzQtdCz0LXQvSDQsdC+0LvQsNC00Yss0YHQvtC90YvSoyDQvdOZ0YLQuNC20LXRgdGW0L3QtNC1INC305nRgNC00ZYg0LrQvtC90YbQtdC90YLRgNC70LXRgyDSm9Cw0YHQuNC10YLRliDRgtOp0LzQtdC90LTQtdC50LTRli7QkdKx0Lsg0LTQsCDRg9GA0LDRgtGC0LDRgNC00YvSoyDRgtKx0L3QsdCw0pPQsCDRgtKv0YHRg9GW0L3QtSDTmdGB0LXRgCDQtdGC0LXRgtGW0L0g0LHQvtC70YvQvyDRgtCw0LHRi9C70LDQtNGLLtCa06nQvyDQttCw0pPQtNCw0LnQtNCwINCx0rHQuyDQt9C40Y/QvSDRgtC40LPRltC30LHQtdC50LTRlizQttOZ0L3QtSDRg9Cw0pvRi9GC0YjQsCDQsdC+0LvQsNC00Ysu0K/Sk9C90Lgg0L7QuyDQsdCw0LvQsNC90YvSoyDQt9Cw0YIg0LDQu9C80LDRgdGDINC/0YDQvtGG0LXRgdGWINC20LDSm9GB0LDRgNGL0L8s0LTQtdC90LXRgdGWINC20LXRgtGW0LvQs9C10L0g0LrQtdC30LTQtSDTqdC30LTRltCz0ZbQvdC10L0g0LbQvtC50YvQu9GL0L8g0LrQtdGC0LXRgtGW0L0g0LTQsNC80YMg0L/RgNC+0YbQtdGB0ZbQvdGW0qMg0LHRltGAINCx06nQu9GW0LPRliDQsdC+0LvRi9C/INGC0LDQsdGL0LvQsNC00Ysu0JXQs9C10YAg0LTQtSDQsdGW0YDQvdC10YjQtSDQsNC/0YLQsCDQutGW0YDQv9GW0Ygg0YLSr9GB0YLRliDQtNCw0pvRgtCw0YAg0LHQvtC70LDRgtGL0L0g0LHQvtC70YHQsCDQsdCw0LvQsNC00LAg0LfTmdGAINGI0YvSk9Cw0YDRgyDQutC10LfRltC90LTQtSDQvNCw0LfQsNGB0YvQt9C00YvSmyDQvdC10LzQtdGB0LUg0LbQsNC50YHRi9C30LTRi9KbLNCw0YPRi9GA0YHRi9C90YMg0LHQvtC70YHQsCDQvdC10LzQtdGB0LUg0LfTmdGAINGI0YvSk9Cw0YDRg9C00LAg0pvRi9C30YvQuyDRgtKv0YHRgtGWINC205nQvdC1INKb0LDQvSDQsNGA0LDQu9Cw0YEg0LHQvtC70YHQsCDQtNOZ0YDRltCz0LXRgNCz0LUg0LzRltC90LTQtdGC0YLRliDRgtKv0YDQtNC1INKb0LDRgNCw0LvRgyDQutC10YDQtdC6LtCh0L7QvdGL0LzQtdC9INKb0LDRgtCw0YAg0LHQsNC70LDQu9Cw0YDQtNGLINC20LjRliDQtdC80ZbQt9GDINCx0LDQu9CwINC+0YDQs9Cw0L3QuNC30LzRltC90LTQtdCz0ZYg0YHSsdC50YvSm9GC0YvSmyDQtNC10qPQs9C10LnRltC9INGB0LDSm9GC0LDRg9KT0LAg0LbTmdGA0LTQtdC80LTQtdGB0LXQtNGWLtCR0LDQu9CwINC+0YDQs9Cw0L3QuNC30LzRltC90LTQtdCz0ZYg0YHRgy3RjdC70LXQutGC0YDQvtC70LjRgtGC0ZbQuiDRgtC10qPQs9C10YDRltC80LTRliDSm9Cw0LvQv9GL0L3QsCDQutC10LvRgtGW0YDRgyDQutC10YDQtdC6LjxiciAvPg0KMi4g0JDQu9C00YvQvNC10L0g0LzSsdC90LTQsNC5INC20LDSk9C00LDQudC00LAg0LbQsNGA0LDSm9Cw0YIg0YLSr9GA0ZbQvSDQsNC90YvSm9GC0LDRgyDQutC10YDQtdC6LNC80YvRgdCw0LvRiyDQvtC7INGB0YvQvdGDLNGI0YvSk9GDLNC20rHQvNGB0LDSmyDRgtGW0L3QtNC10YDQtNGW0qMg0LfQsNKb0YvQvNC00LDQvdGD0Ysg0LHQvtC70YPRiyDQvNKv0LzQutGW0L0u0J7QvdGLINC00rHRgNGL0YEg0LDQvdGL0pvRgtCw0YMg0q/RiNGW0L0g0LHQsNC70LDQu9Cw0YDQtNCw0pPRiyDRgtGW0YDQtdC6INKb0LjQvNGL0Lsg0LbSr9C50LXRgdGW0L3QtNC10LPRliDQtdGA0LXQutGI0LXQu9GW0LrRgtC10YDQtNGWINCx0ZbQu9GDINC60LXRgNC10Lou0JHQsNC70LDQu9Cw0YDQtNCwINGB0q/QudC10LrRgtC10YDRltC90ZbSoyDSm9Kx0YDQsNC80YvQvdC00LAg0L7RgNCz0LDQvdC40LrQsNC70YvSmyDQt9Cw0YLRgtCw0YAg0LrTqdC/LNCw0Lsg0LzQuNC90LXRgNCw0LvQtNGLINC30LDRgtGC0LDRgCDQsNC3INCx0L7Qu9GL0L8g0LrQtdC70LXQtNGWLtCv0pPQvdC4INC60L7Qu9C70LDQs9C10L0g0YLQsNC70YjRi9Kb0YLQsNGA0Ysg0LrTqdC/INC806nQu9GI0LXRgNC00LUs0LDQuyDQutCw0LvRjNGG0LjQuSzRhNC+0YHRhNC+0YAg0LTQtdCz0LXQvSDQt9Cw0YLRgtCw0YAg0LDQtyDQutC10LfQtNC10YHQtdGC0ZbQvSDQsdC+0LvRi9C/INC60LXQu9C10LTRli7QkdKx0Lsg0YHSr9C50LXQutGC0LXRgNC00ZYg0LbSsdC80YHQsNKbINC205nQvdC1INGB0LXRgNC/0ZbQvNC00ZYg0LXRgtC10LTRlizQvdOZ0YLQuNC20LXRgdGW0L3QtNC1INC20LDRgdGL0Lsg0LHSsdGC0LDSmyDRgdC10LrRltC70LTRliDRgdGL0L3RgyDQutOp0L8g0LrQtdC30LTQtdGB0LXRgtGW0L0g0LHQvtC70LDQtNGLLtCW0LDRgdGL0Lsg0LHSsdGC0LDSmyDQtNC10LPQtdC9INGB0q/QudC10LrRgtGW0qMg0YLQvtC70YvSmyDRgdGL0L3QsdCw0Lks0LbQsNGA0YLRi9C70LDQuSDSk9Cw0L3QsCDQvNCw0LnRi9GB0YPRi9C9INCw0LnRgtCw0LzRi9C3LtCR0LDQu9Cw0LvQsNGA0LTQsNKT0Ysg0rHQt9GL0L0g0YHSr9C50LXQutGC0LXRgNC00ZbSoyDRjdC/0LjRhNC40LfQsNGA0LvRiyDQv9C70LDRgdGC0LjQutCw0YHRiyDRj9KT0L3QuCDTqdGB0YMg0LDQudC80LDSm9GC0LDRgNGLINC00LXRgdC10Log0YLQtSDQsdC+0LvQsNC00Ysg0YLQvtC70YvSm9GC0LDQuSDRgdKv0LnQtdC60YLQtdC90LHQtdCz0LXQvSDQttCw0pPQtNCw0LnQtNCwINCx0L7Qu9Cw0LTRiy7Qr9KT0L3QuCDQttCw0YDQsNKb0LDRgiDQsNC70pPQsNC9INC20LDSk9C00LDQudC00LAg0L7Qu9Cw0YAg05nQu9GB0ZbQtyDQsdC+0LvRi9C/LNC20LjRliDQt9Cw0pvRi9C80LTQsNC90YPQu9Cw0YDSk9CwINKx0YjRi9GA0LDRg9GLINC80q/QvNC60ZbQvS7QodC+0L3Ri9C80LXQvSDSm9Cw0YLQsNGAINCx0LDQu9Cw0LvQsNGA0LTQsCDQsdCw0LnQu9Cw0LzQtNCw0YAg0LjQutC10LzQtNGWINOZ0YDRliDRjdC70LDRgdGC0LjQutCw0LvRi9KbLNGB0L7Qt9GL0LvQvNCw0LvRiyDQsdC+0LvRi9C/INC60LXQu9C10LTRli7QkNC7INCx0rHQuyDRgdKv0LnQtdC60YLQtdGA0LTRltKjINCx0YPRi9C9INCw0LnQvNCw0pPRi9C90LTQsCDRiNGL0pPRgyDSm9Cw0YPRltC/0ZbQvSDRgtOp0LzQtdC90LTQtdGC0LXQtNGWLtCR0ZbRgNCw0psg0LHQsNC50LvQsNC80L3Ri9KjINGI0LDQvNCw0LTQsNC9INGC0YvRgSDRgdC+0LfRi9C70LzQsNC70Ysg0LHQvtC70YPRiyDQttOZ0L3QtSDQttKx0LzRgdCw0psg0YLRltC90LTQtdGA0LTRltKjINC30LDSm9GL0LzQtNCw0L3Rg9GLINCw0YPRi9GA0YHRi9C90YPSk9CwINCw0LvRi9C/INC60LXQu9GD0ZYg0LzSr9C80LrRltC9LtCh0L7QvdGL0LzQtdC9INCx0ZbRgNCz0LUg0LHQsNC70LDQu9Cw0YDQtNCwINGB0q/QudC10LrRgtC10YAg0LDQudC90LDQu9Cw0YHRi9C90LTQsNKT0Ysg0LbSsdC80YHQsNKbINGC0ZbQvdC00LXRgCDQt9Cw0pvRi9C80LTQsNC70LDRgtGL0L0g0LHQvtC70YHQsCDRltGB0ZbQvdGDINC90LXQvNC10YHQtSDQs9C10LzQsNGC0L7QvNCwINC/0LDQudC00LAg0LHQvtC70YPRiyDQvNKv0LzQutGW0L0g0LXQutC10L3RltC9INCw0LnRgtCwINC60LXRgtC60LXQvSDQttOp0L0u0KHQuNC80L/RgtC+0LzQtNCw0YDQtNGLINKb0L7RgNGL0YLRi9C90LTRi9C70LDQudGC0YvQvSDQsdC+0LvRgdCw0Lws0LbQsNGB0YvQuyDQsdKx0YLQsNKbINGC05nRgNGW0LfQtNGWINGB0YvQvdGDINC90LXQvNC10YHQtSDQttKx0LzRgdCw0psg0YLRltC90LTQtdGA0LTRltKjINC30LDSm9GL0LzQtNCw0LvRg9GLINC80q/QvNC60ZbQvSDQtNC10L8g0L7QudC70LDQudC80YvQvS7QodC10LHQtdCx0ZYsINCx0rHQuyDQttC10YDQtNC1INCx0LDQu9Cw0LTQsNKT0Ysg0LDRg9GL0YDRgdGL0L3Rg9C00Ysg0L3QtdCz0ZbQt9Cz0LUg0LDQu9GL0L8s0LDQu9Cw0LnQtNCwINKb0L7Qt9KT0LDQu9GL0YHRi9C9INGB0LDSm9GC0LDQu9KT0LDQvdC00YvSk9GL0L0g0LXRgdC60LXRgNC10LzRltC3LtCh0q/QudC10Log0YLRltC90ZYg0YLQvtC70YvSmyDQttC10YLRltC70LzQtdCz0LXQvdC00ZbQs9GW0L0g0LXRgdC60LXRgNGB0LXQuiDQsdKx0Lsg0LbQtdGA0LTQtSDRiNC10LzRltGA0YjQtdC6INGC0ZbQvdGWINC606nQvyDQvNOp0LvRiNC10YDQtNC1INCx0L7Qu9Cw0LTRiy7QodKv0LnQtdC6INKx0YjRgtCw0YDRiyDRgtGL0pPRi9C3INC60LDQv9GB0YPQu9Cw0LzQtdC9INC205nQvdC1INCx0LDQudC70LDQvNC00LDRgNC80LXQvSDSm9C+0YDRiNCw0LvSk9Cw0L0g0LHQvtC70YvQvyDQutC10LvQtdC00ZYs0YHQvtC7INGB0LXQsdC10L/RgtGWINKb0L7Qt9KT0LDQu9GL0YEg0YjQtdC60YLQtdC70LzQtdCz0LXQvSDQttCw0pPQtNCw0LnQtNCwINC00LAg0L/QsNC70YzQv9Cw0YbQuNGPINC60LXQt9GW0L3QtNC1INCw0YPRi9GA0YHRi9C90YMg0LHQsNC50pvQsNC70LDRgtGL0L0g0LHQvtC70LDQtNGLLtCh0L7QvdGL0LzQtdC9INKb0LDRgtCw0YAg0L/QsNGC0L7Qu9C+0LPQuNGP0LvRi9KbINKb0L7Qt9KT0LDQu9KT0YvRiNGC0YvSmyDQttC+0psu0JTQuNCw0LPQvdC+0LfQtNGLINC90LDSm9GC0YvQu9Cw0YMg0LzQsNKb0YHQsNGC0YvQvdC00LAg0YDQtdC90YLQs9C10L3QvtCz0YDQsNGE0LjRjyDQvdC10LzQtdGB0LUg0LHQsNGB0pvQsCDQtNCwINGD0LvRjNGC0YDQsCDQtNGL0LHRi9GB0YLRi9KbINC30LXRgNGC0YLQtdGDINOZ0LTRltGB0YLQtdGA0ZbQvSDSm9C+0LvQtNCw0L3Rg9GL0LzRi9C3INC60LXRgNC10Lo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80" table:style-name="ce1">
            <text:p>1066880</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0JbQsNGD0LDQvyAxOiDQndOZ0YDQtdGB0YLQtdC00LXQs9GWINGC06nRgdC10LPRltC90ZbSoyDQttCw0LzRi9C70pPRi9GB0Ysg0pvRi9C30pPRi9C70YIt0LrRltGA0L/RltGIINGC0q/RgdGC0ZYg0LHQvtC70YvQvyDQtNCw0psg0pvQsNC70LTRi9GA0YvQu9KT0LDQvdC00YvSk9GL0L0g0pvQsNGA0LDRgdGC0YvRgNGB0LDSmywg0L3TmdGA0LXRgdGC0LXQu9C10YAg0LXQvdC00ZYg0YLRg9GL0LvSk9Cw0L0g0LrQtdC30LTQtSDQt9OZ0YDRltC90ZbSoyDSm9Kx0YDQsNC80YvQvdC00LAg0YPRgNCw0YIg0LrRgNC40YHRgtCw0LvQtNCw0YDRi9C90YvSoy/RgtKx0LfQtNCw0YDRi9C90YvSoyDQutC+0L3RhtC10YLRgNCw0YbQuNGP0YHRi9C90YvSoyDQutOp0L8g0LHQvtC70YvQvNC10L0g0YHQuNC/0LDRgtGC0LDQu9Cw0LTRiyAg0LbTmdC90LUg0L7QuyDQutC70LjQvdC40LrQsNC00LAg0LbQuNGWINC60LXQt9C00LXRgdC10YLRltC9INC20LDSk9C00LDQuSDQsdC+0LvRi9C/INGC0LDQsdGL0LvQsNC00YsuINCd05nRgNC10YHRgtC10LvQtdGA0LTRltKjINCx0q/QudGA0LXQs9GW0L3RltKjINGC0L7Qu9GL0psg0LbQtdGC0ZbQu9C80LXRg9GWLCDQvtGB0YvQvdGL0qMg0YHQsNC70LTQsNGA0YvQvdCw0L0g0pvQsNC9INGC0LDQt9Cw0YDRgtGDLCDRhNC40LvRjNGC0YDQsNGG0LjRj9C70LDRgyDSm9GL0LfQvNC10YLRgtC10YDRltC90ZbSoyDRgtC+0LvRi9KbINC00LDQvNGL0LzQsNGD0YvQvdCw0L0g0pvQsNC70YvQv9GC0LDRgdKb0LDQvSDQutC70LjQvdC40LrQsNC70YvSmyDQutOp0YDRltC90ZbRgSDRgNC10YLRltC90LTQtSDSm9Cw0YDQsNGB0YLRi9GA0YPSk9CwINCx0L7Qu9Cw0LTRiy4g0J7RgdGLINC60YDQuNGB0YLQsNC70LTQsNGA0LTRi9KjINC305nRgCDSm9Kx0YDQsNC80YvQvdC00LAg0YjQsNC80LDQtNCw0L0g0LDRgNGC0YvSmyDQsdC+0LvRg9GL0L3QsCDQsdCw0LnQu9Cw0L3Ri9GB0YLRiyDQt9OZ0YAg0YLSr9GB0ZYg0LTQtSDSm9C+0Y7Qu9Cw0L3Ri9C/LCDSm9GL0LfSk9GL0LvRgi3RgdCw0YDRiyDQvdC1INCw0YjRi9KbINC60ZbRgNC/0ZbRiCDRgtKv0YHRgtC10YEg0LHQvtC70YvQvyDQsdC+0Y/Qu9Cw0LTRiy4g0JDRgtCw0LvQvNGL0Ygg0LbQsNKT0LTQsNC5INC+0YDRi9C9INCw0LvRgdCwLCDSm9Cw0YLRgtGLINCw0LvQsNKj0LTQsNGD0pPQsCDRgdC10LHQtdC/INC20L7Smywg06nQudGC0LrQtdC90ZYg05nQtNC10YLRgtC1INCx0rHQuyDQutOp0YDRltC90ZbRgSDQt9C40Y/QvdC00Ysg0LXQvNC10YEsINC+0L3Ri9C80LXQvSDSm9C+0YHQsCDRg9Cw0pvRi9GC0YjQsCDQsdC+0LvRi9C/INGC0LDQsdGL0LvQsNC00YsuINCe0Lsg0YPQsNKb0YvRgiDTqdGC0LUg0LrQtdC70LUg0L3TmdGA0LXRgdGC0LUg0LzQtdGC0LDQsdC+0LvQuNC30LzRliDQtNKx0YDRi9GB0YLQsNC70pPQsNC9INGB0L7SoyDSm9Cw0LvRi9C/0YLRi9KT0LAg0LDRg9GL0YHQsNC00YsuINCQ0Lsg0LXQs9C10YAg0LTQtSDQsdKx0Lsg0LrQu9C40L3QuNC60LDQu9GL0psg0LrTqdGA0ZbQvdGW0YEg0rHQt9Cw0psg0YPQsNKb0YvRgiDQttCw0LvSk9Cw0YHQsNGC0YvQvSDQsdC+0LvRgdCwLCDRgtGD0LAg0L/QsNC50LTQsCDQsdC+0LvSk9Cw0L0g0LHSr9C50YDQtdC6INCw0YPRgNGD0Ysg0LHQvtC70YPRiyDQvNKv0LzQutGW0L0g0LbTmdC90LUg0L/QtdC00LjQsNGC0YAg0LTTmdGA0ZbQs9C10YDQs9C1INKb0LDRgNCw0LvRg9GLINGC0LjRltGBLiA8YnIgLz4NCjxiciAvPg0K0JbQsNGD0LDQvyAyOiDQkNGP0pst0pvQvtC7INC60L7QvdGC0YPRgNGL0L3Ri9KjINKb0LDQu9GL0L/RgtGLLCDRgdC+0Lsg0pvQvtC70YvQvdGL0qMg0pvQvtC70pPQsNC70YvRgdGL0L3Ri9KjINC90L7RgNC80LDQtNCwINGB0LDSm9GC0LDQu9GD0Ysg0LDQuyDRgtC10Log0L/QsNC70YzQv9Cw0YbQuNGPINC60LXQt9GW0L3QtNC10LPRliDQsNGD0YvRgNGB0YvQvdGD0LTRi9KjINCx0L7Qu9GD0Ysg0LHRg9GL0L0g0YHRltKj0ZbRgNGW0L3RltKjINGB0L7Qt9GL0LvRg9GLINCx0L7Qu9GD0Ysg0LzSr9C80LrRltC9LiDQkNGD0YvRgNGB0YvQvdGD0LTRiyDRiNCw0pvRi9GA0YPRiyDQvNKv0LzQutGW0L0g0LbQsNKT0LTQsNC50LvQsNGAOiDQqNC10YLQutC10YDRliAo0L/QtdGA0LjRhNC10YDQuNGP0LvRi9KbKSDQttKv0LnQutC1INC30LDSm9GL0LzRizsg0JHRg9GL0L3QtNCw0YDQtNGL0qMg0LHQsNC50LvQsNC90YvRgdGD0YvQvdCwINKb0LDRgtGL0YHQsNGC0YvQvSDRgtGW0YDQtdC6INC20q/QudC10YHRliwg0L7Qu9Cw0YA6INGB0ZbSo9GW0YAsINCx0LDQudC70LDQvNC00LDRgCDQt9Cw0pvRi9C80LTQsNC70YPRiy4g0JHSsdC7INCz0LjQv9C+0YLQtdC30LDQvNC10L0g0L3QsNKb0YLRiyDQtNC40LDQs9C90L7QtyDSm9C+0Y4g0q/RiNGW0L0g0YHQvtC7INC40YvSmyDQsNC50LzQsNKT0YvQvdGL0qMg0YDQtdC90YLQs9C10L3QvtCz0YDQsNC80LzQsNGB0Ysg0pvQsNC20LXRgiDQsdC+0LvRg9GLINC80q/QvNC60ZbQvS4g0JbQsNGBINCx0LDQu9Cw0LvQsNGA0LTQsCDRgdKv0LnQtdC6INGC0L7Qu9GL0psg0pvQsNGC0LDQudC80LDSk9Cw0L0sINGB0LXQsdC10LHRliDSm9Kx0YDQsNC80YvQvdC00LDSk9GLINC+0YDQs9Cw0L3QuNC60LDQu9GL0psg0LfQsNGC0YLQsNGAICjQutC+0LvQu9Cw0LPQtdC9LCDQvtGB0YLQtdC+LdGG0LjRgiwt0LHQu9Cw0YHRgtGC0LDRgCkg0LHQtdC50L7RgNCz0LDQvdC40LrQsNC70YvSmyDQt9Cw0YLRgtCw0YDSk9CwICjQvDrQutCw0LvRjNGG0LjQuSwg0LzQsNCz0L3QuNC5LCDRgdGDLCDRhNC+0YHRhNC+0YApINKb0LDRgNCw0pPQsNC90LTQsCDQutOp0LHRltGA0LXQuiDQsdC+0LvQsNC00YsuINCe0Lsg06nQtyDQutC10LfQtdCz0ZbQvdC00LUg0YHSr9C50LXQutC60LUg0YHQtdGA0L/RltC80LTRltC70ZbQuiDQv9C10L0g0LjRltC70LPRltGI0YLRltC6INKb0LDRgdC40LXRgtGW0L0g0LHQtdGA0LXQtNGWLiDQotCw0pPRiywg0LHQsNC70LAg0LbQsNGB0YLQsCDQsdKx0LvRiNGL0pvQtdGC0YLQtdGAINGC0L7Qu9GL0psg0LbTmdGC0ZbQu9C80LXQs9C10L0g0LbTmdC90LUg05nQu9GB0ZbQtywg0YHQvtC7INGB0LXQsdC10L/RgtGWINC20LXSo9GW0Lsg0YHQvtKb0pvRi9C90YvSoyDTqdC30ZYg0LTQtSDRgdKv0LnQtdC60YLRliDQt9Cw0pvRi9C80LTQsNGD0Ysg0LzSr9C80LrRltC9LiDQkNC7INC10L3QtNGWINCx0LDQudC70LDQvNC00LDRgCDQvNC10L0g0LbQsNC70pPQsNC80LDQu9Cw0YAg06nQtyDQutC10LfQtdCz0ZbQvdC00LUg0LHRg9GL0L3QtNCw0YDQtNGLINKb0L7RgNGI0LDQvyDQvtGA0L3QsNC70LDRgdCw0LTRiyDQttOZ0L3QtSDSm9C+0LfSk9Cw0LvRi9GBINGC0rHRgNCw0pvRgtGL0LvRi9KT0YvQvSDSm9Cw0LzRgtCw0LzQsNGB0YvQtyDQtdGC0ZbQvyDQvtC90Ysg0YjQtdC60YLQtdC50LTRliDQtNC1INGI0LDQvNCw0LTQsNC9INGC0YvRgSDSm9C+0LfSk9Cw0LvRi9GB0YLRiyDQsdC+0LvQtNGL0YDRgtC/0LDQudC00YssINCx0LXRgNGW0LvQs9C10L0g0LrQtdC50YHRgtC1INGB0L7QuyDQuNGL0psg0LbTmdC90LUg0LHRltC70LXQuiDQsNC50L3QsNC70LDRgdGL0L3QtNCw0pPRiyDQsdCw0LnQu9Cw0LzQtNCw0YAg0LHSsdC30YvQu9C80LDSk9Cw0L0sINOp0LnRgtC60LXQvdGWINC/0LDRgtC+0LvQvtCz0LjRj9C70YvSmyDTqdC30LPQtdGA0ZbRgdGC0LXRgCDQutOp0YDRltC90LHQtdC50LTRli4g0KjQsNGA0YLRgdGL0Lcg0pvQvtGA0pPQsNC90YvRiCDRgNC10YTQu9C10LrRgdGC0LXRgNGWIC0g0LHQsNC70LAg0LbQsNGA0LDSm9Cw0YLRgtCw0pPQsNC9INGB0L7QuyDQttCw0psg0LDRj9KbLdKb0L7Qu9GL0L0g0YHQsNKb0YLQsNGDINC80LDSm9GB0LDRgtGL0L3QtNCwINCw0LLRgtC+0LzQsNGC0YLRiyDRgtKv0YDQtNC1INKb0L7Qt9KT0LDQu9KT0YvRiNGC0YvSk9GLINGC06nQvNC10L3QtNC10LnQtNGWINC00LUg0YHQvtC7INKb0L7Qu9KT0LAg0LbSr9C60YLQtdC80LUg0LDQt9Cw0Y/QtNGLLiDQkNGD0YvRgNGB0YvQvdGDINGA0LXQsNC60YbQuNGP0YHRi9C90YvSoyDQsdC+0LvRg9GLIC0g0LHQsNC70LDQtNCwINGL0qPSk9Cw0LnRgdGL0LfQtNGL0pvRgtCw0YAg0YLRg9C00YvRgNKT0LDQvSwg0L7QvdGL0qMg0YHQtdCx0LXQsdGWINC20rHQvNGB0LDSmyDRgtGW0L3QtNC10YDQtNGW0qMg0LfQsNKb0YvQvNC00LDQvdGD0YvQvSDQvdC1INC40pvRgtGL0LzQsNC7INGB0YvQvdGDINGB0LjQvNC/0YLQvtC80LTQsNGA0Ysg0LHQvtC70YPRiyDQtNCwINC80q/QvNC60ZbQvS4g0JHQsNC70LDSk9CwINOZ0YDRliDSm9Cw0YDQsNC5INC+0YDRgtC+0L/QtdC0LdC/0LXQtNC40LDRgtGAINC005nRgNGW0LPQtdGA0ZbQvdC1INKb0LDRgNCw0LvRgyDSsdGB0YvQvdGL0LvQsNC00Ys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98" table:style-name="ce1">
            <text:p>1066898</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0LHSsNCbINC20LDSk9C00LDQuSDTmdC00LXRgtGC0LUg0YTQuNC30LjQvtC70L7Qs9C40Y/Qu9GL0psg0LbTmdC90LUg0YPQsNKb0YvRgtGI0LAg0LHQvtC70LDQtNGLLiDQntC90YvSoyDQvdC10LPRltC30LPRliDRgdC10LHQtdCx0ZYg0LfTmdGAINKb0rHRgNCw0LzRi9C90LTQsNKT0Ysg0L3QtdGB0LXQvyDSm9GL0YjSm9GL0LvRi9C90YvSoyDQutGA0LjRgdGC0LDQu9C00LDRgNGLLiDQntC70LDRgCDQttC10YDQs9GW0LvRltC60YLRliDQsNGD0LDQvNC10L0g05nRgNC10LrQtdGC0YLQtdGB0ZbQvywg0YLQvtGC0YvSk9GL0L8g0LrRltGA0L/RltGIINGC0q/RgdGC0ZYg0ZbQtyDSm9Cw0LvQtNGL0YDQsNC00YsuINCR0rHQuyDQutOp0LHRltC90LXRgdC1INOp0LzRltGA0ZbQvdGW0qMg0LDQu9KT0LDRiNKb0Ysg0LrSr9C90LTQtdGA0ZbQvdC00LUg0LHQsNC50pvQsNC70LDQtNGLLtCh0LXQsdC10LHRliDQvdOZ0YDQtdGB0YLQtdC90ZbSoyDQt9OZ0YDRliDSm9C+0Y4g0LHQvtC70LDQtNGLLiDQkNC70pPQsNGI0pvRiyDQutKv0L3QtNC10YDRliDQsdCw0LvQsNC00LAg0LfTmdGAINC806nQu9GI0LXRgNGWINCw0Lcg0YjRi9KT0LDRgNGL0LvQsNC00Ysu0JDQuyDQt9OZ0YDRliDQutC+0L3RhtC10L3RgtGA0LvQtdC90LPQtdC9INCx0L7Qu9Cw0LTRiy7QldC60ZbQvdGI0ZYg0YHQtdCx0LXQsdGWINCw0L3QsCDRgdKv0YLRltC90ZbSoyDTmdC70ZbQtNC1INGC0L7Qu9GL0psg0LHTqdC70ZbQvdCx0LXRg9GWIC4g0JDQu9KT0LDRiNKb0Ysg0LrSr9C90LTQtdGA0ZYg0LXQvNGI0LXQuiDRgdKv0YLRliDQsNC3INCx06nQu9GW0L3Qs9C10L3QtNGW0LrRgtC10L0g0L3TmdGA0LXRgdGC0LUg0LbQtdGC0LrRltC70ZbQutGC0ZYg0YHSsdC50YvSm9GC0YvSmyDQsNC70LzQsNC50LTRiy4g0q7RiNGW0L3RiNGWINGB0LXQsdC10LHRliDRhNC40LfQuNC+0LvQvtCz0LjRj9C70YvSmyDTqdGC0L/QtdC70ZYg0LbQsNKT0LTQsNC5LCDQsdKx0Lsg0LbQsNKT0LTQsNC5INC20LDSo9CwINGC0YPSk9Cw0L0g0LrQtdC30LXSo9Cz0LUg0YLTmdC9LiDTqNC50YLQutC10L3RliDQsNKT0LfQsNC00LAg0LzQtdGC0L7QsdC+0LvQuNC30Lwg06nQt9Cz0LXRgNGW0YHRgtC10YDRliDQttKv0YDQtdC00ZYuINCR0rHQuyDQttCw0pPQtNCw0Lkg0LrTqdC/INC20LDSk9C00LDQudC00LAg0LHQsNC70LAg0q/RiNGW0L0g0pvQsNGD0ZbQv9GC0ZYg0LXQvNC10YEsINGP0pPQvdC4INC10LzQtNC10YPQtNGWINKb0LDQttC10YIg0LXRgtC/0LXQudC00ZYuINCd0LXRgdC10L8g0pvRi9GI0pvRi9C70YvQvdGL0qMg0YLSsdC30LTQsNGA0Ysg0LHSsdC7INGC0LDQsdC40pPQuCDTqdC90ZbQvNC00LXRgC4g0J7Qu9Cw0YAg0LDSk9C30LDQtNCw0L0gMy01INC60q/QvSDRltGI0ZbQvdC00LUg0LbQvtC50YvQu9GL0L8g0L7RgtGL0YDQsNC00YsuINOY0YHRltGA0LXRgdC1INC20LDSo9CwINGC0YPSk9Cw0L0g0LHQsNC70LAg0YHSr9GC0YLRliDRg9Cw0pvRi9GC0YvQu9GLINC10LzRgdC1LCDQt9OZ0YAg0LzTqdC70YjQtdGA0ZYg0LTQtSDQsNGA0YLRi9C/INC+0YLRi9GA0LDQtNGLLiDQnNKx0L3QtNCw0Lkg0LbQsNKT0LTQsNC50LTQsCDQsdKx0Lsg0LHQtdC70LPRltC70LXRgCDSm9Cw0YPRltC/0YLRliDQtdC80LXRgSwg0YTQuNC30LjQvtC70L7Qs9C40Y/Qu9GL0psg0LbQsNKT0LTQsNC5INGB0LDQvdCw0LvQsNC00Ysu0JXQs9C10YAg0LHQsNC70LDQtNCwINKb0LDQu9GL0L/RgtGL0LTQsNC9INGC0YvRgSDQsdC10LvQs9GW0LvQtdGAINCx0LDQudKb0LDQu9GB0LAsINC005nRgNGW0LPQtdGA0LPQtSDQttKv0LPRltC90YMg0LrQtdGA0LXQui4g0J7Qu9Cw0YAg0LHRltGA0L3QtdGI0LUg0LrSr9C9INGB0LDSm9GC0LDQu9GB0LAsINGP0pPQvdC4INCx0LDQu9CwINGC05nRg9C70ZbQs9GW0L3QtSA0INGA0LXRgtGC0LXQvSDQsNC3INC305nRgCDRiNGL0pPQsNGA0YHQsCwg0YHQsNC70LzQsNKbINKb0L7RgdC/0LDRgdCwINC90LXQvNC10YHQtSDSr9C90LXQvNGWINC80LDQt9Cw0YHRi9C30LTQsNC90YHQsCwg0pvQvtGB0YvQvNGI0LAg0YHRg9GB0YvQt9C00LDQvdGDINCx0LXQu9Cz0ZbQu9C10YDRliDQsdCw0LnSm9Cw0LvRgdCwLSDSm9Kx0YDSk9Cw0psg0LXRgNGW0L0sINOZ0LvRgdGW0LfQtNGW0Log0YHQuNGP0pvRgtGLINCx0LXQu9Cz0ZbQu9C10YAg0LHQsNC50pvQsNC70YHQsCDQv9C10LTQuNCw0YLRgNC80LXQvSDQutC10qPQtdGB0YMg0pvQsNC20LXRgi4g0JbQsNKj0LAg0YLRg9KT0LDQvSDQvdOZ0YDQtdGB0YLQtdC70LXRgNC00LUg0LHSr9C50YDQtdC6INGC0L7Qu9GL0psg0LbQtdGC0ZbQu9C80LXQs9C10L0sINGB0L7QuyDRgdC10LHQtdC/0YLRliDQt9OZ0YAg0pvSsdGA0LDQvNGL0L3QtNCwINC90LXRgdC10L8g0pvRi9GI0pvRi9C70Ysg0LbQvtKT0LDRgNGLINCx0L7Qu9GD0Ysg0LzSr9C80LrRltC9LiDQmtGA0LjRgdGC0LDQu9C00LDRgNC00YvSoyDRgtC+0YLRi9KT0YPRiyDQutGW0YDQv9GW0YjQutC1INKx0pvRgdCw0YPRiyDRgtC10Log0LDSk9C30LDQtNCw0L0g0YjRi9KT0YMg0LrQtdC30ZbQvdC00LUg0LDRg9CwINOZ0YHQtdGA0ZbQvdC10L0g0LHQvtC70LDQtNGLLtOY0LTQtdGC0YLQtSDQsdCw0LvQsNC90YvSoyDTqdC80ZbRgNGW0L3RltKjIDEtNSDQutKv0L3RliDQsNGA0LDRgdGL0L3QtNCwINCx0LDQudKb0LDQu9Cw0LTRiy41LTcg0LrSr9C90L3QtdC9INC60LXQudGW0L0g0LTQtSDRgdCw0pvRgtCw0LvRgdCwLCDQsdKx0Lsg0LHQtdC70LPRltC70LXRgCDQsdCw0LvQsNC90YvSoyDQttC10YLQutGW0LvRltC60YHRltC3INGC0LDQvNCw0pvRgtCw0L3Rg9GL0L3Ri9KjINC90LXQvNC10YHQtSDRgdGD0YHRi9C30LTQsNC90YPRi9C90YvSoyDQsdC10LvQs9GW0YHRliDQsdC+0LvRi9C/INGC0LDQsdGL0LvQsNC00YsuINCV0LPQtdGAINC005nRgNGW0LPQtdGA0LPQtSDQttKv0LPRltC90YPQs9C1INC90LXQs9GW0Lcg0LHQvtC70YHQsCDQv9C10LTQuNCw0YLRgCDTmdGA0YLSr9GA0LvRliDRiNCw0YDQsNC70LDRgNC00Ysg0rHRgdGL0L3QsNC00YsuINCc05nRgdC10LvQtdC9INC905nRgNC10YHRgtC10L3RltKjINGB0LDQu9C80LDSmyDSm9C+0YHRgyDQtNC40L3QsNC80LjQutCw0YHRi9C9INCx0LDSm9GL0LvQsNC50LTRiywg0LfTmdGAINGI0YvSk9Cw0YDRgyDQttC40ZbQu9GW0LPRltC9INC20LDQt9GL0L8g0L7RgtGL0YDQsNC00Ysg0YHQtdCx0LXQsdGWIDUg0LrSr9C90L3QtdC9INCx0LDRgdGC0LDQvyDRgtOZ0YPQu9GW0LPRltC90LUgINC60LXQvCDQtNC10LPQtdC90LTQtSA2INGA0LXRgiDQt9OZ0YAg0YjRi9KT0LDRgNGD0Ysg0LrQtdGA0LXQui4g0KHQvtC90YvQvNC10L0g0pvQsNGC0LDRgCDQvdC10YHQtdC/INKb0YvRiNKb0YvQu9GL0L3Ri9KjINC00LXSo9Cz0LXQudGW0L0g0YLQtdC60YHQtdGA0YMg0q/RiNGW0L0g0LfTmdGAINGC0LDQu9C00LDRg9GL0L0g0LbQsNGB0LDRgyDQutC10YDQtdC6LiDQmtC10LnQtNC1INCx0LDQu9Cw0LTQsCDQv9Cw0YLQvtC70L7Qs9C40Y8g0LHQvtC70YHQsCDSm9Cw0L0g0LDRgNCw0LvQsNGBINC305nRgCDQvtGB0Ysg0LrRltGA0L/RltGIINGC0q/RgdGC0ZYg0LTQsNKb0YLQsNGA0pPQsCDSsdKb0YHQsNGD0Ysg0LzSr9C80LrRltC9INCx0rHQvdGLINGI0LDRgtCw0YHRgtGL0YDRi9C/INCw0LvQvNCw0YMg0LzQsNKj0YvQt9C00YsuINCc0rHQvdC00LDQuSDQttCw0pPQtNCw0LnQu9Cw0YDQtNGL0qMg0LDQu9C00YvQvSDQsNC70YMg0q/RiNGW0L0g0LHQvtGB0LDQvdKT0LDQvdC90LDQvSDQutC10LnRltC9INCx0LDQu9Cw0L3RiyDQvNKv0LzQutGW0L3QtNGW0LPRltC90YjQtSDQtdGA0YLQtdGA0LXQuiDQttOZ0L3QtSAyLTMg0YHQsNKT0LDRgiDRgdCw0LnRi9C9INC20LjRliDQtdC80ZbQt9GDINC60LXRgNC10Lou0JHSsdC7INGB0q/RgtGC0ZbSoyDQsdOp0LvRltC90YPRltC9INGC0LXQt9C00LXRgtC10LTRli7SmtC+0YDRi9GC0YvQvdC00YvQu9Cw0Lkg0LrQtdC70LUsINC20LDSo9CwINGC0YPSk9Cw0L0g0L3TmdGA0LXRgdGC0LXQvdGW0qMg0LbTqdGA0LPQtdCz0ZbQvdC00LXQs9GWINC60ZbRgNC/0ZbRiCDRgtKv0YHRgtGWINC00LDSm9GC0LDRgCDQutOp0LHRltC90LXRgdC1INC305nRgNC00LXQs9GWINC90LXRgdC10L8g0pvRi9GI0pvRi9C70Ysg0LrRgNC40YHRgtCw0LvQtNCw0YDRi9C90YvSoyDQvdOZ0YLQuNC20LXRgdGWLCDQsdKx0Lsg0pvQsNC70YvQv9GC0Ysg0LbQsNKT0LTQsNC5INC205nQvdC1INCx0LDQu9Cw0L3Ri9KjINC00LXQvdGB0LDRg9C70YvSk9GL0L3QsCDQt9C40Y/QvdGB0YvQty48YnIgLz4NCjIg0YHSsdGA0LDSmzog0JzSsdC90LTQsNC5INC60LvQuNC90LjQutCw0LvRi9KbINC20LDSk9C00LDQuSDQv9C10LTQuNCw0YLRgNC40Y/QtNCwINC20LjRliDQutC10LfQtNC10YHQtdC00ZYg0LbTmdC90LUg0LHQsNC70LDQvdGL0qMg0YHSr9C50LXQuiDQsdGD0YvQvSDQttKv0LnQtdGB0ZbQvdGW0qMg0LDQvdCw0YLQvtC80LjRj9C70YvSmyDRhNC40LfQuNC+0LvQvtCz0LjRj9C70YvSmyDQtdGA0LXQutGI0LXQu9GW0LrRgtC10YDRltC80LXQvSDRgtGW0LrQtdC70LXQuSDQsdCw0LnQu9Cw0L3Ri9GB0YLRiy4g0JHSsdC7INC20LDSk9C00LDQudC00YvSoyDQtNCw0LzRg9GL0L3QsCDQsdGW0YDQvdC10YjQtSDQtdGA0LXQutGI0LXQu9GW0LrRgtC10YAg0YvSm9C/0LDQuyDQtdGC0LXQtNGWLtCR0ZbRgNGW0L3RiNGWINGB0q/QudC10Log0YLRltC90ZbQvdC90ZbSoyDQsNC90LDRgtC+0LzQuNGP0LvRi9KbINC10YDQtdC60YjQtdC70ZbQutGC0LXRgNGWLiDQkdCw0LvQsNC70LDRgNC00YvSoyDRgdKv0LnQtdCz0ZYgINGB0LXRgNC/0ZbQvNC00ZYg0LbTmdC90LUg0LjRltC70LPRltGIINCx0L7QvyDQutC10LvQtdC00ZYsINGB0LXQsdC10LHRliDQtdGA0LXRgdC10LrRgtC10YDQvNC10L0g0YHQsNC70YvRgdGC0YvRgNKT0LDQvdC00LAg0LHQsNC70LDQu9Cw0YDQtNGL0qMg0YHSr9C50LXQs9GWINC60L7Qu9C70LDQs9C10L3Qs9C1INCx0LDQuSDRgdGDINC806nQu9GI0LXRgNGWINC606nQvy4g0JHSsdC7INGB0q/QudC10LrRgtC10YDQtNC1INCx0LXQu9Cz0ZbQu9GWINCx0ZbRgCDQtNC10qPQs9C10LnQtNC1INC40ZbQu9GD0LPQtSDQttOZ0L3QtSDSm9Cw0L3QtNCw0Lkg0LTQsCDQsdGW0YAg0YHQvtKb0pvRi9C90Ysg0pvQsNCx0YvQu9C00LDRg9KT0LAg0LzSr9C80LrRltC90LTRltC6INCx0LXRgNC10LTRli4g0J7QvdGLINGB0L7Sm9Kb0YvQvdGLINGB0ZbSo9GW0YDRgyDQtNC10L8g0YLQtSDQsNGC0LDRg9KT0LAg0LHQvtC70LDQtNGLLiDQodC+0L3QtNGL0pvRgtCw0L0g0LrQtdC50LTQtSDRgdGL0L3Ri9KbINCx0L7Qu9C80LDQudC00YsuINCR0ZbRgNCw0psg0YHSr9C50LXQuiDSm9Cw0LHRi9KT0Ysg0LfQsNKb0YvQvNC00LDQvdGD0Ysg0LzSr9C80LrRltC9LiDQkdKx0Lsg0LbQsNKT0LTQsNC50pPQsCDRgdC10LHQtdC/INGB0q/QudC10Log0pvQsNCx0YvSk9GL0qMg0pvQsNC70YvSoyDTmdGA0ZYg0LHQvtGBINCx0LDQudC70LDQvdGL0YHSm9Cw0L0g0LHQvtC70YPRiy4g0JHQsNC70LDQu9Cw0YDQtNCwINGB0q/QudC10Log0pvQsNCx0YvSk9GLINOp0YLQtSDSm9Cw0LvRi9KjINKb0LDQvdC80LXQvSDQttCw0pvRgdGLINKb0LDQvNGC0LDQvNCw0YHRi9C3INC10YLRltC70LPQtdC9INC205nQvdC1INGB0q/QudC10LrQv9C10L0g0LHQvtGBINCx0LDQudC70LDQvdGL0YHRgtCwLiDQkdKx0Lsg0YHSr9C50LXQutGC0ZbSoyDRgtC10Lcg0pvQsNC70L/Ri9C90LAg0LrQtdC70YPRltC90LUg0YvSm9C/0LDQuyDQtdGC0LXQtNGWLiDQkdGW0YDQsNKbINGW0YjQutGWINC30LDSm9GL0LzQtNCw0YDQtNGLINGB0YvRgNGC0YLQsNC5INCw0L3Ri9Kb0YLQsNGDINKb0LjRi9C90pPQsCDRgdC+0pPQsNC00YsuINCc0YvRgdCw0LvRiywg0LbQsNGBINCx0rHRgtCw0psg0YLTmdGA0ZbQt9C00ZYg0YHRi9C90YvSm9GC0LDRgC4g0JXQutGW0L3RiNGWINGE0LDQutGC0L7RgC0g0LHRg9GL0L0g0LHQsNC50LvQsNC8INCw0L/Qv9Cw0YDQsNGC0YvQvdGL0qMg0LXRgNC10LrRiNC10LvRltC60YLQtdGA0ZYuINCR0LDQu9Cw0LvQsNGA0LTRi9KjINCx0LDQudC70LDQvNC00LDRgNGLINOZ0LvRgdGW0LcsINCx0rHQuyDQsdGD0YvQvdC00LDRgNC00LAg0LbQsNC70pPQsNC9INKb0L7Qt9KT0LDQu9GL0YHRgtCw0YDSk9CwINKx0pvRgdCw0YEg05nRgdC10YAg0LHQtdGA0YPRliDQvNKv0LzQutGW0L0uINKa0L7Qt9KT0LDQu9KT0YvRiNGC0YvSmyDQttC+0pPQsNGA0Ysg05nRgdGW0YDQtdGB0LUg0YjRi9C90YLQsNKbINCx0ZbQu9C10Log0LDQudC80LDSk9GL0L3QtNCwLiDQnNKx0L3QtNCw0Lkg0LjQutC10LzQtNGW0LvRltC6INC20LDRgdGL0YDRi9C9INC20LDRgNCw0pvQsNGCINCx0L7Qu9GD0YvQvdCwINGL0pvQv9Cw0Lsg0LXRgtC10LTRliwg0Y/Sk9C90Lgg0LHQsNC70LAg0pvQvtC70YvQvSDSm9C40LzRi9C70LTQsNGC0LAg0LDQu9Cw0LTRiyDQsdGW0YDQsNKbINCw0YPRi9GA0YHRi9C90YMg0LHQsNGALiDSr9GI0ZbQvdGI0ZYg0KTQkNCa0KLQntCgINCx0LDQu9Cw0LvQsNGA0LTQsNKT0Ysg0LbQsNGA0LDSm9Cw0YIg0LzQtdGF0LDQvdC40LfQvNGW0L3RltKjINC10YDQtdC60YjQtdC70LXRltC60YLQtdGA0ZY6IDIg0LbQsNGB0YLQsNKT0Ysg0LHQsNC70LDQu9Cw0YAg0pvQvtC30pPQsNC70YvRgSDQutC+0YDQtNC40L3QsNGG0LjRj9GB0Ysg0YLQvtC70YvSmyDQtNCw0LzRi9C80LDSk9Cw0L3QtNGL0pvRgtCw0L0g0YLQtdC/0LUg0YLQtdKj0LTRltCz0ZbQvSDQttC40ZYg0LbQvtKT0LDQu9GC0LDQtNGLLiDQltC+0pPQsNGA0pPRiyDQsNGP0psg0pvQvtC70LzQtdC9INC20LXRgCDRgtGW0YDQtdGDINKb0rHQu9Cw0YMg0LrQtdC30ZbQvdC00LUg0LHRltC70LXQutGC0LUg0LbQuNGWINCx0LDQudKb0LDQu9Cw0YLRi9C9INC20LDRgNCw0pvQsNGCINC80LXRhdCw0L3QuNC30LzRli4g0YLTqdGA0YLRltC90YjRliDQtdGA0LXQutGI0LXQu9GW0Lo6INCw0YPRi9GA0YHRi9C90YMg0YHQtdC30ZbQvNGW0L3RltKjINC606nRgNGW0L3RltGBINCx0LXRgNGD0ZYsIDIg0LbQsNGB0YLQsNKT0Ysg0LHQsNC70LAg0LDRg9GL0YDRgdGL0L3Rg9C00Ysg0L3QsNKb0YLRiyDRgdC40L/QsNGC0YLQsNC5INCw0LvQvNCw0LnQtNGLLtCh0LXQsdC10LHRliDQsNGD0YvRgNGB0YvQvdGDINCx0L7Qu9GB0LDQtNCwINCx0LDQu9CwINC20YvQu9Cw0LzQsNKT0LDQvdGL0LzQtdC9INKb0L7Qu9GL0L0g0pvQvtC70LTQsNC90LHQsNGD0Ysg0LbQsNC90LDQvNCwINCx0LXQu9Cz0ZYg0LHQvtC70YvQvyDRgdCw0L3QsNC70LDQtNGLLiDQkdKx0Lsg0LzQsNKj0YvQt9C00Ysg0LTQuNCw0LPQvdC+0YHRgtC40LrQsCDSr9GI0ZbQvSDQvdKx0YHSm9Cw0YMuIDXRiNGWINC10YDQtdC60YjQtdC70ZbQujog0pvQsNC90LzQtdC9INKb0LDQvNGC0LDQvNCw0YHRi9C3INC10YLRltC70YPRli4g0JHQsNC70LDQu9Cw0YDQtNCwINC60LDQv9C40LvQu9GP0YDQu9Cw0YAg0LbSr9C50LXRgdGWINC20LDSm9GB0Ysg0LTQsNC80YvSk9Cw0L0sINCx0rHQuyDRltGB0ZbQvdGD0LTRltKjINGC0LXQtyDQv9Cw0LnQtNCwINCx0L7Qu9GD0YvQvdCwINOZ0YHQtdGAINC10YLQtdC00ZYuINCR0ZbRgNCw0psg0L7Qu9C00LAg0YHRi9GA0YLRgtCw0Lkg05nRgNC00LDQudGL0Lwg0LHRltGA0LTQtdC9INCx0LDQudKb0LDQu9C80LDQudC00YsuIDbRiNGLINC10YDQtdC60YjQtdC70ZbQujog0L7RgdGLINC20LDSk9C00LDQudC00LAg0L3QsNKb0YLRiyDQtNC40LDQs9C90L7QtyDSm9C+0Y4uINCc0LXQvdGW0qMg0L7QudGL0LzRiNCwINCx0L7Qu9C20LDQvNC00Ysg0LTQuNCw0LPQvdC+0Lc6INGB0YPQv9C40L3QsNGG0LjRj9C70LDQvdKT0LDQvSDRgtCw0YDRgtGL0L8g0LDQu9GDINC905nRgtC40LbQtdGB0ZbQvdC00LXQs9GWINGA0LDQtNC40YPRgdGC0YvSoyDQsdCw0YHRi9C90YvSoyDQttCw0YDRgtGL0LvQsNC5INGI0YvSk9GD0YsuINCc0rHQvdC00LDQuSDQttCw0pPQtNCw0Lkg05nRgdGW0YDQtdGB0LUgMS00INC20LDRgdGC0LDSk9GLINCx0LDQu9Cw0LvQsNGA0LTQsCDQttC40ZYg0LrQtdC30LTQtdGB0LXQtNGWLiDQmtOp0LHRltC90LXRgdC1INCx0LDQu9Cw0L3RiyDSm9C+0LvRi9C90LDQvSDRgtCw0YDRgtGL0L8g0LrTqdGC0LXRgNCz0LXQvdC00LUgINC90LXQvNC10YHQtSDSm9C+0LvQvNC10L0g0YHSr9C50YDQtdCz0LXQvdC00LUg0LTQsNC80LjQtNGLLiDQnNKx0L3QtNCw0Lkg0LTQuNCw0LPQvdC+0LfQtNGL0qMg0YHQuNC/0LDRgtGC0LDQvNCw0YHRiyDQsdCw0LvQsCDSm9C+0LvRi9C9INKb0L7Qu9C00LDQvdCx0LDQudC00YssINCx0ZbRgNCw0psg0pvQvtC30pPQsNC70YvRgdGLINGB0LDSm9GC0LDQu9KT0LDQvSwg0LDRg9GL0YDRgdGL0L3RgyDRgtC10Log0LHQtdC70LPRltC70ZYg0LHRltGAINKb0L7Qt9KT0LDQu9GL0YHRgtCwINCx0ZbQu9GW0L3QtdC00ZYuINKa0L7RgNGL0YLRi9C90LTRi9C70LDQuSDQutC10LvQtSDQsdCw0LvQsNC00LAg0LbQsNGA0LDSm9Cw0YIg0LrTqdGA0ZbQvdGW0YHRliDRgdGL0YDRgtGC0LDQuSDQsNC90YvSmyDQsdCw0LnSm9Cw0LvQvNCw0pPQsNC90YvQvNC10L0g0L7QvdGL0qMg0pvQvtC70YvQvSDSm9C+0LvQtNCw0L3QsdCw0YPRiyDQvNC10L0g0L/QsNC70YzQv9Cw0YbQuNGP0LTQsCDQsNGD0YvRgNGB0YvQvdGD0LTRi9KjINCx0L7Qu9GD0Ysg0ZbRiNC60ZYg0LzQuNC60YDQvtGC0YDQsNCy0LzQsCDQvdC10LzQtdGB0LUg0LbQsNGA0YLRi9C70LDQuSDRiNGL0pPRgyDQvNKv0LzQutGW0L3QtNGW0LPRltC9INC606nRgNGB0LXRgtC10LTRli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3" table:style-name="ce1">
            <text:p>1066913</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MSnQttCw0YEg0LDRgtCwINCw0L3QsNC90Ysg0L3TmdGA0LXRgdGC0LXQvdGW0qMg0LbQsNGP0LvRi9Cz0YvQvdC00LAg0LfTmdGAINGI0YvSm9Kb0LDQvSDRgdC+0qMg0pvRi9C30pPRi9C70YIg0LrRltGA0L/RltGIINGC0q/RgdGC0LXRgSDQtNCw0psg0pvQsNC70YPRiyDQsNC70LDSo9C00LDRgtCw0LTRiyDQsdKx0Lsg0L3QsNGD0pvQsNGB0YLQsCDQsdC+0LvRi9C/INC20LDRgtKb0LDQvSDSm9Kx0LHRi9C70YvRi9GBINGE0LjQt9C40L7Qu9C+0LPQuNGP0LvRi9KbINKb0LDQu9GL0L/RgtGLINCx0L7Qu9GL0L8g0YLQsNCx0YvQu9Cw0LTRiyAuINGP0pPQvdC4ICDTqdC80ZbRgNGW0L3SoyDQsNC70pPQsNGI0pvRiyDQutKv0L3QtNC10YDRltC90LTQtSAg0LDQv9GC0LDRgdGL0L3QtNCwINC+0qPQsNC5INC60YDQuNGB0YLQsNC70LTQsNC90YvQvyDQttCw0Y/Qu9GL0pvRgtCwINC60ZbRgNC/0ZbRiCDRgi7RgdGC0LXRgSDQtNCw0psg0pvQsNC70LTRi9Kb0YLQsNGA0Ysg0LfTmdGAINKx0YvRiNKx0YvQu9GL0L3Ri9KjINC606nQvyDQsdOp0LvRltC90YPRg9C9INC905nRgNC10YHQtdGC0LUg0LHSr9C50YDQtdCz0ZbQvdGW0qMg0LfTmdGAINKb0YvRiNKb0YvQu9GLINC40L3RhNCw0YDQutGCINCx0L7Qu9GL0L8g0YLQsNCx0LvRi9C00LDRiyDQvtC7INKb0LDQu9GL0L/RgtGLICwg0Y/Sk9C90Lgg0LHQsNC70LAg0LfTmdGA0ZbQvdGW0qMg0YLSr9GB0ZYg0Y/QvdGC0LDRgNC70Ysg0pvQvtC90YvRgCDQsdC+0LvRg9GLINC606nRgNGW0L3RltGBINGC0LDQsdCw0LTRiy4g0L7QuyDQvdOZ0YDQtdGB0YLQtSDRgtGD0YvQu9Cz0LDQvSDQutC10LfQtNC1INCw0LvSk9Cw0YjSm9GLIDMtNSDQutKv0L3RltC90LXQtNC1INC606nRgNGW0L3QtdC00ZYgLtCx0rHQvdGL0qMg0YHQtdCx0LXQsdGWINC20LDRgdGD0YjQsNC70LDRgNC00YvSoyDQutOp0L8g0LzTqdC70YjQtdGA0LTQtSDRi9C00YvRgNCw0YPRi9C90L3QsNC9INCx0L7Qu9Cw0LTRiyDQvtC70LDRgNC00YvQvSDRj9C00YDQvtGB0YvQvdCw0L0g0L/Rg9GA0LjQtNGW0Log0LbTmdC90LUg0L/QuNGA0LjQvNC40L3QtNGW0Log0L3QtdCz0ZbQt9C00LXRgCDQsdC+0YHQsNC/INGI0YvSk9GD0YvQvdCw0L0g0YLRg9GL0L3QtNCw0LnQtNGLLtCx0rHQuyDQvNC10YLQsNCx0L7Qu9C40LfQvCDRgdC+0qPRi9C90LTQsCDQt9OZ0YAg0pvRi9GI0pvRi9C70Ysg0YLSr9C30ZbQu9C10LTRli7QsdKx0Lsg05nQtNC10YLRgtC1INC30LjRj9C90YvRgdGL0Lcg0LbTmdC90LUg0YPQsNKb0YvRgtGI0LAg0LbQsNKT0LTQsNC5INC60LvQuNC90LrQsNC70YvSmyDQutOp0YDQutGW0L3RltGBINCx0L7Qu9GL0L8g0YLQsNCx0YvQu9Cw0LTRiy7QvtGB0YvQtNCw0L0g0LrQtdC50ZbQvSDTmdC00LXRgtGC0LUg0LHQsNC70LDQvdGL0qMg0LzQtdGC0LDQsdC+0LvQuNC30LzRliDQttCw0pvRgdCw0YDQsNC00Ysg0LbQtdGC0ZbQu9Cz0LXQvSDRgdCw0LnRi9C9INC20LDRgSDTqdGB0LrQtdC9INGB0LDQudGL0L0g06nQt9C00ZbQs9GW0L3QtdC9INOp0YLQtdC00ZYuINKb0LDQvdC00LDSk9GLINC/0YPRgNC40L3QtNC10YAg0YvQtNGL0YDQsNC/INC305nRgCDQsNGA0pvRi9C70Ysg0L3QtdGB0LXQvyDSm9GL0YjSm9GL0LvRiyDRgtKv0YDRltC90LTQtSDRiNGL0pPQsNGA0YvQu9Cw0LTRiy4g0LXRgNC10YHQtdC6INC20LDQvdC00LDRgNC00LAg0LfTmdGA0ZYg0YLSr9GB0ZYg0YHQsNGA0pPRi9GI0YLQsNC9INGP0L3RgtCw0YDQu9GLIC3RgdCw0YDRiyDRgtKv0YHQutC1INC00LXQudGW0L0g06nQt9Cz0LXRgNGD0ZYg0LzSr9C80LrRltC9INCw0Lsg0L3TmdGA0LXRgdC10YLQtdC70LXRgNC00LUg0L7Sk9Cw0L0g0pvQsNGA0LDSk9Cw0L3QtNCwINCw0pvRiNGL0LvQtNCw0YMg0YLSr9GB0YLQtdGBINCx0L7Qu9GL0L8g0LrQtdC70LXQtNGWLiDQtdCz0LXRgNC00LUg0LHSsdC7INC20LDSk9C00LDQuSDSm9Cw0LnRgtCw0LTQsNC9INKb0LDQudGC0LDQu9Cw0L3QsCDQsdC10YDRgdC1IDEtMiDQsNC/0YLQsNC00LDQvSDQsNGA0Ysg0pvQsNGA0LDQuSDQttCw0LvSk9Cw0YHQsCDQsdC10YDRgdC1INC/0LXQtNC40LDRgtGAINC005nRgNGW0LPQtdGA0LTRltKjINC60LXSo9C10YHRltC90LUg0LHQsNGA0pPQsNC9INC206nQvS4g0LbQsNKj0LAg0YLRg9KT0LDQvSDQvdOZ0YDQtdGB0YLQtdC10L3RltKTINC305nRgNGW0L3QtNC1INC606nQvyDQvNOp0LvRiNC10YDQtNC1INGD0YDQsNGC0YLQsNGAINC60YDQuNGB0YLQsNC70LTQsNGAINC20LjRliDQutC10LfQtNC10YHQtdGC0L0g0YTQuNC30LjQvtC70L7Qs9C40YfRj9C70psg0pvSsdCx0LvRi9GBINCx0L7Qu9GL0L8g0YLQsNCx0YvQu9Cw0LTRiyAuINC10LPQtdGAINC20L7Sk9Cw0YDRi9C00LAg0LDQudGC0LDQu9KT0LDQvSDRgdC10LrRltC70LTRliDQttCw0LvSk9Cw0YHQsCDQsdC10YDRgdC1INGB0L7QvdGL0LzQtdC9INKb0LDRgtCw0YAg0LDRgtCwINCw0L3QsCDQvdOZ0YDQtdGB0LXRgtC1INGI0YvSk9Cw0YDSk9Cw0L0g0LfTmdGA0ZbQvdC1INC60LDRgNCw0L8g0LHQsNCz0LDQu9Cw0L8g0L7Ri9GC0YDRgyDQutC10YDQtdC6INKb0LDQvSDQsNGA0LDQu9Cw0YEg0LjQvdGE0LXQutGG0LjRjyDQsNGA0LDQu9Cw0YEg0LHQvtC70pPQsNC9INC20LDSk9C00LDQudC00LAg0YjSsdKT0YvQuyDRgtKv0YDQtNC1INC005nRgNGW0LPQtdGA0LPQtSDQttKv0LPRltC90YMg0LrQtdGA0LXQui4gMikgMiDQttCw0YHQsNGAINCx0LDQu9CwINGB0L7QuyDQttCw0psg0LHRltC70LXQs9GW0L3RltKjINCw0YPRi9GA0YHRi9C90YPRiyDSm9Kx0LvQsNGDINOZ0YHQtdGA0ZbQvdC10L0g0LHQsNC50pvQsNC70LDQtNGLLiDQvdC10LPRltC30ZYg0LDRj9KbINGB0q/QudC10LrRgtC10YDRltC90LUg0pvQsNGA0LDSk9Cw0L3QtNCwINKb0L7QuyDRgdKv0LnQtdC60YLQtdGA0L3RltKjINGI0YvSk9GD0Ysg0YHRi9C90YPRiyDQttC40ZYg0LrQtdC30LTQtdGB0LXQtNGWLtGB0YvQvdGL0pvRgtGL0qMg0LXSoyDQutOp0L8g0YLQsNGA0LDQu9KT0LDQvdGLINCx0ZbQu9C10Log0YHSr9C50LXQutGC0LXRgNGWINC/0LXRgNC40L7RgdGC0LXRg9C8INCx0LDQu9Cw0LvRi9KbINC60LXQt9C00LUg0L7Qu9Cw0YAg0pvQsNC70YvSo9GL0YDQsNKbINCx0L7Qu9GL0L8g0YLQsNCx0YvQu9Cw0LTRiyDTmdC70LTQtdKb0LDQudC00LAg0pvQsNC90LzQtdC9INC20LDSm9GB0Ysg0pvQsNC80YLQsNC80LDRgdGL0Lcg0LXRgtGW0LvQtdC00ZYu0YHSr9C50LXQutGC0LXRgNC00LUg0L7RgNCz0LDQvdC40LrQsNC70YvSmyDQt9Cw0YLRgtCw0YAg0LrTqdC/INCx0L7Qu9GL0L8g0YLQsNCx0YvQu9Cw0LTRiy7QsdCw0LvQsNC70LDRgNC00LAg0LDRj9KbINKb0L7QuyDRgdGL0L3Rg9GLINC20LjRliDRgdGL0L3Rg9GLINC20LDRgdGL0Lsg0LHSsdGC0LDSmyDRgtC40L/RltC90LUg0LbQsNGC0LDQtNGLINC80rHQvdC00LDQuSDRgdGL0L3Qs9Cw0L0g0YHSr9C50LXQuiDRgdGL0L3Sk9Cw0L0g0LbTmdC90LUg0LjRltC70LPQtdC9INGB0q/QudC10LrQtSDSsdKb0YHQsNC50LTRiy7QttCw0YDQsNKb0LDRgiDQsdKx0Lsg0YLSr9GA0ZbQvdGW0qMg0LDQudGL0YDSm9GI0LAg0LXRgNC10LrRiNC10LvQs9GWINKb0LDQu9GL0L0g0YHSr9C50LXQuiDQsdOp0LvRltC60YLQtdGA0ZbQvdGW0qMg0q/RgdGC0LDQvyDRgtKx0YDRg9Cz0LAg0pvQsNCx0ZbQu9C10YLRgtGWINCx0L7Qu9KT0LDQvdC00YvSm9GC0LDQvSDQsdGW0YAg0LbQsNKb0YLRiyDRgdGL0L3Ri9Kb0YLQsNGAINCx0LDRgdC8INCx0L7Qu9Cw0LTRiy7QsdCw0LvQsNC90YvSoyDRgdKv0LnQtdC6INGC0ZbQvdGW0L3QtNC1INKv0LvQutC10L3QtNC10YDQs9C1INKb0LDRgNKT0LDQvdC00LAg0LzQuNC90LXRgNCw0LvQtNGLINC30LDRgtGC0LDRgCDQsNC3INC205nQvdC1INC+0YDQs9Cw0L3QuNC60LDQu9GL0pvQt9Cw0YLRiyDQvNC10L0g0YHRg9GLINC20LXRgtC60ZbQu9GW0LrRgtC1INGC0q/RgNC00LUg0LrTqdC/INCx0L7Qu9Cw0LTRiy7QtdGA0LXQutGI0LXQu9C10LPRliDRgtCw0LvRiNGL0pvRgtGLINKb0rHRgNC70YvQvNGLINC205nQvdC1INGF0LjQvNC40Y/Qu9GL0psg0pvSsdGA0LDQvNGL0L3RhtGL0qMg0LXRgNC10LrRiNC10LvQs9GWINC20L7Sk9Cw0YDRiyDRgdC10YDQv9GW0LzQtNGW0LvRltCz0ZbQvSDQs9C40LHQutC+0YHRgtGMINC20L7Sk9Cw0YDRiyDQsdC+0LvSk9Cw0L3Ri9C90LAg0L3QtdCz0ZbQt9C00LXQudC00ZYuINCx0LDQu9Cw0LvRgNC00YvSoyDRgdKv0LnQtdCz0ZYg0L7So9Cw0Lkg0LjRltC70ZbQvdC10LTRliDQttOZ0L3QtSDQtNC10YTQvtGA0LzQsNGG0LjRj9C70LDQvdCw0LTRiyDQsdGW0YDQsNKbINCw0Lcg0YHRi9C90pPRi9GIINCx0L7Qu9GL0L8g0LrQtdC70LXQtNGWIC7RgdKv0LnQtdC6INCx0LXRgtGC0LXRgNGWINGB0LDQu9GL0YHRgtGL0YDQvNCw0LvRiyDRgtKv0YDQtNC1INGC0LXQs9GW0YEg0LHQvtC70LDQtNGLLtCx0LDQu9C70LDQsNGA0LTRi9C9INGB0q/QudC10Log0YLRltC90ZYg0pvQsNC90LzQtdC9INKb0LDQvNGC0LDQvNCw0YHRi9GJINC10YLRltC70YPRliDSm9Cw0YDSm9Op0YvQvdC00Ysg0YHQvtC90LTRi9Kx0YLQsNC90LTQsCDRgdKv0LnQtdC60YLRltKjINOp0YHRg9C9INC205nQvdC1INGB0YvQvdKT0LDQvdCw0L0g0LrQtdC50ZbQvSDQttGL0LvQtNCw0Lwg0YDQtdCz0LXQvdGA0LDRhtC40Y/Sk9CwINKb0LDQvNGC0LDQvNCw0YHRi9C3INC10YLQtdC00ZYuINGP0pPQvdC4INCx0q/QuyDRgdKv0LnQtdC6INC20rHQvNGB0LDSm9GC0YvSk9GLINC80LXQvSDQuNC60LXQvNC00ZbQu9GW0LPRliDQsdC+0LvRi9C/INGC0LDQsdGL0LvQsNC00Ysu0LHQsNC70LAg0YHSr9C50LXQuiDTmdC70ZYg0YLQvtC70YvSmyDQttC10YLRltC70LzQtdCz0LXQvSDQvtC70LDRgCDTmdC70LTQtSDSm9Cw0LnQtNCwINC40LrQtdC80LTRliDQsdC+0LvQsNC00Ysu0LHSr9C7INGB0q/QudC10LrRgtGW0qPQvSDRgdGL0L3Rg9GL0L0g0LHQvtC70LTRi9GA0LzQsNGD0pPQsCDQsNGCINGB0LDQu9GL0YHQsNC00Ysu0L7Qu9Cw0YAg0YHQvtKb0pvRi9KT0LAg0LbQsNGA0LDSm9Cw0YLSm9CwINCx0LXQudGW0Lwg0LHQvtC70YvQvyDQutC10LvQtdC00ZYuINCx0LDQu9C70LDRgNC00LAg0Y3Qv9C40YTQuNC3INGB0q/QudC10LrRgtC10YDRliDQttCw0LHRi9C70LzQsNCz0LDQvSAg0LbTmdC90LUg0L7Qu9Cw0YAg0YjQtdC80ZbRgNGI0LXQutGC0LXQvSDRgtKx0YDQsNC00Ysg0LHSsdC7INGI0LXQvNGW0YDRiNC10LrRgtGW0qMg0YHQvtKb0pvRiyDQttCw0YDQsNKb0LDRgiDQsdC+0LvSk9Cw0L3QtNCwINCw0YPRi9GA0YHRi9C90YPRi9C90LAg0LDQu9GL0L8g0LrQtdC70YMg0LzSr9C80LrRltC9IC4yINC20LDRgdKb0LAg0LTQtdC50ZbQvdCz0ZYg0LHQsNC70LDQu9Cw0YDQtNCwINGB0q/QudC10LrRgtC10YDRliDQvNC10L0g0YjQtdC80ZbRgNGI0LXQutGC0LXRgNGWINCw0YDQsNGB0YvQvdC00LDQs9GLINGC0LXQv9C1INGC0LXQvdC00ZbQuiDTqdC30LPQtdGA0ZbQvyDQvtGC0YvRgNCw0LbQtNGLLiDQvtGB0YvQtNCw0L0g0LHQsNC70LDQu9Cw0YDQtNCwINGI0LXQvNGW0YDRiNC10LrRgtC10YDRliDRgdC+0pvSm9GLINGI0LXQvNGW0YDRiNC10LrQutC1INGC0q/RgdGDINC80q/QvNC60ZbQvSDRgdKv0LnQtdC60YLQtdGA0LPQtSDRgtC+0LvRi9KbINC20LXRgtGD0L3QtSDQtNC10LnRltC9INCx0ZbRgNGI0LDQvNCwINGD0LDSm9GL0YIg0YHQvtC30YPQu9GL0YMg0LzSr9C80LrRltC9LiDRgdKv0LnQtdC60YLQtdGA0LTRliDQvNC10YLQvtCx0L7Qu9C40LfQvCDTmdGA0YLSr9GA0LvRliDQsdC+0LvRi9C/INC60LXQu9GD0ZYg0LzSr9C80LrRltC9INC80YvRgdCw0LvRiyDRgdKv0LnQtdC6INGW0YjRltC90LTQtSDQutC+0LvQu9Cw0LPQsNC9INC80LjQvdC10YDQsNC70LTRiyDRgtKv0LfQtNCw0YAg0LHQsNGAINC+0LvQsNGAINGB0q/QudC10LrQutC1INKb0LDRgtGC0YvRgtC70YvSmyDQsdC10YDQtdC00ZYuINCx0YPRi9C90LTQsNGA0LTRi9C9INGB0L7QvtC30YvQu9GL0LPRi9GI0YvRgtGLINC+0LvQsNGA0LTRi9C9INC40LrQtdC80LTRltC70ZbQs9GWINGB0YvQvdGL0L8g0LrQtdGC0YPQtNC10L0g0LbQsNGA0LDSm9GC0YLQsNGA0LTQsNC9INGB0LDSm9GC0LDQudC00YsgLiDQvtC70LDRgCDRgtC10Lcg0pvQsNC70L/Ri9C90LAg0LrQtdC70YPQs9C1INCx0LXQudGW0Lwg0LHQvtC70YvQvyDQutC10LvQtdC00ZYgLCDQvtGB0Ysg0LbQtdGA0LTQtSDQsNC50YLQsNGC0YvQvSDQttCw0LnRgiDQsdCw0LvQsNC70LDRgNC00LAg0LbSr9C50LrQtSDQttKv0LnQtdGB0ZYg05nQu9GWINGC0L7Qu9GL0psg0LTQsNC80YvQvNCw0pPQsNC9INGB0L7QvdC00YvSsdGC0LDQvSDQsNGD0YvRgNGB0YvQvdGD0YHRi9C3INOp0YLQtdC00ZYgLCDQvtC70LDRgNC00LAg0pvQsNGC0YLRiyDQsNGD0YDRgdGL0L3RgyDQutOp0L8g0LHQvtC70LAg0pvQvtC50LzQsNC50LTRiyDQsdGW0YDQsNKb0YLQsCDSm9Cw0L3QtNCw0LnQtNCwINCx0ZbRgCDSm9C+0LfSk9Cw0LvRi9GB0YLQsNGAINC60LXQt9C00LUg0YjQtdC60YLQtdC70LPQtdC9INCx0L7Qu9GD0Ysg0LzSr9C80LrRltC9INC205nQvdC1INGB0L7QuyDQutC10LfQtNC1INGA0LXQsNC60YbQuNGP0LvQsNGAINCx0ZbQu9C00ZbRgNC10LTRli4g0YHSr9C50LXQuiDSm9Kx0YDRi9C70YHRi9C90YvSoyDQtdGA0LXQutGI0LXQu9GW0LPRliDQvtGB0YvSk9Cw0L0g0LHQsNC50LvQsNC90YvRgdGC0Ysg0LHQvtC70LDQtNGLL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3" table:style-name="ce1">
            <text:p>1066943</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MS4g0J7RgdGLINC905nRgNC10YHRgtC10LTQtSDSm9GL0LfSk9GL0LvRgi3QutGW0YDQv9GW0Ygg0YLSr9GB0YLQtdGBINC00LDSm9GC0YvSoyDSm9Cw0LvRg9GL0L3Ri9KjINCx0ZbRgNC00LXQvSDQsdGW0YAg0YHQtdCx0LXQsdGWLCDQt9OZ0YAg0LbSr9C50LXRgdGW0L3QtNC1INCx0LXQu9Cz0ZbQu9GWINCx0ZbRgCDSm9Cw0LHRi9C90YPQtNGL0qMg0LHQvtC70YPRi9C90LDQvSDQv9Cw0LnQtNCwINCx0L7Qu9KT0LDQvSDQtNC10L8g0LHQvtC70LbQsNGB0LDSmyDQsdC+0LvQsNC00Ysu0K/Sk9C90LgsINC905nRgNC10YHRgtC1INOZ0LvRliDQutGW0YjQutC10L3RgtCw0Lkg0LHQvtC70pPQsNC90LTRi9Kb0YLQsNC9INC40LzQvNGD0L3QtNGL0psg0LbSr9C50LXRgdGWINGC0L7Qu9GL0psg0LbQtdGC0ZbQu9C80LXQs9C10L0uINCa0LXQtyDQutC10LvQs9C10L0g0LjQvdGE0LXQutGG0LjRjywg0LLQuNGA0YPRgdGC0Ysg0LTQtdGA0LXRgyDQsNC70YvQvyDQsNC70LDQtNGLLiDQvtGB0Ysg06nQt9Cz0LXRgNGW0YHRgtGW0qMg0YHQtdCx0LXQsdGWINGA0LXRgtGW0L3QtNC1INKb0LDQsdGL0L3Rg9C00YvSoyDQsdC+0LvRi9C/INC20LDRgtKb0LDQvdGL0L0g0LDQudGC0YHQsNKbINCx0L7Qu9Cw0LTRiy4g0JfTmdGA0LTQtSDQv9Cw0YLQsNC70L7Qs9C40Y/QvdGL0qMg0LHQvtC70YPRiyDQsNGD0YvRgNGB0YvQvdGD0LzQtdC9LCDQtNCw0pvRgtGL0qMg0LHQvtC70YPRi9C80LXQvSDQttKv0YDQtdC00ZYu0J7QtNCw0L0g0LHTqdC70LXQuiwg0LPQtdC80LDRgtGD0YDQuNGPINCx0L7Qu9GD0Ysg0LzSr9C80LrRltC9LiDQkdKx0Lsg0LTQtdCz0LXQvdGW0LzRltC3ICzQt9OZ0YDQtNGW0qMg0YDQtdCw0LHRgdC+0YDQsdGG0LjRj9GB0Ysg0LHSsdC30YvQu9GL0L8sINGE0LjQu9GM0YLRgNCw0YbQuNGP0LvRi9KbINKb0LDQsdGW0LvQtdGC0ZYg0LHSsdC30YvQu9GL0L8sINC305nRgNC00LXQvSDRjdGA0LjRgtGA0L7RhtC40YLRgtC10YDQtNGW0qMg06nRgtGW0L8g0LrQtdGC0YPRliwg0YHQvtC90YvQvSDTmdGB0LXRgNGW0L3QtdC9INC00LUg0pvRi9C30pPRi9C70YIg0LrRltGA0L/RltGIINGC0q/RgdGC0LXRgSDQtNCw0pvRgtGL0qMg0LHQvtC70YPRiyDQvNKv0LzQutGW0L0uPGJyIC8+DQoyLiDQkdKx0Lsg0LbQtdGA0LTQtSDRgdKv0LnQtdC6INKb0rHRgNGL0LvRi9GB0YvQvdGL0qMg0LDQvdCw0YLQvtC80L4t0YTQuNC30LjQvtC70L7Qs9C40Y/Qu9GL0psg0LXRgNC10LrRiNC10LvRltC60YLQtdGA0ZbQvdC1INGC0L7Sm9GC0LDQu9GB0LDQvCwg0LbQsNC70L/RiyDRgdKv0LnQtdC6INC+0YHRgtC10L7RhtC40YLRgtC10YDQtNC10L0sINC+0YHRgtC10L7QsdC70LDRgdGC0YLQsNGA0LTQsNC9LCDQvtGB0YLQtdC+0LrQu9Cw0YHRgdGC0LDRgCDQsNGC0YLRiyDQttCw0YHRg9GI0LDQu9Cw0YDQtNCw0L0g0YLSsdGA0LDQtNGLLiDQntC00LDQvSDQsdOp0LvQtdC6INC+0YDQs9Cw0L3QuNC60LDQu9GL0psg0LbTmdC90LUg0LHQtdC50L7RgNCz0LDQvdC40LrQsNC70YvSmyDQt9Cw0YLRgtCw0YDQtNCw0L0g0YLSsdGA0LDQtNGLLiDQkNC7INC+0LvQsNGAINC80LjQvdC10YDQsNC70LTRiyDQt9Cw0YLRgtCw0YDQtNCw0L0sINCy0LjRgtCw0LzQuNC90LTQtdGA0LTQtdC9INGC0rHRgNCw0LTRiy4g0JHSsdC7INGB0q/QudC10Log0LbQsNGB0YPRiNCw0LvQsNGA0YvQvdGL0qMg0pvQsNC70YvQv9GC0LDRgdGD0Ysg0LHQsNC70LDQvdGL0qMg0LrRltGI0LrQtdC90YLQsNC5INC60LXQt9GW0L3QtdC9INCx0LDRgdGC0LDQu9Cw0LTRiywg0LHQsNC70LAg06nRgdC60LXQvSDRgdCw0LnRi9C9INC+0Lsg0pvQsNGC0LDRjyDQsdC10YDQtdC00ZYuICDQkdKx0Lsg0LbQsNGB0YPRiNCw0LvQsNGAINGB0q/QudC10LrRgtGW0qMg0LHQtdGA0ZbQutGC0ZbQu9GW0LPRltC9INGB0LDSm9GC0LDQvyDRgtKx0YDQsNC00YssINGB0q/QudC10LrQutC1INGB0LXRgNC/0ZbQvNC00ZbQu9GW0LosINKb0LDRgtGC0YvQu9GL0psg0YHQtdC60ZbQu9C00ZYg0pvQsNGB0LjQtdGC0YLQtdGA0LTRliDQsdC10YDQtdC00ZYuINCR0LXRgNGW0LvQs9C10L0g0LXRgdC10L8g0LHQvtC50YvQvdGI0LAgMiDQttCw0YHQsNGAINCx0LDQu9Cw0L3Ri9KjINGB0L7QuyDQttCw0psg0LHRltC70LXQs9GW0L3RltKjICDQsNGD0YvRgNGB0YvQvdGD0YvQvdGL0qMg0L/QsNC50LTQsCDQsdC+0LvRgyDRgdC10LHQtdCx0ZbQvSAg0YDQsNGF0LjRgiDQtNC10L8g0LHQvtC70LbQsNGB0LDSmyDQsdC+0LvQsNC00YsuINGA0LDRhdC40YIgLSDQtNC10LPQtdC90ZbQvNGW0Lcg0YHSr9C50LXQutC60LUg0LQg0LTTmdGA0YPQvNC10L3RltC90ZbSoyDQttC10YLRltGB0L/QtdGD0YjRltC70ZbQs9GW0L3QtdC9INGC0YPRi9C90LTQsNC50YLRi9C9INCw0YPRgNGDINCx0L7Qu9GL0L8g0YLQsNCx0YvQu9Cw0LTRiy4g0JbQsNC70L/RiyDQlCDQtNOZ0YDRg9C80LXQvdGW0qMg0pvQsNC50LTQsNC9INCw0LvQsNC80YvQtywg0LrSr9C90L3QtdC9LCDQlCDQtNOZ0YDRg9C80LXQvdGW0L3QtSDQsdCw0Lkg0LrTqdCz0LXQvdGW0YEg0L/QtdC9INC20LXQvNGW0YHRgtC10YDQtNC10L0g0LDQu9Cw0LzRi9C3LCDQstC40YLQsNC80LjQvSDRltGI0YMg0LDRgNKb0YvQu9GLINCw0LvQsCDQsNC70LDQvNGL0LcuINCUINC005nRgNGD0LzQtdC90ZbQvdGW0qMg0YTRg9C90LrRhtC40Y/RgdGLINCx0rHQuyDRgdKv0LnQtdC60YLRltKjINGB0LXRgNC/0ZbQvNC00ZbQu9GW0LPRltC9LCDQsdC10YDRltC60YLRltC70ZbQs9GW0L0g0YHQsNKb0YLQsNGD0pPQsCwg0LHSsdC70YjRi9Kb0LXRgtGC0LXRgNC00ZbSoyDSm9GL0LfQvNC10YLRltC9INC20LDSm9GB0LDRgNGC0YPSk9CwINC606nQvNC10LrRgtC10YHQtdC00ZYuIDIg0LbQsNGB0LDRgCDQsdCw0LvQsNKT0LAg0LrTqdCx0ZbRgNC10Log0LTTmdGA0YPQvNC10L3QtNC10YDQtNGWLCDQstC40YLQsNC80LjQvdCz0LUg0LHQsNC5INC20LXQvNGW0YEg0LbQuNC00LXQuiwg0LrTqdCz0LXQvdGW0YHRgtC10YDQtNGWINCx0LXRgNGB0LXQuiDQsdC+0LvQsNC00YssINKb0LDQt9GW0YDQs9GWINC20LDRgdGL0L3QsNC9INCx0LDRgdGC0LDQvywg0LHQsNC70LDQvdGL0qMg0YHSr9C50LXQs9GW0L0g0pvQsNGC0LDQudGC0YMgINC80LDSo9GL0LfQtNGLL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жауап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09" table:style-name="ce1">
            <text:p>1067009</text:p>
          </table:table-cell>
          <table:table-cell office:value-type="string" table:style-name="ce1">
            <text:p>kazakh</text:p>
          </table:table-cell>
          <table:table-cell office:value-type="string" table:style-name="ce1">
            <text:p>Билет 15&amp;lt;br /&amp;gt; 1.Жас ата-ананы нәрестенің жаялығында зәр шыққан соң қызғылт-кірпіш түстес дақ қалуы аландатады. Осы өзгеріс себебін атаныз және бұл не болуы мүмкін:&amp;lt;br /&amp;gt; 2. 2 жасар бала ойнап жүріп қүлау кезінде сол жақ қолының жарақат алған.Қараған кезде баланы сол жақ қолының қіймілі сақталған, патологиялық өзгерістер жоқ, сол жақ білегің пальпациялағанда ауырсыну байқалады. Сүйектің қүрлысының қандай анатомо-физиологиялық ерекшеліктерімен бүл байланысты?&amp;lt;br /&amp;gt;</text:p>
          </table:table-cell>
          <table:table-cell office:value-type="string" table:style-name="ce1">
            <text:p>MSDRgdKx0YDQsNKbINCW0LDSo9CwINGC0YPRi9C70LPQsNC9INC90LDRgNC10YHRgtC10LvQtdGA0LTQtSDQt9OZ0YAg0YjRi9Cz0LDRgNGD0LTQsNC9INC60LXRltC9INC206nRgNCz0LXQutGC0LXRgNGW0L3QtNC1INC60ZbRgNC/0ZbRiCDRgtGD0YHRgtGLINC00LDSm9GC0YvQvSDQv9Cw0LnQtNCwINCx0L7Qu9GD0Ysg0L7Rg9GA0LDRgiDQutGA0LjRgdGC0LDQu9C00LDRgNGL0L3Ri9C9INCx0L7Qu9GD0YvQvNC1LtC9INCx0LDQudC70LDQvdGL0YHRgtCw0YDQsNC80YvQty4g0JfTmdGA0LTQtdCz0ZYg0LfTmdGAINC60YvRiNC60YvQu9GL0L3Ri9KjINC20L7Qs9Cw0YDQs9GLINC60L7QvdGG0LXQvdGC0YDQsNGD0YbQuNGP0YHRiyAg0LHQvtC70LPQsNC9INC60LXQt9C00LUg0YPRgNCw0YIg0LrRgNC40YHRgtCw0LvQtNCw0YDRiyDQv9Cw0LnQtNCwINCx0L7Qu9GD0Ysg0LzRg9C80LrRltC9ICzQsdGD0Lsg0LbQsNKj0LAg0YLRg9KT0LDQvSDQsdCw0LvQsNC70LDRgNC00LAgINC20LjRliDQsdC+0LvRg9GLINC80q/QvNC60ZbQvSDQkdKx0Lsg0LrRgNC40YHRgtCw0LvQtNCw0YDQtNGL0qMg0L/QsNC50LTQsCDQsdC+0LvRg9GL0L3QsCDQsdCw0LnQu9Cw0L3Ri9GB0YLRiyDQvdC10YHQtdC/INC60YvQt9Cz0YvQu9GCINC60YvRgNC/0ZbRiCAg0YLRg9GB0YLRiyDQsdC+0LvRg9GLINC80YPQvNC60ZbQvSDQsdGD0Lsg0LDQtNC10YLQtNC1INC30LjRj9C90YHRi9C3INC205nQvdC1INGD0LDQutGL0YLRiNCwINC20LDSk9C00LDQuSDQttOZ0L3QtSDQvtC7INCw0LTQtdGC0YLQtSDQvdCw0YDQtdGB0YLQtdC90ZbSoyDQvNC10YLQvtCx0L7Qu9C40LfRltC80ZYg0YDQtdGC0YLQtdC70ZbQvyDQttC10YLRltC70LPQtdC9INGB0LDQudGL0L0g0L7Qt9C00YvQs9GW0L3QtdC9INGI0LXRiNGW0LvQtdC00ZYgLtCR0YPQuyDQvtGC0LUg0YjQs9GL0YDQu9Cw0L3Qs9Cw0L0g0L3QtdGB0LXQvyDQvtC90YvQvSDSm9Kx0YDQsNC80YvQvdC00LAgINGD0YDQsNGCINC60YDQuNGB0YLQsNC70LTQsNGA0YsgLtGD0YDQsNGCINC90LXRgdC10L8g0LrRi9GI0YvQutGL0LvRi9C90LDQvSDRgtGD0LfRi9C70LXQtNGWINC90LXRgdC10L8g0LrRi9GI0LrRi9C70Ysg0LfQsNGCINCw0LvQvNCw0YHRgyDQv9GA0L7RhtC10YHRltC90ZbSoyAg0YHQvtC90LPRiyDTqdC90ZbQvNGWIC7QltCw0qPQsCDRgtGD0LvRi9Cz0LDQvSDQvdCw0YDQtdGB0YLQtdC70LXRgCDQutCw0L3QtNCw0LPRi9GLICDQt9OZ0YAg0LrRi9GI0LrRi9C70YvQvdGL0qMg0LbQvtCz0LDRgNGL0pPRiyDQutC+0L3RhtC10L3RgtGA0LDRhtC40Y/RgdGLINC00LXQvdCz0LXQudGW0LzQtdC9INGC0YPRi9Cw0LvQtNGLICzRgdC10LHQtdCx0ZYg0L7QvdGL0L0g0LzQvtC70YjQtdGA0ZYg0L/Qu9Cw0YbQtdC90YLQsCDQsNGA0pvRi9C70Ysg06nRgtC10LTRliAu0KHQvtC90LTRi9Kb0YLQsNC9INC+0Lsg0LHRg9C50YDQtdC6INCw0YDSm9GL0LvRiyDQvdC10YHQtdC/0YLQtdC9INGC0LXQtyDRiNGL0pPQsNGA0YvQu9Cw0LTRiyAu0J7QuyDQvdCw0YDQtdGB0YLQtdC00LXQs9GWINGB0YPRgdGL0LfQtNCw0L3Rg9C00YvSoyAs0YHRg9GCINGC0LDQv9GI0YvQu9GL0pPRi9C90YvSoyDQsdC10LvQs9GW0YHRliDQsdC+0LvRg9GLINC80q/QvNC60ZbQvTxiciAvPg0KMiDRgdKx0YDQsNKbLS0tLS0t0LHQsNC70LDQu9Cw0YDQtNCwINC10qMg0LrQvtC/INGC0LDRgNCw0LPQsNC9INGB0YvQvdGL0LogLSDQsdGW0LvQtdC6INGB0YPQudC10LrRgtC10YDRi9C90YvQvSDRgdGL0L3Rg9GLIC7QltOZ0L3QtSDRgtC+0LHRi9Kb0YLRi9C9ICzQsdGD0LPQsNC90LDQu9Cw0YDQtNGL0L0g0LrQvtC70LTQsNGA0YvQvdGL0L0g0YHRi9C90YvQutGC0LDRgNGLINC20LjRliDQutC10LfQtNC10YHQtdC00ZYgLtCR0LDQu9Cw0LvQsNC00YvQvSDQutC+0LvRi9C90LTQsNGA0Ysg0LbTmdC90LUg0LrQvtC70YvQtNGL0qMg0LHQvtC70YvQutGC0LXRgNGW0L3RltKjINGI0YvSk9GD0YvRiyAs0YHRi9C90YPRiyDQsNGP0LrRgtGL0L0g0YHRi9C90YvQutGC0LDRgNGL0L3QsCDQutCw0YDQsNCz0LDQvdC00LAg0LbQuNGW0YDQtdC6INCx0LDQudC60LDQu9Cw0LTRiyAu0J/QtdGA0LjQuNGB0YLQtdGD0Lwg0LHQsNC70LDQu9GL0Log0YjQsNC60YLQsCAg0YjQsNC60YLQsCDQutCw0LvRi9Kj0YvRgNCw0Log0LbTmdC90LUg0LDQu9C00LXQutCw0LnQtNCwINC20LDQutGB0Ysg0LrQsNC90LzQtdC9INC60LDQvNGC0LDQvNCw0YHRi9C3INC10YLRltC70LXQtNGWINGB0YPQudC10LrRgtC10YDQtNC1INC+0YDQs9Cw0L3QuNC60LDQu9GL0Log0LfQsNGC0YLQsNGAINC60L7QvyDRjtC+0LvQsNC00Ysu0KHQvtC90LTRi9C60YLQsNC9INCw0Y/QuiDQutC+0LvQtNCw0YDQtNGL0L0gINC20LjRliDRgdGL0L3Rg9GLINC20LDRgdGL0Lsg0LHRg9GC0LDSmyDRgtC40L/RltC90LUg0LbQsNGC0LDQtNGLINC80YPQvdC00LDQuSAg0YHRi9C90YvQuiDRgdGL0L3Qs9Cw0L0g0LbTmdC90LUg0LjRltC70LPQtdC90YHRg9C50LXQutC60LUg0YPQutGB0LDQudC00YsgLtC20LDRgNCw0LrQsNGC0YLRi9C9INCx0YPQuyDRgtGD0YDRiyDQsNC50YDRi9C60YjQsCDQtdGA0LXQutGI0LXQu9GW0LPRliDQutCw0LvRi9C9INC/0LXRgNC40L7RgdGC0LXRg9GL0Lwg0YHRg9C50LXQuiDQsdC+0LvRltC60YLQtdGA0ZbQvSDRg9GB0YLQsNC/INGC0YPRgNGD0pPQsCDSm9Cw0LHRi9C70LvQtdGC0YLRliDQsdC+0LvSk9Cw0L3QtNGL0LrRgtCw0L0g0YHRi9C90YvQutGC0LDRgNC00YvQvSDQsdCw0YHRi9C8INCx0L7Qu9GD0Ysu0J3QsNGA0LXRgdGC0LXQtNGW0LPRliDRgdGD0LnQtdC6INGC0ZbQvdC00LXRgNGWINGC0LDQu9GL0YjRi9C60YLRiyDQutKx0YDRi9C70YvQvNKT0LAg0LjQtSDQvNC40L3QtdGA0LDQu9C00Ysg0YLRg9C30LTQsNGA0LPQsCDQsdCw0Lkg0YHRg9C50pPQsCDQutCw0L0g0YLQsNC80YvRgNC70LDRgNGL0L3QsCDQsdCw0LkgLtCd0LDRgtC40LbQtdGB0ZbQvdC00LUg0LHQsNC70LDQvdGL0L0g0YHRg9C50LXQutGC0LXRgNGWINC20YPQvNGB0LDQuiDQuNC60LXQvNC00ZYs0LbQtdGC0LrRltC70ZbQutGC0ZYg0LHQtdGA0ZbQutGC0ZbQutC1INC40LUg0LXQvNC10YEg0L7QvdCw0Lkg0LrQuNGB0YvQutCx0L7Qu9Cw0LTRiyDQttOZ0L3QtSDQutGL0YHRi9C80LTRiyDQutC40ZbQvNC90ZbSoyDRgtCw0YAg0LDRj9C6INC60LjRltC80ZbQvdGW0qMg0LDRgdC10YDRi9C90LXQvSDQvdC10LzQtdGB0LUg0LXRgNC10YHQtdC60YLQtdGA0LTRltKjINC60L7Qu9GL0L3QtNCwINCx0LXRgdGW0LrRgtC1INC205nQvdC1INGCLtCxINC20YPQudC10LvRliDRgtGD0YDQtNC1INC00YPRgNGL0YEg0LXQvNC10YEg0LrQsNC70YvQv9GC0LAg0LHQvtC70LDQtNGLIDxiciAvPg0K0J7QvNGL0YDQtNGL0qMgIDIg0LbRi9C70YvQvdC00LAg0LHQsNC70LDQvdGL0qMg0YHRg9C50LXQutGC0LXRgNGWINKb0rHRgNGL0LvRi9C80Ysg0LHQvtC50YvQvdGI0LAg0LXRgNC10YHQtdC6INCw0LTQsNC80LTQsNGA0LTRi9C9INGB0YPQudC10LrRgtC10YDRltC90LUg0LbQsNC60YvQvdC00LDQudC00Ysg0LbTmdC90LUgMTIg0LbQsNGB0LrQsCDQutCw0YDQsNC5INC+0LvQsNGA0LTRi9C9INC60rHRgNCw0LzRiyDQvtC70LDRgNC00LDQvSDQtdGA0LXQutGI0LXQu9C10L3QsdC10LnQtNGWINC20LDSo9CwINGC0YPSk9Cw0L0g0L3QsNGA0LXRgdGC0LXQvdGL0L0g0LHQsNGB0YsgINGD0LvQutC10L0g0LbTmdC90LUg0LTQtdC90LXRgdGW0L3RltKjIDEvNCDQsdC+0LvRltCz0ZbQvSDSm9Kx0YDQsNC50LTRiyDQttOZ0L3QtSDQtNC+0LzQsNC70LDTqSDQv9GW0YjRltC90LTRliAu0JXSoyDSm9Cw0YDSm9GL0L3QtNGLINGC0YPRgNC00LUg0LHQsNGBINGB0YPQudC10Log0L7QvNGL0YDQtNGL0L0gMSDRiNGWINC20YvQu9GL0L3QtNCwINKx0LvSk9Cw0Y/QtNGLINC205nQvdC1IDQg0LbRi9C70pPQsCDQtNC10LnRltC9INGB0LDQu9GL0YHRgtGL0YDQvNCw0LvRiyDRgtGD0YDQtNC1INGC0LXQtyDQvtGB0LXQtNGLINCx0L7Qu9Cw0YjQsNC60YLQsCDQsdCw0YEg0YHRg9C50LXQs9GW0L3RltKjINOp0YHRg9GWINCw0LnRgtCw0YDQu9GL0LrRgtCw0Lkg0LHQsNGP0YPQu9Cw0LnQtNGLIC7QttCw0qPQsCDRgtGD0pPQsNC9INC90LDRgNC10YHRgtC10LTQtSDQvtC80YvRgNGC0pvQsNGB0Ysg0YLSr9C30YMgLNGE0LjQt9C40LvQvtCz0LjRj9C70YvSmyDQuNGW0LvRltC80LTQtdGA0ZYg0LbQvtKbLtCR0LDQu9Cw0L3Ri9C9INOp0YHRg9GW0LzQtdC9INC205nQvdC1INC20LDSo9CwINGE0YPQvdC60YbQuNGP0LvQsNGA0LTRiyzQvSDRjtC+0LvRg9GL0LzQtdC9INC+0LzRi9GA0YLSm9Cw0L3Ri9C9INGE0LjQt9C40L7Qu9C+0LPQuNGP0LvRi9KbINC40ZbQu9GW0LzQtNC10YDRliDQv9Cw0LnQtNCwINCx0L7Qu9Cw0LTRiyAu0JzQvtC50YvQvSDQu9C+0YDQtNC+0LfRiyDQvdOZ0YDQtdGB0YLQtdC00LUg0LHQsNGB0YvQvSDSsdGB0YLQsNC5INCx0LDRgdGC0LDSk9Cw0L3QvdCw0L0g0LrQtdC50ZbQvSAyINCw0LnQu9GL0psg0LbQsNGB0YLQsCDQsNC90YvQutGC0LDQu9Cw0LTRiyAt0L7Ri9C80YDRgtC60LDQvdGLINC9INC60LXRg9C00LUgINC60LjRhNC+0LfRiyA2INCw0LnQtNCwINC90LDRgNC10YHRgtC1INC+0YLRi9GA0LAg0LDQu9Cw0YLRi9C9ICDQutC10LfQtNC1INC/0LDQudC00LAg0LHQvtC70LDQtNGLINOp0LHQtdC7ICDQu9C+0YDQtNC+0LfRiyAxINC20LDRgdGC0LDQvSDQutC10LnRltC9ICDQvdCw0YDQtdGB0YLQtSDQttGD0YDQtSDQsdCw0YHRgtCw0LPQsNC90LTQsCAg0LDQv9Cw0LnQtNCwINCx0L7Qu9Cw0LTRiy4zLTQg0LbQsNGB0YvQvdC00LAg0LDQt9GL0LTRiyDQutC+0L/RgtGLINGC0LXSoyDQtdGA0LXRgdC10LrQutC1INGD0LrRgdCw0YEg0LrQvtC90YTQuNCz0YPRgNCw0YbQuNGP0YHRiyDQv9Cw0LnQtNCwINCx0L7Qu9Cw0LTRiyAu0JbQsNKj0LAg0YLRg9GL0LvQs9Cw0L0g0L3QsNGA0LXRgdGC0LXQu9C10YDQtNC1INC+0LzRi9GA0YvQvdGL0L0gMiDQttCw0YDRgtGL0YHRi9C90LAg0LTQtdC50ZbQvSDQutC10YPQtNC1INGG0LjQu9C40L3QtNGAINC90LXQvNC10YHQtSDQutC10YHRltC70LPQtdC9INC60L7QvdGD0YEg0YLSr9GA0ZbQvdC00LUgINCx0L7Qu9Cw0LTRiyAu0J7QvdGL0L0g0YLQvtC80LXQvdCz0ZYg0LHQvtC70YvQs9GL0L3Ri9KjINC60L7Qu9C00LXQvdC10qMgINC20L7Qs9Cw0YDQs9GLINCx0L7Qu9GL0LrRgtGW0Log0LTQuNCw0LzQtdGC0YDRltC90LXQvSDQsNGB0LDQtNGL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8" table:style-name="ce1">
            <text:p>1066948</text:p>
          </table:table-cell>
          <table:table-cell office:value-type="string" table:style-name="ce1">
            <text:p>russian</text:p>
          </table:table-cell>
          <table:table-cell office:value-type="string" table:style-name="ce1">
            <text:p>Билет 15&amp;lt;br /&amp;gt; 1.Молодых родителей встревожило появление пятен кирпичного цвета на пеленке после мочеиспускания у новорожденного. С какими причинами связано развитие данного состояния?&amp;lt;br /&amp;gt; 2.На приеме мама с ребенком 2 лет, со слов мамы ребенок играя, упал, ударив при это левую руку. На момент осмотра ребенок не предъявляет жалоб в левой конечности сохранены движения, но ребенок щадит руку, патологическая подвижность отсутствует, контуры поврежденной конечности не изменены , при пальпации определяется болезненность в области левого предплечья. Какие анатомо-физиологические особенности способствую этому состоянию?&amp;lt;br /&amp;gt;</text:p>
          </table:table-cell>
          <table:table-cell office:value-type="string" table:style-name="ce1">
            <text:p>Mi7QntGC0LLQtdGCINC90LAg0LLRgtC+0YDQvtC5INCy0L7Qv9GA0L7RgTog0JTQtdGC0Lgg0LIg0LTQsNC90L3QvtC8INCy0L7Qt9GA0LDRgdGC0LUg0L7QsdGL0YfQvdC+INC40LzQtdGO0YIg0YHQutC70L7QvdC90L7RgdGC0Ywg0LvQvtC80LDRgtGMINGC0YDRg9Cx0YfQsNGC0YvQtSDQutC+0YHRgtC4INCyINC+0LHQu9Cw0YHRgtC4INC/0YDQtdC00L/Qu9C10YfRjNGPINC4INC30LDQv9GP0YHRgtGM0Y8sINC40Lct0LfQsCDQsNC90LDRgtC+0LzQvi3RhNC40LfQuNC+0LvQvtCz0LjRh9C10YHQutC40YUg0L7RgdC+0LHQtdC90L3QvtGB0YLQtdC5INC60L7RgdGC0L3QvtC5INGB0LjRgdGC0LXQvNGLLiDQndCw0LjQsdC+0LvQtdC1INGD0Y/Qt9Cy0LjQvNGL0LUg0LzQtdGB0YLQsCDRgyDQtNC10YLQtdC5INGC0YDRg9Cx0YfQsNGC0YvQtSDQutC+0YHRgtC4INCyINC+0LHQu9Cw0YHRgtC4INGA0YPQui4g0JIg0LTQsNC90L3QvtC8INGB0LvRg9GH0LDQtSDRgNC10LHQtdC90L7QuiDRgdC60L7RgNC10LUg0LLRgdC10LPQviDQstC+0LfQvNC+0LbQvdC+INC/0L7Qu9GD0YfQuNC7INC/0L7QtNC90LDQtNC60L7RgdGC0L3QuNGH0L3Ri9C5INC/0LXRgNC10LvQvtC8INC70YPRh9C10LLQvtC5INC40LvQuCDQttC1INC70L7QutGC0LXQstC+0Lkg0LrQvtGB0YLQuCDQuNC3LdC30LAg0LrQvtGC0L7RgNC+0Lkg0YMg0YDQtdCx0LXQvdC60LAg0L/RgNC40YHRg9GC0YHRgtCy0YPQtdGCINCx0L7Qu9C10LfQvdC10L3QvdC+0YHRgtGMINCyINC+0LHQu9Cw0YHRgtC4INC70LXQstC+0LPQviDQv9GA0LXQtNC/0LvQtdGH0YzRjyDQuCDQstGB0LvQtdC00YHRgtCy0LjQtSDRjdGC0L7Qs9C+INGA0LXQsdC10L3QvtC6INGJ0LDQtNC40YIg0YHQstC+0Y4g0YDRg9C60YMuICDQmiDQsNC90LDRgtC+0LzQvi3RhNC40LfQuNC+0LvQvtCz0LjRh9C10YHQutC40Lwg0L7RgdC+0LHQtdC90L3QvtGB0YLRj9C8INGDINC00LXRgtC10Lkg0LIg0LLQvtC30YDQsNGB0YLQtSAyINC70LXRgiDQvtGC0L3QvtGB0Y/RgiDRgtC+INGH0YLQviDQvdCw0LTQutC+0YHRgtC90LjRhtCwINC00L7QstC+0LvRjNC90L4g0YLQvtC70YHRgtCw0Y8sINC60YDQvtCy0L7RgdC90LDQsdC20LXQvdC40LUg0L7Rh9C10L3RjCDRhdC+0YDQvtGI0LXQtSDQuCDQstGB0LXQs9C00LAg0Y3Qu9Cw0YHRgtC40YfQvdCw0Y8sINC40Lct0LfQsCDRh9C10LPQviDQv9C+0LTQstC10YDQs9Cw0LXRgtGB0Y8g0L/QtdGA0LXQu9C+0LzQsNC8LiDQodCw0LzQsCDQutC+0YHRgtGMINGB0L7RgdGC0L7QuNGCINC40Lcg0L7RgNCz0LDQvdC40YfQtdGB0LrQuNGFINCy0LXRidC10YHRgtCyINCyINCx0L7Qu9GM0YjQuNC90YHRgtCy0LUuINCjINC00LXRgtC10Lkg0LrQvtGB0YLQvdCw0Y8g0YHQuNGB0YLQtdC80LAg0L3QtSDQvtC60YDQtdC/0YjQsNGPLCDQutC+0YHRgtC4INGN0LvQsNGB0YLQuNGH0L3RiyDQuCDRh9Cw0YHRgtC+INC/0L7QtNCy0LXRgNCz0LDRjtGC0YHRjyDQtNC10YTQvtGA0LzQsNGG0LjQuC4gINCi0LDQutC20LUg0LIg0LHQvtC70YzRiNC40L3RgdGC0LLQtSDQsiDRgdC+0YHRgtCw0LLQtSDQuNC80LXRjtGC0YHRjyDRhdGA0Y/RidC4IC4g0KHQstGP0LfQvtGH0L3Ri9C5INCw0L/Qv9Cw0YDQsNGCINGB0LvQsNCx0YvQuSDQuNC3LdC30LAg0Y3RgtC+0LPQviDQv9GA0Lgg0L/QsNC00LDQvdC40Lgg0LrQsNC6INCyINC00LDQvdC90L7QvCDRgdC70YPRh9Cw0LUg0LLRgdGPINC90LDQs9GA0YPQt9C60LAg0LjQtNC10YIg0L3QsCDQutC+0YHRgtC4LiDQmtC+0YHRgtC90LDRjyDRgtC60LDQvdGMINC+0LHRi9GH0L3QviDQvNGP0LPQutCw0Y8sINC40Lct0LfQsCDRjdGC0L7Qs9C+INC40LTQtdGCINC00LXRhNC+0YDQvNCw0YbQuNGPLiDQotCw0LrQttC1INGDINC00LXRgtC10Lkg0YHQvdC40LbQtdC90LAg0LHQvtC70LXQstCw0Y8g0YfRg9Cy0YHRgtCy0LjRgtC10LvRjNC90L7RgdGC0YwgLCDQvNCw0LvRi9GIINC90LUg0LbQsNC70YPQtdGC0YHRjyDQvdC+INC90LDRh9C40L3QsNC10YIg0YnQsNC00LjRgtGMINGA0YPQutGDLiDQndC10L7QutC+0L3Rh9Cw0YLQtdC70YzQvdC+0LUg0L7QutC+0YHRgtC10L3QtdC90LjQtSAsINC40LzQtdGO0YLRgdGPINGF0YDRj9GJ0LguICDQntC00L3QsNC60L4g0LTQsNC20LUg0LXRgdC70Lgg0LrQvtGB0YLRjCDRgdC70L7QvNCw0LvQsNGB0YwgLCDQvtC90LAg0L/QvtC00LLQtdGA0LPQvdC10YLRgdGPINCx0YvRgdGC0YDQvtC5INGA0LXQs9C10L3QtdGA0LDRhtC40LguINCc0LDQvNGDINC90YPQttC90L4g0YPRgdC/0L7QutC+0LjRgtGMINC4INC+0YLQv9GA0LDQstC40YLRjCDRgNC10LHQtdC90LrQsCDQvdCwINGA0LXQvdGC0LPQtdC90L7Qs9GA0LDRhNC40Y4g0LTQu9GPINGD0YLQvtGH0L3QtdC90LjRjyDQtNC40LDQs9C90L7Qt9CwLjxiciAvPg0KMS7QntGC0LLQtdGCINC90LAg0L/QtdGA0LLRi9C5INCy0L7Qv9GA0L7RgTog0KDQvtC00LjRgtC10LvQtdC5INCy0YHRgtGA0LXQstC+0LbQuNC70L4g0YfRgtC+INGDINGA0LXQsdC10L3QutCwINC/0L7Rj9Cy0LjQu9C40YHRjCDQv9GP0YLQvdCwINC60L7RgNC40YfQvdC10LLQvtCz0L4g0YbQstC10YLQsCDQvdCwINC/0LXQu9C10L3QutC1INC/0L7RgdC70LUg0LzQvtGH0LXQuNGB0L/Rg9GB0LrQsNC90LjRjy4g0JIg0LTQsNC90L3QvtC8INGB0LvRg9GH0LDQtSDRgNC+0LTQuNGC0LXQu9C10Lkg0L3Rg9C20L3QviDRg9GB0L/QvtC60L7QuNGC0Ywg0LLQtdC00Ywg0Y3RgtC+INGP0LLQu9GP0LXRgtGB0Y8g0YTQuNC30LjQvtC70L7Qs9C40YfQtdGB0LrQvtC5INC90L7RgNC80L7QuS4g0J7QsdGL0YfQvdC+INGN0YLQviDQv9C+0Y/QstC70Y/QtdGC0YHRjyDQsiDQv9C10YDQstGL0LUg0LTQvdC4INC/0L7RgdGC0L3QsNGC0LDQu9GM0L3QvtCz0L4g0L/QtdGA0LjQvtC00LAuINCt0YLQviDQstGL0LTQtdC70LXQvdC40LUg0LIg0LTQsNC90L3QvtC8INGB0LvRg9GH0LDQtSDRg9GA0LDRgtC+0LIgKNGB0L7Qu9C10Lkg0LzQvtGH0LXQstC+0Lkg0LrQuNGB0LvQvtGC0YspLCDQutC+0YLQvtGA0YvQuSDQstGL0YXQvtC00LjRgiDQv9GA0Lgg0LzQvtGH0LXQuNGB0L/Rg9GB0LrQsNC90LjQuCDRgNC10LHQtdC90LrQsCDQutC40YDQv9C40YfQvdGL0Lwg0YbQstC10YLQvtC8LiDQldCz0L4g0YLQsNC60LbQtSDQvdCw0LfRi9Cy0LDRjtGCINC80L7Rh9C10LrQuNGB0LvRi9C8INC40L3RhNCw0YDQutGC0L7QvCDQv9C+0YfQtdC6LiDQmiDQtdCz0L4g0L/RgNC40YfQuNC90LDQvCDQvtGC0L3QvtGB0Y/RgiDQstGL0YHQvtC60YPRjiDQutC+0L3RhtC10L3RgtGA0LDRhtC40Y4g0LzQvtGH0LXQstC+0Lkg0LrQuNGB0LvQvtGC0Ysg0LIgINC80L7Rh9C1LCDQvdC40LfQutC+0LUg0L/QvtGC0YDQtdCx0LvQtdC90LjQtSDQttC40LTQutC+0YHRgtC4LCDQvdC10LfRgNC10LvQvtGB0YLRjCDQv9C+0YfQtdC6INC4INC+0YHQvtCx0LXQvdC90L7RgdGC0LXQuSDQvtCx0LzQtdC90LAg0LLQtdGJ0LXRgdGC0LIg0YMg0YDQtdCx0LXQvdC60LAuINCi0LDQutC20LUg0L7QsdGL0YfQvdC+IFBoINC80L7Rh9C4INCx0YPQtNC10YIg0LrQuNGB0LvRi9C8LiDQkiDQvdC+0YDQvNGDINC/0YDQuNGF0L7QtNC40YIg0YfQtdGA0LXQtyAzLTUg0LTQvdC10LkuICDQkiDQtNCw0L3QvdC+0Lwg0YHQu9GD0YfQsNC1INGA0L7QtNC40YLQtdC70LXQuSDQvdGD0LbQvdC+INGD0YHQv9C+0LrQvtC40YLRjCDQuCDQvtCx0YrRj9GB0L3QuNGC0Ywg0LLQvtC30L3QuNC60L3QvtCy0LXQvdC40LUg0YPRgNCw0YLQvtCyINCyINC80L7Rh9C1ICwg0LvQtdGH0LXQvdC40LUg0LIg0LTQsNC90L3QvtC8INGB0LvRg9GH0LDQtSDQvdC1INC90LDQt9C90LDRh9Cw0LXRgtGB0Y8u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2" table:style-name="ce1">
            <text:p>1066952</text:p>
          </table:table-cell>
          <table:table-cell office:value-type="string" table:style-name="ce1">
            <text:p>russian</text:p>
          </table:table-cell>
          <table:table-cell office:value-type="string" table:style-name="ce1">
            <text:p>Билет 15&amp;lt;br /&amp;gt; 1.Молодых родителей встревожило появление пятен кирпичного цвета на пеленке после мочеиспускания у новорожденного. С какими причинами связано развитие данного состояния?&amp;lt;br /&amp;gt; 2.На приеме мама с ребенком 2 лет, со слов мамы ребенок играя, упал, ударив при это левую руку. На момент осмотра ребенок не предъявляет жалоб в левой конечности сохранены движения, но ребенок щадит руку, патологическая подвижность отсутствует, контуры поврежденной конечности не изменены , при пальпации определяется болезненность в области левого предплечья. Какие анатомо-физиологические особенности способствую этому состоянию?&amp;lt;br /&amp;gt;</text:p>
          </table:table-cell>
          <table:table-cell office:value-type="string" table:style-name="ce1">
            <text:p>MSnQn9C+0Y/QstC70LXQvdC40LUg0L/Rj9GC0LXQvSDQutC40YDQv9C40YfQvdC+0LPQviDRhtCy0LXRgtCwINC90LAg0L/QtdC70LXQvdC60LUg0L/QvtGB0LvQtSDQvNC+0YfQtdC40YHQv9GD0YHQutCw0L3QuNGPINGB0LLRj9C30LDQvdC+INGBINCy0YvQtNC10LvQtdC90LjQtdC8INC80L7Rh9C10LLQvtC5INC60LjRgdC70L7RgtGLLCDQsCDQuNC80LXQvdC90L4g0LrRgNC40YHRgtCw0LvQu9C+0LIg0LzQvtGH0LXQstC+0Lkg0LrQuNGB0LvQvtGC0Yso0YPRgNCw0YLQvtCyKSwg0LIg0YDQtdC30YPQu9GM0YLQsNGC0LUg0YLQvtCz0L4g0YfRgtC+INC80L7Rh9C10LjRgdC/0YPRgdC60LDRgtC10LvRjNC90LDRjyDRgdC40YHRgtC10LzQsCDQvdC1INC00L4g0LrQvtC90YbQsCDRgNCw0LfQstC40YLQsCAg0YMg0L3QvtCy0L7RgNC+0LbQtNC10L3QvdGL0YUsINC4INC60LDQvdCw0LvRjNGG0Ysg0LzQvtCz0YPRgiDQstGL0LTQtdC70Y/RgtGMINCy0LXRidC10YHRgtCy0LAg0LrQvtGC0L7RgNGL0LUg0LIg0L3QvtGA0LzQtSDQvdC1INCy0YvQtNC10LvRj9GO0YLRgdGPINCyINCx0L7Qu9GM0YjQvtC8INC60L7Qu9C40YfQtdGB0YLQstC1LiDQrdGC0L4g0Y/QstC70Y/QtdGC0YHRjyDRhNC40LfQuNC+0LvQvtCz0LjRh9C10YHQutC+0Lkg0L3QvtGA0LzQvtC5INGDINC90L7QstC+0YDQvtC20LTQtdC90L3QvtCz0L4g0YDQtdCx0LXQvdC60LAsINC4INCy0YHRgtGA0LXRh9Cw0LXRgtGB0Y8g0YMgNzAtODAlINC00LXRgtC10LkuINCi0LDQuiDQttC1INGN0YLQviDRgdCy0Y/Qt9Cw0L3QviDRgSDRgtC10Lwg0YfRgtC+INGDINGA0LXQsdC10L3QutCwINC90LXQtNC+0YHRgtCw0YLQvtGH0L3QviDRgNCw0LfQstC40YLQsCDQv9C10YfQtdC90Ywg0Lgg0YLQtdC8INGB0LDQvNGL0Lwg0LDQutGC0LjQstC90L7RgdGC0Ywg0YTQtdGA0LzQtdC90YLQvtCyINC00L7RgdGC0LDRgtC+0YfQvdC+INC90LjQt9C60LDRjyDQv9C+INGB0YDQsNCy0L3QtdC90LjRjiDRgdC+INCy0LfRgNC+0YHQu9GL0Lwg0YfQtdC70L7QstC10LrQvtC8INC4INGA0LDRgdC/0LDQtCDQvNC+0YfQtdCy0L7QuSDQutC40YHQu9C+0YLRiyDQvtGB0YPRidC10YHRgtCy0LvRj9C10YLRgdGPINC80LXQtNC70LXQvdC90L4g0Lgg0L3QtSDQv9C+0LvQvdC+0YHRgtGM0Y4uINCi0LDQuiDQttC1INC/0L7QstGL0YjQtdC90LjQtSDQutGA0LjRgdGC0LDQu9C+0LIg0LzQvtGH0LXQstC+0Lkg0LrQuNGB0LvQvtGC0Ysg0LzQvtC20L3QviDRgdCy0Y/Qt9Cw0YLRjCDRgSDRgtC10Lwg0YfRgtC+INC/0L7QstGL0YjQsNC10YLRgdGPINGA0LDRgdC/0LDQtCDRjdGA0LjRgtGA0L7RhtC40YLQvtCyINGDINC90L7QstC+0YDQvtC20LTQtdC90L3Ri9GFLCDRjdGC0L4g0YHQstGP0LfQsNC90L4g0YEg0YLQtdC8INGH0YLQviDRgyDRgNC10LHQtdC90LrQsCDQvdCw0LHQu9GO0LTQsNC10YLRgdGPINCx0L7Qu9GM0YjQvtC1INC60L7Qu9C40YfQtdGB0YLQstC+INGE0LXRgtCw0LvRjNC90L7Qs9C+IEhnRiAg0LPQtdC80L7Qs9C70L7QsdC40L3QsCwg0LrQvtGC0L7RgNGL0Lkg0LjQvNC10LXRgiDQsdC+0LvRjNGI0LXQtSDRgdGA0L7QtNGB0YLQstC+INC6INC60LjRgdC70L7RgNC+0LTRgywg0YfQtdC8IDxiciAvPg0K0LPQtdC80L7Qs9C70L7QsdC40L0g0LLQt9GA0L7RgdC70L7Qs9C+INGH0LXQu9C+0LLQtdC60LAg0Lgg0YLQtdC8INGB0LDQvNGL0Lwg0Y3RgNC40YLRgNC+0YbQuNGC0Ysg0L/RgNCw0LrRgtC40YfQtdGB0LrQuCDQvdC1INGD0YfQsNGB0YLQstGD0Y7RgiDQsiDQv9C10YDQtdC90L7RgdC1INC60LjRgdC70L7RgNC+0LTQsCDQuCDQv9C+0LTQstC10YDQs9Cw0Y7RgtGB0Y8g0YDQsNC30YDRg9GI0LXQvdC40Y4uPGJyIC8+DQoyKdCR0L7Qu9C10LfQvdC10L3QvdC+0YHRgtGMINGDINGA0LXQsdC10L3QutCwIDIg0LvQtdGCINC/0L7Rj9Cy0LjQu9C+0YHRjCDQuNC3LdC30LAg0YLQvtCz0L4g0YfRgtC+INGDINGA0LXQsdC10L3QutCwINC90LDQsdC70Y7QtNCw0LXRgtGB0Y8g0L3QtdCx0L7Qu9GM0YjQvtC5INC/0LXRgNC10LvQvtC8INC40LvQuCDRg9GI0LjQsSDQsiDQu9C10LLQvtC8INC/0YDQtdC00L/Qu9C10YfRjNC1LCDRgtCw0Log0LrQsNC6INGDINGA0LXQsdC10L3QutCwINCyINGN0YLQvtGCINC/0LXRgNC40L7QtCDQv9GA0L7QuNGB0YXQvtC00LjRgiDRgNC+0YHRgiDQutC+0YHRgtC10Lkg0Lgg0Y3Qv9C40YTQuNC30LDRgNC90YvQtSDRhdGA0Y/RidC4LCDRgtC+INC10YHRgtGMINGC0L7Rh9C60Lgg0YDQvtGB0YLQsCDQutC+0YHRgtC10Lkg0LIg0LTQu9C40L3Rgywg0YHQvtC00LXRgNC20LDRgiDQutC70LXRgtC60Lgg0LrQvtGC0L7RgNGL0LUg0L/QvtGB0YLQvtGP0L3QvdC+INC/0YDQvtC70LjRhNC10YDQuNGA0YPRjtGCLCDQtNC10LvRj9GC0YHRjywg0Lgg0YHQvtC00LXRgNC20LDRgiDRhdGA0Y/RidC10LLRg9GOINGC0LrQsNC90Ywg0LrQvtGC0L7RgNCw0Y8g0LHQvtC70LXQtSDQv9C+0LTQstC10YDQttC10L3QsCDQtNC10YTQvtGA0LzQsNGG0LjQuC4g0KMg0LLQt9GA0L7RgdC70YvRhSDQu9GO0LTQtdC5INC60L7RgdGC0Ywg0L/QvtC70L3QvtGB0YLRjNGOINGB0L7RgdGC0L7QuNGCINC40Lcg0LrQvtGB0YLQvdC+0Lkg0YLQutCw0L3QuCwg0LIg0YLQviDQstGA0LXQvNGPINC60LDQuiDRgyDRgNC10LHQtdC90LrQsCDQutC+0YHRgtC90LDRjyDRgtC60LDQvdGMINC90LDQsdC70Y7QtNCw0LXRgtGB0Y8g0YLQvtC70YzQutC+INCyINC00LjQsNGE0LjQt9C1INC60L7RgdGC0LXQuSwg0LAg0L7RgdGC0LDQu9GM0L3QvtC1INGB0L7RgdGC0L7QuNGCINC40Lcg0YXRgNGP0YnQtdCy0L7QuSDRgtC60LDQvdC4LCDQutC+0YLQvtGA0LDRjyDQsiDQv9C+0YHQu9C10LTRg9GO0YnQtdC8INCyINGC0LXRh9C10L3QuNC4INGA0L7RgdGC0LAg0YDQtdCx0LXQvdC60LAg0Lgg0YDQsNC30LLQuNGC0LjQuCDQutC+0YHRgtC4INC30LDQvNC10YnQsNC10YLRgdGPINC60L7RgdGC0L3QvtC5INGC0LrQsNC90YzRjiwg0L/QvtGN0YLQvtC80YMg0YMg0LTQtdGC0LXQuSDQsdC+0LvRjNGI0LDRjyDRgdC60LvQvtC90L3QvtGB0YLRjCDQuiDRg9GI0LjQsdCw0LwsINC/0LXRgNC10LvQvtC80LDQvCDQuCDQtNC10YTQvtGA0LzQsNGG0LjRj9C8LiAg0KLQsNC6INC20LUg0YMg0LTQtdGC0LXQuSDQvdC40LfQutCw0Y8g0LzQuNC90LXRgNCw0LvQuNC30LDRhtC40Y8g0LrQvtGB0YLQuCwg0L/QvtGN0YLQvtC80YMg0LrQvtGB0YLQuCDQsdC+0LvQtdC1INGF0YDRg9C/0LrQuNC1INC4INGN0LvQsNGB0YLQuNGH0L3Ri9C1LCDQsiDQvtGC0LvQuNGH0LjQtSDQvtGCINCy0LfRgNC+0YHQu9GL0YUuICDQodGD0YHRgtCw0LLQvdCw0Y8g0LrQsNC/0YHRg9C70LAg0YLQsNC6INC20LUg0YMg0LTQtdGC0LXQuSDQvtGC0LvQuNGH0LDQtdGC0YHRjywg0YLQsNC6INC60LDQuiAg0LrQvtGB0YLQuCDQuCDRgdGD0YHRgtCw0LLRiyDQvNC+0LPRg9GCINGA0LDQt9Cy0LjQstCw0YLRjNGB0Y8g0LTQviAxOC0yNSDQu9C10YIuINCh0YPRgdGC0LDQstC90LDRjyDQutCw0L/RgdGD0LvQsCDRgdC+0LTQtdGA0LbQuNGCINC10YnQtSDQvdC1INGB0L7QstGB0LXQvCDRgNCw0LfQstC40YLRi9C1INGB0LLRj9C30LrQuCwg0LrQvtGC0L7RgNGL0LUg0LzQvtCz0YPRgiDQv9GA0LjQstC10YHRgtC4INC6INGA0LDRgdGC0Y/QttC10L3QuNGOINGB0YPRgdGC0LDQstCwLCDQstC90YPRgtGA0Lgg0YHRg9GB0YLQsNCy0L3QvtC5INC60LDQv9GB0YPQu9GLINCx0L7Qu9GM0YjQtSDQutC+0LvQu9Cw0LPQtdC90LAgLNGH0LXQvCDRjdC70LDRgdGC0LjQvdCwINC60L7RgtC+0YDRi9C1INGC0LDQuiDQttC1INC80L7Qs9GD0YIg0L/RgNC40LLQtdGB0YLQuCDQuiAg0L/QvtCy0YDQtdC20LTQtdC90LjRjiDRgdGD0YHRgtCw0LLQsC4g0JrQvtGB0YLQuCDRgyDRgNC10LHQtdC90LrQsCDQsdC+0LvQtdC1INC60YDQvtCy0L7RgdC90LDQsdC20LDQtdC80YsgLCDRgtCw0Log0LrQsNC6INGH0LXRgNC10Lcg0LrRgNC+0LLRjCDQsiDQutC+0YHRgtC4INC/0L7RgdGC0YPQv9Cw0LXRgiDQsdC+0LvRjNGI0L7QtSDQutC+0LvQuNGH0LXRgdGC0LLQviDQv9C40YLQsNGC0LXQu9GM0L3Ri9GFINCy0LXRidC10YHRgtCyICwg0LrQvtGC0L7RgNGL0LUg0YHQv9C+0YHQvtCx0YHRgtCy0YPRjiDRgNC+0YHRgiDQutC+0YHRgtC4INCyINC00LvQuNC90YMg0Lgg0YjQuNGA0LjQvdGDLiDQn9GA0Lgg0YPQtNCw0YDQtSDQvNC+0LbQtdGCINCx0YvRgtGMINC/0L7QstGA0LXQttC00LXQvdC40LUg0YbQtdC70L7RgdGC0L3QvtGB0YLQuCDQutC+0YHRgtC4INC4INC90LDRgNGD0YjQsNC10YLRgdGPINC10LUg0LrRgNC+0LLQvtGB0L3QsNCx0LbQtdC90LjQtSwg0YLQtdC8INGB0LDQvNGL0Lwg0Y3RgtC+INGC0LDQuiDQttC1INC80L7QttC10YIg0L/RgNC40LLQtdGB0YLQuCDQuiDQsdC+0LvQtdC30L3QtdC90L3QvtGB0YLQuC4g0KLQsNC6INC20LUg0YMg0LTQtdGC0LXQuSDQsiDRjdGC0L7QvCDQstC+0LfRgNCw0YHRgtC1INC/0YDQvtC00L7Qu9C20LDQtdGCINGA0LDQt9Cy0LjQstCw0YLRjNGB0Y8g0LzRi9GI0LXRh9C90LDRjyDRgdC40YHRgtC10LzQsCAsINGC0LXQvCDRgdCw0LzRi9C8INC60YDQtdC/0LvQtdC90LjQtSDRgdGD0YHRgtCw0LLQvtCyINGC0LDQuiDQttC1INC80L7QttC10YIg0L/RgNC40LLQtdGB0YLQuCDQuiDQtNC10YTQvtGA0LzQsNGG0LjQuCAsINCwINC30LDRgtC10Lwg0Lgg0Log0LHQvtC70LXQt9C90LXQvdC90L7RgdGC0Lg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73" table:style-name="ce1">
            <text:p>914673</text:p>
          </table:table-cell>
          <table:table-cell office:value-type="string" table:style-name="ce1">
            <text:p>english</text:p>
          </table:table-cell>
          <table:table-cell office:value-type="string" table:style-name="ce1">
            <text:p>Ticket 15&amp;lt;br /&amp;gt; 1. Young parents were concerned about the appearance of brick-colored spots on the diaper after urination in the newborn. What is the reason for these changes:&amp;lt;br /&amp;gt; 2. At the pediatrician’s consultation, a mother with a 2-year-old child, according to the mother’s words, the child, playing on the playground, fell, hitting his left hand. At the time of examination, the child does not complain, movements are preserved in the left limb, but the child spares the hand, pathological mobility is absent, the contours of the damaged limb are not changed, and pain on the left forearm is determined by palpation. What anatomical and physiological features contribute to this condition?&amp;lt;br /&amp;gt;</text:p>
          </table:table-cell>
          <table:table-cell office:value-type="string" table:style-name="ce1">
            <text:p>MS0gYXBwZXJlbmNlIG9mIGJyaWNrIGNvbG9yIGNvbG9yIHNwb3RzIG9uIHRoZSBkaXBlciBhZnRlciB1cmluYXRpb24gaW4gYSBuZXdib3JuIGNhbiBiZSBhdHRyaWJ1dGVkIHRvIHRoZSBwcmVzZW5jZSBvZiB1cmF0ZSBjcnlzdGFsLiB0aGVzZSB1cmF0ZSBjcnlzdGFsIGNhbiBiZSBmb3JtIHdod24gdGhlcmUgaXMgaGlnaCBjb25jZW50cmF0aW9uIG9mIHVyaWMgYWNpZCBpbiB0aGUgdXJpbmUgd2hpY2ggaXMgbW9zdCBjb21tYW4gaW4gdGhlIG5ld2Jvcm4uIHRoZSB1cmluZSBtYXkgYXBwZXJlIHBpbmssIG9yYW5nZSBvciBicmljayBjb2xvciBkdWUgdG8gdGhlc2UgY3J5c3RhbC4gdGhpcyBpcyB1c2FsbGF5IGEgaGFybWxlc3MgYW5kIHRlbXBvcmFyeSBjb25kaXRpb24gYW5kIGl0IGlzIHRpcGFsbGNhbHkgcmVzb2x2ZSBvbiBpdHRzIG93biBhcyB0aGUgYmFieXMgbWV0YWJvbGlzbSBhZGp1c3QgYW5kIG1hdHVyZWVzLiAgICAgICAgICAgICAgICAgICAgICAgICAgICAgICAgICAgICAgICAgICAgICAgICAyLSBJbiB0aGUgZGVzY3JpYmVkIHNlbmVyaWlvICwgdGhlIGNoaWxkc3Mgc3BhcmluZyBvZiB0aGUgaGFuZCwgYWJzZWVuY2Ugb2YgcGF0aG9sb29naWNhbCBtb2JpaWxpdHksIHVuY2hhbmdlZCBsaW1iIGNvdW50ZXJzIGFuZCBwYWluIG9uIHBhbHBhdGlvbiBvZiB0aGUgZm9yZWFybSB0aGVzZSBjb25kaXRpb25zIG1heSBpbmRpY2F0ZSBhIHBvc3NpYmxlIGluanVyeSwgc3VjaCBhcyBzcHJhaW4gb3IgZmFjdHVyZS4gQW5hdG9taWNhbCBhbmQgcGh5c2lvbG9naWNhbCBmZWF0dXJlcyB0aGF0IGNhbiBjb250cmlidXRyIHRvIHRoaXMgY29uZGl0aW9uIGluY2x1ZGUgOi0gUEVSSVBIRVJBTCBORVJWRSBJTkpVUlkgLCBMSUdBTUVOVE9VUyBTVVBQT1JUIDotIGxpZ2FtZW50cyBzdXJyb3VuZGVkIHRoZSBqb2ludCBzdGFibGl0eSBhbmQgbGltaXQgZXNjZXNzaXZlIG1vdmVubWVudCBpbiB0aGlzIGNhc2UgbGlnYW1lbnQgb2YgbGVmdCBoYW5kIGFuZCBmb3JlYXJtIGxpa2VseSBsaWtlbHkgcmVtYWluZWQgaW50YWN0ICwgUFJPVEVDVElWRSBSRUZMRVhFUyA6LSB0aGUgY2hpbGQgbmF0dXJlIGluc3N0aW50IHRvIHByb3RlY3QgdGhlIGluanVyeSBsaW1iIGJ5IHNwYXJpbmcgaXIgb3IgcmVkdWNlZCBtb3Zlbm1lbnQgY2FuIGhlbHAgdHAgcHJldmVudCBmdXJ0aGVlciBkYW1hZ2UgLCBQUkVTRVJWQVRJT04gT0YgTU9WRU5NRU5UICwgUEFJTiBSRVNQT05TRSA6LSB0aGUgcHJlc2VuY2Ugb2YgcGFpbiB1cG9uIHRoZSBwYWxwYXRpb24gaW5kaWNhdGVkIGxvY2FsaXphdGlvbiBkaXNjb21tZmVydC4gICAgIEl0IGlzIGltcG9ydGFudCBmb3IgdGhlIGNoaWxkIGZvciBiZSBldnVsYXRlZCBieSBhIGhlYWx0aGNhcmUgcHJvZmZlc2luYWwgLCBzdWNoIGFzIHBlZGlhdHJpY2lhbiBvciBvcnRob3BlZGljIHNwZWNpYWxpc3QuIHRvIGFzc2VjcyB0aGUgaW5qdXJ5IGFuZCBkZXRlZXJtaW5lIHRoZSBjYXVzZSBhbmQgYXBwcm9wcmlhdGUgYWN0aW9uLCBhbmQgZnVydGhlciBsZWFkIHRvIGV4YW1pbmF0aW9ucyBzdWNoIGFzIFgtUkFZIGZvciB0cmVhdG1lbnQgYXMgbmVlZGVkL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87" table:style-name="ce1">
            <text:p>914787</text:p>
          </table:table-cell>
          <table:table-cell office:value-type="string" table:style-name="ce1">
            <text:p>english</text:p>
          </table:table-cell>
          <table:table-cell office:value-type="string" table:style-name="ce1">
            <text:p>Ticket 15&amp;lt;br /&amp;gt; 1. Young parents were concerned about the appearance of brick-colored spots on the diaper after urination in the newborn. What is the reason for these changes:&amp;lt;br /&amp;gt; 2. At the pediatrician’s consultation, a mother with a 2-year-old child, according to the mother’s words, the child, playing on the playground, fell, hitting his left hand. At the time of examination, the child does not complain, movements are preserved in the left limb, but the child spares the hand, pathological mobility is absent, the contours of the damaged limb are not changed, and pain on the left forearm is determined by palpation. What anatomical and physiological features contribute to this condition?&amp;lt;br /&amp;gt;</text:p>
          </table:table-cell>
          <table:table-cell office:value-type="string" table:style-name="ce1">
            <text:p>MS5BbnN3ZXI6VGhlIGFwcGVhcmFuY2Ugb2YgYnJpY2sgY29sb3VyZWQgc3BvdHMgaW4gIHRoZSBuZXctYm9ybnMgZGlhcGVyIGlzIGNvbW1vbmx5IGR1ZSB0byB1cmF0ZSBjcnlzdGFsIHRoYXQgYXJlIGNvbXBvc2VkIG9mIG9mIHVyaWMgYWNpZCAuVGhlIGNvbmRpdGlvbiBpcyByZWZmZXJkIHRvIGFzIHVyaWMgYWNpZCBjcnlzdGFsIG9yIHVyaWMgb3IgdXJpYyBhY2lkIG5lcGhyb3BhdGh5LkluIHRoZSBmaXJzdCB3ZWVrIG9mIGxpZmUgb2YgbmV3Ym9ybiBib2R5IHVuZGVyLWdvZXMgbWFueSBwaHlzaW9sb2dpY2FsIGNoYW5nZXMgIGFzIGl0IGFkYXB0cyBmcm9tIGludHJhLXV0ZXJpbmUgdG8gZXh0cmF1dGVyaW5lIGxpZmUuVGhlIGltbWF0dXJlIGtpZG5leXMgb2YgdGhlIG5ld2Jvcm4gaGFzIGxpbWl0ZWQgY2FwYWNpdHkgdG8gY29uLWNlbnRyYXRlICB0aGUgdXJpbmUgZWZmZWN0aXZlbHkuICBEdXJpbmcgIGZpcnN0IGZldyBkYXlzIG9mIGxpZmUsIHRoZSBleGNyZWF0aW9uIG9mIHVyaWMtYWNpZCBjYW4gYmUgaGlnaGVyICwgbWFpbmx5IGluIGJyZWFzdC1mZWRkaW5nIG5ld2Jvcm4sdGhpcyBpcyBiZWFjYXVzZSB0aGVpciAgZmx1aWQgIGludGFrZSBjYW4gYmUgIHJlbGF0aXZlbHkgbG93IGR1cmluZyBlYXJseSBzdGFnZXMgb2YgYnJlYXN0ZmVlZGluZyB0aGF0IGxlYWRpbmcgdG8gY29uY2VOdHJhdGlvbiBvZiB1cmluZS5VcmljLWFjaWQgaXMgdGhlIGJ5IHByb2R1Y3Qgb2YgcHVyaW5lIG1ldGFib2xpc20gLCB0aGUgZXhjcmVhdGlvbiBvZiB0aGVzZSB0aGVzZSB1cmljIGNyeXN0YWwgZ2l2ZSByaXNlIHRvIHRvIGJyaWNrIHJlZCBkaXMtY29sb3JhdGlvbiBvZiB1cmluZSAgb2JzZXJ2ZWQgaW4gZGlhcGVyLlRoZSByZWRpc2ggb3JyIGJyaWNrIGNvbG91cmVkIGRlcG9zaXRzIGFyZSBoYXJtLWxlc3MgYW5kIHR5cGljYWx5IHJlc29sdmVzIGFzIHRoZSBiYWJ5cyBmZWVkaW5nIGltcHJvdmVzIGFuZCB0aGUgaHlkcmF0aW9uIGluY3JlYXNlLlBhcmVudHMgc2hvdWxkIGJlIGFzc3VyZWRkIGJ1dCB0aGV5IHNob3VsZCBtb25pdGVyIGZvciBzaWducyBvZiBkZWh5ZHJhdGlvbiBsaWtlIGFzIERyeSBNdWNvdXMgTWVtYnJhbmUgLFBvb3IgZmVkZGluZyBhbmQgTGV0aGFyZ3kuIFBlcnNpc3RhbnQgdXJhdGUgY3J5c3RhbCBhcHBlcmFuY2UgYmV5b25kIHRoZSBmaXJzdCB3ZWVrICwgZXhjZXNzIGlycml0YWJpbGl0eXkgLCB3ZWlnaHQgbG9zcyAoPjEwJSBvZiBiaXJ0aCB3ZWlnaHQpIG9yIHNpZ25zIG9mIGRlLWh5ZHJhdGlvbiAuICAgICAgMi5BbnN3ZXI6RmVhdHVyZXMgY29uLXRyaWJ1dGluZyB0byBjb25kaXRpb24gb2YgMiBZZWFycyBvbGRzIGNoaWxkIEZvcmVhcm0gSW5qdXJ5PT09PT4+Pj4gSW4geW91bmcgY2hpbGRyZW4gLHRoZSBib25lcyBhcmUgbW9yZSBmbGV4aWJsa2UgYW5kIHBlcmlvc3RldW0gaXQgaXMgdGhlIG91dGVyLSBsYXllciBvZiBib25lIGlzIHRoaWNrZXIgYW5kIGFsc28gbW9yZSByZXNpbGllbnQgYXMgY29tcGFyZWR0byBhZHVsdHMuIFRoZSBhbmEtdG9taWNhbCBmZWF0dXJlcyBhbGxvdyB0byBncmVhdGVyIHJlc2lzdGFuY2UgdG8gZnJhY3R1cmVzIGFuZCBhbHNvIHByb21vdGUgYmV0dGVyIGhlYWxpbmcgaWYgZnJhY3R1cmUgbWF5IG9jY3VyLlRoZSB0aGljayAgcGVyaW9zdGV1bSByZW1haW4gaW50YWN0IGV2ZW4gdGhlaXIgdGhlcmUgaXMgdGhlIHVuZGVybHlpbmcgYm9uZSBpbmp1cnkgLCBsZWFkaW5naCB0byBjb25kaXRpb25zIGxpa2UgYXMgIkdyZWVuLXN0aWNrIEZyYWN0dXJlcyIgb3IgIkJPTkUgQ09OVFVTSU9OUyIgdGhhdCBtYXkgbm90IGNhdXNlIHBoeXNpY2FsIGRlZm9ybWl0eSAuTW9yZXZlciAsVGhlIHByZXNlbmNlIG9mIHJpY2hoIHZhc2N1bGFyIHN1cHBseSBpbiB0aGUgcGVkaWF0cmljIGJvbmVzIGFpZHMgaW4gdGhlIGZhc3RlciByZWNvdmVyeSAuIFRoZSBjaGlsZCBzcGFyaW5nIHRoZSBoYW5kIHdpdGhvdXQgdmlzaWlibGUgZGVmb3JtaXR5IG9yIHBhdGhvbG9naWNhbCBtb2JpbGl0eSBzdWdnZXN0cyAgYSBtaWxsZCBpbmp1cnkgLCBwb3NzaWJseSBhIGNvbnR1c2lvbiBvcnIgYSB2ZXJ5IHN0YWJsZSBmcmFjdHVyZSAuUGVkaWF0cmljaWFucyBzaG91bGQgYWR2aXNlIHRvIGltbW8tYmlsaXphdGlvbixvYnNlcnZ0aW9uIGZvciB3b3JzZW5pbmcgcGFpbiBhbmQgaW4tZmxhbW1hdGlvbiBhbmQgZm9sbG93IHVwIGlmIHN5cG10b21zIHBlcnNpc3QuICAgICAgICAgICAgICAgICAgICAgICAgICAgICAgICAgICAgICAgICAgICAgICAgICAgICAgICAgICAgICAgICAgICAgICAgICAgICAgICAgICAgICAgICAgICAgICAgICAgICAgICAgICAgICAgICAgICAgICAgICAgICAgICAgICAgICA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88" table:style-name="ce1">
            <text:p>914788</text:p>
          </table:table-cell>
          <table:table-cell office:value-type="string" table:style-name="ce1">
            <text:p>english</text:p>
          </table:table-cell>
          <table:table-cell office:value-type="string" table:style-name="ce1">
            <text:p>Ticket 15&amp;lt;br /&amp;gt; 1. Young parents were concerned about the appearance of brick-colored spots on the diaper after urination in the newborn. What is the reason for these changes:&amp;lt;br /&amp;gt; 2. At the pediatrician’s consultation, a mother with a 2-year-old child, according to the mother’s words, the child, playing on the playground, fell, hitting his left hand. At the time of examination, the child does not complain, movements are preserved in the left limb, but the child spares the hand, pathological mobility is absent, the contours of the damaged limb are not changed, and pain on the left forearm is determined by palpation. What anatomical and physiological features contribute to this condition?&amp;lt;br /&amp;gt;</text:p>
          </table:table-cell>
          <table:table-cell office:value-type="string" table:style-name="ce1">
            <text:p>MS4gdGhlIGJyaWNrIGNvbG91ciBvbiB0aGUgZGlwZXIgb2YgYSBuZXcgYm9ybiAgb2JzZXJ2ZWQgIGluIHRoZSBkaXBlcnIgaXMgY2F1c2VkIGJ5IHRoZWUgKlVSRVRFUyAsIHRoYXQgQVJFIHRoZSBjcnlzdGVscyBvZiB0aGVyIHVyaWMgYWNpZC4gdGhpcyBjb25kaXRpb24gaXMgcmVmZmVyZWRkIGFzIHRoZSB1cmljLWFjaWQgZGlhdGhlc2lzICBvcnIgYnJpY2sgZHVzdCB1cmluLiAqUkVBU09OOiBJTiB0aGUgZmlyc3QgZmV3c3MgYWZ0ZXIgYmlydGggdGhlZSBuZXcgYm9ybiBiYWJ5cyBraWRuZXkgaXMgc3RpbGwgbWF0dXJpbmcuIGFuZCB0aGV5eSBhcmUgc2VjcmV0ZWQgY29uY2VudHJhdGVkIHVyaW1lIHdpdGggaGlnaCB1cmljIGFjaWQgIGNvbnRlbnQsIC4gVEhJUyBjYW4gY2F1c2UgdXJldGUgY3J5c3RlbCBmb3JtYXRpb24sIHdoaWNoIGdpdmVzIHRoZSB1cmluZWUgYSByZWRkaXNoIG9yIG9yIGJsYWNrIGNvbG91cnIgYXBwcmVhbmNlIC4gIHRoaXMgaXMgYmVuZ2luIGJlbmdpbiBhbmQgc2VsZiBsaW1pdGltZyBjb25kaXRpb25uICB0aGF0IG1pbmx5IHNvbHZlIGluIHRoZSBmaXJzdCB3ZWVrIGFzIHRoZSBiYWJieSBmZWVkcyBmZXNkcyBtb3JlLGh5ZHJhdGVzIHN1ZmZpY2llbnRseSBhbmQgdGhlIGtpZG5leXMgbWF0dXJlcy4gICAgICAgKDIpIFRIRSBjaGlsZCBpbiB0aGlzIGNhc2UgaGFkIGEgZ3JlZW5zdGljayBmcmFjdHVyZSBvciBhIG1pbGQgbWlsZCBpbmp1cnkgdGhhdCBpcyBub3QgcHJlc2VudCB3aXRoIGRlZm9ybWl0eSBvciBhIHBhdGhvbG9naWNhbCBtb2JpbGl0eS4gIEFOQVRPTUlDQUwgIEFORCBQSFlTSU9MT0dJQ0FMIEZFQVJVUkVTOiAoMSlJbmNyZWFzc2UgYm9uZSBmbGF4aWJpbGl0eSAtIGNoaWxkcmVucyBib25lIGFyZSBsZXNzIG1pbmVyYWxsaXNlZCBhbmQgYXJlIG1vcmUgY2FydGlsYWdpbmVvdXMgaW4gY29tcGFpcmVkIHRvIHRoZSBhZHVsdHMgdGhhdCBtYWtpbmcgdGhhbSBtb3JlIGZsYXh4aWJsZSBhbmQgcHJvbmUgdG8gdGhlIGluY29tcGxldGUgZnJhY3R1cmVlLiAgKDIpVGhpY2tlciBwZXJpb3N0ZXVzIC0gcGVyaW9zdGV1bSB0aGF0IGlzICB0aGUgb3V0ZXJyIGxheWVyIG9mIHRoZSBib25lLCBpbiB0aGUgY2hpbGRyZW5zIGFyZSB0aGlja2tlciBhbmQgbW9yZSBhY3RpdmUgdGhhdCBoZWxwIHRvIGhvbGQgdGhlIGJvbWUgZnJhZ21lbnRzIHRvZ2V0aGVyIGFuZCBsaW1pdHMgdGhlIGRpc3BsYWNlbmVudCByZWR1Y2luZyB0aGUgY2hhbmNlIG9mIGNvbXBsZXRlZSBmcmFjdHVyZS4gKDMpSGlnaCBlbGFzdGljaXR5IC0gIGR1ZSB0byB0aGUgbW9yZSBlbGFzdGljaXR5IG9mIGEgY2hpbGQgYm9uZXMgLCBmcmFjdHVyZXMgbGlrZWUgZ3JlZWVuc3RpY2sgZnJhY3R1cmVzIChwYXJ0aWFsIGJyZWsgd2l0aCBibGVlZGltZyBvZiB0aGUgYm9tZSApIGlzIG9mdGVuIGNvbW1lbiAuICAoNClHUk9XVEggUExBVEUgLSBpbiBjaGlsZHJlbm4gdGhlIHByZXNlbmNlIG9mIHRoZSB0aGUgZ3Jvd3RoIHBsYXRlc3MoZXBpcGh5c2VhbCBwbGF0ZXMpIG5lYXIgdGhlZSBqb2ludCBtYWtlc3MgdGhlIGJvbWUgcHJvbmUgdG8gdGhlZSBpbmp1cnkgYXQgdGhlc2UgbG9jYXRpb24gLCB0aG91Z2ggc3VjaCBpbmp1cnkgIGFyZWUgdXN1YWxseSBzdGFibGUgYW5lIHZlcnkgbGVzcyBzZXZlcmUuICBDT05DTFVTSU9OLCB0aGUgYW5hdG9taWNhYWxsIGZlYXR1cmVzIG9mIGEgY2hpbGRzIGJvbmUoIGZsYXhpYmlsaXR5LCwgdGhpY2sgcGVyaXRvbml1bWFuZCBncm93dGggcGxhdGVzICkgY29udHJpYnV0dGVzIHRvIHRoZWVpbmh1cmllc3MgdGhhdCBtYXkgbm90IHNob3cgb2JldmlvdXNzIGRlZm9ybWl0aWVzcyBvciB0aGUgcGF0aG9sb2dpY2FsIG1vYmlsaXR5IGJ1dCBpdCBjYW4gc3RpbGwgY2F1c2UgbG9jYWxpc2VkIHBhaW4gYW5kIHRlbmRlcm5lc3Mu</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14" table:style-name="ce1">
            <text:p>915014</text:p>
          </table:table-cell>
          <table:table-cell office:value-type="string" table:style-name="ce1">
            <text:p>english</text:p>
          </table:table-cell>
          <table:table-cell office:value-type="string" table:style-name="ce1">
            <text:p>Ticket 15&amp;lt;br /&amp;gt; 1. Young parents were concerned about the appearance of brick-colored spots on the diaper after urination in the newborn. What is the reason for these changes:&amp;lt;br /&amp;gt; 2. At the pediatrician’s consultation, a mother with a 2-year-old child, according to the mother’s words, the child, playing on the playground, fell, hitting his left hand. At the time of examination, the child does not complain, movements are preserved in the left limb, but the child spares the hand, pathological mobility is absent, the contours of the damaged limb are not changed, and pain on the left forearm is determined by palpation. What anatomical and physiological features contribute to this condition?&amp;lt;br /&amp;gt;</text:p>
          </table:table-cell>
          <table:table-cell office:value-type="string" table:style-name="ce1">
            <text:p>MS4ueW91bmdlIHBhcmVudHMgY29uY2VyZWQgYWJvdXQgdGhlYXBwZWFyYW5jZSBvZiBicmljay1jb2xvcmVkIHNwb3J0IG9uIHRoZSBkaWFwZXIgLi4uLi4uIGFmdGVyIG5ldyBib25lICAgcmVzaW9uIHRoZSAgIGFmZnJlY2UgdGhlIGJyaWYgYmxvY2tlZCAgIHNwb3J0cyBpbiBpbiBhIGRpYXBlciAgYWZ0ZXIgYSBuZXIgYm9ybiAgZXJpbmF0aW9uIG1heSBiZSBkdXIgdG8gcHJlc2VuY2UgIGNyaXN0YWwuIHRoaXNlIGlzIGNvbW1hbiBhbmQgdHlpcGNhbCBoYXJtbGVzcyAgb2NjdXJlbmNlIHRoZSAgaW4gdGhlIGZpcnN0ICBmZXcgZGF5cyAgb2YgbGlmZSBpbiAgbmV3IGJvcm4gICBzb2RpdW0gIGNyZWF0aW5nIGEgcmFkaXNoLW9yYW5nZSAgb2YgYnJpZiAtY29sb3JlZGQgIHBpZ2FtZW50cyBpbiBuZXcgYm9ybiAgIHRoaXMgaXMgb2Z0ZW4gcmVzdWx0ICBvZiBjb25jZXJlbmQgdXJpbmVlICBhbmQgaXMgbm90ICBpbmRpY2F0aXZlICBvZiBhbnkgcGF0aG9sb2d5LiBpdCB1c3VhbGx5ICByZXNvbHZlICBvbiB0aXMgb3dhbiB0aGUgYmFieSAgYmVnaW5zIHRvICBjb25zdW1lICBtb3JlZSBtaWxrICByZWFzc3VyYW5jZSAuIHRoZXNlIGNoYW5nZXNzIGFyZSBwaHlzaW9sb2dpY2FsIGFuZCBub3JtYWwgZXNwaWNhbGx5IGR1cmluZyB0aGUgZmlzdCB3ZWVrIG9mIGxpZmUgcGFyZW50cyBzaG91bGQgYmUgcmVhc3N1cmVkIHVubGVzcyBvdGhlciBzaWducyBvZiBpbGxuZXNzIGFyZSBwcmVzZW50ICAgICAgICAgICAgICAgICAgICAgICAgICAgICAgICAgICAgICAgICAgICAgICAgICAgICAgICAgICAgICAgICAgICAgIDIuIDIgeWVhciBvbGQgY2hpbGQuLmFuYXRvbWljYWwgYW5kIHBoeXNpb2xvZ3kgZmVhdHVyZXMgY29udHJpYnV0ZSAgdG8gdGhlIGNoaWxkICBzcGFyaW5nICBoYW5kIGFmdGVyIGEgZmFsbCBhbmQgIHRoZSBjaGlsZCBzcGFhcmluZyBvZiB0aGUgbGVmdCBoYW5kICBkYW1hZ2UgbGltZiBub2RlIGFyZSBjaGFuZmUgIGFuZCBhbnkgcHJlc2VuY2Ugb2YgYSBtb3ZtZW50ICAgYWZ0ZXIgYSBmYWxsIGRlcHNpdGUgcHJldmVzdCBtb3ZtZW50ICBhbmQgdGhlIGFic2VuY2UgIG9mIHBhdGhvbG9naWNhbCAgbW9iaWxpdHkgbWF5IGJlIGluZmx1c2VuZCBieSBzZXJldmFsIGZhY3RvcnMgcHJvdGVjdGl2ZSByZWZsZXguIHRoaXMgY2hpbGQgaW5zdGluY3RpdmUgcHJvdHJjdGl2ZSByZWZsZXggIG1heSBjdXNlIHRoZW0gaXMgbmF0dXJhbGx5IGF2b2lkIHVzaW5nIG9yIHB1dHRpbmdnICAgcHJlc3VycmUgb24gdGhlIGluanVyeSAgaGFuZCB0byBwcmV2ZW50IGZ1cnRoZXIgZGlzY29tZm9ydCBvZiAgcGFpbiBwcmVjZXB0aW9uIC4uLiB5b3VuZyBjaGlsZGVybiBtYXkgbm90IGFsd2F5c3MgZXhwcmVzcyBwYWluIGNsZWFyeXkgb3IgbG9jYWl6ZWUgaXQgYWNjdXJhdHJ0IHRoZXNlbnN0aW9uIG9mdGVuIGxlYWQgdG8gYSBwcm90ZWN0aXZlIHJlc3BvbmNlICB3aGVyZWUgdGhlIGNoaWxkICBpbnN0aWNldnkgYXZvaWQgIHVzaW5nIHRoZSBhZmZlY3RlZCAgbGltYiB0byAgbWluaW1pemUgIHBhaW4uIGZlYXIgb2YgcmVpbmp1cnkgZXZlbiBpbiB0aGUgYWJzZW5jZSAgb2YgIHNpZ25pZmljYXRpb24gIGluanVyeSAgYWZ0ZXIgYSBmYWxsIHRoaXNlIGZlYXIgIGNhbiBpbmZsdWNlIHRoZXJlIGJlaGF2aW9yIGNhdXNpbmcgIHRoZW4gdG8gYmUgIGNhYXV0aW91cyBhbmQgc3BhcmVlIHRoZSBoYW5kICBlcHNpYWNhbGx5IGlmIHRoZXkgYXNzb2NpYXRlIHRoZSBmYWxsIHdpdGggcGFpbi4gbW9iaWxpdHkgc3VnZ2VzdCBhIG1pbm9yIHNvZnQgdGlzc3VlIGluanVyeXkgYSBncmVlbnN0aWNrIGZyYWN0dXJlIG9yIGEgc3VicGVyaW9zdGVhbGwgaGVhbWF0b21hICB0aGUgYW5hdG9taWNhbCBmZXl1cmVzIGFyZSBib25lIGVsYXN0aWNpdHl5IGEgdGhpY2trIHBlcmlvc3RldW0gYW5kIGluY29tcGxldHQgICBJbmNvbXBsZXQgb3NzdGlmaWNhdGlvbi4uIGluIHlvdW5nZWUgIGJvbmVlIGFyZWUgbm90IGZ1bGxseSBvc2lmaWVkIHRoZSBncm93dGhoIHBsYXRlcyBlcGlwaHlzZWFsbCBwbGF0ZXMgYXJlIHdlYWt3ciBhcmVhIHByb25lIHRvIGluanVyeSBidXQgZHVlIHRvIHRoZSBpbmNvbWxldCBvc3NpZmljYXRpb24uICAgICAgICAgICA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07" table:style-name="ce1">
            <text:p>1067107</text:p>
          </table:table-cell>
          <table:table-cell office:value-type="string" table:style-name="ce1">
            <text:p>english</text:p>
          </table:table-cell>
          <table:table-cell office:value-type="string" table:style-name="ce1">
            <text:p>Ticket 15&amp;lt;br /&amp;gt; 1. Young parents were concerned about the appearance of brick-colored spots on the diaper after urination in the newborn. What is the reason for these changes:&amp;lt;br /&amp;gt; 2. At the pediatrician’s consultation, a mother with a 2-year-old child, according to the mother’s words, the child, playing on the playground, fell, hitting his left hand. At the time of examination, the child does not complain, movements are preserved in the left limb, but the child spares the hand, pathological mobility is absent, the contours of the damaged limb are not changed, and pain on the left forearm is determined by palpation. What anatomical and physiological features contribute to this condition?&amp;lt;br /&amp;gt;</text:p>
          </table:table-cell>
          <table:table-cell office:value-type="string" table:style-name="ce1">
            <text:p>YW5zd2VyIDEtdGhlIGFwcGVhcmFuY2Ugb2YgYnJpY2sgY29sb3JlZCBzcG90cyBvbiB0aGUgZGlhcGVyIGFmdGVyIHVyaW5hdGlvbiBpbiB0aGlzIG5ldyBib3JuIGJhYnkgaXMgYmVjYXVzZSBvZiB0aGUgYWNjdW11bGF0aW9uIG9mIHVyYXRlIGNyeXN0YWxzICwgYSBub3JtYWwgZmluZGluZyBpbiB0aGUgZmlyc3QgZmV3IGRheXMgb2YgdGhlIGxpZmUgdGhlc2UgYXJlIGFsc28gIGNhbGxlZCBicmljayBkdXN0IG9yIHBpbmsgc3RhaW5zKGFzIHRoZXkgIGFyZSByZWRkaXN0IG9yIG9yYW5nZSBjb2xvcmVkIHN0YWlucyApICAsIHRoZXNlIGNyeXN0YWxzIGZvcm0gYmVjYXVzZSBvZiB1cmljIGFjaWQgbGV2ZWxzIHdpdGggY29uY2VudHJhdGVkIHVyaW5lIGFuZCBzb2RpdW0gIHdoaWNoIGpvaW4gdG9nZXRoZXIgdG8gZm9ybSB1cmF0ZSBjcnlzdGFscyAudGhlc2UgdXN1YWxseSAgcmVzb2x2ZXMgd2hlbiB0aGUgYmFieSBiZWNvbWVzIG1vcmUgaHlkcmF0ZWQgdGhyb3VnaCByZWd1bGFyIGZlZWRpbmcgLnRoZXkgZm9ybSBpbiB0aGUgZmlyc3QgMy01IGRheXMgLCB0aGVyZSBtYXkgYmUgbm9ybWFsIGRlaHlkcmF0aW9uIGluIHRoZSBmaXJzdCBkYXlzICwgcGh5c2lvbG9naWNhbCB3ZWlnaHQgbG9zcyBtYXkgaGFwcGVuIC4gdGhleSBhcmUgdXN1YWxseSBub3JtYWwgaW4gdGhlIGZpcnN0IHdlZWsgLiAgcGFyZW50cyAgc2hvdWxkIG9ubHkgd29ycnkgd2hlbiBuZXdib3JuIGRvZXNudCB1cmluYXRlIHJlZ3VsYXJseSBieSBkYXkgMy00ICwgaWYgdGhlIGJhYnkgaXMgbGV0aGFyZ2ljICwgaGFzIGRyeSBtb3V0aCBhbmQgc2tpbiBvciBwb29yIGZlZWRpbmcgLCBpZiBzdGFpbnMgcGVyc2lzdCBiZXlvbmQgd2VlayAxIC4gPGJyIC8+DQo8YnIgLz4NCmFuc3dlciAyIC0gdGhlIGFuYXRvbWljYWwgYW5kIHRoZSBwaHlzaW9sb2dpY2FsIGF0dHJpYnV0ZXMgdGhhdCBsZWFkIHRvIHRoaXMgMiB5ZWFyIG9sZCBraWQgc3BhcmluZyBoaXMgaGFuZCBhZnRlciBhIGZhbGwgZXZlbiB3aXRob3V0IGFuIG9idmlvdXMgaW5qdXJ5IGNhbiBiZSBleHBsYWluZWQgYnkgdGhlc2UgdGVybXMgLjxiciAvPg0KMS0gcHJvdGVjdGl2ZSByZWZsZXhlcyAtIHRoZSBjaGlsZCBpbnN0aW5jdGl2ZWx5IGF2b2lkcyB1c2luZyB0aGUgbGltYiB0aGF0IG1heSBiZSBwYWluZnVsIEFTIEEgcHJvdGVjdGl2ZSBtZWNoYW5pc20gd2hpY2ggY2FuIGJlIG5ldXJvbG9naWNhbC48YnIgLz4NCjItIHBhaW4gcGVyY2VwdGlvbi0gYWx0aG91Z2ggdGhlIG1vdmVtZW50cyBhcmUgcHJlc2VydmVkIGFuZCB0aGVyZSBpcyBubyBzd2VsbGluZyAubG9jYWxpemVkIHBhaW4gb24gcGFscGF0aW9uIG1ha2VzIHRoZSBjaGlsZCByZWx1Y3RhbnQgdG8gdXNlIHRoZSBsaW1iLjxiciAvPg0KMy0gZmVhciBvZiBwYWluIG9yIHJlaW5qdXJ5IC0gYXMgdGhlIGNoaWxkIG1heSBhc3NvY2lhdGUgdGhlIHBhaW4gb3IgbW92ZW1lbnQgYXMgYSBraW5kIG9mIGRpc2NvbWZvcnQgYW5kIHRodXMgbGltaXQgdXNlIHZvbHVudGFyaWx5IDxiciAvPg0KNC0gYW5hdG9taWNhbCBhbmQgcGh5c2lvbG9naWNhbCAtIGluIHlvdW5nIGNoaWxkcmVuICwgdGhlIGJvbmVzIGFyZSBmbGV4aWJsZSAsIHNvIGZyYWN0dXJlcyBtYXkgbm90IHNob3cgb2J2aW91cyBzaWducyBhbmQgbXVzY2xlcyBndWFyZGluZyBjYW4gYmUgc3VidGxlPGJyIC8+DQo=</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24" table:style-name="ce1">
            <text:p>915224</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MSDQkNC70YzQtG/RgdGC0LXRgG/QvS3QsdKx0Lsg0LNv0YDQvNC+0L0s0LHSr9C50YBl0Log0q/RgdGC0ZYg0LFl0LfRltC90ZbSoyDSm9GL0YDRgtGL0YHRgtGLINKb0LDQsdCw0YLRi9C90LDQvSDQsdOp0LvRltC9ZdGC0ZbQvSDQs2/RgNC80L7QvSDQtGXQvWXQtNC10LPRliDRgdGDINC8ZdC9INGC0rHQt9C00YvSoyDQsUHQu2HQvdGB0YvQvSDRgGXRgtGC0LXQudC00ZYuINCQ0LvRjNC0b9GB0YLQtdGA0L7QvSDSm2HQvSDSm9GL0YHRi9C80YvQvSDSm2HQu9GL0L/RgtGLINC0ZdKj0LPQtdC50LTQtSDSsdGB0YLQsNC/INGC0rHRgNGD0pNhINC205nQvdC1INKbYdC9INKb0rHRgNCw0LzRi9C90LTQsNKT0Ysg0L3QsNGC0YDQuNC5INC80LXQvSDQutCw0LvQuNC5INC4b9C90LTQsNGA0YvQvdGL0qMg0YLQtdC/0LUg0YJl0qPQtNGW0LPRltC9INGBYdKb0YLQsNGD0pPQsCDQutOp0LzQtdC60YLQtdGBZdC00ZYg0JHQsNC70LDQu9Cw0YDQtNCwINCx0rHQuyDQs2/RgNC80L7QvSDQsdKv0LnRgNC10Log0pvRi9C30LzQtdGC0ZbQvSDRgNC10YLRgtC10LnQtNGWINKb0LDQvSDSm9GL0YHRi9C80YvQvSDRgtKx0YDQsNKb0YLQsNC90LTRi9GAYdC00YsgINGN0LvQtdC60YLRgG/Qu9C40YIg0YLQtdC/0LUg0YLQtdKj0LTRltCz0ZbQvSDRgWHSm9GC0LDQudC00Yst0LHSsdC7INOp0YHRgyDQvNC10L0g0LRh0LzRgyDSr9GI0ZbQvSDQvNCw0qPRi9C30LTRiyDSm2HQu9GL0L/RgtGLINGB0YMg0LDQu9C80LDRgdGD0LTRiyDSm2HQvNGC0LDQvNCw0YHRi9C3INC10YJl0LTRliDQltCw0YEg0LFh0LvQsNC70LDRgNC00LAg0LDSk9C30LDQvdGL0qMg0pvQsNGA0pvRi9C90LTRiyDTqdGB0YPRliDQvNC10L0g0LTQsNC80YPRiyDQttKv0YBl0YLRltC90LTRltC60YJl0L0g0LDQu9GM0LTQvtGB0YLQtdGAb9C90L3Ri9KjINGA06nQu9GWIGHRgdCwINC80LDSo9GL0LfQtNGLINCW05nQvdC1INCx0LDQu9Cw0LvRgNC00LAg0pvRi9GI0pvRi9C7INGB0ZbQu9GC0ZbQu9GWINCxYdC70LDQvdGB0YLRiyDRgdCw0pvRgtCw0LnQtNGLIDxiciAvPg0K0LHQsNC70LDQu2HRgNC00LAg0LDQu9GM0LTQtdGB0YLQtdGAb9C9INC00LXSo9Cz0LXQudGWINCw0YPRi9GC0pvRg9GLINC00LXQvdGB0LDRg9C70YvSm9Kb0LAg05nRgdC10YAg0LXRgtGD0ZYg0LzSr9C80LrRltC9INC80YvRgdCw0LvRiyDQvWHRgtGA0LjQuSDQttC10YLRltGB0L/QtdGD0YjRltC70ZbQs9GWINGB0YPRgdGL0LfQtNCw0L3RgyDQvdC10LzQtdGB0LUgYdGA0YLQtdGA0LjRj9C70YvSmyDSm9GL0YHRi9C80L3Ri9KjINOp0LfQs9C10YDRg9GWINGB0LjRj9Kb0YLRiyA8YnIgLz4NCtGB0YMg0YLSsdC3INGCZdKj0LPQtdGA0ZbQvNGW0L0g0YBl0YLRgtC10LnQtNGWINC+0Lsg0LHSr9C50YDQtdC60YLQtdCz0ZYg0L3QtdGE0YDQvtC90LTQsNGA0LTQsCDQvdCw0YLRgNC40LnQtNGW0qMg0YDQtdCw0LHRgdC+0YDQsdGG0LjRj9GB0YvQvSDQutKv0YjQtdC50YJl0LTRliAg0LbTmdC90LUga2HQu9C40LnQtNGW0qMg0YjRi9KTYdGA0YvQu9GD0YvQvSBh0YDRgtGC0YvRgNCw0LTRiyDQsdKx0LsgYdKT0LfQsNC00LAg0YHSsdC50YvSm9GC0YvSmyDRgWHSm9GC0LDRg9KT0LAg0LbTmdC90LUg0pvQsNC9INKb0YvRgdGL0LzRi9C9INGC0rHRgGFr0YLQsNC90LTRi9GA0LDQtNGLIDxiciAvPg0KPGJyIC8+DQoyINKw0YDRi9Kb0YLQsCDSm9Cw0L0g0LDQudC90LDQu9GL0Lwg0LbSr9C50LXRgdGWINGN0LzQsdGA0LjQvtC90LDQu9C00YvSmyDQutC10LfQtdKj0LTQtSDQtNCw0LzQuNC00Ysg0LbTmdC90LUg0LHRltGA0L3QtdGI0LUg0YHQsNGC0YvQu9GLINC/0YDQvtGG0LXRgdGC0LXQvSDRgtKx0YDQsNC00YsgPGJyIC8+DQrQk9Cw0YHRgtGA0YPQu9GP0YbQuNGPINC6ZdC30LXSo9GWICjQtdC60ZYg0LDQv9GCKdCwINKw0YDRi9KbINC2YdC/0YvRgNCw0pvRiNCw0LvQsNGA0YvQvdGL0qMg0Y3QutGC0L7QtNC10YDQvNCwICzQvNC10LfQvtC00LXRgNC80LAsINGN0L3RgtC+0LTQtdGA0LzQsCDRgtKv0LfRltC70YPRli4g0JHQvtC70LDRiNCw0psg0LbSr9GA0LXQuiDQttOZ0L3QtSDSm9Cw0L0g0YLQsNC80YvRgNC70LDRgNGL0L3Ri9KjINC90LXQs9GW0LfRliDQvNC10Ldv0LTQtdGA0LzQsCDSm9Cw0LHQsNGC0YvQvdCw0L0g0LHQsNGB0YLQsNC70LDQtNGLLjxiciAvPg0K0JbSr9GA0LXQuiDRgtKv0LfRltC70YPRliAo0q/RiCDQsNC/0YLQsCkgLdKw0YDRi9Kb0YLRi9KjIGHQu9KT0LDRiNKb0Ysg0LbSr9GA0LXQuiDRgtKv0YLRltCz0ZYg0L/QsNC50LTQsCDQsdC+0LvRg9GLLiDQkdKx0Lsg0YLSr9GC0ZbQuiDQv9GD0LvRjNGB0LDRhtC40Y8g0LbQsNGB0LDQuSDQsdCw0YHRgtCw0LnQtNGLLiA8YnIgLz4NCtCW0q/RgNC10Log0ZbRiNGWINKb0YPRi9GB0YLQsNGA0YvQvdGL0qMg0pvQsNC70YvQv9GC0LDRgdGD0YsgKNGC06nRgNGCINCw0L/RgtCwKSAt0JbSr9GA0LXQuiBv0qMg0LbTmdC90LUg0YHQvtC7INKb0LDRgNGL0L3RiNCwINCx0L7Qu9GL0L8g0LHTqdC70ZbQvdC10LTRliwg0KLSsdC50YvSmyDSm9Cw0L0g0LDQudC90LDQu9GL0Lwg0LbSr9C50LXRgdGWINKb0LDQu9GL0L/RgtCw0YHQsCDQsdCw0YHRgtCw0LnQtNGLLiA8YnIgLz4NCtKa0LDQvSDRgtCw0LzRi9GA0LvQsNGA0YvQvdGL0qMg0LRh0LzRg9GLIC3QkdGW0YDRltC90YjRliDSm2HQvSDQsNC50L3QsNC70YvQvCDRiNC10qPQsdC10YDRliAo0rHRgNGL0pvRgtGL0qMg06nQt9GW0L0g0prQvtGA0LXQutGC0LXQvdC00ZbRgNGDINKv0YjRltC9KSDSsNGA0YvSm9GC0LAg0LrRltC90LTRltC6INGC0LDQvNGL0YDQu9Cw0YDRiyDQttOZ0L3QtSDQv9C70LDRhtC10L3RgtCwINCw0YDSm9GL0LvRiyDQsNC90LAg0pvQsNC90YvQvNC10L0g0LHQsNC50LvQsNC90YvRgSDQvtGA0L3QsNC50LTRiyA8YnIgLz4NCtCi0L7Qu9GL0pvSm9Cw0L3QtNGLINKb0LDQvSDQsNC50L3QsNC70YvQvCDQttKv0LnQtdGB0ZbQvdGW0qMg0pvQsNC70YvQv9GC0LDRgdGD0YsgKNGB0LXQs9GW0Lcg0LDQv9GC0LDSk9CwINC00LXQudGW0L0pLdCW0q/RgNC10Log0YLQvtC70YvSmyDRgtOp0YDRgiDSm9GD0YvRgdGC0Ysg0L7RgNCz0LDQvdKT0LAg0LDQudC90LDQu9Cw0LTRiyDSmtCw0L3QsNC50L3QsNC70YvQvCDQttKv0Lll0YHRliDRgm/Qu9GL0pvSm9Cw0L3QtNGLINC20rHQvNGL0YEg0ZbRgdGC0LXQuSDQsdCw0YHRgtCw0LnQtNGLIDxiciAvPg0K0rDRgNGL0pvRgtGL0qMgYdCw0L0g0LDQudC90LDQu9GL0LzRiyA8YnIgLz4NCi3Qv9C70LDRhtC10L3RgtCw0YDQu9GL0psg0pvQsNC9INCw0LnQvdCw0LvRi9C8LdCw0L3QsCDQvNC10L0g0rHRgNGL0psg0LDRgNCw0YHRi9C90LTQsCDQvtGC0YLQtdCz0ZYg0LbTmdC90LUg0pvQvtGA0LXQutGC0ZbQuiDQt9Cw0YLRgtCw0YAg0LDQu9C80LDRgdCw0LTRiyA8YnIgLz4NCi3SsdGA0YvSm9GC0YvSoyDQttKv0YDQtdCz0ZYg0LzQtdC9INKb0LDQvSDRgtCw0LzRi9GA0LvQsNGA0Ysg0L7RgtGC0LXQs9GW0L3RliDQsNC90LAg0pvQsNC90Ysg0LDRgNKb0YvQu9GLINCw0LvQsNC00Ysg0LbTmdC90LUg0pvQsNC20LXRgtGB0ZbQtyDQt9Cw0YLRgtCw0YDQtNGLINC/0LvQsNGG0LXQvdGC0LAg0LDRgNKb0YvQu9GLINGI0YvSk9Cw0YDQsNC00YsgPGJyIC8+DQo8YnIgLz4NCtKb0LDQvSDQsNC50L3QsNC70YvQvNC90YvSoyDQtNCw0LzRgyDRgdCw0YLRi9C70LDRgNGL0L3Ri9KjINGC0L7Qu9GL0psg0YLRltC30LHQtdCz0ZY8YnIgLz4NCi3QkNC70pPQsNGI0pvRiyDSm9Cw0L0g0LDQudC90LDQu9GL0Lwg0LbSr9C50LXRgdGW0L3RltKjINC/0LDQudC00LAg0LHQvtC70YPRiyDSr9GI0ZbQvdGI0ZYg0LDQv9GC0LDQtNCwIDxiciAvPg0K0LHSr9C7INC6ZdC30LTQtSDSsdGA0YvSm9GC0YvSoyDQvNC10LfQvtC00LXRgNC80LDQu9GL0psg0pvQsNCx0LDRgtGL0L3QtNCwINKb0LDQvSDRgtCw0LzRi9GA0LvQsNGA0YvQvdGL0qMg0LHQsNGB0YLQsNC80LDRgNGLINGC0q/Qt9GW0LvQtdC00ZYg0JbSr9GA0LXQuiDRgtKv0YLRltCz0ZYg0pvQsNC70YvQv9GC0LDRgdGL0L8g0LDQu9KT0LDRiNKb0Ysg0L/Rg9C70YzRgdCw0YbQuNGPINCx0LDRgdGC0LDQu9Cw0LTRizxiciAvPg0KLdCW0q/RgGXQuiDRgtKv0YLRltCz0ZbQvdGW0qMg0LbQtdGC0ZbQu9GD0ZYg0YLTqdGA0YLRltC90YjRliDQsNC/0YLQsNC00LAgLdCW0q/RgNC10Log0YLSr9GC0ZbQs9GWIFMg0YHQtdC60ZbQu9C00ZYg0LjRltC70ZbQvyDQsdOp0LvRltC90YMg0L/RgNC+0YbQtdGB0ZYg0LHQsNGB0YLQsNC70LDQtNGLINCW0q/RgNC10Log0pvRg9GL0YHRgtCw0YDRi9C90YvSoyDQsdCw0YHRgtCw0L/Sm9GLINCx0LXQu9Cz0ZbQu9C10YDRliDQv9Cw0LnQtNCwINCx0L7Qu9Cw0LTRiyDQltKv0YDQtdC60YjQtdC70LXRgCDQvNC10L0g0pvQsNGA0YvQvdGI0LDQu9Cw0YAg0LDQudKb0YvQvdC00LDQu9Cw0LAg0LHQsNGB0YLQsNC50LTRiyA8YnIgLz4NCi3QltKv0YBl0Log0pvRg9GL0YHRgtCw0YDRi9C90YvSoyDRgtKv0LfRltC70YPRliDRgtOp0YDRgi3QttC10YLRltC90YjRliDQsNC/0YLQsNC00LA8YnIgLz4NCtCx0rHQuyDQutC10LfQtNC1INKbb9GBINC20q/RgNC10LrRiNC1INC8ZdC9INKbYdGA0YvQvdGI0LAgYdGA0LDQu9GL0psg0L9l0YDQtNC10LvQtdGAINC/0LDQudC00LAg0LFv0LvQsNC00Ysg0JbSr9GA0LXQuiDRgtOp0YDRgiDQutCw0LzQtdGA0LDQu9GLINC+0YDQs9Cw0L3Sk9CwINCw0LnQvdCw0LvQsNC00YsgPGJyIC8+DQot0rDRgNGL0pvRgtGL0qMg0pvQsNC9LdGC0LDQvNGL0YDQu9Cw0YAg0LbSr9C50LXRgdGW0L3RltKjINC00LDQvNGD0Ysg0LHQtdGBLdGB0LXQs9GW0Lcg0LDQv9GC0LDQtNCwIDxiciAvPg0K0LHSsdC7INC60LXQt9C00LUg0LDRgNGC0LXRgNC40Y/Qu9Cw0YAg0LzQtdC90LrTqdC60YLQsNC80YvRgNC70LDRgCDQv9Cw0LnQtNCwINCx0L7Qu9GL0L8g0L3QtdCz0ZbQt9Cz0ZYg0pvQsNC9INCw0LnQvdCw0LvRi9C8INC20q/QudC10YHRliDSm9Cw0LvRi9C/0YLQsNGB0LDQtNGLINCa0ZbQvdC00ZbQuiDQsNGA0pvRi9C70Ysg0rHRgNGL0psg0L/Qu9Cw0YbQtdC90YLQsNC80LXQvSDQsdCw0LnQu9Cw0L3Ri9GB0pvQsCDRgtKv0YFl0LTRliA8YnIgLz4NCi3Qn9C7YdGG0LXQvdGC0LDRgNC70YvSmyDSm9Cw0L0g0LDQudC90LDQu9GL0LzQvdGL0qMg0YLQvtC70YvSmyDSm9GL0LfQvNC10YIg0LXRgtGD0ZYgPGJyIC8+DQrQsdKb0Lsg0LrQtdC30LTQtSBv0YLRgtC10LPRliDQvNC10L0g0pvQvtGA0LXQutGC0ZbQuiDQt9Cw0YLRgtCw0YAg0L/Qu9Cw0YbQtdC90YLQsCDQsNGA0pvRi9C70Ysg0LDQvdCwINKb0LDQvdGL0LzQtdC9INKx0YDRi9Kb0pvQsCDQsdOp0LvRltC90LXQtNGWINOo0LrQv9C1INKb0LDQvSDQsNC50L3QsNC70YvQvNGLINC20rHQvNGL0YEg0ZbRgdGC0LXQvNC10LnQtNGWINGB0LXQsdC10LHRliDSsdGA0YvSm9GC0YvSoyDRgtGL0L3Ri9GBINCw0LvRg9GLINOZ0LvRliDQsWHRgdGC0LDQu9C80LDSk9Cw0L0g0prQsNC9INC20q/RgNC10Log0LDRgNKb0YvQu9GLINC006nSo9CzZdC70LXQuiDQttKv0LnQtdC00LUg0pvQvtC30pPQsNC70LDQtNGLIDxiciAvPg0Kb9KjINC20q/RgNC10LrRiNC1IC3RgdC+0L/QsNKb0YjQsCDRgmXRgdGW0Log0LDRgNKb0YvQu9GLINGB0L7QuyDQttKv0YDQtdC60YjQtSAt0YFv0Lsg0pvQsNGA0YvQvdGI0LAgLdKb0L7Qu9Kb0LAgPGJyIC8+DQot0KLRg9KT0LDQvdC90LDQvSDQutC10LnRltC90LPRliDTqdC30LPQtdGA0ZbRgdGC0LXRgCA8YnIgLz4NCtCRYdC7YSDQtNKv0L3QuNC10LPQtSDQumXQu9Cz0LXQvdC00LUg0LDQu9KT0LDRiNKb0Ysg0YLRi9C90YvRgSDQsNC70YMg0LDRgNKb0YvQu9GLINOp0LrQv9C1INKb0LDQvSBh0LnQvdCw0LvRi9C80Ysg0ZbRgdC6ZSDSm9C+0YHRi9C70LDQtNGLINCh0L7Qv9Cw0pvRiNCwINGC0LXRgdGW0Log0LbTmdC90LUg0LrRltC90LTRltC6INGC0LDQvNGL0YDQu9Cw0YDRiyDQttCw0LHRi9C70LDQtNGLINKb0LDQvSDQsNC50L3QsNC70YvQvNGLINC10YDQtdGB0LXQuiDQsNC00LDQvNC00LDSk9GL0LTQsNC5INGC0L7Qu9GL0psg0pvQsNC70YvQv9GC0LDRgdCw0LTRiyA8YnIgLz4NCtKa0L7RgNGL0YLRi9C90LTRizxiciAvPg0K0rDRgNGL0pvRgtGL0qMg0pth0L0g0LDQudC90LDQu9GL0YHRiyDQttKv0Lll0YHRliDQsdGW0YDRgtGW0L3QtNC10L8g0LTQsNC80YvQvyDRjdC80LHRgNC40L7QvdCw0LvQtNGL0psg0LrQtdC30LXSo9C90ZbSoyDRgdC+0qPRi9C90LTQsCDRgtOp0YDRgiDSm9GD0YvRgdGC0Ysg0LbSr9GA0LXQuiDQv9C9INKb0LDQvSDRgtCw0LzRi9GA0LvQsNGA0Ysg0LbSr9C5ZdGB0ZYg0YLQvtC70YvSmyDSm9Cw0LvRi9C/0YLQsNGB0LDQtNGLINCi0YvQvdGL0YEgYdC70YMg0LbTmdC90LUg0ptv0YDQtdC60YLQtdC90YMg0L/Qu2HRhtC10L3RgtCwIGHRgNKb0YvQu9GLINC20q/RgGXQtNGWINCw0Lsg0YLRg9GL0LvSk2HQvdC90LDQvSDQumXQudGW0L0g06nQutC/ZSDSm9Cw0L0gYdC50L3QsNC70YvQvNGLINGW0YHQumUg0ptv0YHRi9C70LDQtNGLPGJyIC8+DQo=</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1" table:style-name="ce1">
            <text:p>915231</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0JzQtdC60YLQtdC/INC20LDRgdGL0L3QtNCw0pPRiyDQsdCw0LvQsNC70LDRgNC00LAg0LDQu9GM0LTQvtGB0YLQtdGA0L7QvSDQs9C+0YDQvNC+0L3Ri9C90YvSoyDQvNCw0qPRi9C30YvQvdCwINC60LXQu9C10YLRltC9INCx0L7Qu9GB0LDQvCDQsNC70LTQtdGB0YLQtdGA0L7QvSDQsdKv0LnRgNC10Lou0q/RgdGC0ZYg0LHQtdC30ZbQvdGW0qMg0YjRg9C80LDSm9GC0Ysg0LHTqdC70ZbQs9GW0L3QtdC9INCx06nQu9GW0L3QtdGC0ZbQvSDQs9C+0YDQvNC+0L0g0LHQvtC70YvQvyAg0YLQsNCx0YvQu9Cw0LTRiyDQvtC7INOp0Lcg0LrQtdC30LXQs9GW0L0g0YHRgyDRgtKx0Lcg0LDQu9C80LDRgdGD0YvQvSDRgNC10YLRgtC10LnRgtGW0L0g0LPQvtGA0LzQvtC9INCx0q/QudGA0LXQuiDTqdC30LXQutGI0LXQu9C10YDRltC90LTQtdCz0ZYg0L3QsNGC0YDQuNC4INC80LXQvSDRgdGD0LTRi9KjINC60LXRgNGWINGB0ZbSo9GW0YDRltC70YPRltC90LUg0LbQsNKT0LTQsNC5INC20LDRgdCw0LnRgtGL0L0g0LHQvtC70LDQtNGLLiAg0LHQhtCXINCR0IbQm9CV0JzQhtCXINCh0KMg0JzQldCdINCi0rDQlyDQsNC70LzQsNGB0YMg0LDQtNCw0Lwg0LDSk9C30LDRgdGLINKv0YjRltC9INOp0YLQtSDQvNCw0qPRi9C30LTRiyDQv9GA0L7RhtC10YEg0LHQvtC70YvQvyDRgtCw0LHRi9C70LDQtNGLINGB0LXQsdC10LHRliDQttCw0YEg0LHQsNC70LDQvdGL0qMg0L7RgNCz0L3QsNC40LfRltC80ZYg0LXQvdC00ZYg06nRgdGW0L8g0LrQtdC70LUg0LbQsNGC0YvRgCDQtNCw0LzRgyDQsNKT0LfQsNGB0Ysg0LHQvtC70pPQsNC90LTRi9Kb0YLQsNC9INGB0YMg0LDSk9C30LAg0q/RiNGW0L0g0LzQsNKT0YvQt9C00Ysg0LHQvtC70YvQvyDRgtCw0LHRi9C70LDQtNGLLiDQttKv0LnQutC1INCW0q/QudC10YHRltC90ZbSoyDQvtC20LYg0LHQtdC70YHQtdC90YMg0L3TmdGC0LjQttC10YHRltC90LTQtSDQsdKv0LnRgNC10Log0q/RgdGC0ZYg0LHQtdC30ZbQvdC1INOZ0YHQtdGAINC10YLRltC/INCw0LvQtNC10YHRgtC10YDQvtC9INGB0LXQutGA0LXRhtC40Y/RgdGL0L0g0LbQvtKT0LDRgNGL0LvQsNGC0LDRgtGL0L0g0LHQvtC70LDQtNGLICAg0L7QuyDQsdKv0LnRgNC10LrRgtC10LPRliDQvdC10YTRgNC+0L3Sk9CwINOZ0YHQtdGAINC10YLQtdGC0ZbQvSDQsdC+0LvQsNC00Ysg0L/RgNC+0LrRgdC40LzQsNC70LTRiyDQttOZ0L3QtSDQtNC40YHRgtCw0LvQtNGLINCx0q/QudGA0LXQuiDTqdC30LXQutGI0LXQu9C10YDRltC90LUg05nRgdC10YAg0LXRgtGW0L8g0L3QsNGC0YDQuNC00ZbSoyDRgNC10LDQsdGB0L7RgNCx0YbQuNGP0YHRi9C9INC20L7Sk9Cw0YDRi9C70LDRgtGC0YvQvSDQsdC+0LvQsNC00YsuINC90LDRgtGA0LjQuCDQttC+0pPQsNGA0YvQu9Cw0YPRiyDTqdC3INC60LXQt9C10LPRltC90LTQtSDRgdGD0LTRi9KjINC806nQu9GI0LXRgNGW0L3RltKjINCw0YDRgtGD0YvQvdCwINOZ0LrQtdC70LXRgtGW0L0g0LHQvtC70LDQtNGLLiDQttCw0LvQv9GLINCw0LnQvdCw0LvRi9C80LTQsNKT0Ysg0pvQsNC9INC606nQu9C10LzRliDQsNGA0YLQsNGC0YvQvSDQsdC+0LvQsNC00Ysu0JzQtdC60YLQtdC/INC20LDRgdGL0L3QtNCw0pPRiyDQsdCw0LvQsNC70LDRgNC00LAg0LbSr9GA0LXQutGC0ZbSoyDRgdC+0pPRgyDQttC40ZbQu9GW0LPRliDQttC+0pPQsNGA0Ysg0LHQvtC70LDQtNGLINCx0rHQuyDSm9Cw0LvRi9C/0YLRiyDRhNC40LfQuNC+0LvQvtCz0LjRj9C70YvSmyDQv9GA0L7RhtC10YEg0LHQvtC70YvQvyDRgtCw0LHRi9C70LDQtNGLINC20LDRgSDQsdCw0LvQsCDQvtGA0LPQsNC90LjQt9GW0LzRltC90LTQtSDQvNC10YLQsNCx0L7Qu9C40LfRltC8ICDQttC+0pPQsNGA0Ysg0LHQvtC70LDQtNGLINGB0LXQsdC10LHRliDQsdCw0LvQsCDSm9Cw0YDSm9GL0L3QtNGLINOp0YHRgyDRhNCw0LfQsNGB0YvQvdC00LAg0LHQvtC70pPQsNC90LTRi9Kb0YLQsNC9INGC0ZbQvdC00LXRgNC80LXQvSDQvNKv0YjQtdC70LXRgNCz0LUg0L7RgtGC0LXQuiDQv9C10L0g0pvQvtGA0LXQutGC0ZbQuiDQt9Cw0YLRgtCw0YDQtNGLINC606nQvyDRgtCw0LvQsNC/INC10YLQtdGC0ZbQvSDQsdC+0LvQsNC00Ysu0JHRltC3INCx0ZbQu9C10LzRltC3INC20q/RgNC10Log0LHSr9C60ZbQuyDQvNKv0YjQtdCz0LUg0LrQsNC90LTRiyDQttC10YLQutGW0LfQtdGC0ZbQvdGW0L0g0YHQvtC90LTRi9Kb0YLQsNC9INC80LXQutGC0LXQvyDQttCw0YHRi9C90LTQsNKT0Ysg0LHQsNC70LDQu9Cw0YDQtNCwINC20q/RgNC10LrRgtGW0qMg0LbQuNGL0YDRi9C70YMg0LbQuNGW0LvRltCz0ZYg0LzQtdC9INKb0LDQvSDSm9GL0YHRi9C80Ysg0LbQvtKT0LDRgNGLINC00LXSo9Cz0LXQudC00LUg0LHQvtC70LDQtNGLLtCR0LDRgdGC0LDRg9GL0Ygg0YHRi9C90YvQsdGL0L3QtNCw0pPRiyDQsdCw0LvQsNC70LDRgNC00LAg0YjQsNC80LDQvNC10L0gNi0xMtC20LDRgSDQsNGA0LDQu9GL0pPRi9C90LTQsNKT0Ysg0LHQsNC70LDQu9Cw0YAg0L7RgNCz0LDQvdC40ZbQvNGW0L3QtSDRgtCw0pPQsNC80LTRi9KbINKb0rHQvdCw0YDQu9GLINGC0LDSk9Cw0LzQtNCw0YAgINC60LXRgNC10Log0LHQvtC70LDQtNGLINGB0LXQsdC10LHRliDQsdKx0Lsg0LbQsNGB0YLQsNKT0Ysg0LHQsNC70LDQu9Cw0YDQtNCwINKb0LjQvNGL0Lsg0pvQvtC30pPQsNC70YvRgSDTqdGC0LUg0LHQtdC70YHQtdC90LTRliDQvNC10YLQsNCx0L7Qu9C40LfRltC8INC20rHQvNGL0YHRiyDTqdGC0LUg0LbQvtKT0LDRgNGLINCx0L7Qu9GD0LTQsCAg0YTQuNC30LjQutCw0LvRi9KbINCx0LXQu9GB0LXQvdC00ZbQu9GW0LPRltC90LUgINC205nQvdC1INCx0LXQu9GB0LXQvdC00ZYg06nRgdGDINC/0YDQvtGG0LXRgdGW0L3QtSDQsdCw0LnQu9Cw0L3Ri9GB0YLRiywg0YHQtdCx0LXQsdGWINOp0YHRgyDQs9C+0YDQvNC+0L3QtNCw0YDRiyDRgdCw0LzQvtGC0L7RgtGA0L7Qv9C40L3QvdGW0qMg0LHTqdC70ZbQvdGD0ZYg0LbTmdC90LUg0pvQsNC90pvQsCDRgdKv0LnQtdC60YLQtdGA0ZbQvdGW0qMg0LTQsNC80YPRiyDQsdC10LvRgdC10L3QtNGWINC20q/RgNGW0L8g0LbQsNGC0pvQsNC9INGD0LDSm9GL0YIuINCR0rHQuyDQutC10LfQtNC1INGB0q/QudC10LrRgtC1INC+0YDQs9Cw0L3QuNC60LDQu9GL0psg0LfQsNGC0YLQsNGAINC606nQvyDQsdC+0LvQsNC00Ysg0YHQvtC90LTRi9Kb0YLQsNC9INCx0LDQu9Cw0L3Ri9KjINGB0q/QudC10LPRliDRgdC10YDQv9GW0LzQtNGWINC40ZbQu9Cz0ZbRiCDQutC10LvQtdC00ZYuINCQ0LvRjNC00LXRgdGC0LXRgNC+0L0g0LPQvtGA0LzQvtC90Ysg0LbTmdC90LUg0LHQsNGB0pvQsNC00LAg0LPQvtGA0LzQvtC90LTQsNGAINCx0LDRgNC70YvSk9GLINCx0LDQu9CwINCw0pPQt9Cw0YHRi9C90YvSoyDQtNCw0LzRg9GLINKv0YjRltC9INC80LDSo9GL0LfRiyDQtdGA0LXQutGI0LUuINC80LXQutGC0LXQvyDQttCw0YHRi9C90LTQsNKT0Ysg0LHQsNC70LDQu9Cw0YAg0L7RgNCz0L7QvdC00LDRgNC00YvSoyDQtNCw0LzRgyDQttKv0YDQtdC6INCx0L7QudC00YvSoyDTqdGB0YPRliDQttOZ0L3QtSDQvtC50LvQsNGDINKb0LDQsdGW0LvQtdGC0ZbQvdGW0qMg0LbQvtKT0LDRgNGL0LvQsNGD0Ysg0L7RgNGC0LDQu9GL0psg0LbSr9C50LrQtSDQttKv0LnQtdGB0ZbQvdGW0qMg0LbSsdC80YvRgdGLINKb0YvRgNGC0YvRgdGC0Ysg0pvQsNCx0LDRgtGC0LDRgNC00YvSoyDQtNCw0LzRg9GLINCx0LXQu9GB0LXQvdC00ZYg0LbSr9GA0ZbQvyDQttCw0YLQsNC00YsuINCx0LDQu9CwINC+0YDQs9Cw0L3QuNC30ZbQvNGW0L3QtSAgINOp0YHRgyDQv9GA0L7RhtC10YHRliDQvNC10L0gINGB0q/QudC10LrRgtC10YDQtNGW0qMg0LTQsNC80YPRi9C90LAg05nRgdC10YDRliDTqdGC0LUg0LbQvtKT0LDRgNGLINGB0L7QvdC00YvSm9GC0LDQvSDQsNC70YzQtNC10YHRgtC10YDQvtC9INCw0pPQt9CwINKv0YjRltC9INOp0YLQtSDQvNCw0qPRi9C30LTRiyDQsdC+0LvRi9C/INGC0LDQsdGL0LvQsNC00Ysu0JDQu9C00LXRgdGC0LXRgNC+0L3QvdGW0qMg0LTQtdKj0LPQtdC50ZbQvdGW0qMg0LbQvtKT0LDRgNGL0LvQsNGD0Ysg0L7RgNCz0LDQvdC40LfRltC80LTQtdCz0ZYg0LrQsNC9INC606nQu9C10LzRltC9INC20L7Sk9Cw0YDRi9C70LDRgtGL0L8g0LbRltCx0LXRgNC10LTRliDQsNGA0YLRi9KbINC60LDQvSDQutOp0LvQtdC80ZYg0LbSr9GA0LXQutC60LUg0LrTqdC/INC20q/QutGC0LXQvNC1INGB0LDQu9Cw0YLRi9C9INCx0L7Qu9Cw0LTRiyDRgtC10Log0LbSr9GA0LXQuiDQtdC80LXRgSDQsdCw0YHSm9Cw0LTQsCDQvtGA0LPQvtC90LTQsNGAINCx0LDRg9GL0YAg0LHSr9C50YDQtdC6INC20rHQvNGL0YHRiyDQsdKx0LfRi9C70YLRi9C9INCx0L7Qu9Cw0LTRiyDRgtGW0L3QtNC10YDQs9C1INGB0rHQudGL0pvRgtGL0pvRgtGL0qMg0LbQuNC90LDRg9GLINCx0L7Qu9GD0Ysg0LzSr9C80LrRltC9INC205nQvdC1INCx0rHQuyDQtNC10L3QtdC90ZbSoyDRltGB0ZbQvdGD0ZbQvdC1ICDRg9GL0YLRgtGLINOp0L3RltC80LTQtdGAINCx0q/QudGA0LXQuiDQsNGA0pvRi9C70Ysg0YLQsNC30LDQu9Cw0L3Ri9C/INC+0YLRi9GA0LDRgtGL0L0g0LHQvtC70pPQsNC90LTRi9Kb0YLQsNC9INCw0pPQt9CwINGD0LvQsNC90YPRi9C00LAg0LzSr9C80LrRltC9INC60LDQvdC00LAg0L3QsNGA0YLQuNC00ZbSoyDQtNC10LnQs9C10LnRltC90ZbSoyDQttC+0pPQsNGA0YvQu9Cw0YPRiyDQsdKx0LvQtNCwINC60LDRg9GW0L/RgtGWINGE0LDQutGC0L7RgCDRgdC+0L3QtNGL0pvRgtCw0L0g0LDQu9C00LXRgdGC0LXRgNC+0L0g0LTQtdKj0LPQtdC50ZYg0pvQsNC70YvQv9GC0YvQtNCw0L0g0LbQvtKT0LDRgNGLINCx0L7Qu9C80LDRg9GLINC60LXRgNC10LouMtGB0rHRgNCw0psuINKw0YDRi9Kb0YLRi9KjINC60LXQt9C10qMgMC00INCw0L/RgtCwINCw0YDQsNGB0YvQvdC00LAg0Y3QvNCx0YDQuNC+0L0g0rHRgNGL0psg0YHQsNGA0YPRi9C3INKb0LDQv9GI0YvSk9GLINCw0YDSm9GL0LvRiyDQvtGC0YLQtdC6INC/0LXQvSDQutC+0YDQtdC60YLRltC6INC30LDRgtGC0Ysg0LDQu9Cw0LTRiy4gNC040LDQv9GC0LAg0L/Qu9Cw0YbQtdC90YLQsCDSm9Cw0LvRi9C/0YLQsNGB0LAg0LHQsNGB0YLQsNC50LTRiyDQtdC90LTRliDQsdCw0LvQsCAg0L/Qu9Cw0YbQtdC90YLQsCDQsNGA0pvRi9C70Ysg0LrQsNC90LzQtdC9INKb0LDQvNGC0LDQvNCw0YHRi9C3INC10YLRltC70LXQtNGWIDxiciAvPg0KIDPQutC10LfQtdKjIDgtMTLQsNC/0YLQsNC00LAg0rHRgNGL0pvRgtGL0qMg0LbSr9GA0LXQs9GWINGB0L7Sk9CwINCx0LDRgdGC0LDQudC00Ysg0LrQsNC9INCw0LnQvdCw0LvRi9C8INC/0YDQvtGG0LXRgdGW0L3QtSDQttKv0YDQtdC6INKb0LDRgtGL0YHQsNGC0YvQvSDQsdC+0LvQsNC00Ysg0LHRltGA0LDQuiDQsdCw0LvQsNC00LAg06nQutC/0LUg0LbSsdC80YvRgSDRltGB0YLQtdC80LXQudC00ZYgNCDQutC10LfQtdKjIDEyLTE2INCw0L/RgtCwLDUg0LrQtdC30LXSoyAxNi00MNCw0L/RgtCwICDSsdGA0YvSm9GC0YvSoyAg0LrQsNC9INCw0LnQvdCw0LvRi9C80Ysg0LTQsNC80YvQvyDTqdC30LPQtdGA0LXRgtGW0L0g0LbQsNKT0LTQsNC50LvQsNGA0pPQsCDQsdC10LnRltC80LTQtdC70YMg0LbQsNC70pPQsNCw0YHQsCDQsdCw0YHRgtCw0LnQtNGLLiDTmdGAINGC0q/RgNC70ZYg0LzSr9GI0LXQu9C10YAg0LzQtdC9INGC0ZbQvdC00LXRgNC00LUg0pvQsNC9INCw0LnQvdCw0LvRi9C80Ysg0LTQsNC80YvQvyDQsdCw0LvQsNC00LAg0LrQsNC9INCw0LnQvdCw0LvRi9C8INC20L7Sk9Cw0YDRiyDQtNC10qPQs9C10LnQtNC6INC00LDQvNGL0L8g0LHQsNC70LAg0LrRltC90LTRltC6INCw0YDSm9GL0LvRiyDQvtGC0YLQtdC6INC/0LXQvSDSm9C+0YDQtdC60YLRltC6INC30LDRgtGC0LDRgNC00Ysg0L/Qu9Cw0YbQtdC90YLQsCDQsNGA0pvRi9C70Ysg0LDQu9Cw0YLRi9C9INCx0L7Qu9Cw0LTRiy4g0JHSsdC7INC60LXQt9C00LUg0LrRltC90LTRltC6INCy0LXQvdCw0YHRiyDQvNC10L0g0LrRltC90LTRltC6INCw0YDRgtC10YDQuNGP0LvQsNGA0Ysg06nRgtC1INC80LDSo9GL0LfQtNGLINGA06nQuyDQvtC50L3QsNC50LTRiy48YnIgLz4NCtC/0LvQsNGG0LXQvdGC0LAg0LDQvdCwINC80LXQvSDQsdCw0LvQsNC90Ysg0LHQsNC50LvQsNC90YvRgdGC0YvRgNGD0YjRiyDQsdC+0LvRi9C/INC60LXQu9C10LTRliDQutGW0L3QtNGW0Log0LDRgNGC0LXRgNC40YHRiyDQvNC10L0g0LLQtdC90LDRgdGLINCx0LDQu9CwINC60LDQvdGL0L3QtNCwINC80LDSo9GL0LfQtNGLINC+0YDRi9C9INCw0LvQsNC00YsuINC905nRgNC10YHRgtC1INCw0L3QsCDQsNKT0LfQsNGB0YvQvdC00LAg0L/QsNC50LTQsCDQsdC+0LvSk9Cw0L0g0YHQvtKjINGN0LzQsdGA0LjQvtC9INC/0LDQudC00LAg0LHQvtC70pPQsNC9INGB0L7SoyAg0pvQsNC9INCw0LnQvdCw0LvRi9C8INC20q/QudC10YHRliDQtNCw0LzRi9C/INC60ZbQvdC00ZbQuiDQstC10L3QsNGB0Ysg0LDRgNKb0YvQu9GLINCx0LDQu9Cw0pPQsCDSm9Cw0L0g0LrQtdC70LXQtNGWINC60ZbQvdC00ZbQuiDQstC10L3QsNGB0YsgINCx0LDRg9GL0YDSk9CwINCx0LDRgNGL0L8g0LXQutGWINGC0LDRgNC80LDSm9Kb0LAg0LHTqdC70ZbQvdGW0L8g0YLTqdC80LXQvdCz0ZYg0pvRg9GL0YEg0LLQtdC90LDSk9CwINKb0rHQudGL0LvQsNGC0YvQvSDQsdC+0LvQsNC00YsgINGC06nQvNC10L3Qs9GWINKb0YPRi9GBINCy0LXQvdCwINGB0L7QuyDQttCw0psg0LbSr9GA0LXQutGI0LXQs9C1INCx0LDRgNCw0LTRiyDRgdC+0Lsg0LbQsNKbINC20q/RgNC10LrRiNC10LPQtSAg0YLTqdC80LXQvdCz0ZYg0LbQvtKT0LDRgNKT0Ysg0pvRg9GL0YEg0LLQtdC90LDQu9Cw0YAg0LrQtdC70LXQtNGWINCx0LDQu9Cw0LTQsCDTqdC60L/QtSDQttKx0LzRi9GBINGW0YHRgtC10LzQtdGD0ZbQvdC1INCx0LDQudC70LDQvdGL0YHRgtGLINOp0LrQv9C1INCw0YDRgtC10YDQuNGP0YHRiyDQvNC10L0gINCw0L7RgNGC0LAg0LDRgNCw0YHRi9C90LTQsCDQsNGI0YvSmyDTqdC30LXQutGI0LUg0LHQvtC70LDQtNGLINC+0YHRiyDTqdC30LXQutGI0LUg0LHSsdC7INGN0LzQsdGA0LjQvtC9INC60LXQt9C00LUg0pvQsNC70YvQv9GC0Ysg0LbQsNKT0LTQsNC50LTQsCDQsNGI0YvSmyDRgtKx0YDQsNC00Ysg0LHQsNC70LAg0YLRg9GL0LvSk9Cw0L0g0YHQvtKjINC20LDQsdGL0LvRi9C/INKb0LDQu9GD0Ysg0LrQtdGA0LXQuiDQttOZ0L3QtSDRgdC+0Lsg0LbQsNKbINC20q/RgNC10LrRiNC1INC80LXQvSDQvtKjINC20LDSmyDQttKv0YDQtdC60YjQtSDQsNGA0LDRgdGL0L3QtNCwINGB0L7Qv9Cw0psg0YLQtdGB0ZbQuiDQsdC+0LvQsNC00Ysg0LHSsdC7INGC0LXRgdGW0LrRgtC1INGN0LzQsdGA0LjQvtC90LTQsCDQsNGI0YvSmyDQsdC+0LvQsNC00Ysg0YHQvtC7INCw0YDSm9GL0LvRiyDRgdC+0Lsg0LbQsNKbINC20q/RgNC10LrRiNC10LTQtdCz0ZYg0pvQsNC9INC+0qMg0LbQsNKbINC20q/RgNC10LrRiNC10LPQtSDTqdGC0LXRgtGW0L0g0LHQvtC70LDQtNGLINGN0LzQsdGA0LjQvtC90LTQsCDRgdC+0Lsg0LbQsNKb0YLQsNKT0Ysg0LbTmdC90LUg0L7SoyDQttCw0pvRgtCw0pPRiyDSm9Cw0L3QtNCw0YAg0LHRltGAINCx0ZbRgNGW0LzQtdC9INCw0YDQsNC70LDRgdCw0YLRi9C9INCx0L7Qu9Cw0LTRiy4g0LDQvtGA0YLQsNKT0LAg06nRgtC60LXQvSDSm9Cw0L0g0Y3QvNCx0YDQuNC+0L0g0LTQtdC90LXRgdGW0L3QtSDRgtCw0YDQsNC/INC60ZbQvdC00ZbQuiDQsNGA0YLQtdGA0LjRj9GB0Ysg0pvQsNC90L3Ri9KjINGI0YvSk9GD0Ysg0LbSr9GA0LXRgtGW0L0gINCx0L7Qu9Cw0LTRiy4g0rHRgNGL0pvRgtGL0qMg0pvQsNC9INCw0LnQvdCw0LvRi9C80YvQvdC00LDSk9GLINC90LXQs9GW0LfQs9GWINC10YDQtdC60YjQtdC70ZbQutGC0LXRgCDQsdCw0LvQsNC90YvSoyDQsNC90LAg0L7RgNCz0LDQvdC40LfRltC80ZbQvNC10L0g0YLRi9KT0YvQtyDQsdCw0LnQu9Cw0L3Ri9GB0YLQsCDQsdC+0LvRg9GLINC205nQvdC1INOp0LrQv9C1INC20rHQvNGL0YEg0LbQsNGB0LDRg9GLINGB0L7Qv9Cw0pvRiNCwINGC0LXRgdGW0LrRgtGW0qMg0LDRiNGL0psg0LHQvtC70YPRiyzQkdCw0YLRgtCw0LvQvtCyINOp0LfQtdCz0ZbQvdGW0qMg0LDRiNGL0psg0LHQvtC70YPRiywg0LHSsdC7INC90LXQs9GW0LfRltC90LXQvSDQsdCw0LvQsCDRgtGD0YvQu9KT0LDQvSDRgdC+0qMgINOp0LrQv9C10YHRliDSm9Cw0LvRi9C/0YLRiyDQttKx0LzRi9GBINGW0YHRgtC10LnRgtGW0L0g0LHQvtC70LDQtNGLINKv0LvQutC10L0g0LbTmdC90LUg0LrRltGI0ZYg0pvQsNC9INCw0LnQvdCw0LvRi9C80Ysg0pvQsNC70YvQv9GC0LDRgdCw0LTRiyAg0YHQvtC/0LDSm9GI0LAg0YLQtdCz0ZbQutGC0ZbSoyDQttCw0LHRi9C70YMg0L/RgNC+0YbQtdGB0ZYg0LHQvtC70LDQtNGLINKb0LDQvdC90YvSoyDQsNGA0LDQu9Cw0YHRg9GLINCx0L7Qu9C80LDQudC00YssINCx0LDRgtGC0LDQu9C+0LIg06nQt9C10LrRiNC10YHRliDQttCw0LHRi9C70LDRgtGL0L0g0LHQvtC70LDQtNGLLiDQldCz0LXRgCAg0LHQsNC70LDQtNCwINC+0YHRiyDQv9GA0L7RhtC10YHRgtC10YAg0LHQvtC70LzQsNC50YLRi9C9INCx0L7Qu9GB0LAg0LHQsNC70LAg0YLRg9CwINCx0ZbRgtC60LXQvSDQsNKb0LDRg9C80LXQvSDQtNKv0L3QuNC10LPQtSDQutC10LvQtdGC0ZbQvSDQsdC+0LvQsNC00YsuINCR0rHQuyDTqdGC0LUg0pvQsNGD0ZbQv9GC0ZYg0YHQtdCx0LXQsdGWICDSm9Cw0L0g0LDQudC90LDQu9GL0Lwg0LbSr9C50LXRgdGWINC20q/RgNC10Log0LbSsdC80YvRgdGLINCx0LDQu9CwINKv0YjRltC9INOp0YLQtSDQvNCw0qPRi9C30LTRiyDQutC10LnQtNC1INC80rHQvdC00LDQuSDQsNKb0LDRg9C70LDRgNC00Ysg0LHQsNC50pvQsNC80LDQuSDSm9Cw0LvRgyDQvdC10LzQtdGB0LUg0LDQvdCw0YHRiyDQttKv0LrRgtGW0LvRltC6INGD0LDSm9GL0YLRi9GB0YvQvdC00LAg0LbSr9C50LXQu9GWINGC0q/RgNC00LUg0pvQsNGA0LDQu9C80LDRg9GLINC90LXQvNC10YEg0LbSr9C60YLRltC70ZbQuiDQutC10LfRltC90LTQtSDQsNC90LDQtNCwINCx0L7Qu9KT0LDQvSDQutC10YDRliDQttCw0pPQtNCw0LnQu9Cw0YAg0LzRi9GB0LDQu9KT0LAg0YHRgtGA0LXRgdGBINC90LXQvNC10YHQtSDQsNC90LAg0LTQtdC90YHQsNGD0LvRi9KT0YvQvdC00LDSk9GLINCw0LrQsNGD0LvQsNGAINC205nQvdC1INC30LjRj9C90LTRiyDTmdC00LXRgtC10YDQtNGW0qMg0LHQvtC70YPRiyDQttKv0LrRgtGW0LvRltC6INGD0LDSm9GL0YLRiyDQtNKx0YDRi9GBINOp0YLRltC70LzQtdCz0LXQvSDQttCw0pPQtNCw0LnQtNCwINCx0LDQu9CwINC+0YDQs9Cw0L3QuNC30ZbQvNGW0L3QtSDQt9C40Y/QvSDQutC10LvQtdGC0ZbQvSDQsdC+0LvQsNC00Ysg0YHQtdCx0LXQsdGWINCw0L3QsNC80LXQvSDQsdCw0LvQsCDQsdGW0YAg0LHRltGA0ZbQvNC10L3QtSDRgtGL0pPRi9C3INKb0LDRgNGL0Lwg0pvQsNGC0YvQvdCw0YHRgtCwINGB0L7QvdC00YvSm9GC0LDQvSDQttKv0LrRgtGW0LvRltC6ICDQutC10LfRltC90LTQtSDQsNC90LAg0LTSsdGA0YvRgSDRgtCw0LzQsNKb0YLQsNC90YMg0LrTqdKj0ZbQuyDQutKv0LnRltC80LXQvSAg0LTQtdC90YHQsNGD0LvRi9KT0YvQvdCwINKv0L3QtdC80ZYg0pvQsNC00LDSk9Cw0LvQsNC/INC+0YLRi9GA0YMg0LrQtdGA0LXQui4g0J3TmdGA0LXRgdGC0LUg0YLRg9GL0LvSk9Cw0L3Sk9CwINC00LXQudGW0L0g0rHRgNGL0pvRgtGL0psg0pvQsNC9INCw0LnQvdCw0LvRi9C80Ysg0LDRgNKb0YvQu9GLINKb0L7RgNC10LrRgtGW0Log0LfQsNGC0YLQsNGA0LzQtdC9INC+0YLRgtC10LPRltC90ZYg0LDQu9GL0L8g06nRgdGW0L8g0LTQsNC80YPRi9C90LAg0LbSsdC80YHQsNC50YLRi9C9INCx0L7Qu9Cw0LTRiy4g0JHQsNC70LAg0YLRg9GL0LvSk9Cw0L0g0YHQvtKjINC10YDQtdGB0LXQuiDQsNC00LDQvNC00LDRgCDRgdC10LrRltC70LTRliDSsdGA0YvSm9GC0YvSmyDQutCw0L0g0LDQudC90LDQu9GL0Lwg0YLQvtKb0YLQsNC50YLRi9C9INCx0L7Qu9Cw0LTRiyDQtdC90LTRliDQsdCw0LvQsCDSm9Cw0LvRi9C/0YLRiyDTqdC60L/QtSDQttKv0YDQtdC6INC20rHQvNGL0YHRgtCw0YDRiyDSm9Cw0LvRi9C/0YLQsNC00YsuIC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68" table:style-name="ce1">
            <text:p>915268</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IDEuINCQ0LvRjNC00L7RgdGC0LXRgNC+0L3Sk9CwINGB0LjQv9Cw0YLRgtCw0LzQsCDQsdC10YDRltC/INC60LXRgtGB0LXQuiDQkNC70YzQtNC+0YHRgtC10YDQvtC9INC90LXQs9GW0LfRltC90LXQvSDQsdKv0LnRgNC10Log0q/RgdGC0ZYg0LHQtdC30ZbQvdC10L0g0YHQuNC90YLQtdC30LTQtdC70LXRgtGW0L0g0LPQvtGA0LzQvtC9INCx0L7Qu9GL0L8g0LrQtdC70LXQtNGWLCDRj9KT0L3QuCDQvNC40L3QtdGA0LDQu9C+0LrQvtGA0YLQuNC60L7QuNC00YLQsNGAINGC0L7QsdGL0L3QsCDQttCw0YLQsNGC0YvQvSDQsdC+0LvRi9C/INC60LXQu9C10LTRli7QntC7INC90LXQs9GW0LfRltC90LXQvSDQsNKT0LfQsNC00LAg0YHRgyDRjdC70LXQutGC0YDQvtC70LjRgiDQsNC70LzQsNGB0YPRi9C9INGP0pPQvdC4INCx0LDQu9Cw0L3RgdGL0L0g0YDQtdGC0YLQtdGW0LTQtSDQvNCw0qPRi9C30LTRiyDRgNOp0Lsg0LDRgtKb0LDRgNCw0YLRi9C9INCz0L7RgNC80L7QvSDQsdC+0LvRi9C/INGB0LDQvdCw0LvQsNC00YsuINCQ0Lsg0LHQsNGB0YLQsNGD0YvRiCDRgdGL0L3Ri9C/INC20LDRgdGL0L3QtNCw0pPRiyDQsdCw0LvQsNC00LAg0LDQu9GM0LTQvtGB0YLQtdGA0L7QvSDSm9Cw0L3QtNCw0pPRiyDQvdCw0YLRgNC40Lkg0LzQtdC9INC60LDQu9C40LnQtNGW0qMg0LHQsNC70LDQvdGB0YvQvSDSsdGB0YLQsNC/INGC0rHRgNGD0pPQsCDQttOZ0L3QtSDQtNC1INKb0LDQvSDSm9GL0YHRi9C80YvQvSDRgNC10YLRgtC10YPRgtGW0L0g0pvRi9C30LzQtdGCINCw0YLSm9Cw0YDQsNC00Ysu0K/Sk9C90Lgg0LDQu9GM0LTQvtGB0YLQtdGA0L7QvSDQvtC7INCx0q/QudGA0LXQutGC0LXQs9GWINC90LDRgtGA0LjQudC00ZbSoyDRgNC10LDQsdGB0L7RgNCx0YbQuNGP0YHRi9C9INCw0YDRgtGC0YvRgNCw0LTRiyDQttOZ0L3QtSDQtNC1INC60LDQu9C40LnQtNGW0qMg0YjRi9KT0LDRgNGL0LvRg9GL0L0g0YvQvdGC0LDQu9Cw0L3QtNGL0YDQsNGC0YvQvSDRhNGD0L3QutGG0LjRj9C70LDRgNC00Ysg0LDRgtKx0LDRgNCw0YLRi9C9INCx0L7Qu9GL0L8g0LrQtdC70LXQtNGWLtCW0L7Sk9Cw0YDRi9C00LAg0LDQudGC0pvQsNC90YvQvNGL0LfQtNCw0Lkg0LDQu9GM0LTQvtGB0YLQtdGA0L7QvSDQvtC7INC00LXQvdC10L3RltKjINKb0LDQvSDQutOp0LvQtdC80ZbQvSDQttOZ0L3QtSDQtNC10L3QtdC90ZbSoyDRgdKx0LnRi9Kb0YLRi9KbINCx0LDQu9Cw0L3RgdGL0L0g0YHQsNKb0YLQsNGD0LTRiyDSm9Cw0LzRgtCw0LzQsNGB0YvQtyDQtdGC0LXQtNGWINC00LXQvyDQsNC50YLQsNC80YvQtyzQvtC7INC20LDQu9C/0Ysg0L7RgNCz0LDQvdC40LfQvNC90ZbSoyDRgdCw0YMg0LHQvtC70YPRiyDSr9GI0ZbQvSDQvNCw0qPRi9C30LTRiyDQsdC+0LvRi9C/INC60LXQu9C10LTRlizRgdC+0L3Ri9C80LXQvSDSm9Cw0YLQsNGAINCQ0LvRjNC00L7RgdGC0LXRgNC+0L0g0Y3QutGB0YLRgNCw0YbQtdC70LvRjtC70LvQsNGA0LvRi9KbINGB0rHQudGL0pvRgtGL0pvRgtGL0qMg0LrTqdC70LXQvNGW0L0g0YHQsNKb0YLQsNC50LTRiy7QltCw0LvQv9GLINCw0LnRgtGB0LDSmyDQsdCw0YHRgtCw0YPRi9GIINGB0YvQvdGL0L8g0LbQsNGB0YvQvdC00LDSk9GLINCx0LDQu9Cw0LvQsNGA0LTRi9KjINOZ0YDQtdC60LXRgtGC0LXRgNGWINC606nQvyDQsdC+0LvQsNC00Ysg0Y/Sk9C90Lgg0L7Qu9Cw0YAg0YTQuNC30LjQutCw0LvQtNGLINCx0LXQu9GB0LXQvdC00ZYg0LHQvtC70YvQvyDQutC10LvQtdC00ZYu0KHQv9C+0YDRgtC/0LXQvSDQsNC50L3QsNC70YvRgdGL0L8g0L3QtdC80LXRgdC1INC+0LnRi9C9INC+0LnQvdCw0L8s0Y3QvdC10YDQs9C40Y/RgdGL0L0g0LbSsdC80YHQsNC/INOp0LfQtNC10YDRltC90LTQtdCz0ZYg0Y3Qu9C10LrRgtGA0L7Qu9C40YLRgtC10YDQtNKjINCx0ZbRgCDRiNCw0LzQsNGB0YvQvSDQttC+0pPQsNC70YLQsNC00Yss0LDQuyDQsNC70YzQtNC+0YHRgtC10YDQvtC9INC+0YHRiyDQttC10YDQtNC1INC20L7Sk9Cw0LvRgtGL0LvSk9Cw0L0g0Y3Qu9C10LrRgtGA0L7Qu9C40YLRgtC10YDQtNGW0qMg0LTQtdKj0LPQtdC50ZbQvSDRgtC10qPQtdGB0YLRltGA0YPQs9C1INC606nQvNC10LrRgtC10YHQtdC00ZYu0J7RgNCz0LDQvdC40LfQvNGW0L3QtNC1INGB0LDSm9GC0LDQu9KT0LDQvSDQvdCw0YLRgNC40Lkg0LjQvtC90LTQsNGA0Ysg0LbSr9C50LrQtSDQuNC80L/Rg9C70YzRgdGC0LDRgNGL0L3QtNCwINC80LDSo9GL0LfQtNGLINGA06nQuyDQsNGC0pvQsNGA0LDQtNGLLCDRj9KT0L3QuCDQttKv0LnQutC1INC40LzQv9GD0LvRjNGB0YLQsNGA0YvQvdGL0qMg0LHQtdGA0ZbQu9GD0ZbQvdC00LUg0LzQsNKj0YvQt9C00Ysg0YDTqdC7INCw0YLSm9Cw0YDQsNGC0YvQvSDQsdC+0LvRi9C/INC60LXQu9C10LTRli7QodC+0L3Ri9C80LXQvSDSm9Cw0YLQsNGAINGC0LDSk9GLINCw0LvRjNC00L7RgdGC0LXRgNC+0L3Sk9CwINKb0L7RgdGL0L8g0LDQudGC0LDRgtGL0L0g0LHQvtC70YHQsNKbINC+0Lsg0LzQsNCz0L3QuNC5INCw0LzQvNC40LDQutGC0LDRgNC00YvSoyDRgdKv0YLQtdCz0ZbQvdGW0qMg0YjRi9KT0LDRgNGL0LvRg9GL0L0g0LDRgNGC0YLRi9GA0LDRgtGL0L0g0LHQvtC70YvQvyDQutC10LvQtdC00ZYu0JDQu9GM0LTQvtGB0YLQtdGA0L7QvdC90YvSoyDQvtGB0Ysg0YTRg9C90LrRhtC40Y/Qu9Cw0YDRiyDQsdCw0YHRgtCw0YPRi9GIINGB0YvQvdGL0L8g0LbQsNGB0YvQvdC00LDSk9GLINCx0LDQu9Cw0LvQsNGA0LTQsCDQvtC70LDRgNC00YvSoyDRhNC40LfQuNC60LDQu9GL0psg0LbTmdC90LUg0LTQtSDQuNC90YLQtdC70LvQtdC60YLRg9Cw0LvQtNGL0psg0LTQsNC80YPRi9C90LTQsCDQttCw0L3QsNC80LAgINGC0q/RgNC00LUg06nQt9GW0L3RltKjINKv0LvQtdGB0ZbQvSDSm9C+0YHQsNGC0YvQvSDQsdC+0LvQsNC00Ysu0JDQuyDQtdCz0LXRgCDQvtGA0LPQsNC90LjQt9C80LTQtSDQsNC70YzQtNC+0YHRgtC10YDQvtC9INGC06nQvNC10L3QtNC10L8g0LrQtdGC0YHQtSDQs9C40L/QvtCw0LvRjNC00L7RgdGC0LXRgNC+0L3QuNC30Lwg0LHQsNC50pvQsNC70LDQtNGLLCDQsdKx0Lsg0LPQuNC/0L7QvdCw0YLRgNC40LXQvNC40Y/Sk9CwINC205nQvdC1INCz0LjQv9C10YDQutCw0LvQuNC10LzQuNGP0pPQsCDQsNC70YvQvyDQutC10LvQtdC00ZYu0JHSsdC7INOp0Lcg0LrQtdC30LXQs9GW0L3QtNC1INKb0LDQvdKb0LAg0LHSsdC70YjRi9Kb0LXRgtGC0LXRgNGW0L3QtSDQsdKv0LnRgNC10LrQutC1INC205nQvdC1INKb0LDQvSDRgtCw0LzRi9GAINC20q/QudC10YHRltC90LUg05nRgdC1INC10YLQtdC00ZYu0JDQuyDQsNC70YzQtNC+0YHRgtC10YDQvtC9INC606nQsdC10LnRltC/INC60LXRgtGB0LUg0Y/Sk9C90Lgg0LPQuNC/0LXRgNCw0LvRjNC00L7RgdGC0LXRgNC+0L3QuNC30LwgLCDQvtC7INC80LXRgtCw0LHQvtC70LjQutCw0LvRi9KbINCw0LvQutCw0LvQvtC30pPQsCAs0LDRgNGC0LXRgNC40LDQu9GM0L3QsNGPINCz0LjQv9C10YDRgtC10L3Qt9C40Y/Sk9CwINCw0LvRi9C/INC60LXQu9GD0ZYg0LzSr9C80LrRltC9LiAgPGJyIC8+DQoyLiDQltCw0LvQv9GLINC20q/RgNC10Log0pvSsdGA0YHQsNKbINGW0YjRltC70ZbQuiDQtNCw0LzRg9C00YvSoyDSr9GI0ZbQvdGI0ZYg0LDQv9GC0LDRgdGL0L3QsNC9INCx0LDRgdGC0LDRgyDQsNC70LDQtNGLINC00LAg0L7QuyAyMiDRiNGWINC60q/QvdC90LXQvSDQsdCw0YHRgtCw0L8g0LbQuNGL0YDRi9C70LDRgtGL0L0g0LHQvtC70YvQvyDQutC10LvQtdC00ZYuINCQ0Lsg0L7QvSDQsdGW0YDRltC90YjRliDQttOZ0L3QtSDQvtC9INC10LrRltC90YjRliDQsNC/0YLQsNC70LDRgNC00LAg0pvQsNC9INCw0LnQvdCw0LvRi9C80Ysg0LbQsNC30YvQu9C80LDSk9Cw0L0g06nQutC/0LXQtNC1ICzQutC10YPQtNC1INKb0YPRi9GB0YvQvdC00LAg0YLQtdGA0ZbRgSDSm9GL0YHRi9C8INGC0YPRg9GL0L3QsNC9INKb0LDQvdC90YvSoyDQv9C70LDRhtC10L3RgtCw0LTQsNC9INC20q/RgNC10LrRgtGW0qMg0L7SoyDQttCw0pPRi9C90LAg0YLSr9GB0YPRliDQttKv0YDQtdC00ZYuINCQ0Lsg0rHRgNGL0pvRgtGL0psg0pvQsNC9INCw0LnQvdCw0LvRi9C8INC00LXQs9C10L3RltC80ZbQtyAtINC+0Lsg0LDQvdCwINC80LXQvSDSsdGA0YvSmyDQsNGA0LDRgdGL0L3QtNCw0pPRiyDSm9C+0YDQtdC60YLRltC6INC30LDRgtGC0LDRgNC00YvSoyDQttGW0L3QtSDQvtGC0YLQtdCz0ZbQvdGW0qMg0LDQu9C80LDRgdGD0YvQvSDSm9Cw0LzRgtCw0LzQsNGB0YvQtyDQtdGC0LXRgtGW0L0g0LbSr9C50LUg0LHQvtC70YvQvyDRgdCw0L3QsNC70LDQtNGLLiDSsNGA0YvSm9GC0YvSoyDSm9Cw0L0g0LDQudC90LDQu9Cw0YHRi9C90YvSoyDQttCw0LvQv9GLICDQtNCw0LzRgyDQutC10LfQtdKj0LTQtdGA0ZbQvSDSr9GIINGB0LDRgtGL0pPQsCDQsdOp0LvRltC/INKb0LDRgNCw0YHRgtGL0YDQsNC80YvQty7Qr9KT0L3QuCDQvtC70LDRgCDRgdCw0YDRg9GL0LfQtNGL0psgLNCw0LvQu9Cw0L3RgtC+0LjRgdGC0YvSmywg0L/Qu9Cw0L3RhtC10L3RgtCw0YDQu9GL0psuINCR0ZbRgNGW0L3RiNGWINGB0LDRgtGL0YHRi9C90LTQsCDRj9KT0L3QuCDRgdCw0YDRg9GL0LfQtNGL0psg0YHQsNGC0YsgINOp0YLQtSDSm9GL0YHSm9CwINCx0L7Qu9GL0L8g0LrQtdC70LXQtNGWINC205nQvdC1INC+0Lsg0LjQvNC/0LvQsNC90YLQsNGG0LjRj9C00LDQvSDQsdCw0YHRgtCw0YMg0LDQu9GL0L8g0Y3QvNCx0YDQuCDQvtC9INOp0LzRltGA0ZbQvdGW0qMg0LXQutGW0L3RiNGWINCw0L/RgtCw0YHRi9C9INC00LXQudGW0L0g0LbQsNC70pPQsNGB0LDRgtGL0L0g0LHQvtC70LDQtNGLLiDQkdKx0Lsg0YHQsNGC0YvRgdGL0L3QtNCwINKb0L7RgNC10LrRgtGW0Log0LfQsNGC0YLQsNGAINC80LXQvSDQvtGC0YLQtdCz0ZYg0Y3QvNCx0YDQuNC+0L3Sk9CwINKb0LDQvSDRgtCw0LzRi9GA0LvQsNGA0YQg0LbQvtKbINGC0YDQvtGE0L7QsdC70LDRgdGCINC20LDRgdGD0YjQsNC70LDRgNGLINCw0YDSm9GL0LvRiyDQttC10YLQutGW0LfRltC70LXRgtGW0L0g0LHQvtC70YvQvyDQutC10LvQtdC00ZYuINCv0pPQvdC4INGB0LDRgNGD0YvQtyDSm9Cw0L/RiNGL0pPRi9C90LTQsNKT0Ysg0LHQsNGB0YLQsNC/0pvRiyDSm9Cw0L0g0YLQsNC80YvRgNC70LDRgNGLINCw0YDSm9GL0LvRiyDRjdC80LHRgNC+0L3Sk9CwINC+0YLRgtC10LPRliDQvNC10L0g0pvQsNC20LXRgtGC0ZYg0LHQvtC70pPQsNC9INKb0L7RgNC10LrRgtGW0Log0LfQsNGC0YLQsNGAINGC0q/RgdGW0L8g0L7RgtGL0YDQsNC00Ysu0JDQuyDQtdC60ZbQvdGI0ZYg0Y/Sk9C90Lgg0LDQu9C70LDQvdGC0L7QuNC00YLRi9KbINKb0LDQvSDQsNC50L3QsNC70YvQvCDRgdCw0YLRi9GB0Ysg0LbSr9C60YLRltC70ZbQutGC0ZbSoyDRgdC10LPRltC30ZbQvdGI0ZYg0LDQv9GC0LDRgdGL0L3Ri9KjINCw0Y/Sk9GL0L3QsNC9INCx0LDRgdGC0LDQvyDQttKx0LzRi9GB0YvQvSDQsdCw0YHRgtCw0LnQtNGLINC00LAg0L7QuyDQttKv0LrRgtGW0LvRltC60YLRltKjIDE1LTE2INCw0L/RgtCw0LvQsNGA0YvQvdCwINC00LXQudGW0L0g0LbQsNC70pPQsNGB0LDQtNGLLtCQ0LvQu9Cw0L3RgtC+0LjRgSDQvtC7INCx0LDRgdGC0LDQv9Kb0Ysg0ZbRiNC10LrRgtGW0qMg0YjRi9KT0YvSo9Kb0YvRgdGLINCx0L7Qu9GL0L8g0YLQsNCx0YvQu9Cw0LTRiyDQttOZ0L3QtSDQvtC7INGC0LDQvNGL0YDRgdGL0Lcg0YLRgNC+0YTQvtCx0LvQsNGB0YLSm9CwINC20LDSm9GL0L3QtNCw0L8g0LbTmdC90LUg0L7QvdGL0qMg0LHQtdGB0YHQvtGB0YPQtNC90YvQuSDRgtGA0L7RhNC+0LHQu9Cw0YHRgtGC0LDRgNGL0L3QsCDSm9C+0YHRi9C70YvQvyDTqdGB0LXQtNGW0LTQtSDRgdC+0LvQsNC50YjQsCDRhdC+0YDQuNC+0L0g0YLQsNC80YvRgNC70Ysg0LHQvtC70LDQtNGLLiDQkNC70LvQsNC90YLQvtC40LTRgtGLINKb0LDQvSDQsNC50L3QsNC70YvQvNGL0L3Ri9KjINC/0LDQudC00LAg0LHQvtC70YPRiyDQsNC90LDQtNCw0L0g0rHRgNGL0pvSm9CwINKb0L7RgNC10LrRgtGW0Log0LfQsNGC0YLQsNGA0LTRiyDSm9Cw0YDSm9GL0L3QtNGLINGC0LDRgdGL0LzQsNC70LTQsNGD0LTRiyDQttCw0pvRgdGL0YDQsNKbINKb0LDQvNGC0LDQvNCw0YHRi9C3INC10YLQtdC00ZYu0JDQuyDQutC10LvQtdGB0ZYg0L/Qu9Cw0L3RhtC10L3RgtCw0YDQu9GL0psg0YHQsNGC0YvRgdGLINC+0Lsg0LbSr9C60YLRltC70ZbQutGC0ZbSoyAy0YjRliDRgtGA0LjQvNC10YHRgtGA0LjQvdC00LUg0LHQvtC70LDQtNGLINGP0pPQvdC4IDMtNCDQsNC50LvQsNGA0YvQvdC00LAg0LHQsNGB0YzRgtCw0LvQsNC00Ysu0J7RgdGLINC/0LvQsNGG0LXQvdGC0LDRgNC70YvSmyDSm9Cw0L0g0LDQudC90LDQu9GL0LzQvdGL0qMg0pvQsNC70YvQv9GC0LDRgdGD0Ysg0L/Qu9Cw0L3RhtC10L3RgtCw0L3Ri9KjINCx0LDRgNC70YvSmyDRhNGD0L3QutGG0LjRj9C70LDRgNGL0L3Ri9KjINKb0LDQu9GL0L/RgtCw0YHRg9GL0LzQtdC9INC20ZbQvdC1INKx0YDRi9Kb0YLRi9KjINC00LDQvNGD0YvQvNC10L0g0LHRltGA0LPQtSDQttKv0YDQtdGC0ZbQvSDQsdC+0LvQsNC00YsuINCQ0Lsg0LbSr9C60YLRltC70ZbQutGC0ZbSoyAyMiDQsNC/0YLQsNGB0YvQvdCw0L0g0LrQtdC50ZbQvSDQsdC+0LvRgdCwINC/0LvQsNGG0LXQvdGC0L3Ri9KjINOp0YHRg9GWINC60q/RiNC60LXQvdC1INCx0LDRj9GD0LvQsNC50LTRiyDQtNCwICwzNiDQsNC/0YLQsNGB0YvQvdCwINC60LXQu9GW0L8g0YTRg9C90LrRhtC40L7QvdCw0LvQtNGLINGC0L7Qu9GL0pvRgtCw0Lkg0LbQtdGC0ZbQu9C10LTRli4g0JDQvdCwINC80LXQvSDSsdGA0YvSmyDQsNGA0LDRgdGL0L3QtNCw0pPRiyDQs9Cw0Lcg0LDQu9C80LDRgdGDINC/0YDQvtGG0LXRgdGWINC/0LvQsNGG0LXQvdGC0LDQvdGL0qMg0YLQtdGA0LzQuNC90LDQu9C00Ysg0LLQvtGA0YHQuNC90LrQsNC70LDRgNGL0L3QtNCw0pPRiyDQvNC10LbQstC+0YDRgdC40L3Rh9Cw0YLRi9C5INC60LXSo9GW0YHRgtGW0LrRgtC1INC20q/RgNC10YLRltC9INCx0L7Qu9GL0L8g0LrQtdC70LXQtNGWLtCQ0Lsg0LDRgNGC0LXRgNC40Y/Qu9GL0psg0pvQsNC9INCx0L7Qu9GB0LAg0LDQvdCw0L3Ri9KjINGB0L/QuNGA0LDQu9GM0LTRiyDQsNGA0YLQtdGA0LjRj9C70LDRgNGLINCw0YDSm9GL0LvRiyDQstC40LvQu9Cw0YDQsNGA0LvRi9KbINC60LXSo9GW0YHRgtGW0LrQutC1INC20LXRgtC60ZbQt9GW0LvQtdGC0ZbQvSDQsdC+0LvRi9C/INC60LXQu9C10LTRli4g0KHQvtC90YvQvNC10L0g0pvQsNGC0LDRgCDSsdGA0YvSm9GC0YvSoyDSm9Cw0L0g0LDQudC90LDQu9GL0YHRi9C9INCw0L/RgtCw0LvQsNGA0YvQvdCwINCx0LDQudC70LDQvdGL0YHRgtGLIDUg0LrQtdC30LXSo9Cz0LUg0LHTqdC70LUg0LDQu9Cw0LzRi9C3LtCR0ZbRgNGW0L3RiNGWINC60LXQt9C10qMgMC00INCw0L/RgtCwLCDQtdC60ZbQvdGI0ZYg0LrQtdC30LXSoyA0LTgg0LDQv9GC0LAsINKu0YjRltC90YjRliDQutC10LfQtdKjIDgtMTIg0LDQv9GC0LAsINCi06nRgNGC0ZbQvdGI0ZYg0LrQtdC30LXSoyAxMi0xNiDQsNC/0YLQsCAs0LbTmdC90LUg0YHQvtKj0pPRiyDQsdC10YHRltC90YjRliDQutC10LfQtdKjIDE2LTQwINCw0L/RgtCw0LvQsNGALtCW0q/QutGC0ZbQu9GW0LrRgtGW0qMg0pvQsNC70pPQsNC9INC60LXQt9C10qPRltC90LTQtSDSsdGA0YvSm9GC0YvSoyDSm9Cw0L0g0LDQudC90LDQu9GL0LzRiyDQtNCw0LzRi9C/LiDTqdC30LPQtdGA0LXRgtGW0L0g0LbQsNKT0LTQsNC50LvQsNGA0pPQsCDQsdC10LnRltC80LTQtdC70YPRltC9INC20LDQu9KT0LDRgdGC0YvRgNCw0LTRiy4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70" table:style-name="ce1">
            <text:p>915270</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MS4g0JDQu9GM0LTQvtGB0YLQtdGA0L7QvSDQs9C+0YDQvNC+0L3RiyDQsdKv0LnRgNC10LrSr9GB0YLRliDQsdC10LfRltC90ZbSoyDSm9GL0YDRgtGL0YHRgtGLINKb0LDQsdCw0YLRi9C90LDQvSDQsdOp0LvRltC90LXRgtGW0L0g0LPQvtGA0LzQvtC9LtCR0rHQuyDQs9C+0YDQvNC+0L0g0LHQsNGA0LvRi9KbINCw0LTQsNC8INKv0YjRltC9INC80LDSo9GL0LfQtNGLLCDTmdGB0ZbRgNC10YHQtSDTqdGB0ZbQvyDQutC10LvQtSDQttCw0YLSm9Cw0L0g0LHQsNGB0YLQsNGD0YvRiCDQttCw0YHRi9C90LTQsNKT0Ysg0LHQsNC70LDQu9Cw0YAg0q/RiNGW0L0uINCQ0LvRjNC00L7RgdGC0LXRgNC+0L3QvdGL0qMg0LHQsNGB0YLQsNGD0YvRiCDQsdCw0LvQsNC70LDRgNGLINKv0YjRltC9INKb0YvQt9C80LXRgtGWINC80L7Quy4g0J7Qu9Cw0YAg0Y3Qu9C10LrRgtGA0L7Qu9C40YLRgtC10YDQtNGWINGC0LXSo9Cz0LXRgNGW0LzQtNGWINKx0YHRgtCw0L8g0YLSsdGA0YPSk9CwINC606nQvNC10LrRgtC10YHQtdGC0ZbQvSDQs9C+0YDQvNC+0L0uINCV0qMg0LDQu9KT0LDRiNKb0Ysg0pvRi9C30LzQtdGC0YLQtdGA0ZbQvdGW0qMg0LHRltGA0ZbQvdC1INC90LDRgtGA0LjQudC00ZYg0rHRgdGC0LDQvyDSm9Cw0LvRi9C/LCDQvtC90LTQsNKT0Ysg0L3QsNGC0YDQuNC5INC205nQvdC1INGB0YMg0YDQtdCw0LHRgdC+0YDQsdGG0LjRj9GB0YvQvdCwINKb0LDRgtGL0YHRgy4g0J7QuyDQvdCw0YLRgNC40LnQtNGWINKx0YHRgtCw0L8g0pvQsNC70YPQtNGL0qMg0L3TmdGC0LjQttC10YHRltC90LTQtSwg0YHRg9C00Ysg0YHQsNKb0YLQsNC/LCDQsNC50L3QsNC70YvQvNC00LDSk9GLINKb0LDQvSDQutOp0LvQtdC80ZbQvSDQsNGA0YLRgtGL0YDRi9C/LCDSm9Cw0L0g0pvRi9GB0YvQvNGL0L0g0YDQtdGC0YLQtdGD0LPQtSDSm9Cw0YLRi9GB0LDQtNGLLiDQodGD0LTRiyDRgdCw0pvRgtCw0YMg0LHQsNGB0YLQsNGD0YvRiCDQsdCw0LvQsNC70LDRgNGLINKv0YjRltC9INC80LDSo9GL0LfQtNGLLiDQr9KT0L3QuCDTqdGB0ZbQvyDQutC10LvQtSDQttCw0YLSm9Cw0L0g0LDSk9C30LDQtNCwINGB0YPRgdGL0LfQtNCw0L3Rg9C00YvSoyDQsdC+0LvQvNCw0LksINGC0LXSo9Cz0LXRgNGW0LzQtNC1INCx0L7Qu9GD0Ysg0LHQsNGA0LvRi9KbINC20q/QudC10LPQtSDTmdGB0LXRgCDQtdGC0LXRgtGW0L0g0LHTmdGA0ZbQvNGW0LfQs9C1INCw0LnSm9GL0L0uICAgINCh0L7QvdGL0LzQtdC9INKb0LDRgtCw0YAg0LrQsNC70LjQudC00ZYg0YjRi9KT0LDRgNGDINKb0YvQt9C80LXRgtGW0L0g0LTQtSDQsNGC0pvQsNGA0LDQtNGLLiDQkNC70YzQtNC+0YHRgtC10YDQvtC9INC60LDQu9C40LnQtNGW0qMg0LzTqdC70YjQtdGA0ZbQvdGW0qMg0YjQsNC80LDRgdGL0L3QsNC9INCw0YHRi9C/INC60LXRgtC/0LXRg9GW0L3QtSDRgdC10L/RgtC10YHQtdC00ZYsINGP0pPQvdC4INC+0L3RiyDRiNGL0pPQsNGA0YvQvyDQttGW0LHQtdGA0ZbQvyDQtNC10qPQs9C10LnRltC9INKb0LDQu9GL0L/RgtCwINKx0YHRgtCw0YPSk9CwINKb0YvQt9C80LXRgiDQtdGC0LXQtNGWLiDQodC10LHQtdCx0ZYg0LrQsNC70LjQuSDRiNGL0pPQsNGA0YvQu9GD0Ysg0YDQtdGC0YLQtdC70ZbQvyDRgtKx0YDQvNCw0YHQsCDQvtC7INCw0pPQt9Cw0LTQsCDQutOp0LHQtdC50ZbQvywg0LbSr9GA0LXQuiDRgtCw0LzRi9GAINC20q/QudC10LvQtdGA0ZbQvdC1INC60LXRgNGWINOZ0YHQtdGA0LvQtdGA0ZbQvSDQsdC10YDQtdC00ZYuINCe0L3Ri9C80LXQvSDSm9C+0YHQsCDQsNC50YLSm9Cw0L3QtNCwINC60LDQu9C40LjQudC00ZbSoyDRiNGL0pPQsNGA0YvQu9GD0Ysg0LrQsNC70YzRhtC40LnQtNGW0qMg0YHRltKj0ZbRgNGW0LvRg9GW0L3QtSDTmdGB0LXRgNC70LXRgdC10LTRli4g0JDQuyDQutCw0LvRjNGG0LjQudC00ZbSoyDQttC10YLQutGW0LvRltC60YLRliDQvNOp0LvRiNC10YDQtNC1INGB0ZbSo9GW0YDRltC70YPRliDQsdCw0YHRgtCw0YPRi9GIINGB0YvQvdGL0L8g0LbQsNGB0YvQvdC00LDSk9GLINCx0LDQu9Cw0LvQsNGAINKv0YjRltC9INC80LDSo9GL0LfQtNGLLiDQntC90YvSoyDRgdC10LHQtdCx0ZbQvdC1INCx0ZbQtyDQsdKx0Lsg0LbQsNGB0YLQsNKT0Ysg0LHQsNC70LDQu9Cw0YDQtNGL0qMg0LHQtdC70YHQtdC90LTRliDSm9C40LzRi9C70LTQsNGD0YvQvSwg0LbRi9C70LTQsNC8INOZ0YDRliDSm9Cw0LvRgiDSm9C40LzRi9C70LTQsNGA0pPQsCDQsdC10LnRltC8INCx0L7Qu9GD0YvQvdCw0L0g0LTQtdC/INC10YHQtdC/0YLQtdC50LzRltC3LiDQotCw0pPRiyDQsdGW0YAg0q/Qu9C60LXQvSDRhNGD0L3QutGG0LjRjyDRgdGDINC80LXQvSDQvNC40L3QtdGA0LDQuyDQsNGA0LDRgdGL0L3QtNCw0pPRiyDQsdCw0LvQsNC90YHRgtGLINGB0LDSm9GC0LDRgy4g0JzSsdC90LTQsNKT0Ysg0YLQtdC/0LUg0YLQtdKj0LTRltC60YLRliDRgNC10YLRgtC10Lkg0L7RgtGL0YDRi9C/LCDQsNKT0LfQsNC00LDSk9GLINGC0rHRgNCw0pvRgtGL0LvRi9Kb0YLRiyDSm9Cw0LzRgtCw0LzQsNGB0YvQtyDQtdGC0LXQtNGWLiDQkNC7INC80LjQvdC10YDQsNC70LTQsNGAINC80LXQvSDRgdGDINCx0LDQu9Cw0L3Ri9KjINGE0LjQt9C40L7Qu9C+0LPQuNGP0LvRi9KbINOp0YHRg9GWINKv0YjRltC9INCx0ZbRgNC00LXQvSDQsdGW0YAg0pvQsNC20LXRgiDQttKv0LnQtSDQsdC+0LvRi9C/INGC0LDQsdGL0LvQsNC00YsuIDIuINKw0YDRi9Kb0YLRi9KjINKb0LDQvSDQsNC50L3QsNC70YvQvNGLINC00LXQs9C10L3RltC80ZbQtyDQvdC10LPRltC30ZbQvdC10L0g0LDQvdCwINC80LXQvSDSsdGA0YvSmyDQsNGA0LDRgdGL0L3QtNCwINCx0LDQudC70LDQvdGL0YHRgtGLINC20q/Qt9C10LPQtSDQsNGB0YvRgNCw0YLRi9C9LCDQvtC90YvSoyDSm9C+0YDQtdC60L/QtdC9INC205nQvdC1INC+0YLRgtC10LPRltC80LXQvSDSm9Cw0LzRgtCw0LzQsNGB0YvQtyDQtdGC0ZbQu9GD0ZbQvSDSm9Cw0LzRgtCw0LzRgdGL0Lcg0LXRgtC10YLRltC9INC60ZbRiNGW0LPRltGA0ZbQvCDQsdC+0LvRgdCwINC00LAg0q/Qu9C60LXQvSDQvNOZ0L3Qs9C1INC40LUg0LDQudC90LDQu9GL0Lwg0LHQvtC70YvQvyDRgtCw0LHRi9C70LDQtNGLLiDSsNGA0YvSm9GC0YvSoyDSm9Cw0L0g0LDQudC90LDQu9GL0LzRi9C90YvSoyDQtNCw0LzRg9GLINCx0ZbRgNC90LXRiNC1INC60LXQt9C10qPQtNC10YDQtNC10L0g0YLSsdGA0LDQtNGLLiDQkdGW0YDRltC90YjRliDQutC10LfQtdKj0LPQtSDQsNC70pPQsNGI0pvRiyDQtNCw0LzRg9C00YvSoyDQsdGW0YDQvdC10YjQtSDQsNC/0YLQsNGB0YvQvdC00LAsINOZ0LTQtdGC0YLQtSDQsdGW0YDRltC90YjRliDQttOZ0L3QtSDRgtOp0YDRgtGW0L3RiNGWINCw0L/RgtCw0LvQsNGAINCw0YDQsNGB0YvQvdC00LAg0LTQtdC/INCw0LnRgtGD0pPQsCDQsdC+0LvQsNC00YsuINCR0rHQuyDQutC10LfQtNC1INCw0L3QsNC00LDQvSDRgdCw0YDRi9GD0YvQtyDSm9Cw0L/RiNGL0pPRiyDQsNGA0pvRi9C70Ysg0YLRltC60LXQu9C10Lkg0L7RgtGC0LXQs9GWINC80LXQvSDSm9C+0YDQtdC60YLRltC6INC30LDRgtGC0LDRgNC00Ysg0LDQu9Cw0LTRiy4g0JXQutGW0L3RiNGWINC60LXQt9C10qMg0LTQsNC80YPQtNGL0qMg0LHRltGA0ZbQvdGI0ZYg0LDQudGL0L3Ri9KjINGB0L7So9GL0L3QtNCwINC/0LvQsNGG0LXQvdGC0LAg0pvQsNC70YvQv9GC0LDRgdGL0L8g0LHQsNGB0YLQsNC50LTRiy4g0K/Sk9C90Lgg0L/Qu9Cw0YbQtdC90YLQsCDSsdGA0YvSm9GC0YvSoyDQvtGC0YLQtdCz0ZbQvNC10L0g0LbTmdC90LUg0pvQvtGA0LXQutC/0LXQvSDSm9Cw0LzRgtCw0LzQsNGB0YvQtyDQtdGC0ZbQu9GD0ZbQvSDQttKv0LfQtdCz0LUg0LDRgdGL0YDRi9C/INCx0LDRgdGC0LDQudC00YsuINCe0YHRi9C90LTQsNC5INC80LDSo9GL0LfQtNGLINC60LXQt9C10qPQtNC1INCx0ZbQtyDSsdGA0YvSm9GC0YvSoyDQsNC70pPQsNGI0pvRiyDSm9Cw0L0g0LDQudC90LDQu9GL0LzRiyDQsdC10LvQs9GW0LvQtdGA0ZbQvSDQsdCw0LnSm9Cw0LnRgtGL0L0g0LHQvtC70LDQvNGL0LcuINCQ0LvQsNC50LTQsCDQsdKx0Lsg0LDQvdGL0pvRgtCw0LzQsCDTmdC70ZYg0YLQvtC70YvSmyDQvdOZ0YLQuNC20LXQs9C1INC40LUg0LHQvtC70YvQvyDRgtCw0LHRi9C70LzQsNC50LTRiy4g0KHQtdCx0LXQsdGWINC/0LvQsNGG0LXQvdGC0LAg05nQu9GWINC00LUg0LTQsNC80YMg0L/RgNC+0YbQtdGB0YHRltC9INGW0YHQutC1INCw0YHRi9GA0YPQtNCwLiDSrtGI0ZbQvdGI0ZYg0LrQtdC30LXSo9C00LUg0L/Qu9Cw0YbQtdC90YLQsNC90YvSoyDQtNCw0LzRg9GLINCw0Y/Sm9GC0LDQu9GL0L8sINKx0YDRi9KbINGC0L7Qu9GL0pPRi9C80LXQvSDQv9C70LDRhtC10L3RgtCwINCw0YDSm9GL0LvRiyDQvtGC0YLQtdCz0ZYg0LzQtdC9INKb0L7RgNC10LrRgtGW0Log0LfQsNGC0YLQsNGA0LTRiyDQsNC70LDRgtGL0L0g0LHQvtC70LDQtNGLLiDQkdKx0Lsg0LrQtdC30LXSo9C00LUg0LTQsNC80YPQtNGL0qMg0LXQutGW0L3RiNGWINCw0LnRi9C90LTQsCDQttKv0YDQtdC60YLRltKjINGB0L7Sk9GD0Ysg0LHQsNGB0YLQsNGDINCw0LvRi9C/LCDQvtC90YvSoyDSm9Cw0L0g0LDQudC90LDQu9GL0LzRiyDQutKv0YDQtNC10LvQtdC90ZbQvyDQsdCw0YHRgtCw0LnRgtGL0L3Ri9C9INC606nRgNC10LzRltC3LiDQkNC90LAg0LzQtdC9INKx0YDRi9KbINCw0YDQsNGB0YvQvdC00LAg0LrRltC90LTRltC6INGC0LDQvNGL0YDQu9Cw0YDRiywg0Y/Sk9C90Lgg0LDRgNGC0LXRgNC40L7Qu9Cw0LvQsNGAINC80LXQvSDQstC10L3QsNC70LDRgCDQsNGA0pvRi9C70Ysg0L7RgtGC0LXQs9GWINC80LXQvSDSm9C+0YDQtdC60YLRltC6INC30LDRgtGC0LDRgCDTqdGC0ZbQvyDSsdGA0YvSm9GC0YvSoyDTmdGA0ZYg0pvQsNGA0LDQudKT0Ysg0LTQsNC80YPRi9C9INKb0LDQvNGC0LDQvNCw0YHRi9C3INC10YLQtdGC0ZbQvSDQsdC+0LvQsNC00YsuINCR0rHQuyDRgtKx0YHRgtCwINKx0YDRi9Kb0YLRi9KjINOp0LfRltC90LTRltC6INKb0LDQvSDQsNC50L3QsNC70YvQvNGLINCx0LDRgdGC0LDQvNCw0YHRi9C9INC20LDRgdCw0LnQtNGLINC00LXRgdC10Log0LHQvtC70LDQtNGLLiDQotOp0YDRgtGW0L3RiNGWINC60LXQt9C10qPQtNC1INC20LDQu9C/0Ysg0rHRgNGL0psg0pvQsNC9INCw0LnQvdCw0LvRi9C80Ysg0LbQsNKb0YHRiyDQttC10YLRltC70LPQtdC9INCx0L7Qu9GL0L8g0YHQsNC90LDQu9Cw0LTRiy4g0rDRgNGL0psg06nQt9GW0L3RltKjINKb0LDQvSDSm9GL0YHRi9C80Ysg0LzQtdC9INKb0LDQvSDQsNC50L3QsNC70YvQvNGL0L0g0YHQsNKb0YLQsNC5INCw0LvQsNGC0YvQvdC00LDQuSDQtNOZ0YDQtdC20LXQs9C1INC20LXRgtC10LTRli4g0JHSsdC7INKb0LDQvSDQttKv0LnQtdGB0ZbQvdGW0qMg0LbQsNKb0YHRiyDSm9Cw0LvRi9C/0YLQsNGB0pvQsNC90YvQvdGL0qMg0LHQtdC70LPRltGB0ZYg0LTQtdGD0LPQtSDQsdC+0LvQsNC00YsuINKw0YDRi9Kb0YLRi9KjINKb0LDQvSDQsNC50L3QsNC70LDRgdGL0L3Ri9KjINKb0LDQvdC00LDQuSDQvNCw0qPRi9C30LTRiyDQv9GA0L7RhtC10YHRgdGC0LXRgCDQtdC60LXQvdGW0L0g0L7RgdGLINC00LDQvNGDINC60LXQt9C10qPQtNC10YDRltC90LXQvSDQsNKbINC606nRgNC1INCw0LvQsNC80YvQty4g0JDQuyDQvtC90YvSoyDQsNGA0Ysg0pvQsNGA0LDQudKT0Ysg0LbSr9C30LXQs9C1INCw0YHRg9GLINC10qMg0LzQsNKj0YvQt9C00Ysg0LLQtdC90L7Qt9C00Ysg0YLSr9GC0ZbQuiwg0YHQvtC/0LDSm9GI0LAg0YLQtdGB0ZbQuiwg0LDQvtGA0YLQsNC70YzQtNGLINGC0q/RgtGW0Log0LDRgNKb0YvQu9GLINGW0YHQutC1INCw0YHQsNC00YsuINKw0YDRi9Kb0YLQsCDRgdC+0L/QsNKb0YjQsCDRgtC10YHRltC6INC+0qMg0LbTmdC90LUg0YHQvtC7INC20LDSmyDQttKv0YDQtdC60YjQtSDQsNGA0LDRgdGL0L3QtNCwINCx0L7Qu9Cw0LTRiy4g0J7SoyDQttCw0psg0LbSr9GA0LXQutGI0LXQtNC10L0g0YHQvtC7INC20LDSm9Kb0LAsINC+0LTQsNC9INC60LXQudGW0L0g0YHQvtC7INC20LDSmyDSm9Cw0YDRi9C90YjQsNKT0LAsINC+0LTQsNC9INC60LXQudGW0L0g0pvQsNC9INC606nRgtC10YDRltC70LXRgtGW0L0g0pvQvtC70pvQsNKT0LAg0LHQsNGA0LDQtNGLLiDSmtC+0LvSm9Cw0LTQsCDQvtGC0YLQtdCz0ZbQvNC10L0g0pvQsNC90YvSk9GL0L8sINC20q/RgNC10Log0L/QtdC9INC80Lgg0YHQtdC60ZbQu9C00ZYg0LzQsNKj0YvQt9C00Ysg0L7RgNCz0LDQvdC00LDRgNKT0LAg0LHQsNGA0LDQtNGLLtCR0rHQuyDSsdGA0YvSm9GC0YvSoyDQvtGC0YLQtdCz0ZbQvNC10L0g0YHRi9GA0YLSm9GLINC+0YDRgtCw0pPQsCDSm9Cw0YDQsNKT0LDQvdC00LAg0LDQtyDRgtKx0YLRi9C90YPRi9C90LAg0LHQsNC50LvQsNC90YvRgdGC0Ysg0L7QvdGLINC20LXSo9GW0LvQtNC10YLRgyDSr9GI0ZbQvSDQsdC+0LvQsNC00YsuINCR0ZbRgCDQttCw0pPRi9C90LDQvSDTqdC60L/QtSDTmdC70ZYg0YLQvtC70YvSmyDQttKx0LzRi9GBINCw0YLSm9Cw0YDQvNCw0YPRi9C90YvSoyDQtdGB0LXQsdGW0L3QtdC9LiAg0JDQuyDQstC10L3QvtC30LTRiyDRgtKv0YLRltC6INC00LXQvyDQsNGC0LDQu9Cw0YLRi9C9INGI0YPQvdGCINCw0YDSm9GL0LvRiyDQsdGW0YAg0LHTqdC70ZbQs9GW0L3RltKjINCx0LDRg9GL0YDSk9CwINC60LXRgtGD0ZYg0LbSr9C30LXQs9C1INCw0YHQsNC00YsuINCR0rHQuyDSsdGA0YvSmyDSr9GI0ZbQvSDTqdGC0LUg0LzQsNKj0YvQt9C00YsuINCW0LDQu9C/0Ysg0LHSsdC7INKx0YDRi9Kb0YLQsNKT0Ysg0pvQsNC9INCw0LnQvdCw0LvRi9C8INC905nRgNC10YHRgtC1INC00q/QvdC40LXQs9C1INC60LXQu9Cz0LXQvdC90LXQvSDQutC10LnRltC9INC00LUg0LDRgNGLINKb0LDRgNCw0Lkg0LTQsNC80YPRiyDQutKv0YLRltC/INGC0rHRgNCw0LTRiy4=</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2-ші сұраққа жауап толық емес- Ұрықтың даму кезеңдерін үш сатыға, яғни олар саруыздық ,аллантоистық, планцентарлық ата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915313" table:style-name="ce1">
            <text:p>915313</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0JzQtdC60YLQtdC/INC20LDRgdGL0L3QtNCw0pPRiyDQsdCw0LvQsNC70LDRgNC00LAg0LDQu9GM0LTQvtGB0YLQtdGA0L7QvSDRhNGD0L3QutGG0LjRj9GB0Ysg0LbQsNC70L/Ri9C70LDQvNCwINOp0YLQtSDQvNCw0qPRi9C30LTRiyDSm9GL0LfQvNC10YIg0LDRgtCw0pvQsNGA0LDQtNGLLtCe0Lsg0LHRltC30LTQtSDQsdKv0LnRgNC10Log0q/RgdGC0ZYg0LHQtdC30ZbQvdGW0qMg0LHTqdC70ZbQvNGW0L3QtdC9INCx06nQu9GW0L3QtdGC0ZbQvSDQs9Cw0YDQvNC+0L0g0LHQvtC70YvQvyDQsNGC0YvQu9Cw0LTRiy4g0JDQuyDQtdCz0LXRgCDQvtC90YvSoyDSm9GL0LfQvNC10YLRltC90LUg0YLQvtKb0YLQsNC70LDRgtGL0L0g0LHQvtC70YHQsNC8INC+0Lsg0LHRltC30LTQtSDRgdGDINC80LXQvSDRgtKx0Lcg0LDQu9C80LDRgdGD0YvQvdCwICwg0Y/Sk9C9INC90LDRgtGA0LjQuSDQvNC10L0g0YHRg9C00YvSoyDQsdKv0LnRgNC10Log06nQt9C60YjQtdC70LXRgNGW0L3QtNC10LPRliDQutC10YDRliDRgdGW0qPRltGA0ZbQu9GD0ZbQvdC1INGB0LXQv9GC0LXRgdC10YLRltC9INCx0L7Qu9GL0L8g0LrQtdC70LXQtNGWLiAg0JDQuyDRgdGDINC80LXQvSDRgtKx0Lcg0LDQu9C80LDRgdGDINC80LDSo9GL0LfQtNGLICDQsNKT0LfQsNC00LDSk9GLINC/0YDQvtGG0LXRgdGBINGB0LXQsdC10LHRliDQsNKT0LfQsNC00LDSk9GLINGN0LvQutGC0YDQvtC70LjRgtGC0YLRltC6INCx0LDQudC70LDQvdGL0YHRgtGL0qMg0YLQtdKj0LPQtdGA0ZbQvNC00ZbQu9GW0LPRliAsINGC0LXQv9C1INGC0LXSo9C00ZbQutGC0LUg0LHQvtC70YPRiyDQsdGW0LfQtNC1ICDQvtGB0Ysg0LfTmdGAINGI0YvSk9Cw0YDRgyDQttKv0LnQtdC70LXRgNGW0L3RltKjICDSm9GL0LfQvNC10YLRltC90LUg0LHQsNC50LvQsNC90YvRgdGC0Ysg0LHQvtC70YvQvyDQutC10LvQtdC00ZYuINCW0LDRgtGL0YAg0LTQsNC80YMg0LDSk9C30LDRgdGLINCx0L7Qu9KT0LDQvdC00YvSm9GC0LDQvSDQsdGW0LfQtNC1INGB0YMg0LzQsNKj0YvQt9C00Ysg0YDQtdGB0YPRgNGBINCx0L7Qu9GL0L8g0LrQtdC70LXQtNGWLiDQltCw0LvQv9GLINCw0LvRjNC00L7RgdGC0LXRgNC+0L0g0LHRltC30LTQtSDQttKv0LnQutC1INC20q/QudC10YHRliDQsNGA0pvRi9C70Ysg0LrQtdGA0ZYg0LHQsNC50LvQsNC90YvRgSDQsNGA0pvRi9C70Ysg0LHRltC30LTQtSAg0LHSr9C50YDQtdC6INOp0LfQtdC60YjQtdC70LXRgNGW0L3QtNC10LPRliDRj9KT0L3QuCDQvtC90YvSoyDRltGI0ZbQvdC00LUg0LTQuNGB0YLQsNC70YzQtNGWINC205nQvdC1INC00LUg0L/RgNC+0LrRgdC40LzQsNC70YzQtNGLINOp0LfQtdC60YjQtdC70LXRgNGW0L3QtNC10LPRliDQvdCw0YLRgNC40Lkg0LzQtdC9INGB0YPQtNGL0qMg0LrQtdGA0ZYg0rHQsNC50YLQsCDRgdGW0qPRltGA0ZbQu9GD0ZbQvSDSm9Cw0LzRgtCw0LzQsNGB0YvQtyDQtdGC0LXQtNGWLiDQkdGW0YDQsNKbINGC0LAg0LHRltC30LTQtSDQsdKv0LnRgNC10LrRgtGW0qMg0pvRi9C30LzQtdGC0ZYg0LbTmdC90LUg0LTQtSDQvtC90YvSoyDRiNGL0pPQsNGA0YPRiNGLINCz0LDRgNC80L7QvdC00LDRgNGL0L3Ri9KjINKb0YvQt9C80LXRgtGW0L3QtSDQutC10LvQtdGC0ZbQvSDQsdC+0LvRgdCw0psg0L7QuyDQsdGW0LfQtNC1INC20LDQu9C/0Ysg0YHTmdCx0Lgg0LrQtdC30ZbQvdC00LUgINC305nRgCDRiNGL0pPQsNGA0YMg0LbSr9C50LXRgdGW0L3RltKjINC20LDSm9GB0YsgINC00rHRgNGL0YEg0LTQsNC80YvQvNCw0pPQsNC90LTRi9KT0YvQvdCw0L0g0LHRltC30LTQtSDRgdGDINC80LXQvSDRjdC70LXQutGC0YDQvtC70LjRgiDQuNC+0L3QtNCw0YDRiyDQutC10YDRliDRgdGW0qPRltGA0ZbQu9C80LXQudC00ZYsINC+0Lsg0L7QvdC00LDSk9GLINCz0LjQtNGA0L7RgdGC0LDRgtC40LrQsNC70YvSmyDSm9GL0YHRi9C80pPQsCDQsdCw0LnQu9Cw0L3Ri9GB0YLRiyDQttOZ0L3QtSDQtNC1INC+0YHRiyDQsNC70YzQtNC+0YHRgtC10YDQvtC9INC205nQvdC1INC00LUg0KDQkNCQ0KEg0LbSr9C50LXRgdGW0L3RltKjINC00rHRgNGL0YEg0LHQvtC70LzQsNGD0YvQvdCwINCx0LDQudC70LDQvdGL0YHRgtGLIC4g0KHQvtC90LTRi9Kb0YLQsNC9INC00LAg0LHRltC3INC305nRgNC00LUg0LjQvtC90LTQsNGA0LTRiywg0JrQsNGA0LHQvtC90LDRgtGC0LDRgNC00Ysg0LHQsNC50pvQsNC50LzRi9C3LiDQodC+0L3Ri9C80LXQvSDSm9Cw0YLQsNGAINCw0LvRjNC00L7RgdGC0LXRgNC+0L0g0LHQsNC70LDQvdGL0qMg06nRgdGDINC60LXQt9C10qPRliDQvNC10L0g0YHSr9C50LXQutGC0LXRgNC00ZbSoyDQtNCw0LzRgyDQv9GA0L7RhtC10YHRgdGW0L3QtSDSm9Cw0YLRi9GB0LDRgtGL0L0g0LHQvtC70YvQvyDQutC10LvQtdC00ZYuINCh0L7QuyDSr9GI0ZbQvdC00LUg0LHRltC30LTQtSAg0LDQu9GM0LTQvtGB0YLQtdGA0L7QvSDTmdGB0ZbRgNC10YHQtSDQvNC10LrRgtC10L8g0LbQsNGB0YvQvdC00LDSk9GLINCx0LDQu9Cw0LvQsNGAINKv0YjRltC9ICDQvtC70LDRgNC00YvSoyDQtNCw0LzRg9GL0L3QtNCwINOp0LfRltC90ZbSoyDQt9C+0YAg0LzQsNKj0YvQt9GL0L0g0LDQudKb0YvQvSDQutOp0YDRgdC10YLQtdC00ZYuINCh0LXQsdC10LHRliDQvNC10LrRgtC10L8g0LbQsNGB0YvQvdC00LDSk9GLINCx0LDQu9Cw0LTQsCDQsdKx0Lsg0LzQsNKj0YvQt9C00Ysg0LrQtdC30LXSoyDQttOZ0L3QtSDSm9Cw0LvRi9C/0YLQsNGB0LDRgtGL0L0g0YHTmdGCINCx0L7Qu9GL0L8g0LrQtdC70LXQtNGWLiDQkNC7INKx0YDRi9Kb0YLRi9KjINKb0LDQu9GL0L/RgtCw0YHRg9GL0L3QtNCw0pPRiyDSm9Cw0L0g0LDQudC90LDQu9GL0LzRi9C90YvSoyDQtNCw0LzRgyDRgdCw0YLRi9C70LDRgNGL0L3QsCDQutC10LvQtdGC0ZbQvSDQsdC+0LvRgdCw0pssINCx0ZbQt9C00LUg0pvQsNC9INCw0LnQvdCw0LvRi9C80YvQvdKjINC00LDQvNGD0Ysg0YTQvtC70LjQutGD0LvQsNC70YvSmyDQutC10LfQtdKj0LTQtSDQtNCw0LzRi9C/INCx0LDRgdGC0LDQudC00Ysg0L7QuyDQutC10LfQtNC10LPRliDSm9Cw0L0g0LHRltC30LTQtSDQvdC+0YDQvNCw0LTQsNKT0Ysg0LDQtNCw0Lwg0pvQsNC90YvQvdCwINKx0pvRgdCw0LzQsNC50LTRiy4g0L7QtNCw0L0g0LrQtdGW0L3Qs9GWINC60LXQt9C10qMg0L7QuyDQsdGW0LfQtNC1INCw0LvQu9Cw0L3RgtC+0LjQtNGC0Ysg0pvQsNC9INCw0LnQvdCw0LvRi9C80Ysg0Y/Sk9C90Lgg0LHSsdC7INGB0LDRgtGL0LTQsCDQsdGW0LfQtNC1INC20LDRgtGL0YDSk9CwINGC0q/RgdC60LXQvSDQutC10LfQtdKj0L3QtdC9INCx0LDRgdGC0LDQu9Cw0LTRiy4g0JbQsNC70L/RiyDSm9Cw0L0g0LDQudC90LDQu9GL0LzRi9C90LTQsCDQsdCw0LvQsNC00LAg0YLRg9GL0LvSk9Cw0L3RiNCwINC60ZbRiNGWINKb0LDQvSDQsNC50L3QsNC70YvQvNGLINOp0LfRltC90ZbSoyDRgNOp0LvRltC9INCw0YLSm9Cw0YDQvNCw0LnQtNGLICDQttOZ0L3QtSDQtNC1INKx0YDRi9KbINCx0ZbQt9C00LUg0LrRltC90LTRltC6INCw0YDRgtC10YDQuNGP0YHRiyAg0LDRgNKb0YvQu9GLINCw0L3QsNGB0YvQvdGL0qMgINKb0LDQvSDQsNC50L3QsNC70YvQvNGL0LzQtdC9INCx0LDQudC70LDQvdGL0YHRgtGLINCx0L7Qu9GL0L8g0LrQtdC70LXQtNGWLiDQltCw0LvQv9GLINGE0LXRgtCw0LvRjNC00YvSmyDQutC10LfQtdKj0LTQtSDQsdKx0Lsg0LrQtdC30LXSo9C00LUgMyDQsNC50LTQsNC9INCw0YHSm9Cw0L0g0rHRgNGL0pvRgtCwINC/0LDQudC00LAg0LHQvtC70LDQtNGLLiDQkdKx0Lsg0LbQtdGA0LTQtSDRhNC10YLQsNC70YzQtNGLINCz0LXQvNC+0LPQu9C+0LHQuNC9INCx0L7Qu9Cw0LTRiy4gINCW0LDQu9C/0Ysg0LHSsdC7INC60LXQt9C00LUg0LHRltC30LTQtSDSm9Cw0L0g0LDQudC90LDQu9GL0LzQtNGLICDQsdGW0LcgMyDQutC1INCx06nQu9GW0L8g0pvQsNGA0LDRgdGC0YvRgNCw0LzRi9C3LiAg0KHQvtC7INC60LXQt9C00LUgMy00INCw0LnQtNCwINCx0ZbQt9C00LUg0Y3QvNCx0YDQuNC+0L0g0L/QsNC50LTQsCDQsdC+0LvSk9Cw0L0g0LrQtdC30LTQtSDQutGW0L3QtNGW0Log0LLQtdC90LDRgdGLINKb0rHRgNGL0LvRi9C80LTQsNC90LAg0LHQsNGB0YLQsNC50LTRiy4g0JbTmdC90LUg0LTQtSDQvtC7INCx0ZbQt9C00LUg0LHQsNGA0YvQvyAyINGC0LDRgNC80LDSm9Kb0LAgINGC06nQvNC10L3Qs9GWINKb0YPRi9GBINCy0LXQvdCw0pPQsCDQsdCw0YDRi9C/INKb0rHQudGL0LvQsNC00YsgLCDQsNC7INGC06nQvNC10L3Qs9GWINKb0YPRi9GBINCy0LXQvdCwICDQsdGW0LfQtNC1INCx0LDRg9GL0YDSk9CwINCw0Lsg0LHQsNGD0YvRgCDQsdGW0LfQtNC1INGB0L7QuyDQttCw0psg0LbSr9GA0LXQutGI0LXQs9C1INCx0LDRgNGL0L8g0pvSsdC50YvQu9Cw0LTRiy4g0KHQvtC7INC205nQvdC1INC+0qMg0LbQsNKbINC20q/RgNC10LrRiNC1INCw0YDQsNGB0YvQvdC00LAg0LHRltC30LTQtSDRgdC+0L/QsNKb0YjQsCDRgtC10YHRltC6INCx0L7Qu9Cw0LTRiy4g0J7QuyDRgtGD0YvQu9KT0LDQvdGI0LAg06nQtyDSm9GL0LfQvNC10YLRltC9ICDRgtC+0pvRgtCw0YLQsNC00Ysg0LbTmdC90LUg0LTQtSAg0YHQvtC7INGB0L7Qv9Cw0pvRiNCwINGC0LXRgdGW0LogMTAtMTIg0LDQudC00LAg0LDQvdCw0YLQvtC80LjRj9C70YvSmyDRgtKv0YDQtNC1INC20LDQsdGL0LvQsNC00YsuICAyINC20YvQu9KT0LAg0LTQtdC50ZbQvSDQvtC90YvSoyDQttCw0LHRi9C70LzQsNGD0Ysg0L3QvtGA0LzQsCDQsdC+0LvRi9C/INC60LXQu9C10LTRli4gINCW0LDQu9C/0Ysg0LHRltC30LTQtSDQsdKx0Lsg0LbQtdGA0LTQtdCz0ZYg0LXRgNC10LrRiNC10LvRltC60YLQtdGA0LPQtSDQutC10LvQtdGC0ZbQvSDQsdC+0LvRgdCw0psg0LHRltC30LTQtdCz0ZYg0YHQvtC/0LDSm9GI0LAg0YLQtdGB0ZbQutGC0ZbSoyDQsNGI0YvSmyDQsdC+0LvRg9GL0L3QsNC9INC+0L3QtNCw0pPRiyDRgdC+0Lsg0LbTmdC90LUg0L7SoyDQttCw0psg0LbSr9GA0LXQutGI0LXQtNC10LPRliDSm9Cw0L3QtNCw0YDQtNGL0qMg0LDRgNCw0LvQsNGB0YPRi9C90LAg0YHQtdC/0YLQtdGB0LXQtNGWLiDQodC+0L3Ri9C80LXQvSDSm9Cw0YLQsNGAINCR0LDRgtGC0LDQu9C+0LIg06nQt9C10LPRliDQsdGW0LfQtNC1INCw0YjRi9KbINCx0L7Qu9Cw0LTRiy4gINCQ0Lsg0YPQsNKb0YvRgiDTqdGC0LUg0LrQtdC70LUg0LHRltC30LTQtSAg0KHQvtC7INC20LDSm9GC0LDSk9GLINC20q/RgNC10LrRiNC10LTQtdCz0ZYg0pvRi9GB0YvQvCDQutC10YLQtdC00ZYg0LTQtSDQvtKjINC20LDSm9GC0LDSk9GLINC20q/RgNC10LrRiNC10LPQtSDSm9GL0YHRi9C8INGC0q/RgdC10LTRliDRgdC+0L3QtNGL0pvRgtCw0L0g0LTQsCDRgdC+0L/QsNKb0YjQsCDRgtC10YDQtdC30LUg0LbQsNCx0YvQu9Cw0LTRiy4g0JbTmdC90LUg0LTQtSDQsdGW0LfQtNC1INCz0LXQvNC+0LPQu9C+0LHQuNC9INC806nQu9GI0LXRgNGWINOp0YLQtSDQttC+0pPQsNGA0Ysg0LHQvtC70YvQvyDQutC10LvQtdC00ZYuIDE0MC0yNDAg0LDRgNCw0YHRi9C90LTQsCDQsdC+0LvQsNC00Ysg0pvQsNC9INKb0YvRgdGL0LzRiyDRgtOp0LzQtdC9INCx0L7Qu9GL0L8g0LrQtdC70LXQtNGWLiAg0KHQvtKj0YvQvdCwINKb0LDRgNCw0Lkg0LHRltC30LTQtSDRgtC+0LvRi9KT0YvQvNC10L0gNCDQutCw0LzQtdGA0LDQu9GLINC20q/RgNC10Log0pvQsNC70YvQv9GC0LDRgdCw0LTRiy4g0prQvtGA0YvRgtGL0L3Ri9C00LvQsNC5INC60LXQu9C1INCx0ZbQt9C00LUgINKa0LDQvSDQsNC50L3QsNC70YvQvCDQsdGW0LfQtNC1IDIg0LDQv9GC0LDQtNCwINCw0psg0LTQsNC80YvQvyDQsdCw0YHRgtCw0LTRiyDQtNCwIDMg0LDQv9GC0LDQtNCwINOp0LfRltC90ZbSoyBTICDRgtOZ0YDRltC30LTRliDQutKv0LnRltC90LUg0LrQtdC70LXQtNGWLiDQltOZ0L3QtSDQtNC1INKb0LDQvSDQsdGW0YAg0LHQsNKb0YvRgtGC0LAg0L7SoyDQttCw0psg0LbSr9GA0LXQutGI0LXQtNC10L0g0LDSk9Cw0LTRiy4gNCDQsNC/0YLQsNC00LAg0LHRltC30LTQtSDSm9Cw0L3QsNC50L3Qu9Cw0YvQvNGLINKb0LDQu9GL0L/RgtCw0YHQsCDQutC10LvQtSA4LTEwINCw0L/RgtCwINGB0L7So9GL0L3QsCDSm9Cw0YDQsNC5INC/0LvQsNGG0LXQvdGC0LDQu9GL0psg0pvQsNC9INCw0LnQvdCw0LvRi9C80YsgINC/0LDQudC00LAg0LHQvtC70LDQtNGLINC00LAg0pvQsNGA0YvQvdGI0LDQsNGA0LDQu9GL0psg0L/QtdGA0LTQtdC70LXRgCDQttC+0LnRi9C70LDQtNGLLiDQldKjINCw0LvSk9Cw0YjSm9GLINC20q/RgNC10Log0LbQvtKbINC60LXQt9GW0L3QtNC1INCx0ZbQt9C00LUg0LTQuNGE0YTRg9C30LTRiyDSm9Cw0L0g0LDQudC90LDQu9GL0LzRiyDQsdC+0LvQsNC00Ysg0Y/Sk9C90Lgg0LPQsNC3INCw0LvQvNCw0YHRgyDQsNGA0pvRi9C70Ysg0LbSr9C30LXQs9C1INCw0YHQsNC00Ysu</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2-ші сұрақтың жауабы толық емес, Ұрықтық даму кезеңдері, үш сатысы, яғни олар саруыздық ,аллантоистық, планцентарлық толық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27" table:style-name="ce1">
            <text:p>1066827</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MS4g0JDQu9GM0LTQvtGB0YLQtdGA0L7QvSDQsNC00LDQvCDQsNKT0LfQsNGB0YvQvdC00LAg0LzQsNKj0YvQt9C00Ysg0YDQvtC70Ywg0LDRgtKb0LDRgNCw0YLRi9C9INCz0L7RgNC80L7QvdC00LDRgNC00YvSoyDQsdGW0YDRliDQsdC+0LvRi9C/INGC0LDQsdGL0LvQsNC00YsuINCR0LDQu9Cw0LvQsNGA0LTQsCDQtNCwLCDQtdGA0LXRgdC10LrRgtC10YDQtNC1INC00LUg0LHSsdC7INCz0L7RgNC80L7QvSDQsdKv0LnRgNC10LrSr9GB0YLRliDQsdC10LfRltC90ZbSoyDSm9GL0YDRgtGL0YHRgtGLINKb0LDQsdCw0YLRi9C90LDQvSDRgdC40L3RgtC10LfQtNC10LvQtdC00ZYuINCQ0LvRjNC00L7RgdGC0LXRgNC+0L0g0YHQuNC90YLQtdC30ZbQvdC1INKb0YvRgdKb0LDRiNCwINGC0L7Sm9GC0LDQu9GL0L8g0LrQtdGC0LXRgtGW0L0g0LHQvtC70YHQsNKbLCDQsdKx0Lsg0LPQvtGA0LzQvtC9INC10qMg0LDQu9C00YvQvNC10L0g0LHQsNGD0YvRgNC00LDQvSDQsNC90LPQuNC+0YLQtdC90LfQuNC90L7Qs9C10L0g0YLSr9GA0ZbQvdC00LUg0LHTqdC70ZbQvdC10LTRliwg0L7QtNCw0L0g0LrQtdC50ZbQvSDRhNC10YDQvNC10L3RgtGC0LXRgCDSm9Cw0YLRi9GB0YvQvdC00LAg0LDQvdCz0LjQvtGC0LXQvdC30LjQvSAxLdCz0LUg0LDQudC90LDQu9Cw0LTRiyDQttOZ0L3QtSDTqdC60L/QtdC00LXQvSDQsdOp0LvRltC90LXRgtGW0L0g0JDQn9CkINGE0LXRgNC80LXQvdGC0ZbQvdGW0qMg0pvQsNGC0YvRgdGL0L3QtNCwINCw0L3Qs9C40L7RgtC10L3Qt9C40L0gMi3Qs9C1INCw0LnQvdCw0LvQsNC00YsuINCQ0Lsg0LDQvdCz0LjQvtGC0LXQvdC30LjQvSAyLdCz0LUg06nQtyDQsNC70LTRi9C90LAg0LDQu9GM0LTQvtGB0YLQtdGA0L7QvdKT0LAg0LDQudC90LDQu9Cw0LTRiy4g0JHQsNGB0YLQsNGD0YvRiCDRgdGL0L3Ri9C/INC20LDRgdGL0L3QtNCw0pPRiyDQsdCw0LvQsCwg0Y/Sk9C90LggNi0xMCDQttCw0YEg0LDRgNCw0LvRi9KT0YvQvdC00LDSk9GLINCx0LDQu9Cw0LTQsCDQsdKv0LnRgNC10LrSr9GB0YLRliDQsdC10LfRltC90LXQvSDQsNC70YzQtNC+0YHRgtC10YDQvtC9INGB0LjQvdGC0LXQt9C00LXQu9C10LTRliDQttOZ0L3QtSDQsdGW0YDRiNCw0LzQsCDQvNCw0qPRi9C30LTRiyDRgNC+0LvRjCDQsNGC0pvQsNGA0LDQtNGLLiDQkdGW0YDRltC90YjRltC00LXQvSwg0LDSk9C30LDQtNCw0pPRiyDQvdCw0YLRgNC40Lks0YHRgyDQttOZ0L3QtSDQutCw0LvQuNC5INCw0LvQvNCw0YHRg9GLINC80LXQvSDQvtC70LDRgNC00YvSoyDQutC+0L3RhtC10L3RgtGA0LDRhtC40Y/RgdGL0L0g0YDQtdGC0YLQtdC/INC+0YLRi9GA0LDQtNGLLiDQkNC70YzQtNC+0YHRgtC10YDQvtC9INC90LXRhNGA0L7QvSDRgtKv0YLRltC60YjQtdC70LXRgNGW0L3QtNC10LPRliB2MS3RgNC10YbQtdC/0YLQvtGA0LvQsNGA0YvQvdCwINOZ0YHQtdGAINC10YLRgyDQsNGA0pvRi9C70Ysg0YHRgyDQvNC10L0g0L3QsNGC0YDQuNC50LTRltKjINGA0LXQsNCx0YHQvtGA0LHRhtC40Y/RgdGL0L0g0LbQsNKb0YHQsNGA0YLQsNC00YsuINCh0L7QtNCw0L0g0LDQudC90LDQu9GL0LzQtNCw0pPRiyDQvdCw0YLRgNC40Lkg0LzQtdC9INGB0YMg0LzTqdC70YjQtdGA0ZYg0LDRgNGC0YvQvywg0LDQudC90LDQu9GL0LzQtNCw0pPRiyDSm9Cw0L0g0LrTqdC70LXQvNGWINC00LUg0LDRgNGC0LDQtNGLLCDRhtC40YDQutGD0LvRj9GG0LjRjyDQttCw0pvRgdCw0YDQsNC00YsuINCR0LDRgdGC0LDRg9GL0Ygg0YHRi9C90YvQv9GC0LDSk9GLINCx0LDQu9Cw0LvQsNGA0LTQsCDRgdKx0LnRi9Kb0YLRi9KbINC00LXSo9Cz0LXQudGW0L3RltKjINKb0LDQu9GL0L/RgtGLINC00LXSo9Cz0LXQudC00LUg0LHQvtC70YPRiyDTqdGC0LUg0LzQsNKj0YvQt9C00YssINGB0LXQsdC10LHRliwg0LHSsdC7INC20LDRgdGC0LDSk9GLINCx0LDQu9Cw0LvQsNGAINGE0LjQt9C40LrQsNC70YvSmyDQsdC10LvRgdC10L3QtNGWLCDRgdC+0LTQsNC9INGC0LXRgNC00ZbSoyDQutOp0L8g0LHTqdC70ZbQvdGD0ZYg0LbTmdC90LUg0LDSk9C30LDQtNCw0L0g0YHSsdC50YvSm9GC0YvSm9GC0YvSoyDRiNGL0pPQsNGA0YvQu9GD0Ysg0L7RgNGL0L0g0LDQu9Cw0LTRiy4g0JDQu9GM0LTQvtGB0YLQtdGA0L7QvSDRgdGDINC80LXQvSDQvdCw0YLRgNC40Lkg0YDQtdCw0LHRgdC+0YDQsdGG0LjRj9GB0YvQvSDQttCw0pvRgdCw0YDRgtKb0LDQvdC00YvSm9GC0LDQvSwg0LHQsNC70LAg0L7RgNCz0LDQvdC40LfQvNGW0L3QtNC1INCx0rHQuyDQvNC10YXQsNC90LjQt9C8INCx0LDQu9Cw0L3RgdGC0Ysg0YDQtdGC0YLQtdC/INC+0YLRi9GA0LDQtNGLLiDQldC60ZbQvdGI0ZbQtNC10L0sINCw0LvRjNC00L7RgdGC0LXRgNC+0L0g0LDSk9C30LDQtNCw0L0g0LrQsNC70LjQuSDRjdC60YHQutGA0LXRhtC40Y/RgdGL0L0g0LbQsNKb0YHQsNGA0YLQsNC00Ysg0LTQsCDQuNC+0L3QtNCw0YAg0LHQsNC70LDQvdGB0YvQvSDRgdCw0pvRgtCw0LnQtNGLLiDQkNC70YzQtNC+0YHRgtC10YDQvtC90L3Ri9KjINC+0YHRiyDRhNGD0L3QutGG0LjRj9C70LDRgNGL0L3Ri9KjINCw0YDSm9Cw0YHRi9C90LTQsCDQsNC50L3QsNC70YvQvNC00LAg0YHSsdC50YvSm9GC0YvSmyDQutOp0LvQtdC80ZYg0YDQtdGC0YLQtdC70ZbQvdGW0L8g0L7RgtGL0YDQsNC00Ysg0LbTmdC90LUg0LDSk9C30LDQtNCwINC00LXQs9C40LTRgNCw0YLQsNGG0LjRjyDQutOp0YDRltC90ZbRgSDRgtCw0L/Qv9Cw0LnQtNGLLiA8YnIgLz4NCjIuINKw0YDRi9Kb0YLRi9KjINKb0LDQvdCw0LnQvdCw0LvRi9C80YvSoyDRgtGW0LrQtdC70LXQuSDQsNC90LDQvNC10L0g0LrRltC90LTRltC60LHQsNGDINCw0YDSm9GL0LvRiyDQsdCw0LnQu9Cw0L3Ri9GB0YLQsCDQsdC+0LvQsNC00Ysg0LbTmdC90LUg0L7QvdGL0qMg0LTQsNC80YPRi9C90YvSoyDQsdGW0YDQvdC10YjQtSDRgdCw0YLRi9C00LDQvSDRgtKx0YDQsNC00YsuINKw0YDRi9Kb0YLRi9KbINKb0LDQvdCw0LnQvdCw0LvRi9C80L3Ri9KjINCw0YDSm9Cw0YHRi9C90LTQsCDSsdGA0YvSmyDQvtGC0YLQtdCz0ZbQvNC10L0g0pvQsNC90YvSk9Cw0LTRiyDQttOZ0L3QtSDQsNKT0LfQsNKT0LAg0pvQsNC20LXRgiDSm9C+0YDQtdC60YLRltC6INC30LDRgtGC0LDRgNC80LXQvSDQvdOZ0YDQu9C10L3QtdC00ZYuINCR0ZbRgNGW0L3RiNGWINGB0LDRgtGLIDAtNCDQsNC/0YLQsCDQsNGA0LDQu9GL0pPRi9C9INKb0rHRgNCw0LnQtNGLLiDQkdKx0Lsg0LrQtdC30LTQtSDSsdGA0YvSmyDRgdCw0YDRi9GB0YMg0pvQsNC/0YjRi9Kb0YLQsCDQsdC+0LvQsNC00Ysg0LTQsCwg0YHQvtC7INCw0YDSm9GL0LvRiyDQsNC90LDRgdGL0L3QsNC9INKb0L7RgNC10LrRgtGW0Log0LfQsNGC0YLQsNGA0LTRiyDQsNC70YvQvywg0LTQsNC80LjQtNGLLiDQldC60ZbQvdGI0ZYg0YHQsNGC0YsgNC04INCw0L/RgtCwINCw0YDQsNC70YvSk9GLLiDQkdKx0Lsg0LrQtdC30LXSo9C00LUg0LTQsNC80YPQtNGL0qMg0LHRltGA0ZbQvdGI0ZYg0LrQtdC30LXSo9GWINCx0L7Qu9GL0L8g0LXRgdC10L/RgtC10LvRltC90LXQtNGWLiDQkdKx0Lsg0LrQtdC30LXSo9C00LUg0rHRgNGL0psg0L/QtdC9INCw0L3QsCDQsNGA0LDRgdGL0L3QtNCwINKx0YDRi9KbINC20L7Qu9C00LDRgSDQv9Cw0LnQtNCwINCx0L7Qu9Cw0LTRiy4g0J7RgdGLINKx0YDRi9KbINC20L7Qu9C00LDRgSDQsNGA0pvRi9C70Ysg0L3QtdCz0ZbQt9Cz0ZYg0pvQsNC90LDQudC90LDQu9GL0Lwg0LbSr9C30LXQs9C1INCw0YHQsNC00YssINKx0YDRi9KbINC20L7Qu9C00LDRgSDSm9Kx0YDQsNC80YvQvdCwINCx0ZbRgCDQutGW0L3QtNGW0Log0LLQtdC90LDRgdGLLCDQtdC60ZYg0LDRgNGC0LXRgNC40Y8g0LbTmdC90LUg0LDRgNGC0YvSmyDQsdOp0LvRltC90ZbQvyDRiNGL0pPRg9KT0LAg0pvQsNC20LXRgtGC0ZYg0LfQsNGC0YLQsNGA0LTRiyDRgtCw0YHRi9C80LDQu9C00LDQudGC0YvQvSDRg9GA0LDRhdGD0YEg0LHQvtC70LDQtNGLLiDQrdC80LHRgNC40L7QvdCw0LvRjNC00ZYg0pvQsNC90LDQudC90LDQu9GL0Lwg0LbSr9C30LXQs9C1INCw0YHQsNC00YsuINCR0rHQuyDSm9Cw0L3QsNC50L3QsNC70YvQvCDQv9Cw0YHRgdC40LLRgtGWINGC0rHRgNKT0YvQtNCwINC20q/Qt9C10LPQtSDQsNGB0YvQvyDQvtGC0YvRgNCw0LTRiy4g0q7RiNGW0L3RiNGWINGB0LDRgtGLIDgtMTIg0LDQv9GC0LAg0LDRgNCw0LvRi9KT0YvQvSDSm9Kx0YDQsNC50LTRiywg0LHSsdC7INGB0LDRgtGL0LTQsCDSsdGA0YvSm9GC0YvSoyDQttKv0YDQtdCz0ZYg0pvQsNKT0YvQvyDQsdCw0YHRgtCw0LnQtNGLLCDRgdC+0LTQsNC9INCw0LnQvdCw0LvRi9C80LTQsCDSm9Cw0L3QvdGL0qMg0YbQuNGA0LrRg9C70Y/RhtC40Y/RgdGLINC20LDSm9GB0LDRgNCwINGC0q/RgdC10LTRli4g0KbQuNGA0LrRg9C70Y/RhtC40Y8g0LbQsNKb0YHQsNGA0pPQsNC90L3QsNC9INKx0YDRi9Kb0YLRi9KbINKb0LDQvdCw0LnQu9GL0Lwg0LDQutGC0LjQstGC0ZYg0YLSsdGA0pPRi9C00LAg0ZbRgdC60LUg0pvQvtGB0YvQu9Cw0LTRiy4g0J7QvdGL0LzQtdC9INKb0LDRgtCw0YAg0rHRgNGL0pvRgtGL0psg0pvQsNC90LDQudC90LDQu9GL0Lwg0LrSr9GA0LTQtdC70LXQvdC1INGC0q/RgdC10LTRli4g0KLTqdGA0YLRltC90YjRliDRgdCw0YLRiyAxMi0xNiDQsNC/0YLQsCDQsNGA0LDQu9GL0pPRi9C9INKb0rHRgNCw0LnQtNGLLiDQkdKx0Lsg0LrQtdC30LXSo9C00LUg0pvQsNC90LDQudC90LDQu9GL0Lwg0LbSr9C50LXRgdGWINC00LDQvNGD0YvQvSDQttCw0LvSk9Cw0YHRgtGL0YDQsNC00YssINC60q/RgNC00LXQu9C10L3QtSDRgtKv0YHQtdC00ZYuINKw0YDRi9Kb0YLRi9KjINOp0LfRltC90ZbSoyDSm9Cw0L0g0pvRi9GB0YvQvNGLINCx0L7Qu9Cw0LTRiy4g0JbTmdC90LUg0YHQvtKj0pPRiyDRgdCw0YLRiyDQsdC10YHRltC90YjRliDRgdCw0YLRiyAxNi0yMCDQsNC/0YLQsCDQsNGA0LDQu9GL0pPRi9C9INKb0rHRgNCw0LnQtNGLLiDQkdKx0Lsg0YHQsNGC0YvQtNCwINKx0YDRi9Kb0YLRi9KbINKb0LDQvdCw0LnQvdCw0LvRi9C8INC20LXRgtC60ZbQu9GW0LrRgtGWINGC0rHRgNKT0YvQtNCwINC00LDQvNGL0L8sINGG0LjRgNC60YPQu9GP0YbQuNGPINC20q/Qt9C10LPQtSDQsNGB0LDQtNGLLiDSmtCw0L0g0LDSk9C30LDQtNCw0pPRiyDQsdCw0YHSm9CwINC80q/RiNC10LvQtdGA0LPQtSDRgtCw0YHRi9C80LDQu9C00LDQvdGL0L8sINCx0LDRg9GL0YAsINCx0q/QudGA0LXQuiwg0LzQuNKT0LAg0YLQsNGB0YvQvNCw0LvQtNCw0L3Ri9C/LCDQsNKT0LfQsNC70LDRgCDSm9C+0YDQtdC60YLRltC6INC30LDRgtC/0LXQvSDSm9Cw0LzRgtCw0LzRgdGL0Lcg0LXRgtGW0LvQtdC00ZYuINKw0YDRi9Kb0YLRi9KbINKb0LDQvdCw0LnQvdCw0LvRi9C8INC10YDQtdGB0LXQutGC0LXRgNC00ZbSoyDQttOZ0L3QtSDQsdCw0LvQsNC70LDRgNC00YvSoyDSm9Cw0L3QsNC50L3QsNC70YvQvNGL0L3QsNC9INC10YDQtdC60YjQtSDSm9Kx0YDRi9C70YvQvC4g0KHQtdCx0LXQsdGWLCDQsNC90LAg0pvSsdGA0YHQsNKT0YvQvdC00LAg0LbQsNGC0pvQsNC9INC60LXQt9C00LUg0L7RgtGC0LXQs9GW0L3RltKjINCw0LvQvNCw0YHRg9GL0L3QsCDSsdGA0YvSm9GC0YvSoyDTqdC60L/QtdGB0ZYg0LXQvNC10YEsINKx0YDRi9KbINC20L7Qu9C00LDRgdGC0LDQvSDQsNC90LAg0pvQsNC90Ysg0LDRgNKb0YvQu9GLINGC0LDRgdGL0LzQsNC70LTQsNC90YvQvyDQvtGC0YvRgNCw0LTRiy4g0KbQuNGA0LrRg9C70Y/RhtC40Y/RgdGL0L0g0YHQuNC/0LDRgtGC0LDQvyDQutC10YLQtdGC0ZbQvSDQsdC+0LvRgdCw0LwsINC60ZbQvdC00ZbQuiDQstC10L3QsNGB0Ysg0LDRgNKb0YvQu9GLINKb0LDQvSDRgtOp0LzQtdC90LPRliDSm9GD0YvRgdGC0Ysg0LLQtdC90LDSk9CwINGC0LDRgdGL0LzQsNC70LTQsNC90LDQtNGLLiDQntC00LDQvSDSm9Cw0L0g0L7SoyDQttCw0psg0LbSr9GA0LXQutGI0LXQs9C1INOp0YLQtdC00ZYsINCw0Lsg0LHSsdC7INKb0rHRgNGL0LvRi9C80L3QsNC9INKb0LDQvSDQvtKjINC20LDSmyDSm9Cw0YDRi9C90YjQsNKT0LAg0YLQsNGB0YvQvNCw0LvQtNCw0L3QsNC00YsuINCV0YDQtdGB0LXQutGC0LXRgNC00LUg0L7RgdGLINC20LXRgNC00LUg06nQutC/0LUg0LDRgNGC0LXRgNC40Y/Qu9Cw0YDRiyDQsNGA0pvRi9C70Ysg0LrRltGI0ZYg0pvQsNC90LDQudC90LDQu9GL0Lwg0LbSr9C50LXRgdGWINC20q/Qt9C10LPQtSDQsNGB0YHQsCwg0rHRgNGL0pvRgtCwINC60LXRgNGW0YHRltC90YjQtSDQsNC+0YDRgtCw0pPQsCDSm9Cw0YDQsNC5INCx0LDRgtCw0LvQu9C+0LIg0YLSr9GC0ZbQs9GWINCw0YDSm9GL0LvRiyDSm9Cw0L0g0YLQsNGB0YvQvNCw0LvQtNCw0L3Ri9C/LCDTqdC60L/QtdC90ZYg0LDQudC90LDQu9CwINOp0YLRltC/LCDSsdGA0YvSm9GC0YvSoyDQttC+0pPQsNGA0pPRiyDQsdOp0LvRltC80ZbQvdGW0qMg0LHQsNGBLCDQvNC4LCDQvNC+0LnRi9C9LCDQsdKx0pPQsNC90LAg0LbTmdC90LUg0pvQvtC70LTRiyDSm9Cw0L3QvNC10L0g0pvQsNC80YLQsNC80LDRgdGL0Lcg0LXRgtC10LTRli4g0JDQuyDSm9Cw0LvSk9Cw0L0g0pvQsNC9INCx0L7Qu9GB0LAsINC+0qMg0LbQsNKbINC20q/RgNC10LrRiNC10LTQtdC9INGB0L7Qv9Cw0pvRiNCwINGC0LXRgdGW0Log0LDRgNKb0YvQu9GLINGB0L7QuyDQttCw0psg0LbSr9GA0LXQutGI0LXQs9C1INOp0YLRltC/LCDQvtC00LDQvSDRgdC+0Lsg0LbQsNKbINKb0LDRgNGL0L3RiNCw0pPQsCDSm9Cw0L0g0YLQsNGB0YvQvNCw0LvQtNCw0L3Ri9C/LCDQsNC+0YDRgtCw0L3Ri9KjINGC06nQvNC10L3QtNC10LPQtdC9INCx06nQu9GW0LzRltC90LUg0pvQsNC9INGC0LDRgdGL0LzQsNC70LTQsNC90LDQtNGLLiDQodC+0LvQsNC5LCDSsdGA0YvSm9GC0YvSoyDRgtOp0LzQtdC90LPRliDQsdOp0LvRltC80LTQtdGA0ZbQvdGW0qMg0LDRj9KbLCDQsdC10LssINC20LDQvNCx0LDRgSDQsNGB0YLQsNGD0YvQvdGL0qMg0pvQsNC90LzQtdC9INKb0LDQvNGC0LDQvNCw0YHRi9C3INC10YLRltC70YPRliDQttKv0LfQtdCz0LUg0LDRgdCw0LTRiy4g0prQsNC90L3Ri9KjINCw0Lcg0LzTqdC70YjQtdGA0ZYg0pPQsNC90LAg0L/QvtGA0YLQsNC70YzQtNGWINCy0LXQvdCw0pPQsCDSm9Cw0YDQsNC5INGC0LDRgdGL0LzQsNC70LTQsNC90YvQvyzQsdCw0YPRi9GA0pPQsCDQsdCw0YDQsNC00Ysg0LbTmdC90LUg0LrRltC90LTRltC6INCy0LXQvdCw0YHRiyDQsNGA0pvRi9C70Ysg0rHRgNGL0psg0LDSk9C30LDRgdGL0L3QsNC9INGI0YvSk9Cw0YDRi9C70LDQtNGLLiDSsNGA0YvSmyDQtNKv0L3QuNC10LPQtSDQutC10LvQs9C10L3QtNC1LCDQutGW0L3QtNGW0Log0LHQsNGD0LTRiyDQutC10YHQutC10L3QtNC1LCDSsdGA0YvSm9C20L7Qu9C00LDRgSDSm9Kx0YDQsNC80YvQvdCwINC60ZbRgNCz0LXQvSDSm9Kx0YDRi9C70YvQvNC00LDRgCDQvtCx0LvQuNGC0LXRgNCw0YbQuNGP0pPQsCDSsdGI0YvRgNCw0LnQtNGLINC00LAsINGW0YjQsNGB0YLQsNGA0LTRi9KjINGC0YPRi9C90LTRi9C70LDRgNGL0L3Ri9KjINKb0rHRgNCw0LzRi9C90LAg0LrRltGA0LXQtNGWLiDQodC+0L/QsNKb0YjQsCDRgtC10YHRltC6INCx0LDQu9Cw0L3Ri9KjINOp0LzRltGA0ZbQvdGW0qMgMiDQsNC50YvQvdCwINC00LXQudGW0L0g0L3QtdC80LXRgdC1INC60LXQudCx0ZbRgCDQttCw0pPQtNCw0LnQu9Cw0YDQtNCwIDItMTIg0LbQsNGB0pvQsCDQtNC10LnRltC9INC20LDQsdGL0LvQvNCw0YPRiyDQvNKv0LzQutGW0L0uINOo0YLQtSDRgdC40YDQtdC6INC20LDSk9C00LDQudC70LDRgNC00LAg0L7QuyDRgtGW0L/RgtGWLCDQtdGA0LXRgdC10Log0LbQsNGB0pvQsCDQutC10LvQs9C10L3QtNC1INC00LUg0LbQsNCx0YvQu9C80LDRg9GLINC80q/QvNC60ZbQvS4g0KHQvtC7INC60LXQt9C00LUg0LHQsNC70LDQtNCwINC20q/RgNC10Log0LbQtdGC0LrRltC70ZbQutGB0ZbQt9C00ZbQs9GWINC+0YDRi9C9INCw0LvQsNC00YsuINOY0LTQtdGC0YLQtSwgMiDQsNC50pPQsCDQtNC10LnRltC9INC005nQvdC10LrQtdGAINGC0ZbQvdGWINOp0YHRltC/LCDRgdC+0L/QsNKb0YjQsCDRgtC10YHRltC60YLRliDRgtC+0LvRi9Kb0YLQsNC5INC20LDQsdCw0LTRiy4g0JDQuyDTqdC60L/QtSDQstC10L3QsNGB0Ysg0LzQtdC9INCw0L7RgNGC0LAg0LTQvtKT0LDRgdGLINCw0YDQsNGB0YvQvdC00LAg0LHQvtC70LDRgtGL0L0g0LHQsNGC0YLQsNC70L7QsiDRgtKv0YLRltCz0ZYg0YjQuNGA0LDRgtGL0LvRi9C/LCDQsdCw0LnQu9Cw0LzSk9CwINCw0LnQvdCw0LvRi9C/INC60LXRgtC10LTRli4g0JHSsdC7INGC0q/RgtGW0LrRgtGW0qMg0LbQsNCx0YvQu9C80LDRg9GLINC00LAg0LbSr9GA0LXQuiDQttC10YLQutGW0LvRltC60YHRltC30LTRltCz0ZbQvdGW0qMg0YLRg9GL0L3QtNCw0YPRi9C90LAg0L3QtdCz0ZbQt9Cz0ZYg0YHQtdCx0LXQvyDQsdC+0LvQsNC00YsuINCR0LDQu9Cw0LTQsCDQttKv0YDQtdC6INC20LXRgtC60ZbQu9GW0LrRgdGW0LfQtNGW0LPRltC90ZbSoyDQvdC10LPRltC30LPRliDQsdC10LvQs9GW0LvQtdGA0ZYg0LHQvtC70YvQvywg0LbRi9C70LDSk9Cw0L3QtNCwINGC0YPRi9C90LTQsNC50YLRi9C9INCx0LXRgtGC0LXQs9GWINGG0LjQsNC90L7Qtywg0YHQtdCx0LXQv9GB0ZbQtyDQtdC90YLRltCz0YMsINC20LjRliDRgtGL0L3Ri9GBINC20LXRgtC60ZbQu9GW0LrRgdGW0LfQtNGW0LPRliwg0YTQuNC30LjQutCw0LvRi9KbINCx0LXQu9GB0LXQvdC00ZbQu9GW0LrRgtGW0qMg0YLTqdC80LXQvdC00ZbQs9GWINCw0LnSm9GL0L0g0LHQtdC70LPRliDQsdC+0LvRi9C/INC10YHQtdC/0YLQtdC70ZbQvdC10LTRli4gIDxiciAvPg0K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6" table:style-name="ce1">
            <text:p>1066876</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0JHQsNGB0YLQsNGD0YvRiCDRgdGL0L3Ri9C/INC20LDRgdGL0L3QtNCw0LPRiyDQsdCw0LvQsNKT0LAg0LDQu9GM0LTQtdGB0YLQtdGA0L7QvSDRhNGD0L3QutGG0LjRj9GB0YvQvdCwINGC0L7Sm9GC0LDQu9Cw0YLRi9C9INCx0L7Qu9GB0LDQvCAu0JDQu9GM0LTQtdGB0YLQtdGA0L7QvSDQsdKv0LnRgNC10Log0q/RgdGC0ZYg0LHQtdC30ZYg0YjRi9KT0LDRgNCw0YLRi9C9INCz0L7RgNC80L7QvS7QntC7INC90LXQs9GW0LfRltC90LXQvSDQutOp0L/RgtC10LPQtdC9INGE0YPQvdC60YbQuNGP0LvQsNGA0LTRiyDQsNGC0LrQsNGA0LDQtNGLLtCh0L7QvdGL0L0g0ZbRiNGW0L3QtNC1INCw0pPQt9Cw0LTQsNKT0Ysg0YHSsdC50YvSm9GC0YvQuiDQv9C10L0g0Y3Qu9C10LrRgtGA0L7Qu9C40YIg0LHQsNC70LDRgdGL0L0g0YDQtdGC0YLQtdGD0LTQtSDQvNCw0L3Ri9C30LTRiyDQsdC+0LvRi9C/INGC0LDQsdGL0LvQsNC00YsuINCR0LDRgdGC0LDRg9GL0Ygg0LzQtdC60YLQtdC/INC20LDRgdGL0L3QtNCw0pPRiyDQsdCw0LvQsNC70LDRgNC00LAg0LDQu9GM0LTQtdGB0YLQtdGA0L7QvSDSm9Cw0L0g0pvRi9GB0YvQvNGL0L0g0YDQtdGC0YLQtdGD0LPQtSDRgdC+0L3Ri9C80LXQvSDQutCw0YLQsNGAINKb0LDQvdC00LDSk9GLINC90LDRgtGA0LjQuSDQvNC10L0g0LrQsNC70LjQuSDQtNGW0L0g0LTQtdC90LPQtdC50ZbQvSDRgdCw0LrRgtCw0YPQtNCwINC205nQvdC1INKb0LDQtNCw0pPQsNC70LDRg9C00LAg0LzQsNC90YvQt9C00Ysu0J7QuyDQsdKv0LnRgNC10LrRgtC10LPRliDQvdCw0YLRgNC40LnQtNGW0L0g0YDQtdCw0LHRgdC+0YDQsdGG0LjRj9GB0YvQvSDQttC+0LPQsNGA0LvQsNGC0YMg0LDRgNKb0YvQu9GLINC205nQvdC1INC00LUg0LrQsNC70LjQudC00ZbQvSDQsNKT0LfQsNC00LDQvSDRiNGL0pPQsNGA0YvQu9GD0YvQvSDRi9C90YLQsNC70LDQvdC00YvRgNGDINCw0YDSm9GL0LvRiyDQttKx0LzRi9GBINC20LDRgdCw0LnQtNGLLtCR0YPQuyDQtNC10L3QtdC00LXQs9GWINGB0rHQudGL0LrRgtGL0LrRgtGL0L0g0YHQvtC90YvQvNC10L0g0LrQsNGC0LDRgCDQutOp0LvQtdC80ZbQvSDRgdCw0LrRgtCw0YPSk9CwINC606nQvNC10LrRgtC10YHQtdC00ZYu0JDSk9C30LDQtNCw0pPRiyDRiNCw0LzQsNC00LDQvSDRgtGL0YEg0LDQu9GM0LTQtdGB0YLQtdGA0L7QvdC90YvQvSDQvNOp0LvRiNC10YDRliDSm9Cw0L0g0pvRi9GB0YvQvNGL0L3Ri9C9INC20L7Sk9Cw0YDRi9C70LDRg9GL0L3QsCDQttOZ0L3QtSDQtNC1INC00LXQvdC10LPQtSDQutOp0L8g0LzTqdC70YjQtdGA0LTQtSDRgdGD0LnRi9Kb0YLRi9Kb0YLRi9C9INC20LjQvdCw0LvRg9GL0L3QsCDQsNC70YvQvyDQutC10LvQtdC00ZYu0KLQsNKT0YvQtNCwINKb0L7RgdGL0L8g0LrQtdGC0LXRgtGW0L0g0LHQvtC70YHQsNC8INCQ0LvRjNC00LXRgdGC0LXRgNC+0L0g0LHSr9C50YDQtdC60YLRltC9INC00LjRgdGC0LDQu9C00Ysg0YLSr9GC0ZbQutGI0LXQu9C10YDRltC90LUg05nRgdC10YAg0LXRgtC10LTRlizQvtGB0YvQu9Cw0LnRiNCwINC90LDRgtGA0LjQuSDQuNC+0L3QtNCw0YDRi9C9INGA0LXQsNCx0YHQvtGA0LHRhtC40Y/RgdGL0L0g0LrQsNC70LjQuSDQuNC+0L3QtNCw0YDRi9C90YvQvSDQttOZ0L3QtSDRgdGD0YLQtdCz0ZYs0LzQsNCz0L3QuNC5INC205nQvdC1INCw0LzQvNC40LDQutGC0YvQvSDRiNGL0pPQsNGA0YvQu9GD0YvQvSDQsNGA0YLRgtGL0YDQsNC00YsuPGJyIC8+DQrQldC60ZbQvdGW0YjRliDRgdKx0YDQsNKb0pvQsCDRgtC+0pvRgtCw0LvQsNGC0YvQvSDQsdC+0LvRgdCw0Lwg0rDRgNGL0pvRgtGL0L0g0pvQsNC9INCw0LnQvdCw0LvRi9C80Ysg0LDQvdCwINC80LXQvSDSsdGA0YvSmyDQsNGA0LDRgdGL0L3QtNCw0pPRiyDQvtGC0YLQtdCz0ZYg0LzQtdC9INKb0L7RgNC10LrRgtGW0Log0LfQsNGC0YLQsNGA0LTRi9C9INCw0LvQvNCw0YHRg9GL0L0g0LrQsNC80YLQsNC80LDRgdGL0Lcg0LXRgtC10YLRltC9INKb0rHRgNGL0LvRi9C8INCx0L7Qu9GL0L8g0YLQsNCx0YvQu9Cw0LTRiy4g0rHRgNGL0pvRgtGL0L0g0LrQsNC9INCw0LnQu9Cw0LzRi9C90YvQvSA10LrQtdC30LXQvdGW0L0g0LrQsNGA0LDRgdGC0YvRgNCw0LzRi9C3LjEt0YjRliAwLTQg0LDQv9GC0LAg0LDRgNCw0YHRiyDQtNCw0LzRg9C00YvQvSDQsdGW0YDRltC90YjRliDQsNC/0YLQsNC70LDRgNGL0L3QtNCwINKx0YDRi9KbINCw0L3QsNGB0YvQvdGL0L0g0YHQsNGA0YPRi9C3INKb0LDQv9GI0YvSk9GL0L3QsNC9INKb0LDQvSDRgtCw0LzRi9GA0LvQsNGA0Ysg0LDRgNKb0YvQu9GLINKb0L7RgNC10LrRgtGW0Log0LfQsNGC0YLQsNGA0LzQtdC9INKb0L7RgNC10LrRgtC10L3QtdC00ZYuMi3RiNGWINC60LXQt9C10L3QtNC1IDQtOCDQsNC/0YLQsCDQsNGA0LDQu9GL0pPRi9C9INKb0LDQvNGC0LjQtNGLLtCR0rHQuyDQutC10LfQtNC1INC/0LvQsNGG0LXQvdGC0LAg0pvQsNC70YvQv9GC0LDRgdCwINCx0LDRgdGC0LDQudC00Ysu0J/Qu9Cw0YbQtdC90YLQsCDQsNGA0pvRi9C70Ysg0rHRgNGL0psg0pvQvtGA0LXQutGC0ZbQuiDQt9Cw0YLRgtCw0YDQvNC10L0g0YLQvtC70YvQuiDSm9Cw0LzRgtCw0LzQsNGB0YvQtyDQtdGC0ZbQu9C10LTRli4zLdGI0ZYg0LrQtdC30LXQvSA4LTEyINCw0L/RgtCwINCw0YDQsNC70YvSk9GL0L0g0LrQsNC80YLQuNC00YsuNC3RiNGWINC60LXQt9C10L0gMTItMTYg0LDQv9GC0LAg0LDRgNCw0LvRi9KT0YvQvSDSm9Cw0LzRgtC40LTRiyDQsdKx0Lsg0LrQtdC30LTQtSDSsdGA0YvSm9GC0YvQvSDSm9Cw0L0g0LDQudC90LDQu9GL0LzRiyDRgtC+0LvRi9KbINKb0LDQu9GL0L/RgtCw0YHQsNC00Ysu0rHRgNGL0psg06nQt9GW0L3RltC9INKb0LDQvSDSm9GL0YHRi9C80Ysg0LzQtdC9INKb0LDQvSDQsNC50L3QsNC70YvQvNGL0L0g0YHQsNKb0YLQsNC5INCw0LvQsNC00YsuNS3RiNGWINCw0L/RgtCwIDE2LTQwINCw0L/RgtCw0L3RiyDSm9Cw0LzRgtC40LTRiyAs0rHRgNGL0pvRgtGL0L0g0LrQsNC9INCw0LnQvdCw0LvRi9C80Ysg0LTQsNC80YvQvyDRgtGW0L3QtNC10YDQs9C1INC205nQvdC1INOZ0YDRgtKv0YDQu9C4INC80YPRiNC10LvQtdGA0LPQtSDQvtGC0YLQtdCz0ZYg0LzQtdC9INKb0L7RgNC10LrRgtGW0Log0LfQsNGC0YLQsNGAINGC0L7Qu9GL0pPRi9C80LXQvSDQttC10YLQutGW0LfRltC70LXQtNGWLjxiciAvPg0K0rDRgNGL0pvRgtGL0L0g0pvQsNC9INCw0LnQvdCw0LvRi9GB0YvQvdGL0L0g0LTQsNC80YMg0LrQtdC30LXQvdC00LXRgNGW0L3RltC9INGB0LDRgtGL0LvQsNGA0YvQvSDQsNC50YLRi9C/INC60LXRgtC10YLRltC9INCx0L7Qu9GB0LDQvCAz0YHQsNGC0YvRgdGL0L0g0pvQsNGA0LDRgdGC0YvRgNCw0LzRi9C3IC7QkdGW0YDRltC90YjRliDQodCw0YDRi9GB0Ysg0LrQtdC30LXQvdGWINCx0rHQuyDSm9GL0YHSm9CwINC60LXQt9C10L0g0LHQvtC70YvQvyDRgtCw0LHRi9C70LDQtNGLLtC+0Lsg0LjQvNC/0LvQsNC90YLQsNGG0LjRj9C00LDQvSDQsdCw0YHRgtCw0L8g0Y3QvNCx0YDQuNC+0L0g06nQvNGW0YDRltC90ZbSoyAyLdGI05kg0LDQv9GC0LDRgdGL0L3QsCDQtNC10LnRltC90LPRliDRg9Cw0LrRi9GC0YLRiyDQutCw0LzRgtC40LTRiy7QntGC0YLQtdCz0ZYg0LbTmdC90LUg0LrQvtGA0LXQutGC0ZbQuiDQt9Cw0YLRgtCw0YAg0Y3QvNCx0YDQvtC90pPQsCDRgtC40LrQtdC70LXQuSDRgtGA0L7RhNC+0LHQu9Cw0YHRgiDQttCw0YHRg9GI0LDQu9Cw0YDRiyDQsNGA0pvRi9C70Ysg0LbQtdGC0LrRltC30ZbQu9C10LTRli7QodCw0YDRi9GD0YvQtyDSm9Cw0L/RiNGL0pPRi9C90LDQvSDSm9Cw0L0g0YLQsNC80YvRgNC70LDRgNGLINCw0YDSm9GL0LvRiyDRjdC80LHRgNC40L7QvdKT0LAg0YLRg9GB0LXQtNGWLtCV0LrRltC90YjRliDQutC10LfQtdC90ZbQvSDQsNC50YLQsNGC0YvQvSDQsdC+0LvRgdCw0Lwg0LDQu9C70LDQvdGC0L7QuNC50LTRgtGLICDQutCw0L0g0LDQudC90LDQu9GL0Lwg0LbSr9C60YLRltC70ZbQutGC0ZbQvSA4LdGI05kg0LDQv9GC0LDRgdGL0L3Ri9C9INCw0Y/Sk9GL0L3QsNC9INCx0LDRgdGC0LDQvyDQttKx0LzRi9GBINGW0YHRgtC10Lkg0LHQsNGB0YLQsNC50LTRiyDQttOZ0L3QtSDQttKv0LrRgtGW0LvRltC60YLRltC9IDE1LTE20YjRiyDQsNC/0YLQsNGB0YvQvdCwINC00LXQudGW0L3Qs9GWINCw0YDQsNC70YvSm9GC0Ysg0pvQsNC80YLQuNC00YsgLiDQkNC70LvQsNC90YLQvtC40YEg06nQt9GW0LzQtdC9INCx0ZbRgNCz0LUg0rHRgNGL0psg0YLQsNC80YvRgNC70LDRgNGL0L0g0LDQu9GL0L8g0LbSr9GA0LXRgtGW0L0g0YLQsNC80YvRgNGB0YvQtyDRgtGA0L7RhNC+0LHQu9Cw0YHRgtC60LAg0LTQtdC50ZbQvSDTqdGB0LXQtNGWLtKu0YjRltC90YjRltCz0LUg0YLQvtKb0YLQsNC70LDRgtGL0L0g0LHQvtC70YHQsNC8INCx0rHQuyDQutC10LfQtNC1INKx0YDRi9Kb0YLRi9KbINKb0LDQvSDQsNC50L3QsNC70YvRgdGL0L0g0LTQsNC80YPRi9C90YvQvSDSm9Cw0YDSm9GL0L3Ri9C9INCx0LDSm9GL0LvQsNC5INCw0LvQsNC80YvQty7SsNGA0YvSm9GC0YvQvSDQttKv0YDQtdCz0ZbQvdGW0L0g0YHQvtKT0YvRgdGL0L0g0YHQvtC90YvQvNC10L0g0pvQsNGC0LDRgCDSm9Cw0L0g0LDQudC90LDQu9GL0LzRi9C9INC60q/RgNC00LXQu9GW0LvRltCz0ZbQvSDQsdCw0pvRi9C70LDQuSDQsNC70LDQvNGL0Lcu0JrRltC90LTRltC6INCy0LXQvdCw0YHRiyDQvNC10L0g0LDRgNGC0LXRgNC40Y/Qu9Cw0YAg0rHRgNGL0pvRgtGL0L0g0LrQvtGA0LXQutGC0ZbQuiDQt9Cw0YLRgtCw0YAg0LzQtdC9INC+0YLRgtC10LPRltC90ZYg0LbQtdGC0LrRltC30LUg0LDQu9Cw0YLRi9C90YvQvSDQsdCw0LrRi9C70LDQuSDQsNC70LDQvNGL0LcuI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8" table:style-name="ce1">
            <text:p>1066908</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0LHQsNGB0YLQsNGD0YvRiCDRgdGL0L3Ri9C/INC+0pvRg9GI0YvRgdGL0L3Ri9KjINC20LDRgdGLIDfQtNC10L0gMTEg0LDRgNCw0LvRi9KT0YvQvdC00LAg0LHQvtC70LDQtNGLINC205nQvdC1INCx0rHQuyDQttCw0YHRgtCwINCx0LDQu9Cw0L3Ri9KjINC+0YDQs9Cw0L3QuNC30LzRliDSm9Cw0YDSm9GL0L3QtNGLINOp0YHQtdC00ZYg0LXRgNC10YHQtdC60YLQtdGA0LTRltC60ZbQvdC1INGI0LDQvNCw0LzQtdC9INKx0pvRgdCw0pPQsNC90YvQvNC10L0g0YLQvtC70YvSk9GL0LzQtdC9INC20LXRgtGW0LvQs9C10L0g0LHQsdC+0LvQvNCw0LnQtNGLLiDQsNC70YzQtNC+0YHRgtC10YDQvtC9INC+0Lsg0LHSr9C50YDQtdC6INKv0YHRgtGWINCx0LXQt9GW0L3QtNC1INC60L7RgNGC0LjQutCw0LvRjNC00Ysg0LHTqdC70ZbQs9GW0L3QtNC1INOp0L3QtNGW0YDRltC70LXRgtGW0L0g0LzQsNKj0YvQt9C00Ysg0LPQvtGA0LzQvtC90LTQsNGA0LTRi9KjINCx0ZbRgNGWINC80LjQvdC10YDQsNC70L7QutC+0YDRgtC40LrQvtGB0YLQtdGA0L7QuNC0INCx0L7Qu9GL0L8g0YLQsNCx0YvQu9Cw0LTRiyDQttOZ0L3QtSDQvtC90YvSoyDQvdC10LPRltC30LPRliDRhNGD0L3QutGG0LjRj9GB0Ysg0LHSsdC7INGB0YMg0YLSsdC3INCw0LvQvNCw0YHRg9C00Ysg0YDQtdGC0YLQtdGDINCx0L7Qu9GL0L8g0YLQsNCx0YvQu9Cw0LTRiy4g0YHRgyDRgtKx0Lcg0LDQu9C80LDRgdGDINC80LDSo9GL0LfQtNGLINGE0YPQvdC60YbQuNGP0LvQsNGA0LTRi9KjINCx0ZbRgNGWINCx0L7Qu9GL0L8g0YLQsNCx0YvQu9Cw0LTRiyDRj9KT0L3QuCDQvtGA0LPQsNC90LjQt9C80LTQtdCz0ZYg0pvQsNC70YvQv9GC0Ysg0pvQsNC9INKb0YvRgdGL0LzRi9C9INC+0YHQvNC+0YHRgtGL0psg0pvRi9GB0YvQvNC00Ysg0L3QvtGA0LzQsNC00LAg0rHRgdGC0LDRgCDRgtKx0YDQsNC00YsuINC+0Lsg0LHRltGA0L3QtdGI0LUg0YLSsdC30LTQsNGAINC40L7QvdC00LDRgCDRgNC10YLRgtC10LvRg9GW0L3QtNC1INC80YvRgdCw0LvRiyDQutCw0LvQuNC5INC90LDRgtGA0LjQuSDQutCw0LvRjNGG0LjQuSDQttOZ0L3QtSDRgtCw0pPRiyDQsdCw0YHSm9CwINC40L7QvdC00LDRgNC00YvSoyDQvdC+0YDQvNCw0LvRi9KbINC606nRgNGB0LXRgtC60ZbRiNGW0L0g0rHRgdGC0LDQvyDRgtKx0YDQsNC00Ysg0LHSsdC7INOp0YLQtSDQvNCw0qPRi9C30LTRiyDRgdC10LHQtdCx0ZYg0L7QvdGL0qMg0LDRg9GL0YLSm9GD0Ysg0L7RgNCz0LDQvdC40LfQvNC90ZbSoyDQttCw0LvQv9GLINCx0rHQt9GL0LvRi9GB0YLQsNGA0YvQvdCwINOZ0LrQtdC70ZbQvyDRgdC+0pvRgtGL0YDQsNC00YsuINCw0LvRjNC00L7RgdGC0LXRgNC+0L0g0L3QtdGE0YDQvtC9INGC0q/RgtGW0LrRiNC10LvQtdGA0ZbQvdC00LUg0L3QsNGC0YDQuNC50LTRiyDRgNC10LDQsdGB0L7RgNCx0YbQuNGP0LvQsNGDINCw0YDSm9GL0LvRiyDQvtGA0LPQsNC90LjQt9C80LTQtSDRgdGD0LTRiyDSsdGB0YLQsNC/INKb0LDQu9Cw0LTRiyDQvtGB0Ysg0LDRgNKb0YvQu9GLINCw0YDRgtC10YDQuNGP0LvRi9KbINKb0YvRgdGL0LzQtNGLINC20L7Sk9Cw0YDQu9Cw0YLQsNC00YsuINGB0LXQsdC10LHRliDQvtGA0LPQsNC90LjQt9C80LTQtdCz0ZYg0L3QsNGC0YDQuNC5INOp0LfRltC90LUg0YHRg9C00Ysg0YLQsNGA0YLQsNC00Ysg0LTQsCDRgdGD0LTRi9KjINGI0YvSk9GL0L8g0LrQtdGC0L/QtdGD0ZbQvdC1INGB0LXQv9GC0ZbQs9GW0L0g0YLQuNCz0ZbQt9C10LTRliDRgdC+0LvQsNC5INCz0LjQv9C10YDQstC+0LvQtdC80LjRjyDQvdOZ0YLQuNC20LXRgdGW0L3QtNC1INKb0LDQvSDSm9GL0YHRi9C80Ysg0LbQvtKT0LDRgNC70LDQudC00YsuINGC0LDSk9GLINCx0ZbRgCDSm9GL0LfQvNC10YLRliDQutCw0LvQuNC50LTRliDQvtGA0LPQsNC90LjQt9C80L3QtdC9INGI0YvSk9Cw0YDRi9C/INGC0LDRgdGC0LDRgyDQtdCz0LXRgCDQsNKT0LfQsNC00LAg0LrQsNC70LjQuSDQutOp0L8g0LzTqdC70YjQtdGA0LTQtSDQttC40L3QsNKb0YLQsNC70LDRgtGL0L0g0LHQvtC70YHQsCwg0L7QuyDQttKv0YDQtdC60YLRltKjINKb0LDQu9GL0L/RgtGLINGE0YPQvdC60YbQuNGP0YHRi9C90YvSoyDQsdKx0LfRi9C70YvRgdGL0L3QsCDQsNC70YvQvyDQutC10LvQtdC00ZYg0Y/Sk9C90Lgg0LDRgNC40YLQvNC40Y8g0LTQsNC80LjQtNGLLiDRgdC+0L3Ri9C80LXQvSDSm9Cw0YLQsNGAINC+0YDQs9Cw0L3QuNC30LzQtNC10LPRliDRgdGDINC80LjQvdC10YDQsNC7INCx0LDQu9Cw0L3RgdGL0L3Ri9KjINGC0LXQv9C1INGC0LXSo9C00ZbQs9GW0L0g0YHQsNKb0YLQsNC5INC+0YLRi9GA0YvQvyDQvtGA0LPQsNC90LjQt9C80LTQtdCz0ZYg0YLQtdC/0LUg0YLQtdKj0LTRltC60YLRliDRj9KT0L3QuCDRgtKx0YDQsNKx0YLRi9C70YvSsdGC0Ysg0YHQsNKb0YLRi9C/INGC0rHRgNCw0LTRiy4g0L7RgdGLINGE0YPQvdC60YbQuNGP0LvQsNGA0Ysg0LDRgNKb0YvQu9GLINKb0LDRgNKb0YvQvdC00Ysg06nRgdGW0L8g0LTQsNC80YvQvyDQutC10LvQtSDQttCw0YLSm9Cw0L0g0LDSk9C30LDQvdGL0qMg0YTQuNC30LjQvtC70L7Qs9C40Y/Qu9GL0psg0L/RgNC+0YbQtdGB0YHRgtC10YDRltC9INGC0rHRgNCw0pvRgtCw0L3QtNGL0YDRi9C/INC20q/Qt9C10LPQtSDQsNGB0YvRgNGL0L8g0L7RgtGL0YDQsNC00YsuINCx0rHQuyDRhNGD0L3QutGG0LjRj9C70LDRgNC00YvSoyDQsdCw0YDQu9GL0pPRiyDQsdCw0LvQsNC90YvSoyDQtNKx0YDRi9GBINC20LXRgtGW0LvRg9GW0L3QtSDQttOZ0L3QtSDQttCw0pPRi9C80YHRi9C3INGB0YvRgNGC0pvRiyDQvtGA0YLQsCDQttCw0pPQtNCw0LnQu9Cw0YDRi9C90LAg0LHQtdC50ZbQvNC00LXQu9GD0LPQtSDQutOp0LzQtdC60YLQtdGB0LXQtNGWLiAgICAyLtKx0YDRi9Kb0YLRi9KjINKb0LDQvSDQsNC50L3QsNC70YvQvCDQttKv0LnQtdGB0ZYg0L7QuyDQsNC90LAg0LzQtdC9INCx0LDQu9CwINCw0YDQsNGB0YvQvdC00LDSk9GLINC60LjRgdC70L7RgNC+0LQg0L/QtdC9INKb0L7RgNC10LrRgtGW0Log0LfQsNGC0YLQsNGA0LTRi9KjINCw0LvQvNCw0YHRi9C/INCx0LXRgNGW0LvRltC/INC+0YLRi9GA0YPRi9C90LTQsCDQvNCw0qPRi9C30LTRiyDRgNOp0LvQtNGWINCw0YLSm9Cw0YDQsNC00YsuINC+0Lsg0LHRltGA0L3QtdGI0LUg0LTQsNC80YMg0LrQtdC30LXSo9C00LXRgNGW0L3QtdC9INGC0rHRgNCw0LTRiywg0LHRltGA0ZbQvdGI0ZYg0LrQtdC30LXSo9GWINGC06nRgNGC0ZbQvdGI0ZYg0LDQv9GC0LDSk9CwINC00LXQudGW0L0g0YPQsNKb0YvRgtGC0Ysg0LDQu9Cw0LTRiywg0LHSsdC7INC60LXQt9C00LUg0rHRgNGL0psg0LDQvdCw0YHRi9C90YvSoyDRgdCw0YDRi9GD0YvQt9GL0L3QsNC9INGC0ZbRgNGI0ZbQu9GW0Log0LXRgtGDINKv0YjRltC9INGC0ZbQutC10LvQtdC5INKb0L7RgNC10LrRgtGW0Log0LfQsNGC0YLQsNGA0LTRiyDQsNC70YvQvyDQvtGC0YvRgNCw0LTRiy4g0LXQutGW0L3RiNGWINC60LXQt9C10qPRliDRgtOp0YDRgtGW0L3RiNGWINC80LXQvSDRgdC10LPRltC30ZbQvdGI0ZYg0LDQv9GC0LAg0LDRgNCw0LvRi9KT0YvQvSDSm9Cw0LzRgtC40LTRiyDQttOZ0L3QtSDQsdGW0YDRltC90YjRliDQsNC50YvQvdGL0qMg0YHQvtKj0YvQvdCwINKb0LDRgNCw0Lkg0L/Qu9Cw0YbQtdC90YLQsCDSm9Cw0LvRi9C/0YLQsNGB0LAg0LHQsNGB0YLQsNC50LTRiyDQttOZ0L3QtSDSsdGA0YvSm9GC0Ysg0L7RgtGC0LXQs9GWINC80LXQvSDSm9C+0YDQtdC60YLRltC6INC30LDRgtGC0LDRgNC00Ysg0LHQtdGA0ZbQvyDQvtGC0YvRgNCw0LTRiyDQsdKx0Lsg0LrQtdC30LTQtSDSsdGA0YvSm9GC0YvSmyDSm9Cw0L0g0LDQudC90LDQu9GL0Lwg0LTQsNC80YvQvyDQsdCw0YHRgtCw0LnQtNGLINCx0ZbRgNCw0psg0YLQvtC70YvSk9GL0LzQtdC9INC00LDQvNGL0LzQsNC50LTRiy4g0q/RiNGW0L3RiNGWINC60LXQt9C10qMg0YHQtdCz0ZbQt9GW0L3RiNGWINCw0L/RgtCw0LTQsNC9INC+0L0g0LXQutGW0L3RiNGWINCw0L/RgtCw0pPQsCDQtNC10LnRltC9INGB0L7Qt9GL0LvQsNC00Ysg0LHSsdC7INC00LDQvNGD0LTRi9KjINC10LrRltC90YjRliDQsNC50YvQvdC00LAg0L/Qu9C+0LTRgtGL0qMg0LbSr9GA0LXQs9GWINGB0L7Sk9GL0L8g0LHQsNGB0YLQsNC50LTRiyDQttOZ0L3QtSDQttCw0LvQv9GLINKb0LDQvdCw0LnQvdCw0LvRi9C8INC20q/QudC10YHRliDQutKv0YDQtNC10LvQtdC90LUg0LTQsNC80LjQtNGLLNC60ZbQvdC00ZbQuiDQstC10L3QsNGB0Ysg0LzQtdC9INCw0YDRgtGA0LjRj9C70LDRgCDQv9C70LDRhtC10L3RgtCwINC80LXQvSDSsdGA0YvSmyDQsNGA0LDRgdGL0L3QtNCw0pPRiyDSm9C+0YDQtdC60YLRltC6INCx0LDQudC70LDQvdGL0YHRgtGLINCw0YLSm9Cw0YDQsNC00YsuINGC06nRgNGC0ZbQvdGI0ZYg0LrQtdC30LXRhiDQvtC7INC+0L0g0LXQutGW0L3RiNGWINC80LXQvSDQvtC9INCw0LvRgtGL0L3RiNGLINCw0L/RgtCw0LvQsNGAINC80LXRgNC30ZbQvNGW0L3QtSDRgdOZ0LnQutC10YEg0LrQtdC70LXQtNGWINGP0pPQvdC4INC00LDQvNGD0LTRi9KjINGC06nRgNGC0ZbQvdGI0ZYg0LDQudGL0L3QtNCwINKx0YDRi9Kb0YLRi9KjINKb0LDQvdCw0LnQvdCw0LvRi9C80Ysg0LbQtdGC0LrRltC70ZbQutGC0ZYg0LTQtdKj0LPQtdC50LTQtSDQtNCw0LzRi9C/INC+0Lsg06nQt9GW0L3RltKjINKb0LDQvSDSm9GL0YHRi9C80YvQvSDRgNC10YLRgtC10Lkg0LDQu9Cw0YLRi9C9INC20LDSk9C00LDQudKT0LAg0LbQtdGC0LXQtNGWLiDQsdC10YHRltC90YjRliDQutC10LfQtdKjINC+0L0g0LDQu9GC0YvQvdGI0Ysg0LDQv9GC0LDQtNCw0L0g0pvRi9GA0YvSmyDQsNC/0YLQsNKT0LAg0LTQtdC50ZbQvSDRgdC+0LfRi9C70LDQtNGLINC205nQvdC1INCx0rHQuyDQvNC10YDQt9GW0LzQtNC1INKb0LDQvSDQsNC50L3QsNC70YvQvCDRgtC+0LvRi9KT0YvQvNC10L0g0LTQsNC80YvQvywg06nQt9Cz0LXRgNGW0YEg0LbQsNKT0LTQsNC50LvQsNGA0YvQvdCwINCx0LXQudGW0LzQtNC10LvQtSDQsNC70LDQtNGLINGP0pPQvdC4INKb0L7Qu9Cw0LnRgdGL0Lcg0LbQsNKT0LTQsNC50LTQsCDQutC+0LzQv9C10L3RgdC40YDQvtCy0LDRgtGMINC10YLRgyDSm9Cw0LHRltC70LXRgtGWINC00LDQvNC40LTRiy4g0rHRgNGL0pvRgtGL0qMg0pvQsNC90LzQtdC9INKb0LDQvNGC0LDQvNCw0YHRi9C3INC10YLRltC70YPRliDQtNCw0LzRi9C/INC60LXQu9C1INC20LDRgtKb0LDQvSDQvNKv0YjQtdC70LXRgNCz0LUg0YLQvtC70YvSm9Kb0LDQvdC00Ysg0L7RgtGC0LXQs9GW0LzQtdC9INC205nQvdC1INKb0L7RgNC10LrRgtGW0Log0LfQsNGC0YLQsNGA0LzQtdC9INKb0LDQvNGC0LDQvNCw0LDRgdGL0Lcg0LXRgtGD0LTQtSDRiNGD0L3RgtGC0LDRgCDQttOZ0L3QtSDQutC70LDQv9Cw0L0g0LbSsdC80YvRgSDQsNGC0pvQsNGA0LDQtNGLLiDQv9C70L7QtNGC0LDSk9GLINKb0LDQvSDQsNKT0YvQvNGL0L3Ri9KjINC20L7Qu9GLINC+0YHRiyDQttC+0LvQvNC10L0g0LbSr9GA0LXQtNGWOiDQsNC90LAg0pvQsNC90YvQvdC00LDSk9GLINC60LjRgdC70L7RgNC+0LQg0L/QtdC9INKb0L7RgNC10LrRgtGW0Log0LfQsNGC0YLQsNGAINKx0YDRi9Kb0pvQsCDQv9C70LDRhtC10L3RgtCwINC606nQvNC10LPRltC80LXQvSDQutGW0L3QtNGW0Log0LDRgNKb0YvQu9GLINCx0LXRgNGW0LvQtdC00ZYuINCw0YDRiyDSm9Cw0YDQsNC5INC60ZbQvdC00ZbQuiDQstC10L3QsNGB0YvQvdCw0L0g0LHQsNGD0YvRgNKT0LAg0LHQsNGA0LDQtNGL0L7QuyDQttC10YDQtNC1INC+0LsgZHVjdHVzIHZlbm9zdXMg0LrTqdC80LXQs9GW0LzQtdC9INC+0YHRiyDRiNGD0L3RgiDQsNGA0pvRi9C70Ysg0pvQvtC30pPQsNC70LDQtNGLLiDQvtGB0Ysg0LDRgNKb0YvQu9GLINKb0LDQvdC90YvSoyDQsdGW0YAg0LHTqdC70ZbQs9GWINCx0LDRg9GL0YDSk9CwINCx0LXRgNGW0LvQtdC00ZYuINC60LXRltC90L3QtdC9INC20L7Sk9Cw0YDRiyDSm9Cw0L3QvNC10L0g0pvQsNC90YvSm9Kb0LDQvSDRgtOp0LzQtdC90LPRliDSm9GD0YvRgdGC0Ysg0LLQtdC90LDSk9CwINC60LXQudGW0L0g0L7SoyDQttCw0psg0LbSr9GA0LXQutGI0LXQs9C1INGC0q/RgdC10LTRliDQtNC1INGB0L7Qv9Cw0pvRiNCwINGC0LXRgdGW0Log0LDRgNKb0YvQu9GLINGB0L7QuyDQttCw0psg0LbSr9GA0LXQutGI0LXQs9C1INOp0YLQtdC00ZYo0L7QuyDRgtGD0YvQu9KT0LDQvdC90LDQvSDQutC10LnRltC9INC20LDQsdGL0LvRi9C/INKb0LDQu9Cw0LTRiykg0LrQtdC50ZbQvSDRgdC+0Lsg0LbQvtKbINKb0LDRgNGL0L3RiNCw0pPQsCDRgtKv0YHQtdC00ZYg0LTQtSDQttC+0pPQsNGA0LvQsNGD0YjRiyDQsNGA0YLQtdGA0LjRj9KT0LAg06nRgtC10LTRli4g0pvQvtC70pvQsNC00LDQvSDSm9Cw0L0gINC20L7Sk9Cw0YDRiyDSm9Cw0YDQsNC5INC20q/RgNC10LrRgtGW0qMg06nQt9GW0L3RltKjINCx0rHQu9GI0YvSm9C10YLRgtC10YDRltC9LCDQvNC40LTRiyDSm9Cw0L3QvNC10L0g0pvQsNC80YLQsNC80LDRgdGL0Lcg0LXRgtGW0L8g0YLTqdC80LXQvdC00LXRg9GI0ZYg0LDQvtGA0YLQsCDQsNGA0pvRi9C70Ysg0LHQsNGB0pvQsCDQvNKv0YjQtdC70LXRgNC00ZYg0LTQtSDSm9Cw0L3QvNC10L0g0pvQsNC80YLQsNC80LDRgdGL0Lcg0LXRgtC10LTRli4gICAgICA=</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9" table:style-name="ce1">
            <text:p>1066959</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0JHQsNGB0YLQsNGD0YvRiCDRgdGL0L3Ri9C/INC20LDRgdGL0L3QtNCw0pPRiyDQsdCw0LvQsNKT0LAg0LDQu9GM0LTQvtGB0YLQtdGA0L7QvSDQsNGC0pvQsNGA0LDRgtGL0L0g0YTRg9C90LrRhtC40Y/Qu9Cw0YDSk9CwINC60LXQu9C10YLRltC9INCx0L7Qu9GB0LDSmyzQsNC70YzQtNC10YHRgtC10YDQvtC9INCz0L7RgNC80L7QvdGLINCw0pPQt9Cw0LTQsCDQsdGW0YDQvdC10YjQtSDSm9GL0LfQvNC10YLRgtC10YDQtNGWINCw0YLSm9Cw0YDQsNC00Ysu0JDQu9GM0LTQtdGB0YLQtdGA0L7QvS3QsdKv0LnRgNC10Log0q/RgdGC0ZYg0LHQtdC30ZbQvdGW0qMg0pvRi9GA0YLRi9GB0YLRiyDSm9Cw0LHQsNGC0YvQvdC00LAg06nQvdC00ZbRgNGW0LvQtdGC0ZbQvSDQs9C+0YDQvNC+0L0s0L7QuyDQsNKT0LfQsNC00LDSk9GLINGB0rHQudGL0pvRgtGL0psg0L/QtdC9INGN0LvQtdC60YLRgNC+0LvQuNGCINCx0LDQu9Cw0L3RgdGL0L0g0YDQtdGC0YLQtdGD0LPQtSDSm9Cw0YLRi9GB0LDQtNGLINC205nQvdC1INC+0Lsg0L7RgdGLINC/0YDQvtGG0LXRgdGC0LUg0LzQsNKj0YvQt9C00Ysg0YDTqdC70LTRliDQsNGC0pvQsNGA0LDQtNGLLtCR0LDRgdGC0LDRg9GL0Ygg0LzQtdC60YLQtdC/INC20LDRgdGL0L3QtNCw0pPRiyDQsdCw0LvQsNC70LDRgNC00LAg0LDQu9GM0LTQvtGB0YLQtdGA0L7QvSDSm9Cw0L0g0pvRi9GB0YvQvNGL0L0g0LbTmdC90LUg0pvQsNC90LTQsNKT0Ysg0L3QsNGC0YDQuNC5INC80LXQvSDQutCw0LvQuNC5INCx0LDQu9Cw0L3RgdGL0L0g0YDQtdGC0YLQtdGD0LPQtSDSm9Cw0YLRi9GB0LDQtNGLLtCe0Lsg0LHSr9C50YDQtdC60YLQtdCz0ZYg0L3QsNGC0YDQuNC50LTRltC9INGA0LXQsNCx0YHQvtGA0LHRhtC40Y/RgdGL0L0g0LDRgNGC0YLRi9GA0YMg0LbTmdC90LUg0LrQsNC70LjQudC00ZbQvSDRiNGL0pPQsNGA0YvQu9GD0YvQvSDRi9C90YLQsNC70LDQvdC00YvRgNGDINCw0YDSm9GL0LvRiyDTqdC3INC20rHQvNGL0YHRi9C9INCw0YLSm9Cw0YDQsNC00Ysu0JHSsdC7INC00LXQvdC10L3RltKjINGB0rHQudGL0pvRgtGL0psg0LHQsNC70LDQvdGB0YvQvSDQttOZ0L3QtSDSm9Cw0L0g0LrTqdC70LXQvNGW0L0g0YHQsNKb0YLQsNGD0pPQsCDQutOp0LzQtdC60YLQtdGB0LXQtNGWLNCx0rHQuyDQtNKx0YDRi9GBINCw0LnQvdCw0LvRi9C8INC205nQvdC1INC20LDQu9C/0Ysg0LTQtdC90YHQsNGD0LvRi9KbINKv0YjRltC9INOp0YLQtSDQvNCw0qPRi9C30LTRiy7QsNGC0LDQvyDQsNC50YLRgdCw0pss0LHSsdC7INCz0L7RgNC80L7QvSDSm9GL0LfQvNC10YLRliDRgtC10Log0LHQsNC70LDQtNCwINKT0LDQvdCwINC10LzQtdGBLNC10YDQtdGB0LXQuiDQsNC00LDQvNC00LDRgNC00LAg0LTQsCDQvNCw0qPRi9C30LTRiyDRgNOp0Lsg0LDRgtKb0LDRgNCw0LTRiy7QkdCw0YHRgtCw0YPRi9GIINGB0YvQvdGL0L8g0LbQsNGB0YvQvdC00LDSk9GLINCx0LDQu9Cw0LTQsCDRgtC10Log0pvQsNC90LAg0LDQu9GM0LTQtdGB0YLQtdGA0L7QvSDQs9C+0YDQvNC+0L3RiyDSk9Cw0L3QsCDQtdC80LXRgSzQtdC90LTRliDSk9Cw0L3QsCDSm9GB0ZbQvyDQutC10LvQtSDQttCw0YLSm9Cw0L0g0LHQsNC70LAg0LHQvtC70pPQsNC90LTRi9Kb0YLQsNC9INCx0LDRgdKb0LAg0LTQsCDQs9C+0YDQvNC+0L3QtNCw0YDQtNGL0L0g05nRgdC10YDRltC9INCx0LDQudKb0LDRg9KT0LAg0LHQvtC70LDQtNGLLtOY0YAg0LPQvtGA0LzQvtC90YvQvSDTqdC30ZbQvdC00ZbQuiDSm9GL0LfQvNC10YLRliDQvNC10L0g0LDRgtKb0LDRgNCw0YLRi9C9INGA06nQu9GWINC+0YDQsNGB0LDQvSDQt9C+0YAs0LXQs9C10YAg0LPQvtGA0LzQvtC90LTQsNGAINCw0YDQsNGB0YvQvdC00LDSk9GLINCx0LDQu9Cw0L3RgSDQsdKx0LfRi9C70LDRgtGL0L0g0LHQvtC70YHQsCzTmdGA0YLSr9GA0LvRliDQsNGD0YDRg9C70LDRgCDQvNC10L0g0L/QsNGC0L7Qu9C+0LPQuNGP0LvRi9KbINC20LDSk9C00LDQudC70LDRgCDRgtGD0YvQvdC00LDRg9GLINC80q/QvNC60ZbQvS4yKdKw0YDRi9Kb0YLRi9C9INKb0LDQvSDQsNC50L3QsNC70YvQvNGLLdCw0L3QsCDQvNC10L0g0rHRgNGL0psg0LDRgNCw0YHRi9C90LTQsNKT0Ysg0L7RgtGC0LXQs9GWINC80LXQvSDSm9C+0YDQtdC60YLRltC6INC30LDRgtGC0LDRgNC00YvQvSDQsNC70LzQsNGB0YPRi9C9INKb0LDQvNGC0LDQvNCw0YHRi9C3INC10YLQtdGC0ZbQvSDQsdGW0YDQtdCz0LXQuSDQttKv0LnQtSDQsdC+0LvRi9C/INGB0LDQvdCw0LvQsNC00Ysu0rDRgNGL0pvRgtGL0L0g0pvQsNC9INCw0LnQvdCw0LvQsNGB0YvQvdGL0qMg0LTQsNC80YMg0LrQtdC30LXSo9GW0L3RltKjINCx0ZbRgNC90LXRiNC1INGB0LDRgtGL0LvQsNGA0Ysg0LHQsNGAOzEg0LrQtdC30LXSoygwLTQg0LDQv9GC0LApOtCU0JDQvNGD0LTRi9C9INCw0LvSk9Cw0YjSm9GLINCw0L/RgtCw0LvQsNGA0YvQvdC00LAg0rHRgNGL0psg0LDQvdCw0YHRi9C90YvSoyDRgdCw0YDRi9GD0YvQtyDSm9Cw0L/RiNGL0pPRiyDQsNGA0pvRi9C70Ysg0YLRltC60LXQu9C10Lkg06nQt9GW0L3RltKjINKb0L7RgNC10LrRgtGW0Log0LfQsNGC0YLQsNGA0YvQvSDSm9Cw0LHRi9C70LTQsNC/INC+0YLRi9GA0LDQtNGLLtCa0LXQudGW0L3Qs9GWINC60LXQt9C10L3QtNC1INGB0LDRgNGD0YvQtyDSm9Cw0L/RiNGL0pPRi9C90YvSkyDRgNOp0LvRltC9INC/0LvQsNGG0LXQvdGC0LAg0LDQu9C80LDRgdGC0YzRi9GA0LDQtNGLINC205nQvdC1INGC0L7Qu9GL0pvRgtCw0Lkg0LHQsNGA0LvRi9KbINKb0YvQt9C80LXRgtGW0L0g0LDRgtKb0LDRgNCw0LTRiy4yINC60LXQt9C10qMoNC04INCw0L/RgtCwKTrQlNCw0LzRg9C00YvQvSDQsdGW0YDRltC90YjRliDQsNC50YvQvdGL0qMg0YHQvtKj0YvQvdC00LAg0L/Qu9Cw0YbQtdC90YLQsCDSm9Cw0LvRi9C/0YLQsNGB0LAg0LHQsNGB0YLQsNC50LTRiyDQttOZ0L3QtSDRjdC80LHRgNC40L7Qs9C10L3QtNGWINC+0YLRgtC10LPRliDQvNC10L0g0pvQvtGA0LXQutGC0ZbQuiDQt9Cw0YLRgtCw0YDQvNC80LXQvSDSm9Cw0LzRgtCw0LzQsNGB0YvQtyDQtdGC0YPRltC9INOp0Lcg0LzQvtC50L3Ri9C90LAg0LDQu9Cw0LTRiy7QkdKx0Lsg0LrQtdC30LXSo9C00LUg0rHRgNGL0pvRgtGL0L0g0pvQsNC9INCw0LnQvdCw0LvRi9C8INC20q/QudC10YHRliDQtNCw0LzQuCDQsdCw0YHRgtCw0LnQtNGLLNCx0ZbRgNCw0psg0L7QuyDTmdC70ZYg06nQtyDQttKx0LzRi9GB0YvQvSDRgtC+0LvRi9KbINCw0YLSm9Cw0YDQvNCw0LnQtNGLLjMg0LrQtdC30LXSoyg4LTEyINCw0L/RgtCwKTvQlNCw0LzRg9C00YvSoyDQtdC60ZbQvdGI0ZYg0LDQudGL0L3QtNCwINKx0YDRi9Kb0YLRi9C9INC20rHRgNC10LPRliDRgdC+0pPRi9C/LNKb0LDQvSDQsNC50L3QsNC70YvQvCDQttKv0LnQtdGB0ZYg0LrSr9GA0LTQtdC70LXQvdC1INCx0LDRgdGC0LDQudC00Ysu0JrRltC90LTRltC6INCy0LXQvdCw0YHRiyDQvNC10L0g0LDRgNGC0LXRgNC40Y/Qu9Cw0YDRiyDSsdGA0YvSmyDQv9C10L0g0L/Qu9Cw0YbQtdC90YLQsCDQsNGA0LDRgdGL0L3QtNCw0pPRiyDQvtGC0YLQtdCz0ZYg0LzQtdC9INKb0L7RgNC10LrRgtGW0Log0LfQsNGC0YLQsNGA0LTRi9C9INC205nQvdC1INKb0LDQu9C00YvSm9GC0LDRgNC00YvQvSDQsNC70LzQsNGB0YPRi9C90LAg0LzSr9C80LrRltC90LTRltC6INCx0LXRgNC10LTRli40INC60LXQt9C10qMoMTItMTYg0LDQv9GC0LAp0JTQsNC80YPQtNGL0L0g0YLTqdGA0YLRltC90YjRliDQsNC50YvQvdGL0qMg0YHQvtKj0YvQvdC00LAg0rHRgNGL0pvRgtGL0L0g0pvQsNC9INCw0LnQvdCw0LvRi9C80Ysg0LbQsNKb0YHRiyDSm9Cw0LvRi9C/0YLQsNGB0LDQtNGLINC205nQvdC1INKx0YDRi9KbINOp0LfRltC90ZbSoyDSm9Cw0L0g0pvRi9GB0YvQvNGLINC80LXQvSDSm9Cw0L0g0LDQudC90LDQu9GL0LzRi9C9INGB0LDSm9GC0LDQuSDQsNC70LDQtNGLLjUg0LrQtdC30LXSoygxNi00MCDQsNC/0YLQsCk70LbSr9C60YLRltC70ZbQutGC0ZbQvSDSm9Cw0LvSk9Cw0L0g0YPQsNKb0YvRgtGL0L3QtNCwINKx0YDRi9KbICDSm9Cw0L0g0LDQudC90LDQu9GL0LzRiyDQtNCw0LzRi9C/LNOp0LfQs9C10YDQtdGC0ZbQvSDQttCw0pPQtNCw0LnQu9Cw0YDSk9CwINCx0LXQudGW0LzQtNC10LvRg9C00ZYg0LbQsNC70pPQsNGB0YLRi9GA0LDQtNGLLtCh0L7QvdGL0LzQtdC9INC+0YHRiyDSsdGA0YvSm9GC0LDSk9GLINKb0LDQvSDQsNC50L3QsNC70YvQvNGLINC00LDQvNGD0YvQvdGL0L3Ri9KjINC60LXQt9C10qPQtNC10YDRltC80LXQvSDSm9Cw0YLQsNGALNCx0ZbRgNC90LXRiNC1INC20q/QudC10LvQtdGA0LTRltC9INCx0ZbRgNCz0LUg0LTQsNC80LjRgtGL0L3Ri9C9INCx0LDQudKb0LDRg9KT0LAg0LHQvtC70LDQtNGLLNC+0Lsg0LbSr9C50LXQu9C10YDQtNGW0L0g06nQt9GW0L3RltKjINC00LDQvNGDINC60LXQt9C10qPQtNC10YDRltC90LUg0LbTmdC90LUg06nQt9GW0L3QtSDQtdGA0LXQutGI0LXQu9GW0LrRgtC10YDRltC90LUg0YHQsNC5INC20ZbQutGC0LXQvyDQsNC70LDQvNGL0Lcu0rDRgNGL0pvRgtGL0L0g0LTQsNC80YMg0LrQtdC30LXSo9C00LXRgNGW0L0g0LHQsNGA0LvRi9KT0YsgNSDQutC10LfQtdKj0LPQtSDQsdOp0LvRltC/INKb0LDRgNCw0LnQvNGL0Lcs0LbQsNC70L/RiyDQsdCw0YDQu9GL0psg0LrQtdC30LXSo9C00LUg0rHRgNGL0pvRgtGL0L0g0pvQsNC9INCw0LnQvdCw0LvRi9C8INC20q/QudC10YHRliDQsdGW0YDRgtC10L3QtNC10L8g0LTQsNC80YvSk9Cw0L3Ri9C9INCx0LDQudKb0LDRg9KT0LAg0LHQvtC70LDQtNGLLNGB0L7QvdGL0LzQtdC9INOZ0YAg0LrQtdC30LXSo9GW0L0g06nQt9GW0L3QtNGW0Log0LzQsNKj0YvQt9GLINC30L7RgCDQtdC60LXQvdGW0L0g0LDSo9KT0LDRgNGD0pPQsCDQsdC+0LvQsNC00YsuPGJyIC8+DQo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63" table:style-name="ce1">
            <text:p>1067063</text:p>
          </table:table-cell>
          <table:table-cell office:value-type="string" table:style-name="ce1">
            <text:p>kazakh</text:p>
          </table:table-cell>
          <table:table-cell office:value-type="string" table:style-name="ce1">
            <text:p>Билет 16&amp;lt;br /&amp;gt; 1. Бастауыш сынып жасындағы балаға альдостерон қандай функцияны атқарады?&amp;lt;br /&amp;gt; 2. Ұрықтың қан айналысының даму кезеңдерінің саттысың атаңыз?&amp;lt;br /&amp;gt;</text:p>
          </table:table-cell>
          <table:table-cell office:value-type="string" table:style-name="ce1">
            <text:p>MSkg0JbQsNC70L/RiyDQsNC00LDQvCDQsNKT0LfQsNGB0YvQvdC00LAg0LDQu9GM0LTQvtGB0YLQtdGA0L7QvSDQvNCw0qPRi9C30LTRiyDRgNOp0LvQtNGWINC+0LnQvdCw0LnRgtGL0L0g0LPQvtGA0LzQvtC90LTQsNGA0LTRi9KjINCx0ZbRgNGWINCx0L7Qu9GL0L8g0YLQsNCx0YvQu9Cw0LTRiy4g0J7QuyDQsdKv0LnRgNC10Log0q/RgdGC0ZYg0LHQtdC30ZbQvdGW0qMg0pvRi9GA0YLRi9GB0YLRiyDSm9Cw0LHQsNGC0YvQvdC00LAg0YHQuNC90YLQtdC30LTQtdC70LXRgtGW0L0g0LzQuNC90LXRgNCw0LvQvtC60L7RgNGC0LjQutC+0LjQtCDQsdC+0LvRi9C/INGC0LDQsdGL0LvQsNC00YsuINCe0Lsg0L3QtdCz0ZbQt9GW0L3QtdC9INC+0YDQs9Cw0L3QuNC30LzQtNC1INGB0YMg0YLSsdC3INCw0LvQvNCw0YHRg9GL0L0g0YDQtdGC0YLQtdC/INC+0YLRi9GA0LDRgtGL0L0g0LPQvtGA0LzQvtC9LiAg0J7QuyDQvdC10LPRltC30ZbQvdC10L0g0LHSr9C50YDQtdC60YLRltKjINC00LjRgdGC0LDQu9GM0LTRiyDRgtKv0YLRltC60YjQtdC70LXRgNGW0L3QtNC1ICBOYSDQtNGL0qMg0LrQtdGA0ZYg0YHRltKj0ZbRgNGW0LvRg9GW0L0gLCDRgdC+0pPQsNC9INGB05nQudC60LXRgSDQutCw0LvQuNC50LTRltKjINC90LXRgdC10L8g0LDRgNKb0YvQu9GLINCw0pPQt9Cw0LTQsNC9INGI0YvSk9Cw0YDRi9C70YPRi9C9INKb0LDQvNGC0LDQvNCw0YHRi9C3INC10YLQtdC00ZYuINCh0L7Qu9Cw0LnRiNCwINCw0LvRjNC00L7RgdGC0LXRgNC+0L0g0YHRg9C00Ysg0LDSk9C30LDQtNCwINKx0YHRgtCw0L8g0pvQsNC70YPSk9CwINKb0LDRgtGL0YHQsNC00YsuINCV0LPQtdGA0LTQtSDQsNC70YzQtNC+0YHRgtC10YDQvtC9INC20LXRgtC60ZbQu9GW0LrRgdGW0LfQtNGW0LPRliDQsdCw0LnSm9Cw0LvQsNGC0YvQvSDQsdC+0LvRgdCwINC+0YDQs9Cw0L3QuNC30LzQtNC1INCz0LjQv9C+0L3QsNGC0YDQuNC10LzQuNGPLCDRgdOZ0LnQutC10YHRltC90YjQtSDQs9C40L/QtdGA0LrQsNC70LjQtdC80LjRjyDQsdCw0LnSm9Cw0LvQsNC00YsuINCR0LDQu9Cw0LTQsCDRgdGD0YHRi9C30LTQsNC90YMsINCz0LjQv9C+0LPQuNC00YDQsNGC0LDRhtC40Y8g0LHQtdC70LPRltC70LXRgNGWINCx0LDQudKb0LDQu9GD0Ysg0LzSr9C80LrRltC9LiDQkdCw0YHRgtCw0YPRi9GIINGB0YvQvdGL0L8g0LbQsNGB0YvQvdC00LDSk9GLINCx0LDQu9Cw0LvQsNGA0LTQsCDQvtC90YvSoyDSm9GL0LfQvNC10YLRliDQvNCw0qPRi9C30LTRiywg0YHQtdCx0LXQsdGWINCx0rHQuyDRg9Cw0pvRi9GC0YLQsCDQvtC70LDRgNC00YvSoyDQsNKT0LfQsNGB0Ysg0pvQsNGA0pvRi9C90LTRiyDTqdGB0ZbQvyDQtNCw0LzQuNGC0YvQvSDQsdC+0LvRi9C/INGC0LDQsdGL0LvQsNC00YsuINCW0LDQu9C/0Ysg0LDQu9GM0LTQvtGB0YLQtdGA0L7QvSDQsdKv0LnRgNC10LrRgtGW0qMg0YLSr9GC0ZbQutGI0LXQu9C10YDRltC90LTQtSDQvdCw0YLRgNC40Lkg0LjQvtC90LTQsNGA0YvQvdGL0qMg0YDQtdCw0LHRgdC+0YDQsdGG0LjRj9GB0YvQvSDQsNGA0YLRgtGL0YDRi9C/LCDQsNC7INC60LXRgNGW0YHRltC90YjQtSDQutCw0LvQuNC5ICwg0LzQsNCz0L3QuNC5LCDRgdGD0YLQtdCz0ZYsINCw0LzQvNC40LDQuiDQuNC+0L3QtNCw0YDRi9C90YvSoyDRjdC60YHQutGA0LXRhtC40Y/RgdGL0L0g0LDRgNGC0YLRi9GA0LDQtNGLLiDQntC7INC90LDRgtGA0LjQudC00Ysg0rHRgdGC0LDQvyDSm9Cw0LvRgyDQsNGA0pvRi9C70Ysg0pvQsNC9INKb0rHRgNCw0LzRi9C90LTQsNKT0Ysg0L3QsNGC0YDQuNC5INC00LXSo9Cz0LXQudGW0L0g0YDQtdGC0YLQtdC/LCDSm9Cw0L3QvdGL0qMg0L7RgdC80L7RgdGC0YvSmyDSm9GL0YHRi9C80YvQvSDRgNC10YLRgtC10L8g0L7RgtGL0YDQsNC00YsuINCe0YDQs9Cw0L3QuNC30LzQtNC1INGB0rHQudGL0pvRgtGL0pvRgtGLINGB0LDSm9GC0LDQvyDSm9Cw0LvRgyDQsNGA0pvRi9C70Ysg0pvQsNC9INKb0YvRgdGL0LzRi9C90LTQsCDSm9Cw0LvRi9C/0YLQsNGB0YLRi9GA0YPSk9CwINKb0LDRgtGL0YHQsNC00YsuINCQ0Lsg0LHQsNC70LDQu9Cw0YDQtNCwINKb0LDQvSDSm9GL0YHRi9C80YvQvSDRgtKx0YDQsNKb0YLRiyDSsdGB0YLQsNC/INGC0rHRgNGDINOp0YLQtSDQvNCw0qPRi9C30LTRiyDQsdC+0LvRi9C/INC60LXQu9C10LTRli4g06jQudGC0LrQtdC90ZYg0L7QuyDRj9KT0L3QuCDSm9Cw0L0g0LHRltC30LTQtSDQsdCw0YDQu9GL0psg0YLRltC90LTQtdGAINC80LXQvSDQsNKT0LfQsNC70LDRgNKT0LAg0L7RgtGC0LXQs9GWINC80LXQvSDSm9C+0YDQtdC60YLRltC6INC30LDRgtGC0LDRgNC00Ysg0LbQtdGC0LrRltC30YPQtNGWINKb0LDQvNGC0LDQvNCw0YHRi9C3INC10YLQtdC00ZYuINCQ0LvRjNC00L7RgdGC0LXRgNC+0L0g0LPQvtGA0LzQvtC90Ysg0LDRgNKb0YvQu9GLINKb0LDQvSDQutOp0LvQtdC80ZYg0YHQsNKb0YLQsNC70YvQvywg0LbSr9GA0LXQuiDSm9Cw0L0g0YLQsNC80YvRgCDQttKv0LnQtdGB0ZbQvdGW0qMg0YLQuNGW0LzQtNGWINC20rHQvNGL0YHRiyDSm9Cw0LzRgtCw0LzQsNGB0YvQtyDQtdGC0ZbQu9C10LTRli4g0KHQvtC90YvQvNC10L0g0pvQsNGC0LDRgCDRgdGD0YLQtdC6INC40L7QvdC00LDRgNGL0L0g0LDSk9C30LDQtNCw0L0g0Y3QutGB0LrRgNC10YbQuNGP0YHRi9C9INGA0LXRgtGC0LXQvywg0pvRi9GI0pvRi9C7LdGB0ZbQu9GC0ZbQu9GW0Log0LHQsNC70LDQvdGB0YLRi9C00LAg0YDQtdGC0YLQtdC50LTRli4gPGJyIC8+DQo8YnIgLz4NCjIp0rDRgNGL0pvRgtGL0psg0pvQsNC9INCw0LnQvdCw0LvRi9C80L3Ri9KjINC00LDQvNGD0Ysg0LHRltC30LTQtSDRjdC80LHRgNC40L7Qs9C10L3QtdC30LTRltKjINC80LDSo9GL0LfQtNGLINCw0YHQv9C10LrRgtGW0YHRliDQsdC+0LvRi9C/INGC0LDQsdGL0LvQsNC00YsuINCR0rHQuyDQvNC10YDQt9GW0LzQtNC1INKx0YDRi9Kb0YLRi9KjINKb0L7RgNC10LrRgtGW0Log0LfQsNGC0YLQsNGA0LzQtdC9INKb0LDQvNGC0LDQvNCw0YHRi9C3INC10YLRltC70ZbQvywg0LHTqdGC0LXQvSDQt9Cw0YLRgtCw0YDQtNGL0qMg0YjRi9KT0LDRgNGL0LvRi9C/INC+0YLRi9GA0YPRi9C90LAg0LbQsNGD0LDQvyDQsdC10YDQtdC00ZYuINCW0LDQu9C/0Ysg0LTQsNC80YMg0LrQtdC30LXSo9C00LXRgNGWOjxiciAvPg0KIDxiciAvPg0KICAoMSkg0prQsNC9INCw0LnQvdCw0LvRi9C8INC20q/QudC10YHRltC90ZbSoyAsINC+0L3Ri9KjINGW0YjRltC90LTQtSDSm9Cw0L0g0YLQsNC80YvRgNC70LDRgNGL0L3Ri9KjINKb0LDQu9GL0L/RgtCw0YHRg9GLINGN0LzQsdGA0LjQvtCz0LXQvdC10LfQtNGW0qMgMyDQsNC/0YLQsNGB0YvQvdC00LAg0LHQsNGB0YLQsNC70LDQtNGLLiDQkNC70pPQsNGI0pvRiyDSm9Cw0L0g0YLQsNC80YvRgNC70LDRgNGLINC80LXQvSDSm9Cw0L0g0LbQsNGB0YPRiNCw0LvQsNGA0Ysg0LzQtdC30L7QtNC10YDQvNCw0L3Ri9KjINCw0YDQvdCw0LnRiyDQttCw0YHRg9GI0LDQu9Cw0YDRiyDQsdC+0LvRi9C/INGC0LDQsdGL0LvQsNGC0YvQvSAi0LPQtdC80LDQvdCz0LjQvtCx0LvQsNGB0YLRgtCw0YDQtNCw0L0iINC00LDQvNC40LTRiyAsINGP0pPQvdC4INGC0q/Qt9GW0LvQtdC00ZYuINCe0YHRi9C90LTQsCDRgtKv0LfRltC70LPQtdC9INKb0LDQvSDRgtCw0LzRi9GA0LvQsNGA0Ysg0rHRgNGL0pvRgtGL0qMg0LHSr9C60ZbQuyDQtNC10L3QtdGB0ZbQvdC1INGC0LDRgNCw0LvQsNC00Ysg0LTQsCwg0LbQsNKj0LAg0YLQsNGA0LzQsNKb0YLQsNC70pPQsNC9INKb0LDQvSDRgtCw0LzRi9GA0LvQsNGAINC20LXQu9GW0YHRltC9INKb0rHRgNCw0LnQtNGLLiA8YnIgLz4NCiAgKDIpINCt0LzQsdGA0LjQvtCz0LXQvdC10LfQtNGW0qMgMy00INCw0L/RgtCw0YHRi9C90LTQsCDQttKv0YDQtdC60YLRltKjINC00LDQvNGD0Ysg0LbSr9GA0LXQtNGWLiDQldKjINCw0LvQtNGL0LzQtdC9INC80LXQt9C+0LTQtdGA0LzQsNC90YvSoyDRgdC/0LvQsNC90YXQuNC60LDQu9GL0psg0pvQsNCx0LDRgtGL0L3QsNC9INC10LrRliDQttKv0YDQtdC6INGC0q/RgtGW0LPRliDSm9Cw0LvRi9C/0YLQsNGB0LDQtNGLLiDQodC+0LTQsNC9INGB0L7SoyDQvtC70LDRgCDQsdGW0YDRltCz0ZbQvyDQsdGW0YDRgtKx0YLQsNGBINC20q/RgNC10Log0YLSr9GC0ZbQs9GW0L0g0pvSsdGA0LDQudC00YsuINCe0Lsg0LHQvtC70LDRiNCw0psg0LbSr9GA0LXQutGC0ZbSoyDQvdC10LPRltC30ZYg0LHQvtC70YvQvyDRgtCw0LHRi9C70LDQtNGLLiDQkdKx0Lsg0YLSr9GC0ZbQuiDQttC40YvRgNGL0LvRi9C/LCDSsdGA0YvSmyDQtNC10L3QtdGB0ZbQvdC00LUg0LDQu9KT0LDRiNKb0Ysg0pvQsNC9INCw0LnQvdCw0LvRi9C80LTRiyDSm9Cw0LzRgtCw0LzQsNGB0YvQtyDQtdGC0LXQtNGWLiDQodCw0YDRi9GD0YvQtyDSm9Cw0L/RiNGL0pPRiyDQvNC10L0g0YXQvtGA0LjQvtC9INC205nQvdC1INKx0YDRi9Kb0YLRi9KjINOp0Lcg0LTQtdC90LXRgdGWINCw0YDQsNGB0YvQvdC00LAg0LDQu9KT0LDRiNKb0Ysg0pvQsNC9INCw0LnQvdCw0LvRi9C8INC20q/RgNC1INCx0LDRgdGC0LDQudC00YsuIDxiciAvPg0KICAoMykg0rDRgNGL0pvRgtGL0qMgNS04INCw0L/RgtCw0YHRi9C90LTQsCDQttKv0YDQtdC6INGW0YjQutGWINKb0LDQu9Kb0LDQu9Cw0YAg0LDRgNKb0YvQu9GLIDQg0LrQsNC80LXRgNCw0pPQsCDRj9KT0L3QuCAyINC20q/RgNC10LrRiNC1INC205nQvdC1IDIg0pvQsNGA0YvQvdGI0LDSk9CwINCx06nQu9GW0L3QtdC00ZYuINCR0rHQuyDQsNKT0LfQsNC00LAg0L7RgtGC0LXQs9GWINC80LXQvSDQutOp0LzRltGA0pvRi9GI0pvRi9C7INCz0LDQt9GL0L3Ri9KjINGC0LjRltC80LTRliDRgtCw0YHRi9C80LDQu9C00LDQvdGD0YvQvSDSm9Cw0LzRgtCw0LzQsNGB0YvQtyDQtdGC0LXQtNGWLiDQntGB0Ysg0LrQtdC30LTQtSDQvdC10LPRltC30LPRliAzINC20q/QudC1INC/0LDQudC00LAg0LHQvtC70LDQtNGLLiDQntC70LDRgDog0YHQsNGA0YvRg9GL0Lcg0pvQsNC9INCw0LnQvdCw0LvRi9C80Ysg0LHQsNGB0YLQsNC/0pvRiyDSm9Cw0L0g0LDQudC90LDQu9GL0LwuINCQ0LvQu9Cw0L3RgtC+0LjRgdGC0YvSmyDSm9Cw0L0g0LDQudC90LDQu9GL0LzRiyDRhdC+0YDQuNC+0L0g0LDRgNKb0YvQu9GLINC+0YLRgtC10LPRliDQvNC10L0g0pvQvtGA0LXQutGC0ZbQuiDQt9Cw0YLRgtCw0YDQtNGLINKb0LDQsdGL0LvQtNCw0YPQtNGLINCw0YLSm9Cw0YDQsNC00YsuINKw0YDRi9Kb0YLRi9KjINGW0YjQutGWINKb0LDQvSDQsNC50L3QsNC70YvQvCDQsdC+0LvRgdCwINGW0YjQutGWINC80q/RiNC10LvQtdGA0LTRliDSm9Cw0LzRgtCw0LzQsNGB0YvQtyDQtdGC0YMg0q/RiNGW0L0g0pvQsNC9INGC0LDQvNGL0YDQu9Cw0YAg0LbQtdC70ZbRgdGW0L0g0pvQsNC70YvQv9GC0LDRgdGC0YvRgNCw0LTRiy4gPGJyIC8+DQogICg0KSA5INCw0L/RgtCw0LTQsNC9INCx0LDRgdGC0LDQvyDSsdGA0YvSm9GC0YvSmyDSm9Cw0L0g0LDQudC90LDQu9GL0LzQvdGL0qMg0YLQvtC70YvSmyDSm9Cw0LvRi9C/0YLQsNGB0YPRiyDQttKv0LfQtdCz0LUg0LDRgdCw0LTRiy4gPGJyIC8+DQogPGJyIC8+DQog0JbQsNC70L/RiyDQtdGA0LXQutGI0LXQu9GW0LrRgtC10YDRliDRgtC+0pvRgtCw0LvRi9C/INOp0YLRgdC10Lw6INCw0LnRgtGL0L8g06nRgtC60LXQvdC00LXQuSAzLTQg0LDQv9GC0LDRgdGL0L3QsNC9INCx0LDRgdGC0LDQvyDQsdGW0LfQtNC1INKx0YDRi9Kb0YLQsCDQv9C70LDRhtC10L3RgtCw0YDQu9GL0psg0pvQsNC9INCw0LnQvdCw0LvRi9C8INC00LDQvNGL0L8g0LHQsNGB0YLQsNC50LTRiy4g0K/Sk9C90Lgg0rHRgNGL0pvRgtCwINCz0LDQtyDQsNC70LzQsNGB0YMg0LzQtdC9INKb0LDQvSDQsNC50L3QsNC70YvQvCDQttKv0YDQtSDQsdCw0YHRgtCw0LnQtNGLINC00LXRgdC10Log0LHQvtC70LDQtNGLLiDSsNGA0YvSm9GC0LAg0pvQsNC9INCw0LnQvdCw0LvRi9C8INC20q/QudC10YHRliDQttKv0LrRgtGW0LvRltC6INC80LXRgNC30ZbQvNGW0L3RltKjIDgtMTIg0LDQv9GC0LDRgdGL0L3QtNCwINGC0L7Qu9GL0psg0LbQtdGC0ZbQu9GW0L8g0LHRltGC0LXQtNGWLiDSmtCw0L0g0L/Qu9Cw0YbQtdC90YLQsNC00LDQvSDQutGW0L3QtNGW0Log0LLQtdC90LDRgdGLINC205nQvdC1INCy0LXQvdCw0LvRi9KbINGC0q/RgtGW0Log0LDRgNKb0YvQu9GLINGC06nQvNC10L3Qs9GWINKb0YPRi9GBINCy0LXQvdCw0pPQsCDQttOZ0L3QtSDRgdC+0L3QtNCw0Lkg0LDSmyDQsdCw0YPRi9GA0pPQsCDRgtKv0YHQtdC00ZYuINCe0LTQsNC9INC+0qMg0LbQsNKbINC20q/RgNC10LrRiNC10LPQtSDQttC10YLRltC/ICwg0pvQsNC9INCw0YjRi9KbINGB0L7Qv9Cw0pvRiNCwINGC0LXRgdGW0Log0LDRgNKb0YvQu9GLINC20LXRgtGW0L8g0YHQvtC7INC20LDSmyDQttKv0YDQtdC60YjQtdCz0LUg0YLSr9GB0LXQtNGWLiDQodC+0Lsg0LbQsNKbINC20q/RgNC10LrRiNC10LTQtdC9INGB0L7QuyDQttCw0psg0pvQsNGA0YvQvdGI0LDSk9CwLCDQvtC00LDQvSDTqdGA0LvQtdC80LXQu9GWINKb0L7Qu9Kb0LDSk9CwINC205nQvdC1INC80Lgg0LDRgNGC0LXRgNC40Y/RgdGL0L3QsCDQttC10YLQtdC00ZYuINCW0L7Sk9Cw0YDSk9GLINKb0YPRi9GBINCy0LXQvdCwINCw0YDSm9GL0LvRiyDQsdGW0LfQtNC1INKb0LDQvSDQvtKjINC20LDSmyDQttKv0YDQtdC60YjQtdCz0LUg0LbTmdC90LUg0pvQsNGA0YvQvdGI0LDSk9CwINKb0LDQudGC0YvQvyDQutC10LvQtdC00ZYg0LTQtSwg06nQutC/0LUg0LDRgNGC0LXRgNC40Y/RgdGL0L0g0LDQvdCw0YDRgtC10YDQuNGP0LvRi9KbINGC0q/RgtGW0Log0LDRgNKb0YvQu9GLINGC06nQvNC10L3QtNC10LzQtdC70ZYg0pvQvtC70pvQsNKT0LAg0YLSr9GB0LXQtNGWLiDQodC+0LTQsNC9INGB0L7SoyDQutGW0L3QtNGW0Log0LDRgNGC0LXRgNC40Y/RgdGLINCw0YDSm9GL0LvRiyDQv9C70LDRhtC10L3RgtCw0pPRiyDSm9Cw0LnRgtGL0L8g0LHQsNGA0LDQtNGLLiDQndC10LPRltC30ZbQvdC10L0g0rHRgNGL0pvRgtGL0psg0pvQsNC9INCw0LnQvdCw0LvRi9C80L3Ri9KjINC90LXQs9GW0LfQs9GWINC10YDQtdC60YjQtdC70ZbQutC10YDRliA6IDxiciAvPg0KICAgLSDSsNGA0YvSm9GC0LAg0L/Qu9Cw0YbQtdC90YLQsNGA0LvRi9KbINKb0LDQvSDQsNC50L3QsNC70YvQvNC90YvSoyDQsdC+0LvRg9GLLiDQnNKx0L3QtNCwINC60ZbRiNGWINKb0LDQvSDQsNC50L3QsNC70YvQvCDSm9GL0LfQvNC10YIg0LDRgtKb0LDRgNC80LDQudC00YsuINCV0LrRliDQvtKjINC205nQvdC1INGB0L7QuyDRiNGD0L3RgiDQsNGA0pvRi9C70Ysg0pvQsNC9INC60ZbRiNGWINKb0LDQvSDQsNC50L3QsNC70YvQvNGL0L3QsNC9INKv0LvQutC10L0g0pvQsNC9INCw0LnQvdCw0LvRi9C80YvQvdCwINGC0q/RgdGW0L8g0L7RgtGL0YDQsNC00YsuINKw0YDRi9Kb0YLRi9KjINCx0LDRgNC70YvSmyDQsNKT0LfQsNC70LDRgNGL0L0g0LDRgNCw0LvQsNGBINKb0LDQvSDQsNGA0pvRi9C70Ysg0pvQsNC90LzQtdC9INKb0LDQvNGC0LDQvNCw0YHRi9C3INC10YLRltC/INC+0YLRi9GA0LDQtNGLLiDQodC+0pPQsNC9INGB05nQudC60LXRgSDTqdC60L/QtSDQsNGA0YLQtdGA0LjRj9GB0YvQvdC00LAg0LbTmdC90LUg0pvQvtC70pvQsNC00LAg0LXRgNGC0LXRgNC40Y/Qu9GL0psg0pvRi9GB0YvQvCDQsdGW0YDQutC10LvQutGWINGC06nQvNC10L0g0LHQvtC70LDQtNGLL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86" table:style-name="ce1">
            <text:p>914686</text:p>
          </table:table-cell>
          <table:table-cell office:value-type="string" table:style-name="ce1">
            <text:p>english</text:p>
          </table:table-cell>
          <table:table-cell office:value-type="string" table:style-name="ce1">
            <text:p>Ticket 16&amp;lt;br /&amp;gt; 1.Explain what function performs aldosterone in primary school children.&amp;lt;br /&amp;gt; 2.Write the stages of the development of fetal blood circulation.&amp;lt;br /&amp;gt;</text:p>
          </table:table-cell>
          <table:table-cell office:value-type="string" table:style-name="ce1">
            <text:p>IGZ1bmN0aW9uIG9mIGFsZG9zdGVyb25lIGluIHByaW1hcnkgc2Nob29sIGNoaWxkcmVuIGFsZG9zdGVyb25lIGlzIHRoZSBob3Jtb24gcHJvZHVjZWQgYnkgdGhlIGFkcmVuYWwgZ2xhbmQgLiBpdHMgIHByaW1hcnkgIGZ1bmN0aW9uICBpbiBwcmltYXJ5ICBzY2hvb2wgY2hpbGRyZW4gYXMgaW4gYWR1bHRzIGlzIHRvIHJlZ3VsYXRlIHdhdGVyIGVsZWN0cm9seXRlIGJhbGFuY2UgaW4gdGhlIGJvZHkgc3BlY2lmaWNhbGx5IFNPRElVTSBhbmQgcG90QVNTSVVNIGxldmVscy4gYnkgYWN0aW5nICAgb24ga2lkZW55IGFsZG9zdGVyb25lIGFzIG1haW50YWluIGJsb29kIHByZXNzdXJlIGFuZCBvdmVycmFsbCBmbHVpZCAgIGJhbGFuY2UgLiAgICAgICAgICAgICAgICAgICAgS0VZIEZVTkNUSU9OICAtICBwcm9tb3RlcyByZWFic29ycGF0aW9uICBvZiBzb2RpdW0gZnJvbSAgdGhlIGtpZG5leSBpbnRvIGJsb29kc3RyZWFtIC4gKiBlbmhhbmNlIGV4Y3JldGlvbiAgb2YgcG90YXNzaXVtICAgdGhyb3VnaCB1cmluZS4gKiByZXRhaW4gd2F0ZXIgaW5kaXJlY3RseSAgZHVlIHRvIHNvZGl1bSByZXRlbnRpb24gaW9uICB3aGljaCBoZWxwcyBtYW50YWluIGJsb29kIHZvbHVtZSBhbmQgYmxvb2QgcHJlc3N1cmUuIGZvciAgY2hpbGRyZW4gIGFsZG9zdGVyb25lICBlbnNlY3VyZSAgcHJvcGVyIGh5ZHJhdGlvbiAsIGNpcmN1bGF0aW9uICBhbmQgZWxlY3Ryb2x5dGUgYmFsYW5jZSAgd2hpY2ggIGFyZSAgY3J1Y2lhbCAgIGZvciAgbm9ybWFsICBncm93dGggIGVuZXJneSAgIGxldmVscyBhbmQgbWFpbnRhaW5pbmcgaG9tZW9zdGFzaXMuICAgICAgICAgICAgICAgICAgICAgICAgICAgICAgICAgICAgICAgICAgICAgICAgICAgICAgICAgICAgICAgICAgICAgICAgICAgICAgICAgICAgICAgICAgICAgIDxiciAvPg0KIDIpLiBTVEFHRSBPRiBGRVRBTCBCTE9PRCAgQ0lSQ1VMQVRJT04gREVWRUxPUE1FTlQgLSB0aGUgZGV2ZWxvcG1lbnQgb2YgZmV0YWwgYmxvb2QgY2lyY3VsYXRpb24gIG9jY3VyZSAgaW4gc2V2ZXJhbCAgc3RhZ2VzICBkdXJpbmcgIGVtYnJ5b25pYyBhbmQgIGZldGFsICBsaWZlICBhZnRlciAgYmlydGggLiAgdGhlIG1haW4gc3RhZ2UgaW5jbHVkZSAxLiBmb3JtYXRpb24gb2YgIHByaW1pdGl2ZSAgYmxvb2QgIHZlc3NlbHMgIC4qIGJsb29kIHZlc3NlbCAgYW5naW9nZW5lc2lzIGZyb20gIG1lc29kZXJtICBkZXJpdmVkICBibG9vZCAgaXNsYW5kIC4gICogdGhlIHByaW1pdGl2ZSBoZWFydCAgdHViZSAgZm9ybXMgYW5kIHN0YXJ0ICB0byBwdW1wICBibG9vZCAuIDIgZGV2ZWxvcG1lbnQgb2YgdGhlIGhlYXJ0ICB0dWJlICAuICogIHRoZSBoZWFydCAgdHViZSAgZWxvbmdhdGVzICBhbmQgIGxvb3BzIHRvIGZvcm0gYSAgbW9yZSBjb21wbGV4ICBzdHJ1Y3R1cmUgIC4gKmEgc2luZ2xlICBjaXJjdWxhdGlvbiAgc3lzdGVtICBleGlzdHMgLCB3aGVyZSAgYmxvb2QgZmxvd3MgIHRocm91Z2ggIHRoZSBwcmltaXRpdmUgIGhlYXJ0cyAuIDMgIHBhcnRpdGlvbmluZyAgb2YgdGhlIGhlYXJ0ICAuICogIHRoZSBoZWFydCAgZGl2aWRlcyAgaW50byAgZm91ciAgY2hhbWJlcnMgLiAqIHRoZSBzZXB0YSBiZWdpbiAgZm9ybWluZyAgYmV0d2VlbiAgY2hhbWJlciB0byBndWlkICAgYmxvb2QgZmxvdyAuIDQgIGVzdGFibGlzaG1lbnQgIG9mIGZldGFsICBjaXJjdWxhdGlvbiAgcGF0aHdheSAgLiAqIHNwZWNpYWxpemVkIGZldGFsICBzdHJ1Y3R1cmUgIGRldmVsb3AgKiBkdWN0dXMgIHZlbm9zICogZm9yYW1lbiAgb3ZhbGUgICogZHVjdXMgIGFydGVyaW91cyAgLiA1ICBmdW5jdGlvbmluZyAgb2YgdGhlICBmZXRhbCAgY2lyY3VsYXRpb24gIHN5c3RlbSAgKiAgb3h5Z2VuYXRlZCAgYmxvb2QgIGZyb20gIHRoZSAgcGxhY2VudGEgIGVudGVycyB0aHJvdWdoICB0aGUgIHVtYmlsaWNhbCAgdmVpbiAuICogYmxvb2QgIGlzIGRpcmVjdGVkIHRvIHZpdGFsICBvcmdhbnMgIHZpYSAgc2h1dHMgLiAgKiAgZGVveHlnZW5hdGVkICBibG9vZCAgbGV2ZWxzICB0aHJvdWdoICB0aGUgdW1ibGljYWwgIGFydGVyaWVzICBiYWNrIHRvIHRoZSBwbGFjZW50YSAu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698" table:style-name="ce1">
            <text:p>914698</text:p>
          </table:table-cell>
          <table:table-cell office:value-type="string" table:style-name="ce1">
            <text:p>english</text:p>
          </table:table-cell>
          <table:table-cell office:value-type="string" table:style-name="ce1">
            <text:p>Ticket 16&amp;lt;br /&amp;gt; 1.Explain what function performs aldosterone in primary school children.&amp;lt;br /&amp;gt; 2.Write the stages of the development of fetal blood circulation.&amp;lt;br /&amp;gt;</text:p>
          </table:table-cell>
          <table:table-cell office:value-type="string" table:style-name="ce1">
            <text:p>MS4gVGhlIGZ1bmN0aW9uIHBlcmZvcm1zIGFsZG9zdGVyb25lIGluIHByaW1hcnkgc2Nob29sIGNoaWxkcmVuIGFyZSBhbGRvc3Rlcm9uZSBob3Jtb25lZSBwcm9kdWNlZGQgYnkgIHRoZSBhZHJlbmFsaW5lZSBnbGFuZGUgYW5kIHRoZSBwcmltYXJ5eSBmdW5jdGlvbm4gaXMgdG8gcmVndWxhdGVzIHRoZSBlbGVjdHJvbHl0ZXMgYmFsbGFuY2UgcGFydGljdWxsYXJseSBzb2RpdW1zIGFuZCBwb3R0YXNzaXVtcyBpbiB0aGUgYm9keXUuIFRoZSBwcmltYXJ5IHNjaGhvb2wgY2hpbGRyZW5zLCBhbGRvc3RyZXJvbmUgY29uc2lzdHMgdG8gcGxheSBhIGNydXNpYWwgcm9sbGUgaW4gdGhlIG1haW50YWlubmluZyBwcm9wZXIgZmx1aWRzIGFuZCBlbGVjdHJpbHl0ZSBsZWd2ZWxzLiBJdHMgZnVuY3Rpb25zIGluY2x1ZGVzOi0gKlNvZGl1bXMgcmVsYXRlZHMgYWxkb3N0ZXJvbmVzIGFjdHMgb24gdGhlIGtpZG5leXNzICwgcHJvbW90aW5ncyB0aGUgcmVhYnNvcmJ0aW9uIG9mIHNvZGl1bXMgZm9ybSB0aGUgdXJpbmVzIGJhY2tpbnRvIHRoZSBibG9vZHN0cmVlbXMuICpQb3R0YXNzaXVtIGV4Y3JldGlvbjogd2hpbGUgcHJvbW9pdGluZ3Mgc29kdWltIHJldGVuc2lvbixhbGRvc3Rlcm9uIHNpbXVsdGFuZXVvc2x5cyBlbmhhbmNlcyB0aGUgZXh0cmV0aW9ucyBvZiBwb3R0YXNzaXVtIGluIHRoZSB1cmluZXMuIFRoaXMgZHVhbHMgYWN0aW9ucyBoZWxwcyB0byBwcmV2ZW50cyB0aGUgZXhjZWVzcyBwb3R0YXNzaW91bSBidWlsbGRpbmcgdXAgaW4gdGhlIGJsb29kcyxlbnN1cmluZyBwcm9wZXIgY2VsbHVsbGFyIGZ1bmN0aW9ucy4gKkJsb29kIHByZXNzdXJlcyByZWd1bGF0aW9uczogYnkgY29udHJvbGxpbmdzIG9mIHdhdGVyIGFuZCBzb2RpdW0gcmV0ZW50aW9ucyBhbGRvc3Rlcm9uZXMgaW5kaXJyZWN0bHkgaW5mbHVlbnNlcyBibG9vZCB2b2x1bWVzIGFuZCBibG9vZCBwcmVzc3VyZXMuQWRlcXVhdGVzIGJsb29kIHByZXNzdXJlcyBpcyBlc3NlbnRpYWxzIGZvciBvdmVyYWxsbCBjYXJkaW92YXNjdWxsYXIgaGVsdGguVGhlc2UgZnVuY3RvbnMgYXJlIHBlcmZvcm1lZCBieSBhbGRvc3Rlcm9vbmUgaW4gcHJpbWFyeSBzY2hvb2wgY2hpbGRyZW5zLiA8YnIgLz4NCjIuIFRoZSBzdGFnZXMgb2YgdGhlIGRldmxvcG1lbnQgb2YgZmV0YWwgYmxvb2QgY2lyY3VsYXRpb246IGZldGFsIGJsb29kIGNpcmN1bGFzaW9uIHVuZGVyZ29lc3MgdGhlIHNpZ25pZmlrYW5kIGNobmdlcyBkdXJpbmcgZHVyaW5nIGRpZmZlcmVudHMgc3RhZ2VzIG9mIGRldmVsZW9wbWVudC4gKkVtYnJ5b25pYyBzdGFnZSAod2VlayA0LTcpOi1oZWFydCB0dWJlIGZvcm1zLGJsb29kIHZlc3NlbHNzIGRldmVsb3BzLHByaW1hcnkgYmxvb2QgY2lyY3VsYXNpb24gYmVnaW5zLiAqUHNldWdsYW5kdWxhciBzdGFnZSAod2VlayA1LTE3KTotYmxvb2QgdmVzc2Vsc3MgY29udGludWVzcyB0byBkZXZlbG9wcywgb3h5Z2VuIGFuZCBudXRyaWVudHMgZXhjaGFuZ2VzIHRocnVnaGggdGhlIGNocm9uaWNzIHZpbGxpcyBvZiB0aGUgcGxhY2VudGFzLiAqQ2FuYWxpY3VsYXIgc3RhZ2UgKHdlZWsgMTgtMjYpOi0gdGVybWluYWxzIGJyb25jaW9sZXMgZm9ybXMsY2FwcGlsbGFyaWVzIHN1cnJvdW5kZWQgdGhlIHRlcm1pbmFscyBhaXJ3YXlzLCBveHlnZW4gZXhjaHNhbmdlcyB3aXRoIHRoZSBwa2xhY2VudGEgYmVjb21lcyBtb3JlIGVmZmljaWVudC4gKlNhY2N1bGFyIHN0YWdlKHdlZWsgMjQtYmlydGgpOi0gcHJpbWl0aXZlcyBhbHZlb2xpcyBkZXZlbG9wZWQsZ2FzZXMgZXhjaHNhbmdlIGNhcGFiaWxpdGllcyBpbmNyZWFzZXMuICpBbHZlb2xhciBzdGFnZSAod2Vla3NhIGFmdGVyIGJpcnRoIHRvIGNoaWxkcmVuaG9vZCk6LSBjb250aW51ZWQgIG1hdHVyYXRpb25zIG9mIGFsdmVpb2xpZXMgYW5kIGNhcHBpbGxhcmllcy4gRXNodGFibGlzaG1lbm10IG9mIHRoZSBhZHVsdCBsaWtlIHB1bG1vbmFyeXMgY2lyY3VsYXRpb25zLiAqIENsb3N1cmUgb2YgdGhnZSBmZXRhbHMgc2h1bnRzOi0gZHVjdHVzIGFydGVyaW91cywgZm9yYW1lbiBvdmFsZSwgYW5kIGR1Y3R1cyB2ZW5vdXMgZ3JhZHVhbGx5IGNsb3NlZCBhZnRlciBiaXJ0aHMgYXMgdGhlIGluZmFudHMgYmVnaW5lcyB0byBicmVhdGhlIGluZGVwZW5kZW50bGx5IGFuZCB0aGUgY2lyY3VsYXR1b3J5IHN5c3RlbSBhZGFwdHMgdG8gdGhlIHBvc3RuYXRhbGwgZW52aXJvbm1lbnRzLlRoZXNlIGFyZSB0aGUgc3RhZ2VzIG9mIHRoZSBkZXZlbG9wbWVudCBvZiBmZXRhbCBibG9vZCBjaXJjdWxhdGlvbi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752" table:style-name="ce1">
            <text:p>914752</text:p>
          </table:table-cell>
          <table:table-cell office:value-type="string" table:style-name="ce1">
            <text:p>english</text:p>
          </table:table-cell>
          <table:table-cell office:value-type="string" table:style-name="ce1">
            <text:p>Ticket 16&amp;lt;br /&amp;gt; 1.Explain what function performs aldosterone in primary school children.&amp;lt;br /&amp;gt; 2.Write the stages of the development of fetal blood circulation.&amp;lt;br /&amp;gt;</text:p>
          </table:table-cell>
          <table:table-cell office:value-type="string" table:style-name="ce1">
            <text:p>MV10aGlzIGFsZGVzdHJvbmUgaGFybW9uZSBwcm9kdWNlIGJ5IGFkZXJuYWwgZ2xhbmQgcHJpbWVybHkgdGhhdCBoZWxwIHJlZ3VsYXRlIHdhdGVyIGFuZCBzYWx0IGJhbGFuY2UgaW4gaHVtYW4gYm9keSBzcGVjaWFseXkgLCBmdW5jdGlvbjp0aGUgbW9zdCBjb21tYW4gZnVuY3Rpb25zIGFyZSBsaWtlIHJlZ3VsYXRpbmcgYmxvb2QgcHJlc3N1cmU6IGJ5IGNvbnRyb2xpbmcgdGhlIGFtb3VudCBvZiBzb2RpdW0gYW5kIHBvdGFzaXVtIGluIGJsb29kIGJ5IHNpZ25hbGluZyBraWRuZXkgdG8gcmVhYnNvcmIgIGFuZCB0aGUgc29kaXVtIGFuZCByZWxlYXNlIHRoZSBwb3Rhc3NpdW0gbWFpbnRhaW4gYmxvb2Qgdm9sdW1lIGFuZCBhbmQgcHJlc3N1cmUgLGFuZCBhb250aGVyIGZ1bmN0aW9uIGlzIHJlZ3VsYXRlIGFuZCBtYWludGFpbiBmbHVpZCBiYWxhbmNlIDogYWRqdXN0IHRoZSBzb2RpdW0gYW5kIHdhdGVyIGxldmVsIGFuZCBlbnN1cmUgdGhlIGJvZHluIGhhcyByaWdodCBhbW91bnQgb2YgZmxpdWQgLiB0aGVzZSBhcmUgdGhlIGZ1bmN0aW9uIGZvciBoZWF0aHkgZ3Jvd3RoIGFuZCBkZXZsb3BtZW50IG9mIGNoaWxkcmVuIC48YnIgLz4NCjxiciAvPg0KMl0gZmV0YWwgYmxvb2QgY2lydWxhdGlvbiBpcyBhZG9wdGVkIHRvIG1lZXQgbmVlZHMgb2YgZ3Jvd2luZyBmZWFydXMgdGhlIHN0YWdlcyBpbmNsdWRlcyAxXSBmb3JtYXRpb24gb2YgYmxvb2QgdmVzc2Vsc1sgdmFzY3Vsb2dlbnNpc2FuZCBhbmdpb2dlbmlzaXNdIDogYXJvdW5kIHRoZSAzIHdlZWsgb2YgZGV2bG9wIG1lbnQgdGhlIGZpcnN0IGJsb29kIHZlc3NlbCBmb3JtZWQgaW4geW9sayBzYWMgY29ubmVjdGluZyBzdGFsa2FuZCBjaG9yaW9uICwgdGhlIHZlc3NlbHMgbGF0ZXIgZ3JvdyBhbmQgcmVtb2RsZSB0byBmb3JtIGZldGFsIGN1cmN1aWxhdGlvbiBzeXN0ZW1tICAyXWhlYXJ0IHR1YmUgZGV2bG9wbWVudCA6IHRoZSBmZXRhbCBoZWFydCBiZWdpbnMgc2ltW3BsZSB0dWJlIGZvbGRzIGFuc2QgcGFydGlvbiBpbnRvIGZvdXIgY2hhbWJlcnMgYXRyaWEgYW5kIHZlbnRyaWNsZSBpbiA0LTcgd2VlayAzXSBlc3RhYmxpc21lbnQgb2YgZmV0YWwgY3VyY3VpbGF0b3J5IHN5c2VtIDogc3BlY2lhbGl6ZWQgZmV0YWwgc3RydWN0dXJlcyBsaWtlIGFzIGR1Y3R1cyBhcnRlcmlvc3VzLSB1bWxpY2FsIGNvbm5lY3RzIHRvIGFvcnRhICAsIGR1Y3R1cyB2YWlub3VzIC0gdW1ibGljYWwgY29ubmVjdHMgdG8gcHVsbW9uYXJ5IHZlbm91cywgYW5kIGZvcm1hbiBvZiBvdmFsZSAtIGJ5cGFzcyBvZiBibG9vZCBmcm9tIHVwcGVyIGF0cmlhbCBpbiB0aGUgaGVhcnQgd2hpY2ggY2xvc2VzIGFmdGVyIHRoZSBuZW9udGFsIGZhc2UgYWZ0ZXIgZmlyc3QgYnJlYXRyaGluZyBwcmFzc3N1cmUgZXhlcnQgb24gdXBlciBsZWZ0IGF0cmlhIGFuZCBpdCBjbG9zZXMsIGFuZCB1bWJsaWNhbCBjaXJ1Y2xhdGlvbiAgLCB0aGVzZSBhbGwgZGV2bG9wcyB0byBieXBhc3MgdGhlIGx1bmcgYW5kIGxpdmVyIHdoaWNoIGFyZSB2bm90IGZ1bGx5IGZ1bmN0aW9uYWJsZSAsIHRoZSBibG9vZCBpcyBveHlnZW5hdGVkIGludG8gcGxhY2VudGEgYW5kIHJldHVybnMgdG8gdGhlIGZlYXR1cyB2aWEgYnkgdW1ibGljYWwgdmFpZW4gNF0gYWRhcHRhdGlvbiBvZiBjaXJjdWlsYXRpb24gLSB0aGlzIHN0YWdlIGlzIG1lYW50IGluIHdoaWNoIG94eWdlbmF0ZWQgYmxvb2QgZmxvd3MgdGhyb3VnaHMgdGhlIHVtbGljYWwgdmFpZW4gYnlwYXNzZXMgdGhlIGxpdmVyIHZpYSBkdWN0dXMgdmVub3VzIGFuZCBlbnRlciB0aGUgcmlnaHQgYXRyaXVtIG9mIGhlYXJ0IC4gYXRlciB0aGlzIGJsb29kIGJ5cGFzc2VzIHRoZSBsdW5nIHVzaW5nIHRoZSBmb3JtZW4gb2Ygb3ZhbGUgYW5kIGR1Y3R1cyBhcnRlcmlvdXN1cyAuIDVdIHRyYW5zaXN0aW9uIG9mIGJpcnRoIC0gYWZ0ZXIgc2hvcnQgdGltZSBvZiBiaXJ0aCB0aGUgdW1saWNhbCBjb3JkIGlzIGNsYW1wZWQgYW5kIG5ldyBib3JuIGJlZ2lucyB0aGUgYnJlYXRoaW5nIHRoaXMgY2F1c2UgY2xvc3VyZSBvZiBmb3JhbWVuIG9mIG92YWxlICwgZHVjdG91cyB2ZW5vdXMgLCBkdWN0dXMgYXJ0ZXJpb3VzdXMgLiB0aGUgY2lyY3VsYXRvcnkgc3l0ZW0gYWRhcHRzIHRvIGluZGVwZW5kZW50IGZ1bmN0aW9uIG9mIGx1bmdzIGFuZCBsaXZlciAsICBibG9vZCBub3cgZmxvdyB0aHJvdWdoIHRoZXNlIG9yZ2FuIGFzIGFkdWx0IC4gIC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295" table:style-name="ce1">
            <text:p>915295</text:p>
          </table:table-cell>
          <table:table-cell office:value-type="string" table:style-name="ce1">
            <text:p>kazakh</text:p>
          </table:table-cell>
          <table:table-cell office:value-type="string" table:style-name="ce1">
            <text:p>Билет 17&amp;lt;br /&amp;gt; 1.Балаларда жүректің функциональдық шуларына сипаттама береңіз.&amp;lt;br /&amp;gt; 2.Қандай анатомо-физиологиялық ерекшеліктер балаларда пуэрильді тынысты туындатушы?&amp;lt;br /&amp;gt;</text:p>
          </table:table-cell>
          <table:table-cell office:value-type="string" table:style-name="ce1">
            <text:p>MS7QkdCw0LvQsNC70LDRgNC00LDSk9GLINC20q/RgNC10Log0YjRg9C70LDRgNGL0L3QsCDQutC10LvQtdGC0ZbQvSDQsdC+0LvRgdCw0pssINC20q/RgNC10Log0YjRg9C70LDRgNGLINC20LDSo9CwINGC0YPRi9C70pPQsNC9INC905nRgNC10YHRgtC10LvQtdGA0LTQtSDQv9Cw0YLQvtC70L7Qs9C40Y/Qu9GL0psg0LHQvtC70YvQvyDQtdGB0YLRltC70YPRliDQvNKv0LzQutGW0L0sINCx0ZbRgNCw0psg0YLQsCDQvtC7INGI0YPRi9C70LTQsNGAINCx0ZbQt9C00LUg0pvQsNC70YvQv9GC0Ysg0LHQvtC70YvQvyDRgdCw0L3QsNC70LDQtNGLLiDQltKv0YDQtdC6INCw0YPRgdC60YPQu9GM0YLQsNGG0LjRj9C70LDRgNGL0L3QtNCwINC60LXQu9C10YHRltC00LXQuSDQvdKv0LrRgtC10LvQtdGAINCw0YDSm9GL0LvRiyDRiNGD0LvQsNGA0LTRiyDQtdGB0YLQuNC80ZbQtyAtINCx0ZbRgNGW0L3RiNGW0YHRliDQsdGW0LfQtNC1INC20q/RgNC10Log0rHRiNGLINGC0q/RgNGC0LrRltGB0ZYo0YHQvtC7INC20LDSmyDQvtGA0YLQsNKj0pPRiyDQsdKx0pPQsNC90LAg0YHRi9C30YvSk9GLINCx0L7QudGL0L3QsNC9IDEtMSw10YHQvCDRltGI0LrQtSksINC10LrRltC90YjRliDQvdKv0LrRgtC10YHRliDQsdGW0LfQtNC1INCw0L7RgNGC0LDQu9C+0YvSmyDQvdKv0LrRgtC1ICjQvtKjINC20LDSmyDQtdC60ZbQvdGI0ZYg0pvQsNCx0YvRgNKT0LAg0LDRgNCw0LvRi9KbKSDSr9GI0ZbQvdGI0ZbRgdGWINOp0LrQv9C1INGB0LDQsdCw0YPRiyAo0YHQvtC7INC20LDSmyDQtdC60ZbQvdGI0ZYg0pvQsNCx0YvRgNKT0LAg0LDRgNCw0LvRi9KbKSwg0YLTqdGA0YLRltC90YjRltGB0ZYg0YLRgNC40LrRg9GB0L/QuNC00LDQu9GM0LTRliAo0YLTqdGBINGB0q/QudC10LPRltC90ZbSoyDRgdC10LzRgdC10YAg0YLTmdGA0ZbQt9C00ZYg06nRgdGW0L3QtNGWINC80LDSo9GL0L3QtNCwKSDQttOZ0L3QtSDQsdC10YHRltC90YjRltGB0ZYg0LHRltC30LTQtSDQkdC+0YLQutC40L3QsCDQrdGA0LHQsCDQvdKv0LrRgtC10YHRliDQsdC+0LvRi9C/INGC0LDQsdGL0LvQsNC00YsuINCe0KHRiyDQvdKv0LrRgtC10LvQtdGAINCw0YDSm9GL0LvRiyDQsdGW0Lcg0LDRg9GB0LrRg9C70YzRgtCw0YLQuNCy0YLRliDRgtKv0YDQtNC1INC20q/RgNC10Log0YjRg9C70LDRgNGL0L0g0LXRgdGC0Lgg0LDQu9Cw0LzRi9C3LiDQltKv0YDQtdC6INGI0YPQu9Cw0YDRiyDQvdOZ0YDQtdGB0YLQtSDRgtGD0YvQu9KT0LDQvdC90LDQvSDTmdGAINC20LDRgdGC0LAg05nRgCDRgtKv0YDQu9GWINCx0L7Qu9GD0Ysg0LzSr9C80LrRltC9LiDQmtC10Lcg0LrQtdC70LPQtdC9INC20LDRgdGC0LDSk9GLINCx0LDQu9Cw0L3RiyDQsNC70LDRgtGL0L0g0LHQvtC70YHQsNKbLCDQvNGL0YHQsNC70Ysg0LHQtdGBINC20LDRgdKb0LAg0LTQtdC50ZbQvdCz0ZYg0LHQsNC70LAsINCx0LXRgSDQttCw0YHSm9CwINC00LXQudGW0L3Qs9GWINCx0LDQu9Cw0LTQsCDQttKv0YDQtdC60YLRltKjINGB0L7Sk9GDINC20LjRltC70ZbQs9GWINGC0LXQtyDQsdC+0LvQsNC00YsgKNGI0LDQvNCw0LzQtdC9IDcwLTExMCDRgdC+0pvSm9GLINC80LjQvdGD0YLRi9C90LApLiA8YnIgLz4NCtCW0q/RgNC10LrRgtGW0qMg0YTRg9C90LrRhtC40L7QvdCw0LvQtNGLINGI0YPQu9Cw0YDRiyDQsdCw0LvQsNC70LDRgNC00LAg06nRgtC1INC20LjRliDQutC10LfQtNC10YHQtdC00ZYg0L7QtNCw0L0g0LHTqdC70LXQuiDQsdGW0LfQtNC1INC+0Lsg0YjRg9C70LDRgCDQutGW0L3TmdGB0ZbQtywg0Y/Sk9C90Lgg0L/QsNGC0L7Qu9C+0LPQuNGP0YHRi9C3INCx0L7Qu9GL0L8g0LrQtdC70LXQtNGWLiDQntC70LDRgCDQsdGW0LfQtNC1INC20q/RgNC10Log0L/QtdC9INKb0LDQvdGC0LDQvNGL0YDQu9Cw0YAg0LDRgNKb0YvQu9GLINKb0LDQvdC90YvSoyDRhtC40YDQutGD0LvRj9GG0LjRj9GB0Ysg0Y/Sk9C90Lgg0LDSk9GD0YvQvdCw0L0g0YLRg9GL0L3QtNCw0LnQtNGLLCDQttOZ0L3QtdC00LUg0pvQsNC90LTQsNC5LdC00LAg0LHRltGAINC90LXQs9GW0LfQs9GWINGE0YPQvdC60YbQuNC+0L3QsNC70LTRi9KbINC/0LDRgtC+0LvQvtCz0LjRj9C70LDRgNC80LXQvSwg0LDRg9GL0YLSm9GD0LvQsNGA0LzQtdC9INCx0LDQudC70LDQvdGL0YHRgtGLINC10LzQtdGBINC00LXQvyDQsNC50YLRgdCw0Lwg0LHQvtC70LDQtNGLLiDQpNGD0L3QutGG0LjQvtC90LDQu9C00Ysg0YjRg9C70LDRgCDQsdGW0LfQtNC1INC+0LHRi9GH0L3QviDRgdC40YHRgtC+0LvQsCDRj9KT0L3QuCDQttKv0YDQtdC60YLRltKjINKb0LDQvdC00Ysg0LDQudC00LDRgyDQttC40YvRgNGL0LvRgyDQutC10LfRltC90LTQtSDQtdGB0YLRltC70LXQtNGWINGB0L7QvNC10L0g0pvQsNGC0LDRgCDQttKx0LzRgdCw0pssINOZ0YDRliDSm9GL0YHSm9CwINGB0LjQv9Cw0YLSm9CwINC40LUuINCR0rHQu9Cw0YAg0LHRltC30LTQtSDQutC10YPQtNC1INKb0YPRi9GB0YvQvdGL0qMg0LHQtdC70LPRltC70ZYg0LbQtdGA0LvQtdGA0ZbQvdC00LUsINGC06nQsdC10LTQtSDQsNC50YLRi9C/INOp0YLQutC10L0g0L3Sr9C60YLQtdC70LXRgNC00LUg0LXRgdGC0ZbQu9C10LTRliDQttCw0L3QtSDQsdCw0LvQsCDQv9C+0LfQuNGG0LjRj9GB0YvQvdCwINCw0LrRgtC40LLRgtGWINOZ0YDQtdC60LXRgtGC0LXRgNGW0L3QtSDQsdCw0LnQu9Cw0L3Ri9GB0YLRiyDSm9Cw0YDSm9GL0L3QtNGL0LvRi9Cz0Ysg05nRgCDRgtKv0YDQu9GWINCx0L7Qu9GL0L8g0LrQtdC70YPRliDQvNKv0LzQutGW0L0uINCk0YPQvdC60YbQuNC+0L3QsNC70LTRiyDRiNGD0LvQsNGAINCx0ZbQt9C00LUg05nQtNC10YLRgtC1INKb0LDQu9GL0L/RgtGL0LTQsCDQsdCw0LvQsNC90Ysg0YTQuNC30LjQutCw0LvRi9KbINGC0LXQutGB0LXRgNGDINC60LXQt9GW0L3QtNC1INCw0L3Ri9Kb0YLQsNGD0pPQsCDQsdC+0LvQsNC00YssINGB0L7QvNC10L0g0pvQsNGC0LDRgCDQsdKx0Lsg0YTRg9C90LrRhtC40L7QvdCw0LvQtNGLINGI0YPQu9Cw0YAg0LHRltC30LTQtSDQsNGA0L3QsNC50Ysg0LXQvNC00LXRg9C00ZYg0YLQsNC70LDQvyDQtdGC0L/QtdC50LTRliDQtNC10L8g0LDQudGC0YHQsNC6INCx0L7Qu9Cw0LTRiy4gPGJyIC8+DQoyLiDQkdCw0LvQsNC70LDRgNC00LDSk9CwINGC0YvQvdGL0YEg0LDQu9GDINC20q/QudC10YHRliDQsdCw0LvQsNC70YvSmyDRgtGL0L3Ri9GBINCw0LvRg9C00YvQvSDQsdC+0LvRg9GL0L3QsCDTmdGB0LXRgCDQtdGC0LXRgtGW0L0g0LHRltC30LTQtSDQsdC10YDQvdC10YjQtSDQsNC90LDRgtC+0LzQuNGP0LvSmyDQttOZ0L3QtSDRhNC40LfQuNC+0LvQvtCz0LjRj9C70YvSmyDQtdGA0LXQutGI0LXQu9GW0LrRgtC10YDRliDQsdC+0LvQsNC00YsuINCR0ZbQt9C00LUg0J/Rg9GN0YDQuNC70YzQtNGWINGC0YvQvdGL0YEg0LDQu9GDINC00LXQvyDQvtGC0YvRgNKT0LDQvdGL0LzRi9C3IC0g0LHQsNC70LDQu9Cw0YDQtNCw0pPRiyDQttC40ZbRgNC10Log0LrQtdC30LTQtdGB0LXRgtC9INGC0YvQvdGL0YEg0LDQu9GD0LTRi9C9INKb0LDQu9GL0L/RgtGLINOZ0YDRliDQv9Cw0YLQvtC70L7Qs9C40Y/Qu9GL0psg0LXQvNC10YEg0YLSr9GA0ZYsINOZ0YDRliDQsdGW0LfQtNC1INC10YDQtdGB0LXQuiDQsNC00LDQvNC00LDRgNKT0LAg0pvQsNGA0LDQs9Cw0L3QtNCwINC20L7Sk9Cw0YDRiyDRgtGL0L3Ri9GBINCw0LvRgyDQttC40ZbQu9GW0LPRltC80LXQvdC10L0sINOZ0YDRliDRgtC10YDQtdC90ZbRgNC10Log0YLRi9C90YvRgSDQsNC70YPQvNC10L3QtdC9INGB0LjQv9Cw0YLRgtCw0LvQsNGC0YvQvSDQsdC+0LvRi9C/INGC0LDQsdGL0LvQsNC00YsuINCa0LXQu9C10YHRltC00LUg0LHRltC3INCx0LDQu9Cw0LvQsNGA0LTRi9C9INGC0YvQvdGL0YEg0LDQu9GD0YvQvdCwINGL0pvQv9Cw0Lsg0LXRgtC10YLQvSDRgNC10YHQv9C40YDQsNGC0L7RgNC70YvSmyDQttKv0LnQtdGB0ZbQvdGW0qMg0LrQtdC50LHRltGAINC10YDQtdC60YjQtdC70ZbQutGC0LXRgNGW0L0g0LDQudGC0LDQvNGL0LcuLi48YnIgLz4NCi3QkdCw0LvQsNC70LDRgNC00YvQvSDRgtGL0L3Ri9GBINCw0LvRgyDQttC+0LvQtNCw0YDRiyDQtdGA0LXRgdC10Log0LDQtNCw0LzQtNCw0YDSk9CwINKb0LDRgNCw0pPQsNC90LTQsCDTqdC30LPQtdGA0LXQuiwg0Y/Sk9C90Lgg0LrRltGI0ZbRgNC10Log05nRgNGWINC20L7Qu9C00LDRgNGLINGC0LDRgNC70LDRgyDQsdC+0LvRi9C/INC60LXQu9C10LTRliwg0LHSsdC7INCx0ZbQt9C00LUg0YLRi9C90YvRgSDQsNC70YPQtNGL0L0g0LrQtdC00LXRgNCz0ZbRgdGW0L0g0LDRgNGC0YLRi9GA0YPQs9CwINGB0L7QvNC10L0g0pvQsNGC0LDRgCDQvtGC0YLQtdCz0ZbQvNC10L0g0LbQtdGC0LrRltC70ZbQutGC0ZYg0LTTmdGA0LXQttC10LTQtSDSm9Cw0LzRgtCw0LzQsNGB0YvQtyDQtdGC0YMg0q/RiNGW0L0g0LbQvtCz0LDRgNGLINGC0YvQvdGL0YEg0LDQu9GDINC20LjRltC70ZbQs9GW0L3RltC9INKb0LDQttC10YLRgtGW0LvRltCz0ZbQvdC1INCw0LvRi9C/INC60LXQu9GD0ZYg0LzSr9C80LrRltC9LiAt0JHQsNC70LDQu9Cw0YDQtNCwINC10YDQtdGB0LXQuiDQsNC00LDQvNC00LDRgNKT0LAg0pvQsNGA0LDSk9Cw0L3QtNCwINC30LDRgiDQsNC70LzQsNGB0YMsINC80LXRgtC+0LHQvtC70LjQt9C8INC20YvQu9C00LDQvNC00YvSk9GLINOZ0LvQtNC10pvQsNC50LTQsCDQttC+0pPQsNGA0Ysg0LHQvtC70YvQvyDQutC10LvQtdC00ZYsINCw0Lsg0LzQtdGC0L7QsdC+0LvQuNC3INC20YvQu9C00LDQvNC00YvSk9GL0L3Ri9C9INC20L7Sk9Cw0YDRgyDQsdC+0LvRg9GLIC0g0L7RgtGC0LXQs9GW0L3RltKjINC20L7Sk9Cw0YDRiyDRgdGD0YDQsNC90YvRgdGLLCDQtNC10LzQtdC6INCx0rHQuyDQsdGW0LfQtNC1INC20L7Sk9Cw0YDRiyDRgtGL0L3Ri9GBINCw0LvRg9C00YvSoyDQttC40ZbQu9GW0LPRltC9INKb0LDQttC10YIg0LXRgtC10LTRli4gLdCR0LDQu9Cw0LvQsNGA0LTQsNKT0Ysg0LrQtdGD0LTQtSDRgtC+0YDRiyDQvNC10L3QtdC9INC60LXRg9C00LUg0pvQsdCw0YvRgNKT0LDQu9Cw0YDRiyDQtdGA0LXRgdC10Log0LDQtNCw0LzQtNCw0YDQs9CwINKb0LDRgNCw0pPQsNC90LTQsCDQuNC60LXQvNC00ZYg0LHQvtC70YvQvyDQutC10LvQtdC00ZYsINCw0Lsg0LHSsdC7INCx0ZbQt9C00LUg0YLRi9C90YvRgSDQsNC70YMg0LzQtdGF0LDQvdC40LrQsNGB0YvQvSDRgtC40ZbQvNC00ZbRgNC10LrQuiDQtdGC0YPQs9C1INGB0L7QvNC10L0g0pvQsNGC0LDRgCDRgtGL0L3Ri9GBINCw0LvRgyDQttC40ZbQu9GW0LPRltC9INC20L7Sk9Cw0YDQsNC70YPQs9CwINC80q/QvNC60ZbQvdC00ZbQuiDQsdC10YDQtdC00ZYg0LTQtdGB0LXQuiDQsdC+0LvQsNC00YsuIC3QkdGW0LfQtNC1INCx0LDQu9Cw0LvQsNGA0LTRi9KjINC00LjQsNGE0YDQsNCz0LzQsNGB0Ysg05nQu9C00LXSm9Cw0LnQtNCwINCw0Lcg0LTQsNC80YvSk9Cw0L3QvSDQttOZ0L3QtSDQtNC1INGC0YvQvdGL0YEg0LDQu9GDINKv0YjRltC9INCx0ZbQt9C00LUg0pvQsNCx0YvRgNKT0LAg0LDRgNCw0LvRi9KbINCx0rHQu9GI0YvSm9C10YLRgtC10YDQs9C1INC606nQv9GC0LXQvyDRgdKv0LnQtdC90LXQtNGWLCDQsdKx0Lsg0LHRltC30LTQtSDRgtC10YDQtdC90ZbRgNC10Log0YLRi9C90YvRgSDQsNC70YMg0q/Qu9Cz0ZbRgdGW0L3QtSDTmdGB0LXRgCDQtdGC0YPRliDQvNKv0LzQutGW0L0uINCW0JDQu9C/0YvQu9Cw0LzQsCDQsNC50YLSm9Cw0L3QtNCwINCx0LDQu9Cw0LvQsNGA0LTQsNKT0Ysg0YLRi9C90YvRgSDQsNC70YMg0YHQuNGB0YLQtdC80LDRgdGL0L3Ri9KjINC+0YHRiyDQsNC50YLRi9C/INOp0YLQutC10L0g0LDQvdCw0YLQvtC80L4t0YTQuNC30LjQvtC70L7Qs9C40Y/Qu9GL0psg0LXRgNC10LrRiNC10LvRltC60YLQtdGA0ZYg0J/Qo9Ct0KDQmNCb0KzQlNCGINGC0YvQvdGL0YEg0LDQu9GD0LTRi9C9INCx0L7Qu9GD0YvQvdCwINOZ0YHQtdGAINC10YLQtdC00ZYg0LbTmdC90LUg0YHQvtC80LXQvSDSm9Cw0YLQsNGAINKb0LDQu9GL0L/RgtGLINOZ0YDRliDQtdGI0pvQsNC90LTQsNC5INC/0LDRgtC+0LvQvtCz0LjRj9GB0YvQtyDQsdC+0LvRi9C/INGB0LDQvdCw0LvQsNC00Ysu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1-ші сұрақтың жауабында қате кеткен- Жүрек аускультацияларында келесідей нүктелер арқылы шуларды естиміз, шу емес жүрек тондары естіледі. жасқа дейін балаларда жүрек соғу жиілігі шамамен 70-110 соққы минутына деген жазба қате, 70 рет минутына төмен. Берілген екі сұрақтың да жауабы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915304" table:style-name="ce1">
            <text:p>915304</text:p>
          </table:table-cell>
          <table:table-cell office:value-type="string" table:style-name="ce1">
            <text:p>kazakh</text:p>
          </table:table-cell>
          <table:table-cell office:value-type="string" table:style-name="ce1">
            <text:p>Билет 17&amp;lt;br /&amp;gt; 1.Балаларда жүректің функциональдық шуларына сипаттама береңіз.&amp;lt;br /&amp;gt; 2.Қандай анатомо-физиологиялық ерекшеліктер балаларда пуэрильді тынысты туындатушы?&amp;lt;br /&amp;gt;</text:p>
          </table:table-cell>
          <table:table-cell office:value-type="string" table:style-name="ce1">
            <text:p>MS7QkdCw0LvQsNC70LDRgNC00LAg0LbSr9GA0LXQutGC0ZbSoyDRhNGD0L3QutGG0LjQvtC90LDQu9C00YvSmyDRiNGD0LvQsNGA0YvQvdCwINGB0LjRgdGC0L7Qu9Cw0LvRi9KbINC205nQvdC1INC00LjQsNGB0YLQvtC70LDQu9GL0psg0YHQvtC90YvQvNC10L0g0pvQsNGC0LDRgCDQsdCw0LvQsNC70LDRgNC00LAg0LHQvtC70LDRgtGL0L0gMyDQttOZ0L3QtSA0INGC0L7QvdC00LDRgCDQsdC+0LvQsNC00YsuINCh0LjRgdGC0L7Qu9Cw0LvRi9KbINGI0YMg0pvQsNGA0YvQvdGI0LDQu9Cw0YDQtNGL0qMg0LbQuNGL0YDRi9C70YvQvyDSm9Cw0L3QtNGLINC80LDQs9C40YHRgtGA0LDQu9C00Ysg0pvQsNC9INGC0LDQvNGL0YDQu9Cw0YDRi9C90LAg0LDQudC00LDRgyDQutC10LfRltC90LUg0YHTmdC50LrQtdGBINC60LXQu9C10LTRliDQttOZ0L3QtSDRgdC+0Lsg0YHQtdCx0LXQv9GC0ZYg0YHQuNGB0YLQvtC70LDQu9GL0psg0YjRg9GL0Lsg0LTQtdC/INCw0YLQsNC70LDQtNGLLiDQkNC7INC00LjQsNGB0YLQvtC70LDQu9GL0psg0YjRgyDSm9Cw0YDRi9C90YjQsNC70LDRgNC00YvSoyDQutC10qPQtdC50ZbQvyDSm9Cw0L3Sk9CwINGC0L7Qu9GDINC60LXQt9C10qPRltC90LTQtSDQv9Cw0LnQtNCwINCx0L7Qu9Cw0LTRiy4g0J7QtNCw0L0g0LHTqdC70LXQuiDQsdCw0LvQsNC70LDRgNC00LAg0YHQuNGB0YLQvtC70LDQtNCw0L0g0LrQtdC50ZbQvSDQtNC40LDRgdGC0L7Qu9CwINCw0LvQtNGL0L3QtNCwINKb0YvRgdKb0LAg05nRgNGWINOZ0LvRgdGW0LcgM9GI0ZYg0YLQvtC9INC10YHRgtGW0LvQtdC00ZYuINCe0Lsg0pvQsNGA0YvQvdGI0LDQu9Cw0YDSk9CwINKb0LDQvSDRgtC+0LvRi9C/INKb0LDQsdGL0YDSk9Cw0YHRi9C90YvSoyDQutC10qPQtdGO0ZbQvdC00LUg0L/QsNC50LTQsCDQsdC+0LvQsNC00YsuINCe0L3RiyDQsdCw0LvQsNC70LDRgNC00YvSoyDQs9C+0YDQuNC30L7QvdGC0LDQu9C00Ysg0pvQsNC70YvQv9GC0LAg0LbQsNGC0pvQsNC9INC60LXQt9GW0L3QtSDQsNGD0YHQutGD0LvRjNGC0LDRhtC40Y/QvdGL0qMgNdGI0ZYg0YLRi9Kj0LTQsNGDINC90q/QutGC0LXRgdGW0L3QtdC9INC10YHRgtGD0LPQtSDQsdC+0LvQsNC00YssINCy0LXRgNGC0LjQutCw0LvQtNGWINKb0LDQu9GL0L/RgtCwINCx0ZbQtyDQsdKx0Lsg0YjRg9C00Ysg0LXRgdGC0Lgg0LDQu9C80LDQudC80YvQty4g0JDQuyA0INGI0ZYg0YLQvtC9INC606nQsdGW0L3QtSDRgdC/0L7RgNGC0L/QtdC9INCw0LnQvdCw0LvRi9GB0LDRgtGL0L0g0LHQsNC70LDQu9Cw0YDQtNCwINC10YHRgtGW0LvQtdC00ZYsINC+0Lsg0LbSr9GA0LXQutGI0LXQu9C10YDQtNGW0qMg0pvQsNC90pPQsCDRgtC+0LvRg9GLINC60LXQt9GW0L3QtNC1INC/0LDQudC00LAg0LHQvtC70LDQtNGLLiDQltCw0LvQv9GLINCx0LDQu9Cw0LvQsNGA0LTQsCDRhNGD0L3QutGG0LjQvtC90LDQu9C00YvSmyDRiNGD0LvQsNGAINC20LDSo9CwINGC0YPSk9Cw0L0g0L3TmdGA0LXRgdGC0LXQu9C10YDQtNC1INOZ0LvRgdGW0Lcg0LXRgdGC0ZbQu9C10LTRliwg06nRgdC1INC60LXQu9C1INGI0YPRi9C70LTQsNGAINKb0LDRgtGC0Ysg05nRgNGWINCw0L3Ri9KbINCx0L7Qu9CwINCx0LDRgdGC0LDQudC00YsuINCe0L3Ri9KjINGB0LXQsdC10LHRliDQsdCw0LvQsNC70LDRgNC00YvSoyDQutC10YPQtNC1INC60LvQtdGC0LrQsNGB0YvQvdGL0qMg0LbSsdKb0LAg0LHQvtC70YPRi9C90LTQsC4gPGJyIC8+DQoyLiDQltCw0LvQv9GLINCx0LDQu9Cw0LvQsNGA0LTQsCDRgtGL0L3Ri9GBINCw0LvRgyDQttKv0LnQtdGB0ZYg0LzSr9GI0LXQu9C10YDRltC90ZbSoyDQsdGW0YDQvdC10YjQtSDQsNC90LDRgtC+0LzQvi3RhNC40LfQuNC+0LvQvtCz0LjRj9C70YvSmyDQtdGA0LXQutGI0LXQu9GW0LrRgtC10YDRliDQsdC+0LvQsNC00YsuINCQ0LnRgtCwINC60LXRgtGB0LXQuiDQvNKx0YDRi9C9INKb0YPRi9GB0YvQvdGL0qMg0YLQsNGAINCx0L7Qu9GD0YssINC80rHRgNGL0L0g0pvRg9GL0YHRi9C90YvSoyDRgtOp0LzQtdC90LPRliDTqdGC0ZbRgdGW0L3RltKjINCx0L7Qu9C80LDRg9GLLNC+0LsgNCDQttCw0YHRi9C90LTQsCDSm9Cw0LvRi9C/0YLQsNGB0LDQtNGLLCDQutOp0LzQtdC5INGB0LDSo9GL0LvQsNGD0YvQvdGL0qMg0LLQsNGA0L7QvdC60LAg0YLTmdGA0ZbQt9C00ZYg0LbTmdC90LUg0YLQsNGAINCx0L7Qu9GD0YssINC00LDRg9GL0YEg0LHQsNC50LvQsNC80LTQsNGA0YvQvdGL0qMg0L3QsNGI0LDRgCDQtNCw0LzRg9GLLCDQsdKx0LvRiNGL0pvQtdGC0YLQtdGA0LTRltKjICDRgtC10Lcg0pvQsNC20YPRiywg0YLRgNCw0YXQtdGP0L3Ri9KjINKx0LfRi9C90LTRi9KT0YvQvdGL0qMg0YHQsNC70YvRgdGC0YvRgNC80LDQu9GLINGC0q/RgNC00LUg0rHQt9GL0L0g0LHQvtC70YPRiywg0Y/Sk9C90LggNNGB0LzQtNGWINKb0rHRgNCw0LnQtNGLLCDQsNC7IDE1INC20LDRgdGC0LDSk9GLINC20LDRgdOp0YHQv9GW0YDRltC80LTQtdGA0LTQtSDQvtC7IDfRgdC8INCx0L7Qu9Cw0LTRiyDQttOZ0L3QtSDQvtC90YvSoyDRjdC70LDRgdGC0LjQutCw0LvRi9KbINKb0LDRgdC40LXRgtGW0L3RltKjINC20L7Sk9Cw0YDRiyDQsdC+0LvRi9C/INC+0L3Ri9KjINC+0qPQsNC5INGB0YvSk9GL0LvRg9GLINGB0LjRj9Kb0YLRiy4g0KHQvtC90YvQvNC10L0g0pvQsNGC0LDRgCDTqdC60L/QtdC00LUg0LTQtSDTqdC30ZbQvdC00ZbQuiDQtdGA0LXQutGI0LXQu9GW0LrRgtC10YDRliDQsdC+0LvQsNC00Ysg0LzRi9GB0LDQu9GLINCw0LvQstC10L7Qu9Cw0LvQsNGAINGB0LDQvdGLINC80LXQvSDQvNOp0LvRiNC10YDRltC90ZbSoyDQsNC3INCx0L7Qu9GD0YssINC+0LvQsNGAIDIg0LbQsNGB0pvQsCDQtNC10LnRltC9INC40L3RgtC10L3RgdC40LLRgtGWINGC0q/RgNC00LUg0YLSr9C30ZbQu9GD0ZYg0LbSr9GA0ZbQvywg0LXRgNC10YHQtdC6INCw0LTQsNC80L3Ri9KjINOp0LrQv9C10YHRltC90ZbSoyDQsNC70LLQtdC+0LvQsCDRgdCw0L3Ri9C80LXQvSDRgtC10qPQtdGB0LXQtNGWLCDTmdGA0ZYg0pvQsNGA0LDQuSA4INC20LDRgdKb0LAg0LTQtdC50ZbQvSDQvtGB0Ysg0pvQsNC70YvQv9GC0LDRgdKb0LDQvSDQsNC70LLQtdC+0LvQsNC70LDRgNC00YvSoyDQutOp0LvQtdC80ZYg0LzQtdC9INGE0YPQvdC60YbQuNC+0L3QsNC70LTRi9KbINC20LDSk9GL0L3QsNC9INC00LDQvNGD0Ysg0LbSr9GA0LXQtNGWLiDQkNC7INC10L3QtNGWINCx0LDQu9Cw0LvQsNGA0LTQsNKT0Ysg0L/Rg9GN0YDQuNC70LTRliDRgtGL0L3Ri9GB0YLRi9KjINCx0L7Qu9GD0YvQvdCwINC60LXQu9GB0LXQvDog0LbQsNC70L/RiyDQv9GD0Y3RgNC40LvQtNGWINGC0YvQvdGL0YEg0LHSsdC7INKb0LDQu9GL0L/RgtGLINC20LDSk9C00LDQudC00LDSk9GLINCy0LXQt9C40LrRg9C70Y/RgNC70Ysg0YLRi9C90YvRgS4g0JHRltGA0LDSmyDQvtC7INCy0LXQt9C40LrRg9C70Y/RgNC70YvSmyDRgtGL0L3Ri9GB0YLRi9KjINKb0LDRgtGC0YvRgNCw0psg0LHQvtC70YvQvyDQtdGB0YLRltC70LXRgtGW0L0g0YLSr9GA0ZYuINCh0L7QvdGL0LzQtdC9INKb0LDRgtCw0YAg0L7QuyDQsdCw0YDQu9GL0psg0YLRi9C90YvRgSDQsNC70YMg0LbTmdC90LUg0YLRi9C90YvRgSDRiNGL0pPQsNGA0YMg0LrQtdC30LXSo9GW0L3QtNC1INC10YHRgtGW0LvQtdGC0ZbQvSDQsdC+0LvQsNC00YsuINCe0L3Ri9KjINC/0LDQudC00LAg0LHQvtC70YMg0YHQtdCx0LXQsdGWOtCw0LvQstC10L7Qu9Cw0LvQsNGA0LTRi9KjINGC0LXRgNCx0LXQu9GW0YHRltC90LXQvSDQv9Cw0LnQtNCwINCx0L7Qu9Cw0LTRiy4g0KHQtdCx0LXQsdGWINCw0LvQstC10L7Qu9Cw0LvQsNGA0LTRi9KjINGI0YvRgNGL0YjRgtGLINKb0LDQsdCw0YLRi9C90YvSoyDQttKx0pvQsCDQsdC+0LvRg9GL0L3QsNC9LiDQntKT0LDQvSDQsdGA0L7QvdGF0YvQu9Cw0YDQtNGL0qMg0LDRg9CwINOp0YLRgyDQutC10LfRltC90LTQtdCz0ZYg0LTRi9Cx0YvRgdGLINKb0L7RgdGL0LvRi9C/INC/0YPRjdGA0LjQu9C00ZYg0YLRi9C90YvRgdGC0Ysg0YLRg9GL0L3QtNCw0YLQsNC00YsuINCi0LDSk9GLINCx0ZbRgCDRgdC10LHQtdCx0ZYg0LrQtdGD0LTQtSDQutC70LXRgtC60LDRgdGL0L3Ri9KjINC20rHSm9CwINCx0L7Qu9GD0YvQvdCw0L0uINCQ0YPRgdC60YPQu9GM0YLQsNGG0LjRj9C00LAg0pvQsNGC0YLRiyDQstC10LfQuNC60YPQu9GP0YDQu9GL0psg0YLRi9C90YvRgdGC0YssINGP0pPQvdC4INC/0YPRjdGA0LjQu9C00ZYg0YLRi9C90YvRgdGC0Ysg0YLRi9Kj0LTQsNC50LzRi9C3LiDQkdKx0Lsg0L3TmdGA0LXRgdGC0LXQu9C10YDQtNC1INKb0LDQu9GL0L/RgtGLINGC0YvQvdGL0YEg0LHQvtC70YvQvyDRgtCw0LHRi9C70LDQtNGLINC205nQvdC1INC10YjSm9Cw0L3QtNCw0Lkg0LXQvNC00LXRgyDRiNCw0YDQsNC70LDRgNGL0L0g0YLQsNC70LDQvyDQtdGC0L/QtdC50LTRli4gIC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берілген екі сұрақтың жауабы толық ашылып жазылмаған, пуэрильді тыныс туралы ақпарат аз жазылған</text:p>
          </table:table-cell>
          <table:table-cell office:value-type="float" office:value="0" table:style-name="ce1">
            <text:p>0</text:p>
          </table:table-cell>
          <table:table-cell table:number-columns-repeated="16376"/>
        </table:table-row>
        <table:table-row table:style-name="ro1">
          <table:table-cell office:value-type="float" office:value="1066829" table:style-name="ce1">
            <text:p>1066829</text:p>
          </table:table-cell>
          <table:table-cell office:value-type="string" table:style-name="ce1">
            <text:p>kazakh</text:p>
          </table:table-cell>
          <table:table-cell office:value-type="string" table:style-name="ce1">
            <text:p>Билет 17&amp;lt;br /&amp;gt; 1.Балаларда жүректің функциональдық шуларына сипаттама береңіз.&amp;lt;br /&amp;gt; 2.Қандай анатомо-физиологиялық ерекшеліктер балаларда пуэрильді тынысты туындатушы?&amp;lt;br /&amp;gt;</text:p>
          </table:table-cell>
          <table:table-cell office:value-type="string" table:style-name="ce1">
            <text:p>MSnQkdCw0LvQsNC70LDRgNC00LAg0LbSr9GA0LXQutGC0ZbSoyDRhNGD0L3QutGG0LjQvtC90LDQu9C00YvSmyDRiNGD0LvQsNGA0Ysg0LHQvtC50YvQvdGI0LAg0LXRgNC10YHQtdC6INCw0LTQsNC80LTQsNGA0pPQsCDSm9Cw0YDQsNKT0LDQvdC00LAg0LHRltGA0L3QtdGI0LUg0LXRgNC10LrRiNC10LvRltC60YLQtdGA0ZYg0LHQsNGALiDQodC+0L3RiyDQsNGC0LDQvyDQsNC50YLRi9C/INOp0YLRgdC10Lo60LDQutGG0LjQtNC10L3RgtCw0LvRjNC00YssINCw0YLQuNC/0YLRliwg0LrRltC905nRgdGW0LcsINCx0LXQudC+0YDQs9Cw0L3QuNC60LDQu9GL0psg0LbTmdC90LUg0LTQvtCx0YDQvtC60LDRh9C10YHRgtCy0LXQvdC90YvQtSDRiNGD0LzQtNCw0YAg0YHTmdCx0LjQu9C10YDQtNC1INC60LXQt9C00LXRgdC10LTRli4g0JHSsdC7INGC0LXRgNC80LjQvdC00LXRgCDQutOp0LHRltC90LUg0LbSr9GA0LXQuiDQv9C10L0g0YLQsNC80YvRgNC70LDRgCDQv9Cw0YLQvtC70L7Qs9C40Y/RgdGL0LzQtdC9INCx0LDQudC70LDQvdGL0YHRgtGLINC10LzQtdGBINGE0YPQvdC60YbQuNC+0L3QsNC70LTRiyDRiNGD0LzQtNCw0YDQtNGLINC10YHRgtGD0LPQtSDSm9C+0LvQtNCw0L3Ri9C70LDQtNGLLiDQsdKx0LvQsNGAINKb0LDQu9GL0L/RgtGLINGE0LjQt9C40L7Qu9C+0LPQuNGP0LvRi9KbINKb0rHQsdGL0LvRi9GBINGA0LXRgtGW0L3QtNC1INGB0LDQvdCw0LvRi9C/LCDQsdC10LvQs9GW0LvRliDQsdGW0YAg0LbQsNGB0YLQsNKT0Ysg0LHQsNC70LDQu9Cw0YDSk9CwINGC05nQvSDRgNC10YLRltC90LTQtSDQtdGB0LXQv9GC0LXQu9GW0L3QtdC00ZYuINCR0rHQuyDRiNGD0LzQtNCw0YAg0LHQsNC70LDQvdGL0qMg0LTQtdC90YHQsNGD0LvRi9KT0YvQvdCwINKb0LDRg9GW0L8g0YLTqdC90LTRltGA0LzQtdC50LTRliDQttOZ0L3QtSDQvNC10LTQuNGG0LjQvdCw0LvRi9KbINCw0YDQsNC70LDRgdGD0LTRiyDSm9Cw0LbQtdGCINC10YLQv9C10LnQtNGWLiDQsNC60YbQuNC00LXQvdGC0LDQu9GM0LTRiyDRiNGD0LzQtNCw0YAtINGD0LDSm9GL0YLRiNCwINGI0YMsINCx0LXQu9Cz0ZbQu9GWINCx0ZbRgCDQttCw0pPQtNCw0LnQu9Cw0YDQtNCwINGC0YPRi9C90LTQsNC50YLRi9C9OiDRhNC40LfQuNC60LDQu9GL0psg0LbSr9C60YLQtdC80LUsINC00LXQvdC1INGC0LXQvNC/0LXRgNCw0YLRg9GA0LDRgdGL0L3Ri9KjINC606nRgtC10YDRltC70YPRliDQvdC10LzQtdGB0LUg0Y3QvNC+0YbQuNC+0L3QsNC70LTRiyDSm9C+0LfRgyDQttCw0pPQtNCw0LnRi9C90LTQsCDQv9Cw0LnQtNCwINCx0L7Qu9Cw0LTRiy4g0J7Qu9Cw0YAg0LrQtdC90LXRgtGC0LXQvSDRgtGD0YvQvdC00LDQvywg06nQt9C00ZbQs9GW0L3QtdC9INC60LXRgtC1INCw0LvQsNC00YsuINCR0rHQuyDRiNGD0LvQsNGAINC606nQsdGW0L3QtSDSm9Cw0L3QsNC50L3QsNC70YvQvCDQttC+0pPQsNGA0YvQu9Cw0YPRi9C90LDQvSwg0LzRi9GB0LDQu9GLINOp0YHRgyDQutC10LfRltC90LTQtSDQvdC10LzQtdGB0LUg0LDQudC90LDQu9GL0LzQtNCw0pPRiyDSm9Cw0L3QvdGL0qMg0LrTqdC70LXQvNGW0L3RltKjINCw0YDRgtGD0YvQvdCw0L0g0YLRg9GL0L3QtNCw0YPRiyDRi9Kb0YLQuNC80LDQuy4g0JDRgtC40L/QuNGP0LvRi9KbINGI0YPQu9Cw0YAtINCx0rHQuyDRiNGD0LvQsNGAINC606nQsdGW0L3QtdGB0LUg0pvQsNC70YvQv9GC0Ysg0LbSr9GA0LXQuiDRhtC40LrQu9GW0L3RltKjINC/0LDRgtGC0LXRgNC90ZbQvdC1INGB05nQudC60LXRgSDQutC10LvQvNC10LnRgtGW0L0gLCDQsNC70LDQudC00LAg0LDRg9GA0YPQtNGL0qMg0LHQsNGA0YvQvdCwINC80LXSo9C30LXQvNC10LnQtNGWLiDQkdKx0Lsg0pvQsNC70YvQv9GC0Ysg0LXQvNC10YEg0LvQvtC60LDQu9C40LfQsNGG0LjRj9GB0Ysg0L3QtdC80LXRgdC1INC00YvQsdGL0YHRgtGLINGF0LDRgNCw0LrRgtC10YDQuNGB0YLQuNC60LDRgdGLINCx0LDRgCDRiNGD0LvQsNGAINCx0L7Qu9GD0Ysg0LzSr9C80LrRltC9LCDQsdGW0YDQsNKbINCx05nRgNGW0LHRltGAINC00L7QsdGA0L7QutCw0YfQtdGB0YLQstC10L3QvdGL0Lkg0LHQvtC70YvQvyDQtdGB0LXQv9GC0LXQu9GW0L3QtdC00ZYsINC10LPQtdGAINC00LUg0LHQsNGB0pvQsCDRgdC40LzQv9GC0L7QvNC00LDRgCDQutC10LfQtNC10YHQv9C10YHQtSwg0LzRi9GB0LDQu9GLLCDQutC10YPQtNC1INGC0rHRgdGL0L3QtNCw0pPRiyDQsNGD0YDRg9C70LDRgCDQvNC10L0g0YLRi9C90YvRgSDQsNC70YPQvNC10L0g0L/RgNC+0LHQu9C10LzQsNC70LDRgCDQsdC+0LvSk9Cw0L0g0LbQsNKT0LTQsNC50LTQsC4g0LrRltC905nRgdGW0Lcg0YjRg9C80LTQsNGALdCx0rHQuyDQsdCw0LvQsNC90YvSoyDRhNC40LfQuNC+0LvQvtCz0LjRj9GB0YvQvdGL0qMg06nQt9Cz0LXRgNGD0ZbQvdC00LUg0LbTmdC90LUg0LbQsNGBINKb0L7RgdGD0YvQvdCwINCx0LDQudC70LDQvdGL0YHRgtGLINOp0LfQtNGW0LPRltC90LXQvSDQutC10LvQtdGC0ZbQvSAsINC+0YDQs9Cw0L3QuNC60LDQu9GL0psg0L/QsNGC0L7Qu9C+0LPQuNGP0pPQsCDSm9Cw0YLRi9GB0Ysg0LbQvtKbLCDQttC40ZYg0LbSr9GA0LXQuiDRiNGD0LzRi9C9INGB0LjQv9Cw0YLRgtCw0YPQtNCwINKb0L7Qu9C00LDQvdGL0LvQsNGC0YvQvSDRgtC10YDQvNC40L0uINCR0rHQuyDRiNGD0LvQsNGAINC20q/RgNC10Lot0pvQsNC90YLQsNC80YvRgCDQttKv0LnQtdGB0ZbQvdGW0qMg0YTRg9C90LrRhtC40L7QvdCw0LvQtNGL0LvRi9KT0YvQvSDQsdKx0LfQsdCw0Lks0LHQsNC70LDQvdGL0qMg0LbQsNC70L/RiyDQutKv0LnRltC90LUg05nRgdC10YAg0LXRgtC/0LXQudC00ZYuINCR0LXQudC+0YDQs9Cw0L3QuNC60LDQu9GL0psg0YjRg9C70LDRgC3RhNC40LfQuNC+0LvQvtCz0LjRj9C70YvSmyDQv9GA0L7RhtC10YHRgSDQvdOZ0YLQuNC20LXRgdGW0L3QtNC1INGC0YPRi9C90LTQsNC50YLRi9C9OiDSm9Cw0L3QsNC50L3QsNC70YvQvNC90YvSoyDQttGL0LvQtNCw0LzQtNCw0YLRi9C70YPRiywg0YLQsNC80YvRgCDRgtC+0L3Rg9GB0YvQvdGL0qMg06nQt9Cz0LXRgNGD0ZYgLCDQttKv0YDQtdC6INCw0YPRgNGD0LvQsNGA0YvQvdCwINKb0LDRgtGL0YHRiyDQttC+0psg0LDRg9GA0YPQu9Cw0YAg0LbQsNGC0LDQtNGLLiDQvtC70LDRgCDQsdCw0LvQsNC70LDRgNC00YvSoyDQsNC90LDRgtC+0LzQuNGP0LvRi9KbINC10YDQtdC60YjRltC70LPRltC90LUg0LHQsNC50LvQsNC90YvRgdGC0Ysg0YLRg9GL0L3QtNCw0L8s0LzRi9GB0LDQu9GLLCDRgtCw0LzRi9GAINGC0L7QvdGD0YHRi9C90YvSoyDQttC+0pPQsNGA0YvQu9Cw0YPRi9C90LDQvSDQvdC10LzQtdGB0LUg0LDSk9C30LDQtNCw0pPRiyDQvNC10YLQsNCx0L7Qu9C40LfQvCDQtNC10qPQs9C10LnRltC90ZbSoyDQttC+0pPQsNGA0YvQu9Cw0YPRi9C90LDQvSDQv9Cw0LnQtNCwINCx0L7Qu9Cw0LTRiy4g0LTQvtCx0YDQvtC60LDRh9C10YHRgtCy0YvQtdC90L3Ri9C90LUg0YjRg9C70LDRgC0g0LHSsdC7INGI0YPQu9Cw0YDQtNCwINC/0LDRgtC+0LvQvtCz0LjRj9C70YvSmyDTqdC30LPQtdGA0ZbRgdGC0LXRgCDQttC+0pssINOZ0YDRliDQsdCw0LvQsNC90YvSoyDQtNC10L3RgdCw0YPQu9GL0pPRi9C90LAg0pvQsNGD0ZbQvyDRgtOp0L3QtNGW0YDQvNC10LnQtNGWLiDQvtC70LDRgCDQttCw0YEg0pvQvtGB0pvQsNC9INGB0LDQudGL0L0g0LbQvtKT0LDQu9Cw0LTRiywg05nRgdGW0YDQtdGB0LUg0L3TmdGA0LXRgdGC0LXQvdGW0qMg0LbSr9GA0LXQs9GWINC80LXQvSDRgtCw0LzRi9GA0LvQsNGA0Ysg0LbQtdGC0ZbQu9Cz0LXQvSDRgdOZ0YLRgtC1LiDQsdKx0Lsg0YjRg9C70LDRgNC00YvSoyDQutOp0L/RiNGW0LvRltCz0ZbQvdC00LUg0L3TmdGA0LXRgdGC0LXQu9C10YDQtNGW0qMg0LbQtdGC0ZbQu9GD0ZbQvdC1INOZ0YHQtdGAINC10YLQv9C10LksINGD0LDSm9GL0YLRiNCwINKb0rHQsdGL0LvRi9GBINGA0LXRgtGW0L3QtNC1INGC0LDQvdGL0LvQsNC00YsuINCW0q/RgNC10LrRgtGW0qMg0YTRg9C90LrRhtC40L7QvdCw0LvQtNGLINGI0YPQu9Cw0YDRiyDQsdCw0LvQsNC70LDRgNC00LAg0LbQuNGWINC60LXQt9C00LXRgdC10LTRliDQttOZ0L3QtSDTmdC00LXRgtGC0LUg0LfQuNGP0L3RgdGL0Lcg0LHQvtC70YvQvyDRgdCw0L3QsNC70LDQtNGLLiDQvtC70LDRgCDQttKv0YDQtdC6INC/0LXQvSDSm9Cw0L0g0YLQsNC80YvRgNC70LDRgNGLINCw0YDSm9GL0LvRiyDSm9Cw0L3QvdGL0qMg0LDSk9GD0YvQvdCw0L0g0YLRg9GL0L3QtNCw0LnQtNGLINC205nQvdC1INOZ0LTQtdGC0YLQtSDSm9Cw0L3QtNCw0Lkg0LTQsCDQsdGW0YAg0L3QtdCz0ZbQt9Cz0ZYg0pvSsdGA0YvQu9GL0LzQtNGL0psg0LDRg9GL0YLSm9GD0LvQsNGA0LzQtdC9INCx0LDQudC70LDQvdGL0YHRgtGLINC10LzQtdGBINCx0L7Qu9GL0L8g0LrQtdC70LXQtNGWLiDRhNGD0L3QutGG0LjQvtC90LDQu9C00Ysg0YjRg9C70LDRgCDTmdC00LXRgtGC0LUg0YHQuNGB0YLQvtC70LAg0LrQtdC30ZbQvdC00LUg0LXRgdGC0ZbQu9C10LTRliwg0LbSsdC80YHQsNKbLCDSm9GL0YHSm9CwINOZ0YDRliDQvNGD0LfRi9C60LDQu9GL0psg0YHQuNC/0LDRgtGC0LAg0LHQvtC70LDQtNGLLiDQvtC70LDRgCDQutC10YPQtNC10LTQtdCz0ZYg05nRgNGC0q/RgNC70ZYg0LbQtdGA0LvQtdGA0LTQtSDQtdGB0YLRltC70YPRliDQvNKv0LzQutGW0L0sINCx0LDQu9Cw0L3Ri9KjINC/0L7Qt9C40YbQuNGP0YHRi9C90LAg0L3QtdC80LXRgdC1INCx0LXQu9GB0LXQvdC00ZbQu9GW0Log0LTQtdKj0LPQtdC50ZbQvdC1INCx0LDQudC70LDQvdGL0YHRgtGLINKb0LDRgNKb0YvQvdC00YvQu9GL0pPRiyDTmdGA0YLSr9GA0LvRliDQsdC+0LvRg9GLINC00LAg0YvSm9GC0LjQvNCw0LsuINGE0YPQvdC60YbQuNC+0L3QsNC70LTRiyDRiNGDINOZ0LTQtdGC0YLQtSDRhNC40LfQuNC60LDQu9GL0psg0YLQtdC60YHQtdGA0YPQu9C10YAg0LrQtdC30ZbQvdC00LUg0LDQvdGL0pvRgtCw0LvQsNC00YssINCw0YDQvdCw0LnRiyDQtdC80LTQtdGD0LTRliDSm9Cw0LbQtdGCINC10YLQv9C10LnQtNGWLiDRhNGD0L3QutGG0LjQvtC90LDQu9C00Ysg0YjRg9C70LDRgCAyLzYg0L3QtdC80LXRgdC1INC+0LTQsNC9INC00LAg0YLTqdC80LXQvSDQtNOZ0YDQtdC20LXQu9GWINKb0YvRgdKb0LAsINC10YDRgtC1INC90LXQvNC10YHQtSDQvtGA0YLQsNKj0pPRiyDRgdC40YHRgtC+0LvQsNC70YvSmyDRiNGDLiDQvtC70LDRgCDRgtOp0YHRgtGW0qMg0YHQvtC7INC20LDSmyDRiNC10LrQsNGA0LDRgdGL0L3Ri9KjINCw0LnQvNCw0pPRi9C90LTQsCDQttCw0pvRgdGLINC70L7QutCw0LvQuNC30LDRhtC40Y/Qu9Cw0L3Sk9Cw0L0uINC/0LDRhtC40LXQvdGCINGC0rHRgNKT0LDQvSDQutC10LfQtNC1INC90LUg0L7RgtGL0YDSk9Cw0L0g0LrQsNC70L/Ri9C90LTQsCDQvdC1INCS0LDQu9GM0YHQsNC70YzQstCwINC80LDQvdC10LLRgNGWINC60LXQt9GW0L3QtNC1INC60q/RiCDRgtKv0YHQutC10L3QtNC1INC+0LvQsNGA0LTRi9KjINKb0LDRgNKb0YvQvdC00YvQu9GL0pPRiyDRgtOp0LzQtdC90LTQtdC50LTRli4g0LHQsNC70LDQu9Cw0YDQtNCwINGI0YPQu9Cw0YAg0LbQuNGWINC30LjRj9C90YHRi9C3INOZ0YDRliDQttKv0YDQtdC60YLRltKjINC20rHQvNGL0YEg0ZbRgdGC0LXQudGC0ZbQvSDQtNGL0LHRi9GB0Ysg0pPQsNC90LAg0pvQsNC70YvQv9GC0YsuINCx0rHQuyDQt9C40Y/QvdGB0YvQtyDRiNGD0LvQsNGAINC606nQsdGW0L3QtdGB0LUg0LrRltC905nRgdGW0Lcg0L3QtdC80LXRgdC1INGE0YPQvdC60YbQuNC+0L3QsNC70LTRiyDRiNGDINC00LXQvyDQsNGC0LDQu9Cw0LTRiy4g0LHQsNC70LDQu9Cw0YDQtNCwINGI0YPQu9Cw0YAg0L7So9Cw0Lkg0LXRgdGC0ZbQu9C10LTRliwg0YHQtdCx0LXQsdGWINC+0LvQsNGA0LTRi9KjINC60LXRg9C00LXQu9C10YDRliDQttKx0pvQsCDTmdGA0ZYg0LbSr9GA0LXQutC60LUg0YHRgtC10YLQvtGB0LrQvtC/0YLRiyDQttCw0pvRi9C9INGC0LDSm9Cw0pPQsNC90L3QsNC9INGB0L7Soy4gPGJyIC8+DQoyKdCR0LDQu9Cw0LvQsNGA0LTQsNKT0Ysg0LDQvdCw0YLQvtC80L4t0YTQuNC30LjQvtC70L7Qs9C40Y/Qu9GL0psg0YLRi9C90YvRgSDQsNC70YMg0LbSr9C50LXRgdGW0L3QtSDQsdCw0LnQu9Cw0L3Ri9GB0YLRiyDQtdGA0LXQutGI0LXQu9GW0LrRgtC10YDQtNGWINKb0LDRgNCw0YHRgtGL0YDRi9C/INOp0YLRgdC10Lw60pvQsNC70YvQv9GC0Ysg0LbQsNKT0LTQsNC50LTQsCAzLTYg0LDQuSDQsNGA0LDQu9GL0pPRi9C90LTQsCDTmdC70YHRltC30LTQtdGDINCy0LXQt9C40LrRg9C70Y/RgNC70Ysg0YLRi9C90YvRgSDQtdGB0YLRltC70LXQtNGWLiA2INCw0LnQtNCw0L0gNS03INC20LDRgdKb0LAg0LTQtdC50ZbQvSAtINC/0YPRjdGA0LjQu9GM0LTRliAoINGC0YvQvdGL0YEg0YjRg9GLINGC0YvQvdGL0YEg0LDQu9GD0LTRi9KjINC10LrRliDQutC10LfQtdKj0ZbQvdC00LUg0LTQtSDSm9Cw0YLSm9GL0Lsg0LbTmdC90LUg0rHQt9Cw0pspLiDQv9GD0Y3RgNC40LvRjNC00ZYg0YLRi9C90YvRgdGC0Ysg0L3QtdCz0ZbQt9C00LXQudGC0ZbQvSDQsdCw0LvQsNC70LDRgNC00YvQvSDRgtGL0L3Ri9GBINCw0LvRgyDQsNKT0LfQsNC70LDRgNGLINKb0rHRgNGL0LvRi9C80YvQvdGL0qMg0LXRgNC10LrRiNC10LvRltC60YLQtdGA0ZYg0LrQtdC70LXRgdGW0LTQtSDQttCw0LfRi9C/INOp0YLQtdC80ZbQvS4gINC606nQutGW0YDQtdC60YLRltKjINC60ZbRiNGWINC606nQu9C10LzQtNGWINCx0L7Qu9GD0YvQvdCw0L0g0LTQsNGD0YvRgSDRgdCw0qPRi9C70LDRg9GL0L3QsNC9INCw0YPRgdC60YPQu9GM0YLQsNGG0LjRjyDQttKv0YDQs9GW0LfRltC70LPQtdC9INCw0LnQvNCw0pvSm9CwINC00LXQudGW0L3Qs9GWINCw0YDQsNKb0LDRiNGL0pvRgtGL0pPRiyDSm9GL0YHSm9Cw0YDQsNC00YssINGB0L7QuyDRgdC10LHQtdC/0YLRliDQutOp0LzQtdC5INGI0YPQu9Cw0YDRi9C9INGW0YjRltC90LDRgNCwINC10YHRgtGD0LPQtSDQsdC+0LvQsNC00Ysu0LHRgNC+0L3RhdGC0LDRgCDRgdCw0qPRi9C70LDRg9GL0L3Ri9KjINGC0LDRgNC70YvSk9GLICwg0LrTqdC60ZbRgNC10LrRgtGW0qMg0LbQvtKT0LDRgNGLINGB0LXRgNC/0ZbQvNC00ZbQu9GW0LPRliDQttOZ0L3QtSDSm9Cw0LHRi9GA0pPQsNC70LDRgNC00YvSoyDQttKx0pvQsNC70YvSk9GLLCDQvtC90YvSoyDQstC40LHRgNCw0YbQuNGP0YHRi9C9INC60q/RiNC10LnRgtC10LTRli4g0LjQvdGC0LXRgNGB0YLQuNGG0LjQsNC70LTRiyDRgtGW0L0g0LbQsNKb0YHRiyDQtNCw0LzRi9KT0LDQvdC00YvSm9GC0LDQvSDTqdC60L/QtdC90ZbSoyDQsNGD0LDQu9GL0LvRi9KT0Ysg0YLTqdC80LXQvdC00LXQudC00ZYuIDcg0LbQsNGB0YLQsNC9INGB0L7SoyDQsdCw0LvQsNC70LDRgNC00YvSoyDRgtGL0L3Ri9GB0Ysg0LHRltGA0YLRltC90LTQtdC/INCy0LXQt9C40LrRg9C70Y/RgNC70YvSk9CwINCw0YPRi9GB0LDQtNGLLiDQv9GD0Y3RgNC40LvRjNC00ZYg0YLRi9C90YvRgSDQsNC70YPQtNGL0qMg0LrQu9C40L3QuNC60LDQu9GL0psg0LXRgNC10LrRiNC10LvRltC60YLQtdGA0ZY6INCw0YPRgdC60YPQu9GM0YLQsNGC0LjQstGC0ZYg0LTRi9Cx0YvRgSDQutC10LfRltC90LTQtSDQsdCw0LvQsNC70LDRgNC00LAgItGEIiDQtNGL0LHRi9GB0YvQvdCwINKx0pvRgdCw0YEsINGP0pPQvdC4INCy0LXQt9C40LrRg9C70Y/RgNC70Ysg0LTRi9Cx0YvRgSDRgdC10LrRltC70LTRljsg0LTQtdC8INCw0LvRgyDQstC10LfQuNC60YPQu9GP0YDQu9GLINGC0YvQvdGL0YEg0LDQu9GD0LzQtdC9INGB0LDQu9GL0YHRgtGL0YDSk9Cw0L3QtNCwINCw0LnSm9GL0L3Ri9GA0LDSmywg0LTQtdC8INGI0YvSk9Cw0YDRgyDRgdCw0LvRi9GB0YLRi9GA0LzQsNC70Ysg0YLSr9GA0LTQtSDSm9Cw0YLRgtGLINC205nQvdC1INKx0LfQsNGA0YLRi9C70pPQsNC9LCDQsdKx0Lsg0YLRi9C90YvRgSDQsNC70YPQtNGL0qMg0YLSr9GA0ZbQvSDQv9Cw0YLQvtC70L7Qs9C40Y/Qu9GL0psg0pvQsNGC0LDSo9C00YvSm9Kb0LAg0LbQsNKb0YvQvdC00LDRgtCw0LTRiy4gKCDQtNC10Lwg0LDQu9GDINC80LXQvSDQtNC10Lwg0YjRi9KT0LDRgNGD0LTRi9KjINGI0LDQvNCw0LzQtdC9INKb0LDRgtGL0L3QsNGB0Ys6INC/0YPRjdGA0LjQu9GM0LTRliDRgtGL0L3Ri9GBINCw0LvRg9C00LAgMzoyLTE6MSwg0LLQtdC30LjQutGD0LvRj9GA0LvRiyDRgtGL0L3Ri9GBINCw0LvRg9C00LAgMzoxLTM6MCDQttOZ0L3QtSDSm9Cw0YLRgtGLINGC0YvQvdGL0YEg0LDQu9GD0LTQsCAxOjEpOyDQutC10YPQtNC1INKb0YPRi9GB0YvQvdGL0qMg0LXQutGWINC20LDRgNGC0YvRgdGL0L3QtNCwINGB0LDRgyDTqdC60L/QtSDRgtGW0L3RltC90ZbSoyDSr9GB0YLRltC90LXQvSDRgtGL0qPQtNCw0YMg0LDRgNKb0YvQu9GLINCx0ZbQu9C1INCw0LvQsNC80YvQty4g0L/Rg9GN0YDQuNC70YzQtNGWINGC0YvQvdGL0YEg0LrTqdCx0ZbQvdC1INGC0YvQvdGL0YEg0LbQvtC70LTQsNGA0YvQvdGL0qMg0pvSsdGA0YvQu9GL0LzRi9C90LAsINC+0LvQsNGA0LTRi9KjINC00LjQsNC80LXRgtGA0ZbQvdC1LCDQsdCw0LvQsNC70YvSmyDRiNCw0pvRgtCwINGC0YvQvdGL0YEg0LDQu9GDINC20q/QudC10YHRltC90ZbSoyDRhNGD0L3QutGG0LjQvtC90LDQu9C00YvQu9GL0pPRi9C90LAg0LHQsNC50LvQsNC90YvRgdGC0YsuINC/0YPRjdGA0LjQu9GM0LTRliDRgtGL0L3Ri9GBINGC0YPRi9C90LTQsNGC0YPRiNGLINGE0LDQutGC0L7RgNC70LDRgDog0YLRi9C90YvRgSDQttC+0LvQtNCw0YDRi9C90YvSoyDRgtCw0YDQu9GL0pPRizog0LHQsNC70LDQu9Cw0YDQtNCwINOZ0YHRltGA0LXRgdC1INC10YDRgtC1INGI0LDSm9GC0LAg0LXRgNC10YHQtdC60YLQtdGA0LPQtSDSm9Cw0YDQsNKT0LDQvdC00LAg0YLRi9C90YvRgSDQttC+0LvQtNCw0YDRiyDSm9GL0YHSm9CwLCDTmdGA0ZYg0YLQsNGAINCx0L7Qu9GL0L8g0LrQtdC70LXQtNGWLCDRgtGA0LDRhdC10Y8g0LzQtdC9INCx0YDQvtGF0YLQsNGA0LTRi9KjINC00LjQsNC80LXRgtGA0ZYg0LrRltGI0ZYg0LHQvtC70LDQtNGLLCDQvtGB0YvQtNCw0L0g0L7Qu9Cw0YAg0pvQsNCx0YvQvdGDINC80LXQvSDRltGB0ZbQvdGD0LPQtSDQsNC70YvQvyDQutC10LvQtdC00ZY7INGC0YvQvdGL0YEg0LbQvtC70LTQsNGA0YvQvdGL0qMg0pvQsNCx0YvRgNKT0LDRgdGL0L3Ri9KjINC40LrQtdC80LTRltC70ZbQs9GWINC80LXQvSDRgdC10YDQv9GW0LzQtNGW0LvRltCz0ZY7INC60LXRg9C00LUg0YLQvtGA0Ysg0LzQtdC9INC00LjQsNGE0YDQsNCz0LzQsNC90YvSoyDQtNCw0LzRg9GLOyDTqdC60L/QtSDRgtGW0L3RltC90ZbSoyDRjdC70LDRgdGC0LjQutCw0LvRi9KT0Ysg0LbQvtKT0LDRgNGLINC205nQvdC1INCw0LvRjNCy0LXQvtC70LDQu9Cw0YDRiyDQttC10YLRltC70LUg0pvQvtC50LzQsNKT0LDQvTsg0LHQsNC70LDQu9Cw0YAg0LHRgNC+0L3RhdGC0LDRgNC00YvSoyDRgdC/0LDQt9C80YvQvdCwINCx0LXQudGW0Lwg0LHQvtC70pPQsNC90LTRi9Kb0YLQsNC9ICzQsdKx0Lsg0YHQv9Cw0LfQvCDRiNGL0YDRi9GI0YLRiyDSm9Cw0LHRi9Kb0YLRi9KjINGW0YHRltC90YPRltC80LXQvdC1INKb0L7RgdGL0LvRi9C/LCDRgtGL0L3Ri9GBINC20L7Qu9C00LDRgNGL0L3Ri9KjINKb0L7RgdGL0LzRiNCwINGC0LDRgNGL0LvRg9GL0L3QsCDQsNC70YvQvyDQutC10LvQtdC00ZYuINCx0LDQu9Cw0LvQsNGA0LTQsCDQtdGA0LXRgdC10Log0LDQtNCw0LzQtNCw0YAg0YHQtdC60ZbQu9C00ZYg0LrQtdGD0LTQtSDRgtC+0YDRi9C90LAg0L/RltGI0ZbQvdCz0LUg0LjQtSDQtdC80LXRgSwg0L7QuyDQttCw0LvQv9Cw0pvRgtCw0YMg0LHQvtC70YvQvyDQutC10LvQtdC00ZYsINCw0Lsg0LTQuNCw0YTRgNCw0LPQvNCwINGC0YvQvdGL0YEg0LDQu9GD0LTQsCDSr9C70LrQtdC9INGA0L7Qu9GMINC+0LnQvdCw0LnQtNGLL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9" table:style-name="ce1">
            <text:p>1066939</text:p>
          </table:table-cell>
          <table:table-cell office:value-type="string" table:style-name="ce1">
            <text:p>kazakh</text:p>
          </table:table-cell>
          <table:table-cell office:value-type="string" table:style-name="ce1">
            <text:p>Билет 17&amp;lt;br /&amp;gt; 1.Балаларда жүректің функциональдық шуларына сипаттама береңіз.&amp;lt;br /&amp;gt; 2.Қандай анатомо-физиологиялық ерекшеліктер балаларда пуэрильді тынысты туындатушы?&amp;lt;br /&amp;gt;</text:p>
          </table:table-cell>
          <table:table-cell office:value-type="string" table:style-name="ce1">
            <text:p>MS4g0JHQsNC70LDQu9Cw0YDQtNCwINC20q/RgNC10LrRgtGW0qMg0YTRg9C90LrRhtC40L7QvdCw0LvQtNGL0psg0YjRg9C70LDRgNGLINC20q/RgNC10Log0ZbRiNGW0L3QtNC1INC205nQvdC1INC20q/RgNC10LrRgtC10L0g0YLRi9GBINC20LXRgNC70LXRgNC00LUg0LXRgdGC0ZbQu9C10LTRli7QltCw0LvQv9GLINCw0LTQsNC80LTQsCDQttGD0YDQtdC6INGI0YPQu9Cw0YDRi9C9IDUg0L3Rg9C60YLQtSDQsNGA0pvRi9C70Ysg0YLRi9C90LTQsNGD0pPQsCDQsdC+0LvQsNC00YsuINCW0q/RgNC10LrRgtC10L0g0YLRi9GBINGI0YPQu9Cw0YAg0YHQuNGB0YLQvtC70LAg0LrQtdC30ZbQvdC00LUg06nQutC/0LXQvdGW0qMg0YjQtdGCINCx06nQu9GW0LrRgtC10YDRltC90LUg0LDRg9CwINC60ZbRgNCz0LXQvdC00LUg0L/QsNC50LTQsCDQsdC+0LvQsNGC0YvQvSDQutCw0YDQtNC40L7Qv9GD0LvRjNC80L7QvdCw0LvRjNC00ZYg0YjRg9C70LDRgC4g0J7QuyDRgdC+0Lsg0LbRg9GA0LXQutGI0LUg0YLSsdGB0YvQvdC00LAg0LXRgdGC0ZbQu9C10LTRli4g0JTQtdC8INCw0LvSk9Cw0L0g0LrQtdC30LTQtSDQutKv0YjQtdC50LUg0YLSr9GB0LXQtNGWLiDQltGD0YDQtdC60YLQtdC9INGC0YvRgSDRiNGD0LTRiyDQkdC+0YLQutC40L3QsCDQrdGA0LHQsCDQvdGD0LrRgtC10YHRliDQsNGA0pvRi9C70Ysg0YLRi9C90LTQsNGD0pPQsCDQsdC+0LvQsNC00YsuINCe0Lsg0L3Rg9C60YLQtdC00LUg0LbRg9GA0LXQutGC0ZbSoyDQsdGW0YDRltC90YjRliDQttOZ0L3QtSDQtdC60ZbQvdGI0ZYg0YLQvtC90LTQsNGA0YvQvSwg0LzQsNGP0YLQvdC40Log0YLTmdGA0ZbQt9C00ZYg0YjRg9C70LDRgNC00Ysg0YLRi9C90LTQsNGD0pPQsCDQsdC+0LvQsNC00Ysu0J7RgNCz0LDQvdC40LrQsNC70YvSmywg0L7RgNCz0LDQvdCw0YTQuNC30LjQutCw0LvRi9KbLCDRhNC40LfQuNC+0LvQvtCz0LjRj9C70YvSmyDRiNGD0LvQsNGA0LTRiyDQtNCwINKb0LDRgNCw0YHRgtGL0YDRgdCw0psg0LHQvtC70LDQtNGLLtCW0YPRgNC10Log0ZbRiNGW0L3QtNC10LPRliDRiNGD0LvQsNGA0LTRiyDRg9GI0LbQsNGA0LzQsNC70Ysg0LrQu9Cw0L/QsNC9INGC0rHRgdGL0L3QtNCwLNC20YPRgNC10Log0YLSr9GA0YLQutGW0YHRltC90LTQtSDQsNC90YvSmyDRgtGL0L3QtNCw0YPSk9CwINCx0L7Qu9Cw0LTRiy4g0JbRg9GA0LXQuiDRgtKv0YDRgtC60ZbRgdGW0L0g0LDRgNC90LDQudGLINC20YPRgNC10Log0L/QtdGA0LrRg9GB0YHQuNGPINCw0YDSm9GL0LvRiyDQsNC90YvSm9GC0LDRg9KT0LAg0LHQvtC70LDQtNGLINC90LXQvNC10YHQtSDQsNC70LDSm9Cw0L3QtNGLINC60LXRg9C00LXQs9C1INKb0L7QudGL0L8g0LbRg9GA0LXQuiDRgtGD0YDQutGW0YHRltC9INGB0LXQt9GDINCw0YDSm9GL0LvRiyDRgtCw0LHRg9KT0LAg0LHQvtC70LDQtNGLLiAyLtCf0YPRjdGA0LjQu9GM0LTRliDRgtGL0L3Ri9GBINCx0LDQu9Cw0LvQsNGA0LTQsCDQttC40ZYg0LrQtdC30LTQtdGB0LXQtNGWLiDQn9GD0Y3RgNC40LvRjNC00ZYg0YLRi9C90YvRgSDQsdCw0LvQsNC70LDRgNC00LAg0pvQsNGC0YLRiyDTmdGA0ZYg0LDRiNGL0psg0LXRgdGC0ZbQu9C10YLRltC9INGC0YvQvdGL0YEg0YLSr9GA0ZYu0JXQoNC10YHQtdC60YLQtdGA0LTQtSDQvtC7INGB0LjRgNC10Log0LHQsNC50pvQsNC70LDQtNGLLiDQkdCQ0LnSm9Cw0LvSk9Cw0L0g0LbQsNKT0LTQsNC50LTQsCDQv9Cw0YLQvtC70L7Qs9C40Y/QvdGL0qMg0LHQvtC70YPRi9C9INCw0LnRgtCw0LTRiy4g0JDQuyDQsdCw0LvQsNC70LDRgNC00LAg0LHSsdC7INGC0YvQvdGL0YEg0L3QvtGA0LzQsCDQsdC+0LvRi9C/INC10YHQtdC/0YLQtdC70LXQtNGWLiDQldGA0LXQutGI0LXQu9GW0LPRliDQsNC50pvRi9C9INCy0LXQt9C40LrRg9C70LvRj9GA0LvRiyDRgtGL0L3Ri9GB0YLRi9KjINCx0L7Qu9GD0YsuINCR0LDQu9CwINC00LXQvNCw0LvSk9Cw0L0g0LrQtdC30LTQtSDSm9Cw0LvQsNC5INGC0YvQvdGL0YEg0LDQu9KT0LDQvdGL0L0g0LbTmdC90LUg0LTQtdC8INGI0YvSk9Cw0YDSk9Cw0L3Ri9C9INCw0LnSm9GL0L0g0LXRiCDQutC10LTQtdGA0LPRltGB0ZbQtyDQtdGB0YLRg9Cz0LUg0LHQvtC70LDQtNGLLg==</text:p>
          </table:table-cell>
          <table:table-cell office:value-type="float" office:value="170348" table:style-name="ce1">
            <text:p>170348</text:p>
          </table:table-cell>
          <table:table-cell office:value-type="float" office:value="54" table:style-name="ce1">
            <text:p>54</text:p>
          </table:table-cell>
          <table:table-cell office:value-type="string" table:style-name="ce1">
            <text:p>Сұрақтарға нақты жауап жоқ</text:p>
          </table:table-cell>
          <table:table-cell office:value-type="float" office:value="0" table:style-name="ce1">
            <text:p>0</text:p>
          </table:table-cell>
          <table:table-cell table:number-columns-repeated="16376"/>
        </table:table-row>
        <table:table-row table:style-name="ro1">
          <table:table-cell office:value-type="float" office:value="915302" table:style-name="ce1">
            <text:p>915302</text:p>
          </table:table-cell>
          <table:table-cell office:value-type="string" table:style-name="ce1">
            <text:p>russian</text:p>
          </table:table-cell>
          <table:table-cell office:value-type="string" table:style-name="ce1">
            <text:p>Билет 17&amp;lt;br /&amp;gt; 1.Дайте характеристику функциональных шумов сердца у детей.&amp;lt;br /&amp;gt; 2. Какие особенности строения органов дыхания у детей , обуславливают наличие пуэрильного дыхания.&amp;lt;br /&amp;gt;</text:p>
          </table:table-cell>
          <table:table-cell office:value-type="string" table:style-name="ce1">
            <text:p>0L7RgdC+0LHQtdC90L3QvtGB0YLRj9C80Lgg0Y/QstC70Y/RjtGC0YHRjzrQodC40YHRgtC+0LvQuNGH0LXRgdC60LjQuSDQt9Cy0YPQuijQsiDRgdC70YPRh9Cw0LUg0LXRgdC70Lgg0LHRg9C00LXRgiDQtNC40LDRgdGC0L7Qu9C40YfQtdGB0LrQuNC5LdC90LDRgNGD0YjQtdC90LjQtSDQsiDQodCh0KEg0LjQu9C4INC60LDQutC+0LUg0LvQuNCx0L4g0LfQsNCx0L7Qu9C10LLQsNC90LjQtSks0LrQvtGA0L7RgtC60LjQtSzRgdC70YvRiNC90L4g0YLQvtC70YzQutC+INCyINC+0LTQvdC+0Lwg0LzQtdGB0YLQtSzQvdCwINC30LLRg9C6INC80Y/Qs9C60LjQuSzQvdC1INGB0L7QvtGC0LLQtdGC0YHQstGD0Y7RgiDRiNGD0LzRgyDRgdC10YDQtNGG0LAs0YHQu9GL0YjQvdC+INC90LUg0LLQviDQstGB0Y4g0YHQuNGB0YLQvtC70YMs0LzRg9C30YvQutCw0LvRjNC90YvQuSDQt9Cy0YPQutC1LNC90LXQttC90YvQtSzQvdC10L/QvtGB0YLQvtGP0L3QvdGLLNC80LXQvdGP0Y7RgtGB0Y8g0LjQtyDQt9CwINC/0L7Qu9C+0LbQtdC90LjRjyjQu9GD0YfRiNC1INGB0LvRi9GI0L3QviDQu9C10LbQsCks0YTQsNC30Ysg0LTRi9GF0LDQvdC40Y8o0LzQvtCz0YPRgiDQvtGB0LvQsNCx0L3Rg9GC0Ywg0LjQu9C4INC/0YDQvtC/0LDRgdGC0Ywg0L/RgNC4INCz0LvRg9Cx0L7QutC+0Lwg0LLQtNC+0YXQtSks0YTQuNC30LjRh9C10YHQutC+0Lkg0LDQutGC0LjQstC90L7RgdGC0Lgo0L/RgNC+0L/QsNGB0YLRjCDQuNC70Lgg0L7RgdC70LDQsdC90YPRgtGMKSwxINC4IDIg0YLQvtC9INC90LUg0LLQu9C40Y/RjtGCINC90LAg0YHQvtC/0YDQvtGC0LjQstC70Y/RjtGJ0LjQtdGB0Y8g0LjQt9C80LXQvdC10L3QuNGPLNC80L7Qs9GD0YIg0LHRi9GC0Ywg0L/RgNC40LfQvdCw0LrQsNC80Lgg0L3QtdC00L7RgdGC0LDRgtC+0YfQvdC+0YHRgtC4INC60YDQvtCy0L7QvtCx0YDQsNGJ0LXQvdC40Y8g0LjQu9C4INCh0J0s0L3QtSDRgtGA0LXQsdGD0Y7RgiDQu9C10YfQtdC90LjRjyzRh9Cw0YnQtSDRgdC70YvRiNC90L4g0YMg0LTQtdGC0LXQuSDQuCDQv9C+0LTRgNC+0YHRgtC60L7QsiDQsiDQv9C10YDQuNC+0LQg0LjQvdGC0LXQvdGB0LjQstC90L7Qs9C+INGA0L7RgdGC0LAs0LrQvtCz0LTQsCDQodCh0KEg0L/RgNC40YHQv9C+0YHQsNCx0LvQuNCy0LDQtdGC0YHRjyDQuiDQuNC30LzQtdC90LXQvdC40Y4g0YDQsNC30LzQtdGA0L7QsiDRgdC10YDQtNGG0LAg0Lgg0YDQvtGB0YLQsCDQtNC10YLQtdC5INC4INC/0L7QtNGA0L7RgdGC0LrQvtCyLjxiciAvPg0KPGJyIC8+DQoy0J/Rg9GN0YDQvdC+0LUg0LTRi9GF0LDQvdC40LUg0Y/QstC70Y/QtdGC0YHRjyDQvdC+0YDQvNC+0Lkg0LIg0L/QtdGA0LjQvtC0INC+0YIgNiDQvNC10YEg0LTQviA2INC70LXRgi7Qn9C+0YHQu9C1INC+0L3QviDQv9C10YDQtdGF0L7QtNC40YIg0L3QsCDQstC10LfQuNC60YPQu9GP0YDQvdC+0LUo0L/RgNC40LzQtdGA0L3QviDQsiA30LvQtdGCKSDQutCw0Log0YMg0LLQt9GA0L7RgdC70L7Qs9C+INGH0LXQu9C+0LLQtdC60LAu0J/Rg9GN0YDQvdC+0LUo0YHQuNC/0LvQvtC1KSDQtNGL0YXQsNC90LjQtS3QvtC90L4g0L/RgNC+0Y/QstC70Y/QtdGC0YHRjyDRgtC10Lwg0YfRgtC+INC+0L3QsCDQsdC+0LvQtdC1INCz0YDQvtC80LrQvtC1INC4INC10LPQviDQv9GA0L7QtNC+0LvQttC40YLQtdC70YzQvdC+0YHRgtGMINGA0LDQstC90LAg0LLRgdC10Lwg0YTQsNC30LDQvCDQtNGL0YXQsNC90LjRjy7QnNC+0LbQtdGCINC+0LHRg9GB0LvQsNCy0LvQuNCy0LDRgtGMOjEu0YDQsNC30LzQtdGAINCz0YDRg9C00L3QvtC5INC60LvQtdGC0LrQuCDQtNC10YLQtdC5KNC/0L7Qv9C10YDQtdGH0L3QuNC6INC4INGB0LDQs9C40YLRgtCw0LvRjNC90YvQuSDRgNCw0LfQvNC10YAg0YDQsNCy0L3Riywg0YTQvtGA0LzQsC3QsdC+0YfQutC+0L7QsdGA0LDQt9C90LDRjyzQuCDQv9C+0YfRgtC4INCz0L7RgNC40LfQvtC90YLQsNC70YzQvdC+0LUg0YDQsNGB0L/QvtC70L7QttC10L3QuNC1INGA0LXQsdC10YApLdC40Lcg0LfQsCDRgtC+0LPQviDRh9GC0L4g0L7QvSDQvdC10LHQvtC70YzRiNC+0Lks0LzQtdC20LTRgyDQs9C+0LvQvtGB0L7QstC+0Lkg0YnQtdC70YzRjiDQuCDQvNC10YHRgtC+0Lwg0LDRg9GB0LrRg9C70YzRgtCw0YbQuNC4INC90LXQsdC+0LvRjNGI0L7QtSDRgNCw0YHRgdGC0L7Rj9C90LjQtSzQuNC3INC30LAg0YfQtdCz0L4g0LzQvtC20L3QviDRg9GB0LvRi9GI0LDRgtGMINGI0YPQvCDQtNGL0YXQsNC90LjRjyDQs9C+0YDRgtCw0L3QuDsyLtCi0LDQuiDQttC1INCy0LvQuNGP0LXRgiDRg9Cy0LXQu9C40YfQtdC90L3QsNGPINGN0LvQsNGB0YLQuNGH0L3QvtGB0YLRjCDQuCDRgtC+0L3QutCw0Y8g0YLQvtC70YnQuNC90LAg0YHRgtC10L3QvtC6INCyINCz0YDRg9C00L3QvtC5INC60LvQtdGC0LrQuCzQuNC3INC30LAg0YfQtdCz0L4g0L/RgNC+0LjRgdGF0L7QtNC40YIg0YPQstC10LvQuNGH0LXQvdC40LUg0LXQtSDQstC40LHRgNCw0YbQuNC4OzMu0KDQsNC30LLQuNGC0LjQtSDQuNC90YLQtdGA0YHRgtC40YbQuNCw0LvRjNC90YvRhSDRgtC60LDQvdC10Lkt0LXQtSDRgNCw0LfQstC40YLQuNC1INCy0LXQtNC10YIg0Log0YHQvdC40LbQtdC90LjRjiDQstC+0LfQtNGD0YjQvdC+0YHRgtC4INC70LXQs9C60LjRhTs00KPQt9C60LjQuSDRgNCw0LfQvNC10YAo0L/RgNC+0YHQstC10YIpINCx0YDQvtC90YXQvtCyOzXRgdC90LjQttC10L3QuNC1INCy0L7Qt9C00YPRhdC+0L/RgNC+0L3QuNGG0LDQtdC80L7RgdGC0Lgg0LvQtdCz0LrQuNGFLtCQINCyIDMtNiDQvNC10YEg0L/RgNC4INCw0YPRgdC60YPQu9GM0YLQsNGG0LjQuCDRgdC70YvRiNC90L4g0L7RgdC70LDQsdC70LXQvdC90L7QtSDQstC10LfQuNC60YPQu9GP0YDQvdC+0LUs0LLQvNC10YHRgtC+INC/0YPRjdGA0L3QvtCz0L4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не полный ответ по 1 вопросу</text:p>
          </table:table-cell>
          <table:table-cell office:value-type="float" office:value="0" table:style-name="ce1">
            <text:p>0</text:p>
          </table:table-cell>
          <table:table-cell table:number-columns-repeated="16376"/>
        </table:table-row>
        <table:table-row table:style-name="ro1">
          <table:table-cell office:value-type="float" office:value="915392" table:style-name="ce1">
            <text:p>915392</text:p>
          </table:table-cell>
          <table:table-cell office:value-type="string" table:style-name="ce1">
            <text:p>russian</text:p>
          </table:table-cell>
          <table:table-cell office:value-type="string" table:style-name="ce1">
            <text:p>Билет 17&amp;lt;br /&amp;gt; 1.Дайте характеристику функциональных шумов сердца у детей.&amp;lt;br /&amp;gt; 2. Какие особенности строения органов дыхания у детей , обуславливают наличие пуэрильного дыхания.&amp;lt;br /&amp;gt;</text:p>
          </table:table-cell>
          <table:table-cell office:value-type="string" table:style-name="ce1">
            <text:p>Mikg0J3QsCDQutCw0LbQtNC+0Lwg0Y3RgtCw0L/QtSDRgNCw0LfQstC40YLQuNGPINGDINC00LXRgtC10Lkg0L/RgNC+0LjRgdGF0L7QtNC40YIg0YDQsNC30L3Ri9C5INGC0LjQvyDQtNGL0YXQsNC90LjRjy4g0J/Rg9GN0YDQuNC70YzQvdC+0LUg0LTRi9GF0LDQvdC40LUg0LLQvtC30L3QuNC60LDQtdGCINC+0YIgNiDQvNC10YHRj9GG0LXQsiDQtNC+IDUg0LvQtdGCICjQtdGB0LvQuCDQvdC1INC+0YjQuNCx0LDRjtGB0YwpINC4INGB0LvRi9GI0LXQvSDRgdGA0LDQt9GDINC90LAg0LTQstGD0YUg0YTQsNC30LDRhSDQtNGL0YXQsNC90LjRjyAoINCy0L4g0LLRgNC10LzRjyDQstC00L7RhdCwINC4INCy0YvQtNC+0YXQsCksINCz0YDQvtC80LrQuNC5INC/0L4g0YHRgNCw0LLQvdC10L3QuNGOINGBINCy0LXQt9C40LrRg9C70Y/RgNC90YvQvC4g0K3RgtC+INGB0LLRj9C30LDQvdC+INGBINCy0YvRgdC+0LrQvtC5INGN0LvQsNGB0YLQuNGH0L3QvtGB0YLRjNGOINCz0YDRg9C00L3QvtC5INC60LvQtdGC0LrQuCwg0YEg0LzQtdC90YzRiNC10Lkg0YLQvtC70YnQuNC90L7QuSDQvNGL0YjQtdGH0L3QvtC5INC+0LHQvtC70L7Rh9C60Lgg0L7RgNCz0LDQvdC+0LIg0Lgg0YEg0YLQtdC8INGH0YLQviDQs9C70L7RgtC60LAg0LrQvtGA0L7RgtC60LDRjyDQuCDQvtGH0LXQvdGMINCx0LvQuNC30LrQviDRgNCw0YHQv9C+0LvQvtC20LXQvdCwINC6INGC0L7Rh9C60LUg0LDRg9GB0LrRg9C70YzRgtCw0YbQuNC4LiDQmiDQvtGA0LPQsNC90LDQvCAg0L7QsdGD0YHQu9Cw0LLQu9C40LLQsNGO0YnQuNC1INC90LDQu9C40YfQuNC1INC/0YPRjdGA0LjQu9GM0L3QvtCz0L4g0LTRi9GF0LDQvdC40Y8g0L7RgtC90L7RgdGP0YLRgdGPINCz0LvQvtGC0LrQsCDQuCDQsdGA0L7QvdGF0Lgg0Lgg0LPRgNGD0LTQvdCw0Y8g0LrQu9C10YLQutCwLiDQntGB0L7QsdC10L3QvdC+0YHRgtC4OiDQs9C70L7RgtC60LAt0LLQvtGA0L7QvdC60L7QvtCx0YDQsNC30L3QvtC5INGE0L7RgNC80YssINC60L7RgNC+0YLQutCw0Y8sINGD0LfQutCw0Y8sINC90LDRhdC+0LTQuNGC0YHRjyDQt9CwINC/0YDQtdC00LXQu9Cw0LzQuCDQtNGD0LbQtdC6OyDQsdGA0L7QvdGF0Lgt0YjQuNGA0L7QutC40LUg0Lgg0LjQvNC10Y7RgiDQvNC10L3RjNGI0LjQuSDRg9Cz0L7QuyDRh9GC0L4g0YLQvtC20LUg0YHQv9C+0YHQvtCx0YHRgtCy0YPRjtGCINC/0L7Rj9Cy0LvQtdC90LjRjiDQtNCw0L3QvdC+0LPQviDRgtC40L/QsCDQtNGL0YXQsNC90LjRjywg0YTQvtGA0LzQsCDQs9GA0YPQtNC90L7QuSDQutC70LXRgtC60Lgg0LHQvtGH0LrQvtC+0LHRgNCw0LfQvdCw0Y8uINCf0L7Qt9C20LUsINCyINGB0LLRj9C30Lgg0YEg0YDQvtGB0YLQvtC8INC+0YDQs9Cw0L3QuNC30LzQsCDRgNC10LHQtdC90LrQsCDQstC+0LfQvdC40LrQsNC10YIg0LLQtdC30LjQutGD0LvRj9GA0L3Ri9C5INGC0LjQvyDQtNGL0YXQsNC90LjRjy4gICAgMSkg0Jog0YTRg9C90LrRhtC40L7QvdCw0LvRjNC90L7QvNGDINGI0YPQvNGDINGB0LXRgNC00YbQsCDRgyDQtNC10YLQtdC5INC+0YLQvdC+0YHQuNGC0YHRjyDRgdC40YHRgtC+0LvQuNGH0LXRgdC60LjQuSDRiNGD0LwgKNC00LjQsNGB0YLQvtC70LjRh9C10YHQutC40Lkg0YjRg9C8INGB0LvRi9GI0LXQvSDQv9GA0Lgg0L/QsNGC0L7Qu9C+0LPQuNGP0YUpLiDQodC40YHRgtC+0LvQuNGH0LXRgdC60LjQuSDRiNGD0LwgINGF0LDRgNCw0LrRgtC10YDQuNC30YPQtdGC0YHRjyDRgtC10Lwg0YfRgtC+INC+0L0g0L3QtdCz0YDQvtC80LrQuNC5LCDQvNGP0LPQutC40LksINC90LXQttC90YvQuSAg0Lgg0LjQvNC10LXRgiDQvNGD0LfRi9C60LDQu9GM0L3Ri9C5INGC0LXQvNCx0YAuINCU0LDQvdC90YvQuSDRiNGD0Lwg0L3QtSDRhdCw0YDQsNC60YLQtdGA0LjQt9GD0LXRgtGB0Y8g0YEg0LDQvdC+0LzQsNC70LjRj9C80Lgg0YHQtdGA0LTRhtCwINGDINC00LXRgtC10LksINC4INCy0YvRgdC70YPRiNC40LLQsNC10YLRgdGPINCyINC+0LHQu9Cw0YHRgtC4INGB0LXRgNC00LXRh9C90L7QuSDRgtGD0L/QvtGB0YLQuCwg0L3QtSDQuNC80LXQtdGCINGN0L/QuNGG0LXQvdGC0YDQsC4gINCh0LjRgdGC0L7Qu9C40YfQtdGB0LrQuNC5INGI0YPQvCDQvNC+0LbQtdGCINGD0YHQuNC70LjQstCw0YLRjNGB0Y8g0LIg0L/QvtC70L7QttC10L3QuNC4INC70LXQttCwINC4INC80L7QttC10YIg0YHQvdC40LbQsNGC0YzRgdGPINC40LvQuCDQv9C+0LvQvdC+0YHRgtGM0Y4g0LjRgdGH0LXQt9C90YPRgtGMINC/0YDQuCDRhNC40LfQuNGH0LXRgdC60L7QuSAg0L3QsNCz0YDRg9C30LrQtSDQuCDQvdCwINC80LDQutGB0LjQvNCw0LvRjNC90L7QvCDQstC00L7RhdC1ICDQkiDQvtGC0LvQuNGH0LjQuCDQvtGCINCy0LfRgNC+0YHQu9GL0YUg0YLQvtGH0LrQuCDQsNGD0YHQutGD0LvRjNGC0LDRhtC40Lgg0L7RgtC70LjRh9Cw0Y7RgtGB0Y8gKNC40Lct0LfQsCDRgNCw0YHQv9C+0LvQvtC20LXQvdC40Y8g0LrQu9Cw0L/QsNC90L7Qsiku0J/RgNC4INC/0LDRgtC+0LvQvtCz0LjRj9GFINC60LvQsNC/0LDQvdC+0LIgKNGB0YLQtdC90L7QtyDQuNC70Lgg0L3QtdC00L7RgdGC0LDRgtC+0YfQvdC+0YHRgtGMKSDQvNC+0LbQvdC+INGD0YHQu9GL0YjQsNGC0Ywg0LTQuNCw0YHRgtC+0LvQuNGH0LXRgdC60LjQuSDRiNGD0LwuIC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620" table:style-name="ce1">
            <text:p>915620</text:p>
          </table:table-cell>
          <table:table-cell office:value-type="string" table:style-name="ce1">
            <text:p>russian</text:p>
          </table:table-cell>
          <table:table-cell office:value-type="string" table:style-name="ce1">
            <text:p>Билет 17&amp;lt;br /&amp;gt; 1.Дайте характеристику функциональных шумов сердца у детей.&amp;lt;br /&amp;gt; 2. Какие особенности строения органов дыхания у детей , обуславливают наличие пуэрильного дыхания.&amp;lt;br /&amp;gt;</text:p>
          </table:table-cell>
          <table:table-cell office:value-type="string" table:style-name="ce1">
            <text:p>MSDQstC+0L/RgNC+0YHQuNC6ICDQpNGD0L3QutGG0LjQvtC90LDQu9GM0L3Ri9C1INGI0YPQvNGLINGB0LXRgNC00YbQsCDRgyDQtNC10YLQtdC5INC/0L4g0LzQu9C+0LXQvNGDINC80L3QtdC90LjRjiAg0Y3RgtC+INC90LXQs9GA0L7QvNC60LjQtSwg0LzRj9Cz0LrQuNC1INGI0YPQvNGLLCDQutC+0YLQvtGA0YvQtSDQstC+0LfQvdC40LrQsNGO0YIg0L/RgNC4INC90L7RgNC80LDQu9GM0L3QvtC5INCw0L3QsNGC0L7QvNC40Lgg0Lgg0YTQuNC30LjQvtC70L7Qs9C40Lgg0YHQtdGA0LTRhtCwLiDQntC90Lgg0L3QtSDRgdCy0Y/Qt9Cw0L3RiyDRgSDQv9C+0YDQvtC60LDQvNC4INC40LvQuCDQvtGA0LPQsNC90LjRh9C10YHQutC+0Lkg0L/QsNGC0L7Qu9C+0LPQuNC10Lkg0Lgg0YfQsNGB0YLQviDRj9Cy0LvRj9GO0YLRgdGPINCy0LDRgNC40LDQvdGC0L7QvCDQvdC+0YDQvNGLLCDQvtGB0L7QsdC10L3QvdC+INCyINC00LXRgtGB0LrQvtC8INCy0L7Qt9GA0LDRgdGC0LUuINCk0YPQvdC60YbQuNC+0L3QsNC70YzQvdGL0LUg0YjRg9C80Ysg0LzQvtC20L3QviDQvtC/0LjRgdCw0YLRjCDQuNGFINC/0YDQvtC40YHRhdC+0LbQtNC10L3QuNC10Lwg0Y3RgtC4INGI0YPQvNGLINCy0L7Qt9C90LjQutCw0Y7RgiDQuNC3LdC30LAg0YLRg9GA0LHRg9C70LXQvdGC0L3QvtCz0L4g0YLQvtC60LAg0LrRgNC+0LLQuCDQsiDRgdC10YDQtNGG0LUg0Lgg0LrRgNGD0L/QvdGL0YUg0YHQvtGB0YPQtNCw0YUsINGH0YLQviDRgdCy0Y/Qt9Cw0L3QviDRgSDRhNC40LfQuNC+0LvQvtCz0LjRh9C10YHQutC40LzQuCDQvtGB0L7QsdC10L3QvdC+0YHRgtGP0LzQuCDQtNC10YLRgdC60L7Qs9C+INC+0YDQs9Cw0L3QuNC30LzQsDog0LzQtdC90YzRiNC40Lwg0LTQuNCw0LzQtdGC0YDQvtC8INGB0L7RgdGD0LTQvtCyLCDQsdC+0LvRjNGI0LXQuSDRgdC60L7RgNC+0YHRgtGM0Y4g0LrRgNC+0LLQvtGC0L7QutCwINC4INGC0L7QvdC60L7RgdGC0YzRjiDQs9GA0YPQtNC90L7QuSDQutC70LXRgtC60LguINCU0LDQu9C10LUg0L/QtdGA0LXQudC00LXQvCDQuiDQpdCw0YDQsNC60YLQtdGA0LjRgdGC0LjQutC1IDog0Log0L3QtdC5INC80Ysg0L7RgtC90L7RgdC40Lwg0YLQvtC90LDQu9GM0L3QvtGB0YLRjCwg0LPRgNC+0LzQutC+0YHRgtGMLCAg0L3QsNC70LjRh9C40LUg0LjQu9C4INC+0YLRgdGD0YLRgdGC0LLQuNGPINC40YDRgNCw0LTQuNCw0YbQuNC4INC4INGB0LjRgdGC0L7Qu9C40YfQtdGB0LrRg9GOINGE0LDQt9CwIC4gPGJyIC8+DQrQotC+0L3QsNC70YzQvdC+0YHRgtGMOiDQqNGD0LzRiyDQvtCx0YvRh9C90L4g0LzRj9Cz0LrQuNC1INC00YPRjtGJ0LjQtSDQuNC70Lgg0LzRg9C30YvQutCw0LvRjNC90YvQtSwg0LHQtdC3INCz0YDRg9Cx0L7Qs9C+INC+0YLRgtC10L3QutCwLjxiciAvPg0K0JPRgNC+0LzQutC+0YHRgtGMOiDQmtCw0Log0L/RgNCw0LLQuNC70L4sIDEtMiDRgdGC0LXQv9C10L3QuCDQv9C+INGI0LrQsNC70LUg0LjQvdGC0LXQvdGB0LjQstC90L7RgdGC0Lgg0YjRg9C80L7Qsi4g0JPRgNC+0LzQutC+0YHRgtGMINGE0YPQvdC60YbQuNC+0L3QsNC70YzQvdGL0YUg0YjRg9C80L7QsiDQuNC30LzQtdC90Y/QtdGC0YHRjyDQv9GA0Lgg0L/QtdGA0LXQvNC10L3QtSDQv9C+0LvQvtC20LXQvdC40Y8g0YLQtdC70LAg0LjQu9C4INC00YvRhdCw0L3QuNC4LjxiciAvPg0K0KHQuNGB0YLQvtC70LjRh9C10YHQutCw0Y8g0YTQsNC30LA6INCn0LDRidC1INCy0YHQtdCz0L4g0YjRg9C80Ysg0LLQvtC30L3QuNC60LDRjtGCINCyINGB0LjRgdGC0L7Qu9GDLCDRgtCw0Log0LrQsNC6INC40LzQtdC90L3QviDQsiDRjdGC0L7RgiDQvNC+0LzQtdC90YIg0LrRgNC+0LLQvtGC0L7QuiDQvdCw0LjQsdC+0LvQtdC1INCw0LrRgtC40LLQvdGL0LkuINCU0LjQsNGB0YLQvtC70LjRh9C10YHQutC40LUg0YjRg9C80Ysg0L/RgNC4INGE0YPQvdC60YbQuNC+0L3QsNC70YzQvdGL0YUg0LjQt9C80LXQvdC10L3QuNGP0YUg0LrRgNCw0LnQvdC1INGA0LXQtNC60LguPGJyIC8+DQog0J3QtSDQuNGA0YDQsNC00LjQuNGA0YPRjtGCICjQsiDQvdC+0YDQvNC1ICk6INCk0YPQvdC60YbQuNC+0L3QsNC70YzQvdGL0LUg0YjRg9C80Ysg0L3QtSDRgNCw0YHQv9GA0L7RgdGC0YDQsNC90Y/RjtGC0YHRjyDQt9CwINC/0YDQtdC00LXQu9GLINGC0L7Rh9C60Lgg0LLRi9GB0LvRg9GI0LjQstCw0L3QuNGPLCDQuNGFINC70YPRh9GI0LUg0LLRgdC10LPQviDRgdC70YvRiNC90L4g0L3QsCDQvtCz0YDQsNC90LjRh9C10L3QvdC+0Lkg0L7QsdC70LDRgdGC0Lgg0LPRgNGD0LTQvdC+0Lkg0LrQu9C10YLQutC4LiDQt9Cw0YLQtdC8INC/0LXRgNC10LnQtNC10Lwg0Log0YLQvtC80YMg0YfRgtC+INC80L7QttC10YIg0LjQt9C80LXQvdC40YLRjNGB0Y8g0LIg0L3QvtGA0LzQsNC70YzQvdC+0Lwg0YHQvtGB0YLQvtGP0L3QuNC4INC40LvQuCDRgdC+0YHRgtC+0Y/QvdC40Lgg0L/QvtC60L7RjyAg0Log0LjQt9C80LXQvdGH0LjQstC+0YHRgtC4INC6INC60L7RgtC+0YDQvtC5INC+0YLQvdC+0YHQuNGC0YzRgdGPINC10LUg0L/QvtC60LDQt9Cw0YLQtdC70Lgg0LrQvtGC0L7RgNGL0LUg0Y8g0YHQtdC50YfQsNGBINC+0L/QuNGI0YMg0L3QuNC20LU8YnIgLz4NCtCY0LfQvNC10L3Rh9C40LLQvtGB0YLRjDog0KjRg9C8INC80L7QttC10YIg0YPRgdC40LvQuNCy0LDRgtGM0YHRjyDQv9GA0Lgg0YTQuNC30LjRh9C10YHQutC+0Lkg0L3QsNCz0YDRg9C30LrQtSwg0LvQuNGF0L7RgNCw0LTQutC1LCDRgdGC0YDQtdGB0YHQtSDQuNC70Lgg0LDQvdC10LzQuNC4INC4INC40YHRh9C10LfQsNGC0Ywg0LIg0YHQvtGB0YLQvtGP0L3QuNC4INC/0L7QutC+0Y8uPGJyIC8+DQrQm9C+0LrQsNC70LjQt9Cw0YbQuNGPOiDQndCw0LjQsdC+0LvQtdC1INGH0LDRgdGC0L4g0YTRg9C90LrRhtC40L7QvdCw0LvRjNC90YvQtSDRiNGD0LzRiyDQstGL0YHQu9GD0YjQuNCy0LDRjtGC0YHRjyDQsiDQv9GA0L7QtdC60YbQuNC4INC70ZHQs9C+0YfQvdC+0Lkg0LDRgNGC0LXRgNC40LggKElJINC80LXQttGA0LXQsdC10YDRjNC1INGB0LvQtdCy0LAg0L7RgiDQs9GA0YPQtNC40L3RiyAg0LXQtSDQu9C40L3QuNC4KSDQuNC70Lgg0LIg0L7QsdC70LDRgdGC0Lgg0LLQtdGA0YXRg9GI0LrQuCDRgdC10YDQtNGG0LAuPGJyIC8+DQrQktC+0LfRgNCw0YHRgtC90YvQtSDQvtGB0L7QsdC10L3QvdC+0YHRgtC4OiDQpNGD0L3QutGG0LjQvtC90LDQu9GM0L3Ri9C1INGI0YPQvNGLINC90LDQuNCx0L7Qu9C10LUg0YXQsNGA0LDQutGC0LXRgNC90Ysg0LTQu9GPINC00LXRgtC10Lkg0LIg0LLQvtC30YDQsNGB0YLQtSDQvtGCIDMg0LTQviA3INC70LXRgiDQuCDQv9C+0LTRgNC+0YHRgtC60L7QsiDQuNC3LdC30LAg0LLQvtC30YDQsNGB0YLQvdGL0YUg0LjQt9C80LXQvdC10L3QuNC5INC60YDQvtCy0L7QvtCx0YDQsNGJ0LXQvdC40Y8g0Lgg0YDQvtGB0YLQsCDRgdC10YDQtNGG0LAgINGBINCy0L7Qt9GA0LDRgdGC0L7QvCDQvtC90LggINC60LDQuiDQv9GA0LDQstC40LvQviDQuNGB0YfQtdC30LDRjtGCLjxiciAvPg0K0KTQuNC30LjRh9C10YHQutC+0LUg0YHQvtGB0YLQvtGP0L3QuNC1OiDQqNGD0LzRiyDQsdC+0LvQtdC1INCy0YvRgNCw0LbQtdC90Ysg0YMg0YXRg9C00L7RidCw0LLRi9GFINC00LXRgtC10Lkg0YEg0YLQvtC90LrQvtC5INCz0YDRg9C00L3QvtC5INC60LvQtdGC0LrQvtC5LCDRgtCw0Log0LrQsNC6INC30LLRg9C6INC70YPRh9GI0LUg0L/QtdGA0LXQtNCw0ZHRgtGB0Y8uPGJyIC8+DQrQndC1INGC0YDQtdCx0YPRjtGCINC70LXRh9C10L3QuNGPOiDQpNGD0L3QutGG0LjQvtC90LDQu9GM0L3Ri9C1INGI0YPQvNGLINCx0LXQt9C+0L/QsNGB0L3RiyDQuCDQvdC1INGC0YDQtdCx0YPRjtGCINGB0L/QtdGG0LjQsNC70YzQvdC+0LPQviDQvtCx0YHQu9C10LTQvtCy0LDQvdC40Y8g0LjQu9C4INGC0LXRgNCw0L/QuNC4LiDQntC00L3QsNC60L4g0LTQu9GPINC40YHQutC70Y7Rh9C10L3QuNGPINC+0YDQs9Cw0L3QuNGH0LXRgdC60L7QuSDQv9Cw0YLQvtC70L7Qs9C40Lgg0L3QtdC+0LHRhdC+0LTQuNC80L4g0L/RgNC+0LLQtdGB0YLQuCDQsNGD0YHQutGD0LvRjNGC0LDRhtC40Y4sINCt0JrQkyDQuCDQo9CX0Jgg0YHQtdGA0LTRhtCwLjxiciAvPg0KPGJyIC8+DQrQotCw0LrQuNC8INC+0LHRgNCw0LfQvtC8LCDRhNGD0L3QutGG0LjQvtC90LDQu9GM0L3Ri9C1INGI0YPQvNGLINGDINC00LXRgtC10Lkg0Y/QstC70Y/RjtGC0YHRjyDQvdC+0YDQvNCw0LvRjNC90YvQvCDRj9Cy0LvQtdC90LjQtdC8LCDQvdC1INC+0YLRgNCw0LbQsNGO0YnQuNC8INC/0LDRgtC+0LvQvtCz0LjRjiDRgdC10YDQtNC10YfQvdC+INGB0L7RgdGD0LTQuNGB0YLQvtC5INGB0LjRgdGC0LXQvNGLLiDQktCw0LbQvdC+INC+0YLQu9C40YfQsNGC0Ywg0LjRhSDQvtGCINC/0LDRgtC+0LvQvtCz0LjRh9C10YHQutC40YUg0YjRg9C80L7Qsiwg0YfRgtC+INC00LXQu9Cw0LXRgiDQstGA0LDRhyDQv9GA0Lgg0LrQu9C40L3QuNGH0LXRgdC60L7QvCDQvtGB0LzQvtGC0YDQtSDQuCDQtNC+0L/QvtC70L3QuNGC0LXQu9GM0L3Ri9GFINC80LXRgtC+0LTQsNGFINC00LjQsNCz0L3QvtGB0YLQuNC60LguPGJyIC8+DQo8YnIgLz4NCjxiciAvPg0KPGJyIC8+DQo8YnIgLz4NCjxiciAvPg0KMi4g0KMg0LTQtdGC0LXQuSDQtNGL0YUuINC/0YPRgtC4INC90LUg0L3QsNC80L3QvtCz0L4g0YPQttC1INC+0YIg0YfQsNGB0YLQuCDQuNC3INC30LAg0YDQsNC30LLQuNGC0L7Qs9C+INGA0L7RgtC+0LLQvtCz0L4g0LDQv9C/0LDRgNCw0YLQsCDQsCDQuNC80LzQtdC90L3QviDQsdC+0LvRjNGI0L7Qs9C+INGP0LfRi9C60LAgICDQv9GA0L7RgdGC0L4g0LDQvdCw0YLQvtC80LjRh9C10YHQutC4INC40YUg0L/RgNC+0YHQstC10YIg0LPQvtGA0LvQsCDQvdCw0LzQvdC+0LPQviDRg9C20LUg0YfQtdC8INGDINCy0LfRgNC+0YHQu9GL0YUsINCyINC90L7RgNC80LUg0YMg0LTQtdGC0LXQuSDRhNC+0YDQvNCwINCz0YDRg9C00L3QvtC5INC60LvQtdGC0LrQuCDQuNC80LXQtdGCINCx0L7Rh9C60LAg0L7QsdGA0LDQt9C90YPRjiDRhNC+0YDQvNGDINGC0LDQutC20LUg0LLQu9C40Y/RjyDRgtC10Lwg0YHQsNC80YvQvCDQvdCwINCw0LrRgiDQtNGL0YXQsNC90LjRjyAgINCwINGC0LDQutC20LUgINGF0LDRgNCw0LrRgtC10YDQvdGL0Lwg0LIg0LDQutGC0LUg0LTRi9GF0LDQvdC40Y8g0YMg0LfQtNC+0YDQvtCy0L7Qs9C+INC4INC00L7QvdC+0YjQtdC90L3QvtCz0L4g0LzQsNC70YvRiNCwINGP0LLQu9GP0LXRgtGB0Y8g0L3QtdGD0YHRgtC+0LnRh9C40LLRi9C5INGA0LjRgtC8INC00YvRhdCw0L3QuNGPLiDQrdGC0L4g0L/RgNC+0Y/QstC70Y/QtdGC0YHRjyDQvdC10YDQsNCy0L3QvtC80LXRgNC90YvQvNC4INC/0LDRg9C30LDQvNC4INC80LXQttC00YMg0LLQtNC+0YXQvtC8INC4INCy0YvQtNC+0YXQvtC8LCDRh9C10YDQtdC00YPQtdGC0YHRjyDQs9C70YPQsdC+0LrQvtC1INC4INC/0L7QstC10YDRhdC90L7RgdGC0L3QvtC1INC00YvRhdCw0L3QuNC1LCDRhNC40LfQuNC+0LvQvtCz0LjRh9C10YHQutC+0LUg0YLQsNGF0LjQv9C90L7RjSDQuCDQutC+0YDQvtGC0LrQuNC80Lgg0L7RgdGC0LDQvdC+0LLQutCw0LzQuCDQtNGL0YXQsNC90LjRjyDQtNC+IDUg0YHQtdC60YPQvdC0ICjQsNC/0L3QvtGNKS4gINCt0YLQviDQv9GA0L7QtNC+0LvQttCw0LXRgtGB0Y8g0L/RgNC40LzQtdGA0L3QviDQtNC+INC00LLRg9GFINC70LXRgiwg0YHQuNC70YzQvdC+INCy0YvRgNCw0LbQtdC90L4g0LIg0L/QtdGA0LLRi9C1INC80LXRgdGP0YbRiyDQttC40LfQvdC4LiDQoyDQvNCw0LvRi9GI0LAg0L3QsNCx0LvRjtC00LDQtdGC0YHRjyDQvdC10L/RgNCw0LLQuNC70YzQvdGL0Lkg0YDQuNGC0Lwg0LTRi9GF0LDQvdC40Y8sINGH0YLQviDQstGL0YDQsNC20LXQvdC90L4gINC/0YDQvtGP0LLQu9GP0LXRgtGB0Y8g0LLQviDQstGA0LXQvNGPINGB0L3QsC4g0JIg0L3QvtGA0LzQtSDRgyDQtNC10YLQtdC5INC00L4gNiDQvNC10YHRj9GG0LXQsiDQstGL0YHQu9GD0YjQuNCy0LDRjtGCINC+0YHQu9Cw0LHQu9C10L3QvdC+0LUg0LLQtdC30LjQutGD0LvRj9GA0L3QvtC1INC00YvRhdCw0L3QuNC1LCDRgSA2LdGC0Lgg0LzQtdGB0Y/RhtC10LIg0LTQviA1LTcg0LvQtdGCIOKAkyDQv9GD0Y3RgNC40LvRjNC90L7QtSAo0LTRi9GF0LDRgtC10LvRjNC90YvQuSDRiNGD0Lwg0LHQvtC70LXQtSDQs9GA0L7QvNC60LjQuSDQuCDQv9GA0L7QtNC+0LvQttC40YLQtdC70YzQvdGL0Lkg0LIg0YLQtdGH0LXQvdC40LUg0L7QsdC10LjRhSDRhNCw0Lcg0LTRi9GF0LDQvdC40Y8pLiDQntGB0L7QsdC10L3QvdC+0YHRgtC4INGB0YLRgNC+0LXQvdC40Y8g0L7RgNCz0LDQvdC+0LIg0LTRi9GF0LDQvdC40Y8g0YMg0LTQtdGC0LXQuSwg0L7QsdGD0YHQu9C+0LLQu9C40LLQsNGO0YnQuNC1INC90LDQu9C40YfQuNC1INC/0YPRjdGA0LjQu9GM0L3QvtCz0L4g0LTRi9GF0LDQvdC40Y8gLiDQmtC+0YDQvtGC0LrQvtC1INGA0LDRgdGB0YLQvtGP0L3QuNC1INC+0YIg0LPQvtC70L7RgdC+0LLQvtC5INGJ0LXQu9C4INC00L4g0LzQtdGB0YLQsCDQsNGD0YHQutGD0LvRjNGC0LDRhtC40Lgg0LjQty3Qt9CwINC80LDQu9GL0YUg0YDQsNC30LzQtdGA0L7QsiDQs9GA0YPQtNC90L7QuSDQutC70LXRgtC60LgsINGH0YLQviDQv9GA0LjQstC+0LTQuNGCINC6INGH0LDRgdGC0LjRh9C90L7QvNGDINCy0YvRgdC70YPRiNC40LLQsNC90LjRjiDQtNGL0YXQsNGC0LXQu9GM0L3Ri9GFINGI0YPQvNC+0LIg0LPQvtGA0YLQsNC90LguICDQkdC+0LvRjNGI0LDRjyDRjdC70LDRgdGC0LjRh9C90L7RgdGC0Ywg0Lgg0LzQsNC70LDRjyDRgtC+0LvRidC40L3QsCDRgdGC0LXQvdC60Lgg0LPRgNGD0LTQvdC+0Lkg0LrQu9C10YLQutC4LCDRg9Cy0LXQu9C40YfQuNCy0LDRjtGJ0LjQtSDQtdGRINCy0LjQsdGA0LDRhtC40Y4uICDQl9C90LDRh9C40YLQtdC70YzQvdC+0LUg0YDQsNC30LLQuNGC0LjQtSDQuNC90YLQtdGA0YHRgtC40YbQuNCw0LvRjNC90L7QuSDRgtC60LDQvdC4LCDRg9C80LXQvdGM0YjQsNGO0YnQuNC5INCy0L7Qt9C00YPRiNC90L7RgdGC0Ywg0YLQutCw0L3QuCDQu9GR0LPQutC40YUuINCf0L7RgdC70LUgNyDQu9C10YIg0LTRi9GF0LDQvdC40LUg0YMg0LTQtdGC0LXQuSDQv9C+0YHRgtC10L/QtdC90L3QviDQv9GA0LjQvtCx0YDQtdGC0LDQtdGCINGF0LDRgNCw0LrRgtC10YAg0LLQtdC30LjQutGD0LvRj9GA0L3QvtCz0L4gINC00YvRhdCw0L3QuNGPIA==</text:p>
          </table:table-cell>
          <table:table-cell office:value-type="float" office:value="170348" table:style-name="ce1">
            <text:p>170348</text:p>
          </table:table-cell>
          <table:table-cell office:value-type="float" office:value="81" table:style-name="ce1">
            <text:p>81</text:p>
          </table:table-cell>
          <table:table-cell office:value-type="string" table:style-name="ce1">
            <text:p>согласно академ политике оценка снижена на 10%</text:p>
          </table:table-cell>
          <table:table-cell office:value-type="float" office:value="10" table:style-name="ce1">
            <text:p>10</text:p>
          </table:table-cell>
          <table:table-cell table:number-columns-repeated="16376"/>
        </table:table-row>
        <table:table-row table:style-name="ro1">
          <table:table-cell office:value-type="float" office:value="1066963" table:style-name="ce1">
            <text:p>1066963</text:p>
          </table:table-cell>
          <table:table-cell office:value-type="string" table:style-name="ce1">
            <text:p>russian</text:p>
          </table:table-cell>
          <table:table-cell office:value-type="string" table:style-name="ce1">
            <text:p>Билет 17&amp;lt;br /&amp;gt; 1.Дайте характеристику функциональных шумов сердца у детей.&amp;lt;br /&amp;gt; 2. Какие особенности строения органов дыхания у детей , обуславливают наличие пуэрильного дыхания.&amp;lt;br /&amp;gt;</text:p>
          </table:table-cell>
          <table:table-cell office:value-type="string" table:style-name="ce1">
            <text:p>MS4g0KTRg9C90LrRhtC40L7QvdCw0LvRjNC90YvQtSDRiNGD0LzRiyDRgdC10YDQtNGG0LAg0YMg0LTQtdGC0LXQuSDQvtCx0YPRgdC70L7QstC70LXQvdGLINGC0LXQvCDRh9GC0L4g0YMg0LTQtdGC0LXQuSDQs9GA0YPQtNC90LDRjyDQutC70LXRgtC60LAg0L7Rh9C10L3RjCDQvNCw0LvQtdC90YzQutCw0Y8g0Lgg0YLQvtC90LrQsNGPINCX0LAg0YHRh9C10YIg0YfQtdCz0L4g0YHQtdGA0LTRhtC1INGF0L7RgNC+0YjQviDQstGL0YHQu9GD0YjQuNCy0LDQtdGC0YHRjy4g0KjRg9C80Ysg0YXQsNGA0LDQutGC0LXRgNC40LfRg9GO0YLRgdGPINGB0YLRgNC+0LXQvdC40LXQvCDRgtC10LvQsCDRgyDQtNC10YLQtdC5LCDRgdC+0L7RgtC90L7RiNC10L3QuNC10Lwg0YLQtdC70LAg0Log0L7RgNCz0LDQvdCw0LwuINCY0Lct0LfQsCDRh9C10LPQviDQvNC+0LbQvdC+INGF0L7RgNC+0YjQviDQstGL0YHQu9GD0YjQuNCy0LDRgtGMINC60LDQuiDRiNGD0LzRiyDRgtCw0Log0Lgg0YLQvtC90Ysg0YHQtdGA0LTRhtCwLiDQntC90Lgg0LfQstGD0YfQvdGL0LUsINGF0L7RgNC+0YjQviDQstGL0YHQu9GD0YjQuNCy0LDRjtGC0YHRjyDQuCDQvtC/0YDQtdC00LXQu9GP0Y7RgtGB0Y8uINCh0LXRgNC00YbQtSDRgyDQtNC10YLQtdC5INCx0YzQtdGC0YHRjyDRh9Cw0YHRgtC+LCDQuNGFINGH0YHRgSDQstGL0YjQtSDRh9C10Lwg0YMg0LLQt9GA0L7RgdC70L7Qs9C+INGH0LXQu9C+0LLQtdC60LAuINCi0LDQuiDQttC1INC40LzQtdGO0YLRgdGPINC90LDQv9GA0LjQvNC10YAg0L7QstCw0LvRjNC90L7QtSDQvtC60L3QviDQutC+0YLQvtGA0L7QtSDQt9Cw0LrRgNGL0LLQsNC10YLRgdGPINC/0YDQuCDQv9C10YDQstC+0Lwg0LrRgNC40LrQtSwg0LjQu9C4INC20LUg0LHQvtGC0LDQu9C70L7QsiDQv9GA0L7RgtC+0Log0LrQvtGC0L7RgNGL0Lkg0LfQsNC60YDRi9Cy0LDQtdGC0YHRjyDQv9GA0Lgg0YDQvtC20LTQtdC90LjQuCwg0LXRgdC70Lgg0L7QvdC4INC90LUg0LHRg9C00YPRgiDQt9Cw0LrRgNGL0YLRiywg0YLQviDQvNC+0LPRg9GCINCx0YvRgtGMINC/0LDRgtC+0LvQvtCz0LjRh9C10YHQutC40LUg0YjRg9C80YsuICDQotC+0L3RiyDRgdC10YDQtNGG0LAg0Y/RgdC90YvQtSwg0LfQstGD0YfQvdGL0LUuINCSINGC0L7Rh9C60LUg0LHQvtGC0LrQuNC90LAg0Y3RgNCx0LAg0LTQviAzINC80LXRgdGP0YbQtdCyINC/0YDQtdC+0LHQu9Cw0LTQsNC10YIgMiDRgtC+0L0g0L3QsNC0IDEuICAyLiDQn9GD0Y3RgNC40LvRjNC90L7QtSDQtNGL0YXQsNC90LjQtSDRjdGC0L4g0YPRgdC40LvQtdC90L3QvtC1INCy0LXQt9C40LrRg9C70Y/RgNC90L7QtSDQtNGL0YXQsNC90LjQtS4g0K/QstC70Y/QtdGC0YHRjyDQvdC+0YDQvNC+0Lkg0LTQu9GPINC00LXRgtC10LkuINCf0YDQuCDQstGL0YHQu9GD0YjQuNCy0LDQvdC40Lgg0LLQtNC+0YUg0LTQu9C40L3QvdGL0Lkg0LrQsNC6INC/0YDQuCDQstC10LfQuNC60YPQu9GP0YDQvdC+0LwsINCwINCy0YvQtNC+0YUg0YLQvtC20LUg0YPQtNC70LjQvdC10L3QvdGL0Lkg0Lgg0LfQstGD0YfQvdGL0Lkg0LrQsNC6INC/0YDQuCDQv9Cw0YLQvtC70L7Qs9C40YfQtdGB0LrQvtC8LiDQn9GD0Y3RgNC40LvRjNC90L7QtSDQtNGL0YXQsNC90LjQtSDQvtCx0YPRgdC70L7QstC70LXQvdC+INGC0LXQvCwg0YfRgtC+INGDINC80LvQsNC00LXQvdGG0LXQsiDQsdGA0L7QvdGF0Lgg0YPQt9C60LjQtSwg0Y3Qu9Cw0YHRgtC40YfQvdGL0LUsINC90L4g0YHQsNC80Lgg0YHRgtC10L3QutC4INGC0L7QvdC60LjQtSwg0LfQsCDRgdGH0LXRgiDRh9C10LPQviDQv9GA0Lgg0LTRi9GF0LDQvdC40Lgg0LfQstGD0Log0LHQvtC70LXQtSDQt9Cy0YPRh9C90YvQuSwg0LPQvtC70L7RgdC+0LLQsNGPINGJ0LXQu9GMINGA0LDRgdC/0L7Qu9C+0LbQtdC90LAg0LHQu9C40LfQutCwINC6INGC0L7Rh9C60LUg0LDRg9GB0LrRg9C70YzRgtCw0YbQuNC4INGC0LDQuiDQutCw0Log0LPQvtGA0YLQsNC90Ywg0LrQvtGA0L7RgtC60LDRjy4g0JfQstGD0Log0L/QvtGF0L7QtiDQvdCwICLRhCIsINGC0LDQuiDQutCw0Log0Y/QstC70Y/QtdGC0YHRjyDRg9GB0LjQu9C10L3QvdGL0Lwg0LLQtdC30LjQutGD0LvRj9GA0L3Ri9C8LiDQkiDQtNCw0LvRjNC90LXQudGI0LXQvCDQtNGL0YXQsNC90LjQtSDQv9C10YDQtdGB0YLQsNC10YIg0LHRi9GC0Ywg0L/Rg9GN0YDQuNC70YzQvdGL0Lwg0YLQsNC6INC+0YDQs9Cw0L3RiyDQtNGL0YXQsNC90LjRjyDRgyDQtNC10YLQtdC5INC00L4g0LrQvtC90YbQsCDRhNC+0YDQvNC40YDRg9GO0YLRgdGPINC4INGA0LXQsdC10L3QvtC6INGA0LDRgdGC0LXRgi4g0JIg0L3QvtGA0LzQtSDRgyDQtNC10YLQtdC5INGD0YLRgNC+0LHQvdC+0LUg0LTRi9GF0LDQvdC40LUsINGC0LDQuiDQutCw0Log0LvQtdCz0LrQuNC1INC4INC00LjQsNGE0YDQsNCz0LzQsCDQtNC+INC60L7QvdGG0LAg0L3QtSDRgdGE0L7RgNC80LjRgNC+0LLQsNC90LAg0Lgg0LTQuNCw0YTRgNCw0LPQvNCwINGA0LDRgdC/0L7Qu9C+0LbQtdC90LAg0LPQvtGA0LjQt9C+0L3RgtCw0LvRjNC90L4sINCyINC00LDQu9GM0L3QtdC50YjQtdC8INC+0L3QsCDQvtC/0YPRgdC60LDQtdGC0YHRjy4g0JTRi9GF0LDQvdC40LUg0YfQsNGB0YLQvtC1LCDQvNC+0LbQtdGCINCx0YvRgtGMINC90LUg0YDQuNGC0LzQuNGH0L3Ri9C8IC4g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Не дана характеристика систолического шума</text:p>
          </table:table-cell>
          <table:table-cell office:value-type="float" office:value="0" table:style-name="ce1">
            <text:p>0</text:p>
          </table:table-cell>
          <table:table-cell table:number-columns-repeated="16376"/>
        </table:table-row>
        <table:table-row table:style-name="ro1">
          <table:table-cell office:value-type="float" office:value="915050" table:style-name="ce1">
            <text:p>915050</text:p>
          </table:table-cell>
          <table:table-cell office:value-type="string" table:style-name="ce1">
            <text:p>english</text:p>
          </table:table-cell>
          <table:table-cell office:value-type="string" table:style-name="ce1">
            <text:p>Ticket 17&amp;lt;br /&amp;gt; 1. Give the characteristic to functional murmurs of heart in children.&amp;lt;br /&amp;gt; 2 What are the anatomical and physiological features of the structure of the respiratory system in children, that determine the presence of puerile breathing.&amp;lt;br /&amp;gt;</text:p>
          </table:table-cell>
          <table:table-cell office:value-type="string" table:style-name="ce1">
            <text:p>VGhlIGNoYXJhY3RlcmlzdGljIHRvIGZ1Y3Rpb25hbCBtdXJtdXJzIG9mIGhlYXJ0IGluIGNoaWxkZXJuIG9mdGVuIGJlbmluZ2UgYW5kIG5vdCBhc3Nvc2lhdGVkIHdpdGggc3RydWN0dXJhbCBoZWFydCBhYm5vcm1hbGl0aWVzIC4gaW5ub2NlbnQgbmF0dXJlIDsgZnVuY3Rpb25hbCBtdXJtdXJlcyBhcmUgaGVhcnQgZGllc2Vhcy4gaGVhcmQgZHVyaW5nIGlubm9jZW50IGNvbmRpdGlvbiA7ICB0aGUgbXVybXVycyBhcmUgb2Z0ZW4gYXVkaWJsZSBkdXJpbmcgc3BlY2lmaWMgY29uZGl0aW9uIHN1Y2ggYXMgLCBhIGZldmVyICwgYW5lbWlhICwgcmFwaWQgZ3Jvd3RoIGFuZCBtYXkgZGlzYXBwZXIgbXVybXVycyBhcmUgdHlwaWNhbGx5IGFyZSBzb2Z0ZW4gYW5kIGdyYWRlIDEgb3IgMiBpbiBpbnRlc2l0eSAuIE5vcm1hbCBwaHlzaWNhbCBleGFtaW5hdGlvbiAtIGNoaWxkcmVucyB3aXRoIGZ1bnRpb25hbCBtdXJtdXJzIHVzdWFsbHkgaGF2ZSBub3JtYWwgcGh5c2ljYWwgZXhhbWluYXRpb24gLiBhbmQgdGhlIG11cm11cnMgYXJlIG5vdCBBY2NvbXBsaXNlZCBieSB0aGUgb3RoZXIgc2lnbiBvZiBoZWFydCBkaWVhc2VzIC4gUG90ZW50aWFsIGNoYW5nZXMgLSBzdWNoIGFzIHN0YW5kaW5nIG9yIHNpdHRpbmcgLiAgICAgICAgICAgICAgICAyIC4gQW5hdG9taWNhbGx5IGFuZCBQaHlzaW9sb2dpY2FsIGZlYXR1cmVzIGZvIHRoZSBzdHJ1Y3R1cmUgb2YgdGhlIHJlc3BpcmF0b3J5IHN5c3RlbSBpcyBjb250cmlidXRpbmcgdG8gdGhlIHB1ZXJpbGUgYnJlYXRoaW5nIDsgcHVlcmlsZSBicmVhdGhpbmcgcmVmZXJzZSBwcmVkb21pbmVudGx5IGFyZSBkaWFwaHJhbWF0aWMgYnJlYXRoaW5nIDogIHdoZXJlIHRoZSBjb250cmFjdGlvbiBvZiB0aGUgZGlhcGhyYW0gcGxheWVzIGEgbWFqb3Igcm9sZSBpbiB0aGUgaW5oYWxhdGlvbiBwcm9jZXNzIC4gdGhpcyBpcyB0aGUgY29udHJhc3Qgb2YgdGhlIG1vcmUgY2hlc3Qgb3JpZW50ZWQgYnJlYXRoaW5nIHNlZW4gaW4gYWR1bHRzIC4gIkhpZ2ggcmVzcGlyYXRvcnkgcmF0ZSItIGNoaWxkcmVucyBnZW5lcmFsbHkgaGF2ZSBoaWdoIHJlc3BpcmF0b3J5IHJhdGUgdGhhbiBhZHVsdHMgcmVmbGVjdGluZyB0aGUgaW5jcmVhc2luZyBtZXRhYm9saWMgZGVtYW5kcyBvZiB0aGVpciBncm93aW5nIGJvZGllcyAuIkZsZXhpYmxlIGNoZXN0IFdBTEwiIDotIHRoZSBjaGlsZHJlbnMgaGF2ZSBmbGV4aWJsZSBjaGVzdCB3YWxsIGFsbG93aW5nIGZvciBlYXNpZXIgZXhwbGFudGlvbiBkdXJpbmcgYnJlYXRoaW5nLiB0aGUgZmxleGlibGl0eSBhY2NvbWlkYXRlcyB0aGUgZ3Jvd3RoIG9mIHRoZSByZXNwaXJhdG9yeSBzeXN0ZW0gLiAiT2JsaWdhdGUgTm9zZSBCcmVhdGhpbmciIDotIGNoaWxkcmVucyBhcmUgb2JsaWdhdGVzIG5vc2UgYnJlYXRoaW5nIG1lYW5zIHRoZXkgcHJpbWFyeSBicmVhdGhlIHRob3VnaCB0aGVpciBub3NlcyAuIHRoaXMgaGVscCBmaWx0ZXJzICwgdG8gaHVtYWRpZnkgYW5kIHdhcm0gdGhlIGluY29taW5nIGFpciBiZWZvcmUgaXQgcmVhY2hlcyB0byB0aGUgbHVuZ3MgIlRpbm5lciBhaXJ3YXkgd2FsbHMiIDotIHRoZSBhaXJ3YXlzIGluIHRoZSBjaGlsZHJlbiBhcmUgdGhpbm5lciB3aGljaCBsZWFkcyB0byB0aGUgbG93IGFpciByZXNpc2l0YW5jZSAuIHRoaXMgZmFjaWxpdGllcyB0aGUgbW92ZW1lbnQgb2YgYWlyIGR1cmluZyBicmVhdGhpbmcgLiAiRUxhc3RpY2l0eSBvZiB0aGUgbHVuZyB0aXNzdWUiIDotIGx1bmcgdGlzc3VlIGluIHRoZSBjaGlsZHJlbnMgYXJlIGhpZ2hseSBlbGFzdGljIGFpZGluZyBpbnN1ZmZpY2llbnQgZ2FzIGV4Y2hhbmdlIGFuZCBhY2NvbW9kYXRpbmcgdGhlIGR5bmFtaWMgY2hhbmdlIGluIHRoZSBsdW5nIHZvbHVtZSBkdXJpbmcgYnJlYXRoaW5nIC4=</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190" table:style-name="ce1">
            <text:p>915190</text:p>
          </table:table-cell>
          <table:table-cell office:value-type="string" table:style-name="ce1">
            <text:p>kazakh</text:p>
          </table:table-cell>
          <table:table-cell office:value-type="string" table:style-name="ce1">
            <text:p>Билет 18&amp;lt;br /&amp;gt; 1.Жаңа туған балалардың көру жүйесінің қүрлымының ерекшеліктері қандай?&amp;lt;br /&amp;gt; 2. 6 күңдік бала. Аймақты дәргер қарағанда баланың теріснің сарғыштығы анықталған. Жалпы жағдайы қанағатты.Іші жүмсақ.&amp;lt;br /&amp;gt; Бауыры үлғаймаған. Үлкен нәжісі сарғыш түсті. Несеп түсі мөлдір.Терінің түсінің өзгеруі немен байланысты? Тері срғыштығы нешіңші күңі пайда болады және жоғалады?&amp;lt;br /&amp;gt;</text:p>
          </table:table-cell>
          <table:table-cell office:value-type="string" table:style-name="ce1">
            <text:p>0JbQsNC70L/RiyDQsdGW0LfQtNC1INC20LDSo9CwINGC0YPSk9Cw0L0g0LHQsNC70LDQu9Cw0YDQtNGL0qMg0LrTqdGA0YMg0LbSr9C50LXRgdGW0L3RltKjINC00LDQvNGDINCx0LDRgNGL0YHRiyDQtdGA0LXQutGI0LXQu9GW0LrRgtC10YDRltC90LUg0YLQvtKb0YLQsNC70LAg0LrQtdGC0YHQtdC8OiDQttCw0LvQv9GLINC606nQtyDQsdGW0LfQtNC1INC10qMg0L3QtdCz0ZbQt9Cz0ZYg0pvRi9C30LzQtdGC0YLRliDQsNGC0pvQsNGA0LDRgtGL0L0sINC905nQt9GW0Log0LbSsdC80YHQsNKbINC80q/RiNC1INCx0L7Qu9GL0L8g0YLQsNCx0YvQu9Cw0LTRiywg0L7QuyDQsNGA0pvRi9C70Ysg0LDQudC90LDQu9Cw0L3RiyDQutOp0YDQtSDQsNC70LDQvNGL0LcgLiDQutOp0YDRgyDQvNKv0YjQtdGB0ZbQvdGW0qMg0LXRgNC10YHQtdC6INCw0LTQsNC80L3QsNC9INC10YDQtdC60YjQtdC70ZbQs9GWINCx0ZbRgNC90LXRiNC1INGB0LjQv9Cw0YLQv9C10L0g0LrQtdC70YLRltGA0YPQs9C1INCx0L7Qu9Cw0LTRiywgMS0g0LrQtdC30LXQutGC0LUg0LbQsNKj0LAg0YLRg9KT0LDQvSDQvdOZ0YDQtdGB0YLQtdC90ZbSoyDQutOp0YDRgyDQvNKv0YjQtdGB0ZYg0LXRgNC10YHQtdC60YLQtdGA0LTRltKj0LrRltC90LUg0pvQsNGA0LDSk9Cw0L3QtNCwINC60ZbRiNGW0YDQtdC6INC20LDQvdC1INKb0LDRgdCw0qMg0pvQsNCx0YvSmyDQttCw0LvQv9Cw0psg0LHQvtC70YvQvyDQutC10LvQtdC00ZYsIDItINC20LDSo9CwINGC0YPSk9Cw0L0g0L3QsNGA0LXRgdGC0LXQvdC10ZbSoyDSm9Cw0YDQsNGI0YvSm9GC0LDRgNGLINC10YDQtdGB0LXQutGC0LXRgNCz0LUg0pvQsNGA0LDSk9Cw0L3QtNCwINC60ZbRiNGW0YDQtdC6INC205nQvdC1INC20LDRgNGL0pvSm9CwINC20LDQvdC1INGC0LDSk9GLINCx0LDRgdKb0LDQvdC00LDQuSDSm9Kx0LHRi9C70YvRgdGC0LDRgNKT0LAg0LDRgdCwINKb0LDRgtGC0Ysg0LzTmdC9INCx0LXRgNC1INCx0LXRgNC80LjQtNGWINC90LXQvNC10YHQtSDQsNC3INC20LDRg9Cw0L8g0LHQtdGA0LXQtNGWLCAzLSDQttCw0qPQsCDRgtGD0pPQsNC9INC90LDRgNC10YHRgtC10L3RltKjINC70LjQvdC30LDRgdGLINC10YDQtdGB0LXQutGC0LXRgNCz0LUg0pvQsNGA0LDSk9Cw0L3QtNCwINKv0LvQutC10L3RltGA0LXQuiDQttGW0L3QtSDQttCw0L3QtSDRgdC10YDQv9GW0LzQtNGWINCx0L7Qu9GL0L8g0LrQtdC70LXQtNGWLCDQsdKx0Lsg0LLQuNC30YPQsNC70LTRiyDRhNC+0LrRg9GB0YLQsNGAINC/0YDQvtCx0LvQtdC80LDQu9Cw0YDRi9C90LAg0YvSm9C/0LDQuyDQtdGC0LXQtNGWLCA0LSDQttCw0qPQsCDRgtGD0pPQsNC9INC90LDRgNC10YHRgtC10L3RltKjINC606nQt9GW0L3RltKjINGC0L7RgCDSm9Cw0LHRi9KT0YsgLSDRgtC+0LvRi9KbINC00LDQvNGL0LzQsNKT0LDQvSwg0YLSr9GBINC/0LXQvSDSsdGB0LDSmyDQsdOp0LvRiNC10LrRgtC10YDQtNGWINKb0LDQsdGL0LvQtNCw0YMg0pvQsNCx0ZbQu9C10YLRliDQttC+0pssINC20LDQvdCwINGC0YPSk9Cw0L0g0L3QsNGA0LXRgdGC0LXQu9C10YDQtNGW0qMg0YjQtdC80ZbRgNGI0LXQs9GWINKb0LDRgtGC0YvRgNCw0psg0LHQvtC70pPQsNC90LTRi9Kb0YLQsNC9INC606nQt9C00LXRgNGWINC606nQsdGW0YDQtdC6INCx0q/QutGC0LXQu9Cz0LXQvSDQvdC10LzQtdGB0LUg0pvRi9GA0YLRi9GB0YLQsNGA0Ysg0LHQsNGAIC4g0L7Qu9Cw0YDQtNGL0qMg0LrTqdC30LTQtdGA0ZYg0LjRgNC40YHRgtGW0qMg0LHQsNGB0pvQsCDQv9GW0YjRltC90ZbQvdC1INC40LUg0LbQsNC90LUg0L7Qu9Cw0YAg06nRgdGW0L8g0LrQtdC70LUg0LbQsNGC0pvQsNC90LTQsCDQv9C40LPQvNC10L3RgtGC0ZYg0YLSsdC90LHQsNKT0LAg0LHQsNC50LvQsNC90YvRgdGC0Ysg06nQt9Cz0LXRgNC10LTRliwg0L7Qu9Cw0YDQtNGL0qMg0LrRltGI0LrQtdC90YLQsNC5INC70LDQutGA0LjQvNCw0LvRjNC00ZYg0LHQtdC30LTQtdGA0ZYg0LHQsNGALiDQutOp0LfQtNGW0qMg0LDQu9C00YvSo9KT0Ysg0LDRgNGC0pvRiyDQtNC40LDQvNC10YLRgNGWLTE1INC80LwgLCDQutC10LnRltC90ZbRgNC10Log0YjQsNC80LDQvNC10L0gMjItMjMg0LzQvCDQtNC40ZbQvSDQsNGA0YLQsNC00YssINCx0LDRgdKb0LAg0LzSr9C80LrRltC90LTRltC60YLQtdGAINC10YDQtdGB0LXQutGC0LXRgNC80LXQvSDQsdGW0YDQtNC4INGC0LXQuiDQvtC70LDRgNC00YvSoyDRhNGD0L3QutGG0LjQvtC90LDQu9C00YvSk9GLINCw0LfRi9GA0LDSmyAuINCa06nQt9C00ZbSoyDRgdGL0YDRgtKb0Ysg0L7RgNGC0LDSo9KT0Ysg0LbQsNC90LUg0ZbRiNC60ZYg0YLRg9C90LjQutCw0YHRiyDQsdCw0YAg0LHQvtC70YvQvyDQutC10LvQtdC00ZYuICDQodGL0YDRgtKb0Ysg0YLRg9C90LjQutCw0YHRizog0LzTqdC70LTRltGAINKb0LDQsdGL0pstINC+0Lsg0LHRltGA0ZbQvdGI0ZYg0L/QsNC50LTQsCDQsdC+0LvQsNGC0YvQvSDQttCw0L3QtSDQutOp0Lcg0YLQvtGA0YvQvdC00LAg0L/QsNC50LTQsCDQsdC+0LvRg9GL0L3QsCDQutOp0LzQtdC60YLQtdGB0LXRgtGW0L0g0LzTqdC70LTRltGAINCx06nQu9GW0LosINCh0LrQu9C10YDQsCAtINCx0rHQuyDRgtCw0LvRiNGL0YLRiyDQsdOp0LvRltC6LiDQntGA0YLQsNKj0pPRiyDRgtGD0L3QuNC60LDRgdGLOiDRgtCw0LzRi9GA0LvRiyDQsdOp0LvRltC6LCDQuNGA0LjRgSDQsdKb0Lsg0LzQtdC70LDQvdC40L0g0L/QuNCz0LzQtdC90YLRltC90LUg0LHQsNC50LvQsNC90YvRgdGC0Ysg0pvQsNGA0LDRiNGL0pvRgtGL0qMg0LDQudC90LDQu9Cw0YHRi9C90LTQsCDTmdGA0YLSr9GA0LvRliDRgi7RgdGC0ZYg0LHQvtC70LDQtNGLLCDQntC7INCw0YDSm9GL0LvRiyDTmdGAINGC0q/RgNC70ZYg0LTTmdGA0LXQttC10LTQtdCz0ZYg0LbQsNGA0YvSm9GC0YvSoyDTqdGC0YPRltC90LUg0LzSr9C80LrRltC90LTRltC6INCx0LXRgNC10LTRliwg0JrRltGA0L/RltC60YjQtdC70ZYg0LTQtdC90LUsINGF0L7RgNC+0LjQtC4g0IbRiNC60ZYg0YLRg9C90LjQutCw0YHRizogINC20q/QudC60LUg0LHTqdC70ZbQs9GWINC20LDQvdC1INGC0L7RgCDSm9Cw0LHRi9KbINC20LDRgNGL0psg0YLRltGC0ZbRgNC60LXQvdC00ZbRgNCz0ZbRiNGW0L0g0pvQsNCx0YvQu9C00LDQvyDQvtC90Ysg0Y3Qu9C10LrRgtGA0LvRltC6INGC0ZbRgtGW0YDQutC10L3QtNGW0YDQs9GW0YjQutC1INCw0LnQvdCw0LvQtNGL0YDQsNC00YssINCk0YPQvdC60YbQuNCw0L3RiyAg0L7RgNC90LTQsNGDINKv0YjRltC9INGC0LDRj9Kb0YjQsCDQvNC10L0g0LrQvtC90YPRgSDQsdCw0YAtINC606nRgNGDINC90LXRgNCy0ZYg0LDRgNKb0YvQu9GLINKb0LDQsdGL0LvQtNCw0pPRi9GI0pvQsCDQvNC40pPQsCAuINC+0LHRjNC10LrRgtC40LI6INKb0LDRgNCw0YjRi9Kb0YLRi9KjINCw0YDRgtGL0L3QtNCwINC+0YDQvdCw0LvQsNGB0LDQtNGLLCDQntC7INC806nQu9C00ZbRgCDQtdC60ZYg0LHQtdGC0ZYg0LTTqdKj0LXRgSDQv9GW0YjRltC90LTRliAuINC+0Lsg0L3Ri9GB0LDQvdC90YvSoyDSm9Cw0YjRi9Kb0YLRi9KT0YvQvdCwINKb0LDRgNCw0Lkg0L/RltGI0ZbQvdGW0L0g0YDQtdGC0YLQtdC50LTRliAsINCx0ZbQt9C00LUg0LbQsNKj0LAg0YLRg9KT0LDQvSDQvdCw0YDQtdGB0YLQtdC90ZbSoyDQutOp0YDRgyDQttKv0LnQtdGB0ZbQvdGW0qMg0L3QtdCz0ZbQt9Cz0ZYg0LXRgNC10LrRiNC10LvRltC60YLQtdGA0ZYg0L7RgdGL0LvQsNGA0LXQvSDQsdCw0LnQu9Cw0L3Ri9GB0YLRiyDQsdC+0LvRi9C/INC60LXQu9C10LTRliwg0LbQsNC90LUg0LbQsNGBINKx0LvSk9Cw0LnQsCDQutC10LvQtSDQutOp0YDRgyDQttKv0LnQtdGB0ZbQtNC1INC20LDSm9GB0LDRgNCwINGC0q/RgdC10YLRltC9INCx0L7Qu9GL0L8g0LrQtdC70LXQtNGWIC4gICAyLSDRgdKx0YDQsNKbLiDQsdC10YDRltC70LPQtdC9INGB0LjQv9Cw0YLRgtCw0LzQsCDQsdC+0LnRi9C90YjQsCDQsdCw0LvQsNC90YvSo9GWINGC0LXRgNGW0YHRltC90ZbSoyDRgdCw0YDSk9Cw0Y7RiyDQodCw0YDSk9Cw0Y7Sk9CwINCx0LDQudC70LDQvdGL0YHRgtGLLiDQsdKx0Lsg0LDRg9GA0YMg0YHQsNGA0Ysg0LDRg9GA0YMgINKb0LDQvdC00LDSk9GLINCx0LjQu9C40YDRg9Cx0LjQvSDQsNGA0YLRi9KbINC20LjQvdCw0LvRg9GL0L3QsNC9ICDRgtGD0YvQvdC00LDQudC00Ysg0L7QuyDQsdCw0YPRi9GAINGC0L7Qu9GL0psg0LbQtdGC0ZbQu9C80LXQs9C10L0g0LbQsNC90LXQuiDQsdC40LvQuNGA0YPQsdC40L3QtNGWINGC0L7Qu9GL0psg06nSo9C00LXQuSDQsNC70LzQsNC5INKb0LDQu9KT0LDQvSDQutC10LfQtNC1ICDQv9Cw0LnQtNCwINCx0L7Qu9Cw0LTRiy4gINCa06jQn9Ci0JXQk9CV0J0gINC20LDSk9C00LDQudC00LAg0LbQsNKj0LAg0YLRg9KT0LDQvSDQvdOZ0YDQtdGB0YLQtdC90ZbSoyDRgdCw0YDSk9Cw0Y7RiyDQsdGW0YDQvdC10YjQtSDQsNC/0YLQsCAg0ZbRiNGW0L3QtNC1INC20L7QudGL0YvQu9Cw0YLRi9C9INC20LDSm9GB0Ysg0LbTmdC90LUg06nQt9C00ZbQs9GW0L3QtdC9INGI0LXQutGC0LXQu9Cz0LXQvSDQttCw0pPQtNCw0Lkg0LHQvtC70YvQvyDRgtCw0LHRi9C70LDQtNGLLCDRgdCw0YDSk9Cw0Y7QtNGL0qMg0L/QsNC50LTQsCDQsdC+0LvRgyDRg9Cw0pvRi9GC0Ysg05nRgNGC0q/RgNC70ZYuINCx0ZbRgNCw0psg0L7QvtC7INOZ0LTQtdGC0YLQtSDTqdC80ZbRgNC00ZbSoyDQtdC60ZbQvdGI0ZYg0L3QtdC80LzQtdGB0LUg0q/RiNOZ0L3RiNOZINC60q/QvdGW05nQvdC00LUg0L/QsNC50LTQsCDQsdC+0LvQsNC00YssINC20LDQvdC1INC10LrRliDQsNC/0YLQsNKT0LAg0LTQuNGW0L0g0YHQvtC30YvQu9GD0Ysg0LzSr9C80LrRltC9IC4g0LTQtdCz0LXQvdGL0LzQtdC9INCx0LXRgNGW0LvQs9C10L0g0YHQuNC/0LDRgtGC0LDQvNCw0pPQsCDRgdKv0LnQtdC90LUg0L7RgtGL0YDRi9C/IDYg0LrSr9C90LTRltC6INCx0LDQu9Cw0L3Ri9KjINGC0YPRi9C70pPQsNC9INC60LXQt9GW0L3QtNC10LPRliDRgdCw0YDSk9Cw0Y7RiyDQvNCw0qPRi9C30LTRiyDQtdC80LXRgSDQttCw0L3QtSDQutC10LvQtdGB0ZYg0LHRltGA0L3QtdGI0LUg0LrSr9C9INGW0YjRltC90LTQtSDTqdC30LTRltCz0ZbQvdC10L0g0LbQvtC50YvQu9GD0Ysg0LzSr9C80LrRltC9INGP0pPQvdC4ICDQvdC+0YDQvNCw0LzQtdC9INGB0LjQv9Cw0YLRgtCw0LvQsNC00YsuINCx0LDQu9Cw0LTQsCDQttCw0qPQsCDRgtGD0pPQsNC9INC905nRgNC10YHRgtC10LvQtdGA0LTQtSDQttC40ZYg0LrQtdC30LTQtdGB0LXRgtGW0L0g0YHQsNGA0pPQsNGOINCx0LDRgCDRgdC10LrQu9C00ZYuINC20LDSo9KT0LAg0YLRg9KT0LDQvSDQvdOZ0YDQtdGB0YLQtdC90ZbSoyDQtNC10L3QtdGB0ZbQvdGW0qMg0LbQvtGOINKb0LDQsdGW0LvQtdGC0ZbQvdC10L0g0LPTqdGA0ZYg0LrTqdC/INKb0YvQt9GL0Lsg0pvQsNC9INC20LDRgdGD0YjQsNC70LDRgNGLINCx0rHQt9GL0LvRgdCwINC+0LvQsNGAINC20L7Sk9Cw0YDRiyDQsdC40LvQuNGA0YPQsdC40L0g0LTQtdKj0LPQtdC50ZbQvSDRgtGD0LTRi9GA0LDQtNGLLCDQttCw0qPQsCDRgtGD0pPQsNC9INC905nRgNC10YHRgtC10LvQtdGA0LTQtSDQsdCw0YHSm9CwINC20LDSk9C00LDQudC70LDRgNC00LAg0LHQuNC70LjRgNGD0LHQuNC9INGW0YjQtdC6INCw0YDSm9GL0LvRiyDQtNC10L3QtdC00LXQvSDRiNGL0pPQsNGA0YvQu9Cw0LTRiywg0LHSsdC7INGI0LDQu9CwINGC0YPRi9C70pPQsNC9INC90LDRgNC10YHRgtC10LvQtdGA0LTQtSwg0L3QtdC80LXRgdC1ICDQvtC70LDRgCDQtdC80YjQtdC6INGB0q/RgtGW0LzQtdC9INGC0LDQvNCw0pvRgtCw0L3QsdCw0pPQsNC9INC60LXQt9C00LUg0LHQvtC70YPRiyAg0LzSr9C80LrRltC9IC4g0LHSsdC7INC90LDRgNC10YHRgtC10L3RltKjINCx0LDRg9GL0YDRi9C90LTQsCDQtdGI0pvQsNC90LTQsNC5INCx0rHSm9C30YvQu9GL0YEg0L3QtdC80LXRgdC1INGC0LDSk9GLINCx0LDRgdKb0LDQvdC00LDQuSDQttCw0pPQtNCw0Lkg0LbQvtKbLiDQvtC7IDItNCDQutKv0L3RliDQv9Cw0LnQtNCwINCx0L7Qu9Cw0LTRiywg0LbTmdC90LUgOC0xMCDQutKv0L3QtNC1INC20L7SmyDQsdC+0LvRi9C/INC60LXRgtC10LTRliwg06nQudGC0LrQtdC90ZYg0LHQuNC70LjRgNGD0LHQuNC9INC00LXSo9Cz0LXQudGWIDMtNyDQutKv0L0g0LzQsNC60YHQuNC80YPQvNKT0LAg0LbQtdGC0LXRgtGW0L0g0LHQvtC70YvQvyDQutC10LvQtdC00ZYuINCx0LDRg9GL0YAg0L/RltGB0ZbQvyDQtdC80YnRiNC10LrQv9C10L0g0LTSsdGA0YvRgSDRgtCw0LzQsNKb0YLQsNC90pPQsNC9INGB0LDQudGL0L0g0YHQsNGA0pPRi9GI0YLRi9KbINCw0LfQsNGP0YLRi9C9INCx0L7Qu9GL0L8g0LrQtdC70LXQtNGWLiDQkdGW0YDQsNKbINCw0YPRi9GA0LvRi9KbINC60q/RiNC10LnQs9C10L0g0LbQsNKT0LTQsNC50LTQsCDQtNGW0YDQs9C10YDQvNC10L0g0LrQtdKj0LXRgdGDINC80ZbQvdC00LXRgtGC0ZYu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17" table:style-name="ce1">
            <text:p>915217</text:p>
          </table:table-cell>
          <table:table-cell office:value-type="string" table:style-name="ce1">
            <text:p>kazakh</text:p>
          </table:table-cell>
          <table:table-cell office:value-type="string" table:style-name="ce1">
            <text:p>Билет 18&amp;lt;br /&amp;gt; 1.Жаңа туған балалардың көру жүйесінің қүрлымының ерекшеліктері қандай?&amp;lt;br /&amp;gt; 2. 6 күңдік бала. Аймақты дәргер қарағанда баланың теріснің сарғыштығы анықталған. Жалпы жағдайы қанағатты.Іші жүмсақ.&amp;lt;br /&amp;gt; Бауыры үлғаймаған. Үлкен нәжісі сарғыш түсті. Несеп түсі мөлдір.Терінің түсінің өзгеруі немен байланысты? Тері срғыштығы нешіңші күңі пайда болады және жоғалады?&amp;lt;br /&amp;gt;</text:p>
          </table:table-cell>
          <table:table-cell office:value-type="string" table:style-name="ce1">
            <text:p>MSnQltCw0LvQv9GLINCx0ZbQt9C00LUg0LrTqdGA0YMg0LzSr9GI0LXRgdGWINC10YDRgtC1INC60LXQt9C10qPQvdC10L0g0LHQsNGB0YLQsNC/INC00LDQvNC40LTRiy7QntC7IDMg0rHRgNGL0psg0LbQsNC/0YvRgNCw0pvRiNCw0YHRi9C90LDQvSDQtNCw0LzQuNC00Ysu0K3QutGC0L7QtNC10YDQvNCw0LTQsNC9LNC80LXQt9C+0LTQtdGA0LzQsNC00LDQvSDQttOZ0L3QtSDQvdC10LnRgNC+0Y3QutGC0L7QtNC10YDQvNCw0LTQsNC9LtCQ0Lsg0LTQsNC80YPRiyAzLdGI0ZYg0LDQv9GC0LDQtNCw0L0g0LHQsNGB0YLQsNC70LDQtNGLINC205nQvdC1LtCd0LXQudGA0L7RjdC60YLQvtC00LXRgNC80LDQtNCwINCx0ZbQt9C00LUg0LrTqdGA0YMg0LbSr9C50LrQtdC70LXRgNGWINC205nQvdC1INC/0LjQs9C80LXQvdGC0YLRliDSm9Cw0LHQsNGC0Ysg0LbTmdC90LUg0YHQtdGC0YfQsNGC0LrQsNGB0Ysg0LTQsNC80LjQtNGLLiDQtNCw0LzQuNC00Ysu0JDQuyDRjdC60YLQvtC00LXRgNC80LDQtNCwINCx0ZbQt9C00LUg0LzTqdC70LTRltGAINKb0LDQsdGL0pPRiyDQttOZ0L3QtSDRhdGA0YPRgdGC0LDQu9C40Log0LTQsNC80LjQtNGLLtCQ0Lsg0LzQtdC30L7QtNC10YDQvNCw0LTQsCDRgtCw0LzRi9GA0LvRiyDSm9Cw0LHQsNGC0Yss0LrTqdC3INCw0LvQvNCw0YHRi9C90YvSoyDQtNOZ0L3QtdC60LXRgCDRgtGW0L3QtNGWINKb0LDQsdCw0YLRiyDQttOZ0L3QtSDQutOp0YDRgyDQutOp0L/RltGA0YjRltCz0ZYu0JbQsNC70L/RiyDQsdCw0LvQsNC00LAg0LrTqdC30LTRltKjINC00LjQsNC80LXRgtGA0ZYg0q/Qu9C60LXQvdC00LXRgNCz0LUg0pvQsNGA0LDSk9Cw0L3QtNCwINC60ZbRiNGW0YDQtdC6INCx0L7Qu9Cw0LTRiy7QodOZ0LHQuNC70LXRgNC00LUg0L7QuyDRiNCw0LzQsNC80LXQvSAxOCDQvNC8INKb0rHRgNCw0LnQtNGLLNCw0Lsg0LXRgNC10YHQtdC60YLQtdGA0LTQtSAyNCDQvNC8LdCz0LUg0LTQtdC50ZbQvSDQttC10YLQtdC00ZYu0JHQsNC70LDQu9Cw0YDQtNGL0qMg0pvQsNGB0LDSk9CwINKb0LDQsdCw0YLRiyDSr9C70LrQtdC90LTQtdGA0LPQtSDSm9Cw0YDQsNKT0LDQvdC00LAg0LbQsNC70L/QsNKbINCx0L7Qu9Cw0LTRiy7QltOZ0L3QtSDQvtC7INCx0LDQu9Cw0LTQsCDQsdKx0LvRiNGL0pvQtdGC0YLQtdGA0ZYg05nQu9GB0ZbQtyDQsdC+0LvQsNC00Yss0YHQvtC7INGB0LXQsdC10L/RgtC10L0g0LHQsNGB0YvQvdC00LAg0LrTqdC30ZYg0pvRi9C70Lgg0LHQvtC70YPRiyDQvNKv0LzQutGW0L0u0JHSr9GA0LDSmyDQsdKx0Lsg0YTQuNC30LjQvtC70L7Qs9C40Y/Qu9GL0psg0LbQsNKT0LTQsNC5LNGB0L7QvdC00YvSm9GC0LDQvSDRg9Cw0pvRi9GCINOp0YLQtSDQutC10LvQtSDQvtC7INC60LXRgtC10LTRli7QkdCw0YHRi9C90LTQsCDQsdCw0LvQsNC00LAg0YLRg9CwINC/0LDQudC00LAg0LHQvtC70pPQsNC9INCw0LvRi9GB0YLQsNC9INC606nRgNCz0ZbRiNGC0ZbQuiDQsdC+0LvQsNC00Ysu0J7QuyDRg9Cw0pvRi9GCINOp0YLQtSDQutC10LvQtSDQutC10YLQtdC00ZYu0K/Sk9C90Lgs0LHSsdC7INGE0LjQt9C40L7Qu9C+0LPQuNGP0LvRi9KbINC20LDSk9C00LDQuS7QltOZ0L3QtSDQsdCw0LvQsCDQsdCw0YHRi9C90LTQsCDRgtKv0YHRgtC10YDQtNGWINCw0LbRi9GA0LDRgtCwINCw0LvQvNCw0LnQtNGLLNC205nQvdC1INCw0LnQvdCw0LvRi9GB0L3QtNCw0pPRiyDQsNC00LDQvNC00LDRgNC00Ysg0LTQsCDRgtCw0L3QuCDQsNC70LzQsNC50LTRiy7QntC7INKb0LDRgdC40LXRgtGC0LXRgCDQsdGW0LfQtNC1IDMg0LDQudC00LDQvSDQsdCw0YHRgtCw0L8g0LTQsNC80LjQtNGLLtCW05nQvdC1IDEg0LbQsNGB0YvQvdCwINKb0LDRgNCw0Lkg0YLQvtC70YvSmyDQttC10YLRltC70LXQtNGWLtCv0pPQvdC4LNC+0Lsg0YLSr9GB0YLQtdGA0LTRliDQsNC20YvRgNCw0YLRi9C/INC205nQvdC1INCw0LnQvdCw0LvQsNGB0YvQvdC00LDSk9GLINC30LDRgtGC0LDRgNC00Yss0LDQtNCw0LzQtNCw0YDQtNGLINGC0LDQvdC4INCx0LDRgdGC0LDQudC00Ysu0JrTqdGA0YMg06nRgtC60ZbRgNC70ZbQs9GWINC00LAg0LHQsNC70LDQtNCwINGC06nQvNC10L0g0LHQvtC70LDQtNGLLNCx0LDRgdGL0L3QtNCwINC+0Lsg0YLQtdC6IDAsMDEtMCwwMyDSm9Cw0L3QsCDQsdC+0LvQsNC00Ysu0JHRltGA0LDSmyAxINC20LDRgdGL0L3QsCDSm9Cw0YDQsNC5INC+0Lsg0LTQsNC80YvQvyAwLDEt0LPQtSDQtNC10LnRltC9INC606nRgtC10YDRltC70LXQtNGWLjIp0JbQsNC70L/RiyDRgdCw0YDSk9GL0YjRgtGL0psg0L7QuyDRhNC40LfQuNC+0LvQvtCz0LjRj9C70YvSmyDQttCw0pPQtNCw0Lkg0LTQtdC/INCw0LnRgtGD0pPQsCDQsdC+0LvQsNC00Ysu0J7QuyDQsdGW0LfQtNC1INCx0LDQu9CwINGC0YPRi9C70pPQsNC90L3QsNC9INC60LXQudGW0L0gMyDQutKv0L3QtNC10YDQtNC1INC/0LDQudC00LAg0LHQvtC70YvQvyzRgdCw0YDSk9GL0Ygg0YLSr9GB0LrQtSDQsdC+0Y/Qu9Cw0LTRiy7QntC90YvSoyDQsdCw0YHRgtGLINGB0LXQsdC10LHRliDQvtC7INOp0YIg0L/QuNCz0LzQtdC90YLRliDQsdC40LvQu9C40YDRg9Cx0LjQvSDQsdC+0LvRi9C/INGC0LDQsdGL0LvQsNC00Ysu0KHQsNGDINCx0LDQu9Cw0LvQsNGA0LTQsCAxMCDQutKv0L0g0ZbRiNGW0L3QtNC1INC+0Lsg0LrQtdGC0YPRliDQutC10YDQtdC6LtCV0LPQtdGAINC60LXRgtC/0LXRgdC1INC+0Lsg0L/QsNGC0L7Qu9C+0LPQuNGP0LvRi9KbINC20LDSk9C00LDQuSDQsdC+0LvRi9C/INGC0LDQsdGL0LvQsNC00Ysu0J7QuyAyNCDRgdCw0pPQsNGC0YLQsNC9INC60LXQudGW0L0g0L/QsNC50LTQsCDQsdC+0LvRi9C/LDIg0LDQv9GC0LDSk9CwINC00LXQudGW0L0g0YHQvtC30YvQu9GD0Ysg0LzSr9C80LrRltC9LtCe0pPQsNC9INCx0ZbRgCDRgdC10LHQtdC/INCw0L3QsNGB0YvQvdGL0qMg0LbSr9C60YLRltC70ZbQuiDQutC10LfRltC90LTQtdCz0ZYg06nQvNGW0YAg0YHQsNC70YLRi9C9INCw0LnRgtGD0pPQsCDQsdC+0LvQsNC00Ysu0K/Sk9C90Lgg0LrQvtC70LAg0YHQuNGP0pvRgtGLINCz0LDQt9C00Ysg0YHRg9GB0YvQvdC00LDRgCzRgtC10LzQtdC60ZYg0YjQtdCz0YMg0LHQsNC70LDQtNCwINCx0LjQu9C70LjRgNGD0LHQuNC9INC00LXSo9Cz0LXQudGW0L3RltKjINC20L7Sk9Cw0YDRi9C70LDRg9GL0L3QsCDTmdC60LXQu9C10LTRli7QkdGW0YDQsNKbINCx0rHQuyDQsdCw0LvQsNC00LAg0LbQsNC5INKT0LDQvdCwINGE0LjQt9C40L7Qu9C+0LPQuNGP0LvRi9KbINC20LDSk9C00LDQuSDQsdC+0LvRi9C/INC20LDRgtKb0LDQvdGLINGC0q/RgdGW0L3RltC60YLRli7QodC10LHQtdCx0ZYg0L7QvdGL0qMg0L3QtdGB0LXQvyDQttOZ0L3QtSDQvdOZ0LbRltGB0ZbQvdGW0qMg0YLSr9GB0YLQtdGA0ZYg0pvQsNC70YvQv9GC0Yss0LHQsNGD0YvRgNGLINKx0LvSk9Cw0LnQvNCw0pPQsNC9LNC205nQvdC1INGW0YjRliDSsdC70pPQsNC50LzQsNKT0LDQvdGL0qMg0LrTqdGA0ZbQvyDRgtKx0YDQvNGL0Lcu0JHSsdC7INC20LXRgNC00LXQs9GWINC80LXRhdCw0L3QuNC30Lwg0LPQtdC80L7Qs9C70L7QsdC40L3QvdGW0qMg0YvQtNGL0YDQsNKT0LDQvdC00LAg0LHQuNC70LvQuNGA0YPQsdC40L3Qs9C1INGL0LTRi9GA0LDQudC00Ysu0JDQuyDQsdCw0LvQsNC00LAg0LHQsNGD0YvRgCDRgtC+0LvRi9KbINC20LXRgtGW0LvQvNC10LPQtdC9LtCh0L7QvdC00YvSm9GC0LDQvSDQvtC7INGC0LXRgNGW0LTQtSDQv9Cw0LnQtNCwINCx0L7Qu9GL0L8s0YHQvtC7INC20LXRgNC00LUg0LbQuNC90LDQu9Cw0YLRi9C9INCx0L7Qu9Cw0LTRiy4gIC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1-ші сұрақтың жауабы толық ашылып жазылмаған, ұрықтық дамуы емес, жаңа туған нәрестенің көру жүйесінің қүрлымының ерекшеліктері сұралған.Яғни, көздің нервтері мен торлы қабықтың толық дамымауы, көз жасы болмауы секілді даму ерекшеліктер жазылмаған.</text:p>
          </table:table-cell>
          <table:table-cell office:value-type="float" office:value="0" table:style-name="ce1">
            <text:p>0</text:p>
          </table:table-cell>
          <table:table-cell table:number-columns-repeated="16376"/>
        </table:table-row>
        <table:table-row table:style-name="ro1">
          <table:table-cell office:value-type="float" office:value="915281" table:style-name="ce1">
            <text:p>915281</text:p>
          </table:table-cell>
          <table:table-cell office:value-type="string" table:style-name="ce1">
            <text:p>kazakh</text:p>
          </table:table-cell>
          <table:table-cell office:value-type="string" table:style-name="ce1">
            <text:p>Билет 18&amp;lt;br /&amp;gt; 1.Жаңа туған балалардың көру жүйесінің қүрлымының ерекшеліктері қандай?&amp;lt;br /&amp;gt; 2. 6 күңдік бала. Аймақты дәргер қарағанда баланың теріснің сарғыштығы анықталған. Жалпы жағдайы қанағатты.Іші жүмсақ.&amp;lt;br /&amp;gt; Бауыры үлғаймаған. Үлкен нәжісі сарғыш түсті. Несеп түсі мөлдір.Терінің түсінің өзгеруі немен байланысты? Тері срғыштығы нешіңші күңі пайда болады және жоғалады?&amp;lt;br /&amp;gt;</text:p>
          </table:table-cell>
          <table:table-cell office:value-type="string" table:style-name="ce1">
            <text:p>MS7QttCw0qPQsCDRgtGD0pPQsNC9INCx0LDQu9Cw0LvQsNGA0LTQsCDQutOp0YDRgyDQttKv0LnQtdGB0ZYg0LDQvdCw0YLQvtC80LjRj9C70YvSmyDQttOZ0L3QtSDRhNC40LfQuNC+0LvQvtCz0LjRj9C70YvQuiDRgtGD0YDQs9GL0LTQsNC9INCw0LvQuCDRgtC+0LvRi9C6INC20LXRgtC40LvQvNC10LPQtdC9INGB0L7QuyDRgdC10LHQtdC/0YLRliDQvdOZ0YDQtdGB0YLQtdC70LXRgCDTmdC70ZYg0YLQvtC70YvSmyDQutOp0YDRgyDSm9Cw0LHRltC70LXRgtGW0L3QtSDQutOp0YDQs9C10L0g0LfQsNGC0YvQvdCwINGA0LXQsNC60YbQuNGPINCx0ZbQu9C00ZbRgNGDINKb0LDQsdGW0LvQtdGC0LjQvdC1INC40LUg0LXQvNC10YEu0LbQsNKj0LAg0YLRg9Cz0LDQvSDQvdOZ0YDQtdGB0YLQtdC70LXRgCDQttCw0YDRi9C60LrQsCDRgNC10LDQutGG0LjRjyDQsdGW0LvQtNGW0YDQtdC00ZYg0LHRltGA0LDSm9GC0LAg0YLSr9GA0LvRliDRgtKv0YHRgtGWINC30LDRgtGC0LDRgNCz0LAgMi00INCw0LnRi9C90LDQvSDQsdCw0YHRgtCw0L8g0YDQtdCw0LrRhtC40Y8g0LHRltC70LTRltGA0LXQtNGWINGB0LXQsdC10LHRliDRhNC40LfQuNC+0LvQvtCz0LjRj9C70YvSmyDSm9Cw0LvRi9C/0YLQsNGB0YPRiyDQsdGW0YDRgtC1INCx0ZbRgNGC0LUg0L7RgNGL0L0g0LDQu9Cw0LTRiy7QsNC90LDRgtC+0LzQuNGP0LvRi9KbINC205nQvdC1INGE0LjQt9C40L7Qu9C+0LPQuNGP0LvRi9C6INC10YDQtdC60YjQtdC70LjQutGC0LXRgNC40L0g0LDQudGC0LAg0LrQtdGC0YHQtdC8LNC606nQtyDQsNC70LzQsNGB0YvQvdGL0qMg0LrTqdC70LXQvNGWINC60ZbRiNGWINCx0L7Qu9Cw0LTRiyDQttCw0L3QtdC1INC+0LvQsNGA0LTQsCDQsNC70YvRgdGC0LDQvSDQutC+0YDQs9C40YjRgtC40Log0LHQsNC50LrQsNC70LDQtNGLINGP0LPQvdC4INC20LDQutGL0L3QvdCw0L0g0LrTqdGA0LPQtdC9INC30LDRgtGC0LDRgNCz0LAg0YDQtdCw0LrRhtC40Y8g0LHQuNC70LTQuNGA0LzQtdC50LTQuC7QvdGD0YDQu9GLINC60LDQsdGL0Log0LbSsdC60LAg0LHQvtC70LDQtNGLLNGC0LDQvNGL0YDQu9GLINKb0LDQsdGL0psg0LbQsNKb0YHRiyDQttC10YLRltC70LPQtdC9INGP0LPQvdC4INC60LDQvSDRgtCw0LzRi9GA0LvQsNGA0LPQsCDQsdCw0Lkg0LHQvtC70LDQtNGLLCDRgtC+0YDQu9GLINC60LDQsdGL0LogINC20LXRgtC40LvQvNC10LPQtdC90LTQuNC60YLQtdC9INC606nRgNGDINC60LDQsdC40LvQtdGC0Lgg0YLTqdC80LXQvSDQsdC+0LvQsNC00Yss0YTQvtGC0L7RgNC10YbQtdC/0YLQvtGA0LvQsNGAINGP0LPQvdC4INGB0LDRg9GL0YLRiNCwINC80LXQvSDRgtCw0Y/QutGI0LAg0L7Qu9Cw0YAg0YLQvtC20LUg0LbQtdGC0LjQu9C80LXQs9C10L0g0YHQvtC7INGB0LXQsdC10L/RgtC4INCx0LDQu9CwINGC0q/RgdGC0LXRgNC00Lgg0LDQttGL0YDQsNGC0LAg0LDQu9C80LDQudC00Ysg0L7QuyDTqdC80ZbRgNGW0L3RltKjIDMg0YjQuCDQsNC50LvQsNGA0YvQvdC00LAg0pvQvtC30LPQsNC70LPQsNC9INC30LDRgtGC0LDRgNCz0LAg0pvRi9C30YvSk9GD0YjRi9C70YvQuiDRgtCw0L3Ri9GC0YvQvyzQttCw0YDQuiDQtdGC0LrQtdC9INC30LDRgtGC0LDRgNCz0LAg0YDQtdCw0LrRhtC40Y8g0LHRltC70LTRltGA0LPQtdC90L3QtdC9INC606nRgNGDINC20q/QudC10YHRltC90ZbSoyDQtNCw0LzRi9C/INC60LXQu9C1INC20LDRgtC60LDQvdGL0L0g0LHQuNC70LUg0LDQu9Cw0LzRi9C3LiDQutOp0YDRgyDQttGD0LnQutC10YHQuCDQvNC40LXQu9C40L3QtNC10L3QsdC10LPQtdC9INC80LjQtdC70LjQvdC00LXQvdCx0LXQs9C10L3QtNC40LrRgtC10L0g0LDQutC/0LDRgNCw0YLRgtGLINC606nQt9C00LXQvSDQvNC40LPQsCDQttC10YLQutC40LfRgyDQutC40YvQvSDQsdC+0LvQsNC00Ysg0LrTqdGA0YMg0LbRg9C50LrQtdGB0ZbQvdGW0qMg0YLQvtC70YvQutGC0LDQuSDQvNC40LXQu9C40L3QtNC10L3Rg9C4INOp0LzRltGA0ZbQvdGW0qMgNiDRiNGLINCw0LnRi9C90LTQsCAg0YLQvtC70YvQuiDQttC10YLRltC70LXRgtGW0L0g0LHQvtC70LDQtNGLLiDQutOp0Lcg0LHSsdGA0YjQsNKT0YsgINC40LrQtdC80LTRliDRj9KT0L3QuCDQttC10YLQuNC70LPQtdC9INCx0LjRgNCw0LrRgtCwINGE0YPQvdC60YbQuNGP0YHRi9C9INCw0LvQuCDRgtC+0LvRi9KbINCw0YLQutCw0YDQsCDQsNC70LzQsNC50LTRiyDRj9Cz0L3QuCDQsNC60LrQvtC80LDQtNCw0YbQuNGP0L3RiyDQvtGA0YvQvdC00LDQuSDQsNC70LzQsNC50LTRiyzQvdOZ0YDQtdGB0YLQtdC70LXRgNC00LUgINC/0LXRgNC40YTQtdGA0LjRj9C70YvSsdKbINC20q/QudC60LUgINC20LDSm9GB0Ysg0LTQsNC80YvSk9Cw0L0g0LHRltGA0LDSm9GC0LAg0L7RgNGC0LDQu9GL0psg0LbSr9C50LrQtdGB0ZYg0L3QsNGI0LDRgCDQtNCw0LzRi9KT0LDQvSDQsdC+0LvRi9C/INC60LXQu9C10LTRli4gNCDRiNGWINCw0LnRi9C90LDQvSDQsdCw0YHRgtCw0L8g0YLSr9GB0YLQtdGA0LTQuCDQsNC20YvRgNCw0YLRi9C/INCx0LDRgdGC0LDQudC00YssNiDQsNC50LTQsNC9INCx0LDRgdGC0LDQvyDQutOp0YDRgyDQttGD0LnQutC10YHQuCDQvNC40LXQu9C40L3QtNC10L3QuNC/LCDQutOp0YDRgyDQttGD0LnQtdGB0ZbQvdGW0qMg0L7QtNCw0L0g05nRgNGWINC00LDQvNGL0L8g0LbQsNGC0pvQsNC90YvQvSDQutOp0YDQtdC80ZbQtyzQsdCw0LvQsCDQsdC40YAg0LbQsNGB0LrQsCDRgtC+0LvQs9Cw0L3Qs9CwINC00LXQudGW0L0g0LrTqdGA0YMg0LbRg9C50LXRgdGWINGC0L7Qu9GL0pvRgtCw0Lkg0pvQsNC70YvQv9GC0LDRgdGL0L8g0LHRltGC0LXQtNGWLjIu0JbQsNKj0LAg0YLRg9Cz0LDQvSDQvdCw0YDQtdGB0YLQtdC70LXRgNC00LUg0YLQtdGA0Lgg0YLRg9GB0LjQvdC40L0g0YHQsNGA0LPRi9GI0YLQsNC90YPRiyDRhNC40LfQuNC+0LvQvtCz0LjRj9C70YvSmyDRgdCw0YDSk9GL0YjRgtCw0L3RgyDQsdC+0LvRi9C/INGC0LDQsdGL0LvQsNC00Yss0LHSsdC7INC/0YDQvtGG0LXRgdGBINOp0LzRltGA0ZbQvdGW0qMg0LDQu9KT0LDRiNC60YsgM9GI0Lgg0LrSr9C90ZbQvdC00LUg0LHQsNGB0YLQsNC70YvQvyw3LTE0INC60q/QvdC00LUg06nQt9C00ZbQs9GW0L3QtdC9INC20L7Sk9Cw0LvQsNGC0YvQvSDQsdC+0LvRi9C/INGC0LDQsdGL0LvQsNC00Ysu0YHQsNGA0LPRi9GI0YLQuNCw0L3Rg9C00YvSoyDRgdC10LHQtdC/0YLQtdGA0Lgg0LHQsNC70LAg0LDQvdCw0L3Ri9KjINKb0rHRgNGB0LDSk9GL0L3QtNCwINC20LDRgtKb0LDQvSDQutC10LfQtNC1INCw0L3QsNC90YvSoyDRjdGA0LjRgtGA0L7RhtC40YLRgtC10YDQuCDQsdCw0LvQsNKT0LAg0LHQtdGA0LjQu9C10LTQuCzQttCw0L3QsCDRgtGD0LPQsNC9INC90LDRgNC10YHRgtC10LvQtdGA0LTQtSDRjdGA0LjRgtGA0L7RhtC40YIg0LzTqdC70YjQtdGA0Lgg0LrTqdC/INCx0L7Qu9Cw0LbQtNGLINC00LAg0L7QuyDQutC10LnQuNC90L3QtdC9INGC0ZbRgNGI0ZbQu9GW0LPRltC9INC20L7Rj9C00YssINGP0pPQvdC4INC+0YHRiyDQutC10LfQtNC1INC905nRgNC10YHRgtC10L3RltKjINKb0LDQvSDSm9Kx0YDQsNC80YvQvdC00LDQs9GLINGE0LXRgtCw0LvQtNGLINCz0LXQvNC+0LPQu9C+0LHQuNC9INC10YDQtdGB0LXQuiDQsNC00LDQvNC90YvSoyDQs9C10LzQvtCz0LvQvtCx0LjQvdGW0L3QtSDQsNGD0YvRgdCw0LTRiyDQvtGB0Ysg0LrQtdC30LTQtSDQvtGA0LPQsNC90LjQt9C80LTQtSDRgdCw0YDQs9GL0YjRgtCw0L3Rg9C80LXQvSDQsdC40YDQs9C1INGE0LjQt9C40L7Qu9C+0LPQuNGP0LvRi9KbINCw0L3QtdC80LjRj9C00LAg0LTQsNC80LjQtNGLLtCi0LDSk9GLINCx0ZbRgCDRi9C60L/QsNC7INC10YLQtdGC0LjQvSDRhNCw0LrRgtC+0YAg0LHQsNGD0YvRgNC00YvQvSDSm9GL0LfQvNC10YLQuCzQsdCw0YPRi9GAINKb0YvQt9C80LXRgtC4INGC0L7Qu9GL0Log0LTQsNC80YvQvNCw0LPQsNC90LTRi9C60YLQsNC9INGC0LjQutC10LvQtdC5INC10LzQtdGBINCx0LjQu9C40YDRg9Cx0LjQvSDQutOp0LHQtdC50ZbQvyDQutC10YLQtdC00ZYg0L7RgdGL0L3Ri9KjINC10YHQtdCx0ZbQvdC10L0g0YLQtdGA0LjQvdC40qMg0YHQsNGA0LPRi9GI0YLQsNC90YPRiyDQsdC+0LvQsNC00Ysu0YHQsNGA0LPRi9GI0YLQsNC90YPQs9CwINC10LzQtNC10YPQtNGW0qMg0pvQsNC20LXRgtC4INC20L7QuiDQsdC40YDQsNC60YLQsCAxNCDQutKv0L3QvdC10L0g06nRgtC60LXQvdC00LUg0LTQtSDRgdCw0YDQs9GL0YjRgtCw0L3RgyDQttC+0LPQsNC70LzQsNGB0LAg0L7QuyDQutC10LfQtNC1INC00LDRgNC40LPQtdGA0LPQtSDQttGD0LPQuNC90YMg0LrQtdGA0LXQuiDQsdC+0LvQsNC00Ysu0YHQtdCx0LXQsdC4INC/0LDRgtC+0LvQvtCz0LjRj9C70YvSmyDQv9GA0L7RhtC10YHRgdC60LUg0LDRg9GL0YHRi9C/INC60LXRgtGD0ZYg0LzRg9C80LrQuNC9LNGP0LPQvdC4INCx0LDRg9GL0YDQtNGL0qMg0LrRi9C30LzQtdGC0Lgg0LDQu9C40LTQtSDQttC10YLQuNC70LzQtdC5INOp0YIg0pvRi9GI0pvRi9C70LTQsNGA0Ysg0LrRi9C30LzQtdGC0LjQvSDQsNGC0LrQsNGA0LAg0LDQu9C80LDRgdCwINC+0Lsg0LrQtdC50LjQvdC90LXQvSDQsdCw0YHQutCwINC00LAg0L/QsNGC0L7Qu9C+0LPQuNGP0LvQsNGA0LPQsCDQsNC70YvQvyDQutC10LvQtdC00Lgu0LHSsdC7INKb0LDRgNCw0YHRgtGL0YDQs9Cw0L0g0LXRgdC10LHRltC80ZbQt9C00LUgNiDQutGD0L3QtNC40Log0LHQsNC70LDQtNCw0LPRiyDRgdCw0YDQs9GL0YjRgtCw0L3RgyDQvtC7INC90L7RgNC80LDQtNCw0LPRiyDQttCw0LPQtNCw0Lku0Y/Qs9C90Lgg0LHQsNC70LDQvdGL0qMg0L7RgNCz0LDQvdC40LfQvNGW0L3QtNC1INGC0LjQutC10LvQtdC5INC10LzQtdGBINCx0LjQu9C40YDRg9Cx0LjQvdC00LXRgCDQutOp0LHQtdC50ZbQvyDQttCw0YLRi9GALNC+0Lsg0YTQtdGC0LDQu9C00Ysg0LPQtdC80L7Qs9C70L7QsdC40L3QvdC10L0g0LXRgNC10YHQtdC6INCw0LTQsNC80L3Ri9KjINCz0LXQvNC+0LPQu9C+0LHQuNC90ZYg0Y/Qs9C90Lgg0LPQtdC80L7Qs9C70L7QsdC40L0g0LAg0LPQsCDQsNGD0YvRgdGL0L8g0LbQsNGC0pvQsNC9INC/0YDQvtGG0LXRgdGB0YE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7" table:style-name="ce1">
            <text:p>1066907</text:p>
          </table:table-cell>
          <table:table-cell office:value-type="string" table:style-name="ce1">
            <text:p>kazakh</text:p>
          </table:table-cell>
          <table:table-cell office:value-type="string" table:style-name="ce1">
            <text:p>Билет 18&amp;lt;br /&amp;gt; 1.Жаңа туған балалардың көру жүйесінің қүрлымының ерекшеліктері қандай?&amp;lt;br /&amp;gt; 2. 6 күңдік бала. Аймақты дәргер қарағанда баланың теріснің сарғыштығы анықталған. Жалпы жағдайы қанағатты.Іші жүмсақ.&amp;lt;br /&amp;gt; Бауыры үлғаймаған. Үлкен нәжісі сарғыш түсті. Несеп түсі мөлдір.Терінің түсінің өзгеруі немен байланысты? Тері срғыштығы нешіңші күңі пайда болады және жоғалады?&amp;lt;br /&amp;gt;</text:p>
          </table:table-cell>
          <table:table-cell office:value-type="string" table:style-name="ce1">
            <text:p>MS7QltCw0qPQsNC00LDQvSDRgtGD0pPQsNC9INCx0LDQu9Cw0LvQsNGA0LTRi9KjINC606nRgNGDINC20q/QudC10YHRltC90ZbSoyDQtdGA0LXRgdC10LrRgtC10YDQtNC10L0g0LDSk9C30LDRgdGL0L3QsNC9INCx0ZbRgNC90LXRiNC1INC10YDQtdC60YjQtdC70ZbQutGC0LXRgNGWINCx0L7Qu9Cw0LTRiy7QltCw0qPQsCDRgtGD0pPQsNC90LTQsCDQtdGA0LXRgdC10Log0LDQtNCw0Lwg0LrTqdC30ZYg0LrTqdC70LXQvNGW0L3RltKjIDIvMyDSm9Kx0YDQsNC50LTRiy7QmtOp0YDRgyDQsNKT0LfQsNGB0YsgOiDQmtOp0Lcg0LDQu9C80LDRgdGLKDE2LTE3INC80Lws0LXRgNC10YHQtdC60YLQtdGA0LTQtSAyNCDQvNC8KSDSm9C+0YHQsNC70pvRi9C70LDRgNGL0LzQtdC9ICjSm9Cw0LHQsNKb0YLQsNGAICwg0LrRltGA0L/RltC60YLQtdGAICwg0LrTqdC3INKb0L7Qt9KT0LDQu9GC0pvRi9GIINCx0rHQu9GI0YvSm9C10YLRgtC10YAgKSDQvtGB0Ysg0pvSsdGA0YvQu9GL0LzQtNCw0YAg0LHQsNC70LDQu9Cw0YDQtNCwINKb0LDQsdCw0pvRgtCw0YDRiyDTmdC70YHRltC3INC20LXRgtGW0LvQs9C10L3QtNGW0LrRgtC10L0g0LbTmdC90LUg0LrTqdC3INKb0L7Qt9KT0LDQu9GC0pvRi9GIIDMsNCw2INC90LXRgNCy0YLQtdGAINC00LDQvNGL0LzQsNGD0YvQvdCwINCx0LDQudC70LDQvdGL0YHRgtGLINC606nQtyDQsNC70LzQsNGB0YvQvdGL0qMg0pvQvtC30pPQsNC70YPRiyDRgdCw0LvRi9GB0YLRi9GA0LzQsNC70Ysg0L3QsNGI0LDRgCDQsdC+0LvQsNC00YsuINCc06nQu9C00ZbRgCDSm9Cw0LHRi9KT0Ysg0pvQsNC70YvSoyzQutOp0Lcg0LDQu9C80LDRgdGL0L3Ri9KjINCw0LvQtNGL0qPSk9GLINCw0YDRgtKb0Ysg0LrTqdC70LXQvNGWINKb0YvRgdKb0LAs0LrTqdGA0YMg0L3QtdGA0LLRliDQvNC10L0g0YLQvtGAINKb0LDQsdGL0pPRiyDRgtC+0LvRi9KbINC20LXRgtGW0LvQvNC10LPQtdC9LtCW0LDRgSDQsdC10LfQtNC10YDRltC90ZbSoyDQvdCw0YjQsNGAINC00LDQvNGD0YvQvdCwINCx0LDQudC70LDQvdGL0YHRgtGLINCx0LDRgdGC0LDQv9Kb0Ysg0LTQsCDQttCw0YEg0LDSk9GD0Ysg0L3QsNGI0LDRgCgxLTIg0LDQudC00LAg0LbQtdGC0ZbQu9C10LTRlikuINCa06nRgNGDINC90LXRgNCy0ZbQvdGW0qMg0LbTmdC90LUg0LrTqdGA0YMg0LDSm9C/0LDRgNCw0YLRgtCw0YDRi9C90YvSoyDSm9Cw0LHRi9C70LTQsNGDINKb0YvRgNGC0YvRgSDQsNGB0YLRiyDQvtGA0YLQsNC70YvSk9GLINC90LDRiNCw0YAg0LTQsNC80YPRi9C90LAg0LHQsNC50LvQsNC90YvRgdGC0Ysg0LrQtdKj0ZbRgdGC0ZbQutGC0LUg0LrTqdGA0LUg0LDQu9C80LDQudC00Ysu0JHSsdC7INC+0YDRgtCw0LvRi9KbINCw0LvSk9Cw0YjSm9GLIDMg0LbQsNGB0YvQvdC00LAg0pvQsNC70YvQv9GC0YvSk9CwINC20LXRgtC10LTRli7QodC+0L3Ri9C80LXQvSDSm9Cw0YLQsNGAINC606nQt9Cx0rHRgNGI0LDSmyDQvNOp0LvQtNGW0YAg0LHQvtC70YPRi9C90LAg0LHQsNC50LvQsNC90YvRgdGC0Ysg0LDQtyDRhNC+0LrRg9GB0YLQsCDQutOp0YDQtdC00ZYs0LrTqdC30LHSsdGA0YjQsNKT0Ysg0LbSsdC80YHQsNKbLNGN0LvQsNGB0YLQuNC60LDQu9GL0psuLtCi0LXQuiDQttCw0pvRi9C9INKb0LDRiNGL0pvRgtGL0pvRgtCw0L0sMjAtMzUg0YHQvCDQtNC10Lkg0rHQt9Cw0pvRgtGL0pvRgtCwINCw0L3QsNGB0YvQvdGL0qMg0LbSr9C30ZbQvSDQttOZ0L3QtSDQutOp0LrRltGA0LXQs9GW0L0g0LrTqdGA0LUg0LDQu9Cw0LTRiy4o0YHQvtGA0YMg0LDQutGC0ZbRgdGWINKv0YjRltC9INC20LXRgtC60ZbQu9GW0LrRgtGWKS4g0KPQsNKb0YvRgiAg06nRgtGW0L8g0LzTqdC70LTRltGAINC205nQvdC1INC90rHRgNC70Ysg0pvQsNCx0YvSmyDQttC10YLRltC70ZbQvyzQtNC40LDQvNC10YLRgNGWINC60LXSo9C10LnRltC/LNCx0LDRgdKb0LAg0LTQuNCw0L/QsNC30L7QvdC00LDRgNC00LAg0LrTqdGA0LUg0LDQu9Cw0LTRiy4g0KLQvtGA0LvRiyDSm9Cw0LHRi9KT0YvQvdGL0qMg0LzQsNC60YPQu9GP0YDQu9GLINC30L7QvdCw0YHRiyDQvdCw0YjQsNGALNC60LXQudGW0L3QvdC10L0gINKb0LDQu9GL0qPQtNCw0L8s0LrTqdC3INCx0rHRgNGI0LDSk9GLINKx0LfQsNGA0LDQtNGLLtCa06nRgNGDINOp0YLQutGW0YDQu9GW0LPRliDRgtOp0LzQtdC9KDAsMDEtMCwwMyks0pvQsNC70YvQv9GC0YvQtNCwICgxLDApINC+0pPQsNC9IDUtNyDQttCw0YHRgtCwINC20LXRgtC10LTRli7QmtOp0YDRgyDQvdC10YDQstGWLNC90LXRgNCy0YPRgSDQvtC/0YLQuNC60YPRgSDSm9Cw0LHQsNGC0Ysg0LzQuNC10LvQuNC90LTQtdC90LUg0LHQsNGB0YLQsNC50LTRiy7QotCw0Y/Sm9GI0LDQu9Cw0YAg0LzQtdC9INKb0rHRgtGL0YjQsNC70LDRgCAg0L3QsNGI0LDRgCDQttC10YLRltC70YPRltC90LUg0LbTmdC90LUg0YTQvtGC0L7RgNC10YbQtdC/0YLQvtGA0LvRi9KbINCw0L/Qv9Cw0YDQsNGCINC00LDQvNGL0LzQsNGD0YvQvdCwINCx0LDQudC70LDQvdGL0YHRgtGLINCx0LDQu9CwINCw0psgLCDSm9Cw0YDQsCAs0LrTqdC6LdC20LDRgdGL0Lsg0YLSr9GB0YLQtdGA0LTRliDQsdCw0YHRgtCw0L/Sm9GL0LTQsCDQvtKj0LDQuSDQsNC20YvRgNCw0YLQsNC00Ysu0JrQtdC50ZbQvdC90LXQvSDRgdCw0YDRiyzSm9GL0LfRi9C7INGC0q/RgdGC0LXRgCDRgtCw0L3QuCDQsdCw0YHRgtCw0LnQtNGLLtCe0LvQsNGA0LTRi9KjINGB0LDQvdGL0L0gLCDRgdCw0L/QsNGB0YvQvdGL0qMg0LDRgNGC0YMg0L/RgNC+0YbQtdGB0ZYg0LHRltGA0L3QtdGI0LUg0LDQudKT0LAg0YHQvtC30YvQu9Cw0LTRiy7QltCw0qPQsCDQvdOZ0YDQtdGB0YLQtSDQttCw0YDRi9Kb0pvQsCDTqdGC0LUg0YHQtdC30ZbQvNGC0LDQuyAsINGB0LXQsdC10LHRliDQutOp0LfQtNC10YDRliDQutKv0qPQs9GW0YDRgiDQutC10LvQtdC00ZYu0KHQvtC7INKv0YjRltC9INC+0Lsg0LbQsNGA0YvSm9GC0LDQvSDSm9C+0YDSm9GD0Ysg0LzSr9C80LrRltC9LtCR0ZbRgNCw0Lcg0YPQsNKb0YvRgiDTqdGC0LrQtdC9INGB0L7SoyDQsdKx0Lsg0YHQtdC30ZbQvNGC0LDQu9C00YvSmyDQttC+0LnRi9C70LDQtNGLLiAg0JrTqdC30LTRltKjINKb0LDRgNKb0YvQvdC00Ysg06nRgdGD0ZYgMS01INC20LDRgSDQsNGA0LDQu9GL0pPRi9C90LTQsCDQttKv0YDRltC/LDEwLTEyINC20LDRgdGC0LAg0LDRj9Kb0YLQsNC70LDQtNGLLiAgICAgICAgICAgICAgICAgICAgICAgICAgICAgICAgICAgICAgICAgICAgICAgICAgICAgICAgICAgIDIu0JbQsNKj0LAg0YLRg9KT0LDQvSDQvdOZ0YDQtdGB0YLQtdC00LUg0YLQtdGA0ZbRgdGW0L3RltKjINC20LXQtNC1INGC0q/RgNC00LUg0YHQsNGA0pPQsNGO0Ysg0LbQuNGWINC60LXQt9C00LXRgdC10YLRltC9INC20LDSk9C00LDQuSDQsdC+0LvRi9C/INC60LXQu9C10LTRli7QntC90Ysg0LrTqdCx0ZbQvdC10YHQtSDRhNC40LfQuNC+0LvQvtCz0LjRj9C70YvSmyDRgdCw0YDSk9Cw0Y4g0LTQtdC/INCw0YLQsNC70LDQtNGLLtCR0rHQuyDQttCw0pPQtNCw0Lkg0L3TmdGA0LXRgdGC0LUg0pvQsNC90YvQvdC00LAg0LHQuNC70LjRgNGD0LHQuNC9INC00LXSo9Cz0LXQudGW0L3RltKjINC20L7Sk9Cw0YDRiyDQsdC+0LvRg9GL0L3QsCDQsdCw0LnQu9Cw0L3Ri9GB0YLRiyDQtNCw0LzQuNC00Ysu0JHSsdC90Ysg0YTQuNC30LjQvtC70L7Qs9C40Y/Qu9GL0psg0LHQsNGD0YvRgNKv0YHRgtGW0LvRltC6INGB0LDRgNKT0LDRjiDQv9GA0L7RhtC10YHRliDQtNC10L8g0LDQudGC0YHQsNKbINCx0L7Qu9Cw0LTRiy7QodC10LHQtdCx0ZYg0LbQsNKj0LAg0L3TmdGA0YHQtdGC0LXQtNC1INC20LDRgdGD0YjQsNC70LDRgNC00YvSoyDTqdC80ZbRgCDRgdKv0YDRgyDRhtC40LrQu9GWINKb0YvRgdKb0LAg0LHQvtC70LDQtNGLLNGB0L7QuyDSr9GI0ZbQvSDRjdGA0LjRgtGA0L7RhtC40YLRgtC10YAg0Y/Sk9C90Lgg0pvRi9C30YvQuyDSm9Cw0L0g0LbQsNGB0YPRiNCw0LvQsNGA0Ysg0LrTqdC60LHQsNGD0YvRgNC00LAg0YjQtdC60YLQtdC9INGC0YvRgSDRi9C00YvRgNCw0LnQtNGLLtCv0pPQvdC4INCz0LXQvNC+0LPQu9C+0LHQuNC9INCx0LjQu9C40YDRg9Cx0LjQvdCz0LUg0YvQtNGL0YDQsNC50LTRiy7QntC90YvQvNC10L0g0pvQvtGB0LAg0L3TmdGA0LXRgdGC0LUg0LHQsNGD0YvRgNGLINC205nQvdC1INOp0YIg0YjRi9KT0LDRgNGDINC20L7Qu9C00LDRgNGLINC00rHRgNGL0YEg0LTQsNC80YvQvNCw0pPQsNC90Ysg0q/RiNGW0L0g06nRgiDQtNKx0YDRi9GBINGI0YvSm9C/0LDQuSzRltGA0LrRltC70ZbQvyzQsdC40LvQuNGA0YPQsdC40L0g0pvQsNC90pPQsCDRgtKv0YHRg9GWINC80q/QvNC60ZbQvS7QntC7INC606nQt9C00ZbSoyDRiNGL0YDRi9GIINKb0LDQsdGL0pPRiyzRgtC10YDRliDQttCw0LzRi9C70pPRi9C70LDRgNGL0L3QsCDQsdCw0YDRi9C/INC20LjQvdCw0LvQsNC00Ysu0JHSsdC7INC/0YDQvtGG0LXRgdGBINOZ0LTQtdGC0YLQtSAyLTMg0LrSr9C90LTQtSDQsdCw0YHRgtCw0LvQsNC00Ysg0LbTmdC90LUgNS03INC60q/QvdCz0LUg0YHQvtC30YvQu9GD0Ysg0LzSr9C80LrRltC9LtCV0qMg0LbQvtKT0LDRgNGLINGB0LDRgNKT0LDRjiDQtNC10qPQs9C10LnRliAzLTUg0LrSr9C90LTQtSDQttC10YLRltC/LDctMTAg0LrSr9C90LPQtSDSm9Cw0YDQsNC5INCw0Y/Sm9GC0LDQu9GD0Ysg0LrQtdGA0LXQuiDQsdC+0LvQsNC00Ysu0JHQsNC70LAg0YTQuNC30LjQvtC70L7Qs9C40Y/Qu9GL0psg0LXQvNGI0LXQuiDRgdKv0YLRltC80LXQvSDSm9C+0YDQtdC60YLQtdC90YPRliAsINC00rHRgNGL0YEg0LrSr9GC0ZbQvdGD0ZYg0LbQsNKT0LTQsNC50YvQvdC00LAg0LHSsdC7INC/0YDQvtGG0LXRgdGBIDEtMiDQsNC/0YLQsNC00LAg0YLTqdC80LXQvdC00LXQvyzRgtC+0pvRgtCw0YPRiyDQutC10YDQtdC6INCx0L7Qu9Cw0LTRiy7QldCz0LXRgNC00LUg0YHQsNGA0pPQsNGOINC/0YDQvtGG0LXRgdGB0ZYg0L7RgdGLINC00LjQsNC/0LDQt9C+0L3QvdCw0L0g0LDRgNGC0YvSmyDRgdCw0pvRgtCw0LvRi9C/LNCx0LDRgdKb0LAgINCx0LXQu9Cz0ZbQu9C10YAgOiDSsdC50pvRiyDQsdKx0LfRi9C70YMs0YLTmdCx0LXRgtGWINCx0L7Qu9C80LDQuSzQvNC10LrQvtC90LjQudC00LUg0L/RgNC+0LHQu9C10LzQsNC70LDRgCDQsdC+0LvRi9C/LNC00LjRgdC/0LXQv9GB0LjRj9C70YvSmyDQsdKx0LfRi9C70YvRgdGC0LDRgCzQsdCw0YPRi9GAINKb0LDQsdGL0YDSk9CwINC00L7Sk9Cw0YHRi9C90LDQvSAyICsg0YHQvCDRiNGL0pPRg9GLLNGW0YjRliDQsNGD0YvRgNGB0YvQvdGD0LzQtdC9INC20q/RgNGB0LUs0LHSsdC7INC/0LDRgtC+0LvQvtCz0LjRj9C70YvSmyDQttCw0pPQtNCw0LnQu9Cw0YDQtNGLINC606nRgNGB0LXRgtGD0ZYg0LzSr9C80LrRltC9LijQs9C10L/QsNGC0LjRgizQsdCw0YPRi9GA0LTRi9KjINC40L3RhNC10LrRhtC40Y8t0LLQuNGA0YPRgdGC0YvSmyDQt9Cw0pvRi9C80LTQsNC90YPRiyku0JHSsdC7INC60LXQt9C00LUg0LHQsNC70LAg0L/QtdC00LjQsNGC0YAg0pvQsNGA0LDRg9GL0L3QtNCwINCx0L7Qu9GL0L8s0pvQvtGB0YvQvNGI0LAg0LfQtdGA0YLRgtC10YPQu9C10YDQtNC10L0g06nRgtGD0ZYg0LrQtdGA0LXQui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589" table:style-name="ce1">
            <text:p>915589</text:p>
          </table:table-cell>
          <table:table-cell office:value-type="string" table:style-name="ce1">
            <text:p>russian</text:p>
          </table:table-cell>
          <table:table-cell office:value-type="string" table:style-name="ce1">
            <text:p>Билет 18&amp;lt;br /&amp;gt; 1.Какие особенности строения органа зрения новорожденного ребенка вы знаете?&amp;lt;br /&amp;gt; 2.Ребенку 6 дней жизни. При осмотре участкового врача обнаружена желтушность кожных покровов. Ребенок не беспокоен. Сон и аппетит хороший. По внутренним органам патологии не обнаружено. Живот мягкий, не увеличен. Печень не увеличена. Стул светло-желтого цвета. Моча прозрачная, светло-желтая. С чем связано изменение окраска кожи.На какой день она должна появиться и исчезнуть.&amp;lt;br /&amp;gt;</text:p>
          </table:table-cell>
          <table:table-cell office:value-type="string" table:style-name="ce1">
            <text:p>Mi7QmNC30LzQtdC90LXQvdC40LUg0L7QutGA0LDRgdCwINC60L7QttC4INGB0LLRj9C30LDQvdC+INGE0LjQt9C40L7Qu9C+0LPQuNGH0LXRgdC60L7QuSDQttC10LvRgtGD0YXQvtC5INC90L7QstC+0YDQvtC20LTQtdC90L3QvtCz0L4g0YDQtdCx0LXQvdC60LAu0J/QvtGB0LvQtSDRgNC+0LbQtNC10L3QuNGPINGDINGA0LXQsdC10L3QutCwINCyINC+0YDQs9Cw0L3QuNC30LzQtSDQvdCw0YXQvtC00LjRgtGB0Y8g0LHQvtC70YzRiNC+0LUg0LrQvtC70LjRh9C10YHRgtCy0L4g0LHQuNC70LjRgNGD0LHQuNC90LAg0LIg0LrQvtC20LUg0Lgg0LIg0LrRgNC+0LLQuCDQsiDQvdC1INGB0LLRj9C30LDQvdC90L7QvCDRgdC+0YHRgtC+0Y/QvdC40Lgu0JIg0LTQsNC90L3QvtC8INGB0LvRg9GH0LDQtSDQvtC9INGP0LLQu9GP0LXRgtGB0Y8g0YTQuNC30LjQvtC70L7Qs9C40YfQtdGB0LrQvtC5INC20LXQu9GC0YPRhdC+0Lkg0YLQsNC6INC60LDQuiDRgNC10LHQtdC90L7QuiDQvdC1INC+0LHQtdGB0L/QvtC60L7QtdC9LCDRgdC+0L0g0Lgg0LDQv9C/0LXRgtC40YIg0YXQvtGA0L7RiNC40LksINC20LjQstC+0YIg0LzRj9Cz0LrQuNC5INC4INC90LUg0YPQstC10LvQuNGH0LXQvS7Qn9C10YfQtdC90Ywg0L3QtSDRg9Cy0LXQu9C40YfQtdC90LAu0KHRgtGD0Lsg0Y/QstC70Y/QtdGC0YHRjyDRgdCy0LXRgtC70L4t0LbRkdC70YLQvtCz0L4g0YbQstC10YLQsCzRgtCw0Log0LbQtSDQvNC+0YfQsCDQv9GA0L7Qt9GA0LDRh9C90LDRjyDQuCDRgdCy0LXRgtC70L4t0LbQtdC70YLQsNGPLtCSINC90L7RgNC80LUg0YTQuNC30LjQvtC70L7Qs9C40YfQtdGB0LrQsNGPINC20LXQu9GC0YPRhdCwINC90LDRh9C40L3QsNC10YLRgdGPINC+0YIgMy00INC00L3QtdC5INC/0L7RgdC70LUg0YDQvtC20LTQtdC90LjRjyDQuCDQuNGB0YfQtdC30LDQtdGCINC/0L7RgdC70LUgNy0xNCDQtNC90LXQuSwg0YLQsNC6INC60LAg0YDQtdCx0LXQvdC+0Log0LHRg9C00LXRgiDQstGL0LLQvtC00LjRgtGMINC40YUg0YfQtdGA0LXQtyDQvNC+0YfRgyzQutCw0LsuINCV0YHQu9C4INC20LXQu9GC0YPRhdCwINCx0YvQu9CwINCx0Ysg0L/QsNGC0L7Qu9C+0LPQuNGH0LXRgdC60L7QuSDRgtC+INC90LDRh9Cw0LvQviDQsdGA0LDQu9C+INCx0Ysg0YEg0YDQvtC20LTQtdC90LjRjyDRgNC10LHQtdC90LrQsCDQuCDQvNC10LTQu9C10L3QvdGL0Lwg0YPRhdC+0LTQvtC8LNGC0LDQuiDQttC1INCx0YvQu9C4INCx0Ysg0LjQt9C80LXQvdC10L3QuNGPINGB0L4g0YHRgtC+0YDQvtC90Ysg0LLQvdGD0YLRgNC10L3QvdC40YUg0L7RgNCz0LDQvdC+0LIg0YLQviDQtdGB0YLRjCDRg9Cy0LXQu9C40YfQtdC90LjQtSDQv9C10YfQtdC90Lgs0YHQtdC70LXQt9C10L3QutC4LCDQv9C+0LLRi9GI0LXQvdC40LXQvCDRgtC10LzQv9C10YDQsNGC0YPRgNGLINGC0LXQu9CwLtCS0L7Qt9C80L7QttC90L4g0YDQtdCx0LXQvdC+0Log0LHRi9C7INCx0Ysg0LHQvtC70LXQvSDQk9C10L/QsNGC0LjRgtC+0Lwg0LjQu9C4INC90LDRgNGD0YjQtdC90LjQtdC8INGB0L4g0YHRgtC+0YDQvtC90Ysg0L/QtdGH0LXQvdC4INGC0L4g0LXRgdGC0Ywg0LLRi9Cy0LXQtNC10L3QuNC10Lwg0LHQuNC70LjRgNGD0LHQuNC90LAuMS7QntGA0LPQsNC9INC30YDQtdC90LjRjyDRgyDQvdC+0LLQvtGA0L7QttC00LXQvdC90L7Qs9C+INC/0L7RgdC70LUg0YDQvtC20LTQtdC90LjRjyDQvdC1INCy0LjQtNC40YIg0L7QutGA0YPQttCw0Y7RidC40Lkg0LzQuNGAINCyINGH0LXRgtC60L7RgdGC0Lgg0Lgg0LLQuNC00LjRgiDRgtC+0LvRjNC60L4g0LIg0YDQsNC00LjRg9GB0LUgMjAtMzAg0YHQvCDQvNGD0YLQvdC+INC4INC80L7Qs9GD0YIg0L3QtSDRgNCw0LfQu9C40YfQsNGC0Ywg0YbQstC10YLQsCwg0Y3RgtC+INGB0LLRj9C30LDQvdC+INGC0LXQvCDRh9GC0L4g0YMg0YDQtdCx0LXQvdC60LAg0L3QtSDRhdC+0YDQvtGI0L4g0YDQsNC30LLQuNGC0Ysg0YDQtdGG0LXQv9GC0L7RgNGLINC30YDQtdC90LjRjyDQutC+0LvQsdC+0YfQutC4INC4INC/0LDQu9C+0YfQutC4LNGB0L4g0LLRgNC10LzQtdC90LXQvCDQuNGFINC60L7Qu9C40YfQtdGB0YLQstC+INCy0L7Qt9GA0LDRgdGC0LDQtdGCINGH0YLQviDRg9C70YPRh9GI0LDQtdGCINC30YDQtdC90LjQtSDRgNC10LHQtdC90LrQsCDQuCDQstC+0YHQv9GA0LjRj9GC0LjQtSDRhtCy0LXRgtCwLtCf0L7RgdC70LUg0YDQvtC20LTQtdC90LjRjyDRgNC10LHQtdC90L7QuiDQv9C10YDQstGL0LUg0LTQvdC4INC20LjQt9C90Lgg0YHQstC10YLQvtGH0YPQstGB0YLQstC40YLQtdC70LXQvSDQuCDQt9Cw0LrRgNGL0LLQsNC10YIg0LPQu9Cw0LfQsCzRgNC10LDQutGG0LjQuNC4INC90LAg0YHQstC10YIg0LfRgNCw0YfQvtC6INC90LUg0YDQtdCw0LPQuNGA0YPQtdGCLtCjINGA0LXQsdC10L3QutCwINC90LUg0YDQsNC30LLQuNGCINGB0LvQtdC30L3Ri9C5INC60LDQvdCw0Lsg0Lgg0L/QtdGA0LLRi9C1INC00L3QuCDQttC40LfQvdC4INC+0L0g0L3QtSDQvNC+0LbQtdGCINC/0YPRgdC60LDRgtGMINGB0LvQtdC30YMg0Lgg0YHQstGP0LfQuCDRgSDRjdGC0LjQvCDQvNC+0LPRg9GCINC+0LHRgNCw0LfQvtCy0LDRgtGM0YHRjyDQstC+0YHQv9Cw0LvQuNGC0LXQu9GM0L3Ri9C1INC/0YDQvtGG0LXRgdGB0Ysg0L3QsNC/0YDQuNC80LXRgCDQuNGFINC30LDQutGD0L/QvtGA0LrQsCDQuCDQtNC70Y8g0Y3RgtC+0LPQviDQstCw0LbQvdC+INGB0L7QsdC70Y7QtNCw0YLRjCDQs9C40LPQuNC10L3RgyDRgNC10LHQtdC90LrQsCzQsiDQtNCw0LvRjNC90LXQudGI0LXQvCDQuNC00LXRgiDRgNCw0LfQstC40YLQtdC1INGB0LvQtdC30L3QvtCz0L4g0LrQsNC90LDQuyDQuCDRgSDQstGL0LTQtdC70LXQvdC40LXQvCDRgdC70LXQt9GLINCyINGC0LXRh9C10L3QuNC4INC+0LTQvdC+0LPQvi3QtNCy0YPRhSDQvdC10LTQtdC70Ywu0J/QviDRgdGA0LDQstC90LXQvdC40Y8g0LLQt9GA0L7RgdC70YvQvCDRh9C10LvQvtCy0LXQutC+0Lwg0YMg0YDQtdCx0LXQvdC60LAg0LPQu9Cw0LfQsCDQvNC10L3RjNGI0LUg0LIg0YDQsNC30LzQtdGA0LUu0KMg0L3QvtCy0L7RgNC+0LbQtNC10L3QvdC+0LPQviDRgNC10LHQtdC90LrQsCDRgtC1INC20LUg0LzQtdC90Y/QtdGC0YHRjyDRhtCy0LXRgiDQs9C70LDQtyDQuCDQsiDQstC+0LfRgNCw0YHRgtC1IDQtNiDQu9C10YIg0L7QvSDQv9GA0LjQvtCx0YDQtdGC0LDQtdGCINGB0LLQvtC5INGB0YLQsNCx0LjQu9GM0L3Ri9C5INGG0LLQtdGCINC4INGB0LLRj9C30L3QviDRgSDQvNC10LvQsNC90L7RhtC40YLQvtC8INC60L7RgtC+0YDRi9C5INC+0L/RgNC10LTQtdC70Y/QtdGCINGG0LLQtdGCINCz0LvQsNC3INCyINGA0LDQtNGD0LbQutC1LtCT0LvQsNC30LAg0YXQvtGA0L7RiNC+INC60YDQvtCy0L7RgdC90LDQsdC20LDQtdGC0YHRjyDQutGA0L7QvNC1INGF0YDRg9GB0YLQsNC70LjQutCwINCz0LvQsNC30LAs0YLQsNC6INC60LDQuiDQvdC10YIg0LrRgNC+0LLQtdC90L7RgdGC0L3Ri9GFINGB0L7RgdGD0LTQvtCyLNGB0YLRgNGD0LrRgtGD0YDQsCDQs9C70LDQt9CwINC+0YfQtdC90Ywg0L3QtdC20L3QsNGPLtCjINGA0LXQsdC10L3QutCwINGC0LDQuiDQttC1INC80L7QttC10YIg0L3QsNCx0LvRjtC00LDRgtGM0YHRjyDQutC+0YHQvtCz0LvQsNC30LjQtSDQutC+0YLQvtGA0YvQtSDRgdC+INCy0YDQtdC80LXQvdC10L3QtdC8INC/0YDQvtGF0L7QtNC40YIg0Y3RgtC+INC80L7QttC10YIg0LHRi9GC0Ywg0YHQstGP0LfQsNC90L4g0YEg0L3QtdC00L7RgdGC0LDRgtGH0L3Ri9C8INGA0LDQt9Cy0LjRgtC40LXQvCDQs9C70LDQt9C+0LTQstC40LPQsNGC0LXQu9GM0L3Ri9GFINC80YvRiNGGINCyINC/0LXRgNC40L7QtCDQvdC+0LLQvtGA0L7QttC00LXQvdC90L7RgdGC0LguINCh0YLRgNGD0LrRgtGA0Ysg0LPQu9Cw0LfQsCDQvNC+0LPRg9GCINC70LXQs9C60L4g0LLQvtGB0L/QvtC70Y/RgtGM0YHRjyAo0LrQvtC90YzRjtC60YLQtdCy0LjRgiwg0L7RgtC10YfQvdC+0YHRjCDQs9C70LDQt9CwINC4INC00YAuKdGC0LDQuiDQutCw0Log0YMg0L3QvtCy0L7RgNC+0LbQtNC10L3QvdC+0LPQviDRgNC10LHQtdC90LrQsCDQvdC10LTQvtGB0YLQsNGC0L7Rh9C90L4g0YDQsNC30LLQuNGC0LAg0LjQvNGD0L3QvdCw0Y8g0YHQuNGB0YLQtdC80LAu</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Ести нет реакциии зрачка на свет- то ребенок умер!!!</text:p>
          </table:table-cell>
          <table:table-cell office:value-type="float" office:value="0" table:style-name="ce1">
            <text:p>0</text:p>
          </table:table-cell>
          <table:table-cell table:number-columns-repeated="16376"/>
        </table:table-row>
        <table:table-row table:style-name="ro1">
          <table:table-cell office:value-type="float" office:value="914696" table:style-name="ce1">
            <text:p>914696</text:p>
          </table:table-cell>
          <table:table-cell office:value-type="string" table:style-name="ce1">
            <text:p>english</text:p>
          </table:table-cell>
          <table:table-cell office:value-type="string" table:style-name="ce1">
            <text:p>Ticket 18&amp;lt;br /&amp;gt; 1. What structural features of the organ of vision of a newborn baby do you know?&amp;lt;br /&amp;gt; 2. The child is 6 days old. During the examination, the doctor detected a yellowness of the skin. The child is not restless. Sleep is not disturbed. The appetite is good. No pathology was found in the internal organs. The abdomen is soft, not enlarged. The liver is not enlarged. The feces is light yellow. The urine is clear, light yellow. What is the reason for the change in skin color and why. On what day it should appear and then disappear?&amp;lt;br /&amp;gt;</text:p>
          </table:table-cell>
          <table:table-cell office:value-type="string" table:style-name="ce1">
            <text:p>MS50aGVyZSBhcmUgbG90cyBvZiBzdHJ1Y3R1YWwgZmVhdHVyZSBvZiB0aGUgb3JhZ2FuIG9mIHZpc2lvbiBpbiBuZXcgYm9ybiBiYWJ5IGxpa2Ugc21hbGwgZXllcyBzaXplLCBsYXJnZSBwdXBpbCwgdGhpbiBjb3JuZWEsIHVuZGVybHlpbmcgcmV0aW5hLCBjb2xvdXIgdmlzaW9uIG9yIGNvbG91ciBibGluZG5lc3MsIHNob3J0IHZpc2lvbiByYW5nZSwgZXhhbXBsZSBhbmQgZGVmaW5hdGlvbiAtIDEuc21hbGwgZXllIHNpemUtaW4gbW9yZSA3MCUgb2YgY2FzZXMgYmFieSBoYXZlICB0aGF0IGNhc2UgYmFieSBleWVzIGNhbiBiZSBzbWFsbCBkdWUgdG8gbXVsdGlscGUgcmVhc29uICAyLmxhcmdlIHB1cGlsLSBhIG5ldyBiYWJ5IGNhbiBoYXZlIHB1cGlsIGluIGxhcmdlIHNpemUgZm9yIG1vcmUgY2xlYXIgdmlzaW9uIDMuIHRoaW4gY29ybmVhLSB0aGlzIGNhbiBiZSBwb3NpYmxlIGZvciBvcmdhbiBvZiB2aXNpb24gNC4gdW5kZXJkZXZlbG9wZWQgcmV0aW5hLSBpbiB0aGlzIHNpdHV0YXRpb24gcmV0aW5hIGNhbiBiZSB1bmRlciBkZXZlbG9wbWVudCBjb25kaXRpb24gb3Igbm90IGZ1bGx5IGRldmVsb3BlZCAgNS5jb2xvdXIgdmlzaW9uLSBiYWJ5IGNhbiBzdWZmZXIgZnJvbSBjb2xvdXIgdmlzaW9uIG9yIGNvbG91ciBibGluZG5lc3MgYW5kIHRoaXMgaXMgYSBpbmhlcml0ZWQgZGlzZWFzZSBjb21lIGZyb20gcGFyZW50cyAgNi5zaG9ydCB2aXNpb24gcmVuZ2UtIGlmIGJhYnkgaGF2ZSB1bmRldmVsb3BlZCBleWVzIHRpc3N1ZSBpdCBjYW4gYWZmZWN0IHRoZWlyIHZpc2lvbiByYW5nZSBvciByZWNvZ25pc2UgdGhlIG9iamVjdCB0aGVyZSBhcmUgc29tZSBvdGhlciBzdHJ1Y3R1YWwgZmVhdHVyZSBsaWtlIG1pc21hdGNoZWQgZXllcyBzaXplICwgbGltaXRlZCB2aXN1YWwgYWN1aXR5LCBkZXB0aCBwZXJjZXB0aW9uICwgYW5kIHRoZXJlIGFyZSBzb21lIG90aGVyIHJlZmxleCBhbmQgbW92ZW1lbnQgbGlrZSByb290aW5nIHJlZmxleCwgdHJhY2tpbmcgcmVmbGV4IGNvbmNvcmdlbmNlIHJlZmxleCBhbmQgY29tbWFuIGV5ZXMgcHJvYmxlbSBvZiBuZXcgYm9ybiBiYWJ5IGFyZSBjYXRlcml1cyBnbHVjb21hLCBjb25nZW5pdGFsIGNhdGVyYWN0cywgcmV0aW5vcGF0aHkgb2YgcHJlbWF0dXJlIGFuZCBzbyBvbi4gICAyLiB0aGUgY2hhbmdlIGluIHNraW4gY29sb3VyIG9mIDYgZGF5IG9sZCBiYWJ5IGlzIGxpa2VseSBkdWUgIHRvIHBoeXNpY2xvZ2ljYWwgamF1bmRpY2UgYWxzbyBrbm93biBhcyBuZW9uZXRhbCBqYXVuZGljZSB0aGlzIGlzIGEgY29tbWFuIGNvbmRpdGlvbiB0aGF0IG9jY3VyIGluIG1hbnkgbmV3IGJvcm4gYmFieSBkdWUgdG8gYnJlYWtkb3duIG9mIHJlZCBibG9vZCBjZWxscyAoUkJDKWFuZCBpbW1hdHVyZSBsaXZlciBpbmFiaWxpdHkgdG8gcHJvY2VzcyBiaWxsaXJ1YmluIGEgeWVsbG93IHBpZ21lbnQgcGh5c2lvY29sb2dpY2FsIGphdW5kaWNlIGlzIGNvbW1hbmx5IGFwcGVyIG9uIHRoZSBzZWNvbmQgYW5kIHRoaXJkIGRheSBvZiBsaWZlIC4gYW5kIHNvbWV0aW1lcyBpdCBtYXkgYmUgYXBwZXIgYWZ0ZXIgaW1taWRpYXRlIGJpcnRoIG9yIHByZW1hdHVyZSBiYWJ5IGJpcnRoIHBlYWtzIGFyb3VuZCB0aGUgZmlmdGggZGF5IGFuZCB0aGVuIGdyYWR1YWxseSByZXNvbHZlIHdpdGhpbiAyIHdlZWtzIHRoZSB5ZWxsb3dpbmcgdXN1YWxseSBzdGFydGVkIG9uIGZhY2UgYW5kIGdvIGRvd25iYXJkIHRvIHRoZSB0cnVuayBhbmQgaW50ZXN0aW5lcyBhZnRlciBzb21lIHRpbWVzIGFuZCB0aGF0IG1heSBiZSBzZXJpb3VzIHNvbWUgb2YgdGltZXMuaW4gbW9zdCBvZiBjYXNlcyBwaHlzaW9sb2dpY2FsIGphdW5kaWNlIG1heSBiZSBoYXJtZnVsbCBhbmQgaW4gc29tZSBvZiBjYXNlcyBpdCBkb2VzIG5vIHJlcXVpcmUgdHJlYXRtZW50IGhvZWV2ZXIgamF1bmRpY2UgaXMgc2V2ZXJlIGl0IG1heSBpbmRpY2F0ZSBhICB1bmRlcmx5aW5nIG1lZGljYWwgY29uZGl0aW9uIHNob3VsZCBiZSBldm9jdWF0ZWQgYnkgZG9jdG9ycy4gIGluIHRoaXMgY2FzZSB3ZSBoYXZlIGEgY2hpbGQgcGF0aWVudCAoIDYgZGF5cyBvbGQpIGR1cmluZyB0aGUgZXhhbWluYXRpb24gb2YgdGhlIGRvY3RvciB0aGUgZG9jdG9yIGZvdW5kIHRoYXQgYSB5ZWxsb3duZXNzIG9mIHRoZSBza2luIHRoZSBjaGlsZCBpcyBub3QgcHJvcGVybHkgcmVzdGxlc3Mgc2xlZXAgaXMgZGlzdHVyYmVkIHRoZSBhcHBldGl0ZSBpcyBnb29kIGFuZCB0aGVyZSBhcmUgbm8gcGF0aG9sb2d5IHdhcyBmb3VuZCBpbiB0aGUgaW50ZXJuYWwgb3JnYW5zIHRoZSBhYmRvbWFuIGlzIHNvZnQgbm90IGlubGFyZ2VkIHRoZSBsaXZlciBpcyBhbHNvIG5vdCBpbmxhcmdlZCB0aGUgZmFjZXMgaXMgbGlnaHQgeWVsbG93IHRoZSB1cmluZSBpcyBjbGVhciBsaWdodCB5ZWxsb3cgYWZ0ZXIgZGlhZ29uaXMgZG9jdG9yIGNhbiBkZXRlY3QgYmFieSBpcyBzdWZmZXJpbmcgZnJvbSBwaHlzaW9sb2dpY2FsIGphdW5kaWNlIC4gamF1bmRpY2UgaXMgYSBsaXZlciByZWdhcmRpbmcgc2lja25lc3MgYXMgZG9jdG9yIG1lbnRpb25lZCB0aGF0IGxpdmVyIGlzIHNsaWRlbHkgaW5sYXJkZWQgaW4gc2l6ZSAuIHRoaXMgaXMgdGhlIHJlYXNvbiBhbmQgaW4gdGhhdCBjYXNlIGxpdmVyIGlzIHByb2R1Y2luZyBtb3JlIGJpbGUganVpY2UgLiBiaWxlIGp1aWNlIGlzIHZlcnkgdXNlZnVsbCBpbiBpbWVsc2lmaWNhdGlvbiBvZiBmYXQgLiB0aGlzIGlzIHZlcnkgdXNlZnVsbCBpbiBvdmVyYWxsIGRpZ2VzdGlvbiBhbmQgYmlsZSBqdWljZSBjb250YWluIGJpbGxpcnViaW4gcGlnbWVudCBpdCBpcyBhIHllbGxvdyBjb2xvdXIgcGlnbWVudCBpZiBiaWxlIGlzIHNlY3JldCBpbiBtb3JlIGFtb3VudCBiYWJ5IHNraW4gY29sb3VyIG1heSBiZSBjb252ZXJ0IGluIHllbGxvdy4gYW5kIG5haWxzIGFuZCBzb21lIG90aGVyIGJvZHkgcGFydCB3aWxsIGJlIHllbGxvd2lzaC4gdGhpcyBpcyBhIHZlcnkgY29tbWFuIGNhdXNlIGluIGNoaWxkIC4gc29tdGltZXMgaXQgY2FuIGNhdXNlIG11bHRpcGxlIGRpc2FiaWxpdHkgYW5kIHNvbWV0aW1lcyBpdCB3aWxsIGJlIHRyZWF0ZWQgYnkgYm9keSBvd25zZWxmLiBhbmQgc29tdGltZXMgaXQgbmVlZGVkIHRyZWF0bWVudCBmcm9tIG91dHNpZGUgbGlrZSBkb2N0b3Igb3IgbWVkaWNhbCB0cmVhdG1lbnQ=</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029" table:style-name="ce1">
            <text:p>915029</text:p>
          </table:table-cell>
          <table:table-cell office:value-type="string" table:style-name="ce1">
            <text:p>english</text:p>
          </table:table-cell>
          <table:table-cell office:value-type="string" table:style-name="ce1">
            <text:p>Ticket 18&amp;lt;br /&amp;gt; 1. What structural features of the organ of vision of a newborn baby do you know?&amp;lt;br /&amp;gt; 2. The child is 6 days old. During the examination, the doctor detected a yellowness of the skin. The child is not restless. Sleep is not disturbed. The appetite is good. No pathology was found in the internal organs. The abdomen is soft, not enlarged. The liver is not enlarged. The feces is light yellow. The urine is clear, light yellow. What is the reason for the change in skin color and why. On what day it should appear and then disappear?&amp;lt;br /&amp;gt;</text:p>
          </table:table-cell>
          <table:table-cell office:value-type="string" table:style-name="ce1">
            <text:p>IzE9IFN0cnVjdHVyZSBmZWF0dXJlcyBvZiB0aGUgb3JnYW5zIG9mIHRoZSB2aXNpb24gIGluIG5ldyBib3JuIGJhYnkgLHRoZSBzdHJ1Y3R1cmUgb2YgdGhlIGV5ZXMgaXMgc3RpbGwgZGV2ZWxvcGluZyAsY29ybmVhIGlzIHJlbGF0aXZlbHkgbGFyZ2VyIGNvbXBhcmVkIHRvIHRoZSBzaXplIGluIHRoZSBpbmZhbnQgLnJldGluYSBpcyBpbW1hdHVyZSBhdCBiaXJ0aCBhbmQgdmlzdWVsIGFjdGl2aXR5IGlzIGxpbWl0ZWQgbmV3IGJvcm4gY2FuIHNlZSBvbmx5IGxpZ2h0ICxzaGFkb3dzYW5kIHZlcnkgY2xvc2VyIG9iamVjdHMgKGFyb3VuZCA4LTEwIGluY2hlcyBhd2F5KSBvcHRpYyBuZXJ2ZSBpcyBzdGlsbCBkZXZlbG9waW5nIGl0cyBjb25uZWN0aW9uICB3aXRoIHRoZSBicmFpbiBhbmQgdmlzdWVsIHByb3NzZWluZyBpcyBub3QgeWV0IGZ1bGx5IHJlZmluZWQucHVwcGlsZXJ5IGxpZ2h0IHJlZmxleGVzIGlzIGluIG5ld2Jvcm4gaGF2ZSBhIHByb3Blcmx5IGNvb3JkaW5hdGVkIHB1cHBpbGVyeSBsaWdodCByZWZsZXhzIGFuZCB0aGVyZSBwdXBpbGVzIG1heSBiZSBzdHVnZ2lzIGluIHJlc3BvbnNlIHRvIHRoZSBsaWdodC4jMj0ganVuZGljZSBpbiA2IGRheSBvbGQgaW5mZW50O3RoZSBqdW5kaWMgaW4gNiBkYXkgb2xkIGluZmVudCBpcyBsaWtlbHkgcGh5c2lsb2dpY2FsIGp1bmRpY2Ugd2hpY2ggaXMgY29tbWVuIGluIG5ld2Jvcm4gLnRoZSBtYWluIGNhdXNlcyBhbmQgY2hlcmVjdGVyc3RpY3MgYXJlIGxpa2UgOiBUaGUgQ2F1c2VzIGFyZSAsdGhpcyBmb3JtIG9mIGp1bmRpY2Ugb2NjdXJzIGR1ZSB0byB0aGUgaW1tYXR1cml0eSBvZiB0aGUgbGl2ZXIgLHdoaWNoIGlzIG5vdCB5ZXQgZnVsbHkgY2FwYWJlbCBvZiBwcm9jZXNzaW5nIGJpbGxpcnViaW4gZWZmYWN0aXZpbHkgdG8gPGJyIC8+DQogYmxvb2QgY2VsbCBicmFrZWRvd24gYW5kIHRoZSBsaXZlciBpbiBuZXcgYm9ybiBtYXkgbm90IGJlIGFiZWwgdG8gY29uanVjdGVkIGFuZCBleGNyZWF0ZSBpbiBlZmlpY2ludGVseSBhdCBmaXJzdC5UaW1pbmc7IHBoeXNpbG9naWNhbCBqdW5kaWNlIHR5cGljYWxseSBhcHBlYXJzIGFyb3VuZCB0aGUgMm5kIG9yIDNyZCBkYXkgb2YgdGhlIGxpZmUgYW5kIGNhbiB1bnRpbGwgdGhlIDd0biBvciAxMHRoIGRheSBsYXN0IGluIGZ1bGwgdGVybSBpbmZlbnQgZ3JhZHVhbGx5IGRpc2FwZWFyaW5nIGFzIHRoZSBsaXZlciBtYXR1cmVzIGFuZCB0aGUgYmlsbGlydWJpbiBpcyBjbGVhcmVkIHNvIGl0cyBkaXNhcHBlYXJzLlJlc29sdXRpb246cGh5c2lvbG9naWNhbCBqdW5kaWNlIHVzdWFsbHkgcmVzb2x2ZXMgb24gaXRzIG93biB3aXRob3V0IHRyZWF0bWVudCAsdGhlIGJpbGxpcnViaW4gbGV2ZWxzIHBlYWsgYXJvdW5kIHRoZSAzcmQtNHRoIGRheSBhbmQgc3RhcnQgdG8gZGVjbGluZSBhZnRlciB0aGF0ICxieSB0aGUgdGltZSB0aGUgaW5mZW50IHJlYWNocyAxMC0xNCBkYXlzICx0aGUganVuZGljIHNob3VsZCBkaXNhcHBlcnMuICA=</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21" table:style-name="ce1">
            <text:p>1067121</text:p>
          </table:table-cell>
          <table:table-cell office:value-type="string" table:style-name="ce1">
            <text:p>english</text:p>
          </table:table-cell>
          <table:table-cell office:value-type="string" table:style-name="ce1">
            <text:p>Ticket 18&amp;lt;br /&amp;gt; 1. What structural features of the organ of vision of a newborn baby do you know?&amp;lt;br /&amp;gt; 2. The child is 6 days old. During the examination, the doctor detected a yellowness of the skin. The child is not restless. Sleep is not disturbed. The appetite is good. No pathology was found in the internal organs. The abdomen is soft, not enlarged. The liver is not enlarged. The feces is light yellow. The urine is clear, light yellow. What is the reason for the change in skin color and why. On what day it should appear and then disappear?&amp;lt;br /&amp;gt;</text:p>
          </table:table-cell>
          <table:table-cell office:value-type="string" table:style-name="ce1">
            <text:p>MS5UaGUgc3RydWN0dXJhbCBmZWF0dXJlcyBvZiB0aGUgb3JnYW4gb2YgdmlzaW9uIGluIGEgbmV3Ym9ybiBiYWJ5IGFyZSBhcyBmb2xsb3cgLiBhPiBMYXJnZSBleWVzOiBUaGUgYmFieSBoYXMgbGFyZ2UgZXllcyByZWxhdGl2ZSB0byB0aGUgc2l6ZSBvZiB0aGUgaGVhZCwgYSBuZXdib3JuJ3MgZXllcyBhcmUgbGFyZ2VyIHRoYW4gdGhvc2Ugb2YgYWR1bHQuIGI+VW5kZXJkZXZlbG9wZWQgdGVhciBkdWN0czogdGVhciBkdWN0cyBtYXkgYmUgdW5kZXJkZXZlbG9wZWQgaW5pdGlhbGx5IGxlYWRpbmcgdG8gb2NjYXNpb2FsIHRlYXJpbmcgb3Igd2F0ZXJpbmcgb2YgdGhlIGV5ZXMuIGM+IEJsdXJyeSBWaXNpb246IE5ld2Jvcm5kIG9mdGVuIGhhdmUgYmx1cnJ5IHZpc2lvbiBhbmQgY2FuIHNlZSBiZXN0IGF0IGEgZGlzdGFuY2Ugb2YgYWJvdXQgOC0xMiBpbmNoZXMuIGQ+IEV5ZWxpZCBlZGVtYTogc29tZSBiYWJpZXMgaGF2ZSBtaWxkIHB1ZmZ5IGFwcGVhcmVhY2UgaW4gdGhlaXIgZXllIGxpZHMuIGU+IGxpbWl0ZWQgY29sb3IgdmlzaW9uOiBjb2xvciB2aXNpb24gaXMgbGltaXRlZCBpbml0aWFsbHkgd2l0aCBhIHByZWZlcmVuY2UgdG8gaGlnaCBjb250cmFzdCBwYXR0ZXJuIC4gdGhlc2UgZmVhdHVyZXMgZGV2ZWxvcHMgZ3JhZHVsbHkgZHVyaW5nIHRoZSBlYXJseSBtb250aHMgb2YgbGlmZSAgICAgICAgICAgICAgICAgICAgICAgICAgICAgICAgICAgICAgICAgICAgICAgICAgICAgICAgICAgICAgICAgICAgICAgICAgICAgICAgICAgICAgICAgICAgICAyLlRoZSB5ZWxsb3duZXNzIG9mIHRoZSBza2luIG9mIDYgeWVhciBvbGQgaW5mYW50IGlzIGxpa2VseSBkdWUgdG8gdGhlIHBoeXNpb2xvZ2ljYWwgamF1bmRpY2UuIFRoaXMgaXMgYSBjb21tb24gYW5kIHR5cGljYWwgaGFybWxlc3MgY29uZGl0aW9uIGNhdXNlZCBieSBhY3V1bXVsYXRpb24gb2YgYmlsbGlydWJpbiwgd2hpY2ggaXMgYSB5ZWxsb3cgcGlnbWVudCB3aGljaCBpcyBwcm9kdWNlZCBkdXJpbmcgdGhlIGJyZWFrZG93biBvZiByYmMgY2VsbHMuIFJlYXNvbiBmb3IgamF1bmRpY2UgaW4gbmV3Ym9ybjogcGh5c2lvbG9naWNhbCBqYXVuZGljZSBpcyBjb21tb24gYW5kIGl0IG9jY3VyIGJlY2F1c2UgdGhlIGxpdmVyIG9mIHRoZSBiYWJ5IGlzIG5vdCBmdWxseSBtYXR1cmVkIGFuZCBpdCBpcyBzdGlsbCBtYXR1cmluZyBkdWUgdG8gd2hpY2ggaXQgY2Fubm90IHByb2Nlc3MgYW5kIGVsbGltaW5hdGUgdGhlIGJpbGxpcnViaW4uIE5vcm1hbCBDb3Vyc2UgOiBwaHlzaW9sb2dpY2FsIGphdW5kaWNlIG9mdGVuIGFwcGVhciBvbiB0aGUgc2Vjb25kIG9yIHRoaXJkIGRheSBhZnRlciB0aGUgYmlydGguIHBlYWtzIGFyb3VuZCB0aGUgZm91cnRoIHRvIGZpZnRoIGRheSBhbmQgdGhlbiBncmFkdWFsbHkgcmVzb2x2ZXMuIENsZWFyaW5nIHRpbWUgOiBpbiBtb3N0IGNhc2UgdGhlIHBoeXNpb2xvZ2ljYWwgamF1bmRpY2UgcmVzb2x2ZXMgb24gaXRzIG93biB3aXRoaW4gdGhlIGZpcnN0IHR3byB3ZWVrIG9mIHRoZSBsaWZlIGFzIHRoZSBiYWJ5J3MgbGl2ZXIgZ2V0IG1hdHVyZWQgYW5kIGJlY29tZXMgZWZmZWN0aXZlIGF0IHByb2Nlc3NpbmcgYmlsaXJ1YmluLiBObyBvdGhlciBzaWducyBvZiBjb25jZXJuOiB0aGUgYWJzZW5zZSBvZiBvdGhlciBzeW1wdG9tcyBsaWtlIHJlc3RsZXNzbmVzcyBkaXN0dXJiZWQgc2xlZXAgb3Igb3JnYW4gcGF0aG9sb2d5IGluZGljYXRlZCB0aGF0IHRoaXMgamF1bmRpbmNlIGlzIGxpa2VseSBhIG5vcm1hbCBwYXJ0IG9mIG5ld2Jvcm4ncyBkZXZlbG9wbWVudA==</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the answer is incomplete, the text is short</text:p>
          </table:table-cell>
          <table:table-cell office:value-type="float" office:value="0" table:style-name="ce1">
            <text:p>0</text:p>
          </table:table-cell>
          <table:table-cell table:number-columns-repeated="16376"/>
        </table:table-row>
        <table:table-row table:style-name="ro1">
          <table:table-cell office:value-type="float" office:value="915199" table:style-name="ce1">
            <text:p>915199</text:p>
          </table:table-cell>
          <table:table-cell office:value-type="string" table:style-name="ce1">
            <text:p>kazakh</text:p>
          </table:table-cell>
          <table:table-cell office:value-type="string" table:style-name="ce1">
            <text:p>Билет 19.&amp;lt;br /&amp;gt; 1.Үрықтын есту анализаторлардын ерекшеліктерің атаңыз?&amp;lt;br /&amp;gt; 2. Педиатр жаңа туған бала қарады, анасынын шағымдары 2 күң бойы баларың несеп шығармауына, қарағанда патология анықталмаған, жалпы несеп анализынде патологиялық өзгерістер жоқ. Осы жастағы балада несеп болмау немен байланысты? Жана туған балада несеп шығару жиілігі қанша?&amp;lt;br /&amp;gt;</text:p>
          </table:table-cell>
          <table:table-cell office:value-type="string" table:style-name="ce1">
            <text:p>MS7SsNGA0YvSm9GC0YvSoyDQtdGB0YLRgyDQsNC90LDQu9C40LfQsNGC0L7RgNGLINC90LXQvNC10YHQtSDSm9Kx0LvQsNKb0YLRi9KjINCx0LDQu9Cw0LvQsNGA0LTQsNKT0Ysg0LXRgNC10LrRiNC10LvRltCz0ZbQvdC1INGC0L7Sm9GC0LDQu9Cw0YLRi9C9INCx0L7Qu9GB0LDQvCDQttCw0LvQv9GLIDMg0LHTqdC70ZbQutC60LUg0LHTqdC70ZbQvyDSm9Cw0YDQsNGB0YLRi9GA0LDQvNGL0Lc60YHRi9GA0YLSm9GLINKb0rHQu9Cw0psg0LbQsNC70L/RiyDQvtC90LTQsCDSm9Kx0LvQsNKb0YLRi9KjINGB0YvRgNGC0pvRiyDSm9Cw0LvSm9Cw0L3RiyDQvtGA0L3QsNC70LDRgdCw0LTRiywg0L7QuyDQsdCw0LvQsNC70LDRgNC00LAg0LXRgNC10LrRiNC10LvRltCz0ZYg0LrRltGI0ZbRgNC10Log0LHQvtC70YvQvyDQutC10LvQtdC00ZYu0L7QtNCw0L0g0LrQtdC50ZbQvdCz0ZYg0L7RgNGC0LDSo9KT0Ysg0LHTqdC70ZbQs9GWINCx0ZbQt9C00LUg0YLQuNC80L/QsNC90LjQutCw0LvRi9KbINC80LXQvNCx0YDQsNC90LAg0LbTmdC90LUg0YHSr9C50LXQuiDRgtKv0YDRltC90LTQtSDQtNCw0LzRi9C/INC60LXQu9C1INC20LDRgtKb0LDQvSDQutGW0YjQutC10L3QtSAzINKb0rHRgNGL0LvRi9C8OtCx0LDQu9KT0LDRiNGL0pss0YLTqdGBINC205nQvdC1INKv0LfQtdKj0LPRliDQvtGA0L3QsNC70LDRgdCw0LTRiy7QntC70LDRgNC00YvSoyDQsdCw0YHRgtGLINKb0YvQt9C80LXRgtGWINC00YvQsdGL0YHRgtGLINGW0YjQutGWINKb0rHQu9Cw0psg0LHTqdC70ZbQs9GW0L3QtNC1INC+0YDQvdCw0LvQsNGB0pvQsNC9INKx0LvRg9C70Ysg0LTQtdC90LXQs9C1INC20LXRgtC60ZbQt9GDINCx0L7Qu9GL0L8g0YLQsNCx0YvQu9Cw0LTRiy7QldC90LTRliDRltGI0LrRliDSm9Kx0LvQsNKbINCx06nQu9GW0LPRltC90LUg0YLQvtKb0YLQsNC70YHQsNC8INC+0Lsg0LHRltC30LTQtSDSsdC70YPQu9GLINC00LXQvdC1INC205nQvdC1INCy0LXRgdGC0LjQsdGD0LvRj9GA0LvRiyDQsNC/0LDRgNCw0YLRgtCw0L0g0YLSsdGA0LDQtNGLLtKw0LvRg9C70Ysg0LTQtdC90LUg0LTRi9Cx0YvRgdGC0Ysg0pvQsNCx0YvQu9C00LDQvyDQvtC90Ysg0LjQvNC/0YPQu9GBINGA0LXRgtGW0L3QtNC1INGC0q/RgNC70LXQvdC00ZbRgNGW0L8g0L3QtdC50YDQvtC90LTRi9KbINC20L7QuyDQsNGA0pvRi9C70Ysg0LbQvtKT0LDRgNKT0Ysg0LbSr9C50LrQtSDQttKv0LnQtdGB0ZbQvdC00LUg0LzQuNKT0LAg0LbQtdGC0LrRltC30ZbQvyDQvtKT0LDQvSDSm9Cw0YDRgdGLINGA0LXRhNC70LXQutGB0YLRltC6INKb0YvQt9C80LXRgtGC0LXRgNC00ZYg0ZbRgdC60LUg0pvQvtGB0LDQtNGLKNCx0LDRgdGL0L0g0LHSsdGA0YvQvyDQttCw0LvRgiDSm9Cw0YDQsNGDINGB0LXQutGW0LvQtNGWLNC00YvQsdGL0YHSm9CwINC00LXQs9C10L0g0YHQtdC30ZbQvNGC0LDQu9C00YvSmyks0LDQuyDQstC10YHRgtC40LHRg9C70Y/RgNC70Ysg0LDQv9Cw0YDQsNGC0YIg0LDQtNCw0LzQvdGL0qMg0YLQtdC/0LUt0YLQtdKj0LTRltC6INGB0LDSm9GC0LDRg9GL0L3QsCDQutOp0LzQtdC60YLQtdGB0LXRgtGW0L0g0pvSsdGA0YvQu9GL0Lwg0LHQvtC70YvQvyDRgtCw0LHRi9C70LDQtNGL0LMu0J3QtdC50YDQvtC90LTRiyDQttC+0LsgLSDQvtGB0Ysg0LDRhNGE0LXRgNC10L3RgtGC0ZYg0L3QtdC50YDQvtC90LTQsNGAINCw0YDSm9GL0LvRiyDRltGI0LrRliDSm9Kx0LvQsNKb0YLQsCDQuNC80L/Rg9C70YEg0YLSr9GA0ZbQvdC00LUg0YLSr9GA0LvQtdC90LTRltGA0ZbQu9Cz0LXQvSDQtNGL0LHRi9GBINC80LjSk9CwINC20LXRgtC60ZbQt9GW0LvQtdC00ZYu0YHQvtC7INCw0YDSm9GL0LvRiyDQvNC40pPQsCDQttC10YLQutGW0LfRltC70LXQtNGWLtCW0LDQu9C/0Ysg0L3TmdGA0LXRgdGC0LXQu9C10YDQtNC1INC10YHRgtGDINC80q/RiNC10YHRliDRgtC+0LvRi9KbINC00LDQvNGL0LzQsNC50LTRiyzRgdC+0L3QtNGL0pvRgtCw0L0g0LHQsNC70LDQu9Cw0YDQtNCwINKb0LDRgtGC0Ysg0LTRi9Cx0YvRgdGC0LDRgNKT0LAg0LTQtdCz0LXQvSDRgNC10YTQu9C10LrRgSDSm9Cw0L3QsCDQsdCw0LnSm9Cw0LvQsNC00Ysu0JDQuyDQvtC90YvSoyDRgtC+0LvRi9KbINC00LDQvNGL0L8g0LbQtdGC0ZbQu9GD0ZYg0LHQsNC70LDQu9Cw0YDQtNCwINGI0LDQvNCw0LzQtdC9IDMg0LDQuS0xINC20LDRgSDQsNGA0LDQu9GL0pPRi9C90LTQsCDRgtC+0LvRi9KbINC00LDQvNGL0L8g0LbQtdGC0ZbQu9C10LTRli7QntC00LDQvSDQutC10LnRltC9INCx0LDQu9Cw0L3Ri9KjINOp0YHRgyDQtNOZ0YDQtdC20LXRgdGW0L3QtSDRgdCw0Lkg0L7QuyDQtNCwINCx0ZbRgNCz0LUg06nRgdGW0L8s0LrQtdC50ZbQvSDQtdGA0LXRgdGC0LXQutGC0LXRgNC00ZbQutGW0L3QtNC10Lkg0LzTqdC70YjQtdGA0LPQtSDQttC10YLQtdGC0ZbQvSDQsdC+0LvRi9C/INGC0LDQsdGL0LvQsNC00YsuPGJyIC8+DQoyLtCW0LDQu9C/0Ysg0LHQsNC70LDQvdGLINKb0LDRgNCw0YMg0LHQsNGA0YvRgdGL0L3QtNCwINC+0L3Ri9KjIDIg0LrSr9C9INCx0L7QudGLINC90LXRgdC10L8g0YjRi9KT0LDRgNC80LDRg9GLLNCx0LDQu9Cw0LTQsCDQsdKv0LnRgNC10Log0pvRi9C30LzQtdGC0ZbQvdGW0qMg0L3QtdC80LXRgdC1INC90LXRgdC10L8g0YjRi9KT0LDRgNGDINC20L7Qu9GL0L3QtNCwINCx06nQs9C10YLRgtC10YDQtNGW0qMg0LHQvtC70YPRi9C90LDQvSDQvdC10YHQtdC/0YLRltKjINCx06nQu9GW0L3QsdC10YPRliDQvNKv0LzQutGW0L0u0JbQsNC70L/RiyDQttCw0qPQsCDRgtGD0pPQsNC9INC905nRgNC10YHRgtC10LvQtdGA0LTQtSDQt9OZ0YDQtNGW0qMg0LHTqdC70ZbQvdGD0ZYg0LbQuNGWINCx0L7Qu9Cw0LTRiyjRiNCw0LzQsNC80LXQvSAyNSkg0YDQtdGCLDQtNiDQsNC50LTQsNC9INCx0LDRgdGC0LDQvygxMC0xNSnRgNC10YIg0L7QtNCw0L0g0LrQtdC50ZbQvSDQsdGW0YDRgtGW0L3QtNC10L8g0LDQt9Cw0Y8g0LHQsNGB0YLQsNC50LTRiyDQtNCwIDYtOSDQttCw0YEg0YjQsNC80LDRgdGL0L3QtNCwINC10YDQtdGB0LXQutGC0LXRgNCz0LUg0rHSm9GB0LDRgSDQsdC+0LvQsNC00YsuLNC+0L3Ri9KjINGB0LXQsdC10LHRliDQtdKjINCw0LvSk9Cw0YjRi9C90LTQsCDQsdCw0LvQsNC70LDRgNC00YvSoyDQvtGB0Ysg0YHRi9GA0YLSm9GLINC+0YDRgtCw0pPQsCDQsdC10LnRltC80LTQtdC70YPRliDQsdCw0YDRi9GB0YvQvdC00LAg0pvQsNC70YvQv9GC0Ysg0YTQuNC30LjQvtC70L7Qs9C40Y/Qu9GL0psg0YHQsNC70LzQsNKbINC20L7Sk9Cw0LvRgtGDINC/0YDQvtGG0LXRgdGWINC20q/RgNC10LTRlizRj9C60Lgg0rHRgNGL0pvRgtCwINCw0L3QsNGB0YvQvdCw0L0g0LDQu9KT0LDQvSDQsNGA0YLRi9KbINC30LDRgtGC0LDRgNC00Ysg0YHRgyDQsNGA0pvRi9C70Ysg0LHQvtGB0LDRgtGL0L8g0YLQsNGB0YLQsNGDLNC+0Lsg0LHQsNC70LDQvdGL0qMg0YLRg9GL0LvSk9Cw0L3Ri9C90LDQvSDQutC10LnRltC9IDMg0LrSr9C9INCw0YDQsNGB0YvQvdC00LAg0LbSr9GA0LXQtNGWLtCe0LTQsNC9INCx06nQu9C10Log0JfTmdGAINGI0YvSk9Cw0YDRgyDQttKv0LnQtdGB0ZbQvdGW0qMg0YLQvtC70YvSmyDQtNCw0LzRi9C80LDRg9GLINCx0q/QudGA0LXQuiDRgtKv0YLRltC60YjQtdC70LXRgNGW0L3RltKjINKb0YvRgdKb0LAg0LHQvtC70YPRiyDRgdC10LrRltC70LTRliDRgdC10LHQtdC/0YLQtdGA0LzQtdC9INC905nRgNC10YHRgtC10LvQtdGA0LTQtSDQttC40ZYg0LfTmdGAINCx06nQu9GW0L3RgyDQsdCw0LnSm9Cw0LvQsNC00Ysu0JDQuyDQsdGW0LfQtNGW0qMg0LbQsNKT0LTQsNC50LTQsCDQvdC10YHQtdC/0YLRltKjIDIgINC60q/QvSDQsdC+0LnRiyDRiNGL0pvQv9Cw0YPRiyDQsdGW0LfQtNC1INC90LXRgdC10L8g0YjRi9KT0LDRgNGDINC20q/QudC10YHRltC90LTQtSDQsdKx0LfRi9C70YvRgtGL0qMg0LHQsNGA0YvQvdCwINC60q/QtNGW0Log0YLRg9KT0YvQt9Cw0LTRiy7QltOZ0L0g0LXQvtC00LDQvSDQsdOp0LvQtdC6INCx0LDQu9Cw0L3RiyDQtNKx0YDRi9GBINGC0LDQvNCw0pvRgtCw0L3QtNGL0YDRgyDRgtOZ0YDRgtGW0LHRltC9INCw0L3QsNGB0YvQvdCw0L0g0YHSsdGA0LDRgdGC0YvRgNGDINKb0LDQvdGI0LDQu9GL0pvRgtGLINCx0LDQu9Cw0pPQsCDQttC40ZYg0YHSsdC50YvSm9GC0YvSmyDQsdC10YDQtdGC0ZbQvdGW0L0g0LHRltC70YMg0LrQtdGA0LXQuiDRgdC90LXQsdC10LHRliDQsdCw0LvQsNC00LDSk9GLINC305nRgNC005nRliDSsdC30LDSmyDQsdOp0LvRltC90LHQtdGD0ZbQvdGW0qMg0LHRltGA0LTQtdC9LdCx0ZbRgCDRgdC10LHQtdCx0ZYg0LDSk9C30LDQtNCwINGB0YPRgdGL0LfQtNCw0L3RgyjQv9C+0LvQuNC00LjQv9GB0LjRjykg0LHQsNC50pvQsNC70YMg0L3TmdGC0LjQttC10YHRltC90LTQtSDQvdC10YHQtdC/0YLRltKjIDIg0LrSr9C9INCx0L7QudGLINGI0YvSm9C/0LDRg9GLINCx0LDQudKb0LDQu9Cw0LTRiy7SmtC+0YDRi9GC0YvQvdC00YvQu9Cw0Lkg0LrQtdC70LUg0LbQsNC70L/RiyDQsdCw0LvQsNKT0LAg0LbQuNGWINGB0rHQudGL0pvRgtGL0psg0LHQtdGA0YMg0pvQsNC20LXRgizQvtGB0Ysg0LbQsNKT0LTQsNC50LTQsCDQsdCw0YHRgtGLINGB0LXQsdC10L/RgtGW0qMg0LHRltGA0ZYg0L7RgdGLINGB0L7QvdGL0qMg0L3TmdGC0LjQttC10YHRltC90LTQtSDQt9OZ0YDQtNGW0qMg0LHTqdC70ZbQvdCx0LXRg9GWINCx0LDQudKb0LDQu9Cw0LTRiy4=</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жауаптар толық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915283" table:style-name="ce1">
            <text:p>915283</text:p>
          </table:table-cell>
          <table:table-cell office:value-type="string" table:style-name="ce1">
            <text:p>kazakh</text:p>
          </table:table-cell>
          <table:table-cell office:value-type="string" table:style-name="ce1">
            <text:p>Билет 19.&amp;lt;br /&amp;gt; 1.Үрықтын есту анализаторлардын ерекшеліктерің атаңыз?&amp;lt;br /&amp;gt; 2. Педиатр жаңа туған бала қарады, анасынын шағымдары 2 күң бойы баларың несеп шығармауына, қарағанда патология анықталмаған, жалпы несеп анализынде патологиялық өзгерістер жоқ. Осы жастағы балада несеп болмау немен байланысты? Жана туған балада несеп шығару жиілігі қанша?&amp;lt;br /&amp;gt;</text:p>
          </table:table-cell>
          <table:table-cell office:value-type="string" table:style-name="ce1">
            <text:p>0JHQhtCg0IbQndCo0IYg0YHSsdGA0LDSm9Kb0LAg0LbQsNGD0LDQvywg0LHRltGA0ZbQvdGI0ZbQtNC10L0g0LbQsNKj0LAg0YLRg9KT0LDQvSDQvdOZ0YDQtdGB0YLQtdC90ZbSoyDQsdGW0Lcg0LHRltC70LXRgtGW0L3RltC80ZbQt9C00LXQuSDQtdGB0YLRgyDQsNC90LDQu9C40LfQsNGC0L7RgNGLINGC0L7Qu9GL0psg0LTQsNC80YvQvNCw0pPQsNC9INCx0L7Qu9GL0L8g0LrQtdC70LXQtNGWLCDRj9KT0L3QuCDQvtC90YvSoyDSm9Kx0YDRi9C70YvQvNGLINC205nQvdC1INGE0YPQvdC60YbQuNGP0LvQsNGA0Ysg0LHQsNC70LDQvdGL0qMg0LDQu9KT0LDRiNKb0Ysg0LDQudC70LDRgNGLINC00LDQvNC40YLRi9C9INCx0L7Qu9Cw0LTRiy4g0JXQutGW0L3RiNGW0LTQtdC9LCDSm9Kx0YDRi9C70YvQvNGLINC80LXQvSDQtdGA0LXQutGI0LXQu9GW0LrRgtC10YDRltC90LUg0YLQvtKb0YLQsNC70LAg0LrQtdC70YHQtdC6LCDQtdKjINCw0LvQtNGL0LzQtdC9INGB0YvRgNGC0pvRiyDSm9Kx0LvQsNKbOiDQttCw0qPQsCDRgtGD0pPQsNC9INC905nRgNC10YHRgtC10L3RltKjINGB0YvRgNGC0pvRiyDSm9Kx0LvQsNKT0YsgKNGP0pPQvdC4INKb0rHQu9Cw0psg0pvQsNC70pvQsNC90YspINGC0L7Qu9GL0psg0LbQtdGC0ZbQu9C80LXQudGC0ZbQvSDQsdC+0LvQsNC00Ysg0LbTmdC90LUg0LbSsdC80YHQsNKb0YLQsNGDINC60LXQu9C10LTRliDQttOZ0L3QtSDQvtC90YvSoyDRiNC10LzRltGA0YjQtdC6INGC0ZbQvdGWINGC0L7Qu9GL0psg0LbQtdGC0ZbQu9C80LXQs9C10L0uINKa0LDQu9GL0L/RgtGLINC20LDSk9C00LDQudC00LAg0pvSsdC70LDSmyDSm9Cw0LvSm9Cw0L3Ri9KjINC/0ZbRiNGW0L3RliDRgtC+0LvRi9KT0YvQvNC10L0g0LXRgNC10YHQtdC60YLQtdGA0LPQtSDSsdKb0YHQsNGBINC60LXQu9C10LTRliwg0LrQtdC50LTQtSDQvtC90YvSoyDSm9Kx0YDRi9C70YvQvNGLINOp0LfQs9C10YjQtSDQutC10LvRg9GWINC00LUg0LzSr9C80LrRltC9LiDSmtKx0LvQsNKb0YLRi9C9INKb0rHRgNGL0LvRi9GB0Ysg0LHQsNC70LDQvdGL0qMg0LTRi9Cx0YvRgdGC0LDRgNC00Ysg0pvQsNCx0YvQu9C00LDRg9KT0LAg0LzSr9C80LrRltC90LTRltC6INCx0LXRgNC10YLRltC90ZbQvSDQsdGW0LvQtdC80ZbQty4g0JXQvdC00ZYg0pvSsdC70LDSmyDRgtKv0YLRltCz0ZbQvdC1ICjQtdGB0YLRgyDQttC+0LvRiyDQtNC10YHQtdC6KSDQutC10LvRgdC10Lo6INC905nRgNC10YHRgtC1INGC0YPQsCDRgdCw0LvRi9C/INC+0Lsg0pvRi9GB0pvQsNGI0LAg0LHQvtC70YvQvyDQutC10LvQtdC00ZYsINOZ0YDRliDRgtCw0YDQu9Cw0YMuINCR0rHQvdC00LDQuSDSm9Kx0YDRi9C70YvRgSDQtNGL0LHRi9GB0YLQsNGA0LTRiyDQtNKx0YDRi9GBINKb0LDQsdGL0LvQtNCw0YPSk9CwINC80q/QvNC60ZbQvdC00ZbQuiDQsdC10YDQtdGC0ZbQvSDQsdC+0LvQsNC00YsuINCR0ZbRgNCw0pvRgtCwINOZ0YDQuNC90LUg0LjQvdGE0LXQutGG0LjRjyDQv9Cw0LnQtNCwINCx0L7Qu9GD0YvQvdCwINCx0LjRltC8INC60LXQu9C10LTRli4g0JrQtdC70LXRgdGWINC+0YDRgtCw0qPSk9GLINKb0rHQu9Cw0ps6INC20LDQu9C/0Ysg0L3TmdGA0LXRgdGC0LXQu9C10YDQtNC1INGC0YPSk9Cw0L0g0LrQtdC30LTQtSDQsdCw0YDQsNCx0LDQvSDSm9GD0YvRgdGLINGB0rHQudGL0pvRgtGL0pvSm9CwINGC0L7Qu9GLINCx0L7Qu9GL0L8g0LrQtdC70LXQtNGWINC205nQvdC1INC+0Lsg06nQtyDQutC10LfQtdCz0ZbQvdC00LUg0LTRi9Cx0YvRgdGC0YvSoyDTqdGC0LrRltC30LPRltGI0YLRltCz0ZbQvSDRgtOp0LzQtdC90LTQtdGC0LXRgtGW0L0g0LHQvtC70LDQtNGLLiDQodC+0L3Ri9C80LXQvSDSm9Cw0YLQsNGAINC+0YHRiyDRgdKx0LnRi9Kb0YLRi9Kb0YLRi9KjINGC0L7Qu9GL0pPRi9C80LXQvSDRgdC+0YDRi9C70YPRiyDQsNC70pPQsNGI0pvRiyDQsNC50LvQsNGA0LTQsCDQttKv0YDQtdGC0ZbQvSDQsdC+0LvQsNC00YsuINCW0LDQu9C/0Ysg0LHQsNGA0LDQsdCw0L3QtNGLINC20LDRgNKT0LDSk9GLINC10YDQtdGB0LXQutGC0LXRgNCz0LUg0pvQsNGA0LDSk9Cw0L3QtNCwINKb0LDQu9GL0qPQtNCw0YMg0LrQtdC70LXQtNGWINC205nQvdC1INCz0L7RgNC40LfQvtC90YLQsNC70YzQtNGWINGC0rHRgNGL0L8sINGB0YvRgNGC0pvRiyDSm9Kx0LvQsNKb0pvQsCDSsdC70LDRgdCw0YLRi9C9INCx0L7Qu9Cw0LTRiy4g0JXRgdGC0YMg0YHSr9C50LXQutGI0LXQu9C10YDRltC90LUg0YLQvtKb0YLQsNC70LDQvNGL0LcgKNC+0LvQsNGA0pPQsDog0LHQsNC70pPQsNGI0YvSmywg0YLTqdGB0YLRltC6INC205nQvdC1INKv0LfQtdKj0LPRlikg0LXQvdC00ZYsINCx0LDQu9Cw0LvQsNGA0LTQsCDQttCw0LvQv9GLINC+0LvQsNGAINKb0L7Qt9KT0LDQu9C80LDQu9GLINC60LXQu9C10LTRliwg0Y/Sk9C90Lgg0YHSr9C50LXQutGC0LXRgNC00ZbSoyDQsdCw0LnQu9Cw0L3Ri9GB0YLQsNGA0Ysg05nQu9GB0ZbQtyDQttOZ0L3QtSDQtNGL0LHRi9GBINOp0YLQutGW0LfRgyDSm9Cw0LHRltC70LXRgtGWINGC06nQvNC10L0uINCa0LXQu9C10YHRliDSm9Kx0YDRi9C70YvQvCDQvtC7INC10LLRgdGC0LDRhdC40Lkg0YLSr9GC0ZbQs9GWOiDQvtC7INC905nRgNC10YHRgtC10LTQtSDSm9GL0YHSm9CwLCDQutC10qPQtNC10YMsINCz0L7RgNC40LfQvtC90YLQsNC70YzQtNGWINCx0L7Qu9Cw0LTRiy4g0KHQvtC70LDQuSDQvtC90LTQsCDQuNC90YTQtdC60YbQuNGPINC20LjRliDQtdC90ZbQvywg0LDRgtC40YLRgtGWINC00LDQvNGL0YLRg9GLINC80q/QvNC60ZbQvS4g0JXQstGB0YLQsNGF0LjQuSDRgtKv0YLRltCz0ZbQvdGW0qMg0LDRg9CwINOp0YLQutGW0LfQtNGW0LPRltGI0YLRltCz0ZYg0L3QsNGI0LDRgCDQsdC+0LvSk9Cw0L3QtNGL0pvRgtCw0L0sINC+0YDRgtCw0qPSk9GLINKb0rHQu9Cw0pvRgtGL0qMg0pvRi9GB0YvQvNGLINOp0LfQs9C10YDQvNC10LvRliDQsdC+0LvQsNGC0YvQvdGL0qMg0LHRltC70LXQvNGW0LcuINKa0rHQu9Cw0psg0pvQsNC70pvQsNC90YvQvdGL0qMg0YHQtdC30ZbQvNGC0LDQu9C00YvSk9GL0L3QsCDRgtC+0pvRgtCw0LvQsCDQutC10YLRgdC10Lo6INCx0LDQu9Cw0LvQsNGAINGC0YPRi9C70LAg0YHQsNC70YvQvyDQsNC70pPQsNGIINC00YvQsdGL0YEg05nRgdC10YDRltC9INGB0LXQt9GW0L3QtdGC0ZbQvSDQsdC+0LvQsNC00YssINCw0LvQsNC50LTQsCDQtNGL0LHRi9GB0YLQsNGA0LTRiyDQsNC20YvRgNCw0YLQsCDQsNC70LDQu9C80LDQudC00YsuINCe0LvQsNGAINC+0YHRiyDRg9Cw0pvRi9GC0YLQsCDRgtC10Log0pvQsNC90LAg0YjRgyDQvNC10L0g0pvQsNGC0YLRiyDQtNGL0LHRi9GB0YLQsNGA0LTRiyDQtdGB0YLRg9GWINC80q/QvNC60ZbQvS4g0JXQvdC00ZYg0LbQsNC70L/RiyDSm9Kx0LvQsNKb0YLRi9KjINGW0YjQutGWINKb0rHRgNGL0LvRi9GB0YvQvdCwINC60LXQu9GB0LXQujog0LrQsNCy0LXRgNC90LDQu9C00Ysg0LvQsNCx0LjRgNC40L3RgtGWINC00LXRgdC10LrRgtC1INCx0L7Qu9Cw0LTRiy4g0J7QvdGL0qMg0LTQsNC80YPRiyAzLTUg0LDQudKT0LAg0LbQtdGC0LrQtdC9INC60LXQt9GW0L3QtNC1INGC0L7Qu9GL0psg0LbQtdGC0ZbQu9C10YLRltC9INCx0L7Qu9Cw0LTRiy4g0JbQsNKj0LAg0YLRg9KT0LDQvSDQvdOZ0YDQtdGB0YLQtdC90ZbSoyDRltGI0LrRliDSm9Kx0LvQsNKT0YvQvdGL0qMg0LXRgNC10LrRiNC10LvRltC60YLQtdGA0ZbQvSDQsNC50YLQsNGC0YvQvSDQsdC+0LvRgdCw0pssINGW0YjQutGWINKb0rHQu9Cw0pvRgtGL0qMg0YDQtdGG0LXQv9GC0L7RgNC70LDRgNGLICjQutC+0YDRgtC40LXQsiDQvNKv0YjQtdGB0ZYpINOp0YLQtSDRgdC10LfRltC80YLQsNC7INC60LXQu9C10LTRliwg0LDQu9Cw0LnQtNCwINC00YvQsdGL0YHRgtGL0qMg0LbQuNGW0LvRltCz0ZbQvSDRgtC+0LvRi9KbINKb0LDQsdGL0LvQtNCw0YPRi9C90LAg0YPQsNKb0YvRgiDQutC10YDQtdC6INCx0L7Qu9Cw0LTRiy4g0JbQsNC70L/RiyDQtdGB0YLRgyDQttKv0LnQtdGB0ZbQvdGW0qMg0LTQsNC80YPRiywg0LHQsNC70LDQu9Cw0YDQtNCwINGI0YMg0LzQtdC9INKb0LDRgtGC0Ysg0LTRi9Cx0YvRgdGC0LDRgNC00Ysg0LDQttGL0YDQsNGC0LDQtNGLINC00LXQvyDQsNC50YLSm9Cw0L0g0LHRi9C3INCw0LvQsNC50LTQsCDQvtC7INCx0LDQu9Cw0LvQsNGA0LTQsCDRgtC10Log0YDQtdGE0LvQtdC60YLQvtGA0LTRiyDQttKv0YDRg9GW0LTQtSDQvNKv0LzQutGW0L0uINCh0L7QuyDQtNCw0YPRi9GB0YLQsNGAINC90LXQvNC10YHQtSDQtNGL0LHRi9GB0YLQsNGA0LTRiyDQtdGB0YLRltCz0LXQvSDQutC10LfQtNC1INCx0LDQu9CwINC606nQt9GW0L0g0LbSsdC80YvQvywg0LHQsNGB0YvQvSDQsdKx0YDRgyDQtNC10LPQtdC9INOZ0YDQtdC60LXRgtGC0LXRgCDQttCw0YHQsNC50LTRiy4g0JTRi9Cx0YvRgdGC0LDRgNC00Ysg0YLQvtC70YvSk9GL0LzQtdC9INKb0LDQsdGL0LvQtNCw0YPRiyAyINCw0LnQu9GL0psg0LHQvtC70pPQsNC9INC60LXQt9C00LUg0LHQsNGB0YLQsNC50LTRiy4g0prQvtGA0YLRi9C90LTRi9C70LDQuSwg0LHQsNC70LDQvdGL0qMg0LXRgdGC0YMg0LDQvdCw0LvQuNC30LDRgtC+0YDQu9Cw0YDRi9C90YvSoyDSm9Kx0YDRi9C70YvRgdGLINC10YDQtdGB0LXQutGC0LXRgNC80LXQvSDQsdGW0YDQtNC10Lkg0LHQvtC70pPQsNC90YvQvNC10L0g06nQt9GW0L3QtNGW0Log0LXRgNC10LrRiNC10LvRltC60YLQtdGA0ZYg0LHQvtC70LDQtNGLLCDRg9Cw0pvRi9GCINOp0YLQtSDQutC10LvQtSDRgtC+0LvRi9KbINC20LXRgtGW0LvRg9GW0L3QtSDQsNC70YvQvyDQutC10LvQtdC00ZYuINCV0JrQhtCd0KjQhiDRgdKx0YDQsNKb0pvQsCDQttCw0YPQsNC/LCDQsdGW0YDRltC90YjRltC00LXQvSDQttCw0qPQsCDRgtGD0YvQu9KT0LDQvSDQsdCw0LvQsNC90YvSoyDQvdC10LzQtdGB0LUg0L3TmdGA0LXRgdGC0LXQvdGW0qMgMiDQutKv0L0g0LHQvtC50Ysg0L3QtdGB0LXQvyDRiNGL0pPQsNGA0LzQsNGD0Ysg0LHRltGAINKb0LDRgNCw0pPQsNC9INC60LXQt9C00LUg0LDQu9Cw0L3QtNCw0YLRg9GLINC80q/QvNC60ZbQvSwg0LHRltGA0LDSm9GC0LAg0LHSsdC7INCx0LDQu9Cw0LvQsNGA0LTQsCDRgtC10Log0pvQsNC90LAg0LDQvdCw0YLQvtC80L4t0YTQuNC30LjQvtC70L7Qs9C40Y/Qu9GL0psg0LXRgNC10LrRiNC10LvRliDQsdC+0LvRi9C/INGC0LDQsdGL0LvQsNC00YsuINCe0L3RiyDQt9OZ0YAg0LDQvdCw0LvQuNC30LTQtdGA0ZYg0LTQtSDQsNC50YLRi9C/INGC0rHRgC4g0JXQutGW0L3RiNGW0LTQtdC9LCDQsdCw0LvQsCDQsNC70pPQsNGI0pvRiyAzINC60q/QvSDRltGI0ZbQvdC00LUg0LfTmdGAINGI0YvSk9Cw0YDRg9GLINCw0LcgKNGC0YDQsNC90LfQuNGC0L7RgNC70Ysg0L7Qu9C40LPRg9GA0LjRjykg0L3QtdC80LXRgdC1INC80q/Qu9C00LXQvCDQttC+0psg0LHQvtC70LDQtNGLLiDQndC10YHQtdC/0YLRltKjINGI0YvSk9Cw0YDRgyDQttC40ZbQu9GW0LPRliDQsdCw0LvQsNC00LAg05nQtNC10YLRgtC1INC60q/QvdGW0L3QtSDRiNCw0LzQsNC80LXQvSA2LTgg0YDQtdGCLCDQsdKx0Lsg0LbQsNKT0LTQsNC50LTQsCDQvtGB0YsgMiDQutKv0L0g0LHQvtC50Ysg0L3QtdGB0LXQvyDRiNGL0pPQsNGA0LzQsNGD0Ysg0LDQvdCw0YHRi9C90LTQsCDQsNC70LDQvdC00LDRg9GI0Ysg0YHQtdC30ZbQvCDRgtGD0pPRi9C30YPRiyDRgtKv0YHRltC90ZbQutGC0ZYg0LHQvtC70LTRiy4g0JXQvdC00ZYg0L7QvdGL0qMg0pvQsNC70YvQv9GC0Ysg0L/RgNC+0YbQtdGB0YEg0LXQutC10L3RltKjINGC0q/RgdGW0L3QtNGW0YDRgyDSr9GI0ZbQvSDRgdC10LHQtdC/0YLQtdGA0LTRliDQsNC50YLQsNC80YvQtzog0LHRltGA0ZbQvdGI0ZbQtNC10L0g0L7QuyDRgtCw0LzQsNKb0YLQsNC90YMg0LzRltGB0LXQu9C10YHRliwg0LXQs9C10YDQtNC1INC905nRgNC10YHRgtC10L3RliDQsNC90LDRgdGLINC20LXRgtC60ZbQu9GW0LrRgdGW0Lcg0YLSr9GA0LTQtSDQtdC80ZbQt9Cx0LXQudGC0ZbQvSAo0LDQvdCwINGB0q/RgtGWINCw0Lcg0LHQvtC70YHQsCkg0LHQvtC70YHQsCDRgtGD0YvQvdC00LDQudC00YssINGP0pPQvdC4INCx0LDQu9CwINC20LXRgtC60ZbQu9GW0LrRgtGWINGC0q/RgNC00LUg0YHSsdC50YvSm9GC0YvSmyDQsNC70YvQvyDQttCw0YLSm9Cw0L0g0LbQvtKbLiDQodC+0L3QtNGL0pvRgtCw0L0g0L7QvdGL0qMg0L3QtdGB0LXQvyDRiNGL0pPQsNGA0YMg0LzTqdC70YjQtdGA0ZYg0LDQt9Cw0Y/RgtGL0L0g0LHQvtC70LDQtNGLLiDQldC60ZbQvdGI0ZbQtNC10L0sINCx0LDRg9GL0YAg0LbTmdC90LUg0LTQtSDQsdKv0LnRgNC10LrRgtGW0qMg0YTRg9C90LrRhtC40Y/RgdGL0L3Ri9KjINOZ0LvRltC00LUg0YLQvtC70YvSmyDQttC10YLRltC70LzQtdGD0ZbQvdC10L0uINCR0YvQu9Cw0LnRiNCwINCw0LnRgtKb0LDQvdC00LAg0LHQsNC70LDQvdGL0qMg0LfTmdGAINGI0YvSk9Cw0YDRgyDQttKv0LnQtdGB0ZYg0YLQvtC70YvSmyDQttC10YLRltC70LzQtdCz0LXQvS4g0JHSsdC7INGI0LDQvNCw0LzQtdC9IDEtMiDQsNC/0YLQsNC00LAg0LTQsNC80YvQvyDQttC10YLQtdC00ZYuINKu0YjRltC90YjRltC00LXQvSwg0L7QuyDQtNC10LPQuNC00YDQsNGC0LDRhtC40Y8g05nRgdC10YDRltC90LXQvSDRgtGD0YvQvdC00LDRg9GLINC80q/QvNC60ZbQvS4g0J3TmdGA0LXRgdGC0LUg0LHQsNC70LDQvdGL0qMg0YHSsdC50YvSm9GC0YvSmyDQttC10YLRltGB0L/QtdGD0YjRltC70ZbQs9GWLCDQvdC10YHQtdC/0YLRltKjINCw0Lcg0LHQvtC70ZbQvdGD0ZbQvdC1INGB0LXQsdC10L8uINCe0Lsg0pvQsNC90LTQsNC5INGB0LXQsdC10L/RgtC10YDQtNC10L0g0LHQvtC70LDQtNGLOiDRgdKx0LnRi9Kb0YLRi9Kb0YLRi9KjINC20LXRgtC60ZbQu9GW0LrRgtGWINC806nQu9GI0LXRgNC00LUg0pvQsNCx0YvQu9C00LDQvNCw0YPRiyDQvdC10LzQtdGB0LUg0LTQtdC90LUg0YLQtdC80L/QtdGA0LDRgtGD0YDQsNGB0YvQvSDQttC+0pPQsNC70YPRiyDQtNCwINGB0LXQsdC10L8uINCi06nRgNGC0ZbQvdGI0ZbQtNC10L0sINKb0LDQu9Kb0LDQvdGI0LAg0LHQtdC30ZbQvdGW0qMg05nRgdC10YDRliwg0Y/Sk9C90Lgg0LTQuNGB0YTRg9C60YbQuNGP0YHRiyDQvdC10LzQtdGB0LUg0LPQuNC/0L7RgtC40YDQtdC+0LcuINCe0Lsg06nQtyDQutC10LfQtdCz0ZbQvdC00LUg0LHQsNC70LDQtNCwINC90LXRgdC10L8g0YjRi9KT0LDRgNGD0YvQvdGL0qMg0LDQt9Cw0Y7Ri9C90LAg0LDQu9GL0L8g0LrQtdC70LXQtNGWLiDQkdC10YHRltC90YjRltC00LXQvSwg0pvQsNGD0ZbQvyDRhNCw0LrRgtC+0YDQu9Cw0YDRiyDQsdCw0YA6INCx0rHQuyDQttCw0pPQtNCw0LnQtNCwINCx0q/QudGA0LXQuiDQvdC10LzQtdGB0LUg0LfTmdGAINGI0YvSk9Cw0YDRgyDQttC+0LvQtNCw0YDRi9C90YvSoyDRgtGD0LAg0LHRltGC0LrQtdC9INCw0pvQsNGD0LvQsNGA0YvQvdGL0qMg0L3TmdGC0LjQttC10YHRltC90LTQtSDQsdC+0LvRg9GLINC80q/QvNC60ZbQvS4g0KHQvtC90LTRi9Kb0YLQsNC9LCDQvtGB0YvQvdC00LDQuSDQttCw0pPQtNCw0Lkg0LrQtdC30ZbQvdC00LUg0LzQtdC00LjRhtC40L3QsNC70YvSmyDQutOp0LzQtdC60LrQtSDQttKx0pPRi9C90YPRiyDSm9Cw0LbQtdGCINCx0L7Qu9Cw0LTRiy4g0prQvtGA0YLRi9C90LTRi9C70LDQuSDQutC10LvQtSwg0LHQsNC70YvQvdGL0qMgMiDQutKv0L0g0LHQvtC50Ysg0LfTmdGAINGI0YvSk9Cw0YDQvNCw0YPRiyDQsdKx0Lsg0pvQsNC70YvQv9GC0Ysg0L/RgNC+0YbQtdGB0YEg0LXQutC10L3RltC9INCw0LnRgtCw0LzRi9C3L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1-ші сұрақта Үрықтын есту анализаторлардын ерекшеліктерің сұрап тұр, сіз жаңа туған нәрестенің есту мүшесінің ерекшеліктерің жазыпсыз. 2-ші сұрақтың жауабында Несептің шығару жиілігі балада әдетте күніне шамамен 6-8 рет,қате кеткен. Нәрестелер күніне 20-25 рет кіші дәретке отырады</text:p>
          </table:table-cell>
          <table:table-cell office:value-type="float" office:value="0" table:style-name="ce1">
            <text:p>0</text:p>
          </table:table-cell>
          <table:table-cell table:number-columns-repeated="16376"/>
        </table:table-row>
        <table:table-row table:style-name="ro1">
          <table:table-cell office:value-type="float" office:value="915339" table:style-name="ce1">
            <text:p>915339</text:p>
          </table:table-cell>
          <table:table-cell office:value-type="string" table:style-name="ce1">
            <text:p>kazakh</text:p>
          </table:table-cell>
          <table:table-cell office:value-type="string" table:style-name="ce1">
            <text:p>Билет 19.&amp;lt;br /&amp;gt; 1.Үрықтын есту анализаторлардын ерекшеліктерің атаңыз?&amp;lt;br /&amp;gt; 2. Педиатр жаңа туған бала қарады, анасынын шағымдары 2 күң бойы баларың несеп шығармауына, қарағанда патология анықталмаған, жалпы несеп анализынде патологиялық өзгерістер жоқ. Осы жастағы балада несеп болмау немен байланысты? Жана туған балада несеп шығару жиілігі қанша?&amp;lt;br /&amp;gt;</text:p>
          </table:table-cell>
          <table:table-cell office:value-type="string" table:style-name="ce1">
            <text:p>0rDRgNGL0pvRgtCwINC10YHRgtGDINCw0L3QsNC70LjQt9Cw0YLQvtGA0LvQsNGA0YvQvdGL0qMg0LTQsNC80YPRiyDSm9Kx0YDRgdCw0pvRltGI0ZbQu9GW0Log0LTQsNC80YPQtNGL0qMgNC3RiNGWINCw0L/RgtCw0YHRi9C90LDQvSDQsdCw0YHRgtCw0L8g0LTQsNC80LjRgtGL0L0g0LHQvtC70YvQvyDQutC10LvQtdC00ZYu0rDRgNGL0pvRgtGL0qMg0LXRgdGC0YMg0LDQvdCw0LvQuNC30LDRgtC+0YDQu9Cw0YDRi9C90YvSoyDQtdGA0LXQutGI0LXQu9C10YDRltC60YLQtdGA0ZbQvdC1INGC0L7Qu9GL0pPRi9GA0LDSmyDRgtC+0pvRgtCw0LvQsNGAINCx0L7Qu9GB0LDQvCzQvtC70LDRgNC00YvSoyDSm9Kx0LvQsNKT0Ysg0YHRi9GA0YLSm9GLINC205nQvdC1INC+0YDRgtCw0qPSk9GLINC4INGW0YjQutGWINKb0rHQu9Cw0pvRgtCw0L0g0YLSsdGA0LDQtNGLLtCh0YvRgNGC0pvRiyDSm9Kx0LvQsNKb0YLRi9KjINC10YDQtdC60YjQtdC70ZbQutGC0LXRgNGW0L3QtSDQutC10LvQtdGAINCx0L7Qu9GB0LDQvCzQtdKjINCx0ZbRgNGW0L3RiNGWINKb0rHQu9Cw0psg0pvQsNC70pvQsNC90Ysg0L7QuyDRjdC80LHRgNC40L7QvdC00YvSmyDQtNCw0LzRg9C00YvSoyA1LTbQsNC/0YLQsNGB0YvQvdC00LAg0YLQsNKbINC205nQvdC1INC20rHQvyDQsdC+0LvRi9C/INC60LXQtdC70LXRgtGW0L0g0YLRltC7INC00L7Sk9Cw0LvQsNGA0L3QsNC9INKb0LDQu9GL0L/RgtCw0YHQsNGC0YvQvSDQsdC+0LvRi9C/INC60LXQu9C10LTRlizQsNC7IDgt0YjRliDQsNC/0YLQsNC00LAg0pvSsdC70LDSmyDSm9Cw0LvSm9Cw0L3Ri9C90YvSoyDQsNC70pPQsNGIINCx0L7Qu9GL0L8g0LrTqdGA0ZbQvdC10YLRltC9INCx0LXQu9Cz0ZbQu9C10YDRliDQutOp0YDQuNC90LXQtNGWLtCd0LXQs9GW0LfRltC90LXQvSDSm9Kx0LvQsNKbINKb0LDQu9Kb0LDQvdGLINC80LXQvSDRgdGL0YDRgtKbINC10YHRgtGDINC20L7QvtC70YsgMjDRiNGLINCw0L/RgtCw0pPQsCDQtNC10LnRltC9INGC0L7Qu9GL0psg0LTQsNC80YvQvyzQsdCw0YHRgtCw0L/Sm9GL0LTQsCDSm9Cw0YLQv9Cw0YAg0YLTmdGA0ZbQt9C00LXRgSDQsdC+0LvRi9C/INC60LXQu9C10LTRliDQtNC1LNC00LDQvNGD0YszOC00MNCw0L/RgtCw0pPQsCDQtNC10LnRltC9INC20q/RgNC10YLRltC9INCx0L7Qu9GL0L8g0LrQtdC70LXQtNGWLtCe0YDRgtCw0qPSk9GLINKb0rHQu9Cw0psg0LXRgdGC0YMg0YHSr9C50LXQutGI0LXQu9C10YDRliDRj9KT0L3QuCDQsdCw0LvSk9Cw0YjRi9KbINGC06nRgdGC0ZbQuiDSr9C30LXSo9Cz0ZbQtNC10L0g0LbQsNC90LUg0LTQtSDQtNCw0LHRi9C7INC20LDRgNCz0LDQs9GL0L3QsNC9INGC0rHRgNCw0YLRi9C9INCx0L7Qu9GL0L8g0LrQtdC70LXQtNGWLtCR0rHQuyDRgdKv0LnQtdC60YjQtdC70LXRgCDQvdC10LPQuNC30LjQvdC10L0g0YPRgNGL0LrRgtCwINGI0LXQvNC40YDRiNC10Log0YLQuNC90LjQvdC10L0g0LrRg9GA0LDQu9Cw0YLRi9C9INCx0L7RgNC70YvQvyDQutC10LvQtdC00Lgu0JXRgdGC0YMg0YHSr9C50LXQutGI0LXQu9C10YDQuCDQvdC10LPQuNC30LjQvdC10L0gNy040LDQv9GC0LDQtNCwINC00LDQvNGL0L8g0LHQsNGB0YLQsNC/LDE2LTIw0LDQv9GC0LDQvdGL0L0g0LrQvtC70LXQvNC40L3QtSDQtNC10LnRltC9INC00LDQvNC40YLQvSDQsdC+0LvRi9C/INC60LXQu9C10LTQuC7QkdC40YDQsNC6INC10YHRgtGDINGB0YPQudC10LrRiNC10LvQtdGA0LjQvdC40L0g0YLQvtC70YvQuiDQutCw0YLQutGL0Lsg0LHQvtC70YPRiyDRgtGD0LPQsNC90L3QsNC9INC60LXQudGW0L3Qs9GWINC60LXQt9C10L3QtNC1INC20q/RgNC10YLQuNC9INCx0L7Qu9GL0L8g0LrQtdC70LXQtNGWLtCQ0Lsg0LXQstGB0YLQsNGF0LjQuSDRgtKv0YLRltCz0ZbQvdC1INGC0L7Sm9GC0LDQu9Cw0YAg0LHQvtC70YHQsNC8LNCe0Lsg0LTQsCDQttCw0LvQv9GLINGC0ZbQuyDQttCw0Log0LTQvtCz0LDQu9Cw0YDRi9C90LDQvSDQsdCw0YHRgtCw0YMg0LDQu9Cw0LTRiyzQvtC7INC90LXQs9C40LfQuNC90LXQvSDQvNGD0YDRi9C6INC20rHRgtC60YvQvdGI0LDQuiDQvNC10L0g0L7RgNGC0LDQvdCz0Ysg0LrRg9C70LDQutGC0Ysg0LHQsNC50LvQsNC90YvRgdGC0YvRgNGL0L8g0YLRg9GA0LDRgtGL0L0g0LrTqdC/0ZbRgCDRgdC10LrRltC70LTRli7QlNCw0LzRg9GL0L3QsCDQutC10LvQtdGAINCx0L7Qu9GB0LDQvCzQutGD0YDRgdCw0Log0ZbRiNGW0LvQuiDQtNCw0LzRg9C00YvSoyAxMi0xNNGI0Lgg0LDQv9GC0LDRgdGL0L3QtNCwINCx0LDRgdGC0LDQvyDQtNCw0LzRi9C/LNGC0YPQs9Cw0L3Sk9CwINC00LXQudGW0L0g0LbQsNC70LPQsNGB0LDRgtGL0L0g0LHQvtC70YvQvyDQutC10LvQtdC00Lgu0JbQsNC70L/RiyDRg9GA0YvQutGC0LAg0LbQsNC90LUg0LTQtSDQvdCw0YDQtdGB0YLQtdC70LXRgNC00LUg0LXQstGB0YLQsNGF0LjQuSDRgtKv0YLRltCz0ZbQvdGW0qMg0pvSsdGA0YvQu9GL0YHRi9C90YvSoyDQtdGA0LXQutGI0LXQu9GW0LrRgtC10YDRltC90LUg0L7QvdGL0L0g0LrRi9GB0LrQsCDTmdGA0ZYg0LrQvtC70LTQtdC90LXQvSDRgtCw0YAg0LHQvtC70YvQvyDQutC10LvRg9GWINC20LDRgtCw0LTRiy7QodC+0Lsg0YPRiNC40L3QtNC1INC90LDRgNC10YHRgtC10LvQtdGA0LXQtNC1INC+0YDRgtCw0L3Qs9GLINC60YPQu9Cw0LrRgtGL0L0g0LrQsNCx0YvQvdGD0Yst0L7RgtC40YLRgtGC0LjQvSDQsdC+0LvRg9GLINC20LjRliDQutCw0LnRgtCw0LvQsNC90LDQtNGLLtCG0YjQutGWINC60YPQu9Cw0Log0YPRgNGL0LrRgtCwINC10YHRgtGDINCw0L3QsNC70LjQt9Cw0YLQvtGA0LvQtNCw0YDRi9C90YvQvSDRltGI0ZbQvdC00LUg0LXQvSDQsNC70LPQsNGI0LrRiyDQsdC+0LvRi9C/INC00LDQvNC40YLRi9C9INC10YHRgtGDINCw0L3QsNC70LjQt9Cw0YLQvtGA0LvQsNGA0YvQvdGL0L3QsdGW0YDRliDQsdC+0LvRi9C/INGC0LDQsdGL0LvQsNC00YsuOS3RiNGLINCw0L/RgtCw0L3Ri9C9INC60L7Qu9C10LzQuNC90LTQtSDRltGI0LrRliDQutGD0LvQsNC60YLRi9C9INC90LXQs9C40LfQs9C4INC60YPRgNGL0LvRi9C80LTRi9C6INCx0L7Qu9C40LzQuCDQutCw0LvRi9C/0YLQsNGB0YvQvyzSsdC70YMgMiw10LDQudC90LDQu9GL0Lws0Y/Rj9KT0L3QuCDQtNOZ0Lsg0LXRgNC10YHQtdC60YLQtdGA0LTQtdCz0ZbQtNC10Lkg0YHQuNGP0pvRgtGLINCw0LnQvdCw0LvRi9C8INC20LDRgdCw0LnQtNGLLtCa0L7RgNGC0LjQtdCyINC+0YDQs9Cw0L3RiyzRj9KT0L3QuCDQtdGB0YLRgyDRgNC10YbQtdC/0YLQvtGA0LvQsNGA0YsgMTItMTTQsNC/0YLQsNC00LAg0YLSr9C30ZbQu9GW0LvQvyzQtNGL0LHRi9GB0YLRiyDQutCw0LHRi9C70LTQsNGDINC60YvQt9C80LXRgtGW0L0g0L7RgNGL0L3QtNCw0LnQtNGLLtCQ0Lsg0YLQsNCz0Ysg0LTQsCDQtdGB0YLRgyDRgNC10YbQtdC/0YLQvtGA0LvQsNGA0YvQvdGL0qMg0LHRltGA0ZYt0YjQsNGIINC20LDRgdGD0YjQsNC70LDRgNC00YvQvSDQtNCw0LzRg9GLIDIwLTI10LDQv9GC0LDQtNCwINOp0Lcg0LDRj9KT0YvQvdCwINC20LXRgtC10LTRli7QhtGI0LrRliDSm9Kx0LvQsNKb0YLQsCDRgdKx0LnRi9Kb0YLRi9KbINC20q/QudC10YHRliAg0Y/Sk9C90Lgg0L/QtdGA0LjQu9C40LzRhNCwINC205nQvdC1INC00LUg0Y3QvdC00L7Qu9C40LzRhNCwINC+0YDQvdCw0LvQsNGB0YvQvyzQtNGL0LHRi9GBINGC0LXRgNCx0LXQu9C40YHRgtC10YDQuNC9INC+0YLQutC40LfRgyDQutGL0LfQvNC10YLQuNC9INC+0YDRi9C90LTQsNC5INCw0LvQsNC00Ysu0JDQuyDRhNC40LfQuNC+0LvQvtCz0LjRj9C70YvQuiDQtdGA0LXQutGI0LXQu9C40LrRgtC10YDQuNC90LUg0YLQvtC60YLQsNC70YHQsNC8LNCj0YDRi9GD0LrRgtGL0L0g0LXRgdGC0YMg0LbQvtC70YsgMTYtMTjQsNC/0YLQsNC00LDQvSDQsdCw0YHRgtCw0L8g0LrRi9C30LzQtdGC0LjQvSDQvtGA0YvQvdC00LDQuSDQsNC70YvQvywyNC0yNtCw0L/RgtCw0LvQsNGA0LTQsCDQutGL0LfQvNC10YLQuNC9INGC0L7Qu9GL0Log0L7RgNGL0L3QtNCw0LnQtNGLLtCV0L3QtNC4INGD0YDRi9C60YLRi9C9INC10YHRgtGDINCw0L3Qu9C40LfQsNGC0L7RgNC70LDRgNGL0L3Ri9C9INC00YvQsdGL0YHRgtGLINC60LDQsdGL0LvQtNCw0YMg0LXRgNC10LrRiNC10LvQuNCz0LjQvdC1INC60LXQu9C10YAg0LHQvtC70YHQsNC8LNGD0YDRi9C6INCw0LzQvdC40L7RgtC40LrQsNC70YvQuiDRgdGD0LnRi9C60YLRi9C6INC+0YDRgtCw0YHRi9C90LTQsCDQvtGA0L3QsNC70LDRgdC60YvQvdC00YvQutGC0LDQvSzQtNGL0LHRi9GBINC+0LfQs9C10YjQtSDRgtCw0YDQsNC70LDRgtGL0L0g0LHQvtC70YvQvyDQutC10LvQtdC00LgsINC20L7Qs9Cw0YDQs9GLINGC0L7QvdC00LDQs9GLINC00YvQsdGL0YHRgtCw0YAg05nQu9GB0ZbQtyDRgtCw0YDQsNC70LDQtNGLINC00LAs0LDQuyDQutC10YDRltGB0ZbQvdGI0LUg0YLQvtC80LXQvSDRgtC+0L3QtNCw0LPRiyDQtNGL0LHRi9GB0YLQsNGAINCw0LvQtNC10LrQutCw0LnQtNCwINC20LDQutGB0Ysg0YLQsNGA0LDQu9Cw0YLRi9C9INCx0L7Qu9Cw0LTRiy7QkNC90LDQvdGL0L0g0LTQsNGD0YHRiyzQttKv0YDQtdC6INGB0L7Qs9GL0YHRiyDQuNGI0LrQuCDQsNCz0LfQsNC70LDRgNC00YvQvSDQtNGL0LHRi9GB0YvQvSDRg9GA0YvQuiDSr9GI0ZbQvSDQvdC10LPQuNC30LPQuCDQsNC60YPRgdGC0LjQutCw0LvRi9C6INC00YvQsdGL0YHRgtCw0YDQtNGL0L0g0LrQsNGC0LDRgNGL0L3QsCDQttCw0YLQutGL0LfQsNC80YvQty7Qo9GA0YvQuiDQutCw0YLRgtGLINC00YvQsdGL0YHRgtCw0YDQs9CwINC60L7Qt9Cz0LDQu9GL0YEg0YDQtdCw0LrRhtC40Y/RgdGL0L0g0L/QsNC50LTQsNC70LDQvdGDINCw0YDQutGL0LvRiyDQttCw0YPQsNC/INCx0LXRgNC10LTQuC7QldC90LTQuNCz0Lgg0LrQtdC30LXQutGC0LUg0YPRgNGL0LrRgtGL0L0g0LXRgdGC0YMg0LbSr9C50LXRgdGW0L3RltKjINC20LXRgtGD0ZbQu9GW0L0g0YLQsNCz0Ysg0LDQudGC0LAg0L7RgtGB0LXQvCwyNC0yONCw0L/RgtCw0LTQsCDRg9GA0YvQuiDQsNC90LDQvdGL0L0g0LTQsNGD0YHRi9C90LAg0LbQsNGD0LDQvyDQsdC10YDRgyDQvNGD0LzQutC40L3QtNC40LPQuNC90LUg0LjQtSDQsdC+0LvQsNC00YsuMzAtMzLQsNC/0YLQsNC70LDRgNC00LAg0LTRi9Cx0YvRgdGC0LDRgNC00Ysg0LDQttGL0YDQsNGC0LAg0LDQu9GDINC60LDQsdC40LvQtdGC0LjQvdC1INC40LUg0LHQvtC70LDQtNGLLtCQ0Lsg0LbRg9C60YLQuNC70LjQutGC0LjQutGC0LjQvSDRgdC+0L3Qs9GLINC80LXRgNC30LjQvNC00LXRgNC40L3QtNC1IDM4LTQw0LDQv9GC0LDQtNCwINGB0YvRgNGC0LrRiyDQvtGA0LDRgtC00LDQvSDQtdGB0YLQuNCz0LXQvSDQtNGL0LHRi9GB0YLQsNGA0LPQsCDQtNCwINC20LDRg9Cw0L8g0LHQtdGA0YMg0LzSr9C80LrRltC90LTRltCz0ZbQvdC1INC40LUg0LHQvtC70LDQtNGLLjLRgdGD0YDQsNC6LtCd0LXQs9C40LfQuNC90LXQvSDQttCw0L3QsCDRgtGD0LPQsNC9INCx0LDQu9Cw0LTQsCDQutC10LnQtNC1INGB0LXQvyDRiNGL0LrQv9Cw0YMg0L/RgNC+0YbQtdGB0Lgg0LrQsNC70YvQv9GC0Ysg0LHQvtC70YvQvyDQutC10LvQtdC00Lgu0JXQvdC00Lgg0YTQuNC30LjQvtC70L7Qs9C40Y/Qu9GL0Log0YHQtdCx0LXQv9GC0LXRgNC40L3QtSDRgtC+0LrRgtCw0LvQsNGAINCx0L7Qu9GB0LDQvCzQttCw0L3QsCDRgtGD0LPQsNC9INCx0LDQu9Cw0LTQsCDTmdGWINC00LUg0LfQsNGAINGI0YvQs9Cw0YDRgyDQvtGA0LPQsNC90LTQsNGA0Ysg0LTRg9GA0YvRgSDQtNCw0LzRi9C80LDQs9Cw0L0s0LrRi9C30LzQtdGC0LjQvSDRgtC+0LvRi9C6INCw0YLQutCw0YDQvNCw0LnQtNGLLNGP0pPQvdC4INCx0q/QudGA0LXQuiDQvtC30LfQuNC90LjQvSDRhNC40LvRjNGC0YDQsNGG0LjRj9C70YvQuiDQutGL0LfQvNC10YLQuNC9INGC0L7Qu9GL0Log0LDRgtC60LDRgNC80LDQudC00YvRi9GL0YvRi9GL0YvRiy7QkNC7INC10LrQuNC90YjQuCDRgdC10LHQtdC/0LrQtSDQsNC90LAg0YHSr9GC0ZbQvdC1INCx0LDQudC70LDQvdGL0YHRgtGLINCx0L7Qu9GD0Ysg0LzSr9C80LrRltC9LtCQ0LvQs9Cw0YjQutGLINC60YPQvdC00LXRgNC4INGD0YvQtyDQsdC+0LvQs9Cw0L3QtNGL0LrRgtCw0L0s0LbQsNC90LAg0YLRg9Cz0LDQvSDQvdCw0YDQtdGB0YLQtSDQttC10YLQutGW0LvRltC60YLRliDQvNOp0LvRiNC10YDQtNC1INGB0rHQudGL0LrRgtGL0Log0LrQsNCx0YvQu9C00LDQvNGD0Ysg0LTQsCDQt9OZ0YAg0YjRi9C60L/QsNGD0YvQvdCwINGL0LrQv9Cw0Lsg0LXRgtC10LTRli7QodC+0L3Ri9C80LXQvSDQutCw0YLQsNGAINCw0LvQs9Cw0YjQutGLINC60YPQvdC00LXRgNC4INC90LDRgNC10YHRgtC1INC20rHRgtC60LDQvSDQutKx0YDRgdCw0Log0ZbRiNGW0LvRltC6INGB0YPQudGL0LrRgtGL0LPRi9C9INGI0YvQs9Cw0YDQsNC00Yss0L7RgdGLINKv0YjRltC90LTQtSDQt9Cw0YAg0LrQvtC70LXQvNGWINCw0Lcg0LHQvtC70YPRiyDQvNKv0LzQutGW0L0u0JDQuyDQv9Cw0YLQsNC70L7Qs9C40Y/Qu9GL0Log0YHQtdCx0LXQvyDRgtKx0YDSk9GL0YHRi9C90LDQvSDQutCw0YDQsNGB0YLRi9GA0LDRgCDQsdC+0LvRgdCw0Los0LHSr9C50YDQtdC60YLQtSDRgtGD0LAg0LHRltGC0LrQtdC9INCw0L3QvtC80LDQu9C40Y/Qu9Cw0YAg0LHQvtC70YPRiyDQvNKv0LzQutGW0L0s0LzRi9GB0LDQuyDQutC10LvRgtGW0YDRgdC10Lwg0YLQvtC70YvQuiDQsdC+0LvQvNCw0YPRiy3QsNCz0LXQvdC10LfQuNGPINC20LDQvdC1INC00LUg0LHSr9C50YDQtdC6INCw0YDRgtC10YDQuNGP0LvQsNGA0YvQvdGL0L0g0LHRltGC0LXQu9GD0ZYu0KLQsNCz0Ysg0LTQsCDQsdGW0YAg0L/QsNGC0LDQu9C+0LPQuNGP0LvRi9C6INGB0LXQsdC10L8g0LfTmdGAINGI0YvQs9Cw0YDRgyDQvtGA0LPQsNC90LTQsNGA0YvQvdGL0L0g0L7QsdGB0YLRgNGD0LrRhtC40Y/RgdGLLNGP0pPQvdC4INCx0ZbRgtC10LvRgyDQvNC10YXQsNC90LfRltC80LXQvSDRgdOZ0LnQutC10YEg0LrQtdC70YPRliDQvNKv0LzQutGW0L0u0KHQvtGL0L3QvNC10L0g0LrQsNGC0LDRgCDQvdCw0YDQtdGB0YLQtSDQutGD0YDRgdCw0Log0ZbRiNGW0LvRltC6INC00LDQvNGDINC60LXQt9C40L3QtNC1INC60LDQvdC00LDQuSDQtNCwINCx0ZbRgCDQt9OZ0YAg0YjRi9Cz0LDRgNGDINC20L7Qu9C00LDRgNGL0L3Ri9C9INC40L3RhNC10LrRhtC40Y/RgdGL0L3QsCDSsdGI0YvRgNCw0YHQsCDQvtC7INC60LXQudGW0L0g0YLRg9GL0LvQs9Cw0L3QvdCw0L0g0YHQvtC9INC305nRgCDRiNGL0LrQv9Cw0YPRi9C90LAg05nQutC10LvRg9GWINC80q/QvNC60ZbQvS7QotCw0LPRiyDQtNCwINCx0ZbRgCDRgdC10LHQtdC/INGB0YMt0YLSsdC3LNGP0pPQvdC4INC60YvRiNC60YvQu9C00Yst0L3QtdCz0LjQt9C00Lgg0LHQsNC70LDQvdGB0YLRi9C9INCx0YPQt9GL0LvRg9GLINC00LAg0LfTmdGAINGI0YvQutC/0LDRg9GL0L3QsCDRgdC10LHQtdC/LtCW0q/RgNC10Log0LrQsNC90YLQsNC80YvRgCDQsNGD0YDRg9C70LDRgNGLLNCz0LjQv9C+0LrRgdC40Y/QtNCwINC20LDQvdCwINGC0YPQs9Cw0L0g0L3TmdGA0LXRgdGC0LXQtNC1INC305nRgCDRiNGL0LrQv9Cw0YPRi9C90LAg0LDQu9GL0L8g0LrQtdC70YMg0LzSr9C80LrRltC9LtCi0YPQs9Cw0L3QvdCw0L0g0LrQtdC50ZbQvSDQsNC70LPQsNGI0LrRiyDQutGD0L3QtNC10YDQuCzRj9KT0L3QuCAxLTLQutKv0L3QtNC1INGC05nRg9C70ZbQs9GW0L3QtSAyLTTRgNC10YIg0LrQsNC90LAg0YjRi9Cz0YPRiyDQvNKv0LzQutGW0L0uNi030LrSr9C90L3QtdC9INCx0LDRgdGC0LDQvyzQvdOZ0YDQtdGB0YLQtSDQutKv0L3RltC90LUgMTAtMTXRgNC10YIg0LfTmdGAINGI0YvQs9Cw0YDQsNC00Ysu0JDQuyAxLdGI0ZYg0LDQudC70LDRgNCz0LAg0LbQtdGC0LrQtdC90LTQtSAyMC0yNdGA0LXRgiDRgtOZ0YPQu9GW0LrRgtGW0Log0LTQuNGD0YDQtdC3INC806nQu9GI0LXRgNGW0L0g0LrTqdGA0YHQtdGC0LXQtNGWLtCQ0LsgNtCw0Lkg0LzQtdC9IDEt0LbQsNGB0YLQsCAyMC0yNdGA0LXRgiDQsdC+0LvRgdCwLDItM9C20LDRgdGC0LAgMTUtMTbRgNC10YIs0LzQtdC60YLQtdC/INC20LDRgdGLINCx0LDQu9C00LDRgCDSr9GI0ZbQvSA3LTjRgNC10YIg0L3QvtGA0LzQsCDQutC+0YDRgdC10YLQutGW0YjRltC9INC60L7RgNGB0LXRgtC10LTRli7QldC90LTRliDQtNC40LDQs9C90L7RgdGC0LjQutCwINC20q/RgNCz0LfQtdGAINCx0L7Qu9GB0LDQuizQtdC9INCx0ZbRgNGW0L3RiNGWINCw0L3QsNC80L3QtdC3INC20LjQvdCw0YMu0JDQvdCw0YHRi9C90LDQvSDRgdKv0YLRltC90ZbSoyDQvNOp0LvQtdGI0LXRgNGW0L0s0LHQsNC70LAg0LfTmdGAINGI0YvQs9Cw0YDRgyDQv9GA0L7RhtC10YHRliDQutC10LfRltC90LTQtSDQvNCw0LfQsNGB0YvQt9C00LDQvdGL0L8g0LbRi9C70LDQuSDQvNCwINC20L7QuiDQv9CwINC+0L3RiyDRgdKx0YDQsNGDINC60LXRgNC10Lou0KHQvtC90YvQvNC10L0g0LrQsNGC0LDRgCDQt9Cw0YAg0LDQvdCw0LvQuNC30ZbQvSzQutCw0L0g0LDQvdCw0LvQuNC30ZbQvSDQsNC70YvQvyzQutGD0YDQsNC80YvQvSDQsNC90YvQutGC0LDQvyDRgtC10LrRgdC10YDRltC/LNCx0LDQu9Cw0LTQsCDQvdC10LPQtSDQt9OZ0YAg0YjRi9C60L/QsNC5INC20LDRgtC60LDQvdGL0L0g0LDQvdGL0LrRgtCw0LPQsNC9INC00rHRgNGL0YEu0J3QtdCz0ZbQt9C10L0g0LbQsNC90LAg0YLRg9Cz0LDQvSDQsdCw0LvQsNCz0LAg0LDQu9Cz0LDRiNC60Ysg0LrRg9C90LTQtdGA0LggINGC0YDQsNC90LfQuNGC0L7RgNC70YvQuiDQvtC70LjQs9GD0YDQuNGPINGC05nQvSDQsdC+0LvRi9C/INC60LXQu9C10LTRli7QotOZ0YPQu9GW0LPRltC90LUgMjAtMzDQvNC7INCz0LDQvdCwINC305nRgCDRiNGL0LPRg9GLINC80q/QvNC60ZbQvSDRgtGW0L/RgtGWINC+0LTQsNC9INC00LAg0LDQty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15" table:style-name="ce1">
            <text:p>1067015</text:p>
          </table:table-cell>
          <table:table-cell office:value-type="string" table:style-name="ce1">
            <text:p>kazakh</text:p>
          </table:table-cell>
          <table:table-cell office:value-type="string" table:style-name="ce1">
            <text:p>Билет 19.&amp;lt;br /&amp;gt; 1.Үрықтын есту анализаторлардын ерекшеліктерің атаңыз?&amp;lt;br /&amp;gt; 2. Педиатр жаңа туған бала қарады, анасынын шағымдары 2 күң бойы баларың несеп шығармауына, қарағанда патология анықталмаған, жалпы несеп анализынде патологиялық өзгерістер жоқ. Осы жастағы балада несеп болмау немен байланысты? Жана туған балада несеп шығару жиілігі қанша?&amp;lt;br /&amp;gt;</text:p>
          </table:table-cell>
          <table:table-cell office:value-type="string" table:style-name="ce1">
            <text:p>MS7QldGB0YLRgyDQsNC90LDQu9C40LfQsNGC0L7RgNGL0L0g0L3QtdCz0ZbQt9GW0L3QtdC9IDMg0LHTqdC70ZbQutC60LUg0LbRltC60YLQtdGD0LPQtSDQsdC+0LvQsNC00Ysu0K/Sk9C90Lgg0L7Qu9Cw0YDSk9CwOtCh0YvRgNGC0pvRiyzQvtGA0YLQsNKj0pPRiyDQttOZ0L3QtSDRltGI0LrRli7QkNC7INC905nRgNC10YHRgtC10L3RltKjINC00YvQsdGL0YHRgtGLINKb0LDQsdGL0LvQtNCw0YMg0LbTmdC90LUg06nRgtC60ZbQt9GD0ZbQvdC1INCx0LDQudC70LDQvdGL0YHRgtGLINC00YvQsdGL0YHRgtGLINOp0YLQutGW0LfRg9GI0ZYg0LbTmdC90LUg0pvQsNCx0YvQu9C00LDRg9GI0Ysg0LHTqdC70ZbQvNC00LXRgNC00LXQvSDRgtKx0YDQsNC00Ysu0JXQvdC00ZYg05nRgNCx0ZbRgCDQsNC90LDQu9C40LfQsNGC0L7RgNC00YvSoyDQsNC90LDRgtC+0LzQvi3RhNC40LfQuNC+0LvQvtCz0LjRj9C70YvSmyDQtdGA0LXQutGI0LXQu9GW0LPRltC90LUg0LbQtdC60LUg0YLQvtKb0YLQsNC70LDRgCDQsdC+0LvRgdCw0Lws0L3TmdGA0LXRgdGC0LXQu9C10YDQtNC1OtCh0YvRgNGC0pvRiyDQtdGB0YLRgyDQttC+0LvRiyDSm9GL0YHSm9CwINC60LXQu9Cz0LXQvSwg0LDRg9CwINC205nQvdC1INC00YvQsdGL0YEg06nRgtC60ZbQt9GD0YjRliDQttC+0Lsg0YLQtdGA0ZbRgdGWINC905nQt9GW0Los0LzQsNC5INCx0LXQt9C00LXRgNGW0L3RltKjINCz0LjQv9C10YDRgtGA0L7RhNC40Y/RgdGL0LzQtdC9INC606nRgNGW0L3RltGBINCx0LXRgNC10LTRli7QnNCw0Lkg0LHQtdC30LTQtdGA0ZbQvdGW0qMg0LHQtdC70YHQtdC90YPRliDQsNGA0pvRi9C70Ysg0YjQsNKjINGC0L7Qt9Cw0qPQtNCw0YAg0LzQtdC9INC40L3RhNC10LrRhtC40Y/Qu9Cw0YAg0rHRgdGC0LDQu9GL0L8g0pvQsNGA0LzQsNC70LDQtNGLLtCe0YDRgtCw0qPSk9GLINKb0rHQu9Cw0pvSm9CwINC60LXQu9C10YAg0LHQvtC70YHQsNC8OiDQvtC7INCw0LnQvNCw0pvRgtCwINC00LDQsdGL0Lsg0LbQsNGA0pPQsNKT0Ysg0YHQsNC70YvRgdGC0YvRgNC80LDQu9GLINKb0LDQu9GL0qPQtNCw0pPQsNC9LCDQutOp0LvQtNC10L3QtdKj0ZbQvdC10L0g0L7RgNC90LDQu9Cw0YHSm9Cw0L0g0LbTmdC90LUg0pvQvtC30pPQsNC70pPRi9GI0YLRi9KbINKb0LDRgdC40LXRgtGWINGC06nQvNC10L0u0JzSsdC90LTQsNC5INKb0rHRgNGL0LvRi9GB0Ysg0LTRi9Cx0YvRgdGC0YvSoyDRgdGL0YDRgtKb0Ysg0pvSsdC70LDSm9GC0LDQvSDQvtGA0YLQsNKj0pPRiyDSm9Kx0LvQsNKb0pvQsCDTqdGC0LrRltC30YPRltC9INKb0LjRi9C90LTQsNGC0LDQtNGLLtCW05nQvdC1INC+0YDRgtCw0qPSk9GLINKb0rHQu9Cw0pvRgtCwIDMg0LXRgdGC0YMg0YHSr9C50LXQs9GW0L0g0LDQttGL0YDQsNGC0YvQvyDQutC10YLRg9Cz0LUg0LHQvtC70LDQtNGLLtCe0LvQsNGAINCx0LDQu9KT0LDRiNGL0pss0YLTqdGBINC205nQvdC1INKv0LfQtdKj0LPRli7QkdKx0Lsg0YHSr9C50LXQutGI0LXQu9C10YAg0YLQvtC70YvSmyDQttC10YLRltC70LzQtdCz0LXQvSDQttOZ0L3QtSDSm9C+0LfSk9Cw0LvRi9GB0Ysg0YjQtdC60YLQtdGD0LvRliDQutC10LvQs9C10L0u0JzSsdC90LTQsNC5INGI0LXQutGC0LXRg9C70ZYg0pvQvtC30pPQsNC70YvRgSDQtNGL0LHRi9GBINGC0LXRgNCx0LXQu9GW0YHRgtC10YDRltC9INKb0LDQsdGL0LvQtNCw0YPQtNGLINKb0LjRi9C90LTQsNGC0LDQtNGLLtCQ0Lsg0LbSsdGC0pvRi9C90YjQsNKb0YLRiyDQvtGA0YLQsNKj0pPRiyDSm9Kx0LvQsNKb0L/QtdC9INCx0LDQudC70LDRgdGC0YvRgNGD0YjRiyDQldCy0YHRgtCw0YXQuNC5INGC0q/RgtGW0LPRliDQsdC+0LvRgdCwLCDSm9GL0YHSm9CwINOZ0YDRliDQutC10qMg0LHQvtC70LDQtNGLLtCR0rHQuyDQvtGC0LjRgiDQtNCw0LzRgyDSm9Cw0YPQv9GW0L0g0LbQvtKT0LDRgNGL0LvQsNGC0LDRgtGL0L3Ri9C9INC606nRgNC10LzRltC3LtCh0LXQsdC10LHRliDQuNC90YTQtdC60YbQuNGP0LvQsNGA0LTRi9KjINC20rHRgtKb0YvQvdGI0LDSmyDQsNGA0pvRi9C70Ysg0LXQvdGD0ZYg0L7So9Cw0Lkg0LHQvtC70LDQtNGLLtCV0L3QtNGWINGW0YjQutGWINKb0rHQu9Cw0pvRgtGL0qMg0pvSsdGA0YvQu9GL0LzQtNCw0YDRi9C90LAg0LrQtdC70LXRgtGW0L0g0LHQvtC70YHQsNC8LCDQvtC90LTQsNKT0Ysg0rHQu9GD0LvRiyDQu9Cw0LHQuNGA0LjQvdGCINC/0LXQvSDQtdGB0YLRgyDQvdC10YDQstGW0YHRliDRgtC+0LvRi9KbINC00LXRgNC70ZbQuiDSm9Cw0LvRi9C/0YLQsNGB0pvQsNC9LNCx0ZbRgNCw0psg0L7QvdC00LDSk9GLINC10YHRgtGD0LTRliDRgtCw0LvQtNCw0YPRiNGLINC80Lgg0pvRi9GA0YLRi9GB0Ysg0L7RgNGC0LDQu9GL0pPRiyDQtNKx0YDRi9GBINKb0LDQu9GL0L/RgtCw0YHQv9Cw0pPQsNC9INCx0L7Qu9GL0L8g0LrQtdC70LXQtNGWLtCh05nQudC60LXQvdGB0ZbQvdGI0LUg0LbQsNKj0LAg0YLRg9GL0LvSk9Cw0L0g0L3TmdGA0LXRgdGC0LUg0YLTqdC80LXQvSDQttC40ZbQu9GW0LrRgtC10LPRliDQtNGL0LHRi9GB0YLQsNGA0LTRiyDQttCw0pvRgdGLINC10YHRgtC40YLRltC9INCx0L7Qu9GB0LAs0LbQvtKT0LDRgNGLINC20LjRltC70ZbQutGC0ZYg0LTRi9Cx0YvRgdGC0Ysg0LXRgdGC0YMg0pvQsNCx0ZbQu9C10YLRliDRgtC+0LvRi9KbINC00LDQvNGL0LzQsNKT0LDQvSDQsdC+0LvQsNC00YsuINCi06nQvNC10L0g0LbQuNGW0LvRltC60YLQtdCz0ZYg0LTRi9Cx0YvRgdGC0LDRgNKT0LAg0LbSr9GA0LXQuiDSm9Cw0pPRi9GB0YvQvSDQttCw0YLSm9GL0LfRg9KT0LAg0LHQvtC70LDQtNGLLiDQkNC7IDctOCDQsNC/0YLQsNC70LDRgNC00LAg0LTRi9Cx0YvRgdKb0LAg0LrTqdKj0ZbQuyDQsNGD0LTQsNGA0YvQvyzQsdCw0YHRi9C9INGB0L7QuyDQsdCw0pPRi9GC0pvQsCDQsdKx0YDQsCAg0LHQsNGB0YLQsNC50LTRiy7QkNC7INGC0L7Qu9GL0pPRi9C80LXQvSDQtdGA0LXRgdC10LrRgtC10YDQtNC10LPRltC00LXQuSDRgtC10LogMy00INC20LDRgdGC0LAg0YLQvtC70YvSmyDSm9Cw0LvRi9C/0YLQsNGB0LDQtNGLLtCv0pPQvdC4INCx0rHQuyDQutC10LfQtNC1INCx0ZbRgNC90LXRiNC1INC00YvQsdGL0YEg0LDRgNCw0YHRi9C90LDQvSDQsNC90LDRgdGL0L3Ri9KjINC00YvQsdGL0YHRi9C9INCw0LbRi9GA0LDRgtCwINCx0ZbQu9GDINKb0LDQsdGW0LvQtdGC0ZbQvdC1INC40LUg0LHQvtC70LDQtNGLLtCV0L3QtNGWINC00LDQvNGDINC60LXQt9C10qPRltC90LUg0LrQtdC70LXRgCDQsdC+0LvRgdCw0Lw6NC01INCw0L/RgtCw0LvQsNGAINC00LXSo9Cz0LXQudGW0L3QtdC00LUg0LXRgdGC0YMg0LjRltGA0ZbQvNC00LXRgNGWINKb0LDQu9GL0L/RgtCw0YHQsNC00YssOC0xMCDQsNC/0YLQsNC00LAg0ZbRiNC60ZYg0pvSsdC70LDSm9GC0YvSoyDQvdC10LPRltC30LPRliDSm9Kx0YDRi9C70YvQvNC00LDRgNGLINKb0LDQu9GL0L/RgtCw0YHQsNC00YssMTYtMjAg0LDQv9GC0LDQtNCwINC10YHRgtGDINGB0q/QudC10LrRgtC10YDRltC90ZbSoyDQvtGB0YHQuNGE0LjQutCw0YbQuNGP0YHRiyDQsdC+0LvQsNC00Ysu0JDQuyAyMCDQsNC/0YLQsNC00LDQvSDQutC10LnRltC9INKx0YDRi9KbINGB0YvRgNGC0pvRiyDQtNGL0LHRi9GB0YLQsNGA0LTRiyDQtdGB0YLRgyDSm9Cw0LHRltC70LXRgtGW0L3QtSDQuNC1INCx0L7Qu9CwINCx0LDRgdGC0LDQudC00YsuMjgtMzAg0LDQv9GC0LDQtNCwINC10YHRgtGDINCw0L3QsNC70LjQt9Cw0YLQvtGA0Ysg0YTRg9C90LrRhtC40L7QvdCw0LvQtNGLINGC0L7Qu9GL0psg0LbQtdGC0ZbQu9C10LTRli7QkNC7INKx0YDRi9Kb0YLRi9KjINC10YHRgtGDINC10YDQtdC60YjQtdC70ZbQutGC0LXRgNGW0L3QtSDQutC10LvRgdC10Lws0rHRgNGL0psg0LDQvdCw0YHRi9C90YvSoyDQttKv0YDQtdC6INKb0LDSk9GL0YHRiyDQvNC10L0g0ZbRiNC60ZYg0LzSr9GI0LXQu9C10YAg0LTRi9Cx0YvRgdGL0L0g0LXRgdGC0Lgg0LDQu9Cw0LTRiy4g0JDQuyDRgdGL0YDRgtKb0Ysg0LTRi9Cx0YvRgdGC0LDRgCDQsNC80L3QuNC+0YLQuNC60LDQu9GL0psg0YHSsdC50YvSm9GC0YvSm9GC0LDQvSDQsdKx0LvRi9Kj0pPRi9GALNCw0L3Ri9KbINC10LzQtdGBINCx0L7Qu9GL0L8g0LXRgdGC0ZbQu9C10LTRli48YnIgLz4NCjIu0JbQsNKj0LAg0YLRg9GL0LvSk9Cw0L0g0L3TmdGA0LXRgdGC0LXQvdGW0qMg0L7RgNCz0LDQvdC40LfQvNGW0L3QtSDQsNC70pPQsNGI0pvRiyAzINC60q/QvdC00LUg0YHSsdC50YvSm9GC0YvSmyDQsNC3INGC0q/RgdC10LTRli7QodC10LHQtdCx0ZYg0LDQvdCw0YHRi9C90YvSoyDRgdKv0YLRliDTmdC70ZYg0YLQvtC70YvSmyDQtNC10YDQu9GW0Log0pvQsNC70YvQv9GC0LDRgdGL0L8g0q/Qu9Cz0LXRgNC80LXRg9GW0L3QtSzQs9C10LzQvtC00LjQvdCw0LzQuNC60LDQu9GL0psg0LXRgNC10LrRiNC10LvRltC60YLQtdGAINC80LXQvSDQsdKv0LnRgNC10LrRgtC10L0g0YLRi9GBINC20L7Sk9Cw0LvRgtGD0LvQsNGAINGB0LXQsdC10L8g0LHQvtC70YPRiyDRi9Kb0YLQuNC80LDQuy4g0KHQvtC90YvQvNC10L0g0pvQvtGB0LAg0LHQsNC70LDQu9Cw0YDQtNCw0pPRiyDQsdKv0LnRgNC10LrRgtGW0qMg0pvQsNC90LzQtdC9INKb0LDQvNGC0LDQvNCw0YHRi9C3INC10YLRltC70YPRliDQttC+0pPQsNGA0Ysg0LTQtdKj0LPQtdC50LTQtS7QltCw0qPQsCDRgtGD0YvQu9KT0LDQvSDQutC10LfQtNC1INCw0LvSk9Cw0YjSm9GLIDEyINGB0LDSk9Cw0YLRgtCwINC90LXRgdC10L8g0LzSr9C70LTQtdC8INCx0L7Qu9C80LDQudC00YssMjQg0YHQsNKT0LDRgiDRltGI0ZbQvdC00LUgMS0yINGI0LDQvNCw0YHRi9C90LTQsCwyLTMg0YLTmdGD0LvRltC60YLQtdGA0ZYg0L3QtdGB0LXQvyDQsdOp0LvRgyDQttC+0pPQsNGA0YvQu9Cw0LnQtNGLLtCQ0LsgMy00INGC05nRg9C70ZbQutGC0LUgNi04INCw0YDQsNGB0YvQvdC00LAg0L3QtdGB0LXQvyDRiNGL0pPQsNGA0LDQtNGLLtCh05nQudC60LXRgdGW0L3RiNC1INCw0LvRgtGLINCw0Lkt0LHRltGAINC20LDRgdGL0L3QtNCwIDE1LTE2INGA0LXRgizQsNC7INC905nRgNC10YHRgtC1IDIwLTI1INGA0LXRgiDQsdC+0LvRgdCwLDItMyDQttCw0YHRgtCwIDctOCDRgNC10YIs0LzQtdC60YLQtdC/INC20LDRgdGL0L3QsCDQutC10LvQs9C10L3QtNC1IDUtNiDRgNC10YIg0L3QtdGB0LXQvyDRiNGL0pPQsNGA0YMg0pvQsNC70YvQv9GC0Ysg0LrTqdGA0YHQtdGC0LrRltGIINCx0L7Qu9GL0L8g0YLQsNCx0YvQu9Cw0LTRiy7QkdKx0Lsg0LrTqdGA0YHQtdGC0LrRltGI0YLQtdGAINCx0LDQu9Cw0L3Ri9KjINKb0L7RgdGL0LzRiNCwINGB0rHQudGL0pvRgtGL0psg0pvQsNCx0YvQu9C00LDRg9GL0L3QsCzQt9Cw0YIg0LDQu9C80LDRgdGDINC/0YDQvtGG0LXRgdGW0L3RltKjINKb0LDRgNKb0YvQvdC00YvQu9GL0pPRi9C90LAg0LHQsNC50LvQsNC90YvRgdGC0Ysg06nQt9Cz0LXRgNGW0L8g0L7RgtGL0YDQsNC00Ysu0JbTmdC90LUg0LHQsNC70LDQtNCw0pPRiyDRgdGDLdGC0rHQtyDQsNC70LzQsNGB0YPRi9C90YvSoyDQtNKx0YDRi9GBINC10LrQtdC90LTRltCz0ZbQvSDQutOp0YDRgdC10YLQtdC00ZYu0J7QuyDQsdKv0LnRgNC10LrRgtGW0qMg0YTQuNC70YzRgtGA0LDRhtC40Y/Qu9GL0psg0pvQsNCx0ZbQu9C10YLRltC90ZbSoyDRgtOp0LzQtdC9INCx0L7Qu9GD0YvQvdCwLNCy0LDQt9C+0L/RgNC10YHRgdC40L3QvdGW0qMg0LHSr9C50YDQtdC6INGC0q/RgtGW0LrRiNC10LvQtdGA0ZbQvdC1INC00rHRgNGL0YEg05nRgdC10YAg0LXRgtC/0LXRg9GWINGB0LDQu9C00LDRgNGL0L3QsNC9INC+0YDQs9Cw0L3QuNC30LzQvdC10L0g0LrTqdC/0YLQtdC/INGB0YMg0YjRi9KT0YvQvyDQutC10YLRg9GW0LzQtdC9INGC0ZbQutC10LvQtdC5INCx0LDQudC70LDQvdGL0YHRgtGLLtCh0L7QvdGL0LzQtdC9INKb0LDRgtCw0YAg0LDQvdCwINGB0q/RgtGW0LzQtdC9INCx0LDQu9CwINCw0pPQt9Cw0YHRi9C90LAg0LrTqdC/0YLQtdC/INGB0YMg0pvQsNCx0YvQu9C00LDRgyDQtNCwINC00LjRg9GA0LXQtyDRgdCw0L3Ri9C9INC20L7Sk9Cw0YDRi9C70LDRgtGD0YjRiyDRhNCw0LrRgtC+0YDQu9Cw0YAg0LHQvtC70LDQtNGLLtCQ0Lsg0LHRltC30LTRltKjINC20LDSk9C00LDQudC00LAgMiDQutKv0L0g0LHQvtC50Ysg0L3QtdGB0LXQvyDQsdC+0LvQvNCw0YPRiyDQv9Cw0YLQsNC70L7Qs9C40Y8g0LHQvtC70YPRi9C9INCx0L7Qu9C20LDQvNC00LDQudC00Ysu0JHSsdC7INC90LXRgdC10L8g0LbQvtC70LTQsNGA0YvQvdC00LDSk9GLINC40L3RhNC10LrRhtC40Y/Qu9GL0psg0pvQsNCx0YvQvdGDINC/0YDQvtGG0LXRgdGC0LXRgNGW0L3QtSDQttOZ0L3QtSDQttC+0pPQsNGA0YvQtNCwINCw0YLQsNC70pPQsNC9INOp0LfQs9C10YDRltGB0YLQtdGA0LPQtSDQsdCw0LnQu9Cw0L3Ri9GB0YLRiyDTqdC30LPQtdGA0LXQtNGW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2" table:style-name="ce1">
            <text:p>915342</text:p>
          </table:table-cell>
          <table:table-cell office:value-type="string" table:style-name="ce1">
            <text:p>russian</text:p>
          </table:table-cell>
          <table:table-cell office:value-type="string" table:style-name="ce1">
            <text:p>Билет 19.&amp;lt;br /&amp;gt; 1.Опишите особенности строения слухового анализатора у новорожденного?&amp;lt;br /&amp;gt; 2.К педиатру обратилась мама новорожденного ребенка с жалобами на отсутствие мочеиспускания в течении 2-х дней. Объясните отсутствие мочи у ребенка? И количество мочеиспусканий у новорожденного? &amp;lt;br /&amp;gt;</text:p>
          </table:table-cell>
          <table:table-cell office:value-type="string" table:style-name="ce1">
            <text:p>MS4g0J7RgdC+0LHQtdC90L3QvtGB0YLQuCDRgdGC0YDQvtC10L3QuNGPINGB0LvRg9GF0L7QstC+0LPQviDQsNC90LDQu9C40LfQsNGC0L7RgNCwINGDINC90L7QstC+0YDQvtC20LTQtdC90L3QvtCz0L4g0LLQutC70Y7Rh9Cw0Y7RgiDQsiDRgdC10LHRjyDRgtC+LNGH0YLQviDRgyDQvdC10LPQvjoxKdC90LDRgNGD0LbQvdGL0Lkg0YHQu9GD0YXQvtCy0L7QuSDQv9GA0L7RhdC+0LQt0YPQt9C60LjQuSDQuCAg0LrQvtGA0L7RgtC60LjQuSwgMinQsdCw0YDQsNCx0LDQvdC90LDRjyDQv9C10YDQtdC/0L7QvdC60LAt0YPRgtC+0LvRidC10L3QsCwg0LjQvNC10LXRgiDQsdC+0LvQtdC1INCz0L7RgNC40LfQvtC90YLQsNC70YzQvdC+0LUg0YDQsNGB0L/QvtC70L7QttC10L3QuNC1LCDRj9Cy0LvRj9GP0YHRjCDQutCw0Log0LHRiyDQvdC10LrQuNC8INC/0YDQvtC00L7Qu9C20LXQvdC40LXQvCDQstC10YDRhdC90LjQuSDRgdGC0LXQvdC60Lgg0L3QsNGA0YPQttC90L7Qs9C+INGB0LvRg9GF0L7QstC+0LPQviDQv9GA0L7RhdC+0LTQsCwgMynRgyDQvdC+0LLQvtGA0L7QttC00LXQvdC90L7Qs9C+INC10LLRgdGC0LDRhdC40LXQstCw0Y8g0YLRgNGD0LHQsC3RiNC40YDQvtC60LDRjyDQuCDQutC+0YDQvtGC0LrQsNGPLCA0KdCwINCyINGG0LXQu9C+0Lwg0YHQsNC8INGB0LvRg9GF0L7QstC+0Lkg0LDQvdCw0LvQuNC30LDRgtC+0YAg0Log0LzQvtC80LXQvdGC0YMg0YDQvtC20LTQtdC90LjRjyDRg9C20LUg0YHRh9C40YLQsNC10YLRgdGPINGB0YTQvtGA0LzQuNGA0L7QstCw0L3QvdGL0LwsINGC0L4g0LXRgdGC0Ywg0YDQtdCx0LXQvdC+0Log0YHQv9C+0YHQvtCx0LXQvSDRgNC10LDQs9C40YDQvtCy0LDRgtGMINC90LAg0YDQsNC30LvQuNGH0L3Ri9C1INC30LLRg9C60Lgg0YPQttC1INC/0YDQuCDRgNC+0LbQtNC10L3QuNC4LCDRjdGC0LjQvCDRjyDQtNGD0LzQsNGOINC4INC+0LHRitGP0YHQvdGP0LXRgtGB0Y8g0YLQvtGCINGE0LDQutGCLCDRh9GC0L4g0L3QvtCy0L7RgNC+0LbQtNC10L3QvdGL0LUg0L7QvtGH0LXQvdGMINGH0YPQstGB0YLQstC40YLQtdC70YzQvdGLINC6INC30LLRg9C60LDQvCjQvtGB0L7QsdC10L3QvdC+INCz0YDQvtC80LrQuNC8INGA0LXQt9C60LjQvCkuINCf0L7QvNC40LzQviDRjdGC0L7Qs9C+LNGD0LbQtSDQvdCwINC/0L7RgdC70LXQtNC90LjRhSDQvNC10YHRj9GG0LDRhSDQsdC10YDQtdC80LXQvdC90L7RgdGC0Lgg0YDQtdCx0LXQvdC+0Log0YHQv9C+0YHQvtCx0LXQvSDRgNC10LDQs9C40YDQvtCy0LDRgtGMINC90LAg0LHQvtC70YzRiNGD0Y4g0LLQvtC70L3RgyDQt9Cy0YPQutC+0LLRi9GFINC60L7Qu9C10LHQsNC90LjQuSDQuNC3LdC30LAg0LrQvtGB0YLQvdC+0LPQviDQv9GA0L7QstC10LTQtdC90LjRjyDQt9Cy0YPQutC+0LLQvtC5INCy0L7Qu9C90YsuINCSINGG0LXQu9C+0LwsINCyINC/0LXRgNCy0L7QtSDQstGA0LXQvNGPINC20LjQt9C90Lgs0YDQtdCx0LXQvdC+0Log0YDQtdCw0LPQuNGA0YPQtdGCINC90LAg0LfQstGD0Log0LLQt9C00YDQsNCz0LjQstCw0L3QuNC10Lwg0Lgg0L/Qu9Cw0YfQtdC8LiAgPGJyIC8+DQo8YnIgLz4NCjIuINCe0YLRgdGD0YLRgdGC0LLQuNC1INC80L7Rh9C4INGDINC90L7QstC+0YDQvtC20LTQtdC90L3QvtCz0L4t0Y/QstC70Y/QtdGC0YHRjyDQv9C+0LrQsNC30LDRgtC10LvQtdC8INGC0YDQsNC90LfQuNGC0L7RgNC90L7QuSDQvtC70LjQs9GD0YDQuNC4LCDRh9GC0L4g0YHRh9C40YLQsNC10YLRgdGPLdC90L7RgNC80L7QuSDRgyDRgNC10LHQtdC90LrQsC4g0JLQvtC30L3QuNC60LDQtdGCINC+0L3QsCDQsiDQv9C10YDQstGL0LUgMi0zINC00L3Rjy4g0K8g0LTRg9C80LDRjiAtINGN0YLQviDQvtCx0YrRj9GB0L3Rj9C10YLRgdGPINGC0LXQvCDRhNCw0LrRgtC+0LwsINGH0YLQviDRgyDQvdC+0LLQvtGA0L7QttC00LXQvdC90L7Qs9C+INCyINC/0LXRgNCy0YvQtSDQtNC90Lgg0LbQuNC30L3QuCDRgdC90LjQttC10L3QsCDRhNC40LvRjNGC0YDQuNGA0YPRjtGJ0LDRjyDRgdC/0L7RgdC+0LHQvdC+0YHRgtGMINC/0L7Rh9C60LguINCt0YLQviDQv9GA0L7QuNGB0YXQvtC00LjRgiDQstGB0LvQtdC00YHRgtCy0LjQuCDQvdC10YHQutC+0LvRjNC60LjRhSDQv9GA0LjRh9C40L0sINCy0LrQu9GO0YfQsNGPINGC0L4sINGH0YLQviDQutC+0LvQuNGH0LXRgdGC0LLQviDQutGA0L7QstC4LCDQv9GA0L7RgtC10LrQsNGO0YnQtdC5INGH0LXRgNC10Lcg0L/QvtGH0LrQuCDRgdC90LjQttC10L3Qviwg0LjQty3Qt9CwINGC0L7Qs9C+INGH0YLQviDRgdC90LjQttC10L0g0YHQtdGA0LTQtdGH0L3Ri9C5INCy0YvQsdGA0L7RgS4g0Jgg0L/QvtC70YPRh9Cw0LXRgtGB0Y8sINGH0YLQviDRhNC40LvRjNGC0YDQsNGG0LjQuCDQvdC1INC/0YDQvtC40YHRhdC+0LTQuNGCPdC80L7Rh9CwINC90LUg0L7QsdGA0LDQt9GD0LXRgtGB0Y8sINC4INC20LjQtNC60L7RgdGC0Ywg0L7RgdGC0LDQtdGC0YHRjyDQsiDQvtGA0LPQsNC90LjQt9C80LUuINCf0L7QvNC40LzQviDRjdGC0L7Qs9C+INGB0YPRidC10YHRgtCy0YPRjtGCINGC0LDQuiDQvdCw0LfRi9Cy0LDQtdC80YvQtS3Qv9C+0LPRgNCw0L3QuNGH0L3Ri9C1INGB0L7RgdGC0L7Rj9C90LjRjywg0L/RgNC40YHRg9GJ0LjQtSDQvdC+0LLQvtGA0L7QttC00LXQvdC90L7QvNGDLNCy0LrQu9GO0YfQsNGPINGC0YDQsNC90LfQuNGC0L7RgNC90YPRjiDQvtC70LjQs9GD0YDQuNGOLCDQutC+0LPQtNCwINC80L7Rh9C4INC90LUg0L7QsdGA0LDQt9GD0LXRgtGB0Y8uINCa0L7Qu9C40YfQtdGB0YLQstC+INC80L7Rh9C10LjRgdC/0YPRgdC60LDQvdC40Lkg0YMg0L3QvtCy0L7RgNC+0LbQtNC10L3QvdC+0LPQviDRgdC+0YHRgtCw0LLQu9GP0LXRgiAyMC0yNSDRgNCw0Lcg0LIg0YHRg9GC0LrQuC4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81" table:style-name="ce1">
            <text:p>915381</text:p>
          </table:table-cell>
          <table:table-cell office:value-type="string" table:style-name="ce1">
            <text:p>russian</text:p>
          </table:table-cell>
          <table:table-cell office:value-type="string" table:style-name="ce1">
            <text:p>Билет 19.&amp;lt;br /&amp;gt; 1.Опишите особенности строения слухового анализатора у новорожденного?&amp;lt;br /&amp;gt; 2.К педиатру обратилась мама новорожденного ребенка с жалобами на отсутствие мочеиспускания в течении 2-х дней. Объясните отсутствие мочи у ребенка? И количество мочеиспусканий у новорожденного? &amp;lt;br /&amp;gt;</text:p>
          </table:table-cell>
          <table:table-cell office:value-type="string" table:style-name="ce1">
            <text:p>MSkg0J7RgdC+0LHQtdC90L3QvtGB0YLQuCDRgdGC0YDQvtC10L3QuNGPINGB0LvRg9GF0L7QstC+0LPQviDQsNC90LDQu9C40LfQsNGC0L7RgNCwINGDINC90L7QstC+0YDQvtC20LTQtdC90L3QvtCz0L46INCh0LvRg9GF0L7QstC+0Lkg0LDQvdCw0LvQuNC30LDRgtC+0YAg0YMg0L3QvtCy0L7RgNC+0LbQtNC10L3QvdGL0YUt0Y3RgtC+INGB0LjRgdGC0LXQvNCwINCy0L7RgdC/0YDQuNGP0YLQuNGPINC4INC+0LHRgNCw0LHQvtGC0LrQuCDQt9Cy0YPQutC+0LIsINC60L7RgtC+0YDQsNGPINGDINGA0LXQsdC10L3QutCwINC90LDRh9C40L3QsNC10YLRgdGPINGA0LDQt9Cy0LjQstCw0YLRjNGB0Y8g0LXRidC1INCyINGD0YLRgNC+0LHQvdC+0Lwg0L/QtdGA0LjQvtC00LUg0Lgg0L/RgNC+0LTQvtC70LbQsNC10YIg0YHQvtCy0LXRgNGI0LXQvdGB0YLQstC+0LLQsNGC0YzRgdGPINC/0L7RgdC70LUg0YDQvtC20LTQtdC90LjRjy4g0J7RgdC+0LHQtdC90L3QvtGB0YLQuCDRgyDQvdC+0LLQvtGA0L7QttC00LXQvdC90YvRhTog0JDQvdCw0YLQvtC80LjRh9C10YHQutCw0Y8g0L3QtdC30YDQtdC70L7RgdGC0Yw6INC90LDRgNGD0LbQvdGL0Lkg0YHQu9GD0YXQvtCy0L7QuSDQv9GA0L7RhdC+0LQg0YPQt9C60LjQuSwg0YHQvtC00LXRgNC20LjRgiDQvtGB0YLQsNGC0LrQuCDQv9C10YDQstC+0YDQvtC00L3QvtC5INGB0LzQsNC30LrQuC4g0J7RgNCz0LDQvSDRgdC70YPRhdCwINGB0L7RgdGC0L7QuNGCINC40Lcg0LLQvdGD0YLRgNC10L3QvdC10LksINGB0YDQtdC00L3QtdC5INC4INC90LDRgNGD0LbQvdC+0Lkg0YfQsNGB0YLQuC4g0J7QvSDQvtGC0LLQtdGH0LDQtdGCINC30LAg0LLQvtGB0L/RgNC40Y/RgtC40LUg0LfQstGD0LrQsCwg0Lgg0LjRhSDQv9C10YDQtdC00LDRh9GDINCyINC80L7Qt9CzLiDQntGB0L7QsdC10L3QvdC+0YHRgtC4INGB0LvRg9GF0LAg0L3QvtCy0L7RgNC+0LbQtNC10L3QvdC+0LPQvjog0L3QsNGA0YPQttC90YvQuSDRgdC70YPRhdC+0LLQvtC5INC/0YDQvtGF0L7QtCDQutC+0YDQvtGC0LrQuNC5LCDQsdCw0YDQsNCx0LDQvdC90LDRjyDQv9C10YDQtdC/0L7QvdC60LAg0YPQv9C70L7RidC10L3QsCDQuCDRgNCw0YHQv9C+0LvQvtC20LXQvdCwINCz0L7RgNC40LfQvtC90YLQsNC70YzQvdC+LiDQldCy0YHRgtCw0YXQuNC10LLQsCDRgtGA0YPQsdCwINGC0LDQutC20LUg0LrQvtGA0L7RgtC60LDRjyDQuCDRiNC40YDQvtC60LDRjywg0YfRgtC+INC80L7QttC10YIg0LLQu9C40Y/RgtGMINC90LAg0LLQvtGB0L/RgNC40Y/RgtC40LUg0LfQstGD0LrQvtCyLiDQodC70YPRhdC+0LLQvtC5INCw0L3QsNC70LjQt9Cw0YLQvtGAINCw0L3QsNGC0L7QvNC40YfQtdGB0LrQuCDRgdGE0L7RgNC80LjRgNC+0LLQsNC9INGD0LbQtSDQv9GA0Lgg0YDQvtC20LTQtdC90LjQuCwg0Lgg0YDQtdCx0LXQvdC+0Log0YHQv9C+0YHQvtCx0LXQvSDQstC+0YHQv9GA0LjQvdC40LzQsNGC0Ywg0LfQstGD0LrQuCDRgNC10LDQs9C40YDRg9GPINC90LAg0L3QuNGFINC/0LvQsNGH0LXQvC4g0KEgNy040Lkg0L3QtdC00LXQu9C4INC20LjQt9C90Lgg0YDQtdCx0LXQvdC+0Log0L3QsNGH0LjQvdCw0LXRgiDQv9C+0LLQvtGA0LDRh9C40LLQsNGC0Ywg0LPQvtC70L7QstGDINCyINGB0YLQvtGA0L7QvdGDINC30LLRg9C60LAsINCwINGBIDMtNCDQvNC10YHRj9GG0LAg0LbQuNC30L3QuCDRgNCw0LfQu9C40YfQsNC10YIg0LPQvtC70L7RgSDQvNCw0LzRiy4g0JjRgdGB0LvQtdC00L7QstCw0L3QuNGPINGB0LvRg9GF0LAg0L/RgNC+0LLQvtC00Y/RgiDRgSDQv9C+0LzQvtGJ0YzRjiDQvtGB0LzQvtGC0YDQsCDRg9GI0L3QvtC5INGA0LDQutC+0LLQuNC90YssINGC0LDQutC20LUg0L7RgdC80LDRgtGA0LjQstCw0Y7RgiDQvdCw0YDRg9C20L3Ri9C5INGB0LvRg9GF0L7QstC+0Lkg0L/RgNC+0YXQvtC0LiDQn9C+0YHQu9C1INC+0YHQvNC+0YLRgNCwINC/0YDQvtCy0L7QtNGP0YIg0LTQtdC50YHRgtCy0LjQtSDQtNC70Y8g0L/RgNC+0LLQtdGA0LrQuCDQstC+0YHQv9GA0LjRj9GC0LjQtSDQt9Cy0YPQutCwLiDQkiDQsdC+0LvRjNGI0LjQvdGB0YLQstC1INGB0LvRg9GH0LDQtdCyINGN0YLQviDQv9GA0L7QuNC30LLQvtC00Y/RgiDRgSDQv9C+0LzQvtGJ0YzRjiDQv9C+0LPRgNC10LzRg9GI0LXQui4g0KTRg9C90LrRhtC40L7QvdCw0LvRjNC90LDRjyDQvdC10LfRgNC10LvQvtGB0YLRjDog0L/QvtGA0L7QuiDQstC+0YHQv9GA0LjRj9GC0LjRjyDQt9Cy0YPQutCwINGDINC90L7QstC+0YDQvtC20LTQtdC90L3Ri9GFINCy0YvRiNC1INGH0LXQvCDRgyDQstC30YDQvtGB0LvRi9GFLiDQm9GD0YfRiNC1INCy0YHQtdCz0L4g0LLQvtGB0L/RgNC40L3QuNC80LDRjtGCINC90LjQt9C60L7Rh9Cw0YHRgtC+0YLQvdGL0LUg0LfQstGD0LrQuCDQuCDRgNCw0LfQu9C40YfQvdGL0LUg0YjRg9C80YsuINCT0YDQvtC80LrQuNC1INC4INGA0LXQt9C60LjQtSDQt9Cy0YPQutC4INCy0YvQt9GL0LLQsNGO0YIg0YDQtdGE0LvQtdC60YLQvtGA0L3QvtC1INCy0LfQtNGA0LDQs9C40LLQsNC90LjQtSDRgNC10LHQtdC90LrQsC4g0J3QvtCy0L7RgNC+0LbQtNC10L3QvdGL0LUg0LvRg9GH0YjQtSDQstC+0YHQv9GA0LjQvdC40LzQsNGO0YIg0YDQtdGH0YwsINC+0YHQvtCx0LXQvdC90L4g0LPQvtC70L7RgSDQvNCw0YLQtdGA0LguIDxiciAvPg0KPGJyIC8+DQoyKSDQpNC40LfQuNC+0LvQvtCz0LjRh9C10YHQutC4INCyINC90L7RgNC80LUg0YMg0L3QvtCy0L7RgNC+0LbQtNC10L3QvdGL0YUg0LIg0L/QtdGA0LLRi9C1IDI0LTQ4INGH0LDRgdC+0LIg0LbQuNC30L3QuCDQsdGL0LLQsNC10YIg0YLRgNCw0L3Qt9C40YLQvtGA0L3QsNGPINCw0L3Rg9GA0LjRjy4g0K3RgtC+INGB0LLRj9C30LDQvdC+INGBINC90LjQt9C60LjQvCDQv9C+0YLRgNC10LHQu9C10L3QuNC10Lwg0LbQuNC00LrQvtGB0YLQuCDQuCDQuNC3LdC30LAg0L3QtdC30YDQtdC70YvRhSDQv9C+0YfQtdC6LiDQkiDQv9C10YDQstGL0LUg0YfQsNGB0Ysg0LbQuNC30L3QuCDRgNC10LHQtdC90L7QuiDQv9C+0LvRg9GH0LDQtdGCINC90LXQsdC+0LvRjNGI0L7QtSDQutC+0LvQuNGH0LXRgdGC0LLQviDQs9GA0YPQtNC90L7Qs9C+INC80L7Qu9C+0LrQsCwg0YfRgtC+INC/0YDQuNCy0L7QtNC40YIg0Log0LzQsNC70YvQvCDQvtCx0YrQtdC80LDQvCDQvNC+0YfQuDsg0J3QtdC30YDQtdC70L7RgdGC0Ywg0L/QvtGH0LXQujog0YTRg9C90LrRhtC40Y8g0L/QvtGH0LXQuiDRgyDQvdC+0LLQvtGA0L7QttC00LXQvdC90YvRhSDRgNCw0LfQstC40YLQsCDQvdC1INC/0L7Qu9C90L7RgdGC0YzRji4g0KHQv9C+0YHQvtCx0L3QvtGB0YLRjCDQutC+0L3RhtC10L3RgtGA0LjRgNC+0LLQsNGC0Ywg0LzQvtGH0YMg0L7Qs9GA0LDQvdC40YfQtdC90LAsINC/0L7RjdGC0L7QvNGDINC80L7Rh9C10LjRgdC/0YPRgdC60LDQvdC40LUg0LzQvtC20LXRgiDQsdGL0YLRjCDRgNC10LTQutC40Lw7INCd0LXQsdC+0LvRjNGI0LjQtSDQv9C+0YLQtdGA0Lgg0LbQuNC00LrQvtGB0YLQuDog0JIg0YDQtdC30YPQu9GM0YLQsNGC0LUg0LTRi9GF0LDQvdC40Y8sINC40YHQv9Cw0YDQtdC90LjRjyDRgSDQv9C+0LLQtdGA0YXQvdC+0YHRgtC4INC60L7QttC4LCDQvtGB0L7QsdC10L3QvdC+INC/0YDQuCDRgtC10L/Qu9C+0Lkg0L7QutGA0YPQttCw0Y7RidC10Lkg0YLQtdC80L/QtdGA0LDRgtGD0YDQtSwg0L/RgNC+0LjRgdGF0L7QtNC40YIg0L3QtdC30LDQvNC10YLQvdC+0LUg0L/QvtGC0LXRgNGPINC20LjQtNC60L7RgdGC0LgsINGH0YLQviDRg9C80LXQvdGM0YjQsNC10YIg0L7QsdGK0LXQvCDQvNC+0YfQuC4g0KLQsNC60LbQtSDQv9GA0LjRh9C40L3QvtC5INC80L7QttC10YIg0LHRi9GC0Yw6INGE0LjQt9C40L7Qu9C+0LPQuNGH0LXRgdC60LDRjyDQs9C40L/QtdGA0YPRgNC40LrQtdC80LjRjy4g0JIg0L/QtdGA0LLRi9C1INC00L3QuCDQttC40LfQvdC4INGA0LXQsdC10L3QutCwINCy0L7Qt9C80L7QttC90LAg0L3QsNC60L7Qv9C70LXQvdC40LUg0LzQvtGH0LXQstC+0Lkg0LrQuNGB0LvQvtGC0YssINGH0YLQviDQv9GA0LjQstC+0LTQuNGCINC6INC+0LHRgNCw0LfQvtCy0LDQvdC40Y4g0LzQvtGH0LXQutC40YHQu9GL0YUg0LrRgNC40YHRgtCw0LvQu9C+0LIg0LIg0L/QvtGH0LrQsNGFLiDQnNC+0YfQsCDRgdGC0LDQvdC+0LLQuNGC0YHRjyDRgdC60YPQtNC90L7QuSwg0LjQvdC+0LPQtNCwINC40LzQtdC10YIg0LrQuNGA0L/QuNGH0L3Ri9C5INC+0YLRgtC10L3QvtC6LiDQrdGC0L4g0LLRgNC10LzQtdC90L3QvtC1INGB0L7RgdGC0L7Rj9C90LjQtSDQutC+0YLQvtGA0L7QtSDQstC10LTQtdGCINC6INCy0YDQtdC80LXQvdC90L7QuSDRgdC90LjQttC10L3QuNC4INC+0LHRitC10LzQsCDQvNC+0YfQuC4g0JrQvtC70LjRh9C10YHRgtCy0L4g0LzQvtGH0LXQuNGB0L/Rg9GB0LrQsNC90LjQuCDRgyDQvdC+0LLQvtGA0L7QttC00LXQvdC90YvRhSDQsiDQv9C10YDQstGL0LUg0LTQvdC4OiAxLTIg0YDQsNC3INCyINC+0LHRitC10LzQtSAxMC0zMNC80LsuINCd0LAgMi0zINGB0YPRgtC60Lgg0LbQuNC30L3QuDog0YfQsNGB0YLQvtGC0LAg0LzQvtGH0LXQuNGB0L/Rg9GB0LrQsNC90LjQtSDRg9Cy0LXQu9C40YfQuNCy0LDQtdGC0YHRjyDQuCDQvtC90LAg0L/RgNC40LzQtdGA0L3QviDRgdC+0YHRgtCw0LLQu9GP0LXRgiA1LTEwINGA0LDQtyDQsiDRgdGD0YLQutC4LiDQmiDQutC+0L3RhtGDINC/0LXRgNCy0L7QuSDQvdC10LTQtdC70Lgg0LbQuNC30L3QuCDQutC+0LvQuNGH0LXRgdGC0LLQviDQvNC+0YfQtdC40YHQv9GD0YHQutCw0L3QuNC5IDIwLTI1INGA0LDQtyDQsiDRgdGD0YLQutC4LiA=</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Правильно - транзиторная олигоурия, а не анурия</text:p>
          </table:table-cell>
          <table:table-cell office:value-type="float" office:value="0" table:style-name="ce1">
            <text:p>0</text:p>
          </table:table-cell>
          <table:table-cell table:number-columns-repeated="16376"/>
        </table:table-row>
        <table:table-row table:style-name="ro1">
          <table:table-cell office:value-type="float" office:value="1066924" table:style-name="ce1">
            <text:p>1066924</text:p>
          </table:table-cell>
          <table:table-cell office:value-type="string" table:style-name="ce1">
            <text:p>russian</text:p>
          </table:table-cell>
          <table:table-cell office:value-type="string" table:style-name="ce1">
            <text:p>Билет 19.&amp;lt;br /&amp;gt; 1.Опишите особенности строения слухового анализатора у новорожденного?&amp;lt;br /&amp;gt; 2.К педиатру обратилась мама новорожденного ребенка с жалобами на отсутствие мочеиспускания в течении 2-х дней. Объясните отсутствие мочи у ребенка? И количество мочеиспусканий у новорожденного? &amp;lt;br /&amp;gt;</text:p>
          </table:table-cell>
          <table:table-cell office:value-type="string" table:style-name="ce1">
            <text:p>MS4g0KHQu9GD0YXQvtCy0L7QuSDQsNC/0L/QsNGA0LDRgiDRgyDQvdC+0LLQvtGA0L7QttC00LXQvdC90L7Qs9C+INC40LzQtdC10YIgMyDRh9Cw0YHRgtC4OiDQvdCw0YDRg9C20L3QvtC1INGD0YXQviwg0YHRgNC10LTQvdC10LUg0YPRhdC+INC4INCy0L3Rg9GC0YDQtdC90L3QtdC1INGD0YXQvi4g0J3QsNGA0YPQttC90YvQuSDRgdC70YPRhdC+0LLQvtC5INC/0YDQvtGF0L7QtCDQtNC+0YHRgtCw0YLQvtGH0L3QviDRg9C30LrQuNC5INC4INC60L7RgNC+0YLQutC40LksINGH0YLQviDQvtCx0YPRgdC70L7QstC70LjQstCw0LXRgiDQstC+0YHQv9GA0LjRj9GC0LjQtSDQt9Cy0YPQutC+0LIg0L3QvtCy0L7RgNC+0LbQtNC10L3QvdGL0LzQuC4g0KLQviDQtdGB0YLRjCDQvtC90Lgg0YHQu9GL0YjQsNGCINC30LLRg9C60LgsINC90L4g0L3QtSDRgdC70YPRiNCw0Y7RgiDQuNGFINC4INC90LUg0YDQtdCw0LPQuNGA0YPRjtGCLiDQoNCw0YHQv9C+0LvQvtC20LXQvdC40LUg0LHQsNGA0LDQsdCw0L3QvdC+0Lkg0L/QtdGA0LXQv9C+0L3QutC4INCz0L7RgNC40LfQvtC90YLQsNC70YzQvdC+0LUsINC4INC+0L3QsCDRgdC70YPQttC40YIg0L/RgNC+0LTQvtC70LbQtdC90LjQtdC8INCy0LXRgNGF0L3QtdC5INGH0LDRgdGC0Lgg0YHRgtC10L3QutC4INC90LDRgNGD0LbQvdC+0LPQviDRgdC70YPRhdC+0LLQvtCz0L4g0L/RgNC+0YXQvtC00LAsINC40Lct0LfQsCDRh9C10LPQviDRg9GC0L7Qu9GJ0LXQvdCwLiDQldCy0YHRgtCw0YXQuNC10LLQsCDRgtGA0YPQsdCwINGI0LjRgNC+0LrQsNGPINC4INC60L7RgNC+0YLQutCw0Y8sINCy0YHQu9C10LTRgdGC0LLQuNC1INGH0LXQs9C+INC80L3QvtCz0LjQtSDQstC+0YHQv9Cw0LvQuNGC0LXQu9GM0L3Ri9C1INC/0YDQvtGG0LXRgdGB0YssINC/0YDQvtGC0LXQutCw0Y7RidC40LUg0LIg0L3QvtGB0L7Qs9C70L7RgtC60LUg0LzQvtCz0YPRgiDQv9GA0L7QvdC40LrQsNGC0Ywg0LIg0YPRhdC+INC4INGA0LDQt9Cy0LjQstCw0LXRgtGB0Y8g0L7RgtC40YIgKNGN0YLQviDQtNC+0LLQvtC70YzQvdC+INGH0LDRgdGC0L7QtSDRj9Cy0LvQtdC90LjQtSDRgyDQtNC10YLQtdC5KS4g0KHRgNC10LTQvdC10LUg0YPRhdC+INC90LXQtNC+0YDQsNC30LLQuNGC0L4uINCS0L3Rg9GC0YDQtdC90L3QtdC1INGD0YXQviDRgtCw0LrQttC1INC90LXQtNC+0YDQsNC30LLQuNGC0L4uINCSINGG0LXQu9C+0Lwg0YHQu9GD0YXQvtCy0L7QuSDQsNC90LDQu9C40LfQsNGC0L7RgCDQsNC90LDRgtC+0LzQuNGH0LXRgdC60Lgg0YHRhNC+0YDQvNC40YDQvtCy0LDQvSDRhdGA0Y/RidC10LLQsNGPINC+0YHQvdC+0LLQsCDQvdC10LTQvtGB0YLQsNGC0L7Rh9C90L4g0YHRhNC+0YDQvNC40YDQvtCy0LDQvdCwLCDQstGB0LvQtdC00YHRgtCy0LjQtSDRh9C10LPQviDQv9GA0LggINGA0L7QtNCw0YUg0LzQvtC20LXRgiDQv9GA0L7QuNC30L7QudGC0Lgg0L/QtdGA0LXQu9C+0Lwg0YXRgNGP0YnQsC4g0JzQvtC70L7RgtC+0YfQtdC6LCDQvdCw0LrQvtCy0LDQu9GM0L3RjyDQuCDRgdGC0YDQtdC80LXRh9C60L4g0LDQvdCw0YLQvtC80LjRh9C10YHQutC4INGA0LDQt9Cy0LjRgtGLLiDQmtC+0LbQsCDRgtC+0L3QutCw0Y8g0Lgg0L3QtdC20L3QsNGPLiDQktGB0LUg0Y3RgtC+INC+0LHRg9GB0LvQvtCy0LvQuNCy0LDQtdGCINC+0YLRgdGD0YLRgdGC0LLQuNC1INGA0LXQsNC60YbQuNC4INGA0LXQsdC10L3QutCwINC90LAg0YDQsNC30LvQuNGH0L3Ri9C1INC30LLRg9C60LguINCe0L0g0L/Qu9C+0YXQviDQstC+0YHQv9GA0LjQvdC40LzQsNC10YIg0LfQstGD0LrQvtCy0YvQtSDQstC+0LvQvdGLID0g0L/Qu9C+0YXQviDRgdC70YvRiNC40YIuINCj0LbQtSDQuiDQutC+0L3RhtGDIDEg0LzQtdGB0Y/RhtCwINGA0LXQsdC10L3QvtC6INC90LDRh9C40L3QsNC10YIg0YDQtdCw0LPQuNGA0L7QstCw0YLRjCDQvdCwINC30LLRg9C60Lgg0Lgg0LzQvtC20LXRgiDRg9C30L3QsNGC0Ywg0LPQvtC70L7RgSDQvNCw0YLQtdGA0LguINCf0L7Qt9C20LUg0L3QsNGH0LjQvdCw0LXRgiDQv9C+0LLQvtGA0LDRh9C40LLQsNGC0Ywg0LPQvtC70L7QstGDINCyINGB0YLQvtGA0L7QvdGDINC30LLRg9C60LAuPGJyIC8+DQoyLiDQntGC0YHRg9GC0YHRgtCy0LjQtSDQvNC+0YfQtdC40YHQv9GD0YHQutCw0L3QuNGPINGDINC90L7QstC+0YDQvtC20LTQtdC90L3QvtCz0L4g0YDQtdCx0LXQvdC60LAg0LIg0YLQtdGH0LXQvdC40LUg0L/QtdGA0LLRi9GFIDMg0LTQvdC10Lkg0L7Rh9C10L3RjCDQvNCw0LvQvtC1LCDQuCDRjdGC0L4g0YHQvtGB0YLQvtGP0L3QuNC1INC90LDQt9GL0LLQsNC10YLRgdGPINGC0YDQsNC90LfQuNGC0L7RgNC90LDRjyDQvtC70LjQs9GD0YDQuNGPLCwg0LrQvtGC0L7RgNC+0LUg0LIg0L3QvtGA0LzQtSDQv9GA0L7RhdC+0LTQuNGCINGH0LXRgNC10LcgMS0yINC00L3Rjy4g0KLQsNC6INC60LDQuiDRgyDQvdC+0LLQvtGA0L7QttC00LXQvdC90YvRhSDQtNC10YLQtdC5INC90LXQtNC+0YDQsNC30LLQuNGCINC80L7Rh9C10LjRgdC/0YPRgdC60LDRgtC10LvRjNC90YvQuSDQsNC/0L/QsNGA0LDRgiwg0LrQvtGC0L7RgNGL0Lkg0YHQvtGB0YLQvtC40YIg0LjQtyDQv9C+0YfQtdC6LCDQvNC+0YfQtdGC0L7Rh9C90LjQutCwLCDQvNC+0YfQtdCy0L7Qs9C+INC/0YPQt9GL0YDRjyDQuCDQvNC+0YfQtdC40YHQv9GD0YHQutCw0YLQtdC70YzQvdC+0LPQviDQutCw0L3QsNC70LAsINGC0LDQutC20LUg0L3QtdC00L7RgNCw0LfQstC40YLRiyDQs9C70LDQtNC60L7QvNGL0YjQtdGH0L3Ri9C1INGB0YTQuNC90LrRgtC10YDRiyDQvNC+0YfQtdC40YHQv9GD0YHQutCw0YLQtdC70YzQvdC+0LPQviDQutCw0L3QsNC70LAg0Lgg0LzQvtGH0LXQuNGB0L/Rg9GB0LrQsNC90LjQtSDQvdC10L/RgNC+0LjQt9Cy0L7Qu9GM0L3QvtC1LCDQv9C+0Y3RgtC+0LzRgyDQvNC+0YfQtdC40YHQv9GD0YHQutCw0L3QuNC1INC80L7QttC10YIg0LTQvtGF0L7QtNC40YLRjCDQtNC+IDIwLTIyINGA0LDQtyDQsiDRgdGD0YLQutC4ICjRjdGC0L4g0YPQttC1INC/0L7RgdC70LUg0YLRgNCw0L3QuNC30YLQvtGA0L3QvtC5INC+0LvQuNCz0L7Rg9GA0LjQuCkuINCf0YDQuCDRjdGC0L7QvCDRgyDQvdC+0LLQvtGA0L7QttC00LXQvdC90YvRhSDQtNC10YLQtdC5INC80L7Rh9C10LjRgdC/0YPRgdC60LDRgtC10LvRjNC90YvQtSDQv9GD0YLQuCDQvNC+0LPRg9GCINC30LDQutGD0L/QvtGA0LjQstCw0YLRjNGB0Y8g0YPRgNCw0YLQsNC80Lgg0Lgg0L7QutGB0LDQu9Cw0YLQsNC80LgsINC40Lct0LfQsCDRgtC+0LPQviDRh9GC0L4g0LzQvtGH0LAg0YHQu9C40YjQutC+0Lwg0LrQvtC90YbQtdC90YLRgNC40YDQvtCy0LDQvdC90LDRjyDQuCDQutC40YHQu9Cw0Y8g0YHRgNC10LTQsCDQvNC+0YfQuCwg0LLRgdC70LXQtNGB0YLQstC40LUg0YLQvtCz0L4g0YfRgtC+INC/0LvQvtGF0L4g0Y3Qu9C10LzQtdC90YLRiyDQv9C70L7RhdC+INGA0LXQsNCx0YHQvtGA0LHQuNGA0YPRjtGC0YHRjyDQsiDQv9GA0L7QutGB0LjQvNCw0LvRjNC90YvRhSDQuCDQtNC40YHRgtCw0LvRjNC90YvRhSDQv9C+0YfQtdGH0L3Ri9GFINC60LDQvdCw0LvRjNGG0LDRhSDQuCDQstGL0LTQtdC70Y/RjtGC0YHRjyDRgSDQvNC+0YfQvtC5LiDQndCwINC00LDQvdC90L7QvCDRjdGC0LDQv9C1INC20LjQt9C90Lgg0LzQvtC20L3QviDQt9Cw0LzQtdGC0LjRgtGMINC90LDQu9C40YfQuNC1INC60L7RgNC40YfQvdC10LLRi9GFINCy0YvQtNC10LvQtdC90LjQuCDQvdCwINC/0LXQu9C10L3QutC1INC40LvQuCDQsiDQv9Cw0LzQv9C10YDRgdC1INCy0YHQu9C10LTRgdGC0LLQuNC1INC90LDQu9C40YfQuNGPINGD0YDQsNGC0L7QsiDQsiDQvNC+0YfQtS4g0KHQviDQstGA0LXQvNC10L3QtdC8INGN0YLQviDQutC+0LvQuNGH0LXRgdGC0LLQviDRg9C80LXQvdGM0YjQsNC10YLRgdGPINGC0LDQuiDQutCw0Log0LvRg9GH0YjQtSDQvdCw0YfQuNC90LDQtdGCINGA0LDQsdC+0YLQsNGC0Ywg0LrQvtC90YbQtdC90YLRgNCw0YbQuNC+0L3QvdCw0Y8g0YTRg9C90LrRhtC40Y8g0L/QvtGH0LXQuiDQuCDRgdGE0LjQvdC60YLQtdGAINC80L7Rh9C10LjRgdC/0YPRgdC60LDRgtC10LvRjNC90L7Qs9C+INC60LDQvdCw0LvQsC4g0KLQsNC60LbQtSDQvtC70LjQs9GD0YDQuNGPINC80L7QttC10YIg0LHRi9GC0Ywg0LjQty3Qt9CwINC90LXQtNC+0YHRgtCw0YLQvtGH0L3QvtCz0L4g0L/QvtGC0YDQtdCx0LvQtdC90LjRjyDQstC+0LTRiyDQuCDQstC90LXQv9C+0YfQtdGH0L3Ri9GFINC/0L7RgtC10YDRjC4g0J/RgNC4INGN0YLQvtC8INC+0YLRgdGD0YLRgdGC0LLQuNC1INC80L7Rh9C10LjRgdC/0YPRgdC60LDQvdC40Y8g0LIg0YLQtdGH0LXQvdC40LUgMiDQtNC90LXQuSDRj9Cy0LvRj9C10YLRgdGPINC90LXQsdC70LDQs9C+0L/RgNC40Y/RgtC90YvQvCDRgtC10YfQtdC90LjQtdC8LCDQuCDQvNC+0LbQvdC+INC30LDQv9C+0LTQvtC30YDQuNGC0Ywg0L/QsNGC0L7Qu9C+0LPQuNGOLCDRgtCw0Log0LrQsNC6INC80L7QttC10YIg0LLQvtC30L3QuNC60L3Rg9GC0Ywg0YPRgNC10LzQuNGH0LXRgdC60LDRjyDQutC+0LzQsCwg0LLRgdC70LXQtNGB0YLQstC40LUg0L7RgtGA0LDQstC70LXQvdC40Y8g0LzQvtGH0LXQstC40L3QvtC5LCDQvNC+0YfQtdCy0L7QuSDQutC40YHQu9C+0YLQvtC5LCDQsNC80LzQuNCw0LrQvtC8INC4INC00YDRg9Cz0LjQvNC4INGC0L7QutGB0LjRh9C10YHQutC40LzQuCDQstC10YnQtdGB0YLQstCw0LzQuC4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6" table:style-name="ce1">
            <text:p>1066946</text:p>
          </table:table-cell>
          <table:table-cell office:value-type="string" table:style-name="ce1">
            <text:p>russian</text:p>
          </table:table-cell>
          <table:table-cell office:value-type="string" table:style-name="ce1">
            <text:p>Билет 19.&amp;lt;br /&amp;gt; 1.Опишите особенности строения слухового анализатора у новорожденного?&amp;lt;br /&amp;gt; 2.К педиатру обратилась мама новорожденного ребенка с жалобами на отсутствие мочеиспускания в течении 2-х дней. Объясните отсутствие мочи у ребенка? И количество мочеиспусканий у новорожденного? &amp;lt;br /&amp;gt;</text:p>
          </table:table-cell>
          <table:table-cell office:value-type="string" table:style-name="ce1">
            <text:p>MS4g0KMg0L3QvtCy0L7RgNC+0LbQtNC10L3QvdC+0LPQviDQutC+0YDQvtGC0LrQuNC5INC90LDRgNGD0LbQvdGL0Lkg0YHQu9GD0YXQvtCy0L7QuSDQv9GA0L7RhdC+0LQsINCwINC/0YDQvtGB0LLQtdGCINC10ZEg0YPQt9C60LjQuSwg0LHQsNGA0LDQsdCw0L3QvdCw0Y8g0L/QtdGA0LXQv9C+0L3QutCwINGP0LLQu9GP0LXRgtGB0Y8g0LDQvdCw0YLQvtC80LjRh9C10YHQutC40Lwg0L/RgNC+0LTQvtC70LbQtdC90LjQtdC8INCy0LXRgNGF0L3QtdC5INGB0YLQtdC90LrQuCDQvdCw0YDRg9C20L3QvtCz0L4g0YHQu9GD0YXQvtCy0L7Qs9C+INC/0YDQvtGF0L7QtNCwLiDQkdCw0YDQsNCx0LDQvdC90LDRjyDQv9C10YDQtdC/0L7QvdC60LAg0YDQsNGB0L/QvtC70LDQs9Cw0LXRgtGB0Y8g0LIg0LPQvtGA0LjQt9C+0L3RgtCw0LvRjNC90L7QuSDQv9C70L7RgdC60L7RgdGC0LgsINCi0L7QvdC60LDRjyDQuCDRgSDQstC+0LfRgNCw0YHRgtC+0LwgINGD0YLQvtC70YnQsNC10YLRgdGPLiDQodC70YPRhdC+0LLQvtC5INCw0L/Qv9Cw0YDQsNGCINGB0LDQvCDQv9C+INGB0LXQsdC1INGP0LLQu9GP0LXRgtGB0Y8g0YfRg9Cy0YHRgtCy0LjRgtC10LvRjNC90YvQvCDRgyDQvdC+0LLQvtGA0L7QttC00LXQvdC90L7Qs9C+LiDQndC+0LLQvtGA0L7QttC00LXQvdC90YvQuSDRgdC70YvRiNC40YIg0LLRgdGRINC4INC60L7Qs9C00LAg0YDQsNC30LLQuNCy0LDRjtGC0YHRjyDQvNGL0YjRhtGLINGI0LXQuCwg0L3QsNGH0LjQvdCw0LXRgiDQv9C+0LLQvtGA0LDRh9C40LLQsNGC0Ywg0LPQvtC70L7QstGDINCyINGB0YLQvtGA0L7QvdGDINC30LLRg9C60L7QstC+0LPQviDRgdC40LPQvdCw0LvQsC4g0JfQsNGC0LXQvCDQvdCw0YfQuNC90LDQtdGCINGD0LfQvdCw0LLQsNGC0Ywg0LPQvtC70L7RgSDQvNCw0YLQtdGA0Lgg0Lgg0L7RgtC70LjRh9Cw0YLRjCDQtdGRINC+0YIg0L7RgdGC0LDQu9GM0L3Ri9GFLiDQldCy0YHRgtCw0YXQuNC10LLQsCDRgtGA0YPQsdCwINC4INC90L7QstC+0YDQvtC20LTQtdC90L3Ri9GFINC60L7RgNC+0YLQutCw0Y8g0Lgg0YjQuNGA0L7QutCw0Y8sINC/0L7RjdGC0L7QvNGDINC70LXQs9C60L4g0LzQvtC20LXRgiDQstC+0YHQv9Cw0LvRj9GC0YzRgdGPLCDQsCDRgtCw0LrQttC1INCy0L7RgdC/0LDQu9C10L3QuNC1INC80L7QttC10YIg0L/QtdGA0LXRhdC+0LTQuNGC0Ywg0LIg0YHRgNC10LTQvdC10LUg0YPRhdC+INC+0YIg0LPQu9C+0YLQutC4LCDQuNC70Lgg0L3QsNC+0LHQvtGA0L7RgijQv9C+0YLQvtC80YMg0YfRgtC+INC10LLRgdGC0LDRhdC40LXQstCwINGC0YDRg9Cx0LAg0YHQvtC10LTQuNC90Y/QtdGCINGB0YDQtdC00L3QtdC1INGD0YXQviDRgSDQvdC+0YHQvtCz0LvQvtGC0LrQvtC5KS4g0KHQu9GD0YXQvtCy0L7QuSDQsNC90LDQu9C40LfQsNGC0L7RgCDRgdCy0Y/Qt9Cw0L0g0YEg0LLQtdGB0YLQuNCx0YPQu9GP0YDQvdGL0Lwg0LDQv9C/0LDRgNCw0YLQvtC8LCDQsCDQvtC90LAg0YDQsNC30LLQuNCy0LDQtdGC0YHRjyDRgdC+INCy0YDQtdC80LXQvdC10LwsINC60L7Qs9C00LAg0L3QvtCy0L7RgNC+0LbQtNC10L3QvdGL0Lkg0L3QsNGH0LjQvdCw0LXRgiDQtNC10YDQttCw0YLRjCDQs9C+0LvQvtCy0YMsINGB0LjQtNC10YLRjCDQuCDRhdC+0LTQuNGC0YwsINCwINGC0LDQutC20LUg0L7RgNC40LXQvdGC0LjRgNC+0LLQsNGC0YzRgdGPINCyINC/0YDQvtGB0YLRgNCw0L3RgdGC0LLQtS4gMi4g0JIg0L/QtdGA0LLRi9C1IDMg0LTQvdC4INGDINC90L7QstC+0YDQvtC20LTQtdC90L3QvtCz0L4g0LHRg9C00LXRgiDQvtGC0YHRg9GC0YHRgtCy0L7QstCw0YLRjCDQvNC+0YfQtdC40YHQv9GD0YHQutCw0L3QuNC1LCDRjdGC0L4g0L3QvtGA0LzQsCwg0YLQviDQtdGB0YLRjCDRhNC40LfQuNC+0LvQvtCz0LjRh9C10YHQutC40Lkg0L/RgNC+0YbQtdGB0YEsINCwINC90LUg0L/QsNGC0L7Qu9C+0LPQuNGPLiDQn9C+0YLQvtC80YMg0YfRgtC+INCyINC/0LXRgNCy0YvQtSDQtNC90Lgg0L3QvtCy0L7RgNC+0LbQtNC10L3QvdGL0Lkg0YLQtdGA0Y/QtdGCINCy0L7QtNGDINGH0LXRgNC10Lcg0LTRgNGD0LPQuNC1INC+0YDQs9Cw0L3Riywg0YLQsNC60LjQtSDQutCw0Log0LvQtdCz0LrQuNC1KCDQstGL0LTRi9GF0LDRjyDQv9Cw0YDRiyDQstC+0LTRiykg0Lgg0LrQvtC20YMuINCi0LDQutC20LUg0YTRg9C90LrRhtC40Y8g0L/QvtGH0LXQuiDQsiDQv9C10YDQstGL0LUg0LTQvdC4INC90L7QstC+0YDQvtC20LTQtdC90L3QvtCz0L4g0LHRg9C00LXRgiDRgdC90LjQttC10L3QsCwg0YHQutC+0YDQvtGB0YLRjCDQutC70YPQsdC+0YfQutC+0LLQvtC5INGE0LjQu9GM0YLRgNCw0YbQuNC4INCx0YPQtNC10YIg0YHQvdC40LbQtdC90LAsINCwINGC0LDQutC20LUg0YDQtdCw0LHRgdC+0YDQsdGG0LjQvtC90L3QsNGPINGE0YPQvdC60YbQuNGPINC40LfQstC40YLRi9GFINC60LDQvdCw0LvRjNGG0LXQsiDRgtC+0LbQtSDQsdGD0LTQtdGCINGB0L3QuNC20LXQvdCwLiDQlNC40YHRgtCw0LvRjNC90YvQtSDQuNC30LLQuNGC0YvQtSDQutCw0L3QsNC70YzRhtGLINCx0YPQtNGD0YIg0YLRgNC+0L/QvdGLINC6INCQ0LvRjNC00L7RgdGC0LXRgNC+0L3RgyAo0LrQvtC90YLRgNC+0LvQuNGA0YPQtdC80LDRjyDRgNC10LDQsdGB0L7RgNCx0YbQuNGPKSwg0LAg0LDQu9GM0LTQvtGB0YLQtdGA0L7QvSDQsdGD0LTQtdGCINC30LDQtNC10YDQttC40LLQsNGC0Ywg0L3QsNGC0YDQuNC5LCDQsCDQstC80LXRgdGC0LUg0YEg0L3QsNGC0YDQuNC10Lwg0LHRg9C00LXRgiDQt9Cw0LTQtdGA0LbQuNCy0LDRgtGM0YHRjyDQuCDQstC+0LTQsC4g0J3QviDQvtGB0L3QvtCy0L3QvtC5INC/0YDQuNGH0LjQvdC+0Lkg0LHRg9C00LXRgiDRgdC90LjQttC10L3QuNC1INC60LvRg9Cx0L7Rh9C60L7QstC+0Lkg0YTQuNC70YzRgtGA0LDRhtC40LgsINGC0L4g0LXRgdGC0Ywg0YTRg9C90LrRhtC40Lgg0L/QvtGH0LrQuC4g0JfQsNGC0LXQvCDRgyDQvdC+0LLQvtGA0L7QttC00LXQvdC90L7Qs9C+INGB0LrQvtGA0L7RgdGC0Ywg0LrQu9GD0LHQvtGH0LrQvtCy0L7QuSDRhNC40LvRjNGC0YDQsNGG0LjQuCDQsdGD0LTQtdGCINC/0L7QstGL0YjQsNGC0YzRgdGPLCDQuCDQuNC3LdC30LAg0LzQsNC70L7Qs9C+INC+0LHRitC10LzQsCDQvNC+0YfQtdCy0L7Qs9C+INC/0YPQt9GL0YDRjyAoNTDQvNC7KSwg0L3QvtCy0L7RgNC+0LbQtNC10L3QvdGL0Lkg0LHRg9C00LXRgiDQsiDRgdGA0LXQtNC90LXQvCDQt9CwINC00LXQvdGMIDIwLTI1INGA0LDQtyDQvNC+0YfQtdC40YHQv9GD0YHQutCw0YLRjNGB0Y8u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Транзиторная олигурия называется</text:p>
          </table:table-cell>
          <table:table-cell office:value-type="float" office:value="0" table:style-name="ce1">
            <text:p>0</text:p>
          </table:table-cell>
          <table:table-cell table:number-columns-repeated="16376"/>
        </table:table-row>
        <table:table-row table:style-name="ro1">
          <table:table-cell office:value-type="float" office:value="915028" table:style-name="ce1">
            <text:p>915028</text:p>
          </table:table-cell>
          <table:table-cell office:value-type="string" table:style-name="ce1">
            <text:p>english</text:p>
          </table:table-cell>
          <table:table-cell office:value-type="string" table:style-name="ce1">
            <text:p>Ticket 19.&amp;lt;br /&amp;gt; 1. Describe the anatomical physiological features of the structure of the auditory analyzer in a newborn?&amp;lt;br /&amp;gt; 2. The pediatrician was contacted by the mother of a newborn child with complaints of lack of urination for 2 days. Explain the lack of urine in the child? And the number of urinations in a newborn?&amp;lt;br /&amp;gt;</text:p>
          </table:table-cell>
          <table:table-cell office:value-type="string" table:style-name="ce1">
            <text:p>MSkgQW5hdG9taWNhbCBwaHlzaW9sb2dpY2FsIGZlYXR1cmVzIG9mIHRoZSBzdHJ1Y3R1cmUgb2YgdGhlIGF1ZGl0b3J5IGFuYWx5emVyIGluIGEgbmV3Ym9ybiA6LS0gPGJyIC8+DQogICAgYW5hdG9taWNzYWwgZmVzdHVyZXMgb2YgdGhlIHN0cnVjdHVyZSBvZiB0aGUgYXVkaXRvcnkgYW5hbHl6ZXIgaW4gYSBuZXdib3JuIGNoaWxkIDotIGluIGEgbmV3Ym9ybiBiYWJ5IGF1ZGl0b3J5ICBzeXN0NGVtIGlzIHVuZGVnb2VzIGluIGNydWNpYWwgZGV2ZWxvcG1lbnQgLiBleHRlcm5hbCBlYXI7IGluY2x1ZGluZyB0aGUgcGlubmEgYW5kIGVhciBjYW5uYWwuYXJlIHdlbGwgZm9ybWVkIGF0IGJpcnRoIC4gdGpoZSBlYXIgY2FubmFsIGhlbHBzIDY1dGhvIGRpcmVjdCBzb3VuZCB3YXZlcyBmb3J3ZXJkcyB0b3RoZSBtaWRkbGUgZWFyLiA8YnIgLz4NCm1pZGRsZSBlYXI7IGNhOWludGFpbnMgdGhlIHR5bXBpYyBtZW1icmFuZSBhbmQgdGhldyBvc3NpY2xlLnRoZXdzZSAgc3RydWN0dXJlIGFyZSBwbGF5cyBhIGNydWNpYWwgcm9sZSBpbiB0aGUgdHJhbnNtaXR0aW5nIHRoZSBzb3VuZCB2aWJyYXRpb24gZmVyb24gb3V0ZWZyIGVhciB0byBpbm5lciBlYXIuIDxiciAvPg0KaW5uZXIgZWFyIDogcmVzcG9uc2libGUgZm9lciAgY29udmVydGluZyBzb3VuZCB2aWJyYXRpb24gaW50byBlbGVjdHJvbmljIHNpZ25hbHMudGhhdCBjYW4gaW50ZXJwZXJhdGVkIHRvIHRoZSBicnphaW4uIDxiciAvPg0KdGhlIHZhcnRpYnVsYXIgc3lzdGVtIGVzc2VudGlhbCBieSBmb3IgdGhlIGJhbGFuY2UgaXMgYWxzbyBsb2NhdGVkIGluIHRoZSBpbm5lNXIgZWFyLmV1c3RhY2hhaW4gdHViZSA6IGNvbm5lY3RpbmcgdGhlIG1pZGRsZSBlYXIgdG8gdGhlIGJhY2sgb2YgdGhlIG5vc2UgdmFuZCB0aHJvdCwgaGVscHMgZXF1YWxpc2UgYWlyIHByZXNzdXJlIGFuZCBicmFpbiBmbHVpZCBmcm9tIHRoZSBtaWRkbGUgZWFyLiA8YnIgLz4NCm1ldHVyYXRpbmcgb2YgaGVhcmluZyBwYXRod2F5czogdGhlIG51cmFsIHBhdGh3YXlzIHJlc3BvbnNpYmw0ZTQgZm9yIGhlYXJpbmcgY29udGludWUgdG8gbWF0dXJlIGFmdGVyIGJpcnRoLiAgICAgICAgICAgICAgICAgICAgICAgICAgICAgICAgICAgICAgICAgICAgPGJyIC8+DQo8YnIgLz4NCjxiciAvPg0KMikgdGhlIHBlZGlhdHJpY2lhbiB3YXMgY29udGFjdGVkIGJ5IHRoZSBtb3RoZXIgb2YgYSBuZXdib3JuIGNoaWxkIHdpdGggY29tcGxhaW50cyBvZiBsYWNrIG9mIHVyaW5hdGlvbiBmb3IgMiBkYXlzLiB0aGUgbGFjayBvZiB1cmluZSBpbiB0aGUgbmV3Ym9ybiBjaGlsZCA6LXRoZSBsYWNrIG9mIHVyaW5lIGluIHRoZSBjaGlsZCAsIHNwZWNpbGxhbGx5IGluIGZvciAyIGRheXMgLCBpcyBjb25jZXJ0aW5nIGFuZCBtYXkgaW5kOGljYXRlZCBhIHBvdGVudGlhbCBpc3N1ZXM7IGRlaHlkcmF0aW9uOyBuZXdib3JuIGFyZSBwcm9uZSB0byBkZWh5ZHJhdGlvbiAsIGlmIHRoZXkgYXJlIG5vdCByZWNldmluZyAgc3VmZmljaWVudCBmbHVpZHMsIGFyZSBleGVwcmllbmNpbmcgZXhzc2VpdmUgZmx1aWQgbG9zcy4gb3IgaGF2ZSBkaWZmaWN1bHRlcyBicmVhc3RmZWVkaW5nLjxiciAvPg0KdXJpbm5hcnkgdHJhY2sgaXNzdWVzOyBhbWF0b21pY2FsIGFibm9ybWlsaXRpZXMsb3Igb2JzdHJhY3Rpb24gaW4gdGhlIHVyaW5hcnkgdHJhY2sgY2FuIGltcGFjdCBub3JtYWwgdXJpbmUgZmxvdy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5687" table:style-name="ce1">
            <text:p>915687</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MS4g0JbQsNKj0LAg0YLRg9GL0LvSk9Cw0L0g0LHQsNC70LDQu9Cw0YDQtNGL0qMg0YLQvtKbINGW0YjQtdCz0ZbQvdC00LXQs9GWINCw0L3QsNGC0L7QvNC+LdGE0LjQt9C40L7Qu9C+0LPQuNGP0LvRi9KbINC10YDQtdC60YjQtdC70ZbQutGC0LXRgNCz0LUg0LrQtdC70YHQtdC6OiDQvtC70LDRgCDRgdCw0LvRi9GB0YLRi9GA0LzQsNC70Ysg0YLSr9GA0LTQtSDSsdC30YvQvSDQttOZ0L3QtSDRgtCw0YAs0LHSsdC70YjRi9Kb0LXRgtGC0LXRgNGWINC00LDQvNGL0LzQsNKT0LDQvSwg0LXRgNC10YHQtdC60YLQtdGA0LPQtSDSm9Cw0YDQsNKT0LDQvdC00LAg0LTQuNCw0LzQtdGC0YDRliDQutGW0YjRli4g0J3TmdGA0LXRgdGC0LXQtNC1INGC0L7SmyDRltGI0LXQutGC0ZbSoyDSsdC30YvQvdC00YvSk9GLINGI0LDQvNCw0LzQtdC9IDYz0YHQvCDSm9Kx0YDQsNC50LTRiy4g06jQvNGW0YDRltC90ZbSoyDQsdGW0YDRltC90YjRliDQttGL0LvRi9C90YvSoyDRgdC+0qPRi9C90LTQsCA4M9GB0Lwg0LHQvtC70LDQtNGLLtOY0YDRliDSm9Cw0YDQsNC5INC+0LvQsNGA0LTRi9KjINKx0LfRi9C90LTRi9KT0Ysg0LHQsNC70LDQvdGL0qMg0LHQvtC50YvQvNC10L0g0YLQtdKjINCx0L7Qu9Cw0LTRiy4g0KHQvtC90YvQvNC10L0g0pvQsNGC0LDRgCDRiNGL0YDRi9GIINGC0q/Qt9C10YLRltC9INC205nQvdC1INC20LDSo9CwINGC0YPRi9C70pPQsNC9INC905nRgNC10YHRgtC10LvQtdGA0LTQtSDQt9OZ0YDQtNGW0qMgINOp0YLRg9GW0L0g0pvQsNC80YLQsNC80LDRgdGL0Lcg0LXRgtC10YLRltC9INC80LXQutC+0L3QuNC50LTRltKjINOp0YLRg9GW0L0g0LbQtdKj0ZbQu9C00LXRgtC10YLRltC9INCx0L7QutCw0Lsg0YLTmdGA0ZbQt9C00ZYg0LbQsNGB0YPRiNCw0LvQsNGAINC606nQv9GC0LXQvyDQsdC+0LvQsNC00YsuINCi0YPRi9C70pPQsNC9INC905nRgNC10YHRgtC10LvQtdGA0LTQtSDRgdCw0LvRjNC90YvQutGC0Lgg06nRgdGW0L3QtNGW0LvQtdGAINC20L7Smygy0LbQsNGB0YLQsNC9INC60LXQudGW0L0g0pvQsNC70YvQv9GC0LDRgdCw0LTRiyks0L7Qu9Cw0YAg0YLQvtC70YvSm9GC0LDQuSA2LTcg0LbQsNGB0pvQsCDQtNC10LnRltC9INKb0LDQu9GL0L/RgtCw0YHQsNC00YsuINCd05nRgNC10YHRgtC10LvQtdGA0LTQtSDQutC+0L3Rg9GBINGC05nRgNGW0LfQtNGWINC90YvRgdCw0L3Riywg0pvSsdGA0YIg0YLTmdGA0ZbQt9C00ZYg06nRgdGW0L3QtNGW0LvQtdGA0ZYg0LHQsNGALtCd05nRgNC10YHRgtGW0LvQtdGA0LTRltKjINGC0L7SmyDRltGI0LXQs9GW0L3QtNC1INGB0YPQtNGLINGB0ZbSo9GW0YDRgyDSm9Cw0LHRltC70LXRgtGWINGC06nQvNC10L3QtNC10LPQtdC9LCDQsdKx0Lsg0LbQuNGWINCx0L7RgSDQvdOZ0LbRltGB0LrQtSDTmdC60LXQu9C10LTRli4g0KLQvtKbINGW0YjQtdC6INGW0YjRltC90LDRgNCwINGB0ZbSo9GW0YDRltC70LPQtdC9INGC0LDSk9Cw0LzQvdCw0L0g0YHRltKj0ZbRgNGW0LvQs9C10L0g0LfQsNGC0YLQsNGALCDRgdGDINC80LXQvSDRjdC70LXQutGC0YDQvtC70LjRgtGC0LXRgNC00ZYg0LrTqdGC0LXRgNC10LTRli4g0prQsNC70pPQsNC9INC80LDRgtC10YDQuNCw0LvQtNCw0YAg0L3TmdC20ZbRgSDQtNC10L8g0LDRgtCw0LvQsNGC0YvQvSDSm9Cw0YLRgtGLINC30LDRgtGC0LDRgCDQsdC+0LvRi9C/LCDRgtC+0psg0ZbRiNC10LrRgtC10L0g0pvQvtC30pPQsNC70LDQtNGLLCDRgtGW0Log0ZbRiNC10LrRgtC1INC20LjQvdCw0LvRi9C/LCDQsNC90YPRgSDQsNGA0pvRi9C70Ysg0YjRi9KT0LDRgNGL0LvQsNC00YsuIDxiciAvPg0KPGJyIC8+DQoyLiAyINC20LDRgdCw0YAg0LHQsNC70LDQtNCwINC00LDRg9GB0YvQvdGL0qMg0pvQsNGA0LvRi9KT0YPRiywg0q/RgNC80LXQu9GWINC206nRgtC10LssINC10L3RgtGW0LPRgywg05nQu9GB0ZbQt9C00ZbQutGC0ZbSoyDQsdC+0LvRg9GLINCx0rHQuyDQuNC90YHQv9C40YDQsNGC0L7RgNC70YvSmyDQtdC90YLRltCz0YPQtNGWINCx0L7Qu9C20LDQudC00YsuINCh0LXQsdC10LHRliDRgdGC0LXQvdC+0LfQtNGLINC70LDRgNC40L3Qs9C40YIg05nQtNC10YLRgtC1INC40L3Qs9Cw0LvQuNGP0YbQuNGP0L3Ri9KjINKb0LDRgtGL0YHRg9GLINGC0YvQvdGL0YEg0LbQvtC70LTQsNGA0YvQvdGL0qMg0YLQsNGA0YvQu9GD0YvQvNC10L0g0LrTqdGA0ZbQvdGW0YEg0YLQsNCx0LDQtNGLLiDQodGC0LXQvdC+0LfQtNGLINC70LDRgNC40L3Qs9C40YIg0L3QtdC80LXRgdC1INC60YDRg9C/LCDTmdC00LXRgtGC0LUg0LLQuNGA0YPRgdGC0YvSmyDQuNC90YTQtdC60YbQuNGP0pPQsCDQsdCw0LnQu9Cw0L3Ri9GB0YLRiyDQutOp0LzQtdC5INC80LXQvSDRgtGA0LDRhdC10Y/QvdGL0qMg0pvQsNCx0YvQvdGDINC80LXQvSDRltGB0ZbQvdGD0ZbQvdC10L0g0LHQvtC70LDQtNGLLiDQkdCw0LvQsNC70LDRgNC00LAg0YHRgtC10L3QvtC30LTRiyDQu9Cw0YDQuNC90LPRgtGC0ZYg0YLRg9GL0L3QtNCw0YLQsNC90Ysg0LDQvdCw0YLQvtC80LjRj9C70YvSmyDRhNCw0LrRgtC+0YAg0YLRi9C90YvRgSDQttC+0LvQtNCw0YDRi9C90YvSoyDRgtCw0YAsINGB0LDQu9GL0YHRgtGL0YDQvNCw0LvRiyDRgtKv0YDQtNC1INKv0LvQutC10L0g0YLRltC7INC606nQvNC10Lkg0LzQtdC9INGC0YDQsNGF0LXRjyDQsNGA0LDRgdGL0L3QtNCwINOp0YLQutGW0YAg0LHSsdGA0YvRiCDQttCw0YHQsNC50LTRiy4g0JXQvdGC0ZbQs9GD0LTRltKjINGC0YPRi9C90LTQsNGD0YvQvdCwINOZ0LrQtdC70LXRgtGW0L0gNCDRgdCw0L3QsNGC0YLRiyDSm9Cw0LzRgtC40LTRizog0LrQsNGA0LTQuNC+0LvQvtCz0LjRj9C70YvSmywg06nQutC/0LXQu9GW0LosINCw0YDQsNC70LDRgSDQttKv0YDQtdC6INC90LXQvNC10YHQtSDTqdC60L/QtdC70ZbQuiwg0LrQsNGA0LTQuNCw0LvRjNC00Ysg0LXQvNC10YEg0L3QtdC80LXRgdC1INOp0LrQv9C10LvRltC6INC10LzQtdGBLiDQmtOp0LzQtdC50LTRltKjINGB0YLQtdC90L7Qt9GLLSDQutC10qPRltGA0LTQtdC60YLRltKjINGC0LDRgNGL0LvRg9GLINC60LXQt9GW0L3QtNC1INC/0LDQudC00LAg0LHQvtC70LDRgtGL0L0g0LbQsNKT0LTQsNC5INC+0Lsg0LTQsNGD0YvRgdKb0LAg05nRgdC10YAg0LXRgtGW0L8sINGC0YvQvdGL0YEg0LDQu9GDINC20L7Qu9GL0L0g0LHRltGC0LXQvyDRgtCw0YHRgtCw0YPRiyDQvNKv0LzQutGW0L0uINCe0Lsg0YLRg9CwINCx0ZbRgtC60LXQvSDQvdC10LzQtdGB0LUg0LbQsNGA0LDSm9Cw0YLRgtCw0L0g0LTQsNC80YPRiyDQvNKv0LzQutGW0L0uINCa06nQvNC10LkgNSDQsdOp0LvRltC60YLQtdC9INGC0rHRgNCw0LTRizog0Y3Qv9C40LPQu9C+0YLRgtC40YEtINGC0LDQvNCw0psg0ZbRiNGDINC60LXQt9GW0L3QtNC1INGC0LDQvNCw0pvRgtGLINOp0LrQv9C10LPQtSDRgtKv0YHRltGA0LzQtdGD0ZYg0q/RiNGW0L0g0LbQsNCx0LDRgtGL0L0g0pvQsNKb0L/QsNKbLiDQs9C70L7RgtC40YEt0LTQsNGD0YvRgSDQsdCw0LnQu9Cw0LzQtNCw0YDRi9C9INKb0LDQvNGC0LjQtNGLLCDRgdGD0LHQs9C70L7RgtC40YEtINC60LXSo9GW0YDQtNC10LrRgtGW0qMg0LTQsNGD0YvRgSDRgdGL0LzQtNCw0YDRi9C90YvSoyDQsNGB0YLRi9C90LTQsNKT0Ysg0YLRgNCw0YXQtdGP0L3Ri9KjINC20L7Sk9Cw0YDSk9GLINC20LDSk9GL0L3QsCDQtNC10LnRltC90LPRliDRgtOp0LzQtdC90LPRliDQsdOp0LvRltCz0ZYu0KHRg9C/0YDQsNCz0LvQvtGC0LjRgS3QutOp0LzQtdC50LTRltKjINC20L7Sk9Cw0YDSk9GLINCx06nQu9GW0LPRliwg0LTQsNGD0YvRgSDRgdGL0LzQtNCw0YDRiy0g0LTQsNGD0YvRgSDRiNGL0pPQsNGA0YMg0q/RiNGW0L0g0YLQtdGA0LHQtdC70LXRgtGW0L0g0LXQutGWINGI0LDSk9GL0L0g0LHSsdC70YjRi9Kb0LXRgiDQttC+0LvQsNKT0YsuINCa06nQvNC10LnQtNGW0qMg0LrQtdC3LSDQutC10LvQs9C10L0g0LHTqdC70ZbQs9GWINGC0LDRgNGL0LvRgdCwINC+0Lsg0LrTqdC80LXQuSDRgdGC0LXQvdC+0LfRiyDQtNC10L8g0LDRgtCw0LvQsNC00YsuINCa06nQsdGW0L3QtdGB0LUg0LHSsdC7INGB0YPQsdCz0LvQvtGC0LjRgdC60LUg05nRgdC10YAg0LXRgtC10LTRli48YnIgLz4NCtCk0LjQt9C40L7Qu9C+0LPQuNGP0LvRi9KbINC10YDQtdC60YjQtdC70ZbQutGC0LXRgNGWINCx0L7QudGL0L3RiNCwOjEpINCx0LDQu9Cw0LTQsCDQutOp0LzQtdC50LTRltKjINGC0LDRgNC70YvSk9GLINC205nQvdC1INC60LXSo9GW0YDQtNC10Log0LDQudC80LDSk9GLINC20rHQvNGB0LDSmyDQttOZ0L3QtSDSm9C+0YDRiNCw0pPQsNC9INGC0ZbQvdC00LXRgNC80LXQvSDQvtKj0LDQuSDRgtCw0YDRi9C70LDQtNGLLiAyKdCx0LDQu9Cw0LvQsNGA0LTQsCDQtNCw0YPRi9GB0YLRi9KbINCx0LDQudC70LDQvNC00LDRgNGLINC20L7Sk9Cw0YDRiyDQvtGA0L3QsNC70LDRgdKb0LDQvSwg0L7Qu9Cw0YAg0pvRi9GB0pvQsCwg0LDQuyDQsdKx0LvRiNGL0pvQtdGC0YLQtdGAINC20L7Sk9Cw0YDRiyDSm9C+0LfSk9GL0YjRgtGL0pvSm9CwINC40LUuIDMp0LvQuNC80YTQsCDRgtGW0L3QtNC10YDRliDQvNC10L0g0pvQsNC9INGC0LDQvNGL0YDQu9Cw0YDRiyDQvNC+0Lsg0LHQvtC70pPQsNC90LTRi9Kb0YLQsNC9LCDSm9Cw0LHRi9C90YMg0LrQtdC30ZbQvdC00LUg0YLRi9C90YvRgSDQsNC70YMg0YLQtdC3INC90LDRiNCw0YDQu9Cw0L8sINGI0YvRgNGL0Ygg0pvQsNCx0LDRgtGL0L3Ri9KjINGW0YHRltC90YPRliDQttOZ0L3QtSDRgdCw0qPRi9C70LDRg9C00Ysg0L7QtNCw0L0g05nRgNGWINGC0LDRgNGL0LvRi9C/INC60YDRg9C/0YLRliDQv9C90LXQstC80L7QvdC40Y/Sk9CwINOZ0LrQtdC70LXQtNGWLiA0KdCR0rHQuyDQttCw0pPQtNCw0LnQtNGL0qMg0LTQsNC80YPRi9C90LAg0L3QtdC50YDQvi3RgNC10YTQu9C10LrRgtC+0YDRi9C70YvSmyDSm9C+0LfSk9GL0YjRgtGL0pPRi9C90YvSoyDQtNCwINC20L7Sk9Cw0YDQu9Cw0YPRiyDSr9C70LrQtdC9INGA0L7Qu9GMINCw0YLSm9Cw0YDQsNC00YsuICA=</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2-ші сұрақтың көмейдің қандай анатомо-физиологиялық ерекшелігімен байланысты? 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1066844" table:style-name="ce1">
            <text:p>1066844</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MdGB0rHRgNCw0pvSm9CwLCDQnNC10L3RltKjINGC0L7Qu9GL0psgINC20LDRg9Cw0LHRi9C8LSDQttCw0LvQv9GLINC90LXQs9GW0LfRltC90LXQvSDQsNC70pPQsNC90LTQsCDQttCw0qPQsCDRgtGD0pPQsNC9INCx0LDQu9Cw0LvQsNGA0LTQsCDRgtC+0psg0ZbRiNC10LrRgtGW0qMg0LDQvdCw0YLQvtC80L4t0YTQuNC30LjQvtC70L7Qs9C40Y/Qu9GL0psg0LXRgNC10LrRiNC10LvRltC60YLQtdGA0ZYg0LrTqdC/INC60LXQt9C00LXRgdC10LTRliAs0YHQtdCx0LXQsdGWINC10L3QtNGWINC00LDQvNGL0L8g0LrQtdC70LUg0LbQsNGC0pvQsNC9INC20LDSo9CwINGC0YPSk9Cw0L0g0YjQsNKb0LDQu9Cw0pvRgtCwINC00LDQvNGDINC/0YDQvtGG0LXRgdGWINOp0YLQtSDRgtC10LcsINOZ0YDRliDSm9Cw0YDSm9GL0L3QtNGLINC20q/RgNC10YLRltC9INCx0L7Qu9Cw0LTRiy7QotC+0LvRi9KbINKb0LDRgNKb0YvQvdC00Ysg0LTQsNC80YMg0LrQtdC30LXSo9GWINC20LDQvdCwINGC0YPQs9Cw0L0g0L3QsNGA0LXRgdGC0LXQtNC1IDEtMiDQsNC50YvQvdCw0L0g0LHQsNGB0YLQsNC70LDRgtGL0L0g0LHQvtC70YvQvyDQutC10LvQtdC00ZYuICDQotC+0psg0ZbRiNC10Log0LTQsNC80YPRiyAg0L7Qu9Cw0YDQtNGL0L0g0LHQsNGB0YLQsNC/0pvRiyDQutC10LfQtNC10L0g0LHQsNGB0pvQsNGI0LAg0LrSr9C50LPQtSAg0Y/Sk9C90Lgg0LbSsdC80YvRgSDRltGB0YLQtdGDINKb0LDRgNKb0YvQvdGL0L3Ri9KjINOp0LfQs9C10YDRg9GW0L3QtSzRgdC+0L3Ri9C80LXQvSDSm9Cw0YLQsNGAINGB0YvRgNGC0pvRiyDQutOp0YDRltC90ZbRgdGW0L3QtNC10LPRliDQtdGA0LXQutGI0LXQu9GW0LrRgtC10YDRltC90LUg0LHQsNC50LvQsNC90YvRgdGC0Ysg06nQt9Cz0LXRgNGW0YHRgtC10YAu0JHRltGA0ZbQvdGI0ZbQtNC10L0g0LbQsNC90LAg0YLRg9Cz0LDQvSDQsdCw0LvQsNC70LDRgNC00LAg0YPQt9GL0L3QtNGL0LPRiyDQvNC10L0g0L/RltGI0ZbQvdGW0L3RltKjINC10YDQtdC60YjQtdC70ZbQutGC0LXRgNGWICAt0LbQsNC90LAg0YLRg9Cz0LDQvSDQsdCw0LvQsNC70LDRgNC00LAg0YLQvtKbINGW0YjQtdC6INGB0LDQu9GL0YHRgtGL0YDQvNCw0LvRiyDRgtKv0YDQtNC1INGP0pPQvdC4ICDRg9C30YvQvSDQsdGL0YDQsNC6INGW0Ygg0LrRg9GL0YHRi9C90LTQsCDRgtC+0LvRi9Cz0YvQvNC10L0g0YHRi9C50YvQvyDRgtGD0YDQsNC00Ysg0YHQvtC90YvQvNC10L0g0LrQsNGC0LDRgCDRgtC+0Log0ZbRiNC10Log0ZbQu9C80LXQutGC0LXRgNGWINC00YPRgNGL0YEg0LrQsNC70YvQv9GC0LDRgdC/0LDQs9Cw0L0g0LrQtdC50LTQtSDRhdCw0L7RgtC40LrQsNC70YvQuiDQvtGA0L3QsNC70LDRgdGD0Ysg0LzRg9C80LrRi9C9INCx0L7Qu9GL0L8g0LrQtdC70LXQtNGWIC7QtdC60ZbQvdGI0ZbQtNC10L0gINC60LDQsdGL0YDQs9Cw0YHRi9C90YvQvSDQutGD0YDRi9C70YvQvNGL0L3QtNCw0LPRiyDQtdGA0LXQutGI0LXQu9GW0LPRliAs0YLQvtC6INGW0YjQtdC6INCx0YPQu9GI0YvQuiDQtdGCINC60LDQsdCw0YLRiyDRgtC+0LvRi9C6INC20LXRgtGW0LvQvNC10LPQtdC9INC/0LXRgNC40YHRgtCw0YLQuNC60LDQu9GL0psg0LrQvtC30LPQsNC70YvRgdGC0LDRgNGLINOZ0LvRgdGW0Lcs0YjRi9GA0YvRiNGC0Ysg0LrQsNCx0LDRgtGLINC905nQt9GW0Los0LrQsNC90LzQtdC9INC20LDQutGB0Ysg0LrQsNC80YLQsNC80LDRgdGL0Lcg0LXRgtGW0LvQs9C10L0gLdCx0YPQuyDQutCw0LHRi9C90YMg0L/RgNC+0YbQtdGB0YLQtdGA0ZbQvdC1INCx0LXQudGW0LzQtNGW0LvRltC60YLRliDQsNGA0YLRgtGL0YDQsNC00YsuINKv0YjRltC90YjRliDQsNC50pvRi9C9INC10YDQtdC60YjQtdC70ZbQutGC0LXRgNGWICDQv9C10YDQuNGB0YLQsNC70YzRgtC40LrQsCDQttOZ0L3QtSDQvNC+0YLQvtGA0LjQutCwINC/0LXRgNC40YHRgtCw0LvRjNGC0LjQutCw0YHRiyDQttC10YLRi9C70LzQtdCz0LXQvSDRgNC10YLRgdGL0Lcg0LbTmdC90LUg0LHQsNGP0YMg0LHQvtC70LDQtNGLLNGW0YjQtdC6INC80L7RgtC+0YDQuNC60LDRgdGLINC+0YDRgtCw0LvRi9C6INC20YPQudC60LUg0LbRg9C50LXRgdGL0L3Ri9C9INGC0L7Qu9GL0Log0LbQtdGC0YvQu9C80LXRg9GL0L3QtSDQsdCw0LnQu9Cw0L3Ri9GB0YLRiyDRgtC+0LvRi9C6INGD0LnQu9C10YHQv9C10LPQtdC9INCx0L7Qu9GL0L8g0LrQtdC70LXQtNGWIC7QnNCY0JrQoNCe0KTQm9Ce0KDQkCAt0YLRg9GL0LvQs9Cw0L0g0LrQtdC30LTQtSDRgtC+0psg0ZbRidC10Log0YHRgtC40YDQuNC70YzQtNGWINCx0L7Qu9Cw0LTRiyAs0LDQu9Cz0LDRiNC60Ysg0LrRg9C90LTQtdGA0Ysg0LDQvdCwINGB0YPRgtGL0L3QtNC10LPRiyDQv9GA0LXQsdC40L7RgtC40LrRgtC10YAg0LDRgdC10YDRi9C90LXQvSDQv9Cw0LnQtNCw0LvRiyDQvNC40LrRgNC+0YTQu9C+0YDQsCDQutCw0LvRi9C/0YLQsNGB0LAg0LHQsNGB0YLQsNC50LTRiy7RgdC+0L3Ri9C80LXQvSDQutCw0YLQsNGAICDQodCG0qLQhtCg0KMg0JbTmNCd0JUg0K3QmtCh0JrQoNCV0KbQmNCvIC3RgtC+0Log0ZbRiNC10LrRgtC1INGB0YPQtNGLINC205nQvdC1INC60LXQudCx0ZbRgCDRjdC70LXQutGC0YDQvtC70LjRgtGC0LXRgNC00ZYg0YHRltKj0ZbRgNGWINC60YvQt9C80LXRgtGWINOZ0LvRgdGW0Lcg0LHQvtC70LDQtNGLLNCw0LvQs9Cw0YjQutGLINC90LDQttGL0YEgINC+0LzRi9GA0LTRi9C9INCw0LvQs9Cw0YjQutGLIDI0INGB0LDQs9Cw0YLRi9C90LTQsCDQsdOp0LvRltC90LXQtNGWLNCx0YPQuyAg0ZbRiNC10Log06nRgtC60ZbQt9Cz0ZbRidGC0ZbQs9GW0L3RltKjINCx0LDRgCDQtdC60LXQvdGW0L0g0LrTqdGA0YHQtdGC0LXQtNGWLiDQodC+0L3Ri9C80LXQvSDQutCw0YLQsNGAINC60L7RgdGL0LzRiNCwINC10YDQtdC60YjQtdC70ZbQutGC0LXRgNGWLdGB0L7Sm9GL0YAg0ZbRiNC10Log0YPQu9C60LXQvdC00LXRgyDQttGW0L3QtSDQttGL0LvQttGL0LzQsNC70Ysg0LHQvtC70YPRiyDQvNGD0LzQutGL0L0u0KLRltC6INGW0YjQtdC60L/QtdC9INCw0L3QsNC70YzQtNGLINGB0YTQuNC90LrRgtC10YDQtNGW0qMg0YDQtdGC0LXRg9GI0ZYg0pvRi9C30LzQtdGC0ZYg0YLQvtC70YvSmyDQttC10YLRltC70LzQtdCz0LXQvSDQsdGD0Lsg0LTQtdGE0LXQutCw0YbQuNGP0L3Ri9C9INC10YDRltC60YLRliDQsdCw0pvRi9C70LDQvdCx0LDRg9GL0L0g0YLSr9GB0ZbQvdC00ZbRgNC10LTRli4gPGJyIC8+DQo8YnIgLz4NCjItINGB0rHRgNCw0pvSm9CwINGC0L7Qu9GL0psg0LbQsNGD0LDQsdGL0LwtINCx0rHQuyDQttC10YDQtNC1IDIg0LbQsNGB0LDRgCDQsdCw0LvQsNC90YvQvSDQsNC90LDRgdGL0L3Ri9C9INGI0LDQs9GL0LzQtNCw0YDRi9C90LAg0LzTmdC9INCx0LXRgNC10YLRltC9INCx0L7Qu9GB0LDQuiAgLNC00LDRg9GB0YvQvdGL0L0g0pvQsNGA0YvSk9GD0YvQvNC10L0gLNKv0YDQvNC10LvRliDQttOp0YLQtdC7LNC10L3RgtGW0LPRgyDQtdC60LXQvdGW0L0g0LDQudGC0LrQsNC9ICzQvtGB0Ysg0L/QvtGC0L7Qu9C+0LPQuNGP0LvRi9KbINGB0LjQvNC/0YLQvtC80LTQsNGAINC90LXQs9GW0LfRltC90LXQvSDQutCw0YDQsNC5INC+0YLRi9GA0YvQvyDQvNC10L0g0LrRgNGD0L8g0YHQuNC90LTRgNC+0LzRi9C90LAg0L3QtdC80LXRgdC1INC20LXQtNC10Lsg0YHRgtC10L3QvtC30LTQsNGD0YjRiyDQu9Cw0YDQuNC90LPQvtGC0YDQsNGF0LXQuNGC0LrQtSDRgtOZ0L0g0LTQtdC/INC+0LnQu9Cw0LnQvNGL0L0gLtGB0LXQsdC10LHRliDQsdGD0Lsg0LbQsNCz0LTQsNC50LTQsCDQsdCw0LvQsNC00LAg0LHQsNC50LrQsNC70LDRgtGL0L0g0LXQvdGC0YvQs9GDINC40L3RgdC/0LjRgNCw0YLQvtGA0LvRiyDQtdC90YLRi9Cz0YMgLdGC0YvQvdGL0YEg0LDQu9GD0LTRi9C9INC60LjRi9C90LTQsNGD0Ysg0LrTqdCx0ZbQvdC1INGI0YPRi9C70LzQtdC9INC60L7QvNC10LrRiNGLINCx0YPQu9GI0YvQutC10YLRgtC10YDQtNGL0L0g0LrQsNGC0YvRgdGD0YvQvNC10L0g0LrQvtGA0YvQvdC10LTRli7QodC40LzQv9GC0L7QvNC00LDRgNC00YvQvSDQutC+0LzQtdC5INCw0L3QsNGC0L7QvNC+LdGE0LjQt9C40L7Qu9C+0LPQuNGP0LvRi9C6INC10YDQtdC60YjQtdC70YvQutGC0LXRgNGL0L3QtSDQsdCw0LnQu9Cw0L3Ri9GB0YLRiyAt0JrQvtC80LXQudC00YvQvSDRgtCw0YDQu9GL0LPRiyAyINC20LDRgdCw0YAg0LHQsNC70LDQvdGL0L0g0LrQvtC80LXQudGLINC10YDQtdGB0LXQutGC0LXRgNCz0LUg0LrQsNGA0LDQs9Cw0L3QtNCwINCw0L3QsNCz0YPRgNC70YvQvCDRgtCw0YAg0LzRi9GB0LDQu9GLICzQtNCw0YPRi9GBINGI0YvQvNGL0LvQtNGL0LPRiyDQsNGB0YLRi9C90LTQsNCz0Ysg0LHQvtC70YvQs9GLLtCa0LDQsdGL0L3RgyDQvdC10LzQtdGB0LUg0ZbRgdGW0L3RgyDQutC10LfRltC90LTQtSDQsdGD0Lsg0YLQsNGAINCw0LnQvNCw0Log0LbRi9C70LTQsNC8INCx0YvRgtC10LvRi9C/INGC0YvQvdGL0YEg0LDQu9GDINC60LjRi9C90LTQsNC50YLRi9C9INCx0L7Qu9GL0L8g0LrQtdC70LXQtNGWLtCh0L7QvdGL0LzQtdC9INC60LDRgtCw0YAg0LXRgNC10LrRiNC10LvRltC60YLQtdGA0ZbQvdC1ICzQqNC10LzRltGA0YjQtdC6INGC0ZbQvdC00LXRgNGW0L3RltKjINC20YPQvNGB0LDQutGC0YvQs9GLINC606nQvNC10Lkg0YjQtdC80ZbRgNGI0LXQtdC60YLQtdGA0ZYg0LbRg9C80YHQsNC6INGB0LXRgNC/0ZbQvNC00ZbQu9GW0LPRliDRgtC+0LzQtdC9INCx0YPQuyAg0Y/Qs9C90Lgg0YLRi9C90YvRgSDQttC+0LvQtNCw0YDRi9C90Ysg0L7Qv9GL0YDRi9C70YvQvyDQttCw0LHRi9C70YPRi9C80LXQvSAg0LHQtdC50ZbQvNC00ZbQu9GW0LogINC10YLQtdC00ZYs0LDRgdGL0YDQtdGB0LUg0YLRi9C90YvRgSDQsNC70LPQsNC9INC60LXQt9C00LUg0LHQvtC70LDQtNGLLtCi0LDQs9GL0LTQsCAs0YjRi9GA0YvRiNGC0Ysg0LrQsNCx0LDRgiDQsdC+0YDQv9GL0LvQtNCw0Log0LrQsNC/0LjQu9C70LjRj9GA0LvQsNGA0LPQsCDQsdCw0Lkg0LHQvtC70YvQvyDQutC10LvQtdC00ZYgIC7RgdC+0L3QtNGL0LrRgtCw0L0g0LrQsNCx0YvQvdGDINC60LXQt9GL0L3QtNC1INGW0YHRltC6INGC0LXQtyDQtNCw0LzQuNC00YvQtNCwICDRgtGL0L3Ri9GBINC20L7Qu9C00LDRgNGL0L3Ri9C9INGC0LDRgNGL0LvRgtGC0YvRgNCw0LTRiy7QkdCw0LvQsCDQutOp0LzQtdC50ZYg0LbQvtCz0LDRgNCz0Ysg0YHQtdC30ZbQvNGC0LDQuyDQsdC+0LvQs9Cw0L3RgtGL0LrRgtCw0L0g0YHQvtC90YvQvNC10L0g0LrQsNGC0LDRgCAgINGB0YvRgNGC0LrRiyDRgtGL0YLRi9GA0LrQtdC90LTRi9GA0LPRi9GI0YLQtdGA0LPQtSwg0LzRi9GB0LDQu9GLINCy0LjRgNGD0YEsINGB0YPRi9C6INCw0YPQsNCz0LAg0LrRg9GI0YLRiyDRgNC10YTRgNC10LrRgtC+0YDQu9GLINC20LXRgtGW0LvQvNC10LPQtdC90LTRltC60YLQtdC9ICDQvtGB0Ysg0LvQsNGA0LjQvdCz0L7RgdC/0LvQsNC30LzQvNC10L0g0Y/Qs9C90Lgg0LrQvtC80LXQudC00YvQvSDRgtCw0YDRi9C70YPRi9C80LXQvSDQttCw0YPQsNC/INCx0LXRgNC10LTRli4g0prQvtGA0YvRgtGL0L3QtNGL0LvQsNC5INC60LXQu9C1INCx0LDQu9Cw0LTQsNCz0Ysg0L/QsNGC0L7Qu9C+0LPQuNGP0LvRi9C6INGB0LjQvNC/0YLQvtC80LTQsNGAINC00LDRg9GL0YHRi9C90YvQvSDQutCw0YDRi9Cz0YPRiyzRg9GA0LzQtdC70Ysg0LbQvtGC0LXQuyzQtdC90YLRltCz0YMg0L7RgdGL0LvQsNGA0LTRi9C9INCx0LDRgNC70YvQs9GLICwg0LrTqdC80LXQudC00ZbSoyDQttCw0YEg0LXRgNC10LrRiNC10LvRltGC0LXRgNGW0L3QtSDQsdCw0LnQu9Cw0L3Ri9GB0YLRiyDQtNCw0LzQuNC00Ysu0LHRg9C7INC20LDQs9C00LDQudC00LAg0LTQtdGA0LXRgyDQtNCw0YDRi9Cz0LXRgNC70YvQuiDQsdCw0LrRi9C70LDRgyDQutC10YDQtdC6INCx0L7Qu9Cw0LTRiyzQttOZ0L3QtSDQtNC10YDQtdGDINC10LzQtNC10YMg0LrQtdGA0LXQuiAs0YHQtdCx0LXQsdGWINC20LDQu9Cz0LDQvSDQutGA0YPQvyDRgtGD0L3RiNGL0LPRgyDQutCw0YPRi9C/0YvQvSDRgtGD0LTRi9GA0LDQtNGLLg==</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63" table:style-name="ce1">
            <text:p>1066863</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0J3TmdGA0LXRgdGC0LXQvSDQsdCw0LvQsNC70LDRgNC00LAg0YLQvtKbINGW0YjQtdC60YLRltKjINC+0YDRgtCw0YjQsCDSsdC30YvQvdC00YvSk9GLICA2M9GB0Lwg0LHRltGA0ZbQvdGI0ZYg0LbRi9C70YvQvdGL0qMg0YHQvtKj0YvQvdCwINKb0LDRgNCw0LkgODMg0YHQvCDQtNC10LnRltC9INC20LXRgtC10LTRlizQutC10LnRltC9INGC0L7SmyDRltGI0LXQutGC0ZbSoyDSsdC30YvQvdC00YvSk9GLINGI0LDQvNCw0LzQtdC9INCx0LDQu9Cw0L3Ri9KjINCx0L7QudGLINC80LXQvSDQsdGW0YDQtNC10Lkg0LHQvtC70LDQtNGLINGC0YPRi9C70pPQsNC90LTQsCDRgtC+0psg0ZbRiNC10LrRgtGW0qMg0pvQsNC70YvQv9GC0LDRgdGD0Ysg0YLQvtC70YvSmyDQsNGP0pvRgtCw0LvQvNCw0LnQtNGLLtCd05nRgNC10YHRgtC1INCx0LDQu9Cw0LvQsNGA0LTQsCDRiNCw0YDQsdGL0LvRi9KbINOp0YHRltC90LTRltC70LXRgCDQsdC+0LvQvNCw0LnQtNGLIDIg0LbQsNGB0pvQsCDSm9Cw0YDQsNC5INKb0LDQu9GL0L/RgtCw0YHQsNC00YsgINC20LjQtdC6INGW0YjQtdC60YLRltKjINGC0LDRgdC/0LDQu9Cw0YDRiyDTqdGC0LUg05nQu9GB0ZbQtyDQsdC+0LvRi9C/INC606nRgNGW0L3QtdC00ZYg0YLQvtC70YvSmyDSm9Cw0LvRi9C/0YLQsNGB0L/QsNKT0LDQvSDQsdC+0LvQsNC00YsgNiDQsNC50LTQsNC9INC60LXQudGW0L0g0pvQsNC70YvQv9GC0LDRgdCw0LTRiyAg0JbQuNC10Log0ZbRiNC10LrRgtGW0qMg0YLQsNGB0L/QsNC70LDRgNGLINKb0LDQvNC/0LDQudC80LDQu9Cw0YDRiyDQvNC10L0g0YjQsNGA0LHRi9C70YvSmyDTqdGB0ZbQvdC00ZbQu9C10YDRliA2LTcg0LbQsNGB0pvQsCDSm9Cw0YDQsNC5INGC0L7Qu9GL0psg0pvQsNC70YvQv9GC0LDRgdCw0LTRiy4g0J3TmdGA0LXRgdGC0LXQvdGW0qMg0pvSsdGA0YIg0YLTmdGA0ZbQt9C00ZYg06nRgdGW0L3QtNGW0LvRgNGWINC60L7QvdGD0YEg0L/RltGI0ZbQvdC00ZYg0LHQvtC70YvQvyDQutC10LvQtdC00ZYg0rHQt9GL0L0g0YjQsNC20YvRgNKb0LDQudC00Ysg0LHQvtC70YPRi9C80LXQvSDQttC+0pPQsNGA0Ysg0pvQvtC30pPQsNC70YvRgdKb0LAg0LjQtSDQttOZ0L3QtSDRltGIINC60YPRi9GB0L3Ri9KjINC60LXQtyDQutC10LvQs9C10L0g0LbQtdGA0ZbQvdC00LUg0L7RgNC90LDQu9Cw0YHRg9GLINC80q/QvNC60ZbQvSDRgdC+0L3Ri9C80LXQvSDSm9Cw0YLQsNGAINGA0LXRgtGA0L7RhtC10YDQutCw0LvRjNC00ZYg0L7Sk9Cw0L0g0LrRltGA0YMg0LbQvtC70Ysg0LrQtdKjINCw0YjRi9C70pPQsNC9INCx0ZbRgNGW0L3RiNGWINC20LDRgdGC0LAg0pvQsNKb0L/QsNKb0YjQsCDSm9Cw0LvRi9C/0YLQsNGB0LDQtNGLLiDQotC+0psg0ZbRiNC10LrRgtGW0qMg0YHRg9C00YvSoyDSm9Cw0LnRgtCwINGB0ZbSo9GW0YDRgyDQttC9INGN0LLQsNC60YPQsNGC0L7RgNC70Yst0YDQtdC30LXRgNCy0LDRgNC70YvSmyDSm9GL0LfQvNC10YIg0pvQsNC80YLQsNC80LDRgdGL0Lcg0LXRgtC10LTRli7QntC70LDRgCDSm9C+0YDQtdC60YLRltC6INC30LDRgtGC0LDRgNC00Ysg0YvQtNGA0LDRg9GLINC20ZbSo9GW0YjQutC1INGW0YjQtdC60YLQtdC9INGC0q/RgdC60LXQvSDRhNC10YDQvNC10L3RgtGC0LXRgNC00ZbSoyDSm9Cw0YLRi9GB0YPQvNC10L0g0pPQsNC90LAg0LXQvNC10YEg0YHQvtC90YvQvNC10L0g0pvQvtGB0LAg0YLQvtKbINGW0YjQtdC60YLRltKjINCx0LDQutGC0LXRgNC40Y/Qu9Cw0YDRiyDQutOp0LzQtdCz0ZbQvNC10L3QtNC1INKb0L7RgNGC0YvQu9GL0L8g0L7Qu9Cw0YDQtNGLINGB0ZbSo9GW0YDRltC70YPRliDQsNGP0pvRgtCw0LvQsNC00Ysg0LbTmdC90LUg0L3TmdC20ZbRgdGC0ZbSoyDRgtKv0LfRltC70YMg0LbSr9GA0LXQtNGWLtCR0LDQu9C70LDRgNC00LAg0YLQvtKbINGW0YjQtdC60YLRltKjICDRiNGL0YDRi9GI0YLRiyDSm9Cw0LHQsNGC0YvQvdCwINGC05nQvSAg0YLQtdGA0LXSo9C00LXQu9Cz0LXQvSDSsdC90pPRi9C70LTQsNGAINC20LDQu9C/0LDSmyDRjdC/0LjRgtC10LvQuNC5INC20L7Sk9Cw0YDRiyDQtNOZ0YDQtdC20LXQtNC10LPRliAg0L/RgNC+0LvQuNGE0LXRgNCw0YbQuNGPINC20YvQu9C00LDQvNC00YvSk9GLLiDSmtCw0LvRi9C/0YLRiyDQttCw0pPQtNCw0LnQtNCwINGC0L7SmyDRltGI0LXQutGC0ZbSoyDRgdOp0Lsg0LHTqdC70ZbQvdGD0ZYg0LDQtyDQsdC+0LvQsNC00Ysg0LHRltGA0LDSmyDRiNGL0YDRi9GI0YLRiyDSm9Cw0LHQsNGC0YLRiyDQvNC10YXQsNC90LjQutCw0LvRi9KbINGC0ZbRgtGW0YDQutC10L3QtNGW0YDQs9C10L3QtNC1ICDQvdC10LzQtdGB0LUg0LfQsNKb0YvQvNC00LDQu9KT0LDQvdC00LAg0YHTqdC7INCx06nQu9GW0L3Rg9GWINC20L7Sk9Cw0YDQu9Cw0LnQtNGLIC4g0KLQvtKbINGW0YjQtdC60YLRltKjINC606nQv9GC0LXQs9C10L0g0LHSr9GA0LvQtdGAINC80LXQvSAg0LHQtdC30LTQtdGAINCx0L7Qu9Cw0LTRiy4g0JHQsNC70LDRgNC00LAg0YLQvtKbINGW0YjQtdC60YLRltKjINCx0rHQu9GI0YvSmyDQtdGC0YLRltC6INKb0LDQsdCw0YLRiyDQvdCw0YjQsNGAINOZ0Lsg0YLQvtGL0psg0pvQsNC70YvQv9GC0LDRgdC/0LDSk9Cw0L0g0YHQvtC7INKv0YjRltC9INGW0YjQtdC6ICDSm9C+0LfSk9Cw0LvRg9GLINOZ0LvRgdGW0Lcg0LHQvtC70LDQtNGLINC/0YDQtdGB0YLQsNC70YzRgtC40LrQsNGB0YsgINCw0Lcg0LHQvtC70pPQsNC90LTRi9Kb0YLQsNC9INC905nQttGW0YEg0LHRltGA0LDQtyDRg9Cw0pvRi9GCINKb0LDQu9GL0L8g0LrQtdGC0YMg0LzSr9C80LrRltC9INGW0YjQutGWINC205nQvdC1INGB0YvRgNGC0pvRiyDQsNC90LDQu9GM0LTRliDRgdGE0LjQvdC60YLQtdGA0ZYgIDItMyDQttCw0YHSm9CwINC00LXQudGW0L0g0YLQvtC70YvSmyDQttC10YLRltC70LzQtdC50LTRli48YnIgLz4NCjIgINCV0LrRliDQttCw0YHRgtCw0pPRiyDQsdCw0LvQsNC90YvSoyDQttCw0pPQtNCw0LnRiyDRgdC40L/QsNGC0YLQsNC80LDRgdGLINCx0L7QudGL0L3RiNCwINC40L3RgdC/0LjRgNGC0L7RgNC70YvSmyDQtdC90YLRltCz0YMg0YLRi9C90YvRgSDQsNC70YPQtNGL0qMg0pvQuNC50YvQvdC00LDRg9GLINCx0L7Qu9Cw0LTRiy7QkdKx0Lsg0LXQvdGC0ZbQs9GDICDQutOp0LHRltC1INC20L7Sk9Cw0YDRiyDRgtGL0L3Ri9GBINCw0LvRgyDRgtGL0L3Ri9GBINC20L7Qu9C00LDRgNGL0L3Ri9KjINGC0LDRgNGL0LvRg9GL0L3QsNC9INCx0LDQudC70LDQvdGL0YHRgtGLINC00LDQvNC40LTRiyAu0JTQsNGD0YvRgdGC0YvSoyDSm9Cw0YDQu9GL0pPRg9GLINKb0LDRgtGC0Ysg0LbTqdGC0LXQuyDQttOZ0L3QtSDQtdC90YLRltCz0YMg0YHRgtC10L3QvtC30LTRiyDQu9Cw0YDQuNC90LPQuNGC0YLRltKjINC60YDRg9C/0YLRi9KjINC90LXQs9GW0LfQs9GWINCx0LXQu9Cz0ZbQu9C10YDRliDQsdC+0LvQvyDRgtCw0LHRi9C70LDQtNGLIC7QodGC0LXQvdC+0LfQtNGL0psg0LvQsNGA0LjQvdCz0LjRgiDQvdC10LzQtdGB0LUg0LrRgNGD0L8g05nQtNC10YLRgtC1INCy0LjRgNGD0YHRgtGL0psg0LjQvdGE0LXQutGG0LjRj9KT0LAg0LHQsNC50LvQsNC90YvRgdGC0Ysg0LrTqdC80LXQuSDQvNC10L0g0YLRgNCw0YXQtdGP0L3RiyDSm9Cw0LHRi9C90YMg0LzQtdC9INGW0YHRltC90YMg0LHQvtC70LDQtNGLLtCR0LDQu9Cw0LvQsNGA0LTQsCDRgdGC0LXQvdC+0LfQtNGL0psg0LvQsNGA0LjQvdCz0LjRgtC60LUg0LDQu9GL0L8g0LrQtdC70LXRgtGW0L0g0LDQvdCw0YLQvtC80LjRjyDRhNC40LfQuNC+0LvQvtCz0LjRj9C70YvSmyDQtdGA0LXQutGI0LXQu9GW0LrRgtC10YDRli0g0KLRi9C90YvRgSDQsNC70YMg0LbQvtC70LTQsNGA0YvQvdGL0qMg0YLQsNGA0LvRi9KT0YssINC20ZbSo9GW0YjQutC1INC606nQvNC10Lkg0YHQsNKj0YvQu9Cw0YPRiyDQsdCw0LvQsNGA0LTQsCDQutOp0LzQtdC60LXQudC00ZbSoyDRgdCw0qPRi9C70LDRg9GLINGC0LDRgCDRgdC+0Lsg0YHQtdCx0LXQv9GC0ZYg0LDQt9KT0LDQvdCwINGW0YHRltC90YMg0LTQtSDQsNC50YLQsNGA0LvRi9Kb0YLQsNC5ICDRgtGL0L3Ri9GBINCw0LvRgyDQttC+0LvQtNCw0YDRi9C9INCx0ZbRgtC10L8g0pvQuNC50YvQvdC00YvSmyDRgtGD0LTRi9GA0LDQtNGLLiDQqNGL0YDRi9GI0YLRiyDSm9Cw0LHQsNGC0YLRi9KjINCx0L7RgNC/0YvQu9C00LDSm9GC0YvSk9GLLCDQsdCw0LvQsNGA0LTQsCDQutOp0LzQtdC5INC80LXQvSDQutOp0LzQtdC60LXQuSDQsNGB0YLRiyDSm9Cw0LHQsNGC0YLQsNGA0YvQvdC00LAg0YjRi9GA0YvRiNGC0Ysg0pvQsNCx0LDRgtGL0YDRiyDQsdC+0YDQv9GL0LvQtNCw0psg0LHSsdC7INC20LXRgNC00LUg0ZbRgdGW0L3RgyDRgtC10Lcg0LbTmdC90LUg0pvQsNGA0pvRi9C90LTRiyDQsdC+0LvQsNC00YsuINCo0LXQvNGW0YDRiNC10LrRgtGW0qMg0LbSsdC80YHSm9GC0YvSk9GLINC606nQvNC10LrQtdC5INGI0LXQvNGW0YDRiNC10LrRgtC10YDRliDRgtC+0LvRi9KbINKb0LDRgtCw0LnQvNCw0pPQsNC9INCx0rHQuyDRgtGL0L3Ri9GBINC20L7Qu9C00LDRgNGL0L0g0YLQsNGA0YvQu9GD0YvQvdCwINGB0LXQsdC10L8g0LHQvtC70LDQtNGLLiDQmNC80LzRg9C90LTRi9KbINC20q/QudC10L3RltKjINOZ0LvRgdGW0LfQtNGW0LPRliAy0LbQsNGB0YLQsNKT0Ysg0LHQsNC70LDQvdGL0qMg0LjQvNC80YPQvdC00YvSmyDQttKv0LnQtdGB0ZYg05nQu9GWINC20LXRgtGW0LvQvNC10LPQtdC9INGB0L7QuyDSr9GI0ZbQvSDQuNC90YTQtdC60YbQuNGP0pPQsCDQstC40YDRg9GB0pvQsCDSm9Cw0YDRgdGLINGC0rHRgNGDINKb05nQsdC70LXRgtGWINGC06nQvNC10L0uINCh0L7QvdGL0LzQtdC9INCx0ZbRgNCz0LXQvSDQu9C40LzRhNCwINGC0q/QudGW0L3QtNC10YAg0LzQtdC9INKb0LDQvSDRgtCw0LzRi9GA0LvQsNGAINC606nQvyDQsdC+0LvSk9Cw0L3QtNGL0pvRgtCw0L0g0pvQsNCx0YvQvdGDINC60LXQt9GW0L3QtNC1INGC0YvQvdGL0YEg0LbQvtC70LTQsNGA0Ysg0YLQtdC3INGC0LDRgNGL0LvRi9C/INKb0LDQu9Cw0LTRiyDQttC9INGI0YvRgNGL0YjRgtGLINKb0LDQsdCw0YLRgtGL0qMg0ZbRgdGW0L3Rg9GWINGB0LDSo9C70LDRg9C00YvSoyDRgtCw0YDRi9C70YPRiyDRgtGL0L3Ri9GBINKb0LjQudGL0L3QtNCw0YPRi9C90LAg0LDQu9GL0L8g0LrQtdC70LXQtNGWLiDQkdCw0LvQsNC90YvSoyDQutOp0LzQudGW0L3RltKjINC+0YDQvdCw0LvQsNGB0YPRiyDQvNC+0LnRi9C90L3Ri9KjINC20L7Sk9Cw0YDRiyDQsdC+0LvRltCz0ZbQvdC00LUg0L7RgNC90LDQu9Cw0YHQsNC00Ysg0YEyLdGBMyDQtNC10qPQtdC50ZbQvdC00LUg0YjQtdC80ZbRgNGI0LXQutGC0LXRgNGWINC20rHQvNGB0LDSmyDTmdC70YHRltC3INC905nQt9GW0Log0LjQutC10LzQtNGWINCx0L7Qu9Cw0LTRiywg0YjQtdC80ZbRgNGI0LXQuiDRgtGW0L3QtNC10YDRliDTmdC70YHRltC3INC60LvQsNGG0LjRhNC40LrQsNGG0LjRj9C70LDQvdKT0LDQvSAg0YHQvtC7INKv0YjRltC9INC20LDRgNCw0pvQsNGC0LDQvdGD0Ysg0LbQsNKb0YvQvNC00LDQvdGDINGC0LXQtyDQsdC+0LvQsNC00YssINCx0LDQu9Cw0YDQtNCwINC606nQvNC10LnQtNGW0qMg0LXSoyDRgtCw0YAg0LbQtdGA0ZYg0LbQsNC70pPQsNC9INC00LDRg9GL0YEg0LbQtdC70LHQtdC30LXQutGC0LXRgNGWINC80LXQvSDSm9Cw0LvSm9Cw0L3RiNCwINGI0LXQvNGW0YDRiNC10LrRgtC10YDRliDQsNGA0LDRgdGLINCx0rHQuyDQtdGA0LXQutGI0LXQu9GW0Log0LHQsNC70LDQu9Cw0YDQtNCwINC+0LHRgdGC0YDRg9C60YbQuNGP0pPQsCDQsdC10LnRltC8INC10LrQtdC90ZbQvSDQutOp0YDRgdC10YLQtdC00ZYg0LTQsNGD0YvRgSDQsdCw0LnQu9Cw0LzQtNCw0YDRiyDSm9GL0YHSm9CwLNGC0YvQvdGL0YEg0LDQu9GDINC20LjRltC70ZbQs9GWINC20L7Sk9Cw0YDRiyDTqdGC0LrQtdC90ZYg0YLRi9C90YvRgSDQttC+0LvQtNCw0YAg0LTQuNCw0LzQtdGC0YDRliDRgtCw0YAg0YHQvtC7INKv0YjRltC9INGC0LXQtyDRgtGL0L3Ri9GBINCw0LvQsNC00YsgLiDQntGB0YvQvdC00LDQuSDQtdGA0LXQutGI0LXQu9C10LPRltC60YLQtdGA0ZbQvdC1INCx0LDQudC70LDQvdGL0YHRgtGL0LTQsCDQsdCw0LvQsNC70LDRgNC00LAg0YLRi9C90YvRgSDQsNC70YMgINCw0YDRg9C70LDRgNGLINC80LXQvSDQttC40ZYg0LDRg9GL0YDQsNC00YsuIA==</text:p>
          </table:table-cell>
          <table:table-cell office:value-type="float" office:value="170348" table:style-name="ce1">
            <text:p>170348</text:p>
          </table:table-cell>
          <table:table-cell office:value-type="float" office:value="96" table:style-name="ce1">
            <text:p>9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3" table:style-name="ce1">
            <text:p>1066873</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MS4g0JbQsNC90LAg0YLRg9GD0YvQu9Cz0LDQvSDQvdCw0YDQtdGB0YLQtdC70LXRgNC00LUg0YLQvtC6INGW0YjQtdC6INGB0LDQu9GL0YHRgtGL0YDQvNCw0LvRiyDRgtKv0YDQtNC1INKx0LfRi9GL0L0g0LbQsNC90LUg0YLQsNCw0YAg0LHQvtC70YvQvyDQutC10LvQtdC00ZYuINCR0rHQu9C70YjRi9Kb0LXRgtGC0LXRgNGWINC00LDQvNGL0LzQsNKT0LDQvSDQttCw0L3QtSDQtdGA0LXRgdC10LrRgtC10YDQs9C1INKb0LDRgNCw0pPQsNC90L3QtNCw0LAg0LTQuNCw0LzQtdGC0YLRgNGWINC60ZbRiNGW0YDQtdC6INCx0L7Qu9GL0L8g0LrQtdC70LXQtNGWLiDQodC+0L3Ri9C80LXQvSDSm9Cw0YLQsNGAINC20LDQvdCwINGC0YPRi9C70pPQsNC90L0g0L3QsNGA0LXRgdGC0LXQu9C10YDQtNC10LPRliDRgtC+0psg0ZbRiNC10LrRgtGC0LUg0YjRi9GA0YvRiCDRgtGC0q/Qt9C30LXRgtGW0L0g0LbQsNC90LAg0YLRg9GL0LvSk9Cw0L0g0L3QsNGA0LXRgdGC0LXQvdC90ZbQvSDQsNC70pPQsNGI0pvRiyDQtNOZ0YDQtdGC0ZbQvdGW0qMg0pvQvtC30pPQsNC70YvRgdGL0L0g0pvQsNCw0LzRgtCw0LzQsNGB0YvQtyDQtdGC0LXRgtGW0L0g0LzQtdC60L7QvdC40LjQudC00ZbSoyDTqdGC0YPRltC9INC20LXQvdGW0LvQtNGC0YLQtdGC0ZbQvSDQsdC+0LrQsNCw0Lsg0LbQsNGB0YPRiNCw0LvQsNGA0YvQvdGL0qMg0LrTqdC/0YLRltCz0ZYg0LHQsNCw0YAuINCi0L7QuiDRltGI0LXQutGC0ZbSoyDQttCw0L3QsCDRgtGD0pPQsNC9INC90LDRgNC10YHRgtC10LvQtdGA0LTQtSDRgdGD0LTRiyDRgdGW0L3RltGA0YMg0pvQsNCx0ZbQu9C10YLRliDRgtOp0LzQtdC90LTQtdC50LTRliwg0LHSsdC7INC20LjRliDQsdC+0L7RgSDQvdCw0LbQtdGB0LrQtSDQsNC60LXQu9GD0ZYg0LzSr9C80LrRltC9LiDQotC+0psg0ZbRiNC10Log0ZbRiNGW0L3QsNGA0LAg0YHRltKj0ZbRgNGW0LvQs9C10L0g0YLQsNKT0LDQvNC90LDQvSDRgdGD0LTRiyDQttCw0L3QtSDQutC10LnQsdGW0YAg0pvQvtGA0LXQtdC60YLRltC6INC30LDRgtGC0LDRgCDQvNC10L0g0Y3Qu9C10LrRgtGA0L7Qu9C40YLRgtC10YDQtNGWINC60LXRgtGW0YDQtdC00ZYuINKa0LDQu9KT0LDQvSDQvNCw0YLQtdGA0LjQsNC7LCDQvdCw0LbRltGBINC00LXQtdC/INCw0YLQsNC70LDRgtGL0L0g0pvQsNGC0YLRiyDSm9Cw0LvQtNGL0pvRgtGC0LDQsNGAINGC0L7SmyDRltGI0LXQuiDQsNGA0pvRi9C70Ysg0pvQvtC30pPQsNC70LDQtNGLLCDRgtGW0ZbQuiDRltGI0LXQutGC0LUg0YHQsNKb0YLQsNC70LDQtNGLINC20LDQvdC1INCw0L3Rg9GBINCw0YDSm9GL0LvRiyDQtNC10L3QtdC00LXQvSDRiNGL0pPQsNGA0YvQu9Cw0LTRiy4g0J3QsNGA0LXRgdGC0LXQtNC10LPQs9GWINGC0L7SmyDRltGI0LXQutGC0ZbSoyDSsdC30YvQvdC00YvSk9GLINC+0YDRgtCw0YjQsCDQtdGB0LXQv9C/0LXQvSA2M9GB0Lwg0LDQuyDTqdC80ZbRgNGW0L3RltKjINCx0ZbRltGA0ZbQvdGI0ZYg0LbRi9C70YvQvdGL0qMg0YHQvtKj0YvQvdC00LAgODPRgdC8INC00LXQudGW0L0g0LHQvtC70LDQtNGLLiDTmNGA0ZYg0pvQsNGA0LDQuSDRgtC+0psg0ZbRiNC10LrRgtGW0qMg0rHQt9GL0L3QtNGL0pPRiyDRiNCw0LzQsNC80LXQvSDQsdCw0LvQsNC90YvSoyDQsdC+0LnRi9C80LXQvSDRgtC10qMg0LHQvtC70LDQtNGLLiDQotGD0pPQsNC9INC905nRgNC10YHRgtC10LTQtSDRgdCw0LvRjNC90LjQutGC0ZYg06nRgdGW0L3QtNGW0LvQtdGAINC20L7SmyDQsdC+0LvQsNC00YssINGC0L7SmyDRltGI0LXQutGC0ZbSoyDQu9C10L3RgtCw0LvQsNGA0Ysg05nRgNC10qMg0LHQtdC70LPRltC70LXQvdCz0LXQvSwg0YLQvtC6INGW0YjQtdC60YLRltKjINCx0LDRg9GL0YDRiyDQttC+0psuINCi0L7SmyDRltGI0LXQutGC0ZbSoyDQuNGW0ZbRgNGW0LzQtNC10YDRliDQs9Cw0YPRgdGC0YDQsNC70LDRgCDQttCw0L3QtSDRgdCw0LvRjNC90LjQutGC0ZYg06nRgdGW0L3QtNGW0LvQtdGAIDYtNyDQttGL0LvSk9CwINC00LXQudGW0L0g0YLSr9C/0LrRltC70ZbQutGC0ZYg0pvQsNC70YvQv9C/0YLQsNGB0LDQtNGLLiDQltCw0L3QsCDRgtGD0pPQsNC9INC90LDRgNC10YHRgtC10LTQtdCz0ZYg0pvSsdGA0YLRgtOZ0YDRltC30LTRliDTqdGB0ZbQvdC00ZbQvdGW0qMg0LrQvtC90YPRgSDRgtOZ0YDRltC30LTRliDQvdGL0YHQsNC90Ysg0LHQsNGALCDSsdC30YvQvSDQttCw0YDRi9Kb0YLRi9C9INGB0LDQu9C00LDRgNGL0L3QsNC9INKv0LvQutC10L0g0pvQvtC30pPQsNC70YvRgdKb0LAg0LjQtSDQttCw0L3QtSDRltGIINKb0YPRi9GB0YvQvdGL0qMg0LrQtdC3INC60LXQu9Cz0LXQvSDQsdOp0LvRltCz0ZbQvdC1LCDQvtC90YvQvSDRltGI0ZbQvdC00LUg0YDQtdGC0YDQvtGG0LXQutCw0LvRjNC00Ysg0L7RgNC90L3QsNC70LDRgdGC0YvRgNGL0LvRg9GLINC80LzSr9C80LrRltC9LCDQvtKT0LDQvSDQutGW0YDRgyDQutC10L0g0LDRiNGL0psg0LrQu9Cw0L/Qv9GL0L3QvdGL0qMg0pvQsNC70YvQv9GC0LDRgdGD0Ysg06nQvNGW0YDQtNGW0qMg0LHRltGA0ZbQvdGI0ZYg0LbRi9C70YvQvdC00LAg0L7RgNGL0L0g0LDQu9Cw0LTRiy4gICAgICAgICAgICAgICAgICAgICAgMi4g0JTQsNGD0YvRgdGL0L3Ri9KjINKb0LDRgNC70YvSk9GD0YssINKb0LDRgtGC0Ysg0LbTqdGC0LXQuywg0LzQsNC30LDRgdGL0LfQtNCw0L3RgyDQttCw0L3QtSDQtdC90YLRltCz0YMg0LHQsNGAINCx0LDQu9Cw0LTQsCDQsdCw0LnSm9Cw0LvQsNGC0YvQvSDQtdC90YLRgtGW0LPRgyDRgtKv0YDRliDQuNC90YHQv9C40YDQsNGC0L7RgNC70YvRi9KbINC10L3RgtGW0LPRgyDQsdC+0LvRg9GD0Ysg0LzSr9C80LrRltGW0L0sINOp0LnRgtC60LXQvdGWINGB0YLQtdC90L7Qt9C00Ysg0LvQsNGA0LjQvdCz0LjRgiDQttC40ZYg0LjQvdCz0LDQu9GP0YbQuNGPINC60LXQt9GW0L3QtNC1INGC0YvQvdGL0YEg0LbQvtC70LTQsNGA0YvQvdGL0qMg0YLQsNGA0YvRi9C70YPRi9C80LXQvSDQsdCw0LnQu9Cw0L3Ri9GB0YLRiy4g0KHRgtC10L3QvtC30LTRiyDQu9Cw0YDQuNC90LPQuNGCINC90LXQvNC10YHQtSDQutGA0YPQvywg05nQtNC10YLRgtC1INCy0LjRgNGD0YHRgtGL0psg0LjQvdGE0LXQutGG0LjRj9KT0LAg0LHQsNC50LvQsNC90YvRgdGC0Ysg0LHQvtC70YvQvyDQutC10LvQtdC00ZbRli4g0JrTqdC80LXQuSDQvNC10L0g0YLRgNCw0YXQtdGP0L3Ri9KjINKb0LDQsdGL0L3Rg9GLINC80LXQvSDRltGB0ZbQvdGD0ZbQvdC10L0g0LTQsNC80LjQtNGLLiDQkdCw0LvQsNC70LDRgNC00LDSk9GLINGB0YHRgtC10L3QvtC30LTRiyDQu9Cw0YDQuNC90LPQuNGC0YLRltKjINC00LDQvNGD0YvQvdCwINGL0pvQv9Cw0Lsg0LXRgtC10YLRltC9INCw0L3QsNGC0L7QvNC40Y/Qu9GL0psg0LHQtdC70LPRltC70LXRgNCz0LUg0YLRi9C90YvRgSDQsNC70YMg0LbQvtC70LTQsNGA0YvQvdGL0qMg0YLQsNGAINCx0L7Qu9GD0YssINGB0LDQu9GL0YHRgtGL0YDQvNCw0LvRiyDRgtKv0YDQtNC1INKv0LvQutC10L0g0YLRltC7INC20LDQvdC1INC606nQvNC10LnQuSDQvNC10L0g0YLRgNCw0YXQtdGPINCw0YDQsNGB0YvQvdC00LDSk9GLINOp06nRgtC60ZbRgCDQsdKx0YDRi9GIINC20LDRgtCw0LTRiy4g0JXQvdGC0ZbQs9GD0LTRltKjINC60LXSoyDQtNC40YTRhNC10YDQtdC90YbQuNCw0LvRjNC00Ysg0LTQuNCw0LPQvdC+0YHRgtC40LrQsNGB0YsgNCDQttCw0LvQv9GLINGB0LDQvdCw0YLRgtGLINKb0LDQvNC40LTRiy4g0JrQsNGA0LTQuNC+0LvQvtCz0LjRj9C70YvSmywg06nQutC/0LXQu9GW0LosINCw0YDQsNC70LDRgSDQttKv0YDQtdC6INC90LXQvNC10YHQtSDTqdC60L/QtdC70ZbQuiDQttCw0L3QtSDQutCw0YDQtNC40LDQu9C00Ysg0LXQvNC10YEg0LbQsNC90LUg06nQutC/0LXQu9GW0Log0LXQvNC10YEuINCa06nQvNC10LnQtNGW0qMg0YHRgtC10L3QvtC30YsgLSDQutC10qPRltGA0LTQtdC60YLRltKjINGC0LDRgNGL0LvRg9GLINC60LXQt9GW0ZbQvdC00LUg0L/QsNC50LTQsCDQsdC+0LvQsNGC0YvQvSDQttCw0pPQtNCw0LksINCx0rHQuyDQtNCw0YPRi9GB0pvQsCDTmdGB0YHQtdGAINC10YLRltC/LCDRgtGL0L3Ri9GBINCw0LvRgyDQttC+0LvRi9C9INCx0ZbRgtC10L8g0YLQsNGB0YLQsNGD0Ysg0LzSr9C80LrRltC9LiDQntC7INGC0YPQsCDQsdGW0YLQutC10L0g0L3QtdC80LXRgdC1INC20LDRgNCw0pvQsNGC0YLQsNC9INC00LDQvNC40LTRiy4g0JrTqdC80LXQuSA1INCx06nQu9GW0LrRgtC10L0g0YLSsdGA0LDQtNGLLiDQrdC/0LjQs9C70L7RgtGC0LjRgSAtINGC0LDQvNCw0psg0ZbRiNGDINC60LXQt9GW0L3QtNC1INGC0LDQvNCw0psg06nQutC/0LXQs9C1INGC0q/RgdC/0LXRg9GWINKv0YjRltC9INGC0YDQsNGF0LXRj9C90Ysg0LbQsNCx0LDRgtGL0L0g0pvQsNKb0L/QsNKbLiBHbG90dGlzIC0g0LTQsNGD0YvRgSDQsdCw0LnQu9Cw0LzQtNCw0YDRi9C9INKb0LDQvNC80YLQuNGC0YvQvSDQutOp0LzQtdC50LTRltKjINCx06nQu9GW0ZbQs9GWIFN1Ymdsb3RpcyAtINC60LXSo9GW0YDQtNC10LrRgtGW0qMg0LTQsNGD0YvRgSDRgdGL0LzQtNCw0YDRi9C90YvSoyDQsNGB0YLRi9C90LTQsNKT0Ysg0YLRgNCw0YXQtdGP0L3Ri9KjINC20L7Sk9Cw0YDSk9GLINC20LDSk9GL0L3QsCDQtNC10LnRltC90LPRliDQtdKjINGC06nQvNC10L3Qs9GWINCx06nQu9GW0LPRli4g0KHRg9C/0YDQsNCz0LvQvtGC0YLQuNGBIC0g0LrTqdC80LXQudC00ZbSoyDQttC+0pPQsNGA0pPRiyDQsdOp0LvRltCz0ZYg0LTQsNGD0YvRgSDRgdGL0LzQtNCw0YDRiyAtINC00YvQsdGL0YEg0YjRi9KT0LDRgNGDINKv0YjRltC9INGC0LXRgNCx0LXQu9C10YLRltC9IDIg0YjQsNKT0YvQvSDQsdKb0LvRiNGL0pvQtdGCINC20L7Qu9Cw0pPRiyDQutOp0LzQtdC50LTRltKjINC60LXQtyDQutC10LvQs9C10L0g0LHTqdC70ZbQs9GWINGC0LDRgNGL0LvRgdCwINC+0Lsg0LrTqdC80LXQuSDRgdGC0LXQvdC+0LfRiyDQtNC10L8g0LDRgtCw0LvQsNC00YsuINCa06nQsdGW0L3QtdGB0LUg0LHSsdC7INGB0YPQsdCz0LvQvtGC0YLQuNGB0LrQutC1INOZ0YHQtdGAINC10YLQtdC00ZYuINCa06nQvNC10LnQtNGW0qMg0pvQsNCx0YvQvdGD0Ysg0LzQtdC9INC20LDQu9KT0LDQvSDQutGA0YPQvyDRgdC40L3QtNGA0L7QvNGLINCx0LDQu9Cw0LvQsNGA0LTQsCDQutOp0LHRltC90LUg0LrQtdC30LTQtdGB0YPRliDQutOp0LzQtdC50LTRltKjINGE0LjQt9C40L7Qu9C+0LPQuNGP0LvRi9KbINC10YDQtdC60YjQtdC70ZbQs9GW0L3QtSDQsdCw0LnQu9Cw0L3Ri9GL0YHRgtGLLiDQntC70LDRgCDQvNGL0L3QsNC90LTQsNC5IDEu0JHQsNC70LDQtNCwINC606nQvNC10LnQudC00ZbSoyDRgtCw0YDQu9GL0pPRiyDQttCw0L3QtSDQutC10qPRltGA0LTQtdC6INCw0LnQvNCw0pPRiyDQttKx0LzRgdCw0psg0LbQsNC90LUg0pvQvtGA0YjQsNKT0LDQvSDRgtGW0L3QtNC10YDQvNC10L0g0L7QvdCw0Lkg0pvQvtGB0YvQu9Cw0LTRiy4gMi7QkdCw0LvQsNC70LDRgNC00YvSoyDQtNCw0YPRi9GB0YLRi9KbINCx0LDQudC70LDQvNC00LDRgCDQttC+0pPQsNGA0Ysg0L7RgNC90LDQu9Cw0YHSm9Cw0L0sINC+0LvQsNGAINKb0YvRgdKb0LAg0LDQuyDQsdKx0LvRiNGL0pvQtdGC0YLQtdGA0ZYg0LbQvtKT0LDRgNGLINKb0L7Qt9KT0YvRiNGC0YvSm9Kb0LAg0LHQtdC50ZbQvC4gMy4g0JvQuNC80YTQsCDRgtGW0L3QtNC10YDRliDQvNC10L0g0pvQsNC9INGC0LDQvNGL0YDQu9Cw0YDRiyDQvNC+0Lsg0LHQvtC70pPQsNC90LTRi9Kb0YLQsNC9INKb0LDQsdGL0L3RgyDQv9GA0L7RhtC10YHRgdGC0LXRgNGWINC60LXQt9GW0L3QtNC1INGC0YvQvdGL0YEg0LDQu9GDINGC0LXQtyDQvdCw0YjQsNGA0LvQsNC/LCDRiNGL0YDRi9GIINKb0LDQsdCw0YLRi9C90YvSoyDRltGB0ZbQvdGD0ZYg0LHQvtC70LDQtNGLLiDQodCw0qPRi9C70LDRg9GL0L3Ri9KjINC+0LTQsNC9INOZ0YDRliDRgtCw0YDRi9C70YPRiyDRgtGL0L3Ri9GB0YLRi9C9INC+0LTQsNC9INOZ0YDRliDSm9C40YvQvdC00LDRg9GL0L3QsCDQsNC70YvQvyDQutC10LvQtdC00ZYuIDQuINCR0rHQuyDQttCw0pPQtNCw0LnQtNGL0L0g0LTQsNC80YPRi9C90LAg0L3QtdC50YDQvtGA0LXRhNC70LXQutGC0L7RgNC70YvSmyDSm9C+0LfSk9GL0YjRgtGL0pPRi9C90YvSoyDQttC+0pPQsNGA0LvRi9KT0YvQvdGL0qMg0LTQsCDSr9C70LvQutC10L0g0LzQsNKj0YvQt9GLINCx0LDQsNGALiA=</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0" table:style-name="ce1">
            <text:p>1066930</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0J3TmdGA0LXRgdGC0LUg0LHQsNC70LDQu9Cw0YDQtNGL0L0g0YLQvtC6INC40YjQtdCz0ZbQvdGW0qMg0rHQt9C90LTRi9Cz0YsgNjMg0YHQvCAsIDEg0LbRi9C70YvQvdGL0qMg0YHQvtKj0YvQvdCwINC60LDRgNCw0LkgODMg0YHQvCDQtNC10LnQvSDQttC10YLQtdC00ZYuINCa0LXQudC90ZbQvdC90LXQvSDRgtC+0Log0ZbRiNC10LrRgtGW0qMg0rHQt9GL0L3QtNGL0LPRiyDRiNCw0LzQsNC80LXQvSDQsdCw0LvQsNC90YvSoyDQsdC+0LnRi9C90YvSoyDSsdC30YvQvdC00YvQs9GLINC80LXQvSDQsdGW0YDQtNC10Lkg0LHQvtC70LDQtNGLLiDQotGD0LPQsNC90LTQsCDRgtC+0Log0LjRiNC10LrRgtGW0qMg0LrQsNC70YvQv9GC0LDRgdGD0Ysg05nQu9GWINGC0L7Qu9GL0Log0LDRj9C60YLQsNC70LzQsNC50LTRiy4g0J3TmdGA0LXRgdGC0LUg0LHQsNC70LDQu9Cw0YDQtNCwINGI0LDRgNCx0YvQu9GL0Log06nRgdGW0L3QtNGW0LvQtdGAINCx0L7Qu9C80LDQudC00YsgOyDQttC40LXQuiDQuNGI0LXQuiDRgtCw0YHQv9Cw0LvQsNGA0Ysg05nRgNC10L0g0LHRltC70ZbQvdC10LTRljsg0LbQuNC10Log0LjRiNC10LrRgtGW0qMg0pvQsNC80L/QsNGO0Ysg0LHQvtC70LzQsNC50LTRiy4g0JbQuNC10Log0LjRiNC10LrRgtGW0qMg0YLQsNGB0L/QsNC70LDRgNGLICwg0pvQsNC80L/QsNGO0LvQsNGA0Ysg0LzQtdC9INGI0LDRgNCx0Ysg06nRgdGW0L3QtNGW0LvQtdGA0ZYgNiw3INC20LDRgdC60LAg0LrQsNGA0LDQuSDRgtC+0LvRi9C6INKb0LDQu9GL0L/RgtCw0YHQsNC00YsuINCd05nRgNC10YHRgtC10LvQtdGA0LTRltC9INKb0YPRgNGCINGC0LDRgNGW0LfQtNGWINOp0YHRltC90LTQuNGB0ZYg0LrQvtC90YPRgSDQv9GW0YjRltC90LTRliDQsdC+0LvRi9C/INC60LXQu9C10LTRliAsINKx0LfRi9C9INGI0LDQttGL0YDSm9Cw0LnRi9C90YvQvSDQsdC+0LvRg9GL0LzQtdC9INC20L7Qs9Cw0YDRiyDQutC+0LfQs9Cw0LvRi9GB0LrQsCDQuNC1INC205nQvdC1INC40Ygg0LrRg9GL0YHRi9C90YvSoyDQutC10Lcg0LrQtdC70LPQtdC9INC20LXRgNGW0L3QtNC1INC+0YDQvdCw0LvQsNGB0YPRiyDQvNGD0LzQutGW0L0sINGB0L7QvdGL0LzQtdC9INC60LDRgtCw0YAg0LLQtdGC0YDQvtGB0LXQutCw0LvQtNGLINC+0pPQsNC9INC60LjRgNGDINC20L7Qu9GLINC60LXSoyDQsNGJ0YvQu9Cz0LDQvSAuINCi0L7QuiDQuNGI0LXQuiDRgdGD0LTRi9C9INC60LDQudGC0LAg0YHRltKj0ZbRgNC40LvRg9GL0L0g0LbQsNC90LUg0Y3QstCw0LrRg9Cw0YLQvtGA0LvRiyDRgNC10LbQtdGA0LLQsNGA0LvRi9C6INC60YvQt9C80LXRgtC40L0g0LrQsNC80YLQsNC80LDRgdGL0Lcg0LXRgtC10LTRli4g0JbQsNC90LUg0LrQvtGA0LXQutGC0ZbQuiDQt9Cw0YLRgtCw0YDQtNGL0L0g0YvQtNGL0YDQsNGD0Ysg0LbQsNC90LUg0YHRltKj0ZbRgNC40LvRg9GWINCw0Y/QutGC0LDQu9Cw0LTRiywg0L3TmdC20LjRgdGC0YvQvSDRgtGD0LfRltC70YPQuCDQttGD0YDQtdC00ZYuINCR0LDQu9Cw0YDQtNCw0YvQvSDRgtC+0Log0LjRiNC10LPQuNC90LjQvSDRiNGL0YDRi9GI0YLRiyDQutCw0LHQsNGC0YvQvdCwINC80YvQvdCw0LvQsNGAINGC05nQvTsg0YLQtdGA0LXQvdC00LXQu9Cz0LXQvSDRg9GL0pPRi9C70LTQsNGALCDQttCw0LvQv9Cw0Log0Y3Qv9C40YLQtdC70LjQuSwg0LbQvtCz0LDRgNGLINC00LDRgNC10LbQtdC00LXQs9GWINC/0YDQvtC70LjRgNC10YTQsNGA0LDRgtGG0LjRjyDQttGL0LvQtNCw0LzQtNGL0LPRiy4gINCa0LDQu9GL0L/RgtGLINC20LDQs9C00LDQudC00LAg0YLQvtC6INC40YjQtdC60YLQtSDRgdOp0Lsg0LHTqdC70LjQvdGD0Lgg0LDQt9Cz0LDQvdGC0LDQuSDQsdC40YDQsNC6INGI0ZbRgNGW0YjRgtGWINC60LDQsdCw0YLRgtCwINC80LXRhdCw0L3QuNC60LDQu9GL0Log0YLRltGC0ZbRgNC60LXQvdC00LjRgNCz0LXQvdC00LUg0LHQuNGA0LTQtdC9INC20L7Qs9Cw0YDRi9C70LDQudC00YsuIDIuINCR0LDQu9Cw0LTQsCDRgtGL0L3Ri9GBINCw0LvRg9C00YvQvSDQuNGI0LjQvdC00LUg0YHRgtC10L3QvtC30LTRiyDQm9Cw0YDQuNC90LPQuNGC0YLQtSDQsdCw0LnQutCw0LvQsNGC0YvQvSDQvdC10LPRltC30LPQuCDRgtGD0YDRliDQuNC90YHQv9C40YDQsNGC0L7RgNC70YvQuiDQtdC90YLQuNCz0YMuINCR0rHQuyDQtdC90YLQuNCz0YMg0YLRi9C90YvRgSDQsNC70YMg0LrQtdC30LjQvdC00LUg0LDRg9CwINC20L7Qu9C00LDRgNGL0L3Ri9KjINGC0LDRgNGL0LvRg9GLINGB0LXQsdC10LHQuNC90LXQvSDRgtGD0YvQvdC00LDQudC00YssINOZ0YHQuNGA0LXRgdC1INGC0YvQvdGL0YEg0LDQu9GDINC60LXQt9C40L3QtNC1INCx0LDQu9Cw0L3Ri9KjINC40YjQutC1INGC0LDRgNGC0YvQu9Cz0LDQvSDQsNGD0LDQvdGLINOp0YLQutC40LfRgyDQutGL0LnRi9C9INCx0L7Qu9Cw0LTRiy4g0JHRg9C7INGC0LjQv9GC0LjQuiDQsdC10LvQs9C4INGB0YLQtdC90L7Qt9C00Ysg0LvQsNGA0LjQvdCz0LjRgtGC0YvQvSDQsdC10LvQs9C40LvQtdGA0LjQvdC1INC20LDRgtCw0LTRiywg06nQudGC0LrQtdC90Lgg0LrTqdC80LXQuSDRgtCw0YDRi9C70YvQvyDRgtGL0L3Ri9GBINCw0LvRgyDQutGL0LnRi9C90LTQsNC50LTRiy4g0JvQsNGA0LjQvdCz0LjQvdGC0YLRltC9INC00LDQvNGD0YvQvdCwINCw0LvRi9C/INC60LXQu9C10YLQuNC9INCw0L3QsNGC0L7QvNC40Y/Qu9GL0Log0LXRgNC10LrRiNC10LvQuNC60YLQtdGAOyDQttCw0L3QsCDRgtGD0LPQsNC9INC905nRgNC10YHRgtC10LvQtdGAINC80LXQvSAzINC20LDRgdC60LAg0LTQtdC50LjQvdCz0Lgg0LHQsNC70LDQu9Cw0YDQtNCwINC606nQvNC10LnQuCDTmdC70Lgg0YLQvtC70YvQuiDQtNCw0LzRi9C80LDQs9Cw0L0sINGI0YvRgNGL0YjRgtGLINC60LDQsdCw0YLRiyDRltGB0LjQvdGD0LPQtSDQtNC10LnQuNC9LiDQodC+0L3QtNGL0LrRgtCw0L0g0LrTqdC80LXQuSDQutCw0LHRi9C90YMg0LrQtdC30LjQvdC00LUg0L7QvdCw0Lkg0YLQsNGA0YvQu9GL0L8g0YLRi9C90YvRgSDQsNC70YMg0LrQuNGL0L3QtNCw0LnQtNGLLiDQkdCw0LvQsNC70LDRgNC00YvQvSDQutOp0LzQtdC5INGI0LXQvNC40YDRiNC10LrRgtC10YDQuCDRgtC+0LvRi9C6INC60LDRgtCw0LnQvNCw0LPQsNC9LCDQvdOZ0LfQuNC6INC20LDQvdC1INC80LDQudGL0LfSk9GL0YggIC4g0KHQvtC90LTRi9C60YLQsNC9INC60LDQsdGL0L3RgyDQutC10LfQuNC90LTQtSDQsNCx0YHRgtGA0YPQutGG0LjRjyDRgtC10Lcg0LTQsNC80YvQudC00YsuINCW05nQvdC1INGC0YvQvdGL0YEg0LDQu9GDINCx0YPQu9GI0YvQutC10YLRgtC10YDQuCDTmdC70YHQuNC3IC4g0KHRgtC10L3QvtC30LTRiyDQu9Cw0YDQuNC90LPQuNGC0YLQuNC9INC00LDQvNGD0YvQvdCwINOZ0YHQtdGAINC10YLQtdGC0ZbQvSDQpNCQ0JrQotCe0KDQm9CQ0KA7INCS0JjQoNCj0KHQotCr0Jog0JjQndCk0JXQmtCm0JjQr9Cb0JDQoCwg0JDQm9Cb0JXQoNCT0JjQr9Cb0KvQmiDQoNCV0JDQmtCm0JjQr9Cb0JDQoCwg0JjQndCk0JXQmtCm0JjQr9Cd0Ksg0KLQkNCg0JDQm9Cr0KPQqy4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11" table:style-name="ce1">
            <text:p>1067011</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0JbQsNKj0LAg0YLRg9KT0LDQvSDQsdCw0LvQsNC70LDRgNC00LDSk9GLINGC0L7SmyDRltGI0LXQutGC0ZbSoyDQsNC90LDRgtC+0LzQvi3RhNC40LfQuNC+0LvQvtCz0LjRj9C70YvSmyDQtdGA0LXQutGI0LXQu9GW0LrRgtC10YDRltC9INCw0YLQsNC/INC60LXRgtC10YLRltC9INCx0L7Qu9GB0LDSmyzQttCw0LvQv9GLINC20LDSo9CwINGC0YPRi9KT0LDQvSDQvdOZ0YDQtdGB0YLQtdC90ZbSoyDQsNKT0LfQsNGB0Ysg0LHQsNGA0LvRi9KT0Ysg0LXRgNC10YHQtdC6INCw0LTQsNC80LTQsNGA0LTQsNC9INC10YDQtdC60YjQtdC70ZbQvdC10LTRlizQttOZ0L3QtSDRgtC+0LvRi9KbINKb0LDQu9GL0L/RgtCw0YHQv9Cw0pPQsNC9INCx0L7Qu9GL0L8g0LrQtdC70LXQtNGWLtCR0ZbRgNCw0psg0YPQsNKb0YvRgiDTqdGC0LUg0LrQtdC70LUg0LHQsNC70LDQtNCwINC20LXRgtGW0LvRltC/INOp0YHRgyDQttKv0YDQtdC00ZYu0KLQvtKbINGW0YjQtdC60YLRltC9INC10YDQtdC60LXRiNC10LvRltCz0ZYg0L7QuyDQtdGA0LXRgdC10LrRgtC10YDQtNC10L0g0pvQsNGA0LDSk9Cw0L3QtNCwINC60ZbRiNC60LXQvdGC0LDQuSDTmdGA0ZYg0pvRi9GB0pvQsCDQsdC+0LvRi9C/INC60LXQu9C10LTRli7QkdCw0LvQsNC90YvSoyDTqdGB0ZbQvyDQttC10YLRltC70YPRltC90LUg0LHQsNC50LvQsNC90YvRgdGC0Ysg0L7QtNCw0L0g05nRgNGWINC20LXRgtGW0LvRg9GWINC20q/RgNC10LTRlizTmdGA0LjQvdC1INC20LXRgtGW0LvRgyDQttKv0YDQs9C10L0g0YHQvtKjINC+0L3Ri9KjINC20rHQvNGL0YHRi9C00LAg0LbQsNKb0YHQsNGA0LDQtNGLLtCi0L7SmyDRltGI0LXQuiDQttCw0qPQsCDRgtGD0pPQsNC9INC905nRgNC10YHRgtC10LvQtdGA0LTQtSDRgdGC0LXRgNC40LvRjNC00ZYg0LHQvtC70YvQvyDQutC10LvQtdC00ZYs0LHRltC30LTRltKjINCw0pPQt9Cw0LzRi9C30LTQsCDQv9Cw0LnQtNCw0LvRiyDQsdCw0LrRgtC10YDQuNGP0LvQsNGAINCx0LDRgCDQttOZ0L3QtSDQvtC70LDRgCDQv9Cw0YLQvtC70L7Qs9C40Y/Qu9GL0psg0LHQsNC60YLQtdGA0LjRj9C70LDRgNC00YvQvSDQttC10YLRltC70YPRltC90LUg0pvQsNGA0YHRiyDQttKx0LzRi9GBINC20LDRgdCw0LnQtNGLLtCe0Lsg0LHQsNC60YLQtdGA0LjRj9C70LDRgCDQsdC40YTQuNC00L7QsdCw0LrRgtC10YDQuNGP0LvQsNGALNC70LDQutGC0L7QsdCw0LrRgtC10YDQuNGP0LvQsNGAINCx0L7Qu9GL0L8g0LrQtdC70LXQtNGWLtCe0LvQsNGAINCx06nQs9C00LUg0LzQuNC60YDQvtC+0YDQs9Cw0L3QuNC30ZbQvNC00LXRgNC00LXQvSDSm9C+0YDSk9Cw0LnQtNGLLtCd05nRgNC10YHRgtC1INGB0YvRgNGC0pvRiyDQvtGA0YLQsNC00LDSk9GLINC40L3RhNC10LrRhtC40Y8g0LHQsNC60YLQtdGA0LjRj9C70LDRgNKT0LAg0LHQtdC50ZbQvNC00LXQu9C80LXQs9C10L0g0LHQvtC70YvQvyDQutC10LvQtdC00ZYs0LDQuyDQsdKx0LvQsNGAINC905nRgNGB0LXRgtC10LPQtSDQsNC90LDRgdGL0L3Ri9KjINGB0q/RgtGWINCw0YDSm9GL0LvRiyDQsdC10YDRltC70LXQtNGWLtCW0LDQu9C/0Ysg0LHQsNC70LAg0LbQsNKj0LAg0YLRg9GL0LvSk9Cw0L3QtNCwINCx0LDQu9Cw0LTQsCDQuNC80LzRg9C90LjRgtC10YIg0LHQvtC70LzQsNC50LTRiyzRgdC+0L3RiyDSm9Cw0LvRi9C/0YLQsNGB0YvRgNGDINCw0L3QsNGB0YvQvSDRgdKv0YLRliDQsNGA0pvRi9C70Ysg0LbSr9GA0LXQtNGWLtCh0L7QuyDRgdC10LHQtdCx0YLRliDQsNC90LDRgdGL0L3Ri9C9INGC0LDQvNCw0pvRgtCw0L3Rg9GLINOp0YLQtSDQvNCw0qPRi9C30LTRiy7SmtC+0YDRi9GC0YvQvdC00YvQu9Cw0Lkg0LrQtdC70LUg0LHQsNC70LDQu9Cw0YDQtNCw0pPRiyDRgtC+0psg0ZbRiNGW0LXQutGC0ZbQvSDQsNC90LDRgtC+0LzQvi3RhNC40LfQvtC70L7Qs9C40Y/Qu9GL0psg0LXRgNC10LrRiNC10LvRltCz0ZYs0LDQvdCw0YLQvtC80LjRj9GB0Ysg0LHQvtC50YvQvdGI0LAg0LrTqdC70LXQvNGWLNKx0LfRi9C90LTRi9KT0Ysg0pvRi9GB0pvQsCDQutGW0YjQutC10L3RgtCw0Lkg0LHQvtC70YvQvyDQutC10LvQtdC00ZYu0JHRltGA0LDSmyDQsdCw0LvQsCDTqdGB0LrQtdC9INGB0LDQudGL0L0s0YLQvtKbINGW0YjRltC10LrRgtC1INC00LDQvNC40LTRiy7QkNC7INGE0LjQt9C+0LvQvtCz0LjRj9C70YvSmyDQtdGA0LXQutGI0LXQu9GW0LrRgtC10YDRliDRgdGC0LjRgNC70YzQtNGWLNC80LjQutGA0L7RhNC70L7RgNCw0YHRiyDSm9Cw0LvRi9C/0YLRiyzQttOZ0L3QtSDQtdGA0LXQutGB0LXQutGC0LXRgNC00LXQvSDSm9Cw0YDQsNKT0LDQvdC00LAg06nQtyDSm9GL0LfQvNC10YLRltKjINGC0L7Qu9GL0psg0LDRgtKb0LDRgNCwINCw0LvQvNCw0LnQtNGLLjxiciAvPg0KMi7QkNC90LDRgdGL0L3Ri9KjINGI0LDSk9GL0LzQtNCw0YDRi9C80LXQvSAyINC20LDRgdGC0LDSk9GLINCx0LDQu9Cw0YHRi9C90YvSoyDQtNCw0YPRgdGL0L3Ri9KjINKb0LDRgNC70YvSk9GD0YvQvNC10L0s0q/RgNC80LXQu9GWINC206nRgtC10Lsg0LXQvdCz0ZbQs9GDINCx0LDRgC7QkdKx0Lsg0YHQuNC80L/RgtC+0LzQtNCw0YDSk9CwINKb0LDRgNCw0L8g0LHQsNC70LDQtNCwINKb0LDQsdGL0L3Rg9C70YvSmyDQv9GA0L7RhtC10YHRgdGC0ZYg0LrTqdGA0YPQs9C1INCx0L7Qu9Cw0LTRiyDQtNC10L8g0L7QudC70LDQudC80YvQvS7QkdGA0L7QvdC40YXRgiDQsdC+0LvRg9GL0LTQsCDQvNKv0LzQutGW0L0s0LHRltGA0LDSmyDQvdCw0pvRgtGL0LvQsNGDINKv0YjRltC9INC30LXRgNGC0YXQsNC90LDQu9GL0psg0LfQtdGA0YLRgtC10YPQu9C10YDQs9C1INC20ZbQsdC10YDRg9Cz0LUg0LHQvtC70LDQtNGLLtCR0LDQu9Cw0LTQsCDSr9GA0LzQtdC70ZYg0LbTqdGC0LXQuyDQutC10LfRltC90LTQtSzRj9KT0L3QuCDSm9Kx0YDSk9Cw0psg0LbTqdGC0LXQuyDQsdGW0LfQtNC1INKb0rHRgNKT0LDSmyDQttOp0YLQtdC7INC60LXQt9GW0L3QtNC1INCx0LDQu9Cw0LTQsCDSm9Cw0pvRi9GA0YvSmyDQsdC+0LvQvNCw0LnQtNGLLNGB0L7QuyDRgdC10LHQtdCx0YLQtdC9INCw0L3RgtC40LHQuNC+0YLQuNC6INC205nQvdC1INGB0LjRgNC+0L/RgtCw0YDQtNGLKNC80YvRgdCw0LvRiyzQu9C+0LfQsNGA0YLQsNC9KSDSm9Cw0LHRi9C70LTQsNGDINCw0YDSm9GL0LvRiyDRi9C70pPQsNC70LTRiyDQttOp0YLQtdC70LPQtSDQsNC50LvQsNC90LTRi9GA0YvQvyDSm9Cw0pvRi9GA0YvSm9GC0Ysg0YLSr9GB0ZbRgNGDINC60LXRgNC10Lou0JHQsNC70LDQtNCwINCt0LrRgdC/0LjRgNCw0YLQvtGA0LvRi9KbINC10L3RgtGW0LPRgyzQvtC7INC00LXQs9C10L3RltC80ZbQtyDRgtGL0L3Ri9GBINGI0YvSk9Cw0YDSk9Cw0L0g0YPQsNKb0YvRgtGC0LAg0LDRg9CwINGI0YvSk9Cw0YDRgyDQttC+0LvQtNCw0YDRi9C90YvSoyDRgtCw0YDRi9C70YvQvyDSm9C40L3QsNC70YPRiy7QrdC60YHQv9C40YDQsNGC0LvRiyDQtdC90YLRltCz0YPQtNC1LNCw0YPQsCDTqdGC0LrRltC30YMg0LbQvtC70LTQsNGA0YvQvdC00LAg0LrQtdC00LXRgNCz0ZbQu9C10YAs0YLQsNGA0LDQu9GL0YPQu9Cw0YAs0YjRi9GA0YvRiNGC0LDRgNC00YvQvSDQsdOp0LvRltC90YPRliDQsdC+0LvSk9Cw0L3QtNCw0LTQsCDQttKv0YDQtdC00ZYu0K/Sk9C90Lgg0LDRg9CwINOp0YLQutGW0LfRgyDQttC+0LvQtNCw0YDRi9C90LTQsCDSm9C40YvQvdC00YvSm9GC0LDRgCDQsdC+0LvSk9Cw0L3QtNCwINC00LDQvNC40LTRiy7QrdC60YHQv9Cw0LjRgNCw0YLQvtGA0LvRi9KbINC10L3RgtGW0LPRgyDRhNC40LfQuNC60LDQu9GL0psg0LbSr9C60YLQtdC80LXQtNC10L0g0LrQtdC50ZbQvdC00LUg0LHQvtC70YPRiyDQvNKv0LzQutGW0L0u0KHQtdCx0LXQsdGWINCw0LTQsNC80pPQsCDRhNC40LfQuNC60LDQu9GL0psg0LbSr9C60YLQtdC80LUg0YLRg9GB0LrQtdC90LTQtSDQtNGL0Lwg0YjRi9KT0LDRgNGDINCw0YPRi9GA0LvQsNC5INCx0LDRgdGC0LDQudC00Ysu0JrTqdC80LXQudC00ZbSoyDQtdGA0LXQutGI0LXQu9GW0LPRliDQvtC7INCx0LDQu9Cw0LvQsNGA0LTQsCDQtdGA0LXRgdC10LrRgtC10YDQs9C1INKb0LDRgNCw0pPQsNC90LTQsCDRgtC+0LvRi9KbINC20LXRgtGW0LvQvNC10LPQtdC9LNGB0LXQsdC10LHRliDQvdOZ0YDQtdGB0YLQtSDQtdC90LTRliDSk9Cw0L3QsCDRgtGD0YvQu9KT0LDQvSDRgdC+0qMg0LHQsNC70LDQtNCwINGC0L7Qu9GL0psg0LbQtdGC0ZbQu9GW0YMg0LDRj9Kb0YLQsNC70LzQsNC00Ysu0JHQsNC70LDQvdGL0qMg0LzSr9GI0LXQu9C10YDRliDSm9Cw0YDSm9GL0L3QtNGLINOp0YHRltC/INC+0YLRi9GA0LDQtNGLLNKb0LDRgNKb0YvQvdC00Ysg06nRgdGDINCx0L7Qu9GL0L8g0LbQsNGC0pvQsNC90LTQsCDQvNKv0YjQtdC90ZbSoyDQsNGC0pvQsNGA0LDRgtGL0L0g0YTRg9C90LrRhtC40Y/RgdGL0LTQsCDQttCw0pvRgdCw0YDQsNC00Ysu0JHRltGA0LDSmyDQsdKx0Lsg0LTQsNC80YPQu9Cw0YAg0LHQsNGA0LvRi9KbINCx0LDQu9Cw0LvQsNGA0pPQsCDRgtOZ0L0g0LXQvNC10YEs0YHQtdCx0LXQsdGWINC/0LDRgtC+0LvQvtCz0LjRj9C70YvSmyDQttCw0pPQtNCw0LnQtNCwINGC0YPRi9C70pPQsNC9INCx0LDQu9Cw0LvQsNGAINC10YDQtdC60YjQtdC70ZbQvdC10LTRli7QntC70LDRgNC00LAg0YLRg9GD0LAg0LHRltGC0LrQtdC9INCw0pvQsNGD0LvQsNGAINCx0L7Qu9GD0Ysg0LzSr9C80LrRltC9LNC205nQvdC1INC80LXRgNC30ZbQvNC90LXQvSDQtdGA0YLQtSDRgtGD0YPRi9C70YPRiyDQvNKv0LzQutGW0L0g0L7QvdC00LDQuSDQsdCw0LvQsNC70LDRgNC00YvQvSDQtNCw0LzRi9C/LdC20LXRgtGW0LvRg9GWINKb0LjRi9C9INCx0L7Qu9Cw0LTRiy7SmtC+0YDRi9GC0YvQvdC00LDQu9Cw0Lkg0LrQtdC70LUg0LrTqdC80LXQuSzQutC10qPRltGA0LTQtdC6INCx0LDQu9Cw0LvQsNGA0LTQsCDQutGW0YjQutC10L3RgtCw0Lks0YTRg9C90LrRhtC40Y/RgdGLINGC0L7Qu9GL0psg0LbQtdGC0ZbQu9C80LXQs9C10L0g0LHQvtC70YvQvyDQutC10LvQtdC00ZY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Екінші сұрактын жауаптары толык емес және к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7100" table:style-name="ce1">
            <text:p>1067100</text:p>
          </table:table-cell>
          <table:table-cell office:value-type="string" table:style-name="ce1">
            <text:p>kazakh</text:p>
          </table:table-cell>
          <table:table-cell office:value-type="string" table:style-name="ce1">
            <text:p>Билет 20.&amp;lt;br /&amp;gt; 1. Жаңа туған балалардың тоқ ішектің анатомо-физиологиялық ерекшеліктерің атаныз:&amp;lt;br /&amp;gt; 2. 2 жасар бала,анасының шағымдары, даусының қарлығыуымен, үрмелі жөтел,ентігу.Балада қандай ентігу? Осы потологиялық симптомдар көмейдің қанадай анатомо-физиологиялық ерекшелігімен байланысты?&amp;lt;br /&amp;gt;</text:p>
          </table:table-cell>
          <table:table-cell office:value-type="string" table:style-name="ce1">
            <text:p>MS4g0JbQsNKj0LAg0YLRg9KT0LDQvSDQvdOZ0YDQtdGB0YLQtdC70LXRgNC00ZbSoyDRgtC+0psg0ZbRiNC10LPRltC90ZbSoyDQtdGA0LXQutGI0LXQu9GW0LrRgtC10YDRltC90LUg0LrQtdC70LXRgCDQsdC+0LvRgdCw0Lw6INC+0Lsg0LXRgNC10YHQtdC60YLQtdGA0LPQtSDSm9Cw0YDQsNKT0LDQvdC00LAg0YHQsNC70YvRgdGC0YvRgNC80LDQu9GLINGC0q/RgNC00LUg0rHQt9GL0L0g05nRgNGWINGC0LDRgCDQttOZ0L3QtSDQsdKx0LvRiNGL0pvQtdGC0YLQtdGA0ZYg0L3QsNGI0LDRgCDQttC10YLRltC70LPQtdC9INGB0LDSo9GL0LvQsNGD0Ysg0YLQsNGAINCx0L7Qu9GL0L8g0LrQtdC70LXQtNGWLiDQndOZ0YDQtdGB0YLQtdC70LXRgNC00ZbSoyDRgtC+0psg0ZbRiNC10LPRliDRgtC+0LvRi9KbINC20LXRgtGW0LvQvNC10LPQtdC9INCw0pPQt9CwINCx0L7Qu9KT0LDQvdC00YvSm9GC0LDQvSDSsdC30YvQvdC00YvSk9GLINCx0L7QudGL0L3RiNCwINC00LAg0LXRgNC10LrRiNC10LvQtdC90LXQtNGWINGP0pPQvdC4INKx0LfRi9C90LTRi9KT0YsgNjPRgdC8INKb0rHRgNCw0LnQtNGLLCDQsNC7IDEg0LbQsNGB0YvQvdCwINKb0LDRgNCw0LkgMjAg0YHQvCDSsdC30LDRgNCw0LTRiy4g0JDQuyDRiNCw0YDQsdGL0LvRi9KbINOp0YHRltC90LTRltC70LXRgCDRgtGD0pPQsNC90LTQsCDRgdOZ0YLRgtC1INCx0L7Qu9C80LDQuSDTqdGB0LUg0LrQtdC70LUgMiDQttCw0YHRi9C90LAg0pvQsNGA0LDQuSDQv9Cw0LnQtNCwINCx0L7Qu9CwINCx0LDRgdGC0LDQudC00YsuINC20LjQtdC6INGW0YjQtdC60YLRltKjINGC0LDRgdC/0LDQu9Cw0YDRiyDQsdGW0YAg0LHRltGA0ZbQvdC10L0g0YLQvtC70YvSmyDQsdOp0LvRltC90LHQtdC5LCDQvNC10LrRgtC10L8g0LDQu9C00Ysg0LbQsNGB0YvQvdCwINKb0LDRgNCw0Lkg0YLQvtC70YvSmyDSm9Cw0LvRi9C/0YLQsNGB0LAg0LHQsNGB0YLQsNC50LTRiy4g0JDQv9C10L3QtNC40LrRgSDQutC+0L3Rg9GBINC/0ZbRiNGW0L3QtNGWINC205nQvdC10LTQtSDQvdCw0pvRgtGLINC70L7QutCw0YbQuNGP0YHRiyDQsdC+0LvQvNCw0YPRiyDQvNKv0LzQutGW0L0g0YHQvtC7INKv0YjRltC90LTQtSDQvtC90Ysg0YLQsNCx0YMg0pvQuNGL0L3Sk9CwINGB0L7Sk9Cw0LTRiy4g0KHQvtC90YvQvNC10LXQvSDSm9Cw0YLQsNGAINC20LDSo9CwINGC0YPSk9Cw0L0g0L3TmdGA0LXRgdGC0LXQu9C10YDQtNC10LPRliDRgtC+0psg0ZbRiNC10LPRltC90LTQtSDRiNGL0YDRi9GIINGC0q/Qt9C10YLRltC9INC205nQvdC1INKb0L7Qt9KT0LDQu9GL0YHRi9C9INKb0LDQvNGC0LDQvNCw0YHRi9C3INC10YLRg9C80LXQvSDSm9C+0YHQsCDQvtC90YvSoyDTqdGC0YPRltC9INC20LXSo9GW0LvQtNC10YLQtdGC0ZbQvSDQsdC+0LvQutCw0Lsg0YLTmdGA0ZbQt9C00ZYg0LbQsNGB0YPRiNCw0LvQsNGAINCx0LDRgC4g0KLQvtKbINGW0YjQtdC6INC20LDSo9CwINGC0YPSk9Cw0L0g0L3TmdGA0LXRgdGC0LXQtNC1INGB0YPQtNGLINC90LDRiNCw0YAg0YHRltKj0ZbRgNGW0L8g0L3TmdGC0LjQttC10YHRltC90LTQtSDQtNOZ0YDQtdGCINGB0rHQudGL0psg05nRgNGWINCx0L7RgSDQsdC+0LvRi9C/INC60LXQu9C10LTRli4g0prQsNC70YvQv9GC0YvQtNCwINGC0L7SmyDRltGI0LXQutGC0LXQvSDQsNC3INGB06nQuyDQsdOp0LvRltC90ZbQvywg0LDQuyDQvtKT0LDQvSDQsNC3INKT0LDQvdCwINGC0ZbRgtGW0YDQutC10L3RgyDTmdGB0LXRgNGW0L3QtdC9INGB06nQuyDQsdOp0LvRg9GWINCx0ZbRgNC00LXQvSDQttC+0pPQsNGA0LvQsNC50LTRiy4gPGJyIC8+DQoyLiDQlNCw0YPRi9GB0YvQvdGL0qMg0pvQsNGA0LvRi9KT0YPRiyDSr9GA0LvQtdC80LXQu9GWINC206nRgtC10Lsg0LXQvdGC0ZbQs9GDINGC0q/RgNGW0LvQtdGA0ZYgLSDQuNC90YHQv9C40YDQsNGC0L7RgNC70Ysg0LXQvdGC0ZbQs9GDINCx0L7Qu9GD0Ysg0LzSr9C80LrRltC9LCDTqdC50YLQutC10L3RliDRgdGC0LXQvdC+0LfQtNGLINC70LDRgNC40L3Qs9C40YIg0LrTqdCx0ZbQvdC10YHQtSDRgtGL0L3Ri9GBINCw0LvRgyDQutC10LfRltC90LTQtSDRgtGL0L3Ri9GBINCw0LvRgyDQttC+0LvQtNCw0YDRi9C90YvSoyDRgtCw0YDRi9C70YPRi9C80LXQvSDQsdCw0LnQu9Cw0L3Ri9GB0YLRiy4g0KHRgtC10L3QvtC30LTRi9KbINC70LDRgNC40L3Qs9C40YIg0LrTqdCx0ZbQvdC1INCy0LjRgNGD0YHRgtGL0psg0LjQvdGE0LXQutGG0LjRj9C80LXQvSDQsdGW0YDQs9C1INC606nQvNC10Lkg0LzQtdC9INGC0YDQsNGF0LXRj9C90YvSoyDSm9Cw0LHRi9C90YPRiyDQvNC10L0g0ZbRgdGW0L3RgyDRgdCw0LvQtNCw0YDRi9C90LDQvSDQtNCw0LzQuNC00YsuINCR0rHQuyDQsdCw0LvQsNC00LAg0YHRgtC10L3QvtC30LTRi9KbINC70LDRgNC40L3Qs9C40YLRgtGW0qMg0LTQsNC80YPRi9C90LAg0YvSm9C/0LDQuyDQtdGC0LXRgtGW0L0g0LDQvdCw0YLQvtC80LjRj9C70YvSmyDQtdGA0LXQutGI0LXQu9GW0LrRgtC10YDQs9C1INGC0YvQvdGL0YEg0LDQu9GDINC20L7Qu9C00LDRgNGL0L3Ri9KjINGC0LDRgNGL0LvRg9GLINC90LXQvNC10YHQtSDRgtCw0YAg0LHQvtC70YPRiywg0YHQsNC70YvRgdGC0YvRgNC80LDQu9GLINGC0q/RgNC00LUg0q/Qu9C60LXQvSDRgtGW0Lsg0LbTmdC90LUg0LrTqdC80LXQuSDRgtGA0LDRhdC10Y8g0LDRgNCw0YHRi9C90LTQsNKT0Ysg06nRgtC60ZbRgCDQsdKx0YDRi9GIINC20LDRgtCw0LTRiy4gMS4g0JHQsNC70LDQu9Cw0YDQtNCwINC606nQvNC10LnQtNGW0qMg0YLQsNGAINCx0L7Qu9GDINOZ0YHQtdGA0ZbQvdC10L0g0LbTmdC90LUg0LrQtdKj0ZbRgNC00LXQuiDQsNC50LzQsNKT0YvQvdGL0qMg0YLRltC90LTQtdGA0ZYg0LbSsdC80YHQsNKbINCx0L7Qu9KT0LDQvdC00YvSm9GC0LDQvSDSm9GL0YHRi9C70YPSk9CwINCx0LXQudGW0Lwg0LrQtdC70LXQtNGWLiAyLiDQkdCw0LvQsNC70LDRgNC00YvSoyDQtNGL0LHRi9GB0YLRi9KbINCx0LDQudC70LDQvNGLINC20L7Sk9Cw0YDRiyDQvtGA0L3QsNC70LDRgdGD0Ysg0LbTmdC90LUg0LHSsdC70YjRi9Kb0LXRgtGC0LXRgNGWINC20L7Sk9Cw0YDRiyDSm9C+0LfSk9GL0YjRgtGL0pvSm9CwINC40LUg0LbTmdC90LUg0rHQt9GL0L3QtNGL0pPRiyDSm9GL0YHSm9CwLiAzLtKa0LDQvdGC0LDQvNGL0YDQu9Cw0L3Ri9C90rvQsCDQttOZ0L3QtSDQu9C40LzRhNCwINGC0q/QudGW0L3QtNC10YDRltC90LUg0LHQsNC5INCx0L7Qu9KT0LDQvdC00YvSm9GC0LDQvSDSm9Cw0LHRi9C90YMg0L/RgNC+0YbQtdGB0YLQtdGA0ZYg0LbQuNGWINC00LDQvNC40LTRiy7QndOZ0YLQuNC20LXRgdGW0L3QtNC1INGC0YvQvdGL0YEg0LDQu9GDINGC0LXQtyDQvdCw0YjQsNGA0LvQsNC/INGI0YvRgNGL0Ygg0pvQsNCx0LDRgtGL0L3Ri9KjINGW0YHRltC90YPRliDRgdCw0qPRi9C70LDRg9GL0L3Ri9KjINC+0LTQsNC9INOZ0YDRliDRgtCw0YDRi9C70YvQvyDRgtGL0L3Ri9GBINCw0LvRgyDSm9C40YvQvdC00LDQuSDRgtKv0YHQtdC00ZYuICDQmtOp0LzQtdC50LTRltKjINC/0ZbRiNGW0L3RliDSm9Kx0LnSk9GL0Ygg0YLTmdGA0ZbQt9GF0LTQtdGBINGI0LXQvNGW0YDRiNC10LPRliDRgtCw0Lcg0L3TmdC30ZbQuiDQttOZ0L3QtSDQvNCw0LnRi9GB0pvRi9GILiDQodCw0qPRi9C70LDRg9GLINGC0LDRgCDSm9Cw0L3RgtCw0LzRi9GA0LvQsNGA0pPQsCDQsdCw0Lkg0YjRi9GA0YvRiNGC0Ysg0pvQsNCx0LDRgtGLINGW0YHRltC90YPQs9C1INCx0LXQudGW0LwuINCU0LDQudGL0YEg0LHQsNC50LvQsNC80LTQsNGA0Ysg0q/Qu9C60LXQvdC00LXRgNCz0LUg0pvQsNGA0LDSk9Cw0L3QtNCwINKb0YvRgdKb0LAg0LHQvtC70pPQsNC90LTRi9Kb0YLQsNC9INC00LDRg9GL0YEg0LXRgNC10LrRiNC10LvRltCz0ZbQvSDQsNC90YvSm9GC0LDQudC00YsuIDMg0LbQsNGB0pvQsCDQtNC10LnRltC9INC10YAg0LHQsNC70LAg0LzQtdC9INKb0YvQtyDQsdCw0LvQsNC70LDRgNC00LvRi9KjINC606nQvNC10LnQu9C10YDRltC90ZbSoyDQv9GW0YjRltC90ZYg0LHRltGA0LTQtdC5INCx0L7Qu9Cw0LTRiywg0YHQvtC90LTRi9Kb0YLQsNC9INC00LDRg9GL0YHRgtCw0YDRiyDQttGW0qPRltGI0LrQtSDQsdGW0YAg0LHRltGA0ZbQvdC10L0g0LDQttGL0YDQsNGC0YvQu9C80LDQudC00YsuINCe0LTQsNC9INGB0L7SoyDSm9GL0Lcg0LHQsNC70LDQu9Cw0YDSk9CwINKb0LDRgNCw0pPQsNC90LTQsCDQtdGAINCx0LDQu9Cw0LvQsNGA0LTQsCDSm9Cw0LvSk9Cw0L3RiNCwINGI0LXQvNGW0YDRiNC10LPRltC90ZbSoyDQv9C70LDRgdGC0LjQvdCw0YHRi9C90YvSoyDQsdGW0YDRltCz0YMg0LHSsdGA0YvRiNGLINGB0q/QudGW0YDQtNC70LXQvdC1INGC0q/RgdC10LTRli4g0JXRgdC10LnQtSDQutC10LvQtSDQtNCw0YPRi9GBINCx0LDQudC70LDQvNC00LDRgNGLINKx0LfQsNGA0LDQtNGLLiDQndOZ0YLQuNC20LXRgdGW0L3QtNC1INC00LDRg9GL0YEg0LbRg9Cw0L3QtNCw0Lkg0YLSr9GB0LXQtNGWL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Екінші сұрактын 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915240" table:style-name="ce1">
            <text:p>915240</text:p>
          </table:table-cell>
          <table:table-cell office:value-type="string" table:style-name="ce1">
            <text:p>russian</text:p>
          </table:table-cell>
          <table:table-cell office:value-type="string" table:style-name="ce1">
            <text:p>Билет 20.&amp;lt;br /&amp;gt; 1.Назовите анатомо-физиологические особенности толстой кишки у новорожденных.&amp;lt;br /&amp;gt; 2.Ребенку 2 года. Жалобы родителей на осиплость голоса, грубый кашель, беспокойство, одышку. Назовите вид одышки? Какие анатомические особенности, приводят к развитию стенозирующего ларингита у детей?&amp;lt;br /&amp;gt;</text:p>
          </table:table-cell>
          <table:table-cell office:value-type="string" table:style-name="ce1">
            <text:p>MS4g0JDQvdCw0YLQvtC80L4t0YTQuNC30LjQvtC70L7Qs9C40YfQtdGB0LrQuNC1INC+0YHQvtCx0LXQvdC90L7RgdGC0Lgg0YLQvtC70YHRgtC+0Lkg0LrQuNGI0LrQuCDRgyDQvdC+0LLQvtGA0L7QttC00LXQvdC90YvRhTog0YLQvtC70YHRgtCw0Y8g0LrQuNGI0LrQsCDRgyDQvdC40YUg0LIg0YHRgNC10LTQvdC10LwgNjMg0YHQvCwg0LAg0Log0LrQvtC90YbRgyDQv9C10YDQstC+0LPQviDQs9C+0LTQsCDQttC40LfQvdC4INC00L7RgdGC0LjQs9Cw0LXRgiA4MyDRgdC8LiDQkiDQtNCw0LvRjNC90LXQudGI0LXQvCDRgtC+0LvRgdGC0LDRjyDQutC40YjQutCwINGA0LDQstC90LAg0YDQvtGB0YLRgyDRgNC10LHQtdC90LrQsC4g0Jog0YDQvtC20LTQtdC90LjRjiDRgtC+0LvRgdGC0LDRjyDQutC40YjQutCwINC90LUg0LfQsNC60LDQvdGH0LjQstCw0LXRgiDRgdCy0L7QtdCz0L4g0YTQvtGA0LzQuNGA0L7QstCw0L3QuNGPLiDQoyDQvdC+0LLQvtGA0L7QttC00LXQvdC90YvRhSDQvdC10YIg0YHQsNC70YzQvdC40LrQvtCy0YvRhSDQvtGC0YDQvtGB0YLQutC+0LIsINC70LXQvdGC0Ysg0L7QsdC+0LTQvtGH0L3QvtC5INC60LjRiNC60Lgg0LXQtNCy0LAg0YDQsNC30LLQuNGC0YssINCz0LDRg9GB0YLRgNGLINC+0LHQvtC00L7Rh9C90L7QuSDQutC40YjQutC4INC+0YLRgdGD0YLRgdGC0LLRg9GO0YIo0L/QvtGP0LLQu9GP0Y7RgtGB0Y8g0L/QvtGB0LvQtSA2INC80LXRgdGP0YbQtdCyKS4g0JvQtdC90YLRiyDQvtCx0L7QtNC+0YfQvdC+0Lkg0LrQuNGI0LrQuCwg0LPQsNGD0YHRgtGA0YssINGB0LDQu9GM0L3QuNC60L7QstGL0LUg0L7RgtGA0L7RgdGC0LrQuCDQsdGL0LLQsNGO0YIg0L7QutC+0L3Rh9Cw0YLQtdC70YzQvdC+INGA0LDQt9Cy0LjRgtGLINC6IDYtNyDQs9C+0LTQsNC8LiDQotC+0LvRgdGC0LDRjyDQutC40YjQutCwINC+0LHQtdGB0L/QtdGH0LjQstCw0LXRgiDRgNC10LfQvtGA0LHRhtC40Y4g0LLQvtC00Ysg0Lgg0Y3QstCw0LrRg9Cw0YLQvtGA0L3Qvi3RgNC10LfQtdCy0YDQstGD0LDRgNC90YPRjiDRhNGD0L3QutGG0LjRji4g0JIg0L3QtdC5INGC0LDQutC20LUg0LfQsNCy0LXRgNGI0LDQtdGC0YHRjyDRgNCw0YHRidC10L/Qu9C10L3QuNC1INC4INCy0YHQsNGB0YvQstCw0L3QuNC1INC/0LjRgtCw0YLQtdC70YzQvdGL0YUg0LLQtdGJ0LXRgdGC0LIsINC/0YDQvtC40YHRhdC+0LTQuNGCINGE0L7RgNC80LjRgNC+0LLQsNC90LjQtSDQutCw0LvQvtCy0YvRhSDQvNCw0YHRgS4g0JTQu9GPINGB0LvQuNC30LjRgdGC0L7QuSDQvtCx0L7Qu9C+0YfQutC4INGC0L7Qu9GB0YLQvtC5INC60LjRiNC60Lgg0YXQsNGA0LDQutGC0LXRgNC90Ys6INGD0LPQu9GD0LHQu9C10L3QvdGL0LUg0LrRgNC40L/RgtGLLCDQsdC+0LvQtdC1INC/0LvQvtGB0LrQuNC5INGN0L/QuNGC0LXQu9C40LksINCy0YvRgdC+0LrQsNGPINGB0LrQvtGA0L7RgdGC0Ywg0L/RgNC+0LvQuNGE0LXRgNCw0YbQuNC4LiDQodC+0LrQvtC+0YLQtNC10LvQtdC90LjQtSDQsiDRgtC+0LvRgdGC0L7QuSDQutC40YjQutC1INCyINC+0LHRi9GH0L3Ri9GFINGD0YHQu9C+0LLQuNGP0YUg0L3QtdC30L3QsNGH0LjRgtC10LvRjNC90LAsINCwINCyINGD0YHQu9C+0LLQuNGP0YUg0LzQtdGF0LDQvdC40YfQtdGB0LrQvtCz0L4g0YDQsNC30LTRgNCw0LbQtdC90LjRjyDRgNC10LfQutC+INCy0L7Qt9GA0LDRgdGC0LDQtdGCLjxiciAvPg0KMi4g0JLQuNC0INC+0LTRi9GI0LrQuDog0LjQvdGB0L/QuNGA0LDRgtC+0YDQvdGL0LkuINCaINGB0YLQtdC90L7Qt9C40YDRg9GO0YnQtdC80YMg0LvQsNGA0LjQvdCz0LjRgtGDINGDINC00LXRgtC10Lkg0L/RgNC40LLQvtC00Y/RgiDQsNC90LDRgtC+0LzQuNGH0LXRgdC60LjQtSDQvtGB0L7QsdC10L3QvdC+0YHRgtC4INCz0L7RgNGC0LDQvdC4INGDINC00LXRgtC10LksINC+0L3QsCDRgyDQvdC40YUg0LLQvtGA0L7QvdC60L7QvtCx0YDQsNC30L3QsNGPINC4INGD0LfQutCw0Y8sINGF0YDRj9GJ0Lgg0L3QtdC20L3Ri9C1INC4INC/0L7QtNCw0YLQu9C40LLRi9C1LCDQutC+0YLQvtGA0YvQtSDQvNC+0LbQvdC+INC70LXQs9C60L4g0L/QvtC00LLQuNCz0LDRgtGMLCDRgdC30LDQtNC4INGF0YDRj9GJ0Lgg0YHQvtC10LTQuNC90LXQvdGLINGE0LjQsdGA0L7Qt9C90L7QuSDRgtC60LDQvdGM0Y4sINC70LXQs9C60L4g0YHQtNCw0LLQu9C40LLQsNC10YLRgdGPINC40L3QvtGA0L7QtNC90YvQvCDRgtC10LvQvtC8LiDQodC70LjQt9C40YHRgtCw0Y8g0L7QsdC+0LvQvtGH0LrQsCDRgdC60LvQvtC90L3QsCDQuiDQvtGC0LXQutCw0Lwg0YMg0LTQtdGC0LXQuSDQuCDRgtCw0LrQttC1INC+0YfQtdC90Ywg0LLQsNGB0LrRg9C70Y/RgNC40LfQuNGA0L7QstCw0L3QsC4g0Jgg0LjQty3Qt9CwINGN0YLQuNGFINCw0L3QsNGC0L7QvNC40YfQtdGB0LrQuNGFINC+0YHQvtCx0LXQvdC90L7RgdGC0LXQuSDQtNC10YLQuCDRgdC60LvQvtC90L3RiyDQuiDRgdGC0LXQvdC+0LfQuNGA0YPRjtGJ0LjQvCDQu9Cw0YDQuNC90LPQuNGC0LDQvC4g</text:p>
          </table:table-cell>
          <table:table-cell office:value-type="float" office:value="170348" table:style-name="ce1">
            <text:p>170348</text:p>
          </table:table-cell>
          <table:table-cell office:value-type="float" office:value="60" table:style-name="ce1">
            <text:p>60</text:p>
          </table:table-cell>
          <table:table-cell office:value-type="string" table:style-name="ce1">
            <text:p>Плагиат составил 59%. Оценка снижена на 30% согласно лиги честности.</text:p>
          </table:table-cell>
          <table:table-cell office:value-type="float" office:value="30" table:style-name="ce1">
            <text:p>30</text:p>
          </table:table-cell>
          <table:table-cell table:number-columns-repeated="16376"/>
        </table:table-row>
        <table:table-row table:style-name="ro1">
          <table:table-cell office:value-type="float" office:value="915298" table:style-name="ce1">
            <text:p>915298</text:p>
          </table:table-cell>
          <table:table-cell office:value-type="string" table:style-name="ce1">
            <text:p>russian</text:p>
          </table:table-cell>
          <table:table-cell office:value-type="string" table:style-name="ce1">
            <text:p>Билет 20.&amp;lt;br /&amp;gt; 1.Назовите анатомо-физиологические особенности толстой кишки у новорожденных.&amp;lt;br /&amp;gt; 2.Ребенку 2 года. Жалобы родителей на осиплость голоса, грубый кашель, беспокойство, одышку. Назовите вид одышки? Какие анатомические особенности, приводят к развитию стенозирующего ларингита у детей?&amp;lt;br /&amp;gt;</text:p>
          </table:table-cell>
          <table:table-cell office:value-type="string" table:style-name="ce1">
            <text:p>MS4g0KMg0L3QvtCy0L7RgNC+0LbQtNC10L3QvdGL0YUg0YLQvtC70YHRgtCw0Y8g0LrQuNGI0LrQsCDRhdC+0YDQvtGI0L4g0LrRgNC+0LLQvtGB0L3QsNCx0LbQsNC10YLRgdGPOyDRgtCw0LrQttC1INC90LDQsdC70Y7QtNCw0LXRgtGB0Y8g0LHQvtC70YzRiNC+0LUg0LrQvtC70LjRh9C10YHRgtCy0L4g0LPQsNC30L7Qsi4g0JjQtyDQt9CwINGN0YLQuNGFINC+0YHQvtCx0LXQvdC90L7RgdGC0LXQuSDRgyDQvdC+0LLQvtGA0L7QttC00LXQvdC90YvRhSDRh9Cw0YHRgtC+INCx0YvQstCw0Y7RgiDQutC+0LvQuNC60LgsINGN0YLQviDRgtCw0LrQttC1INC80L7QttC10YIg0LHRi9GC0Ywg0YHQstGP0LfQsNC90L4g0YEg0L3QtdC00L7RgNCw0LfQstC40YLRi9C80Lgg0LbQtdC70YPQtNC+0YfQvdGL0LzQuCDRhNC10YDQvNC10L3RgtCw0LzQuCDQuCDQuNC3INC30LAg0L3QtdC/0YDQsNCy0LjQu9GM0L3QvtCz0L4g0L/RgNC40LrQu9Cw0LTRi9Cy0LDQvdC40Y8g0Log0LPRgNGD0LTQuCDQvNCw0LvRi9GI0LAg0L/RgNC4INC60L7RgNC80LvQtdC90LjQuCjQvdC10L/RgNCw0LLQuNC70YzQvdC+0LPQviDQutC+0YDQvNC70LXQvdC40Y8pLiA8YnIgLz4NCtCjINC90L7QstC+0YDQvtC20LTQtdC90L3Ri9GFINC00LvQuNC90LAg0YLQvtC70YHRgtC+0LPQviDQutC40YjQtdGH0L3QuNC60LAg0YHQvtGB0YLQsNCy0LvRj9C10YIgNjMg0YHQvCwg0LAg0Log0LrQvtC90YbRgyDQv9C10YDQstC+0LPQviDQs9C+0LTQsCDQttC40LfQvdC4INGB0L7RgdGC0LDQstC70Y/QtdGCIDgz0YHQvC4g0Jog0YDQvtC20LTQtdC90LjRjiDQvdC1INC30LDQutCw0L3Rh9C40LLQsNC10YIg0YHQstC+0LUg0YTQvtGA0LzQuNGA0L7QstCw0L3QuNC1LiDQodCw0LvRjNC90YvRhSDQvtGC0YDQvtGB0YLQutC+0LIg0L3QtdGCLiDQm9C10L3RgtGLINC+0LHQvtC00L7Rh9C90L7QuSDQutC40YjQutC4INC10LTQstCwINC30LDQvNC10YLQvdGLLiDQk9Cw0YPRgdGC0YDRiyDQvtCx0L7QtNC+0YfQvdC+0Lkg0LrQuNGI0LrQuCDQvtGC0YHRg9GC0YHQstGD0Y7Rgi4g0JvQtdC90YLRiyDQuCDQs9Cw0YPRgdGC0YDRiyDQvtCx0L7QtNC+0YfQvdC+0Lkg0LrQuNGI0LrQuCDRhNC+0YDQvNC40YDRg9GO0YLRgdGPINC6IDYtNyDQs9C+0LTQsNC8LjxiciAvPg0KMi4g0KMg0LTQtdGC0LXQuSDRgNCw0L3QvdC10LPQviDQstC+0LfRgNCw0YHRgtCwICjQsiDQtNCw0L3QvdC+0Lwg0YHQu9GD0YfQsNC1IDIg0LPQvtC00LApLCDQuNC3INC30LAg0YLQvtCz0L4g0YfRgtC+INCz0L7Qu9C+0YHQvtCy0YvQtSDRgdCy0Y/Qt9C60Lgg0L3QtSDQtNC+INC60L7QvdGG0LAg0YDQsNC30LLQuNGC0YssINC/0YDQuCDQutCw0YjQu9C1ICjQuCDQtNGA0YPQs9C40YUg0LTRi9GFLiDQt9Cw0LHQvtC70LXQstCw0L3QuNGP0YUpINC90LDQsdC70Y7QtNCw0LXRgtGB0Y8g0L7RgdC40L/Qu9C+0YHRgtGMINCz0L7Qu9C+0YHQsCwg0Lgg0Y3RgtC+INC/0YDQuNCy0L7QtNC40YIg0Log0YDQsNC30LLQuNGC0LjRjiDRgdGC0LXQvdC+0LfQuNGA0YPRjtGJ0LXQs9C+INC70LDRgNC40L3Qs9C40YLQsCDRgyDQtNC10YLQtdC5LiDQotCw0LrQttC1INC40Lcg0LfQsCDQvdC10LTQvtGB0YLQsNGC0L7Rh9C90L7Qs9C+INGA0LDQt9Cy0LjRgtC40Y8g0LPQvtC70L7RgdC+0LLRi9GFINGB0LLRj9C30L7Quiwg0YMg0LTQtdGC0LXQuSDQv9GA0Lgg0LDRg9GB0LrRg9C70YzRgtCw0YbQuNC4INCx0L7Qu9GM0YjQtSDQstGL0YHQu9GD0YjQuNCy0LDQtdGC0YHRjyDQtNGL0YXQsNC90LjQtSDQsdGA0L7QvdGF0L7QsiDRh9C10Lwg0LLQtdC30LjQutGD0LvRj9GA0L3QvtC1LiDQl9C00LXRgdGMINC90LDQsdC70Y7QtNCw0LXRgtGB0Y8g0LjQvdGB0L/QuNGA0LDRgtC+0YDQvdCw0Y8gKNCy0LTQvtGFKSDQvtC00YvRiNC60LAsINGC0LDQuiDQutCw0Log0YDQtdCx0LXQvdC+0Log0L3QtSDQvNC+0LbQtdGCINC90L7RgNC80LDQu9GM0L3QviDQstC00L7RhdC90YPRgtGMINCy0L7Qt9C00YPRhSDQuNC3INC30LAg0YDQsNC30LLQuNGC0LjRjyDRgdGC0LXQvdC+0LfQuNGA0YPRjtGJ0LXQs9C+INC70LDRgNC40L3Qs9C40YLQsCwg0L/QvtGN0YLQvtC80YMg0YLQsNC60LbQtSDQvNC+0LbQtdGCINC90LDQsdC70Y7QtNCw0YLRjNGB0Y8g0L/QvtCy0LXRgNGF0L3QvtGB0YLQvdC+0LUg0Lgg0YfQsNGB0YLQvtC1INC00YvRhdCw0L3QuNC1LiA8YnIgLz4NCtCQ0L3QsNGC0L7QvNC40YfQtdGB0LrQuNC1INC+0YHQvtCx0LXQvdC90L7RgdGC0Lg6INCT0L7Qu9C+0YHQvtCy0YvQtSDRgdCy0Y/Qt9C60Lgg0YMg0LTQtdGC0LXQuSDQutC+0YDQvtGH0LUsINC4INCz0L7RgNGC0LDQvdGMINCy0L7RgNC+0L3QutC+0L7QsdGA0LDQt9C90LDRjywg0YPQt9C60LDRjyAsINGF0YDRj9GJ0Lgg0L3QtdC20L3Ri9C1INC4INC/0L7QtNCw0YLQu9C40LLRi9C1LiDQmCDQsdC+0LPQsNGC0LDRjyDQstCw0YHQutGD0LvRj9GA0LjQt9Cw0YbQuNGPOyDQuCDRgdC70LjQt9C40YHRgtGL0LUg0LPQvtGA0YLQsNC90Lgg0YHQutC70L7QvdC90Ysg0Log0L7RgtC10LrRgy4g0JPQvtC70L7RgdC+0LLRi9C1INGB0LLRj9C30LrQuCDRhNC+0YDQvNC40YDRg9GO0YLRgdGPINGC0L7Qu9GM0LrQviDQuiAxMC0xMiDQs9C+0LTQsNC8LiAgICAgICA8YnIgLz4NCg==</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не полный ответ по 1 и 2 вопросу</text:p>
          </table:table-cell>
          <table:table-cell office:value-type="float" office:value="0" table:style-name="ce1">
            <text:p>0</text:p>
          </table:table-cell>
          <table:table-cell table:number-columns-repeated="16376"/>
        </table:table-row>
        <table:table-row table:style-name="ro1">
          <table:table-cell office:value-type="float" office:value="915653" table:style-name="ce1">
            <text:p>915653</text:p>
          </table:table-cell>
          <table:table-cell office:value-type="string" table:style-name="ce1">
            <text:p>russian</text:p>
          </table:table-cell>
          <table:table-cell office:value-type="string" table:style-name="ce1">
            <text:p>Билет 20.&amp;lt;br /&amp;gt; 1.Назовите анатомо-физиологические особенности толстой кишки у новорожденных.&amp;lt;br /&amp;gt; 2.Ребенку 2 года. Жалобы родителей на осиплость голоса, грубый кашель, беспокойство, одышку. Назовите вид одышки? Какие анатомические особенности, приводят к развитию стенозирующего ларингита у детей?&amp;lt;br /&amp;gt;</text:p>
          </table:table-cell>
          <table:table-cell office:value-type="string" table:style-name="ce1">
            <text:p>0KLQvtC70YHRgtCw0Y8g0LrQuNGI0LrQsCDRgyDQvdC+0LLQvtGA0L7QtNC10L3QvdGL0YUg0YHQvtGB0YLQvtC40YIg0LjQtyDRgdC70LXQv9C+0Lk90LLQvtGB0YXQvtC70LTRj9GJ0LXQuSDQv9C+0L/QtdGA0LXRh9C90L7QuSDQvdC40YHRhdC+0LTRj9GJ0LXQuSDRgdC40LPQvNC+0LLQuNC00L3QvtC5INC4INC/0YDRj9C80L7QuSDQutC40YjQutC4Li7QktCe0YHRhdC+0LTRj9GJ0LDRjyDRh9Cw0YHRgtGMINC+0LHQvtC00L7Rh9C90L7QuSDQutC40YjQutC4INCx0L7Qu9GM0YjQtSDRh9C10Lwg0J3QmNCh0YXQvtC00Y/RidCw0Y8g0LTQviA0INC70LXRgiDQsCDQv9C+0L/QtdGA0LXRh9C90LDRjyDRh9Cw0YHRgtGMINC90LDRh9C40L3QsNC10YIg0LfQsNC90LjQvNCw0YLRjCAg0LPQvtGA0LjQt9C+0L3RgtCw0LvRjNC90L7QtSDQv9C+0LvQvtC20LXQvdC40LUg0LIgMiDQs9C+0LTQsC7QodC40L3QvNC+0LLQuNC00L3QsNGPINC60LjRiNC60LAg0LTQu9C40L3QvdCw0Y8g0L/QvtC00LLQuNC20L3QsNGPINC/0L7RgdC70LUgNSDQu9C10YIg0L7Qv9GD0YHQutCw0LXRgtGB0Y8g0LIg0LzQsNC70YvQuSDRgtCw0Lcu0JTQu9C40L3QsCDRgtC70YHRgtC+0Lkg0LrQuNGI0LrQuD02MyDRgdC8INCyINC80L7QvNC90YIg0YDQvtC20LTQtdC90LjRjyDQsCDQv9C+0YHQu9C1INC+0LTQvdC+0LMg0LPQvtC00LAg0LbQuNC30L3QuCDQvtC90LAg0YDQsNCy0L3QsCA4M9GB0Lwg0KMg0L3QvtCy0L7RgNC+0LbQtNC10L3QvdC+0LPQviDQvtGC0YHRgtGB0YLQstGD0LXRgiDRgdCw0LvRjNC90LjQutC+0LLRi9C1INC90LDRgNC+0YEt0YLRiyDQutC+0YLQvtGA0YvQtSDQvdCw0YfQuNC90LDRjtGCINGE0L7RgNC80LjRgNGB0Y8g0LIgMiDQs9C+0LTQtNCwINGDINGA0LXQsdC10L3QutCwICDQm9C10L3RgtGDINGC0L7Qu9GB0YLQvtC5INC60LjRiNC60Lgg0YLQvtC20LUg0LXQtNCy0LAg0LfQsNC80LXRgtC90Ysg0L3QtSDRgdGE0L7RgNC80LjRgNC+0LLQsNC90Ysg0L/QvtC70L3QvtGB0YLRjNGOINC6INC80L7QvNC10L3RgtGDINGA0L7QttC00LXQvdC40Y8u0JPQsNGD0YHRgtGA0Ysg0YLQviDQtdGB0YLRjCDQstGL0L/Rj9GH0LjQstCw0L3QuNGPINGB0LDQu9C90LjQutC+0LLRi9C1INC90LDRgNC+0YHRgtGLINCyINGC0L7QuyDQutC40YjQutC1INC+0LrQvtC90YfQsNGC0LXQu9GM0L3QviDRhNC+0YDQvNC40YDRgdGPINC6IDcg0LPQvtC00LDQvCDQk9Cw0YPRgdGC0YDRiyDQv9C+0Y/QstC70Y/RjtGC0YHRjyDQvdCwIDYg0LzQtdGB0Y/RhtC1IC7Qp9C10YDQstC10L7QsdGA0LDQt9C90Ysg0L7RgtGA0L7RgdGC0L7QuiDQvtGC0YXQvtC00LjRgiDQvtGCINGB0LvQtdC/0L7QuSDQutC40YjQutC4Li7Qp9C10YDQstC10L7QsdGA0LDQt9C90YvQuSDQvtGC0YDQvtGB0YLQvtC6INGDINC90L7QstGA0L7Qti7QutC+0L3QuNGH0LXRgdC60L7QuSDRhNC+0YDQvNGLINC4INC+0L0g0YHQstC+0LHQvtC00L3QviDQtNCy0LjQs9Cw0LXRgtGB0Y8g0LzQtdC90Y/QtdGCINC/0L7Qu9C+0LbQtdC90LjQtSDQuNC30LfQsCDQtNC70LjQvdC90L7Qs9C+INC/0YDQvtGB0LLQtdC60YLQsCDQstGB0LvQtdC00YHRgtCy0LjQuCDRjdGC0L7Qs9C+INC+0L0g0LzQvtC20LXRgiDRgNCw0YHQv9C+0LvRgdGPINCyINC70Y7QsdC+0Lkg0YfQsNGB0YLQuCDQsdGA0Y7RiNC90L7QuSDQv9C+0LvQvtGB0YLQuCDQodC70LjQtyDQvtCx0L7Qu9C+0YfQutCwINGC0L7Qu9GB0YLQvtCz0L4g0LrQuNGI0LXRh9C90LjQutCwINC40LzQtdC10YIg0LHQvtC70LXQtSDRg9Cz0LvRg9Cx0LvQtdC90L3Ri9C1INC60YDQuNGB0YLRi9GOLtCc0LjQutGA0L7RhNC70L7RgNCwINC60LjRiNC10YfQvdC40LrQsCDRgdGC0LXRgNC40LvRjNC90LAgLdCyINGC0LXRhyAxINGB0YPRgtC+0Log0L/RgNC+0LjRgdGF0L7QtNC40YIg0LXQtSDQt9Cw0YHQtdC70LXQvdC40LUg0JzQuNC60YDQvtGE0LvQvtGA0LAg0LrQuNGI0LXRh9C90LjQutCwINC90LDRh9GB0Y8g0YEg0LXRgdGC0LXRgdGC0LLQtdC90L3QvtCz0L4g0LLRgdC60LDRgNC80LvQuNCy0LDQvdC40Y8g0JIg0LrQuNGI0LXRh9C90LjQutC1INC90LDRhdC+0LTRj9GC0YHRjyDQsdC40YTQuNC00L7QsdCw0LrRgtC10YDQuNC4INC70LDQutGC0L7QsdCw0LrRgtC10YDQuNC4INC00LDQu9C10LUg0YEg0LLQvtC30YDQsNGB0YLQvtC8INC80LjQutGA0L7RhNC70L7RgNCwINC60LjRiCDQuNC30LzQtdC90Y/QtdGC0YHRjy4g0J/RgNGP0LzQsNGPINC60LjRiNC60LAg0YMg0L3QvtCy0L7RgCDQuNC80LXQtdGCINGG0LjQu9C40L3QtNGA0LjRh9C10YHQutGD0Y4g0YTQvtGA0LzRgyDQvdC+INGDINC90LXQtSDQvdC1INGA0LDQt9Cy0LjRgtGLINCw0LzQv9GD0LvQsCDQuCDQuNC30LPQuNCx0Ysg0KHQstC+0LUg0L7QutC+0L3Rh9Cw0YLQtdC70YzQvdC+0LUg0L/QvtC70L7QttC10L3QuNC1INGE0L7RgNGB0Y8g0LogMiDQs9C+0LTQsNC8INC00L4g0Y3RgtC+0LPQviDQstGA0LXQvNC10L3QuCDQvtC90LAg0L/QvtC00LLQuNC20L3QsCDQvdC+INC90LUg0YTQuNC60YHQuNGA0L7QstCw0L3QsCDQv9C+0Y3RgtC+0LzRgyDRh9Cw0YHRgtC+INC80L7QttC10YIg0LLQvtC30L3QuNC60LDRgtGMINCy0YvQv9Cw0LTQtdC90LjQtSDQv9GA0Y/QvNC+0Lkg0LrQuNGI0LrQuC7QkiDQv9GA0Y/QvNC+0Lkg0LrQuNGI0LrQtSDQv9C+0LTRgdC70LjQt9GB0YLRi9C5INGB0LvQvtC5INGA0LDQt9Cy0LjRgiDRhdC+0YDQvtGI0L4g0LAg0LzRi9GI0LXRhyDRgdC70LDQsdC+INCk0YPQvdC60YbQuCDQutC40YjQutC4OtC+0L3QsCDQvtCx0LXRgdC/0LXRh9C40LLQsNC10YIg0YDQtdC30L7RgNCx0YbQuNGOINCy0L7QtNGLINC4INCy0YvQv9C+0LvQvdGP0LXRgiDRjdCy0LDQutGD0LDRgtC+0YDQvdC+INGA0LXQt9C+0YDQstGD0LDRgNC90Y4g0YTRg9C90LrRhtC40Y4t0LrQsNC70L7QvtCx0YDQsNC30YPRjtGJ0LDRjyDRhNGD0L3QutGG0LjRjyDRgtC+INC10YHRgtGMINCyINC90LXQuSAg0YXRgNCw0L3Rj9GC0YHRjyDQv9C40YnQuCDQuCDQtNCw0LvQtdC1INGH0LXRgNC10Lcg0L/RgNGP0LzRg9GOINC60LjRiNC60YMg0LLRi9GF0L7QtNC40YIg0LrQsNC70L7QstCw0Y8g0LzQsNGB0YHQsC7QoyDQvdC+0LLQvtGA0L7QttC00LXQvdC90YvRhSDQv9GA0L7RhtC10YHRiyDQstGB0LDRgdGL0LLQsNC90Y8g0LLQvtC00Ysg0Lgg0YTQvtGA0LzQuNGA0L7QstCw0L3QuNGPINC60LDQu9C+0LLRi9GFINC80LDRgdGBINC90LXQtNC+0YDRgdGC0LDRgtC+0YfQvdC+INGN0YTRhNC10LrRgtC40LLQvdGLINC40LfQt9CwINC90LXQt9GA0LXQu9C+0YHRgtC4INGB0LjRgdGC0LXQvNGLINCh0L7QutC+0L7RgtC00LXQu9C10L3QuNC1INCyINGC0L7Qu9GB0YLQvtC5INC60LjRiNC60LUg0YPQstC10LvQuNGH0LjQstGB0Y8g0L/RgNC4INC80LXRhdGF0LDQvdC40YfQtdGB0LrQvtC8INGA0LDQt9C00YDQsNC20LXQvdC40Lg8YnIgLz4NCjIg0LfQsNC00LDRh9CwLzrQrdGC0L4g0L7RgdGC0YDQvtC1INCy0L7RgdC/0LDQu9C40YLQtdC70YzQvdC+0LUg0LfQsNCx0L7Qu9C10LLQsNC90LjQtSDQs9C+0YDRgtCw0L3QuCDQstC+0LfQvdC40LrQsNGO0YnQtdC1INGH0LDRgdGC0L4g0YMg0LTQtdGC0LXQuSDRgNCw0L3QvdC10LPQviDQstC+0LfRgNCw0YHRgtCwIDEtMyDQuCDRgdC+0L/RgNC+0LvQstC+0LbQtNCw0Y7RidGJ0LXQtdGB0Y8g0YHRgtC10L3QvtC30L7QvCDRgiDQtSDRgdGD0LbQtdC90LjQtdC8INCz0L7RgNGC0LDQvdC4INC40LfQt9CwINC+0YLQtdC60LAg0Lgg0LLQvtGB0L/QsNC70LXQvdC40Y8g0L/QvtC00YHQutC70LDQtNC+0YfQvdC+0LPQviDQv9GA0L7RgdGC0YDQsNC90YHQstCwLtCc0LDQu9C10L3RjNC60LjQtSDQtNC10YLQuCDQuNC80LXRjtGCINCx0L7Qu9GM0YjRg9GOINGB0LrQu9C+0L3QvdC+0YHRgtGMINC6INGB0YLQtdC90L7Qt9C40YDRg9GO0YnQuNC8INC70LDRgNC40L3Qs9C40YLQsNC8INGN0YLQviDRgdCy0Y/Qt9Cw0L3QviDRgSDQtdC1INCw0L3QvtGC0L7QvNC40YfQtdGB0LrQuNC80Lgg0L7RgdC+0LHQtdC90L3QvtGB0YLRj9C80LguINCT0L7RgNGC0LDQvdGMINC40LzQtdC10YIg0LLQvtGA0L7QvdC60L7QvtCx0YDQsNC30L3Rg9GOINGE0L7RgNC80YMg0Lgg0YDQsNGB0L/QvtC70YHRjyDQstGL0YjQtSDRh9C10Lwg0YMg0LLQt9GA0L7RgdC70YvRhSA9INGDINC90LXQtSDRg9C30LrQuNC5INC/0YDQvtGB0LLQtdGCPdGN0YLQviDQv9GA0LjQstC+0LTQuNGCINC6INGB0LrQu9C+0L3QvdC+0YHRgtC4INGB0Lsg0L7QsdC+0Lsg0Log0L7RgtC10LrRgyDQuCDQsdC+0LPQsNGC0LDRjyDQutGA0L7QstC10L3QvtGB0L3Ri9C80Lgg0Lgg0LvQuNC80YTQsNGC0LjRh9C10YHQutC40LzQuCDRgdC+0YHRg9C00LDQvNC4LtCc0Y/Qs9C60LjQtSDRhdGA0Y/RidC4INCz0L7RgNGC0LDQvdC4INC90LUg0L7QsdC10YHQv9C10YfQuNCy0LDRjtGCINC00L7RgdGC0LDRgtC+0YfQvdC+0Lkg0LbQtdGB0YLQutC+0YHRgtC4INGB0YLQtdC90L7RhSDQtNGL0YUg0L/Rg9GC0LXQuSDRh9GC0L4g0L/RgNC40LLQvtC00LjRgiDQuiDQuNGFINC60L7Qu9C70LDQv9GB0YMg0L/RgNC4INCy0LTQvtGF0LUu0JPQvtC70L7RgdC+0LLRi9C1INGB0LLRj9C30LrQuCDQs9C+0YDRgtCw0L3QuCDQvtC90Lgg0LrQsNGA0L7Rh9C1INGH0LXQvCDRgyDQstC30YDQvtGB0LvRi9GFINC/0L7RjdGC0L7QvNGDINGD0LTQtdGC0LXQuSDRgtCw0LrQvtC5INCz0L7Qu9C+0YEg0JTQviAzINC70LXRgiDQs9C+0YDRgtCw0L3RjCDQuNC80LXQtdGCINC+0LTQuNC90LDQutC+0LLRg9GOINGE0L7RgNC80YMg0YMg0LzQsNC70YzRh9C40LrQvtCyINC4INGDINC00LXQstC+0YfQtdC6INC90L4g0L/QvtGB0LvQtSAzINGDINC80LDQu9GM0YfQuNC60L7QsiDQuNC30LzQtdC90Y/QtdGC0YHRjyDRg9Cz0L7QuyDRgdC+0LXQtNC40L3QsNC90LjRjyDQv9C70LDRgdGC0LjQvdC+0Log0YnQuNGC0L7QstC40LTQvdC+0L4g0YXRgNGP0YnQsCDQvtC9INGB0YLQsNC90L7QstC40YLRgdGPINC+0YHRgtGA0LXQtdC1INC4INCyINCx0L7Qu9C10LUg0LLQt9GA0L7RgdC70L7QvCDQstC+0LfRgNCw0YHRgtC1INGDINC90LjRhSDQstC40LTQvdC+INCw0LTQvtC80L7QstCw0Y8g0Y/QsdC70L7QutC+LtCaIDEwINCz0L7QtNCw0Lwg0LPQvtC70L7RgdC+0LLRi9C1INGB0LLRj9C30LrQuCDRg9C00LvQuNC90Y/RjtGC0YHRjy7QmNC90YHQv9C40YDQsNGC0L7RgNC90YvQuSDQstC40LQg0L7QtNGI0LrQuCDRgtC+INC10YHRgtGMINC30LDRgtGA0YPQtNC90Y/QtdGC0YHRjyDQstC00L7RhSAu0JHQtdGB0L/QvtC60L7QudGB0YLQstC+INC4INCy0L7Qt9Cx0YPQttC00LXQvdC40LUg0YMg0YDQtdCx0LXQvdC60LAg0LjQt9C30LAg0LPQuNC/0L7QutGB0LjQuC7Qn9C+0LTQstC+0LTRjyDQuNGC0L7Qs9C4INC+0YHQuNC/0LvQvtGB0YLRjCDQs9C+0LvQvtGB0LAs0LPRgNGD0LHRi9C5INC60LDRiNC10LvRjCDQsdC10YHQv9C+0LrQvtC50YHRgtCy0L4g0Lgg0L7QtNGL0YjQutCwINGDIDIg0LvQtdGC0L3QtdCz0L4g0YDQtdCx0LXQvdC60LAg0YDQsNC30LLQuNGC0LjQtSDRgdGC0LXQvdC+0LfQuNGA0YPRjtGJ0LXQs9C+INC70LDRgNC40L3Qs9C40YLQsCDRgdCy0Y/Qt9Cw0L3QviDRgSDQsNC90LDRgtGE0LjQt9C40L7Qu9C+0LPQuNGH0LXRgdC60LjQvNC4INC+0YHQvtCx0LXQvdC90L7RgdGC0Y/QvNC4INCz0L7RgNGC0LDQvdC4INCyINGN0YLQvtC8INCy0L7Qt9GA0LDRgdGC0LUg0KLQsNC60LbQtSDRgdGC0LXQvdC+0LfQuNGA0YPRjtGJ0LjQuSDQu9Cw0YDQuNC90LPQuNGCINC40LfQstC10YHRgtC10L0g0LrQsNC6INC70L7QttC90YvQuSDQutGA0YPQvyDQuNC70Lgg0LbQtSDQvtGB0YLRgNGL0Lkg0YHRgtC10L3QvtC3INCz0L7RgNGC0LDQvd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717" table:style-name="ce1">
            <text:p>914717</text:p>
          </table:table-cell>
          <table:table-cell office:value-type="string" table:style-name="ce1">
            <text:p>english</text:p>
          </table:table-cell>
          <table:table-cell office:value-type="string" table:style-name="ce1">
            <text:p>Ticket 20.&amp;lt;br /&amp;gt; 1 What are the anatomical and physiological features of the colon in newborns:&amp;lt;br /&amp;gt; 2. Parents of 2 years old child complain about hoarseness of voice, severe cough, anxiety, dyspnea. Name the type of dyspnea? What anatomical features lead to the development of stenosing laryngitis in children?&amp;lt;br /&amp;gt;</text:p>
          </table:table-cell>
          <table:table-cell office:value-type="string" table:style-name="ce1">
            <text:p>MXRoZSBhbmF0b21pY2FsIGFuZCBwaHlzaW9sb2dpY2FsIG9mIGNvbG9uIGluIG5ldyBib3JucyBhcmUgdGhlIGJhc2VkIG9uIHRoZSBwZWRpYXRyaWNzIGFuZCB0aGUgbWFpbiBmZWF0dXJlcyBiYXNlZCB0aGUgbW9zdCBkaXN0aW5jdCBvbmVzIGFyZSBhbHNvIG1lbnRpb25lZC4gc3RhcnRpbmcgZnJvbXRvICB0aGUgYW5hdG9taWNhbCB2aWV3LiBmaXJzdGx5IHRoZSBjb2xvbnMgaW4gdGhlIG5ldyBib3JucyBhcmUgcmVsYXRpdmVseSBzaG9ydGVyIHRoYW4gY29tcGFyaW5nIHRvIHRoZSBhZHVsdHMuIHRoZSAgYXNjZW5kaW5nIGNvbG9uIGlzIHRvIHRoZSBhbHNvIG5vdCBmdWxseSB0byBkZXZlbG9wZWQgaW4gdGhlIG5ldyBib3JucyBhcyBjb21wYXJldGQgdG8gdGhlIGFkdWx0LiAgIHRoZSBtdXNjdWxlcyBvZiBjb2xvbiB0aGF0IGlzIGJvdGggIGxvbmdpdHVkbmFsIGNpcmN1bGFyIGFyZSBpbW1hdHVyZSBhbmQgbm90IGZ1bGx5IGRldmVsb3BlZCBhcyBjb21wYXJlZCB0byB0aGVyIGFkdWx0cy4gdGhlIGx1bWVuIGlzIGFsc28gbmFycm93ZXIgd2hpY2ggcmVzdWx0cyBpbiBwYXRod2F5IG5hcnJvd2luZyB0byB0aHdlIHN0b29sLiBhbmQgYWxzbyBkdWUgdG8gdGhlIGxlc3MgZGV2ZWxvcG1lbnRhbCBvZiB0aGlzIGxlYWRzIHRvIHRoZSAgdGhlIGxvdyBhYnNvcnB0aW9uIG9mIHdhdGVyIGFuZCBlbGVjcm9seXRlcyB0aGVyZSBpcyBzb2Z0bmVzcyBpbiBzdG9vbCBhbmQgb3Igbm90IHZlcnkgd2VsbCBkZXZlbG9wbWVudC4gIHRoZSByZWN0YWwgZGV2ZWxvcG1lbnQgYWxzbyBpcyBhaG9ydCBhbmQgbm90IHdlbGwgZGV2ZWxvcGVkLiAgdGhlcmUgaXMgYXNsbyBhYnNjZW5jZSBvZiBoYXVzdHJhdGlvbnMuIHdoaWNoIGdpdmUgdGhlIGNvbG9uIGl0cyBzZWdtZW50ZWQgYXBwZT1yZWFuY2UvIGFyZSBsZXNzIHByb21pbmVudCBhbmQgb3IgYWJzZW50IGluIG5ld2Jvcm5zIG9yIGNoaWxkcmVuICBhbmQgdGhlIGNvbG9uIGFsc28gZWxvbmdhdGVkIGFzIGNvbXBhcnRvZWQgdG8gdGhlIGFkdWx0cyB0aGUgbXVzY3VsZSBvZiB0aGUgY29sb24gYXJlIGFsc28gdW5kZXJkZXZlbG9wZWQuIHRoZSBwaHlzaW9sb2dpY2FsIGZlYXR1cmVzIGFyZSB0aGF0IHRoZSBjb2xvbiBtdXNjdWxlIGFyZSB3ZWFrIHRoYXQgcmVzdWx0cyBpbiB0aGUgc2xvd2VyIHBlcmlzdGFsaXNpcyBtb21lbnQgYXMgY29tcGF0ZWQgdG8gdGdoeWUgIGFkdWx0cy4gYW5kIGFsc28gZHVlIHRvIHRoZSBsZXNzIGRldmVsb3BtZW50YWwgbmV1cm9tdXNjdWxhciBkZXZlbG9wbWVudCBpbiBuZXcgYm9ybnMuICBsZWFkaW5nIHRvIHNsb3dlciBzdG9vbCBwYXNzYWdlLCB0aGVyZSBpcyBhbHNvIHRoZSBkZWZlY2F0aW9uIHJlZmwzZXggaW4gbmV3Ym9ybnMgd2h1Y2ggaXMgbml0IHZlcnl0IHdlbGwgZGV2ZWxvcGVkLiB3aGljaCBtcmFucyB0aGUgYm93bCBtb3Zlbm1lbnRzIGFyZSBwcmltYXJpbHkgaW52b3VsdW50YXJ5LyAgIHRoZSBhYm9ycHRpb24gb2Ygd2F0ZXIgdGhhdCBpcyBoMjAgYW5kIGVsZWN0cm9seXRlIGFyZSBhbHNvIGxpbWl0ZWQgdGhhbiBjb21wcWFyaW5nIHRvIHRoZSBhZHVsdHMvIHRoZSBwaHlzaW9sb2dpY2FsIGZvcm1zIHZhcnkgYWxzbyBhcyBjb21wYXJlZCB0byB0aGUgYWR1bHRzLCwgdGhlIG1haW4gZGlmZmVyZW5jZXMgdGhvdWdoIGhhdmUgLCBuZW9uaW90ZXMgcHJvZHVjZSBtIGluOWltYWwgbW9pbmltYWwgbXVzY291cyBwcm9kdWN0aW9pbiBzbyB0aGV5IGhhdmUgd2VhayBhbmQgc2xvd2VyIGRpZ2VzdGlvbiBhcyBjb21wb2FlcmQgdG8gYWR1bHRzLyAyIHRoZSB0eXBlIG9mIGR5c3BuZWEgaXMgdGhlIHN0ZW5vc2luZyBsYXJ5bmdpdGlzIGluIGNoaWxkcmVuLiBpdHMgY2hhcmFjdGVyaXNpc2VkIGJ5IHRoZSBob2Fyc2VuZXNzIG9mIHZvaWNlIHNldmVyZSBjb3VnaCAuIGFueGlldHkuIGR5c3BuZWEgcmVzdWx0cyBmcm9tIHVwcGVyIHJlc3BpcmF0b3J5IG9ic3RydWN0aW9uLiB0aGUgdHlwZXMgb2YgZHlzcG5lYSB0aGF0IGlzIHRoZSBzaG9ydG5lc3Mgb2YgYnJlYXRoLiBhbmQgdGhlcmUgaXMgZGlmZmljdWx0eSBpbiB1cHBlcmUgcmVzcGlyYXRvcnkgdHJhY3QgZHVlIHRvIHRoZSBvYnN0cnVjdGlvbiBpbiB1cHBlciByZXNwaXJhdG9yeSBwYXRod2F5LCBuZXh0IGlzIGluc3BpcmF0b3J5IHN0cmlkb3IgaW4gaGlnaGtseSBwaXRjaGVkLiBhcmUgMS4gaW5zcGlyYXRvcnkgZHlzcG5lYS4gaXRzIGNoYXJhY3RlcmlzZWQgYnkgdGhlIGFuZCBjb21tb24gaW4gbGFyeWluZ2l5dGlzIGR1ZSB0byB1cHBlciByZXNwaWVyYXRvcnkgbmFycm93aW5nLiAyIG1peGVkIGR5c3BuZWEgaXQgb2NjdXJzIGR1ZSB0byB0aGUgaWYgb2JzdHJ1Y3Rpb24gaXMgcHJvZ3Jlc3NpdmUgYW5kIGludm9sdmluZyBib3RoIGluc3BpcmF0aW9uIGFuZCBleHBpcmF0aW9uLiBhbmF0b21pY2FsIGZlYXR1cmVzIHRoYXQgbGVhZCB0byB0aGUgZGV2ZWxvcG1lbnQgb2Ygc3Rlbm9zaW5nIGxhcnluZ2l0aXMgaW4gY2hpbGRyZW4gaXMgdGhlIG5hcnJvd2luZyBvZiB1cHB3ZXIgYWlyd2F5LiB0aGUgaG9hcnNuZXNzIG9mIHZvaWNlIGlzIGR1ZSB0byB0aGUgbmFycm93aW5ndGhlIG1haW4gLCB0aGUgc2l0ZS4gdGhlIGxlbmd0aCBhbmQgc3RydXR1cmUgYWxzbyB2YXJ5ICBvZiBjb2xvbiBhbmQgLiAxIHRoZSBsYXJ5bnggaXMgc2hvcnRlcmluIGFuYXRvbWljYWwgaW4gY2hpbGRyZW4uIDIgLiBjcmljb2lkIGNhcnRpbGFnZSB0aGUgbmFycm93ZWQgcGFydCBpcyBjb21wbGV0ZWluIHJpbmcuIG1ha2luZyAgaXQgcHJvbmUgdG8gc3Rlbm9zaXMgd2l0aCBsYXJ5bmdpdGlzLiAzLiBzdWJtdXNjb3NhTCBUSVNTVUVTIGFyZSBsb29zZSBhbmQgdmFzY3VsYXIgbGVhZGluZyB0byBtb3JlIHNpZ25pZmljYW50IHByb25lIHRvIHN0ZW5vc2luZy4g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914995" table:style-name="ce1">
            <text:p>914995</text:p>
          </table:table-cell>
          <table:table-cell office:value-type="string" table:style-name="ce1">
            <text:p>english</text:p>
          </table:table-cell>
          <table:table-cell office:value-type="string" table:style-name="ce1">
            <text:p>Ticket 20.&amp;lt;br /&amp;gt; 1 What are the anatomical and physiological features of the colon in newborns:&amp;lt;br /&amp;gt; 2. Parents of 2 years old child complain about hoarseness of voice, severe cough, anxiety, dyspnea. Name the type of dyspnea? What anatomical features lead to the development of stenosing laryngitis in children?&amp;lt;br /&amp;gt;</text:p>
          </table:table-cell>
          <table:table-cell office:value-type="string" table:style-name="ce1">
            <text:p>IDEuIFRoZSBjb2xvbiBpbiBuZXdib3JubiBleGliaXRzICBzZXZlcmFsIGRpc3RpbmN0IGFuYXRvbWljYWwgYW5kZCBwaHlzaW9sb2dpY2FsbCAgZmVhdHVyZXMgOiAgICAgICAgICAgICAgICAgICAgICAgICAgICAgICAgICAgICAgICAgICAgICAgICAgICAgICAgICAgICAgICAgICAgICAgICAgPGJyIC8+DQogICAgICAgICAgICAgICAgICAgICAgICAgICAgICAgICAgICAgICAgICAgICAgICAgICAgICAgICAgICAgICAgICAgICAgICAgICAgICAgICAgICAgICAgICAgICAgICAgICAgICAgICAgICAgICAgICAgICAgICAgICAgICAgICAgIDxiciAvPg0KIENPTE9OIExFTkdUSCAtIFRoZSBjb2xvbm4gaXMgcmVsZWF0aXZlbGx5IGxvbmdnIGluIHBvcnBvcnRpb25hbGwgdG8gdGhlZSBpbmZhbnRzIGJvZHl5IHNpemUgLiAgICAgICAgICAgICAgICAgICAgICAgICAgICAgICAgICAgICAgICAgICAgICAgICAgICAgICAgICAgICAgICAgICAgICAgICAgICAgIDxiciAvPg0KICAgICAgICAgICAgICAgICAgICAgICAgICAgICAgICAgICAgICAgICAgICAgICAgICAgICAgICAgICAgICAgICAgICAgICAgICAgICAgICAgICAgICAgICAgICAgICAgICAgICAgICAgICAgICAgICAgICAgICAgICAgIDxiciAvPg0KIE1FQ09OSVVNIFBBU1NBR0UgLSBOZXdib3JuICAgcGFzcyBtZWNvbml1bSAgLCBhIGdyZWVuaXNoIC0gYmxhY2trICwgc3RpY2t5IHN0b29sICwgaW4gdGhlZSBmaXJzdCBkYXlzIG9mIGxpZmUgIC4gTWVjb25pdW0gY29uc2lzdCAgb2YgbWF0ZXJpYWwgIGluZ2VzdGVkICAgaW4gdXRlcm8gLCBzdWNoaCBhcyBhbWlub3RpY2MgZmx1aWQgIG11Y3VzIGFuZGQgZXBpdGhlbGl1bSBjZWxscyAu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PGJyIC8+DQpNSUNST0JJQUwgIENPTE9OSVpBVElPTiAtVGhlICBjb2xvbiB1bmRlcmdvZXMgdGhlIHByb2Nlc3Mgb2YgIG1pY3JvYmlhbGwgY29sb25pemF0aW9uICwgZXN0YWJsaXNoZWQgdGhlIGluZmFudHMgZ3V0IG1pY3JvYmlvbWUgLiBUaGlzIGNvbG9uaXphdGlvbiBpcyBjcnVjaWFsIGZvciB0aGVlIGRyaWdlc3Rpb24gICwgbnV0cml0aW9uIGFic29ycHRpb24gYW5kIGZlcm1lbnRhdGlvbiAuIEluaXRpYWxseSB0aGVlIGlzICBjb2xvbiBoYXMgbGltaXRlZGQgZmVybWVudGF0aW9uIGNhcGFjaXR5IC4gQXMgdGhlIGluZmFudCB0cmFuc3Rpb24gdG8gdGhlZSBtaWxrayBiYXNlZCBkaWV0dCAsIGJhY3RlcmlhbCBwb3B1bGF0aW9ubiBjaGFuZ2VzICwgYWxsb3dpbmdnICBmb3IgY29tcGxldGUgZmVybWVudGF0aW9uIGFuZCBoZWxwZWQgaW4gY29tcGxldGUgZGlnZXN0aW9uIGluICBvZiBjYXJib2h5ZHJhdGVzcyAu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CAgPGJyIC8+DQoyLlR5cGUgb2YgZHlzcG5lYWEgYW5kIGZlYXR1cmVzIChTdGVub3NpbmdnIGxhcnluZ2l0aXMgKSBpbiBjaGlsZHJlbiA6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DxiciAvPg0KVFlQRSAgT0YgRFlTUE5FQSAtICB0aGVlIHN5bXB0b21zIGRlc2NyaWJlIGluICAyIHllYXIgb2xkIGNoaWxkIC0gIGhvYXJzZW5lc3Mgb2Ygdm9pY2VzICwgc2V2ZXJlIGNvdWdoICwgYW54aWV0eSAsICBhbmQgZHlzcG5lYSBzdWdnZXN0ZWRkICB0aGUgcHJlc2VuY2Ugb2YgKCBTdHJpZG9yICkgICwgIFNUUklET1IgaXMgYSBoaWdoIHBpdGNoZWQgLCBub2lzeSBicmVhdGhpbmcgIGFuZGQgc291bmQgdHlvaWNhbGx5IGhlYXJkZCBkdXJpbmdnIGluaGlsYXRpb24gYW5kIGxlc3MgY29tbW9ubHl5IGluIGV4aGFsYXRpb24gLkl0IGlzIHRoZWUgaW5kaWNhdGlvbiBvZiB1cHBlciBhaXJ3YXlzIG9ic3RydWN0aW9ubiAu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8YnIgLz4NCiBBbmF0b21pY2FsbHkgZmVhdHVyZXNzIG9mIHN0ZW5vc2luZyBsYXJ5bmdpdGlzIDogICAgICAgICAgICAgICAgICAgICAgICAgICAgICAgICAgICAgICAgICAgICAgICAgICAgICAgICAgICAgICAgICAgICAgICAgICAgICAgICAgICAgICAgICAgICAgICAgICAgICAgICAgICAgICAgICAgICAgICAgICAgICAgICAgICAgICAgICAgICAgICAgICAgICAgICAgICAgICAgICAgICAgICAgICAgPGJyIC8+DQogICAgICAgICAgICAgICAgICAgICAgICAgICAgICAgICAgICAgICAgICAgICAgICAgICAgICAgICAgICAgICAgICAgICAgICAgICAgICAgICAgICAgICAgICAgICAgICAgICAgICAgICAgICAgICAgICAgICAgICAgICAgIDxiciAvPg0KIE5BUlJPVyBBSVJXQVlTIC0gSU4gY2hpbGRyZW4gdGhlIGFpcndheXNzIGlzIG5hcnJvd2VyciBjb21wYXJlZCB0aGFuIGFkdWx0ZHMgLCBtYWtpbmcgdGhlbSBtb3JlIHN1c3VzY2VwdGliaWxlICB0byBhaXJ3YXlzIG9ic3RydWN0aW9uIC4gICAgICAgICAgICAgICAgICAgICAgICAgICAgICAgICAgICAgICAgICAgICAgICAgICAgICAgICAgICAgICAgICAgICAgICAgICAgICAgICAgICAgICAgICAgICAgICAgICAgICAgICAgICAgICAgICAgICAgICAgICAgICAgICAgICAgICAgICAgICAgPGJyIC8+DQogICAgICAgICAgICAgICAgICAgICAgICAgICAgICAgICAgICAgICAgICAgICAgICAgICAgICAgICAgICAgICAgICAgICAgICAgICAgICAgICAgICAgICAgICAgICAgICAgICAgICAgICAgICAgICAgICAgICAgICAgIDxiciAvPg0KICAgTEFSWU5HRUFMIEVERU1BIC0gIFN0ZW5vc2luZyBsYXJ5bmdpdGlzICBpbnZvbHZlcyBpbmZsYW1hdGlvbiBhbmQgc3dlbGxpbmcgb2YgdGhlZSBsYXJ5bnggKCB2b2ljZSBib3gpIC4gSU4gY2hpbGRyZW4gLCB0aGUgc21hbGxlciBkaW1lbnNpb25zIG9mIHRoZWUgbGFyeW54IG1ha2VlIHRoZW0gbW9yZSBwcm9uZSB0byBzaWduaWZpY2FudHQgIGFpcmZsb2UgcmVzdHJpY3Rpb24gd2hlbiBlZGVtYSBvY2N1cnMgLi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DxiciAvPg0KICBTT0ZUIFRJU1NVRVMgSU4gREVWRUxPUE1FTlQgOiBDaGlsZHJlbiBoYXZlIHRoZSBzb2Z0ZXIgLCBtb3JlICBwbGlhYmxlIHRpc3N1ZXMgaW4gdGhlaXIgYWlyd2F5cyAsIHdoaWNoIGNhbiBiZWUgbW9yZSBzdXNjZXB0aWJsZSB0byBzd2VsbGluZ2cgLiAgICAgICAgICAgICAgICAgICAgICAg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gIDxiciAvPg0KICBWT0NBTCBDT1JEIElOVk9MVkVNRU5UVCAgOiBTdGVub3NpbmcgIGxhcnluZ2l0aXMgb2Z0ZW5uIGludm9sdmVkIHRoZSB2b2NhbCBjb3JkZCAgLCBsZWFkaW5nIHRvIHRoZSBzeW1wdG9tc3Mgb2YgaG9hcnNlbmVzcy4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the answers are incomplete</text:p>
          </table:table-cell>
          <table:table-cell office:value-type="float" office:value="0" table:style-name="ce1">
            <text:p>0</text:p>
          </table:table-cell>
          <table:table-cell table:number-columns-repeated="16376"/>
        </table:table-row>
        <table:table-row table:style-name="ro1">
          <table:table-cell office:value-type="float" office:value="1067111" table:style-name="ce1">
            <text:p>1067111</text:p>
          </table:table-cell>
          <table:table-cell office:value-type="string" table:style-name="ce1">
            <text:p>english</text:p>
          </table:table-cell>
          <table:table-cell office:value-type="string" table:style-name="ce1">
            <text:p>Ticket 20.&amp;lt;br /&amp;gt; 1 What are the anatomical and physiological features of the colon in newborns:&amp;lt;br /&amp;gt; 2. Parents of 2 years old child complain about hoarseness of voice, severe cough, anxiety, dyspnea. Name the type of dyspnea? What anatomical features lead to the development of stenosing laryngitis in children?&amp;lt;br /&amp;gt;</text:p>
          </table:table-cell>
          <table:table-cell office:value-type="string" table:style-name="ce1">
            <text:p>MS5hbmF0b21pY2FsIGFuZCBwaHlzaW9sb2dpY2FsIGZlYXR1cmVzIG9mIGNvbG9uIGluIG5ld2Jvcm4gZXhoaWJpdHMgc2V2ZXJhbCBkaXN0aWN0IGFuYXRvbWljYWwgYW5kIHBoeXNpb2xvZ2ljYWwgZmVhdHVyZXMgQ09MT04gbGVhbnRoIHRoZSBjb2xvbiBpcyByZWxhdGl2ZWx5IGluZmFudHMgYm9keSBzaXplIG1lY29uaXVtIHBhc3NhZ2UgcGFzcyBtZWNvbml1bSBhIEdyZWVlbmlzaCBibGFjayBzdGlja3kgc3Rvb2wgaW4gdGhlIGZpcnN0IGZldyBkYXlzIG9mIGxpZmUgbWVjb25pdW0gY29uc2lzdCBvZiBtYXRlcmlhbCBpbmdlc3RlZCBpbiB1dGVydXMgYXMgYW1uaW90aWMgZmx1aWQgbXVjdXMgYW5kIGVwZXRoaWxpYWwgY2VsbCBtaWNyb2JpYWwgY29sb25pemF0aW9uIHRoZSBjb2xvbiB1bmRlcmdvZXMgdGhlIHByb2Nlc3Mgb2YgbWljcm9iaWFsIGNvbG9uaXphdGlvbiBlc3RhYmlzaW5nIHRoZSBpbmZhbnRzIGd1dCBtaWNyb2JpdW0gdGhpcyBjb2xvbml6YXRpb24gaXMgY3J1Y2lhbCBmb3IgZGlnZXN0aW9uICxudXRyaWVudCBhYnNvcnB0dGlvbiBhbmQgdGhlIGRldmVsb3BtZW50IG9mIHRoZSBpbW11bmUgc3lzdGVtIGxpbWl0ZWQgYmFjdGVyaWFsIGZlcm1hbnRhdGlvbiBpbnRpYWxseSB0aGUgY29sb24gaGFzIGxpbWl0ZWQgYmFjdGVyaWFsIGZlcm1lbnRhdGlvbiBjYXBhY2l0eSBhcyB0aGUgaW5mYWN0IHRyYW5zaXRpb24gdG8gYSBtaWxrIGJhc2VkIGRpZXQgYmFjdGVyaWFsIHBvcHVsYXRpb24gY2hhbmdlIGFsbG93aW5nIGZvciBlbmhhbmNlZCBmZXJtYW50YXRpb24gYW5kIGRpZ2VzdGlvbiBvZiBjb21wbGV4IGRlaHlkcmF0aW9uLiAgICAgICAgICAgICAgICAgICAgICAgICAgICAgICAgICAgICAgICAgICAgICAgICAgICAgICAgICAgICAgICAgICAgICAgICAgICAgICAgICAgICAgICAgICAgMi4tVFlQRVMgT0YgREVTUE5FQSBBTkQgZmVhdHVyZXMgb2Ygc3Rlbm9zaW5nIGxhcnluZ2l0aXMgaW4gY2hpbGRlcm4gdHlwZSBvZiBkeXNwbmVhIHRoZSBzeW1wdG9tcyBkZXNjcmliZWQgaW5uIHRoZSAyIFlFQVJTIG9sZCBjaGlsZCBob2Fyc2VuZXNzIG9mIHZvaWNlIHNlcnZlIGNvdWdoIGFueGlldHkgYW5kIGR5c3BuZWEgc3VnZ2VzdCB0aGUgcHJlc2VuY2Ugb2Ygc3RpZG9yIGlzIGEgaGlnaCBwaXRjaGVkICwsbm9pc3kgLGJyZWF0Z2luZyBzb3VuZCB0eXBpY2FsbHkgaGVhcmQgZHVyaW5nIGluaGFsYXRpb24gYW5kIGxlc3MgY29tbW9tbHkgZHVyaW5nIGV4aGFsYXRpb24gaXQgaXMgaW5kYWN0aXZlIG9mIHVwcGVyIGFpcndheSBvYnN0cnVjdGlvbiwgYW5hdG9taWNhbCBmZWFydXJlcyBsZWFkaW5nIHRvIHN0ZW5vc2luZyBsYXJ5bmdpdHMgLG5hcnJvdyBhaXJ3YXkgaW4gY2hpbGRybiB0aGUgYWlyd2F5IGlzIG5hdHVyYWwgbmFycm93ZXIgdGhhdCBpbiBhZHVsdCBtYWtpbmcgdGhlIG1vcmUgc3VzY2V0aWJsZSB0byBhaXJ3YXkgb2JzdHJ1Y3Z0aW9uIGxhcnlnbmVhbCBlZGVtYSAsLHN0ZW5vc2luZyBsYXJ5bmdpdGlzIGludm9sdmNlcyBpbmZsYW1tYXRpb24gYW5kIHN3ZWxsaW5nIG9mIHRoZSBsYXJ5bnggLHZvaWNlIGJveCBpbiB0aGUgY2hpbGRyZW4gc21lbGxlciBkaW1lbnNpb24gb2YgdGdoZSBsYXJ5bnggbWFrZSB0aGUgbW9yZSBwcm9uZSB0byBzaWduaWZpY2FudCBhaXJmbG93IHJpc3RyaWN0aW9uIHdoZW4gZWRlbWEgb2NjdXIgLCxzb2Z0IHRpc3N1ZSBpbiBkZXZlbG9wbWVudCBjaGlsZHJlbiBoYXZlIGEgc29mdGVyIG1vcmUgcGlsaWJsZSB0aXNzdWUgaW4gdGhlaXIgYWlyd2F5IHdoaWNoIGNhbiBiZSBtb3JlIHN1c3RpYmxlIHRvIHN3ZWxsaW5nIHZvY2FsIGNvcmQgdG8gc3lzbXB0b21zIHN1Y2ggYXMgaG9lcnNlbnNlcy4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13" table:style-name="ce1">
            <text:p>1067113</text:p>
          </table:table-cell>
          <table:table-cell office:value-type="string" table:style-name="ce1">
            <text:p>english</text:p>
          </table:table-cell>
          <table:table-cell office:value-type="string" table:style-name="ce1">
            <text:p>Ticket 20.&amp;lt;br /&amp;gt; 1 What are the anatomical and physiological features of the colon in newborns:&amp;lt;br /&amp;gt; 2. Parents of 2 years old child complain about hoarseness of voice, severe cough, anxiety, dyspnea. Name the type of dyspnea? What anatomical features lead to the development of stenosing laryngitis in children?&amp;lt;br /&amp;gt;</text:p>
          </table:table-cell>
          <table:table-cell office:value-type="string" table:style-name="ce1">
            <text:p>MS5BbmF0b21pY2FsIGFuZCBwaHlzaW9sb2dpY2FsIGZlYXR1cmVzIG9mIHRoZSBjb2xvbiBpbiBuZXdib3JuIHRoZSBjb2xvbiBpbiBuZXcgYm9ybiBleGhpYml0cyBzZXZlcmFsIGRpc3RpbmN0IGFuYXRvbWljYWwgYW5kICBwaHlzaW9sb2dpY2FsIGZlYXR1cmVzICwgY29sb24gbGVuZ3RoIHRoZSBjb2xvbiBpcyByZWxhdGl2ZWx5IGluZmFudHMgYm9keSBzaXplIG1lY29uaXVtIHBhc3NhZ2UgbmV3Ym9ybiBwYXNzIG1lY29uaXVtIGEgZ3JlZW5pc2ggYmxhY2sgc3RpY2t5IHN0b29sIGluIHRociBmaXJzdCBmZXcgZGF5cyBvZiBsaWZlIG1lY29uaXVtIGNvbmlzdCBvZiBtYXRlcmlhbHMgaW5nZXN0ZWQgaW4gdXRlcm8gc3VjaCBhcyBhbW5pb3RpYyBmbHVpZCBtdWN1cyBhbmQgZXBpdGhlbGlhbCBjZWxscyAgbWljcm9iaWFsIGNvbG9uaXphdGlvbiB0aGUgY29sb24gdW5kZXJnb2VzIHRoZSBwcm9jZXNzICBvZiBtaWNyb2JpYWwgY29sb25pemF0aW9uIGVzdGFibGlzaGluZyAgdGhlIGluZmFudHMgIGd1dCBtaWNyb2Jpb21lIHRoaXMgY29sb25pemF0aW9uIGlzIGNydWNpYWwgZm9yIGRpZ2VzdGlvbiBudXRyaWVudCBhYnNvcnB0aW9uIGFuZCB0aGUgZGV2ZWxvcG1lbnQgb2YgdGhlIGltbXVuZSBzeXN0ZW0gbGltaXRlZCBiYWN0ZXJpYWwgZmVybWVudGF0aW9uIGluaXRpYWxseSB0aGUgY29sb24gaGFzIGxpbWl0ZWQgYmFjdGVyaWFsIGZlcm1lbnRhdGlvbiBjYXBhY2l0eSBhcyBhIHRoZSBpbmZhbnQgdHJhbnNpdGlvbiB0byBhIG1pbGsgYmFzZWQgZGlldCBiYWN0ZXJpYWwgcG9wdWxhdGlvbiBjaGFuZ2UgYWxsb3dpbmcgIGZvciBlbmhhbmNlZCBmZXJtZW50YXRpb24gYW5kIGRlZ2VzdGlvbiBvZiBjb21wbGV4IGNhcmJvaHlkcmF0ZXMuICAgICAgICAgICAgICAgICAgICAgIDIudHlwZXMgb2YgZHlzcG5lYSBhbmQgZmVhdHVyZXMgb2Ygc3Rlbm9zaW5nIGxhcnluZ2l0aXMgaW4gY2hpbGRyZW4gdHlwZSBvZiBkeXNwbmVhICwgdGhlIHN5bXB0b21zIGRlc2NyaWJlZCBpbiB0aGUgMiB5ZWFyIG9sZCBjaGlsZCAgaG9hcnNuZXNlc3Mgb2Ygdm9pY2UgIHNldmVyZSBjb3VnaCBhbnhpZXR5IGFuZCBkeXNwbmVhIHN1Z2dlc3QgdGhlIHByZXNlbmNlIG9mIHN0cmlkb3IgLiBzdHJpZG9yIGlzIGEgaGlnaCBwaXRjaGVkICwgbm9pc3kgYnJlYXRoaW5nIHNvdW5kIHR5b2ljYWxseSAgaGVhcmQgZHVyaW5nIGluaGFsYXRpb24gYW5kIGxlc3MgY29tbW9ubHkgZHVyaW5nIGV4aGFsYXRpb24gaXQgaXMgaW5kaWNhdGl2ZSBvZiB1cHBlZXIgYWlyd2F5IC5vYnN0cnVjdGlvbiAsIGFuYXRvbWljYWwgZmVhdHVyZXMgbGVhZGluZyB0byBzdGVub3NpbmcgbGFyeW5naXRpcyAgbmFycm93ICBhaXJ3YXkgIGluIGNoaWxkcmVuIHRoZSBhaXJ3YXkgaXMgbmF0dXJhbGx5IG5hcnJvd2VyIHRoYXQgaW4gYWR1bHRzIG1ha2luZyB0aGVtIG1vcmUgIHN1c2NlcHRpYmxlIHRvIGFpcndheSBvYnN0cnVjdGlvbiBsYXJ5bmdlYWwgZWRlbWEgLCBzdGVub3NpbmcgbGFyeW5naXRpcyBpbnZvbHZlcyBpbmZsYW1tYXRpb24gYW5kIHN3ZWxsaW5nIG9mIHRoZSBsYXJ5bnggLCB2b2ljZXMgYm94IC4gaW4gY2hpbGRyZW4gdGhlIHNtYWxsZXIgZGltZW5zaW9uIG9mIHRoZSBsYXJ5bnggbWFrZSB0aGUgbW9yZSBwcm9uZSB0byBzaWduaWZpY2FudCBhaXJmbG93IHJlc3RyaWN0aW9uIHdoZW4gZWRlbWEgb2NjdXIgLCBzb2Z0ICB0aXNzdWUgIGluIGRldmVscG1lbnQgY2hpbGRyZW4gaGF2ZSBhICBzb2Z0ZXIgbW9yZSBwbGlhYmxlIHRpc3N1ZSBpbiB0aGVpciBhaXJ3YXkgd2hpY2ggY2FuIGJlICBtb3JlIHN1c2NlcHRpYmxlIHRvIHN3ZWxsaW5nICB2b2NhbCBjb3JkIGxlYWRpbmcgIHRvIHN5bXB0b21zIHN1Y2hhIGFzIGhvYXJzZW5lc3M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77" table:style-name="ce1">
            <text:p>915277</text:p>
          </table:table-cell>
          <table:table-cell office:value-type="string" table:style-name="ce1">
            <text:p>kazakh</text:p>
          </table:table-cell>
          <table:table-cell office:value-type="string" table:style-name="ce1">
            <text:p>Билет 21.&amp;lt;br /&amp;gt; 1. 3-күндік баланың анасы педиатрдан баласының нәжісінің қоныр-жасыл түсті екенін, неге ақ емес ол ана сұттімен қөректенеді ғой деп сұраған. Алғашқы нәжіс қалай аталады? Баланың нәжісінің жасыл түсті болуы немен байланысты?&amp;lt;br /&amp;gt; 2. Cіз- кардиолог дәргері. 2-жасар анасымен келді диагнозы: Жүректің кіші даму аномалиясы. Ашық овальды терезе. Қандай фактор ашық овальды терезенің жабылауына себебші,жабылу мерізімі? &amp;lt;br /&amp;gt;</text:p>
          </table:table-cell>
          <table:table-cell office:value-type="string" table:style-name="ce1">
            <text:p>MSnQkdGW0YDRltC90YjRliDQvdOZ0LbRltGBINC80LXQutC+0L3QuNC5INC00LXQvyDQsNGC0LDQu9Cw0LTRiy7QkdKx0Lsg0L/RgNC+0YbQtdGB0YEgItC20LDSo9CwINGC0YPRi9C70pPQsNC9INCx0LDQu9Cw0L3Ri9KjINGE0LjQt9C40L7Qu9C+0LPQuNGP0LvRi9KbINGB0LDRgNKT0LDRjtGLItC00LXQvyDQsNGC0LDQu9Cw0LTRiy7QkdCw0LvQsNC00LDSk9GLINC905nQttGW0YHRgtGW0qMg0LbQsNGB0YvQuyDRgtKv0YHRgtGWINCx0L7Qu9GD0Ysg0ZbRiNC10LrRgtC1INKx0YDRi9Kb0YLRi9KjINCz0LXQvNC+0LPQu9C+0LHQuNC90L3RltKjINGL0LTRi9GA0LDRgyDQutC10LfRltC90LTQtSDQv9Cw0LnQtNCwINCx0L7Qu9Cw0YLRi9C9INC20LDRgdGL0Lsg0L/QuNCz0LzQtdC90YIt0LHQuNC70LjRgNGD0LHQuNC90L3RltKjINCx0L7Qu9GD0YvQvNC10L0g0LHQsNC50LvQsNC90YvRgdGC0Ysu0JDQvdCwINGB0q/RgtGW0LzQtdC9INKb0L7RgNC10LrRgtC10L3QtdGC0ZbQvSDQvdOZ0YDQtdGB0YLQtdC70LXRgNC00LUg0LTQtSDRltGI0LXQuiDQv9GW0YHRltC/LNC905nQttGW0YHRgtC10LPRliDQsdC40LvQuNGA0YPQsdC40L0g0YLQvtGC0YvSk9GL0L8s0L3TmdC20ZbRgSDQsdGW0YDRgtGW0L3QtNC10L8g0pvQvtGOINC20LDRgdGL0LvQtNCw0L0g0YHQsNGA0Ysg0YLSr9GB0LrQtSDQtNC10LnRltC9INOp0LfQs9C10YDQtdC00ZYu0JbQsNKj0LAg0YLRg9KT0LDQvSDQvdOZ0YDQtdGB0YLQtdC70LXRgNC00ZbSoyDQutOp0L/RiNGW0LvRltCz0ZbQvdC00LUg0LHQvtC70LDRgtGL0L0g0pvQsNC70YvQv9GC0Ysg0LbQsNKT0LTQsNC5LiAgICAgICAgICAgICAgICAgICAgICAgICAgICAgICAgICAgICAgICAgICAgICAgICAgICAgICAgICAgICAgICAgICAgICAgICAgICAgICAgICAgIDIp0KHQvtC/0LDSm9GI0LAg0YLQtdGB0ZbQui3QsdKx0Lsg0rHRgNGL0psg0LbSr9GA0LXQs9GW0L3RltKjINC+0qMg0LbTmdC90LUg0YHQvtC7INC20LDSmyDQttKv0YDQtdC60YjQtdC70LXRgNGWINCw0YDQsNGB0YvQvdC00LAg0LHQvtC70LDRgtGL0L0g0pvQsNC70YvQv9GC0Ysg0YHQsNKj0YvQu9Cw0YMu0prQsNC90L3Ri9KjINOp0LrQv9C10L3RliDQsNC50L3QsNC70YvQvyDTqdGC0ZbQvyzQvtKjINC20LDSmyDQttKv0YDQtdC60YjQtdC00LXQvSDRgdC+0Lsg0LbQsNKbINKb0LDRgNGL0L3RiNCw0pPQsCDRgtGW0LrQtdC70LXQuSDQsNKT0YPRi9C90LAg0LzSr9C80LrRltC90LTRltC6INCx0LXRgNC10LTRli7QodC+0L/QsNKb0YjQsCDRgtC10YHRltC60YLRltKjINC20LDQsdGL0LvRg9GL0L3Ri9KjINCw0L3Ri9Kb0YLQsNGD0YjRiyDRhNCw0LrRgtC+0YDRiyDQsdC+0YHQsNC90pPQsNC90L3QsNC9INC60LXQudGW0L0g0pvQsNC90L3Ri9KjINC+0YLRgtC10LPRltC80LXQvSDSm9Cw0L3Ri9KT0YPRi9C90YvSoyDQttC+0pPQsNGA0YvQu9Cw0YPRiyDQsdC+0LvRi9C/INGC0LDQsdGL0LvQsNC00Ysu0JHSsdC7INOp0LrQv9C1INKb0LDQvSDQsNC50L3QsNC70YvQvNGL0L3QtNCw0pPRiyDSm9Cw0YDRgdGL0LvRi9Kb0YLRi9KjINGC06nQvNC10L3QtNC10YPRltC90LUg0LbTmdC90LUg0LTQtSDQttKv0LnQtdC70ZbQuiDSm9Cw0L0g0LDQudC90LDQu9GL0LzRi9C90LTQsNKT0Ysg0pvQsNGA0YHRi9C70YvSmyDQttC+0pPQsNGA0YvQu9Cw0YPRi9C90LAg0LDQu9GL0L8g0LrQtdC70LXQtNGWLtCR0rHQuyDQttCw0pPQtNCw0Lkg0L7SoyDQttCw0psg0LDRgtGA0LjRg9C80pPQsCDSm9Cw0YLRi9GB0YLRiy7QodC+0Lsg0LbQsNKbINCw0YLRgNC40LzRg9C00LDSk9GLINKb0YvRgdGL0LzQvdGL0qMg0LbQvtKT0LDRgNGL0LvQsNGD0YvQvdCwINOZ0LrQtdC70LXQtNGWLtCh0L7Qv9Cw0pvRiNCwINGC0LXRgdGW0Log0LbQsNCx0LDRgtGL0L0g0YLRltC90L3RltKjINC60LvQsNC/0LDQvSDRgtOZ0YDRltC30LTRliDSm9Cw0pvQv9Cw0pPRi9C9INC20LDQsdCw0LTRiy7QldCz0LXRgCDQtNC1INGC0YPRi9C70pPQsNC90L3QsNC9INC60LXQudGW0L0g0YHQvtC/0LDSm9GI0LAg0YLQtdGB0ZbQuiDQttCw0LHRi9C70LzQsNGB0LAsINC+0Lsg0LbSr9GA0LXQutGC0ZbSoyDQtNCw0LzRg9GL0L3QtNCwINC20LjRliDQutC10LfQtNC10YHQtdGC0ZbQvSDQutGW0YjRltCz0ZbRgNGW0Lwg0LDQvdC+0LzQsNC70LjRjyDQsdC+0LvRi9C/INGC0LDQsdGL0LvQsNC00Ysu0JXRiNKb0LDQvdC00LDQuSDQsNKb0LDRg9C70LDRgCDQttC+0Log0LHQvtC70YHQsCDQv9Cw0YLQtdC90LPRgtGW0Log0YLQtdGB0ZbQuiDQtNC10L8g0LDRgtCw0LvQsNC00Ysu0prQsNC70YvQv9GC0Ysg0LbQsNKT0LTQsNC50LTQsCAyINC20LDRgdGC0LAg0YLQvtC70YvSk9GL0LzQtdC9INC20LDQsdGL0LvRg9GLINC60LXRgNC10Lo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3" table:style-name="ce1">
            <text:p>915333</text:p>
          </table:table-cell>
          <table:table-cell office:value-type="string" table:style-name="ce1">
            <text:p>kazakh</text:p>
          </table:table-cell>
          <table:table-cell office:value-type="string" table:style-name="ce1">
            <text:p>Билет 21.&amp;lt;br /&amp;gt; 1. 3-күндік баланың анасы педиатрдан баласының нәжісінің қоныр-жасыл түсті екенін, неге ақ емес ол ана сұттімен қөректенеді ғой деп сұраған. Алғашқы нәжіс қалай аталады? Баланың нәжісінің жасыл түсті болуы немен байланысты?&amp;lt;br /&amp;gt; 2. Cіз- кардиолог дәргері. 2-жасар анасымен келді диагнозы: Жүректің кіші даму аномалиясы. Ашық овальды терезе. Қандай фактор ашық овальды терезенің жабылауына себебші,жабылу мерізімі? &amp;lt;br /&amp;gt;</text:p>
          </table:table-cell>
          <table:table-cell office:value-type="string" table:style-name="ce1">
            <text:p>MS7QodOZ0LHQuNC00ZbSoyDQsNC70pPQsNGI0pvRiyDQutKv0L3QtNC10YDRltC90LTQtdCz0ZYg0L3TmdC20ZbRgdGWINC80LXQutC+0L3QuNC5INC00LXQvyDQsNGC0LDQu9Cw0LTRiy7QntC7INCx0ZbQt9C00LUg0LHQsNC70LDQvdGL0qMg0ZbRiNC10LrRgtC10YDRltC9INGC0LDQt9Cw0LvRg9KT0LAg0LHQsNKT0YvRgtCw0LvSk9Cw0L0g0LHQvtC70LDQtNGLLtGB0LXQsdC10LHRliDQsdC40LvQuNCy0LXRgNC00LjQvdC90ZbSoyDQsNGA0pvQsNGB0YvQvdC00LAg0LbQsNGB0YvQuyDQsdC+0LvQsNC00YsuINCx0LjQu9GD0YDQuNCx0LjQvSDRgtKv0YHRltC90LUg0LHQsNC50LvQsNC90YvRgdGC0Ysg0LbQsNGB0YvQuyDRgtKv0YHRgtKjINCx0L7Qu9Cw0LTRiy4g0JzQtdC60L7QvdC40LkgINGW0YjQtdC60YLRltKjINCw0LvSk9Cw0YjSm9GLINGC0L7Qu9GC0YvRgNGL0LvSk9Cw0L0g0L3TmdC20ZbRgdGWLiDTmNC00LXRgtGC0LUg0LHQsNC70LDQvdGL0qMgICDRgtGD0YvQu9GD0YvQvdCw0L0g0LrQtdC50ZbQvSzQsdGW0YDRltC90YjRliDQutKv0L0g0ZbRiNGW0L3QtNC1INGI0YvSk9GD0Ysg0YLQuNGW0YEu0JzQtdC60L7QvdC40Lkg0pvQvtGOINKb0LDRgNCwINC20LDRgdGL0Lsg0YLSr9GB0YLRliDQsdC+0LvQsNC00YsuINCh0LXQsdC10LHRliDQvtC7INCw0LzQuNC+0LnRgtC40LrQsNC70YvSmyDRgdKx0LnRi9Kb0YLRi9KbLNOp0YIs0LbQsNGB0YPRiNCwINKb0LDQu9C00YvSm9GC0LDRgNGLLNC205nQvdC1INKx0YDRi9Kb0YLRi9KbINKb0LDQu9C00YvSm9GC0LDRgNC00LDQvSDRgtKx0YDQsNC00Ysu0JzQtdC60L7QvdC40Lkg0LDQu9KT0LDRiNKb0Ysg0LHRltGAINC10LrRliDQutKv0L0g0ZbRiNGW0L3QtNC1INGI0YvSk9GD0Ysg0LrQtdGA0LXQuizRgdC+0LTQsNC9INC60LXQudGW0L0g0LHQsNC70LDQvdGL0qMg0L3TmdC20ZbRgdGWINCx0ZbRgNGC0ZbQvdC00LXQvyDQttCw0YHRi9C7INC90LXQvNC10YHQtSDRgdCw0YDRi9KT0LAg06nQt9Cz0LXRgNGW0L8g0YjQtdGI0LUg0YHSr9GC0ZbQvdC1INCx0LXQudGW0LzQtNC10LvQs9C10L0g0LrQtdC30LTQtSzQvtC90YvSoyDRgtKv0YHRliDQsNGI0YvSmyDQsdC+0LvQsNC00Ysu0LHQsNC70LAg0L3TmdC20ZbRgdGW0L3RltKjINC20LDRgdGL0Lsg0YLSr9GB0YLRliDQsdC+0LvRg9GLINCx0ZbRgNC90LXRiNC1INGB0LXQsdC10L8g0YHQsNC70LTQsNGA0pPQsCDQsdCw0LnQu9Cw0L3Ri9GB0YLRiyzQsNC90LAg0YHSr9GC0ZbQvdC1INCx0LXQudGW0LzQtNC10LvRgyzQttCw0YHRi9C7INGC0q/RgSDQttCw0YHRi9C7INOp0YIg0L/QuNCz0LzQtdC90YLRgtC10YDRltC90ZbSoyDTmdGB0LXRgNGW0L3QtdC90LHQvtC70LDQtNGLLNGB0q/RgtGC0ZbSoyDRgtKv0YDRltC90LUg0LHQsNC50LvQsNC90YvRgdGC0Yss0YHSr9GCINGW0YjRgyDQttC40LvRltCz0ZbQvdC10YLQtNC1INCx0LDQudC70LDQvdGL0YHRgtGLINCx0L7Qu9Cw0LTRiy4gICAgICAgICAgICAgICAgICAgICAgICAgICAgICAgICAgICAgICAgICAgICAgICAgICAgICAgICAgICAgICAgICAgICAgICAgMi7QttKv0YDQtdC60YLRltKjINC10LrRliDQttCw0YDRgtGL0YHRiyDQv9Cw0YDRgNCw0LvQtdGM0L3QviDQttCw0LvSk9Cw0L3Sk9Cw0L0g06nQutC/0LXQu9GW0Log0YLQsNC80YvRgNC70YvSmyDQutCw0L3QsNC70LTQsNGA0Ysg0L7Sm9GI0LDRg9C70LDQvdCwINC+0YDQvdCw0LvQsNGB0pvQsNC9LiAgINCQ0YjRi9KbINC+0LLQsNC70YzQtNGLINGC0LXRgNC10LfQtSDQttKv0YDQtdC60YLRltKjINGB0L7QuyDQttCw0psg0LbTmdC90LUg0L7SoyDQttCw0psg0LbSr9GA0LXQutGI0LUg0LDRgNCw0YHRi9C90LTQsCDQvtGA0L3QsNC70LDRgdKb0LDQvSDRgtC10YHRltC60YLRltKjINC20LDQsdGL0LvQvNCw0YPRiy4g0YLRg9GL0LvRg9GLINC60LXQt9GW0L3QtNC1INC90LXQvNC10YHQtSDRgtGD0YvQu9KT0LDQvdC90LDQvSDQutC10LnRltC9INOp0LrQv9C10LvRltC6INGC0YvQvdGL0YEg0LDQu9GDINCx0LDRgdGC0LDQu9KT0LDQvSDRgdC+0qMg0LrQtdC70LXRgdGWINGE0LDQutGC0L7RgNC70LDRgCDQvtCy0LDQu9GM0LTRiyDRgtC10YDQtdC30LXQvdGW0qMg0LbQsNCx0YvQu9GD0YvQvdCwINGL0pvQv9Cw0Lsg0LXRgtC10LTSm9Cw0L0g0LDQudC90LDQu9GL0LzRi9C90YvSoyDTqdC30LPQtdGA0YPRli3Sm9Cw0L0g0LDQudC90LDQu9GL0LzRi9C90YvSoyDTqdC30LPQtdGA0YPRliDTqdC60L/QtSDRgtGL0L3Ri9GBINCw0LvQsCDQsdCw0YHRgtCw0pPQsNC9INC60LXQt9C00LUg06nQutC/0LUg0LDRgNGC0LXRgNC40Y/RgdGL0L3QtNCw0pPRiyDSm9GL0YHRi9C8INGC06nQvNC10L3QtNC10LnQtNGWLtCw0Lsg0YHQvtC7INC20q/RgNC10LrRiNC10LTQtdCz0ZYg0pvRi9GB0YvQvCDQsNGA0YLQsNC00YsuINCR0rHQuyAg0L7QstCw0LvRjNC00Ysg0YLQtdGA0LXQt9C10L3RltKjINC60LvQsNC/0YvQvdGL0L0g0LbQsNGD0YvQvyDSm9Cw0L3QvdGL0qMg0L7So9C90LDQvSDRgdC+0LvSk9CwINOp0YLRg9GW0L0g0YLQvtKb0YLQsNGC0LDQtNGLLtCT0L7RgNC80L7QvdCw0LvRjNC00Ysg0YTQsNC60YLQvtGA0LvQsNGAINGC0YPRi9C70pPQsNC9INGB0L7SoyDQv9GA0L7RgdGC0L7Qs9C70LDQvdC00LjQvSDQtNC10qPQs9C10LnRltC90ZbSoyDRgtKb0LzQtdC90LTQtdGD0ZYg0YLQsNKj0Ysg0LTQsCDQv9C70LDRhtC10L3RgtCwINCx0LDQudC70LDQvdGL0YHRi9C90YvSoyDRgtC+0pvRgtCw0YPRiyDSm9Cw0L0g0YLQsNC80YvRgNC70LDRgNGL0L3QtNCw0pPRiyDSm9GL0YHRi9C80LTRiyDTqdC30LPQtdGA0YLQtdC00ZYuINCe0LLQsNC70YzQtNGLINGC0LXRgNC10LfQtSDQutC70LDQv9GL0L3RiyDRjdC90LTQvtC60LDRgNC00YLRi9KbINGC0ZbQvdC00LXRgNC00ZbSoyDTqdGB0YPRliDQsNGA0pvRi9C70Ysg0YLSsdGA0LDSm9GC0Ysg0YLSr9GA0LTQtSDQttCw0LHRi9C70LDQtC4g0L7QstCw0LvRjNC00Ysg0YLQtdGA0LXQt9C10L3RltKjINC20LDQsdGL0LvRg9GLICDTmdGAINCx0LDQu9Cw0L3Ri9KjINC00LDQvNGDINC10YDQtdC60YjQtdC70ZbQutGC0LXRgNGW0L3QtSDQsdCw0LnQu9Cw0L3Ri9GB0YLRiywg0pvQsNC70YvQv9GC0YvQtNCwINGC0YPRi9C70pPQsNC90L3QsNC9INC60LXQudGW0L0g0LDQu9GC0Ysg0LDQudC00LDQvSAgINC10LrRliDQttGL0LvSk9CwINGB0L7Qt9GL0LvQsNC00Yss0YLQvtC70YvSmyDQttCw0LHRi9C70YPRiyDQutKv0YLRltC70LXQtNGWLtCR0rHQuyDQsdGW0LfQtNC1INOp0LrQv9C10L3RltKjINGC0YvQvdGL0YEg0LDQu9GDINGE0YPQvdC60YbQuNGP0YHRiyDQttOZ0L3QtSDSm9Cw0L0g0LDQudC90LDQu9GL0LzRi9C90YvSoyDSm9Cw0LvRi9C/0pvQsCDQutC10LvRg9GW0LzQtSDQsdCw0LnQu9Cw0L3Ri9GB0YLRi9GA0LDQtNGLIC4gICAgICAgICAgICAgICAgICAgICAgICAgICAgICAgICAgICAgICAgICAgICAgICAgICAgICAgICAgIC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5" table:style-name="ce1">
            <text:p>915335</text:p>
          </table:table-cell>
          <table:table-cell office:value-type="string" table:style-name="ce1">
            <text:p>kazakh</text:p>
          </table:table-cell>
          <table:table-cell office:value-type="string" table:style-name="ce1">
            <text:p>Билет 21.&amp;lt;br /&amp;gt; 1. 3-күндік баланың анасы педиатрдан баласының нәжісінің қоныр-жасыл түсті екенін, неге ақ емес ол ана сұттімен қөректенеді ғой деп сұраған. Алғашқы нәжіс қалай аталады? Баланың нәжісінің жасыл түсті болуы немен байланысты?&amp;lt;br /&amp;gt; 2. Cіз- кардиолог дәргері. 2-жасар анасымен келді диагнозы: Жүректің кіші даму аномалиясы. Ашық овальды терезе. Қандай фактор ашық овальды терезенің жабылауына себебші,жабылу мерізімі? &amp;lt;br /&amp;gt;</text:p>
          </table:table-cell>
          <table:table-cell office:value-type="string" table:style-name="ce1">
            <text:p>0JbQsNKj0LAg0YLRg9GL0LvSk9Cw0L0g0L3TmdGA0LXRgdGC0LXQu9C10YDQtNGW0qMg0LDQu9KT0LDRiNKb0Ysg0J3TmNCW0IbQodCGIC0g0LzQtdC60L7QvdC40Lkg0LTQtdC/INCw0YLQsNC70LDQtNGLLtCc0LXQutC+0L3QuNC5INC60L7Rjiwg0LbQsNCx0YvRgdKb0LDSmyDQttOZ0L3QtSDQutCw0YDQsCDQttCw0YHRi9C70L3QtdC80LXRgdC1INKb0L7So9GL0YAt0LbQsNGB0YvQuyDRgtKv0YHRgtGWINCx0L7Qu9Cw0LTRiy4g0J7QvdGL0qMg0LHSsdC7INGC0q/RgdGC0LUg0LHQvtC70YMg0YHQtdCx0LXQsdGWINKb0rHRgNGB0LDSm9GC0LAg0LHQvtC70pPQsNC9INC60LXQt9C00LUg0ZbRiNC10LrRgtC10LPRliDQttC40L3QsNC70pPQsNC9INC30LDRgtGC0YLQsNGA0LTQsNC9INC80YvRgdCw0LvRiyDRltGI0LXQuiDQsdCw0LrRgtC10YDQuNGP0LvQsNGA0YssICDQsNC80L3QuNC+0YLQuNC60LDQu9GL0psg0YHSsdC50YvSm9GC0YvSmyDSm9Cw0LvQtNGL0pvRgtCw0YDRiywg06nRgiDQv9C40LPQtdC80LXQvdGC0ZbQvdGW0qMgINOZ0YHQtdGA0ZbQvdC90LXQvSDRgtGD0YvQvdC00LDQudC00YsuINCR0LDQu9Cw0LTQsNKT0Ysg0L3TmdC20ZbRgdGC0ZbSoyDQttCw0YHRi9C7INGC0q/RgdGWINGW0YjQtdC60YLQtSDSsdGA0YvSm9GC0YvSoyDQs9C10LzQvtCz0LvQvtCx0LjQvdC90ZbSoyDRi9C00YvRgNCw0YPRiyDQutC10LfRltC90LTQtSDQv9Cw0LnQtNCwINCx0L7Qu9Cw0YLRi9C90LbQsNGB0YvQuyDQv9C40LPQvNC10L3RgiDQsdC40LvQuNCy0LXRgNC00LjQvdC90ZbSoyDQsdC+0LvRg9GL0L3QsCDQsdCw0LnQu9Cw0L3Ri9GB0YLRiyDQsNC70pPQsNGI0pvRiyDQutKv0L3QtNC10YDRliDQsdGW0LfQtNC1INC905nQttGW0YHRgtGW0qMg0YLSr9GB0ZYg0LbQsNGB0YvQuy3Sm9Cw0YDQsCDQsdC+0LvQsNC00Ysg0LrQtdC50ZbQvdC90LXQvSDQvtC7INCx0ZbQt9C00LUg06nQtyDSm9Cw0LvQv9GL0L3QsCDQutC10LvRltC/INGB0LDRgNGLINGC0q/RgdC60LUg0LDQudC90LDQu9Cw0LTRiy4g0JXQvNGI0LXQuiDRgdKv0YLRltC80LXQvSDSm9C+0YDQtdC60YLQtdC90LXRgtGW0L0g0L3TmdGA0LXRgdGC0LXQu9C10YAg0ZbRiNC10Log0L/RltGB0ZbQvyDQvdOZ0LbRltGB0YLQtdCz0ZYg0LHQuNC70LjRgNGD0LHQuNC9INGC0L7RgtGL0pPQsCDQsdCw0YHRgtCw0pPQsNC90LTQsCDQvdOZ0LbRltGBINC60L7RjtC70LDQvdGL0L8g0LbQsNGB0YvQu9C00LDQvSDRgdCw0YDRi9KT0LAg0LTQtdC50ZbQvSDTqdC30LPQtdGA0LXQtNGWLtCW05nQvdC1INCx0rHQvdGL0qMg0LHRltGA0LTQtSDQsdGW0YAg0YHQtdCx0LXQsdGWINOp0YLRgtGW0qMg0LbSsdC80YvRgdGLINGC0L7Qu9GL0psg0LbQtdGC0ZbQu9C80LXQs9C10L3QtNGW0LrRgtC10L0g06nRgtC/0LjQs9C80LXQvdGC0YLQtdGA0ZYg0YLRltC60LXQu9C10Lkg0L3TmdC20ZbRgdC60LUg0YLSr9GB0ZbQvyDRgtKv0YHRltC9INC20LDRgdGL0Lsg0L3QtdC80LXRgdC1INKb0L7QvdGL0YAg0LbQsNGB0YvQuyDQtdGC0LUg0LDQu9Cw0LTRiy7QodC+0Lsg0YHQtdCx0LXQv9GC0ZYg0LHSsdC7INGE0LjQt9C40L7Qu9C+0LPQuNGP0LvRi9KbINC/0YDQvtGG0LXRgdGC0ZYg0pvQsNC70YvQv9GC0Ysg0LbQsNKT0LTQsNC5INC00LXQvyDQsNC90LDRgdGL0L3QsCDRgtKv0YHRltC90LTRltGA0LXQvNGW0Lcg0LXRiCDRg9Cw0LnRi9C80LTQsNC50YLRi9C9INKb0LDRg9GW0L8g0LbQvtKbICDQtNC10L8g0LDQudGC0LDQvNGL0LcuINCW05nQvdC10LTQtSDQvNC10LrQvtC90LjQuSDQsNC70pPQsNGI0pvRiyDRgdCw0pPQsNGC0YLQsCDRgdGC0LjRgNC40LvRjNC00ZYsINC60LXQudGW0L3RltGA0LXQuiDQvtC90YvSoyDSm9Kx0YDQsNC80YvQvdC00LAg0LzQuNC60YDQvtC+0YDQs9Cw0L3QuNC30LzQtNC10YAg0LHQvtC70YPRiyDQvNKv0LzQutGW0L0uINCW05nQvdC1INCw0LnRgtCwINC60LXRgtC10YLRltC9INCx0L7Qu9GB0LDSmyDQttCw0qPQsCDRgtGD0pPQsNC9INGB05nQsdC40LvQtdGA0LTQtdC00ZbSoyDRltGI0LXQutGC0LXRgNGWIDMtMTkg0YHQsNKTINGW0YjRltC90LTQtSDRgtCw0LfQsNGA0YLRi9C70LDQtNGLLiDQldC60LjQvdGI0Lgg0LrRg9C90LTQtdGA0ZYg0L3TmdC20ZbRgSDQvNC10LrQvtC90LjQudC80LXQvSDQsNGA0LDQu9Cw0YHQsNC00YsuINCQ0Jsg0LrQtdC70LXRgdGWINC10LrRliDQutKv0L0g0ZbRiNGW0L3QtNC1INC905nQttGW0YEg0YLQvtC70YvSk9GL0LzQtdC9INC80LXQutC+0L3QuNC50LTQtdC9INCw0LnRi9GA0YvQu9Cw0LTRiy4g0JzQtdC60L7QvdC40LnQtNGW0qMg0pvRi9GI0pvRi9C70LTRiyw2IFBIINKb0rHRgNCw0LnRgtGL0L0g0LHQvtC70YvQvyDQutC10LvQtdC00ZYuMtC10YHQtdC/IDIg0LbQsNGB0LDRgCDQsdCw0LvQsNC00LAg0J7QstCw0LvRjNC00ZYg0YLQtdGB0ZbQui0g0rHRgNGL0psg0LbSr9GA0LXQs9GW0L3RltKjINC+0qMg0LbTmdC90LUg0YHQvtC7INC20q/RgNC10LrRiNC1INCw0YDQsNC70YvRgtGLINC20LDRg9GL0L8g0YLSsdGA0LDRgtGL0L0g0pvQsNC70YvQv9GC0Ysg0YHQsNKj0YvQu9Cw0YMg0L7QuyDSm9Cw0L3QvdGL0qMg06nQutC/0LXQvdGWINCw0LnQvdCw0LvRi9C/INOp0YLQtdC00ZbQtNC1ICDQvtKjINC20LDSmyDQttKv0YDQtdC60YjQtdC00LXQvSDRgdC+0Lsg0LbQsNKbINC20q/RgNC10LrRiNC10LTQtdC9INGC0ZbQutC10LvQtdC5INOp0YLRg9GW0L3QtSDQvNKv0LzQutGW0L3QtNGW0Log0LHQtdGA0LXQtNGWLiDQkNGI0YvSmyDQvtCy0LDQu9GM0LTRiyDRgtC10YDQtdC30LUtINCx0rHQuyDQttKv0YDQtdC60YLRltKjINGB0L7QuyDQttOZ0L3QtSDQvtKjINC20q/RgNC10LrRiNC1INCw0YDQsNC70YvSm9GC0Ysg0LHTqdC70ZbQvyDRgtKx0YDQsNGC0YvQvSDSm9Cw0LvSm9Cw0LTQsNKT0Ysg0YLQtdGB0ZbQutGC0ZbSoyDQttCw0LHRi9C70LzQsNGD0YsuINCe0Jsg0LHRltC30LTQtdC60LvQsNC/0LDQvSDSm9GL0LfQvNC10YLRltC9INCw0YLSm9Cw0YDQsNC00YsgLiDQntCbINCx0ZbQt9C00LUg0YLRg9KT0LDQvdC90LDQvSDQutC10LnRltC9INC606nQvyDSsdC30LDQvNCw0Lkg0LbQsNCx0YvQu9Cw0LTRiyDQvtC7INCx0ZbQt9C00LUg06nQutC/0LXQvNC10L0g0LbSr9GA0LXQutGC0ZbSoyDSm9Cw0L0g0pvRi9GB0YvQvNGLINC80LXQvSDQsNKT0YvQvNGL0L3QsCDQsdCw0LnQu9Cw0L3Ri9GB0YLRiyDQttCw0LHRi9C70LDQtNGLLiDQodC+0L/QsNKb0YjQsCDRgtC10YHRltC60YLRltKjINC20LDQsdGL0LvRg9GL0L3Ri9KjINCw0L3Ri9Kb0YLQsNGD0YjRiyDRhNCw0LrRgtC+0YDRiyDQvtC7INCx0ZbQt9C00LUg0LHQvtGB0LDQvdKT0LDQvdC90LDQvSDQutC10LnRltC9INKb0LDQvdGL0L3Ri9KjINC+0YLQtdCz0ZbQvNC10L0g0pvQsNC90YvSk9GD0YvQvdGL0qMg0LbQvtKT0LDRgNC70LDRg9GLICDQsdKx0Lsg06nQutC/0LUg0pvQsNC9INCw0LnQvdCw0LvRi9C80YvQvdC00LDSk9GLINKb0LDRgNGB0YvQu9GL0pvRgtGL0qMg0YLTqdC80LXQvdC00LXRg9GW0L3QtSDQttOZ0L3QtdC00LUg0LbSsdC50LXQu9GW0Log0pvQsNC9INCw0LnQvdCw0LvRi9C80YvQvdC00LDSk9GLINKb0LDRgNGB0YvQu9GL0pvRgtGLINC20L7Sk9Cw0YDQu9Cw0YPRi9C90LAg0LDQu9GL0L8g0LrQtdC70LXQtNGWLiDQndC10LPRltC30ZbQvdC10L0g0YTRg9C90LrRg9GG0LjQvtC90LDQu9C00Ysg0LbQsNCx0YvQu9GD0Ysg0LDQu9KT0LDRiNKb0YsgMy00INGB0LDSk9Cw0YLRgtCwINCx0L7Qu9Cw0LTRiyDQsNC7INGC0L7Qu9GL0pPRi9C80LXQvSDQsNC90LDRgtC+0LzQuNGP0LvRi9KbINC20LDQsdGL0LvRg9GLIDItMTIg0LDQuSDQsNC50LTQsCDQvtGA0YvQvSDQsNC70LDQtNGLLiDQmtC10Lkg0LbQsNKT0LTQsNC50LTQsCDQvtC00LDQvdC00LAg0LDRgdGL0L8g0LrQtdGC0ZbQvyDQttCw0YLQsNC00YsgMiDQttGL0LvSk9CwINC00LXQudGW0L0g0YHQvtC30YvQu9GD0Ysg0LzSr9C80LrRltC9LtCW0q/RgNC10LrRiNC10LvQtdGA0LTQtSDSm9GL0YHRi9C80L3Ri9KjINOp0LfQs9C10YDQs9C10L3RltC90LXQvSDQvtCy0LDQu9GM0LTRiyDRgtC10YDQtdC30LXQvdGW0qMg0pvRi9C30LzQtdGC0ZYg0YLQvtC60YLQsNC50LTRiy4zINCw0LnQtNGL0qMg0ZbRiNGW0L3QtNC1INCx0LDQu9Cw0LTQsCDTqdC30ZbQvdGW0qMg0LrQsNC60L/QsNC60YjQsNGB0Ysg0LbRltC90LUg0L7QvdGL0qMg0YTRg9C10LrRhtC40L7QvdCw0LvQtNGLINC20LDQsdGL0LvRg9GLINC20q/RgNC10LTRli4g0LrQtdC50ZbQvSDQutCw0LrQv9Cw0LrRiNCwINC+0LLQsNC70Ywg0YLQtdGB0ZbQs9GW0L3RltKjINC20LDQsdGL0YHRi9C/INCx0ZbRgtC10YHRltC/INC60LXRgtC10LTRli4g0JHQsNC70LDQu9Cw0YDQtNGL0qMg0LbSr9GA0LXQutGI0LUg0LDRgNCw0LvRi9KbINC/0LXRgNC00LXRgdGW0L3RltKjINGC0L7Qu9GL0psg0LbQsNCx0YvQu9GD0Ysg0LHRltC30LTQtSAxMiDQsNC5INGW0YjRltC90LTQtSDQltCQ0JHQq9Cb0KvQnyDQotCe0prRgtCw0LnQtNGLLiDQkdCw0LvQsNC70LDRgNC00YvSoyA1MCDQv9GA0L7RhtC10YLRltC90LTQtSAg0q/Qu9C60LXQvdC00LXRgNC00LUgMjAtMjUg0L/QsNC50YvQt9GL0L3QtNCwINC20q/RgNC10LrRiNC1INCw0YDQsNC70YvSm9GC0LAgINC20ZbSo9GW0YjQutC1INC30L7QvdC0INOp0YLQtdGC0ZbQvSDRgtC10YHRltC6INC20LDQsdGL0LvRi9C/INC60LDQu9GD0Ysg0LzSr9C80LrRltC9LiDQkdGW0YDQsNKbINC+0Lsg06nQvNGW0YDQs9C1INCz0LXQvNC+0LTQuNC90LDQvNC40LrQsNKT0LAg0pvQsNGC0YLRiyDTmdGB0LXRgNGWINC20L7Smy7QndC10LPRltC30ZYg0L7QstCw0LvRjNC00Ysg0YLQtdGB0ZbQuiDQsdGW0LfQtNC1INKb0rHRgNGB0LDSm9GC0LAg0LTQsNC80YvQvyDQutC10LvQtSDQttCw0YLSm9Cw0L0g0LrQtdC30LTQtSDQttKv0YDQtdC60YLRltKjINC+0qMg0LbRltC90LUg0YHQvtC7INC20LDQuiDQttKv0YDQtdC60YjQtdC70LXRgNC00ZbSoyDQsdCw0LnQu9Cw0L3Ri9GB0YLRi9GA0LDRgtGL0L0g0YTQuNC30LjQvtC70L7Qs9C40Y/Qu9GL0psg0YLQtdGB0ZbQui4g0J7QuyDSsdGA0YvSm9GC0LAg06nQutC/0LXQs9C1INKb0LDQvSDQsNC50L3QsNC70YvQvNGLINC60LDQttC10YIg0LHQvtC70LzQsNKT0LDQvdC00YvSm9GC0LDQvSDQutCw0L3QvdGL0qMg0L7SoyDQttCw0psg0LbQttKv0YDQtdC60YjQtdC00LXQvSDRgdC+0Lsg0LbQsNKbINC20q/RgNC10LrRiNC10LPQtSDTqdGC0YPRltC9INKb0LDQvNGC0LDQvNCw0YHRi9C3INC10YLQtdC00ZY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55" table:style-name="ce1">
            <text:p>1066855</text:p>
          </table:table-cell>
          <table:table-cell office:value-type="string" table:style-name="ce1">
            <text:p>kazakh</text:p>
          </table:table-cell>
          <table:table-cell office:value-type="string" table:style-name="ce1">
            <text:p>Билет 21.&amp;lt;br /&amp;gt; 1. 3-күндік баланың анасы педиатрдан баласының нәжісінің қоныр-жасыл түсті екенін, неге ақ емес ол ана сұттімен қөректенеді ғой деп сұраған. Алғашқы нәжіс қалай аталады? Баланың нәжісінің жасыл түсті болуы немен байланысты?&amp;lt;br /&amp;gt; 2. Cіз- кардиолог дәргері. 2-жасар анасымен келді диагнозы: Жүректің кіші даму аномалиясы. Ашық овальды терезе. Қандай фактор ашық овальды терезенің жабылауына себебші,жабылу мерізімі? &amp;lt;br /&amp;gt;</text:p>
          </table:table-cell>
          <table:table-cell office:value-type="string" table:style-name="ce1">
            <text:p>MS4g0JHRltC3INCx0ZbQu9C10LzRltC3LCDQttCw0qPQsCDRgtGD0YvQu9KT0LDQvSDRgdCw0LHQuNC70LXRgNC00LUg0LXSoyDQsNC70pPQsNGI0pvRiyDQvdOZ0LbRltGB0ZYg0L3QvtGA0LzQsNC00LDSk9GL0LTQsNC5INCw0YjRi9KbINGB0LDRgNGLINC90LUg0YHQsNGA0Ysg0YLSr9GB0YLQtSDQtdC80LXRgSwg0LbQsNGB0YvQuyDQvdC1INKb0L7RjiDQttCw0YHRi9C7INGC0q/RgdGC0LXRgSDQsdC+0LvQsNC00YssINCx0rHQuyDQsdCw0LvQsNC90YvSoyDRgtGD0YvQu9GLINCx0LDRgNGL0YHRi9C90LTQsCDQvtC60L7Qu9C+0L/Qu9C+0LTQvdGL0LUg0LLQvtC00YssINC90LUg0pvQsNC9INC20rHRgtGL0L8g0pvQvtGO0YvQvNC10L0g0LHQsNC50LvQsNC90YvRgdGC0YsuINCQ0LvSk9Cw0YjSm9GLINGC0LDRg9C70ZbQutGC0LUgNi04INGB0LDSk9Cw0YIg0ZbRiNGW0L3QtNC1INC90LDQttGW0YHRgtGW0qMg0LHQsNGB0pvQsNGI0LAg0YLSr9GB0YLQtdGBINCx0L7Qu9GD0Ysg0LDQvdCw0pPQsCDQtdGI0pvQsNC90LTQsNC5INCw0LvQsNKj0LTQsNGC0YPRiNGL0LvRi9Kb0YLQsNGAINGC0YPQtNGL0YDQvNCw0YMg0LrQsNC20LXRgi4g0JHSsdC7INC20LDSk9C00LDQuSDQsNC00LXRgtGC0LUsINCw0YHSm9Cw0LfQsNC9INGW0YjQtdC6INC20L7QvtC70LTQsNGA0YvQvdGL0qMg0LbSsdC80YvRgdGL0L0g0YLSsdGA0LDSm9GC0LDQvdC00YvRgNGDICDQttCw0L3QtSDRltGI0YLQtdCz0ZYg0pvQsNC70LTRi9Kb0YLQsNGA0LTRiyDRgtCw0LfQsNGA0YLRgyDQvNCw0pvRgdCw0YLRi9C90LTQsCDQv9Cw0LnQtNCwINCx0L7Qu9Cw0LTRiyDQttCw0L3QtSDQvtC90Ysg0LbQuNGWINOp0YLQv9C10LvRliDQtNC10L8g0LDRgtCw0LnQtNGLLiDQntC7INC40ZbRgdGWINKb0YvRiNKb0YvQuywg0LrQvtC90YHQuNGB0YLQtdC90YbQuNGP0YHRiyDQttCw0pPRi9C90LDQvSDQsdC+0YLSm9CwINGC0LDRgNGW0LfQtNC10YEg0LHQvtC70LDQtNGLLiDQntC90Ysg0LzQtdC00LjRhtC40L3QsNC70YvSmyDRgtC10YDQvNC40L3QvtC70L7Qs9C40Y/QtNCwICDQnNCV0JrQntCd0JjQmSDQtNC10L8g0LDRgtCw0LnQvNGL0LcuINCc0LXQutC+0L3QuNC5INCx0rHQuyDRgdCw0LHQuNC00LXQs9GWINCw0LvSk9Cw0YjSm9GLINC905nQttGW0YEuINCe0Lsg0LbQsNCx0YvRgdKb0LDQvSDSm9Cw0YDQsCAt0pvQvtKj0YvRgC0g0LbQsNGB0YvQuyDRgtKv0YHRgtGWLCDRiNGL0YDRi9GI0YLRiywgcEgt0YsgNiwwOyDRjdC/0LjRgtC10LvQuNC50LzQtdC9INKb0LDQsdGL0YDRiNCw0pvRgtCw0LvSk9Cw0L0sINGI0YvRgNGL0YjRgtCw0L0sINKx0YDRi9KbINC80LDSo9GLINGB0YPRiyDSm9Cw0LvQtNGL0pPRi9C90LDQvSwg06nRgiDQv9C40LPQvNC10L3RgtGC0LXRgNGW0L3QtdC9INC20LDQvdC1INGCLtCxLiDRgtKx0YDQsNC00YsuINCQ0LvSk9Cw0YjSm9GLIDItMyDQutKv0L3QtNC1INC80LXQutC+0L3QuNC5INC90LDQttGW0YHQv9C10L0g0LDRgNCw0LvQsNGB0YPRiyDQttCw0LvSk9Cw0YHQsNC00YssINCw0LsgNSDQutGD0L3QvdC10L0g0LHQsNGB0YLQsNC/INCw0LTQtdGC0YLQtdCz0ZbQtNC10Lkg0L3QsNC20ZbRgdC60LUg0LDQudC90LDQu9Cw0LTRiy4g0JHSsdC7INC60LXQt9C10qMg0L3QtdCz0ZbQt9GWINCw0L3QsNC00LAg0YHSr9GC0YLRltKjINGC0L7Qu9GL0psg0L/QsNC50LTQsCDQsdC+0LvSk9Cw0L3Sk9CwINC00LXQudGW0L0g0LbQsNC70pPQsNGB0LDQtNGLLiDQkNC90LAg0YHRg9GC0ZbQvNC10L0g0YLQvtC70YvSmyDRgtCw0LzQsNC60YLQsNC90YvQvyDQsdCw0YHRgtCw0pPQsNC90L3QsNC9INC60LXQudGW0L0g0LDQtNC10YLRgtC1INCx0LDQu9CwINC90LDQttGW0YHRliDRgdCw0YDRiywg0LDRiNGL0psg0YHQsNGA0Ysg0YLSr9GB0LrQtSDQsNGD0YvRgdCw0LTRiyDQttOZ0L3QtSDQutC+0L3RgdC40YHRgtC10L3RhtC40Y/RgdGLINC00LAg0LHRltGA0YLQtdC60YLRltCz0LUg0LDRg9GL0YHRi9C/LCDSm9GL0YjSm9GL0Lsg0LjRltGBINC20L7Sk9Cw0LvQsNC00YsuINCR0ZbRgNCw0psg0LDRgCDRgdCw0LHQuNC00ZbSoyDTqdC3INC90L7RgNC80LDRgdGLINCx0L7Qu9GD0Ysg0LzRg9C80LrRltC9LCDQsdKx0Lsg0YjRi9GA0YvRiNGC0YvSoyDQsNC3INCx0L7Qu9GD0YssINC90LUg0pvQsNC90LTQsNC5INC00LAg0LHRltGAINC60L7QvNC+0YfQutCw0LvQsNGA0LTRiyDQvdC1INCw0YjRi9KbINGB0LDRgNGLINGC0q/RgdGC0LXRgSDQt9Cw0YLRgtCw0YAg0LHQsNC50LrQsNC70YPRiyDQvNGD0LzQutGW0L0uINCQ0Lsg0LrQtdGA0ZbRgdGW0L3RiNC1INGB05nQsdC40LTQtSDQsNC70pPQsNGI0pvRiyDQvdOZ0LbRltGB0YLRltKjINC90LUg0LfTmdGA0LTRltKjINCx0L7Qu9C80LDRg9GLLCDQsNC50pvRi9C9INC/0LDRgtC+0LvQvtCz0LjRj9C70LDRgNC00YssINKx0YDRi9Kb0YLRi9KjINC00LDQvNGDINCx0LDRgNGL0YHRi9C90LTQsNKT0Ysg0LHQvtC70pPQsNC9INKb0LDRgtC10LvRltC60YLQtdGA0LTRliwg0YHQvtC90YvSoyDRltGI0ZbQvdC00LUg05nRgdGW0YDQtdGB0LUg0JDQodKa0JDQl9CQ0J0g0IbQqNCV0Jog0LbQvtC70LTQsNGA0YvQvdGL0qMg0LDRiCDRltGI0LXQutGC0ZbSoyDSm9Kx0YDRi9C70YvQvNGLLCDQsdKv0YDQu9C10YDRliwg0YLQvtKbINGW0YjQtdC60YLRltKjINC80L7RgtC+0YDQuNC60LDRgdGLINC20YvQu9C20YvRgtGDINKb0LDRgdC40LXRgtGC0LXRgNGW0L3QtNC1LCDSsdGA0YvSm9GC0YvQvSDQtNCw0LzRg9GL0L3Ri9KjIDE2LTIwINCw0L/RgtCw0YHRi9C90LTQsCDQsNC90LDQvdGL0qMg0LHQsNGB0YvQvdCw0L0g0LrQtdGI0ZbRgNCz0LXQvSDQuNC90YTQtdC60YbQuNGP0LvRi9KbINCw0YPRgNGD0LvQsNGA0pPQsCDQvdC1INC30LjRj9C90LTRiyDQsNC00LXRgtGC0LXRgNCz0LUg0LHQsNC50LvQsNC90YvRgdGC0Ysg0LTQtdC/INCw0LnRgtCwINCw0LvQsNC80YvQty4g0JbQsNKj0LAg0YLRg9GL0LvSk9Cw0L0g0YHQsNCx0LjQu9C10YDQtNC1INC90L7RgNC80LDQtNCwINCw0LvSk9Cw0YjQutGLIDEg0LDQudGL0L3QtNCwINC00LXRhNCw0LrQsNGG0LjRjyDQutGD0L3RltC90LUgNS02INGA0LXRgiwgMiDQsNC50YvQvdC00LAg0YLTmdGD0LvRltCz0ZbQvdC1IDMtNSDRgNC10YIsIDMg0LDQudGL0L3QsNC9INCx0LDRgdGC0LDQvyAxLTMg0YDQtdGC0LrQtSDQsNGD0YvRgdCw0LTRiy4g0JHQsNC70LDQvdGLINCw0L3QsNGB0Ysg0YHSr9GC0YLQtdC9INCw0LbRi9GA0LDRgtGL0L8sINC20LDRgdCw0L3QtNGLINGC0LDQvNCw0pvRgtCw0L3Rg9KT0LAg0LDRg9GL0YHRgtGL0YDSk9Cw0L0g0LrQtdC30LTQtSDQtNC1INC00LXRhNCw0LrQsNGG0LjRj9GB0YvQvdC00LAg06nQt9Cz0LXRgNGW0YHRgtC10YAg0L7RgNCz0LDQvdC40LfQvNC90ZbSoyDSr9C50YDQtdC90YjRltC70ZbQutGC0ZbQu9GW0LPRltC90ZbSoyDQsNGD0YvRgdGD0LzQtdC9INCx0LDQudC70LDQvdGL0YHRgtGLLCDQttC+0pPQsNGA0YvQtNCw0pPRi9C00LDQuSDQvdC+0YDQvNCw0LTQsNC9INCw0YPRi9GC0pvRg9C70LDRgCDQsdCw0LnSm9Cw0LvQsNC00YsuINCh0L7QvdGL0LzQtdC9INKb0LDRgtCw0YAg0LHQsNC70LAg0YLRg9GL0LvSk9Cw0L3QvdCw0L0g0YHQvtKjINCw0LvSk9Cw0YjSm9GLINKb0rHRgdGDINC00LAg0LDQtNCw0Lwg0YTQuNC30LjQvtC70L7Qs9C40Y/RgdGL0L3QsCDRgtOZ0L0g0LHQvtC70YvQvyDRgtCw0LHRi9C70LDQtNGLLjxiciAvPg0KMi4g0JbSr9GA0LXQutGC0ZbSoyDQutGW0YjRliDQtNCw0LzRgyDQsNC90L7QvNCw0LvQuNGP0YHRiy0g0LHRg9C7INCx0ZbQt9C00LUg0LDRiNGL0psgKNCR0LDRgtC+0LvQvtCyKSDQsNGA0YLQtdGA0LjRj9C70YvSmyDQutCw0L3QsNC7INC20q/RgNC10LrRgtGW0qMg0YLRg9CwINCx0ZbRgtC60LXQvSDQsNKb0LDRg9GLLiDQltKv0YDQtdC60YLRltKjINC10LrRliDQttCw0YDRgtGL0YHRiyDQv9Cw0YDQsNC70LvQtdC70YzQtNGWINC20LDQu9KT0LDQvdKT0LDQvSwg06nQutC/0LXQu9GW0Log0YLQsNC80YvRgNC70YvSmyDQsNGA0L3QsNC70LDRgCDQvtC60YjQsNGD0LvQsNC90pPQsNC9LiDQotGD0YvQu9KT0LDQvdC90LDQvSDRgdC+0L0g0L7SoyDQttCw0L3QtSDRgdC+0Lsg0LbQsNKbINC20YPRgNC10Log0LHQsNC50LvQsNC90YvRgdGC0LDRgNGLINGC0ZbQt9Cx0LXQutGC0ZYg0LHQvtC70LDQtNGLLiDQntKT0LDQvSDRgdC10LHQtdC/INOp0LrQv9C10LvRltC6INKb0LDQvSDQsNC50L3QsNC70YvQvNC90YvSoyDQtNCw0LzRg9GLINC20LDQvdC1INKb0L7Qu9Kb0LAg0LzQtdC9INOp0LrQv9C10LvRltC6INCw0YDRgtC10YDQuNGP0LvQsNGA0LTRiyDQttCw0LvSk9Cw0LnRgtGL0L0g0LbRg9GA0LXQutGI0LUg0LDRgNCw0LvRi9C6INKb0LDQu9Kb0LDQtNCw0pPRiyDRgdC+0L/QsNKb0YjQsCDRgtC10YHRltC60YLRltC6INC20LDQvdC1INCw0YDRgtC10YDQuNGP0LvRi9C6INOp0LfQtdC60YLRltC6ICrRiNGD0L3RgtGC0LDRgNC00YvQvSog0LbQsNCx0YvQu9GD0Ysg0LbSr9GA0LXQtNGWLiDTqNC30LXQutGI0LXQu9C10YDQtNGW0qMg0LbQsNCx0YvQu9GDINGD0LDSm9GL0YLRiy0gNiDQsNC/0YLQsNKT0LAg0pvQsNGA0LDQuSDQsNGA0YLQtdGA0LjRj9C70YvSmyDTqdC30LXQuiDQkdCw0YLQvtC70L7QsiDTqdC30LXQs9GWINC20LDQsdGL0LvRg9GLLCAyLTMg0LDQudKT0LAg0pvQsNGA0LDQuSDQstC10L3QsNC70YvSmyDQkNGA0LXQvdGG0LjQtdCyINOp0LfQtdCz0ZYsIDYtNyDQsNC50LvQsNGA0LTQsCDQttGD0YDQtdC60YjQtSDQsNGA0LDQu9GL0Log0pvQvtC70pvQsNC00LDSk9GLINGB0L7Qv9Cw0LrRiNCwINGC0LXRgNC10LfQtSDQttCw0LHRi9C70LDQtNGLLiDSmtCw0LvRi9C/0YLRiyDQttCw0pPQtNCw0LnQtNCwINOp0LfQtdC60YLRltKjINC20LDQsdGL0LvRg9GLLdGB0LDQsdC4INGC0YPRi9C70pPQsNC90L3QsNC9INC60LXQudGW0L0g0LDQu9KT0LDRiNKb0Ysg0LTQtdC8INCw0LvSk9Cw0L3QtNCwINOp0LrQv9C1INGC0YPQt9GW0LvQtdC00ZYg0LbQsNC90LUg06nQutC/0LUg0YLQsNC80YvRgNC70LDRgNGL0L3Ri9KjINC60LXQtNC10YDQs9GW0YHRliDQsNC30LDRj9C00YsuINCi0YPSk9Cw0L3QvdCw0L0g0LrQtdC50ZbQvSDTqdC60L/QtSDQsdGA0LDQtNC40LrQuNC90LjQvdC00ZYg0LHQvtGB0LDRgtCw0LTRiywg0L7QuyDRgtC10LPRltGBINCx0YPQu9GI0YvQutC10YLRgtC10YDQtNGWINKb0YvRgdKb0LDRgNGC0YvQvyDSm9Cw0L0g0LDSk9GL0L3Ri9C9INCw0LfQsNC50YLQsNC00YssINCw0YDRgtC10YDQuNGP0LvQsNGA0LTRiyDQsdC+0YHQsNC90YHRi9GC0YvQvyDRgtC10YDQtdC30LXQvdGW0qMg0LbQsNCx0YvQu9GD0YvQvdCwINCw0YDQtdC60LXRgiDQttCw0YHQsNC50LTRiy4g0JDRgNGC0LXRgNC40Y/Qu9GL0Log0LDSk9GL0LwgKNC/0YDQvtGC0L7Quikg0LDQtNC10YLRgtC1INGC0LDRgNGL0LvQsNC00Ysg0LbQsNC90LUgMTUtMjAg0YHQsNKT0LDRgiDQsdC+0LnRiyDRgtC+0LvRi9C6INOp0YHQtdC00ZYsINCw0LTQtdGC0YLQtSAgMi04INCw0L/RgtCw0LTQsNC9INCw0YHQv9Cw0LnQtNGLLiDQkNKT0YvQvdC00Ysg0LbQsNCx0YPQtNGL0qMg0L3QtdCz0ZbQt9Cz0ZYg0YHRgtC40LzRg9C70Ysg0LbQsNKj0LAg0YLRg9KT0LDQvSDQvdCw0YDQtdGB0YLQtdC70LXRgNC00ZbSoyDQutCw0L3Ri9C90LTQsCDQvtGC0YLQtdCz0ZYg0LzTqdC70YjQtdGA0ZbQvSDQsNGA0YLRgtGL0YDRgy4g0JDQvdCw0LvRi9KbINCw0LnQvdCw0LvQvNCw0LvRiyDQv9GA0L7RgdGC0LDQs9C70LDQvdC00LjQvdC00LXRgNC00ZbSoyDQsdOp0LvRltC90YPRliDQsNKT0YvQvNKT0LAg0LrQtdC00LXRgNCz0ZYg0LbQsNGB0LDQvywg0L7QstCw0LvRjNC00Ysg0YLQtdGA0LXQt9C10L3RltKjINC20LDQsdGL0LvRg9GL0L3QsCDQutC10LTQtdGA0LPRliDQttCw0YHQsNC50LTRiy4g0JDRiNGL0psg0L7QstCw0LvRjNC00Ysg0YLQtdGA0LXQt9C1INC606nQsdGW0L3QtSDRgtGD0YvQu9KT0LDQvSDRgdC+0qMg0YDQtdGB0L/QuNGA0LDRgtC+0YDQu9GLINC00LjRgS3RgdGC0YDQtdGB0YEg0YHQuNC90LTRgNC+0LzSk9CwINKx0YjRi9GA0LDSk9Cw0L0g0LHQsNC70LDQu9Cw0YDQtNCwINGB0YPRgNGE0LDQutGC0LDQvdGCINC20LXRgtGW0YHQv9C10YPRiNGW0LvRltCz0ZbQvdC10L0sINCw0LvRjNCy0LXQvtC70LDQu9Cw0YDQtNGL0qMg0LbQsNCx0YvRgdGL0L8g0pvQsNC70YMg0L3QsNGC0LjQttC10YHRltC90LTQtSDQnjIg0LbQtdGC0ZbRgdC/0LXRg9GI0ZbQu9GW0LPQvdC10L0g0L/QsNC50LTQsCDQsdC+0LvQsNC00Ysg0LTQtdC/INCw0LnRgtCwINCw0LvQsNC80YvQt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65" table:style-name="ce1">
            <text:p>915365</text:p>
          </table:table-cell>
          <table:table-cell office:value-type="string" table:style-name="ce1">
            <text:p>russian</text:p>
          </table:table-cell>
          <table:table-cell office:value-type="string" table:style-name="ce1">
            <text:p>Билет 21.&amp;lt;br /&amp;gt; 1.Мама ребенка, 3-х дней жизни интересуется у педиатра, почему стул у ее ребенка темно-зеленого цвета, а не белого, ведь он питается грудным молоком?Как называется первородный кал? С чем связана окраска зеленого цвета стула у ребенка? &amp;lt;br /&amp;gt; 2.Вы- врач- кардиолог. К Вам обратилась мама с ребенком 2-х лет с диагнозом: Малая аномалия развития сердца. Открытое овальное окно. Какой фактор является определяющим при закрытии овального окна в установленные сроки? &amp;lt;br /&amp;gt;</text:p>
          </table:table-cell>
          <table:table-cell office:value-type="string" table:style-name="ce1">
            <text:p>0JLQvtC/0YDQvtGBIOKEljEuINCjINC00LXRgtC10Lkg0L/QvtGB0LvQtSDRgNC+0LbQtNC10L3QuNGPINC+0YLRhdC+0LTQuNGCINC/0LXRgNCy0L7RgNC+0LTQvdGL0Lkg0LrQsNC7LCDQv9C+INC00YDRg9Cz0L7QvNGDINC90LDQt9GL0LLQsNGO0YIg0LzQtdC60L7QvdC40LkuINCjINC80LXQutC+0L3QuNC5INGG0LLQtdGCIC0g0YLQtdC80L3Qvi3Qt9C10LvQtdC90L7QstCw0YLRi9C5INC+0YLRgtC10L3QvtC6LCDQsCDRgNC10LDQutGG0LjRjyDQutC40YHQu9Cw0Y8gKDZwaCkuINCc0LXQutC+0L3QuNC5INGB0L7RgdGC0L7QuNGCINC40Lcg0YHRgtCw0YDRi9GFINC60LvQtdGC0L7QuiAo0Y3Qv9C40YLQtdC70LjQuSksINC20LXQu9GH0L3Ri9GFINC/0LjQs9C80LXQvdGC0L7Qsiwg0LAg0YLQsNC60LbQtSDQvtGB0YLQsNGC0LrQuCDQvtC60L7Qu9C+0L/Qu9C+0LTQvdGL0YUg0LLQvtC0INC40LzQtdC10YIg0LIg0YHQvtGB0YLQsNCy0LUuINCd0LAgMiDQtNC10L3RjCDQuiDQvNC10LrQvtC90LjQuSDQv9GA0LjQsdCw0LLQu9GP0LXRgtGB0Y8g0LrQsNC7LiDQndCwINGC0YDQtdGC0LjQuSAtINC/0Y/RgtGL0Lkg0LTQtdC90Ywg0LrQsNC7INGD0LbQtSDQsdGD0LTQtdGCINC40LzQtdGC0Ywg0LrQvtC90LrRgNC10YLQvdGL0Lkg0YXQsNGA0LDQutGC0LXRgNC90YvQuSDQstC40LQuINCjINGA0LXQsdC10L3QutCwINCyINC90L7RgNC80LUg0YHRgtGD0Lsg0LrQsNGI0LjRhtC10L7QsdGA0LDQt9C90LDRjywg0LrQuNGB0LvQvtC5INGA0LXQsNC60YbQuNC4LCDQt9C+0LvQvtGC0LjRgdGC0L4t0LbQtdC70YLQvtCz0L4g0YbQstC10YLQsCAo0L/RgNC40YHRg9GC0YHRgtCy0LjQtSDQsdC40LvQuNGA0YPQsdC40L3QsCkg0LjQu9C4INGC0LXQvNC90L7Qs9C+LdC30LXQu9C10L3QvtCz0L4gKNC/0YDQuNGB0YPRgtGB0YLQstC40LUg0LHQuNC70LjQstC10YDQtNC40L3QsCkuINCY0LzQtdC10YIg0LrQuNGB0LvRi9C5INC30LDQv9Cw0YUuINCf0YDQuCDQs9GA0YPQtNC90L7QvCDQutC+0YDQvNC70LXQvdC40Lgg0YMg0YDQtdCx0LXQvdC60LAg0LDQutGCINC00LXRhNC10LrQsNGG0LjQuCDQv9GP0YLRjC3RgdC10LzRjCDRgNCw0Lcg0LIg0LTQtdC90Ywg0LfQsCDQv9C10YDQstGL0Lkg0LzQtdGB0Y/RhiDQttC40LfQvdC4LiDQl9CwINCy0YLQvtGA0L7QuSDQvNC10YHRj9GGINC20LjQt9C90Lgg0YLRgNC4LdGI0LXRgdGC0Ywg0YDQsNC30LAg0LIg0LTQtdC90YwuINCV0YHQu9C4INGA0LXQsdC10L3QutGDINCz0L7QtNC40LosINGC0L4g0L7QtNC40L0t0LTQstCwINGA0LDQt9CwINCyINGB0YPRgtC60LguINCe0LHRi9GH0L3QviDRgtCw0LrQuNC1INC00LDQvdC90YvQtSDQv9C+0LrQsNC30YvQstCw0Y7RgiDRgyDRgNC10LHQtdC90LrQsCDQv9GA0Lgg0LPRgNGD0LTQvdC+0Lwg0LrQvtGA0LzQu9C10L3QuNC4LCDQv9GA0Lgg0LrQvtGC0L7RgNC+0Lwg0LIg0L7RgNCz0LDQvdC40LfQvCDRgNC10LHQtdC90LrQsCDQv9C+0YHRgtGD0L/QsNGO0YIg0L3QtdC+0LHRhdC+0LTQuNC80YvQtSDQv9C40YLQsNGC0LXQu9GM0L3Ri9C1INCy0LXRidC10YHRgtCy0LAuINCQINC10YHQu9C4INGA0LXQsdC10L3QvtC6INC/0YDQuCDQuNGB0LrRg9GB0YHRgtCy0LXQvdC90L7QvCDQutC+0YDQvNC70LXQvdC40LgsINGC0L4g0YbQstC10YIg0YPQttC1INCx0L7Qu9C10LUg0YHQstC10YLQu9GL0Lkg0L7RgtGC0LXQvdC+0Log0LjQu9C4INGB0LXRgNC+0LLQsNGC0YvQuSDRhtCy0LXRgi4g0KDQtdCw0LrRhtC40Y8g0LHQvtC70LXQtSDRidC10LvQvtGH0L3QsNGPLiDQl9Cw0L/QsNGFINCx0L7Qu9C10LUg0YDQtdC30LrQuNC5LCDRh9C10Lwg0L/RgNC4INCz0YDRg9C00L3QvtC8INC60L7RgNC80LvQtdC90LjQuCDQuCDRgtCw0LrQvtC5INCz0YPRgdGC0L7QuSwg0L/Qu9C+0YLQvdC+0Lkg0LrQvtC90YHQuNGB0YLQtdC90YbQuNC4LiDQn9GA0Lgg0Y3RgtC+0Lwg0LDQutGCINC00LXRhNC10LrQsNGG0LjQuCDQsiDQtNC10L3RjCDRgtC+0LvRjNC60L4g0L7QtNC40L0g0LjQu9C4INC00LLQsCDRgNCw0LfQsC4g0J/QvtGN0YLQvtC80YMg0YMg0LTQsNC90L3QvtCz0L4g0YDQtdCx0LXQvdC60LAg0LrQsNC7INCy0YHQtSDQsiDQvdC+0YDQvNC1LjxiciAvPg0KPGJyIC8+DQrQktC+0L/RgNC+0YEg4oSWMi4g0JzQsNC70LDRjyDQsNC90L7QvNCw0LvQuNGPINGA0LDQt9Cy0LjRgtC40Y8g0YHQtdGA0LTRhtCwINGB0LLRj9C30LDQvdC+INGBINC+0LLQsNC70YzQvdGL0Lwg0L7QutC90L7QvC4g0J7QstCw0LvRjNC90L7QtSDQvtC60L3QviDQvdCw0YXQvtC00LjRgtGB0Y8g0LzQtdC20LTRgyDQtNCy0YPQvNGPINC/0YDQtdC00YHQtdGA0LTQuNGP0LzQuC4g0KMg0YDQtdCx0LXQvdC60LAg0YEg0YDQvtC20LTQtdC90LjRjyDQuNC80LXQtdGC0YHRjyDQvtGC0LrRgNGL0YLQvtC1INC+0LLQsNC70YzQvdC+0LUg0L7QutC90L4uINCd0L4g0Log0LzQvtC80LXQvdGC0YMg0L3QsNGB0YLRg9C/0LvQtdC90LjRjyAyINC70LXRgiwg0L7QstCw0LvRjNC90L7QtSDQvtC60L3QviDQsiDQsdC+0LvRjNGI0LjQvdGB0YLQstC1INGB0LvRg9GH0LDQtdCyINC30LDQutGA0YvQstCw0LXRgtGB0Y8uINCe0LLQsNC70YzQvdC+0LUg0L7QutC90L4g0YHQu9GD0LbQuNGCINC00LvRjyDQv9C10YDQtdC80LXRidC10L3QuNGPINC60YDQvtCy0Lgg0YEg0L/RgNCw0LLQvtCz0L4g0L/RgNC10LTRgdC10YDQtNC40Y8g0LIg0LvQtdCy0L7QtSDQv9GA0LXQtNGB0LXRgNC00LjQtS4g0JXRgdC70Lgg0L7QstCw0LvRjNC90L7QtSDQvtC60L3QviDQvdC1INC30LDQutGA0L7QtdGC0YHRjywg0Y3RgtC+INC80L7QttC10YIg0L/RgNC40LLQtdGB0YLQuCDQuiDQv9C+0LLRi9GI0LXQvdC40Y4g0LDRgNGC0LXRgNC40LDQu9GM0L3QvtCz0L4g0LTQsNCy0LvQtdC90LjRjyDQsiDQv9GA0LDQstGL0YUg0Lgg0LvQtdCy0YvRhSDQv9GA0LXQtNGB0LXRgNC00LjRj9GFLCDRgtCw0Log0LrQsNC6INC40LTQtdGCINC/0L7QstGL0YjQtdC90L3QvtC1INC60YDQvtCy0L7QvtCx0YDQsNGJ0LXQvdC40LUsINGH0YLQviDQsiDQtNCw0LvRjNC90LXQudGI0LXQvCDQvNC+0LbQtdGCINC/0YDQuNCy0LXRgdGC0Lgg0Log0YPRhdGD0LTRiNC10L3QuNGOINC4INC/0L7QstGL0YjQtdC90L3QvtC5INGA0LDQsdC+0YLQtSDQv9GA0LXQtNGB0LXRgNC00LjQuC4g0KLQviDQtdGB0YLRjCDQt9Cw0LrRgNGL0LLQsNC10YLRgdGPINC00LvRjyDQvtGB0YLQsNC90L7QstC60Lgg0LTQsNC70YzQvdC10LnRiNC+0LPQviDQv9C10YDQtdC80LXRidC10L3QuNGPINC60YDQvtCy0Lgg0LjQtyDQv9GA0LDQstC+0LPQviDQsiDQu9C10LLRi9C5LiDQotCw0LrQttC1INC+0LLQsNC70YzQvdC+0LUg0L7QutC90L4g0LfQsNC60YDRi9Cy0LDQtdGC0YHRjywg0LrQvtCz0LTQsCDQvdCw0YfQuNC90LDQtdGCINGE0YPQvdC60YbQuNC+0L3QuNGA0L7QstCw0YLRjCDQvNCw0LvRi9C5INC60YDRg9CzINC60YDQvtCy0L7QvtCx0YDQsNGJ0LXQvdC40Y8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56" table:style-name="ce1">
            <text:p>1067156</text:p>
          </table:table-cell>
          <table:table-cell office:value-type="string" table:style-name="ce1">
            <text:p>russian</text:p>
          </table:table-cell>
          <table:table-cell office:value-type="string" table:style-name="ce1">
            <text:p>Билет 21.&amp;lt;br /&amp;gt; 1.Мама ребенка, 3-х дней жизни интересуется у педиатра, почему стул у ее ребенка темно-зеленого цвета, а не белого, ведь он питается грудным молоком?Как называется первородный кал? С чем связана окраска зеленого цвета стула у ребенка? &amp;lt;br /&amp;gt; 2.Вы- врач- кардиолог. К Вам обратилась мама с ребенком 2-х лет с диагнозом: Малая аномалия развития сердца. Открытое овальное окно. Какой фактор является определяющим при закрытии овального окна в установленные сроки? &amp;lt;br /&amp;gt;</text:p>
          </table:table-cell>
          <table:table-cell office:value-type="string" table:style-name="ce1">
            <text:p>MS4g0J/QtdGA0LLQvtGA0L7QtNC90YvQuSDQutCw0Lsg0LIg0L/QtdGA0LLRi9C1INC00L3QuCDQttC40LfQvdC4INC00LXRgtC10Lkg0L3QvtGB0LjRgiDQvdCw0LfQstCw0L3QuNC1INC80LXQutC+0L3QuNC5LiDQodGC0YPQuyDRgyDRgNC10LHQtdC90LrQsCDRgtC10LzQvdC+LdC30LXQu9C10L3QvtCz0L4g0YbQstC10YLQsCDQuNC3LdC30LAg0LjQvNC10Y7RidC10LPQvtGB0Y8g0L/QuNCz0LzQtdC90YLQsCDQt9C10LvQtdC90L7Qs9C+INGG0LLQtdGC0LAgLSDQsdC40LvQuNCy0LXRgNC00LjQvdCwKNC+0LHRgNCw0LfRg9C10YLRgdGPINC/0YDQuCDRgNCw0LfRgNGD0YjQtdC90LjQuCDRhNC10YLQsNC70YzQvdC+0LPQviDQs9C10LzQvtCz0LvQvtCx0LjQvdCwINCyINC60LjRiNC10YfQvdC40LrQtSAtINC/0YDQuCDRgNC+0LbQtNC10L3QuNC4INGB0L4g0LLRgNC10LzQtdC90LXQvCDRhNC10YLQsNC70YzQvdGL0Lkg0LPQtdC80L7Qs9C70L7QsdC40L0g0LfQsNC80LXQvdGP0LXRgtGB0Y8g0LLQt9GA0L7RgdC70YvQvCkuINCa0L7Qu9C40YfQtdGB0YLQstC+INCx0LjQu9C40LLQtdGA0LTQuNC90LAg0L/QvtCy0YvRiNCw0LXRgtGB0Y8g0LjQty3Qt9CwINGD0LLQtdC70LjRh9C10L3QvdC+0LPQviDRg9GA0L7QstC90Y8g0L7QutC40YHQu9C10L3QuNGPINCx0LjQu9C40YDRg9Cx0LjQvdCwINCyINC60LjRiNC10YfQvdC40LrQtSwg0LrQvtGC0L7RgNGL0Lkg0YMg0L3QvtCy0L7RgNC+0LbQtNC10L3QvdGL0YUg0LTQtdGC0LXQuSDQtdGJ0LUg0L3QtdC00L7RgdGC0LDRgtC+0YfQvdC+INGA0LDQt9Cy0LjRgiAo0YHQu9Cw0LHQsNGPINGB0LvQuNC30LjRgdGC0LDRjywg0LzQvtGC0L7RgNC40LrQsCwg0L/QvtC00LLQtdGA0LbQtdC9INC40L3RhNC10LrRhtC40Y/QvCwg0LvQtdCz0LrQviDRgNCw0LfQtNGA0LDQttCw0LXRgtGB0Y8p0YLQsNC60LbQtSDQvdGD0LbQvdC+INGD0YfQuNGC0YvQstCw0YLRjCDRgtC+0YIg0YTQsNC60YIsINGH0YLQviDRgyDQvdC+0LLQvtGA0L7QttC00LXQvdC90YvRhSDQuNC00LXRgiDQv9C+0LLRi9GI0LXQvdC90YvQuSDRgNCw0YHQv9Cw0LQg0Y3RgNC40YLRgNC+0YbQuNGC0L7QsiDQsiDQv9C10YDQstGL0LUg0LTQvdC4INC20LjQt9C90LguINCjINC90L7QstC+0YDQvtC20LTQtdC90L3Ri9GFINC60LDQuyDQsdGD0LTQtdGCINC20LjQtNC60LjQuSwg0YMg0LTQtdGC0LXQuSDQv9C40YLQsNGO0YnQuNGF0YHRjyDQs9GA0YPQtNC90YvQvCDQvNC+0LvQvtC60L7QvCDQvtC9INC80L7QttC10YIg0LzQtdC90Y/RgtGMINC+0LrRgNCw0YHQutGDINGBINGC0LXQvNC90L4t0LfQtdC70LXQvdC+0LPQviDRhtCy0LXRgtCwINC90LAg0LbQtdC70YLRi9C5ICjQt9Cw0LLQuNGB0LjRgiDQvtGCINGA0LDQt9Cy0LjRgtC40Y8g0LrQuNGI0LXRh9C90LjQutCwINC4INGD0YDQvtCy0L3RjyDQsdC40LvQuNGA0YPQsdC40L3QsCkuINCU0LDQvdC90YvQuSDQv9GA0L7RhtC10YHRgSDQvNC+0LbQvdC+INC90LDQt9Cy0LDRgtGMICLRhNC40LfQuNC+0LvQvtCz0LjRh9C10YHQutC+0Lkg0LbQtdC70YLRg9GF0L7QuSDQvdC+0LLQvtGA0L7QttC00LXQvdC90L7Qs9C+IiDQuCDQvdGD0LbQvdC+INCx0YPQtNC10YIg0L7QsdGK0Y/RgdC90LjRgtGMINC80LDRgtC10YDQuCDRgNC10LHQtdC90LrQsCDRh9GC0L4g0YbQstC10YIg0YHRgtGD0LvQsCjQsiDQtNCw0L3QvdC+0Lwg0YHQu9GD0YfQsNC1INGC0LXQvNC90L4t0LfQtdC70LXQvdGL0LkpINGP0LLQu9GP0LXRgtGB0Y8g0LLQsNGA0LjQsNC90YLQvtC8INC90L7RgNC80YssINC4INC10YHQu9C4INGDINGA0LXQsdC10L3QutCwINC90LXRgiDQtNGA0YPQs9C40YUg0YHQuNC80L/RgtC+0LzQvtCyLCDRgtC+INCx0LXRgdC/0L7QutC+0LjRgtGB0Y8g0L3QtSDQviDRh9C10LwuIDIuINCe0LLQsNC70YzQvdC+0LUg0L7QutC90L4gLSDRjdGC0L4g0L7RgtCy0LXRgNGB0YLQuNC1INGDINC/0LvQvtC00LAsINC60L7RgtC+0YDQvtC1INC+0YLQstC10YfQsNC10YIg0LfQsCDQv9C10YDQtdC90L7RgSDQutGA0L7QstC4INGBINC+0LTQvdC+0LPQviDQv9GA0LXQtNGB0LXRgNC00LjQtSDQsiDQtNGA0YPQs9C+0LUsINCyINC90L7RgNC80LUg0L7QvdC+INC90LDRh9C40L3QsNC10YIg0LfQsNC60YDRi9Cy0LDRgtGM0YHRjyDQsiDQv9C10YDQstGL0LUg0LTQvdC4INC20LjQt9C90Lgg0Lgg0L7QsdGL0YfQvdC+INC6IDMtNiDQvNC10YHRj9GG0LXQvCDQvNC+0LbQtdGCINCx0YvRgtGMINC30LDQutGA0YvRgtC+LCDQvdC+INC40L3QvtCz0LTQsCDQvtC90L4g0LzQvtC20LXRgiDQt9Cw0LrRgNGL0LLQsNGC0YzRgdGPINC00L4g0LPQvtC00LAo0YMgMjAtMzAg0L/RgNC+0YbQtdC90YLQvtCyINC00LXRgtC10Lkg0L7QstCw0LvRjNC90L7QtSDQvtC60L3QviDQvNC+0LbQtdGCINC+0YHRgtCw0LLQsNGC0YzRgdGPINC+0YLQutGA0YvRgtGL0LwpLiDQpNCw0LrRgtC+0YDQsNC80Lgg0LfQsNC60YDRi9GC0LjRjyDQvtC60L3QsCDRgdC70YPQttCw0YIgLSDRg9Cy0LXQu9C40YfQtdC90LjQtSDQtNCw0LLQu9C10L3QuNC1INCyINC70LXQstC+0Lwg0L/RgNC10LTRgdC10YDQtNC40Lgg0L/QviDQvtGC0L3QvtGI0LXQvdC40Y4g0Log0L/RgNCw0LLQvtC80YMsINGC0LDQuiDQutCw0Log0Y3RgtC+INCy0YvQvdGD0LbQtNCw0LXRgiDQutC70LDQv9Cw0L3QvdC+0L/QvtC00L7QsdC90L7QvNGDINGD0YfQsNGB0YLQutGDINGC0LrQsNC90Lgg0LzQtdC20LTRgyDQv9GA0LXQtNGB0LXRgNC00LjRj9C80Lgg0LfQsNC60YDRi9Cy0LDRgtGM0YHRjyAo0LXRgdC70Lgg0LTQsNCy0LvQtdC90LjQtSDQvdC1INCx0YPQtNC10YIg0LzQtdC90Y/RgtGM0YHRjyDRgtC+INC+0LrQvdC+INC80L7QttC10YIg0L3QtSDQt9Cw0LrRgNGL0YLRjNGB0Y8pLCDRgtCw0LrQttC1INC/0YDQuNC30L3QsNC60L7QsiDRgtC+0LPQviwg0YfRgtC+INC+0LrQvdC+INC30LDQutGA0YvRgtC+INGP0LLQu9GP0LXRgtGB0Y8g0YPQstC10LvQuNGH0LXQvdC40LUg0L3QsNGB0YvRidC10L3QuNGPINC60LjRgdC70L7RgNC+0LTQvtC8INC60YDQvtCy0LgsINCy0LXQtNGMINC/0YDQuCDQv9C10YDQstC+0Lwg0YHQsNC80L7RgdGC0L7Rj9GC0LXQu9GM0L3QvtC8INCy0LTQvtGF0LUg0YDQtdCx0LXQvdC60LAg0LIg0LrRgNC+0LLQvtC+0LHRgNCw0YnQtdC90LjQtSDQstGB0YLRg9C/0LDRjtGCINC70LXQs9C60LjQtSwg0LrQvtGC0L7RgNGL0LUg0L3QsNGB0YvRidCw0Y7RgiDQutGA0L7QstGMINC60LjRgdC70L7RgNC+0LTQvtC8ICjQstC+INCy0YDQtdC80Y8g0LLQvdGD0YLRgNC40YPRgtGA0L7QsdC90L7Qs9C+INGA0LDQt9Cy0LjRgtC40Y8g0LzQutC6INC90LUg0YTRg9C90LrRhtC40L7QvdC40YDRg9C10YIsINCwINC/0LvQvtC0INC/0L7Qu9GD0YfQsNC10YIg0LrQuNGB0LvQvtGA0L7QtCDRgSDQtNGA0YPQs9C40LzQuCDQv9C40YLQsNGC0LXQu9GM0L3Ri9C80Lgg0LLQtdGJ0LXRgdGC0LLQsNC80Lgg0YfQtdGA0LXQtyDQv9C70LDRhtC10L3RgtGDINC+0YIg0LzQsNGC0LXRgNC4KS4g0JIg0L3QvtGA0LzQtSDQutGA0L7QstC+0YHQvdCw0LHQttC10L3QuNC1INC/0LvQvtC00LAg0Lgg0YDQtdCx0LXQvdC60LAg0L7RgtC70LjRh9Cw0Y7RgtGB0Y8sINC/0YDQuCDRgNC+0LbQtNC10L3QuNC4INGDINGA0LXQsdC10L3QutCwINC00L7Qu9C20L3RiyDQt9Cw0LrRgNGL0LLQsNGC0YzRgdGPINC+0LLQsNC70YzQvdC+0LUg0L7QutC90L4sINCw0YDRgtC10YDQuNCw0LvRjNC90YvQuSDQv9GA0L7RgtC+0Loo0LogMyDQvNC10YHRj9GG0YMpINC4INC00YAuLCDQvdC+INGN0YLQvtCz0L4g0LzQvtC20LXRgiDQvdC1INC/0YDQvtC40YHRhdC+0LTQuNGC0Ywg0LjQtyAt0LfQsCDRh9C10LPQviDQsdGD0LTRg9GCINCy0L7Qt9C90LjQutCw0YLRjCDRgtCw0LrQuNC1INCw0L3QvtC80LDQu9C40Lgg0YDQsNC30LLQuNGC0LjRjyDRgdC10YDQtNGG0LAuINCc0LDRgtC10YDQuCDRgNC10LHQtdC90LrQsCDQvdGD0LbQvdC+INC+0LHRitGP0YHQvdC40YLRjCwg0YfRgtC+INC+0YLQutGA0YvRgtC+0LUg0L7QstCw0LvRjNC90L7QtSDQvtC60L3QviDRj9Cy0LvRj9C10YLRgdGPINC00L7RgdGC0LDRgtC+0YfQvdC+INGA0LDRgdC/0YDQvtGB0YLRgNCw0L3QtdC90L3QvtC5INC80LDQu9C+0Lkg0LDQvdC+0LzQsNC70LjQtdC5INGA0LDQt9Cy0LjRgtC40Y8g0YHQtdGA0LTRhtCwINC4INC10Lkg0L3QtSDRgdGC0L7QuNGCINC/0LXRgNC10LbQuNCy0LDRgtGML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23" table:style-name="ce1">
            <text:p>915023</text:p>
          </table:table-cell>
          <table:table-cell office:value-type="string" table:style-name="ce1">
            <text:p>english</text:p>
          </table:table-cell>
          <table:table-cell office:value-type="string" table:style-name="ce1">
            <text:p>Ticket 21.&amp;lt;br /&amp;gt; 1. A mother of a 3-day-old child, is interested and asked a pediatrician, why is her child’s stool dark green colored, but not white, as he is on breast feeding? What is the name of the primal feces? What is the reason for the green color of the stool in a child?&amp;lt;br /&amp;gt; 2. You are a cardiologist. A mother came to you with a child of 2 years old with a diagnosis of Minor anomaly in heart development. Open foramen oval. What is the determining factor when closing the oval foramen on time? Why?&amp;lt;br /&amp;gt;</text:p>
          </table:table-cell>
          <table:table-cell office:value-type="string" table:style-name="ce1">
            <text:p>Ly8oMSk7REFSSyBHUkVFTiBDT0xPVVJFRCBTVE9PTCBJTiBCUkVTVElGSUVEIE5FVyBCT1JOUy4qUFJJTUFMIEZFQ0VTOlRIRSBEQVJLIEdSRUVOIENPTE9SRUQgU1RPT0wgSU4gQlJFU1RJRklFRCBORVdCT1JOUyBJUyBDQUxMRUQgQVMgIk1FQ09OSVVNIiBNRUNPTklVTSBJUyBGSVJTVCBQQVNTRUQgQlkgQU5OIElORkFOVCBBTkQgSVMgVFlQSUNBTExZWSBHUkVFTklTSCBCTEFDSyBJTiBDT0xPUi4uL1JFQVNPTk4gRk9SIEdSRUVOIENPTE9SOk1FQ09OSVVNIEdFVFMgSVRTIENPTE9SUiBGUk9NTSBBTU5JT1RJQyBGTFVJRCAsTVVDVVMgQU5EIE9USEVSIFNVQlNUQU5DRVMgVEhFIEJBQlkgSU5HRVNUUyBJTiBUSEhFIFdPTUIuL1RIRSBHUkVFTiBIVUUgSVMgVEhFRSBSRVNVTFQgT0YgVEhFIEJSRUFLRE9XTiBPRiBUSEUgQklMTElWRVJESU4sIEEgUElHR01FTlQgSU4gVEhFIEFNTklPVElDIEZMVUlEIElOVE8gQklMSVJVQklOLi5UUkFOU0lUSU9OIFRPTyBZRUxMT1cgU1RPT0wgQVMgVEhFIEJBQlkgQ09OVElOVUVTIFRPIEJSRUFTVCBGRUVESU5HICwsTUVDT05JVU0gSVMgR1JBRFVBTExZIFJFUExBQ0VEIEJZIFRSQU5TSVRJT05BTCBTVE9PTCBXSElDSCBJUyBMSUdIVEVSIElOIENPTE9SICxFVkVOVFVBTExZIEJZIE1BVFVSRSBCUkVTVCBNSUxLIFNUT09MUyAsV0hJQ0ggQVJFIFRZUElDQUxMWSBZRUxMT1cuLi8vLy4uKDIpO0RFVEVSTUlOSU5HIEZBQ1RPUiBGT1JSIENMT1NJTkcgVEhFIE9WQUwgRk9SQU1FTjs7VElNSU5HIE9GIENMT1NVUkU7VEhFIEZPUkFNRU4gT1ZBTEUgSVMgVEhFIFNNQUxMIE9QRU5JTkcgQkVUV0VFTiBUV08gQVRSSUEgT0YgSEVBUlQuSVRTIENMT1NVUkUgSVMgRVNTRU5USUFMIEZPUiBUSEVFIENBUkRJQUMgRlVOVElPTlMuLi5GRVRBTCBDSVJDVUxBVElPTiBBREFQVEFUSU9OLERVUklORyBGRVRBTCBERVZFTE9QTUVOVCBUSEUgRk9SQU1FTiBPVkFMRSBBTExPV1MgQkxPT0QgVE9PIEJZUEFTUyBUSEUgTk9OLUZVTkNUSU9OSU5HIEZFVEFMIExVTkdTLi4uLkFGVEVSIEJJUlRIIFdIRU4gVEhFIEJBQlkgVEFLRVMgSVRTIEZJUlNUIEJSRUFUSFMgQU5EIFRIRUUgTFVOR1MgQkVDT01FIEZVTkNUSU9OQUwsVEhFIFBSRVNTVVJFIElOIFRIRSBMRUZUIEFUUklVTSBJTkNSRUFTRVMuSU5DUkVBU0UgSU4gVEhFIExFRlQgQVRSSUFMIFBSRVNTVVJFOypUSEUgSU5DUkVTRSBJTiBUSEUgUFJFU1NVUkUgSU4gTEVGVCBBVFJJVU0gIEFMT05HIFdJVEggT1RIRVIgQ0hBTkdFUyBJTiBDSVJDVUxBVE9SWSBEWU5BTUlDUy4uLkxFQURTIFRPIFRIRSBGVU5DVElPTkFMIENMT1NVUkUgT0YgVEhFIEZPUkFNRU4gT1ZBTEUuLi5USEUgQ0xPU1VSRSBJUyBDT01QTEVURUQgSU4gRklSU1QgRkVXIE1PTlRIUy4uUFJFU1NVUkUgR1JBRElFTlQgU0hJRlQ7OlRIRSBTSElGVCBJTiBQUkVTU1VSRSBHUkFESUVOVFMgQU5EIENIQU5HRVMgSU4gQkxPT0QgRkxPVyBQQVRURVJOUyBDT05UUklCVVRFIFRPIFRIRSBGTEFQIC1MSUtFIFZBTFZFIE9GIFRIRSBGT1JBTUVOIE9WQUxFIFNFQUxJTkcgU0hVVCxFTlNVUklORyBUSEFUIE9YWUdFTkFURUQgQkxPT0QgRkxPV1MgVEhST1VHSCBUSEUgTFVOR1MgRk9SIE9YWUdFTiBFWENIQU5HRS4uLy8g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There are many punctuation marks</text:p>
          </table:table-cell>
          <table:table-cell office:value-type="float" office:value="0" table:style-name="ce1">
            <text:p>0</text:p>
          </table:table-cell>
          <table:table-cell table:number-columns-repeated="16376"/>
        </table:table-row>
        <table:table-row table:style-name="ro1">
          <table:table-cell office:value-type="float" office:value="915227" table:style-name="ce1">
            <text:p>915227</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0JHRltGA0ZbQvdGI0ZYg0YHSsdGA0LDSmzog0JXRgNGC0LUg0LbQsNGB0YLQsNKT0Ysg0LHQsNC70LDQu9Cw0YDQtNGL0qMg0YLTqdC80LXQvdCz0ZYg0YLRi9C90YvRgSDQsNC70YMg0LbQvtC70LTQsNGA0YvQvdGL0qMg0LTQsNC80LjRgtGL0L0g0LDRg9GA0YPQu9Cw0YAg0LrQtdGD0LTQtSDSm9GD0YvRgdGL0L3QtNCwINCw0L3QsNGC0L7QvNC+INGE0LjQt9C40L7Qu9C+0LPQuNGP0LvRi9KbINC10YDQtdC60YjQtdC70ZbQutGC0LXRgNGWINCw0LvRg9Cw0L0g0YLSr9GA0LvRliDQsdC+0LvRi9C/INGC0LDQsdGL0LvQsNC00YsuINCV0qMg0LHQsNGB0YvQvdCw0L0g0LHQsNGB0YLQsNC/INC10YDRgtC1INC20LDRgdGC0LDSk9GLINCx0LDQu9Cw0LvQsNGA0LTQsCDRgtOp0LzQtdC90LPRliDRgtGL0L3Ri9GBINCw0LvRgyDQttC+0LvQtNCw0YDRiyDQsdGW0LfQtNC1INC10YDQtdGB0LXQuiDQsNC00LDQvNC00LDRgNKT0LAg0pvQsNGA0LDSk9Cw0L3QtNCwINGC0LDRgCDQttOZ0L3QtSDQutGW0YjQutC10L3RgtCw0Lkg0LHQvtC70YvQvyDQutC10LvQtdC00ZYg0LbTmdC90LUg0LTQtSDQvtC70LDRgCDRiNGL0YDRi9GI0YLQsNGA0pPQsCDQvdC10LzQtdGB0LUg0LHQsNGB0pvQsCDQtNCwINCx06nQs9C00LUg0LfQsNGC0YLQsNGA0pPQsCDQsdGW0YLQtdC70YPRliDSm9Cw0YPRltC/0ZYg0LbQvtKT0LDRgNGLINCx0L7Qu9GL0L8g0LrQtdC70LXQtNGWLiDQntC7INCx0ZbQt9C00LUg0LHQsNC70LDQu9Cw0YDQtNCwINCx0YDQvtC90YXQuNCw0LvRjNC00ZYg0LDRgdGC0LzQsNKT0LAg0LbTmdC90LUg0LTQtSDQsdGA0L7QvdGF0LjQvtC70LjRgtGC0ZbSoyDQtNCw0LzRg9GL0L3QsCDRgdC10LHQtdC/0LrQtdGAINCx0L7Qu9GL0L8g0LrQtdC70LXQtNGWLiDQodC10LHQtdCx0ZYg0YLRi9C90YvRgSDQsNC70YMg0LbQvtC70LTQsNGA0LTQsNKT0Ysg0LHSsdC70YjRi9Kb0LXRgtGC0LXRgNC00ZbSoyDQu9GO0LzQtdC90ZYg0YLQsNGAINCx0L7Qu9KT0LDQvdC00YvSm9GC0LDQvSwg0LHQsNC70LDQtNCwINGC0YvQvdGL0YEg0LDQu9GD0LTRi9KjINKb0LjRi9C90LTQsNGC0YvQu9GD0Ysg05nQsdC00LXQvSDQvNKv0LzQutGW0L0g0LHQvtC70YvQvyDQutC10LvQtdC00ZYu0JHQsNGB0pvQsCDQtNCwINC10YDQtdC60YjQtdC70ZbQutGC0LXRgNGW0L3QtSDQutC10LvRgdC10Los0LXRgNGC0LUg0LbQsNGB0YLQsNKT0Ysg0LHQsNC70LDQu9Cw0YDQtNCwLCDQvtC7INGC0YvQvdGL0YEg0LDQu9GDINCx0rHQu9GI0YvSm9C10YLRgtC10YDQtNGW0qMg0LbQtdGC0ZbQu9C80LXRg9GWLiDTmNGB0ZbRgNC10YHQtSDQtdGA0YLQtSDQttCw0YEg0LHQsNC70LDQu9Cw0YDQtNCwLCDQvtC70LDRgNC00LAg0LTQuNCw0YTRgNCw0LPQvNCw0L3Ri9KjINC205nQvdC1INC00LUg0pvQsNCx0YvRgNKT0LAg0LDRgNCw0LvRi9KbINCx0rHQu9GI0YvSm9C10YLRgtC10YDRliDRgtC+0LvRi9KbINC20LXRgtGW0LvQvNC10LPQtdC9LiDQntC90YvSoyDQttC10YLRltC70LzQtdGD0ZYg0LHQsNC70LDQu9Cw0YDQtNCwINGC0YvQvdGL0YEg0LDQu9GDINCw0LrRgtGW0YHRltC90LTQtdCz0ZYg0pvQuNGL0L3QtNGL0pvRgtCw0YDSk9CwINOZ0LrQtdC70YPRliDQvNKv0LzQutGW0L0uINCe0YHRi9C00LDQvSDQutC10LnRltC9INC+0Lsg0YjRi9GA0YvRiNGC0LDRgNC00Ysg0YLQsNC30LDRgNGC0YPSk9CwINC205nQvdC1INC00LUg0YLRi9C90YvRgSDQsNC70YMg0LbQvtC70LTQsNGA0YvQvdGL0qMg0LbQtdC70LTQtdGC0YPRltC90ZbSoyDTmdGA0YLSr9GA0LvRliDSm9C40YvQvdC00YvSm9GC0LDRgNKT0LAg0LbTmdC90LUg0LTQtSDQsNGD0YDRg9C70LDRgNKT0LAg0YHQtdCx0LXQv9C60LXRgCDQsdC+0LvQsCDQsNC70LDQtNGLLiDQltOZ0L3QtSDQtNC1INC10YDRgtC1INC20LDRgdGC0LDSk9GLINCx0LDQu9Cw0LvQsNGA0LTQsNKT0Ysg0LXRgNC10LrRiNC10LvRltC60YLQtdGA0ZbQvdGW0qMg0LHRltGA0ZYg0L7Quywg0L7Qu9Cw0YDQtNGL0qMg0YLRi9C90YvRgSDQsNC70YMg0LbQuNGW0LvRltCz0ZbQvdGW0qMg0LXRgNC10YHQtdC6INCw0LTQsNC80LTQsNGA0pPQsCDSm9Cw0YDQsNKT0LDQvdC00LAg0LbQvtKT0LDRgNGLINCx0L7Qu9GL0L8g0LrQtdC70LPQtdC90L3QtdC9LNGC0YvQvdGL0YEg0LDQu9GDINCw0YPRgNGD0LvQsNGA0pPQsCDQsdC40ZbQvCDQsdC+0LvQsCDQsNC70LDQtNGLLiDQntC90YvSoyDRgdC10LHQtdC/0YLQtdGA0ZbQvdC1LCDQvtC7INCx0LDQu9Cw0LvQsNGA0LTQsNKT0Ysg0LzQtdGC0LDQsdC+0LvQuNC30LzQvdGW0qMg0LDQutGC0LjQstGC0ZbQu9GW0LPRliDQttC+0pPQsNGA0Ysg0LHQvtC70pPQsNC90L3QsNC9INCx0L7Qu9Cw0LTRiy4g0KLQsNKT0Ysg0LHRltGAINC10YDQtdC60YjQtdC70ZbQutGC0LXRgNGW0L3QtSDQutC10LvRgdC10Log0L7QuyDQsdCw0LvQsNC70LDRgNC00LDSk9GLINC40LzQvNGD0L3QtNGL0psg0LbSr9C50LXQvdGW0qMg0LDQutGC0LjQstGC0ZYg0YLSr9GA0LTQtSDQtNCw0LzRgyDRgdCw0YLRi9GB0YvQvdC00LDSk9GLINC60LXQt9C10LPRltC90LTQtSDQsdC+0LvSk9Cw0L3QsNC9INC60LXQudGW0L0sINC+0Lsg0LXRgNGC0LUg0LbQsNGB0YLQsNKT0Ysg0LHQsNC70LDRgNC70LDRgNC00YvSoyDQuNC90YTQtdC60YbQuNGP0LvQsNGA0pPQsCDQsdC40ZbQvCDQsdC+0LvQsCDQsNC70LDQtNGLLCDTmdGB0ZbRgNC10YHQtSDRgtOp0LzQtdC90LPRliDRgtGL0L3Ri9GBINCw0LvRgyDQttC+0LvQtNCw0YDQtNCw0pPRiyDQv9C90LXQstC80L7QvdC40Y/QvNC10L0g0LbTmdC90LUg0LTQtSDQsdGA0L7QvdGF0LjRgtGC0LXRgNCz0LUg0YLTqdC30ZbQvNGB0ZbQtyDQsdC+0LvQsCDQsNC70LDQtNGLLjIp0JXQutGW0L3RiNGWINGB0rHRgNCw0ps6INCe0YHRiyDRgdC40YLRg9Cw0YbQuNGP0LvRi9KbINC20LDSk9C00LDQudC00LAsINCx0ZbQt9C00LUg0LHQsNC70LDQvdGL0qMg0YjQsNKT0YvQvNGL0L3QsCDQutC10LvRgdC10LosINCw0L3QtdC80LjRj9KT0LAg0LrTqdC805nQvSDQsdC+0LvQsCDQsNC70LDQvNGL0Lcg0LbTmdC90LUg0LTQtSDQsdGW0Lcg0L7QvdGL0qMg0pvQsNC9INCw0L3QsNC70LjQt9C40L3QtNC10LPRliDQvdC+0YDQvNCw0pPQsCDRgdCw0Lkg0LXQvNC10YEg0LDRg9GL0YLSm9GD0YvQu9Cw0YAg0LHQsNGAINC10LrQtdC9LiDQldKjINCx0LDRgdGL0L3QsNC9INCx0LDRgdGC0LDQvSwg0L7QuyDQsdCw0LvQsNC00LAg0LPQtdC80L7Qs9C70L7QsdC70LjQvSDQutOp0YDRgdC10YLQutGW0YjRliDRgtOp0LzQtdC9IDkwINC00LXSo9Cz0LXQudKj0L3QtNC1LCDQvtC7INCx0ZbQt9C00LUg0LHQsNC70LDQu9Cw0YDQtNGL0qMg0LPQtdC80L7Qs9C70L7QsdC40L0gMSDQttCw0YHRgtCw0pPRiyDQsdCw0LvQsNC70LDRgNC00LAg0L3QvtGA0LzQsNC90YvSoyDQutOp0YDRgdC10YLQutGW0YjRltC90LXQvSAxMTDQvdCw0L0gINGC06nQvNC10L0g0LHQvtC70LzQsNGDINC60LXRgNC10LouINCe0Lsg0LHRltC30LTQtSDQsNC90LXQvNC40Y/Sk9CwINC606nQvNOZ0L0g0YLRg9C00YvSk9GD0Ysg0LzSr9C80LrRltC9LNGB0LXQsdC10LHRliDRiNCw0pPRi9C80LTQsNGA0LTQsCDQsdCw0LvQsNC00LAs05nQu9GB0ZbQt9C00ZbQutC60LUs0YLQtdGA0ZbQvdGW0qMg0LDSm9GI0YvQu9C00YvSk9GL0L3QsCDQttOZ0L3QtSDRgtOZ0LHQtdGC0ZbQvdGW0qMg0YLTqdC80LXQvdC00LXRg9GWINCw0L3QtdC80LjRj9C90YvSoyDRiNCw0pPRi9C80LTQsNGA0Ysg0LHQvtC70YvQvyDQutC10LvQtdC00ZYuINCQ0Lsg0LvQtdC50LrQvtGG0LjRgtGC0LXRgNC00ZbSoyDQutOp0YDRgdC10YLQutGW0YjRliA5LjMg0LTQtdKj0LPQtdC50ZYg0LHRltC30LTQtSDRgdCw0LvRi9GB0YLRi9GA0LzQsNC70Ysg0YLSr9GA0LTQtSDQvdC+0YDQvNCw0LvRjNC00ZYg0LHQvtC70YvQvyDQutC10LvQtdC00ZYuINCt0YDQuNGC0YDQvtGG0LjRgtGC0LXRgNC00ZbSoyDQutOp0YDRgdC10YLQutGW0YjRliAzLjgg0LTQtdKj0LPQtdC50ZbQvdC00LUg0pvQsNC70YvQv9GC0Ysg0LHQvtC70YvQvyDQutC10LvQtdC00ZYg0L3QtdC80LXRgdC1INC90L7RgNC80LDQtNCw0L0g0YHTmdC7INKT0LDQvdCwINGC06nQvNC10L0g0LHQvtC70YvQvyDQutC10LvQtdC00ZYg0YHQtdCx0LXQsdGWINGN0YDQuNGC0YDQvtGG0LjRgtGC0LXRgNC00ZbSoyDQvdC+0YDQvNCw0YHRiyDQsdGW0YAg0LbQsNGB0YLQsNKT0Ysg0LHQsNC70LDQu9Cw0YDQtNCwIDMuOdC00LDQvSA1LDMg0LTQtdC50ZbQvSDQsdC+0LvQsNC00YsuINCW05nQvdC1INCx0ZbQt9C00LUg0pvQsNC9INCw0L3QsNC70LjQt9C40L3QtNC10LPRliDQvtC90YvSoyDRjdGA0LjRgtGA0L7RhtC40YLRgtC10YDQtNGW0qMg0LjQvdC00LXQutGB0ZbQvdC1INC90LDQt9Cw0YAg0LDRg9C00LDRgNCw0LzRi9C3LiDQldKjINCx0LDRgdGL0L3QsNC9INCx0LDRgdGC0LDQvywg0LHRltC3INC+0L3Ri9KjINGC0q/RgSDQutOp0YDRgdC10YLQutGW0YjRliwg0L/QvtC50LrQvtC70LjRhtC40YLQvtC3INC205nQvdC1INC00LUg0LDQvdC40LfQvtGG0LjRgtC+0Lcg0LHQvtC70YPRiywg0LHRltC30LTQtSDQsNC90LXQvNC40Y/QvdGL0qMg0LHQvtC70YPRi9C90YvSoyDQsdC10LvQs9GW0LvQtdGA0ZYg0LHQvtC70YvQvyDRgtCw0LHRi9C70LDQtNGLLCDRgdC10LHQtdCx0ZYg0L7QuyDQsdCw0LvQsNC00LAg0pvQsNC9INC20LDRgdGD0YjQsNC70LDRgNGL0L3Ri9KjINC/0ZbRiNGW0L3RliDQvNC10L0g0YHQsNC90YvQvdGL0qMg06nQt9Cz0LXRgNGD0ZbQvNC10L0g0YHQuNC/0LDRgtGC0LDQu9Cw0LTRiy4g0JDQuyDQu9C40LzRhNC+0YbQuNGC0YLQtdGAINCx0ZbQt9C00LUg0LbQvtKT0LDRgNC70LDSk9Cw0L0gNjcg0L/QsNC50YvQtyDRgdC10LHQtdCx0ZYg0L7QvdGL0qMg0L3QvtGA0LzQsCDQutOp0YDRgdC10YLQutGW0YjRliA1MC02MCDQv9Cw0LnRi9C3INC00LXSo9Cz0LXQudGW0L3QtNC1INCx0L7Qu9GD0Ysg0YLQuNGW0YEg0LbTmdC90LUg0LTQtSDQvtC7INCx0ZbQt9C00LUg0LjQvNC80YPQvdC00YvSmyDQttCw0YPQsNC/INCx0LXRgNGW0L8g0LbQsNGC0YvRgCDTmdGA0YLSr9GA0LvRliDQstC40YDRg9GB0YLRi9KbINC40L3RhNC10LrRhtC40Y/Sk9CwLiDQkNC7INGB0LXQs9C80LXQvdGCINGP0LTQtdGA0LvQtdGA0ZYg0LHRltC30LTQtSDRgtOp0LzQtdC90LTQtdCz0LXQvSAyMSDQv9Cw0LnRi9C3LNC90L7RgNC80LDRgdGLIDI1INC/0LDQudGL0LfQtNCw0L0g0YLTqdC80LXQvSDQsdC+0LvQvNCw0YMg0YLQuNGW0YEsINC+0LvQtNCwINCx0ZbQt9C00LUg0LLQuNGA0YPRgdGC0YvSmyDQuNC90YTQtdC60YbQuNGP0pPQsCDSm9Cw0YDRgdGLINC20LDRg9Cw0L8g0YDQtdGC0ZbQvdC00LUg0LHQvtC70YPRiyDQvNKv0LzQutGW0L0uINCe0YHRiyDQttCw0LvQv9GLINKb0LDQvSDQsNC90LDQu9C40LfQuNC90ZbQvSDQttCw0LvQv9GL0LvQsNC5INKb0LDRgNCw0pPQsNC90LTQsCwg0LHRltC30LTQtSDQsdCw0LvQsNC00LAg05nQu9GB0ZbQt9C00LXQuiwg0YLQtdGA0ZbQvdGW0qMg0LDSm9GI0YvQu9C00YvSk9GLINC205nQvdC1INC00LUg0YLTmdCx0LXRgtGW0L3RltKjINGC06nQvNC10L3QtNC10YPRliDQttOZ0L3QtSDQtNC1INC+0L3Ri9KjINKb0LDQvSDQsNC90LDQu9C40LfQtNC10YDRliDQsdGW0LfQtNC1INCw0L3QtdC80LjRjyDQsdC+0LvRg9GL0L0g0LrTqdGA0YHQtdGC0LXQtNGWLiDQkNC7INC+0L3RiyDRgtC+0LvRi9Kb0YLQsNC5INC005nQu9C10LvQtNC10YMg0q/RiNGW0L0g0YLQsNKT0YvQtNCwINKb0L7RgdGL0LzRiNCwINC30LXRgNGC0YLQtdGD0LvQtdGAINKb0LDQttC10YIg0LXRgtC10LTRli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29" table:style-name="ce1">
            <text:p>915229</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7QldGA0YLQtSDQttCw0YHRgtCw0pPRiyDQsdCw0LvQsNC70LDRgNC00YvSoyDRgtOp0LzQtdC90LPRliDRgtGL0L3Ri9GBINCw0LvRgyDQttC+0LvQtNCw0YDRi9C90LTQsCDQtNCw0LzQuNGC0YvQvSDQsNGD0YDRg9C70LDRgCDQutC10YPQtNC1INC60YPRi9GB0YvQvdGL0L0g0LDQvdCw0YLQvtC80L4t0YTQuNC30LjQvtC70L7Qs9C40Y/Qu9GL0psg0LXRgNC10LrRiNC10LvRltC60YLQtdGA0ZbQvSDQsNC50YLQsNGC0YvQvSDQsdC+0LvRgdCw0psg0L7Qu9Cw0YAg0LXRgNC10YHQtdC6INCw0LTQsNC80LTQsNGA0pPQsCDSm9Cw0YDQsNKT0LDQvdC00LAgINGC0LDRgCDQttCw0L3QtSDQutGW0YjQutC10L3RgtCw0Lkg0LHQvtC70YvQvyAg0LrQtdC70LXQtNGLLCDQvtC70LDRgCDQsdGL0LfQtNC1INGI0YvRgNGL0YjRgtCw0YDSk9CwINC90LXQvNC10YHQtSDQsdCw0YHSm9CwINC00LAg0LHQvtCz0LTQtSDQt9Cw0YLRgtCw0YDQs9CwINCx0YvRgtC10LvRg9GLINC60LDRg9GL0L/RiyDQttC+0LPQsNGA0Ysg0LHQvtC70YvQvyDRgtCw0LHRi9C70LDQtNGLLiDQntC7INCx0ZbQt9C00LUg0LHRgNC+0L3RhdC40LDQu9GM0LTRiyDQsNGB0YLQvNCw0LPQsCDQttCw0L3QtSDQsdGA0L7QvdGF0LjQvtC70LjRgtGC0YvQvSDQtNCw0LzRg9GL0L3QsCDRgdC10LHQtdC/0LrQtdGAINCx0L7Qu9Cw0LTRiy4g06jQudGC0LrQtdC90Ysg0LHRi9C30LTQtSDRgtGL0L3Ri9GBINCw0LvRgyDQttC+0LvQtNCw0YDQtNCw0LPRiyDQsdGD0LvRiNGL0LrQtdGC0YLQtdGA0LTRi9C9INC70Y7QvNC10L3RiyDRgtCw0YAg0LHQvtC70LPQsNC90LTRi9C60YLQsNC9LCDQsdCw0LvQsNC00LAg0YLRi9C90YvRgSDQsNC70YPQtNGL0L0g0LrQuNGL0L3QtNCw0YPRiyDTmdCx0LTQtdC9INC80YPQvNC60YvQvS4g0JHQsNGB0LrQsCDQtNCwINC10YDQtdC60YjQtdC70YvQutGC0LXRgNGL0L3QtSDQutC10LvQtdGC0YvQvSDQsdC+0LvRgdCw0LosINC10YDRgtC1INC20LDRgdGC0LDQs9GLINCx0LDQu9Cw0LvQsNGA0LTQsCDRgtGL0L3Ri9GBINCw0LvRgyDQsdGD0LvRiNGL0LrQtdGC0YLQtdGA0Ysg0LbQtdGC0YvQu9C80LXQs9C10L0g0LHQvtC70YvQvyDQutC10LvQtdC00YsuINCe0L3Ri9C9INGB0LXQsdC10LHRiyDQsdCw0LvQsNC70LDRgNC00LAg0YLRi9C90YvRgSDQsNC70YMg0LDQutGC0YvRgdGL0L3QtNC10LPRliDQutC40YvQvdC00YvQutGC0LDRgNCz0LAg0LDQutC10LvQtdC00YsuINCe0YHRi9C00LDQvSDQutC10LnRi9C9INGI0YvRgNGL0YjRgtCw0YDQtNGLINGC0LDQt9Cw0YDRgtGD0LPQsCDQttCw0L3QtSDRgtGL0L3Ri9GBINCw0LvRgyDQttC+0LvQtNCw0YDRi9C90YvSoyDQttC10LvQtNC10YLRg9GL0L3Ri9KjINOZ0YDRgtKv0YDQu9GWINC60LjRi9C90LTRi9C60YLQsNGA0LPQsCDQttCw0L3QtSDQtNC1INCw0YPRgNGD0LvQsNGA0LPQsCDQsdGL0LfQtNC1INGB0LXQsdC10L/QutC10YAg0LHQvtC70LDQtNGLLiAg0JXRgNGC0LUg0LbQsNGB0YLQsNCz0Ysg0LHQsNC70LDQu9Cw0YDQtNCw0LPRiyDQtdGA0LXQutGI0LXQu9GL0LrRgtC10YDQtNGL0L0g0LHRltGA0ZYsINC+0LvQsNGA0LTRi9C9INGC0YvQvdGL0YEg0LDQu9GDINC20LjRltC70ZbQs9GWINC10YDQtdGB0LXQuiDQsNC00LDQvNC00LDRgNCz0LAg0LrQsNGA0LDQs9Cw0L3QtNCwINC20L7Qs9Cw0YDRiyDQsdC+0LvRi9C/INC60LXQu9C10LTRiyDQttCw0L3QtSDRgtGL0L3Ri9GBINCw0LvRgyDQsNGD0YDRg9C70LDRgNCz0LAg0LHQuNGL0Lwg0LHQvtC70LDQtNGLLiDQodC10LHQtdCx0YvQvSDQsNC50YLQsNGC0YvQvSDQsdC+0LvRgdCw0Log0LHQsNC70LDQu9Cw0YDQtNCwINC80LXRgtCw0LHQvtC70LjQt9C8INCw0LrRgtC40LLRgtGW0LvRltCz0ZYg0LbQvtCz0LDRgNGLINCx0L7Qu9Cz0LDQvdC90LDQvS4g0JHQsNC70LDQu9Cw0YDQtNCw0LPRiyDRgtCw0LPRiyDQtNCwINCx0YvRgCDQtdGA0LXQutGI0LXQu9GL0LrRgtC10YDRi9C9INCw0LnRgtGB0LDQuiDQsdCw0LvQsNC70LDRgNC00LAg0LjQvNC80YPQvdC00YvQuiDQttGD0LnQtSDQsNCy0YLQuNCy0YLRiyDRgtGD0YDQtNC1INC00LDQvNGDINGB0LDRgtGL0YHRi9C90LTQsNCz0Ysg0LrQtdC30LXQs9GL0L3QtNC1INCx0L7Qu9Cz0LDQvdC90LDQvSDQutC10LnRi9C9LCDQvtC7INC10YDRgtC1INC20LDRgdGC0LDQs9GLINCx0LDQu9Cw0LvQsNGA0LTRi9C9INC40L3RhNC10LrRhtC40Y/Qu9Cw0YDQs9CwINCx0LjRltC8INCx0L7Qu9Cw0LTRiywg05nRgdGW0YDQtdGB0LUg0YLQvtC80LXQvdCz0Ysg0YLRi9C90YvRgSDQsNC70YMg0LbQvtC70LTQsNGA0YvQvdC00LDQs9GLINC/0L3QtdCy0LzQvtC90LjRjyDQvNC10L0g0LbQsNC90LUg0LTQtSDQsdGA0L7QvdGF0LjRgtGC0LXRgNCz0LUg0YLTqdC30ZbQvNGB0ZbQtyDQsdC+0LvRi9C/INC60LXQu9C10LTRli48YnIgLz4NCjIuINCh0YPRgNCw0LrRgtGLINC60LDRgNCw0YHRgtGL0YDQsNGC0YvQvSDQsdC+0LvRgdCw0Log0LHRi9C30LTQtSAxINC20LDRgdGC0LDQs9GLINCx0LDQu9Cw0L3Ri9C9INC60LDQvSDQsNC90LDQu9C40LfQtNC10YDRiyDQvdC+0YDQvNCw0LTQsCDQtdC80LXRgSDQtdC60LXQvdGL0L0g0LHQsNC50LrQsNGB0LDQuiDQsdC+0LvQsNC00YsuINCT0LXQvNC+0LPQu9C+0LHQuNC9INC60L7RgNGB0LXRgtC60YvRiNGLINGC06nQvNC10L0sICDQvtC7INCx0ZbQt9C00LUg0LHQsNC70LDQu9Cw0YDQtNGL0L0g0LPQtdC80L7Qs9C70L7QsdC40L0gMSDQttCw0YHRgtCw0LPRiyDQsdCw0LvQsNC70LDRgNC00LAg0L3QvtGA0LzQsNC90YvQvSDQutC+0YDRgdC10YLQutGL0YjRiyDQvtC7IDEyMC0xMTAg0YLQvtC80LXQvSDQsdC+0LvQvNCw0YPRiyDQutC10YDQtdC6LiDQldCz0LXRgCDRgtOp0LzQtdC9INCx0L7Qu9GB0LAg0LDQvdC10LzQuNGPINCx0LDRgNGL0L3QsCDQutKv0LzTmdC90LTQsNC90LDQvNGL0LcsINGB0LXQsdC10LHRiyAg0YjQsNCz0YvQvNC00LDRgNC00LAgINCx0LDQu9Cw0LTQsCwg0LDQu9GB0YvQt9C00YvQuiwg0YLQtdGA0YvRgdGL0L3Ri9C9INCw0LrRiNGL0LvQtNGL0LPRi9C90LAsINGC0LDQsdC10YLRltC90ZbSoyDRgtC+0LzQtdC90LTQtdCz0YvQvdGLINCw0L3QtdC80LjRj9C90YvQvSDQv9GA0LjQt9C90LDQutGC0LDRgNGLINCx0L7Qu9GL0L8g0YLQsNCx0YvQu9Cw0LTRiy4g0JvQtdC50LrQvtGG0LjRgiDQutC+0YDRgdC10YLQutGL0YjRiyDQsdGL0LfQtNC1INKb0LDQu9GL0L/RgtGLLCDRjdGA0LjRgtGA0L7RhtC40YLRgtGC0LXRgCDQutOp0YDRgdC10YLQutGW0YjRltC00LUg0L3QvtGA0LzQsNC00LDQvSDQutGW0YjQutC10L3QtSDSk9Cw0L3QsCDRgtOp0LzQtdC9LNC90L7RgNC80LDQtNCwINC+0LsgMyw5LTUsMyDQsNGA0LDQu9GL0LPRi9C90LTQsCDQsdC+0LvQsNC00Yss0YHQvtC7INCx0ZbQtyDSm9Cw0L0g0LDQvdCw0LvQuNC30YvQvdC00LUg0Y3RgNC40YLRgNC+0YbQuNGC0YLQtdGAINC60L7RgNGB0LXRgtC60YvRiNGL0L3QtSDQvdCw0LfQsNGAINCw0YPQtNCw0YDRg9C80YvQtyDQutCw0LbQtdGCLiDQmtC10LnRi9C90L3QtdC9INGC0YPRgSDQutC+0YDRgdC10YLQutGL0YjRi9C90LTQtSwg0L/QvtC50LrQuNC70L7RhtC40YLQvtC3INC20LDQvdC1INCw0L3QuNC30L7RhtC40YLQvtC30YLRi9C9INCx0L7Qu9GD0Ysg0LHRltC30LTQtSDQsNC90LXQvNC40Y/QvdGL0L0g0LHQvtC70YPRi9C90YvQvSDQsdC10LvQs9GL0LvQtdGA0Ysg0LHQvtC70YvQvyDRgtCw0LHRi9C70LDQtNGLLiDQodC10LHQtdCx0Ysg0L7QuyDQsdCw0LvQsNC00LAg0LrQsNC9INC20LDRgdGD0YjQsNC70LDRgNGL0L3Ri9C9INC/0ZbRiNGW0L3RliDQvNC10L0g0YHQsNC90YvQvdGL0L0g06nQt9Cz0LXRgNGD0ZbQvNC10L0g0YHQuNC/0LDRgtGC0LDQu9Cw0LTRiy4g0JvQuNC80YTQvtGG0LjRgtGC0LXRgCDQsdGL0LfQtNC1INC20L7Qs9Cw0YDRiywg0L3QvtGA0LzQsNC00LAgNTAtNjAg0L/RgNC+0YbQtdC90YIg0LDRgNCw0LvRi9Cz0YvQvdC00LAg0LHQvtC70YPRiyDQutC10YDQtdC6INC20LDQvdC1INC00LUg0L7QuyDQsdGL0LfQtNC1INC40LzQvNGD0L3QtNGL0Log0LbQsNGD0LDQvyDQsNGA0YLRg9GA0LvRiyDQuNC90YTQuNC10LrRhtC40Y/Qu9Cw0YAg0LzQtdC9INCy0LjRgNGD0YHRgtCw0YDQs9CwLiDQodC10LPQvNC10L3RgiDRj9C00YDQvtC70YsgMjEg0L/RgNC+0YbQtdC90YIg0YLQvtC80LXQvSwg0L3QvtGA0LzQsNC00LAgMjUg0L/RgNC+0YbQtdC90YLRgtC10L0g0YLQvtC80LXQvSDQsdC+0LvQvNCw0YPRiyDQutC10YDQtdC6L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екі сұрақтың да жауабы толық ашылып жазылмаған. кеуде қуысының қандай анатомо-физиологиялық ерекшеліктері толық емес. 2-ші сұрақта анемия дәрежесі көрсетілмеген</text:p>
          </table:table-cell>
          <table:table-cell office:value-type="float" office:value="0" table:style-name="ce1">
            <text:p>0</text:p>
          </table:table-cell>
          <table:table-cell table:number-columns-repeated="16376"/>
        </table:table-row>
        <table:table-row table:style-name="ro1">
          <table:table-cell office:value-type="float" office:value="915309" table:style-name="ce1">
            <text:p>915309</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kgRdGA0YLQtSDQttCw0YHRgtCw0pPRiyDQsdCw0LvQsNC70LDRgNC00YvSoyDQutC10YPQtNC1INC60YPRi9GB0YvQvdGL0qMg0LXRgNC10LrRiNC10LvRltCz0ZY6INC20LDQu9C/0Ysg0LrQtdGD0LTQtSDQutGD0YvRgdGL0L3Ri9C9INGG0LjQu9C40L3QtNGAINC/0ZbRiNGW0L3QtNGWINCx0L7Qu9GD0Ysg0Y/Sk9C90Lgg0LrQtdGD0LTQtSDQutGD0YvRgdGL0L3Ri9C9INC20LDQu9C/0LDQuiDQsdC+0LvRi9C/INC+0YDQvdCw0LvQsNGB0YPRiyAg0LbTmdC90LUg0LrQsNCx0YvRgNKT0LDQu9Cw0YDRi9C90YvSoyDQutOp0LvQtNC10L3QtdC9INC+0YDQvdCw0LvQsNGB0YPRi9C90LDQvSDTqdC60L/QtdC90ZbQvSDRgtC+0LvRi9C6INC60LXRgNGW0LvQtSDQsNC70LzQsNGD0YvQvSAg0LTQuNCw0YTRgNCw0LPQvNCwINC20L7Sk9Cw0YDRiyDQvtGA0L3QsNC70LDRgdGD0YvQvSDQsdCw0LnQutCw0LnQvNGL0Lcg0L7QuyDQtdGA0YLQtSDQttCw0YHRgtCw0LPRiyDQsdCw0LvQsNC70LDRgNC00LAg0LTQuNCw0YTRgNCw0LPQvNCw0LvRi9C6INGC0YvQvdGL0YHRgtGL0L0g0LHQsNGB0YvQvCDQsdC+0LvRg9GL0L0g0LbTmdC90LUg06nQutC/0LXQvdGW0L0g0YLQvtC70YvQuiDQttC10LvQtNC10L3QtSDQsNC70LzQsNGD0YvQvdCwINOZ0LrQtdC70LXQtNGWINCx0rHQvdGLINCx0ZbQtyDQsdCw0LvQsNC90YvQvSAg0LbQuNGWINGC0YvQvdGL0YEg0LDQu9GD0YvQvdCw0L0g0LHQsNC50LrQsNC50LzRi9C3ICAg0LbTmdC90LUg0L7RgdGL0pPRi9C9INCx0LDQudC70LDQvdGL0YHRgtGLINC10YDRgtC1INC20LDRgdGC0LDSk9GLINCx0LDQu9Cw0LvQsNGA0LTQsCDTqdC60L/QtdC90ZbQvSDQttC10LvQtNC10L3Rg9GWINC80LXQvSDRgNC10LfQtdGA0LLRgtGWINCw0YPQsCDQutOp0LvQtdC80ZbQvdGW0L0g0LDQtyDQsdC+0LvQsNGC0YvQvdC00YvSk9GL0L0g0LHQsNC50LrQsNC50LzRi9C3INGP0pPQvdC4INCx0rHQuyDQtdGA0LXQutGI0LXQu9GW0LrRgtC10YAg0LrQvtC30pPQsNC70YvRgSDQutOp0LvQtdC80ZbQvSDRiNC10LrRgtC10LnQtNGWINC905nRgtC40LbQtdGB0ZbQvdC00LUg06nQutC/0LXQvdGW0L0g0YLRi9C90YvRgSDQsNC70YMg0LrQvtGA0Ysg0LDQt9Cw0Y/QtNGLINC+0YHRiyDQtdGA0LXQutGI0LXQu9GW0LrRgtC10YDQs9C1ICDQsdCw0LnQu9Cw0L3Ri9GB0YLRiyDRgtOp0LzQtdC90LPRliDRgtGL0L3Ri9GBINCw0LvRgyDQttC+0LvRi9C90YvQvSDQsNGD0YDRg9C70LDRgNGL0L3Ri9C9INC00LDQvNGD0YvQvdCwINC60L7Qu9Cw0LnQu9GLINC20LDSk9C00LDQuSDRgtGD0LDQtNGLINC+0YHRi9KT0LDQvSDQsdCw0LnQu9Cw0L3Ri9GB0YLRiyDQtdGA0YLQtSDQttCw0YHRgtCw0pPRiyDQsdCw0LvQsCDQvtGA0LPQsNC90LjQt9C80ZbQvdC00LUg0LDQu9GM0LLQtdC+0LvRj9GA0LvRiyDQs9C40L/QvtCy0LXQvdGC0LjQu9GP0YbQuNGP0L3RiyDQttOZ0L3QtSDQttC40ZYg0LjQvdGC0L7QutGB0LjQutCw0YbQuNGP0L3RiyDQsdCw0LnQutCw0LnQvNGL0Lcg0LbTmdC90LUg0LXRgNGC0LUg0LbQsNGB0YLQsNKT0Ysg0LHQsNC70LDQu9Cw0YDQtNCwINGC0YvQvdGL0YEg0LDQu9GDINC20L7Qu9C00LDRgNGL0L3Ri9C9INGC0LDRgCDQsdC+0LvRg9GL0L3QsCDQsdCw0LnQu9Cw0L3Ri9GB0YLRiyDQvtC7INCw0YPQsNC90YvQvSDTqdGC0YPRltC90LUg0LrQtdC00LXRgNCz0ZYg0LrQtdC70YLRltGA0YPRltC9INC205nQvdC1INGC0rHRgNC70ZYg0LHRgNC+0L3RhSDQvtCx0YHRgtGA0YPQutGG0LjRj9KT0LAg05nQutC10LvQtdC00ZYg0Y/Sk9C90Lgg0YjRi9GA0YvRiNC/0LXQvSDQvdC10LzQtdGB0LUg0LHTqdCz0LTQtSDQt9Cw0YLRgtCw0YDQvNC10L0g0LHRltGC0LXQu9GD0ZbQvdC1ICDQttOZ0L3QtSDTqdC60L/QtSDRgtGW0L3RltC90ZbQvSDQuNC60LXQvNC00ZbQu9GW0LPRltC90ZbQvSDRgtOp0LzQtdC90LTRltCz0ZYg0Y/Sk9C90Lgg0LDQu9GM0LLQtdC+0LvQsNC70LDRgNC00YvQvSDRgtC+0LvRi9C6INC00LDQvNGL0LzQsNGD0YvQvdCw0L0g0LPQsNC3INCw0LvQvNCw0YHRg9GL0L3Ri9C9INC90LDRiNCw0YAg0LXQutC10L3RltC9INCx0LDQudC60LDQudC80YvQtyAsINCx0LDQu9Cw0LvQsNGA0LTQsCDRgtGL0L3Ri9GBINCw0LvRgyDQsdKx0LvRiNGL0psg0LXRgtGC0LXRgNGW0L3RltC9INOZ0LvRgdGW0Lcg0LHQvtC70YPRi9C90LAg0LHQsNC50LvQsNC90YvRgdGC0Ysg0YLRi9C90YvRgSDQsNC70YMg0LrQuNGL0L3QtNCw0LnRgtGL0L3Ri9C9INCx0LDQudC60LDQudC80YvQtyAg0pvQvtGA0YvRgtGL0L3QtNGL0LvQsNC5INC60LXQu9C1INC+0YHRiyDQtdGA0LXQutGI0LXQu9GW0LrRgtC10YAg0LXRgNGC0LUg0LbQsNGB0YLQsNKT0Ysg0LHQsNC70LDQu9Cw0YDQtNCwINOp0LrQv9C1INCy0LXQvdGC0LjQu9GP0YbQuNGP0YHRi9C90YvQvSDRgtOp0LzQtdC90LTRltCz0ZbQvSDQutOp0YDRgdC10YLQtdC00ZYg0LbTmdC90LUg0YLTqdC80LXQvdCz0ZYg0YLRi9C90YvRgSDQsNC70YMg0LbQvtC70LTQsNGA0YvQvdGL0L0g0LDRg9GA0YPQu9Cw0YDRi9C90LAg05nQutC10LvQtdC00ZYgLiAgICAyKSDQkdGW0YAg0LbQsNGB0YLQsNKT0Ysg0LHQsNC70LAg0LDQvdCw0YHRi9C80LXQvSDQutCw0LHRi9C70LTQsNGD0LTQsCDQttCw0LvQv9GLINC60LDQvSDQsNC90LDQu9C40LfRltC90LXQvSDQsdGW0Lcg0LPQtdC80L7Qs9C70L7QsdC40L0gKGhiKSDQtNC10L3Qs9C10LnRltC90ZbQvSDRgtOp0LzQtdC90LTRltCz0ZbQvSDRj9KT0L3QuCDQsdKx0Lsg0LHQsNC70LDQtNCwINCw0L3QtdC80LjRj9C90YvQvSDQsdC+0LvRg9GLINC80q/QvNC60ZbQvdC00ZbQs9GW0L0g0LrTqdGA0YHQtdGC0LXQtNGWINCw0Lsg0LDQvdC10LzQuNGPINOZ0LvRgdGW0LfQtNGW0LrQutC1LCDRgtC10YDRliDQsdC+0LfQsNGA0YPRi9C90LAg0LbTmdC90LUg0YLTmdCx0LXRgtGC0ZbQvSDRgtOp0LzQtdC90LTQtdGD0ZbQvdC1INOZ0LrQtdC70LXQtNGWINCx0ZbRgNCw0psg0pvQsNC9INCw0L3QsNC70LjQt9GW0L3QtdC9INCx0ZbQtyDQs9C10LzQvtCz0LvQsNCx0LjQvSDQkCDQvdC10LzQtdGB0LUgRiDQutOp0YDRgdC10YLRltC70LzQtdCz0LXQvdC00ZbQs9GW0L0g0LHQsNC50LrQsNC50LzRi9C3INCw0Lsg0LHQsNC70LAg0L7RgNCz0LDQvdC40LfQvNGW0L3QtNC1INC+0YLRgtC10LPRltCz0LUg0rHQutGB0LDRgSDQs9C10LzQvtCz0LvQvtCx0LjQvSBGINC606nQvyDQsdC+0LvQsNGC0YvQvdC00YvSk9GL0L0g0LHRltC70LXQvNGW0Lcg0LbTmdC90LUg0LvQtdC50LrQvtGG0LjRgtGC0LXRgCDRj9KT0L3QuCDQsNC6INC60LDQvSDQttCw0YHRg9GI0LDQu9Cw0YDRi9C90YvQvSDRgdCw0L3RiyDQutCw0LvRi9C/0YLRiyDQtNC40LDQv9Cw0LfQvtC90LTQsCDQtdC60LXQvdGW0L0g0LHQsNC50LrQsNC50LzRi9C3ICDQvtC00LDQvSDQsdOp0LvQtdC6INGN0YDQuNGC0YDQvtGG0LjRgtGC0LXRgNC00ZbQvSDRj9Cz0L3QuCDQutGL0LfRi9C7INC60LDQvSDQttCw0YHRg9GI0LDQu9Cw0YDRi9C90YvQvSDQvdC+0YDQvNCw0LTQsCDQtdC60LXQvdC00ZbQs9GW0L0g0LHQsNC50LrQsNC50LzRi9C3ICAsINGC0q/RgSDQutOp0YDRgdC10YLQutGW0YjRltC90ZbQvSDTmdC00LXRgtGC0LXQs9GW0LTQtdC9INGP0pPQvdC4INC90L7RgNC80LDQtNCw0L0g0YLTqdC80LXQvdC00ZbQs9GW0L0g0LHQsNC50LrQsNC50LzRi9C3INC205nQvdC1INGN0L7Qt9C40L3QvtGE0LjQu9C00LXRgNC00ZbQvSDRgdCw0L3Ri9C90YvQvSDRgtOp0LzQtdC90LTRltCz0ZbQvSDRj9KT0L3QuCDQsdCw0LvQsCDQvtGA0LPQsNC90LjQt9C80ZbQvdC00LUgINGN0L7Qt9C40L3QvtGE0LjQu9C40Y/QvdGLINC205nQvdC1INCx0LDQu9CwINC+0YDQs9Cw0L3QuNC30LzRltC90LTQtSDQsNC90LjQt9C+0YbQuNGC0L7Qt9C00YvSoyDQvtKjINC205nQvdC1INC/0L7QudC60LjQu9C+0YbQuNGC0L7Qt9C00YvQvSDQvtC9INC10LrQtdC90LTRltCz0ZbQvSDQsdCw0LnQutCw0LnQvNGL0Lcg0Y/Sk9C90Lgg0Y3RgNC40YLRgNC+0YbQuNGC0YLQtdGA0ZYg05nRgNGC0q/RgNC70ZYg0LrTqdC70LXQvNC00LUg0Y/Sk9C90Lgg0YTQvtGA0LzQsNGB0YvQvdGL0L0g05nRgNGC0q/RgNC70ZYg0LXQutC10L3RltC9INC606nRgNC10LzRltC3INC+0YHRi9KT0YvQvSDQsdCw0LnQu9Cw0L3Ri9GB0YLRiyDQsNC90LDRgdGL0L3QtNCwINGC0rHQutGL0Lwg0LrRg9Cw0LvQsNC50YLRi9C9INCw0L3QtdC80LjRjyDRgtKv0YDRltC90ZbQvSDQsdCw0YAg0L3QtdC80LXRgdC1ICDQttC+0LPRi9C9INCw0L3Ri9C60YLQsNC/INCw0LvRg9GL0LzRi9C3INC60LXRgNC10LogINC205nQvdC1INC70LjQvNGE0L7RhtC40YIg0YHQsNC90YvQvdGL0L0g06nRgtC1INC20L7Sk9Cw0YDRiyDQtdC60LXQvdC00ZbQs9GW0L0g0LHQsNC50LrQsNC50LzRi9C3INC+0Lsg0LHQsNC70LDQvdGL0L0g0LLQuNGA0YPRgdGC0YvQuiDQuNC90YTQtdC60YbQuNGPINC20rHQutGC0YvRgNGD0Ysg0LzSr9C80LrRltC9INC10LrQtdC90ZbQvSDQutOp0YDRgdC10YLQtdC00ZYg0LbTmdC90LUg0L3QsNC50YLRgNC+0YTQuNC70LTQtdGA0LTRltC9INC+0L3Ri9C9INGW0YjRltC90LTQtSDRgdC10LPQvNC10L3RgiDRj9C00YDQvtC70Ysg0L3QtdC50YLRgNC+0YTQuNC70LTQtdGA0LTRltC9INCw0Lcg0LXQutC10L3QtNGW0LPRltC9INCx0LDQudC60LDQudC80YvQtyDQttOZ0L3QtSDQsdCw0LvQsNC00LAg0Y3RgtC2INC90L7RgNC80LDQtNCwINGP0qPQvdC4INGN0YDQuNGC0YDQvtGG0LjRgtGC0LXRgNC00ZbQvSDRgtKx0L3RgyDQttGL0LvQtNCw0LzQtNGL0pPRiyDQutCw0LvRi9C/0YLRiyAsINC60LDQvSDQsNC90LDQu9C40LfRltC90LXQvSDQsdOp0LvQtdC6INGI0LDQs9GL0LzQtNCw0YDRi9C90LAg0LrQtdC70LXRgtGW0L0g0LHQvtC70YHQsNC6INCx0LDQu9CwINOZ0LvRgdGW0LfQtNGW0LrQutC1ICwg0YLQtdGA0ZYg0LDQutGI0YvQu9C00YvSk9GL0L3QsCDQttOZ0L3QtSDRgtOZ0LHQtdGC0ZbQvdGW0L0g0YLTqdC80LXQvdC00ZbQs9GW0L3QtSDRiNCw0pPRi9C80LTQsNC90LTRiyDQsdKx0Lsg0L7RgNCz0LDQvdC40LfQvNC00LXQs9GWINC+0YLRgtC10LPRliDRgtCw0YHRi9C80LDQu9GL0L3Ri9C9INC00rHRgNGL0YEg0LbSr9GA0LzQtdGD0ZbQvdGW0L0g0YHQsNC70LTQsNGA0YvQvdCw0L0g0LHQvtC70YPRiyDQvNKv0LzQutGW0L0g0Y/Qs9C90Lgg0L7RgtGC0LXQs9GWINC+0YDQs9Cw0L3QuNC30LzQtNC1INC00rHRgNGL0YEg0YLQsNGB0YvQvNCw0LvQtNCw0L3QsdCw0YHQsCDQvtC7INGI0LXRgtC60LXRgNGWINGC0ZbQvdCz0LUg0L7RgtGC0LXQs9GW0L3RltC9INCx0LDRgNC80LDRg9GL0L3QsCDRgdC+0L3Ri9C9INOZ0YHQtdGA0ZbQvdC10L0g0YLQtdGA0ZbQvdGW0L0g0LDQutGI0YvQu9C00LDQvdGD0L3QsCDTmdC60LXQu9C10LTRliDQttOZ0L3QtSDRjdC90LXRgNCz0LjRjyDQtNKx0YDRi9GBINGC0q/Qt9GW0LvQvNC10LnQtNGWINC205nQvdC1INC+0Lsg0L7RgNCz0LDQvdC40LfQvCDTmdC70YHRltC30LTRltCz0ZbQvdC1INOZ0LrQtdC70LXQtNGWINCw0Lsg0L7RgtGC0LXQs9GW0L3RltC9INGC0LDRgdGL0LzQsNC70LTQsNC90YPRi9C9INCz0LXQvNC+0LPQu9Cw0LHQuNC9INC60LDQvNGC0LDQvNCw0YHRi9C3INC10YLQtdC00ZYuINKa0L7RgNGL0YLRi9C90LTRi9C70LDQuSDQutC10LvQtSDQsdKx0Lsg0pvQsNC9INCw0L3QsNC70LjQt9GW0L3QtdC9INCx0LDQu9Cw0LTQsCDQsNC90LXQvNC40Y/QvdGL0L0g0LHQsNGA0YvQvSDQttOZ0L3QtSDQstC40YDRg9GB0YLRi9KbINC40L3RhNC10LrRhtC40Y/QvdGLINC20rHQutGC0YvRgNCz0LDQvdGL0L0g0LHQsNC50LrQsNC50LzRi9C3INC+0YHRi9KT0LDQvSDQsdCw0LnQu9Cw0L3Ri9GB0YLRiyDQsdCw0LvQsNC00LAg0pvQsNC90LTQsNC5INCw0L3QtdC80LjRjyDQtdC60LXQvdGW0L0g0LDQvdGL0LrRgtCw0L8g0L7Sk9Cw0L0g0YHQsNC5INC10LzQtNC10LvRgyDTmdC00ZbRgdGC0LXRgNGW0L0g0rHRgdGL0L3RgyDSm9Cw0LbQtdGCLiAgICAgPGJyIC8+DQo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Екі сұрақтың жауабы толық емес,2-ші сұрақ жауабында қате пікі- қан анализінен біз гемоглабин А немесе F көрсетілмегендігін байкаймыз.</text:p>
          </table:table-cell>
          <table:table-cell office:value-type="float" office:value="0" table:style-name="ce1">
            <text:p>0</text:p>
          </table:table-cell>
          <table:table-cell table:number-columns-repeated="16376"/>
        </table:table-row>
        <table:table-row table:style-name="ro1">
          <table:table-cell office:value-type="float" office:value="1066838" table:style-name="ce1">
            <text:p>1066838</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4gICDQltCw0LvQv9GLINC60ZbRiNC60LXQvdGC0LDQuSDQtdGA0YLQtSDQttCw0YHRgtCw0pPRiyDQsdCw0LvQsNC70LDRgNC00LAg0YLRi9C90YvRgSDQsNC70YMg0LbQvtC70LTQsNGA0Ysg0LXRgNC10YHQtdC60YLQtdGA0LTRltC60ZbQvdC1INKb0LDRgNCw0pPQsNC90LTQsCDTqdC30LPQtdGI0LXQu9C10YMg0LHQvtC70YvQvyDQutC10LvQtdC00ZYuINCd0LXQs9GW0LfRltC90LXQvSDRgtGL0L3Ri9GBINCw0LvRgyDQttC+0pPQsNGA0pPRiyDQttOZ0L3QtSDRgtOp0LzQtdC90LPRliDQsdC+0LvRi9C/INC20ZbQutGC0LXQu9C10LTRli4g0JbQvtKT0LDRgNKT0Ysg0LbQvtC70LTQsNGA0pPQsCDQvNKx0YDRi9C90L3QsNC9INCx0LDRgdGC0LDQvyDQttKx0YLSm9GL0L3RiNCw0pssINCx0YDQvtC90YXRgtCw0YAg0LbQsNGC0LDRgtGL0L0g0LHQvtC70YHQsCwg0LDQuyDRgtOp0LzQtdC90LPRliDRgtGL0L3Ri9GBINC20L7Qu9C00LDRgNGLINOp0LrQv9C1INC205nQvdC1INCw0LvRjNCy0LXQvtC70LDQu9C70LDRgCDQttCw0YLQsNGC0YvQvSDQsdC+0LvRi9C/INC60LXQu9C10LTRli4g0JbQsNC70L/RiyDQsNC70pPQsNC90LTQsCDQtdGA0YLQtSDQttCw0YHRgtCw0pPRiyDQsdCw0LvQsNC70LDRgNC00LAg0LrQtdGD0LTQtSDSm9GD0YvRgdGLINC905nQt9GW0Log0LbTmdC90LUg0YHQtdGA0L/RltC80LTRliDQsdC+0LvRi9C/INC60LXQu9C10LTRli4g0KHQvtKT0LDQvSDQsdCw0LnQu9Cw0L3Ri9GB0YLRiyDQsdCw0LvQsNC90YvSoyDRgtGL0L3Ri9GBINC20L7Qu9C00LDRgNGL0L0g0YLQtdC60YHQtdGA0YMg0LrQtdC30ZbQvdC00LUg0LrTqdC/0YLQtdCz0LXQvSDQtdGA0LXQutGI0LXQu9GW0LrRgtC10YAg0LHQsNGAINCx0L7Qu9GL0L8g0LrQtdC70LXQtNGWLiDQnNOZ0YHQtdC70LXQvSDQtdGA0YLQtSDQttCw0YHRgtCw0pPRiyDRj9KT0L3QuCAxLTMg0LbQsNGBINCw0YDQsNC70YvSk9GL0L3QtNCw0pPRiyDQsdCw0LvQsNC70LDRgNC00LAg0L/QsNC70YzQv9Cw0YbQuNGPINC205nQvdC1INC/0LXRgNC60YPRgdGB0LjRjyDQttCw0YHQsNKT0LDQvSDQutC10LfQtNC10YDQtNC1INOZ0LvRgdGW0Lcg0YHQvtKb0pvRi9C70LDRgyDQsNGA0pvRi9C70Ysg0pPQsNC90LAg0YLQtdC60YHQtdGA0LXRgtGW0L0g0LHQvtC70YvQvyDRgtCw0LHRi9C70LDQtNGLLiDQldKjINCw0LvQtNGL0LzQtdC9INC20LDRgSDQsdCw0LvQsNC70LDRgNC00YvSoyDQutC10YPQttC1INKb0YPRi9GB0YvQvdGL0qMg0LDQvdCw0YLQvtC80LjRj9C70YvSmyDQtdGA0LXQutGI0LXQu9GW0LrRgtC10YDRltC90LUg0YLQvtKb0YLQsNC70LDRgCDQsdC+0LvRgdCw0LwuINKa0LDQsdGL0YDSk9CwINGC0L7RgNC70LDRgNGLINC20rHQvNGB0LDSmywg0LbTmdC90LUg0LjQutC10LzQtNGWINCx0L7Qu9GL0L8g0LrQtdC70LXQtNGWINC10LrQtdC9LiDQodC10LHQtdCx0ZYg0YjQtdC80ZbRgNGI0LXQutGC0ZbSoyDTmdC70ZYg0YLQvtC70YvSmyDQttC10YLRltC70LzQtdCz0LXQvSDQsdC+0LvRi9C/INC60LXQu9C10LTRli4g0JHSsdC7INOp0LrQv9C10L3RltKjINGC0L7Qu9GL0psg0LbTmdC90LUg0YLQtdGA0LXSoyDRgtGL0L3Ri9GBINCw0LvRg9GL0L3QsCDQutC10LTQtdGA0LPRliDQutC10LvRgtGW0YDQtdGC0ZbQvSDQsdC+0LvRi9C/INGC0LDQsdGL0LvQsNC00YsuINCh0L7Qu9Cw0LnRiNCwINC10YDRgtC1INC20LDRgdGC0LDSk9GLINCx0LDQu9Cw0LvQsNGA0LTQsCDRgtGL0L3Ri9GBINCw0LvRgyDRgtC40ZbQvNC00ZbQu9GW0LPRltC9INGC06nQvNC10L3QtNC10YLQtdC00ZYsINCh0L7QvdGL0LzQtdC9INKb0LDRgtCw0YAg0LzQtdC90ZbSoyDQvtC50YvQvNGI0LAg0LXRgNGC0LUg0LbQsNGB0YLQsNKT0Ysg0LHQsNC70LDQu9Cw0YDQtNCwINC00LjQsNCz0YTRgNCw0LPQvNCw0LTQsCDQtdGA0LXQutGI0LXQu9GW0Log0LHQsNGAINCx0L7Qu9Cw0LTRiy4g0J7Qu9Cw0YDQtNCwINC90LXQs9GW0LfQs9GWINGC0YvQvdGL0YEg0LDQu9GD0YvQsCDQtNC40LDRhNGA0LDQs9C80LAg0LHQvtC70YvQvyDQutC10LvQtdC00ZYsINGB0LXQsdC10LHRliDSm9Cw0LHRi9GA0pPQsCDQsNGA0LDQu9GL0psg0LHSsdC70YjRi9Kb0LXRgtGC0LXRgNGWINOZ0LvRgdGW0Lcg0LHQvtC70YvQvyDQutC10LvQtdC00ZYuINCV0LPQtdGAINCx0rHQuyDRhNGD0L3QutGG0LjRjyDQsdKx0LfRi9C70LDRgtGL0L0g0LHQvtC70YHQsCDQvtC90LTQsCDRgtGL0L3Ri9GBINCw0LvRgyDQttC10YLQutGW0LvRltC60YHRltC30LTRltCz0ZbQvdC1INCw0LvRi9C/INC60LXQu9GD0ZYg0LzSr9C80LrRltC9LiDQodC+0L3Ri9C80LXQvSDSm9Cw0YLQsNGAINCx0YDQvtC90YXRgtCw0YDQvNC10L0g0LHRgNC+0L3RhdC40L7Qu9Cw0LvQsNGA0LTRi9KjINC00LjQsNC80LXRgtGA0ZYg0YLQsNGAINCx0L7Qu9GL0L8g0LrQtdC70LXQtNGWLiDQkdKx0Lsg0LrQtdC3INC60LXQu9Cz0LXQvSDSm9Cw0LHRi9C90YPSk9CwINCx0LDQu9Cw0L3RiyDQsdC40ZbQvCDQtdGC0LXQtNGWINGB0LXQsdC10LHRliDTqdGC0LXRgtGW0L0g0LDRg9CwINCw0pPRi9C80Ysg0YLQsNGAINCx0L7Qu9GL0L8g0LrQtdC70LXQtNGWLiDQldGA0YLQtSDQttCw0YHRgtCw0pPRiyDQsdCw0LvQsNC70LDRgNC00LAg0LDQu9GM0LLQtdC+0LvQsNC70LDQu9GAINGB0LDQvdGLINCw0Lcg0LHQvtC70YvQvyDQutC10LvQtdC00ZYuINCR0rHQuyDQsdCw0LvQsNC70LDRgNC00YvSoyDTqdC60L/QtdGB0ZbQvdGW0qMg0LPQsNC3INCw0LvQvNCw0YHRgyDQsdC10YLRltC9INC60ZbRiNGW0YDQtdC50YLRltC/LCDQs9C40L/QvtC60YHQuNGP0pPQsCDQsdC10LnRltC80LTRltC70ZbQutGC0ZYg0LDRgNGC0YLRi9GA0LDRgtGL0L0g0LHQvtC70YvQvyDRgtCw0LHRi9C70LDQtNGLLiDQntGB0YvQvdC00LDQuSDQsdCw0LvQsNC70LDRgNC00Ysg0LDQvdCw0YLQvtC80LjRj9C70YvSmyDQtdGA0LXQutGI0LXQu9GW0LrRgtC10YAg0LHQsNGAINC10YDQtdGB0LXQutGC0LXRgNCz0LUg0pvQsNGA0LDSk9Cw0L3QtNCwLiDQkNC7INC10L3QtNGWINCx0LDQu9Cw0LvQsNGA0LTQsNKT0Ysg0YTQuNC30LjQvtC70L7Qs9C40Y/Qu9GL0psg0LXRgNC10LrRiNC10LvRltC60YLQtdGA0ZbQvdC1INC60LXQu9C10YAg0LHQvtC70YHQsNC8INC20LDRgSDQsdCw0LvQsNC70LDRgNC00LAg0YLRi9C90YvRgSDQsNC70YMg0LbQuNC10LvRltCz0ZYg0LbQvtKT0LDRgNGLLCDTqdC50YLQutC10L3RliDTqdC60L/QtSDQutOp0LvQtdC80ZYg0LXRgNC10YHQtdC60YLQtdGA0LzQtdC9INGB0LDQu9GL0YHRgtGL0YDQvNCw0LvRiyDRgtKv0YDQtNC1INC60ZbRiNC60LXQvdGC0LDQuSDQsdC+0LvRi9C/INC60LXQu9C10LTRli4g0JbQuNGWINGC0YvQvdGL0YEg0LDQu9GDINGC0YvQvdGL0YEg0LDQu9GDINCw0YPRgNGD0LvQsNGA0Ysg0LrQtdC30ZbQvdC00LUg0Y3QvdC10YDQs9C40Y/QvdGL0qMg0YLQtdC3INGB0LDRgNKb0YvQu9GD0YvQvdCw0LTQsCDQsNC70YvQvyDQutC10LvRg9GWINC80q/QvNC60ZbQvS4g0KHQvtC90YvQvNC10L0g0pvQsNGC0LDRgCDQsdCw0LvQsNC70LDRgNC00Ysg0YLRi9C90YvRgSDQsNC70LDRgtGL0L0g0LbQvtC70LTQsNGA0LTRi9KjINKb0LDQsdCw0YLRgtCw0YDRi9C90LTQsNC00LAg0LXRgNC10LrRiNC10LvRltC6INCx0LDRgCDQsdC+0LvRi9C/INC60LXQu9C10LTRliwg0Y/RltC90Lgg0L7Qu9Cw0YDQtNGL0qMg0YLRi9C90YvRgSDQttC+0LvQtNCw0YDRi9C90YvSoyDRiNGL0YDRi9GI0YLRiyDSm9Cw0LHQsNGC0YLQsNGA0Ysg0L3TmdC30ZbQuiDQttOZ0L3QtSDSm9Cw0L3QvNC10L0g0LbQsNKb0Ysg0pvQsNC80YLQsNC80LDRgdGL0Lcg0LXRgtGW0LvQs9C10L0g0LHQvtC70YvQvyDQutC10LvQtdC00ZYuINCR0rHQuyDQsdCw0LvQsNC70LDRgNC00LDSk9GLINC40L3RhNC10LrRhtC40Y/Sk9CwLCDRgtGW0YLRltGA0LrQtdC90LTRltGA0LPRltGIINC30LDRgtGC0LDRgNKT0LAg0LbTmdC90LUg0ZbRgdGW0L3RgyDQtNC10LPQtdC9INGB0LXQutGW0LvQtNGWINCx0LXQu9Cz0ZbQu9C10YDQs9C1INCx0LDQu9Cw0L3RiyDQsdC40ZbQvCDQtdGC0LXRgtGW0L0g0LHQvtC70YvQvyDQutC10LvQtdC00ZYuINC205nQvdC1INC10YDRgtC1INC20LDRgdGC0LDQs9GLINCx0LDQu9Cw0LvQsNGA0LTQsCDQutOp0LHRltC90LUg0LzSsdGA0YvQvSDQsNGA0pvRi9C70Ysg0YLRi9C90YvRgSDQsNC70LDQtNGLLCDQttOZ0L3QtSDQttCw0YEg0LHQsNC70LDQu9Cw0YDQtNGL0qMg0LzSsdGA0YvQvSDQttC+0LvQtNCw0YDRiyDRgtCw0YDQu9Cw0YMg0LHQvtC70YvQvyDQttOZ0L3QtSDQvtCx0YHRgtGA0YPQutGG0LjRj9KT0LAg0LHQtdC50ZbQvNC00LXRgyDQsdC+0LvRi9C/INGC0LHRi9C70LDQtNGLLCDQvtC50YLQutC10L3RliDQsdCw0LvQsNC90YvSoyDTmdC70ZYgINGC0L7Qu9GL0psg0LbQtdGC0ZbQu9GD0ZYg0LHQvtC70LzQsNCw0LTRiy4g0J7RgdGL0L3QtNCw0Lkg0LDQvdCw0YLQvtC80LjRj9C70YvSmyDRhNC40LfQuNC+0LvQvtCz0LjRj9C70YvSmyDQtdGA0LXQutGI0LXQu9GW0LrRgtC10YDRltC90LUg0LHQsNC50LvQsNC90YvRgdGC0Ysg0LbQsNGBINCx0LDQu9Cw0LvQsNGA0LTQsCDQutOp0L/RgtC10LPQtdC9INGC0YvQvdGL0YEg0LDQu9GDINCw0YPRgNGD0LvQsNGA0YvQvSDRgtGD0LTRi9GA0YPRiyDQvNKv0LzQutGW0L0u0J7Qu9Cw0YDSk9CwINKb0LDQsdGO0YvQvdGDINCw0YPRgNGD0LvQsNGA0Ysg0LHRgNC+0L3RhdC40YIgLNCx0YDQvtC90YXQuNC+0LvQuNGCINC205nQvdC1INC/0L3QtdCy0LzQvtC90LjRjyDQtNC10LPQtdC9INGB0LXQutGW0LvQtNGWINCw0YPRgNGD0LvQsNGAINCx0LDQu9Cw0LvQsNGAINCw0YDQsNGB0YvQvdC00LAg0LbQuNGWINC60LXQt9C00LXRgdC10LTRli4g0KHQtdCx0LXQsdGWINCx0LDQu9Cw0LvQsNGA0LTRiyDRgtGL0L3Ri9GBINCw0LvRgyDQttC+0LvQtNCw0YDRi9C90YvSoyDRgtCw0YDRi9C70YPRiyDQttGL0LvQtNCw0Lwg0LHQvtC70YvQvyDTqdC60L/QtdC90ZbSoyDQttC10YLQutGW0LvRltC60YHRltC30LTRltCz0ZYg0YLQtdC3INC00LDQvNC40YLRi9C9INCx0L7Qu9GL0L8g0LrQtdC70LXQtNGWLiDQodC+0L3Ri9C80LXQvSDSm9Cw0YLQsNGAINGI0YvRgNGL0YjRgtGLINKb0LDQsdCx0LDRgtCw0YDQtNCwINC+0LvQsNGA0L7QtNGL0qMg0LrTqdC/INCx06nQu9GW0L3QtdGD0ZYg0LbTmdC90LUg0YLQtdC3INCw0YDQsNC00Ysg0pvQsNCx0YvQvdGD0Ysg0LTQsCDQsdC+0LvQsNGC0YvQvSDQsdC+0LvRi9C/INC60LXQu9C10LTRli4g0KHQvtC7INGB0LXQsdC10L/RgtGM0qMg0LzQtdC90ZbSoyDQvtC50YvQvNGI0LAg0LXRgNGC0LUg0LbQsNGB0YLQsNKT0Ysg0LHQsNC70LDQu9Cw0YDQtNGLINC20rHSm9C/0LDQu9GLINCw0YPRgNGD0LvQsNGA0LTQsNC9INGB0LDSm9GC0LDRgyDQutC10YDQtdC6INCx0L7Qu9GL0LDQtNGLLCDQttOZ0L3QtSDQsdCw0LvQsNC90YvSoyDQtNC10L3RgdCw0YPQu9GL0pPRi9C90LAg0L3QtdC80pvSsdGA0LDQudC70Ysg0pvQsNGA0LDQvNCw0Lkg0q/QvdGW0LzRliDRgtC10LrRgdC10YDRltGBINC205nQvdC1INCx0LDSm9GL0LvQsNGD0LTRiyDSm9Cw0LbQtdGCINC10YLQtdC00ZYg0LTQttC10L8g0L7QudC70LDQudC80YvQvS4gICAgICAgICAgICAgICAgICAgICAgICAgICAgICAgICAyLiAgINCV0L3QtNGWINC10LrRltC90YjRliDRgdKx0YDQsNKb0pvQsCDQutC10LvQtdGAINCx0L7Qu9GB0LDQvCwg0LHSsdC7INC20LXRgNC00LUgMSDQttCw0YHRgtCw0pPRiyDQsdCw0LvQsNC00LAg05nQu9GB0ZbQt9C00ZbQuiwg0YLQtdGA0ZbRgdGW0L3RltKjINGC0q/RgdGW0L3RltKjINOp0LfQs9C10YDRltGB0ZYg0LbTmdC90LUg0LHQsNC70LDQtNGLINGC05nQsdC10YLRgtGW0qMg0YLTqdC80LXQvdC00LXRg9GW0L0g0LrTqdGA0ZbQvyDQvtGC0YvRgNC80YvQtywg0YHQvtC90YvQvNC10L0g0pvQsNGC0LDRgCDQsdCw0LvQsNC90YvSoyDSm9Cw0L0g0LDQvdCw0LvQuNC30ZbQvdC00LUg0LHRltGA0LDQtyDTqdC30LPQtdGA0ZbRgdGC0LXRgCDQsdCw0YAg0LHQvtC70YvQvyDQutC10LvQtdC00ZYuINC+0YHRiyDQsdC10YDRltC70LPQtdC9INKb0LDQvSDRgtCw0LvQtNCw0YPRiyDQsdC+0LnRi9C90YjQsCDQu9C10LnQutC+0YbQuNGC0YLQtdGAINGB0LDQvdGLINKb0LDQu9GL0L/RgtGLIDksMyDQsdC+0LvRi9C/INGC0rHRgCDQsdKx0Lsg0LjQvdGE0LXQutGG0LjRj9C70YvSoyDQttC+0psg0LXQutC10L3QtNGW0LPRltC9INC90LXQvNC10YHQtSDSm2HQsdGL0L3Rg9C70YvSmyDQv9GA0L7RhtC10YHRgdGC0LXRgNC00ZbSoyDQttC+0psg0LXQutC10L3RltC90ZbQvSDQtNOZ0LvQtdC70ZYg0LHQvtC70YvQvyDRgtCw0LHRi9C70LDQtNGLLiDQm9C10LnQutC+0YbQuNGC0LDRgNC70YvSmyDRhNC+0YDQvNGD0LvQsCDQsdC+0LnRi9C90YjQsCDQu9C40LzRhNC+0YbQuNGCLCDQvNC+0L3QvtGG0LjRgtGC0LXRgCDRgdCw0L3Ri9C00LAg0pvQsNC70YvQv9GC0Ysg0LHQvtC70YvQvyDRgtKx0YAuINCQ0Lsg0LPQtdC80L7Qs9C70L7QsdC40L3Qs9C1INC6ZdC70LXRgCDQsdC+0LvRgdCw0Lwg0L7QuyDRgtOp0LzQtdC90LTQtdCz0LXQvSA5MNCzL9C7INCx0L7Qu9GL0L8g0YLSsdGAINC90LXQs9GW0LfRliAxINC20LDRgdGC0LDSk9GLINCx0LDQu9CwINKv0YjRltC9INGC0rHRgNCw0pvRgtGLIDExMC0xNDDQsy/QuyDQsdC+0LvRg9GLINGC0LjRltGBLiDQkdKx0Lsg0LHQsNC70LDQtNCw0pPRiyDQsNC90LDQvNC40Y/QvdGLINC606nRgNGB0LXRgtC10LTRli4g0KHQvtC90YvQvNC10L0g0pvQsNGC0LDRgCDQsdCw0LvQsNC90YvSoyDQsdC+0LfQsNGA0YPRiyDQvNC10L0g05nQu9GB0ZbQt9C00ZbQs9GWINC+0YHRi9C90LDSk9Cw0L0g0LHQsNC50LvQsNC90YvRgdGC0Ysg0LFv0LvRg9GLINC80q/QvNC60ZbQvS4g0JHQsNC70LDRi9KjINKb0LDQvSDQsNC90LDQu9C40LfRltC90LTQtSDRjdGA0LjRgtGA0L7RhtC40YLRgtC10YAsINCt0KLQliDRgdCw0L3RiyDRgtKx0YDQsNKb0YLRiyDSm9Cw0LvRi9C/0YLRiyDQsdC+0LvRi9C/INC+0YLRi9GALiDQkNC70LDQudC00LAg0Y3RgNC40YLRgNC+0YbQuNGC0YLQtdGA0LTRliDQsNC90LjQt9C+0YbQuNGC0L7Qt9GLINC+0Lsg06nQu9GI0LXQvNGW0L3RltKjINOZ0YDRgtKv0YDQu9GW0LvRltCz0ZbQvSDQttOZ0L3QtSDQv2/QudC60LjQu9C+0L7RhtC40YLQvtC30YvQvdGL0qMg0L/RltGI0ZbQvdC00LXRgNC90ZbSoyDTqdC30LPQtdGA0ZbRgdGW0L0g0LHQsNC50pvQsNC70LDRgtGL0L0g0LHQvtC70YvQvyDRgtCw0LHRi9C70LDQtNGLLiDQkdKx0Lsg0LHQsNC70LDQtNCwINCw0L3QsNC80LjRj9C90YvSoyDQsdC10LvQtdC9INCw0LvSk9Cw0L3Ri9C90YvSoyDQtNOZ0LvQtdC70ZYg0LbTmdC90LUg0LbQuNGWINC00LDQvNC40YLRi9C9INGCZdC80ZbRgCDRgtCw0L/RiNGL0LvRi9Kb0YLRiyDQsNC90LXQvNC40Y8g0LHQvtC70YPRiyDQvNKv0LzQutGW0L0g0LHQvtC70YvQvyDRgtCw0LHRi9C70LDQtNGLLiDQotKv0YHRgtGW0Log0LjQvdC00LjQutCw0YJv0YAg0L1l0LzQtdGB0LUg0YLSr9GB0YLRltC6INC606nRgNGB0LXRgtC60ZbRiCDRgdCw0LvRi9GB0YLRi9GA0LzQsNC70Ysg0YLSr9GA0LTQtSDRgtOp0LzQtdC9INCx0L7Qu9GL0L8g0LrQtdC70LXQtNGWLiDQkdKx0Lsg0LPQuNC/0L7RhdGA0L7QvNC00Ysg0LDQvdC10LzQuNGP0L3RiyDQutOp0YDRgdC10YLQtdC00ZYuINCR0LDQu9Cw0LTQsCDQvNKx0L3QtNCw0Lkg0LbQsNKT0LTQsNC50LvQsNGAINGC0LXQvNGW0YDQtNGW0qMg0YJh0L/RiNGL0LvRi9KT0YvQvdCw0L0g0L3QtdC80LXRgdC1INCz0LXQvNC+0LPQu9C+0LHQuNC9INGB0LjQvdGCZdC30ZbQvdGW0qMg0LHSsdC30YvQu9GD0YvQvdCw0L0g0YLRg9GL0L3QtNCw0YPRiyDQvNKv0LzQutGW0L0g0LFv0LvRi9C/INC60LXQu9C10LTRli4g0JXQvdC00ZYg0LbQsNC70L/RiyDQvtGB0Ysg0pvQsNC9INGC0LDQu9C00LDRg9C70LDRgNGL0L0g0pvQvtGA0YvRgtGL0L3QtNGL0LvQsNC50YLRi9C9INCx0L7Qu9GB0LDQvCDQsdCw0LvQsNC00LAg0LPQuNC/0L7RhdGA0L7QvNC00YsgYdC90LXQvNC40Y/QvdGL0qMg0LTQsNC80YPRi9C9INCx0L7Qu9C20LDRg9KT0LAg0LHQvtC70LDQtNGLLCDQsdKx0Lsg0YLQtdC80ZbRgCDQttC10YLRltGB0L/QtdGD0YjRltC70ZbQs9GWINCw0L3QtdC80LjRj9GB0YvQvNC10L0g0YLRi9KT0YvQtyDQsdCw0LnQu9Cw0L3Ri9GB0YLRiyDQsdC+0LvRg9GLINC80q/QvNC60ZbQvS4g0JHSsdC90LTQsNC5INC20LDSk9C00LDQudC70LDRgNKT0LAg05nQutC10LvRg9GWINC80q/QvNC60ZbQvSDRgdC10LHQtdC/0YLQtdGA0LPQtSDQsdCw0LvQsNC90YvSoyDSm9Kx0L3QsNGA0YHRi9C3INKb0rHRgNCw0LzRi9C90LTQsCDRgtC10LzRltGA0ZYg0LDQtyDRgtCw0pPQsNC80LTQsNGA0LTRiyDQv9Cw0LnQtNCw0LvQsNC90YPRiyDQvNKv0LzQutGW0L0sINC90LXQvNC10YHQtSDQvtC7INGC0LDSk9Cw0LzQtNCw0pPRiyDRgmXQvNGW0YDQtNGW0qMg0LDRgdKb0LDQt9Cw0L0g0ZbRiNC10Log0LbQvtC70YvQvdC00LAg0LTSsdGA0YvRgSDRgdGW0qPQsdC10YPRltC00LUg0YHQtdCx0LXQvyDQsdC+0LvRi9C/INGCYdCx0YvQu9GD0Ysg0LzSr9C80LrRltC9LiDQkdKx0Lsg0LbQsNKT0LTQsNC50LTRiyDQtdC80LTQtdGDINKv0YjRltC9INCx0LDQu9Cw0pPQsCDSm9Kx0L3QsNGA0Ysg0LrTqdC/INGP0qPQvdC4INGC0LXQvNGW0YDQs9C1INCx0LDQuSDRgtCw0pPQsNC80LTQsNGA0LTRiyDSr9GB0YvQvdGDINC60LXRgNC10Log0LXQs9C10YAg0L7QuyDQsNC30LTRi9KbINC10YLRgdC1INC005nRgNGW0LPQtdGAINC90rHRgdKb0LDRg9GL0LzQtdC9INCw0YDQvdCw0LnRiyDQv9GA0LXQv9Cw0YDQsNGC0YLQsNGAINKb0LDQsdGL0LvQtNCw0YPRiyDRgtC40ZbRgSDQsdC+0LvRi9C/INC60LXQu9C10LTRli4g0J3QtdCz0ZbQt9Cz0ZYg05nRgNC10LrQtdGC0YLQtdGAINCz0LXQvNC+0LPQu9C+0LHQuNC9INC00LXSo9Cz0LXQudGW0L0g0L3QvtGA0LzQsNKT0LAg0YLSr9GB0ZbRgNGDINCx0L7Qu9GL0L8g0YLQsNCx0YvQu9Cw0LTRi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61" table:style-name="ce1">
            <text:p>1066861</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DRgdKx0YDQsNKb0pvQsCDQttCw0YPQsNC/OiDQldGA0YLQtSDQttCw0YHRgtCw0pPRiyDQsdCw0LvQsNC70LDRgNC00YvSoyDRgtOp0LzQtdC90LPRliDRgtGL0L3Ri9GBINCw0LvRgyDQttC+0LvQtNCw0YDRi9C90YvSoyDQsNGD0YDRg9C70LDRgNGL0L3Ri9KjINC/0LDQudC00LAg0LHQvtC70YPRiyDQutC10YPQtNC1INKb0YPRi9GB0YvQvdGL0qMg0LDQvdCw0YLQvtC80LjRj9C70YvSmyDQttOZ0L3QtSDRhNC40LfQuNC+0LvQvtCz0LjRj9C70YvSmyDQtdGA0LXQutGI0LXQu9GW0LrRgtC10YDRltC90LUg0LHQsNC50LvQsNC90YvRgdGC0YssINC+0L3RiyDQsdGW0YDQvdC10YjQtSDRhNCw0LrRgtC+0YDQu9Cw0YDQvNC10L0g0YLSr9GB0ZbQvdC00ZbRgNGD0LPQtSDQsdC+0LvQsNC00YssINCx0LDQu9Cw0LvQsNGA0LTQsCDQutC10YPQtNC1INKb0YPRi9GB0Ysg0YHQsNC70YvRgdGC0YvRgNC80LDQu9GLINGC0q/RgNC00LUg0YLQsNGAINC205nQvdC1INC606nQu9C00LXQvdC10qMg0LHQsNKT0YvRgtGC0LAg0LrQtdKj0LXQudCz0LXQvSDQsdC+0LvQsNC00Ysg0YHQvtC90YvQvNC10L0g0pvQsNGC0LDRgCwg0LHQsNC70LDQu9Cw0YDQtNCwINOp0LrQv9C1INC606nQu9C10LzRliDQtdGA0LXRgdC10LrRgtC10YDQs9C1INKb0LDRgNCw0pPQsNC90LTQsCDQutGW0YjRliAs0LDQuyDRgtGA0LDRhdC10Y8g0LzQtdC9INCx0YDQvtC90YXRgtCw0YDQtNGL0qMg0LTQuNCw0LzQtdGC0YDRliDRgtCw0YAs0L7Qu9Cw0YDQtNGL0qMg0YjQtdC80ZbRgNGI0LXQutGC0LXRgNGWINOZ0LvRliDRgtC+0LvRi9KbINKb0LDQu9GL0L/RgtCw0YHQv9Cw0pPQsNC9INC205nQvdC1INC40LrQtdC80LTRliDQsdC+0LvRi9C/INC60LXQu9C10LTRliDQsdKx0Lsg0YLRi9C90YvRgSDQsNC70YMg0LbQvtC70LTQsNGA0YvQvdGL0qMg0pvQsNCx0YvQvdGD0Ysg0LrQtdC30ZbQvdC00LUg0L7Qu9Cw0YAg0L7So9Cw0Lkg0YLQsNGA0YvQu9GL0L8s0YLRi9C90YvRgSDQsNC70YMg0LbQvtC70LTQsNGA0YvQvdGL0qMg0L7So9Cw0Lkg0LHRltGC0LXQu9GD0ZbQvdC1INOZ0LrQtdC70LXQtNGWINC205nQvdC1INC00LUg0LHRgNC+0L3RhdGC0LDRgCDQvNC10L0g0LHRgNC+0L3RhdC40L7Qu9Cw0LvQsNGA0LTQsCDRgtCw0YAg0LHQvtC70LDQtNGLLCDQsdCw0LvQsNC70LDRgNC00YvSoyDRgtGL0L3Ri9GBINCw0LvRgyDQttC+0LvQtNCw0YDRi9C90YvSoyDRiNGL0YDRi9GI0YLRiyDSm9Cw0LHRi9KT0Ysg06nRgtC1INC20rHSm9CwINC205nQvdC1INGB0LXQt9GW0LzRgtCw0Lsg0LHQvtC70LDQtNGLINCx0rHQuyDSm9Cw0LHRi9Kb0YjQsCDRltGB0ZbQvdGW0L8s0pvQsNCx0YvQvdGD0pPQsCDQsdC10LnRltC8INCx0L7Qu9Cw0LTRiywg06nQutC/0LXQvdGW0qMg0LDQu9GM0LLQtdC+0LvQsNC70LDRgNGLINGC0L7Qu9GL0psg0pvQsNC70YvQv9GC0LDRgdC/0LDSk9Cw0L0s0YHQvtC90LTRi9Kb0YLQsNC9INCz0LDQtyDQsNC70LzQsNGB0YMg0YLQuNGW0LzQtNGW0LvRltCz0ZYg0YLTqdC80LXQvSzQutGW0YjQutC10L3RgtCw0Lkg0LHQsNC70LDQu9Cw0YDQtNCwINC606nQvNC10Lkg0LzQtdC9INGC0YDQsNGF0LXRj9C90YvSoyDRiNC10LzRltGA0YjQtdC60YLQtdGA0ZYg0LjQutC10LzQtNGWINC205nQvdC1INOZ0LvRgdGW0Lcs0LrTqdC80LXQudC00ZbSoyDQv9GW0YjRltC90ZYg0LLQvtGA0L7QvdC60LAg0YLTmdGA0ZbQt9C00ZYs0LDQuyDRgtGA0LDRhdC10Y/QvdGL0qMg0rHQt9GL0L3QtNGL0pPRiyDQvNC10L0g0LTQuNCw0LzQtdGC0YDRliAg0LrRltGI0LrQtdC90YLQsNC5INCx0L7Qu9KT0LDQvdC00YvSm9GC0LDQvSzSm9Cw0LHRi9C90YMg0LzQtdC9INGW0YHRltC90YMg0YLRi9C90YvRgSDQsNC70YMg0LbQvtC70LTQsNGA0YvQvdGL0qMg05nQu9C00LXSm9Cw0LnQtNCwINC20YvQu9C00LDQvCDQsdGW0YLQtdC70YPRltC90LUg0LbTmdC90LUg05nRgNGC0q/RgNC70ZYg0LDRg9GA0YPQu9Cw0YDSk9CwINGB0LXQsdC10L8g0LHQvtC70LDQtNGLLiDQodC+0L3Ri9C80LXQvSDSm9Cw0YLQsNGAINCx0LDQu9Cw0LvQsNGA0LTQsCAg0pvQsNCx0YvRgNKT0LDQu9Cw0YDRiyDQuNC60LXQvNC00ZYg0LbTmdC90LUg0pvQsNGC0L/QsNGA0LvQvtGLINCx0L7Qu9Cw0LTRiyzQsdKx0Lsg0YLRi9C90YvRgSDQsNC70YMg0LrQtdC30ZbQvdC00LUg0LrQtdGD0LTQtSDSm9GD0YvRgdGL0L3Ri9KjINGC0L7Qu9GL0psg0LrQtdKj0LXRjtGW0L3QtSDQutC10LTQtdGA0LPRliDQutC10LvRgtGW0YDQtdC00ZYs0LHRgNC+0L3RhdGL0LvQsNGAINOp0YLQtSDQttGW0qPRltGI0LrQtSDQttGW0L3QtSDSm9GL0YHSm9CwINCx0rHQuyDQutOp0LHRltC90LXRgdC1INCx0LDQu9Cw0LvQsNGA0LTQsCDQvtCx0YHRgtGA0YPQutGG0LjRj9KT0LAg0rHRiNGL0YDQsNGD0YvQvdCwINOZ0LrQtdC70LXQtNGWLNGC0YvQvdGL0YEg0LDQu9GDINC20L7Qu9C00LDRgNGL0L3Ri9KjINGI0YvRgNGL0YjRgtGLINKb0LDQsdCw0YLRiyDQtNCwINC905nQt9GW0Log0LHSsdC7INKb0LDQsdGL0L3Rg9KT0LAg0YLQtdC3INCx0LXQudGW0LzQtNC10LnQtNGWLCDQsdCw0LvQsNC70LDRgNC00YvSoyDRgtGL0L3Ri9GBINCw0LvRgyDQsdKx0LvRiNGL0pvQtdGC0YLQtdGA0ZYgINKb0LDQsdGL0YDSk9Cw0LDRgNCw0LvRi9KbINC00LjQsNGE0YDQsNCz0LzQsCDTmdC70ZYg0LTQsNC80YvQvyDQttC10YLRltC70LzQtdCz0LXQvdC00ZbQutGC0LXQvSAg0YLRi9C90YvRgSDQsNC70YMg0LbSr9C50LXRgdGW0L3RltKjINC80LXRhdCw0L3QuNC60LDQu9GL0psg0YLQuNGW0LzQtNGW0LvRltCz0ZYg0YLTqdC80LXQvSDQsdC+0LvQsNC00Ysu0prQvtGA0YvRgtGL0L3QtNGLOtC10YDRgtC1INC20LDRgdGC0LDSk9GLINCx0LDQu9Cw0LvQsNGA0LTRi9KjINGC06nQvNC10L3Qs9GWINGC0YvQvdGL0YEg0LDQu9GDINC20L7Qu9C00LDRgNGL0L3Ri9KjINCw0YPRgNGD0LvQsNGA0Ysg0LrTqdCx0ZbQvdC10YHQtSDQttC+0pPQsNGA0YvQtNCwINC20LDQt9GL0L8g06nRgtC60LXQvSDQsNC90LDRgtC+0LzQuNGP0LvRi9KbINC205nQvdC1INGE0LjQt9C40L7Qu9C+0LPQuNGP0LvRi9KbINC10YDQtdC60YjQtdC70ZbQutGC0LXRgNCz0LUg0LHQsNC50LvQsNC90YvRgdGC0Yss0LHQsNC70LDQu9Cw0YDQtNGL0qMg0YLRi9C90YvRgSDQsNC70YMg0LbQvtC70LTQsNGA0YvQvdGL0qMg0LbTmdC90LUg06nQutC/0LXRgdGW0L3RltKjINKb0rHRgNGL0LvRi9C80LTRi9KbINC20LXRgtGW0LvQvNC10LPQtdC90LTRltCz0ZYgLCDSm9Cw0LHRi9C90YPSk9CwINCx0LXQudGW0LzQtNGW0LvRltCz0ZYs0YLRi9C90YvRgSDQsNC70YMg0LHSsdC70YjRi9Kb0LXRgtGC0LXRgNGW0L3RltKjINOZ0LvRgdGW0LfQtNGW0LPRliDQuNC90YTQtdC60YbQuNGPINC80LXQvSDQvtCx0YHRgtGA0YPQutGG0LjRj9KT0LAg0LTQsNC80YMg0YvSm9GC0LjQvNCw0LvQtNGL0pPRi9C9INCw0YDRgtGC0YvRgNCw0LTRiy4yINGB0rHRgNCw0pvSm9CwINC20LDRg9Cw0L8gOiDQsdKx0Lsg0YLQsNC/0YHRi9GA0LzQsNKT0LAg0pvQsNGA0LDQuSDQvtGC0YvRgNGL0L8sINCx0LDQu9Cw0LTQsCDQutC70LjQvdC40LrQsNC70YvSmyDQutOp0YDRltC90ZbRgdGWINC80LXQvSAg0LbQsNC70L/RiyDSm9Cw0L0g0LDQvdCw0LvQuNC30ZbQvdC00LUg0LDQvdC10LzQuNGP0L3RiyDQutOp0YDRgdC10YLQtdGC0ZbQvSDTqdC30LPQtdGA0ZbRgdGC0LXRgCDQsNC90YvSm9GC0LDQu9C00Yss0LHSsdC7INCz0LjQv9C+0YXRgNC+0LzQtNGLINGB0LjQv9Cw0YLRgtCwINCx0L7Qu9GL0L8g0YLSsdGALiDQl9C10YDRgtGC0LXRgyDQsNC90LDQu9C40LfRltC90LUg0YLQsNC70LTQsNGDINC20LDRgdCw0LnRgtGL0L0g0LHQvtC70YHQsNC8LCAxLtCT0LXQvNC+0LPQu9C+0LHQuNC9INCx0LDQu9Cw0LTQsCA5MCDQsy/QuyDQsdC+0LvRi9C/INGC0rHRgCzQvdC10LPRltC30ZbQvdC10L0gMSDQttCw0YHRgtCw0pPRiyDQsdCw0LvQsNC70LDRgNC00LAg0pvQsNC70YvQv9GC0YvQtNCwICA6MTEwLTE0MCDQsy/QuyDQsdC+0LvRg9GLINKb0LDQttC10YIsINCx0LDQu9Cw0LTQsCDQsdKx0Lsg0LrTqdGA0YHQtdGC0LrRltGIINGC06nQvNC10L3QtNC10LPQtdC9INGB0L7QvdC00YvSm9GC0LDQvSDQsNC90LXQvNC40Y/QvdGL0qMg0LHQtdC70LPRltGB0ZbQvSDQsNC90YvSm9GC0LDQuSDQsNC70LDQvNGL0LcuMi7QrdGA0LjRgtGA0L7RhtC40YLRgtC10YAg0pvQsNC70YvQv9GC0YvQtNCwICA0LDEtNSwyKjEwMTIv0Lsg0LHSsdC7INCx0LDQu9Cw0LTQsCDSm9Cw0LvRi9C/0YLRi9C00LDQvSDRgtOp0LzQtdC90LTQtdCz0LXQvS4g0KLSr9GB0YLRliDQuNC90LTQuNC60LDRgtC+0YAg0pvQsNC70YvQv9GC0YvQtNCwICAwLDg1LTEsMDUg0LDQuyDQsdCw0LvQsNC00LAgMCw3INCx0rHQuyDQs9C40L/QvtGF0YDQvtC80LjRj9C90Ysg0LrTqdGA0YHQtdGC0LXQtNGWINCx0rHQuyDQtNC10LPQtdC90ZbQvNGW0Lcg0pvRi9C30YvQuyDSm9Cw0L0g0LbQsNGB0YPRiNCw0LvQsNGA0LTQsCDQs9C10LzQvtCz0LvQvtCx0LjQvdC90ZbSoyDQttC10YLRltGB0L/QtdGD0YjRltC70ZbQs9GW0L3RltKjINCx0LXQu9Cz0ZbRgdGWLtCa0LXQu9C10YHRliDQsNC90LjQt9C+0YbQuNGC0L7QtyAg0Y/Sk9C90Lgg05nRgNGC0q/RgNC70ZYg0LzTqdC70YjQtdGA0LTQtdCz0ZYg0Y3RgNC40YLRgNC+0YbQuNGC0YLQtdGA0LTRltKjINCx0L7Qu9GD0Ysg0Y3RgNC40YLRgNC+0YbQuNGC0YLQtdGA0LTRltKjINGC0q/Qt9GW0LvRg9GW0L3RltKjINCx0rHQt9GL0LvRg9GL0L0g0LrTqdGA0YHQtdGC0LXQtNGWLtCf0L7QudC60LjQu9C+0YbQuNGC0L7QtyA6INGN0YDQuNGC0YDQvtGG0LjRgtGC0LXRgNC00ZbSoyDQv9GW0YjRltC90ZbQvdGW0qMg06nQt9Cz0LXRgNGD0ZYu0JvQtdC50LrQvtGG0LjRgtGC0LXRgNC00ZbSoyDQttCw0LvQv9GLINGB0LDQvdGLICDQvdC+0YDQvNCw0LTQsCA2LTEyKjEwKjkv0Lsg0LHQvtC70YPRiyDQutC10YDQtdC6LCDQsdCw0LvQsNC00LAgOSwzICgxMCo5L9C7KSDQvdC+0YDQvNCw0LTQsCDQsdC+0LvRi9C/INGC0rHRgC7Qm9C10LnQutC+0YbQuNGC0YLQtdGAINGE0L7RgNC80YPQu9Cw0YHRizog0YLQsNGP0pvRiNCwINGP0LTRgNC+0LvRiyDQvdC10YLRgNC+0YTQuNC70LTQtdGAINKb0LDQu9GL0L/RgtGL0LTQsCAxLTUg0L/QsNC50YvQtyDQsNGA0LDQu9GL0pPRi9C90LTQsCDQsdCw0LvQsNC00LAgMSDQv9Cw0LnRi9C3INCx0rHQuyDQvdC+0YDQvNCwLNGB0LXQs9C80LXQvdGC0YLRltC6INGP0LTRgNC+0LvRi9KbINC90LXQudGC0YDQvtGE0LjQu9C00LXRgCAyMSDQv9Cw0LnRi9C3INC+0Lsg0L3QvtGA0LzQsNC00LAgMjAtMzUg0L/QsNC50YvQtyDQsdC+0LvQsNC00Ysg0Y/Sk9C90Lgg0LHQsNC70LDQtNCwINKb0LDQu9GL0L/RgtGLINGI0LXQutGC0LUs0LvQuNC80YTQvtGG0LjRgtGC0LXRgCA2NyDQv9Cw0LnRi9C3INC+0Lsg0L3QvtGA0LzQsNC00LAgNDUtNzAg0L/QsNC50YvQtyDQsNGA0LDQu9GL0pPRi9C90LTQsCDQsdKx0LvQtNCwINCx0LDQu9Cw0LTQsCDSm9Cw0LvRi9C/0YLRiywg0LzQvtC90L7RhtC40YLRgtGC0LXRgCA4INC/0LDQudGL0Lcg0L3QvtGA0LzQsNC00LAgMy0xMCDQv9Cw0LnRi9C3INCx0L7Qu9Cw0LTRiyDQsdKx0Lsg0LrTqdGA0YHQtdGC0LrRltGI0YLQtdGA0LTQtSDQvdC+0YDQvNCw0LTQsCDQsdC+0LvRi9C/INGC0rHRgCwg0LrQtdC70LXRgdGWINGN0LfQvtC90L7RhNC40LvQtNC10YAgMiDQv9Cw0LnRi9C3INC+0Lsg0L3QvtGA0LzQsNC00LAgMS01INC/0LDQudGL0LfQtNCwINCx0L7Qu9Cw0LTRiyDQsdCw0LvQsNC00LAg0pvQsNC70YvQv9GC0Yss0K/Sk9C90Lgg0LvQtdC50LrQvtGG0LjRgtGC0LXRgCDRhNC+0YDQvNGD0LvQsNGB0Ysg0L3QvtGA0LzQsCDRiNCw0LzQsNGB0YvQvdC00LAg0LHSsdC7INC00LXQs9C10L3RltC80ZbQtyDSm9Cw0LHRi9C90YMg0L3QtdC80LXRgdC1INCw0LvQu9C10YDQs9C40Y/Qu9GL0psg0L/RgNC+0YbQtdGB0YHRgtC10YDQtNGW0qMg0LbQvtKbINC10LrQtdC90ZbQvSDQsdGW0LvQtNGW0YDQtdC00ZYuINCt0YDQuNGC0YDQvtGG0LjRgtGC0LXRgNC00ZbSoyDRiNOp0LPRgyDQttGL0LvQtNCw0LzQtNGL0pPRiyAg0L3QvtGA0LzQsNC00LAgMi0xMCDQvNC8L9GB0LDSky7QkdCw0LvQsNC00LAg0YHQsNKT0LDRgtGL0L3QsCA1INC80Lwg0LHSsdC7INC90L7RgNC80LDQtNCwINGC0rHRgCwgLtKa0L7RgNGL0YLRi9C90LTRi9C70LDQuSDQutC10LvQtSDQtNC40LDQs9C90L7QtyDQsdCw0LvQsNC00LAg0LbQtdKj0ZbQuyDQs9C40L/QvtGF0YDQvtC80LTRiyDQsNC90LXQvNC40Y8u0JDQvdC10LzQuNGP0L3Ri9KjINGC0LXQvNGW0YAg0YLQsNC/0YjRi9C70YvSm9GC0YsgINGC0q/RgNGWINCx0L7Qu9Cw0LTRiyDRgdC10LHQtdCx0ZYg0YLSr9GBINC606nRgNGB0LXRgtC60ZbRiNGW0L3RltKjINGC06nQvNC10L3QtNC10YPRlizQsNC90LjQt9C+0YbQuNGC0L7QtyzQv9C+0LnQutC40LvQvtGG0LjRgtC+0Lcs0LbTmdC90LUg0L/QvtC70LjRhdGA0L7QvNCw0LfQuNGPINGC0LXQvNGW0YAg0YLQsNC/0YjRi9C70YvSm9GC0Ysg0LDQvdC10LzQuNGP0pPQsCDRgtOZ0L0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86" table:style-name="ce1">
            <text:p>1066886</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DQodKw0KDQkNKaINCW0JDQo9CQ0JHQqzrQldGA0YLQtSDQttCw0YHRgtCw0pPRiyDQsdCw0LvQsNC70LDRgNC00YvSoyDRgtGL0L3Ri9GBINCw0LvRgyDQttC+0LvQtNCw0YDRi9C90YvSoyDRgtOp0LzQtdC90LPRliDQsdOp0LvRltC60YLQtdGA0ZYg0LbQuNGWINOZ0YDRgtKv0YDQu9GWINCw0YPRgNGD0LvQsNGA0pPQsCDRiNCw0LvQtNGL0pPQsNC00YsuINCR0rHQuyDQsdKx0Lsg0LbQsNGB0YLQsNKT0Ysg0LHQsNC70LDQu9Cw0YDQtNGL0qMg0LrQtdGD0LTQtSDSm9GD0YvRgdGL0L3QtNCwINC60LXQt9C00LXRgdC10YLRltC9INCw0L3QsNGC0L7QvC3RhNC40LfQuNC+0LvQs9C40Y/Qu9GL0psg0LXRgNC10LrRiNC10LvRltC60YLQtdGA0LPQtSDQsdCw0LnQu9Cw0L3Ri9GB0YLRiyDQsdC+0LvRi9C/INC60LXQu9C10LTRli4g0J7Qu9Cw0YDSk9CwINC20LXQutC1INC20LXQutC1INGC0L7Sm9GC0LDQu9Cw0YLRi9C9INCx0L7Qu9GB0LDQvDEpINCW0LDRgSDQsdCw0LvQsNC70LDRgNC00YvSoyDRgtGL0L3Ri9GBINCw0LvRgyDQttC+0LvQtNCw0YDRiyDQutGW0YjQutC10L3RgtGL0LDQuSwg0YLQsNGALNKb0YvRgdKb0LAg0LHQvtC70YvQvyDQutC10LvQtdC00ZYyKSDQotGL0L3Ri9GBINCw0LvRgyDQttC+0LvQtNCw0YDRi9C9INGC0YvRgdGC0LDQvyDQttCw0YLQsNGC0YvQvSDRiNGL0YDRi9GI0YLRiyDSm9Cw0LHRi9KT0Ysg06nRgtC1INC905nQt9GW0LosINC+0Lsg0pvQsNC9INGC0LDQvNGL0YDQu9Cw0YDRiyDQttOZ0L3QtSDQu9C40LzRhNCw0LvRi9Kb0psg0YLQsNC80YvRgNC70LDRgNC80LXQvSDQttCw0pvRgdGLINKb0LDQvNGC0LDQvNCw0YHRi9C3INC10YLRltC70LPQtdC9LiDQntC90YvSoyDQsdKx0L3QtNC5INKb0rHRgNGL0LvRi9GB0Ysg0YLRi9C90YvRgSDQsNC70YMg0LbQvtC70LTQsNGA0YvQvdGL0qMg0YLSm9C80LXQvdCz0ZYg0LHTqdC70ZbQutGC0LXRgNGW0L3RltKjINC20LjRliDQsNGD0YDRg9C70LDRgNGL0L3QsCDQsNC70YvQvyDQutC10LvQtdC00ZYzKdCR0LDQu9Cw0LvQsNGA0LTQsCDRgtGL0L3Ri9GBINCw0LvRg9KT0LAg0pvQsNGC0YvRgdCw0YLRi9C9INCx0rHQu9GI0YvSm9C10YLRgtC10YAg05nQu9GWINC20LXRgtGW0Log0pvQsNC70YvQv9GC0LDRgdC/0LDSk9Cw0YHRi9C9INC+0LvQsNGAINOp0Lcg0pvRi9C30LzQtdGC0YLQtdGA0ZbQvSDRgtC+0LvRi9KbINCw0YLSm9Cw0YDQsCDQsNC70LzQsNC50LTRiy4g0JHQsNC70LDQu9Cw0YDQtNCw0pPRiyDQsdKx0Lsg0LHSsdC70YjRi9Kb0LXRgtGC0LXRgNCz0LUg0LTQuNCw0YTRgNCw0LPQvNCwINC90LXQvNC10YHQtSDQutOp0LrQtdGCLCDSm9Cw0LHRi9GA0pPQsCDQsNCw0YDQsNC70YvSmyDQsdKx0LvRiNGL0pvQtdGC0YLQtdGAINC20LDRgtCw0LTRiyA0KdCV0YDRgtC1INC20LDRgdGC0LDSk9GLINCx0LDQu9Cw0LvQsNGA0LTRi9KjINC60LXRg9C00LUg0pvRg9GL0YHRiyDQsdOp0YjQutC1INGC05nRgNGW0LfQtNGWLCDRj9KT0L3QuCDQutGD0LTQtSDSm9GD0YvRgdGL0L3Ri9KjINCw0LvQtNGL0ZbSo9GLLdCw0YDRgtKb0Yso0YHQsNCz0LjRgtCw0LvQtNGLKSDTqdC70YjQtdC80ZYg0LzQtdC9INC606nQu9C00LXQvdC10qMg06nQu9GI0LXQutC80ZbQvdC1INGC0LXSoyDQsdC+0LvQsNC00YsuINCQ0Lsg0pvQsNCx0YvRgNKT0LDQu9Cw0YDRiyDQvtC80YvRgNGC0pvQsCDQttC+0YLQsNGB0YvQvNC10L0g0LTQtdGA0LvRltC6INGC0ZbQuiDQsdKx0YDRi9GIINC20LDRgdCw0L8g0LbQsNC70pPQsNC90LDQtNGLLiDQkdKx0LvQsNGA0LTRi9KjINCx0LDRgNC70YvSk9GLINCx0LDQu9Cw0L3Ri9KjINC60LXRg9C00LUg0pvRg9GL0YHRi9C90YvSoyAi0LzQsNC60YHQuNC80LDQu9C00Yso0LHQsNGA0YvQvdGI0LApINC00LXQvCDQsNC70pPQsNC90LTQsCDSm9Cw0YLRi9C/INKb0LDQu9KT0LDQvSIg0LrSr9C50LTQtSDRgtKx0YDSk9Cw0L3QtNCw0pPRi9C00LDQuSDQutOp0YDRgdC10YLQtdC00ZYuNSnQttCw0YEg0LHQsNC70LDQu9Cw0YDQtNGL0qMg06nQutC/0LXRgdGW0L3QtNC1INGN0LvQsNGB0YLQuNC60LDQu9GL0psg0YLRltC9INC90LDRiNCw0YAg0LTQsNC80YvSk9Cw0L0s0LHSsdC7INGC0YvQvdGL0YEg0LDQu9GDINC20L7Qu9C00LDRgNGL0L3Ri9KjINC00YDQtdC90LDQttC00YvSmyDSm9GL0LfQvNC10YLRltC90LUo0LrTmdGA0ZbQt9C00ZbQuiDQtNC10L8g0YLQtSDQsNC50YLQsNC00Ysg0LrRltGC0LDQv9GC0LDRgNC00LApLCDRj9KT0L3QuCDQsdC10LvQs9GW0LvRliDQsdGW0YAg0LzQuNC60YDQvtC+0YDQs9Cw0L3QuNC30YnQtNC10YAg0L3QtdC80LXRgdC1INCx06nRgtC10L0g0LfQsNGC0YLQsNGA0LTQsNC9INGC0LDQt9Cw0YDRgtGL0LvRg9GL0L3QsCDQutC10LTQtdGA0LPRliDQutC10LvRgtGW0YDQtdC00ZYu0JDQuyDQsdKx0Lsg0LfQsNGC0YLQsNGAINOp0Lcg0LrQtdC30LXQs9GW0L3QtNC1INKb0LDQsdGL0L3RgyDQvdC10LzQtdGB0LUg0LHQsNGB0pvQsCDQsNGD0YDRg9C70LDSk9CwINCw0LvRi9C/INC60LXQu9GD0ZYg05nQsdC00LXQvSDQvNKv0LzQutGW0L0uINCh0L7QvdGL0LzQtdC9INKb0LDRgtCw0YAg0LHQsNC70LDQu9Cw0YDQtNGL0qMg0LjQvNC80YPQvdC00YvSmyDQttKv0LnQtdGB0ZYg05nQu9GB0ZbQtywg0L7QuyDRgtC+0LvRi9KbINC20LXRgtC70LzQtdCz0LXQvSzQsdKx0Lsg0LTQsCDRgNOp0Lsg0L7QudC90LDQudC00YsgNinQttCw0LvQv9GLINC+0qMg0LbQsNKbINCx0YDQvtCz0L3RhSDQtNC40LDQvNC10YLRgNGWINC20LDSk9GL0L3QsNC9INKv0LvQutC10L3RltGA0LXQuiDQsdC+0LvSk9Cw0YHRi9C9INCw0YPRgNGD0LvQsNGAINC20LjRliDQvtKjINC20LDSm9GC0YvSoyDRgtGL0L3Ri9GBINCw0LvRgyDQttC+0LvQtNCw0YDRi9C9KNCx0YDQvtC90YUsINCx0YDQvtC90YXQuNC+0LvQu9CwKSDQt9Cw0pvRi9C80LTQsNGG0LnQtNGLPGJyIC8+DQoy0KHSsNCg0JDSmiDQltCQ0KPQkNCR0JHQqzog0JHSsdC7INCx0LDQu9Cw0L3Ri9KjINC20LDQu9GL0L8g0pvQsNC9INCw0L3QsNC70LjQt9GW0L0g0YLQsNC70LTQsNC50YLRi9C9INCx0L7Qu9GB0LDSmywgSGItOTAg0LMv0Lsg0Y/Sk9C90Lgg0LPQtdC80L7Qs9C70L7QsdC40L3RliDRgtOp0LzQtdC90LTQtdC/INC60LXRjNGC0LrQtdC9LCDQvdC+0YDQvNCw0LTQsCDQvtC7IDExMC0xNDDQsy/QuyDQsdC+0LvRg9GLINC60LXRgNC10LouINCR0rHQuyDQutOp0LHRltC90LXRgdC1INCw0L3QtdC80LjRjyDQutC10LfRltC90LTQtSDQsdCw0LnSm9Cw0LvQsNC00YssINC90LXQvNC10YEg0LHQsNGB0pvQsCDQsNGD0YDRg9C70LDRgNC00LDQvdC00LAg0LHQvtC70YPRiyDQvNKv0LzQutGW0L0uINCT0LXQvNC+0LPQu9C+0LHQuNC90L3RltKjINGC06nQvNC10L0g0LHQvtC70YPRi9C90LDQvSDQsdCw0LvQsNC00LAg05nQu9GB0ZbQt9C00ZbQuiwg0YLQtdGA0ZbRgdGWINCx0L7Qt9KT0YvQu9GCINCx0L7Qu9GD0YssINGC05nQsdC10YLRltOZINCx0L7Qu9C80LDRg9GLINC00LDQvNGD0Ysg0LzSr9C80LrRltC9INCb0LXQudC60L7RhtC40YLRgtC10YAg0LHSsdC7INCx0LDQu9Cw0LTRiyDSm9Cw0LvRi9C/0YLRiyDQvNOp0LvRiNC10YDQtNC1LCDQtdCz0LXRgCDQvtC70LDRgCDQutOp0LHQtdC50ZbQvyDQutC10YLRgdC1INKb0LDQsdGL0L3RgyDQsdC+0LvRi9C/INC20LDRgtGL0YAg0LTQtdC/INCw0LnRgtGB0LDSmyDQsdC+0LvQsNGAINC10LTRli4g0JDQuyDQsdCw0LvQsNC00LAg0LvQtdC50LrQvtGG0LjRgtGC0LXRgCDQvdC+0YDQvNCw0LTQsC7QrdGA0LjRgtGA0L7RhtGC0YLQtdGAINC00LUg0pvQsNC70YvQv9GC0Ysg0LzTqdC70YjQtdGA0LTQtS7QotCw0Y/Sm9GI0LAg0LbTmdC90LUg0LTQtSDRgdC10LPQvNC10L3RgtC+0Y/QtNGA0L7Qu9GLINC20LDRgdGD0YjQsNC70YDQtNGL0pPSoyDQtNCwINC/0LDQudGL0LfQtNGL06kg0LzTqdC70YjQtdGA0ZYg0pvQsNC70YvQv9GC0YsuINCQ0Lsg0K3QotCWKNCh0J7QrSkg0pvQsNC70YvQv9GC0YssINC+0Lsg0L3QtdCz0ZbQt9GWIDEtMTUg0L3QtdC80LXRgdC1IDEtMTAg0LTQtdC50ZbQvSDSm9Cw0LvRi9C/0YLRiyDQtNC10L8g0LXRgdC10L/RgtC10LvQtdC00ZYu0K3QotCWINKb0LDQu9GL0L/RgtGLLCDQtNC10LzQtdC6INC10YjSm9Cw0L3QtNCw0Lkg0pvQsNCx0YvQvdGDINC20L7Smy7QrdC+0LfQuNC90L7RhNC40LvQtNC1LNC70LjRhNC+0YbQuNGC0YLQtdGALNC80L7QvdC+0YbQuNGC0YLQtdGAINC00LUg0pvQsNC70YvQv9GC0Ysg0L/QsNC50YvQt9C00YvSmyDQvNKb0LvRiNC10YDQtNC1LtCi0q/RgSDQutOp0YDRgdC10YLQutGW0YjRliAwLDcg0LPQtSDRgtC10qMg0LXQutC10L0g0LHQsNC70LDQtNCwLCDQsdKx0Lsg0L7QvdGL0qMg0YLTqdC80LXQvdC00LXQvyDQutC10YLQutC10L3QtNGW0LPRltC9INCx0ZbQu9C00ZbRgNGW0LXQtNGWLtKa0LDQu9GL0L/RgtGL0LTQsCAwLDg1LTEg0LPQtSDRgtC10qMuINCR0rHQuyDQtNCwINCw0L3QtdC80LjRj9C90YvSoyDQsdGW0YAg0LHQtdC70LPRltGB0ZYg0LHQvtC70YvQvyDRgtCw0LHRi9C70LDQtNGLLiDQkNC90LjQt9C+0YbQuNGC0L7QtyArKyDQtdC60LXQvSwg0LbQsNC70LDRiyDQsNC90LjQt9C+0YbQuNGC0L7QtyDQsdKx0Lsg0Y3RgNC40YLRgNC+0YbQuNGC0YLQtdGAINC806nQu9GI0LXRgNGW0L3RltKjINOp0LfQs9C10YDRg9GWINCx0L7Qu9GL0L8g0YLQsNCx0YvQu9Cw0LTRiywg0LDQuyDQv9C+0LnQutC40LvQvtGG0LjRgtC+0LcgKywg0L/QvtC50LrQuNC70L7RhtC40YLQvtGFINC00LXQvyDSm9Cw0L0g0LDRgNC90LDRgdGL0L3QtNCwINC20q/RgNCz0LXQvSDRjdGA0LjRgtGA0L7RhtC40YLRgtC10YDQtNGW0qMg0L/RltGI0ZbQvdGW0L3RltKj0rsg06nQt9Cz0LXRgNGD0ZYg0LDQudGC0YvQu9Cw0LTRiy7QkdKx0Lsg0JbSmtCQKNCe0JDQminQtNCwINCx0LXRgNGW0LvQs9C10L0g0LrTqdGA0YHQtdGC0LrRltGI0YLQtdGALNGP0pPQvdC40Lgg0LPQtdC80L7Qu9C+0LHQuNC9INC806nQu9GI0LXRgNGW0L3RltKjINGC06nQvNC10L3QtNC10L8g0LrQtdGC0YPRliwg0YLSr9GBINC606nRgNGB0LXRgtC60ZbRiNGW0L3RltKjINC90L7RgNC80LDQtNCw0L0g0YLTqdC80LXQvSDQsdC+0LvRiywg0LDQvdC40LfQvi0g0LbTmdC90LUg0L/QvtC50LrQuNC70L7RhtC40YLQvtC30LTQsNGAINC205nQvdC1INCx0LDQu9Cw0L3Ri9KjINCw0L3QsNGB0YvQvdGL0qMg0YjQsNKT0YvQvNC00LDRgNGLKNOZ0LvRgdGW0LfQtNGW0Los0YLQtdGA0ZYg0LHQvtC30pPRi9C70YIg0YLSsdGB0YLRlizRgtOZ0LHQtdGC0ZYg0YLTqdC80LXQvSDQsdC+0LvRg9GLKdCw0L3QtdC80LjRjyDQsNGD0YDRi9C90LAg0LHQvtC70LbQsNC/INGC0rHRgC7QltKa0JAt0LTQsCDQsdC+0LvQsNGC0YvQvSDRgNC10YLQuNC60YPQu9C+0YbQuNGC0YLQtdGA0LTRliDQtNC1INKb0LDRgNCw0YMg0LrQtdGA0LXQutC/0ZbQvSwg06nQudGC0LrQtdC90ZYg0LDQvdC10LzQuNGPINCx0L7Qu9GB0LAg0pvRi9C30YvQuyDRgdKv0LnQtdC6INC60LXQvNGW0LPRliDRjdGA0LjRgtGA0L7RhtC40YLRgtC10YDQtNGWINGC0q/Qt9GW0L8g0q/Qu9Cz0LXRgNC80LXQuSDQttCw0YLQsNC00Ysg0LTQsCDRgNC10YLQuNC60YPQu9C+0YbQuNGC0YLQtdGA0LTRliDSm9Cw0L3Sk9CwINC606nQvyDQvNOp0LvRiNC10YDQtNC1INGI0YvSk9Cw0YDQsNC00Ysu0YHQvtC90LTRi9Kb06nRgtCw0L0g0LTQsCDQsdCw0LvQsNC00LAg0LDQvdC10LzQuNGPINCx0L7Qu9GL0L8g0LbQsNGC0YvRgCDQtNC10L8g0pvQvtGA0YvRgtGL0L3QtNGLINC20LDRgdCw0LTRi9C80Lws0pvQsNC5INCw0L3QtdC80LjRjyDRgtKv0YDRliDQtdC60LXQvdC00ZbQs9GW0L0g0LbTmdC90LUg0L7QvdGL0qMg0YHQtdCx0LXQv9GC0LXRgNGW0L0g0LDQvdGL0rHRgtCw0YMg0q/RiNGW0L0g0LHQsNGB0pvQsCDQtNCwINCw0L3QsNC70LjQtyDRgtKv0YDQu9C10YDRltC9LCDQt9C10YDRgtGC0LXRgyDTmdC00ZbRltGB0YLQtdGA0ZYg0LTQtSDSm9Cw0YDQsNGDINC60LXRgNC10Lo=</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1" table:style-name="ce1">
            <text:p>1066911</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i4g0LrQsNC9INCw0L3QsNC70LjQt9C40L3QuNC9INC90LDRgtC40LbQtdC70LXRgNC40L3QtSDQutC10LvQtdGC0LjQvSDQsdC+0LvRgdCw0Log0LHQsNC70LDQvdGL0L0g0LrQsNC9INC60L7RgNGB0LXRgtC60LjRiNGC0LXRgNC4INCx0LjQt9Cz0LUg0LHQtdC70LPQuNC70Lgg0LHQuNGAINCw0YPRi9GC0LrRg9C70LDQu9Cw0YDQtNGLINCw0LnQutGL0L0g0LrSm9GA0YHQtdGC0LXQtNC4LiDQsdC10YDQuNC70LPQtdC9INC90LDRgtC40LbQtdC70LXRgNCz0LXRgtGD0YHQuNC90LTQuNGA0LzQtdGB0LjQvdC1INC60LXQu9C10YLQuNC9INCx0L7Qu9GB0LDSo9C6INCz0LXQvNC+0LPQu9C+0LHQuNC9INCx0LDQu9Cw0LTQsNCz0Ysg0LTQtdC90LPQtdC50LjQsdC40LfQtNC1IDkwINCz0Lsg0LrRg9GA0L/QsNC50LTRiyDQsdGD0Lsg0LHQuNC30LTQtSDQsdC40LvQtdGC0LjQvSDQsdC+0LvRgdCw0Log0LrQsNC70YvQv9GC0YvQtNCw0L0g0YLQvtC80LXQvSDQtdC60LXQvdC40L0g0LHQuNC70LXQvNC40LcuINCx0YPQuyDQsdC40LfQtNC1INC60YvQt9GL0Lsg0LrQsNC9INC20LDRgdGD0YjQsNC70LDRgNGL0L3Ri9C9INGP0LPQvdC4INCw0LfQsNC50Y7Ri9C80LXQvSDQttCw0L3QtdC00LUg0LPQtdC80L7Qs9C70L7QsdC40L3QvdC40L0g0LTQtdC90LPQtdC50LjQvdC40L0g0YLQvtC80LXQvdC00LXRg9C40LzQtdC9INGB0LjQv9C/0LDRgtCw0LvQsNGC0YvQvSDQttCw0LPQtNCw0LnQu9Cw0YDQtNGL0L0g0LHQuNGA0Lgg0LHQvtC70YvQvyDRgtCw0LHRi9C70LDQtNGLIC7QsNC90LXQvNC40Y8g0L7Qt9C40LzQuNC3INCx0LjQu9C10YLQuNC90LTQtdC5INCw0LvRgdC40LfQtNC40LogLCDQsdC+0LfQsNGA0YMsINGC0LDQsdC10YLRgtC40L0g0LHQvtC70LzQsNGD0YvQvNC10L0g0YHQuNC/0LDRgtGC0YLQsNC70LDQtNGLLiDQu9C10LnQutC+0YbQuNGC0YLQtdGA0LPQtSDQutC10LvQtdGC0LjQvSDQsdC+0LvRgdCw0Log0YHQsNC90Ysg0LbQsNC70L/Ri9C70LDQuSDQutCw0LvRi9C/0YLRiyDRiNC10LrRgtC10YDQtNC1INCx0YPQuyDQsdC40LfQtNC1INC60LDQu9GL0L/RgtGLINC40LzQvNGD0L3QtNGL0Log0LbQsNGD0LDQv9GC0Ysg0LrQvtGA0YHQtdGC0LXQtNC4LiDQutCw0L3QtNCw0LPRiyDQu9C10LnQutC+0YbQuNGC0YLQtdGA0LTQuNC9INC00LXRhNGE0LXRgNC40YbQuNCw0L3QsNC70LTRiyDRgdCw0L3RiyAg0LHQuNC30LTQtSDQu9C10LnQutC+0YbQuNGC0YLRgtC10YDQtNC40L0g0LDRgNGC0YPRgNC70Lgg0YLRg9GA0LvQtdGA0LjQvdC40L0g0L/QsNC50YvQt9GLINC60L7RgNGB0LXRgtC40LvQs9C10L0gLtC90LXQudGC0YDQvtGE0LjQu9GM0LTQtdGA0LTQuNC9INC20LDQvdC1INGN0LfQvtC90L7RhNC40LvRjNC00LXRgNC00Lgg0L0g0LHQsNC30L7RhNC40LvQtNC10YDQtNC40L0g0LvQtdC50LrQvtGG0LjRgtC10YDQtNC40L0g0YHQvtC90YvQvNC10L0g0LrQsNGC0LDRgCDQvNC+0L3QvtGG0LjRgtGC0LXRgNC00LjQvSDRgdCw0L3RiyDQsdC40LfQtNC1INC60LDQu9GL0L/RgtGLINGI0LXQutGC0LXRgNC00LUg0LHRg9C7INCx0LjQt9C00LUg0Y/Qs9C90Lgg0YLQtdGA0LTQtdGB0YLQuNGA0LjQu9Cz0LXQvSDQttCw0YPQsNC/0YLRiyDRgNCw0YHRgtCw0LnQtNGLLiDRjdGA0LjRgtGA0L7RhtC40YLRgtC10YDQtNC40L0g0YHQsNC90Ysg0LHQsNC70LDQtNCw0LPRiyDQutC+0YDRgdC10YLQutC40YjRgtC10YDQuCAzLDgqMTAgMTIg0Lsg0LrRg9GA0LDQudC00YsgINCx0YPQuyDQsdC40LfQtNC1INC60LDQu9GL0L/RgtGLINGI0LXQutGC0LXRgNC00LUg0LTQtdC/INCw0LnRgtCwINCw0LvQsNC80YvQty4g0LHQuNC30LTQtSDRjdGA0LjRgtGA0L7RhtC40YLRgtC10YDQtNC40L0g0LrQvtGA0YHQtdGC0LrQuNGI0YLQtdGA0LggINGC0YPRgSDQuNC90LTQtdC60YHQuCDQttCw0L3QtSDQsNC90LDRhtC40LfQvtGG0LjRgtC+0Lcg0LzQtdC9INC/0L7QudC60LjQu9C+0LfQuNGC0L7Qt9C00YvQvSDQsdC+0LvRg9GLINC00LXQs9C10L3QuNC80LjQtyDQsdC40Lcg0LHQuNC70LXRgtC40L0g0LDQvdC10LzQuNGP0L3Ri9C9ICDQsdC10LvQs9C40LvQuCDQsdC40YAg0YLRg9GA0LvQtdGA0LjQvdC00LUg0LHQsNC50LrQsNC70YLQsNGL0L0g0Y3RgNC40YLRgNC+0YbQuNGC0YLQtdGA0LQg0LjQvSDQvNC+0LvRiNC10YDQuCDQvNC10L0g0YTQvtGA0LzQuNCw0YHRi9GE0L3QtNCw0LPRiyDQsNC50LrRi9C9INCw0LnRi9GA0LzQsNGI0YvQu9GL0LrRgtCw0YDQtNGLINC60L7RgNGB0LXRgtC10LTQuCAuINCw0Lsg0LXQvdC00Lgg0YDQtdGC0LjQutGD0LvQvtGG0LjRgtGC0LXRgNCz0LUg0YLQvtC60YLQsNC70LDRgtGL0L0g0LHQvtC70YHQsNC8INCx0YPQu9C+0LbQtdGA0LTQtSDQvdCw0YLQuNC20LXQu9C10YDQtNC1IDEsMiDQv9Cw0LnRi9C3INCw0L3QtdC80LjRj9Cz0LAg0LbQsNGD0LDQvyDRgNC10LrRgtC40L3QtNC1INCx0LjQt9C00LUg0Y3RgNC40YLRgNC+0YbQuNGC0YLQtdGA0LTQuNC9INGD0LfQtNC40LrRgdC40Lcg0L7QvdC00LjRgNC40LvQuNC/INC20LDRgtC60LDQvdGL0L0g0LrQvtGA0YHQtdGC0LXQtNC4LiDQttCw0LvQv9GLINC60LDQvSDQsNC90LDQu9C40LfQuNC90LjQvSDQutC+0YDRi9GC0YvQvdC00YvQu9Cw0YDRi9C9LtCwINC60LXQu9C10YLQuNC9INCx0L7Qu9GB0LDQuiDQsdCw0LvQsNC00LAg0LDQvdC10LzQuNGPINCx0LDRgCDQtdC60LXQvdC40L0g0LrQvtGA0YHQtdGC0LjQvyDRgtGD0YAu0LHRg9C7INCx0LjQt9C00LUg0LDQu9GB0LjQt9C00LjQuiDQsdC+0LfQsNGA0YMg0YLQsNCx0LXRgtGC0LjQvSDQvdCw0YjQsNGA0LvQsNGD0Ysg0YHRi9C90LTRiyDQsdC10LvQs9C40LvQuNC10YDQtNC40L0g0LHQvtC70YPRiy7QsNC90LXQvNC40Y/QvdGL0L0g0YHQtdCx0LXQsdC40L0g0LbQsNC90LXQtNC1INGC0LjRgdGC0Lgg0LXQvNC00LXRg9C00Lgg0LDQvdGL0LrRgtCw0YMg0YPRiNC40L0g0LrQvtGB0YvQvNGI0LAg0LHQsNCz0LDQu9Cw0L8g0LbQsNC90LUg0YLQtdGA0LPQtdGDINC60LDQttC10YIuPGJyIC8+DQoiLjxiciAvPg0KMS4g0JrQuNGI0LrQtdC90YLQsNC5INCx0LDQu9Cw0LvQsNGA0LTQsNCz0Ysg0YLQvtC80LXQvdCz0LggINGC0YvQvdGL0YEg0LDQu9GDINC20L7Qu9C00LDRgNGL0L3QtNCw0LPRiyDQtNCw0LzQuNGC0YvQvSDQsNGD0YDRg9C70LDRgNCz0LAg0LHQuNC30LTQtSDQutC10YPQtNC1INC60YPRi9GB0YvQvdGL0L0g0LHQtdC70LPQuNC70Lgg0LHQuNGAINCw0L3QsNGC0L7QvNC40Y/Qu9GL0Log0YHQvtC90YvQvNC10L0g0LrQsNGC0LDRgCDRhNC40LfQuNC+0LvQvtCz0LjRj9C70YvQuiDQtdGA0LXQutGI0LXQu9C40LrRgtC10YAg0LDRgdC10YAg0LXRgtGDINCw0LHQtNC10L0g0LzRg9C80LrQuNC9IC4g0L7Qu9Cw0YDQs9CwINCx0LjQtyDQvtGB0YvQu9C/0LDRgNC00Ysg0LbQsNGC0LrRi9C30LAg0LDQu9Cw0LzRi9C3INC60LjRiNC60LXQvdGC0LDQuSDRgtGL0L3Ri9GBINCw0LvRgyDQttC+0LvQtNCw0YDRiyDQutC40YjQutC10L3RgtCw0Lkg0LHQsNC70LDQu9Cw0YDQtNCw0LPRiyDRgtGL0L3Ri9GBINCw0LvRgyDQttC+0LvQtNCw0YDRiyDRgtCw0LLRgCDQttCw0L3QtdC00LUg0LrQsNCx0YvQvdGD0LTRi9C9INGB0L7QvdGL0LzQtdC9INGI0YvRgNGL0YjRgtGL0L0g0L3QtSDQsdC+0LvQvNCw0YHQsCDQsdC+0LPQtNC1INCx0LjRgCDQtdGA0LXQutGI0LXQu9C40LrRgtC10YAg0LDRgdC10YAg0LXRgtC10LTQuC4g0LHRg9C7INCx0LjQt9C00LUg0LHRgNC+0L3RhdC40L7Qu9C40YIg0L3QtdC80LXRgdC1INCw0YHRgtC80LAg0YHQuNGP0LrRgtGLINGC0L7QvNC10L3Qs9C4INGC0YvQvdGL0YEg0LbQvtC70LTQsNGA0YvQvdGL0L0g0LDRg9GA0YPQu9Cw0YDRi9C90LAg0LDQu9GL0L8g0LrQtdC70YPQuCDQvNGD0LzQutC40L0gLtC00LDQvNGL0LzQsNCz0LDQvSAg0LjQvNC80YPQvdC00YvQuiDQttGD0LnQtSAg0LrQuNGI0LrQtdC90YLQsNC5INCx0LDQu9Cw0LvQsNGA0LTQsCDQsdC40Lcg0LHQuNC70LXRgtC40L3QtNC10Lkg0LjQvNC80YPQvdC00YvQuiDQttGD0LnQtSDQsNC70Lgg0LTQtSDQtNCw0LzRi9C/INC60LXQu9C10LTQuCDQuNC90YTQtdC60YbQuNCw0LvQsNGA0YvRhNC90LAg0YHQvtC90YvQvSDQuNGI0LjQvdC00LUg0LrQtdC70LXRgtC40L0g0LHQvtC70YHQsNC6INC/0L3QtdCy0LzQvtC90LjRjyDQttCw0L3QtdC00LUg0LHRgNC+0L3RhdC40YLQutC1INGB0LXQt9C40LzRgtCw0Lsg0LXRgtC10LTQuC4gINC00LXRgtC40LvQvNC10LPQtdC9INGC0YvQvdGL0YEg0LDQu9GDINCx0YPQu9GI0YvQutC10YLRgtC10YDQuCDQutC40YjQutC10L3RgtCw0Lkg0LHQsNC70LDQu9Cw0YDQtNCw0LPRiyAg0YLRi9C90YvRgSDQsNC70YMg0LHRg9C70YjRi9C60LXRgtC10YDQuCDQsNGA0LDQu9GL0Log0YHQvtC90YvQvSDQuNGI0LjQvdC00LUg0LDRgtCw0L8g0L7RgtC10YLQuNC9INCx0L7Qu9GB0LDQvCDQtNC40LDRhNGA0LDQs9C80LAg0LzQtdC9INC60LDQsdGL0YDQs9Cw0LDRgNCw0LvRi9C6INCx0YPQu9GI0YvQutC10YLRgtC10YAg0LbQsNC90LXQtNC1INCw0YDQsNC70YvQuiDQsdGD0LvRiNGL0LrQtdGC0YLQtdGAINGC0L7Qu9GL0Log0LTQsNC80YvQvNCw0LPQsNC9INCx0L7Qu9GL0L8g0LrQtdC70LXQtNC4LiDQsdGD0Lsg0LHQuNC30LTQtSDRiNGL0YDRi9GI0YLRiyDRgtC40LjQvNC00Lgg0LrQtdGC0LjRgNGD0LTQtSDQttCw0L3QtdC00LUg0L7QutC/0LXQvdC40L0g0LbQtdGC0LrQuNC70LjQutGC0Lgg0LbQtdC00LXQu9C00LXRgtGD0LTQtSDQutC40YvQvdC00YvQutGC0LDRgCDQsNC60LXQu9GD0Lgg0LzRg9C80LrQuNC9IC4g0LHRg9C7INCx0LjQt9C00LUg0L7QutC/0LXQvdC40L0g0YLQvtC80LXQvdCz0Lgg0YLRi9C90YvRgSDQttC+0LvQtNCw0YDRi9C90YvQvSDQsNGD0YDRg9C70LDRgNGL0L0g0YPRiNGL0LrRgtGL0YDRg9Cz0LAg0LDQutC10LvRg9C4INCw0LHQtNC10L0g0LzRg9C80LrQuNC9LiDRgtGL0L3Ri9GBINCw0LvRgyDQttC40LXQu9C40LPQuNC9INC20L7Qs9Cw0YDRi9C70LDRg9GLINC20LDRgSDQsdCw0LvQsNC70LDRgNC00LAg0LDQtNC10YLRgtC1INC10YDQtdGB0LXQuiDQsNC00LDQvNC00LDRgNCz0LAg0LrQsNGA0LDQs9Cw0L3QtNCwINGC0YvQvdGL0YEg0LDQu9GDINC20LjQuNC70LjQs9C4INC20L7Qs9Cw0YDRiyAuINCx0YPQuyDQsdC40LfQtNC1INC20L7Qs9Cw0YDQs9GLINC00LXQvdCz0LXQuSDQv9C+0YLQtdC90YbQuNCw0LvQtNGLINC/0LDRgtC+0LPQtdC90LTQtdGA0LTQuNC9INGC0L7QvNC10L3Qs9C4INGC0YvQvdGL0YEg0LbQvtC70LTQsNGA0YvQvdCwINC60L7QsdC40YDQtdC6INCw0YHQtdGAINC10YLQtdC00LguINC60LXRg9C00LUg0LrRg9GL0YHRiyDQvdCw0YDQtdGB0YLQtdC00LUg0LrQvtC60LjRgNC10LPQuCDQsdC+0YjQutC1INGC0LDRgNC40LfQtNC4INGB0LDQs9C40YLQsNC70YzQtNGLICDQvtC70YjQtdC80Lgg0LHQuNC30LTQtSDQutC+0LvQtNC10L3QtdC90LjQvdC1INGC0LXQvSDQsdC+0LvRi9C/INC60LXQu9C10LTQuCDQsNC7INC60LDQsdGL0YDQs9Cw0LvQsNGA0Ysg0L7QvNGL0YDRgtC60LDQvdGL0L0g0LPQvtGA0LjQt9Cw0L3RgtCw0LvRjNC00YsgLiDRgtC40Log0LHRg9GA0YvRiNGC0Ysg0LrQvtGB0YvQu9Cz0LDQvSDQsdC+0LvRi9C/INC60LXQu9C10LTQuC4gINGN0L/QuNCz0LDRgdGC0YDQsNC70YzQtNGLINCx0YPRgNGL0q/RiCDQtNC+0LPQsNC7INC20LDQvdCwINGC0YPQs9Cw0L0g0L3QsNGA0LXRgdGC0LXQu9C10YDQtNC1INCw0LvQs9Cw0YjQutGLINCw0LnQu9Cw0YDRi9C90LTQsCDQsdCw0LvQsNGA0LTQsNCz0Ysg0YLRi9C90YvRgSDQsdGD0LvRiNGL0LrQtdGC0YLQtdGA0Lgg0LDQu9GB0LjQtyDRgtGL0L3Ri9GBINCw0LvRgyDQsdC10YLQutC10LnQu9C4INC00LjQsNGE0YDQsNCz0LzQsNC70YvQuiDRgtGL0L3Ri9GBINCw0LvRg9GLINCx0LDRgdGL0Lwg0LHQvtC70YvQvyDQutC10LvQtdC00LguINC+0YHQtSDQutC10LvQtSDQsdC40LfQtNC1INCw0LvQtNGL0L3Qs9GLINCw0YDQvtGC0LrRiyDQutC+0LvQtdC80Lgg0LrQuNGI0LXRgNC10LnQuNC/ICDQutC+0LrQuNGA0LXQutGC0LjQvSDQutC+0LvQtNC10L3QtdC9INC60LXRgdC40L3QtNC40YHQuNC8INC+0LLQsNC70YzQtNGLINCx0L7Qu9GL0L8g0LrQsNC70YvQv9GC0LDRgdCw0LTRiy4g0L7QvdGL0L0g0YTRgNC+0L3RgtCw0LvRjNC00Ysg0LrQvtC70LXQvNC4INCw0LnQutGL0L0g0YPQu9Cz0LDRj9C00YvQsNC7INGB0LDQs9C40YLQsNC70YzQtNGLINCx0L7Qu9C40LzQuCDQutC+0LvQtdC80Lgg0LbQsNCz0YvQvdCw0L0g0LrQuNGI0LjRgNC10LnQtdC00LguINC60LDQsdGL0YDQs9Cw0LvQsNGAINC40LjQu9C40LzQuCDRg9C70LrQtdC50LXQtNC4IC4g0Y3Qv9C40LPQsNGB0YLRgNCw0LvRjNC00Ysg0LHRg9GA0YvRiCDQsdC40LfQtNC1INGB0YPRgNC70LXQvdC1INCx0LDRgdGC0LDQudC00YsuINC+0LrQv9C1INGC0LjQvdC40L3QuNC9INGN0LvQsNGB0YLQuNC60LDQu9GL0Log0LrRg9GA0YvQu9GL0LzRiyDQsdC40LfQtNC1INC00LDQvNC40LTRiyDQttCw0L3QtdC00LUg0LLQtdC90YLQuNC70Y/RhtC40Y/Qu9GL0Log0LDRgdC10YDQuCDQttC+0LPQsNGA0YvQu9Cw0LnQtNGLLiDQvdCw0YDQtdGB0YLQtdGA0LvQtdGA0LTQtSDQttCw0L3QtdC00LUg0YHQsNCx0LjQu9C10YDQtNC4INCw0YLQtdC70LXQutGC0LDQtyDQttCw0L3QtdC0INC/0L3QtdCy0LzQvtC90LjRjyDQsdC+0LvRgyDQutCw0YPQv9C4INC20L7Qs9Cw0YDRiyDQsdC+0LvRi9C/INC60LXQu9C10LTQu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7" table:style-name="ce1">
            <text:p>1066927</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3RgdKx0YDQsNKb0pvQsCDRgtC+0LvRi9KbINC20LDRg9Cw0LHRi9C8O9CV0YDRgtC1INC20LDRgdGC0LDSk9GLINCx0LDQu9Cw0LvQsNGA0pPQsCDQutC10LvQtdGC0ZbQvSDQsdC+0LvRgdCw0psg0L7Qu9Cw0YDQtNGL0qMg0YLRi9C90YvRgSDQttC+0LvQtNCw0YDRiyDTmdC70ZYg0YLQvtC70YvSm9Kb0LDQvdC00Ysg0LTQsNC80YvQvyDQttC10YLRltC70LzQtdCz0LXQvSDRgdC+0qMg0LrQtdGD0LTQtSDSm9GD0YvRgdGL0L3QtNCwINCx0ZbRgNKb0LDRgtCw0YAg0LXRgNC10LrRiNC10LvRltC60YLQtdGAINC10YHQtdCx0ZbQvdC10L0g0LDRg9GA0YPSk9CwINCx0LXQudGW0Lwg0LHQvtC/INC60LXQu9C10LTRli7QndC10LPRltC30ZbQvdC10L0g0LHQsNC70LDQu9Cw0YAg0LTQsNC80YMg0q/RgdGC0ZbQvdC00LUg0LHQvtC70pPQsNC90L3QsNC9INC60LXQudGW0L0g0LrQtdGD0LTQtSDSm9GD0YvRgdGL0L3Ri9KjINC60ZbRiNGWINCx0L7Qu9GD0Ysg0LbTmdC90LUg0LTQuNCw0YTRgNCw0LPQvNCw0L3Ri9KjINC20LDQu9C/0Ysg0LrRltGI0LrQtdC90LUg0LbQvtKT0LDRgNGL0YDQsNKbINC+0YDQvdCw0LvQsNGB0YPRi9C90LDQvSAs06nQtyDQutC10LfQtdCz0ZbQvdC00LUg0YDQtdC30LXRgNCy0YLRliDRgtGL0L3Ri9GBINCw0LvRg9C00YvSoyDQsNC30LDRjtGL0L3QsCDQttOZ0L3QtSDRgtGL0L3Ri9GBINCw0LvRgyDSm9C+0LfSk9Cw0LvRi9GB0YvQvdGL0qMg0YjQtdC60YLQtdC70YPRltC90LUgINCw0LvRi9C/INC60LXQu9C10LTRliAuINCe0LTQsNC9INCx06nQu9C10Log0LHRgNC+0L3RhSzQsdGA0L7QvdGF0LjQvtC70LAg0LzQtdC9INCw0LvRjNCy0LXQvtC70LDQu9Cw0YDQtNGL0qMg0YHQsNC70YvRgdGC0YvRgNC80LDQu9GLINGC0q/RgNC00LUg0LTQuNCw0LzQtdGC0YDRltC90ZbSoyDQutGW0YjRliDQsdC+0LvRgyDQtdGB0LXQsdGW0L3QtdC9INCx0ZbRgtC10LvRltC/INKb0LDQu9GD0Ysg05nQsdC00LXQvSDQvNKv0LzQutGW0L0o0LfQsNGB0YLQvtC5KSAuINCe0LTQsNC9INCx06nQu9C10Log0YLRi9C90YvRgSDQsNC70YPSk9CwINKb0LDRgtGL0YHQsNGC0YvQvSDQsdKx0LvRiNGL0pvQtdGC0YLQtdGA0LTRltKjINOZ0LvRgdGW0LcgINC205nQvdC1INCx0LDQu9Cw0LvQsNGA0LTQsCDRgtGL0L3Ri9GBINCw0LvRgyDQtdGA0LXRgdC10LrRgtC10YDQs9C1INKb0LDRgNCw0pPQsNC90LTQsCDQttC40ZYg0LHQvtC70pPQsNC90LTRi9Kb0YLQsNC9INGB0L/QsNC30Lwg0LHQvtC70YMg0YvSm9GC0LjQvNCw0LvQtNGL0LvRi9KT0Ysg0LbQvtKT0LDRgNGLLiDQndC10LPRltC30ZbQvdC10L0g0YjRi9GA0YvRiNGC0Ysg0pvQsNCx0LDRgtGC0YvSoyDQttKx0pvQsCDQsdC+0LvRg9GLINC40L3RhNC10LrRhtC40Y/Qu9GL0psg0LDRg9GA0YPSk9CwINCx0LXQudGW0LzQtNGW0LvRltC60YLRliDQsNGA0YLRgtGL0YDQsNC00YsgLtCi0LDSk9GLINCx0ZbRgCDQttCw0LvQv9GLINC80YvRgdCw0Lsg0YDQtdGC0ZbQvdC00LUg0YjQsNC70LAg0YLRg9KT0LDQvSDQvdOZ0YDQtdGB0YLQtdC90ZbSoyDRgtGL0L3Ri9GBINCw0LvRgyDQvNKv0YjQtdGB0ZYg05nQu9GWINGC0L7Qu9GL0psg0LbQtdGC0ZbQu9GW0L8g0q/Qu9Cz0LXRgNC80LXRgyDQtdGB0LXQsdGW0L3QtdC9INGB0YPRgNGE0LDQutGC0LDQvdGCINGB0LjQvdGC0LXQt9GW0L3RltKjINGC06nQvNC10L0g0L3QtSDQvdCw0YjQsNGAINCx0L7Qu9GD0YsuINCQ0Lsg0L7QuyDTqdC3INC60LXQt9C10LPRltC90LTQtSDQsNC70YzQstC10L7Qu9Cw0LvQsNGA0LTRi9KjINCx0ZbRgCAtINCx0ZbRgNGW0L3QtSAg0LbQsNCx0YvRgdC/0LDRg9GL0L3QsNC9INC205nQvdC1INGB0YvRgNGC0pvRiyDQvtGA0YLQsNC00LDQvSDQutC10LvQtdGC0ZbQvSDQstC40YDRg9GB0YLQsNGA0LTQsNC9INKb0L7RgNKT0LDQvdGL0Ygg0pvRi9C30LzQtdGCINCw0YLSm9Cw0YDQsNC00YsuINCk0LjQt9C40L7Qu9C+0LPQuNGP0LvRi9KbINC10YDQtdC60YjQtdC70ZbQuiDQttCw0qPQsCDQsNC50YLQsCDQutC10YLQutC10L3QtNC10Lkg0LDQtNCw0Lwg0LzQuNC90YPRgtGL0L3QsCDRiNCw0LzQsNC80LXQvSAxOC0yMCDRgtGL0L3Ri9GBINCw0LvRgdCwLCDQsdCw0LvQsNC70LDRgCDQttOZ0L3QtSDQvdOZ0YDQtdGB0YLQtdC70LXRgCAg0YjQsNC80LDQvNC10L0gMjUtMzAg0YDQtdGCINC00LXQvCDQsNC70LDQtNGLLtKa0L7RgdCwINC60LXRgtC10YLRltC90ZbQvCDRgtGL0L3Ri9GBINC20L7Qu9GL0L3QsCDSm9Cw0YLRi9GB0YLRiyDQtdC80LXRgSDQttCw0LvQv9GLINC90LXQs9GW0LfQs9GWINC10YDQtdC60YjQtdC70ZbQuiDQvtC7INCx0LDQu9Cw0LvQsNGA0LTRi9KjINC40LzQvNGD0L3QtNGL0psg0LbSr9C50LXRgdGW0L3RltKjINKb0LDQu9GL0L/RgtCw0YHRgyDSr9GB0YLRltC90LTQtSDQsdC+0LvRg9GL0L3QtNCwICzRj9KT0L3QuCDQsdKx0Lsg0LTQtdCz0LXQvdGW0LzRltC3INOZ0LvRliDSm9C+0YDSk9Cw0L3Ri9GI0pvQsCDSm9Cw0YLRi9GB0LDRgtGL0L0g0LDQvdGC0LjQtNC10L3QtdC70LXRgNC00ZbSoyAg0YLQvtC70YvSm9Kb0LDQvdC00Ysg0YHQuNC90YLQtdC30LTQtdC70LzQtdGD0ZbQvdC00LUgLtCh0L7QuyDRgdC10LHQtdC/0YLQtdGA0LTQtdC9INC00LUg05nQtNC10YLRgtC1INCx0LDQu9Cw0LvQsNGAINGC0YvQvdGL0YEg0LbQvtC7INCw0YPRgNGD0LvQsNGA0YvQvdCwINC10YDQtdGB0LXQutGC0LXRgNCz0LUg0pvQsNGA0LDSk9Cw0L3QtNCwINCx0LXQudGW0Lwg0LHQvtC70YvQvyDQutC10LvQtdC00ZYgLiAgIDIt0YHSsdGA0LDSm9Kb0LAg0YLQvtC70YvSmyDQttCw0YPQsNCx0YvQvCA7INCd0LXQs9GW0LfRltC90LXQvSDSm9Cw0L0g0LDQvdCw0LvQuNC30ZbQvdC1INGB0q/QudC10L3QtSDQvtGC0YvRgNGL0L8g0LDQvdGL0psgLNC+0YHRiyDQsdCw0LvQsNC00LAg0LDQvdC10LzQuNGPINC00LXQs9C10L0g0LTQuNCw0LPQvdC+0Lcg0pvQvtGPINCw0LvQsNC80YvQty7QodC10LHQtdCx0ZYg0LPQtdC80L7Qs9C70L7QsdC40L0g0L3QvtGA0LzQsNC00LDQvSDRgtOp0LzQtdC9ICzRgtKv0YEg0LrTqdGA0YHQtdGC0LrRltGI0ZYgMCw3INCx0rHQuyDQtNC10LPQtdC90ZbQvNGW0LcgINCz0LjQv9C+0YXRgNC+0LzQtNGLINCw0L3QtdC80LjRjywg0Y3RgNC40YLRgNC+0YbQuNGCINGC0rHQvdGDINC20YvQu9C00LDQvNC00YvSk9GLINC00LAg0L3QvtGA0LzQsNC00LDQvSDQtdC005nRg9GW0YAg0LbQvtKT0LDRgNGLIC7Qm9C10LnQutC+0YbQuNGCINC806nQu9GI0LXRgNGWIC0g0LbQsNC70L/RiyDQvdC+0YDQvNCw0LTQsC7QntC00LDQvSDQsdOp0LvQtdC6INCw0L3QtdC80LjRjyDQtNC40LDQs9C90L7Qt9GL0L0g0L3QsNKb0YLRi9C70LDRgyDSr9GI0ZbQvSDQvdCw0YPSm9Cw0YEg0L/Qu9Cw0LfQvNCw0LTQsNKT0Ysg0LPQtdC80L7Qs9C70L7QsdC40L3QtNGWLNC/0YDQvtGC0YDQvtC80LHQuNC90LTRliDRg9Cw0pvRi9GC0YLRiyDQttOZ0L3QtSDQlC3QtNC40LzQtdGA0LTRliDRgtC10LrRgdC10YDRgyDSm9Cw0LbQtdGCLtCf0L7QudC60LjQu9C+0YbQuNGC0L7QtyDQttOZ0L3QtSDQsNC90LjQt9C+0YbQuNGC0L7QtyDQtNC10LPQtdC90ZbQvNGW0Lcg0Y3RgNC40YLRgNC+0YbQuNGC0YLRltKjINOp0LfRltC90ZbSoyDQttCw0YDRgtGL0Lkg0LDQuSDRgtOZ0YDRltC30LTRliDRhNC+0YDQvNCw0YHRi9C90LDQvSDQsdCw0YHSm9CwINGC0q/RgNCz0LUg06nRgtGD0ZYg0LbTmdC90LUg0LbQsNC70L/RiyDRgdCw0L3Ri9C90YvSoyDQsNC30LDRjtGLINC20LDRgtCw0LTRiy4g0JbQsNC70L/RiyDQvdCw0YPSm9Cw0YHRgtGL0qMg0YjQsNKT0YvQvNC00LDRgNGL0L3QsCDQutC10LvQtdGC0ZbQvSDQsdC+0LvRgdCw0psg0LDQvdC10LzQuNGPINC60LXQt9GW0L3QtNC1ICDQsNC00LDQvCDTmdC70YHRltGA0LXQudC00ZYg0LbTmdC90LUg0L7Sk9Cw0L0g0L3QtdCz0ZbQt9Cz0ZYgINGB0LXQsdC10L8g0LPQtdC80L7Qs9C70L7QsdC40L0g0LDQtyDQsdC+0LvSk9Cw0L3QvdCw0L0g0L7RgtGC0LXQs9GWINGC0LDRgdGL0LzQsNC70Ysg0LTSsdGA0YvRgSDQsdC+0LvQvNCw0LnQtNGLINC205nQvdC1INC+0Lsg06nQtyDQutC10LfQtdCz0ZbQvdC00LUg0Y3QvdC10YDQs9C40Y8g0YLSr9C30ZbQu9GD0ZbQvdGW0qMg0YLQtdC20LXQu9GD0ZbQvdC1INCw0LvRi9C/INC60LXQu9C10LTRliAu0JDQuyDRgtC10YDRltGB0ZbQvdGW0qMg0LDSm9GI0YvQuyDRgtCw0YDRgtGDINGB0LXQsdC10LHRliDQs9C10LzQvtCz0LvQvtCx0LjQvSDRgtOp0LzQtdC9INCx0L7Qu9GDINOZ0YHQtdGA0ZbQvdGW0LXQvSDQsdC10LvQvtC60YLRi9KjINGC0q/Qt9GW0LvRg9GW0L3RltKjINGC0LXQttC10LvRg9GW0L3QtNC1INC205nQvdC1INGC05nQsdC10YLRgtGW0qMg0YLTqdC80LXQvSDQsdC+0LvRg9GLINCw0pPQt9Cw0pPQsCDSm9Cw0LbQtdGC0YLRgtGW0LvRltC60YLRltKjINGC06nQvNC10L3QtNC10YPRliAu0JDQvdC10LzQuNGP0L3Ri9KjINKb0LDQuSDRgtKv0YDRliDQtdC60LXQvdGW0L0g0LDQvdGL0pvRgtCw0YMg0q/RiNGW0L0g0YLQsNKT0Ysg0LTQsCDQsdCw0YHSm9CwINKb0L7RgdGL0LzRiNCwINCw0L3QsNC70LjQt9C00LXRgCDSm9Cw0LbQtdGCICAu0J7RgdGLINCw0L3QsNC70LjQtyDQvdOZ0YLQuNC20LXQu9C10YDRltC90LUg0YHQsNC5INCw0L3QtdC80LjRjyDQtNC10LPQtdC9INCw0YPRgNGD0pPQsCDQvdCw0pvRgtGLINGC0L7Sm9GC0LDQu9C00YvQvCAu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74" table:style-name="ce1">
            <text:p>1066974</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0JXRgNGC0LUg0LbQsNGB0YLQsNKT0Ysg0LHQsNC70LDQu9Cw0YDQtNCwINGC06nQvNC10L3Qs9GWINGC0YvQvdGL0YEg0LDQu9GDINC20L7Qu9C+0LTQsNGA0YvQvdGL0qMg0LDRg9GA0YPQu9Cw0YDRi9C90YvSoyDQtNCw0LzRg9GL0L3QtNCwINC60LXRhtC00LUg0pvRg9GL0YHRi9C90YvSoyDQtdGA0LXQutGI0LXQu9GW0LrRgtC10YDRliDQsdGW0YDQvdC10YjQtSDQvNCw0qPRi9C30LTRiyDRgNC+0LvRjCDQsNGC0pvQsNGA0LDQtNGLLCDRj9KT0L3QuCwg0LrQtdGD0LTQtSDSm9GD0YvRgdGL0L3Ri9KjINCx0LXQu9Cz0ZbQu9GWINCx0ZbRgCDQsNC90LDRgtC+0LzQuNGP0LvRi9KbINC205nQvdC1INGE0LjQt9C40L7Qu9C+0LPQuNGP0LvRi9KbINC10YDQtdC60YjQtdC70ZbQutGC0LXRgNGWINOZ0YHQtdGAINC10YLQtdC00ZYg0LTQtdC/INCw0LnRgtGDLNCwINCx0L7Qu9Cw0LTRiy4g0J7Qu9Cw0YDSk9CwINGC0L7Sm9GC0LDQu9Cw0YAg0LHQvtC70YHQsNC8OtC10YDRgtC1INC20LDRgdGC0LDSk9GLINCx0LDQu9Cw0LvQsNGA0LTQsCDRgtGL0L3Ri9GBINCw0LvRgyDQttC+0LvQtNCw0YDRiyDQtNC40LDQvNC10YLRgNGWINCx0L7QudGL0L3RiNCwINGC0LDRgCDQttOZ0L3QtSDSm9Cw0LHRi9C90YMg0LrQtdC30ZbQvdC00LUg0L7So9Cw0Lkg0LHRltGC0LXQu9GD0ZYg0Y/Sk9C90Lgg0L7QsdGB0YLRgNGD0LrRhtC40Y/Sk9CwINC+0qPQsNC5INKx0YjRi9GA0LDRg9GLINC80q/QvNC60ZbQvSDQttOZ0L3QtSDRiNGL0YDRi9GI0YLQsNGA0pPQsCDQtNC10LPQtdC9INC90LXQvNC10YHQtSDQsdOp0LPQtNC1INC30LDRgtGC0LDRgNC00YvSoyDQutC10LTQtdGA0LPRltGB0ZYg0LDRgNGC0LDQtNGLLiDQkdKx0Lsg0LXRgNC10LrRiNC10LvRltC60YLQtdGAINCx0YDQvtC90YXQuNC+0LvQuNGCLCDQsNGB0YLQvNCwINGB0LXQutGW0LvQtNGWINCw0YPRgNGD0LvQsNGA0LTRi9KjINC00LDQvNGD0YvQvdCwINGL0pvQv9Cw0Lsg0LXRgtGD0ZYg0LzSr9C80LrRltC9LiDQmtGW0YjQutC90YLQsNC5INCx0LDQu9Cw0LvQsNGA0LTRi9KjINC40LzQvNGD0L3QtNGL0psg0LbSr9C50LXRgdGW0LTQtSDTmdC70ZYg0YLQvtC70YvSmyDQtNCw0LzRi9C80LDSk9Cw0L0g0LHQvtC70LDQtNGLLiDQsdKx0Lsg0L7Qu9Cw0YDQtNGLINGC06nQvNC10L3Qs9GWINGC0YvQvdGL0YEg0LbQvtC70LTQsNGA0YvQvdGL0qMg0LjQvdGE0LXQutGG0LjRj9C70LDRgNGL0L3QsCwg0LzRgdC+0L3Ri9KjINGW0YjRltC90LTQtSDQv9C90LXQstC80L7QvdC40Y8g0LzQtdC9INCx0YDQvtC90YXQuNGC0LrQtSDRiNCw0LvQtNGL0pPRg9GL0L0g0LDRgNGC0YLRi9GA0LDQtNGLLiDQmtGW0YjQutC10L3RgtCw0Lkg0LHQsNC70LDQu9Cw0YDQtNCw0pPRiyDRgtGL0L3Ri9GBINCw0LvRgyDQsdKx0LvRiNGL0pvQtdGC0YLQtdGA0ZYg0YHQvtC90YvSoyDRltGI0ZbQvdC00LUgINC90LXQs9GW0LfQs9GW0LvQtNC10YDRliDQsdC+0LvRi9C/INGB0LDQvdCw0LvQsNGC0YvQvSDQtNC40LDRhNGA0LDQs9C80LAg0LzQtdC9INKb0LDQsdGL0YDSk9Cw0LDRgNCw0LvRi9KbINCx0rHQu9GI0YvSm9C10YLRgtC10YAg0YLQvtC70YvSmyDQttC10YLRltC70LzQtdCz0LXQvSDQsdC+0LvQsNC00YsuINCo0YvRgNGL0YjRgtGL0qMg0YLQsNC30LDRgNGC0YvQu9GD0Ysg0LzQtdC9INCy0LXQvdGC0LjQu9GP0YbQuNGP0L3RiyDRgdCw0pvRgtCw0YMg0Y/Sk9C90Lgg0pvQsNC70YvQv9GC0Ysg0LbQtdC70LTQtdGC0ZbQu9GD0LTRliDRgdCw0pvRgtCw0YPQtNCwINKb0LjRi9C90LTRi9KbINGC0YPQtNGL0YDQsNC00YsuICDQotGL0L3Ri9GBINCw0LvRgyDQttC40ZbQu9GW0LPRltC90ZbSoyDQttC+0pPQsNGA0YvQu9Cw0YPRi9C00LAg0LrRltGI0LrQtdC90YLQsNC5INCx0LDQu9Cw0LvQsNGA0LTRi9KjINGC0YvQvdGL0YEg0LDQu9GD0LTQsNKT0Ysg0LXQvdGA0LXQutGI0LXQu9GW0LrRgtC10YDRltC90ZbSoyDQsdGW0YDRliDQsdC+0LvRi9C/INGB0LDQvdCw0LvQsNC00YssINGB0LDQu9GL0YHRgtGL0YDQvNCw0LvRiyDRgtKv0YDQtNC1INC10YDQtdGB0LXQutGC0LXRgNC00ZbSoyDRgtGL0L3Ri9GBINCw0LvRgyDQttC40ZbQu9GW0LPRltC90LUg0pvQsNGA0LDSk9Cw0L3QtNCwINC20L7Sk9Cw0YDRiyAuINCa0ZbRiNC60LXQvdGC0LDQudC70LDRgNC00LAg0LrQtdGD0LTQtSDSm9GD0YvRgdGL0L3Ri9KjINKb0LvRiNC10LzRliDQttCw0pPRi9C90LDQvdC00LAg0LXRgNC10LrRiNC10LvQtdC90LXQtNGWINGP0pPQvdC4INC+0LvQsNGA0LTRi9KjINC60YPQtNC10YHRliDQsdOp0YjQutC1INGC05nRgNGW0LfQtNGWINGP0pPQvdC4INGB0LDQs9C40YLQsNC70LTRiyDTqdC70YjQtdC8INC606nQu9C00LXQvdC10qMg06nQu9GI0LXQvNCz0LUg0YLQtdKjLiDQntC80YvRgNGC0pvQsCDQvNC10L0g0pvQsNCx0YvRgNKT0LDQu9Cw0YAg0YLRltC6INCx0rHRgNGL0YjQv9C10L0gOTDQs9GA0LDQtNGD0YEg0pvSsdGA0LDQuSDQvtGC0YvRgNGL0L8g0pvQvtGB0YvQu9Cw0LTRiy4g0JHSsdC7ICDTqdC60L/QtdC90ZbSoyDRiNCw0pPRi9C9INGN0LrRgdC60YPRgNGB0LjRj9GB0YvQvSwg0YHQvtC90YvSoyDTmdGB0LXRgNGW0L3QtdC9INGC0LDRj9C3INGC0L3Ri9GBINCw0LvRg9C00Ysg0YLRg9C00YvRgNCw0LTRiy4g0KLRi9C90YvRgSDQsNC70YMg0LHSsdC70YjRi9Kb0LXRgtGC0LXRgNGW0L3RltKjINOZ0LvRgdGW0LfQtNGW0LPRltC00LUg0YLRi9C90YvRgSDQsNC70YMg0LDQutGC0ZbRgdGW0L3RltKjINGC0LXQtyDQsNGP0pvRgtCw0LvRg9GL0LzQtdC9INGB0LjQv9Cw0YLRgtCw0LvQsNC00YssINOp0LrQv9C10L3RltKjINGN0LvQsNGB0YLQuNC60LDQu9GL0psg0YLRltC90ZYg0L3QsNGI0LDRgCDQtNCw0LzRi9KT0LDQvSDQsdKx0Lsg0LDRg9GA0YPQtNGL0qMg0LTQsNC80YMg0pvQsNGD0L/RltC1INCw0YDRgtGC0YvRgNCw0LTRiy4g0KHQvtC90YvQvNC10L0g0pvQsNGC0LDRgCDQsdCw0LvQsNC70LDRgNC00LAg06nQutC/0LUg0LrTqdC70LXQvNGWINC10YDQtdGB0LXQutGC0LXRgNC80LXQvSDRgdCw0LvRi9GB0YLRi9GA0pPQsNC90LTQsCDQutGW0YjRliwg0YLRgNCw0YXQtdGPINC80LXQvSDQsdGA0L7QvdGF0YLQsNGA0LTRi9KjINC00LjQsNC80LXRgtGA0ZYg0YLQsNGALCDRiNC10LzRltGA0YjQtdC60YLQtdGA0ZYg0YLQvtC70YvSmyDQttC10YLRltC70LzQtdCz0LXQvS4uINKa0LDQsdGL0L3RgyDQutC10LfRltC90LTQtSDRgdC+0L3QtNGL0pvRgtCw0L3QtNCwINGC0YvQvdGL0YEg0LDQu9GDINC20L7Qu9C00LDRgNGLINC+0qPQstC5INCx0ZbRgtGW0LvQtdC00ZYuINCi0YvQvdGL0YEg0LDQu9GDINC20L7Qu9C00LDRgNGL0L3Ri9KjINGI0YvRgNGL0YjRgtGLINKb0LDQsdCw0YLRiyDRgdC+0L3QtNCw0Lkg0LDSmyDRgdC10LfRltC80YLQsNC70LTRi9KT0Ysg0LbQvtKT0LDRgNGLINC205nQvdC1INC20rHSm9CwINCx0L7Qu9Cw0LTRiywg0LHSsdC7INC30LDSm9GL0LzQtNCw0L3Rg9C70LDRgNKT0LAg0YHQtdC30ZbQvNGC0LDQu9C00YvSm9GC0Ysg0LDRgNGC0YLRi9GA0LDQtNGLLiAg0JDQuyDQsNC70YzQstC10L7Qu9Cw0LvQsNGA0pPQsCDQutC10LvQtdGAINCx0L7Qu9GB0LDQvCDQvtC70LDRgCDTmdC70ZbQtNC1INGC0L7Qu9GL0psg0pvQsNC70YvQv9GC0LDRgdC/0LDSk9Cw0L0g0YHQvtC90LTRi9Kb0YLQsNC9INCz0LDQtyDQsNC70LzQsNGB0YMg0YLQuNGW0LzQtNGW0LvRltCz0ZYg0YLTqdC80LXQvS4g0JrTqdC80LXQuSDQvNC10L0g0YLRgNCw0YXQtdGPINGI0LXQvNGW0YDRiNC10LrRgtC10YDRliDQuNC60LXQvNC00ZYsINOZ0LvRgdGW0LcsINC606nQvNC10Lkg0L/RltGI0ZbQvdGWINCy0L7RgNC+0L3QutCwINGC05nRgNGW0LfQtNGWLCDQsNC7INGC0YDQsNGF0LXRj9C90YvSoyDSsdC30YvQvdC00YvSk9GLINC80LXQvSDQtNC40LDQvNC10YLRgNGWINC60ZbRiNC60LXRgtCw0Lkg0LHSsdC7INC10YDQtdC60YjQtdC70ZbQutGC0LUg06nQtyDQutC10LfQtdCz0ZbQvdC00LUg0YLRi9C90YvRgSDQsNC70YMg0LbQvtC70LTQsNGA0YvQvdC00LAg0pvQsNCx0YvQvdGDINC80LXQvSDRltGB0ZbQvdGDINC10YHQtdCx0ZbQvdC10L0g0LbRi9C70LTQsNC8INCx0ZbRgtC10LvRg9Cz0LUg0YHQtdCx0LXQvyDQsdC+0LvQsCDQsNC70LDQtNGLLiAgICAgICAgICAgICAgICAgICAgICAgICAgICAgICAgICAgICA8YnIgLz4NCiAg0KHSsdGA0LDSmyAyLtCR0ZbRgCDQttCw0YHRgtCw0pPRiyDQsdCw0LvQsNC90YvSoyDSm9Cw0L0g0LDQvdCw0LvQuNC30ZbQvdC1INC205nQvdC1INGI0LDSk9GL0LzQtNCw0YDRi9C90LAg0pvQsNGA0LDQuSDQvtGC0YvRgNGL0L8g0L7QvdC00LAg0YLQtdC80ZbRgCDQttC10YLRltGB0L/QtdGD0YjRltC70ZbQutGC0ZYg0LDQvdC10LzQuNGP0L3RiyDQsdC+0LvQttCw0YPSk9CwINCx0L7Qu9Cw0LTRiy4g0JDQvdC10LzQuNGPINGB0LjQv9Cw0YLRiyDQs9C40L/QvtGF0YDQvtC80LTRiy4g0JbQsNGD0LDQsdGL0LzQtNGLINGC06nQvNC10L3QtNC1INC90LXQs9GW0LfQtNC10LnQvNGW0L0uINCT0LXQvNC+0LPQu9C+0LHQuNC9IDHQttCw0YHQsNGAINCx0LDQu9Cw0LvQsNGA0LTQsCDSm9Cw0LvRi9C/0YLRi9C00LAgMTEwLTE0MCDQsy/QuyDRiNCw0LzQsNGB0YvQvdC00LAg0LHQvtC70LDQtNGLLiDQkdGW0LfQtNGW0qMg0L3QsNGD0pvQsNGB0YLQsCDQvtC7IDkw0LMv0Lsg0LrTqdGA0YHQtdGC0ZbQvyDRgtKx0YDSkyDQtNC10LzQtdC6INC606nRgNGB0LXRgtC60ZbRiCDRgtOp0LzQtdC90LTQtdCz0LXQvdGW0L0g0LHQsNC50pvQsNC50LzRi9C3LiDQrdGA0LjRgtGA0L7RhtC40YLRgtC10YDQtNGW0qMg0pvQsNC70YvQv9GC0Ysg0LrTqdGA0YHQtdGC0LrRltGI0ZYgNCwxLTUsMioxMDEyL9C7LiDQkNC7INCx0ZbQt9C00ZbSoyDQsNC90LDQu9C40LfRltC80ZbQt9C00LUg0L7QuyAzLDgqMTAxMi/QuyDQutOp0YDRgdC10YLQtdC00ZYg0Y/Sk9C90Lgg0YLTqdC80LXQvdC00LXQs9C10L0uINCi0q/RgdGC0ZbQuiDQuNC90LTQuNC60LDRgtC+0YA6INKb0LDQu9GL0L/RgtGLINC20LDSk9C00LDQudC00LAgMCw4NS0xLDA1INCx0pvQuyDRjdGA0LjRgtGA0L7RhtC40YLRgtGW0qMg0LPQtdC80L7Qs9C70L7QsdC40L3QvNC10L0g0pvQsNC90YvSk9GDINC606nRgNGB0LXRgtC60ZbRiNGWINCw0L3QsNC70LjQtyDQvdOZ0YLQuNC20LXRgdGW0L3QtNC1INC+0LsgMCw3LdC90ZYg0LrTqdGA0YHQtdGC0ZbQvyDRgtKx0YAg0LHSsdC7INCz0LjQv9C+0YXRgNC+0LzQtNGLINCw0L3QtdC80LjRjyDQsdC10LvQs9GW0YHRli4g0K3RgNC40YLRgNC+0YbQuNGC0YLQtdGAINKb0rHRgNCw0LzRi9C90LTQsCDQs9C10LzQvtCz0LvQvtCx0LjQvdC90ZbSoyDQsNC3INC10LrQvdC00ZbQs9GW0L0g0LHRltC70LTRltGA0LXQtNGWLiDQkNC90LjQt9C+0YbQuNGC0L7QtyArKyDQsdKx0Lsg05nRgNGC0q/RgNC70ZYg0LzTqdC70YjQtdGA0LTQtdCz0ZYg0Y3RgNC40YLRgNC+0YbQuNGC0YLQtdGA0LTRltKjINCx0L7Qu9GD0YssINCx0rHQuyDRjdGA0LjRgtGA0L7RhtC40YIg0YHQuNC90YLQtdC30ZYg0Y/Sk9C90Lgg0Y3RgNC40YLRgNC+0L/QvtGN0Lcg0LHSsdC30YvQu9KT0LDQvdC00YvSk9GL0L0g0LrTqdGA0YHQtdGC0LXQtNGWLCDQsNC90LXQvNC40Y8uINCf0L7QudC60LjQu9C+0YbQuNGC0L7QtyArINGN0YDQuNGC0YDQvtGG0LjRgtGC0LXRgNC00ZbSoyDQv9GW0YjRltC90ZbSoyDTqdC30LPQtdGA0YPRliDQsdKx0LvQtNCwINCw0L3QtdC80LjRjyDQutOp0YDRgdC10YLQutGW0YjRliDQsdC+0LvRi9C/INGC0LDQsdGL0LvQsNC00YsuINCf0L7Qu9C40YXRgNC+0LzQsNC30LjRjyArKyDRjdGA0LjRgtGA0L7RhtC40YLRgtC10YDQtNGW0qMg0LrSu9Cx0LXRjtGW0L3RltKjINCx0LXQu9Cz0ZbRgdGWINCx0rHQuyDQvtGA0LPQsNC90LjQt9C80L3RltKjINC60L7QvNC/0LXQvdGB0LDRgtC+0YDQu9GL0psg0LzQtdGF0LDQvdC40LfQvNGWINC10YHQtdCx0ZbQvdC10L0g0LbSr9GA0ZbQvyDQvtGC0YvRgNKT0LDQvdGL0L0g0LXRgdC60LXRgNGDINOp0LDQttC10YIuICDQoNC10YLQuNC60YPQu9C+0YbQuNGC0YLQtdGAIDEsMiDQv9Cw0LnRi9C3LCDSm9Cw0LvRi9C/0YLRi9C00LAg0LHSsdC7IDAsNS0xLDUg0L/QsNC50YvQt9C00Ysg0LrTqdGA0YHQtdGC0LXQtNGWLCDQsdCw0LvQsNC00LAg0LHTmdGA0ZYg0L3QvtGA0LzQsCDQtdC60L3QtNGW0LPRliDQsdCw0LnSm9Cw0LnQvNGL0Lcg0LHSsdC7INGB0q/QudC10Log0LrQtdC80ZbQs9GW0L3RltKjINC00rHRgNGL0YEg0YDQtdCw0LrRhtC40Y/RgdGL0L3Ri9KjINGB0LDSm9GC0LDQu9KT0LDQvdC00YvSk9GLINGC0YPRgNCw0LvRiyDQsNC50YLQsNC00YsuINCb0LXQudC60L7RhtC40YLRgtC10YAg0pvQsNC70YvQv9GC0YvQtNCwIDYtMTIgMTAqOdC005nRgNC10LbQtdGB0ZYv0LsuINCR0LDQu9Cw0LTQsCAg0L7QuyA5LDMg0LrQtSDRgtC10qMg0LHQvtC70YvQv9CwINGC0rHRgCDQttOZ0L3QtSDQsdKx0LvQtNCwINC90L7RgNC80LDQvdGLINC606nRgdC10YLRltC/INKb0LDQsdGL0L3RgyDQttC+0pvRgtGL0pPRi9C9INGA0LDRgdGC0LDQvyDRgtKx0YAuINCb0LXQudC60L7RhtC40YLRgtC10YDQtNGW0qMg0LTQuNGE0YTQtdGA0LXQvdGG0LjQsNC70LTRiyDRgdCw0L3Ri9C90YvSoyDQv9Cw0LnRi9C30LTRi9OpINC606nRgNGB0LXRgtC60ZbRiNGC0LXRgNGW0LTQtSDQsdC+0LnRi9C90YjQsCDRgtCw0LvQtNCw0LnRgtGL0L0g0LHQvtC70YHQsNC8LiAg0JvQtdC50LrQvtGG0LjRgtCw0YDQu9GL0psg0YTQvtGA0LzRg9C70LDQtNCwINGC0LDRj9Kb0YjQsCDRj9C00YDQvtC70Ysg0L3QtdC50YLRgNC+0YTQuNC70LTQtdGAINKb0LDQu9GL0L/RgtGL0LTQsCAxLTXQv9Cw0LnRi9C3LCDQsdCw0LvQsNC00LAg0L7QuyAx0L/QsNC50YvQt9KT0LAg0YLQtdKjLCDRgdC10LPQvNC10L3RgtGC0ZbQuiDRj9C00YDQvtC70Ysg0L3QtdC50YLRgNC+0YTQuNC70LTQtdGAINKb0LDQu9GL0L/RgtGL0LTQsCAyMC0zNSDQv9Cw0LnRi9C30LTRiyDQutOp0YDRgdC10YLQtdC00ZYsINCx0LDQu9Cw0LTQsCDQvtC7IDIx0L/QsNC50YvQt9KT0LAg0YLQtdKjLCDQu9C40LzRhNC+0YbQuNGC0YLQtdGAINKb0LDQu9C/0YLRiyDQttCw0pPQtNCw0LnQtNCwIDQ1LTcwINC/0LDQudGL0Lcg0LHQvtC70YHQsCwgPGJyIC8+DQog0LHQsNC70LDQtNCwIDY3INC/0LDQudGL0Lcg0L3QvtGA0LzQsCwg0LzQvtC90L7RhtC40YLRgtC10YAg0pvQsNC70YvQv9GC0YvQtNCwIDMtMTDQv9Cw0LnRi9C3LCDQsdCw0LvQsNC00LAgONC/0LDQudGL0Lct0L3QvtGA0LzQsCwg0Y3QvtC30LjQvdC+0YTQuNC70LTQtdGAINKb0LDQu9GL0L/RgtGL0LTQsCAzLTEwINC/0LDQudGL0LcsINCx0LDQu9Cw0LTQsCAyLNCx0LDQt9C+0YTQuNGC0LvQtNC10YAgMSwg0L3QvtGA0LzQsNC00LAgMC0xLCDQltCw0LvQv9GLINC70LXQudC60L7RhtC40YLQsNGA0LvRi9KbINGE0L7RgNC80YPQu9Cw0pPQsCDSm9Kx0LDRgNCw0Lkg0L7RgtGL0YDRi9C/INC80rHQvdC00LAg0LXRiNKb0LDQvdC00LDQudC00LAg0pvQsNCx0YvQvdGD0LvRi9KbINC205nQvdC1INCw0LvQu9C10YDQs9C40Y/Qu9C+0YvSmyDQsNGB0pvRi9C90YPQu9Cw0YDQtNGL0qMg0LbQvtKbINC10LrQtdC90LTRltCz0ZbQvSDQsdCw0LnSm9Cw0YHQsNKbINCx0L7Qu9Cw0LTRiy4g0K3QotCWIDUt0LrQtSDRgtC10qMg0LDQuyDQvdC+0YDQvNCw0LTQsCAyLTEw0LzQvC/RgdCw0pMg0LHSsdC70LTQsCDSm9Cw0LvRi9C/0YLRiyDQutOp0YDRgdC10YLQutGW0YjRgtGWINC606nRgNGB0LXRgtGW0L8g0YLSsdGALiDQkNC90LDQu9C40Lcg0L3TmdGC0LjQttC10LvQtdGA0ZbQvSDQtdGB0LrQtdGA0LUg0L7RgtGL0YDRi9C/INCx0LDQu9Cw0LTQsCDQsdC+0LvQttCw0LzQtNGLINC00LjQsNCz0L3QvtC3INGA0LXRgtGW0L3QtNC1ICDQs9C40L/QvtGF0YDQvtC80LTRiyDQsNC90LXQvNC40Y8g0LTQtdGD0LPQtSDQsdC+0LvQsNC00YsuINCQ0Lsg0LDQvdC10LzQuNGP0L3Ri9KjINGL0pvRgtC40LzQsNC7INGB0LXQsdC10LHRliDRgtC10LzRltGA0LTRltKjINC20LXRgtGW0YHQv9C10YPRiNGW0LvRltCz0ZYg0LHQvtC70YPRiyDQvNKv0LzQutGW0L0uINCh0LXQsdC10LHRliDRgtKv0YHRgtGW0Log0LjQvdC00LXQutGB0YLRltKjINGC06nQvNC10L3QtNC10LPQtdC90ZbQvSDQsdCw0LnSm9Cw0LnQvNGL0LcsINCw0L3QuNC30L7RhtC40YLQvtC3LCDQv9C+0LnQutC40LvQvtGG0LjRgtC+0Lcg0LbTmdC90LUg0L/QvtC70LjRhdGA0L7Qu9C80LDQt9C40Y8g0YLQtdC80ZbRgCDRgtCw0L/RiNGL0LvRi9Kb0YLRiyDQsNC90LXQvNC40Y/RgdGL0L3RiyDQutOp0YDRgdC10YLQtdC00ZY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89" table:style-name="ce1">
            <text:p>1066989</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kg0JXRgNGC0LUg0LbQsNGB0YLQsNKT0Ysg0LHQsNC70LDQu9Cw0YDQtNGL0qMg0YLTqdC80LXQvdCz0ZYg0YLRi9C90YvRgSDQsNC70YMg0LbQvtC70LTQsNGA0YvQvdC00LAg0LTQsNC80LjRgtGL0L0g0LDRg9GA0YPQu9Cw0YAg0LrQtdGD0LTQtSDSm9GD0YvRgdGL0L3Ri9KjINCw0L3QsNGC0L7QvNC+LdGE0LjQt9C40L7Qu9C+0LPQuNGP0LvRi9KbICDQtdGA0LXQutGI0LXQu9GW0LrRgtC10YDRltC90LUg0LHQsNC50LvQsNC90YvRgdGC0YssINC+0LvQsNGA0pPQsCDQvNGL0L3QsNC70LDRgCDQttCw0YLQsNC00Ys6INCd0LXQs9GW0LfQs9GWINC10YDQtdC60YjQtdC70ZbQutGC0LXRgDog0JrQtdGD0LTQtSDSm9GD0YvRgdGL0L3Ri9KjINKb0rHRgNGL0LvRi9C80Ysg05nQu9GB0ZbQtyAsINC60LXRg9C00LUg0LbQsNGB0YPRiNCw0YHRi9C90YvSoyDQv9GW0YjRltC90ZYg0LrTqdC70LTQtdC90LXSoyAtINGL0LTRi9GBINGC05nRgNGW0LfQtNGWLiDRgtGL0L3Ri9GBINC20L7Qu9C00LDRgNGL0L3Ri9KjINC00LjQsNC80LXRgtGA0ZYg0YLQsNGALCDRiNC10LzRltGA0YjQtdC60YLQtdGAINC20rHQvNGB0LDSmyDQttOZ0L3QtSDRgdC10YDQv9GW0LzQtNGW0LvRltCz0ZYg0YLTqdC80LXQvSwg06nQutC/0LUg0YLRltC90LTQtdGA0ZYg0YLQvtC70YvSmyDQttC10YLRltC70LzQtdCz0LXQvSwg0LzSsdGA0YvQvdC80LXQvSDRgtGL0L3Ri9GBINCw0LvRg9KT0LAg0LHQtdC50ZbQvCDQttOZ0L3QtSDQuNC80LzRg9C90LTRi9KbINC20q/QudC10YHRliDTmdC70YHRltC3LiDQmtGW0YjRliDRgtGL0L3Ri9GBINC20L7Qu9C00LDRgNGLINC60ZbRiNC60LXQvdGC0LDQuSDQsdCw0LvQsNC70LDRgNC00YvSoyDRgtGL0L3Ri9GBINCw0LvRgyDQttC+0LvQtNCw0YDRiyDRgtCw0YAg0LbTmdC90LUg0pvQsNCx0YvQvdGD0pPQsCwg0YjRi9GA0YvRiCDQvdC10LzQtdGB0LUg0LHTqdCz0LTQtSDQt9Cw0YLRgtCw0YAg0LHRltGC0LXQu9GD0LPQtSDQsdC10LnRltC8INC60LXQu9C10LTRli4g0JHSsdC7INCx0YDQvtC90YXQvtC70LjRgiDQvdC10LzQtdGB0LUg0LDRgdGC0LzQsCDRgdC10LrRltC70LTRliDRgtOp0LzQtdC90LPRliDRgtGL0L3Ri9GBINC20L7Qu9C00LDRgNGL0L3Ri9KjINCw0YPRgNGD0LvQsNGA0YvQvdGL0qMg0LTQsNC80YPRi9C90LAg0LDQu9GL0L8g0LrQtdC70YPRliDQvNKv0LzQutGW0L0uINCY0LzQvNGD0L3QtNGL0psg0LbSr9C50LUg0LTQsNC80YvQvNCw0pPQsNC9INC20LDRgSDQsdCw0LvQsNC70LDRgNC00YvSoyDQuNC80LzRg9C90LTRi9KbINC20q/QudC10YHRliDTmdC70ZYg0LTQtSDQtNCw0LzRi9C/INC60LXQu9C10LTRliwg0LHSsdC7INC+0LvQsNGA0LTRi9KjINGC06nQvNC10L3Qs9GWINGC0YvQvdGL0YEg0LDQu9GDINC20L7Qu9C00LDRgNGL0L3Ri9KjINC40L3RhNC10LrRhtC40Y/Qu9Cw0YDRi9C90LAsINGB0L7QvdGL0qMg0ZbRiNGW0L3QtNC1INCx0YDQvtC90YXQuNGCINC/0LXQvSDQv9C90LXQstC80L7QvdC40Y/Sk9CwINCx0LXQudGW0Lwg0LXRgtC10LTRli7QotGL0L3Ri9GBINCw0LvRgyDQsdKx0LvRiNGL0pvQtdGC0YLQtdGA0ZYg0LbQtdGC0ZbQu9C80LXQs9C10L0g0LbQsNGBINCx0LDQu9Cw0LvQsNGA0LTQsNKT0Ysg0YLRi9C90YvRgSDQsNC70YMg0LHSsdC70YjRi9Kb0LXRgtGC0LXRgNGWINGB0L7QvdGL0qMg0ZbRiNGW0L3QtNC1INC00LjQsNGE0YDQsNCz0LzQsCDQttOZ0L3QtSDSm9Cw0LHRi9GA0pPQsNCw0YDQsNC70YvSmyDQsdKx0LvRiNGL0pvQtdGC0YLQtdGAINGC0L7Qu9GL0psg0LbQtdGC0ZbQu9C80LXQs9C10L0u0JHSsdC7INGI0YvRgNGL0YjRgtGLINGC0LjRltC80LTRliDRgtCw0LfQsNGA0YLRg9C00LAg0LbTmdC90LUg0YLQuNGW0YHRgtGWINC20LXQu9C00LXRgtGD0LTRliDSm9Cw0LzRgtCw0LzQsNGB0YvQtyDQtdGC0YPQtNC1INKb0LjRi9C90LTRi9Kb0YLQsNGAINGC0YPSk9GL0LfQsNC00YsuINCx0rHQuyDRgtOp0LzQtdC90LPRliDRgtGL0L3Ri9GBINCw0LvRgyDQttC+0LvQtNCw0YDRi9C90YvSoyDQsNGD0YDRg9C70LDRgNGL0L0g0LrSr9GI0LXQudGC0YPRliDQvNKv0LzQutGW0L0u0KLRi9C90YvRgSDQsNC70YMg0LbQuNGW0LvRltCz0ZbQvdGW0qMg0LbQvtKT0LDRgNGL0LvQsNGD0YsgLSDQsdCw0LvQsNC70LDRgNC00LAg0LXRgNC10YHQtdC60YLQtdGA0LzQtdC9INGB0LDQu9GL0YHRgtGL0YDSk9Cw0L3QtNCwINGC0YvQvdGL0YEg0LDQu9GDINC20LjRltC70ZbQs9GWINGB0LDQu9GL0YHRgtGL0YDQvNCw0LvRiyDQttC+0pPQsNGA0Ysg0LHQvtC70LDQtNGLLCDQvNKx0L3QtNCw0Lkg0LbQvtKT0LDRgNGLINC20LjRltC70ZbQuiDRgtOp0LzQtdC90LPRliDRgtGL0L3Ri9GBINCw0LvRgyDQttC+0LvQtNCw0YDRi9C90LTQsCDQv9Cw0YLQvtCz0LXQvdCz0LUg0YvSm9GC0LjQvNCw0LvQtNGL0LvRi9Kb0YLRi9KjINC606nQvyDQtNC10qPQs9C10LnQtNC1INCx0L7Qu9Cw0LTRiy7QktC40YHRhtC10YDQsNC70YzQtNGLINC/0LvQtdCy0YDQsCAsINGB0LDQu9GL0YHRgtGL0YDQvNCw0LvRiyDSm9Cw0LvRi9KjINC205nQvdC1INCx0L7RgNC/0YvQu9C00LDSmy4g0KHQuNC90YPRgdGC0LDRgNC00LAg0LbTmdC90LUg0LvQvtCx0LDRgNCw0LvRi9KbINC+0LnRi9Kb0YLQsNGA0LTQsCDQtdKjINCw0LnSm9GL0L0g0LrTqdGA0ZbQvdC10YLRltC9INCx0q/RgNGI0ZbQutGC0LXRgNC00ZYg0pvQsNC80YLQuNC00YsuINCR0rHQuyDQsNC50LzQsNKb0YLQsNGA0LTQsCDQuNC90YTQtdC60YbQuNGPINC+0YjQsNKb0YLQsNGA0YvQvdGL0qMg0YLQtdC30ZbRgNC10Log0L/QsNC50LTQsCDQsdC+0LvRg9GL0L3QsCDQttCw0pPQtNCw0Lkg0LbQsNGB0LDQu9KT0LDQvS4gMikg0JHQtdGA0ZbQu9Cz0LXQvSDQttCw0LvQv9GLINKb0LDQvSDRgtCw0LvQtNCw0YPRiyDQsdC+0LnRi9C90YjQsCAxINC20LDRgdGC0LDSk9GLINCx0LDQu9Cw0L3Ri9KjINCw0L3QtdC80LjRj9KT0LAg0YjQsNC70LTRi9Kb0pvQsNC90Ysg0LHQsNC50pvQsNC70LDQtNGLLiDQk9C10LzQvtCz0LvQvtCx0LjQvSDRgtOp0LzQtdC9IC0g0LDQudKb0YvQvSDQs9C40L/QvtGF0YDQvtC80LTRiyDQsNC90LXQvNC40Y8sINCt0YDQuNGC0YDQvtGG0LjRgtGC0LXRgCDRgtOp0LzQtdC9IC0g0LHSsdC70LTQsCDQsNC90LXQvNC40Y/QvdGL0qMg0LrTqdGA0YHQtdGC0LrRltGI0ZbQvSDRgNCw0YHRgtCw0LnQtNGLLCDRgtKv0YEg0LjQvdC00LjQutCw0YLQvtGA0YsgLSAwLjcgLSDQs9C10LzQvtCz0LvQvtCx0LjQvdC90ZbSoyDRjdGA0LjRgtGA0L7RhtC40YLQutC1INKb0LDRgtGL0L3QsNGB0Ysg0YLTqdC80LXQvdC00ZbQs9GW0L0g0LHRltC70LTRltGA0LXQtNGWLiDQkNC7INCw0L3QuNC30L7RhtC40YLQvtC3LCDQv9C+0LnQutC40LvQvtGG0LjRgtC+0LcgLSDRjdGA0LjRgtGA0L7RhtC40YLQtdGAINOp0LvRiNC10LzRliDQvNC10L0g0L/RltGI0ZbQvdGWINOZ0YDRgtKv0YDQu9GWICwg0LHSr9C7INC606nQsdGW0L3QtdGB0ZYg0YLQtdC80ZbRgCDRgtCw0L/RiNGL0LvRi9Kb0YLRiyDQsNC90LXQvNC40Y/QvdGLINC606nRgNGB0LXRgtC10LTRli7Qm9C10LnQutC+0YbQuNGC0YLQtdGAINC90L7RgNC80LDQtNCwIC0g0LjQvdGE0LXQutGG0LjRj9C70YvSmyDQsdC10LvQs9GW0LvQtdGAINC20L7Smy4g0KHQtdCz0LzQtdC90YLRgtGWINC90LXQudGC0YDQvtGE0LjQuyAyMSDRgtCw0Y/Sm9GI0LAg0Y/QtNGA0L7Qu9GLIC0xINC/0LDQudGL0LfQtNCw0L0g0LbQsNGB0pvQsCDQsdCw0LnQu9Cw0L3Ri9GB0YLRiyDRgdCw0LvRi9GB0YLRi9GA0LzQsNC70Ysg0L3QtdC50YLRgNC+0L/QtdC90LjRjyDQsdC10LvQs9GW0YHRliDQsdC+0LvRg9GLINC80q/QvNC60ZbQvSwg0LvQuNC80YTQvtGG0LjRgtGC0LXRgCAtIDY3INC/0LDQudGL0Lcg0LbQsNGBINCx0LDQu9Cw0LvQsNGA0LTQsCDRhNC40LfQuNC+0LvQvtCz0LjRj9C70YvSmyDQu9C40LzRhNC+0YbQuNGC0L7QtyDQsdC+0LvRg9GLINC80q/QvNC60ZbQvSDQvdC+0YDQvNCw0YHRiyA2MC03MCDQv9Cw0LnRi9C3INCw0YDQsNGB0YvQvdC00LAu0prQsNC70pPQsNC9INC606nRgNGB0LXRgtC60ZbRiNGC0LXRgCDQvNC+0L3QvtGG0LjRgtGC0LXRgCDRjdC+0LfQuNC90L7RhNC40LvQtNC10YAgLSDSm9Cw0LvRi9C/0YLRiyDQtNC10qPQs9C10LnQtNC1LCDQv9Cw0YLQvtC70L7Qs9C40Y/QvdGLINC606nRgNGB0LXRgtC/0LXQudC00ZYu0K3QotCWIDUt0LzQvNCh0LDSkyDSm9Cw0LvRi9C/0YLRiyAtINKb0LDQsdGL0L3RgyDQttC+0psuINCW0LDQu9C/0Ysg0pvQvtGA0YvRgtGL0L3QtNGL0LvQsNC5INC60LXQu9GB0LXQuiDSm9Cw0L0g0LDQvdCw0LvQuNC30ZYg0LPQuNC/0L7RhdGA0L7QvNC00Ysg0LDQvdC10LzQuNGP0L3RiyDQutOp0YDRgdC10YLQtdC00ZYsINGL0pvRgtC40LzQsNC70LTRiyDQtNC40LDQs9C90L7QtyAtINGC0LXQvNGW0YDRgtCw0L/RiNGL0LvRi9Kb0YLRiyDQsNC90LXQvNC40Y8gINC205nQvdC10LTQtSDQsdKx0Lsg0LTQuNCw0LPQvdC+0LfQtNGLINC60LvQuNC90LjQutCw0LvRi9KbINGI0LDSk9GL0LzQtNCw0YDRiyDRgNCw0YHRgtCw0LnQtNGLLg==</text:p>
          </table:table-cell>
          <table:table-cell office:value-type="float" office:value="170348" table:style-name="ce1">
            <text:p>170348</text:p>
          </table:table-cell>
          <table:table-cell office:value-type="float" office:value="78" table:style-name="ce1">
            <text:p>7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34" table:style-name="ce1">
            <text:p>1067034</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7QltCw0LvQv9GLINGC06nQvNC10L3Qs9GWINGC0YvQvdGL0YEg0LDQu9GDINC20L7Qu9C00LDRgNGL0L3QsCDQsdGW0LfQtNC10YAg0LHRgNC+0L3RhdGC0LDRgCDQsNC70YzQstC10L7Qu9Cw0LvQsNGAINOp0LrQv9C10L3RliDQttCw0YLSm9GL0LfQsNC80YvQty7QkdCw0LvQsNC70LDRgNC00LDSk9GLINC10YDQtdC60YjQtdC70ZbQs9GW0L3QtSDQutC10LvQtdGC0ZbSoyDQsdC+0LvRgdCw0psg0L7QuyDQttCw0pvRgtCwINCx0YDQvtC90YXRgtCw0YDQtNGL0qMg0LrTqdC70LXQvNGWINC60ZbRiNC60LXQvdGC0LDQuSDQsdC+0LvQsNC00Ysg0LbQsNC90LUg0LDQu9GM0LLQtdC+0LvQsNC70LDRgNGLINC606nQvyDQsdC+0LvQsNC00Ysg0YHQvtC90YvQvNC10L0g0pvQvtGB0LAg0YHRg9GA0YTQsNC60YLQsNC90YLRgtGL0psg06nQt9Cz0LXRiNC10LvRltC60YLQtdGA0LTRliDQtdGB0LrQtdGA0LUg0LrQtdGC0YHQtdC6INCx0L7Qu9Cw0LTRiy7QpNC40LfQuNC+0LvQvtCz0LjRj9C70YvSmyDQtdGA0LXQutGI0LXQu9GW0LrRgtC10YDRliDQttCw0LvQv9GLINC90LXQs9GW0LfQs9GW0YHRliDQvtC7INGC0YvQvdGL0YEg0LDQu9GDINC20LDQvdC1INGC0YvQvdGL0YEg0YjRi9KT0LDRgNGDINC10YDQtdC60YjQtdC70ZbQutGC0LXRgNGW0L3QtNC1INC+0Lsg0LTQtdCz0LXQvdGW0LzRltC3INC10YDQtdGB0LXQuiDQsNC00LDQvNC90LDQvSDSm9Cw0YDQsNKT0LDQvdC00LAg0LbRi9C70LTQsNC8INC20q/RgNC10LTRliDRgdC+0L3Ri9C80LXQvSDSm9C+0YHQsCDQutC10YPQtNC1INGC0L7RgNGLINC10YDQtdGB0LXQuiDQsNC00LDQvNC90LDQvSDSm9Cw0YDQsNKT0LDQvdC00LAg0YLQsNGAINCx0L7Qu9Cw0LTRiy7QldC90LTRliDQsNGD0YDRg9C70LDRgNGL0L3QsCDQutC10LvQtdGC0ZbSoyDQsdC+0LvRgdCw0psg0LXRgNGC0LUg0LbQsNGB0YLQsNKT0Ysg0LHQsNC70LDQu9Cw0YDQtNCwINC606nQsdGW0L3QtSDQstC40YDRg9GB0YLRi9KbINC/0L3QtdCy0LzQvtC90LjRjyzQv9C90LXQstC80L7RgtC+0YDQvtC60YEg0YHQuNGP0pvRgtGLINCy0LjRgNGD0YHRgtGL0psg0LDRg9GA0YPQu9Cw0YAg0LrQtdC30LTQtdGB0LXQtNGWLtCd0LXQs9GW0LfRltC90LTQtSDQsdCw0LvQsNC70LDRgNC00LDSk9GLINGC06nQvNC10L3Qs9GWINGC0YvQvdGL0YEg0LDQu9GDINC20L7Qu9C00LDRgNGL0L3Ri9KjINCw0YPRgNGD0LvQsNGA0Ysg0L7Qu9Cw0YAg0L3QtdCz0ZbQt9GW0L3QtNC1INGC0YPQsCDQsdGW0YLQutC10L0g0L3QtdC80LXRgdC1INC606nQvyDQttCw0pPQtNCw0LnQtNCwINC+0YHRi9C90LTQsNC5INCy0LjRgNGD0YHRgtGL0psg0LDRg9GA0YPQu9Cw0YAg0LHQvtC70LDQtNGLLNC/0L3QtdCy0LzQvtC90LjRjyDQutC10LfRltC90LTQtSDQttC+0pPQsNGA0pPRiyDRgtGL0L3Ri9GBINCw0LvRgyDQttC+0LvQtNCw0YDRiyDQsNGA0pvRi9C70Ysg0LLQuNGA0YPRgSDQtdC90LXQtNGWINC60LXQudGW0qMg0L7QuyDRgtOp0LzQtdC90LPRliDRgtGL0L3Ri9GBINCw0LvRgyDQttC+0LvQtNCw0YDRi9C90LAg0YLSr9GB0ZbQvyDQsdGA0L7QvdGFINCw0LHRgdGC0YDRg9C60YLQuNCy0YLRliDRgdC40L3QtNGA0L7QvCzQuNC90YHQv9C40YDQsNGC0L7RgNC70Ysg0YHQuNC90LTRgNC+0Lwg0Y/Sk9C90Lgg0LXQvdGC0ZbQs9GDINCx0YDQvtC90YXRgtCw0YDQtNGL0qMg0YLQsNGA0YvQu9GD0Ysg0YHQvtC90YvQvNC10L0g0pvQsNGC0LDRgCDRgtGL0L3Ri9GBINCw0LvRgyDQsNC60YLRltGB0ZbQvdGW0qMg0LTSsdGA0YvRgSDQttKv0YDQvNC10YPRliDQtNC10LPQtdC9INGB0LjRj9Kb0YLRiyDRgdC40L3QtNGA0L7QvNC00LDRgCDQsdCw0LnSm9Cw0LvQsNC00Ysg0LbTmdC90LUg0L/QvdC10LLQvNCw0YLQvtGA0LDQutGBINC+0L3Ri9KjINCx0L7Qu9GD0Ysg0LTQsCDQstC40YDRg9GB0pvQsCDQsdCw0LnQu9Cw0L3Ri9GB0YLRiyDQsdC+0LvQsNC00YsuPGJyIC8+DQoyLjEg0LbQsNGB0YLQsNKT0Ysg0LHQsNC70LAg0LDQvdCw0YHRi9C80LXQvSDSm9Cw0LHRi9C70LTQsNGD0LTQsCDQsdC+0LvSk9Cw0L0g0LbTmdC90LUg0pvQsNC9INCw0L3QsNC70LjQt9GWINC60LXQu9Cz0LXQvSDQvtCx0YzQtdC60YLQuNCy0YLRliDQsNC50YLRi9C70pPQsNC9INGI0LDSk9GL0LzQsNGAINCx0ZbQt9C00LUg0L7RgNCz0LDQvdC40LfQvNC00LUg0pvQsNC90L3Ri9KjINC+0YLRgtC10LPRltC80LXQvSDSm9Cw0L3Ri9Kb0L/QsNKT0LDQvdGL0qMg0LrTqdGA0LUg0LDQu9Cw0LzRi9C3INC10L3QtNGWINKb0LDQvSDQsNC90LDQu9C40LfRltC90LUg0LrQtdC70LXQudGW0Lou0JPQtdC80L7Qs9C70LDQsdC40L0g0L3QvtGA0LzQsCDQu9C10LnQutC+0YbQuNGCINC606nRgNGB0LXRgtC60ZbRiNGWINOp0YHQutC10L0g0YLSr9GB0YLRltC6INC606nRgNGB0LXRgtC60ZbRiNGC0LXRgCDTqdC30LPQtdGA0LPQtdC9INC+0Lsg0LTQtdCz0LXQvdGW0LzRltC3INGN0YDQuNGC0YDQvtGG0LjRgtGC0ZbSoyDQvtGC0YLQtdCz0ZbQvNC10L0g0pvQsNC90YvSk9GD0Ysg0LDQtyDQtNC10LPQtdC9INCw0Lsg0pvQsNC70pPQsNC9INC606nRgNGB0LXRgtC60ZbRiNGC0LXRgNCz0LUg0pvQsNGA0LDQvyDQsdGW0Lcg0pvQsNCx0YvQvdGDINC/0YDQvtGG0LXRgdGB0ZYg0LbSr9GA0ZbQvyDQttCw0YLSm9Cw0L3Ri9KjINC606nRgNC1INCw0LvQsNC80YvQtyDQvNC10L3RltKjINC+0LnRi9C80YjQsCDQsdKx0Lsg0YLRi9C90YvRgSDQsNC70YMg0LbQvtC70LTQsNGA0YvQvdGL0qMg0LLQuNGA0YPRgdGC0YvSmyDQsNGD0YDRg9C70LDRgNGLINCx0L7Qu9GD0Ysg0LzSr9C80LrRltKjINC00LXQvyDQvtC50LvQsNC50LzRi9C9INCw0Lsg0Y3RgNC40YLRgNC+0YbQuNGCINCw0LfQsNC50LzQsNKT0LDQvSDQsdKx0Lsg0LLQuNGA0YPRgdGC0YvSmyDQsNGD0YDRgw==</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62" table:style-name="ce1">
            <text:p>1067062</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MSnQldGA0YLQtSDQttCw0YHRgtCw0pPRiyDQsdCw0LvQsNC70LDRgNC00LAg0YLTqdC80LXQvdCz0ZYg0YLRi9C90YvRgSDQttC+0LvRi9C90LTQsNKT0Ysg0LTQsNC80LjRgtGL0L0g0LDRg9GA0YPQu9Cw0YAg0LrTqdC/0YLQtdCz0LXQvSDQsNC90LDRgtC+0LzQvi3RhNC40LfQuNC+0LvQvtCz0LjRj9C70YvSmyDQtdGA0LXQutGI0LXQu9GW0LrRgtC10YDQs9C1INCx0LDQudC70LDQvdGL0YHRgtGLLNC+0LvQsNGA0pPQsCDRgtC+0pvRgtCw0LvQsCDQutC10YLRgdC10Lwt0LXSoyDQsNC70LTRi9C80LXQvSAg0LHQsNC70LDQu9Cw0YDQtNCwINGC0YDQsNGF0LXRjyDQttOZ0L3QtSDQsdGA0L7QvdGF0YLQsNGA0LTRi9KjINC00LjQsNC80LXRgtGA0ZbQvdGW0qMg0LrRltGI0ZYgINC20LXQvdC1INC+0L3QtNCw0pPRiyDRjdC70LDRgdGC0LjQutCw0LvRi9KbINGI0LXQvNGW0YDRiNC10LzQtdC6INCx0LDRgdGL0Lwg0LTQsNC80YvSk9Cw0L0g0LHSsdC7INC+0LvQsNGA0LTRi9KjINC/0LDRgtC+0LvQvtCz0LjRjyDQutC10LfRltC90LTQtSDRgtC10Lcg0LjQvdGE0LXQutGG0LjRj9C90YvSoyDRgtKv0YHRg9GW0L3QtSwg0YHQvtC90YvQvNC10L0g0pvQvtGB0LAg0L7Qu9Cw0YDQtNGL0qMg0LDRg9CwINC20L7Qu9C00LDRgNGL0L3Ri9KjINCx0ZbRgtC10LvRltC/INC00rHRgNGL0YEg06nRgtC/0LXRg9GW0L3QtSDTmdC60LXQvyDRgdC+0pPQsNGC0YvQvSDQsdC+0LvQsNC00YsuINCa0LXQu9C10YHRliDRhNCw0LrRgtC+0YAg0YLRi9C90YvRgSDQsNC70YMg0LbQvtC70LTQsNGA0YvQvdC00LDSk9GLINC60ZbRgNC/0ZbQutGI0LXQu9GWINGN0L/QuNGC0LXQu9C40Lkg0LbQsNKb0YHRiyDQtNCw0LzRi9C80LDSk9Cw0L0g0YHQsNC70LTQsNGA0YvQvdCw0L0g0LHTqdCz0LTQtSDQt9Cw0YLRgtCw0YDQtNGLINKx0YHRgtCw0L8g0pvQsNC70YMg0pvQsNCx0ZbQu9C10YLRliwg0LbTmdC90LUg0L7Qu9Cw0YDQtNGLINC20L7RjiDSm9Cw0LHRltC70LXRgtGWINC90LDRiNCw0YAg0LTQsNC80YvSk9Cw0L0g0LHQvtC70YvQvyDRgdCw0L3QsNC70LDQtNGLLtCR0LDQu9Cw0LvQsNGA0LTQsCDRgtGL0L3Ri9GBINCw0LvRgyDQttC+0LvQtNCw0YDRi9C90YvSoyDQttCw0LfRi9KbINCx0rHQu9GI0YvSmyDQtdGC0YLQtdGA0ZbQtNC1INCw0LnRgtCw0YDQu9GL0pvRgtCw0Lkg0LbQsNKb0YHRiyDQtNCw0LzRi9C80LDSk9Cw0L0g0LHSsdC7INC+0LvQsNGA0LTRi9KjINC206nRgtC10LvRgyDSm9Cw0LHRltC70LXRgtGW0L0g0YLTqdC80LXQvdC00LXRgtGW0L8s0LHTqdCz0LTQtSDQt9Cw0YLRgtCw0YDQtNGLINGB0YvRgNGC0pvQsCDRiNGL0pPQsNGA0YMg0pvQsNCx0ZbQu9C10YLRltC90ZbSoyDQsNC50YLQsNGA0LvRi9Kb0YLQsNC5INC90LDRiNCw0YDQu9GL0pPRi9C9INC606nRgNGB0LXRgtC10YLRltC9INCx0L7Qu9GL0L8g0YHQsNC90LDQu9Cw0LTRiy7RgtCw0pPRiyDQsdGW0YAg0LXRgNC10LrRiNC10LvRltC6INC+0Lsg0LHQsNGB0YLRiyDQsdGA0L7QvdGC0LDRgNC00YvSoyDQvtGA0L3QsNC70LDRgdGDINGA0LXRgtGW0L3QtNC1INCx0L7Qu9GL0L8g0YHQsNC90LDQu9Cw0LTRiywg0LHQsNC70LDQu9Cw0YDQtNCwICDQvtKjINC20LDSmyDQsdCw0YHRgtGLINCx0YDQvtC90YXRgtGL0qMgINC+0YDQvdCw0LvQsNGB0YMg0YDQtdGC0ZYg0YLRltC6INC205nQvdC1INKb0YvRgdKb0LAg0YHQvtC90YvQvNC10L0g0pvQvtGB0LAg0LTQuNCw0LzQtdGC0YDRliDQutC10qMg0LHQvtC70YvQvyDRgtCw0LHRi9C70LDQtNGLINCw0Lsg0YHQvtC7INCx0LDRgdGC0Ysg0LHRgNC+0L3RhdGC0YvSoyDQvtGA0L3QsNC70LDRgdGD0Ysg0pvQuNKT0LDRiNGC0LDRgyDQttOZ0L3QtSDQtNC40LDQvNC10YLRltGA0ZYg0LrRltGI0LrQtdC90YLQsNC5INCx0L7Qu9GL0L8g0LrQtdC70LXQtNGWLNCx0rHQuyDQsdCw0LvQsNGA0LTQsCDQv9C90LXQstC80L7QvdC40Y/QvdGL0qMg0LrTqdCx0ZbQvdC1INC+0qMg0LbQsNKbINOp0LrQv9C10LTQtSDQsdC+0LvQsNGC0YvQvdGL0L0g0YLSr9GB0ZbQvdC00ZbRgNC10LTRliwg0YHQvtC90YvQvNC10L0g0pvQvtGB0LAg0LHQsNC70LAg0LHTqdCz0LTQtSDQt9Cw0YLRgtCw0YDQtNGLINC20rHRgtGL0L8g0pvQvtC50pPQsNC9INC60LXQt9C00LUo0LbQuNGWINC60LXQt9C00LXRgdC10YLRltC9INC/0YDQvtCx0LvQtdC80LApINCx0ZbQtyDQvtKjINC20LDSmyAg06nQutC/0LXQtNC10L0g0LrTqdC/INGC0LDQsdCw0YLRi9C9INCx0L7Qu9GL0L8g0YHQsNC90LDQu9Cw0LzRi9C3LtCR0LDQu9Cw0YDQtNCwINGC06nQvNC10L3Qs9GWINGC0YvQvdGL0YEg0LDQu9GDINC20L7Qu9GLICDSm9Cw0L0g0YLQsNC80YvRgCDQttKv0LnQtdGB0ZbQvNC10L0g0LbQsNKb0YHRiyDSm9Cw0L3QvNC10L0g0pvQsNC80YLQsNC80LDRgdGL0Lcg0LXRgtGDINGB0LDQu9C00LDRgNGL0L3QsNC9ICDSm9Cw0LHRi9C90YMg0LbQsNKT0LTQsNC50LvQsNGA0YvQvdC00LAgINGN0LrRgdGB0YPQtNCw0YLRgtCw0YDQtNGL0qMg0LbQuNC90LDSm9GC0LDQu9GDINGB0LDQu9C00LDRgNGL0L3QsNC9INGC0YvQvdGL0YEg0LDQu9GDICDQttC+0LvQtNCw0YDQtNGL0qMg0pvRi9GB0YvQu9GL0L8g0pvQsNC70YPRi9C90LAs0LHRltGC0LXQu9GD0ZbQvdC1INOZ0LrQtdC/INGB0L7Sk9Cw0YLRi9C9INCx0L7Qu9GL0L8g0YHQsNC90LDQu9Cw0LTRiyzQttOZ0L3QtSDSm9C+0YHRi9C80YjQsCDRhNCw0LrRgtC+0YAg0YDQtdGC0ZbQvdC00LUg0LHQsNC70LDQu9Cw0YDQtNCw0pPRiyDQuNC80LzRg9C90LTRi9KbINKb0LDQsdGW0LvQtdGC0YLRltKjINC90LDRiNCw0YDQu9GL0pPRiyDRgdC+0L3Ri9C80LXQvSDSm9C+0YHQsCDQvtC70LDRgNC00YvSoyDRgtGL0L3Ri9GBINCw0LvRgyDQttC40ZbQu9GW0LPRltC90ZbSoyDQutOp0L8g0LHQvtC70YPRiyzRgdGD0YDRhNCw0LrRgtCw0L3RgtGC0YvSoyDQttCw0pvRgdGLINC20LXRgtGW0LvQvNC10YPRliwg0LjQvdGE0LXQutGG0LjRj9C90YvSoyDSm9Cw0YDSm9GL0L3QtNGLINC00LDQvNGD0YvQvdCwINOZ0LrQtdC/INGB0L7Sk9Cw0LTRiy7QntGB0YvQu9Cw0LnRiNCwINC606nQv9GC0LXQs9C10L0g0LDQvdCw0YLQvi3RhNC40LfQuNC+0LvQvtCz0LjRj9C70YvSmyDQtdGA0LXQutGI0LXQu9GW0LrRgtC10YDQs9C1INCx0LDQudC70LDQvdGL0YHRgtGLINGC0YvQvdGL0YEg0LDQu9GDINC/0LDRgtC+0LvQvtCz0LjRj9C70LDRgNGLINOZ0YHRltGA0LXRgdC1INC40L3RhNC10LrRhtC40Y/Qu9GL0psg0Y3RgtC40L7Qu9C+0LPQuNGP0LTQsCDTqdGA0LHQuNGC0ZbQvSDQsdGA0L7QvdGF0L4t0L/QvdC10LLQvNC+0L3QuNGPINCw0YPRgNGD0Ysg0YHRgtCw0YLQuNGB0YLQuNC60LDQu9GL0psg0YLSsdGA0pPRi9C00LDQvSAg0LbQsNGBINCx0LDQu9Cw0YDQtNCwINC10YDQtdGB0LXQutGC0LXRgNCz0LUg0pvQsNGA0LDSk9Cw0L3QtNCwICDQttC40ZYg0LrQtdC30LTQtdGB0LXQtNGWLtCR0rHQuyDQvtC70LDRgNC00YvSoyDQsNGA0L3QsNC50Ysg0LHQsNKT0YvRgtGC0LDQu9KT0LDQvSDRgtC40ZbQvNC00ZYg0LXQvNC00LXRgyDTmdC00ZbRgdGW0L0g0pvQvtC70LTQsNC90YMg0LrQtdGA0LXQs9GW0L0g0YLSr9GB0ZbQvdC00ZbRgNC10LTRli48YnIgLz4NCjxiciAvPg0KMikg0J3QsNGD0pvQsNGB0YLRi9KjINGI0LDSk9GL0LzQtNCw0YDRi9C9INC205nQvdC1INCW0LDQu9C/0Ysg0pvQsNC9INCw0L3QsNC70LjQt9GW0L0g0pvQsNGA0LDQuSDQvtGC0YvRgNCwINC80LXQvSDQvtGA0YLQsCDQtNOZ0YDQtdC20LXQtNC10LPRliDRgtC10LzRltGAINC20LXRgtC60ZbQu9GW0LrRgdGW0LcgINCw0L3QtdC80LjRjyDQtNC10LPQtdC9INC00LjQsNCz0L3QvtC30pPQsCDQutKv0LTRltC60YLQtdC90LXQvNGW0L0sINGB0LXQsdC10LHRli08YnIgLz4NCiAxKdCT0LXQvNC+0LPQu9C+0LHQuNC90L3RltKjIDkwINCzL9C7INCx0rHQuyDQvdC+0YDQvNCw0LTQsNC9INOZ0LvQtNC1INKb0LDQudC00LAg0LDQtyjQvdC+0YDQvNCwIDExMC0xNDAg0LMv0LspINC+0YDRgtCw0YjQsCDRgdGC0LXQv9C10L3QtNC10LPRliDQsNC90LXQvNC40Y8sIDxiciAvPg0KIDIp0Y3RgNC40YLRgNC+0YbQuNGC0YLQtdGA0LTRltKjINCw0Lcg0LHQvtC70YPRiyw8YnIgLz4NCiAzKSDRgtKv0YEg0LrTqdGA0YHQtdGC0LrRltGI0ZbQvdGW0qMgMCw3INCx0L7Qu9GD0YsgKNCz0LjQv9C+0YXRgNC+0LzQtNGLKSDQutOp0YDRgdC10YLQutGW0YjRgtC10YAg0YLQtdC80ZbRgCDQttC10YLQutGW0LvRltC60YHRltC3INCw0L3QtdC80LjRjyDQtdC60LXQvdGW0L0g0LrTqdGA0YHQtdGC0LXQtNGWINC205nQvdC1INC00LUg0LDQvdC40LvQvtGG0LjRgtC+0Lco05nRgNGC0q/RgNC70ZYg0LrTqdC70LXQvNC00LUpLCDQv9C+0LnQutC40LvQvtGG0LjRgtC+0Lcg0YHQuNGP0pvRgtGLINC/0ZbRiNGW0L3RliDTqdC30LPQtdGA0LPQtdC9INGN0YDQuNGC0YDQvtGG0LjRgtGC0LXRgCwg0L3QsNGD0pvQsNGB0YLRi9KjINGI0LDSk9GL0LzRiy0xKdOZ0LvRgdGW0LfQtNGW0LosMinRgtC10YDRltGB0ZbQvdGW0qMg0LDSm9GI0YvQu9C00YvSk9GLLCAzKdGC05nQsdC10YLRgtGW0qMg0YLTqdC80LXQvdC00ZbQs9GWINCx0rHQvdGLINC005nQu9C10LvQtNC10Lkg0YLSr9GB0LXQtNGWLiDQldC90LTRliDSm9Cw0LvSk9Cw0L0g0LrTqdGA0YHQtdGC0LrRltGI0YLQtdGA0LPQtSDRgtC+0pvRgtCw0LvQsCDQutC10YLRgdC10Lwt0JvQtdC50LrQvtGG0LjRgtGC0LXRgCwg0K3QvtC30LjQvdC+0YTQuNC70LTQtdGALCDRgdC10LPQvNC10L3RgiDRj9C00YDQvtC70YssINGC0LDRj9Kb0YjQsCDRj9C00YDQvtC70Ysg0LrTqdGA0YHQtdGC0LrRltGI0YLQtdGAINC90L7RgNC80LDQtNCwLCDQsNC7INC70LjQvNGE0L7RhtC40YLRgtC10YDQs9C1INGB0LDQuyDQttC+0pPQsNGA0Ysg0LHSsdC7INGE0LjQt9C40L7Qu9C+0LPQuNGP0LvRi9KbINC20L7Sk9Cw0YDQu9Cw0YPRiyDQsdC+0LvRi9C/INGB0LDQvdCw0LvQsNC00YssINC/0LDRgtC+0LvQvtCz0LjRj9C70YvSmyDQttCw0pPQtNCw0Lkg0LXQvNC10YEu0JXQvdC00ZYg0LHSsdC7INKb0L7QudGL0LvSk9Cw0L0g0LTQuNCw0LPQvdC+0LfQtNGLINC90LDSm9GC0YvQu9Cw0YMg0LbTmdC90LUg0L7QvdGL0qMgINGB0LDQu9C00LDRgNGL0LzQtdC9INC+0pPQsNC9INCx0LDSk9GL0YLQsNC70pPQsNC9INC10LzQtNC10YMg0YLTmdGB0ZbQu9GW0L0g0rHRgdGL0L3RgyDSr9GI0ZbQvSDSm9C+0YHRi9C80YjQsCDQt9C10YDRgtGC0LXRgyDTmdC00ZbRgdGC0LXRgNGWINC60LXRgNC10Log0LHQvtC70LDQtNGLLCDQnNGL0YHQsNC70Ysg0LDSk9C30LDQtNCw0pPRiyDRhNC10YDRgNC40YLQuNC90LTRliwg0YLRgNCw0L3RgdGE0LXRgNGA0LjQvdC00ZYg0LbQsNC90LUg0YIu0LEg0LfQtdGA0YLRgtC10YMg0pvQsNC20LXRgiDQsdC+0LvRi9C/INGB0LDQvdCw0LvQsNC00Ysu0J7RgdGL0LvQsNC50YjQsCDQsdGW0Lcg0L/QsNGG0LjQtdC90YLQutC1INGC0LjRltC80LTRliDTmdGA0ZYg0LTSsdGA0YvRgSDQtdC80LTQvdGDINOZ0LTRltGB0ZbQvSDRgtCw0pPQsNC50YvQvdC00LDQudC80YvQty4=</text:p>
          </table:table-cell>
          <table:table-cell office:value-type="float" office:value="170348" table:style-name="ce1">
            <text:p>170348</text:p>
          </table:table-cell>
          <table:table-cell office:value-type="float" office:value="78" table:style-name="ce1">
            <text:p>7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05" table:style-name="ce1">
            <text:p>1067105</text:p>
          </table:table-cell>
          <table:table-cell office:value-type="string" table:style-name="ce1">
            <text:p>kazakh</text:p>
          </table:table-cell>
          <table:table-cell office:value-type="string" table:style-name="ce1">
            <text:p>Билет 22.&amp;lt;br /&amp;gt; 1.Ерте жастағы балалардың төменгі тыныс алу жолдарында дамитын аурулар кеуде қуысының қандай анатомо-физиологиялық ерекшеліктерімен байланысты?&amp;lt;br /&amp;gt; 2. 1 жастағы бала анасымен қабылдауында. Шағымдары әлсіздікке, терісінің ақшылдығына, тәбіеттінің төмендігіне.Зерттеу кезінде анықталды:&amp;lt;br /&amp;gt; Нв. - 90 г/л Лейкоциттер - 9,3 (10*9/л)&amp;lt;br /&amp;gt; Эритроциттер - 3,8 (1012/л,Таяқша ядерлы - 1 %&amp;lt;br /&amp;gt; Түс көрсеткіші -. 0,7 Сегмент ядролы - 21%&amp;lt;br /&amp;gt; Э.Т.Ж. - 5 мм/сағ. Эозинофилдер - 2%&amp;lt;br /&amp;gt; Анизоцитоз ++ &amp;lt;br /&amp;gt; Пойкилоцитоз + Лимфоциттер - 67%&amp;lt;br /&amp;gt; Моноциттер - 8%&amp;lt;br /&amp;gt; Жалпы қан анализын қортындылаңыз&amp;lt;br /&amp;gt;</text:p>
          </table:table-cell>
          <table:table-cell office:value-type="string" table:style-name="ce1">
            <text:p>0JXRgNGC0LUg0LbQsNGB0YLQsNKT0Ysg0LHQsNC70LDQu9GA0LTRi9KjICDQsdGW0YDRltC90YjRliDQsNC/0YLQsNGB0YvQvdC00LAg0LPQtdC80L7Qs9C70L7QsdC40L0g0YLSr9GB0LXQtNGWINCx0rHQuyDQs9C10LzQvtCz0LvQvtCx0LvQuNC9INC60L7QvdGG0LXQvdGC0YDQsNGG0LjRj9GB0YvQvdGL0qMg0LbTmdC90LUg0Y3RgNC40YLRgNC+0YbQuNGC0YLQtdGAINGB0LDQvdC90YvSoyDQsNC30LDRjtGLINGE0LXRgtCw0LvQtNGLINGN0YDQuNGC0L7RhtC40YLRgtC10YAg0LPQtdC40L7Qu9GC0LfRltC90ZbSoyDQttGW0L3QtSDSm9GL0LfRi9C7INKb0LDQvSDQtNC10L3QtdC70LXRgNGW0L3RltKjINKb0LDQvSDRgtKv0LfRltC70YMg0L7RgNCz0LDQvdC40LfQvNC90ZbSoyDTqdC90ZbQvNGW0L3RltKjINC20L7Sk9Cw0YDRiyDQtdC80LXRgSDQtNC10qPQs9C10LnRltC90ZbSoyDQvdOZ0YLQuNC20LXRgdGWINCx0L7Qu9GL0L8g0YLQsNCx0YvQu9Cw0LTRiyDTqdC80ZbRgNGW0L3RltKjINCw0LvSk9Cw0YjSm9GLINCw0L/RgtCw0YHRi9C90LTQsNKT0Ysg0Y3RgNC40YLRgNC+0YbQuNGC0YLQtdGAINC20LDQu9C/0Ysg0pvQsNC9INGC0LDQu9C00LDRg9GL0L3QtNCwINCx0rHQuyDQutOp0YDRgdC10YLQutGW0Ygg0pvQsNC70YvSo9C00YvSk9GLINKv0LvQutC10LnQs9C10L0g0Y3RgNC40YLRgNC+0YbQuNGC0YLQtdGAINC20LDQvdC1INGA0LXRgtC40LrRg9C70L7RhtC40YLQvtC3INGA0LXRgtGW0L3QtNC1INCx0LXQu9Cz0ZbQu9C10L3QtdC00ZYg0LHQtdGBINC20YvQu9KT0LAg0pvQsNGA0LDQuSDQtdGA0LXRgdC10LrRgtC10YDQtNC10LPRltC00LXQuSDQsdC+0LvQsNC00Ysg0pvQsNC9INGC0LDQu9C00LDRg9GLINCw0LvQsNC50LTQsCDSsdGB0YvQvdGL0LvSk9Cw0L0g0LDQvdCw0LvQuNC30LTQtSDQsNC90LjRhtC40YLQvtC3INC205nQvdC1INC/0L7Qu9C40LvQtdC50LrQvtGG0LjRgtC3INC+0qMg0LzTmdC90LTRliDQsdC+0LvSk9Cw0L3QvdCw0L0g0YLQtdC80ZbRgCDRgtCw0L/RiNGL0LvRi9Kb0YLRiyDQsNC90LXQvNC40Y/RgdGLINKb0L7RjtKT0LAg0LHQvtC70LDQtNGLINC+0Lsg0LHQsNC60YLQtdGA0LjRj9C70YvSmyDQuNC90YTQtdC60YbQuNGPINCy0LjRgNGD0YHRgtGL0psg0LHQvtC70YPRiyDQvNKv0LzQutGW0L0g0YLRg9KT0LDQvSDQutC10LfQtNC1INC70LXQudC60L7RhtC40YLRgtC10YAg0YHQsNC90YsgOCw1INC205nQvdC1INGB0L7QtNCw0L0g0LrQtdC50ZbQvSDRgtKx0Lcg0LrQtdC80LjQtdC00ZYg0YLSsdC3INGC0LXQtyDSm9Kx0LvQsNC50LTRiyAxNSDQutKv0L3Qs9C1INKb0LDRgNCw0LkgOSAxNCDQuyDSm9Kx0YDQsNC50LTRiyDQsNC90LDRgtC+0LzQuNGPINGE0LjQt9C10L7Qu9C+0LPQuNGP0LvRi9KbINC10YDQtdC60YjQtdC70ZbQutGC0LXRgNGW0L3QtSDQutC10LvRgdC10Log0LrRltGI0ZYg0YLRi9C90YvRgSDQttC+0LvQtNCw0YDRiyDQsdCw0LvQsNC70LDRgNC00Ysg0LbQvtC70LTQsNGA0Ysg0YLQsNGA0YvQu9KT0LDQvSDSm9Cw0LHRi9C90YMg0YjQsNGA0LDRiCDQvdC10LzQtdGB0LUg0LHTqdCz0LTQtSDQt9Cw0YLRgtCw0YDQvNC10L0g0LHRltGC0LXQu9GD0LPQtSDQsdC10LnRltC8INCx0L7Qu9GL0L8g0LrQtdC70LXQtNGWINCx0rEg0LHQsNC70LDQvdGL0qMg0LHRgNC+0L3RhdC40L7Qu9C40YIg0L3QtdC80LXRgdC1INCw0YHRgtC80LAg0YHQuNCw0pvRgtGLINCw0YPRgNGD0LvQsNGA0LTRi9KjINC00LDQvNGD0YvQvdCwINGL0pvQv9Cw0Lsg0LXRgtC10LTRliDQuNC80YPQvdC00YvSmyDQttKv0LnQtSDQtNCw0LzRi9C80LDSk9Cw0L0g0LbQsNGBINCx0LDQu9Cw0LvQsNGA0LTRi9KjINC40LzRg9C90LTRi9KbINC20q/QudC10YHRliDTmdC70ZbQtNC1INC00LDQvNGDINKv0YHRgtGW0L3QtNC1INCx0L7Qu9Cw0LTRiyDRgdGL0YDRgtGC0LDQvSDQsdOp0LPQtNC1INC30LDRgtGC0LDRgNC00Ysg0pvQsNCx0YvQu9C00LDRg9GLINCx0LXQudGW0Lwg0LHQvtC70LDQtNGLINKb0L7RgNKT0LDQvdGL0YjRgtGL0psg0pvRi9C30LzQtdGC0YLRliDQvdCw0YjQsNGAINCi0YvQvdGL0YEg0LDQu9GDINCx0rHQu9GI0YvSmyDQtdGC0YLQtdGA0ZYg05nQu9GB0ZbQtyDQttC10YLRltC70LzQtdCz0LXQvSDQttCw0YEg0LHQsNC70LDQu9Cw0YDQtNCwINCx0rHQu9GI0YvSm9C10YLRgtC10YDRliDRgdC+0L3Ri9KjINGW0YjRltC90LTQtSDQtNC40LDRhNGA0LDQs9C80LAg0LbTmdC90LUg0pvQsNCx0YvRgNKT0LAg0LDRgNCw0LvRi9KbINCx0rHQu9GI0YvSmyDQtdGC0YLQtdGAINGC0L7Qu9GL0psg0LbQtdGC0ZbQu9C80LXQs9C10L0g0YLRi9C90YvRgSDQsNC70YMg0LbQuNGW0LvRltCz0ZbQvdGW0qMg0LbQvtKT0LDRgNGL0LvQsNGD0Ysg0LrRltGI0LrQtdC90YLQsNC5INCx0LDQu9Cw0LvQsNGA0LTQsCDQtdGA0LXRgdC10LrRgtC10YDQvNC10L0g0YHQsNC70YvRgdGC0YvRgNKT0LDQvdC00LAg0YLRi9C90YvRgSDQttC40ZbQu9GW0LPRliDRgtCw0LHQuNKT0Lgg0YLSr9GA0LTQtSDQttC+0pPQsNGA0Ysg0LbQvtKT0LDRgNGL0LvQsNGD0Ysg0pvQsNGA0pvRi9C90LTRiyDRgtOp0LzQtdC90LPRliDRgtGL0L3Ri9GBINC20L7Qu9C00LDRgNGL0L3Ri9KjINGL0pvRgtC40LzQsNC7INC/0LDRgtCw0LPQtdC90LTQtdGA0ZbQvdC1INOZ0YHQtdGAINC10YLRg9GWINC80q/QvNC60ZbQvSDRgtOp0LzQtdC90LPRliDRgtGL0L3Ri9GBINCw0LvRgyDQttC+0LvQtNCw0YDRi9C90LAg0L3QtdCz0ZbQt9Cz0ZYg0LbQvtC70LTQsNGA0Ysg06nQutC/0LXQvdGW0qMg0ZbRiNGW0L3QtNC10LPRliDQsdGA0L7QvdGF0YLQsNGAINCx0YDQvtC90YXQuNC+0LvQsNC70LDRgCDQsNC70LLQtdC+0LvQsNC70LDRgCDQttCw0YLQsNC00Ysg06nQutC/0LXQvdGW0qMg05nRgCDQsdOZ0YAg0LHRgNC+0L3RhdGC0LDRgCDQtdC60ZbQvdGI0ZYg0q/RiNGW0L3RiNGWINCx0YDQvtC90YXRgtCw0YDSk9CwINCx06nQu9GW0L3QtdC00ZYg0LTQuNCw0YTRgNCw0LPQvNCwINGC0YvQvdGL0YEg0LDQu9GD0pMg0q/Qu9C60LXQvSDRgNOp0Lsg0LDRgtKb0LDRgNCw0LTRiyDQsdCw0LvQsNC70LDRgNC00LAg0YLRi9C90YvRgSDQsNC70YMg0YLQtdGA0LXSo9C00ZbQs9GW0L0g0pvQsNC00LDSk9Cw0LvQsNC50LTRiyDQttC40YvRgNGL0LvRg9GL0L0g05nQu9GB0ZbQt9C00ZbQs9GW0L0g0L/Qu9C10LLRgNCwINC+0qPQsNC5INGB0L7Qt9GL0LvQsNC00Ysg0YHQsNC70YvRgdGC0YvRgNC80LDQu9GLINKb0LDQu9GL0qMg0LHQvtGA0L/Ri9C70LTQsNKbINC80LjRi9C80LTQsNKT0Ysg0LHQsNGA0LvRi9KT0YvQvSDQttCw0LfQtNGL0Lwg0YDQsNGF0LzQtdGC</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29" table:style-name="ce1">
            <text:p>915429</text:p>
          </table:table-cell>
          <table:table-cell office:value-type="string" table:style-name="ce1">
            <text:p>russian</text:p>
          </table:table-cell>
          <table:table-cell office:value-type="string" table:style-name="ce1">
            <text:p>Билет 22.&amp;lt;br /&amp;gt; 1.С какими анатомо-физиологическими особенностями грудной клетки связано возникновение заболеваний нижних дыхательных путей у детей раннего возраста? &amp;lt;br /&amp;gt; 2.На приеме мама с ребенком в возрасте 1 года. Обратились в связи с жалобами на слабость, бледность ребенка, плохой аппетит. При обследовании выявлено:&amp;lt;br /&amp;gt; Нв. - 90 г/л Лейкоциты - 9,3 (10*9/л)&amp;lt;br /&amp;gt; Эритроциты - 3,8 (1012/л Палочкоядерные - 1 %&amp;lt;br /&amp;gt; Цв: пок -. 0,7 Сегментоядетные - 21%&amp;lt;br /&amp;gt; С.О.Э. - 5 мм/час Эозинофилы - 2%&amp;lt;br /&amp;gt; Анизоцитоз ++ &amp;lt;br /&amp;gt; Пойкилоцитоз + &amp;lt;br /&amp;gt; Лимфоциты - 67%&amp;lt;br /&amp;gt; Моноциты - 8%&amp;lt;br /&amp;gt; Дайте интерпретацию анализа крови.&amp;lt;br /&amp;gt;</text:p>
          </table:table-cell>
          <table:table-cell office:value-type="string" table:style-name="ce1">
            <text:p>0JDQvdCw0YLQvtC80L4t0YTQuNC30LjQvtC70L7Qs9C40YfQtdGB0LrQuNC1INC+0YHQvtCx0LXQvdC90L7RgdGC0Lgg0LPRgNGD0LTQvdC+0Lkg0LrQu9C10YLQutC4OiDQk9GA0YPQtNC90LDRjyDQutC70LXRgtC60LAsINC40LzQtdC10YIg0LHQvtGH0LrQvtC+0LHRgNCw0LfQvdGD0Y4g0YTQvtGA0LzRgywg0YHQsNCz0LjRgtGC0LDQu9GM0L3Ri9C1INGA0LDQt9C80LXRgNGLINC/0L7Rh9GC0Lgg0YDQsNCy0L3RiyDQv9C+0L/QtdGA0LXRh9C90L7QvNGDLCDQoNC10LHRgNCwINGA0LDRgdC/0L7Qu9C+0LbQtdC90Ysg0LPQvtGA0LjQt9C+0L3RgtCw0LvRjNC90L4sINCt0L/QuNCz0LDRgdGC0YDQsNC70YzQvdGL0Lkg0YPQs9C+0Lsg0YLRg9C/0L7QuSwg0J/QvtC/0LXRgNC10YfQvdC+0LUg0YHQtdGH0LXQvdC40LUg0L7QutGA0YPQs9C70L7QuSDRhNC+0YDQvNGLLCDQlNGL0YXQsNGC0LXQu9GM0L3QsNGPINC80YPRgdC60YPQu9Cw0YLRg9GA0LAg0YDQsNC30LLQuNGC0LAg0YHQu9Cw0LHQviwg0LTRi9GF0LDQvdC40LUg0L/QvtCy0LXRgNGF0L3QvtGB0YLQvdC+0LUsINGBINCy0L7Qt9GA0LDRgdGC0L7QvCwg0LPRgNGD0LTQvdCw0Y8g0LrQu9C10YLQutCwLCDQtdC1INC/0L7Qv9C10YDQtdGH0L3QvtC1INGB0LXRh9C10L3QuNC1LCDRgdGC0LDQvdC+0LLQuNGC0YHRjyDQvtCy0LDQu9GM0L3QvtC5INGE0L7RgNC80YssINGB0LDQs9C40YLRgtCw0LvRjNC90YvQuSDRgNCw0LfQvNC10YDRiyDRg9C80LXQvdGM0YjQsNGO0YLRgdGPLCDRhNGA0L7QvdGC0LDQu9GM0L3Ri9C1INGD0LLQtdC70LjRh9C40LLQsNGO0YLRgdGPLCDQv9C10YDQtdC00L3QtdC30LDQtNC90LjQuSDRgNCw0LfQvNC10YAg0YHRgtCw0L3QvtCy0LjRgtGB0Y8g0LzQtdC90YzRiNC1LCDRgNC10LHRgNCwINGA0LDRgdC/0L7Qu9Cw0LPQsNGO0YLRgdGPINC60L7RgdC+LCDRjdC/0LjQs9Cw0YHRgtGA0LDQu9GM0L3Ri9C5INGD0LPQvtC7INGB0YLQsNC90L7QstC40YLRgdGPINC+0YHRgtGA0LXQtS4g0JLRgdC70LXQtNGB0YLQstC40LUg0LTQsNC90L3Ri9GFINC+0YHQvtCx0LXQvdC90L7RgdGC0LXQuSDQs9GA0YPQtNC90L7QuSDQutC70LXRgtC60LgsINCy0L7Qt9C80L7QttC90L4g0YDQsNC30LLQuNGC0LjQtSDQsNGC0LXQu9C10LrRgtCw0LfQvtCyINGDINC00LXRgtC10LksINGB0L/QsNC00LXQvdC40LUg0LDQu9GM0LLQtdC+0LsuINCi0LDQutC20LUg0L7QvdCwINC70LXQs9C60L4g0YHQtNCw0LLQu9C40LLQsNC10YLRgdGPINC40LfQstC90LUsINGC0LDQuiDRh9GC0L4g0LvQtdCz0LrQviDQv9C+0LTQstC10YDQttC10L3QsCDQv9C10YDQtdC70L7QvNCw0LwuINCf0YDQuCDQv9C70LXQstGA0LjRgtCw0YUsINCy0L7Qt9C80L7QttC90Ysg0LLRi9Cx0YPRhdCw0L3QuNC1INCz0YDRg9C00L3QvtC5INC60LvQtdGC0LrQuC4g0KLQsNC60LbQtSDQstC+0LfQvNC+0LbQvdC+INGA0LDQt9Cy0LjRgtC40LUg0L/QvdC10LLQvtC80L3QuNC5LiAo0KMg0LTQtdGC0LXQuSDRgNCw0L3QvdC10LPQviDQstC+0LfRgNCw0YHRgtCwLCDQsiDRgdCy0Y/Qt9C4INGBINCw0L3QsNGC0L7QvNC+LdGE0LjQt9C40L7Qu9C+0LPQuNGH0LXRgdC60LjQvNC4INGB0LLQvtC50YHRgtCy0LDQvNC4INCx0YDQvtC90YXQuNCw0LvRjNC90L7Qs9C+INC00LXRgNC10LLQsCwg0LIg0YHQstGP0LfQuCDRgtC10LwsINGH0YLQviDQtdC1INGB0LvQuNC30LjRgdGC0LDRjyDQvtCx0L7Qu9C+0YfQutCwINC90LXQttC90LDRjywg0LHQvtCz0LDRgtC+INCy0LDRgdC60YPQu9GP0YDQuNC30LjRgNC+0LLQsNC90LAsINC90LXQvNC90L7Qs9C+INGB0LvQuNC30Lgg0L3QsCDQv9C+0LLQtdGA0YXQvdC+0YHRgtC4INCx0YDQvtC90YXQvtCyLCDRhtC40LvQuNC90LTRgNC40YfQtdGB0LrQuNC5INC80LXRgNGG0LDRgtC10LvRjNC90YvQuSDRjdC/0LjRgtC10LvQuNC5LCDQtNC10YLQuCDQvdCw0LjQsdC+0LvQtdC1INC/0L7QtNCy0LXRgNC20LXQvdGLINCy0L7RgdC/0LDQu9C10L3QuNGP0LwsINC/0L3QtdCy0LzQvtC90LjRj9C8LCDQsdGA0L7QvdGF0LjRgtCw0LwsINC40Lcg0LfQsCDRhdC+0LvQvtC00LAg0L3QsNC/0YDQuNC80LXRgC4g0KLQsNC60LbQtSDRgdGC0L7QuNGCINGB0LrQsNC30LDRgtGMINGH0YLQviDQsdGA0L7QvdGF0LjQsNC70YzQvdC+0LUg0LTQtdGA0LXQstC+INGB0L7RgdGC0L7QuNGCINC40Lcg0YXRgNGP0YnQtdC5LCDRgdC+0LXQtNC40L3QtdC90L3Ri9GFINGB0LfQsNC00Lgg0YTQuNCx0YDQvtC30L3QvtC5INC/0LXRgNC10L/QvtC90LrQvtC5LCDQsCDRgtCw0LrQttC1INC+0YLQvNC10YfRgywg0YfRgtC+INCz0LvQsNC00LrQsNGPINC80YPRgdC60YPQu9Cw0YLRg9GA0LAg0LHRgNC+0L3RhdC+0LIg0LTQtdGC0LXQuSDRgNCw0L3QvdC10LPQviDQstC+0LfRgNCw0YHRgtCwINGB0LvQsNCx0LDRjywg0Lgg0LLRgdC70LXQtNGB0YLQstC40LUg0Y3RgtC+0LPQviDQv9GA0Lgg0LDRgdC/0LjRgNCw0YbQuNC4INC40L3QvtGA0L7QtNC90YvQvNC4INGC0LXQu9Cw0LzQuCwg0LHRgNC+0L3RhSDQvdC1INGB0L/QsNC30LzQuNGA0YPQtdGC0YHRjy4g0JDQu9GM0LLQtdC+0LvRiyDRgyDQtNC10YLQtdC5ICDQvdC10LTQvtGB0YLQsNGC0L7Rh9C90L4g0YDQsNC30LLQuNGC0YssINC/0L4g0LrQvtC70LjRh9C10YHRgtCy0YMsINC6INGA0L7QttC00LXQvdC40Y4g0LjRhSDQvtC60L7Qu9C+IDYwINC80LvQvSwg0YLQvtCz0LTQsCDQutCw0Log0YMg0LLQt9GA0L7RgdC70YvRhSAzNDAg0LzQu9C9LiDQktGB0LvQtdC00YHRgtCy0LjQtSDQvdC10LTQvtGB0YLQsNGC0L7Rh9C90L7Qs9C+INGA0LDQt9Cy0LjRgtC40Y8g0LDQu9GM0LXQstC+0LssICDQstC+0LfQvNC+0LbQtdC9INC90LjQt9C60LjQuSDRgdC40L3RgtC10Lcg0YHRg9GA0YTQsNC60YLQsNC90YLQsCwg0LrQvtGC0L7RgNGL0Lkg0YPQvNC10L3RjNGI0LDQtdGCINC/0L7QstC10YDRhdC90L7RgdGC0L3QvtC1INC90LDRgtGP0LbQtdC90LjQtSDQsNC70YzQstC10L7Quywg0L7QsdC70LDQtNCw0Y7RidC40Lkg0LHQsNC60YLQtdGA0LjRhtC40LTQvdC+0Lwg0LTQtdC50YHRgtCy0LjQtdC8LCDRg9C70YPRh9GI0LDQtdGCINC80YPQutC+0YbQuNC70LvQuNCw0YDQvdGL0Lkg0LDQv9C/0LDRgNCw0YIuINCS0YHQu9C10LTRgdGC0LLQuNC1INC90LjQt9C60L7Qs9C+INGB0LjQvdGC0LXQt9CwLCDQstGA0L7QttC00LXQvdC90L4g0LLQvtC30LzQvtC20LXQvSDRgNC10YHQv9C40YDQsNGC0L7RgNC90YvQuSDQtNC40YHRgtGA0LXRgdGBINGB0LjQvdC00YDQvtC8LiDQotCw0LrQttC1INCy0L7Qt9C80L7QttC90Ysg0YHQv9Cw0LTQtdC90LjRjyDQsNC70YzQstC10L7QuykuPGJyIC8+DQo8YnIgLz4NCtCX0LDQtNCw0L3QuNC1IDIuINCY0L3RgtC10YDQv9GA0LXRgtCw0YbQuNGPINCw0L3QsNC70LjQt9CwINC60YDQvtCy0Lg6INCd0LAg0LDQvdCw0LvQuNC30LDRhSDRgyDRgNC10LHQtdC90LrQsCAxINCz0L7QtNCwLCDQvNGLINCy0LjQtNC40LwsINC/0L7QvdC40LbQtdC90L3Ri9C5INCz0LXQvNC+0LPQu9C+0LHQuNC9IC0gOTAg0LMv0LsgKNC90L7RgNC80LAgMTEwLTEzMCDQsy/QuyDQtNC70Y8gMSDQs9C+0LTQsCksINGC0LDQutC20LUg0LzRiyDQstC40LTQuNC8INC/0L7QvdC40LbQtdC90L3Ri9C1INGN0YDQuNGC0YDQvtGG0LjRgtGLIC0gMyw4INGFIDEwMTIv0LsgKNC90L7RgNC80LAgNCwwIC0gNCw1INGFIDEwMTIv0Lsg0LTQu9GPIDEg0LPQvtC00LApINCm0LLQtdGC0L3QvtC5INC/0L7QutCw0LfQsNGC0LXQu9GMIC0gMCw3ICjQvdC+0YDQvNCwIDAuODcgLSAxLjAxKSDRh9GC0L4g0LPQvtCy0L7RgNC40YIg0L4g0LPQuNC/0L7RhdGA0L7QvNC90L7QuSDQsNC90LXQvNC40LgsICjQvdC10L7QsdGF0L7QtNC40LzQviDRgdC00LXQu9Cw0YLRjCDQsNC90LDQu9C40LfRiyDQvdCwINC20LXQu9C10LfQviwg0YLQsNC60LbQtSDQstC+0LfQvNC+0LbQvdCwINCz0LXQvNC+0LvQuNGC0LjRh9C10YHQutCw0Y8g0LDQvdC10LzQuNGPKNC/0YDQvtCy0LXRgNC40YLRjCDQsdC40LvQu9C40YDRg9Cx0LjQvSnQuCDQvdCwINCy0LjRgtCw0LzQuNC9INCRMTIpLCDQrdGA0LjRgtGA0L7RhtC40YLRiyAtINGD0LLQtdC70LjRh9C10L3RiyDQsiDRgNCw0LfQvNC10YDQsNGFICjQsNC90LjQt9C+0YbQuNGC0L7QtyDQuCDQv9C+0LnQutC40LvQvtGG0LjRgtC+0LcpLiDQoNC10LHQtdC90L7QuiDQttCw0LvRg9C10YLRgdGPINC90LAg0LHQu9C10LTQvdC+0YHRgtGMINC4INC/0LvQvtGF0L7QuSDQsNC/0L/QtdGC0LjRgi4g0JLRgdC70LXQtNGB0YLQstC40LUg0Y3RgtC+0LPQviDQstC+0LfQvNC+0LbQvdCwINC20LXQu9C10LfQvtC00LXRhNC40YbQuNGC0L3QsNGPINCw0L3QtdC80LjRjyDQuNC70Lgg0JExMiDQtNC10YTQuNGG0LjRgtC90LDRjyDQsNC90LXQvNC40Y8uINCb0LjQvNGE0L7RhtC40YLRiyAtINGD0LLQtdC70LjRh9C10L3RiywgNjclLCDQodC10LPQvNC10L3RgtC+0Y/QtNC10YDQvdGL0LUgLSDRg9C80LXQvdGM0YjQtdC90YsgMjElLCDRg9Cy0LXQu9C40YfQtdC90LjQtSDQu9C40LzRhNC+0YbQuNGC0L7QsiAo0LvQuNC80YTQvtGG0LjRgtC+0LcpLCDQodCe0K0g0L/QvtCy0YvRiNC10L3QviwgNdC80Lwg0LIg0YfQsNGBLCAo0L3QvtGA0LzQsCDQtNC70Y8gMSDQs9C+0LTQsCAtIDItMyDQvNC8L9GHKSDQv9GA0L7QtNGD0YbQuNGA0YPQtdGC0YHRjyDQsdC+0LvRjNGI0L7QtSDQutC+0LvQuNGH0LXRgdGC0LLQviDQu9C40LzRhNC+0YbQuNGC0L7Qsiwg0LrQvtGC0L7RgNGL0LUg0L/RgNC10L7QsdC70LDQtNCw0Y7RgiDQvdCw0LQg0YHQuNC90YLQtdC30L7QvCDQvdC10LnRgtGA0L7RhNC40LvQvtCyLCDQuCDQv9C+0Y3RgtC+0LzRgyDQvdC10LnRgtGA0L7RhNC40LvQvtCyINC80LXQvdGM0YjQtS4=</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 написано какой степени анемия . О чем говорит повышение лимфоцитов.Нормы не написаны лимфоцитов и нейтрофилов.</text:p>
          </table:table-cell>
          <table:table-cell office:value-type="float" office:value="0" table:style-name="ce1">
            <text:p>0</text:p>
          </table:table-cell>
          <table:table-cell table:number-columns-repeated="16376"/>
        </table:table-row>
        <table:table-row table:style-name="ro1">
          <table:table-cell office:value-type="float" office:value="1066936" table:style-name="ce1">
            <text:p>1066936</text:p>
          </table:table-cell>
          <table:table-cell office:value-type="string" table:style-name="ce1">
            <text:p>russian</text:p>
          </table:table-cell>
          <table:table-cell office:value-type="string" table:style-name="ce1">
            <text:p>Билет 22.&amp;lt;br /&amp;gt; 1.С какими анатомо-физиологическими особенностями грудной клетки связано возникновение заболеваний нижних дыхательных путей у детей раннего возраста? &amp;lt;br /&amp;gt; 2.На приеме мама с ребенком в возрасте 1 года. Обратились в связи с жалобами на слабость, бледность ребенка, плохой аппетит. При обследовании выявлено:&amp;lt;br /&amp;gt; Нв. - 90 г/л Лейкоциты - 9,3 (10*9/л)&amp;lt;br /&amp;gt; Эритроциты - 3,8 (1012/л Палочкоядерные - 1 %&amp;lt;br /&amp;gt; Цв: пок -. 0,7 Сегментоядетные - 21%&amp;lt;br /&amp;gt; С.О.Э. - 5 мм/час Эозинофилы - 2%&amp;lt;br /&amp;gt; Анизоцитоз ++ &amp;lt;br /&amp;gt; Пойкилоцитоз + &amp;lt;br /&amp;gt; Лимфоциты - 67%&amp;lt;br /&amp;gt; Моноциты - 8%&amp;lt;br /&amp;gt; Дайте интерпретацию анализа крови.&amp;lt;br /&amp;gt;</text:p>
          </table:table-cell>
          <table:table-cell office:value-type="string" table:style-name="ce1">
            <text:p>MSkg0JLQvtC30L3QuNC60L3QvtCy0LXQvdC40LUg0LfQsNCx0L7Qu9C10LLQsNC90LjQuSDQvdC40LbQvdC40YUg0LTRi9GF0LDRgtC10LvRjNC90YvRhSDQv9GD0YLQtdC5INGDINC00LXRgtC10Lkg0YDQsNC90L3QtdCz0L4g0LLQvtC30YDQsNGB0YLQsCDRgdCy0Y/Qt9Cw0L3QviDRgSDQvtC/0YDQtdC00LXQu9C10L3QvdGL0LzQuCDQsNC90LDRgtC+0LzQvi3RhNC40LfQuNC+0LvQvtCz0LjRh9C10YHQutC40LzQuCDQvtGB0L7QsdC10L3QvdC+0YHRgtGP0LzQuCDQs9GA0YPQtNC90L7QuSDQutC70LXRgtC60Lg6IDEuINCR0L7Rh9C60L7QvtCx0YDQsNC30L3QsNGPINGE0L7RgNC80LAg0LPRgNGD0LTQvdC+0Lkg0LrQu9C10YLQutC4LCDRh9GC0L4g0L7QsdGD0YHQu9C+0LLQu9C10L3QviDRgtCw0LrQttC1IDIuINCx0L7Qu9C10LUg0LPQvtGA0LjQt9C+0L3RgtCw0LvRjNC90YvQvCDRhdC+0LTQvtC8INGA0LXQsdC10YAg0L7RgiDQv9C+0LfQstC+0L3QvtGH0L3QuNC60LAsINGCLtC1LiDQvdCwINC00LDQvdC90L7QvCDRjdGC0LDQv9C1INC/0L7RgdGC0L3QsNGC0LDQu9GM0L3QvtCz0L4g0YDQsNC30LLQuNGC0LjRjyDQtdGJ0LUg0L7RgtGB0YPRgtGB0YLQstGD0LXRgiDQtdGB0YLQtdGB0YLQstC10L3QvdCw0Y8g0LrRgNC40LLQuNC30L3QsCDRhdC+0LTQsCDRgNC10LHQtdGAID0g0YTQvtGA0LzQsCDQs9GA0YPQtNC90L7QuSDQutC70LXRgtC60Lgg0LHRg9C00YLQviDQsdGLINC90LAg0YTQsNC30LUg0LzQsNC60YHQuNC80LDQu9GM0L3QvtCz0L4g0LLQtNC+0YXQsCArINGN0L/QuNCz0LDRgdGC0YDQsNC70YzQvdGL0Lkg0YPQs9C+0Lsg0YMg0LTQtdGC0LXQuSDQsdC+0LvQtdC1INGC0YPQv9C+0Lk7IDMuINCh0LDQs9C40YLRgtCw0LvRjNC90YvQuSDRgNCw0LfQvNC10YAg0LPRgNGD0LTQvdC+0Lkg0LrQu9C10YLQutC4INC/0YDQsNC60YLQuNGH0LXRgdC60Lgg0YHQuNC80LzQtdGC0YDQuNGH0LXQvSDQv9C+0L/QtdGA0LXRh9C90L7QvNGDINGA0LDQt9C80LXRgNGDINCz0YDRg9C00L3QvtC5INC60LvQtdGC0LrQuCwg0YfRgtC+INC+0LHRg9GB0LvQsNCy0LvQuNCy0LDQtdGCINGE0L7RgNC80YMg0LPRgNGD0LTQvdC+0Lkg0LrQu9C10YLQutC4LCDQsCDRgtCw0LrQttC1INGC0L4sINGH0YLQviDQvtC90LAg0YjQuNGA0L7QutCw0Y8g0Lgg0LrQvtGA0L7RgtC60LDRjzsgNC4g0J3QsNCx0LvRjtC00LDQtdGC0YHRjyDRgdC70LDQsdC+0LUg0YDQsNC30LLQuNGC0LjQtSDQtNGL0YXQsNGC0LXQu9GM0L3QvtC5INC80YPRgdC60YPQu9Cw0YLRg9GA0Ysg0YMg0L3QvtCy0L7RgNC+0LbQtNC10L3QvdGL0YUg0Lgg0LTQtdGC0LXQuSAxINC80LXRgdGP0YbQsCDQttC40LfQvdC4LCDQv9GA0LXQvtCx0LvQsNC00LDQtdGCINC/0YDQtdC40LzRg9GJ0LXRgdGC0LLQtdC90L3QviDQtNC40LDRhNGA0LDQs9C80LDQu9GM0L3QvtC1INC4INC/0L7QstC10YDRhdC90L7RgdGC0L3QvtC1INC00YvRhdCw0L3QuNC1LCDQv9C+0YHQu9C10LTQvdC10LUgKNC/0L7QstC10YDRhdC90L7RgdGC0L3QvtC1INC00YvRhdCw0L3QuNC1KSDQvtCx0YPRgdC70L7QstC70LXQvdC+INGC0LDQutC20LUg0L/RgNC10L7QsdC70LDQtNCw0L3QuNC10Lwg0YLQvtC90YPRgdCwINGB0LjQvNC/0LDRgtC40YfQtdGB0LrQvtC5INC90LXRgNCy0L3QvtC5INGB0LjRgdGC0LXQvNCwINC90LDQtCDQv9Cw0YDQsNGB0LjQvNC/0LDRgtC40YfQtdGB0LrQuNC8INC4INC90LXQt9GA0LXQu9C+0YHRgtGM0Y4g0LTRi9GF0LDRgtC10LvRjNC90L7Qs9C+INGG0LXQvdGC0YDQsCDRgSDQv9C10YDQuNGE0LXRgNC40YfQtdGB0LrQuNC80Lgg0Lgg0YbQtdC90YLRgNCw0LvRjNC90YvQvNC4INGF0LXQvNC+0YDQtdGG0LXQv9GC0L7RgNCw0LzQuC4g0JTQvtC/0L7Qu9C90LjRgtC10LvRjNC90L4g0LzQvtC20L3QviDQvtGC0LzQtdGC0LjRgtGMLCDRh9GC0L4g0LvQtdCz0LrQuNC1INGDINC00LXRgtC10Lkg0YDQsNC90L3QtdCz0L4g0LLQvtC30YDQsNGB0YLQsCDQsdC+0LvQtdC1INC/0L7Qu9C90L7QutGA0L7QstC90Ysg0Lgg0LzQtdC90LXQtSDQstC+0LfQtNGD0YjQvdGLLCDRh9GC0L4g0L/RgNC4INCy0L7Qt9C90LjQutC90L7QstC10L3QuNC4INC30LDQsdC+0LvQtdCy0LDQvdC40Lkg0L3QuNC20L3QuNGFINC00YvRhdCw0YLQtdC70YzQvdGL0YUg0L/Rg9GC0LXQuSDRgdC/0L7RgdC+0LHRgdGC0LLRg9C10YIg0LHQvtC70LXQtSDRgdC40LvRjNC90L7QvNGDINGB0LrQvtC/0LvQtdC90LjRjiDQstC+0YHQv9Cw0LvQuNGC0LXQu9GM0L3QvtCz0L4g0Y3QutGB0YHRg9C00LDRgtCwINCyINC/0LDRgNC10L3RhdC40LzQtS4g0JLQtNC+0LHQsNCy0L7Quiwg0YXQvtGC0Ywg0YHRg9GA0YTQsNC60YLQsNC90YIg0Lgg0L7Qv9GA0LXQtNC10LvRj9C10YLRgdGPINGDINGA0LXQsdC10L3QutCwINC/0YDQuNC80LXRgNC90L4g0YEgMzAt0L7QuSDQvdC10LTQtdC70LUg0LLQvdGD0YLRgNC40YPRgtGA0L7QsdC90L7Qs9C+INGA0LDQt9Cy0LjRgtC40Y8sINC/0YDQuCDRgNC+0LbQtNC10L3QuNC4INC+0L0g0LXRidC1INC90LUg0LTQvtGB0YLQsNGC0L7Rh9C90L4g0LLRi9GA0LDQsdC+0YLQsNC9INCyINC/0L7Qu9C90L7QvCDQutC+0LvQuNGH0LXRgdGC0LLQtSDQsNC70YzQstC10L7Qu9C+0YbQuNGC0LDQvNC4IDIg0YLQuNC/0LAg0Lgg0LrQu9C10YLQutCw0LzQuCDQmtC70LDRgNCwLiDQmiDRgtC+0LzRgyDQttC1LCDQsiDQv9C+0YHRgtC90LDRgtCw0LvRjNC90L7QvCDRgNCw0LfQstC40YLQuNC4INC70LXQs9C60LjRhSDQvNC+0LbQvdC+INC+0YLQvNC10YLQuNGC0YwsINGH0YLQviDQv9C+0LvQvdC+0LrRgNC+0LLQuNC1INC4INC+0YLQvdC+0YHQuNGC0LXQu9GM0L3QviDQsdC+0LvRjNGI0L7QtSDQutC+0LvQuNGH0LXRgdGC0LLQviDRgdC+0LXQtNC40L3QuNGC0LXQu9GM0L3QvtC5INGC0LrQsNC90Lgg0YLQsNC60LbQtSDRgdCy0Y/Qt9Cw0L3QviDRgSDRgtC10LwsINGH0YLQviDQv9GA0Lgg0YDQvtC20LTQtdC90LjQuCDRgyDRgNC10LHQtdC90LrQsCAyNCDQvNC70L0g0LDQu9GM0LLQtdC+0LssINGH0YLQviDQsiDQtNCw0LvRjNC90LXQudGI0LXQvCDQv9GA0LjQstC+0LTQuNGCINC6INC40YUg0YDQsNC30LLQuNGC0LjRjiDQtNC+IDYwINC80LvQvSDQsiDQstC+0LfRgNCw0YHRgtC1IDIg0LvQtdGCLCDQsCDQtNC+0YHRgtC40LPQsNC10YIg0LrQvtC70LjRh9C10YHRgtCy0LAsINGA0LDQstC90L7QvNGDINGDINCy0LfRgNC+0YHQu9GL0YUsINGC0L7Qu9GM0LrQviDQuiAxMi0xNSDQu9C10YIgKNCx0L7Qu9C10LUgMzAwINC80LjQu9C70LjQvtC90L7QsiDQsNC70YzQstC10L7QuykgPSDQstC+0LfQtNGD0YjQvdC+0YHRgtGMINC4INCy0LXQvdGC0LjQu9GP0YbQuNGPINC70LXQs9C+0YfQvdC+0Lkg0YLQutCw0L3QuCDQstC+0LfRgNCw0YHRgtCw0LXRgiDQsiDRhdC+0LTQtSDQstC30YDQvtGB0LvQtdC90LjRjyDRgNC10LHQtdC90LrQsC4g0JTQvtC/0L7Qu9C90LjRgtC10LvRjNC90L4g0Log0L7RgtCy0LXRgtGDINC90LAg0LLQvtC/0YDQvtGBINC80L7QttC90L4g0L7RgtC80LXRgtC40YLRjCwg0YfRgtC+INC/0L4g0YXQvtC00YMg0LLQt9GA0L7RgdC70LXQvdC40Y8g0YMg0YDQtdCx0LXQvdC60LAg0LTQsNC90L3Ri9C1INCw0L3QsNGC0L7QvNC+LdGE0LjQt9C40L7Qu9C+0LPQuNGH0LXRgdC60LjQtSDQvtGB0L7QsdC10L3QvdC+0YHRgtC4INC/0YDQvtC/0LDQtNCw0Y7Rgiwg0YIu0LUuINGD0LzQtdC90YzRiNCw0LXRgtGB0Y8g0L/QtdGA0LXQtNC90LUt0LfQsNC00L3QuNC5INGA0LDQt9C80LXRgCwg0LPRgNGD0LTQvdCw0Y8g0LrQu9C10YLQutCwINGB0YLQsNC90L7QstC40YLRgdGPINCx0L7Qu9C10LUg0YPQv9C70L7RidC10L3QvdC+0LkgKNC6IDE1INCz0L7QtNCw0Lwg0YPQv9C70L7RidCw0LXRgtGB0Y8pLCDRg9Cy0LXQu9C40YfQuNCy0LDQtdGC0YHRjyDQutGA0LjQstC40LfQvdCwINGF0L7QtNCwINGA0LXQsdC10YAsINGN0L/QuNCz0LDRgdGC0YDQsNC70YzQvdGL0Lkg0YPQs9C+0Lsg0YHRgtCw0L3QvtCy0LjRgtGB0Y8g0LHQvtC70LXQtSDQvtGB0YLRgNGL0LwsINGA0LDQt9Cy0LjQstCw0LXRgtGB0Y8g0L/QtdGA0LXRhdC+0LQg0YEg0LTQuNCw0YTRgNCw0LPQvNCw0LvRjNC90L7Qs9C+INC/0L7QstC10YDRhdC90L7RgdGC0L3QvtCz0L4g0L3QsCDQs9GA0YPQtNC90L7QtSDQtNGL0YXQsNC90LjQtSAo0YEgMyDQu9C10YIg0YHRgtCw0L3QvtCy0LjRgtGB0Y8g0Y3RhNGE0LXQutGC0LjQstC90YvQvCksINGD0LzQtdC90YzRiNCw0LXRgtGB0Y8g0KfQlNCUICjQvNC40LXQu9C40L3QtdC30LDRhtC40Y8g0LLQvtC70L7QutC+0L0g0LHQu9GD0LbQtNCw0Y7RidC10LPQviDQvdC10YDQstCwLCDRgNCw0LfQstC40YLQuNC1INC90LXRgNCy0L3Ri9GFINGG0LXQvdGC0YDQvtCyINCyINC/0YDQvtC00L7Qu9Cz0L7QstCw0YLQvtC8INC80L7Qt9Cz0YMsINGD0LLQtdC70LjRh9C10L3QuNC1INC00YvRhdCw0YLQtdC70YzQvdC+0LPQviDQuCDQtNGA0YPQs9C40YUg0L7QsdGK0LXQvNC+0LIg0LvQtdCz0LrQvtCz0L4pLiDQndCw0LTQtdGO0YHRjCwg0YfRgtC+INC00L7Qv9C+0LvQvdC40YLQtdC70YzQvdCw0Y8g0LjQvdGE0L7RgNC80LDRhtC40Y8g0L3QtSDQsdGD0LTQtdGCINGA0LDRgdGG0LXQvdC40LLQsNGC0YzRgdGPINC60LDQuiDQu9C40YjQvdGP0Y8sINGB0L/QsNGB0LjQsdC+ITxiciAvPg0KMikg0JjQvdGC0LXRgNC/0YDQtdGC0LDRhtC40Y8g0LDQvdCw0LvQuNC30LAg0LrRgNC+0LLQuDog0LTQu9GPINGA0LXQsdC10L3QutCwINCy0L7Qt9GA0LDRgdGC0L7QvCAxINCz0L7QtNCwINC90LDQsdC70Y7QtNCw0Y7RgtGB0Y8g0LIg0L3QvtGA0LzQtSDRgdC70LXQtNGD0Y7RidC40LUg0L/QvtC60LDQt9Cw0YLQtdC70Lg6INC70LXQudC60L7RhtC40YLRiywg0YTRgNCw0LrRhtC40Lgg0L3QtdC50YLRgNC+0YTQuNC70L7QsiAo0L/QsNC70L7Rh9C60L7Rj9C00LXRgNC90YvQtSDQuCDRgdC10LPQvNC10L3RgtC+0Y/QtNC10YDQvdGL0LUpLCDQodCe0K0sINGN0L7Qt9C40L3QvtGE0LjQu9GLLCDQu9C40LzRhNC+0YbQuNGC0Ysg0Lgg0LzQvtC90L7RhtC40YLRiy4g0J/QsNGC0L7Qu9C+0LPQuNGH0LXRgdC60LjQtSDQuNC30LzQtdC90LXQvdC40Y8g0LIg0LrRgNC+0LLQuDog0YHQvdC40LbQtdC90LjQtSDRg9GA0L7QstC90Y8g0LPQtdC80L7Qs9C70L7QsdC40L3QsCDQvdC40LbQtSDQvdC+0YDQvNGLICjQtNC70Y8g0LTQtdGC0LXQuSDQstC+0LfRgNCw0YHRgtC+0LwgMSDQs9C+0LTQsCDQvdC+0YDQvNCwINGB0L7RgdGC0LDQstC70Y/QtdGCICDQv9GA0LjQvNC10YDQvdC+IDExMC0xMzAg0LMv0LspINC4INGN0YDQuNGC0YDQvtGG0LjRgtC+0LIg0L3QuNC20LUg0L3QvtGA0LzRiyAo0LIg0L3QvtGA0LzQtSDQsiDRgdGA0LXQtNC90LXQvCDQtNC70Y8gMSDQs9C+0LTQsCA0LTQsNSAxMC8xMtC7KTsg0KbQstC10YLQvtCy0L7QuSDQv9C+0LrQsNC30LDRgtC10LvRjCDQvdC40LbQtSDQvdC+0YDQvNGLICjQvdC40LbQvdGP0Y8g0LPRgNCw0L3QuNGG0LAg0KbQnyDRgdC+0LPQu9Cw0YHQvdC+INGA0LDQt9C70LjRh9C90YvQvCDQu9C40YLQtdGA0LDRgtGD0YDQvdGL0Lwg0LjRgdGC0L7Rh9C90LjQutC+0Lwg0YDQsNCy0L3Rj9C10YLRgdGPIDAsOC0wLDg1KTsg0JDQvdC40LfQvtGG0LjRgtC+0LcgKysg0Lgg0L/QvtC50LrQuNC70L7RhtC40YLQvtC3ICsgPSDRgdC+0LPQu9Cw0YHQvdC+INC70LjRgtC10YDQsNGC0YPRgNC1INC+0LTQuNC9INC/0LvRjtGBID0gMjUlLCDRgi7QtS4g0L3QsNCx0LvRjtC00LDQtdGC0YHRjyDQuNC30LzQtdC90LXQvdC40LUg0YDQsNC30LzQtdGA0L7QsiDRgyA1MCUg0Y3RgNC40YLRgNC+0YbQuNGC0L7QsiDQuCDQuNC30LzQtdC90LXQvdC40LUg0YTQvtGA0LzRiyDRgyAyNSUg0Y3RgNC40YLRgNC+0YbQuNGC0L7QsiDRgdC+0L7RgtCy0LXRgtGB0YLQstC10L3QvdC+LiDQotCw0LrQuNC8INC+0LHRgNCw0LfQvtC8LCDRgyDRgNC10LHQtdC90LrQsCDQstGL0Y/QstC70LXQvSDQsNC90LXQvNC40YfQtdGB0LrQuNC5INGB0LjQvdC00YDQvtC8LCAg0LzQvtC20L3QviDQv9GA0LXQtNC/0L7Qu9C+0LbQuNGC0Ywg0L3QsNC70LjRh9C40LUg0LbQtdC70LXQt9C+0LTQtdGE0LjRhtC40YLQvdC+0Lkg0LDQvdC10LzQuNC4INGDINGA0LXQsdC10L3QutCwID0g0L7QsdC+0YHQvdC+0LLQsNC90LjQtTog0KbQstC10YLQvtCy0L7QuSDQv9C+0LrQsNC30LDRgtC10LvRjCDQvtGC0YDQsNC20LDQtdGCINC60L7Qu9C40YfQtdGB0YLQstC+INCz0LXQvNC+0LPQu9C+0LHQuNC90LAg0LIg0Y3RgNC40YLRgNC+0YbQuNGC0LUgKNGCLtC6LiDQs9C10LzQvtCz0LvQvtCx0LjQvSDRgtCw0LrQttC1INC+0YLQstC10YfQsNC10YIg0Lgg0LfQsCDQvtC60YDQsNGBINC60LvQtdGC0L7Quj3RhtCy0LXRgtC+0LLQvtC5INC/0L7QutCw0LfQsNGC0LXQu9GMKTsg0LAg0YLQsNC60LbQtSDRgdCw0Lwg0LPQtdC80L7Qs9C70L7QsdC40L0gLSDRjdGC0L4g0YHQu9C+0LbQvdGL0Lkg0LHQtdC70L7QuiAo0YHQvtGB0YLQvtC40YIg0LjQtyDQs9C10LzQsCDQuCDQv9GA0L7RgtC10LjQvdC+0LLQvtC5INGH0LDRgdGC0LgpLCDQsiDQutC+0YLQvtGA0L7QvCDQttC10LvQtdC30L4g0LjQs9GA0LDQtdGCINC60LvRjtGH0LXQstGD0Y4g0YDQvtC70Ywg0Lgg0LfQsNC90LjQvNCw0LXRgiDRhtC10L3RgtGA0LDQu9GM0L3QvtC1INC/0L7Qu9C+0LbQtdC90LjQtSDQsiDRhtC10L3RgtGA0LUg0YLQtdGC0YDQsNC80LXRgNCwLCDQvtGC0LLQtdGH0LDRjyDQt9CwINGB0LLRj9C30YvQstCw0L3QuNC1INC60LjRgdC70L7RgNC+0LTQsCDRgSDRjdGA0LjRgtGA0L7RhtC40YLQvtC8LCDRgi7QtS4g0L/RgNC4INC00LXRhNC40YbQuNGC0LUg0LbQtdC70LXQt9CwINC90LDRgNGD0YjQsNC10YLRgdGPINGB0LjQvdGC0LXQtyDQs9C10LzQvtCz0LvQvtCx0LjQvdCwLCDRh9GC0L4g0YHQvtC+0YLQstC10YLRgdGC0LLQtdC90L3QviDQv9GA0LjQstC+0LTQuNGCINC6INGB0L3QuNC20LXQvdC40Y4g0LrQvtC90YbQtdC90YLRgNCw0YbQuNC4INCz0LXQvNC+0LPQu9C+0LHQuNC90LAg0Lgg0YbQstC10YLQvtCy0L7Qs9C+INC/0L7QutCw0LfQsNGC0LXQu9GPLiDQktC00L7QsdCw0LLQvtC6LCDQvdCw0YDRg9GI0LXQvdC40LUg0YHQuNC90YLQtdC30LAg0LPQtdC80L7Qs9C70L7QsdC40L3QsCDQstC70LjRj9C10YIg0L3QsCDQtNC70LjRgtC10LvRjNC90L7RgdGC0Ywg0LrQu9C10YLQvtGH0L3QvtCz0L4g0YbQuNC60LvQsCwg0YfRgtC+INC80L7QttC10YIg0L/RgNC40LLQtdGB0YLQuCDQuiDRgdCw0LzQvtC80YMg0YPQvNC10L3RjNGI0LXQvdC40Y4g0LrQvtC70LjRh9C10YHRgtCy0LAg0Y3RgNC40YLRgNC+0YbQuNGC0L7Qsiwg0LjQt9C80LXQvdC10L3QuNGOINGA0LDQt9C80LXRgNC+0LIg0Lgg0YTQvtGA0LzRiyAo0L7QsdGL0YfQvdC+INC/0YDQuCDQltCU0JAg0L3QsNCx0LvRjtC00LDQtdGC0YHRjyDQvNC40LrRgNC+0YbQuNGC0L7QtyAtINGC0L4g0LXRgdGC0Ywg0YPQvNC10L3RjNGI0LXQvdC40LUg0YDQsNC30LzQtdGA0L7Qsjsg0YTQvtGA0LzQsCDQsiDQvdC+0YDQvNC1INGP0LLQu9GP0LXRgtGB0Y8g0LTQstC+0Y/QutC+0LLQvtCz0L3Rg9GC0YvQuSDQtNC40YHQuiwg0YfRgtC+INC+0LHQtdGB0L/QtdGH0LjQstCw0LXRgiDQvNCw0LrRgdC40LzQsNC70YzQvdGD0Y4g0YHQstGP0LfRi9Cy0LDRjtGJ0YPRjiDRgdC/0L7RgdC+0LHQvdC+0YHRgtGMINC60LjRgdC70L7RgNC+0LTQsCDRjdGA0LjRgtGA0L7RhtC40YLQvtC8LCDQvdC+INC+0L3QsCDRgtCw0LrQttC1INC40LfQvNC10L3Rj9C10YLRgdGPLCDQvdCw0L/RgNC40LzQtdGALCDRgdGC0LDQvdC+0LLQuNGC0YHRjyDRiNCw0YDQvtC+0LHRgNCw0LfQvdC+0LkpLiDQlNC+0L/QvtC70L3QuNGC0LXQu9GM0L3Qviwg0L/RgNC4INCw0L3QtdC80LjQuCDQuCDQltCU0JAg0LLQutC70Y7Rh9C40YLQtdC70YzQvdC+INC80L7QttC90L4g0L3QsNCx0LvRjtC00LDRgtGMINGB0LvQtdC00YPRjtGJ0LjQtSDQuNC30LzQtdC90LXQvdC40Y86IDEpINC/0L7QstGL0YjQtdC90LjQtSDQutC+0L3RhtC10L3RgtGA0LDRhtC40Lgg0YDQtdGC0LjQutGD0LvQvtGG0LjRgtC+0LIsINGCLtC1LiDQv9GA0LXQtNGI0LXRgdGC0LLRg9GO0YnQuNGFINGE0L7RgNC8INC60L7QvdC10YfQvdC+0Lkg0LTQuNGE0YTQtdGA0LXQvdGG0LjRgNC+0LLQutC4INGN0YDQuNGC0YDQvtGG0LjRgtC+0LIsINGCLtC6LiDQv9GA0Lgg0L3QtdC00L7RgdGC0LDRgtC+0YfQvdC+0Lwg0L/QvtGB0YLRg9C/0LvQtdC90LjQuCDQutC40YHQu9C+0YDQvtC00LAg0YHRgtC40LzRg9C70LjRgNGD0Y7RgtGB0Y8g0Y7QutGB0YLQsNCz0LvQvtC80LXRgNGD0LvRj9GA0L3Ri9C5INCw0L/Qv9Cw0YDQsNGCINC/0L7Rh9C10LosINCy0LXQtNGD0YnQuNC5INC6INC/0L7QstGL0YjQtdC90L3QvtC5INCy0YvRgNCw0LHQvtGC0LrQtSDRjdGA0LjRgtGA0L7Qv9C+0Y3RgtC40L3QsCAtINCx0LjQvtC70L7Qs9C40YfQtdGB0LrQuCDQsNC60YLQuNCy0L3QvtCz0L4g0LLQtdGJ0LXRgdGC0LLQsCwg0YTRg9C90LrRhtC40Y8g0LrQvtGC0L7RgNC+0LPQviDQt9Cw0LrQu9GO0YfQsNC10YLRgdGPINCyINGB0YLQuNC80YPQu9C40YDQvtCy0LDQvdC40Lgg0Y3RgNC40YLRgNC+0L/QvtGN0LfQsC4g0JLQvNC10YHRgtC1INGBINGN0YDQuNGC0YDQvtGG0LjRgtCw0LzQuCDQvNC+0LbQtdGCINC90LDQsdC70Y7QtNCw0YLRjNGB0Y8g0L/QvtC70LjRhdGA0L7QvNCw0LfQuNGPLCDRgi7QtS4g0LjQt9C80LXQvdC10L3QuNC1INGB0LDQvNC+0LPQviDQvtC60YDQsNGB0LAg0LrRgNC+0LLRj9C90YvRhSDRgtC10LvQtdGGLCDRh9GC0L4g0L7QsdGD0YHQu9C+0LLQu9C10L3QviDRgtC10LwsINGH0YLQviDQv9GA0LXQtNGI0LXRgdGC0LLQtdC90L3QuNC60Lgg0Y3RgNC40YLRgNC+0YbQuNGC0L7QsiDQvdCwINGA0LDQt9C70LjRh9C90YvRhSDRjdGC0LDQv9Cw0YUg0L7QutGA0LDRiNC40LLQsNGO0YLRgdGPINC/0L4t0YDQsNC30L3QvtC80YMg0LIg0YXQvtC00LUg0YHQstC+0LXQuSDQtNC40YTRhNC10YDQtdC90YbQuNGA0L7QstC60Lgg0Lgg0LjQt9C80LXQvdC10L3QuNC4INCy0L3Rg9GC0YDQuNC60LvQtdGC0L7Rh9C90L7Qs9C+INC60L7Qu9C40YfQtdGB0YLQstCwINCx0LXQu9C60LAsINCg0J3Qmiwg0LPQtdC80L7Qs9C70L7QsdC40L3QsCDQuCDRgi7QtC4gKNC+0YIg0LHQsNC30L7RhNC40LvRjNC90L7Qs9C+INC6INC+0LrRgdC40YTQuNC70YzQvdC+0LzRgyk7IDIpINCx0YPQtNC10YIg0L/QvtCy0YvRiNC10L3QsCDQntCW0KHQoSAtINC+0LHRidCw0Y8g0LbQtdC70LXQt9C+INGB0LLRj9C30YvQstCw0Y7RidCw0Y8g0YHQv9C+0YHQvtCx0L3QvtGB0YLRjCDQutGA0L7QstC4LCDRgi7Qui4g0L3QsNCx0LvRjtC00LDQtdGC0YHRjyDQvdC10LTQvtGB0YLQsNGC0L7QuiDQttC10LvQtdC30LAsINC80L7QttC10YIg0LHRi9GC0Ywg0YHQvdC40LbQtdC9INGE0LXRgNGA0LjRgtC40L0gKNC00LXQv9C+INC20LXQu9C10LfQsCDQsiDQv9C10YfQtdC90LgsINC60L7RgdGC0L3QvtC8INC80L7Qt9Cz0LUsINGB0LXQu9C10LfQtdC90LrQtSwg0LAg0YLQsNC60LbQtSDQsiDQutC40YjQtdGH0L3QuNC60LUuINCf0YDQuCDQtNC10YTQuNGG0LjRgtC1INC20LXQu9C10LfQsCDQutCw0Log0YDQsNC3LdGC0LDQutC4INGB0L3QsNGH0LDQu9CwINC40LfRgNCw0YHRhdC+0LTRg9GO0YLRgdGPINC30LDQv9Cw0YHRiyDQttC10LvQtdC30YssINC/0L7RgtC+0Lwg0YPQttC1INC/0YDQvtGP0LLQu9GP0LXRgtGB0Y8g0LTQtdC60L7QvNC/0LXQvdGB0LDRhtC40Y8g0LzQtdGF0LDQvdC40LfQvNC+0LIg0Lgg0LDQvdC10LzQuNGPKS4g0JTQuNCw0LPQvdC+0Lcg0LDQvdC10LzQuNGH0LXRgdC60L7Qs9C+INGB0LjQvdC00YDQvtC80LAg0L7QsdGK0Y/RgdC90Y/QtdGCINGC0LDQutC40LUg0LbQsNC70L7QsdGLLCDQutCw0Log0YHQu9Cw0LHQvtGB0YLRjCDQuCDQsdC70LXQtNC90L7RgdGC0Ywg0YDQtdCx0LXQvdC60LAsINGH0YLQviDRgdCy0Y/Qt9Cw0L3QviDRgSDQvdC10LTQvtGB0YLQsNGC0L7Rh9C90YvQvCDQv9C+0YHRgtGD0L/Qu9C10L3QuNC10Lwg0LrQuNGB0LvQvtGA0L7QtNCwINCyINC60LvQtdGC0LrQuCA9INC90LXQtNC+0YHRgtCw0YLQvtGH0L3QvtC1INC+0LHRgNCw0LfQvtCy0LDQvdC40LUg0Y3QvdC10YDQs9C40LggKNCQ0KLQpCksINGH0YLQviDQvdCw0L/RgNGP0LzRg9GOINC4INC60L7RgdCy0LXQvdC90L4gKNCQ0KLQpCDQvdC10L7QsdGF0L7QtNC40LzQviDQtNC70Y8g0YTQtdGA0LzQtdC90YLQsNGC0LjQstC90YvRhSDRgNC10LDQutGG0LjQuSwg0YDQsNCx0L7RgtGLINC40L7QvdC90YvRhSDQvdCw0YHQvtGB0L7QsiDQuCDRgNC10YbQtdC/0YLQvtGA0L7QsiDQuCDRgi7QtC4pINC/0YDQuNCy0L7QtNC40YIg0Log0L7RidGD0YnQtdC90LjRjiDRgdC70LDQsdC+0YHRgtC4LCDQv9C+0Y/QstC70LXQvdC40LXQvCDQvNGD0YjQtdC6INC/0LXRgNC10LQg0LPQu9Cw0LfQsNC80LgsINCz0L7Qu9C+0LLQvtC60YDRg9C20LXQvdC40Y4g0Lgg0YIu0LQuINCR0LvQtdC00L3QvtGB0YLRjCDQvtCx0YPRgdC70L7QstC70LXQvdCwINGC0LXQvCwg0YfRgtC+IDEuINC80LDQu9C+INCz0LXQvNC+0LPQu9C+0LHQuNC90LAgKNC+0LrRgNCw0YjQuNCy0LDRjtGJ0LjQuSDRgdC70L7QttC90YvQuSDQsdC10LvQvtC6KSA9INC80LXQvdGM0YjQtSDQvtC60YDQsNGBINC60L7QttC90YvRhSDQv9C+0LrRgNC+0LLQvtCyLCDRgdC70LjQt9C40YHRgtGL0YUsINC60L7QvdGK0Y7QutGC0LjQstGLINC4INGCLtC0LiA9INCx0LvQtdC00L3QvtGB0YLRjDsgMi4g0LLQvtC30LzQvtC20L3Qviwg0L/RgNC4INC90LXQtNC+0YHRgtCw0YLQvtGH0L3QvtC8INC/0L7RgdGC0YPQv9C70LXQvdC40Lgg0LrQuNGB0LvQvtGA0L7QtNCwINCw0LrRgtC40LLQuNGA0YPQtdGC0YHRjyDRgdC40LzQv9Cw0YLQuNGH0LXRgdC60LDRjyDQvdC10YDQstC90LDRjyDRgdC40YHRgtC10LzQsCDQuCDQv9GA0L7QuNGB0YXQvtC00LjRgiDRhtC10L3RgtGA0LDQu9C40LfQsNGG0LjRjyDQutGA0L7QstC+0L7QsdGA0LDRidC10L3QuNGPINC/0YPRgtC10Lwg0YHRg9C20LXQvdC40Y8g0L/QtdGA0LjRhNC10YDQuNGH0LXRgdC60LjRhSDRgdC+0YHRg9C00L7Qsiwg0YfRgtC+0LHRiyDQutGA0L7QstGMINC00L7RgdGC0LDQstC70Y/Qu9Cw0YHRjCDQv9GA0LXQttC00LUg0LLRgdC10LPQviDQsiDQttC40LfQvdC10L3QvdC+INC90LXQvtCx0YXQvtC00LjQvNGL0LUg0L7RgNCz0LDQvdGLICjQodC10YDQtNGG0LUsINCz0L7Qu9C+0LLQvdC+0Lkg0LzQvtC30LMsINC70LXQs9C60LjQtSksINGH0YLQviDQvtCx0YPRgdC70LDQstC70LjQstCw0LXRgiDQvNC10L3RjNGI0LjQuSDQutGA0L7QstC+0YLQvtC6INC90LAg0L/QtdGA0LjRhNC10YDQuNC4INC4INC60L7QttC1ID0g0LHQu9C10LTQvdC+0YHRgtGMLiDQlNC+0L/QvtC70L3QuNGC0LXQu9GM0L3QviDQuiDQvtGC0LLQtdGC0YMg0YXQvtGH0YMg0LTQvtCx0LDQstC40YLRjCwg0YfRgtC+INC90LDQstGA0Y/QtCDQu9C4INGDINGA0LXQsdC10L3QutCwINCSMTIt0LTQtdGE0LjRhtC40YLQvdCw0Y8g0LDQvdC10LzQuNGPLCDRgi7Qui4g0L/RgNC4INC00LDQvdC90L7QuSDQsNC90LXQvNC40Lgg0YbQstC10YLQvtCy0L7QuSDQv9C+0LrQsNC30LDRgtC10LvRjCDQvdCw0L7QsdC+0YDQvtGCINC/0L7QstGL0YjQtdC9LCDRgi7Qui4g0JItMTIg0Y/QstC70Y/QtdGC0YHRjyDQstCw0LbQvdGL0Lwg0LrQvtGE0LDQutGC0L7RgNC+0Lwg0LIg0YHQuNC90YLQtdC30LUg0JTQndCaINC4INCg0J3QmiDQutC70LXRgtC+0LosINC60LvQtdGC0L7Rh9C90L7QvCDRhtC40LrQu9C1LCDRgi7QtS4g0L/RgNC4INC90LXRhdCy0LDRgtC60LUg0LTQsNC90L3QvtCz0L4g0LLQuNGC0LDQvNC40L3QsCDQutC70LXRgtC+0YfQvdGL0Lkg0YbQuNC60Lsg0Lgg0LTQtdC70LXQvdC40LUg0LrQu9C10YLQvtC6INCx0YPQtNC10YIg0LfQsNC00LXRgNC20LjQstCw0YLRjNGB0Y8sINC90L4g0YHQuNC90YLQtdC3INCz0LXQvNC+0LPQu9C+0LHQuNC90LAg0L7RgdGC0LDQtdGC0YHRjyDQsiDQvdC+0YDQvNC1ID0g0L/QvtCy0YvRiNCw0LXRgtGB0Y8g0YbQstC10YLQvtCy0L7QuSDQv9C+0LrQsNC30LDRgtC10LvRjC4g0KLQsNC60LbQtSDQtNC70Y8g0LIxMi3QtNC10YTQuNGG0LjRgtC90L7QuSDQsNC90LXQvNC40Lgg0YXQsNGA0LDQutGC0LXRgNC90Ysg0YPQstC10LvQuNGH0LXQvdC90YvQtSDRgNCw0LfQvNC10YDRiyDRjdGA0LjRgtGA0L7RhtC40YLQvtCyLCDRgi7Qui4g0LjQty3Qt9CwINC30LDQtNC10YDQttC60Lgg0L/QviDQtNC70LjRgtC10LvRjNC90L7RgdGC0Lgg0LrQu9C10YLQvtGH0L3QvtCz0L4g0YbQuNC60LvQsCDQutC70LXRgtC60LAg0YPQstC10LvQuNGH0LjQstCw0LXRgtGB0Y8g0LIg0YDQsNC30LzQtdGA0LDRhS4g0JLQtNC+0LHQsNCy0L7Quiwg0L3QsNCy0YDRj9C0INC70Lgg0Y3RgtC+INCw0L3QtdC80LjRjyDRhdGA0L7QvdC40YfQtdGB0LrQuNGFINC30LDQsdC+0LvQtdCy0LDQvdC40LksINGC0LDQuiDQutCw0LosINC60LDQuiDQvNC40L3QuNC80YPQvCwg0YHQvdC40LbQtdC90L4g0KHQntCtLiDQndCw0LTQtdGO0YHRjCwg0YfRgtC+INC00L7Qv9C+0LvQvdC40YLQtdC70YzQvdCw0Y8g0LjQvdGE0L7RgNC80LDRhtC40Y8g0L3QtSDQsdGD0LTQtdGCINGA0LDRgdGG0LXQvdC40LLQsNGC0YzRgdGPINC60LDQuiDQu9C40YjQvdGP0Y8sINGB0L/QsNGB0LjQsdC+IQ==</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18" table:style-name="ce1">
            <text:p>1067018</text:p>
          </table:table-cell>
          <table:table-cell office:value-type="string" table:style-name="ce1">
            <text:p>russian</text:p>
          </table:table-cell>
          <table:table-cell office:value-type="string" table:style-name="ce1">
            <text:p>Билет 22.&amp;lt;br /&amp;gt; 1.С какими анатомо-физиологическими особенностями грудной клетки связано возникновение заболеваний нижних дыхательных путей у детей раннего возраста? &amp;lt;br /&amp;gt; 2.На приеме мама с ребенком в возрасте 1 года. Обратились в связи с жалобами на слабость, бледность ребенка, плохой аппетит. При обследовании выявлено:&amp;lt;br /&amp;gt; Нв. - 90 г/л Лейкоциты - 9,3 (10*9/л)&amp;lt;br /&amp;gt; Эритроциты - 3,8 (1012/л Палочкоядерные - 1 %&amp;lt;br /&amp;gt; Цв: пок -. 0,7 Сегментоядетные - 21%&amp;lt;br /&amp;gt; С.О.Э. - 5 мм/час Эозинофилы - 2%&amp;lt;br /&amp;gt; Анизоцитоз ++ &amp;lt;br /&amp;gt; Пойкилоцитоз + &amp;lt;br /&amp;gt; Лимфоциты - 67%&amp;lt;br /&amp;gt; Моноциты - 8%&amp;lt;br /&amp;gt; Дайте интерпретацию анализа крови.&amp;lt;br /&amp;gt;</text:p>
          </table:table-cell>
          <table:table-cell office:value-type="string" table:style-name="ce1">
            <text:p>MSDQstC+0L/RgNC+0YE6INGDINC90L7QstC+0YDQvtC20LTQtdC90L3QvtCz0L4g0YDQtdCx0LXQvdC60LAg0LPRgNGD0LTQvdCw0Y8g0LrQu9C10YLQutCwINCx0YPQtNC10YIg0LHQvtGH0LrQvtC+0LHRgNCw0LfQvdCw0Y8sINGA0LXQsdGA0LAg0YHQutGA0LXQv9C70LXQvdGLINGBINC/0L7Qt9Cy0L7QvdC+0YfQvdC40LrQvtC8INCx0L7Qu9C10LUg0LPQvtGA0LjQt9C+0L3RgtCw0LvRjNC90L4sINGN0L/QuNCz0LDRgdGC0YDQsNC70YzQvdGL0Lkg0YPQs9C+0Lsg0YLRg9C/0L7QuSAtINC/0YDQtdC00YHRgtCw0LLQu9GP0LXRgiDQvNCw0LvRg9GOINGN0LrRgdC60YPRgNGB0LjRjiDQu9C10LPQutC40YUsINC40LzQtdC10YLRgdGPINC/0L7QstGL0YjQtdC90L3QvtC1INC00YvRhdCw0L3QuNC1LiDQmNC3LdC30LAg0YHQu9Cw0LHQvtGB0YLQuCDQtNGL0YXQsNGC0LXQu9GM0L3QvtC5INC80YPRgdC60YPQu9Cw0YLRg9GA0Ysg0LjQvNC10LXRgtGB0Y8g0LHRi9GB0YLRgNC+0LUg0LjRgdGC0L7RidC10L3QuNC1LCDRgtCw0Log0LbQtSDQstC40LTQuNC8INC/0L7QstC10YDRhdC90L7RgdGC0L3Ri9C5INC00LjQsNGE0YDQsNCz0LzQsNC70YzQvdGL0Lkg0YXQsNGA0LDQutGC0LXRgCDQtNGL0YXQsNC90LjRjy4g0JIg0L/QtdGA0LLRi9C1INC80LXRgdGP0YbRiyDQttC40LfQvdC4INCy0YvRgdC+0LrQuNC5INGA0LjRgdC6INC30LDQsdC+0LvQtdCy0LDQvdC40LkuINCh0L4g0LLRgNC10LzQtdC90LXQvCDRgdGC0LDQvdC+0LLQuNGC0YHRjyDQsdC+0LvRjNGI0LUg0L/QtdGA0LXQt9C00L3QtdC30LDQtNC90LjQuSDRgNCw0LfQvNC10YAg0LPRgNGD0LTQvdC+0Lkg0LrQu9C10YLQutC4LCDRgtCw0Log0LbQtSDRg9Cx0L7Qu9GM0YjQsNC10YLRgdGPINC60YDQuNCy0LjQt9C90LAg0YDQtdCx0LXRgCwg0LAg0Y3Qv9C40LPQsNGB0YLRgNCw0LvRjNC90YvQuSDRg9Cz0L7QuyDRgdGC0LDQvdC+0LLQuNGC0YHRjyDQsdC+0LvQtdC1INC+0YHRgtGA0YvQvCwg0L/RgNC+0LjRgdGF0L7QtNC40YIg0YDQsNC30LLQuNGC0LjQtSDRjdC70LDRgdGC0LjRh9C10YHQutC40YUg0YHRgtGA0YPQutGC0YPRgCDQu9C10LPQutC40YUsINGDINC00LXQstC+0YfQtdC6LCDQsiDRgdCy0L7RjiDQvtGH0LXRgNC10LTRjCwg0YEgNS02INC70LXRgiDQs9GA0YPQtNC90L7QuSDRgtC40L8g0LTRi9GF0LDQvdC40Y8uIDIg0LLQvtC/0YDQvtGBOiDQutC+0LvQuNGH0LXRgdGC0LLQviDQvdC10LnRgtGA0L7RhNC40LvQvtCyLCDQsdCw0LfQvtGE0LjQu9C+0LIsINC70LjQvNGE0L7RhtC40YLQvtCyLCDRjdC+0LfQuNC90L7RhNC40LvQvtCyINC4INC80L7QvdC+0YbQuNGC0L7QsiDQvdCw0YXQvtC00Y/RgtGB0Y8g0LIg0L/RgNC10LTQtdC70LDRhSDQvdC+0YDQvNGLLiDQn9Cw0YLQvtC70L7Qs9C40Y8g0LrRgNC+0LLQtdGC0LLQvtGA0L3QvtC5INGB0LjRgdGC0LXQvNGLLiDQk9C40L/QvtGF0YDQvtC80L3QsNGPINCw0L3QtdC80LjRjy4g0JPQuNC/0LXRgNGA0LXQs9C10YDQsNGC0L7RgNC90LDRjyAtINCz0L7QstC+0YDQuNGCINC+INCz0LXQvNC+0LvQuNGC0LjRh9C10YHQutC+0Lkg0LDQvdC10LzQuNC4LiDQkNC90LjQt9C+0YbQuNGC0L7Qtywg0L/QvtC50LrQuNC70L7RhtC40YLQvtC3IC0g0LjQt9C80LXQvdC10L3QuNC1INGE0L7RgNC80Ysg0Y3RgNC40YLRgNC+0YbQuNGC0L7Qsi4g0J/QvtC70LjRhdGA0L7QvNCw0LfQuNGPINGD0LrQsNC30YvQstCw0LXRgiDQvdCwINGD0YHQuNC70LXQvdC90YPRjiDRgNC10LPQtdC90LXRgNCw0YbQuNGOINC60YDQsNGB0L3QvtCz0L4g0LrQvtGB0YLQvdC+0LPQviDQvNC+0LfQs9CwLiDQk9C10LzQvtCz0LvQvtCx0LjQvSwg0Y3RgNC40YLRgNC+0YbQuNGC0Ysg0Lgg0YbQstC10YLQvdC+0Lkg0L/QvtC60LDQt9Cw0YLQtdC70Ywg0L/QvtC90LjQttC10L3Riy4g0JPQtdC80L7Qu9C40YLQuNGH0LXRgdC60LDRjyDQsNC90LXQvNC40Y8g0YDQsNC30LLQuNCy0LDQtdGC0YHRjyDQv9GA0Lgg0LTQtdGE0LXQutGC0LUg0LzQtdC80LHRgNCw0L3Riywg0LTQtdGE0LjRhtC40YIg0JM20KQt0JTQky4g</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Не верно интерпритирован анализ крови . Не указаны нормы. Сегменты снижены, лимфоциты повышены.Не сказано об анемии и какой степени анемия.Не полный ответ по 1 вопросу.</text:p>
          </table:table-cell>
          <table:table-cell office:value-type="float" office:value="0" table:style-name="ce1">
            <text:p>0</text:p>
          </table:table-cell>
          <table:table-cell table:number-columns-repeated="16376"/>
        </table:table-row>
        <table:table-row table:style-name="ro1">
          <table:table-cell office:value-type="float" office:value="1067025" table:style-name="ce1">
            <text:p>1067025</text:p>
          </table:table-cell>
          <table:table-cell office:value-type="string" table:style-name="ce1">
            <text:p>russian</text:p>
          </table:table-cell>
          <table:table-cell office:value-type="string" table:style-name="ce1">
            <text:p>Билет 22.&amp;lt;br /&amp;gt; 1.С какими анатомо-физиологическими особенностями грудной клетки связано возникновение заболеваний нижних дыхательных путей у детей раннего возраста? &amp;lt;br /&amp;gt; 2.На приеме мама с ребенком в возрасте 1 года. Обратились в связи с жалобами на слабость, бледность ребенка, плохой аппетит. При обследовании выявлено:&amp;lt;br /&amp;gt; Нв. - 90 г/л Лейкоциты - 9,3 (10*9/л)&amp;lt;br /&amp;gt; Эритроциты - 3,8 (1012/л Палочкоядерные - 1 %&amp;lt;br /&amp;gt; Цв: пок -. 0,7 Сегментоядетные - 21%&amp;lt;br /&amp;gt; С.О.Э. - 5 мм/час Эозинофилы - 2%&amp;lt;br /&amp;gt; Анизоцитоз ++ &amp;lt;br /&amp;gt; Пойкилоцитоз + &amp;lt;br /&amp;gt; Лимфоциты - 67%&amp;lt;br /&amp;gt; Моноциты - 8%&amp;lt;br /&amp;gt; Дайте интерпретацию анализа крови.&amp;lt;br /&amp;gt;</text:p>
          </table:table-cell>
          <table:table-cell office:value-type="string" table:style-name="ce1">
            <text:p>0LDQvdCw0YLQvtC80L4t0YTQuNC40LfQuNC+0LvQvtCz0LjRh9C10YHQutC40LUg0L7RgdC+0LHQtdC90L3QvtGB0YLQuC4g0YMg0LTQtdGC0LXQuSDQvdCw0LHQu9GO0Y7QtNCw0LXRgtGB0Y8g0YHQvdC40LbQtdC90L3QsNGPINGN0LrRgdC60YPRgNGB0LjRjyDQs9GA0YPQtNC90L7QuSDQutC70LXRgtC60LgsINGC0LDQuiDQutCw0Log0LjRhSDRgNC10LHRgNCwINC60YDQtdC/0YfRgtGB0Y8g0L/QvtC0INC/0YDRj9C80YvQvCDRg9Cz0LvQvtC8INC6INC/0L7Qt9Cy0L7QvdC+0YfQvdC+0LzRgyDRgdGC0L7Qu9Cx0YMg0Lgg0YDQsNGB0L/QvtC70L/Qs9Cw0Y7RgtGB0Y8g0LHQvtC70LXQtSDQs9C+0YDQuNC30L7QvdGC0LDQu9GM0L3Qvi4g0YMg0L3QuNGFINGB0LvQsNCx0L4g0YDQsNC30LLQuNGC0Ysg0LzRi9GI0YbRiyDQuCDQvtC90Lgg0LHRi9GB0YLRgNC10LXQtSDRg9GB0YLQsNGO0YIsINGE0L7RgNC80LAg0LjRhSDQs9GA0YPQtNC90L7QuSDQutC70LXRgtC60Lgg0LLQvdCw0YfQsNC70LUg0LHQvtGH0LrQvtC+0LHRgNCw0LfQvdCw0Y8sINGE0YDQvtC90YLQsNC70YzQvdGL0LnQuSDQuCDRgdCw0LPQuNGC0YLQsNC70YzQvdGL0Lkg0YDQsNC30LzQtdGAINC/0YDQuNC80LXRgNC90L4g0L7QtNC40L3QsNC60L7Qsiwg0YLQvtC70YzQutC+INC/0L7RgtC+0Lwg0YPQttC1INGE0YDQvtC90YLQsNC70YzQvdGL0Lkg0L3QsNGH0LjQvdCw0LXRgiDQv9GA0LXQvtCx0LvQsNC00LDRgtGMINC90LDQtCDRgdCw0LPQuNGC0YLQsNC70YzQvdGL0LwuINGC0LDQutC20LUg0L/RgNC+0YHQstC10YIg0LHRgNC+0L3RhdC+0LIg0LHQvtC70LXQtdC1INGD0LfQutC40LksINGB0LvQuNC30LjRgdGC0YLQsNGPINCx0YDQvtC90YXQvtCyINC90LXQttC90LDRjywg0L7QsdC40LvRjNC90L4g0LrRgNC+0LLQvtGB0L3QsNCx0LbQsNC10YLRgdGPLCDRgyDQttC10LvQtdC3INCz0LjQv9C10YDQv9GA0L7QtNGD0LrRhtC40Y8sINC+0L3QuCDQv9GA0L7QuNC30LLQu9C00Y/RgiDQvNC90L7Qs9C+INGB0LXQutGA0LXRgtCwLCDQsCDQvNGL0YjQtdGH0L3QsNGPINC+0LHQvtC70L7Rh9C60LAg0YDQsNC30LLQuNGC0LAg0YHQu9Cw0LHQvi4gINC+0LHRgdGC0YDRg9C60YbQuNGPINC00YvRhSDQv9GD0YLQtdC5INGH0LDRidC1INC/0YDQvtC40YHRhdC+0LTQuNGCINC40Lct0LfQsCDRgdC70LjQt9C4INC4INC+0YLQtdC60LrQsCwg0LAg0L3QtSDQuNC3LdC30LAg0YHQv9Cw0LfQvNCwLiDRgtCw0LrQttC1INGDINC00LXRgtC10Lkg0LzQtdC90YzRiNC10LUg0LrQvtC70LLQviDQsNC70YzQstC10L7Quywg0Log0YDQvtC20LTQtdC90LjRji0yNSDQvNC70L0s0LfQsNGC0LXQvCDRjdGC0L4g0LrQvtC7LdCy0L4g0YDQsNGB0YLQtdGCLiDRgtCw0LrQttC1INGF0L7RgNC+0YjQviDRgNCw0LfQstC40YLQsCDQuNC90YLQtdGA0YHRgtC40YbQuNCw0YzQvdCw0Y8g0YLQutCw0L3RjC4g0YMg0L3QuNGFINGB0LvQsNCx0L4g0LLRi9GA0LDQttC10L0g0Y3Qv9C40LPQsNGB0YLRgNGA0LDQu9GM0L3Ri9C5INGD0LPQvtC7LCDQt9Cw0YLQtdC8INC+0L0g0YHRgtCw0L3QvtCy0LjRgtGB0Y8g0L7RgdGC0YDQtdC1LiDRgtCw0LrQttC1INC+0YHQvtCx0LXQvdC90L7RgdGC0Lgg0LTRi9GF0LDQvdC40Y86INCy0L7Qt9C80L7QttC90L4g0L3QvtGH0L3QvtC1INC+0L/QvdC+0Y0sINC00YvRhdCw0L3QuNGPINGH0LDQudC90LDQsCDRgdGC0L7QutGB0LAg0YMg0L3QvtCy0L7RgNC+0LbQtNC10L3QvdGL0YUsINC4INC/0YPRjdGA0LjQu9GM0L3QvtC1INC00YvRhdCw0L3QuNC1LCDQutC+0YLQvtGA0L7QtSDQuNGB0YfQtdC30LDQutGCINC/0L7RgdC70LUg0YHQtdC80Lgg0LvQtdGC0YIu0LTRi9GF0LDQvdC40LUg0YMg0LTQtdGC0LXQuSDQv9C+0LLQstC10YDRhdC90L7RgdGC0L3QvtC1LCDQvdC+INGN0YLQviDQutC+0LzQv9C10L3RgdGB0LjRgNGD0LXRgtGB0Y8g0LLRi9GB0L7QutC+0Lgg0YfQsNGB0YLQvtGC0L7QuCDQtNGL0YXQsNC90LjRjy4g0Y3Qv9C40YLQtdC70LjQuSDQstGL0YHRgtCw0LvQsNC9INC80L3QvtCz0L7RgNGP0LTQvdGL0Lwg0YbQuNC70LjQvdC90LTRgNC40YfQtdGB0LrQuNC8INC80LXRgNGG0LDRgtC10LvRjNC90YvQvCDRjdC/0LjRgtC10LvQuNC10LwsINC60L7RgtC+0YDRi9C5INC10YnQtSDQv9C70L7RhdC+INCy0YvQv9C+0LvQvdGP0LXRgiDQtNGA0LXQvdCw0LbQttC90YPRjiDRhNGD0L3QutGG0LjRjiwg0LAg0LLQtdGA0L3QtdC1INC80YPQutC+0YbQuNC70LvQuNCw0YDQvdGL0Lkg0LrQu9C40YDQtdC90YEuINGDINC90LXQtNC+0L3QvtGI0LXQvdC90YvRhSDRgdC90LjQttC10L3QviDQutC+0LvQstC+INGB0YPRgNGE0LDQutGC0LDQvdGC0LAs0YfRgtC+INGC0L7QttC6INC80L7QttC10YIg0LLQu9C40Y/RgtGMINC90LAg0YDQsNC30LLQuNGC0LjQtSDQt9Cw0LHQvtC70LrQstCw0L3QuNC5LiDRgtCw0LrQttC1INGDINC00LXRgtC10Lkg0L3QtSDQsiDRgdC+0LLQtdGA0YjQtdC90YHRgtCy0LUg0YDQsNCx0L7RgtCw0LXRgiDQuNC80YPQvdC90LDRjyDRgdC40YHRgtC10LzQsC7QvNCw0LvQviDQutC70LXRgtC+0Log0L/QsNC80Y/RgtC4LCDQstC+0YHQv9GA0LjQuNC80YfQuNCy0L7RgdGC0YzRjCDQuiDQuNC90YTQtdC60YbQuNGP0LwuINCy0L7Qt9C80L7QttC90YvQtSDRh9Cw0YHRgtGL0LXQtSDQv9GA0L7RgdGC0YPQtNC90YvQtSDRj9Cy0LvQtdC90LjRjyDQuCDQuNGFINC+0YHQu9C+0LbQvdC60L3QuNGPLCDQsiDQstC40LTQtSDQv9C90LXQstC80L7QvdC40LgsINCx0YDQvtC90YXQuNGC0LAuINC80LXRgNGLINC/0YDQvtGE0LjQu9Cw0LrRgtC40LrQuDog0LPQuNCz0LjQtdC90LAg0YDRg9C6LCDRgNC10LPRg9C70YDQvdC+0LUg0L/RgNC+0LLQtdGC0YDQuNCy0LDQvdC40LUsINGD0LzQtdGA0LXQvdC90YvQtSDRhNC40Lcg0L3QsNCz0YDRg9C30LrQuC4gMiDQstC+0L/RgNC+0YE6INC/0L4g0LTQsNC90L3Ri9C8INCw0L3QsNC70LjQt9CwINCy0YvRj9Cy0LvQtdC10L3QsCDQs9C40L/QvtGF0YDQvtC80L3QsNGPINCz0LjQv9C10YDRgNC10LPQtdC90LXRgNCw0YLQvtGA0L3QsNGPINCw0L3QtdC80LjRj9GPLiDQvdCwINGN0YLQviDRg9C60LDQt9GL0LLQsNGO0YI60LPQuNC/0L7Qs9C10LzQvtCz0LvQvtCx0LjQvdC10LzQuNGPINGB0L3QuNC20LXQvdC90YvQuSDRg9GA0L7QstC60L3RjCDQs9C10LzQvtCz0LvQvtCx0LjQvdCwLTkwLCDQsCDQsiDQvdC+0YDQvNC1INCyINCz0L7QtCDQs9C10LzQvtCz0LvQvtCx0LjQvSAxMTAtMTMw0LPQuy4g0YLQsNC60LbQtSDRgdC90LjQttC10L3RiyDRjdGA0LjRgtGA0L7RhtGG0LjRgtGLIDMuOCwg0LAg0L3QvtGA0LzQsCA0LjAtNC41IDEwMTIg0LsuINGG0LLQtdGC0L3QvtC5INC/0L7QutCw0LfQsNGC0LXQu9GMINGB0L3QuNC20LXQvTAuNywg0LAg0LXQs9C+INC90L7RgNC80LAg0Y3RgtC+IDAuODQtMS4wNS4gINC70LXQudC60L7RhtC40YLRiyDQsiDQvdC+0YDQvNC1LCDRgtCw0Log0LrQsNC6INGA0LXRhNC10YDQtdC90YHRgSDRjdGC0L4g0L7RgiA3INC00L4gMTEgMTDQsiDQtNC10LLRj9GC0L7QuSDRgdGC0LXQv9C10L3QuC4g0L/QsNC70L7Rh9C60L7Rj9C00LXRgNC90YvQtSDRgtCw0LrQttC1INCyINC90L7RgNC80LUsINGA0LXRhNC10YDQtdC90YEg0L7RgiAwLjUg0LTQviA1JS4g0YHQtdCz0LzQtdC90YLQvtGP0LTQtdGA0L3Ri9C1INCyINC90L7RgNC80LUsINGB0L7RjSDRgtCw0LrQttC1INCyINC90L7RgNC80LUsINC10LUg0YDQtdGE0LXRgNC10L3RgSDQvtGCIDQg0LTQviA3INC80Lwg0LIg0YfQsNGBLiDRjdC+0LfQuNC90L7RhNC40LvRi9GLINCyINC90L7RgNC80LUsINC40YUg0YDQtdGE0LXRgNC10L3RgdGBIDAuNS03JS4g0L3QvtGA0LzQsCDRgNC10YLQuNC60YPQu9C+0YbQuNGC0L7Qsjog0L7RgiAwLjUg0LTQviAxJS4g0LIg0L3QsNGI0LXQvCDRgdC70YPRh9Cw0LUg0L7QvdC4INC00L7Qu9C20L3RiyDQsdGL0YLRjCDQv9C+0LLRi9GI0LXQvdGLLCDRgtCw0Log0LrQsNC6INCy0YvRj9Cy0LvQtdC9INCw0L3QuNC30L7RhtC40YLQvtC30LcsINC/0L7QudC60LjQu9C+0YbQuNGC0L7Qty0g0Y3RgtC+INCw0L3QvtC80LDQu9GM0L3Ri9C1INGE0L7RgNC80Ysg0Y3RgNGC0YLRgNC+0YbQuNGC0L7Qsiwg0L/QvtGP0LLQu9GP0Y7RgtGB0Y8g0LjQtyDQsdC70LDRgdGC0L3Ri9GFINC60LvQtdGC0L7QuiDQv9GA0Lgg0LPQuNC/0LXRgNGA0LXQs9C10L3QtdGA0LDRhtC40Y8g0LIg0LrRgNCw0YHRgtC90L7QvCDQutC+0YHRgtC90L7QvCDQvNC+0LfQs9C1LiAg0LzQvtC90L7RhtC40YLRiyDRgtCw0LrQttC1INCyINC90L7RgNC80LUsINC90L7RgNC80LAg0L7RgiAyINC00L4gMTAlLiDRgtCw0LrQttC1INC70LjQvNGE0L7RhtC40YLQvtC3INGD0LzQtdGA0LXQvdC90YvQuSDRgtCw0Log0LrQsNC6INC90L7RgNC80LAg0LvQuNC80YTQvtGG0LjRgtC+0LIg0L7RgiAyNi02MCUuINGN0YLQviDQv9C+0LTRgtCy0LXRgNC20LTQsNC10YIg0LrQu9C40L3QuNC60LA6INGB0LvQsNCw0LHQvtGB0YLRjCwg0LHQu9C10LXQtNC90L7RgdGC0YwsINC/0LvQvtGF0L7QuSDQsNC/0L/QtdGC0LjRgi4g0YHQu9Cw0LHQvtGB0YLRjCDQuCDQsdC70LXQtNC90L7RgdGC0Ywg0LjQty3Qt9CwINGA0LDQt9Cy0YLRgtC40Y8g0LrRgNC+0LLRj9C90L7QuSDQs9C40L/QvtC60YHQuNC4LiDRjdGA0LjRgtGA0L7RhtC40YLRiyDQvdC1INGB0L/QvtGB0L7QsdC90Ysg0L/QtdGA0LXQvdC+0YHQuNGC0Ywg0LTQvtGB0YLQsNGC0L7Rh9C90L7QtSDQutC+0LvQstC+INC60LjRgdC70L7RgNC+0LTQsCDQuCDRgdC90LjQttCw0LXRgtGB0Y8g0LrQuNGB0LvQvtGA0L7QtNC90LDRjyDQtdC80LzQutC+0YHRgtGMINC60YDQvtCy0LguINC/0L7RjdGC0L7QvNGDINC80LXQvdGM0YjQtSDQstGL0LTQtdC70Y/QtdGC0YHRjyDRjdC90LXRgNCz0LjQuC4g0L/Qu9C+0YXQvtC5INCw0L/Qv9C10YLQuNGCINCy0L7Qt9C80L7QttC10L0g0LjQty3Qt9CwINGB0L3QuNC20LXQvdC40Y8g0L/QtdGA0LjRgdGC0LDQu9GM0YLQuNC60Lgg0YLQuiDRgtCw0LrQttC1INC90LUg0YXQstCw0YLQsNC10YIg0LTQu9GPINGN0YLQvtCz0L4g0Y3QvdC10YDQs9C40LguINCz0LjQv9C+0YXRgNC+0LzQvdGL0LUg0LDQvdC10LzQuNC4INGB0LLRj9C30LDQvdGLINGH0LDRidC1INGBINC90LXQtNC+0YHRgtCw0YLQutC+0Lwg0LbQtdC70LXQt9CwKCDRgdC40LTQtdGA0L7Qv9C10L3QuNGHINGB0LjQvdC00YDQvtC8KSwg0L/QvtGN0YLQvtC80YMg0L3QtdC+0LHQvtGF0LjQvNC+INGB0LTQsNGC0Ywg0LDQvdCw0LvQuNC30Ysg0L3QsCDQvtCx0Ykg0LbQtdC70LXQt9C+0YHQstGP0LfRi9Cy0LDRjtGJ0YPRjiDRgdC/0L7QvtGB0LHQvdC+0YHRgtGMLCDRg9GA0L7QstC10L3RjCDRgdGL0LLQvtGA0L7RgtC+0YfQvdC+0LPQviDQttC10LvQtdC30LAuINGA0LXQsdC10L3QvtC6INGA0LDRgdGC0LXRgiDQuCDRgNCw0LfQstC40LLQsNGC0YHRjyDQuCDQvdGD0LbQtNCw0LXRgtGB0Y8g0LIg0L7Qv9GC0LrQvNCw0LvRjNC90L7QvCDRg9GA0L7QstC90LUg0LPQtdC80L7Qs9C70L7QuNCx0L3QsCwg0L3QtdC+0LHRhS3QvNC+INCy0YvRj9Cy0LjRgtGMINC/0YDQuNGH0LrQuNC90YMg0Lgg0YPRgdGC0YDQsNC90LjRgtGML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31" table:style-name="ce1">
            <text:p>1067031</text:p>
          </table:table-cell>
          <table:table-cell office:value-type="string" table:style-name="ce1">
            <text:p>russian</text:p>
          </table:table-cell>
          <table:table-cell office:value-type="string" table:style-name="ce1">
            <text:p>Билет 22.&amp;lt;br /&amp;gt; 1.С какими анатомо-физиологическими особенностями грудной клетки связано возникновение заболеваний нижних дыхательных путей у детей раннего возраста? &amp;lt;br /&amp;gt; 2.На приеме мама с ребенком в возрасте 1 года. Обратились в связи с жалобами на слабость, бледность ребенка, плохой аппетит. При обследовании выявлено:&amp;lt;br /&amp;gt; Нв. - 90 г/л Лейкоциты - 9,3 (10*9/л)&amp;lt;br /&amp;gt; Эритроциты - 3,8 (1012/л Палочкоядерные - 1 %&amp;lt;br /&amp;gt; Цв: пок -. 0,7 Сегментоядетные - 21%&amp;lt;br /&amp;gt; С.О.Э. - 5 мм/час Эозинофилы - 2%&amp;lt;br /&amp;gt; Анизоцитоз ++ &amp;lt;br /&amp;gt; Пойкилоцитоз + &amp;lt;br /&amp;gt; Лимфоциты - 67%&amp;lt;br /&amp;gt; Моноциты - 8%&amp;lt;br /&amp;gt; Дайте интерпретацию анализа крови.&amp;lt;br /&amp;gt;</text:p>
          </table:table-cell>
          <table:table-cell office:value-type="string" table:style-name="ce1">
            <text:p>MS4g0KMg0LTQtdGC0LXQuSDQuNC80LXRjtGC0YHRjyDQuNC90LTQuNCy0LjQtNGD0LDQu9GM0L3Ri9C1INC+0YHQvtCx0LXQvdC90L7RgdGC0Lgg0LTRi9GF0LDRgtC10LvRjNC90L7QuSDRgdC40YHRgtC10LzRiyDQsiDRh9Cw0YHRgtC90L7RgdGC0Lgg0L7RgdC+0LHQtdC90L3QvtGB0YLQuCDQs9GA0YPQtNC90L7QuSDQutC70LXRgtC60Lgg0YMg0LzQsNC70LXQvdGM0LrQuNGFINC00LXRgtC10Lkg0YEg0LzQvtC80LXQvdGC0LAg0LTQviAyLTPRhSDQu9C10YIg0LHQvtGH0LrQvtC+0LHRgNCw0LfQvdCw0Y8g0YTQvtGA0LzQsCwg0YHQsNCz0LjRgtCw0LvRjNC90YvQuSDRgNCw0LfQvNC10YAg0L/QvtGH0YLQuCDRgNCw0LLQtdC9INC/0L7Qv9C10YDQtdGH0L3QvtC80YMsINC/0YDRj9C80L7QuSDRg9Cz0L7Quy0g0YDQtdCx0YDQsCDRgNCw0YHRhdC+0LTRj9GC0YHRjyDQv9C+0LQg0L/RgNGP0LzRi9C8INGD0LPQu9C+0Lwg0L7RgiDQv9C+0LfQstC+0L3QvtGH0L3QuNC60LAgKNC40Lct0LfQsCDRjdGC0L7Qs9C+INC80LDQu9Cw0Y8g0Y3QutGB0LrRg9GA0YHQuNGPINC70LXQs9C60LjRhSwg0L/QvtCy0LXRgNGF0L3QvtGB0YLQvdC+0LUg0LTRi9GF0LDQvdC40LUsINGB0LvQsNCx0L7RgdGC0Ywg0LTRi9GF0LDRgtC10LvRjNC90L7QuSDQvNGD0YHQutGD0LvQsNGC0YPRgNGLICjQuNC3LdC30LAg0YfQtdCz0L4g0LHRi9GB0YLRgNCw0Y8g0YPRgtC+0LzQu9GP0LXQvNC+0YHRgtGMLCDQtNGL0YXQsNC90LjQtSDQv9GD0Y3RgNC40LvRjNC90L7QtSwg0L/QvtGB0LvQtSA3LdC80Lgg0LvQtdGCINGB0YLQsNC90L7QstC40YLRgdGPINCy0LXQt9C40LrRg9C70Y/RgNC90YvQvCwg0LrQsNC6INGDINCy0LfRgNC+0YHQu9GL0YUuINGDINC90L7QstC+0L7RgNC+0LbQtNC10L3QvdGL0YUg0LLQtdGA0YXRg9GI0LrQuCDQu9C10LPQutC40YUg0L3QsNGF0L7QtNGP0YLRgdGPINCy0YvRiNC1LCDRh9C10Lwg0YMg0LLQt9GA0L7RgdC70YvRhS4gQ9C90LjQttC10L0g0LzRg9C60L7RhtC40LvQuNCw0YDQvdGL0Lkg0LrQu9C40YDQtdC90YEg0LjQty3Qt9CwINGH0LXQs9C+INCy0L7Qt9C80L7QttC90Ysg0L/RgNC+0L3QuNC60L3QvtCy0LXQvdC40LUg0LHQsNC60YLQtdGA0LjQuSDQuCDQstC40YDRg9GB0L7Qsiwg0YHQvdC40LbQtdC90LjQtSDRh9C40YHQu9CwINCw0LvRjNCy0LXQvtC7LCDQsNC70YzQstC10YDQu9GP0YDQvdGL0YUg0LzQtdGI0L7Rh9C60L7Qsi4gPGJyIC8+DQog0JjQty3Qt9CwINC+0YHQvtCx0LXQvdC90L7RgdGC0LXQuSDRgdGC0YDQvtC10L3QuNGPINCz0YDRg9C00L3QvtC5INC60LvQtdGC0LrQuCDRgyDQtNC10YLQvtC6INGH0LDRgdGC0L4g0LLQvtC30L3QuNC60LDQtdGCINC00YvRhdCw0L3QuNC1INCn0LDQudC9INCh0YLQvtC50LrRgdCwICjRgNC+0LTQuNGC0LXQu9C4INC90LUg0L/QvtC90LjQvNCw0Y7RgiDQtNCw0L3QvdC+0LPQviDRj9Cy0LvQtdC90LjRjykg0L3QviDRjdGC0L4g0YTQuNC30LjQvtC70L7Qs9C40YfQtdGB0LrQuNC5INC/0YDQvtGG0LXRgdGBLCDRgdCy0Y/Qt9Cw0L0g0LjQty3Qt9CwINC90LXQtNC+0YDQsNC30LLQuNGC0LjRjyDQtNGL0YXQsNGC0LXQu9GM0L3QvtCz0L4g0YbQtdC90YLRgNCwLigg0YHQvtC/0YDQvtCy0L7QttC00LDQtdGC0YHRjyAxLtC60L7RgNC+0YLQutC40LzQuCDQv9Cw0YPQt9Cw0LzQuCwgMi4g0YPRh9Cw0YnQtdC90L3Ri9C8INC/0L7QstC10YDRhdC90L7RgdGC0L3Ri9C8INC00YvRhdCw0L3QuNC10LwsINC00LDQu9C10LUg0YHQu9GD0LTRg9C10YIg0LPQu9GD0LHQvtC60LjQtSDQstC00L7RhdC4KTxiciAvPg0KINCn0YLQviDQutCw0YHQsNC10YLRgdGPINCy0L3Rg9GC0YDQtdC90L3QtdCz0L4g0YHRgtGA0L7QtdC90LjRjywg0LfQtNC10YHRjCDRgtC+0LbQtSDQuNC80LXQtdGC0YHRjyDRgNGP0LQg0L7RgdC+0LHQtdC90L3QvtGB0YLQtdC5LiDQmiDRgNC+0LbQtNC10L3QuNGOINCx0YDQvtC90YXQuNCw0LvRjNC90L7QtSDQtNC10YDQtdCy0L4g0YHRhNC+0YDQvNC40YDQvtCy0LDQvdC+LCDQvtGB0L3QvtCy0YMg0LHRgNC+0L3RhdC+0LIg0YHQvtGB0YLQsNCy0LvRj9GO0YIg0YXRgNGP0YnQtdCy0YvQtSDQv9C+0LvRg9C60L7Qu9GM0YbQsCwg0YHQvtC10LTQuNC90LXQvdC90YvQtSDRhNC40LHRgNC+0LfQvdC+0Lkg0L/QtdGA0LXQv9C+0L3QutC+0LkuINCi0YDQsNGF0LXRjyDQtNC10LvQuNGC0YHRjyDQvdCwINCz0LvQsNCy0L3Ri9C5INC/0YDQsNCy0YvQuSDQuCDQu9C10LLRi9C1INCx0YDQvtC90YXQuC4g0L/RgNCw0LLRi9C5INGB0L7RgdGC0LDQstC70Y/RgiDQvNC10L3RjNC40Lkg0YPQs9C+0Lsg0Lgg0L7QvSDRiNC40YDQtSwg0YfQtdC8INC70LXQstGL0LksINC/0L7RjdGC0L7QvNGDINGDINC80LDQu9C10L3RjNC60LjRhSDQtNC10YLQtdC5INC10YHRgtGMINCx0L7Qu9GM0YjQvtC5INGA0LjRgdC6INC/0L7Qv9Cw0LTQsNC90LjRjyDQuNC90L7RgNC+0LTQvdC+0LPQviDRgtC10LvQsDxiciAvPg0K0KfRgtC+INC60LDRgdCw0LXRgtGB0Y8g0L3QvtCy0L7RgNC+0LbQtNC10L3QvdGL0YUg0LTQtdGC0L7Quiwg0YMg0L3QuNGFINC80LDQu9C+INCz0LvQsNC00LrQvtC5INC80YPRgdC60YPQu9Cw0YLRg9GA0Yss0YLQsNC60LbQtSDQuNC30LfQsCDQvdC10LTQvtGA0LDQt9Cy0LjRgtC+0YHRgtC4INC80YvRiNC10YfQvdC+0Lkg0Lgg0Y3Qu9Cw0YHRgtC40YfQvdC+0Lkg0YLQutCw0L3QuCDRgyDQvdC40YUg0YfQsNGB0YLQviDQvNC+0LPRg9GCINGB0LvRg9GH0LDRgtGB0Y8g0LHRgNC+0L3RhdC+0YHQv9Cw0LfQvNGLLCDQsCDRgtCw0LrQttC1INCy0YvRgdC+0LrQuNGFINGA0LjRgdC6INC30LDQsdC+0LvQtdCy0LDQvdC40Lkg0LTRi9GF0LDRgtC10LvRjNC90L7QuSDRgdC40YHRgtC10LzRiywg0YLQsNC6INC60LDQuiDRgdGD0YDRhNCw0LrRgtCw0L3RgtCwINC10YnQtSDQvNC+0LbQtdGCINCx0YvRgtGMINC80LDQu9C+LCDQuCDRgdC/0L7RgdC+0LHQvdC+0YHRgtGMINC10LPQviDQvdC40LfQutCwINC40Lct0LfQsCDQvdC10LTQvtGB0YLQsNGC0LrQuCDQuNC80YPQvdC90L7Qs9C70L7QsdGD0LvQuNC90L7Qsi4g0KLQsNC6INC20LUg0YMg0LzQsNC70YvRiNC10Lkg0YfQsNGB0YLQvtC1INGP0LLQu9C10L3QuNC1INGN0YLQviDRjdC60YHQv9C40YDQsNGC0L7RgNC90LDRjyDQvtC00YvRiNC60LAsINC60L7RgtC+0YDQsNGPICDRhdCw0YDQsNC60YLQtdGA0LjQt9GD0LXRgtGB0Y8g0LfQsNGC0YDRg9C00L3QtdC90L3Ri9C8INCy0YvQtNC+0YXQvtC8INC4INGD0YfQsNGB0YLQuNC10Lwg0L/RgNC40LXQvNGD0YnQtdGB0YLQstC10L3QvdC+INCx0YDRjtGI0L3QvtCz0L4g0LTRi9GF0LDQvdC40Y8o0YLQviDQtdGB0YLRjCDQvNGL0YjRhtGLINCx0YDRjtGI0L3QvtCz0L4g0L/RgNC10YHRgdCwKSDRgtCw0LrQvtC5INGC0LjQvyDQvtC00YvRiNC60Lgg0LzQvtC20L3QviDQstGB0YLRgNC10YLQuNGC0Ywg0L/RgNC4INC+0LHRgdGC0YDRg9C60YbQuNC4INCx0YDQvtC90YXQvtCyLCDQsdGA0L7QvdGF0LjQsNC70YzQvdC+0Lkg0LDRgdGC0LzQtSzQvdC40LbQvdC10LTQvtC70LXQstC+0Lkg0L/QvdC10LLQvNC+0L3QuNC4LiAgICAgIDxiciAvPg0KPGJyIC8+DQoyLiDQndC+0YDQvNCwINCz0LXQvNC+0LPQu9C+0LHQuNC90LAg0YMg0LTQtdGC0LXQuSDQstC+0LfRgNCw0YHRgtC+0LwgMSDQs9C+0LQgKDExMC0xNDApINCz0LXQvNC+0LPQu9C+0LHQuNC9INGB0L3QuNC20LXQvSwg0YfRgtC+INC+0LHRitGP0YHQvdGP0LXRgiDQsdC70LXQtNC90L7RgdGC0Ywg0Lgg0YHQu9Cw0LHQvtGB0YLRjC4gPGJyIC8+DQogICDQrdGA0LjRgtGA0L7RhtC40YLRiyDQvdCwINC90LjQttC90LXQuSDQs9GA0LDQvdC40YbQtSDQvdC+0YDQvNGLICjRh9GC0L4g0L7QsdGK0Y/RgdC90Y/QtdGCINGB0L3QuNC20LXQvdC40LUg0LPQtdC80L7Qs9C70L7QsdC40L3QsCkg0YLQsNC6INC60LDQuiDRjdGA0LjRgtGA0L7RhtC40YLRiyDRj9Cy0LvRj9GO0YLRgdGPINGC0YDQsNC90YHQv9C+0YDRgtC10YDQsNC80Lgg0LTQu9GPINC/0LXRgNC10L3QvtGB0LAgSGI8YnIgLz4NCtGG0LLQtdGC0L3QvtC5INC/0L7QutCw0LfQsNGC0LXQu9GMINGB0L3QuNC20LXQvSAo0LPQuNC/0L7RhdGA0L7QvNC90LDRjyDQsNC90LXQvNC40Y8pPGJyIC8+DQrQodCe0K0g0J3QntCg0JzQkCAtINC90LXRgiDQstC+0YHQv9Cw0LvQuNGC0LXQu9GM0L3Ri9GFINC/0YDQvtGG0LXRgdGB0L7QsiwgPGJyIC8+DQrQsNC90LjQt9C+0YbQuNGC0L7QtysrLCDQv9C+0LnQutC40LvQvtGG0LjRgtC+0LcrKyAo0LPQuNC/0LXRgNGA0LXQs9C40L3QtdGA0LDRgtC+0YDQvdCw0Y8g0LDQvdC10LzQuNGPKdC/0L7QstGL0YjQsNGO0YLRgdGPINGA0LXRgtC40LrRg9C70L7RhtC40YLRiyDQsiDQutGA0L7QsNGB0YLQvdC+0Lwg0LrQvtGB0YLQvdC+0Lwg0LzQvtC30LPQtSwg0YEg0YbQtdC70YzRjiDQutC+0LzQv9C10L3RgdCw0YbQuNC4LCDQsiDQvdC10LTQvtGB0YLQsNGO0YnQuNGFINGN0YDQuNGC0YDQvtGG0LjRgtCw0YUg0Lgg0L3QuNC30LrQvtC8INCz0LXQvNC+0LPQu9C+0LHQuNC90LUuIDxiciAvPg0K0L/Qu9C+0YXQvtC5INCw0L/Qv9C10YLQuNGCINGDINC80LDQu9GL0YjQsCDQvNC+0LbQtdGCINCx0YvRgtGMINGB0LLRj9C30LDQvSDQuNC3LdC30LAg0YHQvdC40LbQtdC90LjRjyDQv9C10YDQuNGB0YLQsNC70YzRgtC40LrQuCwg0LzQvtGC0L7RgNC40LrQuCwg0LLQvtC30LzQvtC20L3QviDQv9GA0LXQtNC/0L7Qu9C+0LbQuNGC0YwsINGH0YLQviDRgdC60YPQtNC90L7QtSDQstGB0LrQsNGA0LzQu9C40LLQsNC90LjQtSDQs9GA0YPQtNC90YvQvCDQvNC+0LvQvtC60L7QvCAo0YMg0LzQsNGC0LXRgNC4INCz0LjQv9C+0LPQsNC70LDQutGC0LXQvNC40Y8pINC40LvQuCDQttC1INGA0LXQsdC10L3QvtC6INC90LAg0LjRgdC60YPRgdGB0YLQstC10L3QvdC+0Lwg0LLRgdC60LDRgNC80LvQuNCy0LDQvdC40Lgg0LHQtdC3INC00L7QsdCw0LLQu9C10L3QuNGPINCy0LjRgtCw0LzQuNC90L3Ri9GFINC60L7QvNC/0LvQtdC60YHQvtCyLiA8YnIgLz4NCtCc0Ysg0LrQsNC6INCy0YDQsNGH0Lgg0L/QtdC00LjQsNGC0YDRiyDQvNC+0LbQtdGCINC/0YDQvtCy0LXRgNC40YLRjCDRgdCw0YLRg9GA0LDRhtC40Y4sINCy0LfRj9GC0Ywg0LDQvdCw0LzQvdC10Lcg0LbQuNC30L3QuCwg0YDQsNGB0L/RgNC+0YHQuNGC0Ywg0L4g0LrQvtGA0LzQu9C10L3QuNC4LCDRgdC90LUsINC+INC/0LjRgtCw0L3QuNC4INC80LDRgtC10YDQuC4gPGJyIC8+DQo8YnIgLz4NCiAgICAgICAgICAgICAgICAgICAgICAgICAgICAgICAgICAgICAgICAgICAgICAgICAgICAgICAgICAgICAgICAgICAgICAgICA8YnIgLz4NC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Не полно интерпритирован анализ крови. ( лимфоциты, сегментоядерные..)</text:p>
          </table:table-cell>
          <table:table-cell office:value-type="float" office:value="0" table:style-name="ce1">
            <text:p>0</text:p>
          </table:table-cell>
          <table:table-cell table:number-columns-repeated="16376"/>
        </table:table-row>
        <table:table-row table:style-name="ro1">
          <table:table-cell office:value-type="float" office:value="914675" table:style-name="ce1">
            <text:p>914675</text:p>
          </table:table-cell>
          <table:table-cell office:value-type="string" table:style-name="ce1">
            <text:p>english</text:p>
          </table:table-cell>
          <table:table-cell office:value-type="string" table:style-name="ce1">
            <text:p>Ticket 22.&amp;lt;br /&amp;gt; 1. What are the anatomical and physiological characteristics of the chest associated with the occurrence of lower respiratory tract diseases in young children?&amp;lt;br /&amp;gt; 2. At the reception, a mother with a child aged 1 year, complaining of weakness, pallor of the child, poor appetite. The examination revealed:&amp;lt;br /&amp;gt; Hb. - 90 g / l Leukocytes - 9.3 * 10 9 / l&amp;lt;br /&amp;gt; Erythrocytes - 3.8 * 10 12 / l stab neutrophils - 1%&amp;lt;br /&amp;gt; Color indicator - 0.7 Segmental - 21%&amp;lt;br /&amp;gt; Erythrocyte sedimentation rate. - 5 mm / hour Eosinophils - 2%&amp;lt;br /&amp;gt; Anisocytosis ++ Basophils - 1%&amp;lt;br /&amp;gt; Poikilocytosis + Lymphocytes - 67%&amp;lt;br /&amp;gt; Polychromasia ++ Monocytes - 8%&amp;lt;br /&amp;gt; Reticulocytes 1.2%&amp;lt;br /&amp;gt; Give an interpretation of the blood test.&amp;lt;br /&amp;gt; &amp;lt;br /&amp;gt;</text:p>
          </table:table-cell>
          <table:table-cell office:value-type="string" table:style-name="ce1">
            <text:p>QW5hdG9teSBhbmQgcGh5c2lvbG9naWNhbCBjaGFyYWN0ZXIgb2YgdGhlIGxvd2VyIHJlc3BpcmF0b3J5IHRyYWNrIGRpc2Vhc2UgaW4geW91bmcgY2hpbGRyZW4gLiB0cmFjayBvZiBjaGlsZHJlbiBub3Qgd2lkZW4gYXMgaW4gYWR1bHQgLiByZXNwaXJhdG9yeSB0cmFjayBvZiBjaGlsZHJlbiBub3QgcHJvcGVybHkgZGV2ZWxvcGVkIC4gdGhlIHRyYWNrIGlzIHNob3J0IHNvIHBhdGhvZ2VuIGNhbiBlYXNpbHkgZW50ZXIgaW50byBsb3dlciByZXNwaXJhdG9yeSB0cmFjayAuPGJyIC8+DQogdGhlIGJyb25jaGkgYW5kIGJyb25jaGlvbGVzIGFyZSBzbWFsbCBpbiBkaWFtZXRlciAuIHJlc3BpcmF0YXJ5IHRyYWNrICBoYXZlIG5vdCAgZW5vdWdoIGRldmVsb3BtZW50IHRvIGRvIGNvdWdoIHJlZmxleCB0byBlbGltaW5hdGUgdGhlIHBhdGhvZ2VuICwgYXVyIG11Y3VzIG91dCBvZiB0aGUgcmVzcGlyYXRvcnkgdHJhY2sgLiBhbHZlb2xpIG9mIHRoZSBjaGlsZHJlbiBpcyBsZXNzIGluIG51bWJlciBhbmQgc21hbGwgaW4gZGlhbWV0ZXIgc28gbm90IGFibGUgdG8gZXhjaGFuZ2UgdGhlIGdhc2VzIHByb3Blcmx5IC4gdGhlIGltbXVuZSBzeXN0ZW0gb2YgdGhlIGNoaWxkcmVuIG5vdCB3ZWxsIGRldmVsb3Agc28gcmVzcGlyYXRvcnkgdHJhY2sgbm90IGFibGUgdG8ga2lsbCBhbmQgb3V0IHRoZSBwYXRob2dlbiBmcm9tIHRoZSB0cmFjayAuIGhvcml6b250YWwgbGFyeW54IHNvIGluY3JlYXNlIHRoZSBjaGFuY2Ugb2YgYXNwaXJhdGlvbiBhbmQgc2VjcmV0aW9uIC4gc28gcmVzcGlyYXRvcnkgdHJhY2sgc2hvdWxkICBwYXRob2dlbiBjYW4gZWFzaWx5IGVudGVyIGludG8gdHJhY2sgYW5kIHNlY3JldGlvbiAub3V0IG9mIHRoZSB0cmFjayAgLiAgY2hpbGRyZW4gaGF2ZSBsZXNzIGRldmVsb3Blc2QgaW50ZXJjb2FzdGFsIG11c2NsZSAgdGhhbiBhZHVsdCBzbyBub3QgYWJsZSB0byBjb250cmFjdCBwcm9wZXJseSAsIGNoaWxkcmVuIGhhdmUgc21hbGwgY2hlc3QgY2F2aXR5IHRoYW4gYWR1bHQgLCBjaGlsZHJlbiByaWJzICBpcyBtb3JlICBob3Jpem9udGFsIHNvIG5vdCBhYmxlIHRvIGV4cGFuZCBwcm9wZXJ5IGluIHJlc3BvbnNlIHR3byBkaXNlYXNlICwgY2hpbGRyZW4gaGF2ZSBzbWFsbCBhaXJ3YXkgLiBpbiBkaXNlYXNlcyBjaGlsZCBmaWxsIHJlc3BpcmF0b3J5IG9ic3RydWN0aW9uIC4gIDxiciAvPg0KPGJyIC8+DQo8YnIgLz4NCiAxIHllYXIgY2hpbGQgY29tcGxhaW4gb2Ygd2Vha25lc3MgLCBwb2xsYXIgb2YgY2hpbGQgLCBwb29yIGFwZXRpdGUgLiBzbyBpbiBpdmVzdGlnYXRpb24gZmluZGluZyA9IGhiIDkwIGcvbCBsZXNzIGhiIGluIDEgeWVhciAgbGV1Y29jeXRlIDkuMyoxMDkvbCAsZXJ5dGhyb2N5dGUgMy44KjEwMTIvMSBzdGFiIG5ldXRvcGhpbCAxJSAsIGNUIDAuNyBzZWdtZW50YWwgMjElICwgIGVyeXRocm9jeXRlIHNlZGltZW50YXRpb24gcmF0ZSA1bW0vaG91cmVvc29ub3BoaWxzIDIlICwgYW5pc29jeXRvc2lzICsrYmFzb3BoaWxzIDElICwgcG9raWxvY3l0b3NpcyArIGx5bXBob2N5dGVzIDY3JSAsc2hvdyBsZXNzIHZhcmlhdGlvbiBpbiByYmMgc2hhcGUgYW5kIHNpemUgLiBub3JtYWwgIEVTUiA9ICBtZWFucyBib25lIG1hcnJvdyByZXNwb25kIHRvIGxlc3MgYW5lbWlhIC4gPGJyIC8+DQogcG9seWNocm9tYXNpYSArKyBtb25vY3l0ZXMgOCUgLCByZXRpY3Vsb2N5ZXMgMS4yJSAuICB0aGlzIGV4YW1pbmF0aW9uIHJldmVsZWQgdGhhdCB0aGUgY2hpbGQgaXMgc3VmZmVyaW5nIGZyb20gbWljcm9jeXRpYyBoeXBlcmNocm9taWMgYW5lbWlhIGR1ZSBpcm9uIGRlZmljaWVuY3kgICAuaW5jcmVhc2UgcmV0aWN1bG9jeXRlIG1lYW5zIGJvZHkgY29tcGVuc2FpdGUgZm9yIHRoZSBkZWNyZWFzZSBoYiAsICBjb2xvdXIgaW5kZXggbG93IHdoaWNoIHNob3cgbGVzcyBwaWdtZW50ZWQgcmJjIC4gaW5jcmVhc2UgbHltcGhvY3l0ZSBjb3VudCBzaG93IGluZmxhbW1hdGlvbiBhbmQgZW50cnkgb2YgcGF0aG9nZW4gd2hpY2ggaW5jcmVhc2UgaW4gYm9keSBkZWZlbmNlIG1lY2hhbmlzbSAuICBsb3cgbGV1Y29jeXRlIG1lYW5zIG5vIGluZmxhbW1hdGlvbiBpbiBib2R5ICwgbG93IGVydGhyb2N5dGUgY291bnQgbWVhbnMgbG93IGhiIHByZXNlbnQgb24gY2hpbGQgLi4uPGJyIC8+DQo=</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Тhe interpretation of the tests is partially incorrect</text:p>
          </table:table-cell>
          <table:table-cell office:value-type="float" office:value="0" table:style-name="ce1">
            <text:p>0</text:p>
          </table:table-cell>
          <table:table-cell table:number-columns-repeated="16376"/>
        </table:table-row>
        <table:table-row table:style-name="ro1">
          <table:table-cell office:value-type="float" office:value="915061" table:style-name="ce1">
            <text:p>915061</text:p>
          </table:table-cell>
          <table:table-cell office:value-type="string" table:style-name="ce1">
            <text:p>english</text:p>
          </table:table-cell>
          <table:table-cell office:value-type="string" table:style-name="ce1">
            <text:p>Ticket 22.&amp;lt;br /&amp;gt; 1. What are the anatomical and physiological characteristics of the chest associated with the occurrence of lower respiratory tract diseases in young children?&amp;lt;br /&amp;gt; 2. At the reception, a mother with a child aged 1 year, complaining of weakness, pallor of the child, poor appetite. The examination revealed:&amp;lt;br /&amp;gt; Hb. - 90 g / l Leukocytes - 9.3 * 10 9 / l&amp;lt;br /&amp;gt; Erythrocytes - 3.8 * 10 12 / l stab neutrophils - 1%&amp;lt;br /&amp;gt; Color indicator - 0.7 Segmental - 21%&amp;lt;br /&amp;gt; Erythrocyte sedimentation rate. - 5 mm / hour Eosinophils - 2%&amp;lt;br /&amp;gt; Anisocytosis ++ Basophils - 1%&amp;lt;br /&amp;gt; Poikilocytosis + Lymphocytes - 67%&amp;lt;br /&amp;gt; Polychromasia ++ Monocytes - 8%&amp;lt;br /&amp;gt; Reticulocytes 1.2%&amp;lt;br /&amp;gt; Give an interpretation of the blood test.&amp;lt;br /&amp;gt; &amp;lt;br /&amp;gt;</text:p>
          </table:table-cell>
          <table:table-cell office:value-type="string" table:style-name="ce1">
            <text:p>QU5BVE9NSUNBTCBBTkQgUEhZU0lPTE9HSUNBTEwgQ0hBUkFDVEVSSVNUSUNTUyAsIE9GIFRIQSBDSEVTVCAsIElOIExPV0VSIFJFU1BJUkFUT1JZIFRSQUNUIERJU0VBU0VTICxJTiBZT1VORyAgQ0hJTERSRU4sLCAgICBIQVZFIE5BUlJPV0VSICAgQUlSV0FZUyAgIENPTVBBUkVEICBUTyBUSEEgQURVTFQuLi4gIFRISVMgQU5BVE9NSUNBTCBGRUFUVVJFLCwsLCBNQUtFICAgVEhFTSAgTU9SRSBQUk9ORSAgLCwgICBUTyBUSEEgICBBSVJXQVlTIE9CU1RVQ1RJT04gICAgRFVSSU5HICAgUkVTUElSQVRPUlkgICBJTkZFQ1RJT05TLCwsICAgQ09OVFJJQlVBVElORyAgICBUTyBDT05ESVRJT05TICAgU1VDSCBBUyBCUk9OQ0hJT0xJVElTIE9SIFZJUkFMIElORFVDRUQgV0hFRVpJTkctIElOQ1JFQVNFRCAgICBBSVJXQVkgIFJFU0lTVEFOQ0UtICAgICBUSEEgU01BTExFUiAgIERJQU1FVEVSLCAsLCBPRiBUSEEgICAgICBBSVJXQVlTICwsIENPVVBMRUQgICBXSVRIICAgTEVTUyAgREVWTE9QRUQgQ0hIRVNUICAgTVVTQ0xFUyAgUkVTVUxUUyAsIElOIEhJR0hFUiAgIEFJUldBWSAgICBSRVNJU1RBTkNFLi4uLiBUSElTICBDQU4gICBMRUFEICwgIFRPIElOQ1JFQVNFRCBXT1JLICAgT0YgQlJFQVRISU5HICAgRFVSSU5HIExPV0VSIFJFU1BJUkFUT1JZICAgIFRSQUNUIERJU0VBU0VTIC4uIDIpIEZMRVhJQkxFIENIRVNUIFdBTEwtIFRIQSBDSEVTVCBXQUxMIElOIFlPVU5HIENISUxEUkVOLCBJUyBNT1JFIEZMRVhJQkxFIERVRSBUTyBUSEEgUFJFU0VOQ0UgT0YgQ0FSVElMQUdFIC4uLi4uIFdISUxFIFRISVMgRkxFWElCSUxJVFkgQUlEUyAgICBJTiAgICBSRVNQSVJBVE9SWSBNT1ZFTUVOVCwsICAgT0JMSUdBVEUgTk9TRSBCUkVBVEhJTkcuLi4gWU9VTkcgQ0hJTERSRU5TLCAgIFRIQVZFICAgIE5BUlJPV0VSICAgIEFJUldBWVNTLCAgIENPTVBBUkVEIFRPIFRIQSBBRFVMVC4uLiBUSElTICAgIEFOQVRPTUlDQUxMICwgRkVBVFVSRSAgICAgTUFLRSAgICBUSEVNICAgTU9SRSBQUk9ORSBUTyAgIEFJUldBWVkgICAgT0JTVFVDVElPTiwsICAgIERVUklORyAgICAgVEhBICAgIFJFU1BJUkFUT1JZICAgSU5GRUNUSU9OUyAgICAgQ09OVFJJQlVUSU5HIFRPIENPTkRJVElPTlMgLCBTVUNIIEFTIEJST05DSElPTElUSVMgT1IgVklSQUwgSU5EVUNFREQgV0hFRVpJTkcgLSBJTkNSRUFTRUQgQUlSV0FZIFJFU0lTVEFOQ0VFIC4uLiBUSEEgU01BTExFUiAgICBESUFNRVRFUiAgIE9GIFRIQSBBSVJXQVlTUyAsLCwgQ09VUExFRCBXSVRIIExFU1MgREVWTE9QRUREICAgIENIRVNUIE1VU0NMRVNTUywgUkVTVUxUSU5HICAgIElOICAgSElHSEVSIEFJUldBWSwsICBSRVNJU1RBTkNFICAuLi4uIFRISVMgQ0FOICAgIExFQUQgVE8gSU5DUkVBU0VTLCwgV09SSyBPRiBCUkVBSElORywsIERVUklORyAgICBMT1dFUiBSRVNQSVJBVE9SWSAgICBUUkFDVCBESVNFQVNFUyAuLiAzKSAgT0JMSUdBVEUgICBOT1NFICAgQlJFQVRISU5HLSBUSEEgICBZT1VORyAgIENISUxEUkVOUyBBUkUgICBPQkxJR0FURSBOT1NFIEJSRUFUSEVSUy4uLiBOQVNBTCAgIENPTkdFU1RJT05OTiwgRFVFICAgVE8gUkVTUElSQVRPUlkgSU5GRUNUSU9OU1MgQ0FOIFNJR05JRklDQU5UTFkgSU1QQUNUIEJSRUFUSElORywsIEFORCBDT05UUklCVVRFICAgVE8gICAgUkVTUElSQVRPUlkgRElTVEVTUy4uNCkgVEhBICAgIElNTVVORSAgICBTWVNURU0gLCwsICBJTiBZT1VORyAgICBDSElMRFJFTiBJUyBTVElMTCBERVZMT1BJTkcsLCBNQUtJTkcgVEhFTSBNT1JFIFNVU1BFQ1RJQkxFIFRPIFJFU1BJUkFUT1JZICAgIElORkVDVElPTlMgRVNQRUNJQUxMWSAsLCBWSVJBTCBJTExORVNTIFRIQVQgICAgQ09NTU9OTFkgICAgQUZGRUNUICAgVEhBIExPV0VSIFJFU1BJUkFUT1JZWSBUUkFDVC4uIC4uLi4gIDIpIElOVEVSUFJFVEFUSU9OICAgIE9GIEJMT09EIFRFU1QgLSBUSEEgSEVNT0dMT0JJTiwgICAgTEVFVkVMICAgSVMgQkVMT1cgICwgICBUSEEgTk9STUFMIFJBTkdFLCwgICAgICggTk9SQU1BTCBSQU5HRSBWQVJJRVMgQlkgQUdFICwgQlVUIElUICAgSVMgVFlQSUNBTExZICAgICBISUdIRVIgVEhBTiA5MCBnIC8gbCBJTkRJQ0FUSU5HICAgIEFORU1JQSBXSElDSCBJUyAgICBDT05UUklCVVRFIFRPIFdFQUtORVNTICAgIEFORCBQQUxMT1IuLiBMRVVLT0NZVEUgKFdCQykgLSBFTEVWQVRFRCBXQkMgQ09VTlQgOS4zICogMTA5L2wgU1VHR0VTVCAgICAgQU4gQUNUSVZFIElNVU5FIFJFU1BPTlNFLi4uIExJS0VMWSBEVUUgVE8gQU4gSU5GRUNUSU9OLi4gRElGRkVSRU5USUFMIFdCQyBDT1VOVCAtIElOQ1JFQVNFRCBMWU1QSE9DWVRFUyAoNjglKSBFTEVWQVRFRCAgICAgIExZTVBIT0NZVEUgT0ZURU4gSU5ESUNBVEUsLCBWSVJBTCBJTkZFQ1RJT05TLi4gTk9STUFMIE5FVVRST1BISUwgLSBUSEpBICwgUFJPUE9SVElPTiBPRiAgICAgIE5FVVRST1BISUwoMjIlKSBJUyBXSVRISU4gICAgIFRIQSAgICBOT1JNQUwgUkFOR0UgQlVUIE1BWSBJTkNSRUFTRSBEVVJJTkcgVEhBIEJBQ1RFUklBTCBJTkZFQ1RJT05TLi4gRU9TSU5PUEhJTCwgQkFTT1BISUxTIEFORCAgICBNT05PQ1lVVEUgICAgV0lPVEhJTiAgICAgICBOT1JNQUwgTElNSVQgLSBSRVRJQ1VMT0NZVEVTUyggMS4yKSAlIFNMSUdIVExZICAgICAgRUxFVkFURUQgLCwgU1VHR0VTVElORyBBTiwgQ09NUEVOU0FUT1JZICAgIFJFU1BPTlNFICAgIFRPIEFORU1JQVMuLi4uIEVSWVRIUk9DWVRFICAgIFNFRElNRU5BVElPTiBSQVRFICggRVNSKSBXSVRISU4gVEhBIE5PUk1BTCBSQU5NR0UgKCA1bW0vaHIpIElORElDQVRJTkcgICBOTyAgICBTSUdOSUZJQ0FOVCAgICBJTkZMQU1BVElPTi4uLi4=</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the interpretation of the tests is partially incorrect, they put a lot of punctuation marks</text:p>
          </table:table-cell>
          <table:table-cell office:value-type="float" office:value="0" table:style-name="ce1">
            <text:p>0</text:p>
          </table:table-cell>
          <table:table-cell table:number-columns-repeated="16376"/>
        </table:table-row>
        <table:table-row table:style-name="ro1">
          <table:table-cell office:value-type="float" office:value="915244" table:style-name="ce1">
            <text:p>915244</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0JHSsdC7INC20LDSk9C00LDQudC00LAg0L/QsNGG0LjQtdC90YIgNiDQsNC50LvRi9KbINCx0LDQu9CwLiDSmtC+0YHRi9C80YjQsCDRgtCw0pPQsNC80LTQsNGA0LTRiyA2INCw0LnQu9GL0pvRgtCw0L0g0LHQsNGB0YLQsNC/INCx0LXRgNC1INCx0LXRgNGD0LPQtSDQsdC+0LvQsNC00YsuINCv0pPQvdC4INCx0LDQu9Cw0L3Ri9KjINCw0L3QsNGB0YvQvdCwINKb0L7RgdGL0LzRiNCwINGC0LDSk9Cw0Lwg0LXQvdCz0ZbQt9GDINC10YDQtdC20LXQu9C10YDRltC9INGC0q/RgdGW0L3QtNGW0YDQtSDQvtGC0YvRgNGL0L8sINC+0L3RiyDSm9Cw0LHRi9C70LTQsNGD0pPQsCDRgNKx0pvRgdCw0YIg0LHQtdGA0YPQs9C1INCx0L7Qu9Cw0LTRiy4g0J3QtdCz0ZbQt9GWINKb0L7RgdGL0LzRiNCwINGC0LDSk9Cw0Lwg0LXQvdCz0ZbQt9GD0LPQtSDQsdCw0LvQsCA2INCw0LnQu9GL0pPRi9C90LDQvSDQsdCw0YHRgtCw0L8g0LrQtdKj0LXRgSDQsdC10YDRgyDSm9Cw0LbQtdGCLiDQodC10LHQtdCx0ZYg0LHQsNC70LDQvdGL0qMg0LTQtdC90LUg0LzQsNGB0YHQsNGB0YssINCx0L7QudGLINKx0LvSk9Cw0LnSk9Cw0L0g0YHQsNC50YvQvSDQvtC7INKb0L7RgdGL0LzRiNCwINGN0L3QtdGA0LPQuNGP0pPQsCDQvNKx0pvRgtCw0LYg0LHQvtC70LDQtNGLLiDQntC7INKv0YjRltC9INCw0L3QsCDRgdKv0YLRliDQttC10YLQutGW0LvRltC60YHRltC3INCx0L7Qu9GD0Ysg0LzSr9C80LrRltC9LiDQltOZ0L3QtSDRg9Cw0pvRi9GCINOp0YLQtSDQutC10LvQtSDQsNC90LAg0YHSr9GC0ZbQvdGW0qMg0pvSsdC90LDRgNC70YvQu9GL0pPQsCDQtNCwINCx05nRgdC10qPQtNC10LnQtNGWLiDQlNC10LzQtdC6INCx0LDQu9CwINC00LDQvNGD0Ysg0q/RiNGW0L0g0pvQvtGB0YvQvNGI0LAg0YLQsNKT0LDQvCDSm9Cw0LbQtdGCLiDQldGA0LXQttC10LvQtdGA0ZY6INCx0LDRgdGC0LDQv9Kb0YvQtNCwIDYg0LDQudC70YvSk9GL0L3QtNCwINCx0LDQu9Cw0pPQsCDQsdC+0YLSm9CwINCx0L7Qu9GL0L8g0LXQt9GW0LvQtdGC0ZbQvSwg0LDRgdKb0LDQt9Cw0L3RiyDSm9C+0YDRi9GC0YPRi9C90LAg0pvQuNGL0L3QtNGL0psg0YLRg9C00YvRgNC80LDQudGC0YvQvSwg0LbQtdKj0ZbQuyDRgtCw0pPQsNC80LTQsNGA0LTRiyDQsdC10YDRgyDQutC10YDQtdC6LiDQnNGL0YHQsNC70YssINCx0YDQvtC60LrQvtC70LgsINC/0ZbRgdC60LXQvSDQutOp0LrTqdC90ZbRgdGC0LXRgNC00LXQvSDQv9GO0YDQtSwg0YIu0LEuINCR0LDQu9Cw0L3Ri9KjINCw0YEg0pvQvtGA0YvRgtGDINGE0LXRgNC80LXQvdGC0YLQtdGA0ZYg0YTRg9C90LrRhtC40Y/RgdGLINGC0L7Qu9GL0psg0LHQtdC70YHQtdC90LTRltGA0ZbQu9C80LXQs9C10L3QtNGW0LrRgtC10L0g0LbTmdC90LUg0LHQsNC70LAg0L7RgNCz0LDQvdC40LfQvNGWINGC0LXQuiDQsNC90LAg0YHSr9GC0ZbQvSDSm9C+0YDRi9GC0YvQvyDSr9C50YDQtdC90LPQtdC90LTRltC60YLQtdC9INCx0LDRgdGC0LDQv9Kb0Ysg0YLQsNKT0LDQvCDSr9GI0ZbQvSDRgtCw0pPQsNC80LTRi9KbINKb0rHQvdC00YvQu9GL0pvRgtCw0YDRiyDQttC+0pPQsNGA0YssINC20LXSo9GW0Lsg0LbTmdC90LUg0YLQsNCx0LjSk9C4INOp0L3RltC80LTQtdGAINKx0YHRi9C90YvQu9Cw0LTRiy4g0JDQu9KT0LDRiNGL0L3QtNCwINKb0L7RgdGL0LzRiNCwINGC0LDSk9Cw0Lwg0LHQtdGA0ZbQu9GW0L8g0LHQsNGB0YLQsNKT0LDQvSDRg9Cw0pvRi9GC0YLQsCDQsdCw0LvQsNC00LAg0LvQvtKb0YHRgywg0pvSsdGB0YvQvyDRgtCw0YHRgtCw0YMsINGW0YjRgtC1INC20LXQuyDQttC40L3QsNC70YPRiyDRgdC10LrRltC70LTRliDTmdGB0LXRgNC70LXRgCDQsdC+0LvRg9GLINC80q/QvNC60ZbQvS4g0JHRltGA0LDSmyDRgtCw0pPQsNC8INKb0rHRgNCw0LzRiyDQtNKx0YDRi9GBINCx0L7Qu9GB0LAg0LHSsdC7INGE0LjQt9C40L7Qu9C+0LPQuNGP0LvRi9KbINC20LDSk9C00LDQuSDQsdC+0LvRi9C/INGC0LDQsdGL0LvQsNC00Ysg0LbTmdC90LUg0LDRgdCwINKb0LDRgtGC0Ysg0LXQvNC00LXRg9C00ZYg0YLQsNC70LDQvyDQtdGC0L/QtdC50LTRli4g0JrQtdC50ZbQvdC90LXQvSDQsdCw0LvQsNC70LDRgNKT0LAg0LbQtdC80ZbRgSwg0LrTqdC606nQvdGW0YHRgtC10YDQtNGWINKx0LfRi9C90YjQsCDQv9GW0YjRltC90LTRliDQtdGC0ZbQvyDRgtGD0YDQsNC/INKb0LDQsdGL0LvQtNCw0YPRi9C90LAg0LrTqdGI0ZbRgNGD0LPQtSDQsdC+0LvQsNC00YsuINCe0Lsg0LrQtdC30LTQtSDQsdCw0YHRgtCw0L/Sm9GL0LTQsCDQsdCw0pvRi9C70LDRg9C00LAg0rHRgdGC0LDRgyDSm9Cw0LbQtdGCLiDQodC10LHQtdCx0ZYg0LHQsNC70LAg0q/QudGA0LXQvdCz0LXQvdGI0LUg0YLQsNKT0LDQvCDQsdOp0LvRltC60YLQtdGA0ZbQvdC1INGC0rHQvdGI0YvSk9GDINCw0LrRgtGW0YHRliDQvtGA0YvQvSDQsNC70YPRiyDQvNKv0LzQutGW0L0uINCV0YHQutC10YDRgyDSm9Cw0LbQtdGCOiDQsdCw0YHRgtCw0L/Sm9GL0LTQsCDRgtCw0pPQsNC8INCx0LXRgNGW0L8g0LHQsNGB0YLQsNKT0LDQvdC00LAg0LDQtyDQvNOp0LvRiNC10YDQtNC10L0g0LHQsNGB0YLQsNGDINC60LXRgNC10Log0LbTmdC90LUg0LrQtdC50ZbQvSDQsdGW0YDRgtGW0L3QtNC10L8g0LzTqdC70YjQtdGA0ZbQvSDSsdC70pPQsNC50YLRg9KT0LAg0LHQvtC70LDQtNGLLiDQodC+0L3Ri9C80LXQvSDSm9Cw0YLQsNGALCDQsdCw0YHRgtCw0L/SsdGL0LTQsCDQttC10LzRltGBLCDQutKb0LrQvdGW0YHRgtC10YDQtNGWINCx0LXRgNGDINC00rHRgNGL0YEsINC60LXQudGW0L3RltGA0LXQuiDQvdOZ0YDRg9GL0LfSk9CwINCx0LDQuSDQtdGCINGC0LDSk9Cw0LzQtNCw0YDRi9C9INKx0YHRi9C90LAg0LHQtdGA0YPRltCz0LUg0LHQvtC70LDQtNGLLCDQsdCw0LvQsCDQsNKT0LfQsNGB0Ysg0pvQsNC70YvQv9GC0LDRgdKb0LDQvdC90LDQvSDQutC10LnRltC9INCw0YDQsNC70LDRgdGC0YvRgNGL0L8sINGC0L7Qu9GL0pvSm9Cw0L3QtNGLINCx0LXRgNC1INCx0LXRgNGD0LPQtSDQsdC+0LvQsNC00YsuINCi0LDSk9GLINCx0ZbRgCDQtdGB0LrQtdGA0LXRgtGW0L0g0LbQsNKT0LTQsNC5INCx0LDQu9Cw0LTQsCDQsNC70LvQtdGA0LPQuNGPINCx0L7Qu9C80LDRg9GL0L0g0pvQsNC00LDSk9Cw0LvQsNGDINKb0LDQttC10YIuINCh0L7QuyDSr9GI0ZbQvSDQsNC70pPQsNGI0YvQvdC00LAg0LbQuNGWINCw0LvQu9C10YDQs9C40Y8g0YjQsNKb0YvRgNCw0YLRi9C9INGC0LDSk9Cw0LzQtNCw0YDQtNGLINC80q/Qu9C00LUg0LHQtdGA0LzQtdCz0LXQvSDQtNKx0YDRi9GBLiAyINGB0rHRgNCw0ps6INKb0LDQsdGL0LvQtNCw0YPQtNCwIDEg0LDQudC70YvSmyDQsdCw0LvQsCwg0LHQvtGC0pvQsCDRgtOZ0YDRltC30LTRliwgINGB0LDRgNGLINC205nQvdC1INKb0YvRiNKb0YvQuyDQuNGW0YHRgtGWLCDSm9C+0YDRi9GC0YvQu9C80LDSk9Cw0L0g0YLSr9C50ZbRgNGI0ZbQutGC0LXRgNGWINCx0LDRgCDQvdOZ0LbRltGB0L/QtdC9LiDQkdKx0Lsg0LHQsNC70LDQtNCw0pPRiyDSsdC50pvRiyDQsdC10LfRltC90ZbSoyDRhNC40LfQuNC+0LvQvtCz0LjRj9C70YvSmyDQtdGA0LXQutGI0LXQu9GW0LrRgtC10YDRltC90LUg0LHQsNC50LvQsNC90YvRgdGC0Ysg0L7RgNGL0L0g0LDQu9GL0L8g0L7RgtGL0YAuINCh0LXQsdC10LHRliDQsdCw0LvQsNC00LAg0LXRiNKb0LDQvdC00LDQuSDSm9C+0YHRi9C80YjQsCDRgtCw0LzQsNKb0YLQsNC90LTRi9GA0YMg0LbQvtKbLCDRgtCw0LHQuNKj0Lgg0Y/Sk9C90Lgg0LDQvdCwINGB0q/RgtGW0LzQtdC9INGC0LDQvNCw0pvRgtCw0L3QsNC00YsuINCV0YDQtdGB0LXQutGC0LXRgNC80LXQvSDRgdCw0LvRi9GB0YLRi9GA0pPQsNC90LTQsCDQsdCw0LvQsNC70LDRgNC00LAg0rHQudKb0Ysg0LHQtdC30ZYg0LrTqdC70LXQvNGWINCx0L7QudGL0L3RiNCwINC60ZbRiNGWLCDQvtGA0L3QsNC70LDRgdGD0Ysg0LbQvtKT0LDRgNGLINCx0L7Qu9GL0L8g0YLQuNCw0LHRi9C70LDQtNGLLiAg0JHQsNC70LDQtNCwINGC0YPRi9C70pPQsNC9INGB05nRgtGC0LXQvSAyLTMg0LDQudC70YvSk9GL0L3QsCDQtNC10LnRltC9INC/0YDQvtGC0LXQvtC70LjRgtC40LrQsNC70YvSmyDRhNC10YDQvNC10L3RgtGC0LXRgCDQtNKx0YDRi9GBINKb0YvQt9C80LXRgtGW0L0g0LDRgtKb0LDRgNC80LDQudGC0YvQvSDQsdC+0LvRi9C/INC60LXQu9C10LTRli4g0JHRltC30LTRltKjINC20LDSk9C00LDQudC00LAg0rHQudKb0Ysg0LHQtdC30ZbQvdC10L0g0YHQtdC60YDQtdGG0LjRj9C70LDQvdCw0YLRi9C9INC70LDQutGC0LDQt9CwINGE0LXRgNC80LXQvdGC0ZbQvdGW0qMg0LbQtdGC0ZbRgdC/0LXRg9GI0ZbQu9GW0LPRliDQvtGA0YvQvSDQsNC70YvQvyDRgtKx0YAuINCb0LDQutGC0LDQt9CwINGE0LXRgNC80LXQvdGC0ZYg0LDQvdCwINGB0q/RgtGW0L3RltKjINKb0rHRgNCw0LzRi9C90LTQsNKT0Ysg0LvQsNC60YLQsNGC0YLRiyDRi9C00YvRgNCw0YLRi9C/LCDQsdC10LnRgtCw0YDQsNC/0YLQsNC50LTRiy4g0JvQsNC60YLQsNC30LAg0LbQtdGC0ZbRgdC/0LXRg9GI0ZbQu9GW0LPRltC90LXQvSDQttC40L3QsNC70pPQsNC9INGB0q/RgiDSm9GL0YjSm9GL0LvQtNCw0YDRiyDQvdOZ0LbRltGBINCw0YDSsdGL0LvRiyDRiNGL0pPQsNGA0YvQu9KT0LDQvS4gINCR0LDQu9Cw0LTQsCDQu9Cw0LrRgtCw0LfQsCDQttC10YLRltGB0L/QtdGD0YjRltC70ZbQs9GW0L3QtdC9INC+0YHRiyDRgdC40LzQv9GC0L7QvNC00LDRgCDQvtGA0YvQvSDQsNC70YvQvyDRgtKx0YA6INKa0YvRiNKb0YvQu9GC0YvQvCDQuNGW0YHRliDQvdOZ0LbRltGB0YLQtSDRgdKv0YIg0pvRi9GI0pvRi9C70Ysg0Y/Sk9C90Lgg0LvQsNC60YLQsNGCINC606nQvyDQttC40L3QsNC70YPRi9C90LDQvSwg06nRgtC60ZbRgCDSm9GL0YjSm9GL0Lsg0LjRltGB0YLRliDQsdC+0LvQsNC00YsuINCd05nQttGW0YHRgtC1INC606nRgNGW0L3QtdGC0ZbQvSDSm9C+0YDRi9GC0YvQu9C80LDSk9Cw0L0g0YLSr9C50ZbRgNGI0ZbQutGC0LXRgCwg0YvQtNGL0YDQsNGC0YvQu9C80LDSk9Cw0L0g0LvQsNC60YLQsNGC0YLRi9KjINCx0ZbRgC3QsdGW0YDRltC90LUg0LbQsNCx0YvRgdGL0L8g0YjRi9KT0LDRgNGL0LvRg9GL0L3QsNC9INCx0L7Qu9Cw0LTRiy4g0JHSsNC7INC20LDSk9C00LDQuSDQsdCw0LvQsNC70LDRgNC00LAg0YTQuNC30LjQvtC70L7Qs9C40Y/Qu9GL0psg0L3QvtGA0LzQsCDQsdC+0LvRi9C/INGC0LDQsdGL0LvQsNC00Ysg0LbTmdC90LUg0YPQsNKb0YvRgiDTqdGC0LUg0LrQtdC70LUg0pvQsNC70YvQv9Kb0LAg0LrQtdC70LXQtNGWLiDQodC+0Lsg0q/RiNGW0L0g0LDQvdCw0YHRi9C90LAg0pvQsNGC0YLRiyDQsNC70LDSo9C00LDQvNCw0YPSk9CwINC60LXSo9C10YEg0LHQtdGA0YMg0pvQsNC20LXRgi4g0JDQu9Cw0LnQtNCwLCDQsdKx0Lsg0LrTqdGA0ZbQvdGW0YEg0LHQsNC70LAgMyDQsNC50LvRi9KT0YvQvdCw0L0g0LrQtdC50ZbQvSDQvtGA0YvQvSDQsNC70LDRgtGL0L0g0LHQvtC70YHQsCDQtNOZ0YDRltCz0LXRgCDQv9C10LTQuNCw0YLRgCDQutOp0LzQtdCz0ZbQvdC1INC20q/Qs9GW0L3RgyDSm9Cw0LbQtdGCLiDQlNOZ0YDRltCz0LXRgCDRhNC10YDQvNC10L3RgtGC0LXRgNCz0LUg0YHQsNGA0LDQv9GC0LDQvNCwINC20LDRgdCw0L8sINC305nRgCDQttOZ0L3QtSDQvdOZ0LbRltGBINC30LXRgNGC0YLQtdGD0LvQtdGA0ZbQvSDQttCw0YHQsNGDINKb0LDQttC10YIuINCd05nQttGW0YEg0LfQtdGA0YLRgtC10YPRliDQutCw0L/RgNC+0LPRgNCw0LzQvNCwINC00LXQvyDQsNGC0LDQu9Cw0LTRiywg0pvSsdGA0LDQvNGL0L3QtNCwINKb0YvRiNKb0YvQu9C00YvSmyDQutOp0L8g0LHQvtC70YHQsCwg0pvQsNC20LXRgtGC0ZYg0LXQvNC00LXRgyDRiNCw0YDQsNC70LDRgNGL0L0g0LHQsNGB0YLQsNGDINKb0LDQttC10YIuINCh0L7QvdGL0LzQtdC9INKb0LDRgtCw0YAsINKb0LDQvSDQsNC90LDQu9C40LfRliDQtNC1INC20LDRgdCw0LvRg9GLINKb0LDQttC10YIu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Жауаптарда қате жіберілген, мысалы бастапқыда 6 айлығында балаға ботқа болып езілетін, асқазаны қорытуына қиындық тудырмайтын, жеңіл тағамдарды беру керек, әрі балаға жекеленген көз карас болу керек , баланың физикалык дамуына байланысты,бір балаларға көкеніс пюреден бастасак, кейбір балаларда ботқадан бастаймыз</text:p>
          </table:table-cell>
          <table:table-cell office:value-type="float" office:value="0" table:style-name="ce1">
            <text:p>0</text:p>
          </table:table-cell>
          <table:table-cell table:number-columns-repeated="16376"/>
        </table:table-row>
        <table:table-row table:style-name="ro1">
          <table:table-cell office:value-type="float" office:value="915255" table:style-name="ce1">
            <text:p>915255</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7QltCw0YEg0LHQsNC70LDQu9Cw0YDQtNCwINGP0pPQvdC4IDYg0LDQudKT0LAg0LTQtdC50ZbQvdCz0ZYg0LHQsNC70LDQu9Cw0YDSk9CwINCx0ZbQtyDSm9C+0YHRi9C80YjQsCDRgtCw0LzQsNKb0YLQsNGAINCx0LXRgNGW0L8g0LHQsNGB0YLQsNC50LzRi9C3INC005nRgNGW0LPQtdGA0LTRltKjINC60LXSo9C10YHRltC80LXQvSAs0pvQvtGB0YvQvNGI0LAg0YLQsNC80LDSm9GC0LDQvdGDINC00LXQvyBhYnViZWJieSDSm9C+0YHRi9C80YjQsNGB0YvQvNC10L0g0L3QtdC80LXRgdC1INC10LzRiNC10Log0YHSr9GC0ZbQvNC10L0g0L3QtdC80LXRgdC1INC20LDRgdCw0L3QtNGLINGB0q/RgtC/0LXQvSDQsdGW0YDQs9C1INGC0L7Qu9GL0psg0L3QtdC80LXRgdC1INC20LDRgNGC0Ysg0LDQudC70YvSm9GC0Ysg0YLQsNC80LDSm9GC0Ysg0LXQvdCz0ZbQt9GD0LTRliDQsNC50YLQsNC80YvQty7SmtC+0YHRi9C80YjQsCDRgtCw0LzQsNKb0YLQsNC90YMg0LrQtdC30ZbQvdC00LUg0LHQsNC70LDQu9Cw0YDSk9CwINC20LDRgdGL0L3QsCDQttOZ0L3QtSDQtNC10L3QtSDRgdCw0LvQvNCw0pPRi9C90LAg0pvQsNGA0LDQuSDTmdGA0YLSr9GA0LvRliDQsdC+0LvRi9C/INC60LXQu9C10LTRliAs0Y/Sk9C90Lgg0LTTmdGA0ZbQs9C10YAg0L7RgdGLINCw0L3QsNC80L3QtdC30LTQtdGAINCw0YDSm9GL0LvRiyDRgtCw0pPQsNC50YvQvdC00LDQudC00Ysu0JzRi9GB0LDQu9GLINCw0LvSk9Cw0YjRi9C90LTQsCDQsNC80LXRgNC40LrQsNC90LTRi9KbINC005nRgNGW0LPQtdGAINCx0LDQu9Cw0LvQsNGA0LTRiyA2INCw0LnQu9GL0pvRgtCw0L0g0LHQsNGB0YLQsNC/INKb0L7RgdGL0LzRiNCwINGC0LDQvNCw0pvRgtCw0L3QtNGL0YDRgyDQtNKx0YDRi9GBICDQtNC10L8g0rHRgdGL0L3Sk9Cw0L0gLtKa0L7RgdGL0LzRiNCwINGC0LDQvNCw0pvRgtCw0L3QtNGL0YDRg9C00Ysg0LHQsNGB0YLQsNC80LDRgSDQsdKx0YDRi9C9INC905nRgNC10YHRgtC1INGC0ZbRgNC10LrQv9C10L0g0L7RgtGL0YDRg9KT0LAgLNCx0LDRgSDQv9C10L0g0LzQvtC50YvQvdKT0LAg0LbQsNKb0YHRiyDQsdCw0pvRi9C70LDRgyDQttCw0YHQsNGD0Ysg0LbTmdC90LUg0YLQsNC80LDSm9Kb0LAg0pvRi9C30YvSk9GD0YjRi9C70YvSmyDRgtCw0L3Rg9GL0YLRg9GLINC60LXRgNC10Lou0prQvtGB0YvQvNGI0LAg0YLQsNC80LDSm9GC0LDRgNC00Ysg0LXQvdCz0ZbQt9GDINCx0ZbRgNGC0ZbQvdC00LXQvyDQsdC+0LvRgyDQutC10YDQtdC6ICzQsdGW0YAg0YPQsNKb0YvRgtGC0LAg0LHQsNC70LDSk9CwINGC0LDQvNCw0pvRgtGL0qMg0LHQsNGA0LvRi9KT0YvQvSDQsdGW0YAg0YPQsNKb0YvRgtGC0LAg0LHQtdGA0ZbQvyDRgtCw0YHRgtCw0LnRgtGL0L0g0LHQvtC70YHQsNKbINCx0ZbQtyDQsdCw0LvQsNC90YvSoyDQsNGB0pvQsNC30LDQvdGL0L0g0LHSsdC30YvQvyDQsNC70LDQvNGL0LcgLCDQsdGW0YAg0YPQsNKb0YvRgtGC0LAg0LHRltGAINGC0LDSk9Cw0Lwg0LbTmdC90LUg0LDRgtCwIC3QsNC90LDQu9Cw0YAg0YLQsNC80LDSmyDQsNC70LvQtdGA0LPQuNGP0YHRi9C90YvSoyDQvdC10LzQtdGB0LUg0YLTqdC30ZbQvNC00ZbQu9GW0LPRltC9INC60LXQty3QutC10LvQs9C10L0g0LHQtdC70LPRltC70LXRgNGW0L0g0LHQsNKb0YvQu9Cw0L8g0L7RgtGL0YDRg9GLINC60LXRgNC10LouINCi0LDSk9Cw0LzQvdGL0qMg0LrQvtC90YHQuNGB0YLQtdC90YbQuNGP0YHRiyDQttKx0LzRgdCw0psg0LbTmdC90LUg0LbSsdGC0YPSk9CwINC+0qPQsNC5INCx0L7Qu9GD0Ysg0LrQtdGA0LXQuiAs0YHQvtC90YvQvNC10L0g0pvQsNGC0LDRgCDQvtC90Ysg0LHQsNC70LDSk9CwINC60ZbRiNC60LXQvdGC0LDQuSDSm9Cw0YHRi9Kb0L/QtdC9INCx0LXRgNGDINC60LXRgNC10LouINCV0YDQtdC20LXQu9C10YDRltC90LUg0LzRi9GB0LDQu9GLINCx0ZbRgCDQutKv0L3QtNC1INCx0LDRgdGC0LDQv9Kb0YvQtNCwINCx0ZbRgCDRgNC10YIg0YHQvtGB0YvQvSDQsdCw0LvQsNC90YvSoyDRgtCw0LzQsNKb0YLQsNC90YMg0YvSm9GL0LvQsNGB0YvQvdCwINKb0LDRgNCw0Lkg0LHRltGAINC60q/QvdC00LUg0LXQutGWINGA0LXRgtGC0LXQvSDQsdC10YDRg9Cz0LUg0LHQvtC70LDQtNGLICwg0LHRltGA0LDSmyDQttCw0L3QsCDQsdCw0YHRgtCw0L/Sm9GL0LTQsCDQsNC50YLRi9C/INC60LXRgtC60LXQvdC00LXQuSDQsdCw0LvQsNC90YvSoyDSm9Cw0LHRi9C70LTQsNGD0YvQvdCwINC90LDQt9Cw0YAg0LDRg9C00LDRgNKT0LDQvSDQttOp0L0gLCDQvNGL0YHQsNC70Ysg0LHQsNC70LDQvdGL0qMg0ZbRiNGW0L0g0LDRg9GL0YDRgtC/0LDQudC80LAgPyDRltGI0ZYg06nRgtC/0LXQudC80LAgPyDSm9Kx0YHRgyDQsdC10LvQs9GW0LvQtdGA0ZYg0LbQvtKb0L/QsCA/INCw0LvQu9C10YDQs9C40Y/Qu9GL0psg0LHQtdC70LPRltC70LXRgNGWINC20L7Sm9C/0LAg0LTQtdCz0LXQvSDRgdC40Y/Sm9GC0YsuINKa0L7RgdGL0LzRiNCwINGC0LDQvNCw0pvRgtCw0YDQtNGLINC10L3Qs9GW0LfRgyDQsdCw0LvQsNKT0LAg0L/QsNC50LTQsNC70Ysg0LHQvtC70YvQvyDQutC10LvQtdC00ZYgINC20LDSm9GB0Ysg06nRgdGD0ZbQvdC1ICwg0LbQtdGC0ZbQu9GD0ZbQvdC1INGB0L7QvdGL0LzQtdC9INKb0LDRgtCw0YAg06nQtyDQttCw0YHRi9C90LAg0YHQsNC5INGB0LDQu9C80LDSmyDSm9C+0YHRg9GL0L3QsCDQutOp0LzQtdC60YLQtdGB0LXQtNGWLjxiciAvPg0KMi4g0JHRltGAINCw0LnQu9GL0psg0LHQsNC70LDQvdGL0qMg0LDRgSDSm9C+0YDRi9GC0YMg0LbSr9C50LXRgdC10L3RltKjINOZ0YHRltGA0LXRgdC1INKx0LnSm9GLINCx0LXQt9GW0L3RltKjINC10YDQtdC60YjQtdC70ZbQutGC0LXRgNGW0L3QtSDQsdCw0LnQu9Cw0L3Ri9GB0YLRiyDQvtC90YvSoyDQvdOZ0LbRltGB0ZbQvdC00LUg0pvQvtGA0YvRgtGL0LvQvNCw0pPQsNC9INGC0q/QudGW0YDRiNGW0LrRgtC10YAg0LHQvtC70YPRiyDQvNKv0LzQutGW0L0gLtCR0rHQuyDQsNC90LDRgtC+0LzQuNGP0LvRi9KbINC205nQvdC1INGE0LjQt9C40L7Qu9C+0LPRj9C70YvSmyDQtdGA0LXQutGI0LXQu9GW0LrRgtC10YDRltC90LUg0LHQsNC50LvQsNC90YvRgdGC0Ysg06nQt9Cz0LXRgNGW0YHRgtC10YDQs9C1INCw0LvRi9C/INC60LXQu9C10LTRliAu0JbQsNKj0LAg0YLRg9GL0LvSk9Cw0L0g0LHQsNC70LDQu9Cw0YDQtNCwINKx0LnSm9GLINCx0LXQt9GWINGC0L7Qu9GL0psg0LbQtdGC0ZbQu9C80LXQudC00ZYgLNC+0L3Ri9KjINC90LXQs9GW0LfQs9GWINGE0LXRgNC80LXQvdGC0YLQtdGA0ZYg0LvQuNC/0LDQt9CwICzQsNC80LjQu9Cw0LfQsCAs0YLRgNC40L/RgdC40L0g0LDQtyDQvNOp0LvRiNC10YDQtNC1INC205nQvdC1INC20LXRgtC60ZbQu9GW0LrRgdGW0Lcg0LDQtyDQvNOp0LvRiNC10YDQtNC1INCx0L7Qu9Cw0LTRiy4g0JvQuNC/0LDQt9CwINC80LDQudC70LDRgNC00Ysg0YvQtNGL0YDQsNGC0YMg0q/RiNGW0L0g0pvQsNC20LXRgtGC0ZYg0YTQtdGA0LzQtdC90YIgLtCW0LDSo9CwINGC0YPRi9C70pPQsNC9INCx0LDQu9Cw0LvQsNGA0LTQsCDQu9C40L/QsNC30LDQvdGL0qMg0LzTqdC70YjQtdGA0ZYg0LDQtyDQsdC+0LvRi9C/INC60LXQu9C10LTRliDRgdC+0Lsg0YHQtdCx0LXQv9GC0ZbQtNC1INC80LDQudC70LDRgNC00YvSoyDRi9C00YvRgNCw0YLRgyDQutOp0YDRgdC10YLQutGW0YjRliDRgtOp0LzQtdC9LtCQ0LzQuNC70LDQt9CwLSDQutGA0LDRhdC80LDQuyDQvNC10L0g0LrTqdC80ZbRgNGB0YPQtNGL0qMg0YvQtNGL0YDQsNGD0YvQvdCwINC20LDRg9Cw0L/RgtGLINGE0LXRgNC80LXQvdGCICzQsNC80LjQu9Cw0LfQsCDRgdC10LrRgNC10YbQuNGP0YHRiyDTqdC80ZbRgNGW0L3RltKjINCw0LvSk9Cw0YjSm9GLINCw0LnRi9C90LTQsCDQsdCw0LvQsNC70LDRgNC00LAg06nRgtC1INGC06nQvNC10L0g0LHQvtC70LDQtNGLINGB0L7QuyDRgdC10LHQtdC/0YLRliDQutOp0LzRltGA0YHRg9C70LDRgNC00YvSoyDRi9C00YvRgNCw0YLRgyDQutOp0YDRgdC10YLQutGW0YjRliDRgtOp0LzQtdC9LiDQotGA0LjQv9GB0LjQvSAt0LDSm9GD0YvQt9C00Ysg0YvQtNGL0YDQsNGC0YPRiNGLINGE0LXRgNC80LXQvdGCINCx0L7Qu9GL0L8g0LrQtdC70LXQtNGWLNCx0ZbRgNCw0psg0L7QvdGL0qPQtNCwINGB0LXQutGA0LXRhtC40Y/RgdGLINGC0L7Qu9GL0psg0LbQtdGC0ZbQu9C80LXQs9C10L0g0LHQvtC70YvQvyDQutC10LvQtdC00ZYg0LHQsNC70LDQu9Cw0YDQtNCwLiDQkNC90LDRgtC+0LzQuNGP0LvRi9KbINC205nQvdC1INGE0LjQt9C40L7Qu9C+0LPQuNGP0LvRi9KbINC10YDQtdC60YjQtdC70ZbQutGC0LXRgNGWINC905nRgNC10YHRgtC10L3RltKjINCw0YEg0pvQvtGA0YvRgtGDINC20q/QudC10YHRltC90ZbSoyDQsNC90LAg0YHSr9GC0ZbQvdC00LXQs9GWINC90LXQs9GW0LfQs9GWINKb0L7RgNC10LrRgtGW0Log0LfQsNGC0YLQsNGA0LTRiyDQu9Cw0LrRgtC+0LfQsCAs0YHSr9GCINC80LDQudC70LDRgNGLICwg0LDSm9GD0YvQt9C00LDRgNC00Ysg0pvQvtGA0YvRgtGD0pPQsCDQsdC10LnRltC80LTRliDRhNC10YDQvNC10L3RgiDSk9Cw0L3QsCDSm9C+0YDRi9GC0YPSk9CwINCx0LXQu9GB0LXQvdC00ZYg0LHQvtC70YvQvyDQutC10LvQtdC00ZYgLtCQ0L3QsCDRgdKv0YLRltC90LTQtdCz0ZYg0LvQsNC60YLQvtC30LAg0YTQtdGA0LzQtdC90YLRliDQutOp0LzRltGA0YHRg9C70LDRgNC00Ysg0pvQvtGA0YvRgtGD0pPQsCDQutOp0LzQtdC60YLQtdGB0LXQtNGWLCDQsdGW0YDQsNKbINCx0LDRgdKb0LAg0LrSr9GA0LTQtdC70ZYg0LfQsNGC0YLQsNGA0LTRiyDRgtC+0LvRi9KT0YvQvNC10L0g0pvQvtGA0YvRgtCwINCw0LvQvNCw0LnQtNGLINGB0LXQsdC10LHRliDQsdCw0LvQsNC90YvSoyDQttKv0LnQtdGB0ZYg0L7RgNCz0LDQvdC40LfQvNGWINC20LDRgSDQsdC+0LvRi9C/INC60LXQu9C10LTRliDRgtC+0LvRi9KbINC20LXRgtGW0LvQvNC10LPQtdC9LCDQsdCw0YHRgtCw0L/Sm9GL0LTQsCDQsNC50YLRi9C/INC60LXRgtC60LXQvdC00LXQuS4g0prQvtGA0YvRgtGL0L3QtNGL0LvQsNC5INC60LXQu9C1IDEg0LDQudC70YvSmyDQsdCw0LvQsNC90YvSoyDQvdOZ0LbRltGB0ZbQvdC00LUg0LrQvtGA0YvRgtGL0LvQvNCw0pPQsNC9INGC0q/QudGW0YDRiNGW0LrRgtC10YDQtNGW0qMg0LHQvtC70YPRiyDSsdC50pvRiyDQsdC10LfRltC90ZbSoyDRhNC10YDQvNC10L3RgtGC0LXRgNGW0L3RltKjINC20LXRgtC60ZbQu9GW0LrRgdGW0Lcg0LHTqdC70ZbQvdGD0ZbQvdC10L0g0LbTmdC90LUg0LDRgSDSm9C+0YDRi9GC0YMg0LbSr9C50LXRgdC10L3RltKjINGC0L7Qu9GL0psg0LbQtdGC0ZbQu9C80LXQs9C10L3QtNGW0LPRltC80LXQvSDRgdC40L/QsNGC0YLQsNC70LDQtNGLLtCR0rHQuyDRhNC40LfQuNC+0LvQvtCz0LjRj9C70YvSmyDSm9Kx0LHRi9C70YvRgSDQsdC+0LvRi9C/INGB0LDQvdCw0LvQsNC00Ysg0LbTmdC90LUg0YPQsNKb0YvRgiDTqdGC0LUg0LrQtdC70LUgLCDSsdC50pvRiyDQsdC10LfRliDSm9GL0LfQvNC10YLRliDQttC10YLRltC70LPQtdC9INGB0LDQudGL0L0g0L3TmdC20ZbRgdGC0ZbSoyDQutC+0L3RgdC40YHRgtC10L3RhtC40Y/RgdGLINOp0LfQs9C10YDQtdC00ZYu</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Толық емес және 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915581" table:style-name="ce1">
            <text:p>915581</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nQn9C10LTQuNCw0YLRi9GA0LTRi9C9INGC0LDSk9Cw0LnRi9C90LTQsNGD0Ysg0L3QtdCz0ZbQt9GW0L3QtdC9INC00rHRgNGL0YEg0LHQvtC70YvQvyDQtdGB0LXQv9GC0LXQu9GW0L3QtdC00ZYg0LDQu9GC0Ysg0LDQudC70YvSmyDQsdCw0LvQsNKT0LAg0LrQsNGA0LzQtdGI0LrQsCDRgNC10YLRltC90LTQtSDRgtCw0pPQsNC50YvQvdC00LDRg9KT0LAg0LHQvtC70LDQtNGLLNCw0LvQtNGL0LzQtdC9INCx0rHQuyDQttC10L3RltC7INGB0ZbQvdGW0YDQu9C10YLRltC9INGC0LDSk9Cw0LzQtNCw0YAg0LHQvtC70YPRiyDRgtC40ZbRgSDQvdC10LPRltC30ZbQvdC10L0gLSDQnNGL0YHQsNC70Ysg0prQvtGB0YvQvNGI0LAg0YLQsNC80LDSm9GC0LDRgNKT0LAg0L/RjtGA0LUg0YHTmdCx0ZbQtyzQtdGA0LXQttC1INCx0L7QudGL0L3RiNCwINOZ0YAg0LbQsNC90LAg0YLQsNKT0LDQvNC00YsgMy01INC60q/QvSDQsNGA0LDQu9GL0pPRi9C90LTQsCDQtdC90LPRltC30YMg0pvQsNC20LXRgiDQsdGW0YDQsNKbINCw0LvQtdGA0LPQuNGP0LvRi9KbINGA0LXQsNC60YbQuNGP0LvQsNGA0YvQvSDQsNC90pPQsNGA0pPQsNC9INC00rHRgNGL0YEg0YLQsNC80LDSmyDQtdC30LPQtdC9INC90LXQvNC10YHQtSDQv9GO0YDQtSDRgtKv0YDRltC90LTQtSDQsdC+0LvRg9GLINGC0LjRltGBLNKa0L7RgdGL0LzRiNCwINGC0LDQvNCw0pvRgtCw0YDSk9CwINCx0LDQu9Cw0L3Ri9C9INCw0LvQtdGA0LPQuNGP0YHRiyDQsdCw0YAg0YLQsNC80LDSm9GC0LDRgCDQvdC10LzQtdGB0LUg0YLSsdC3INKb0LDQvdGCINKb0L7RgdC/0LDSk9Cw0L0g0LbTqdC9LNCR0LDQu9CwINC+0YLRi9GA0pPQsNC9INC60LXQt9C00LUg0LHQtdGA0YPQs9C1INCx0L7Qu9Cw0LTRiyDRgtGW0Log0L7RgtGL0YDSk9Cw0L0g0LrQtdC30LTQtSDSk9Cw0L3QsCDSm9Cw0YHRi9C/0LXQvSDQtdC80LXRgSDQvNGW0L3QtNC10YLRgtGWINGC0q/RgNC00LUg0LHTqdGC0LXQu9C60LXQvNC10L0g0LHQtdGA0LPQtdC9INC206nQvS4gPGJyIC8+DQoyKdCR0ZbRgNGW0L3RiNGW0LTQtdC9INCx0LDQu9Cw0LvQsNGA0LTQsCDQsNGBINKb0L7RgNGL0YLRgyDQttKv0LnQtdGB0ZYg0YLQvtC70YvSmyDSm9Cw0LvRi9C/0YLQsNGB0L/QsNKT0LDQvSDQsdC+0LvRi9C/INC60LXQu9C10LTRlizQldC60ZbQvdGI0ZbQtNC10L0g0pvQsNKT0LjQtNCwINCx0L7QudGL0L3RiNCwINGE0LXRgNC80LXQvdC90YLQtdGAINGC0LDQv9GI0YvQu9GL0pPRi9C90LDQvSDQsdC+0LvRg9GLINGL0pvRgtC40LzQsNC7LNCw0LzQuNC70LDQtyDRhNC10YDQvNC10L3RgtGWINCw0Lcg0YLQsNC/0YjRi9C70YvSm9GC0LAg0LHTqdC70ZbQvdC10LTRlizQutOp0LzRltGA0YHRg9C70LDRgCDRgtCw0L/RiNGL0LvRi9KT0Ysg0LTSsdGA0YvRgSDQttC10YLRltC70LzQtdGD0ZYs0ZbRiNGC0ZbQvSDQvNC40LrRgNCw0YTQu9C+0YDQsNGB0YvQvdGL0L0g0LTSsdGA0YvRgSDSm9Cw0LvRi9C/0YLQsNGB0L/QsNGD0Ysg0L7Qu9Cw0YDQtNCwINGW0YjRgtC1INCx0LDQutGC0LXRgNC40Y/Qu9Cw0YAg0LrTqdC/INC20LjQvdCw0LvRi9C/LNGW0Ygg0pvQsNGC0YPQu9Cw0YAg0LbQuNGWINCx0LDQudKb0LDQu9Cw0LTRiyzSm9Kx0YHRgyDQutCw0LvRi9C/0Ysg0YHRhNC40L3QutGC0ZbRgNC00ZbQvSDTqdC90LXRiNC60LUg0YLTqdC80LXQvdCz0LUg0LHQsNKT0YvRgtCw0LvRg9GL0L3QsNC9INC/0LDQudC00LAg0LHQvtC70LDQtNGLINCw0YEg0pvQvtGA0YvRgtGDINC20YPQudC10YHRltC90LTQtSzQsNGB0LrQsNC30LDQvdC00LAg0YLQsNC80LDSmyDQsdCw0Y/RgyDQvtGC0LXQtNGWINCx0rHQuyDQtNCwINC30LDRgNC00LDQv9GC0LDRgNKT0LAg0LDQutC10L8g0YHQvtKT0LDQtNGLLNGB0rHQudGL0psg0LTQuNC10YLQsCDQsNC90LDQvdC90YvQvSDRgdKv0YLRltC90LXQvSDQtNC1INC/0YDQvtCx0LvQtdC80LDQu9Cw0YAg0YLRg9GL0L3QtNCw0YPRiyDQvNKv0LzQutGW0L0s0LHQsNC70LDQtNCwINCw0YHQutCw0LfQsNC9INC606nQu9C10LzRliDRiNCw0LzQsNC80LXQvSAzNdC80Lsg0pvSsdGA0LDQudC00Yss0LbQsNC90LAg0LDQudGC0pvQsNC90LTQsNC5INGE0LXRgNC80LXQvdGC0LXRgNC00ZbQvSDTmdGB0LXRgNGWINCw0LzQuNC70LDQt9CwINC70LDQutGC0LDQt9CwLNGW0YjQtdC60YLQtdGA0LTRltC9INOZ0YHQtdGA0ZbQvdC10L0g0LHSr9C60YLQtdC80LXQu9GWINOZ0YDRliDQsNC3INCx0L7Qu9GD0YvQvdCw0L0s0LjQvdGE0LXQutGG0LjRj9C90YvQvSDTmdGB0LXRgNC70LXRgNGWINCx0L7Qu9GD0Ysg0YvSm9GC0LjQvNCw0Lsg0LDRgdKb0LfQsNC9INGW0YjQtdC6INC20L7Qu9GL0L3QsCDRgtC10Lcg0YLSr9GB0YPRltC90LXQvSDQsdC+0LvRg9GLINC80q/QvNC60ZbQvSzSsdC50pvRiyDQsdC10LfRltC90LTQtSDQu9C40L/QsNC30LAg0LDQvNC40LvQsNC30LAg0YTQtdGA0LzQtdC90YLQtdGA0ZYg0YLTqdC80LXQvSDQsdKx0Lsg0LzQsNC50LvQsNGAINKb0L7RgNGC0YvQu9GD0YvQvSDRgtOp0LzQtdC90LTQtdGC0LXQtNGWLNCx0LDRg9GL0YDQtNGL0L0g0LrRi9C30LzQtdGC0YLRliDQsdKx0Lsg0LTQsCDQvNCw0LnQu9Cw0YAg0YLQvtC70YvSmyDSm9C+0YDRgtGL0LvRg9GL0L3QsCDQutC10LTQtdGA0LPRliDQttCw0YHQsNC50LTRiywxINCw0LnQu9GL0psg0LHQsNC70LDQtNCwINGC0LDQsdC40pPQuCDQttCw0pPRi9C90LDQvSDQs9Cw0Lcg0LbQuNC90LDQu9GDINGW0Ygg0LDRg9GA0YMg0LbQsNC90LAg0YLRg9GL0LvSk9Cw0L0g0L3TmdGA0LXRgdGC0LXQu9C10YDQs9C1INC90L7RgNC80LAg0LHQvtC70YvQvyDRgdCw0L3QsNC70LDQtNGLLg==</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Жауаптары толық ашылып жазылмаған және 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42" table:style-name="ce1">
            <text:p>1066842</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7QltCw0LvQv9GLIDYg0LDQudC70YvSmyDQsdCw0LvQsNC70LDRgNC00YvSoyDTqdOp0LfQtNC10YDRliDTmdC70ZYg0LXQvNGI0LXQutGC0LXQvSDRiNGL0pvQv9Cw0pPQsNC90LTRi9Kb0YLQsNC9LCDQttOZ0L3QtSDSm9C+0YHRi9C80YjQsCDQvtC70LDRgNC00YvSoyDRgtGW0YHRgtC10YDRliDRgtC+0LvRi9KbINGI0YvSm9C/0LDSk9Cw0L3QtNGL0pvRgtCw0L0g0L7Qu9Cw0YDSk9CwINOZ0LvRliDRltGA0ZYg0YjQsNC50L3QsNC70LDRgtGL0L0sINC+0LTQsNC9INGB0L7SoyDSsdC30LDSmyDSm9C+0YDRi9GC0YvQu9Cw0YLRi9C9INGC0LDQvNCw0pvRgtCw0YAg0LHQtdGA0LzQtdCz0LXQvSDQttOp0L0uINCR0LDQu9Cw0pPQsCDQutOp0LHRltC90LXRgdC1INC20LXSo9GW0Lsg0pvQvtGA0YvRgtGL0LvQsNGC0YvQvSwg0YHSsdC50YvSmyDRgtCw0LzQsNKb0YLQsNGAINCx0LXRgNCz0LXQvSDQtNKx0YDRi9GBLiDQnNGL0YHQsNC70Ysg0LHQvtGC0pvQsCwg0YHSr9GCINGB0LXQutGW0LvQtNGWINGC0LDQvNCw0pvRgtCw0YAuINCQ0LssINKb0LDQt9GW0YDQs9GWIDYg0LDQudC70YvSmyDQsdCw0LvQsNKT0LAg0LrQtdC70LXRgtGW0L0g0LHQvtC70YHQsNKbINC+0pPQsNC9INC/0Y7RgNC1INCx0LXRgNGD0LPQtSDQsdC+0LvQsNC00Ysg0LTQtdC/INC+0LnQu9Cw0LnQvNGL0L0uINCh0LXQsdC10LHRliDQvtC7INCx0ZbRgCDQttCw0pPRi9C90LDQvSDQttC10qPRltC7INCx0ZbRgCDQttCw0pPRi9C90LDQvSDRgtC10Lcg0YHRltKj0ZbRgNGW0LvQtdC00ZYuINCh0L7QuyDRgdC10LHQtdC/0YLRliDQutOp0LrTqdC90ZbRgSDQv9GO0YDQtdGB0ZbQvdGW0qMg0LfQuNGP0L0g0LXRiNGC0LXSo9C10YHRliDQttC+0psg0LTQtdC/INCx0ZbQu9C10LzRltC9LiDSmtC+0YHRi9C80YjQsCDRgtCw0LzQsNKb0YLQsNC90LTRi9GA0YMg0LbQsNC70L/RiyDQvdC10LPRltC30ZbQvdC10L0g0LDSm9GL0YDRi9C9LCDQsdGW0YDRgtGW0L3QtNC10L8g0LbTmdC90LUg06nQtyDQutC10LfQtdCz0ZbQvNC10L0g0LHQtdGA0ZbQu9C10YLRltC9LCDQsNC90LAg0YHSr9GC0ZbQvdGW0qMg0L7RgNC90YvQvSDQsdCw0YHRgyDSr9GI0ZbQvSDQvdC10LzQtdGB0LUg0YHSr9GC0YLRltKjINKb0LDRgdGL0L3QsCDSm9C+0YHRi9C80YjQsCDTmdGB0LXRgCDQutOp0YDRgdC10YLRgyDSr9GI0qPQvSDRgtCw0pPQsNC50YvQvdC00LDQu9Cw0YLRi9C9INKb0L7RjtC70LDQvdKT0LDQvSwg0L/QsNC50LTQsNC70Ysg06nQvdGW0LzQs9C1INCx0LDQuSwg0LbQsNKj0LAg0YLQsNKT0LDQvCDQtdC90LPRltC30YMg0LHQvtC70YvQvyDRgtCw0LHRi9C70LDQtNGLLiDQkNC80LXRgNC40LrQsNC90LTRi9KbINC/0LXQtNC40LDRgtGA0LjRjyDQsNC60LDQtNC10LzQuNGP0YHRi9C90YvSoyDQt9C10YDRgtGC0LXRgyDRltGBINOZ0YDQtdC60LXRgtGC0LXRgNGWINC80LXQvSDQttKv0YDQs9GW0LfRltC70LPQtdC90L0g0YLTmdC20ZbRgNC40LHQtdC70LXRgNCz0LUg0L7RgNCw0Lkg0pvQvtGB0YvQvNGI0LAg0YLQsNC80LDSm9GC0LDRgNC00Ysg0LHQtdGA0YPQtNGWINGI0LDQvNCw0LzQtdC9IDYg0LDQudC70YvSmyDQttCw0YHRgtCw0L0g0L3QtdC80LXRgdC1INC+0YHRiyDRg9Cw0pvRi9GC0LAg0LHQtdGA0YMg0LrQtdGA0LXQuiDQtNC10L8g0LbQvtGB0L/QsNGA0LvRi9C/LCDSsdGB0YvQvdCw0LTRiy4g0prQvtGB0YvQvNGI0LAg0YLQsNC80LDSm9GC0LDQvdC00YvRgNGD0LTRiyDQsdCw0YHRgtCw0LzQsNGBINCx0rHRgNGL0L0g0L3QtdCz0ZbQt9GW0L3QtdC9INC905nRgNC10YHRgtC1INGC0ZbRgNC10LrQv9C10L0sINC40LrQtdC80LTQtdC70ZbQvyDQvtGC0YvRgNGD0pPQsCwg0L7QtNCw0L0g0LrQtdC50ZbQvSDQsdCw0YEg0L/QtdC9INC80L7QudGL0L3Sk9CwINC00LDSm9GB0Ysg0LHQsNKb0YvQu9Cw0YMg0LbQsNGB0LDRg9GLLCDSm9Cw0LTQsNKT0LDQu9Cw0YPRiywg0YHQvtC00LDQvSDRgdC+0qMg0YLQsNKT0LDQvNKT0LDQsNCwINKb0YvQt9GL0pPRg9GI0YvQu9GL0pswINGC0LDQvdGL0YLRg9GLLCDQsNGD0LfRi9C90LAg0pvQsNGB0YvSmywg0LXQvNGW0LfRltC6LCDQvtC50YvQvdGI0YvSmyDRgdCw0LvRgdCwIC0g0YjQsNC50L3QsNC5INCx0LDRgdGC0LDRg9GLLCDQsNC70pPQsNGI0pvRiyDRgdKv0YIg0YLRltGB0YLQtdGA0ZYg0LbQsNGA0YvQvyDRiNGL0pPRg9GLINC60LXRgNC10LouLiDSmtC+0YHRi9C80YjQsCDRgtCw0pPQsNC80LTQsNGA0LTRiyDQtdC90LPRltC30YMg0L3QtdC80LXRgdC1INCx0LXRgNGDINCx0ZbRgNGC0ZbQvdC00LXQvyDQttKv0LfQtdCz0LUg0LDRgdGL0YDRi9C70LDRgtGL0L0g0L/RgNC+0YbQtdGB0YEg0LHQvtC70YvQvyDRgtCw0LHRi9C70LDQtNGLLiAu0JHQtdC70LPRltC70ZYg0LHRltGAINGD0LDSm9GL0YLRgtCwINCx0ZbRgCDRgtCw0pPQsNC8INC205nQvdC1INCw0YLQsCDQsNC90LDQu9Cw0YAg0YLQsNC80LDSmyDQsNC70LvQtdGA0LPQuNGP0YHRi9C90YvSoyDQvdC10LzQtdC80YHQtSDRgtOp0LfRltC80YHRltC30LTRltC60LrRgtGW0qMg0LrQtdC3INC60LXQu9Cz0LXQvSDQsdC10LvQs9GW0LvQtdGA0ZbQvdC9INCx0LDQudKb0LDRg9GLINKb0LDQttC10YIuINCi0LDSk9Cw0LzQvdGL0qMg0LrQvtC90YHQuNGB0YLQtdC90YbQuNGP0YHRiyDQttKx0LzRgdCw0psg0LbTmdC90LUg0LbSsdGC0YPSk9CwINC+0qPQsNC50Lkg0LHQvtC70YPRiyDQutC10YDQtdC6LiDQltOZ0L3QtSDSm9Cw0L3QtNCw0Lkg0LTQsCDQsdGW0YAg0YLQsNKT0LDQvCDQsdC+0LvQvNCw0YHRi9C9INC+0L3RiyDSm9Cw0YHRi9Kb0L/QtdC9NSDQsdC10YDRgyDQutC10YDQtdC6INCx0L7Qu9GL0L8g0YLQsNCx0YvQu9Cw0LTRiy4g0KjQsNC80LDQvNC10L0gNiDQsNC50LvRi9KbINC20LDRgdGC0LDQsCDQvdOZ0YDQtdGB0YLQtdC/0L3RltKjINGN0L3QtdGA0LPQuNGP0Y8g0LzQtdC9INKb0L7RgNC10LrRgtGW0Log0LfQsNGC0YLRgtCw0YDSk9CwINC60LDQttC10YLRgtGW0LvRltCz0ZYg0LDQvdCwINGB0q/RgtGW0L3RltC9INKb0LDQvNGC0LDQvNCw0YHRi9C3INC10YLRltC70LPQtdC90ZbQvdC10L0g0LDRgdGL0L8g0YLSr9GB0LXQtNGWINC00LXRgdC10Log0LDRgNGC0YvSmyDQsNC50YLQv9Cw0LnQvNGL0LcuLiDQkdKx0Lsg0pvQsNC20LXRgtGC0ZbQu9GW0LrRgtC10YDQtNGW0qMg0LHQsNGA0LvRi9KT0YvQvSDSm9Cw0L3QsNKT0LDRgtGC0LDQvdC00YvRgNGDINKv0YjRltC9ICDSm9C+0YHRi9C80YjQsCDRgtCw0pPQsNC80LTQsNGAINKb0LDQttC10YIg0LHQvtC70LDQtNGLLi4g0JHSsdC7INC20LDRgdGC0LDSk9GLINC905nRgNC10YHRgtC1INC00LDQvNGDINC20LDSk9GL0L3QsNC9INCx0LDRgdKb0LAg0YLQsNKT0LDQvNC00LDRgNKT0LAg0LTQsCDQtNCw0LnRi9C9INCx0L7Qu9GL0L8g0LrQtdC70LvQtdC00ZYuLiDQkdKb0Lsg0LDRg9GL0YHRg9C00Ysg0pvQvtGB0YvQvNGI0LAg0YLQsNC80LDSm9GC0LDQvdC00YvRgNGDINC00LXQvyDQsNGC0LDQudC00YsuIDYg0LDQudC00LDQvSDQutC10LnRltC9INC90LXQs9GW0LfRltC90LXQvSDQsdCw0LvQsCDQvtKT0LDQvSDQtNCw0LnRi9C9INCx0L7Qu9KT0LDQvSDQutC10LfQtNC1INKb0L7RgdGL0LzRidGI0LAg0YLQsNKT0LDQvNC00LDRgNC00Ysg0LHQtdGA0YPQtNGWINCx0LDRgdGC0LDRgyDSsdGB0YvQvdGL0LvQsNC00YsuINCi0LDSk9Cw0LzQtNCw0YDQtNGLINGC0q/RgNC70LXQvdC00ZbRgNGW0L8sINOp0LfQs9C10YjQtSDSm9GL0LvRi9C/INCx0LXRgNCz0LXQvSDQttOp0L0sINCx0ZbRgCDRgtCw0LzQsNKb0YLRiyDQsNGA0YLRiyDQsNGA0YLRi9C90LDQvSDQutKv0L0g0YHQsNC50YvQvSDQsdC10YDQvNC10YMg0pvQsNC20LXRgiwg0LHSr9Cz0ZbQvSDQsdGW0YAg0YLQsNC80LDSmywg0LXRgNGC0LXSoyDQsdCw0YHSm9Cw0YjQsCDRgtCw0LzQsNKbLCDQsNGA0pPRiyDQutKv0L3RliDRgtCw0pPRiyDQsdCw0YHSm9Cw0YjQsCDRgtCw0LzQsNKbINGB0LjRh9GP0pvRgtGLINKb0YvQu9GL0L8g0LHQtdGA0YMg0LrQtdGA0LXQui4g0prQvtGB0YvQvNGI0LAgINGC0LDQvNCw0pvQsNGA0LTQsiDQutKv0L3RltC90LUgMdGA0LXRgiwgMdC00LUgMiDSm9GL0LvRi9C/INGI0LDQuSDSm9Cw0YHRi9Kb0L/QtdC9INCx0LDRgdGC0LDRgyDSm9Cw0LbQtdGCLiDQldC60ZbQvdGI0ZYg0LrSr9C90ZYg0LHRltGAINGI0LDQuSDSm9Cw0YHRi9KbINCx0LXRgNGW0LvQtdC00ZYuINCe0YHRi9C70LDQuSDQsdGW0YAg0LDQv9GC0LAg0LrTqdC70LXQvNGW0L3QtNC10LUg0pvQvtGB0YvQvNGI0LAg0YLQsNC80LDSm9GC0YvSoyDQttCw0LvQv9GLINC606nQu9C10LzRltC9INGC0rHRgtCw0YEgMdGA0LXRgtGC0ZbQuiDQutOp0LvQtdC80LPQtSDQttC10YLQutGW0LfRg9Cz0LUg0LHQvtC70LDQtNGLLiwuINCa0ZbRiNC60LXQvdGC0LDQuSDQsdOp0LvRltC60YLQtdGA0LTQtdC9INCx0LDRgdGC0LDRgzAg0pvQsNC20LXRgi4g0JHSsdC7INOp0Lcg0LrQtdC30LXQs9GW0L3QtNC1INCw0YHSm9C+0YDRi9GC0YMg0LbQvtC70LTQsNGA0YvQvdGL0qMg0L/RgNC+0LHQu9C10LzQsNC70LDRgNGL0L3Ri9KjINCw0LvQtNGL0L0g0LDQu9Cw0LTRiywg0LbTmdC90LUg0L7RgNCz0LDQvdC00LDRgNKT0LDQsCDQsNC50YLQsNGA0LvRi9Kb0YLQsNC5INC606nQu9C10LzQtNC1INGB0LDQu9C80LDSmyDRgtKv0YHRltGA0ZbQvywg0LfQuNGP0L3RiyDQsdC+0LvQvNCw0LnQtNGLLiDQkdCw0YHRhNC90LTQsCDQv9GO0YDQtSDQvdC10LzQtdGB0LUg0LbSsdKb0LAg0LbQsNGA0LzQsNC00LDQvSDQsdCw0YHRgtCw0L8sINC60LXQudGW0L0g0LHRltGA0YLQtSDQsdGW0YDRgtC1INKb0LDRgtGC0YvRgNCw0psg0YLQsNKT0LDQvNC00LDRgNKT0LAg0LDRg9GL0YHRgtGL0YDRgyDSsdGB0YvQvdGL0LvQsNC00YsuINKa0L7RgdGL0LzRiNCwINGC0LDQvNCw0pvRgtC/0YDQtNGLINC10LzRltC30YPQtNGW0qMg0LDQu9C00YvQvdC00LAg0LHQtdGA0LXQvNGW0LcsINGB0L7QtNCw0L0g0YHQvtKjINCw0L3QsCDRgdKv0YLRltC9INC10LzRltC30YMg0LrQtdGA0LXQuiwg0L3QtSDRgdKv0YIg0pvQvtGB0L/QsNGB0YvQvSDQsdC10YDRgyDQutC10YDQtdC6LiDQltCw0qPQsCDRgtCw0pPQsNC80LTRiyDRgtCw0qPQtdGA0YLQtdKjINC90LUg0YLSr9GB0YLQtSDQsdC10YDQtdC80ZbQtyDQtNC1LCDQutKv0L3RliDQsdC+0LnRiyDQvtGA0LPQsNC90LjQt9C8INGA0LXQsNC60YbQuNGP0YHRi9C9INCx0LDSm9GL0LvQsNC/LCDSm9Cw0LTQsNKT0LDQu9Cw0L8g0L7RgtGL0YDQsNC80YvQty4g0JDQu9C70LXRgNCz0LjRj9C70YvSmyDRgNC10LDQutGG0LjRjyDQv9Cw0LnQtNCwINCx0L7Qu9GB0LAsINC80YvRgdCw0LvRiyDSm9GL0LfQsNGA0YMsINCx06nRgNGC0L/QtSwg0pvRi9GI0YvQvdGDLCDRgtKv0YjQutGW0YDRgyDRgdC10LrRltC70LTRliwg0pvQvtGB0YvQvNGI0LAg0YLQsNKT0LDQvNC00Ysg0LHQtdGA0YPQtNGWINGC0L7Sm9GC0LDQu9GL0L8sINC00L7Sk9Cw0YDQsNC80YvQty4gINKa0L7RgdGL0LzRiNCwINGC0LDSk9Cw0LzQtNCw0YAg0LHQsNC70LDQvdGL0qMg0LTQuNC10YLQsNGB0YvQvdCw0LAg06nRgtC1INKb0LDQttC10YLRgtGWINC005nRgNGD0LzQtdC90LTQtdGAINC205nQvdC1INC80LjQvdC10YDQsNC70LTQsNGA0LzQtdC9INKb0LDQvNGC0LDQvNCw0YHRi9C3INC10YLRg9GW0L0sINC205nQvdC1INC+0YHRiyDRgtCw0pPQsNC80LTRi9KbINC30LDRgtGC0LDRgCDQsNGA0pvRi9C70Ysg0L7RgdGLINC606nRgNGB0LXRgtC60ZbRiNGC0LXRgCDQsdCw0LnRi9GC0YvQu9GD0Ysg0LrQtdGA0LXQui4g0prQvtGB0YvQvNGI0LAg0YLQsNKT0LDQvNC00LDRgNC00YvSoyDRgtCw0LfQsCDTmdGA0ZYg0pvQsNGD0ZbQv9GB0ZbQtyDQtNCw0LnRi9C90LTQsNC70YvQvywg0L7RgNCz0LDQvdC40LfQvNCz0LUg0LXRiNKb0LDQvdC00LDQuSDQtNCwINC30LjRj9C9INC60LXQu9GC0ZbRgNC80LXQudGC0ZbQvdC00ZbQs9GW0L3QtSDQutOp0Lcg0LbQtdGC0LrRltC30ZbQvyDQsNC70pPQsNC90L3QsNC9INC60LXQudGW0L0g0pPQsNC90LAg0rHRgdGL0L3Ri9C70YPRi9C9INKb0LDQvNGC0LDQvNCw0YHRi9C3INC10YLRltKj0ZbQty4g0prQsNGC0YLRiyDRgtCw0pPQsNC80LTQsNGA0LTRiyDQtdC90LPRltC30LHQtdGB0YLQtdC9INCw0LvQtNGL0L0sINOZ0YHRltGA0LXRgdC1INC80LXQtNC40YbQuNC90LDQu9GL0psg0LbQsNKT0LTQsNC50LvQsNGAINC90LUg0LHQvtC70LzQsNGB0LAg0L3TmdGA0LXRgdGC0LXQvdGW0qMg0LTQtdC90YHQsNGD0LvRi9KT0YvQvdCwINKb0LDRgtGL0YHRgtGLINGB0rHRgNCw0pvRgtCw0YAg0YLRg9GL0L3QtNCw0YHQsCwg05nRgNKb0LDRiNCw0L0g0LTTmdGA0ZbQs9C10YDQvNC10L0g0L3QtdC80LXRgdC1INC/0LXQtNC40LDRgtGA0LzQtdC9INC60LXSo9C10YHQutC10L0g0LbTqdC9LiAgICAyLiDQldC80YjQtdC6INGB0q/RgtGW0LzQtdC9INKb0L7RgNC10LrRgtC10L3QtdGC0ZbQvSDQvdOZ0YDQtdGB0YLQtdC70LXRgNC00LUuINKb0L7RgNGL0YLRi9C70LzQsNKT0LDQvSDRgtKv0LnRltGA0YjRltC60YLQtdGAINC80LXQvSDSm9GL0YjSm9GL0Lsg0LjRltGB0ZYg0LHQsNGAINGB0LDRgNGLINC205nQvdC1INCx0L7RgNC/0YvQu9C00LDSmyDQvdOZ0LbRltGBINC90LXQs9GW0LfRltC90LXQvSDQvdOZ0YDQtdGB0YLQtdC70LXRgNC00LUg0pvQsNC70YvQv9GC0Ysg0LbQsNKT0LTQsNC5INCx0L7Qu9GL0L8g0YLQsNCx0YvQu9Cw0LTRiy4gINCW05nQvdC1INC905nRgNC10YHRgtGC0LXQvdGW0qMg0LDRgdKb0L7RgNGL0YLRgyDQttKv0LnQtdGB0ZbQvdGW0qMg05nQu9GW0ZYg0LTQtSDQtNCw0LzRi9C/INC20LDRgtKb0LDQvdGL0L0g0LrTqdGA0YHQtdGC0LXQtNGWLCDRj9GP0pPQvdC4INOZ0LvRliDQtNC1INC00LDQvNGDINC/0YDQvtGG0LXRgdGWINCx0L7Qu9GL0L8g0LbQsNGC0YvRgCDQtNC10LPQvdC10L0g0YHTqdC3LiDQldC80YjQtdC6INGB0q/RgtGWINC+0qPQsNC5INOZ0YDRliDRgtC10Lcg0YHRltKj0LXQtNGWLiDQltOZ0L3QtSDQsNGB0pvQvtGA0YvRgtGD0pPQsCDQutOp0LzQtdC60YLQtdGB0LXRgtGW0L0g0YTQtdGA0LzQtdC90YLRgtC10YDQtNGWINKb0LDQvNGC0LjRgtGL0L0g0LHQvtC70YvQvyDQutC10LvQtdC00ZbRli4g0prQvtGA0YvRgtGL0LvQvNCw0pPQsNC9INGC0q/QudGW0YDRiNGW0LrRgtC10YAg0LbQsNC70L/RiyDQutC10LvQs9C10L3QtNC1INGB0q/RgiDRgdKv0LfQsdC10LvQtdGA0ZYg0LHQvtC70YvQvyDRgtCw0LHRi9C70LDQtNGLLiDQttOZ0L3QtSDRgdKv0YIg0LDSm9GD0YvQt9GL0L3Ri9KjINCw0YHSm9Cw0LfQsNC90pPQsCDQttC40L3QsNC70YPRi9C90YvSoyDQvdOZ0YLQuNC20LXRgdGWLiDSmtGL0YjSm9GL0Lsg0LjRltGBINGB0q/RgtGC0ZbSoyDRltGI0LXQutGC0LUg0LDRiNGL0YLRi9C70YPRi9C90LAg0LHQsNC50LvQsNC90YvRgdGC0YsuINCd05nRgNC10YHRgtC10L3RltKjINCw0YHSm9C+0YDRi9GC0YMg0LbSr9C50LXRgdGW0LbQtdGC0ZbQu9Cz0LXQvSDRgdCw0LnRi9C9INCx0rHQuyDQsdC10LvQs9GW0LvQtdGAINC20LDSm9GB0LDRgNCw0LTRiywg0L3TmdC20ZbRgSDRgtKv0LfRltC70LXQtNKj0rvRli4g0JXQs9C10YAg0L3TmdGA0LXRgdC1INCx0LDRgdKb0LDRiNCwINGB0LDRgyDQsdC+0LvRgdCwINC205nQvdC1INGB0LDQu9C80LDSk9GL0L0g0LDRgNGC0YLRi9GA0YHQsCwg05nQtNC10YLRgtC1INCw0LvQsNKj0LTQsNGD0LTRi9KjINGB0LXQsdC10LHRliDQttC+0psuINCV0LzRiNC10LrRgtC10YDQtNC10LPRliDTmdGA0LHRltGAINGB05nQsdC40LTRltKjINOp0Lcg0L3QvtGA0LzQsNGB0Ysg0LHQvtC70YPRiyDQvNKv0LzQutGWLCDQsdGW0YDQtdGD0LTQtSDQsdCw0YHSm9CwINC606nRgNGB0LXRgtC60ZbRiNGM0YLQtdGALCDQsdCw0YHSm9CwINCx0ZbRgNC10YPQtNC1INC80q/Qu9C00LXQvCDQsdCw0YHSm9CwMCDQtNC10LPQtdC9INGB0LjRj9Kb0YLRiy4g0KHQvtC90LTRi9Kb0YLQsNC9INGI0YvRgNGL0YjRgtGL0qMg0LDQtyDQvNOp0LvRiNC10YDRltC9LCDQutC+0LzQvtGH0LrQsNC70LDRgNC00Ysg0L3QtdC80LXRgdC1INCw0pvRiNGL0Lsg0YLSr9GB0YLQtdGA0LTRliDSm9Cw0LzRgtGD0Ysg0LzSr9C80LrRltC9LiDQodCw0YDRiyDQttCw0YHRi9C7INC905nQttGW0YEg05nQtNC10YLRgtC1INGW0YjQtdC6INC20rHQvNGL0YHRi9C9INGC0rHRgNCw0pvRgtCw0L3QtNGL0YDRgyDQvNC10L0g0LbQsNKb0YHQsNGA0YLRgyDRgdC10LrRltC70LTRliDQttOZ0L3QtSDQvtC90Ysg0LzQtdC60L7QvdC40LjQuSDSm9Cw0LvQtNGL0pvRgtCw0YDRi9C90LDQvSDRgtCw0LfQsNGA0YLRgyDQutC10LfRltC90LTQtSDQv9Cw0LnQtNCw0LAg0LHQvtC70LDQtNGLLiDQodC10LHQtdCx0ZYg0L7QvdGLINC20LjRliDTqdGC0L/QtdC70ZYg0LTQtdC/INCw0YLQsNC50LTRiy4g05jQtNC10YLRgtC1INC80rHQvdC00LDQuSDQvdOZ0LbTmdGB0YLRltKjINKb0YvRiNKb0YvQuyDQuNGW0YHRliDQttOZ0L3QtSDQsdC+0YLSm9CwINGC05nRgNGW0LfQtNGWINC60L7QvdGB0LjRgdGC0LXQvdGG0LjRj9GB0Ysg0LHQsNGALiDQkdKx0Lsg0LrQtdC30LXSoyDTmdC00LXRgtGC0LUg05nQudC10LvQtNC10YDQtNC1INGB0q/RgiDQv9Cw0LnQtNCwINCx0L7Qu9KT0LDQvdGI0LAg0YHQvtC30YvQu9Cw0LTRiy4g0JbTmdC90LUg0L7QuyDQsdCw0LvQsNC90YvSoyDSm9C+0YDQtdC60YLRltC6INC30LDRgtGC0LDRgNKT0LAg0LTQtdCz0LXQvSDSm9Cw0LbQtdGC0YLRltC70ZbQs9GW0L0g0YLQvtC70YvSmyDSm9Cw0LzRgtCw0YHRi9C3INC10YLQtSDQsNC70LzQsNC50LTRiy4g0JHQsNC70LAg0YLQvtC70YvSk9GL0LzQtdC9INC10LzRiNC10Log0YHSr9GC0ZbQvNC10L0g0YLQsNC80LDSm9GC0LDQvdGD0pPQsCDQsNGD0YvRgdKb0LDQvdC90LDQvSDQutC10LnRltC9LCDQvtC7INCx0ZbRgNGC0ZbQvdC00LXQvyDQttC10YLRltC70LPQtdC9INC905nQttGW0YEg0YLSr9C30LUg0LHQsNGB0YLQsNC50LTRiy4g0JXSoyDQtNKx0YDRi9GB0Ysg0LXQvNGI0LXQutGC0LXQs9GWINC905nQttGW0YEgMdCw0LnQtNCwINGB0LDRgNGLINC90LXQvNC10YHQtSDRgdCw0YDSk9GL0Ygg0LDQu9GC0YvQvSDRgtKv0YHRgtGWLiDQkdGW0YDRgtC10LrRgtGWINC60L7QvdGB0LjRgdGC0LXQvdGG0LjRj9C80LXQvSDQtdGA0LXQutGI0LXQu9C10L3QtdC00ZYuINCW05nQvdC1INKb0YvRiNKb0YvQuyDRgdKv0YLRgtGW0qMg0LjRltGB0ZYg0LHQvtC70YPRiyDQvNKv0LzQutGW0L0uINCa0LXQudCx0ZbRgCDQvdOZ0YDQtdGB0YLQtdC70LXRgNC00LUg0LvQsNC60YLQvtC30LDQvdGLINC606nRgtC10YDQtSDQsNC70LzQsNGDINC20LDSk9C00LDQudGLINCx0L7Qu9GD0Ysg0LzSr9C80LrRltC9LiDQkdKx0Lsg0LDRgdKb0L7RgNGL0YLRgyDQttKv0LnQtdGB0ZbQvdC00LUg0pvQuNGL0L3QtNGL0pvRgtCw0YDSk9CwINCw0LvRi9C/INC60LXQu9GW0L8sINC905nQttGW0YHRgtC1INKb0L7RgNGL0YLRi9C70LzQsNKT0LDQvSDRgtKv0LnRltGA0YjRltC60YLQtdGAINC80LXQvSDSm9GL0YjSm9GL0Lsg0LjRltGB0YLRltKjINC/0LDQudC00LAg0LHQvtC70YPRi9C90LAg0YHQtdCx0LXQvyDQsdC+0LvRg9GLINC80q/QvNC60ZbQvS4gINKw0LnSm9GLINCx0LXQt9GW0L3RltKjINCw0L3QvtGC0L7QvNC40Y/Qu9GL0psg0YTQuNC30LjQvtC70L7Qs9GP0LvRi9KbINC10YDQtdC60YjQtdC70ZbQutGC0LXRgNGW0L3QtSDQutC10LvQtdGC0ZbQvSDQsdC+0LvRgdCw0psg0JbQsNKj0LAg0YLRg9KT0LDQvSDQvdOZ0YDQtdGB0YLQtdC70LXRgNC00LUg0LTTmdC7INKx0LnSm9GLINCx0LXQt9GWINC205nQvdC1INC+0LTQsNC9INCx06nQu9C10Log0LDRgdKb0L7RgNGL0YLRgyDQvNKv0YjQtdC70LXRgNGWINGC0L7Qu9GL0psg0LTQsNC80YvQvNCw0pPQsNC9LiDSsNC50pvRiyDQsdC10LfRltC90ZbSoyDRjdC60LfQvtC60YDQuNC90LTRltC6INGB0LXQutGA0LXRhtC40Y/RgdGLINOZ0LvRliDQtNC1INOZ0LvRgdGW0LfRiSDQsdC+0LvRi9C/INGC0rHRgC4g0JDQvNC40LvQsNC30LAg0L/RgNC+0YLQtdCw0LfQsCwg0LvQuNC/0LDQt9CwINGB0LXQutGW0LvQtNGWINGE0LXRgNC80LXQvdGC0YLQtdGA0LTRltKjINCx0LXQu9GB0LXQvdC00ZbQu9GW0LPRliDRgtOp0LzQtdC9LiDQkdKx0Lsg0L3QtdCz0ZbQt9GW0L3QtdC9INKb0LDQu9GL0L/RgtGLLCDTmdGA0ZYg0L3QvtGA0LzQsCDQsdC+0LvRi9C/INGC0LDQsdGL0LvQsNC00YsuINCh0L7QvdC00YvSm9GC0LDQvSDQsNC70LDSo9C00LDQudKT0LAg0LXRiNKb0LDQvdC00LDQuSDQvdC10LPRltC3INC20L7SmyDQtNC10YHQtdC6INCx0L7Qu9Cw0LTRiy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Жауаптарында 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45" table:style-name="ce1">
            <text:p>1066845</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4g0prQvtGB0YvQvNGI0LAg0YLQsNC80LDSmyDQsdC10YDRgyDQtNC10LPQtdC90ZbQvNGW0Lcg0LHRltGA0YLRltC90LTQtdC/INCx0LDQu9Cw0pPQsCDRgdKv0YLQvNC10L0g0pvQvtGB0LAg0LHQtdC70LPRltC70ZYg0LHRltGAINGD0LDSm9GL0YLRgtCwINKb0L7RjtC70LDQvdKT0LDQvSDQttCw0qPQsCDRgtCw0pPQsNC80LTQsNGA0LTRiyDQtdC90LPRltC30YMuINKb0L7RgdGL0LzRiNCwINGC0LDQvNCw0pvRgtGLINCx0LXRgNGD0LTQtdC9INCx0rHRgNGL0L0g0LHQsNC70LDQvdGL0qMg0YLQsNKT0LDQvNKT0LAg0pvRi9C30YvSk9GD0YjRi9C70YvSmyDRgtCw0L3Ri9GC0YPRi9C9LCDQvdOZ0YDQtdGB0YLQtdC90ZbSoyDQvtGC0YvRgNCwINCw0LvQsNGC0YvQvdGL0L0sINCw0YPQt9GL0L3QsCDSm9Cw0YHRi9KbLCDRgdC+0YHQutCwINC90LXQvNC10YHQtSDQvtC50YvQvdGI0YvSmyDRgdCw0LvRgdCwINGI0LDQudC90LDQuSDQsNC70LDRgtGL0L3Ri9C90LAg0pvQsNGA0LDQvyDQsdCw0pvRi9C70LDRgyDQttCw0YHQsNGD0YvQvNGL0Lcg0LrQtdGA0LXQui4g0pvQvtGB0YvQvNGI0LAg0YLQsNC80LDSm9GC0Ysg0LHQtdGA0LPQtdC9INC60LXQt9C00LUg0L7QvdGL0qMg0LrQvtC90YHQuNGB0YLQtdC90YbQuNGP0YHRiyDQttKx0LzRgdCw0psg0LbTmdC90LUg0LbSsdGC0YPSk9CwINC+0pPQsNC5INCx0L7Qu9Cw0YLRi9C90LTQsNC5INCx0L7Qu9GDINC60LXRgNC10Log0LbTmdC90LUg0L7QvdGLINCw0Lcg0LDQt9C00LDQvyDSm9Cw0YHRi9Kb0L/QtdC9INCx0LXRgNGDINC60LXRgNC10LouIDYg0LDQudC70YvSm9GC0LDQvSDQsdCw0YHRgtCw0L8g0LHQsNC70LDQvdGL0qMg0Y3QvdC10YDQs9C40Y/Sk9CwINKb0LDQttC10YLRgtGWINKb0L7RgNC10LrRgtGW0Log0LfQsNGC0YLQsNGAINCw0L3QsNGB0YvQvdGL0qMg0YHSr9GC0ZbQvNC10L0g0YLQvtC70YvSmyDSm9Cw0LzRgtCw0LzQsNGB0YvQtyDQtdGC0LUg0LDQu9C80LDQudC00YsuINGB0L7QuyDSr9GI0ZbQvSDQvtGB0Ysg0pvQsNC20LXRgtGC0ZbQu9GW0LrRgtGWINKb0LDQvNGC0LDQvNCw0YHRi9C3INC10YLRgyDSr9GI0ZbQvSDSm9C+0YHRi9C80YjQsCDRgtCw0pPQsNC80LTQsNGAINCx0LXRgNC10LzRltC3LiDSm9C+0YHRi9C80YjQsCDRgtCw0LzQsNKb0YLRiyDQutKv0L3RltC90LUg0LHRltGAINGA0LXRgiDQsNC30LTQsNC/INKb0LDRgdGL0pvQv9C10L0g0LHQtdGA0ZbQvyDQsdCw0YHRgtCw0LnQvNGL0LcuINC10LrRltC90YjRliDQutKv0L3RliDTqdGC0LrQtdC9INC60q/QvdCz0LUg0pvQsNGA0LDSk9Cw0L3QtNCwINGB05nQuyDQutOp0L/RgtC10L8g0LHQtdGA0ZbQvywg0YHQvtC70LDQudGL0L3QsNC9INC60q/QvSDTqdGC0LrQtdC9INGB0LDQudGL0L0g0pvQsNGB0YvSm9C/0LXQvSDRgtCw0LzQsNKbINC806nQu9GI0LXRgNGW0L0g0pvQvtGB0YvQvyDQsdC10YDQtdC80ZbQty4g0LHQsNGB0YvQvdC00LAg0L/RjtGA0LUg0YHQuNGP0pvRgtGLINC20rHRgtGD0pPQsCDQvtKj0LDQuSDRgtCw0LzQsNKb0YLQsNGA0LTRiyDQsdC10YDQtdC80ZbQty4g0YHQtdCx0LXQsdGWINCx0LDQu9Cw0LvQsNGA0LTQsCDQttKx0YLRi9C90YMg0LHSsdC70YjRi9Kb0LXRgtGC0LXRgNGWINGC0L7Qu9GL0psg0LTQsNC80YvQvNCw0pPQsNC90LTRi9Kb0YLQsNC9INKb0LjRi9C90LTRi9KbINGC0q/RgdGW0YDQvNC10LnRgtGW0L0g0YLQsNKT0LDQvNC00LDRgNC00Ysg0LHQtdGA0LXQvNGW0LcuINKb0L7RgdGL0LzRiNCwINGC0LDQvNCw0pvRgtGLINC10LzRltC30YPQtNGW0qMg0LDQu9C00YvQvdC00LAg0LHQtdGA0LXQvNGW0LcuINGB0L7QtNCw0L0g0YHQvtKjINCw0L3QsCDQtdC80ZbQt9C10LTRli4g0pvQvtGB0YvQvNGI0LAg0YLQsNC80LDSm9GC0Ysg0YLQsNKj0LXRgNGC0LXSoyDQvdC10LzQtdGB0LUg0YLSr9GB0YLQtSDQsdC10YDRgyDQutC10YDQtdC6LiDRgtCw0LzQsNKbINCx0LXRgNCz0LXQvSDQutC10LfQtNC1INCx0LDQu9Cw0L3Ri9KjINGA0LXQsNC60YbQuNGP0YHRi9C9INCx0LDSm9GL0LvQsNC50LzRi9C3LiDQtdCz0LXRgCDQsdCw0LvQsNC00LAg0YLQsNC80LDSm9Kb0LAg0LTQtdCz0LXQvSDRgtC10YDRltGBINGA0LXQsNC60YbQuNGP0L3RiyDQsdCw0LnSm9Cw0YHQsNKbINC80YvRgdCw0Lsg0YDQtdGC0ZbQvdC00LUg0YLQtdGA0ZbRgdGW0L3QtNC1INCx06nRgNGC0L/QtdC70LXRgCwg0L3TmdC20ZbRgdGW0L3QtNC1INOp0LfQs9C10YDRltGB0YLQtdGAINCx0L7Qu9GB0LAg0LTQtdGA0LXRgyDRgtCw0LzQsNKbINCx0LXRgNGD0LTRliDRgtC+0pvRgtCw0YLRgyDQutC10YDQtdC6LiDSm9C+0YHRi9C80YjQsCDRgtCw0LzQsNKbINKb0rHRgNCw0LzRi9C90LTQsCDQutOp0LrTqdC90ZbRgdGC0LXRgCwg0LbQtdC80ZbRgdGC0LXRgCwg0YLSr9GA0LvRliDQv9Cw0LnQtNCw0LvRiyDQstC40YLQsNC80LjQvdC00LXRgCwg0LzQuNC60YDQvtGN0LvQtdC80LXQvdGC0YLQtdGALCDQvNC40L3QtdGA0LDQu9C00LDRgCDQsdC+0LvQsNC00YsuINKb0L7RgdGL0LzRiNCwINGC0LDSk9Cw0LzQtNCw0YAg0YLQsNC30LAsINC205nQvdC1INCx0LXRgNGDINC60LXQt9GW0L3QtNC1INGC0LDQt9Cw0LvRi9Kb0YLRiyDRgdCw0pvRgtCw0YMg0LrQtdGA0LXQui4g0YHQtdCx0LXQsdGWINCx0LDQu9CwINC+0YDQs9Cw0L3QuNC30LzRliDTmdC70ZYg0YLQvtC70YvSmyDQttC10YLRltC70LzQtdCz0LXQvdC00ZbQutGC0LXQvSDQuNC90YTQtdC60YbQuNGP0LvQsNGA0LTRiyDRgtC10Lcg0LbSsdKb0YLRi9GA0YvQvyDQsNC70YPRiyDQvNKv0LzQutGW0L0uINGB0L7QvdC00YvSm9GC0LDQvSDSm9C+0YHRi9C80YjQsCDRgtCw0LzQsNKbINCx0LXRgNGDINCw0LvQtNGL0L0g0L/QtdC00LjQsNGC0YDQvNC10L0g0LDSm9GL0LvQtNCw0YHRi9C/LCDRgtC+0LvRi9KbINCw0pvQv9Cw0YDQsNGCINCw0LvRgyDQutC10YDQtdC6LiDQutOp0LrTqdC90ZbRgSDQv9GO0YDQtdGB0ZbQvdC10L0g0LHQsNGB0YLQsNGB0LAg0LHQvtC70LDQtNGLINC+0Lsg0LbSsdGC0YPSk9CwINC+0pPQsNC5INC205nQvdC1INKb0rHRgNCw0LzRi9C90LTQsCDQv9Cw0LnQtNCw0LvRiyDSm9C+0YDQtdC60YLRltC6INC30LDRgtGC0LDRgNGLINC606nQvyDSm9C+0YHRi9C80YjQsCDRgtCw0pPQsNC8LiDQutOp0LHRltC90LXRgdC1INC00LDQudGL0L0g0LHQvtC70YvQvyDRhNCw0LHRgNC40LrQsNGC0YLRi9KbINOp0L3RltC80LTQtdGAINCx0L7Qu9GL0L8g0YHQsNGC0YvQu9Cw0LTRiy4g0L3QtdC80LXRgdC1INC+0L3RiyDQsNC90LDRgdGLINOp0Lcg0pvQvtC70YvQvdCw0L0g0LTTmdGA0ZbQs9C10YDQtNGW0qMg0L3SsdGB0pvQsNGD0LvRi9C70YvSk9GL0LzQtdC9INC20LDRgdCw0YHQsCDQsdC+0LvQsNC00YsuIDxiciAvPg0KMi4gMSDQsNC50LvRi9KbINCx0LDQu9CwINC20LDSo9CwINGC0YPRi9C70pPQsNC9INC905nRgNC10YHRgtC1INCx0L7Qu9GL0L8g0YHQsNC90LDQu9Cw0LTRiy4g0YHTmdC50LrQtdGB0ZbQvdGI0LUg0L7Qu9Cw0YDQtNGL0qMg0L7RgNCz0LDQvdC40LfQvNGWINOZ0LvRliDRgtC+0LvRi9KbINC00LDQvNGL0L8g0LbQtdGC0ZbQu9C80LXQs9C10L0uINCx0LDQu9Cw0LTQsCDQtdC80ZbQt9Cz0LXQvSDQutC10LfQtNC1INCw0L3QsCDRgdKv0YLRliDSm9Kx0YDQsNC80YvQvdC00LAg0LDRgdGC0Ysg0pvQvtGA0YvRgtGD0pPQsCDQutOp0LzQtdC60YLQtdGB0LXRgtGW0L0g0YTQtdGA0LzQtdC90YLRgtC10YAg0LzQtdC9INC/0LDQudC00LDQu9GLINC80LjQutGA0L7RhNC70L7RgNCw0L3RiyDSm9Cw0LvRi9C/0YLQsNGB0YLRi9GA0YPSk9CwINC606nQvNC10LrRgtC10YHQtdGC0ZbQvSDQv9Cw0LnQtNCw0LvRiyDQsdCw0LrRgtC10YDQuNGP0LvQsNGALCDSm9C+0YDQtdC60YLRltC6INC30LDRgtGC0LDRgCDQsdC+0LvQsNC00YsuINCx0LDQu9Cw0L3Ri9KjINC905nQttGW0YHRltC90LTQtSDQsNC90YvSm9GC0LDQu9KT0LDQvSDSm9C+0YDRi9GC0YvQu9C80LDSk9Cw0L0g0YLSr9C50ZbRgNGI0ZbQutGC0LXRgCDRgdKv0YIg0YHSr9C30LHQtdC70LXRgNGWINCx0L7Qu9GL0L8g0YLQsNCx0YvQu9Cw0LTRiy4g0LHSsdC7INGE0LjQt9C40L7Qu9C+0LPQuNGP0LvRi9KbINC20LDSk9C00LDQuSDQsdC+0LvRi9C/INGC0LDQsdGL0LvQsNC00YsuINGP0pPQvdC4INGB0q/RgiDRgdGW0qPQsdC10Lkg0LDRgdKb0LDQt9Cw0L3QtNCwINCx0ZbRgCDQsdGW0YDRltC90LUg0LbQsNCx0YvRgdGL0L8sINC20LjQvdCw0LvRi9C/INKb0LDQu9Cw0LTRiy4g0pvRi9GI0pvRi9C7INC40ZbRgSDRgdC+0Lsg0YHSr9GC0YLRltKjINCw0YHSm9Cw0LfQsNC90LTQsCDQsNGI0YPRi9C90LAg0LHQsNC50LvQsNC90YvRgdGC0Ysg0L7RgNGL0L0g0LDQu9GL0L8g0YLSsdGALiDQvdOZ0YDQtdGB0YLQtdC90ZbSoyDQsNGB0pvQvtGA0YvRgtGDINC20q/QudC10YHRliDRgtC+0LvRi9KbINC00LDQvNGL0LzQsNKT0LDQvdC00YvSm9GC0LDQvSDQsdC+0LvRi9C/INGC0rHRgC4g0LHQsNC70LAg06nRgdC1INC60LXQu9C1INCw0YHSm9C+0YDRi9GC0YMg0LbSr9C50LXRgdGWINC20LDSm9GB0Ysg0LTQsNC80Lgg0LHQsNGB0YLQsNKT0LDQvdC00LAg0LHSsdC7INCx0LXQu9Cz0ZbQu9C10YAg0L/QsNC50LTQsCDQsdC+0LvRg9GLINGC0L7Sm9GC0LDQudC00YsuINGB0LDQvy3RgdCw0YDRiyDQttCw0YHRi9C7INC905nQttGW0YEg05nQtNC10YLRgtC1INGW0YjQtdC6INC20rHQvNGL0YHRi9C9INGC0rHRgNCw0pvRgtCw0L3QtNGL0YDRgyDQttOZ0L3QtSDQvNC10LrQvtC90LjQuSDSm9Cw0LvQtNGL0pvRgtCw0YDRi9C90LDQvSDRgtCw0LfQsNGA0YLRgyDQutC10LfRltC90LTQtSDQv9Cw0LnQtNCwINCx0L7Qu9Cw0LTRiy4g0LXQs9C10YAg0LHQsNC70LAg0YLQtdC3INGC0LXQtyDQtdC80YHQtSDRgdKv0YLRgtGW0qMg0LDRgdKb0LDQt9Cw0L3Sk9CwINGC0LXQtyDRgtKv0YHRltC/LCDRgtC+0LvRi9KbINKb0L7RgNGL0YLQsCDQsNC70LzQsNC5INCw0YHSm9Cw0LfQsNC90LTQsNKT0Ysg0L/QtdC/0YHQuNC90L3RltKjINOZ0YHQtdGA0ZbQvdC10L0g0pvRi9GI0pvRi9C70LTQsNC90YvQvywg0LDRiNC40LTRiy4g0L7QuyDQtNCwINGD0LDSm9GL0YIg06nRgtC1INC60LXQu9C1INC20L7QudGL0LvQsNC00YsuINKx0LnSm9GLINCx0LXQt9GWINC20LDSo9CwINGC0YPSk9Cw0L0g0L3TmdGA0LXRgdGC0LXQu9C10YDQtNC1INGC0L7Qu9GL0psg0LbQtdGC0ZbQu9C80LXQs9C10L0g0LHQvtC70LDQtNGLINGB0L7QvdC00YvSm9GC0LDQvSDTqdC30ZbQvdGW0qMg0YTRg9C90LrRhtC40Y/RgdGL0L0g0YLQvtC70YvSmyDQsNGC0pvQsNGA0LAg0LDQu9C80LDQudC00YsuINC+0LTQsNC9INCx06nQu9GW0L3QtdGC0ZbQvSDRgdOp0LvQtNGW0qMg0pvSsdGA0LDQvNGL0L3QtNCw0pPRiyDRhNC10YDQvNC10L3RgtGC0LXRgNGWINCw0Lcg0LbTmdC90LUg0LHQtdC70YHQtdC90YHRltC3LCDQsdC40LrQsNGA0LHQvtC90LDRgtGC0Ysg0YHSsdC50YvSmyDQsdOp0LvRltCz0ZYg0LrTqdC/INCx0L7Qu9Cw0LTRiyDQtNCwINC+0L0g0LXQutGWINC10LvRliDRltGI0LXQutC60LUg0LHTqdC70ZbQvdCz0LXQvdC00LUg05nRgdC10YDRliDRgtOp0LzQtdC9INCx0L7Qu9Cw0LTRiy4g0L3TmdGC0LjQttC10YHRltC90LTQtSDQsNC90LAg0YHSr9GC0ZYg0pvSsdGA0LDQvNGL0L3QtNCw0pPRiyDQsdC10LvQvtC60YLQsNGAINC/0L7Qu9C40YHQsNGF0LDRgNC40LTRgtC10YAg0LzQsNC50LvQsNGA0LTRiyDRi9C00YvRgNCw0YLRgyDSm9C40YvQvdKT0LAg0YHQvtKT0LDQtNGLLiDQttCw0qPQsNKT0Ysg0YLSr9C30ZbQu9Cz0LXQvSDSm9C+0YDRi9GC0YvQu9C80LDSk9Cw0L0g0YHSr9GCINGC0q/QudGW0YDRiNGW0LrRgtC10YDRltC90LUg0pvQvtGB0LAg0YLQvtC70YvSmyDRgdGW0qPQsdC10LPQtdC9INKb0L7RgNGL0YLRi9C70LzQsNKT0LDQvSDSm9C+0YDQtdC60YLRliDQt9Cw0YLRgtCw0YAg0LTQsCDSm9C+0YHRi9C70LDQtNGLLiAgMSDQsNC50LvRi9KbINCx0LDQu9CwINOZ0LvRliDQutGW0YjQutC10L3RgtCw0Lkg0YLQtdC6INKb0LDQvdCwINCw0L3QsCDRgdKv0YLRltC80LXQvSDSm9C+0YDQtdC60YLQtdC90LXRgtGW0L3QtNGW0LrRgtC10L0g0LrQtdC50ZbQvdC90LXQvSDQvNGL0YHQsNC70YsgNiDQsNC50LvRi9KT0YvQvdCw0L0g0LHQsNGB0YLQsNC/INKb0L7RgdGL0LzRiNCwINGC0LDSk9Cw0LzQtNCw0YDQtNGLINCx0LXRgNCz0LXQvSDQutC10LfQtNC1INC00LUg0L7RgdGLINC20LDSk9C00LDQudC00Ysg0LHQsNC50pvQsNC70YPRiyDQvNKv0LzQutGW0L0uINC+0Lsg05nRgCDQsdCw0LvQsCDQvtGA0LPQsNC90LjQt9C80ZbQvdC1INCx0LDQudC70LDQvdGL0YHRgtGLLiDQtdCz0LXRgNC00LUg0rHQudKb0Ysg0LHQtdC30ZYg0LbQsNKb0YHRiyDQtNCw0LzRi9GB0LAg0L7Qu9Cw0YDQtNCw0L0g0LHTqdC70ZbQvdC10YLRltC9INGE0LXRgNC80LXQvdGC0YLQtdGA0LTRltKjINC00LUg0pvRi9C30LzQtdGC0ZYg0LbQvtKT0LDRgNGL0LvQsNC50LTRiy4g0YHQvtC90LTRi9Kb0YLQsNC9INC00LAg0LHQsNC70LDQtNCwINC905nQttGW0YHRliDQsdC+0YLSm9CwINGC05nRgNGW0LfQtNGWINKb0YvRiNKb0YvQu9GC0YvQvCDQuNGW0YHRgtGWINKb0L7RgNGL0YLRi9C70LzQsNKT0LDQvSDRgtKv0LnRltGA0YjRltC60YLQtdGAINC/0LDQudC00LAg0LHQvtC70LDQtNGLLiDRgdC+0L3Ri9C80LXQvSDSm9Cw0YLQsNGAINKx0LnSm9GLINCx0LXQt9GW0LzQtdC9INKb0L7RgdCwINOp0YLRgtGW0qMg0LbQsNC70L/RiyDRgtKv0YLRltCz0ZYg0LDRiNGL0LvQsNGC0YvQvSDQsdC+0LvSk9Cw0L3QtNGL0pvRgtCw0L0g06nRgtGC0ZbSoyDQtNC1INCx06nQu9GW0L3Rg9GWINOZ0LvRliDQtNKx0YDRi9GBINC10LzQtdGBLCDTqdC3INKb0YvQt9C80LXRgtGW0L0g05nQu9GWINC00rHRgNGL0YEg0LbQsNGB0LDQuSDQsNC70LzQsNC50LTRiy4g0YHQtdCx0LXQsdGWINOp0YIg0LvQuNC/0LDQt9Cw0L3RiyDQsdC10LvRgdC10L3QtNGW0YDQtdC00ZYuINGB0L7QvdC00YvSm9GC0LDQvSDQtNCwINC80LDQudC70LDRgNC00YvSoyDRi9C00YvRgNCw0YPRiyDRgtC+0LvRi9KbINCx0L7Qu9C80LDRg9GLINC80q/QvNC60ZbQvS4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Бірінші сұрактын жауабында 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53" table:style-name="ce1">
            <text:p>1066853</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DRiNGWINGB0rHRgNCw0pstINKa0L7RgdGL0LzRiNCwINGM0YLQsNKT0LDQvCDQtNC10LPQtdC90ZbQvNGW0Lcg0LXQvNGI0LXQuiDRgdKv0YLRliDQvNC10L0g0L3QtdC80LXRgdC1INC20LDRgdCw0L3QtNGL0LvRi9Kb0L/QtdC9INGC0LDQvNCw0pvRgtCw0L3QtNGL0YDRi9C70LDRgtGL0L0g0LHQsNC70LDQvdGL0qMg0pvQvtGB0YvQvNGI0LAg0pvQvtGA0LXQuiDQsNC70LDRgtGL0L0g0YLQsNKT0LDQvNC00LDRgNGLLiDSmtC+0YHRi9C80YjQsCDRgtCw0pPQsNC80LTQsNGAINGC0LXQuiDQtdC80YjQtdC6INGB0q/RgtGW0LzQtdC9INC20LDRgdCw0L3QtNGL0LvRi9Kb0YLRiyDRgtC+0LvRi9Kb0YLRi9GA0LzQsNC50LTRiywg0YHQvtC90YvQvNC10L0g0pvQsNGC0LDRgCDQsdCw0LvQsNC90YvSoyDQsNKT0LfQsNGB0YvQvSDQttCw0L3QsCDSm9C+0YDQtdC60YLRltC6INC30LDRgtGC0LDRgNC80LXQvSDSm9Cw0LzRgtCw0LzQsNGB0YvQtyDQtdGC0YPQs9C1INC606nQvNC10LrRgtC10YHQtdC00ZYsINOZ0YHRltGA0LXRgdC1IDYg0LDQudC00LDQvSDQutC10LnRltC9LCDRgdC10LHQtdCx0ZYg0L7RgdGLINC20LDRgdGC0LAg0LHQsNC70LDQvdGL0L0g0YHSr9GC0YLRliDSm9C+0YDQtdC60LrQtSDQtNC10LPQtdC9INKb0LDQttC10YLRgtGW0LvRltCz0ZYg0LHRltGA0YjQsNC80LAg0LDRgNGC0LDQtNGLINC205nQvdC1INC+0L3Ri9KjINC00LDQvNGD0Ysg0q/RiNGW0L0g0LHQsNGB0pvQsCDSm9C+0YDQtdC6INC606nQt9C00LXRgNGWINKb0LDQttC10YIg0LHQvtC70LDQtNGLLiDSmtC+0YHRi9C80YjQsCDRgtCw0pPQsNC80LTQsNGA0LTRiyDQtdKj0LPRltC30YM7MSDRiNGWINKb0L7RgdGL0LzRiNCwINGC0LDSk9Cw0LzQtNCw0YDQtNGLIDYg0LDQudC00LDQvSDQsdCw0YHRgtCw0L8g0LXQvdCz0ZbQt9GDINKx0YHRi9C90YvQu9Cw0LTRiy4gNiDQsNC50pPQsCDQtNC10LnRltC9INGC0LXQuiDQtdC80YjQtdC6INGB0q/RgtGWINC90LXQvNC10YHQtSDRgtC10Log0LbQsNGB0LDQvdC00Ysg0YHSr9GCINC20LXRgtC60ZbQu9GW0LrRgtGWLiAyINGI0ZYgLSA2INCw0LnQtNCw0L0g0LHQsNGB0YLQsNC/INCx0LDQu9Cw0L3Ri9KjINCw0pPQt9Cw0YHRiyDQttCw0qPQsCDRgtCw0pPQsNC80LTRiyDSm9Cw0LHRi9C70LTQsNGD0pPQsCDQtNCw0LnRi9C9INCx0L7Qu9Cw0LTRiywg0q/QudGC0LrQtdC90ZYg0L7QvdGL0qMg0LDRgSDSm9C+0YDRi9GC0YMg0LbSr9C50LXRgdGWINC00LDQvNGDINGB0LDRgtGL0YHRi9C90LTQsCDQsdC+0LvRi9C/LCDSm9Cw0LbQtdGC0YLRliDRhNC10YDQvNC10L3RgtGC0LXRgNC00ZYg0YjRi9KT0LDRgNCwINCw0LvQsNC00YsuMy3SmtC+0YHRi9C80YjQsCDRgtCw0pPQsNC80LTQsNGA0LTRiyDQsdGW0YDRgtGW0L3QtNC10L8g0LXSo9Cz0ZbQt9GDINC60LXRgNC10LouINCR0ZbRgNGW0L3RiNGWINGC0LDSk9Cw0LzQtNGLIDEsMiDSm9Cw0YHRi9Kb0YLQsNC9INCx0LDRgdGC0LDQvdGL0LcsINOZ0YDRliDSm9Cw0YDQsNC5INC806nQu9GI0LXRgNGW0L0g0LDRgNGC0YLRi9GA0YMg0LDRgNKb0YvQu9GLINCx0LDQu9Cw0L3Ri9KjINCw0pPQt9Cw0YHRi9C90YvSoyDQttCw0qPQsCDRgtCw0pPQsNC80LTRiyDSm9Cw0LHRi9C70LTQsNGDINKb0LDQsdGW0LvQtdGC0ZbQvSDQsdCw0LnSm9Cw0YPSk9CwINCx0L7Qu9Cw0LTRiy4gNC3QkdGW0YAg0LbQsNKj0LAg0YLQsNKT0LDQvNC00Ysg0LrQtdC8INC00LXQs9C10L3QtNC1IDMsNSDQutKv0L0g0LHQvtC50Ysg0LHQsNKb0YvQu9Cw0L8sINCw0LvQu9C10YDQs9C40Y/Qu9GL0psg0YDQtdCw0LrRhtC40Y/Qu9Cw0YAg0LbTmdC90LUg0LHQsNGB0pvQsCDQttCw0pPRi9C80YHRi9C3INOZ0YHQtdGA0LvQtdGA0LTRltKjINC20L7Sm9GC0YvSk9GL0L3QsCDQutOp0Lcg0LbQtdGC0LrRltC30YMg0LrQtdGA0LXQui4gNS3QkNC70pPQsNGI0pvRiyDRgtCw0pPQsNC8INGA0LXRgtGW0L3QtNC1INC606nQutC10L3RltGBINC/0Y7RgNC10YHRliDQvNGL0YHQsNC70Ysg0LDRgdKb0LDQsdCw0psgLCDRgdOZ0LHRltC3LCDQutCw0YDRgtC+0L8g0L3QtdC80LXRgdC1INC20q/Qs9C10YDRliDQttOZ0L3QtSDQutKv0YDRltGIINC20LDRgNC80LDQu9Cw0YDRi9C90YvSoyDQv9GO0YDQtdGB0ZYg0rHRgdGL0L3Ri9C70LDQtNGLLiDQkdKx0Lsg0YLQsNKT0LDQvNC00LDRgCDQsdCw0LvQsNC90YvSoyDQsNGB0pvQsNC30LDQvdGL0qMg0LDRg9GL0YDQu9Cw0YLQv9Cw0LnQtNGLLCDQvtKj0LDQuSDRgdGW0qPQtdC00ZYg0LbTmdC90LUg0LDQu9C70LXRgNCz0LjRj9C70YvSmyDRgNC10LDQutGG0LjRj9C70LDRgCDRgtGD0YvQvdC00LDRgtC/0LDQudC00YsuNi3QldC60ZbQvdGI0ZYg0LrQtdC30LXQvdCz0LUg0LXRgiAsINCx0LDQu9GL0pssINC20LXQvNGW0YHRgtC10YAsINGB0q/RgiDTqdC90ZbQvNC00LXRgNGWINGB0LjRj9Kb0YLRiyDRgtCw0pPQsNC80LTQsNGAINC10qPQs9GW0LfRltC70LXQtNGWLiA3LdKb0L7RgdGL0LzRiNCwINGC0LDSk9Cw0LzQtNCw0YDQtNGLINC/0ZbRgdGW0YDRltC70LPQtdC9INC/0Y7RgNC1INGC0q/RgNGW0L3QtNC1INCx0LXRgNGDINC60LXRgNC10LosINCx0LDQu9Cw0L3Ri9KjINC20LDRgdGLINC80LXQvSDQtNCw0pPQtNGL0LvQsNGA0YvQvdCwINGB0LDQuSDRgtCw0pPQsNC80L3Ri9KjINGC0LXQutGB0YLRg9GA0LDRgdGL0L0g06nQt9Cz0LXRgNGC0YPQs9C1INCx0L7Qu9Cw0LTRiyAv0LzRi9GB0LDQu9GLLCA2INCw0LnQtNCwINC60LXQvdC40YDQu9C40Log0LrRltGI0LrQtdC90LUg0pvRi9GA0YLRi9GBLCDQvdC10LzQtdGB0LUg0rHRgdCw0psg0LrQtdGB0LXQutGC0LXRgCDRgtKv0YDRltC90LTQtS8uOC3QltCw0qPQsCDRgtCw0pPQsNC80LTRiyDQsNC70pPQsNGIINGA0LXRgiDQtdKj0LPRltC30LPQtdC90LTQtSDQsNC70LvQtdGA0LPQuNGP0LvRi9KbINGA0LXQsNC60YbQuNGP0LvQsNGAINCx0LXQu9Cz0ZbQu9C10YDRltC9INCx0LDSm9GL0LvQsNGDINKb0LDQttC10YIgL9GC0LXRgNGWINCx06nRgNGC0L/QtdGB0ZYsINKb0YvRiNGL0L3Rgywg0LTQuNCw0YDQuNGPLCDSm9Kx0YHRgy8uIDkt0prQvtGB0YvQvNGI0LAg0YLQsNKT0LDQvCDRgdKv0YLRgtGWINCw0LvQvNCw0YHRgtGL0YDQvNCw0LnQtNGLLiDQkdCw0LvQsNC90YvSoyDQvdC10LPRltC30LPRliDSm9C+0YDQtdCz0ZYg05nQu9GWINC00LUg0LXQvNGI0LXQuiDRgdKv0YLRliDQvdC10LzQtdGB0LUg0LbQsNGB0LDQvdC00Ysg0YHSr9GCINCx0L7Qu9GL0L8g0YLQsNCx0YvQu9Cw0LTRiy4gMTAtINKb0L7RgdGL0LzRiNCwINGC0LDSk9Cw0LzQtNCw0YDQtNGLINCx0LDQu9Cw0L3Ri9KjINCw0Ygg0LHQvtC70pPQsNC9INGD0LDSm9GL0YLRi9C90LTQsCwg0YHSr9GCINC10LzRltC30LPQtdC9INC60q/QudGWINCx0LXRgNCz0LXQvSDQtNKx0YDRi9GBLiDQkdKx0Lsg0LHQsNC70LDQvdGL0qMg0LbQsNKj0LAg0YLQsNKT0LDQvNC00Ysg0pvQsNCx0YvQu9C00LDRg9KT0LAg0pvRi9C30YvSk9GD0YjRi9C70YvSk9GL0L0g0LDRgNGC0YLRi9GA0LDQtNGLLiAxMS3QkdCw0LvQsNC90Ysg05nRgCDQutKv0L3RliDQsdGW0YAg0YPQsNKb0YvRgtGC0LAg0YLQsNC80LDSm9GC0LDQvdC00YvRgNGDLCDRgdKv0YLQv9C10L0g0LHRltGA0LPQtSDQttOZ0L3QtSDQttCw0qPQsCDRgtCw0pPQsNC80LzQtdC9INGC0LDQvdGL0YHRgyDQv9GA0L7RhtC10YHRltC9INGB05nQuyDRgdC+0LfRgyDQvNCw0qPRi9C30LTRiy4g05jRgCDRgtCw0pPQsNC8INC20LDSo9CwINC60q/QvdC90ZbSoyDTqdC30ZbSo9C00LUg0pPQsNC90LAg0LXSo9Cz0ZbQt9GW0LvRg9GWINC60LXRgNC10LouINKa0L7RgdGL0LzRiNCwINGC0LDSk9Cw0LzQtNCw0YDQtNGL0L0g0YLSr9GA0LvQtdGA0ZY6INC606nQutC10L3RltGBINC/0Y7RgNC10YHRliAv0YHTmdCx0ZbQtyzQsNGB0pvQsNCx0LDSmywg0LrQsNGA0YLQvtC/ICwg0LHRgNC+0LrQvtC70LgvLCDQttKv0LPQtdGA0ZYg0LrSr9GA0ZbRiCDQttCw0YDQvNCw0LvQsNGA0YssINC10YIg0L3QtdC80LXRgdC1INCx0LDQu9GL0psg0L/RjtGA0LXRgdGWLCDQttC10LzRltGB0YLQtdGAIC/QsNC70LzQsCzQsdCw0L3QsNC9LNCw0LvQvNKx0YDRgi8sINGB0q/RgiDTqdC90ZbQvNC00LXRgNGWIC3QudC+0LPRg9GA0YIs0YHSr9C30LHQtSwg0LrQtdGE0LjRgC04LDkg0LDQudC00LDQvSDQsdCw0YHRgtCw0L8uINKa0L7RgNGC0YvSo9C00Ys60prQvtGB0YvQvNGI0LAg0YLQsNKT0LDQvNC00LDRgNC00Ysg0LXQvdCz0ZbQt9GDIDYg0LDQudC00LDQvSDQsdCw0YHRgtCw0L8g0YHTmdCx0LjQtNGW0qMg06nRgdGW0L8g0LTQsNC80YPRiyDSr9GI0ZbQvSDQvNCw0qPRi9C30LTRiyDQutC10LfQtdKjINCx0L7Qu9GL0L8g0YLQsNCx0YvQu9Cw0LTRiy4g0JHSsdC7INC60LXQt9C10qPQtNC1INKb0L7RgdGL0LzRiNCwINGC0LDSk9Cw0LzQtNCw0YDQtNGLIDEg0LrSr9C90LTQtdC/INC205nQvdC1INC00rHRgNGL0YEg0YLTmdGA0YLRltC/0L/QtdC9INC10qPQs9GW0LfRgyDSm9Cw0LbQtdGCLCDRgdC+0L3QtNCw0LnQsNKbINOZ0YAg0LbQsNKj0LAg0YLQsNKT0LDQvNC00Ysg0LXSo9Cz0ZbQt9Cz0LXQvSDQutC10LTQtSDQsNC70LvQtdGA0LPQuNGPINC90LXQvNC10YHQtSDQsdCw0YHSm9Cw0LTQsCDQttCw0pPRi9C80YHRi9C3INOZ0YHQtdGA0LvQtdGA0LTRliDQsdCw0pvRi9C70LDRgyDQutC10YDQtdC6LiAyINGI0ZYg0YHSsdGA0LDSmy0gMSDQsNC50LvRi9KbINGB05nQsdC40LTRltKjINGB0LDRgNGLLCDQsdC+0YLSm9CwINGC05nRgNGW0LfQtNGWINC905nQttGW0YHRliDQttOZ0L3QtSDSm9GL0YjSm9GL0Lsg0pvQvtGA0YLRi9C70LzQsNKT0LDQvSDRgtKv0LnRltGA0YjRltC60YLQtdGA0ZYg0YTQuNC30LjQvtC70L7Qs9C40Y/Qu9GL0psg0LbQsNKT0LTQsNC5INCx0L7Qu9GL0L8g0YLQsNCx0YvQu9Cw0LTRiy4g0K/Sk9C90Lgg0LHSsdC7INC905nRgNC10YHRgtC10L3RltKjINCw0YEg0pvQvtGA0YvRgtGDINC20q/QudC10YHRltC90ZbSoyDSm9Cw0LvRi9C/0YLRiyDQttKv0LnQtdGB0LjQvSDQutC+0YDRgdC10YLQtdC00ZYu0KLQsNCx0LjSk9C4INGC0LDQvNCw0pvRgtCw0L3Rg9C80LXQvSDSm9C+0YDQtdC60YLQtdC90LXRgtGW0L0g0LHQsNC70LDQu9Cw0YDQtNCwINC80rHQvdC00LDQuSDQvdOZ0LbRltGBINGC0q/RgNGWINC20LjRliDQutC10LfQtNC10YHQtdC00ZYuINCV0LzRiNC10Log0YHSr9GC0ZbQvNC10L0g0pvQvtGA0LXQutGC0LXQvdC10YLRltC9INGP0pPQvdC4INGC0LDQsdC40pPQuCDRgtCw0LzQsNKb0YLQsNC90YPQtNCwINKb0L7RgNGC0YvQu9C80LDSk9Cw0L0g0LrQtdGB0LXQutGC0LXRgNC80LXQvSDRgdCw0YDRiyDQsdC+0LvRg9GLLiDQkdKx0Lsg0YLQsNCx0LjSk9C4INGC0LDQvNCw0pvRgtCw0L3Rg9C00LAg0LbTmdC90LUg0LTQtSDRgdKv0YLRgtGW0L0g0pvSsdGA0LDQvNGL0L3QtNCw0pPRiyDQttCw0LvQv9GLINGC0LDSk9Cw0LzQtNCw0YDQtNGL0L0g0LzQsNC50LvQsNGAINC80LXQvSDQsNKb0YPRi9C30LTQsNGA0LTRi9C9INGC0L7Qu9GL0psg0YHRltKj0LHQtdGD0ZbQvNC10L0g0YTQtdGA0LzQtdC90YLRgtC10YDQtNGW0qMg0LHQsNC70LDQvdGL0L0g0LDRgdKb0LDQt9Cw0L3Ri9C90LTQsCDQttOZ0L3QtSDRltGI0LXQutGC0LXRgNGW0qPQtNC1INC+0L3QtNC10LvRg9C80LXQvSDQsdCw0LnQu9Cw0L3Ri9GB0YLRiy7QldC80YjQtdC6INGB0q/RgtGW0L3QtNC1INC70LDQutGC0L7Qt9CwINC606nQvyDQsdC+0LvSk9Cw0L3QtNGL0pvRgtCw0L0sINC60LXQudCx0ZbRgCDRgdOZ0LHQuNC70LXRgNC00LUg0L7QvdGL0qMg0YLQvtC70YvSk9GL0LzQtdC9INKb0L7RgNGL0YLRi9C70YPSk9CwINKb0LDQttC10YLRgtGWINGE0LXRgNC80LXQvdGC0YLQtdGAINC20LXRgtC60ZbQu9GW0LrRgdGW0Lcg0LHQvtC70YPRiyDQvNKv0LzQutGW0L0uINCd05nQttGW0YHRgtGW0qMg0pvSsdGA0LDQvNGL0L3QtNCwINGB0q/RgtGC0ZbQvSDQvNCw0LnQu9Cw0YDRiyDQvNC10L0g0YHSsdC50YvSmyDQsdOp0LvRltC80ZYg0LHQvtC70pPQsNC90LTRi9Kb0YLQsNC9LCDQvtC7INC20LjRliDQttKx0LzRgdCw0psg0LHQvtGC0pvQsCDRgtOZ0YDRltC30LTRliDQsdC+0LvQsNC00YsuINCe0Lsg0LrTqdCx0ZbQvdC1INC+0YHRiyDRgtCw0LHQuNKT0Lgg0YLQsNKT0LDQvNC00LDRgNC00Ysg0pvQsNCx0YvQu9C00LDRgyDTmdGB0LXRgNGW0L3QtdC9LiDSmtGL0YjSm9GL0Lsg0LjRltGBLdCx0rHQuyDRgtCw0LHQuNKT0Lgg0YLQsNC80LDSm9GC0LDQvdGD0LTQsCDRgdKv0YLRgtKj0L0g0pvQsNC70YvQv9GC0Ysg0YTQtdGA0LzQtdC90YLQsNGG0LjRj9GB0YvQvdGL0qMg0LHQtdC70LPRltGB0ZYuINKa0L7RgNGL0YLRi9C70LzQsNKT0LDQvSDRgtKv0LnRltGA0YjRltC60YLQtdGA0LTQtSAg0LbQuNGWINC60LXQt9C00LXRgdC10YLRltC9INKb0rHQsdGL0LvRi9GBINGB0LXQsdC10LHRliwg0YHTmdCx0LjQu9C10YDQtNGW0qMg0LDRgSDSm9C+0YDRi9GC0YMg0LbSr9C50LXRgdGWINOZ0LvRliDRgtC+0LvRi9KbINC20LXRgtGW0LvQvNC10LPQtdC9INC205nQvdC1INC60LXQudCx0ZbRgCDRgtCw0pPQsNC80LzQtdC9INGB0q/RgtGC0ZbQvSDQutC+0LzQv9C+0L3QtdC90YLRgtC10YDRliDRgtC+0LvRi9KbINKb0L7RgNGL0YLRi9C70LzQsNGD0Ysg0LzSr9C80LrRltC9LiDTmNC00LXRgtGC0LUg0LHSsdC7INC10YjSm9Cw0L3QtNCw0Lkg0L/QsNGC0L7Qu9C+0LPQuNGPINCx0LXQu9Cz0ZbRgdGWINC10LzQtdGBLiDSmtC+0YDRi9GC0YvQvdC00Ys60LXQs9C10YAg0LHQsNC70LDQvdGL0qMg0LbQsNC70L/RiyDQttCw0pPQtNCw0LnRiyDQttCw0pvRgdGLINCx0L7Qu9GB0LAs0YLTmdCx0LXRgtGWINKb0LDQu9GL0L/RgtGLINCx0L7Qu9GB0LAsINC20YvQu9Cw0L8g0LzQsNC30LDRgdGL0LfQtNCw0L3QsdCw0pPQsNC9INC20LDSk9C00LDQudC00LAsINGB0LDRgNGLINCx0L7RgNC/0YvQu9C00LDSmyDQvdOZ0LbRltGBINC205nQvdC1INKb0YvRiNKb0YvQuyDQuNGW0YHRliDQsdCw0YAg0pvQvtGA0YvRgtGL0LvQvNCw0pPQsNC9INGC0q/QudGW0YDRiNGW0LrRgtC10YAt0LHSsdC7INC20LDQu9C/0Ysg0L3TmdGA0LXRgdGC0LXQvdGW0qMg0LDRgSDSm9C+0YDRi9GC0YMg0LbSr9C50LXRgdGW0L3RltKjINKb0LDQu9GL0L/RgtGLINGE0LjQt9C40L7Qu9C+0LPQuNGP0LvRi9KbINC10YDQtdC60YjQtdC70ZbQs9GWLiDQkdGW0YDQsNKbINC10LPQtdGAINC905nQttGW0YHRgtGW0qMg0YLSr9GB0ZYg0L3QtdC80LXRgdC1INC40ZbRgdGWINOp0LfQs9C10YDQtSDQsdCw0YHRgtCw0YHQsCwg0L3QtdC80LXRgdC1INCx0LDRgdKb0LAg0LDQu9Cw0L3QtNCw0YPRiNGL0LvRi9KbINGC0YPQtNGL0YDQsNGC0YvQvSDQsdC10LvQs9GW0LvQtdGAINC/0LDQudC00LAg0LHQvtC70YHQsCwg0pvQvtGB0YvQvNGI0LAg0LfQtdGA0YLRgtC10YMg0LbSr9GA0LPRltC30YMg0q/RiNGW0L0g0L/QtdC00LjQsNGC0YDSk9CwINC20q/Qs9GW0L3RgyDSm9Cw0LbQtdGCLiDSsNC50pvRiyDQsdC10LfRltC90ZbSoyDQsNC90LDRgtC+0LzQuNGP0LvRi9KbINC10YDQtdC60YjQtdC70ZbQutGC0LXRgNGWINC20LDRgSDRiNCw0LzQsNGB0YvQvdCwINCx0LDQudC70LDQvdGL0YHRgtGLINCx0L7Qu9GD0Ysg0LzSr9C80LrRltC9LiDQltCw0qPQsCDRgtGD0pPQsNC9INCx0LDQu9Cw0LTQsCDQsdC10Lcg0YHQvtC30YvQu9GL0L3QutGLINC20ZbQvdGW0YjQutC1INGB0LDQu9C80LDSk9GLIDIsMyDQs9GA0LDQvNC8LCDSsdC30YvQvdC00YvSk9GLIDQsNSDRgdC8LiAgMy01INC20LDRgSDQsNGA0LDQu9GL0pPRi9C90LTQsCDQsdC10LfQtNGW0L0g0LvQvtCx0YPQu9GP0YDQu9GLINKb0rHRgNC70YvQvNGLINC00LDQvNGL0L8sINCx0LXQtyDQutOp0LvQtdC80ZYg0LDRgNGC0LAg0LHQsNGB0YLQsNC50LTRiy4gNyDQttCw0YHRgtCw0L0g0LHQtdC30LTRltKjINCz0LjRgdGC0L7Qu9C+0LPQuNGP0LvRi9KbINKb0rHRgNC70YvQvNGLINC10YDQtdGB0LXQutGC0LXRgNCz0LUg0LbQsNKb0YvQvSDQsdC+0LvQsNC00YsuIDEwLTEyINC20LDRgSDQsNGA0LDQu9GL0pPRi9C90LTQsCDSsdC50pvRiyDQsdC10LfRliDRgtC+0LvRi9KbINCw0L3QsNGC0L7QvNC40Y/Qu9GL0psg0LzRltGI0ZbQvSDQvNC10L0g0LrTqdC70LXQvNCz0LUg0LbQtdGC0LXQtNGWLCAxMiwxNSDRgdC8INKx0LfRi9C90LTRi9KT0YsuINCe0YDQvdCw0LvQsNGB0YPRi9C90LAg0LrQtdC70YHQtdC6INKx0LnSm9GLINCx0LXQt9GWINCw0YHSm9Cw0LfQsNC9INCw0YDRgtGLINC60LXSo9GW0YHRgtGW0LPRltC90LTQtSwg0LbQvtKT0LDRgNGLINC205nQvdC1INC606nQu9C00LXQvdC10L0g0L7RgNC90LDQu9Cw0YHQsNC00YsuINCk0LjQt9C40L7Qu9C+0LPQuNGP0LvRi9KbINC10YDQtdC60YjQtdC70ZbQutGC0LXRgNGWOiDSsdC50pvRiyDQsdC10LfRliDQsNGA0LDQu9Cw0YEg0YHQtdC60YDQtdGG0LjRjyDQsdC10LfRliDQsdC+0LvRi9C/INGC0LDQsdGL0LvQsNC00YsuINKw0LnSm9GLINCx0LXQt9GW0L3RltKjINGB0LXQutGA0LXRhtC40Y/RgdGL0L3Ri9C9INCx0LDRgdGC0LDQu9GD0Ysg0YLRg9KT0LDQvdC90LDQvSDQutC10LnRltC9IDItMyDQsNC/0YLQsNC00LAg0LHRltGA0YLRltC90LTQtdC/INGW0YHQutC1INKb0L7RgdGL0LvQsNC00YsuINCi0L7Qu9GL0psg0LHQtdC70YHQtdC90LTRltC70ZbQs9GWIDItMyDQttCw0YHSm9CwINGC0LDQvNCw0L0g0LbQtdGC0LXQtNGWLiDQndC10LPRltC30LPRliDRhNC10YDQvNC10L3RgtGC0LXRgDsxIC3QsNC80LjQu9Cw0LfQsCDQutOp0LzRltGA0YHRg9C70LDRgNC00Ysg0LrRgNCw0YXQvNCw0LvSk9CwINC00LXQudGW0L0g0YvQtNGL0YDQsNGC0LDQtNGLLiDQltCw0qPQsCDRgtGD0pPQsNC90LTQsNGA0LTQsCDQsdC10LvRgdC10L3QtNGW0LvRltCz0ZYg06nRgtC1INGC06nQvNC10L0sIDYt0LDQudC00LDQvSDQutC10LnRltC9INCx0ZbRgNGC0ZbQvdC00LXQvyDQsNGA0YLQsCDQsdCw0YHRgtCw0LnQtNGLLiAyLdC70LjQv9Cw0LfQsCDQvNCw0LnQu9Cw0YDQtNGLINC80LDQuSDSm9GL0YjSm9GL0LvQtNCw0YDRi9C90LAg0LTQtdC50ZbQvSDRi9C00YvRgNCw0YLQsNC00YsuINCd05nRgNC10YHRgtC10LvQtdGA0LTQtSDRgtOp0LzQtdC9INC00LXSo9Cz0LXQudC00LUg06nSo9C00ZbRgNGW0LvQtdC00ZYuIDMt0YLRgNC40L/RgdC40L0s0YXQuNC80L7RgtGA0LjQv9GB0LjQvSDQsNKb0YPRi9C30LTQsNGA0LTRiyDQsNC80LjQvSDSm9GL0YjSm9GL0LvQtNCw0YDRi9C90LAg0LTQtdC50ZbQvSDRi9C00YvRgNCw0YLQsNC00YsuINCi0LXQuiAxINC20LDRgdKb0LAg0pvQsNGA0LDQuSDSk9Cw0L3QsCDQsdC10LvRgdC10L3QtNGW0LvRltCz0ZYg0LDRgNGC0LDQtNGLLiDQodC+0L3Ri9C80LXQvSDSm9Cw0YLQsNGAINKx0LnSm9GLINCx0LXQt9GW0L3RltKjINGN0L3QtNC+0LrRgNC40L3QtNGW0Log0pvRi9C30LzQtdGC0ZbQtNC1INCx0LDRgC4g0J7QuyDQuNC90YHRg9C70LjQvSwg0LPQu9C40LrQvtCz0L7QvSwg0YHQsNC80L7RgdGC0LDRgtCw0YLQuNC9INCz0L7RgNC80L7QvdC00LDRgNGL0L0g06nQvdC00ZbRgNC10LTRli7QltCw0qPQsCDRgtGD0pPQsNC9INC905nRgNC10YHRgtC10LvQtdGA0LTQtSDQuNC90YHRg9C70LjQvSDQvNC10L0g0LPQu9C40LrQvtCz0L7QvSDQsdOp0LvRltC90LXQtNGWLCDQsdGW0YDQsNKbINCz0LvRjtC60L7Qt9CwINGA0LXRgtGC0LXQu9GWINOZ0LvRgdGW0LcuINCW0q/QudC60LUg0LbSr9C50LXRgdGW0LzQtdC9INCx0LDQudC70LDQvdGL0YEg0YLQvtC70YvSmyDQttC10YLRltC70LzQtdCz0LXQvdC00ZbQutGC0LXQvSzQs9C+0YDQvNC+0L0g0YHQtdC60YDQtdGG0LjRj9GB0Ysg0LbQsNKT0LTQsNC50pPQsCDRgtC+0LvRi9KbINCx0LXQudGW0LzQtNC10LvQvNC10LnQtNGWLiDSmtC+0YDRi9GC0YvQvdC00YvQu9Cw0Lkg0LrQtdC70LU60rDQudKb0Ysg0LHQtdC30ZYg0LbQsNKj0LAg0YLRg9KT0LDQvSDQsdCw0LvQsNC70LDRgCDQvNC10L0gMSDQttCw0YHQutCwINC00LXQudGL0L3Qs9C4INCx0LDQu9Cw0LvQsNGA0LTQsCDRhNC10YDQvNC10L3RgtGC0LXRgCDQvNC10L0g0LDQu9C80LDRgdGDINCz0L7RgNC80L7QvdC00LDRgNGL0L0g0YHQsNC70YvRgdGC0YvRgNC80LDQu9GLINGC0YPRgNC00LUg0LDQtyDTqdC90LTRltGA0LXQtNGWLtCk0YPQvdC60YbQuNC+0L3QsNC70LTRiyDQsdC10LvQs9GW0LvRltC10YDRliDQsNGA0YLQsNC00YsgLCA3LTEyINC20LDRgSDQsNGA0LDQu9GL0pPRi9C90LTQsCDSsdC50pvRiyDQsdC10LfRliDRhNC40LfQuNC+0LvQvtCz0LjRj9C70YvSmyDRgtKx0YDSk9GL0LTQsCDRgtC+0LvRi9KbINKb0LDQu9GL0L/RgtCw0YHQsNC00Ys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8" table:style-name="ce1">
            <text:p>1066928</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0L/QtdC00Y/RgtC+0YDQtNGL0qMg0pvQsNCx0YvQu9C00LDRg9GL0L3QtNCwIDYg0LDQudC70YvSmyDQsdCw0LvQsNC80LXQvSDQsNC90LDRgdGLLCDQsdCw0LvQsCDRgtCw0LHQuNKT0Lgg0YLQsNC80LDSm9GC0LDQvdGD0LTQsCAsINCw0L3QsNGB0Ysg0LTTmdGA0ZbQs9C10YDQtNC10L0g0YHSsdGA0LDQudC00Ysg0L7RgdGLINC20LDRgdGC0LAg0LHQsNC70LDSk9CwINCw0LvSk9Cw0YjSm9GLINKb0L7RgdGL0LzRiNCwINGC0LDQvNCw0psg0L/RjtGA0LXRgdGW0L0g0LHQsNGB0YLQsNGD0pPQsCDQsdC+0LvQsNC80LAgLCDSm9C+0YHRi9C80YjQsCDRgtCw0LzQsNKb0YLQsNC9INC00LXQs9C10L0g0L3QtSDQttOZ0L3QtSDQvtC90Ysg0LXQvdCz0ZbQt9GDINC10YDQtdC20LXQu9C10YDRliA7INC20LDRg9Cw0LHRiyA7INGI0LDQvNCw0LzQtdC9IDYg0LDQudC70YvSmyDQsdCw0LvQsNC90YvSoyDRjdC90LXRgNCz0LjRjyDQvNC10L0g0pvQvtGA0LXQuiDSm9Cw0LbQtdGC0YLRltC70ZbQs9GWINCw0L3QsCDRgdGD0YLRltC80LXQvSDRgtGD0YHQtdGC0ZbQvSDQvdC+0YDQvNCw0LTQsNC9INCw0YHRi9C/INGC0YPRgdC10LTRliDRgdC+0Lsg0YPRiNGW0L0g0pvQvtGB0YvQvNGI0LAg0pvQsNC20LXRgtGC0ZbQu9GW0LrRgtGWINC+0YLQtdC50LTRliwg0YHQvtC90LTRi9Kb0YLQsNC9INKb0L7RgdGL0LzRiNCwINGC0LDQvNCw0psg0LHQtdGA0ZbQu9C10LTRliAuINCx0rHQuyDQttCw0YHRgtCwLNGLINCx0LDQu9CwINCx0LDRgdKb0LDQtNCwINC005nRgNGD0LzQtdC90LPQtSDQsdCw0Lkg0YLQsNKT0LDQvNC00LDRgNKT0LAg0Y/Sk9C90Lgg0pvQvtGB0YvQvNGI0LAg0L/RjtGA0LXQu9C10YDQs9C1INCx0LXRgNGD0LPQtSDQsdC+0LvQsNC00YsgLiDQsdKx0Lsg0pvQvtGB0YvQvNGI0LAg0YLQsNKT0LDQvNKT0LAg0LDRg9GL0YHRg9GLINKb0L7RgdGL0LzRiNCwINGC0LDSk9Cw0LzQtNCw0L3RgtGL0YDRgyDQtNC10L8g0LDRgtCw0LvQsNC70LDQtNGLIC4g0L3QtdCz0ZbQt9GW0qMg0LbQsNGB0YsgNiDQsNC50LTQsNC9INC20L4s0LDRgNGLINC90LXQvNC10YHQtSDRgdC+0Lsg0LbQsNGB0pvQsCDQttC10YLQtdC50ZbQvSDQtNC10LPQtdC90L3QtdC9INCx0LDRgdGC0LDQvyDSm9C+0YHRi9C80YjQsCDRgtCw0pPQsNC80LTQsNC90LTRi9GA0YPSk9CwINCx0L7Qu9Cw0LTRiyAuINOZ0YAg0YLRg9C/0LvRltC70ZbQuiA7INGP0pPQvdC4INCx0LDQu9Cw0qPRi9C3INOZ0YDRgtGD0YDQu9GWINKb0L7RgNC10LrRgtGW0Log0LfQsNGC0YLQsNGAINCw0LvRg9GWINGD0YjRltC9INCx0LDQu9Cw0qPRi9C30LTRiyDRgtCw0pPQsNC80YvQvSDRgtGD0YDQu9C10L3QtNGW0YDRltKj0ZbQty4g0JHRltGA0YLRltC90LTQtdC/OiDQsdCw0LvQsNKj0YvQt9KT0LAg0LrRltGI0LrQtdC90LUg0LHTqdC70ZbQutGC0LXRgCDRj9KT0L3QuCDQvNCw0LnQtNCwINKb0YvQu9GL0L8g0LHRltGA0YLRltC90LTQtdC/INGC0LDQvNCw0pPRi9C90LTQsCDRgtGD0YDRi9C/INKb0LDQu9C80LDQudGC0YvQvdC00LDQuSDQvNCw0LnQtNCw0LvQsNC/INCx0LDRgdGC0LDSo9GL0Lcg0YPQsNKb0YvRgiDQvtGC0LUg0LrTqdCx0LXQudGC0ZbRgNGW0qPRltC3IC4g0YLQtdC60YHRgtGD0YDQsCDQsdCw0YHRi9C90LTQsCDQv9GO0YDQtSDQvdC10LzQtdGB0LUg0LbRg9Kb0LAg0LbQsNGA0LzQsCDSsdGB0YvQvdGL0qPRi9C3INGB0L7QtNCw0L0g0LrQtdC50ZbQvSDQsdGW0YDRgtC1INCx0ZbRgNGC0LUg0pvQsNGC0YLRiyDRgtC10LrRgdGC0YPRgNCw0pPQsCDQsNGD0YvRgdGL0qPRi9C3LiDSm9Cw0YPRi9C/0YHRltC30LTQtdC6IDog06nQvdGW0LzQtNC10YDQtNGW0qMg0pvQsNGD0YvQv9GB0ZbQtyDQtdC60LXQvdGW0L3QtSDQutOp0Lcg0LbQtdGC0LrRltC30ZbSo9GW0Lcg0LDQu9C70LXRgNCz0LjRj9C70YvSmyDRgNC10LDQutGG0LjQuNGPINCx0LXRgNC80LXQudGC0ZbQvdGW0L3QtSDQutOp0Lcg0LbQtdGC0LrRltC30ZbSo9GW0LcuIDIuIDEg0LDQudC70YvSmyDQsdCw0LvQsCDRgtCw0LHQuNKT0Lgg0YLQsNC80LDSm9GC0LDQvdGD0LTQsCDQsdCw0LvQsNC90YvSoyDQvdOZ0LbRltGB0ZYg0LHQvtGC0pvQsCDRgtOZ0YDRltC30LTRliAsINGB0LDQv9GB0LDRgNGLLCDSm9GL0YjSm9GL0LvRgtGL0Lwg0LjRltGB0YLRliDSm9C+0YDRgtGL0LvQvNCw0pPQsNC9INGC0YPQudGW0YDRiNGW0LrRgtC10YDQvNC10L0gLiDSsNC50pvRiyDQsdC10LfRltC90ZbSoyDSm9Cw0L3QtNCw0Lkg0LDQvdCw0YLQvtC80LjRj9C70YvSmyDQtdGA0LXQutGI0LXQu9GW0LrRgtC10YDRltC80LXQvSDQsdCw0LnQu9Cw0L3Ri9GB0YLRiyAuIDEg0LDQudC70YvSmyDQsdCw0LvQsNC00LAg0YHQsNGA0Ysg0L3QtdC80LXRgdC1INCw0LvRgtGL0L0g0YLRg9GB0YLRliDQutC10LnQtNC1INC20LDRgdGL0Lsg0YDQtdKj0LTRliDRgdKx0LnRi9KbINC90LXQvNC10YHQtSDQsdC+0YLSm9CwINGC05nRgNGW0LfQtNGWINC60L7QvdGB0LjRhtC10L3RhtC40Y/QtNCwIC4g0LrQtdC50LTQtSDSm9GL0YjSm9GL0Lsg0LjRltGB0ZYg0LHQvtC70YPRltC20ZbQvdC1INKb0L7RgNGL0YLRi9C70LzQsNKT0LDQvSDSm9C+0YDQtdC60YLQtdGAIDEg0LDQudC70YvSmyDQsdCw0LvQsNC00LAg0LDRgdKb0L7RgNGC0YMg0LbQvtC70LTQsNGA0YvQvdGL0qMg0YLQvtC70YvSmyDQttC10YLRltC70LzQtdGD0ZYg0LHQvtC70LDQtNGLIC4g0L7RgiDRhNC10YDQvNC10L3RgtGW0L3RltKjINGC0rHQt9GD0LvRg9GWINOZ0LvRliDRiNC10LrRgtC10YPRltC70ZYg0LzQsNC50LvQsNGA0LTRi9KjINGC0L7Qu9GL0psg0YvQtNGL0YDQsNC80LDRg9GL0L3QsCDQsNC70YvQvyDQutC10LvQtdC00ZYgLiDRg9C50pvRiyDQsdC10LfRliDQttCw0YHRg9GI0LDQu9Cw0YDRiyDRgtC+0LvRi9KbINC20LXRltC70LzQtdCz0LXQvSDQsNGC0YHQuNC90YPRgdGC0LDRgNGLINC20LXRgtGW0LvQvNC10LPQtdC9IA==</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Жауаптар нақты және толық емес, к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7103" table:style-name="ce1">
            <text:p>1067103</text:p>
          </table:table-cell>
          <table:table-cell office:value-type="string" table:style-name="ce1">
            <text:p>kazakh</text:p>
          </table:table-cell>
          <table:table-cell office:value-type="string" table:style-name="ce1">
            <text:p>Билет 23.&amp;lt;br /&amp;gt; 1.Педиатрдын қабылдауында 6 айлық баламен анасы, бала табиғи тамақтануда, анасы дәргерден сүрайды осы жаста балаға алғашқы қосымша тамақты көкөніс пюресінен бастауға болама? Қосымша тамақтеген не және онын енгізу ережелері? &amp;lt;br /&amp;gt; 2. 1 айлық бала табиғи тамақтануда, баланың нәжесе ботқа тәрізді,сап-сары,қышқылтым иісті, қортылмаған түйіршектермен. Үйқы безінің қандай анатомо-физиологиялық ерекшеліктерімен байланысты? &amp;lt;br /&amp;gt;</text:p>
          </table:table-cell>
          <table:table-cell office:value-type="string" table:style-name="ce1">
            <text:p>MSkg0JHSsdC7INC20LDSk9C00LDQudC00LAgNiDQsNC50LvRi9KbINCx0LDQu9Cw0YHRi9C80LXQvSDQsNC90LAg0L/QtdC00LjQsNGC0YDSk9CwINC60LXQu9GW0L8g0YLSsdGALCDQsdCw0LvQsNGB0YvQvdGL0qMg0L7RgdGLINC20LDRgdGC0LAg0LDQu9KT0LDRiNKb0Ysg0pvQvtGB0YvQvNGI0LAg0YLQsNC80LDSm9GC0Ysg0LrTqdC606nQvdGW0YEg0L/RjtGA0LXRgdGW0L3QtdC9INCx0LDRgdGC0LDRg9KT0LAg0LHQvtC70LAg0LzQsCDQtNC10LPQtdC9INGB0rHRgNCw0psg0pvQvtC50YvQvyDRgtKx0YAuINCY0Y8sINCx0rHQuyDQttCw0YHRgtCwINCx0LDQu9Cw0pPQsCDQsNC70pPQsNGI0pvRiyDSm9C+0YHRi9C80YjQsCDRgtCw0LzQsNKbINCx0LXRgNGDINC60LXRgNC10Log0YHQtdCx0LXQsdGWINCx0LDQu9Cw0L3Ri9KjINC20LDSo9CwINGC0LDSk9Cw0LzQtNCw0YDSk9CwINKv0LnRgNC10L3RltGB0YPRliwg0pvQsNGC0YLRiyDRgtCw0pPQsNC80LTQsNGA0LTRiyDRgdC10LfRgywg0YjQsNC50L3QsNGDINKb0YvQt9C80LXRgtGC0LXRgNGW0L0g0LbQsNC50LzQtdC90LTQtdC/INC00LDQvNGL0YLRgyDTqdGC0LUg0LzQsNKj0YvQt9C00YsuINCV0L3QtNGW0LPRliDQvtC90Ysg0pvQsNC70LDQuSDQttCw0YHQsNGDINC60LXRgNC10Log0LXQutC10L3RltC90LUg0LrQtdC70YHQtdC6LCDQsdCw0YHRgtCw0L/Sm9GL0LTQsCDQutOp0LrTqdC90ZbRgSDQv9GO0YDQtdC70LXRgNGW0L3QtdC9INCx0LDRgdGC0LDRgyDSm9Cw0LbQtdGCLCDQttOZ0L3QtSDQttCw0YDRgtGLINGI05nQuSDSm9Cw0YHRi9KbINC806nQu9GI0LXRgNGW0L3QtNC1INKT0LDQvdCwINCx0LXRgNGW0LvRg9GWINC60LXRgNC10Log0LrQtdC50ZbQvSDQsNC30LTQsNC/INC606nQsdC10LnRgtGW0L8g0YLSsdGA0YPSk9CwINCx0L7Qu9Cw0LTRiywg0LbQsNKj0LAg0YLQsNKT0LDQvNC00YssINCx0ZbRgNGW0L3RiNGWINGC0LDSk9Cw0LzQvdCw0L0g0LrQtdC50ZbQvSA3LTEwINC60q/QvSDQutC10LnRltC9INCx0LDRgdGC0LDRg9KT0LAg0pPQsNC90LAg0LHQvtC70LDQtNGLLiA8YnIgLz4NCjEp0JrTqdC606nQvdGW0YEg0L/RjtGA0LXQu9C10YDRliAoNiDQsNC5KSA8YnIgLz4NCjIp0KHRg9C00LAg0L/RltGB0ZbRgNGW0LvQs9C10L0g0LHQvtGC0pvQsNC70LDRgCjQutKv0YDRltGIKSg2LTcg0LDQuSkgPGJyIC8+DQozKdCW0LXQvNGW0YEg0L/RjtGA0LXQu9C10YDRlig3INCw0LkpIDxiciAvPg0KNCnQldGCINGC0LDSk9Cw0LzQtNCw0YDRiyg3INCw0LkpIDxiciAvPg0KNSnRgdKv0YIg0YLQsNKT0LDQvNC00LDRgNGLICg4LTkg0LDQuSkgPGJyIC8+DQo2KdCd0LDQvSwg0YLQvtKb0LDRiCwg0YHSr9C30LHQtSAoMSDQttCw0YEpINC+0YHRi9C90LTQsNC5INC60LXQt9C10LrQv9C10L0g0LXQvdCz0ZbQt9GDINKb0LDQttC10YIuINCW0LDQu9C/0Ysg0pvQvtGB0YvQvNGI0LAg0YLQsNC80LDSmyDQsdCw0LvQsNC90YvSoyDRjdC90LXRgNCz0LXRgtC40LrQsNC70YvSmywg0LzQtdGC0L7QsdC+0LvQuNGC0YLRltC6LCDRjdC90LXRgNCz0LjRj9C70YvSmyDSm9Cw0LbQtdGC0YLRltC70ZbQutGC0LXRgNGW0L0g0LbQsNGB0YvQvdCwINCx0LDQudC70LDQvdGL0YHRgtGLINKb0LDQvNGC0LDQvNCw0YHRi9C3INC10YLRgyDSr9GI0ZbQvSDQv9Cw0LnQtNCw0LvQsNC90YvQu9Cw0LTRiy4g0JDQvdCw0YHRi9C90LAg0LDQudGC0LDRgNGL0LzRi9C3INCY0Y8g0LbQsNC50LvQsNC/INCx0LXRgNGDINKb0LDQttC10YIg0LbTmdC90LUg0LHQtdGA0ZbQu9Cz0LXQvSDQtdGA0LXQttC10LvQtdGA0LPQtSDRgdCw0Lkg0LHQtdGA0LPQtdC9INC00rHRgNGL0YEg0LXQs9C10YAg0LTQtSDQsdC10LvQs9GW0LvRliDQsdGW0YAg0pvQvtGB0YvQvNGI0LAg0YLQsNC80LDSm9GC0LDQvSDQsdOp0LPQtNC1INCx0LXQu9Cz0ZbQu9C10YAg0L/QsNC50LTQsCDQsdC+0LvRgdCwINKb0YvRiNGL0L3Rgywg0LDQu9C70LXRgNCz0LjRj9C70YvSmyDQttCw0YPQsNC/INGB0LjRj9Kb0YLRiyDQvtC7INC20LDSk9C00LDQudC00LAg0YHQvtC7INGC0LDQvNCw0pvRgtCw0L0g0LHQsNGBINGC0LDRgNGC0YvQvyDQtNOZ0YDRltCz0LXRgNC70LXRgCDQutOp0LzQtdCz0ZbQvdC1INC20q/Qs9GW0L3Rg9GW0L0g0YHSsdGA0LDQudC80YvQtyA8YnIgLz4NCjxiciAvPg0KMinSmtCw0LHRi9C70LTQsNGD0LTQsCAxINCw0LnQu9GL0psg0LHQsNC70LAsINCw0L3QsNGB0Ysg0LHQsNC70LDRgdGL0L3Ri9KjINC905nQttGW0YHRgtC10LPRliDQutOp0YDRgdC10YLQutGW0YjRgtC10YDRltC90LUg0LHQsNC50LvQsNC90YvRgdGC0Ysg0YjQsNKT0YvQvNC00LDQvdGD0LTQsC4gMSDQsNC50LvRi9KbINCx0LDQu9CwINKv0YjRltC9INCx0rHQuyDQutOp0YDRgdC10YLQutGW0YjRgtC10YAg0L3QvtGA0LzQsNKT0LAg0YHTmdC50LrQtdGBLiDQodC10LHQtdCx0ZYsINCx0LDQu9CwIDEg0LDQudC70YvSmyDQttCw0YHRi9C90LTQsCDQvtC80YvRgNCw0YPQtNCw0L0g0YHSr9GCINKb0LDQsdGL0LvQtNCw0LnQtNGLLCDQttOZ0L3QtSDQvtGB0Ysg0LrQtdC30LPQtSDQttCw0pvRi9C9INCw0L3QsNGB0YvQvdGL0qMg0YHSr9GC0ZYg0LbQtdGC0ZbQu9C10LTRliDRj9KT0L3QuCDRg9GL0LfQtNGLINGB0q/RgiDQvdC1INC60L7Qu9C+0YHRgtGA0YPQvCwg0LzQvtC70L7QstC40LfQviDQtdC80LXRgSwg0YLQvtC70YvSm9Kb0LDQvdC00Ysg0YHSr9GCINKb0rHRgNCw0LzRiyDQsdCw0LkuINCQ0Lsg0LHQsNC70LDQtNCwINC+0Lsg0LrQtdC30LTQtSDQkNCG0JYg0LTQsNC80YPRiyDRgtOp0LzQtdC9LCDTmdGB0ZbRgNC10YHQtSDQsdKx0Lsg0LbQtdGA0LTQtSDSsdC50pvRiyDQsdC10LfRltC9INCw0YLQsNC/INOp0YLQutC10L0g0LTSsdGA0YvRgSDRgdC10LHQtdCx0ZYg0YTQtdGA0LzQtdC90YLRgtGW0Log0LHQtdC70YHQtdC90LTRltC70ZbQs9GWINOZ0LvRliDRgtOp0LzQtdC9INGB0L7QuyDRgdC10LHQtdC/0YLRliDQv9GA0L7RgtC10L7Qu9C40YLQuNC60LDQu9GL0psg0YTQtdGA0LzQtdC90YLRgtC10YAg0LDQtywg0LvQuNC/0LDQt9CwINCw0LcsINC70LDQutGC0LDQt9CwINCw0Lcg0YHQvtC7INGB0LXQsdC10L/RgtGWINCx0L7RgtKb0LAg0YLTmdGA0ZbQt9C00ZYsINC205nQvdC1INKb0L7RgNGL0YLRi9C70LzQsNKT0LDQvSDRgtKv0LnRltGA0YjRltC60YLQtdGAINC60LXQt9C00LXRgdC10LTRliwg0LDQuyDRgdCw0L8g0YHQsNGA0Ysg0LHQvtC70YPRiyDQvtC7INGB0q/RgiDSm9Cw0LHRi9C70LTQsNKT0LDQvdKT0LAg0LHQsNC50LvQsNC90YvRgdGC0Ysg0LrQtdC70LXQtNGWLCDSmtGL0YjSm9GL0LvRgtGL0Lwg0LjRltGBINC+0Lsg0YHSr9GCINOp0L3RltC80LTQtdGA0ZYg0Y/Sk9C90Lgg0LvQsNC60YLQvtC30LAg0LbTmdC90LUg0YLQsNKT0Ysg0LHQsNGB0pvQsNC70LDRgNGL0L3Ri9KjINCw0YjRg9GLINC205nQvdC1INGW0YjQtdC6INC20L7Qu9C00LDRgNC90YvSoyDQvNCw0YLQvtGA0LjQutCw0YHRiyDRgtOp0LzQtdC90LTRltCz0ZbQvdC10L0g0ZbRiNC10LrRgtC1INCx0ZbRgNCw0Lcg0YHQsNKb0YLQsNC70LDQtNGLLCDRgdC+0Lsg0YHQtdCx0LXQv9GC0ZYg0pvRi9GI0pvRi9C70YLRi9C8INC40ZbRgdGC0ZYg0LHQsNC50pvQsNC50LzRi9C3LiDQltOZ0L3QtSDQsNGC0LDQvyDTqdGC0LXRgNC70ZbQuiDRgtC+0psg0ZbRiNC10LrRgtC1INCw0LHRgdC+0YDQsdGG0LjRj9C70YvSmyDSm9GL0LfQvNC10YLRliDTmdC70ZYg0YLQvtC70YvSmyDQttC10YLRltC70LzQtdCz0LXQvdC90LXQvSDRgdGDINGB0ZbSo9GW0YDRltC70LzQtdC5INCx0L7RgtKb0LAg0YLTmdGA0ZbQt9C00ZYg0LHQvtC70YPRiyDQvNKv0LzQutGW0L0=</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тарында қателер жіберлген</text:p>
          </table:table-cell>
          <table:table-cell office:value-type="float" office:value="0" table:style-name="ce1">
            <text:p>0</text:p>
          </table:table-cell>
          <table:table-cell table:number-columns-repeated="16376"/>
        </table:table-row>
        <table:table-row table:style-name="ro1">
          <table:table-cell office:value-type="float" office:value="915297" table:style-name="ce1">
            <text:p>915297</text:p>
          </table:table-cell>
          <table:table-cell office:value-type="string" table:style-name="ce1">
            <text:p>russian</text:p>
          </table:table-cell>
          <table:table-cell office:value-type="string" table:style-name="ce1">
            <text:p>Билет 23.&amp;lt;br /&amp;gt; 1.К педиатру на консультацию обратилась мама с ребенком 6 месяцев, находящемся на грудном вскармливании, мама интересуется можно ли ребенку в этом возрасте вводить первый прикорм в виде овощного пюре. Что такое прикорм и какие существуют правила введения прикорма?&amp;lt;br /&amp;gt; 2.Ребенку 1 месяц, находится на грудном вскармливании. Маму беспокоит кашицеобразный стул желтого цвета, непереваренными комочками, с кисловатым запахом. С какими анатомо-физиологическими особенностями поджелудочной железы это связано?&amp;lt;br /&amp;gt;</text:p>
          </table:table-cell>
          <table:table-cell office:value-type="string" table:style-name="ce1">
            <text:p>MSkg0J/RgNC40LrQvtGA0LwgLSDRjdGC0L4g0L/QvtGB0YLQtdC/0LXQvdC90L7QtSDQstCy0LXQtNC10L3QuNC1INC/0LjRidC4INCyINGA0LDRhtC40L7QvSDRgNC10LHQtdC90LrQsCwg0YEg0LTQsNC70YzQvdC10LnRiNC40Lwg0LfQsNC80LXRidC10L3QuNC10Lwg0LPRgNGD0LTQvdC+0LPQviDQstGB0LrQsNGA0LzQu9C40LLQsNC90LjRjy4g0J7QvSDQtNC+0LvQttC10L0g0L3QsNGH0LjQvdCw0YLRjNGB0Y8g0LIgNC01INC80LXRgdGP0YbQtdCyINGBINC60LDRiNC10L7QsdGA0LDQt9C90YvRhSDQv9GO0YDQtS4g0J/QtdGA0LLRi9C5INC/0YDQuNC60L7RgNC8INC+0LHRj9C30LDRgtC10LvRjNC90L4g0LTQvtC70LbQtdC9INCx0YvRgtGMINC+0YHQvdC+0LLQsNC9INC90LAg0YTRgNGD0LrRgtCw0YUg0LjQu9C4INC+0LLQvtGJ0LDRhSwg0YLQtdGA0LzQuNGH0LXRgdC60L7QuSDQvtCx0YDQsNCx0L7RgtC60LgsINCx0LXQtyDQstC60YPRgdC+0LLRi9GFINC00L7QsdCw0LLQvtC6LCDRgdC/0LXRhtC40Lkg0Lgg0L/RgNC40L/RgNCw0LIsINC/0LXRgNC10YLQtdGA0YLRi9C5INCyINC60L7QvdGB0LjRgdGC0LXQvdGG0LjRjiDQv9GO0YDQtSwg0LHQtdC3INC60L7QvNC+0YfQutC+0LIsINC20LjQtNC60L7QvtCx0YDQsNC30L3Ri9C5LiDQotCw0Log0LbQtSDQv9C+0LfQttC1INC80L7QttC90L4g0LTQsNCy0LDRgtGMINGB0LLQtdC20LjQtSwg0L/QtdGA0LXRgtC10YDRgtGL0LUg0YTRgNGD0LrRgtGLLCDQsdC10Lcg0LrQvtC80L7Rh9C60L7Qsiwg0YfRgtC+0LHRiyDRgNC10LHQtdC90L7QuiDQvdC1INC/0L7QtNCw0LLQuNC70YHRjy4g0Jgg0YLQvtC70YzQutC+INC/0L7RgdC70LUg0LLQstC10LTQtdC90LjRjyDQv9GA0LDQstC40LvRjNC90L7Qs9C+INC/0YDQuNC60L7RgNC80LAg0YDQsNGB0YLQuNGC0LXQu9GM0L3Ri9C80Lgg0L/RgNC+0LTRg9C60YLQsNC80Lgg0LzQvtC20L3QviDQtNCw0LLQsNGC0Ywg0L/RgNC+0LTRg9C60YLRiyDQttC40LLQvtGC0L3QvtCz0L4g0L/RgNC+0LjRgdGF0L7QttC00LXQvdC40Y8sINGN0YLQviDQtNC10LvQsNC10YLRgdGPINC/0L7RgtC+0LzRgyDRh9GC0L4sINGA0LDRgdGC0LjRgtC10LvRjNC90YvQtSDQstC10YnQtdGB0YLQstCwINCyINGG0LXQu9C+0Lwg0LjQvNC10Y7RgiDQvNC10L3RjNGI0LUg0YPRgdCy0LDQuNCy0LDQtdC80YvRhSDQuCDRgdC70L7QttC90YvRhSDQstC10YnQtdGB0YLQsiwg0LIg0YHRgNCw0LLQvdC10L3QuNC4INGBINC20LjQstC+0YLQvdGL0LzQuC4g0J/RgNC4INCy0LLQtdC00LXQvdC40Lgg0L/RgNC40LrQvtGA0LzQsCDRgyDRgNC10LHQtdC90LrQsCDQvNC+0LPRg9GCINCx0YvRgtGMINC60L7Qu9C40LrQuCwg0LLRi9C30LLQsNC90L3Ri9C1INC90LDQutC+0L/Qu9C10L3QuNC10Lwg0LPQsNC30L7Qsiwg0LIg0YHQu9C10LTRgdGC0LLQuNC4INC90LXRgdC+0LLQtdGA0YjQtdC90YHRgtCy0L7QstCw0L3QuNGPINGE0LXRgNC80LXQvdGC0L7QsiDQutC40YjQtdGH0L3QuNC60LAsINCy0LfQtNGD0YLQuNGPLCDQsiDRgdC70LXQtNGB0YLQstC40Lgg0YfQtdCz0L4g0YDQtdCx0LXQvdC+0Log0LzQvtC20LXRgiDQutCw0L/RgNC40LfQvdC40YfQsNGC0YwsINC40LfQvNC10L3QtdC90LjRjyDRgdGC0YPQu9CwLCDRgdGC0YPQuyDRgdGC0LDQvdC+0LLQuNGC0YHRjyDRgtC10LzQvdC10LUg0Lgg0L/RgNC40L7QsdGA0LXRgtCw0LXRgiDQt9Cw0L/QsNGFLiDQnNCw0YLRjCDRgNC10LHQtdC90LrQsCDRgdGC0L7QuNGCINC/0L7RgtC+0YDQvtC/0LjRgtGMINGBINC/0YDQuNC60L7RgNC80L7QvCwg0Lgg0YHQutCw0LfQsNGC0Ywg0YfRgtC+INGN0YLQviDQvdGD0LbQvdC+INCx0YvQu9C+INC90LDRh9C40L3QsNGC0Ywg0LTQtdC70LDRgtGMINGA0LDQvdC10LUsINC90LUg0YHQvNC+0YLRgNGPINC90LAg0YLQviwg0YfRgtC+INC/0YDQuNC60L7RgNC8INC00LDQstCw0YLRjCDQvdGD0LbQvdC+INCx0YvQu9C+INGA0LDQvdGM0YjQtSwg0YEg0Y3RgtC+0LPQviDQvNC+0LzQtdC90YLQsCDQvdGD0LbQvdC+INGB0LrQsNC30LDRgtGMINC80LDRgtC10YDQuCDRh9GC0L4g0L/RgNC40LrQvtGA0Lwg0LTQvtC70LbQtdC9INCx0YvRgtGMINGB0L7QsdC70Y7QtNC10L0g0L/QviDQstGB0LXQvCDQv9GA0LDQstC40LvQsNC8LiDQotCw0Log0LbQtSDRgdC70LXQtNGD0LXRgiDQv9GA0LXQtNGD0L/RgNC10LTQuNGC0Ywg0LXQtSDQviDQstC+0LfQvNC+0LbQvdGL0YUg0L/QvtGB0LvQtdC00YHRgtCy0LjRj9GFINCyINCy0LjQtNC1INC60L7Qu9C40LrQvtCyINC4INC40LfQvNC10L3QtdC90LjRjyDRgdGC0YPQu9CwLiA8YnIgLz4NCjIpINCjINC90L7QstC+0YDQvtC20LTQtdC90L3QvtCz0L4gMSDQvNC10YHRj9GG0LAg0LbQuNC30L3QuCwg0L3QsNGF0L7QtNGP0YnQtdCz0L7RgdGPINC90LAg0LPRgNGD0LTQvdC+0Lwg0LLRgdC60LDRgNC80LvQuNCy0LDQvdC40Lgg0LrQsNGI0LjRhtC10L7QsdGA0LDQt9C90YvQuSDRgdGC0YPQuyDQttC10LvRgtC+0LPQviDRhtCy0LXRgtCwINGBINC90LXQv9C10YDQtdCy0LDRgNC10L3QvdGL0LzQuCDQutC+0LzQvtGH0LrQsNC80Lgg0YEg0LrQuNGB0LvQvtCy0LDRgtGL0Lwg0LfQsNC/0LDRhdC+0Lwg0Y/QstC70Y/QtdGC0YHRjyDQvdC+0YDQvNC+0LkuINCt0YLQviDRgdCy0Y/Qt9Cw0L3QviDRgSDQsNC90LDRgtC+0LzQvi3RhNC40LfQuNC+0LvQvtCz0LjRh9C10YHQuNC80Lgg0L7RgdC+0LHQtdC90L3QvtGB0YLRj9C80Lgg0L/QvtC00LbQtdC70YPQtNC+0YfQvdC+0Lkg0LbQtdC70LXQt9GLLiDQktC+LdC/0LXRgNCy0YvRhSDQv9C+0LTQttC10LvRg9C00L7Rh9C90LDRjyDQttC10LvQtdC30LAg0L3QtdC00L7RgdCw0YLQvtGH0L3QviDRgdC10LrRgNC10YLQuNGA0YPQtdGCINC/0LDQvdC60YDQtdCw0YLQuNGH0LXRgdC60LjQuSDRgdC+0LosINGH0YLQviDRgdCy0Y/Qt9Cw0L3QviDRgSDRgNCw0LfQvNC10YDQsNC80Lgg0L/QvtC00LbQtdC70YPQtNC+0YfQvdC+0Lkg0LbQtdC70LXQt9GLINC4INC80LDQu9C+0LPQviDQutC+0LvQuNGH0LXRgdGC0LLQsCDQvdGD0LbQtNGLINC+0YDQs9Cw0L3QuNC30LzQsCDRgNC10LHQtdC90LrQsCDQsiDQv9Cw0L3QutGA0LXQsNGC0LjRh9C10YHQutC+0Lwg0YHQvtC60LUuINCY0Lct0LfQsCDQvdC10LTQvtGB0YLQsNGC0LrQsCDRjdGC0L7Qs9C+INGB0LXQutGA0LXRgtCwLCDQs9GA0YPQtNC90L7QtSDQvNC+0LvQvtC60L4g0L3QtSDQvNC+0LbQtdGCINC/0L7Qu9C90L7RgdGC0YzRjiDQv9C10YDQtdCy0LDRgNC40YLRjNGB0Y8g0Lgg0YPRgdCy0L7QuNGC0YzRgdGPLiDQodC+INCy0YDQtdC80LXQvdC10LwsINC/0L7RgdC70LUg0LLQstC10LTQtdC90LjRjyDQv9GA0LjQutC+0YDQvNCwLCDQv9Cw0L3QutGA0LXQsNGC0LjRh9C10YHQutCw0Y8g0LbQtdC70LXQt9CwINGB0YLQsNC90LXRgiDRgNCw0YHRgtC4INCyINGA0LDQt9C80LXRgNCw0YUsINGE0YPQvdC60YbQuNC+0L3QsNC70YzQvdCw0Y8g0YHQtdC60YDQtdGC0LjRgNGD0Y7RidCw0Y8g0YLQutCw0L3RjCDRgdGC0LDQvdC10YIg0YDQsNGB0YLQuCwg0LXQtSDQutC+0LvQuNGH0LXRgdGC0LLQsCDQsdGD0LTQtdGCINC00L7RgdGC0LDRgtC+0YfQvdC+INC00LvRjyDQv9GA0LDQstC40LvRjNC90L7Qs9C+INC/0LXRgNC10LLQsNGA0LjQstCw0L3QuNGPLiDQnNCw0LvQsNGPINCy0YvRgNCw0LHQvtGC0LrQsCDQv9Cw0L3QutGA0LXQsNGC0LjRh9C10YHQutC+0LPQviDRgdC+0LrQsCDRgtCw0Log0LbQtSDQvNC+0LbQtdGCINCx0YvRgtGMINC+0LHRg9GB0LvQvtCy0LvQtdC90L3QsCDQvdC10LTQvtGB0YLQsNGC0L7Rh9C90YvQvCDQutC+0LvQuNGH0LXRgdGC0LLQvtC8INC4INC60LDRh9C10YHRgtCy0L7QvCDRhNC10YDQvNC10L3RgtC+0LIsINGH0YLQviDRgtCw0Log0LbQtSDQuNC80LXQtdGCINCy0LDQttC90L7QtSDQt9C90LDRh9C10L3QuNC1INCyINC/0LXRgNC10LLQsNGA0LjQstCw0L3QuNC4INC4INGD0YHQstCw0LjQstCw0L3QuNC4LiDQnNCw0YLRjCDRgdGC0L7QuNGCINGD0YHQv9C+0LrQvtC40YLRjCwg0L7QsdGK0Y/RgdC90LjRgtGMINGH0YLQviDRgtC+LCDQvdCwINGB0YfQtdGCINGH0LXQs9C+INC+0L3QsCDQsdC10YHQv9C+0LrQvtC40YLRgdGPINGP0LLQu9GP0LXRgtGB0Y8g0LDQsdGB0L7Qu9GO0YLQvdC+0Lkg0L3QvtGA0LzQvtC5LCDQutCw0YjQuNGG0LXQvtCx0YDQsNC30L3Ri9C5INGB0YLRg9C7INC20LXQu9GC0L7Qs9C+INGG0LLQtdGC0LAg0LfQsNC80LXQvdC40YLRgdGPINC90LAg0LHQvtC70LXQtSDQvtGE0L7RgNC80LvQtdC90L3Ri9C5INC/0L7RgdC70LUg0LLQstC10LTQtdC90LjRjyDQv9GA0LjQutC+0YDQvNCwLCDQvdC10L/QtdGA0LXQstCw0YDQtdC90L3Ri9C1INC60L7QvNC+0YfQutC4INCy0YHQu9C10LTRgdGC0LLQuNC4INC90LXQtNC+0YHRgtCw0YLQvtGH0L3QvtC5INGB0LXQutGA0LXRhtC40Lgg0L/QvtC00LbQtdC70YPQtNC+0YfQvdC+0Lkg0LbQtdC70LXQt9GLLCDQutC+0YLQvtGA0YvQtSDRgtCw0Log0LbQtSDQuNGB0YfQtdC30L3Rg9GCINC/0YDQuCDQstCy0LXQtNC10L3QuNC4INC/0YDQuNC60L7RgNC80LAsINCwINC60LjRgdC70L7QstCw0YLRi9C5INC30LDQv9Cw0YUg0LIg0YHQu9C10LTRgdGC0LLQuNC4INC90LXQv9C+0LvQvdC+0YbQtdC90L3QvtCz0L4g0L/QtdGA0LXQstCw0YDQuNCy0LDQvdC40Y8g0LPRgNGD0LTQvdC+0LPQviDQvNC+0LvQvtC60LAsINGH0YLQviDRgtCw0Log0LbQtSDQsiDQs9GA0YPQtNC90L7QvCDQstC+0LfRgNCw0YHRgtC1INC40LzQtdC10YIg0LfQvdCw0YfQtdC90LjQtS4g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Фрукты в данном возрасте не вводят. Оптимальное введение прикорма ребенку в 6 мес. и поэтому мама пришла вовремя, в данном случае раннее введение прикорма не аргументировано.Правила введения прикорма в ответе не раскрыты</text:p>
          </table:table-cell>
          <table:table-cell office:value-type="float" office:value="0" table:style-name="ce1">
            <text:p>0</text:p>
          </table:table-cell>
          <table:table-cell table:number-columns-repeated="16376"/>
        </table:table-row>
        <table:table-row table:style-name="ro1">
          <table:table-cell office:value-type="float" office:value="1067004" table:style-name="ce1">
            <text:p>1067004</text:p>
          </table:table-cell>
          <table:table-cell office:value-type="string" table:style-name="ce1">
            <text:p>russian</text:p>
          </table:table-cell>
          <table:table-cell office:value-type="string" table:style-name="ce1">
            <text:p>Билет 23.&amp;lt;br /&amp;gt; 1.К педиатру на консультацию обратилась мама с ребенком 6 месяцев, находящемся на грудном вскармливании, мама интересуется можно ли ребенку в этом возрасте вводить первый прикорм в виде овощного пюре. Что такое прикорм и какие существуют правила введения прикорма?&amp;lt;br /&amp;gt; 2.Ребенку 1 месяц, находится на грудном вскармливании. Маму беспокоит кашицеобразный стул желтого цвета, непереваренными комочками, с кисловатым запахом. С какими анатомо-физиологическими особенностями поджелудочной железы это связано?&amp;lt;br /&amp;gt;</text:p>
          </table:table-cell>
          <table:table-cell office:value-type="string" table:style-name="ce1">
            <text:p>MSnQn9GA0LjQutC+0YDQvCDRj9Cy0LvRj9C10YLRgdGPINC00L7Qv9C+0LvQvdGC0LXQu9GM0L3Ri9C8INC40YHRgtC+0YfQvdC40LrQvtC8INC/0LjRgtCw0L3QuNGPINC/0L7QvNC40LzQviDQs9GA0YPQtNC90L7Qs9C+INC80L7Qu9C+0LrQsCwgLCDQvtC9INCy0LLQvtC00LjRgtGB0Y8g0L/QvtGB0YLQtdC/0LXQvdC90L4g0YEg0L/QtdGA0LjQvtC00LAg0L7QutC+0LvQviA1LDUtNiDQvNC10YHRj9GG0L7QsiAs0LrQvtCz0LTQsCDRgyDRgNC10LHQtdC90LrQsCDQv9GA0LXQutGA0LDRidCw0LXRgtGB0Y8g0YDQtdGE0LvQtdC60YEg0L7RgtGC0LDQu9C60LjQstCw0L3QuNGPINGP0LfRi9C60L7QvCwg0L/QuNGJ0LXQstCw0YDQuNGC0LXQu9GM0L3Ri9C1INGE0LXRgNC80LXQvdGC0Ysg0LbQtdC70YPQtNC60LAg0Lgg0L/QvtC00LbQtdC70YPQtNC+0YfQvdC+0Lkg0LbQtdC70LXQt9GLINGE0YPQvdC60YbQuNCw0L3QsNC70YzQvdC+INCz0L7RgtC+0LLRiyDQuiDQv9C10YDQtdCy0LDRgNC40LLQsNC90LjRjiDQu9C10LPQutC+0Lkg0LXQtNGLINC4INC+0L0g0LIg0YbQtdC70L7QvCDQuNC80LXQtdGCINC40L3RgtC10YDQtdGBINC6INC90L7QstC+0Lkg0LXQtNC1LCDQvdC+INGBINGB0L7QsdC70Y7QtNC10L3QuNC10Lwg0YLQvtCz0L4g0YfRgtC+INGA0LXQsdC10L3QvtC6INCw0LHRgdC+0LvRjtGC0L3QviDQt9C00L7RgNC+0LIuINCf0YDQuNC60L7RgNC80Ysg0LHRi9Cy0LDRjiDRgNCw0LfQvdGL0LUg0LPQvtC80L7Qs9C10L3QvdGL0LUsINC60L7QvNCx0LjQuNGA0L7QstCw0L3QvdGL0LUsINGB0LzQtdGI0LDQvdC90YvQtSwg0LrQsNGI0LjRhtC10L7QsdGA0LfQvdGL0LUsINC/0Y7RgNGN0L7QsdGA0LDQt9C90YvQtSDQuCDRgi7QtCDQkiDQvdCw0YjQtdC8INGB0LvRg9GH0LDQtSDRgNC10LHQtdC90LrRgyA2INC80LXRgdGP0YbQtdCyINC4INGN0YLQvtGCICDQstC+0LfRgNCw0YHRgiDQv9C+0LTRhdC+0LTQuNGCINC00LvRjyDRgtC+0LPQviDRh9GC0L7QsdGLINC90LDRh9C40L3QsNGC0Ywg0LLQstC+0LTQuNGC0Ywg0L/RgNC40LrQvtGA0LwuICDQkiDQv9C10YDQstGD0Y4g0L7Rh9C10YDQtdC00Ywg0LzRiyDQstGL0LHQuNGA0LDQtdC8INGD0LTQvtCx0L3QvtC1INC/0L7Qu9C+0LbQtdC90LjQtSDRgNC10LHQtdC90LrRgywg0Y3RgtC+INCyINC+0YHQvdC+0LLQvdC+0Lwg0YHQuNC00Y8sINGC0LDQuiDRh9GC0L7QsdGLINGC0LXQu9C+INC40LzQtdC70L4g0LLQtdGA0YLQuNC60LDQu9GM0L3QvtC1INC/0L7Qu9C+0LbQtdC90LjQtSwg0LjQvdCw0YfQtSDRgNC10LHQtdC90L7QuiDQvNC+0LbQtdGCINC/0L7Qv9C10YDRhdC90YPRgtGB0Y8uINCa0L7Qs9C00LAg0LzRiyDRgtC+0LvRjNC60L4g0L3QsNGH0LjQvdCw0LXQvCDQstCy0L7QtNC40YLRjCDQv9GA0LjQutC+0YDQvCDRgdC70LXQtNGD0LXRgiDQstGL0LHQuNGA0LDRgtGMINCz0L7QvNC+0LPQtdC90L3Ri9C1INC/0YDQuNC60L7RgNC80Yso0YHQvtGB0YLQvtGP0YnQuNC1INC40Lcg0L7QtNC90L7Qs9C+INGN0LvQtdC80LXQvdGC0LAsINC9LdGAINC60LDQsdCw0YfQutC4INC4INGCLtC0KSwg0YLQsNC60LbQtSDQuNC30L3QsNGH0LDQu9GM0L3QviDQvNGLINCy0LLQvtC00LjQvCDQv9GA0LjQutC+0YDQvCDRgSDRh9Cw0LnQvdC+0Lkg0LvQvtC20LXRh9C60LgsINCyINC/0LXRgNCy0YvQuSDQtNC10L3RjCDQvNGLINC00LDQtdC8INC/0L4g0L/QvtC7INGH0LDQudC90L7QuSDQu9C+0LbQutC4LCDQvdCwINCy0YLQvtGA0L7QuSDQtNC10L3RjCAg0YPQttC1INC/0L4g0YbQtdC70L7QuSDQu9C+0LbQutC1LCDQuCDRgtCw0Log0LzRiyDQv9GA0L7QtNC+0LvQttCw0LXQvCDRg9Cy0LXQu9C40YfQuNCy0LDRgtGMINC00L7Qt9GDINGF0LDRgNCw0LrRgtC10YDQvdGD0Y4g0LTQu9GPINCy0L7Qt9GA0LDRgdGC0L3QvtC5INCz0YDRg9C/0L/RiyDRgNC10LHQtdC90LrQsCwg0Y3RgtC+INC00L7QstC+0LTQuNGC0YHRjyDRh9C10YDQtdC3IDctMTAg0LTQvdC10Lko0LjQvdC+0LPQtNCwIDIg0L3QtdC00LXQu9C4KS4g0Jgg0L/RgNC40LrQvtGA0Lwg0LTQvtC70LbQtdC9INCx0YvRgtGMINC90LUg0YXQvtC70L7QtNC90YvQuSDQuCDQvdC1INCz0L7RgNGP0YfQuNC5INCwINGC0LXQv9C70YvQuSwg0YfRgtC+0LHRiyDRgNC10LHQtdC90LrRgyDQsdGL0LvQviDQutC+0LzRhNC+0YDRgtC90L4sINCe0LHRj9C30LDRgtC10LvRjNC90L4g0L3QsNGH0LjQvdCw0LXQvCDQstCy0L7QtNC40YLRjCDQv9GA0LjQutC+0YDQvCDRgSDRg9GC0YDQsCwg0Lgg0LIg0LzQvtC80LXQvdGCINC60L7RgNC80LvQtdC90LjRjyDQvdCw0LHQu9GO0LTQsNGC0Ywg0LfQsCDRgNC10LDQutGG0LjQtdC5INGA0LXQsdC10L3QutCwLCDRgtCw0LrQttC1INC/0YDQvtC00L7Qu9C20LDQtdC8INC90LDQsdC70Y7QtNCw0YLRjCDQutC+0LbQvdGL0LUg0L/QvtC60YDQvtCy0YssINGB0YLRg9C7LCDQv9C+0LTQvdC40LzQsNC10YLRgdGPINC70Lgg0YLQtdC80L/QtdGA0LDRgtGD0YDQsCwg0LLQvtC30LzQvtC20L3Ri9C1INCw0LvQu9C10YDQs9C40YfQtdGB0LrQuNC1INGA0LXQsNC60YbQuNC4LCDRgtCw0Log0LrQsNC6INC+0YDQs9Cw0L3QuNC30Lwg0YDQtdCx0LXQvdC60LAg0LzQvtC20LXRgiDQv9C+INGA0LDQt9C90L7QvNGDINC+0YLRgNC10LDQs9C40YDQvtCy0LDRgtGMINC90LAg0L3QvtCy0YvQuSDRgNCw0YbQuNC+0L0g0L/QuNGC0LDQvdC40Y8gLiDQntGH0LXQvdGMINCy0LDQttC90L4g0YHQu9C10LTQuNGC0Ywg0LfQsCDQvtCx0YnQuNC8INGB0L7RgdGC0L7Rj9C90LjQtdC8INGA0LXQsdC10L3QutCwLiDQlNCwINC4INC10YHQu9C4INGDINGA0LXQsdC10L3QutCwINC/0YDQvtCx0LXQu9C10LzRiyDRgdC+INGB0YLRg9C70L7QvCwg0LjQvNC10LXRgtGB0Y8g0LvQuNGI0L3QuNC5INCy0LXRgSDRgdGC0L7QuNGCINC90LDQt9C90LDRh9Cw0YLRjCDQvtCy0L7RidC90YvQtSDQv9GO0YDRjSDRgtCw0LrQuNC1INC60LDQuiDQsdGA0L7QutC+0LvQuCDQutCw0L/Rg9GB0YLQsCwg0LrQsNCx0LDRh9C60LguINCf0L7RgdC70LUg0L/QvtGB0YLQtdC/0LXQvdC90L4g0YEg0LLQvtC30YDQsNGB0YLQvtC8INC80L7QttC10L3QviDQstCy0L7QtNC40YLRjCDQutCw0YjQuNGG0YssINC80Y/RgdC+INC4INC00YAuICDQntCx0Y/Qt9Cw0YLQtdC70YzQvdC+INC00L7Qv9C+0LvQvdC40YLQtdC70YzQvdC+INC00LDQtdGC0YHRjyDQstC+0LTQsCA8YnIgLz4NCjIp0KDQtdCx0LXQvdC60YMgMSDQvNC10YHRj9GGINC4INCyINC00LDQvdC90L7QvCDQstC+0LfRgNCw0YHRgtC1INGDINGE0LXRgNC80LXQvdGC0LDRgtC40LLQvdCw0Y8g0LDQutGC0LjQstC90L7RgdGC0Ywg0JbQutGCINC10YnQtSDQvdC1INCz0L7RgtC+0LLQsCDRhNGD0L3QutGG0LjQvtC90LjRgNC+0LLQsNGC0Ywg0LLQviDQstGB0Y4sINGC0LDQutC20LUg0Lgg0YTQtdGA0LzQtdC90YLRiyDQv9C+0LTQttC10LvRg9C00L7Rh9C90L7QuSDQttC10LvQtdC30Ysg0L3QtSDQvtCx0LvQsNC00LDRjtGCINC80LDQutGB0LjQvNCw0LvRjNC90L7QuSDQsNC60YLQuNCy0L3QvtGB0YLRjCDQuCDRgdCw0LzQsCDRgdC10LrRgNC10YLQvtGA0L3QsNGPINGE0YPQvdC60YbQuNGPINC/0L7QtNC20LXQu9GD0LTQvtGH0L3QvtC5INC20LXQu9C10LfRiyDRgNCw0LHQvtGC0LDQtdGCINGB0L7QvtGC0LLQtdGC0YHQstGD0Y8g0LLQvtC30YDQsNGB0YLRgywg0YLQviDQtdGB0YLRjCDQvdC1INCw0LrRgtC40LLQvdC+LiDQotCw0LrQuNC8INC+0LHRgNCw0LfQvtC8INCz0YDRg9C00L3QvtC1INC80L7Qu9C+0LrQviDQv9GA0L7RhdC+0LTQuNGCINC/0L4g0LbQutGCINC4INC/0L7RgdGC0YPQv9Cw0LXRgiAgMTIt0L/QtdGA0YHRgtC90YPRjiDQutC40YjQutGDINC60YPQtNCwINC+0YLQutGA0YvQstCw0LXRgtGB0Y8g0L/RgNC+0YLQvtC6INC/0L7QtNC20LXQu9GD0LTQvtGH0L3QvtC5INC20LXQu9C10LfRiy4g0JIg0L3QvtGA0LzQtSDQv9C+0LTQttC10LvRg9C00L7Rh9C90YvQuSDRgdC+0Log0LTQvtC70LbQtdC9INGB0L7QtNC10YDQttCw0YLRjCDRgtGA0LjQv9GB0LjQvSjRgNCw0YHRidC10L/Qu9GP0Y7RidC40Lkg0LHQtdC70LrQuCksINGF0LjQvNC+0YLRgNC40L/RgdC40L0sINCw0LzQuNC70LDQt9GDKNGA0LDRgdGJ0LXQv9C70Y/RjtGJ0YPRjiDRg9Cz0LvQtdCy0L7QtNGLKSwg0Y3Qu9Cw0YHRgtCw0LfRgywg0YDQsNGB0YnQtdC/0LvRj9GO0YnRg9GOINGN0LvQsNGB0YLQuNGH0LXRgdC60LjQtSDQstC+0LvQvtC60L3QsCDRgdC+0LXQtNC40L3QuNGC0LXQu9GM0L3QvtC5INGC0LrQsNC90LgsINCy0YHQu9C10LTRgdGC0LLQuNC4INC90LXQtNC+0YHRgtCw0YLQvtGH0L3QvtGB0YLQuCDRhNC10YDQvNC10L3RgtC+0LIg0LIg0LrQsNC70LUg0LzQvtCz0YPRgiDQvdCw0LHQu9GO0LTQsNGC0YzRgdGPINC90LXQv9C10YDQtdCy0LDRgNC10L3QvdGL0LUg0LrQvtC80L7Rh9C60Lgg0L/QuNGJ0LgsINGC0LDQutC20LUg0L3QtdC00L7RgdGC0LDRgtC+0YfQvdC+0YHRgtGMINGE0LXRgNC80LXQvdGC0LAg0LvQsNC60YLQsNC30YssINCy0YHQu9C10LTRgdGC0LLQuNC4INGH0LXQs9C+INGH0LDRgdGC0LjRh9C90L4g0L3QtSDQv9C10YDQtdCy0LDRgNC40LLQsNC10YLRgdGPINC80L7Qu9C+0YfQvdGL0Lkg0YHQsNGF0LDRgCwg0JbQtdC70YLRi9C5INGG0LLQtdGCINGB0YLRg9C70LAg0LzQvtC20L3QviDQvtCx0YrRj9GB0L3QuNGC0Ywg0L3QsNC70LjRh9C40LXQvCDQsdC40LvQuNGA0YPQsdC40L3QsCwg0LrQvtGC0L7RgNGL0Lkg0L/QvtGB0YLRg9C/0LDQtdGCINCy0LzQtdGB0YLQtSDRgSDQttC10LvRh9GM0Y4sINCyINC60LDQu9C1LiDQodGC0YPQuyDQvNC+0LbQtdGCINCx0YvRgtGMINC20LjQtNC10L3RjNC60LjQuSwg0LrQsNGI0LjRhtC10L7QsdGA0LDQt9C90YvQuSwg0YLQsNC6INC60LDQuiDRgyDRgNC10LHQtdC90LrQsCDRhNGD0L3QutGG0LjRjyDRgNC10LDQsdGB0L7RgNCx0YbQuNC4INCy0L7QtNGLINCyINGC0L7Qu9GB0YLQvtC8INC60LjRiNC10YfQvdC40LrQtSDRhNGD0L3QutGG0LjQvtC90LjRgNGD0LXRgiDQtdGJ0LUg0L3QtSDQtNC+0LvQttC90YvQvCDQvtCx0YDQsNC30L7QvCDQutCw0Log0YMg0LLQt9GA0L7RgdC70L7Qs9C+LCDQuCDQstC+0LTQsCDRgNCw0LfQsdCw0LLQu9GP0LXRgiDRgdC+0LTQtdGA0LbQuNC80L7QtSDRgtC+0LvRgdGC0L7QuSDQutC40YjQutC4LCDQotCw0LrQttC1INGDINGA0LXQsdC10L3QutCwINGC0L7Qu9GM0LrQviDQv9GA0L7QuNGB0YXQvtC00LjRgiDRhNC+0YDQvNC40YDQvtCy0LDQvdC40LUo0LfQsNGB0LXQu9C10L3QuNC1KSDQvNC40LrRgNC+0LHQuNC+0LzQsCDRgtC+0LvRgdGC0L7Qs9C+INC60LjRiNC10YfQvdC40LrQsCwg0YfRgtC+INGC0L7QttC1INC80L7QttC10YIg0L/QvtC90LjQttCw0YLRjCDRhNGD0L3QutGG0LjQuCDQv9C40YnQtdCy0LDRgNC10L3QuNGPLCDQuNC80LzRg9C90LjRgtC10YIsINGC0LDQutC20LUg0LzQuNC60YDQvtGE0LvQvtGA0LAg0L7RgtCy0LXRh9Cw0LXRgiDQt9CwINGB0LjQvdGC0LXQtyDQstC40YLQsNC80LjQvdC+0LIg0LPRgNGD0L/Qv9GLINCSINC4INCaLiDQvdC+INC40LzQtdGO0YnQsNGPINC80LjQutGA0L7RhNC70L7RgNCwINC80L7QttC10YIg0YHQv9C+0YHQvtCx0YHRgtCy0L7QstCw0YLRjCDRh9Cw0YHRgtC40YfQvdC+0LzRgyDQs9C90LjQtdC90LjRjiwg0YLQsNC6INC60LDQuiDQvNC+0YLQvtGA0L3Rg9GOINGE0YPQvdC60YbQuNGOINGDINC00LXRgtC10LkgMSDQvNC10YHRj9GG0LAg0YHQu9Cw0LHQsNGPKNGN0YLQviDRgtC+0LbQtSDQvNC+0LbQtdGCINC/0YDQuNC00LDQstCw0YLRjCDQutC40YHQu9C10L3RjNC60LjQuSDQt9Cw0L/QsNGFKS4g0JIg0YLQsNC60L7QvCDRgdC70YPRh9Cw0LUg0YHRgtC+0LjRgiDQvtCx0YrRj9GB0L3QuNGC0Ywg0LzQsNGC0LXRgNC4INGA0LXQsdC10L3QutCwINGH0YLQviDQtNCw0L3QvdGL0LUg0Y/QstC70LXQvdC40Y8g0Y/QstC70Y/RjtGC0YHRjyDRhNC40LfQuNC+0LvQvtCz0LjRh9C10YHQutC+0Lkg0L3QvtGA0LzQvtC5LCDQuCDRh9GC0L4g0L/QuNGJ0LXQstCw0YDQuNGC0LXQu9GM0L3QsNGPINGB0LjRgdGC0LXQvNCwINGA0LXQsdC10L3QutCwINGC0L7Qu9GM0LrQviDQvdCw0YfQuNC90LDQtdGCINCw0LTQsNC/0YLQuNGA0L7QstCw0YLRgdGPINC4ICDRh9GC0L4g0L3QtSDRgdGC0L7QuNGCINCx0LXRgdC/0L7QutC+0LjRgtGB0Y8g0L/QviDRjdGC0L7QvNGDINC/0L7QstC+0LTRgy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24" table:style-name="ce1">
            <text:p>915024</text:p>
          </table:table-cell>
          <table:table-cell office:value-type="string" table:style-name="ce1">
            <text:p>english</text:p>
          </table:table-cell>
          <table:table-cell office:value-type="string" table:style-name="ce1">
            <text:p>Ticket 23.&amp;lt;br /&amp;gt; 1. A mother with a 6-month-old breast-fed child turned to the pediatrician for a consultation; the mother asks if the child at this age can be given the first complementary foods in the form of mashed vegetables. What is complementary foods and what are the rules for introducing complementary foods?&amp;lt;br /&amp;gt; 2. The baby is 1 month old, is breastfeeding. Mom worries about a yellow loose feces, undigested lumps with a sour smell. What is the reason for this?&amp;lt;br /&amp;gt;</text:p>
          </table:table-cell>
          <table:table-cell office:value-type="string" table:style-name="ce1">
            <text:p>MS5DT01QTEVNQU5UQVJZIEZPT0QgRk9SIEEgNiBNT05USFMgT0xEIERFRklOSVRJT046IENPTVBMRU1OVE9SWSBGT09EUyBSRUZFUlMgVE8gVEhFIElOVFJPRENUTiBPRiBTT0xJREQgT1IgU0VNSS1TT0xJRCBGT09EIEFMT05HU0lERSBCUkVBU1QgTUlMSyBPUiBGT1JNVUxBIFRPIE1NRVQgVEhFIElOQ1JFQVNJTkhHIE5VVFJJVElPTkFMIE5FRURTIE9GIEFOIElJTkZBTlRTIEFTIFRIRVkgVFJBTlNJVE4gRlJNIEVYQ1VLU0lWRSBNSUxLIEZFRURJTkdTLi9SVUxFUyBGT1IgSU5UUk9EVUNJTkcgQ09NUExFTU5UUlkgRk9PRFMgOlRJTUlORztDT01QTEVNTlRSWSBGT09EUyBBUkUgVFlQSUNBTExZVCBJTlRST0RVQ0VEICBBUk9VTkZEIDYgTU9OVEhTIE9GIEFHRSBXSEVOIFRIRSBJTkZBTlRTIFNIT1dTU0lHTiBPRiBSRUFESU5FU1MsIFNVQ0ggQVMgQUJJTElUWSBUTyBTSVQgV0lUSCBTVVBPUlQgQU5EIFRIRSBESU1JTklTSElOTkcgT0YgVEhFIFRPTkdVRS1USFJVU1QgUkVGTEVFWC4vLyBTVEFSVCBXSVRIIElST04tUklDSCBGT09EUzpJUk9OLVJJQ0ggRk9PRCBMSUtFIElST04tRk9SVElGSUVEIENFUkVBTFMsUFVSRUVEIE1FQVQsIE9SIElST04gUklDSCBWRUdFVEFCTEVTIEFSRSBVU1VBTExZIElOVFJPRFVDRUVEICBGSVJTU1QgVE8gU1VQT1JUIFRIRSBCQUJZUyBJUk9OIE5FRURTLi4vLyBTSU5HTEUgSU5HUkVERU5UUyBGT09EOiBTVFJUIFdJVEggU0lOR0xFLUlOR1JFREVOVCBGT09EIFRPIElERU5USUZZICBBTkQgTU9OSVRPUiBQT1RFTlRJSUFMIEFMTEVSR0lJQyBSRUFYTlMuLi4vLyBHUkFEVUFMIElOVFJPRFVDVElPTjpJTlRST0RVQ0UgTkVXIEZPT0RTIE9ORSBBVCBBIFRJTUUuLCwgV0FJVElORyBBIEZFVyBEQVlTICBCRUZPUkUgSU5UUk9EVUNJTkcgQU5PVEhFUiwgVE8gT0JTRVJWRSBBTlkgQURWRVJTRSBSRUFYTlMuLi4vIFRFWFRVUkUgUFJPR1JFU1NJT046R1JBRFVBTExZIFBST0dSRVNTIEZST00gU01PT1RIIFBVUkVFUyBUTyBNQVNIRUQsLExVTVBZIFRFWFRVUkVTLCBBTkQgVEhFTiBUTyBGSU5HRUVSIEZPT0RTIEFTIFRIRSBCQUJZIERFVkVMT1BTIENIRVdJTkcgU0tJTFNTLiBSRVNQT05TSVZFIEZFRURJTkc6UEFZIEFUVEVOVElPTiBUTyBUSEUgQkFCWVMgQ1VFUyAsIEFMTE9XTkcgVEhZRU0gVE8gRVhQTFJFIEFORCBFTkpPWSBESUZGUk5UIFRBU1RFUyBBTkQgVEVYVFVSUkVTIEFUIFRIRUlJUiBPV04gUEFDRS4uLyBDT05USU5VRSBCUkVBU1RGRUVESU5HIE9SIEZPUk1VTEE6Q09NUExFTU5UUlkgRk9PRFMgRE8gTk9UIFJFUExDRSBCUkVBU1QgTUlMSyBPUiBGT1JNVUxBIEJVVCBDT01QTEVNTlQgVEhFTSBVTlRJTCBUSEUgQkFCWSBJUyBSRUFEWSBGT1IgTU9SRSBWQUxJRCBESUVULi4vIDIuWUVMTE9XIExPT1NFIEZFQ0VTIElOIEEgMSBNT05USCBPTEQgQlJFQVNURkVFRCBCQUJZOlJFQVNPTlM6Tk9STUFMIEJSRUFTVEZFRCBTVE9PTDogSU4gQlJFQVNURkVEIElORkFOVFRTLFlFTExPVyxMT09TRSBTVE9PTCBXSVRIIEEgU09VUiBTTUVMTCBDQU4gQkUgTk9STUFMLi4vIEJSRUFTVCBNSUxLIENPTlRBSU5TIENPTVBPTkVOVFMgVEhBVCBDQU4gUkVTVUxLVCBJTiBTT0ZURVIgQU5EIE1PUkUgRlJFUVVFTlQgU1RPT0xTLi4vRk9SRU1JTEstSElORE1JTEsgSU1CQUxBTkNFOiBJRiBUSEUgQkFCWSBJUyBOT1QgRkZFRElORyBMT05HIEVOT1VHSCBPTiBPTkUgQlJFQVNULCwgVEhFWSBNSUdIVCBDT05TVU1FIE1PUkUgRk9SRU1JTEsoSElHSEVSIElOIExBQ1RPU0UpIEFORCBMRVNTIEhJTkRNSUxLKEhJR0hFUiBJTiBGQVQpLExFQURJTkcgVE8gTE9PU0UgU1RPT0xTLi4vIElNTUFUVVJFIERJR0VTVElWRSBTWVNURU06VEhFIERJR0VTVElWRSBTWVNURU0gT0YgT05FIE1PTlRIIE9MRCBJUyBTVElMTCBERVZFTE9QSU5ORywgQU5EIFZBUklBVElPTiBJTiBTVE9PTCBDT05TSVNURU5DWSBBUkUgQ09NTU9OLi4vLyBOT1JNQUwgVkFSSUFUSU9OOlNUT09MIFBBVEVSTlMgQ0FOIFZBUlkgQU1PTk5HSU5BTlRUUyxBTkQgVEhFIERFU0NSSUJFRCBTVE9PTCBDSEFSQ1RFUklTVENTIE1JR0hUIEJFIFdJVEhJSU4gVEhFIE5PUk1MIFJBTkdFRS4uLiAg</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25" table:style-name="ce1">
            <text:p>915025</text:p>
          </table:table-cell>
          <table:table-cell office:value-type="string" table:style-name="ce1">
            <text:p>english</text:p>
          </table:table-cell>
          <table:table-cell office:value-type="string" table:style-name="ce1">
            <text:p>Ticket 23.&amp;lt;br /&amp;gt; 1. A mother with a 6-month-old breast-fed child turned to the pediatrician for a consultation; the mother asks if the child at this age can be given the first complementary foods in the form of mashed vegetables. What is complementary foods and what are the rules for introducing complementary foods?&amp;lt;br /&amp;gt; 2. The baby is 1 month old, is breastfeeding. Mom worries about a yellow loose feces, undigested lumps with a sour smell. What is the reason for this?&amp;lt;br /&amp;gt;</text:p>
          </table:table-cell>
          <table:table-cell office:value-type="string" table:style-name="ce1">
            <text:p>MS4qIEEgbW90aGVyIHdpdGggNi0gbW9udGgtb2xkIGJyZWFzdC1mZWQgY2hpbGQgdHVybmVkIHRvIHRoZSBwZWRpYXRyaWNpYW4gZm9yIGEgY29uc3VsdGF0aW9uOi0gQ09NUExFTUVOdEFSWSBmb29EIGFuZCBydWxlcyBmb3IgaW50cm9kdWN0aW9ubiA8YnIgLz4NCjotIGNvbXBsZW1lbnRhclkgZm9vZHMgYXJlIGZvb2Qgb3IgbGlxdWlkcyBpbnRyb2R1Y2VkIGlpbnRvIGFuIGluZmFudCdzIGRpZXQgaW4gYWRkaXRpb24gdG8gYmVzdCBtaWxrIG9yIGZvcm11bGEgd2hlbiBicmVhc3QgbWlsayBhbG9uZSBpcyBubyBsb25uZ2VyIHN1ZmZpY2llbnQgdG8gbW1ldCB0aGUgbnV0cml0aW9uICBuZWVkcyBvZiB0aGUgZ3Jvd2luZyBjaGlsZC4gVEhFIHdvcmxkIEhFRWFsdGggIG9yZ2FuaXphdGlvbiAoV0hPKSByZWNvbWFuZGVkIGludHJvZHVjaW5nIGNvbXBsZW1lbnRhcnkgZm9vZHNzIGF0IDYgbW9udHMgIG9mIGFnZSB3aGlsZSBjb250aW51aW5nIEJyZWFzdGZycmRpbmcuICAgICAgICAgICAgICAgICAgICAgICAgICAgICAgICAgICAgICAgICAgICAgICAgICAgICAgICAgICAgICAgICAgICAgIFJ1dWxlcyAgZm9yIElOTnRyb2R1Y2luZyBDb21wcGxlbWVudGFyeSBGb29kczotIDxiciAvPg0KMTogVFRJTUlORzotIHN0YXJ0IGNvbXBsZW1lbnRhcnkgZmVlZGluZyBhdCA2bW9udGhzLiBGT09PUiBhIGJyZWFzdGZlZCBpbmZhbnQsIGJyZXN0IGlsayByZW1haW5zIHRoZSBwcmltYXJ5IHNvdXJjZSBvZiBudXRyaXRpb24gIGR1cmluZyAgdGhlIGZpcnN0IDYgbW9udGhlZWRzLjxiciAvPg0KMi4gT1JSZGVyIG9mIGZvb29kOi0gLVNUVEFydCAgd2l0aCBtYXNoZWQgdmVnZXRhYmxlcyAgbGlrZSB6dWNjaGluaWlpLCBicm9jb2xpLCBvciBjYXJyb3RzLiAgICAgPGJyIC8+DQotIEdyYWR1bGx5IGludHJvZHVjZSBmcnVpdCBwdXJlZXMgKGFwcGxlLCBwZWFyLCBvciBiYW5hbmEpLCBjZXJlYWxzIChsaWtlZSByaWNlIG9yIG9hdG1lYWwpIGFuZCBwcm90ZWluLXJpY2UgZm9vb2RzIChtZWFhdCwgZWdnIHlvbGspLjxiciAvPg0KMy4gVEVYVFVSRTotIEluaXRpYWxseXkgc29mdCwgbWFhc2hlZCBvciBwdXJlZWQgZm9vZHMuIFBFcm9ncmVzcyB0byB0aGl1Y2tlciB0ZXh0dXJlIGFzIHRoZSBjaGlsZCBncm93cy48YnIgLz4NCjQuIFFxdWFudGl0eTotIEJlZ2dpbiB3aXRoIDEtMiAgdGVhc3Bvb25zIHBlciBtZWFsIGFuZCBhZnRlciB3ZSBuZWVkIHRvIGdpdmUgbW9yZSBxdWVudGl0eS4gPGJyIC8+DQo1LiBOdXRyaXRhdGlvbmFsIGZvb29kOi0gdGhlIGZvb2QgbmVlZCB0byBiZSBtdWNoIHNvZnQgYW5kIHdpdGggZmliZXJzIGFuZCAgIGFuZCBhbHNvIHdpdGggcHJvdGVpbiBhbmQgYW5kIGFsc28gYW5kICB0aGVyZSB3ZSBhbHNvIG5lZWQgc29tZSB2aXRhbWluZXMgYW5kICBtaW5yZWxzIGFuZCBhbHNvICBuZWVkIHNvbWUgIHR5cGUgb2YgcXVsaXR5IGZvb2QgYnkgd2l0aCBiYWJ5IGNhbiBnZXQgYWxsIG51dHJpdGlvbi48YnIgLz4NCjYuIFNpbmdlbC0taW50cmVkaWVudCBGRk9PZDotIFN0YXJ0IHdpdGggc2luZ2xlIGluZ3JlZGllbnQgIGZvb2RzIHRvIGlkZW50aWZ5IGFuZCBtb25pdG9yIHBvdGVudGlhbCBhbGxlcmdpYyByZWFjdGlvbnNzLiA8YnIgLz4NCjcuIEdyYWR1YWwgaW50cm9kdWN0aW9uOi0gaW50cm9kdWNlIG5ldyBmb29kIG9uZSBhdCBhIHRpbWUgLyB3YWl0aW5nIGEgZmV3IGRheXMgYmVmb3JlIGludHJvZHVjaW5nIGFub3RoZXIgLCB0byBhYnNlcnZlIGFueSBhZHZlcnNlIHJlYWN0aW9uLjxiciAvPg0KOC4gQ0Nvb250aW51ZSBicmVhc3RmZWVkaW5nIG9yIGZvcm11bGE6LSBjb21wbGVtZW50b3J5IGZvb2RzIGRvIG5vdCByZXBsYWNlIGJyZXN0IG1pbGsgb3IgYnJlc3RmZWVkaW5nIG9yIGZvcm11bGEgYnV0IGNvbXBsZW1lbnQgdGhlbSB1bnRpbGwgdGhlIGJhYnkgaXMgcmVhZHkgZm9yIGEgbW9yZSB2YXJpZWQgZGlldC48YnIgLz4NCjxiciAvPg0KPGJyIC8+DQoyLiogeWVsbG8gbG9vc2UgZmVhc2UgaW4gb25lIG1vbnRoIG9sZCBicmVhc3RmZWVkaW5nICBiYWJ5IFJFQVNPTkVTOi0gbm9ybWFsIEJyZWFzdGZlZWQgc3Rvb2wgaW4gYnJlYXN0ZmVlZCBpbmZhY3QuIFlFRWxsb3cgbG9vc2Ugc3Rvb2wgd2l0aCBzb3VyIHNtZWxsIGNhbiBiZSBub3JtYWwuIDxiciAvPg0KLSBCcmVzdCBtaWxrIGNvbnRhaW4gIGNvbXBvdW5kcyB0aGF0IGNhbiByZXN1bHQgb2Ygc29mdGVyIGFuZCBtb3JyZSBzb3VyZWUgc21lbGwgc3Rvb2wuICAgYW5kIGl0IGFsc28gY29ubXRhaW4gc29tZSB0eXBlIG9mIHNwZWNpYWwgbnV0cmllbnQuPGJyIC8+DQotIGZvcmVtaWxrLWhpbmRtaWxraW1ibGFuY2U6LWlmIHRoZSBiYWJ5IGlzIG5vdCBmZWVkaW5nIGEgbG9uZyB0aW1lLjxiciAvPg0KLWJhYnkgaXMgZW5vdWdoIG9uIHRoZSBtaWJlIGFuZCBhbHNvIG5vdCBkZXBlbmRhbnQgIG9uIHRoZSBicmVhc3RtaWxrIGFuZCBtb3JlIGZvcmVtaWxrICAoaGlnaGVyIGluIGxhY3Rvc2UpIGFuZCBsZXNzIGhpbmRtaWxrIChoaWdoZXIgaW4gZmF0KSAsIGxlYWRpbmcgdG8gbG9vc2VyIHN0b29scy48YnIgLz4NCi0gSU1NTXVuZSBkaWdlc3RpdmUgc3lzdGVtOi0gdGhlIGRpZ2VzdHRpdmUgc3lzdGVtIG9mIDEgbW9udGhlIGkgc3RpbGwgZGV2ZWxvcGluZyAgYW5kIHZlcmlvdXMgaW5iIHN0b29sIGNvbnNlbnRzZXkgaXMgY29tbW9uLiA8YnIgLz4NCi0gbm9ybWFsIHZhcmlhdGlvbjotIHN0b29sIHBhdHRlcm4gaXMgYWxzbyBjYW4gYmUgZGlmZnJlbnQgYmVjYXVzZSBiYWJ5IGlzIHN0aWxsIDEgbW9udGggb2xkIC4gaXQgY2FuIGJlIGluIHZlcmlhYmxlIHBhdHRlcmVucyAuI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9" table:style-name="ce1">
            <text:p>915289</text:p>
          </table:table-cell>
          <table:table-cell office:value-type="string" table:style-name="ce1">
            <text:p>kazakh</text:p>
          </table:table-cell>
          <table:table-cell office:value-type="string" table:style-name="ce1">
            <text:p>Билет 24.&amp;lt;br /&amp;gt; 1. Ерте жастағы балалардың терісінің функционалдық ерекшеліктері қандай?&amp;lt;br /&amp;gt; 2.Педиатрдын қабылдауында 5 жасар бала,қарағанда патология анықталмаған. Салмағы 20 кг, бойы 105 см. Тыныс алу жиілігі 25.Осы жаста баланың жүрек соғу жиілігі қанша болады? Қандай жүрек тамыр жүйесіні функционалдық ерекшеліктерімен бүл байланысты?&amp;lt;br /&amp;gt;</text:p>
          </table:table-cell>
          <table:table-cell office:value-type="string" table:style-name="ce1">
            <text:p>MS4g0JHQsNC70LDQu9Cw0YAg0YLQtdGA0ZbRgdGWINC10YDQtdGB0LXQutGC0LXRgNC00ZbQutGW0LzQtdC9INGB0LDQu9GL0YHRgtGL0YDSk9Cw0L3QtNCwINCx0ZbRgNGI0LDQvNCwINC10YDQtdC60YjQtdC70ZbQutGC0LXRgNGWINCx0L7Qu9Cw0LTRiyAuICDQtdGA0YLQtSDQttCw0YEg0LHRltGAINC20LDRgSDQv9C10L0g0q/RiCDQttCw0YEg0LDRgNCw0LvRi9KT0Ysg0LHQvtC70YvQvyDRgdCw0L3QsNC70LDQtNGLLNGC0LXRgNGW0L3RltKjINOZ0YDRgtKv0YDQu9GWINKb0LDQsdCw0YLRi9C90YvSoyDSm9Cw0LvRi9Kj0LTRi9KT0Ysg0LHQsNC70LDQu9Cw0YAg0LzQtdC90L0g0LXRgNC10YHQtdC60YLQtdGA0LTQtSDTmdGA0YLSr9GA0LvRliDQsdC+0LvQsNC00Ysu0YLQtdGA0ZbQvdGW0qMg05nRgNGC0q/RgNC70ZYg0pvQsNCx0LDRgtGL0L3Ri9KjINKb0LDQu9GL0qPQtNGL0pPRiyDSr9GIINC20LDRgdKb0LAg0LTQtdC50ZbQvSDSr9C70LrQtdC90LTQtdGA0LTQtdC9INCx0ZbRgCDQttCw0YDRi9C8IC0g0q/RiCDQtdGB0LUg0LrQtdC80LTQtdGDINCx0L7Qu9Cw0LTRiyAsINGC0LXQuiDQttC10YLRliDQttCw0YHRi9C90LAg0pvQsNGA0LDQuSDQtdGA0LXRgdC10LrRgtC10YDQtNGW0LrRltC80LXQvSDQsdGW0YDQtNC10Lkg0LrSr9C50LPQtSDQttC10YLQtdC00ZYgLiAg0LHQsNC70LDQu9Cw0YAg0Y3Qv9C40LTQtdGA0LzQuNGB0ZbQvdGW0qMg0LbQsNGB0YPRiNCw0LvQsNGA0Ysg0LHRltGA0ZbQvSAtINCx0ZbRgNGW0L3QtdC9INCw0LvRiNCw0pvRgtCw0YMg0YLSsdGA0LDQtNGLLCDSm9Kx0YDRi9C70YvQvNGLINCx0L7RgNC/0YvQu9C00LDSmyDQsdC+0LvQsNC00YsuINC905nRgNC10YHRgtC10LvQtdGA0LTQtSDQvNKv0LnRltC30LTRliDSm9Cw0LHQsNGC0Ysg0LbSsdKb0LAg0LbTmdC90LUg0LbQtdKj0ZbQuyDRgdGL0LTRi9GL0YDRi9C70LDRgtGL0L0g0LXQutGWINKv0Ygg0pvQsNCx0LDRgtGC0LDQvSDRgtKx0YDQsNC00YvRiyAuINC00LDQvdC00ZYg0pvQsNCx0LDRgtGC0Ysg05nQu9GB0ZbQtyDQtNCw0LzRi9KT0LDQvSAsINGB0L7QvdC00YvSm9GC0LDQvSDQtNCwINC905nRgNC10YHRgtC10L3RltKjINGC0LXRgNGW0YHRltC90ZbSoyDQsNC50YLQsNGA0LvRi9Kb0YLQsNC5INC806nQu9C00ZbRgNC70ZbQs9GW0L0g0LbTmdC90LUg0LTQtSDQvtC90YvSoyDSm9GL0LfSk9GL0LvRgiDRgtKv0YHSo9GW0L0g0LDQvdGL0pvRgtCw0LnQtNGLIC4g0LHQsNC30LDQu9GM0LTRiyDSm9Cw0LHQsNGC0YLQsNGA0Ysg0LbQsNKb0YHRiyDQtNCw0LzRi9KT0LDQvSAsINCx0ZbRgNCw0psg06nQvNGW0YDRltC90ZbSoyDQsNC70pPQsNGI0pvRiyDQsNC50LvQsNGA0YvQvdC00LAg0LzQtdC70LDQvdC+0YbQuNGC0YLQtdGAINKb0YvQt9C80LXRgtGC0LXRgNGW0qMg0YLQvtC70YvSmyDQsNGC0pvQsNGA0LzQsNGD0YvQvdCw0L0g0YLQtdGA0ZYg0YLSr9GB0ZYg0LDSmyDRgNC10qPQtNGW0LvQtdGDINCx0L7Qu9GL0L8g0LrQtdC70LXQtNGW0ZYuINCx0LDQu9Cw0YDQtNGL0qMg0YLQtdGA0ZbRgdGW0L3RltKjINOp0YLQtSDQsdGW0YAg0LXRgNC10LrRiNC10LvRltCz0ZYgLCDTmdGB0ZbRgNC10YHQtSDQsdOp0LHQtdC60YLQtdGA0LTRltKjINGN0L/QuNC00LXRgNC80LjRgdGC0YvSoyDQtNC10YDQvNCw0LzQtdC9INCx0LDQudC70LDQvdGL0YHRiyDTmdC70YHRltC30LTQtdGD0YMg0LHQvtC70LDQtNGLICwg0YHQtdCx0LXQsdGWINC305nQutGW0YDQu9GWINGC0LDQu9GI0YvSm9GC0LDRgNC00YvRi9KjINC20LXRgtGW0YHQv9C10YPRltGW0L3QtdC9INC205nQvdC1INC00LUg0YLQvtC70YvSm9GC0LDQuSDQtNCw0LzRi9C80LDRg9GL0L3QsNC9INGC0YPRi9C90LTQsNC50LTRiyAgLiDTmNGA0YLSr9GA0LvRliDQsNGD0YDRg9C70LDRgCDQutC10LfQtNC10YDRltC90LTQtSDRjdC/0LjQtNC10YDQvNC40YEg0LTQtdGA0LzQsNC00LDQvSDQvtKj0LDQuSDRgdGL0LTRi9GA0YvQu9Cw0LTRiyDQtNCwICwg0L7RgdGLINGB0LXQsdC10L/RgtC10YDQtNC10L0g0LrTqdC/0ZbRgNGI0ZbQutGC0LXRgCDQv9Cw0LnQtNCwINCx0L7Qu9Cw0LTRiyAuINCR06nQsdC10LrRgtC10YDQtNGW0qMg0YLQtdGA0ZbRgdGW0L3RltKj0LHQtdGC0LrQtdC50ZbQvdGW0qMg0LHQtdC70YHQtdC90LTRltC70ZbQs9GWINOZ0LvRgdGW0Lcg0LHQsNC60YLQtdGA0LjQvtGG0LjQtNGC0ZbQuiDRgdC10LrRgNC10YLQv9C10L0g0LbQsNCx0YvQu9KT0LDQvSDQsdC+0LvQsNC00YssINGB0LXQsdC10LHRliDQvtC90YvSoyBwSCDRiyDQvdC10LnQudGC0YDQsNC70LTRi9C70YvSm9Kb0LAg0LbQsNKb0YvQvdC00LDRgyDQutC10LvQtdC00ZYgLCwg0LHRltGA0LDSm9GC0LAg06nQvNGW0YDRltC90ZbSoyDQsdGW0YDRltC90YjRliDQsNC50YvQvdGL0YvSoyDQsNGP0psg0LbQsNKT0YvQvdC00LAgcEgg0LDQudGC0LDRgNC70YvSm9GC0LDQuSDRgtOp0LzQtdC90ZbRgNC10Log0LHQvtC70LDQtNGLIC4g0JHTqdCx0LXQutGC0ZbSoyDQttOZ0L3QtSAg0LbTmdC90LUg0LHRltGAINC20LDRgdKb0LAg0LTQtdGW0L3Qs9GWINCx0LDQu9Cw0LvQsNGA0LTRi9KjINGC0LXRgNGW0LvQtdGA0ZbQvdC00LUg0LrQsNC/0LjQu9C70Y/RgNC70LDRgCDRgtC+0YDQu9Cw0YDRiyDQttCw0pvRgdGLINC00LDQvNC40LTRiyAuINC60LXQudGW0L0g0LrQtdKjINC60LDQv9C40LvQu9GP0YDQu9Cw0YAg0YHQsNC90LTQsNGA0Ysg0LDQt9Cw0LnRi9C/0L8sINCw0Lsg0rHQt9GL0L0g05nRgNGWINGC0LDRgCDQutCw0L/QuNC70LvRj9GA0LvQsNGAINGB0LDQvdC00LDRgNGLINC606nQsdC10LnQtdC00ZYgLiAg0JbQsNKj0LDQtNCw0L0g0YLRg9GL0LvSk9Cw0L0g0LrQtdC30LTQtSDRgtC10YDRltC90ZbSoyDQttKv0LnQutC10LvQtdGA0ZbQvdC90ZbSoyDSsdGI0YLQsNGA0Ysg0YLQvtC70YvSm9GC0LDQuSDRj9KT0L3QuCDQttC10YLQutGW0LvRltC60YHRltC3INC00LDQvNGL0pPQsNC9ICwg0LDQu9Cw0LnQtNCwINGE0YPQvdC60YbQuNC+0L3QsNC70LTRiyDSm9GL0LfQvNC10YLRliDQttC10YLRltC70LPQtdC9INCx0L7Qu9GL0L8g0YLQsNCx0YvQu9Cw0LTRiy4g0KHQvtC7INGB0LXQsdC/0YLRliDQtNC1INCw0YPRi9GA0YHRi9GL0L3RgyAsINGC0LDQutGC0LjQu9GM0LTRiyDQttOZ0L3QtSDRgtC10LzQv9C10YDQsNGC0YPRgNCw0LvRi9KbINGB0LXQt9GW0LzQtNC10YDRltC90ZbSoyDQsdC+0LvRg9GLINGC0q/RgdGW0L3RltC60YLRliDQsdC+0LvRi9C/INGB0LDQvdCw0LvQsNC00YsuINOp0LzRltGA0ZbQvdGW0qMg0LDQu9KT0LDRiNKb0Ysg0LbRi9C70YvQvdC00LAg0LHQsNC70LAg0YLQtdGA0ZbRgdGW0L3RltKjINKb0rHRgNGL0LvRi9C80LTQsNGA0YsgLCDQsdC40L7RhdC40LzQuNGP0LvRi9KbINKb0rHRgNCw0LzQtNCw0YDRiyDQtdGA0LXQutGI0LXQu9GW0LrRgtC10YDRltC90LUg0LbTmdC90LXQtNC1INKb0LDQvdGC0LDQvNGL0YDQu9Cw0YDRi9C80LXQvSDQttCw0pvRgdGLINKb0LDQvNGC0LDQvNCw0YHRgdGB0YvQtyDQtdGC0ZbQu9GD0ZbQvdC10LTQtSDQsdCw0LnQu9Cw0L3Ri9GB0YLRiyDRgdOZ0LHQuCDRgtC10YDRltGB0ZYg0L3RltC30ZbQuiDTmdGA0ZYg0LbSsdC80YHQsNKbINCx0LDRgNKb0YvRgiDRgdC10LrQu9C00ZYg0LHQvtC70LDQtNGLIC4g0q7Qu9C60LXQvdC00LXRgNC00ZbSoyDRgtC10YDRltGB0ZbQvdC1INKb0LDRgNCw0pPQsNC90LTQsCDRgdOZ0LHQuNC70LXRgNC00ZbSoyDQsdCw0LvQsNC70LDRgNC00YvSoyDRgtC10YDRltGB0ZYg0LrTqdC/0YLQtdCz0LXQvSDQvdOZ0YDRgdC10LvQtdGA0LzQtdC9INC10YDQtdC60YjQtdC70LXQvdC10LTRliA6INC20rHSm9CwICwg0LbSsdC80YHQsNKb0YLRi9KT0YsgLCDRgtC10LPRltGB0YLRltCz0ZYgLCDRgtC10YDRltGB0ZbQvdGW0qMg0LHQtdGC0LrQtdC5INCx0LXRgtGC0LXRgNGWINKb0LDQsdGL0YDRiNCw0pvRgtCw0L3Rg9KT0LAg0LHQtdC50ZbQvNC00ZYg0LHQvtC70YvQv9GC0LDQsdGL0LvQsNC00YsgLiDQkdCw0YDQu9GL0psg0YLQtdGA0ZbQvdGW0qMg0LbTmdC90LUg0YjQsNGI0YLQsNGA0YvQvdGL0qMg0LHQtdGC0ZYg0YHRg9C70Yst0LvQuNC/0LjQtNGC0ZYg0pvQsNCx0LDRgtGC0LDRgNC80LXQvSDQvdC10LzQtdGB0LUg0LzQsNC90YLQuNC40Y/QvNC10L0g0LbQsNCx0YvQu9KT0LDQvSDQsdC+0LvRi9C/INGC0LDQsdGL0LvQsNC00YsgLiAg0L7QuyDSm9C+0YDRiNCw0pPQsNC9INC+0YDRgtCw0L3Ri9KjINC20LDSk9GL0LzRgdGL0Lcg05nRgdC10YDQu9C10YDRltC90LXQvSDSm9C+0YDSk9Cw0YPSk9CwINGB0LXQsdC10L/RiNGWINCx0L7Qu9Cw0LTRiyAsINGF0LjQvNC40Y/Qu9GL0psg0LfQsNGC0YLQsNGA0LTRi9KjINGB0ZbQvdGD0ZbQvdC1INC205nQvdC1INOZ0YHQtdGAINC10YLRg9C70LXRgNGW0L0g0YLQtdC20LXQudC00ZYg0LbTmdC90LUg0LDQu9C00YvQvSAg0LDQu9Cw0LTRiyAuINCUINC005nRgNGD0LzQtdC90ZbSoyDRgtKv0LfRltC70YMg0L7RgNC90Ysg0LHQvtC70YvQvyDRgtCw0LHRi9C70LDQtNGLICwg0LDQvdGC0LjQsdCw0LrRgtC10YDQuNCw0LvQtNC00LTRiyDSm9Cw0YHQuNGC0YLQtdGA0ZbQvdC00LUg0LDRgtCw0L8g0LDQudGC0YHQsNKbINCx0L7Qu9Cw0LTRiyAuINKb0YDRi9GC0YvQvdC00YvQu9Cw0Lkg0LrQtdC70YHQtdC6ICwg0LHQsNC70LAg0YLQtdGA0ZbRgdGWINOZ0YHRltGA0LXRgdC1INOp0LzRltGA0ZbQvdGW0qMg0LDQu9KT0LDRiNKb0Ysg0LbRi9C70YvQvdC00LDQsCDQuNC90YTQtdC60YbQuNGP0LvQsNGA0pPQsCAsINGF0LjQvNC40Y/Qu9GL0psg0LbTmdC90LUg0LTQtSDRhNC40LfQuNC60LDQu9GL0psg0YLRltGC0ZbRgNC60LXQvdC00ZbRgNCz0ZbRiNGC0LXRgNCz0LUgLCDQsNGC0LzQvtGB0YTQtdGA0LDQu9GL0psg0YTQsNC60YLQvtGA0LvQsNGAINOZ0YHQtdGA0LvQtdGA05nQvdC1INC205nQvdC1INC00LUg0YvRgdGDINGC0L7QvdGDINGB0LXQutC70LTRliDTmdGB0LXRgNC70LXRgNCz0LUg06nRgtC1INGB0LXQt9GW0LzRgtCw0Lsg0LHQvtC70YvQvyDQutC10LvQtdC00ZYgLiAgIDxiciAvPg0KMi4gINCR06nQsdC10LrRgtC10YDQtNC1INGC0YvQvdGL0YEg0LDQu9GD0LTRi9KjINCw0LHRgdC+0LvRjtGC0YLRliDQttOZ0L3QtSDQtNC1INGB0LDQu9GL0YHRgtGL0YDQvNCw0LvRiyDQutOp0LvQtdC80LTQtdGA0ZbRliDQsNC3INCx0L7Qu9Cw0LTRi9GLLiDRgtCw0Y/QtyDTmdGA0ZYg0YLQuNGW0LzRgdGB0ZbQtyDRgtGL0L3Ri9GBINCw0LvRg9GL0L3QsCDSm9Cw0YDQsNC80LDRgdGC0LDQvSAsINC20LjRliDRgtGL0L3Ri9GBINCw0LvSk9Cw0L3QtNCw0LAg0LHQsNC70LDQvdGL0qMg0LTQtdC90LXRgdGWINC20LXRgtC60ZbQu9GW0LrRgtGWINC806nQu9GI0LXRgNC00LXQtSDQvtGC0YLQtdCz0ZbQvNC10L0g0pvQsNC80YLQsNC80LDRgdGL0Lcg0LXRgtGW0LvQtdC00ZYgLiDQsdOp0LHQtdC60YLQtdGAINC80LXQvSDQttCw0YEg0LHQsNC70LDQu9Cw0YDQtNCwINC20LDRgtGL0YAg0ZbRiNGW0LvRltC6INGC0YvQvdGL0YEg0LDQu9GDINGC0q/RgNGWINCx0LDRgdGL0Lwg0LHQvtC70LDQtNGLIC4g0LHSsdC7INKb0LDQsdGL0YDSk9Cw0LvQsNGA0LTRi9KjINC606nQu9C00LXQvdKjINC+0YDQvdCw0LvQsNGB0YPRi9C90LAg0LbTmdC90LUg0LTQtSDQutOp0LrQtdGC0YLRltKjINGC06nQvNC10L0g0YzQvtC70YPRi9C90LAgLCDQutC10YPQtNC1INKb0YPRi9GB0YvQvdGL0qMg0LbQtdGC0LrRltC70ZbQutGB0ZbQtyDRjdC60YHQutGD0YDRgdC40Y/RgdGL0L3QsCDQsdCw0LnQu9Cw0L3Ri9GB0YLRiyAuINCx0ZbRgCDQttCw0YHSm9CwINC00LXQudGW0L3Qs9GWINCx0LDQu9Cw0LvQsNGA0LTQsNKT0Ysg0YLRi9C90YvRgSDQsNC70YMg0YDQuNGC0LzRliDRgtKx0YDQsNKb0YHRi9C3ICwg0YLRi9C90YvRgSDQsNC70YMg0LbQuNGW0LvRltCz0ZYg0LzQtdC9INGC0LXRgNC10qPQtNGW0LPRliDQsdGW0YDQutC10LvQutGWINC10LzQtdGBIC4g0JHSsdC7INC20LDRgSDQsdCw0LvQsNC70LDRgNC00LDSk9GLINGC0YvQvdGL0YEg0LDQu9GD0LTRi9KjINC20q/QudC60LUg0YDQtdGC0YLQtdGD0YjRliDQvNC10YXQsNC90LjQt9C80LTQtdGA0ZbQvdGW0qMg0LbQtdGC0ZbRgdC/0LXRg9GI0ZbQu9GW0LPRliDQvNC10L0g0LrQtdGD0LTQtSDSm9Cw0LHRi9GA0pPQsNGB0YvQvdGL0qMg0LXRgNC10LrRiNC10LvRltCz0ZbQvNC10L0g0YLSr9GB0ZbQvdC00ZbRgNGW0LvQtdC00ZYgLiDQpNC40LfQuNC+0LvQvtCz0LjRj9C70YvSmyDRgtCw0YXQuNC/0L3QvtGNINGC05nQvSDQsdC+0LvRi9C/INC60LXQu9C10LTRliAuINCW0q/RgNC10LrRgtGW0qMg0YHQvtCz0YMg0LbQuNC40LvQuNCz0Lgg0LHQsNC70LAg0L3QtdKT0rHRgNC70YvQvCDQttCw0YEg0LHQvtC70YHQsNCwLNC80LXRgtCw0LHQvtC70LjQt9C80L3RltKj0qMg0LrSr9GI0LXRjtGW0L3QtSDQttOZ0L3QtSDQtNC1INC20q/RgNC10LrQutC1INGB0YHQuNC80L/QsNGC0LjQutCw0LvRi9C6INOZ0YHQtdGA0LTRltKjINCx0LDRgdGL0Lwg0LHQvtC70YPRg9GL0L3QsCDQsdCw0LnQu9Cw0L3Ri9GB0YLRiyDRgdC+0pPRg9GA0LvRi9C8INC20L7Qs9Cw0YDRiyDQsdC+0LvQsNC00YsuINC20q/RgNC10Log0YHQvtKT0YMg0LbQuNGW0LvRltGW0L3RltKjINC20LDRgdKb0LAg0LHQsNC50LvQsNC90YvRgdGC0Ysg0YLTqdC80LXQvdC00LXRg9GWINC60LDQvNC10YDQsNC70LDRgNC00YvSoyDQutOp0LvQtdC80ZbQvdGW0qMg0rHQu9KT0LDRjtGL0L3QsCAsINC20q/RgNC10LrRgtGW0qMg0YHQvtKb0pvRiyDQutOp0LvQtdC80ZbQvdC10LUgLCDQstC10LPQtdGC0LDRgtC40LLRgtGWINC20q/QudC60LUg0LbSr9C50LXRgdGW0L3RltKjICDQv9Cw0YDQsNGB0LjQvNC/0L/QsNGC0LjQutCw0LvRi9KbICDQsdOp0LvRltC80ZbQvdGW0qMg0LbSr9GA0LXQuiDSm9GL0LfQvNC10YLRltC90LUg05nRgdC10YDRltC90ZbSoyDQttC+0pPQsNGA0YvQu9Cw0YPRi9C90LAg0LHQsNC50LvQsNC90YvRgdGC0YvRiyAuINCx0LDQu9Cw0LvQsNGA0LTQsNKT0Ysg0LbSr9GA0LXQuiDRgdC+0pPRgyDQttC40ZbQu9GW0LrRgtC10YDRliDRgtKx0YDQsNKb0YHRi9C3INCx0L7Qu9GL0L8g0LrQtdC70LXQtNGWLCDQtNC10L3QtSDQutKv0LnQvdGW0ZbQvdGW0qMg06nQt9Cz0LXRgNGD0ZbQvNC10L0gLCDQsNC50pvQsNC50LvQsNGD0LzQtdC9ICwg0LTQtdC90LUg0YLQtdC80L/QtdGA0LDRgtGD0YDQsNGB0YvQvdGL0L0g0LbQvtKT0LDRgNGLINCx0L7Qu9GD0YvQvNC10L0g0LbTmdC90LUg0LHQsNGB0pvQsCDRhNCw0LrRgtC10YDQu9C10YDQtNGW0qMg05nRgdC10YDQu9C10YDRltC90LXQvSDQsNGA0YLQsNC00YsuINCx0LDQu9Cw0LvQsNGAINGC0YvQvdGL0YEg0LDQu9GDINCw0YDQuNGC0LzQuNGP0YHRi9C80LXQvSDRgdC40L/QsNGC0YLQsNC70LDQtNGLLtGC0YvQvdGL0YEg0LDQu9GDINC60LXQt9GW0L3QtNC1INC20q/RgNC10Log0YHQvtCz0YMg0LbQuNGW0LvRltCz0ZbQvdGW0qMg0LbQvtCz0LDRgNGL0LvQsNGD0Ysg0LbTmdC90LUg0LTQtdC8INGI0YvSk9Cw0YDRgyDQutC10LfRltC90LTQtSDRgtOp0LzQtdC90LTQtdGD0ZYgIC4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Жауаптарда қате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87" table:style-name="ce1">
            <text:p>1066887</text:p>
          </table:table-cell>
          <table:table-cell office:value-type="string" table:style-name="ce1">
            <text:p>kazakh</text:p>
          </table:table-cell>
          <table:table-cell office:value-type="string" table:style-name="ce1">
            <text:p>Билет 24.&amp;lt;br /&amp;gt; 1. Ерте жастағы балалардың терісінің функционалдық ерекшеліктері қандай?&amp;lt;br /&amp;gt; 2.Педиатрдын қабылдауында 5 жасар бала,қарағанда патология анықталмаған. Салмағы 20 кг, бойы 105 см. Тыныс алу жиілігі 25.Осы жаста баланың жүрек соғу жиілігі қанша болады? Қандай жүрек тамыр жүйесіні функционалдық ерекшеліктерімен бүл байланысты?&amp;lt;br /&amp;gt;</text:p>
          </table:table-cell>
          <table:table-cell office:value-type="string" table:style-name="ce1">
            <text:p>0JrRltGI0LrQtdC90YLQsNC5INCx0LDQu9Cw0YDQtNGL0qMg0YLQtdGA0ZbRgdGW0L3QvSDQutGD0YDRi9C70YvQvNGLINC80LXQvSDRhNGD0L3QutGG0LjRj9GB0Ysg0LXRgNC10YHQtdC60YLQtdGA0LPQtSDQutCw0YDQsNCz0LDQvdC00LAg0LHRltGA0L3QtdGI0LUg0LXRgNC10LrRiNC10LvRltC60YLQtdGA0Lgg0LHQsNGAINCw0YLQsNC/INCw0LnRgtGB0LDSmyAxINCx0LDQu9Cw0LvQsNGA0LTRi9KjINGN0L/QuNC00LXRgNC80LjRgSDQutCw0LHQsNGC0Ysg0LbRg9C60LAg0LbQsNC90LUg0L3TmdC30LjQuiDQsdGD0Lsg0L7QvdGLINGB0YvRgNGC0LrRiyDTmdGB0LXRgNC70LXRgNCz0LUg0YHQtdC30ZbQvNGC0LDQuyDQtdGC0LXQtNGWINCt0L/QuNC00LXRgNC80LjQuNGB0YLRltKjINC80Y7Qt9C00LXQu9Cz0LXQvSDQutCw0LHQsNGC0Ysg0LbRg9Kb0LAg0LbQsNC90LUg0LbQtdKj0ZbQuyDRgdGL0LTRi9GA0YvQu9Cw0LTRiyDQsNC7INC005nQvdC00ZYg0LrQsNCx0LDRgtGLINCw0LvRgdGW0Lcg0LTQsNC80YvQs9Cw0L0g0YHQvtC90LTRi9Kb0YLQsNC9INGC0LXRgNGW0YHRliDQttGD0LrQsCDQutGL0LfQs9GL0LvRgiDRgtGD0YHRgtGWINCx0L7Qu9Cw0LTRiyDRjdC/0LjQtNC10YDQvNC40YHRgtC10L0g0LTQtdGA0LzQsNC90YvSoyDQsdCw0LnQu9Cw0L3Ri9GB0Ysg0LDQu9GB0ZbQtyDRgdC+0L3QtNGL0LrRgtCw0L0g0YLQtdGA0ZYg0YHQvtC70LDQuSDQt9Cw0LrRi9C80LTQsNC70YPRiyDQvNGD0LzQutGW0L0gMiDQkdCw0LvQsCDRgtC10YDRltGB0Lgg0L3TmdC30LjQuiDQsdCw0YDQutGL0YIg0YLQsNGA0ZbQt9C00LggINC60YvRiNC60YvQu9C00Ysg0LXQvNC10YEg0LDRgNGWINC60LDQsdGL0YDRiNCw0LrRgtCw0L3Rg9Cz0LAg0LHQtdC50ZbQvCDQsdC+0LvRi9C/INC60LXQu9C10LTRliAzINC80LDQuSDQutCw0LHQsNGC0Ysg0LbRg9C60LAg0YHQvtC90LTRi9C60YLQsNC9INGC0LXRgNGWINKb0L7RgNCz0LDQvdGL0YjRiyDQvdCw0YjQsNGAINCc0LXQu9C+0L3QvtGB0LjRgtGC0LXRgCDQttC10YLQutGW0LvRltC60YHQuNC3INKb0YvQt9C80LXRgiDQsNGC0LrQsNGA0LPQsNC90LTRi9C60YLQsNC9INGC0LXRgNGWINC60YPQvSDRgdCw0YPQu9C10YHRltC90LUg0YHQtdC30LzRgtCw0LsgNCDQsdCw0LvQsNC70LDRgNC00LAg0YLQtdGA0LzQvtGA0LXQs9GD0LvRj9GG0LjRjyDQvNC10YXQsNC90LjQt9C80ZYg0YLQvtC70YvQuiDQtNCw0LzRi9C80LDQs9Cw0L0g0YLQtdGA0ZYg0LHQtdC30LTQtdGA0ZYg0YHQsNC90Ysg0LrQvtC/INCx0L7Qu9Cz0LDQvdGLINC80LXQvSDQvtC70LDRgNC00YvSoyDQutGL0LfQvNC10YLRliDQttC10YLQutC40LvQuNC60YHQuNC3INGB0L7QvdC00YvQutGC0LDQvSDQsdCw0LvQsNC70LDRgCDRgtC10YDRiNC10qMg0LXQvNC10YEg0LbQsNC90LUg0LrRi9C30YvQvyDQutC10YLRg9C00LUg0L3QtdC80LXRgdC1INGC0LDQvdGD0LPQsCDQsdC10LnRltC8INCx0L7Qu9GL0L8g0LrQtdC70LXQtNGWIDUg0KLQtdGA0ZbQvdGW0qMg0LrQvtGA0LPQsNC90YvRgSDRhNGD0L3QutGG0LjRj9GB0Ysg0LbQtdGC0LrRltC70ZbQutGB0LjQtyDRgdC10LHQtdCx0ZYg0LjQvNGD0L3QtNGL0Log0LbRg9C1INGC0L7Qu9GL0Log0LrQsNC70YvQv9GC0LDRgdC/0LDQs9Cw0L0g0JHRg9C7INC40L3RhNC10LrRhtC40Y8g0LHQsNC60YLQtdGA0LjRjyDQstC40YDRg9GB0YLQsNGA0LPQsCDRgdC10LfRltC80YLQsNC70LTRi9C60LrQsCDQsNC70YvQvyDQutC10LvQtdC00ZYgNiDQkdCw0LvQsNC70LDRgNC00LAg0YLQtdGA0ZbQvdGW0qMg0YDQtdCz0LXQvdC40YDQsNGG0LjRj9GB0Ysg0LbRi9C70LTQsNC8INC20YPRgNC10LTRliDRgdC+0L3QtNGL0LrRgtCw0L0g0LbQsNGA0LDQutCw0YLRgtCw0YAg0LzQtdC9INC30LDQutGL0LzQtNCw0L3Rg9C70LDRgCDRgtC10Lcg0LrQsNC70L/Ri9C90LAg0LrQtdC70LXQtNGWIDcg0KLQtdGA0ZYg0YHQtdC90YHQvtGA0LvRi9C6INGA0LXRhtC10L/RgtC+0YDQu9Cw0YDQs9CwINCx0LDQuSDQsdGD0Lsg0LrRltGI0LrQtdC90YLQsNC5INCx0LDQu9Cw0LvQsNGA0LTQsCDQttCw0L3QsNGB0YMg0YLQtdC80L/QtdGA0LXRgtGD0YDQsCDQsNGD0YvRgNGB0YvQvdGDINGB0LjRj9C60YLRiyDQsNGAINGC0YPRgNC70ZYg0YLRltGC0LjRgNC60LXQvdC00ZbRgNCz0LjRiNGC0LXRgNC00ZYg0LrQsNCx0YvQu9C00LDRg9Cz0LAg0LbQsNC90LUg0L7Qu9Cw0YDQs9CwINC20LDRg9Cw0L8g0LHQtdGA0YPQs9C1INC80YPQvNC60ZbQvdC00ZbQuiDQsdC10YDQtdC00ZYgOCDQmtGD0L0g0YHQsNGD0LvQtdGB0ZbQvdGW0qMg0LDRgdC10YDRltC90LXQvSDRgtC10YDRltC00LUg0LrQsNC70YbQuNC00ZbSoyDRgdGD0YDRg9GWINC20LDQvdC1INGB0YPQtdC60YLQtdGA0LTRltKjINC00YPRgNGL0YEg0LTQsNC80YPRi9C90LAg0pvQsNC20LXRgiDQlCDQtNCw0YDRg9C80LXQvdGWINGB0LjQvdGC0LXQt9C00LXQu9C10LTRliAgICAgIDIg0YHRg9GA0LDQuiDQttCw0YPQsNCx0YsgNSDQttCw0YHQsNGAINCx0LDQu9Cw0L3Ri9KjINC20YPRgNC10Log0YHQvtCz0YMg0LbQuNGW0LvRltCz0ZYgOTAgMTEwINGA0LXRgiDQvNC40L3Rg9GCINC00LXQvdCz0LXQudC90LTQtSDQsdC+0LvRg9GLINC20LDRgdGL0L3QsCDRgdCw0LnQutC10YEg0LrQsNC70YvQv9GC0Ysg0LrQvtGA0YHQtdGC0LrRltGIINCx0L7Qu9GL0L8g0YLQsNCx0YvQu9Cw0LTRiyDQkdGD0Lsg0LzTmdC9INCx0LDQu9Cw0LvQsNGA0LTRi9KjINC20YPRgNC10Log0LrQsNC9INGC0LDQvNGL0YDQu9Cw0YAg0LbRg9C10YHRltC90ZbSoyDRhNC40LfQuNC+0LvQvtCz0LjRj9C70YvQuiDQtdGA0LXQutGI0LXQu9GW0LrRgtC10YDRliDQvNC10L0g0YLRg9GB0LjQvdC00LjRgNGW0LvQtdC00LggNSDQttCw0YHQsNGAINCx0LDQu9CwINGD0YjRltC9INC60LDQu9GL0L/RgtGLINC20YPRgNC10Log0YHQvtCz0YMg0LbQuNGW0LvRltCz0ZYg0L3QtdCz0LjQt9Cz0ZYg0L3QvtGA0LzQsNGB0YsgODAgMTIwINGA0LXRgiDQvNC40L0g0J7RgNGC0LDRiNCwINC80LDQvdGWIDEwMCDRgNC10YIg0LzQuNC9INCR0YPQuyDQsdCw0LvQsNC90YvSoyDQttGD0YDQtdC6INGB0L7Qs9GDINC20LjRltC70ZbQs9GWINC60LDQu9GL0L/RgtGLINC00LjQsNC/0L7Qt9C+0L3QtNCwINGP0LPQvdC4INC/0L7RgtC+0LvQvtCz0LjRjyDQttC+0Log0LXQvdC00ZYg0L7RgdCz0LDQvSDRgdCw0LnQutC10YEg0LHQsNC70LDQu9Cw0YDQtNCw0LPRiyDQttGD0YDQtdC6INC60LDQvSDRgtCw0LzRi9GAINC20YPQtdGB0ZbQvdGW0qMg0YTRg9C90LrRhtC40L7QvdCw0LvQtNGL0psg0LXRgNC10LrRiNC10LvRltC60YLQtdGA0ZYg0YLRg9GA0LDQu9GLINCw0LnRgtGB0LDQvCAxINC20YPRgNC10Log0LzQsNGB0YHQsNGB0Ysg0LzQtdC9INC60L7Qu9C10LzRliDQsdCw0LvQsNC90YvSoyDQttGD0YDQtdCz0ZYg0LTQtdC90LUg0YHQsNC70LzQsNCz0YvQvdCwINC60LDRgNCw0LPQsNC90LTQsCDQutGW0YjRltGA0LXQuiDRgdC+0L3QtNGL0LrRgtCw0L0g0LDRgCDQsdGW0YAgINC20LjRi9GA0YvQu9GDINC60LXQt9GW0L3QtNC1INC60LDQvdC90YvSoyDQsNC3INC80L7Qu9GI0LXRgNGW0L0g0YjRi9Cz0LDRgNCw0LTRiyDQmtCw0L0g0LDQudC90LDQu9GL0Lwg0LrQsNC20LXRgtGC0ZbQu9GW0LrRgtC10YDQuNC9INC60LDQvNGC0LDQvNCw0YHRi9C3INC10YLRgyDRg9GI0ZbQvSDQttGD0YDQtdC6INC20LjRliDQttC40YvRgNGL0LvQsNC00YsgMiDQotCw0LzRi9GA0LvQsNGA0LTRi9KjINGB0LXRgNC/0ZbQvNC00ZbQu9GW0LPRliDQsdCw0LvQsNC70LDRgNC00YvSoyDRgtCw0LzRi9GA0Ysg0YHQtdGA0L/RltC90LTRliDQsdC40YDQsNC6INC+0LvQsNGA0LTRi9KjINC60LDRgNGB0YvQu9GL0LPRiyDQsNC3INGB0L7QvdC00YvQutGC0LDQvSDQttGD0YDQtdC6INC20LjRliDQttC40YvRgNGL0LvRg9GLINKb0LDQttC10YIgMyDQotCw0LzRi9GA0LvQsNGA0LTRi9KjINC00LjQsNC80LXRgtGA0ZYg0LXRgNC10YHQtdC60YLQtdGA0LPQtSDQutCw0YDQsNCz0LDQvdC00LAg0YLQsNGAINCx0YPQuyDQutCw0L3QvdGL0qMg0YLQtdC3INC60L7Qt9Cz0LDQu9GL0YHRi9C9INC60LDQvNGC0LDQvNCw0YHRi9C3INC10YLQtdC00ZYgNCDQttGD0YDQtdC6INC80LjQvdGD0YLRgtGL0psg0LrQvtC70LXQvNGWINC20L7Qs9Cw0YDRiyDQvtC50YLQutC10L3RliDQsdGD0Lsg0L7RgNCz0LDQvdC40LfQvNC90ZbSoyDQvtGB0YPRliDQvNC10L0g0LTQsNC80YPRi9C90LAg0LrQsNC20LXRgiAgNSDQkNGE0YLQvtC90L7QvNC00Ysg0LbRg9C50LrQtSDQttGD0LXRgdGW0L3RltKjINCw0YHQtdGA0ZYg0JHQsNC70LDQu9Cw0YDQtNCwINGB0LjQvNC/0LDRgtC40LrQsNC70YvSmyDQttGD0LXQvdGW0qMg0LHQtdC70YHQtdC90LTRltC70ZbQs9C4INC20L7Qs9Cw0YDRiyDQsdC+0LvQsNC00Ysg0LHRg9C7INC20YPRgNC10Log0YHQvtCz0YMg0LbQuNGW0LvQuNCz0ZbQvdGW0qMg0LbQvtCz0LDRgNGLINCx0L7Qu9GD0YvQvdCwINGL0LrQv9Cw0Lsg0LXRgtC10LTRliA2INCc0LXRgtC+0LHQvtC70LjQt9C80ZYg0LHQtdC70YHQtdC90LTRliDQttGD0YDQtdC00ZYg0LHRg9C7INC20YPRgNC10LrRgtC10L0g0LrQsNC9INCw0LnQvdCw0LvRi9C80L3Ri9KjINC20YvQu9C00LDQvCDQttGD0LzRi9GBINGW0YHRgtC10YPRltC90LUg0YLQsNC70LDQvyDQtdGC0LXQtNGWIC4u</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87" table:style-name="ce1">
            <text:p>1066987</text:p>
          </table:table-cell>
          <table:table-cell office:value-type="string" table:style-name="ce1">
            <text:p>kazakh</text:p>
          </table:table-cell>
          <table:table-cell office:value-type="string" table:style-name="ce1">
            <text:p>Билет 24.&amp;lt;br /&amp;gt; 1. Ерте жастағы балалардың терісінің функционалдық ерекшеліктері қандай?&amp;lt;br /&amp;gt; 2.Педиатрдын қабылдауында 5 жасар бала,қарағанда патология анықталмаған. Салмағы 20 кг, бойы 105 см. Тыныс алу жиілігі 25.Осы жаста баланың жүрек соғу жиілігі қанша болады? Қандай жүрек тамыр жүйесіні функционалдық ерекшеліктерімен бүл байланысты?&amp;lt;br /&amp;gt;</text:p>
          </table:table-cell>
          <table:table-cell office:value-type="string" table:style-name="ce1">
            <text:p>MS7QldGA0YLQtSDQttCw0YHRgtCw0pPRiyDQsdCw0LvQsNC70LDRgNC00YvSoyDQtdGA0LXQutGB0LXQutGC0LXRgNCz0LUg0pvQsNGA0LDSk9Cw0L3QtNCwINGC0LXRgNGW0YHRltC90LTQtSDRhNGD0L3QutGG0LjQvtC90LDQu9C00YvSmyDQtdGA0LXQutGI0LXQu9GW0LrRgtC10YDRliDQsdCw0YAuINCR0ZbRgNGW0L3RiNGWINC10YDQtdC60YjQtdC70ZbQs9GWINC+0Lsg0YLQtdGA0YHRliDQvdOZ0LfRltC6INCx0L7Qu9GL0L8g0LrQtdC70LXQtNGWLiDSmtC+0YDSk9Cw0YM60YLQtdGA0ZYg0LDRgdGC0YvQvdC00LDSk9GLINGC0ZbQvdC00LXRgCDQvNC10L0g0LzSr9GI0LXQu9C10YDQtNGWINC80LjQutGA0L7RgNCz0L3QsNC30LjQvNC00LXRgCDRg9C70YzRgtGA0LDQutKv0LvQs9GW0L0g0YHTmdGD0LvQtdC70LXQvdGDINC205nQvdC1INC80LXRhdCw0L3QuNC60LDQu9GL0psg0LbQsNGA0LDSm9Cw0YIg0YHQuNGP0pvRgtGLINGB0YvRgNGC0pvRiyDRhNCw0LrRgtC+0YDQu9Cw0YDQtNCw0L0g0pvQvtGA0pPQsNC50YLRi9C9INGC0L7RgdKb0LDRg9GL0Lsg0YDQtdGC0ZbQvdC00LUg05nRgNC10LrQtdGCINC10YLQtdC00ZYuINCi0LXRgNC80L7RgNC10LPRg9C70Y/RhtC40Y86INC60ZbRiNC60LXQvdGC0LDQuSDQsdCw0LvQsNC70LDRgNC00YvSoyDQtNC10L3QtSDRgdCw0LvQvNCw0pPRi9C80LXQvSDRgdCw0LvRi9GB0YLRi9GA0pPQsNC90LTQsCDQtNC10L3QtSDQsdC10YLRltC90ZbSoyDQsNGD0LTQsNC90Ysg0YHQsNC70YvRgdGC0YvRgNC80LDQu9GLINGC0q/RgNC00LUg0q/Qu9C60LXQvSDQsdKx0Lsg0L7Qu9Cw0YDQtNGL0qMg0LbRi9C70YPQtNGLINC20L7Sk9Cw0LvRgtGD0pPQsCDQsdC10LnRltC80LTRltC70ZbQs9GW0L0g0LDRgNGC0YLRi9GA0LDQtNGLLiDQotC10YDRliDRgtC10YDQu9C10YMsINKb0LDQvSDRgtCw0LzRi9GA0LvQsNGA0YvQvdGL0qMg0LrQtdKj0LXRjtGWINC205nQvdC1INGC0LDQvNGL0YDQu9Cw0YDRi9C90YvSoyDRgtCw0YDRi9C70YPRiyDRgdC40Y/Sm9GC0Ysg0LzQtdGF0LDQvdC40LfQuNC80LTQtdGAINCw0YDSm9GL0LvRiyDQtNC10L3QtSDRgtC10LzQv9C10YDQsNGC0YPRgNCw0YHRi9C9INGA0LXRgtGC0LXRg9C00LUg0LzQsNKj0YvQt9C00Ysg0YDTqdC7INCw0YLSm9Cw0YDQsNC00YsuINCh0LXQt9GW0Lw6INGC0LXRgNGWINC20LDRgSDQsdCw0LvQsNC70LDRgNC00LAg0LbQsNC90LDRgdGDICwg0pvRi9GB0YvQvCDRgtC10LzQv9C10YDQsNGC0YPRgNCwINC205nQvdC1INCw0YPRi9GA0YHRi9C90YMg0YHQuNGP0pvRgtGLINOZ0YDRgtKv0YDQu9GWINGL0L3RgtCw0LvQsNC90LTRi9GA0YPQtNGLINKb0LDQsdGL0LvQtNCw0YPSk9CwINC205nQvdC1INC+0LvQsNGA0pPQsCDQttCw0YPQsNC/INCx0LXRgNGD0LPQtSDQvNKv0LzQutGW0L3QtNGW0Log0LHQtdGA0LXRgtGW0L0g0YHQtdC90YHQvtGA0LvRi9KbINGA0LXRhtC10L/RgtC+0YDQu9Cw0YDSk9CwINCx0LDQuSDQsdC+0YDQu9GL0L8g0LrQtdC70LXQtNGWLiDQodGW0qPRg9GWOtC10YDRgtC1INC20LDRgdGC0LDSk9GLINCx0LDQu9Cw0LvQsNGA0LTRi9KjINGC0LXRgNGW0YHRliDQtdGA0LXRgdC10LrRgtC10YDQs9C1INKb0LDRgNCw0pPQsNC90LTQsCDTqdGC0LrRltC30LPRltGI0YLRltCz0ZbRiNGC0ZbQs9GWINC20L7Sk9Cw0YDRiyDQsdC+0LvQsNC00YsuINCh0LjQvdGC0LXQtzog0LrSr9C9INGB05nRg9C70LXRgdGW0L0g05nRgdC10YDRltC90LXQvSDRgtC10YDRliDQlCDQtNOZ0YDRg9C80LXQvdGW0L0g0YHQuNC90YLQtdC30ZbQvdC1INKb0LDRgtGL0YHQsNC00YsuINCR0rHQuyDQutCw0LvRjNGG0LjQudC00ZYg0YHRltKj0ZbRgNGDINC205nQvdC1INGB0q/QudC10LrRgtGW0qMg0LTSsdGA0YvRgSDQtNCw0LzRg9GLINKv0YjRltC9INC80LDSo9GL0LfQtNGLLiAyLiA1INC20LDRgdCw0YAg0LHQsNC70LDQtNCwINOZ0LTQtdGC0YLQtSDRgtGL0L3Ri9GI0YLRi9KbINC60LXQt9C10qPRltC90LTQtSDQttKv0YDQtdC6INGB0L7Sk9GDINC20LjRltC70ZbQs9GWINC80LjQvdGD0YLRi9C90LAgMTAwINGB0L7Sm9Kb0YvSk9CwINC00LXQudGW0L0g0LbQtdGC0LXQtNGWLtCW0q/RgNC10Log0YHQvtKT0YMg0LbQuNGW0LvRltCz0ZYgNCDQtdGB0LUg0LbQvtKT0LDRgNGLINCx0L7Qu9Cw0LTRiyDRgtGL0L3Ri9GBINCw0LvRgyDQttC40ZbQu9GW0LPRltC90LUg0pvQsNGA0LDSk9Cw0L3QtNCwLiDQkdGW0LfQtNGW0qMg0LbQsNKT0LTQsNC50LTQsCDQsdCw0LvQsNC00LAg0YLQsNC90YvRgSDQsNC70YMg0LbQuNGW0LvRltCz0ZYgMjUg0LHQvtC70YvQvyDRgtKx0YAg0LXQvdC00LXRiNC1INCx0LDQu9Cw0LTQsCAxMDAg0YHQvtKb0pvRi9KT0LAg0LTQtdC50ZbQvSDQttC10YLQtdC00ZYuICDQlNC10L3QtSDQsdC10LvRgdC10L3QtNGW0LvRltCz0ZYg0Y3QvNC+0YbQuNC+0L3QsNC70YzQtNGL0psg0LrSr9C5INC205nQvdC1INC20LDQu9C/0Ysg0LTQtdC90YHQsNGD0LvRi9KbINC20q/RgNC10Log0YHQvtKT0YMg0LbQuNGW0LvRltCz0ZbQvdC1INOZ0YHQtdGAINC10YLRg9GWINC80q/QvNC60ZbQvS7QltC10LrQtSDQstCw0YDQuNCw0YbQuNGP0LvQsNGAINCx0L7Qu9GD0Ysg0LzSr9C80LrRltC9INC205nQvdC10Log0LbSr9GA0LXQuiDRgdC+0pPRgyDQttC40ZbQu9GW0LPRltC9INC005nQuyDTqdC70YjQtdGDINKv0YjRltC9INC/0LXQtNC40LDRgtGAINCx0LDQu9Cw0L3Ri9KjINC90LDSm9GC0Ysg0LbQsNKT0LTQsNC50YvQvSDQsdCw0pPQsNC70LDRgyDQutC10YDQtdC6INCx0L7Qu9Cw0LTRiy4g0JbSr9GA0LXQuiDRgtCw0LzRi9GAINC20q/QudC10YHRltC90LTQtSDRhNGD0L3QutGG0LjQvtC90LDQu9GM0LTRi9KbINC10YDQtdC60YjQtdC70ZbQutGC0LXRgNGW0L0g0LDQudGC0pvQsNC9INC60LXQt9C00LUg0LHRltC3INCx0LDQu9Cw0L3Ri9KjINC20LDRgdGL0L0gLNGE0LjQt9C40LrQsNC70YvSmyDQsdC10LvRgdC10L3QtNGW0LvRltC6INC30LDRgiDQsNC70LzQsNGB0YMg0LbRi9C70LTQsNC80LTRi9KT0YssINC20LDQu9C/0Ysg0LbSr9GA0LXQuiDSm9Cw0L0g0YLQsNC80YvRgNC70LDRgNGLINC00LXQvdGB0LDRg9C70YvSk9GLINGB0LjRj9Kb0YLRiyDRhNCw0LrRgtC+0YDQu9Cw0YAg05nRgdC10YAg0LXRgtC10LTRli4g0JHQsNC70LDQu9Cw0YDQtNCwINC20q/RgNC10Log06nQvdGW0LzQtNGW0LvRltCz0ZYg0LbQvtKT0LDRgNGLINCx0L7Qu9Cw0LTRiy4g0JHSsdC7INC+0LvQsNGA0LTRi9KjINOp0YHRg9GWINC80LXQvSDQtNCw0LzRg9GL0L0g0pvQvtC70LTQsNGDINKv0YjRltC9INC20LXRgtC60ZbQu9GW0LrRgtGWINC+0YLRgtC10LrRgtGC0ZYg0LzQtdC9INKb0L7RgNC10LrRgtGWINC30LDRgtGC0LDRgNC00Ysg0LbQtdGC0LrRltC30ZbQu9GD0ZbQvdC1INC80q/QvNC60ZbQvdC00ZbQuiDQsdC10YDQtdC00ZYuINCU0LXQvdC10L3RltKjINCx0LDRgNC70YvSmyDQsdOp0LvRltC60YLQtdGA0LPQtSDQvtC60YHRjtCz0LXQvdCz0LUg0LbQtdGC0YPQs9C1INC606nQvNC10LrRgtC10YHQtdC00ZYu0prQvtGA0LXQutGC0ZbQuiDQt9Cw0YLRgtCw0YAg0LzQtdC9INCz0L7RgNC80L7QvdC00LDRgNC00Ysg0YLQsNGB0YvQvNCw0LvQtNCw0LnQtNGLLiDQkdKx0Lsg0LbSr9C50LUg0LPQsNC3INCw0LvQvNCw0YHRgyDSr9GI0ZbQvSDSm9C+0LvQtNCw0L3Ri9C70LDQtNGLINC205nQvdC1INKb0LDQu9C00YvSm9GC0LDRgNGL0L0g0LrQtdGC0ZbRgNC10LTRli4g0J7QuyDQsdGW0LfQtNGW0qMg0LTQtdC90LXQvNGW0LfQtNGWINC40L3RhNC10LrRhtC40Y/QtNCw0L0g0pvQvtGA0pPQsNC50LTRiy4g0J7QuyDQtNC10L3QtdC90ZbSoyDQsdCw0YDQu9GL0psg0LHTqdC70LrRltGC0LXRgNGW0L3QtSDSm9Cw0L0g0LDSk9GL0L3Ri9C9INGB0LDSm9GC0LDQudC00YsuINCh0L7QvdC00LDQuSDQsNKbINC40LzQvNGD0L3QtNGL0psg0LbQsNGD0LDQv9GC0LAg0YDTqdC7INCw0YLSm9Cw0YDQsNC00YsuIA==</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9" table:style-name="ce1">
            <text:p>915319</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nQmtC+0LbQsC3RgdCw0LzRi9C5INC60YDRg9C/0L3Ri9C5INC+0YDQs9Cw0L0g0YfQtdC70L7QstC10YfQtdGB0LrQvtCz0L4g0L7RgNCz0LDQvdC40LfQvNCwLiDQoyDRgNC10LHQtdC90LrQsCDRgdGC0YDQvtC10L3QuNC1INC4INC+0YHQvtCx0LXQvdC90L7RgdGC0Lgg0LrQvtC20Lgg0LfQvdCw0YfQuNGC0LXQu9GM0L3QviDQvtGC0LvQuNGH0LDQtdGC0YHRjy4g0KHQvtGB0YLQvtC40YIg0LrQvtC20LAg0LrQsNC6INC4INGDINCy0LfRgNC+0YHQu9GL0YUg0LjQtyDRjdC/0LjQtNC10YDQvNC40YHQsCDQuCDQtNC10YDQvNGLLiDQodGC0L7QuNGCINC90LDRh9Cw0YLRjCDRgSDRgtC+0LPQviwg0YfRgtC+INC60L7QttCwINGDINGA0LXQsdC10L3QutCwINCyINC+0YLQu9C40YfQuNC1INC+0YIg0LLQt9GA0L7RgdC70L7Qs9C+INCyIDEsNS0zINGA0LDQt9CwINGC0L7QvdGM0YjQtS4g0J7RgNC+0LPQvtCy0LXQstCw0Y7RidC40Lko0YDQvtCz0L7QstC+0LkpINGB0LvQvtC5OiDRgdC+0YHRgtC+0Y/RidC40Lkg0LjQtyDQutC10YDQsNGC0LjQvdC+0YbQuNGC0L7QsiDRgtC+0L3QutC40LksINC40LcgMi0zINGB0LvQvtC10LIg0LrQu9C10YLQvtC6OiDQv9GA0Lgg0Y3RgtC+0Lwg0YMg0LTQtdGC0LXQuSDQt9Cw0YfQsNGB0YLRg9GOINC80LDQu9C+0LUg0LrQvtC70LjRh9C10YHRgtCy0L4g0YHQu9GD0YnQtdC90L3Ri9GFINCy0L7Qu9C+0LrQvtC9KNC60LXRgNCw0YLQuNC90LApLCDRh9GC0L4g0L7QsdGM0Y/RgdC90Y/QtdGCINGC0L4sINGH0YLQviDQutC+0LbQsCDQu9C10LPQutC+INGC0YDQsNCy0LzQuNGA0YPQtdGC0YHRjyDQuCDQvNCw0LvQviDQv9C+0LTQstC10YDQttC10L3QsCDQvtGA0L7Qs9C+0LLQtdCy0LDQvdC40Y4uINCX0LXRgNC90LjRgdGC0YvQuSDRgdC70L7QuSDRgtCw0LrQttC1INGC0L7QvdGM0YjQtSDRh9C10Lwg0YMg0LLQt9GA0L7RgdC70YvRhSwg0YfRgtC+INC+0LHRjNGP0YHQvdGP0LXRgiDQtdC1INGC0L7QvdC60L7RgdGC0Ywg0Lgg0YHQstC+0LnRgdGC0LLQviAi0L/RgNC+0YHQstC10YfQuNCy0LDRgtGMIiwg0YLQviDQtdGB0YLRjCDQvNC+0LbQvdC+INGB0LrQsNC30LDRgtGMLCDRh9GC0L4g0LrQvtC20LAg0LHQvtC70LXQtSAi0L/RgNC+0LfRgNCw0YfQvdCwIiwg0YfQtdC8INGDINCy0LfRgNC+0YHQu9C+0LPQvi4g0JHQsNC30LDQu9GM0L3Ri9C5INGB0LvQvtC5INC00L7RgdGC0LDRgtC+0YfQvdC+INGA0LDQt9Cy0LjRgiDQuCDQv9GA0LXQtNGB0YLQsNCy0LvQtdC9INC90LXRgdC60L7Qu9GM0LrQuNC80Lgg0YHQu9C+0Y/QvNC4INC60LvQtdGC0L7Quiwg0L7QtNC90LDQutC+INC60L7Qu9C40YfQtdGB0YLQstC+INC/0LjQs9C80LXQvdGC0LAg0YHQvdC40LbQtdC90L4g0LjQty3Qt9CwINC80LDQu9C+0LPQviDQutC+0LvQuNGH0LXRgdGC0LLQsCDRgdC40L3RgtC10LfQuNGA0YPQtdC80L7Qs9C+INC80LXQu9Cw0L3QvtC60L7RgNGC0LjQvdCwINC4INC80LXQu9Cw0L3QvtGG0LjRgtC+0LIg0LIg0YbQtdC70L7QvCjQutC70LXRgtC60LgsINC/0YDQvtC00YPRhtC40YDRg9GO0YnQuNC1INC/0LjQs9C80LXQvdGCLdC80LXQu9Cw0L3QuNC9LCDQutC+0YLQvtGA0YvQuSDQsiDRhtC10LvQvtC8INC4INC+0YLQstC10YfQsNC10YIg0LfQsCDQvtC60YDQsNGB0LrRgyDQutC+0LbQuCkuICDQotCw0Log0LbQtSDQvtGC0LzQtdGH0LXQvdCwINGC0LDQutCw0Y8g0L7RgdC+0LHQtdC90L3QvtGB0YLRjDog0LzQtdC20LTRgyDRjdC/0LjQtNC10YDQvNC40YHQvtC8INC4INC00LXRgNC80L7QuSDQvNCw0LvQviDRj9C60L7RgNC90YvRhSDQstC+0LvQvtC60L7QvTog0YfRgtC+INC+0LHRjNGP0YHQvdGP0LXRgiDRgtC+0YIg0YTQsNC60YIsINGH0YLQviDQvNC10LbQtNGDINGN0L/QuNC00LXRgNC80LjRgdC+0Lwg0Lgg0LTQtdGA0LzQvtC5INC80L7QttC10YIg0YHQutCw0L/Qu9C40LLQsNGC0YzRgdGPINC20LjQtNC60L7RgdGC0YwsINGBINC+0LHRgNCw0LfQvtCy0LDQvdC40LXQvCDRgdCy0L7QtdC+0LHRgNCw0LfQvdGL0YUg0L/Rg9C30YvRgNC10LkuIHBoINC60L7QttC4INC90LXQudGC0YDQsNC70YzQvdGL0Lkg0LjQu9C4INGB0LvQsNCx0L4t0LrQuNGB0LvRi9C5LCAg0LrQvtC20LAg0YHQsNC80LAg0L/QviDRgdC10LHQtSDQv9C+0LrRgNGL0YLQsCDQstC+0LTQvdC+LdC70LjQv9C40LTQvdGL0Lwg0YHQu9C+0LXQvCwg0LLRi9C/0L7Qu9C90Y/RjtGJ0LjQvCDQt9Cw0YnQuNGC0L3Rg9GOINGA0L7Qu9GMLCDQstC10LTRjCDQutC+0LbQsCDQvdC+0LLQvtGA0L7QttC00LXQvdC90L7Qs9C+INC+0YfQtdC90Ywg0L3QtdC20L3QsNGPLiDQmtC+0LzQv9C+0L3QtdC90YLRiyDQutC+0LbQuCDQtNC70Y8g0YHQuNC90YLQtdC30LAg0LLQuNGC0LDQvNC40L3QsCDQlCDRhNGD0L3QutGG0LjQvtC90LDQu9GM0L3QvtGCINC/0L7Qu9C90L7RhtC10L3QvdGLOiDQv9C+0Y3RgtC+0LzRgyDRgdC40L3RgtC10Lcg0LTQsNC90L3QvtCz0L4g0LLQuNGC0LDQvNC40L3QsCDQv9C+0LQg0LTQtdC50YHRgtCy0LjQtdC8INGD0LvRjNGC0YDQsNGE0LjQvtC70LXRgtC+0LLQvtCz0L4g0LjQt9C70YPRh9C10L3QuNGPINGE0YPQvdC60YbQuNC+0L3QsNC70YzQvdC+INGA0LDQt9Cy0LjRgiDQtdGJ0LUg0YEg0YDQvtC20LTQtdC90LjRjy4g0JIg0LrQvtC20LUg0YLQsNC60LbQtSDQv9GA0LjRgdGD0YLRgdGC0LLRg9GO0YIg0YLRg9GH0L3Ri9C1INC60LvQtdGC0LrQuCwg0LrQvtGC0L7RgNGL0LUg0LLRi9C00LXQu9GP0Y7RgiDRgtCw0LrQuNC1INCx0LjQvtC70L7Qs9C40YfQtdGB0LrQuCDQsNC60YLQuNCy0L3Ri9C1INCy0LXRidC10YHRgtCy0LAg0LrQsNC6OtCz0LXQv9Cw0YDQuNC9LCDQs9C40YHRgtCw0LzQuNC9LCDQs9C40LDQu9GD0YDQvtC90LjQtNCw0LfRgy4g0JrQvtC20LAg0YDQtdCx0LXQvdC60LAg0LHQvtCz0LDRgtC+INCy0LDRgdC60YPQu9GP0YDQuNC30LjRgNC+0LLQsNC90LAuKNC40Lct0LfQsCDRgtC+0L3QutC+0LPQviDRgdC70L7RjyDQutC+0LbQuCDQuCDRgNCw0LfQstC40YLQvtC5INGB0L7RgdGD0LTQuNGB0YLQvtC5INGB0LXRgtC4INC60L7QttCwINGA0LXQsdC10L3QutCwINC80LDQu9C+0LPQviDQstC+0LfRgNCw0YHRgtCwINC00L7RgdGC0LDRgtC+0YfQvdC+INC70LXQs9C60L4g0LrRgNCw0YHQvdC10LXRgiDQuNC3LdC30LAg0L3QtdC30L3QsNGH0LjRgtC10LvRjNC90YvRhSDQstC+0LfQtNC10LnRgdGC0LLQuNC5KSDQn9C+0YLQvtCy0YvQtSDQttC10LvQtdC30Ysg0Log0LzQvtC80LXQvdGC0YMg0YDQvtC20LTQtdC90LjRjyDQuCDQsiDRgNCw0L3QvdC10Lwg0LLQvtC30YDQsNGB0YLQtSDRhNGD0L3QutGG0LjQvtC90LDQu9GM0L3QviDQvdC1INGA0LDQt9Cy0LjRgtGLLCDQsiDRgtC+INCy0YDQtdC80Y8g0LrQsNC6INGB0LDQu9GM0L3Ri9C1INC20LXQu9C10LfRiyDQtNC+0LLQvtC70YzQvdC+INGA0LDQt9Cy0LjRgtGLLiDQmtC+0LbQsCDQv9C+0LrRgNGL0YLQsCDQv9GD0YjQutC+0LLRi9C80Lgg0LLQvtC70L7RgdCw0LzQuCwg0YEg0LzQsNC70YvQvCDQutC+0LvQuNGH0LXRgdGC0LLQvtC8INC/0LjQs9C80LXQvdGC0LAsINC+0YLQu9C40YfQsNGO0YnQuNC10YHRjyDQvNCw0LvQvtC5INC20LXRgdGC0LrQvtGB0YLRjNGOLtC40YHRhdC+0LTRjyDQuNC3INC00LDQvdC90YvRhSDQvtGB0L7QsdC10L3QvdC+0YHRgtC10Lkg0YTRg9C90LrRhtC40Lgg0LrQvtC20Lgg0YLQsNC60LbQtSDQvdC10YHQutC+0LvRjNC60L4g0L7RgtC70LjRh9Cw0Y7RgtGB0Y86IDEp0LfQsNGJ0LjRgtC90LDRjyDRhNGD0L3QutGG0LjRjywg0LLRi9C/0L7Qu9C90Y/QtdC80LDRjyDQutC+0LbQtdC5INC+0YHQu9Cw0LHQu9C10L3QsC4g0JrQvtC20LAt0L/QtdGA0LLRi9C5INGE0LjQt9C40L7Qu9C+0LPQuNGH0LXRgdC60LjQuSDQsdCw0YDRjNC10YAsINC60L7RgtC+0YDRi9C5INCy0YHRgtGA0LXRh9Cw0LXRgiDQstC+0LfQsdGD0LTQuNGC0LXQu9GMLiDQlNCw0L3QvdCw0Y8g0YTRg9C90LrRhtC40Y8g0LrQvtC20Lgg0L7RgdC70LDQsdC70LXQvdCwINC40Lct0LfQsCDRgtC+0LPQviwg0YfRgtC+IHBIINC60YDQvtCy0Lgg0L3QtdC00L7RgdGC0LDRgtC+0YfQvdC+INC90LjQt9C60LjQuSwg0LAgINGC0LDQutC20LUg0LTQsNC90L3QsNGPINGE0YPQvdC60YbQuNGPINC60L7QttC4INC+0YHQu9Cw0LHQu9C10L3QsCDQuNC3LdC30LAg0YLQvtC90LrQvtCz0L4g0YDQvtCz0L7QstC+0LPQviDRgdC70L7Rjy3QuNC3LdC30LAg0Y3RgtC+0LPQviDQstC+0LfQsdGD0LTQuNGC0LXQu9GOINC70LXQs9GH0LUg0L/RgNC+0L3QuNC60L3Rg9GC0Ywg0LIg0L7RgNCz0LDQvdC40LfQvCDRgNC10LHQtdC90LrQsC4gMinQstGL0LTQtdC70LjRgtC10LvRjNC90LDRjyDRhNGD0L3QutGG0LjRjyDQutC+0LbQuCDRgtCw0LrQttC1INC+0YHQu9Cw0LHQu9C10L3QsCDQuNC3LdC30LAg0L3QtSDRgNCw0LfQstC40YLRi9GFINC/0L7RgtC+0LLRi9GFINC20LXQu9C10LcsIDMp0YDQtdC30L7RgNCx0YbQuNC+0L3QvdCw0Y8g0YTRg9C90LrRhtC40Y8g0YPRgdC40LvQtdC90LAg0LjQty3Qt9CwINGC0L7QvdC60L7Qs9C+INGB0LvQvtGPINC60LXRgNCw0YLQuNC90L7QstGL0YUg0LLQvtC70L7QutC+0L0g0Lgg0LHQvtCz0LDRgtC+0Lkg0LLQsNGB0LrRg9C70LjRgNC40LfQsNGG0LjQtdC5LCA0KdC00YvRhdCw0YLQtdC70YzQvdCw0Y8g0YTRg9C90LrRhtC40Y8g0L3QvtCy0L7RgNC+0LbQtNC10L3QvdC+0LPQviDRg9GB0LjQu9C10L3QsCwg0L/QvtGC0L7QvNGDINC60LDQuiDQvtC/0Y/RgtGMINC20LUg0YLQvtC90LrQuNC5INC+0YDQvtCz0L7QstC10LLQsNGO0YnQuNC5INGB0LvQvtC5INC4INCx0L7Qs9Cw0YLQvtC1INGA0LDQt9Cy0LXRgtCy0LvQtdC90LjQtSDRgdC+0YHRg9C00L7QsiDQvtCx0YzRj9GB0L3Rj9GO0YIg0LHQvtC70LXQtSDQu9C10LPQutGD0Y4g0LTQuNGE0YTRg9C30LjRjiDQutC40YHQu9C+0YDQvtC00LAg0YfQtdGA0LXQtyDRgdC70L7QuSDQutC+0LbQuCwgNSkg0YHQuNC90YLQtdGC0LjRh9C10YHQutCw0Y8g0YTRg9C90LrRhtC40Y8t0YTRg9C90LrRhtC40L7QvdCw0LvRjNC90L4g0L/QvtC70L3QvtGG0LXQvdC90LAsINGB0LjQvdGC0LXQtyDQstC40YLQsNC80LjQvdCwINCUINGD0LbQtSDQsNC60YLQuNCy0L3QviDQv9GA0L7RgtC10LrQsNC10YIg0L3QsCAzLTQg0L3QtdC0LCA2KdC/0LjQs9C80LXQvdGC0L7QvtC+0LHRgNCw0LfRg9GO0YnQsNGPINGE0YPQvdGG0LjRjyDRgyDQutC+0LbQuCDRgdC90LjQttC10L3QsCDQuNC3LdC30LAg0LzQsNC70L7Qs9C+INC60L7Qu9C40YfQtdGB0YLQstCwINC80LXQu9Cw0L3QvtGG0LjRgtC+0LIg0Lgg0LzQtdC70LDQvdC+0LrQvtGA0YLQuNC90LAuNynQp9GD0LLRgdGC0LLQuNGC0LXQu9GM0L3QsNGPINGE0YPQvdC60YbQuNGPINC60L7QttC4INGDINGA0LXQsdC10L3QutCwINCx0L7Qu9C10LUg0YDQsNC30LLQuNGC0LAg0LjQty3Qt9CwINGC0L7Qs9C+LCDRh9GC0L4g0YHQsNC80LAg0L/QviDRgdC10LHQtSDQutC+0LbQsCDRgtC+0L3QutCw0Y8sINC90LXQttC90LDRjzog0LvQtdCz0LrQviDRgNCw0LfQtNGA0LDQttC40LzQsNGPKCDRjdGC0L4g0L7QsdGM0Y/RgdC90Y/QtdGCINGC0L7RgiDRhNCw0LrRgiwg0YfRgtC+INGDINGA0LXQsdC10L3QutCwINC30LDRh9Cw0YHRgtGD0Y4g0L/RgNC+0Y/QstC70Y/QtdGC0YHRjyDRgNCw0LfQtNGA0LDQttC40LzQvtGB0YLRjCDQutC+0LbQuCDQuNC3LdC30LAg0LPRgNGP0LfQvdGL0YUg0L/QtdC70LXQvdC+0Loo0Y3RgtC+INC+0LHRjNGP0YHQvdGP0LXRgiDQsdGD0YDQvdGD0Y4gItGA0LXQsNC60YbQuNGOIiDQsiDQvtGC0LLQtdGCINC90LAg0LPRgNGP0LfQvdC+0LUg0LHQtdC70YzQtSwgOCnRgtC10YDQvNC+0YDQtdCz0YPQu9GP0YLQvtGA0L3QsNGPINGE0YPQvdC60YbQuNGPLdCyINC60L7QvdGC0LXQutGB0YLQtSDQutC+0LbQuCDRgyDQvNC70LDQtNC10L3RhtCwINC+0YHQu9Cw0LHQu9C10L3QsC3RgtC10L/Qu9C+0L7RgtC00LDRh9CwINC/0YDQtdCy0YvRiNCw0LXRgiDRgtC10L/Qu9C+0L/RgNC+0LTRg9C60YbQuNGOLCDRh9GC0L4g0L7QsdGM0YHQvdGP0LXRgiDQv9C+0YLRgNC10LHQvdC+0YHRgtGMINGA0LXQsdC10L3QutCwINCyINC/0L7QtNC00LXRgNC20LDQvdC40Lgg0L7Qv9GC0LjQvNCw0LvRjNC90L7QuSDRgtC10LzQv9C10YDQsNGC0YPRgNGLLCDRh9GC0L7QsdGLINC90LUg0LTQvtC/0YPRgdC60LDRgtGMINC/0LXRgNC10LPRgNC10LLQsNC90LjRjyDQuCDQv9C10YDQtdC+0YXQu9Cw0LbQtNC10L3QuNGPLjIp0KfRgdGBINGDINGA0LXQsdC10L3QutCwINCyINCy0L7Qt9GA0LDRgdGC0LUgNS3RgtC4INC70LXRgiDRgdC+0YHRgtCw0LLQu9GP0LXRgiDQv9GA0LjQsdC70LjQt9C40YLQtdC70YzQvdC+KDkwLTExMCDRg9C0LtC80LjQvSjQsiDRgdGA0LXQtNC90LXQvCDQvtC60L7Qu9C+IDEwMCkpLCDQsiDRgtC+INCy0YDQtdC80Y8g0LrQsNC6INGDINCy0LfRgNC+0YHQu9C+0LPQviDRh9C10LvQvtCy0LXQutCwINC+0LrQvtC70L4gNjAtODAg0YPQtC7QvNC40L0gLiDQn9GA0LjRh9C40L3QvtC5INGD0YfQsNGJ0LXQvdC90L7Qs9C+LCDQv9C+INC+0YLQvdC+0YjQtdC90LjRjiDQutC+INCy0LfRgNC+0YHQu9GL0LwsINCn0KHQoSDRj9Cy0LvRj9C10YLRgdGPOjEp0L/RgNC10L7QsdC70LDQtNCw0L3QuNC1INGB0LjQvNC/0LDRgtC40YfQtdGB0LrQvtCz0L4g0YLQvtC90YPRgdCwINC90LDQtCDQv9Cw0YDQsNGB0LjQvNC/0LDRgtC40YfQtdGB0LrQvtC5INC40L3QvdC10YDQstCw0YbQuNC10Lkt0LrQsNC6INC40LfQstC10YHRgtC90L4g0YHQuNC80L/QsNGC0LjRh9C10YHQutCw0Y8g0J3QoSDQt9CwINGB0YfQtdGCINGC0LDQutC40YUg0L3QtdC50YDQvtGC0YDQsNC90YHQvNC40YLRgtC10YDQvtCyINC60LDQuiDQsNC00YDQtdC90LDQu9C40L0g0Lgg0L3QvtGA0LDQtNGA0LXQvdCw0LvQuNC9LCDRh9GC0L4g0L7QsdGM0YHQvdGP0LXRgiDQstC70LjRj9C90LjQtSDQvdCwINGB0LXRgNC00YbQtSDQuCDRg9Cy0LXQu9C40YfQtdC90LjQtSDRh9Cw0YHRgtC+0YLRiyDQtdCz0L4g0YHQvtC60YDQsNGJ0LXQvdC40LkuMinQstGL0YHQvtC60LjQuSDQvNC10YLQsNCx0L7Qu9C40LfQvC3Rh9GC0L7QsdGLINC/0L7QtNC00LXRgNC20LjQstCw0YLRjCDQstGL0YHQvtC60LjQuSDQvtCx0LzQtdC9INCy0LXRidC10YHRgtCyLCDQutC+0LzQv9C10L3RgdCw0YLQvtGA0L3QviDRg9Cy0LXQu9C40YfQuNCy0LDQtdGC0YHRjyDQp9Ch0KEo0LIg0YHQstGP0LfQuCDRgSDQv9C+0YHRgtC+0Y/QvdC90L7QuSDQv9C+0YLRgNC10LHQvdC+0YHRgtGM0Y4g0Log0LTQvtGB0YLQsNGC0L7Rh9C90L7QuSDQv9C10YDRhNGD0LfQuNC4INC+0YDQs9Cw0L3QvtCyKSwg0LIg0YDQtdC30YPQu9GM0YLQsNGC0LUg0Y3RgtC+INC+0LHQtdGB0L/QtdGH0LjQstCw0LXRgiDQtNC+0YHRgtCw0YLQvtGH0L3QvtC1INC60YDQvtCy0L7RgdC90LDQsdC20LXQvdC40LUsINC/0YDQtdC00L7RgtCy0YDQsNGJ0LDRjtGJ0LXQtSDQs9C40L/QvtC60YHQuNGOINC+0YDQs9Cw0L3QvtCyINC4INGC0LrQsNC90LXQuSwg0LAg0YLQsNC60LbQtSDQvtCx0LXRgdC/0LXRh9C40LLQsNC10YIg0LDQtNC10LrQstCw0YLQvdGL0Lkg0YLRgNCw0L3RgdC/0L7RgNGCINC+0LHRgNCw0LfQvtCy0LDQvdC90YvRhSDQvNC10YLQsNCx0L7Qu9C40YLQvtCyLtCU0L7Qv9C+0LvQvdC40YLQtdC70YzQvdC+INC90LAg0KfQodChINC80L7Qs9GD0YIg0L/QvtCy0LvQuNGP0YLRjCDRgtCw0LrQttC1INGB0LvQtdC00YPRjtGJ0LjQtSDRhNCw0LrRgtC+0YDRizrQotC+0L3Rg9GBINGB0L7RgdGD0LTQvtCyINGDINGA0LXQsdC10L3QutCwINC80LXQvdGM0YjQtSwg0YfQtdC8INGDINCy0LfRgNC+0YHQu9C+0LPQviDQuNC3LdC30LAg0L/RgNC10L7QsdC70LDQtNCw0L3QuNGPINGN0LvQsNGB0YLQuNGH0LXRgdC60LjRhSDQstC+0LvQvtC60L7QvSwg0YHQvtC+0YLQstC10YLRgdCy0LXQvdC90L4g0LzQtdC90YzRiNC1INCw0YDRgtC10YDQuNCw0LvRjNC90L7QtSDQtNCw0LLQu9C10L3QuNC1LCDRh9GC0L4g0YLQsNC60LbQtSDRg9Cy0LXQu9C40YfQuNCy0LDQtdGCINC/0L7RgtGA0LXQsdC90L7RgdGC0Ywg0LIg0LrQvtC80L/QtdC90YHQsNGG0LjQuCDRg9Cy0LXQu9C40YfQtdC90LjQtdC8INCn0KHQoSwg0YfRgtC+0LHRiyDQvtCx0LXRgdC/0LXRh9C40LLQsNGC0Ywg0LDQtNC10LrQstCw0YLQvdGD0Y4g0L/QtdGA0YTRg9C30LjRjiDQvtGA0LPQsNC90L7QsiDRgyDRgNC10LHQtdC90LrQsC7QodC40LvQsCDRgdC10YDQtNC10YfQvdGL0YUg0YHQvtC60YDQsNGJ0LXQvdC40Lkg0YMg0YDQtdCx0LXQvdC60LAg0YLQsNC60LbQtSDQvdC40LbQtSwgINGH0LXQvCDRgyDQstC30YDQvtGB0LvQvtCz0L4g0YfQtdC70L7QstC10LrQsCzQsCDRgtCw0LrQttC1INGB0LDQvNC4INC60LDQvNC10YDRiyDRgdC10YDQtNGG0LAg0YMg0YDQtdCx0LXQvdC60LAg0LzQsNC70L7Qs9C+INGA0LDQt9C80LXRgNCwINGH0YLQviDRgtCw0LrQttC1INGB0L/QvtGB0L7QsdGB0YLQstGD0LXRgiDQvNC10L3RjNGI0LXQvNGDINC/0L4g0YHRgNCw0LLQvdC10L3QuNGOINGB0L4g0LLQt9GA0L7RgdC70YvQvCDRgdC10YDQtNC10YfQvdC+0LzRgyDQstGL0LHRgNC+0YHRgywg0YfRgtC+INGC0LDQutC20LUg0YHQv9C+0YHQvtCx0YHRgtCy0YPQtdGCINC60L7QvNC/0LXQvdGB0LDRgtC+0YDQvdC+0LzRgyDRg9Cy0LXQu9C40YfQtdC90LjRjiDRh9Cw0YHRgtC+0YLRiyDRgdC10YDQtNC10YfQvdGL0YUg0YHQvtC60YDQsNGJ0LXQvdC40Y8g0L7Qv9GP0YLRjC3RgtCw0LrQuCDQtNC70Y8g0LDQtNC10LrQstCw0YLQvdC+0LPQviDQutGA0L7QstC+0YHQvdCw0LHQttC10L3QuNGPINC+0YDQs9Cw0L3QvtCyINCyINGB0L7QvtGC0LLQtdGC0YHQstC40Lgg0YEg0LjRhSDQv9C+0YLRgNC10LHQvdC+0YHRgtGP0LzQuC4g</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9" table:style-name="ce1">
            <text:p>915349</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4g0KTRg9C90LrRhtC40L7QvdCw0LvRjNC90YvQtSDQvtGB0L7QsdC10L3QvdC+0YHRgtC4INC60L7QttC4INGDINC00LXRgtC10Lkg0YDQsNC90L3QtdCz0L4g0LLQvtC30YDQsNGB0YLQsC4g0JrQvtC20LAg0LzQsNC70LXQvdGM0LrQvtCz0L4g0YDQtdCx0LXQvdC60LAg0LLRi9C/0L7Qu9C90Y/QtdGCINCx0L7Qu9GM0YjQvtC1INC60L7Qu9C40YfQtdGB0YLQstC+INGE0YPQvdC60YbQuNC5LiDQn9C10YDQtdGH0LjRgdC70Y46INC30LDRidC40YLQvdCw0Y8sINGC0LXRgNC80L7RgNC10LPRg9C70LjRgNGD0Y7RidCw0Y8sINGB0LjQvdGC0LXRgtC40YfQtdGB0LrQsNGPLCDQv9C40LPQvNC10L3RgtC+0L7QsdGA0LDQt9GD0Y7RidCw0Y8sINCy0YvQtNC10LvQuNGC0LXQu9GM0L3QsNGPLCDQtNGL0YXQsNGC0LXQu9GM0L3QsNGPINC4INC60L7QttCwLCDQutCw0Log0L7RgNCz0LDQvSDRh9GD0LLRgdGC0LIuINCd0LDRh9C90YMg0YEg0LfQsNGJ0LjRgtC90L7QuSDRhNGD0L3QutGG0LjQuC4g0JfQsNGJ0LjRgtC90LDRjyDRhNGD0L3QutGG0LjRjyDQutC+0LbQuCDRgyDQtNC10YLQtdC5INC10YnQtSDRgdC70LDQsdC+0LLRi9GA0LDQttC10L3QsCDQuNC30LfQsCDRgtC+0LPQviwg0YfRgtC+INC90LDRgNGD0LbQvdC40LUg0YHQu9C+0Lgg0LrQvtC20Lgg0LXRidC1INC/0LvQvtGF0L4g0YHRhNC+0YDQvNC40YDQvtCy0LDQvdGLLCDQsCDQuNC80LXQvdC90L4g0YDQvtCz0L7QstC+0Lkg0YHQu9C+0Lkg0Y3Qv9C40LTQtdGA0LzQuNGB0LAg0YLQvtC90LrQuNC5LCDQutC10YDQsNGC0LjQvdC40LfQsNGG0LjRjyDQuCDRgdCy0Y/Qt9GMINGBINC00LXRgNC80L7QuSDRgtCw0LrQttC1INGB0LvQsNCx0L4g0YDQsNC30LLQuNGC0LAuINCf0YDQvtC00L7Qu9C20YMg0LTQsNC70YzRiNC1LCDRgtC10YDQvNC+0YDQtdCz0YPQu9C40YDRg9GO0YnQsNGPINGE0YPQvdC60YbQuNGPINC40Lct0LfQsCDQvdC10LTQvtGB0YLQsNGC0L7Rh9C90L7Qs9C+INGA0LDQt9Cy0LjRgtC40Y8g0L/QvtGC0L7QstGL0YUg0LbQtdC70LXQtyDQstGL0YDQsNC20LXQvdCwINGB0LvQsNCx0L4sINC/0L7RjdGC0L7QvNGDINC00LXRgtC10Lkg0YDQsNC90L3QtdCz0L4g0LLQvtC30YDQsNGB0YLQsCDQvtCx0YvRh9C90L4g0YXQvtGA0L7RiNC+INC/0LXQu9C10L3QsNGO0YIg0Lgg0YPQutGD0YLRi9Cy0LDRjtGCLCDRh9GC0L4g0L/QvtC30LLQvtC70Y/QtdGCINC/0L7QtNC00LXRgNC20LjQstCw0YLRjCDRgtC10LzQv9C10YDQsNGC0YPRgNGDINGC0LXQu9CwINGA0LXQsdC10L3QutCwINC/0YDQuNC80LXRgNC90L4g0L3QsCDQvtC00L3QvtC8INGD0YDQvtCy0L3QtSwg0LLQtdC00Ywg0L/QvtGB0LvQtSDRgNC+0LbQtNC10L3QuNGPINC4INC90LAg0YDQsNC90L3QuNGFINGN0YLQsNC/0LDRhSDQttC40LfQvdC4INGDINGA0LXQsdC10L3QutCwINGC0LXQv9C70L7QvtGC0LTQsNGH0LAg0LHQvtC70YzRiNC1LCDRh9C10Lwg0YLQtdC/0LvQvtC/0YDQvtC00YPQutGG0LjRjy4g0KLQviDQtdGB0YLRjCwg0L7RgNCz0LDQvdC40LfQvCDRgtGA0LDRgtC40YIg0Y3QvdC10YDQs9C40Y4g0L3QsCDQstGL0YDQsNCx0L7RgtC60YMg0YLQtdC/0LvQsCwg0L3QviDRgSDQu9C10LPQutC+0YHRgtGM0Y4g0Y3RgtC+INGC0LXQv9C70L4g0L7RgtC00LDQtdGCLiDQrdGC0L4g0L/RgNC+0LjRgdGF0L7QtNC40YIg0LjQty3Qt9CwINGC0L7Qs9C+LCDRh9GC0L4g0L7RgtC90L7RgdC40YLQtdC70YzQvdC+INCx0L7Qu9GM0YjQsNGPINC/0LvQvtGJ0LDQtNGMINGC0LXQu9CwINCx0L7Qs9Cw0YLQviDQstCw0YHQutGD0LvRj9GA0LjQt9C+0LLQsNC90LAsINCwINGG0LXQvdGC0YAg0YLQtdGA0LzQvtGA0LXQs9GD0LvRj9GG0LjQuCDQtdGJ0LUg0YDQsNC30LLQuNGCINGB0LvQsNCx0L4uINCf0YDQuCDRgNCw0YHRiNC40YDQtdC90LjQuCDRgdC+0YHRg9C00L7Qsiwg0L/RgNCw0LrRgtC40YfQtdGB0LrQuCDQstGB0Y8g0L/QvtCy0LXRgNC90L7RgdGC0Ywg0YLQtdC70LAg0LHRg9C00LXRgiDQt9Cw0LTQtdC50YHRgtC+0LLQsNC90LAsINGB0LvQtdC00L7QstCw0YLQtdC70YzQvdC+INC4INC40YHQv9Cw0YDQtdC90LjQtSDRgtC10L/Qu9CwINGC0L7QttC1INCx0YPQtNC10YIg0YHQviDQstGB0LXQs9C+INGC0LXQu9CwLiDQndGD0LbQvdC+INC/0L7RjdGC0L7QvNGDINCy0YHQtdCz0LTQsCDRgdC70LXQtNC40YLRjCDQt9CwINGC0LXQvNC/0LXRgNCw0YLRg9GA0L7QuSDRgtC10LvQsCDRgNC10LHQtdC90LrQsCwg0YLQsNC6INC60LDQuiDQvtC9INC80L7QttC10YIg0L/QtdGA0LXQvtGF0LvQsNCx0LjRgtGM0YHRjyDQuNC70Lgg0L3QsNC+0LHQvtGA0L7RgiDQv9C10YDQtdCz0YDQtdGC0YzRgdGPINC4INC/0L7QtNCx0LjRgNCw0YLRjCDQvtC00LXQttC00YMg0L/QviDQv9C+0LPQvtC00LUuINCS0YvQtNC10LvQuNGC0LXQu9GM0L3QsNGPINGE0YPQvdC60YbQuNGPINCz0L7QstC+0YDQuNGCINC+INCy0YvQtNC10LvQtdC90LjQuCDQv9C+0YLQsCwg0LAg0LLQvNC10YHRgtC1INGBINC90LjQvCDQuCDQvdC10LrQvtGC0L7RgNGL0YUg0YHQvtC70LXQuSDQtNC70Y8g0L/QvtC00LTQtdGA0LbQsNC90LjRjyDQsdCw0LvQsNC90YHQsCDQsiDQvtGA0LPQsNC90LjQt9C80LUsINC90L4g0LIg0YDQsNC90L3QtdC8INCy0L7Qt9GA0LDRgdGC0LUg0LjQty3Qt9CwINGC0L7Qs9C+LCDRh9GC0L4g0L/QvtGC0L7QstGL0LUg0LbQtdC70LXQt9GLINC10YnQtSDQtNC+INC60L7QvdGG0LAg0L3QtSDQtNC40YTRhNC10YDQtdC90YbQuNGA0L7QstCw0L3Riywg0LTQsNC90L3QsNGPINGE0YPQvdC60YbQuNGPINCx0YPQtNC10YIg0L3QtdGB0LrQvtC70YzQutC+INGB0L3QuNC20LXQvdCwLi4g0JTRi9GF0LDRgtC10LvRjNC90LDRjyDRhNGD0L3QutGG0LjRjyDRj9Cy0LvRj9C10YLRgdGPINC00L7Qv9C+0LvQvdC40YLQtdC70YzQvdC+0Lkg0Log0L7RgdC90L7QstC90L7QvNGDINC00YvRhdCw0L3QuNGOINC00LvRjyDQuNC30LHQtdC20LDQvdC40Y8g0L3QsNGB0YLRg9C/0LvQtdC90LjRjyDQs9C40L/QvtC60YHQuNC4LCDQvtC90LAg0YXQvtGA0L7RiNC+INCy0YvRgNCw0LbQtdC90LAg0LHQu9Cw0LPQvtC00LDRgNGPINGC0L7QvdC60L7QvNGDINGB0LvQvtGOINGN0L/QuNC00LXRgNC80LjRgdCwINC4INGF0L7RgNC+0YjQtdC80YMg0LrRgNC+0LLQvtGB0L3QsNCx0LbQtdC90LjRjiwg0LAg0LrQsNC6INC80Ysg0LfQvdCw0LXQvCDQutGA0L7QstGMINGC0LDQutC20LUg0Y/QstC70Y/QtdGC0YHRjyDQv9C10YDQtdC90L7RgdGH0LjQutC+0Lwg0LrQuNGB0LvQvtGA0L7QtNCwLiAg0KDQtdC30L7RgNCx0YbQuNC+0L3QvdCw0Y8g0YTRg9C90LrRhtC40Y8g0LHRg9C00LXRgiDQv9C+0LLRi9GI0LXQvdCwINC40Lct0LfQsCDRgtC+0LPQviwg0YfRgtC+INGDINGA0LXQsdC10L3QutCwINGI0LjRgNC+0LrQviDRgNCw0YHQv9C+0LvQvtC20LXQvdCwINGB0LXRgtGMINC60LDQv9C40LvQu9GP0YDQvtCyLCDRgtC+INC10YHRgtGMINC60L7QttCwINC+0LHQuNC70YzQvdC+INCy0LDRgdC60YPQu9GP0YDQuNC30L7QstCw0L3QsCwg0LAg0L3QsNGA0YPQttC90LjQuSDRgNC+0LPQvtCy0L7QuSDRgdC70L7QuSDRjdC/0LjRgtC10LvQuNGPINGC0L7QvdC60LjQuS4g0J/QuNCz0LzQtdC90YLQvtC+0LHRgNCw0LfRg9GO0YnQsNGPINGE0YPQvdC60YbQuNGPICDRgyDQtNC10YLQtdC5INGA0LDQvdC90LXQs9C+INCy0L7Qt9GA0LDRgdGC0LAg0YHQvdC40LbQtdC90YssINGC0LDQuiDQutCw0Log0YHQuNC90YLQtdC3INC80LXQu9Cw0YLQvtC90LjQvdCwINGC0L7QttC1INGB0L3QuNC20LXQvSwg0LrQsNC6INC4INGB0YLQuNC80YPQu9GP0YbQuNGPINC60LvQtdGC0L7Quiwg0LrQvtGC0L7RgNGL0LUg0LfQsCDQvdC10LPQviDQvtGC0LLQtdGH0LDRjtGCLCDRgtC+INC10YHRgtGMINC80LXQu9Cw0L3QvtGG0LjRgtC+0LIuINCh0LjQvdGC0LXRgtC40YfQtdGB0LrQsNGPINGE0YPQvdC60YbQuNGPINC/0L7Rj9Cy0LvRj9C10YLRgdGPINGDINGA0LXQsdC10L3QutCwINC90LUg0YHRgNCw0LfRgywg0YLQviDQtdGB0YLRjCDQvdC1INGBINGB0LDQvNC+0LPQviDRgNC+0LbQtNC10L3QuNGPINC60L7QttCwINC80L7QttC10YIg0YHQuNC90YLQtdC30LjRgNC+0LLQsNGC0Ywg0LLQuNGC0LDQvNC40L0g0JQzLCDQtNCw0L3QvdCw0Y8g0YTRg9C90LrRhtC40Y8g0L3QsNGH0LjQvdCw0LXRgiDRhNGD0L3QutGG0LjQvtC90LjRgNC+0LLQsNGC0Ywg0L/QvtC70L3QvtGG0LXQvdC90L4g0L/RgNC40LzQtdGA0L3QviDRgSDRgtGA0LXRgtGM0LXQuS3Rh9C10YLQstC10YDRgtC+0Lkg0L3QtdC00LXQu9C4INC/0L7RgdC70LUg0YDQvtC20LTQtdC90LjRjy4g0JrQvtC20LAg0LrQsNC6INC+0YDQs9Cw0L0g0YfRg9Cy0YHRgtCyINGE0YPQvdC60YbQuNC+0L3QuNGA0YPQtdGCINGF0L7RgNC+0YjQviDRgSDRgdCw0LzQvtCz0L4g0YDQvtC20LTQtdC90LjRjywg0L/RgNCw0LrRgtC40YfQtdGB0LrQuCDQstGB0LUg0YDQtdGE0LvQtdC60YHRiyDQvdC+0LLQvtGA0L7QttC00LXQvdC90L7Qs9C+INGB0LLRj9C30LDQvdGLINC40LzQtdC90L3QviDRgSDQvtGB0Y/Qt9Cw0L3QuNC10LwuINCS0LXQtNGMINCyINC/0LXRgNCy0YvQtSDQvNC10YHRj9GG0Ysg0LbQuNC30L3QuCDRgNC10LHQtdC90L7QuiDQstGF0L7QtNC40YIg0LIg0LTRgNGD0LPQuNC1INGD0YHQu9C+0LLQuNGPINC4INC90LDRh9C40L3QsNC10YIg0YDQsNC30LvQuNGH0LDRgtGMINC/0YDQtdC00LzQtdGC0Ysg0L/QvtGB0YDQtdC00YHRgtCy0L7QvCDQvtGB0Y/Qt9Cw0L3QuNGPLjxiciAvPg0KPGJyIC8+DQoyLiDQmtCw0Log0LzRiyDQstC40LTQuNC8LCDQv9Cw0YLQvtC70L7Qs9C40Lkg0YMg0YDQtdCx0LXQvdC60LAg0L3QtdGCINGE0LjQt9C40L7Qu9C+0LPQuNGH0LXRgdC60LjQtSDQv9C+0LrQsNC30LDRgtC10LvQuCDQsiDQvdC+0YDQvNC1LCDQv9C+0Y3RgtC+0LzRgyDQvNC+0LbQvdC+INC/0YDQtdC00L/QvtC70L7QttC40YLRjCwg0YfRgtC+INC4INGH0LDRgdGC0L7RgtCwINGB0LXRgNC00LXRh9C90YvRhSDRgdC+0LrRgNCw0YnQtdC90LjQuSDRgtC+0LbQtSDQsdGD0LTQtdGCINCyINC90L7RgNC80LUuINCU0LvRjyDRgNC10LHQtdC90LrQsCA1INC70LXRgiDQvdC+0YDQvNC+0Lkg0KfQodChINCyINC90L7RgNC80LUg0YHQvtGB0YLQsNCy0LvRj9C10YIgMTAwINGD0LTQsNGA0L7QsiDQsiDQvNC40L3Rg9GC0YMuINCt0YLQviDRgdCy0Y/Qt9Cw0L3QviDRgSDRgtC10LwsINGH0YLQviDRgyDQtNC10YLQtdC5INC40L3RgtC10L3RgdC40LLQvdGL0Lkg0L7QsdC80LXQvSDQstC10YnQtdGB0YLQsiwg0YLRgNCw0YLQuNGC0YHRjyDQsdC+0LvRjNGI0L7QtSDQutC+0LvQuNGH0LXRgdGC0LLQviDRjdC90LXRgNCz0LjQuCDQvdCwINGE0L7RgNC80LjRgNC+0LLQsNC90LjQtSwg0LTQsCDQuCDQsiDRhtC10LvQvtC8INGC0YDQsNGC0LjRgtGB0Y8g0LHQvtC70YzRiNC+0LUg0LrQvtC70LjRh9C10YHRgtCy0L4g0Y3QvdC10YDQs9C40Lgg0L3QsCDRgNCw0LfQu9C40YfRgtGL0LUg0LDQutGC0LjQstC90L7RgdGC0Lgg0LIg0LTQtdGC0YHQutC+0Lwg0LLQvtC30YDQsNGB0YLQtS4g0JjQty3Qt9CwINGC0L7Qs9C+LCDRh9GC0L4g0LrQsNC80LXRgNGLINGB0LXRgNC00YbQsCDQtNC+0YHRgtCw0YLQvtGH0L3RiyDQvNCw0LvRiywg0LAg0LjQvCDQvdCw0LTQviDQv9C10YDQtdC60LDRh9C40LLQsNGC0Ywg0YLQvtGCINC20LUg0L7QsdGK0LXQvCDQutGA0L7QstC4LCDRgdC70LXQtNC+0LLQsNGC0LXQu9GM0L3QviDRjdGC0L4g0LTQtdC70LDQtdGC0YHRjyDQsdGL0YHRgtGA0LXQtS4g0J/QvtC80LjQvNC+INGN0YLQvtCz0L4sINC+0YLQvdC+0YHQuNGC0LXQu9GM0L3QviDQv9C+0LLRi9GI0LXQvdC90L7QtSDQp9Ch0KEg0LIg0YHRgNCw0LLQvdC10L3QuNC4INGB0L4g0LLQt9GA0L7RgdC70YvQvCDRh9C10LvQvtCy0LXQutC+0Lwg0L/RgNC+0LjRgdGF0L7QtNC40YIg0LjQty3Qt9CwINGC0L7Qs9C+LCDRh9GC0L4g0Log0YHQtdGA0LTRhtGDINC40LTRg9GCINCyINC+0YHQvdC+0LLQvdC+0Lwg0YHQuNC80L/QsNGC0LjRh9C10YHQutC+0LUg0LjQvNC/0YPQu9GM0YHRiywg0YLQviDQtdGB0YLRjCDQuNC80L/Rg9C70YzRgdGLINGB0YLRgNC10YHRgdCwICjQsNC00YDQtdC90LDQu9C40L3QvtCy0YvQtSkuINCh0L3QuNC20LXQvdC40LUg0KfQodChINCx0YPQtNC10YIg0L3QsNCx0LvRjtC00LDRgtGM0YHRjywg0LrQvtCz0LTQsCDRgNC10LHQtdC90L7QuiDQsdGD0LTQtdGCINGA0LDRgdGC0LgsINCx0YPQtNGD0YIg0YPQstC10LvQuNGH0LjQstCw0YLRjNGB0Y8g0YDQsNC30LzQtdGA0Ysg0YHQtdGA0LTRhtCwLCDQtdCz0L4g0LzRi9GI0LXRh9C90LDRjyDRgdGC0LXQvdC60LAg0YPQstC10LvQuNGH0LXQvdC40Y8uINCi0LDQutC20LUsINGBINCy0L7Qt9GA0LDRgdGC0L7QvCDQvdCwINGB0LXRgNC00YbQtSDQsdGD0LTQtdGCINC/0YDQuNGF0L7QtNC40YLRjCDQsdC+0LvRjNGI0LUg0LjQvNC/0YPQu9GM0YHQvtCyINC+0YIg0L/QsNGA0LDRgdC40LzQv9Cw0YLQuNGH0LXRgdC60L7Qs9C+INC+0YLQtNC10LvQsCDQstC10LPQtdGC0LDRgtC40LLQvdC+0Lkg0L3QtdGA0LLQvdC+0Lkg0YHQuNGB0YLQtdC80Ysg0L3QsCDRgdC10YDQtNGG0LUuINCn0YLQviDQsdGD0LTQtdGCINCz0L7QstC+0YDQuNGC0Ywg0L4g0LfQsNC80LXQtNC70LXQvdC40Lgg0YDQsNCx0L7RgtGLINGB0LXRgNC00YbQsCwg0LAg0YHQu9C10LTQvtCy0LDRgtC10LvRjNC90L4sINC80LXQvdGM0YjQtdC8INCn0KHQoS4g0JLQvtC+0LHRidC1LCDRh9Cw0YHRgtC+0YLQsCDRgdC10YDQtNC10YfQvdGL0YUg0YHQvtC60YDQsNGJ0LXQvdC40Lkg0YMg0LTQtdGC0LXQuSDQtNC+0LLQvtC70YzQvdC+INGF0L7RgNC+0YjQviDQuNC30LzQtdC90LjQvNCwINC4INC30LDQstC40YHQuNGCINC+0YIg0LzQvdC+0LbQtdGB0YLQstCwINGE0LDQutGC0L7RgNC+0LIuINCc0L7QttC10YIg0LzQtdC90Y/RgtGM0YHRjyDQvtGCINC90LDRgdGC0YDQvtC10L3QuNGPINGA0LXQsdC10L3QutCwLCDQvdCw0L/RgNC40LzQtdGALCDRg9Cy0LXQu9C40YfQuNCy0LDQtdGC0YHRjyDQv9GA0Lgg0LrRgNC40LrQtSDQuCDQv9C70LDRh9C1LiDQotCw0LrQttC1LCDQv9GA0Lgg0L/QtdGA0LXQvtGF0LvQsNC20LTQtdC90LjQuCDQuNC70Lgg0L3QsNC+0LHQvtGA0L7RgiDQv9GA0Lgg0L/QvtC00L3Rj9GC0LjQuCDRgtC10LzQv9C10YDQsNGC0YPRgNGLINCn0KHQoSDQsdGD0LTQtdGCINC80LXQvdGP0YLRjNGB0Y8sINC/0YDQuCDQv9C+0LLRi9GI0LXQvdC40Lgg0YLQtdC80L/QtdGA0LDRgtGD0YDRiyDQp9Ch0KEg0L/QvtCy0YvRiNCw0LXRgtGB0Y8sINC/0YDQuCDQv9C+0L3QuNC20LXQvdC40Lgg0YLQtdC80L/QtdGA0LDRgtGD0YDRiyDQp9Ch0KEg0YLQsNC60LbQtSDRgdC90LjQttCw0LXRgtGB0Y8uINCY0LfQvNC10L3Rj9GC0YzRgdGPINCn0KHQoSDQvNC+0LbQtdGCINC4INC/0YDQuCDQsdC+0LvRjNGI0L7QvCDQutC+0LvQuNGH0LXRgdGC0LLQtSDQtNGA0YPQs9C40YUg0YTQsNC60YLQvtGA0L7Qsi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655" table:style-name="ce1">
            <text:p>915655</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4g0KMg0LTQtdGC0LXQuSDRgNCw0L3QvdC10LPQviDQstC+0LfRgNCw0YHRgtCwINC60L7QttC90YvQtSDQv9C+0LrRgNC+0LLRiyDQv9GA0LjRhdC+0LTRj9GC0YHRjyDQvtGH0LXQvdGMINGC0L7QvdC60LjQvNC4LCDRh9GD0LLRgdGC0LLQuNGC0LXQu9GM0L3Ri9C80Lgg0Lgg0Y3Qu9Cw0YHRgtC40YfQvdGL0LzQuCwg0YHQstGP0LfQuCDRgSDQvdC10LTQvtGB0YLQsNGC0L7Rh9C90L7QuSDRgNCw0LfQstC40YLQvtGB0YLRjNGOINGB0L7QtdC00LjQvdC40YLQtdC70YzQvdC+0Lkg0YLQutCw0L3QuC4g0J/RgNC4INGA0L7QttC00LXQvdC40Lgg0YDQtdCx0LXQvdC60LAg0LbQuNC00LrQvtGB0YLRjCDQsiDQvtGB0L3QvtCy0L3QvtC8INCy0YvQstC+0LTQuNGC0YHRjyDRgSDQutC+0LbQtdC5LCDRgtC+INC10YHRgtGMINC+0YfQtdC90Ywg0LLRi9GB0L7QutCw0Y8g0YDQtdC30L7RgNCx0YbQuNC+0L3QvdCw0Y8g0YTRg9C90LrRhtC40Y8sINC60L7RgtC+0YDQsNGPINC/0YDQvtC/0YPRgdC60LDQtdGCINGA0LDQt9C90YvQtSDRjdC70LXQvNC10L3RgtGLLiDQlNGL0YXQsNGC0LXQu9GM0L3QsNGPINGE0YPQvdC60YbQuNGPINC80L7QttC10YIg0L7RgdGD0YnQtdGB0YLQstC70Y/QtdGC0YHRjyDQt9CwINGB0YfQtdGCINC60L7QttC4LCDRgtCw0Log0LrQsNC6INC60L7QttCwINGDINC00LXRgtC10Lkg0L7Rh9C10L3RjCDRgtC+0L3QutCw0Y8sINGB0L7RgdGD0LTRiyDQvdCw0YXQvtC00Y/RgtGB0Y8g0L/QvtGH0YLQuCDRh9GC0L4g0L3QsCDQv9C+0LLQtdGA0YXQvdC+0YHRgtC4LiDQotC10YDQvNC+0YDQtdCz0YPQu9GP0YbQuNGPINGB0L3QuNC20LXQvdCwLCDQutCw0Log0Lgg0LLRi9C00LXQu9C40YLQtdC70YzQvdCw0Y8uINCX0LDRidC40YLQvdCw0Y8g0YTRg9C90LrRhtC40Y8g0YLQvtC20LUg0YHQvdC40LbQtdC90LAsINC30LAg0YHRh9C10YIg0LXQtSDRgtC+0L3QutC+0YHRgtC4LCDRjdGC0L4g0YHQstGP0LfQsNC90L4g0YEg0L3QtdC00L7RgdGC0LDRgtC+0YfQvdC+0Lkg0YDQsNC30LLQuNGC0L7RgdGC0YzRjiDRgdC70L7QtdCyINC60L7QttC4LtCX0LDRidC40YLQvdCw0Y8g0YTRg9C90LrRhtC40Y8g0LrQvtC20Lgg0YMg0LTQtdGC0LXQuSDRgNCw0L3QvdC10LPQviDQstC+0LfRgNCw0YHRgtCwINGC0L7QttC1INC/0L7QvdC40LbQtdC90LAsINGC0LDQuiDQutCw0Log0YDQtdGG0LXQv9GC0L7RgNGLINC4INC90LXRgNCy0L3Ri9C1INC+0LrQvtC90YfQsNC90LjRjyDRgyDQtNC10YLQtdC5INC/0LvQvtGF0L4g0YDQsNC30LLQuNGC0YsuINCt0L/QuNC00LXRgNC80LjRgSDRgtC+0L3QutC40Lkg0Lgg0L3QsCDQv9C+0LvRgtC+0YDQsCAtIDMg0YDQsNC30LAg0LzQtdC90YzRiNC1INGH0LXQvCDRgyDQstC30YDQvtGB0LvRi9GFLiDQodC70L7QuSDQt9C10YDQvdC40YHRgtGL0YUg0LrQu9C10YLQvtC6INC90LXQtNC+0YHRgtCw0YLQvtGH0L3QviDRgNCw0LfQstC40YIuINGBINGA0L7QttC00LXQvdC40Y8g0L/QvtC60YDRi9GC0LAg0LHQsNC60YLQtdGA0LjQvtGG0LjQtNC90L7QuSDQvtCx0L7Qu9C+0YfQutC+0LksINC80Y/Qs9GH0LUsINGH0LXQvCDRgyDQstC30YDQvtGB0LvRi9GFLiDQmtC+0LbQsCDQstC+0LrRgNGD0LMg0LPQu9Cw0Lcg0L/RgNC40YXQvtC00LjRgtGB0Y8g0L7Rh9C10L3RjCDRgtC+0L3QutC+0LksINC90LDQsdC70Y7QtNCw0Y7RgtGB0Y8g0LrQsNC/0LjQu9C70Y/RgNGLINC/0L7QtCDQvdC40LzQuCDRgSDQstGL0YbQstC10YLQsNC90LjQtdC8INC90LDRgNGD0LbRgywg0LAg0YLQsNC6INC20LUg0YMg0LTQtdGC0LXQuSDRgNCw0L3QvdC10LPQviDQstC+0LfRgNCw0YHRgtCwINC/0L4g0YHRgNCw0LLQvdC10L3QuNGOINGBINCy0LfRgNC+0YHQu9GL0LzQuCDQutC+0LbQvdGL0LUg0L/QvtC60YDQvtCy0Ysg0LHQvtC70YzRiNC1INC/0L7QtNCy0LXRgNC20LXQvdGLINCy0L7Qt9C00LXQudGB0YLQstC40Y4g0YHQvtC70L3QtdGH0L3QvtCz0L4g0YHQstC10YLQsC4g0J3QviDRgtCw0Log0LbQtSDQutC+0LbQsCDQtNC10YLQtdC5INGA0LDQvdC90LXQs9C+INCy0L7Qt9GA0LDRgdGC0LAg0YHQv9C+0YHQvtCx0L3QsCDQsdGL0YHRgtGA0L4g0YDQtdCz0LXQvdC10YDQuNGA0L7QstCw0YLRjCwg0YDRg9Cx0YbQtdCy0LDQvdC40Y8g0LAg0YLQsNC6INC20LUg0LvRjtCx0YvQtSDQvNC10YXQsNC90LjRh9C10YHQutC40LUg0LLQvtC30LTQtdC50YHRgtCy0LjRjyDQvdCwINC60L7QttGDINC80L7Qs9GD0YIg0LHRi9GC0Ywg0YHQstC+0LXQstGA0LXQvNC10L3QvdC+INGA0LXQs9C10L3QtdGA0LjRgNC+0LLQsNC90YssINC+0YIg0YfQtdCz0L4g0YHQu9C10LTQvtCyINCy0L7Qt9C00LXQudGB0YLQstC40Y8g0LLQviDQvNC90L7Qs9C+0Lwg0LzQvtCz0YPRgiDQuCDQvdC1INC+0YHRgtCw0YLRjNGB0Y8uINCi0LDQutC40Lwg0L7QsdGA0LDQt9C+0LwsINC60L7QttCwINC00LXRgtC10Lkg0YDQsNC90L3QtdCz0L4g0LLQvtC30YDQsNGB0YLQsCDQuNC80LXQtdGCINC80L3QvtC20LXRgdGC0LLQviDRhNGD0L3QutGG0LjQvtC90LDQu9GM0L3Ri9GFINC+0YHQvtCx0LXQvdC90L7RgdGC0LXQuSDQsiDQv9C10YDQuNC+0LQg0YHQstC+0LXQs9C+INC00LDQu9GM0L3QtdC50YjQtdCz0L4g0YDQsNC30LLQuNGC0LjRjywg0YLQtdC8INGB0LDQvNGL0Lwg0L7QvdCwINC/0YDQuNGF0L7QtNC40YLRgdGPINCx0L7Qu9C10LUg0YLQvtC90LrQvtC5LCDRh9GD0LLRgdGC0LLQuNGC0LXQu9GM0L3QvtC5LCDRgNCw0LfQtNGA0LDQttC40YLQtdC70YzQvdC+0LksINGN0LvQsNGB0YLQuNGH0L3QvtC5INC/0L4g0YHRgNCw0LLQvdC10L3QuNGOINGBINCy0LfRgNC+0YHQu9GL0LzQuC4g0J3QtdC30YDQtdC70L7RgdGMINCx0LDRgNGM0LXRgNC90L7QuSDRhNGD0L3QutGG0LjQuCDRgyDQtNC10YLQtdC5INGA0LDQvdC90LXQs9C+ICDQstC+0LfRgNCw0YHRgtCwINC90LDQsdC70Y7QtNCw0LXRgtGB0Y8sINGC0LDQuiDQutCw0Log0LjRhSDQutC+0LbQsCDQvdC1INGC0LDRgtCw0Log0Y3RhNGE0LXQutGC0LjQstC90L4g0LfQsNGJ0LjRidCw0LXRgiDQvtGCINC/0L7RgtGA0Lgg0LbQuNC00LrQvtGB0YLQuDxiciAvPg0KMi4g0Jog0LLRgNCw0YfRgyDQvdCwINC/0YDQuNC10Lwg0L/RgNC40YXQvtC00LjRgiDRgNC10LHQtdC90L7QuiA1INC70LXRgiDRgSDQvNCw0LzQvtC5LCDQtdCz0L4g0LLQtdGBINGB0L7RgdGC0LDQstC70Y/QtdGCIDIw0LrQsywg0YDQvtGB0YIgMTA10YHQvCwg0Lgg0KfQlNCUIDI1LiDQlNC70Y8g0LTQtdGC0LXQuSA1INC70LXRgiDQvdC+0YDQvNC+0Lkg0YfQsNGB0YLQvtGC0Ysg0LTRi9GF0LDRgtC10LvRjNC90YvRhSDQtNCy0LjQttC10L3QuNC5INGP0LLQu9GP0LXRgtGB0Y8gMTYtMjAsINCwINGH0YLQviDQvdCw0YHRh9C10YIg0KfQodChIC0gNjAtMTIwINGD0LTQsNGA0L7QsiDQsiDQvNC40L3Rg9GC0YMuINCU0LDQvdC90YvQuSDQv9C+0LrQsNC30LDRgtC10LvRjCDQtNC70Y8g0YDQtdCx0LXQvdC60LAgNSDQu9C10YIsINGBINGA0L7RgdGC0L7QvCAxMDUg0YHQvCDRj9Cy0LvRj9C10YLRgdGPINC90LUg0L3QvtGA0LzQvtC5LCDQsCDRgtCw0Log0LbQtSDQvNC+0LPRg9GCINC/0L7RgtGA0LXQsdC+0LLQsNGC0YzRgdGPINC00L7Qv9C+0LvQvdC40YLQtdC70YzQvdGL0LUg0YLRgNC10LHRg9GO0YnQuNC1INCy0L3QuNC80LDQvdC40Y8g0LDRgdC/0LXQutGC0YssINGC0LDQutC40LUg0LrQsNC6INCz0LjQv9C+0YLQtdGA0LzQuNGPLCDRgdC10YDQtNC10YfQvdCw0Y8g0L3QtdC00L7RgdGC0LDRgtC+0YfQvdC+0YHRgtGMINC4INC/0LDRgtC+0LvQvtCz0LjQuCDQtNGL0YXQsNGC0LXQu9GM0L3QvtC5INGB0LjRgdGC0LXQvNGLLiDQldGB0LvQuCDQs9C+0LLQvtGA0LjRgtGMINC+INGB0LLRj9C30Lgg0LTQsNC90L3Ri9GFINC/0L7Qu9GD0YfQvdC90YvRhSDQsdC70LDQs9C+0LTQsNGA0Y8g0L7RgdC80L7RgtGA0YMg0Lgg0YTRg9C90LrRhtC40Y/QvtC90LDQu9GM0L3Ri9C1INC+0YHQvtCx0LXQvdC90L7RgdGC0Lgg0YHQtdGA0LTQtdGH0L3QviDRgdC+0YHRg9C00LjRgdGC0L7QuSDRgdC40YHRgtC10LzRiywg0YLQviDQvNC+0LbQvdC+INC/0YDQtdC00L/QvtC70L7QttC40YLRjCwg0YfRgtC+INGDINC00LDQvdC90L7Qs9C+INGA0LXQsdC10L3QutCwINC10YHRgtGMINC/0LDRgtC+0LvQvtCz0LjRjyDRgdC10YDQtNGG0LAuINCS0YHQtSDRjdGC0L4g0LzQvtC20LXRgiDQsdGL0Ywg0YHQstGP0LfQsNC90L4g0YEg0YLQvCwg0YfRgtC+INGDINGA0LXQsdC10L3QutCwINC10YnQtSDQvdC10LTQvtGB0YLQsNGC0L7Rh9C90L4g0YDQsNC30LLQuNGC0LAg0YHQtdGA0LTQtdGH0L3QviDRgdC+0YHRg9C00LjRgdGC0LDRjyDRgdC40YHRgtC10LzQsCwg0Lgg0LTQu9GPINC90L7RgNCw0LvRjNC90L7QuSDRhtC40YDQutGD0LvRj9GG0LjQuCDQutGA0L7QstC4INGC0YDQtdCx0YPQtdGC0YHRjyDQsdC70LXQtSDQstGL0YHQvtC60LDRjyDRh9Cw0YHRgtC+0YLQsCDRgdC10YDQtNC10YfQvdGL0YUg0YHQvtC60YDQsNGJ0LXQvdC40LkuICDQoyDQtNC10YLQtdC5INCx0YzQtdC8INC60YDQvtCy0LgsINCy0YvQsdGA0LDRgdGL0LLQsNC10LzRi9C5INGB0LXQtNGG0LXQvCDQt9CwINC+0LTQvdC+INC4INGB0L7QutGA0LDRidC10L3QuNC5INC80LXQvdGM0YjQtSDRh9C10Lwg0YMg0LLQt9GA0L7RgdC70YvRhSwg0Lgg0LLRgdC1INGN0YLQviDQutC+0LzQv9C10L3RgdC40YDRg9C10YLRgdGPINCy0YvRgdC+0LrQvtC5INGH0LDRgdGC0L7RgtC+0Lkg0YHQtdGA0LTQtdGH0L3Ri9GFINGB0L7QutGA0LDRidC10L3QuNC5LiA8YnIgLz4NCg==</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Во второй задаче неверно оценено физ.развитие ребенка</text:p>
          </table:table-cell>
          <table:table-cell office:value-type="float" office:value="0" table:style-name="ce1">
            <text:p>0</text:p>
          </table:table-cell>
          <table:table-cell table:number-columns-repeated="16376"/>
        </table:table-row>
        <table:table-row table:style-name="ro1">
          <table:table-cell office:value-type="float" office:value="1066961" table:style-name="ce1">
            <text:p>1066961</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4g0KMg0LTQtdGC0LXQuSDQvNC+0LbQvdC+INC30LDQvNC10YLQuNGC0Ywg0YLQvtC90LrQuNC5INGN0L/QuNGC0LXQu9C40Lkg0Lgg0YDQvtCz0L7QstC+0Lkg0YHQu9C+0LksINGC0L4g0LXRgdGC0Ywg0YMg0LTQtdGC0LXQuSDQvtGB0L7QsdC10L3QvdC+INGDINC90L7QstC+0YDQvtC20LTQtdC90L3Ri9GFINC00L7QstC+0LvRjNC90L4g0YLQvtC90LrQsNGPINC60L7QttCwINC4INC/0LvQvtGF0L4g0YDQsNC30LLQuNGC0YvQuSDRgNC+0LPQvtCy0L7QuSDRgdC70L7QuSDRh9GC0L4g0L7QsdGD0YHQu9Cw0LLQu9C40LLQsNC10YIg0LHQvtC70LXQtSDQv9C+0LLRi9GI0LXQvdC90YPRjiDRh9GD0LLRgdGC0LLQuNGC0LXQu9GM0L3QvtGB0YLRjCDQuiDQvtC60YDRg9C20LDRjtGJ0LXQuSDRgdGA0LXQtNC1LCDQuiDRhdC40LzQuNC60LDRgtCw0Lwg0Lgg0LvQtdC60LDRgNGB0YLQstC10L3QvdGL0Lwg0YHRgNC10LTRgdGC0LLQsNC8LCDQsCDRgtCw0LrQttC1INC90LjQt9C60YPRjiDQsdCw0YDRjNC10YDQvdGD0Y4g0YTRg9C90LrRhtC40Y4g0LjRhSDQutC+0LbQuC4g0JrQu9C40L3QuNGH0LXRgdC60L7QtSDQt9C90LDRh9C10L3QuNC1IC0g0LLRi9GI0LUg0YDQuNGB0Log0YDQsNC30LvQuNGH0L3Ri9GFINC40L3RhNC10LrRhtC40LksINC30LDRgNCw0LbQtdC90LjQuSwg0LDQu9C70LXRgNCz0LjRh9C10YHQutC40YUg0YDQtdCw0LrRhtC40Lkg0Lgg0LjQvdGC0L7QutGB0LjQutCw0YbQuNC5INGH0YLQviDQv9GA0L7Rj9Cy0LvRj9C10YLRgdGPINGB0YvQv9GM0Y4g0LjQu9C4INC/0L7QutGA0LDRgdC90LXQvdC40Y/QvNC4INC90LAg0LrQvtC20LUg0YMg0LzQsNC70YvRiNC10Lkg0YfRgtC+INC80L7QttC10YIg0LLQvtC30L3QuNC60LDRgtGMINC40Lct0LfQsCDQvdCw0YDRg9C20L3Ri9GFINC/0YDQuNC80LXQvdC10L3QuNC5INC90LXQutC+0YLQvtGA0YvRhSDQu9C10LrQsNGA0YHRgtCy0LXQvdC90YvRhSDRgdGA0LXQtNGB0YLQsi4g0KLQsNC60LbQtSDRgyDQtNC10YLQvtC6INGB0LvQsNCx0L7QtSDQv9GA0LjQutGA0LXQv9C70LXQvdC40LUg0Y3Qv9C40LTQtdGA0LzQuNGB0LAg0Log0LTQtdGA0LzQtSwg0YLQviDQtdGB0YLRjCDRgdCy0Y/Qt9GMINC80LXQttC00YMg0YHQu9C+0Y/QvNC4INGA0YvRhdC70LDRjyDRh9GC0L4g0LTQtdC70LDQtdGCINC60L7QttGDINCx0L7Qu9C10LUg0YPRj9C30LLQuNC80L7QuSDQuiDQvNC10YXQsNC90LjRh9C10YHQutC40Lwg0L/QvtCy0YDQtdC20LTQtdC90LjRj9C8INC+0YHQvtCx0LXQvdC90L4g0L/RgNC4INGC0YDQtdC90LjQuCDQuCDQtNCw0LLQu9C10L3QuNC4LiDQnNC+0LbQtdGCINCx0YvRgtGMINGA0LjRgdC6INCy0YvRgdC+0LrQvtC5INGC0YDQsNCy0LzQsNGC0LjQt9Cw0YbQuNC4INC40Lct0LfQsCDQvdC1INC/0YDQsNCy0LjQu9GM0L3QvtCz0L4g0YPRhdC+0LTQsCDQuNC70Lgg0LLQvtC30LzQvtC20L3QvtGB0YLRjCDQvtGC0YHQu9C+0LnQutC4INGN0L/QuNC00LXRgNC80LjRgdCwINC/0YDQuCDQutC+0LbQvdGL0YUg0LfQsNCx0L7Qu9C10LLQsNC90LjRj9GFLiAg0JHQvtCz0LDRgtC+0LUg0LrRgNC+0LLQvtGB0L3QsNCx0LbQtdC90LjQtSDQtNC10YDQvNGLINC60L7QttCwINC80LvQsNC00LXQvdGG0LXQsiDQs9C40L/QtdGA0LXQvNC40YDQvtCy0LDQvdCwINC4INGB0L7RgdGD0LTRiyDRgNCw0YHQv9C+0LvQvtC20LXQvdGLINC00L7QstC+0LvRjNC90L4g0LHQu9C40LfQutC+INC6INC/0L7QstC10YDRhdC90L7RgdGC0Lgg0LrQvtC20LgsINC60LDQv9C40LvQu9GP0YDQvdCw0Y8g0YHQtdGC0Ywg0YXQvtGA0L7RiNC+INGA0LDQt9Cy0LjRgtCwLiDQrdGC0L4g0L7QsdGD0YHQu9Cw0LLQu9C40LLQsNC10YLRgdGPINCy0YvRgdC+0LrQvtC5INGC0LXQv9C70L7QvtGC0LTQsNGH0LXQuSDQuCDQu9Cw0LHQuNC70YzQvdC+0YHRgtGMINGC0LXRgNC80L7RgNC10LPRg9C70Y/RhtC40LguINCh0LDQu9GM0L3Ri9C1INC4INC/0L7RgtC+0LLRi9C1INC20LXQu9C10LfRiyDRgyDQtNC10YLQtdC5INGA0LDQvdC90LXQs9C+INCy0L7Qt9GA0LDRgdGC0LAg0L/QvtC60LAg0LXRidC1INC90LUg0YDQsNC30LLQuNGC0YssINC+0L3QuCDRgNCw0LfQstC40LLQsNGO0YLRgdGPINC70YPRh9GI0LUg0LHQu9C40LbQtSDQuiA1LTYg0LPQvtC00LDQvC4g0J3QtSDQt9GA0LXQu9C+0YHRgtGMINC40LzQvNGD0L3QvdC+0Lkg0YTRg9C90LrRhtC40Lgg0YMg0L3QvtCy0L7RgNC+0LbQtNC10L3QvdC+0LPQviAtINGB0L7QtNC10YDQttC40YIg0LzQsNC70L4g0YHQtdC60YDQtdGC0L7RgNC90L7Qs9C+INC40LzQvNGD0L3QvtCz0LvQvtCx0YPQu9C40L3QsCDQkCDRgdC90LjQttC10L3QsCDQsNC60YLQuNCy0L3QvtGB0YLRjCDRhNCw0LPQvtGG0LjRgtC40YDRg9GO0YnQuNGFINC60LvQtdGC0L7Qui4gINCc0LXRgdGC0L3Ri9C5INC40LzQvNGD0L3QuNGC0LXRgiDQvdC1INC00L7RgdGC0LDRgtC+0YfQtdC9LCDRgtC+INC10YHRgtGMINC80L7QttC10YIg0LHRi9GC0Ywg0LLRi9GB0L7QutC40Lkg0YDQuNGB0Log0L/QuNC+0LTQtdGA0LzQuNC5INC+0L/RgNC10LTQvtGB0YLQtdC5INC60LDQvdC00LjQtNC+0Lcg0Lgg0YLQsNC6INC00LDQu9C10LUuINCS0YvRgdC+0LrQsNGPINCz0LjQtNGA0L7RhNC40LvRjNC90L7RgdGC0Ywg0LrQvtC20Lgg0YMg0LTQtdGC0LXQuSAtINGC0L4g0LXRgdGC0Ywg0LjRhSDQutC+0LbQsCDRgdC/0L7RgdC+0LHQvdCwINGD0LTQtdGA0LbQuNCy0LDRgtGMINC40LvQuCDQt9Cw0LTQtdGA0LbQuNCy0LDRgtGMINCy0L7QtNGDLiDQp9GC0L4g0LPQvtCy0L7RgNC40YIg0L4g0L3QtSDRgdC+0LLQtdGA0YjQtdC90YHRgtCy0LUg0LHQsNGA0YzQtdGA0LAg0LfQsCDRgdGH0LXRgiDRh9C10LPQviDQvtC90Lgg0Lgg0YLQtdGA0Y/RjtGCINCy0L7QtNGDINGC0LDQutC20LUg0LHRi9GB0YLRgNC+LiDQmtC+0LbQsCDRgdGC0LDQvdC+0LLQuNGC0YHRjyDRh9GD0LLRgdGC0LLQuNGC0LXQu9GM0L3QsCDQuiDQvtCx0LXQt9Cy0L7QttC40LLQsNC90LjRjiDQuCDQvdGD0LbQtNCw0LXRgtGB0Y8g0LIg0L/RgNCw0LLQuNC70YzQvdC+0Lwg0YPRhdC+0LTQtSDQuCDRh9Cw0YHRgtC+0Lwg0YPQstC70LDQttC90LXQvdC40LguINCf0YDQtdC+0LHQu9Cw0LTQsNC90LjQtSDQvdC10LnRgtGA0LDQu9GM0L3QvtC5INC40LvQuCDRgdC70LDQsdC+0YnQtdC70L7Rh9C90L7QuSBwSCAtINCyINC/0LXRgNCy0YvQtSDQtNC90Lgg0LbQuNC30L3QuCBQSCDQsdC70LjQttC1INC6INC90LXQudGC0YDQsNC70YzQvdC+0Lkg0YLQviDQtdGB0YLRjCA2LjQtNy40INGH0YLQviDRgdC+0LfQtNCw0LXRgiDQvNC10L3QtdC1INC60LjRgdC70YPRjiDRgdGA0LXQtNGDINC4INCx0L7Qu9C10LUg0LHQu9Cw0LPQvtC/0YDQuNGP0YLQvdGD0Y4g0LTQu9GPINGA0LDQt9C80L3QvtC20LXQvdC40Y8g0LzQuNC60YDQvtGE0LvQvtGA0YssINGH0YLQviDQtNCw0LXRgiDQsdC+0LvQtdC1INCy0YvRgdC+0LrQuNC5INGI0LDQvdGBINC00LvRjyDRgNCw0LfQvNC90L7QttC10L3QuNGPINGA0LDQt9C70LjRh9C90YvRhSDQsdCw0LrRgtC10YDQuNC5LjxiciAvPg0KIDxiciAvPg0KMi4g0JTQu9GPINC00LXRgtC10LkgNSDQu9C10YIg0L3QvtGA0LzQsNC70YzQvdGL0Lwg0Y/QstC70Y/QtdGC0YHRjyDQp9Ch0KEg0LIg0YHRgNC10LTQvdC10LwgOTAtMTAwINGD0LTQsNGA0L7QsiDQsiDQvNC40L3Rg9GC0YMg0LIg0YHQvtGB0YLQvtGP0L3QuNC4INC/0L7QutC+0Y8uINCU0L7Qv9GD0YHRgtC40LzRi9C1INCz0YDQsNC90LjRhtGLINC90L7RgNC80YsgODAtMTAwINGD0LQg0LIg0LzQuNC90YPRgtGDLCDQkNC90LDRgtC+0LzQvi3RhNC40LfQuNC+0LvQvtCz0LjRh9C10YHQutC40LUg0L7RgdC+0LHQtdC90L3QvtGB0YLQuCDRgdC10YDQtNC10YfQvdC+INGB0L7RgdGD0LTQuNGB0YLQvtC5INGB0LjRgdGC0LXQvNGLINGDINC00LXRgtC10Lkg0LIg0Y3RgtC+0Lwg0LLQvtC30YDQsNGB0YLQtSDQvtCx0YrRj9GB0L3Rj9GO0YIg0L7RgtC90L7RgdC40YLQtdC70YzQvdGD0Y4g0YLQsNGF0LjQutCw0YDQtNC40Y4sIDEgLSDQvdC40LfQutC40Lkg0YPQtNCw0YDQvdGL0Lkg0LIg0LzQuNC90YPRgtC90YvQuSDQvtCx0YrQtdC8INGB0LXRgNC00YbQsCAtINGDINC00LXRgtC10Lkg0LzQu9Cw0LTRiNC10LPQviDQstC+0LfRgNCw0YHRgtCwINGD0LTQsNGA0L3Ri9C5INC+0LHRitC10Lwg0YHQtdGA0LTRhtCwINC80LXQvdGM0YjQtSDRh9C10Lwg0YMg0LLQt9GA0L7RgdC70YvRhSDQsiDRgdGA0LXQtNC90LXQvCAzLTUg0LzQuyDQutCzINC90LAg0LzQsNGB0YHRiyDRgtC10LvQsC4g0JTQu9GPINC+0LHQtdGB0L/QtdGH0LXQvdC40Y8g0LDQtNC10LrQstCw0YLQvdC+0Lkg0L/QtdGA0YTRg9C30LjQuCDRgtC60LDQvdC10Lkg0L7RgNCz0LDQvdC40LfQvCDQutC+0LzQv9C10L3RgdC40YDRg9C10YIg0Y3RgtC+INCy0YvRgdC+0LrQuNC8INCn0KHQoSDRgtCw0Log0LrQsNC6INC80LjQvdGD0YLQvdGL0Lkg0L7QsdGK0LXQvCA9INGD0LTQsNGA0L3Ri9C5INC+0LHRitC10LwgeCDQp9Ch0KEg0Lgg0L/RgNC4INC80LXQvdGM0YjQtdC8INGD0LTQsNGA0L3QvtC8INC+0LHRitC10LzQtSDRgtGA0LXQsdGD0LXRgtGB0Y8g0LLRi9GB0L7QutC40Lkg0KfQodChINC00LvRjyDQv9C+0LTQtNC10YDQttCw0L3QuNGPINC/0LXRgNGE0YPQt9C40LguIDIgLSDQvNC10L3RjNGI0LjQtSDRgNCw0LfQvNC10YDRiyDRgdC10YDQtNGG0LAgLSAg0LzQsNGB0YHQsCDRgdC10YDQtNGG0LAg0YMg0LTQtdGC0LXQuSDQvNC10L3RjNGI0LUg0YfQtdC8INGDINCy0LfRgNC+0YHQu9GL0YUg0LIg0L3QtdGB0LrQvtC70YzQutC+INGA0LDQtyDQvdC+INGB0LXRgNC00YbQtSDRgNCw0YHRgtC10YIg0LHRi9GB0YLRgNC10LUg0YfQtdC8INCz0YDRg9C00L3QsNGPINC60LvQtdGC0LrQsCDQvdC+INCyIDUg0LvQtdGCINC10LPQviDQvNCw0YHRgdCwINC4INGB0LjQu9CwINCy0YHQtSDQtdGJ0LUg0L7Qs9GA0LDQvdC40YfQtdC90YsuIDMgLSDQvdC40LfQutC40Lkg0L/QtdGA0LjRhNC10YDQuNGH0LXRgdC60LjQuSDRgdC+0YHRg9C00LjRgdGC0YvQuSDRgtC+0L3Rg9GBINGDINC00LXRgtC10Lkg0L/RgNC10L7QsdC70LDQtNCw0LXRgiwg0L/QsNGA0LDRgdC40LzQv9Cw0YLQuNGH0LXRgdC60L7QtSDQstC70LjRj9C90LjQtSDQuCDRgdC+0YHRg9C00LjRgdGC0YvQuSDRgtC+0L3Rg9GBINC90LUg0YHRgtCw0LHQuNC70LXQvSwg0YHQvdC40LbQtdC90LjQtSDRgtC+0L3Rg9GB0LAg0LLRi9C30YvQstCw0LXRgiDQutC+0LzQv9C10L3RgdCw0YLQvtGA0L3QvtC1INC/0L7QstGL0YjQtdC90LjQtSDQp9Ch0KEg0LTQu9GPINC/0L7QtNC00LXRgNC20LrQuCDQsNGA0YLQtdGA0LjQsNC70YzQvdC+0LPQviDQtNCw0LLQu9C10L3QuNGPLiA0LSDQs9C40L/QtdGA0LzQtdGC0LDQsdC+0LvQuNC30Lwg0Lgg0LLRi9GB0L7QutC40LUg0L/QvtGC0YDQtdCx0L3QvtGB0YLQuCDQsiDQutC40YHQu9C+0YDQvtC00LUg0YMg0LTQtdGC0LXQuSDQv9C+0LLRi9GIINGD0YDQvtCy0LXQvdGMINC+0YHQvdC+0LLQvdC+0LPQviDQvtCx0LzQtdC90LAg0Lgg0LTQu9GPINC+0LHQtdGB0L/QtdGH0LXQvdC40Y8g0L/QvtGC0YDQtdCx0L3QvtGB0YLQtdC5INGC0LrQsNC90LXQuSDQsiDQutC40YHQu9C+0YDQvtC00LUg0Lgg0L/QuNGC0LDRgtC10LvRjNC90YvRhSDQstC10YnQtdGB0YLQstCw0YUg0YLRgNC10LHRg9C10YLRgdGPINGD0YHQuNC70LXQvdC90L7QtSDQutGA0L7QstC+0L7QsdGA0LDRidC10L3QuNC1INC4INGD0YfQsNGJ0LXQvdC40LUg0KfQodChLiA1IC0g0L3QtdC00L7RgdGC0LDRgtC+0YfQvdCw0Y8g0YDQtdCz0YPQu9GP0YbQuNGPINCy0LXQs9C10YLQsNGC0LjQstC90L7QuSDQvdC10YDQstC90L7QuSDRgdC40YHRgtC10LzQvtC5INC/0YDQtdC+0LHQu9Cw0LTQsNC90LjQtSDRgdC40LzQv9Cw0YLQuNGH0LXRgdC60LjRhSDQuCDQv9Cw0YDQsNGB0LjQvNC/0LDRgtC40YfQtdGB0LrQuNGFINCy0LvQuNGP0L3QuNC5INC80L7QttC10YIg0LrQvtC70LXQsdCw0YLRjNGB0Y8g0YfRgtC+INC+0LHRitGP0YHQvdGP0LXRgiDQu9Cw0LHQuNC70YzQvdC+0YHRgtGMINCn0KHQoS4gNiAtICDQv9C+0LLRi9GI0LXQvdC90LDRjyDRjdC80L7RhtC40L7QvdCw0LvRjNC90LDRjyDQu9Cw0LHQuNC70YzQvdC+0YHRgtGMINGDINC00LXRgtC+0LosINGC0L4g0LXRgdGC0Ywg0Y3QvNC+0YbQuNC4LCDRhNC40LfQuNGH0LXRgdC60LDRjyDQsNC60YLQuNCy0L3QvtGB0YLRjCDQtNCw0LbQtSDQvdC1INC30L3QsNGH0LjRgtC10LvRjNC90L7QtSDQstC+0LvQvdC10L3QuNC1INGDINGA0LXQsdC10L3QutCwINC80L7QttC10YIg0LLRi9C30LLQsNGC0Ywg0LLRgNC10LzQtdC90L3Rg9GOINGE0LjQt9C40L7Qu9C+0LPQuNGH0LXRgdC60YPRjiDRgtCw0YXQuNC60LDRgNC00LjRjiDRgyDQtNC10YLQtdC5LiAgICAgICAgICAgICAgICAgICAgICAgICAgICAgICAgICAgICAgICAg</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76" table:style-name="ce1">
            <text:p>1066976</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4g0Jog0YTRg9C90LrRhtC40L7QvdCw0LvRjNC90YvQvCDQvtGB0L7QsdC10L3QvdC+0YHRgtGP0Lwg0LrQvtC20Lgg0YMg0LTQtdGC0LXQuSDRgNCw0L3QvdC10LPQviDQstC+0LfRgNCw0YHRgtCwINC80L7QttC90L4g0L7RgtC90LXRgdGC0Lgg0YHQvdC40LbQtdC90L3Rg9GOINC30LDRidC40YLQvdGD0Y4g0YTRg9C90LrRhtC40Y4g0LjQty3Qt9CwINGB0LvQsNCx0L7Qs9C+INGA0LDQt9Cy0LjRgtC40Y8g0Lgg0YDQsNCx0L7RgtGLINGB0LDQu9GM0L3Ri9GFINC20LXQu9C10LcuINCi0LXQv9C70L7QvtGC0LTQsNGH0LAg0YPRgdC40LvQtdC90LAg0LjQty3Qt9CwINCw0LrRgtC40LLQvdC+0YHRgtC4INC/0L7RgtC+0LLRi9GFINC20LXQu9C10LcuINCi0LDQuiDQttC1INC40Lct0LfQsCDQsdC+0LvRjNGI0LXQuSDQsNC60YLQuNCy0L3QvtGB0YLQuCDQv9C+0YLQvtCy0YvRhSDQttC10LvQtdC3INCy0LvQsNC20L3QvtGB0YLRjCDQutC+0LbQuCDQv9C+0LLRi9GI0LXQvdCwLiDQrdGC0L4g0LzQvtC20LXRgiDQv9GA0LjQstC+0LTQuNGC0YwgKNC/0YDQuCDQv9GA0LXQvdC10LHRgNC10LbQtdC90LjQuCDQs9C40LPQuNC10L3QuNGH0LXRgdC60LjQvNC4INC90L7RgNC80LDQvNC4KSDQuiDQv9GA0L7RgtGA0YPQt9C40Y/QvCDQuCDRjdGA0L7Qt9C40Y/QvCDQsiDRgdC60LvQsNC00LrQsNGFINC60L7QttC4LiDQlNC70Y8g0L/RgNC+0YTQuNC70LDQutGC0LjQutC4INGN0YDQvtC30LjQstC90YvRhSDQuNC30LzQtdC90LXQvdC40Lkg0LIg0LrQvtC20L3QvtC8INC/0L7QutGA0L7QstC1INC00LXRgtC10Lkg0YfQsNGB0YLQviDQv9GA0LjQvNC10L3Rj9GO0YIg0YLQsNC70YzQutC+0L/QvtC00L7QsdC90YvQtSDQtNC10YLRgdC60LjQtSDQv9C+0YDQvtGI0LrQuCAo0L/RgNC40YHRi9C/0LrQuCkuINCi0LXQv9C70L7Qv9GA0L7QtNGD0LrRhtC40Y8g0YHQvdC40LbQtdC90LAg0LjQty3Qt9CwINGB0LvQsNCx0L7RgNCw0LfQstC40YLQvtCz0L4g0LLQvtC70L7RgdGP0L3QvtCz0L4g0L/QvtC60YDQvtCy0LAuINCS0L7Qu9C+0YHRj9C90L7QuSDQv9C+0LrRgNC+0LIg0L/QvtGH0YLQuCDQvdC1INGA0LDQt9Cy0LjRgiwg0LjQvNC10Y7RgtGB0Y8g0LzQsNC70YvQtSDRgtC+0L3QutC40LUsINGB0LLQtdGC0LvRi9C1INCy0L7Qu9C+0YHRiyDQv9C+INCy0YHQtdC80YMg0LrQvtC20L3QvtC80YMg0L/QvtC60YDQvtCy0YMg0LIg0L3QsNGA0L7QtNC1INC90LDQt9GL0LLQsNC10LzRi9C1ICLQv9GD0YjQutC+0LwiINC40LvQuCAi0L/Rg9GI0LrQvtCy0YvQvNC4INCy0L7Qu9C+0YHQsNC80LgiLiDQrdC70LDRgdGC0LjRh9C90L7RgdGC0Ywg0LrQvtC20Lgg0L/QvtCy0YvRiNC10L3QsCDQuNC3LdC30LAg0L/QvtCy0YvRiNC10L3QvdC+0LPQviDQsiDQv9GA0L7RhtC10L3RgtC+0Lwg0LrQvtC70LjRh9C10YHRgtCy0LUg0LrQvtC70LjRh9C10YHRgtCy0LAg0Y3Qu9Cw0YHRgtC40L3QsCDQsiDQvNC10LfQvtC00LXRgNC80LUuINCSINGB0LLQvtGOINC+0YfQtdGA0LXQtNGMINGD0L/RgNGD0LPQvtGB0YLRjCDQutC+0LbQuCDQv9C+0L3QuNC20LXQvdCwINCyINGB0LvQtdC00YHRgtCy0LjQuCDQv9C+0L3QuNC20LXQvdC90L7Qs9C+INC/0YDQvtGG0LXQvdGC0L3QvtCz0L4g0LrQvtC70LjRh9C10YHRgtCy0LAg0LrQvtC70LvQsNCz0LXQvdCwLiDQntC60YDQsNGBINC60L7QttC90YvRhSDQv9C+0LrRgNC+0LLQvtCyINGDINGC0L7Qu9GM0LrQviDRh9GC0L4g0YDQvtC00LjQstGI0LjRhdGB0Y8g0LzQvtC20LXRgiDQstCw0YDRjNC40YDQvtCy0LDRgtGM0YHRjy4g0JIg0L/QtdGA0LLRi9C1IDItNCDQtNC90Y8g0LrQvtC20L3Ri9C1INC4INGB0LvQuNC30LjRgdGC0YvQtSDQv9C+0LrRgNC+0LLRiyDQvNC+0LPRg9GCINC/0YDQuNC+0LHRgNC10YLQsNGC0Ywg0LbQtdC70YLRg9GI0L3Ri9C5INCy0LjQtCwg0YfRgtC+INC90LDQt9GL0LLQsNC10YLRgdGPINGE0LjQt9C40L7Qu9C+0LPQuNGH0LXRgdC60L7QuSDQttC10LvRgtGD0YXQvtC5INC90L7QstC+0YDQvtC20LTQtdC90L3Ri9GFINC4INGP0LLQu9GP0LXRgtGB0Y8g0LLQsNGA0LjQsNC90YLQvtC8INC90L7RgNC80YsuINCt0YLQviDQttC10LvRgtGD0YjQvdC+0YHRgtGMINCy0L7Qt9C90LjQutCw0LXRgiDQsiDRgdC70LXQtNGB0YLQstC40Lgg0YDQsNGB0L/QsNC00LAg0YTQtdGC0LDQu9GM0L3QvtCz0L4g0LPQtdC80L7Qs9C70L7QsdC40L3QsCDQuCDQv9C+0LLRi9GI0LXQvdC90L7QvNGDINC+0LHRgNCw0LfQvtCy0LDQvdC40Y4g0L/RgNGP0LzQvtCz0L4g0L3QtdC60L7QvdGK0Y7Qs9C40YDQvtCy0LDQvdC90L7Qs9C+INCz0LXQvNC+0LPQu9C+0LHQuNC90LAuINCk0LjQt9C40L7Qu9C+0LPQuNGH0LXRgdC60LDRjyDQttC10LvRgtGD0YjQvdC+0YHRgtGMINC60L7QttC90YvRhSDQv9C+0LrRgNC+0LLQvtCyINGDINC00LXRgtC10Lkg0L7QsdGL0YfQvdC+INC/0YDQvtGF0L7QtNC40YIg0LogMTAtMTIg0LTQvdGP0Lwg0LbQuNC30L3QuC4gIDxiciAvPg0KPGJyIC8+DQoyLtCn0LDRgdGC0L7RgtCwINGB0LXRgNC00LXRh9C90YvRhSDRgdC+0LrRgNCw0YnQtdC90LjQuSDRgyDQtNC10YLQtdC5OiDQoyDQs9GA0YPQtNC90LjRh9C60L7QsiAo0YEg0LzQvtC80LXQvdGC0LAg0YDQvtC20LTQtdC90LjRjyDQtNC+IDEg0LzQtdGB0Y/RhtCwKSDQp9Ch0KEg0YDQsNCy0L3QsCAxMjAtMTYwINGD0LTQsNGA0L7QsiDQsiDQvNC40L3Rg9GC0YMuINCjICjQvNC70LDQtNC10L3RhtC10LIpINGBIDEg0LTQviAxMiDQvNC10YHRj9GG0LAgLSAxMTAtMTQwINGD0LTQsNGA0L7QsiDQsiDQvNC40L3Rg9GC0YMuINChIDEg0LPQvtC00LAg0LTQviAzINC70LXRgiAtIDEwMC0xMjAg0YPQtNCw0YDQvtCyINCyINC80LjQvdGD0YLRgy4g0J3QsNGH0LjQvdCw0Y8g0YEg0LTQvtGI0LrQvtC70YzQvdC+0LPQviDQstC+0LfRgNCw0YHRgtCwICjQvtGCIDMg0LTQviA2INC70LXRgikgLSDRh9Cw0YHRgtC+0YLQsCDRgdC10YDQtNC10YfQvdGL0YUg0YHQvtC60YDQsNGJ0LXQvdC40Lkg0YHQvdC40LbQsNC10YLRgdGPINC00L4gOTAtMTAwINGD0LTQsNGA0L7QsiDQsiDQvNC40L3Rg9GC0YMuINCjINC00LXRgtC10Lkg0LzQu9Cw0LTRiNC10LPQviDRiNC60L7Qu9GM0L3QvtCz0L4g0LLQvtC30YDQsNGB0YLQsCAo0L7RgiA2INC00L4gMTIg0LvQtdGCKSAtINCn0KHQoSDRgNCw0LLQvdCwIDgwLTEwMC4g0KMg0L/QvtC00YDQvtGB0YLQutC+0LIgKDEyKyDQu9C10YIpIC0g0YfQsNGB0YLQvtGC0LAg0YHQtdGA0LTQtdGH0L3Ri9GFINGB0L7QutGA0LDRidC10L3QuNC5INGB0YLQsNC90L7QstC40YLRgdGPINGC0L7QttC00LXRgdGC0LLQtdC90L3QvtC5INCn0KHQoSDQstC30YDQvtGB0LvRi9GFINC4INGB0L7RgdGC0LDQstC70Y/QtdGCIDYwLTcwINGD0LTQsNGA0L7QsiDQsiDQvNC40L3Rg9GC0YMuINCt0YLQuCDQutC+0LvQtdCx0LDQvdC40Y8g0LIg0LfQvdCw0YfQtdC90LjRjyDQp9Ch0KEg0YMg0LTQtdGC0LXQuSDRgNCw0LfQvdC+0LPQviDQstC+0LfRgNCw0YHRgtC90L7Qs9C+INC/0LXRgNC40L7QtNCwINC+0LHRg9GB0LvQvtCy0LvQtdC90Ysg0YTRg9C90LrRhtC40L7QvdCw0LvRjNC90YvQvNC4INC+0YHQvtCx0LXQvdC90L7RgdGC0Y/QvNC4INGB0LXRgNC00LXRh9C90L4t0YHQvtGB0YPQtNC40YHRgtC+0Lkg0YHQuNGB0YLQtdC80YsgINC4INGB0LDQvNC+0LPQviDQvNC+0LvQvtC00L7Qs9C+INC+0YDQs9Cw0L3QuNC30LzQsC4g0KDQsNC30LzQtdGA0Ysg0YHQtdGA0LTRhtCwINGDINC00LXRgtC10Lkg0LzQtdC90YzRiNC1INGH0LXQvCDRgyDQstC30YDQvtGB0LvRi9GFINC4INC10LPQviDRgdC+0LrRgNCw0YLQuNGC0LXQu9GM0L3QsNGPINGB0LjQu9CwINGC0L7QttC1INC80LXQvdGM0YjQtS4g0JTQu9GPINC60L7QvNC/0LXQvdGB0LDRhtC40Lgg0YHQu9Cw0LHQvtGB0YLQuCDRgdC10YDQtNC10YfQvdC+0LPQviDQstGL0LHRgNC+0YHQsCDRh9Cw0YHRgtC+0YLQsCDRgdC10YDQtNC10YfQvdGL0YUg0YHQvtC60YDQsNGJ0LXQvdC40Lkg0L7RgdGC0LDQtdGC0YHRjyDQstGL0YHQvtC60L7QuSAo0L/QviDRgdGA0LDQstC90LXQvdC40Y4g0YHQviDQstC30YDQvtGB0LvRi9C80LgpLCDRh9GC0L4g0LHRiyDRjdGE0YTQtdC60YLQuNCy0L3QvtGB0YLRjCDQvdCw0LPQvdC10YLQsNGC0LXQu9GM0L3QvtC5INGE0YPQvdC60YbQuNC4INGB0LXRgNC00YbQsCDQsdGL0LvQsCDQtNC+0YHRgtCw0YLQvtGH0L3QvtC5INC00LvRjyDQv9C+0LvQvdC+0Lkg0L/QtdGA0YTRg9C30LjQuCDQvtGA0LPQsNC90L7QsiDQuCDRgtC60LDQvdC10Lkg0LTQtdGC0LXQuS4g0KEg0LPQvtC00LDQvNC4INGA0LDQt9C80LXRgNGLINC4INGB0LjQu9CwINC80LjQvtC60LDRgNC00LAg0YDQsNGB0YLQtdGCINC4INGB0LXRgNC00LXRh9C90YvQuSDQstGL0LHRgNC+0YEg0YLQvtC20LUsINGB0L7QvtGC0LLQtdGC0YHRgtCy0LXQvdC90L4g0YHQvdC40LbQsNC10YLRgdGPINC4INCn0KHQoS4g0JIg0LTQvtCx0LDQstC+0Log0YMg0LTQtdGC0LXQuSDQtdGJ0LUg0L3QtSDQtNC+INC60L7QvdGG0LAg0YHRhNC+0YDQvNC40YDQvtCy0LDQvdGLINCy0LXQs9C10YLQsNGC0LjQstC90YvQtSDRgNC10LPRg9C70Y/RgtC+0YDQvdGL0LUg0LzQtdGF0LDQvdC40LfQvNGLINGB0L3QuNC20LXQvdC40Y8g0YPQstC10LvQuNGH0LXQvdC40Y8g0KfQodChICjRgyDQtNC10YLQtdC5INGB0LjQvNC/0LDRgtC40YfQtdGB0LrQsNGPINGB0LjRgdGC0LXQvNCwINC/0YDQtdC+0LHQu9Cw0LTQsNC10YIg0L3QsNC0INC/0LDRgNCw0YHQuNC80L/QsNGC0LjRh9C10YHQutC+0LkpLiDQotCw0Log0LbQtSDRgyDQtNC10YLQtdC5INC/0L7QstGL0YjQtdC9INC+0LHQvNC10L0g0LLQtdGJ0LXRgdGC0LIg0Lgg0LrQsNC6INCyINGB0LvQtdC00YHRgtCy0LjQuCDRgtC60LDQvdC4INC+0YDQs9Cw0L3QuNC30LzQsCDQvdGD0LbQtNCw0Y7RidC40LXRgdGPINCyINCx0L7Qu9GM0YjQtdC8INC/0L7RgdGC0YPQv9C70LXQvdC40Lgg0L3QtdC+0LHRhdC+0LTQuNC80YvRhSDQstC10YnQtdGB0YLQsiDQutC+0YLQvtGA0YvQtSDQsiDQsdC+0LvRjNGI0LXQvCDQutC+0LvQuNGH0LXRgdGC0LLQtSDQv9GA0LjQvdC+0YHRj9GC0YHRjyDQsdC+0LvRjNGI0LXQuSDRgdC60L7RgNC+0YHRgtGM0Y4g0LrRgNC+0LLQvtGC0L7QutCwL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Не сказано о терморегулирующей функции, дыхательной, синтетической и как орган чувств.</text:p>
          </table:table-cell>
          <table:table-cell office:value-type="float" office:value="0" table:style-name="ce1">
            <text:p>0</text:p>
          </table:table-cell>
          <table:table-cell table:number-columns-repeated="16376"/>
        </table:table-row>
        <table:table-row table:style-name="ro1">
          <table:table-cell office:value-type="float" office:value="1067065" table:style-name="ce1">
            <text:p>1067065</text:p>
          </table:table-cell>
          <table:table-cell office:value-type="string" table:style-name="ce1">
            <text:p>russian</text:p>
          </table:table-cell>
          <table:table-cell office:value-type="string" table:style-name="ce1">
            <text:p>Билет 24.&amp;lt;br /&amp;gt; 1.Какие функциональные особенности кожи у детей раннего возраста.&amp;lt;br /&amp;gt; 2.На приеме у педиатра мама с ребенком 5 лет, обратились в связи с прохождением медицинского осмотра. Врач провел осмотр, патологии не выявлено. Вес 20 кг, рост 105 см. ЧДД 25. Какова частоты сердечных сокращений у данного ребенка? С какими функциональными особенностями сердечно -сосудистой системы это связано?&amp;lt;br /&amp;gt;</text:p>
          </table:table-cell>
          <table:table-cell office:value-type="string" table:style-name="ce1">
            <text:p>MS4g0KTRg9C90LrRhtC40L7QvdCw0LvRjNC90YvQtSDQvtGB0L7QsdC10L3QvdC+0YHRgtC4INC60L7QttC4INGDINC00LXRgtC10Lkg0YDQsNC90L3QtdCz0L4g0LLQvtC30YDQsNGB0YLQsDog0LjQvNC10LXRgiDRgNGP0LQg0L7RgtC70LjRh9C40Lgg0L7RgiDQutC+0LbQuCDQstC30YDQvtGB0LvQvtCz0L4g0YfQtdC70L7QstC10LrQsCwg0YfRgtC+INGB0LLRj9C30LDQvdC90L4g0YEg0LDQvdCw0YLQvtC80L4t0YTQuNC30LjQvtC70L7Qs9C40YfQtdGB0LrQvtC5INC+0YHQvtCx0LXQvdC90L7RgdGC0Y/QvNC4LiAxKSDQl9Cw0YnQuNGC0L3QsNGPLSDRgdC70LDQsdC+INCy0YvRgNCw0LbQtdC90L3QsNGPLCDRgtC+0L3QutC40Lkg0YDQvtCz0L7QstC+0Lkg0YHQu9C+0Lkg0Y3Qv9C40LTQtdGA0LzQuNGB0LA6INGDINC90L7QstC+0YDQvtC20LTQtdC90L3Ri9GFINC4INC80LDQu9C10L3RjNC60LjRhSDQtNC10YLQtdC5INGA0L7Qs9C+0LLQvtC5INGB0LvQvtC5INC30L3QsNGH0LjRgtC10LvRjNC90L4g0YLQvtC90YzRiNC1INGH0LXQvCDRgyDQstC30YDQvtGB0LvRi9GFLCDRh9GC0L4g0LTQtdC70LDQtdGCINC60L7QttGDINC70LXQs9C60L4g0YDQsNC90LjQvNC+0Lkg0Lgg0YfRg9Cy0YHRgtCy0LjRgtC10LvRjNC90L7QuSDQuiDQstC90LXRiNC90LjQvCDQstC+0LfQtNC10LnRgdGC0LLQuNGP0LwuINCR0L7Qu9C10LUg0YPRj9C30LLQuNC80L7QuSDQuiDQuNC90YTQtdC60YbQuNGP0Lwg0Lgg0YDQsNC30LTRgNCw0LbQsNGO0YnQuNC8INCy0LXRidC10YHRgtCy0LDQvC4g0KHQv9C+0YHQvtCx0YHRgtCy0YPQtdGCINCx0YvRgdGC0YDQvtC5INC/0L7RgtC10YDQtSDQstC70LDQs9C4INCy0YvRgdC+0LrQsNGPINGC0YDQsNC90YEg0Y3Qv9C40LTQtdGA0LzQsNC70YzQvdCw0Y8g0L/QvtGC0LXRgNGPINCy0L7QtNGLLiAyKSDQndC10LTQvtGB0YLQsNGC0L7Rh9C90L7QtSDQtNC40YTRhNC10YDQtdC90YbQuNGA0L7QstC60LAg0Y3Qv9C40LTQtdGA0LzQuNGB0LAg0Lgg0LTQtdGA0LzRiyDRjdGC0L4g0YHQstGP0LfRjCDQvC/RgyDRgdC70L7Rj9C80Lgg0LrQvtC20Lgg0LHQvtC70LXQtSDRgdC70LDQsdC10LU6INGN0L/QuNC00LXRgNC80LjRgSDQu9C10LPQutC+INC+0YLRgdC70LDQuNCy0LDQtdGC0YHRjyDQvtGCINC00LXRgNC80YssINC60L7QttCwINGB0LrQu9C+0L3QvdCwINC6INC80LDRhtC10YDQsNGG0LjQuCDQuCDQvtCx0YDQsNC30L7QstCw0L3QuNGOINC+0L/RgNC10LvQtdGB0YLQuCDQv9GA0Lgg0LjQt9Cx0YvRgtC60LUg0LLQu9Cw0LPQuC4gMykg0JHQvtCz0LDRgtCw0Y8g0LrRgNC+0LLQvtGB0L3QsNCx0LbQtdC90LjQtSDQuCDQstGL0YHQvtC60LDRjyDQstCw0YHQutGD0LvRj9GA0LjQt9Cw0YbQuNGPINGN0YLQviDQv9GA0LjQstC+0LTQuNGCINC6INC/0L7QstGL0Ygt0Y8g0YfRg9Cy0YHRgi3RgtGMINC6INGC0LXQvNC/0LXRgNCw0YLRg9GA0L3Ri9C8INC40LfQvNC10L3QtdC90LjRj9C8LCDRgdC60LvQvtC90L3QvtGB0YLQuCDQuiDQs9C40L/QtdGA0LXQvNC40Lgg0Lgg0LHRi9GB0YLRgNC+0LzRgyDRgNCw0YHQv9GA0L7RgdGCLdGOINCy0L7RgdC/0LDQu9C40YLQtdC70YzQvdGL0YUg0YDQtdCw0LrRhtC40LguIDQpINCf0L7QstGL0YjQtdC90L3QsNGPINC/0YDQvtC90LjRhtCw0LXQvNC+0YHRgtGMINC60L7QttC4OiDQutC+0LbQsCDQvNCw0LvQtdC90YzQutC+0LPQviDRgNC10LHQtdC90LrQsCDQv9GA0L7Qv9GD0YHQutCw0LXRgiDQvNC90L7Qs9C40LUg0LIt0LLQsCAoINCyINGC0L7QvCDRh9C40YHQu9C1INGC0L7QutGB0LjRh9C10YHQutC40LUpLCDQsdGL0YHRgtGA0LXQtSwg0YfRgtC+INGC0YDQtdCx0YPQtdGCINC+0YHRgtC+0YDQvtC20L3QvtGB0YLQuCDQv9GA0Lgg0L/RgNC40LzQtdC90LXQvdC40Lgg0LzQtdGB0YLQvdGL0YUg0LvQtdC60LDRgNGB0YLQstC10L3QvdGL0YUg0YHRgNC10LTRgdGC0LIg0Lgg0LrQvtGB0LzQtdGC0LjQutC4LiA1KSDQndC10LfRgNC10LvQvtGB0YLRjCDQv9C+0YLQvtCy0YvRhSDQuCDRgdCw0LvRjNC90YvRhSDQttC10LvQtdC3OiDRgdCw0LvRjNC90YvQtSDQttC10LvQtdC30Ysg0LDQutGC0LjQstC90Ysg0YMg0L3QvtCy0L7RgNC+0LbQtNC10L3QvdGL0YUg0LfQsCDRgdGH0LXRgiDQvNCw0YLQtdGA0LjQvdGB0LrQuNGFINCz0L7RgNC80L7QvdC+0LIsINC30LDRgtC10Lwg0LjRhSDRhNGD0L3QutGG0LjRjyDRgdC90LjQttCw0LXRgtGB0Y8uINCf0L7RgtC+0LLRi9C1INC20LXQu9C10LfRiyDRhNGD0L3QutGG0LjQvtC90LjRgNGD0LXRgiDRgdC70LDQsdC+LCDRgtC10YDQvNC+0YDQtdCz0YPQu9GP0YbQuNGPINC90LXRgdC+0LLQtdGA0YjQtdC90L3QsCwg0LLRi9GB0L7QutCw0Y8g0YHQutC70L7QvdC90L7RgdGC0Ywg0Log0L/QtdGA0LXQs9GA0LXQstCw0L3QuNGOINC4INC/0LXRgNC10LPRgNGD0LfQutC1INCy0L7QtNC90L4t0YHQvtC70LXQstC+0LPQviDQvtCx0LzQtdC90LAuIDYpINCd0LjQt9C60L7QtSDRgdC+0LTQtdGA0LbQsNC90LjQtSDQvNC10LvQsNC90LjQvdCwOiDRgdC90LjQttC10L3QvdCw0Y8g0L/QuNCz0LzQtdC90YLQsNGG0LjRjyDQtNC10LvQsNC10YIg0LrQvtC20YMg0LHQvtC70LXQtSDRh9GD0LLRgdGCLdGPINC6INCj0KQt0LjQt9C70YPRh9C10L3QuNGOLCDRgNC40YHQuiDQvtC20L7Qs9C+0LIg0L/RgNC4INCj0KQt0LLQvtC30LTQtdC50YHRgtCy0LjQuC4gNykg0JLRi9GB0L7QutCw0Y8g0YDQtdCz0LXQvdC10YDQsNGC0LjQstC90LDRjyDRgdC/0L7RgdC+0LHQvdC+0YHRgtGMOiDQutC+0LbQsCDRgNC10LHQtdC90LrQsCDQt9Cw0LbQuNCy0LDQtdGCINC/0YDQuCDQv9C+0LLRgNC10LbQtNC10L3QuNGP0YUsINGH0YLQviDQvtCx0YrRj9GB0L3Rj9C10YLRgdGPINCw0LrRgtC40LLQvdGL0Lwg0L7QsdC80LXQvdC+0Lwg0LIt0LIg0Lgg0LHRi9GB0YLRgNC+0Lkg0L/RgNC+0LvQuNGE0LXRgNCw0YbQuNC10Lkg0LrQu9C10YLQvtC6LiA8YnIgLz4NCjxiciAvPg0KPGJyIC8+DQoyLiDQp9Ch0KEg0YMg0YDQtdCx0LXQvdC60LAg0LIgNSDQu9C10YIg0YHQvtGB0YLQsNCy0LvRj9C10YIgODAtMTAwINGD0LTQsNGA0L7QsiDQsiDQvNC40L3Rg9GC0YMg0L/QviDQktCe0JcuINCV0YHQu9C4INGA0LXQsdC10L3QvtC6INGB0L/QvtC60L7QtdC9LCDQvdC1INC/0LvQsNGH0LXRgiwg0LjRgdC/0YvRgtGL0LLQsNC10YIg0LHQvtC70Lgg0Lgg0LvQuNGF0L7RgNCw0LTQutC4LCDQp9Ch0KEg0L/QviDQsdC+0LvRjNGI0LXQuSDQstC10YDQvtGP0YLQvdC+0YHRgtGM0Y4g0L3QsNGF0L7QtNC40YLRgdGPINCyINGN0YLQvtC8INC00LjQsNC/0LDQt9C+0L3QtS4g0KfQlNCUINCy0YvRiNC1LCDRgtCw0Log0LrQsNC6INGDINC00LXRgtC10Lkg0LjQvdGC0LXQvdGB0LjQstC90YvQuSDQvtCx0LzQtdC9INCyLdCyINC4INC/0YDQtdC40LzRg9GJ0LXRgdGC0LLQtdC90L3QviDRgdC40LzQv9Cw0YLQuNGH0LXRgdC60L7QtSDQstC70LjRj9C90LjQtSDQvdCwINGB0LXRgNC00YbQtS4g0KTRg9C90LrRhtC40L7QvdCw0LvRjNC90YvQtSDQvtGB0L7QsdC10L3QvdC+0YHRgtC4INCh0KHQoS0g0KHQvdC40LbQtdC90LjQtSDQp9Ch0KEg0L/RgNC+0LjRgdGF0L7QtNC40YIg0L/QviDQvNC10YDQtSDRg9Cy0LXQuy3RjyDQvtCx0YrQtdC80LAg0LrQsNC80LXRgCDRgdC10YDQtNGG0LAsINGD0LTQsNGA0L3QvtCz0L4g0L7QsdGK0LXQvNCwINGB0LXRgNC00YbQsCDQuCDRg9GB0LjQu9C10L3QuNGPINCy0LvQuNGP0L3QuNGPINC/0LDRgNCw0YHQuNC80L/QsNGC0LjRh9C10YHQutC+0LPQviDQvtGC0LTQtdC70LAg0LLQtdCz0LXRgtCw0YLQuNCy0L3QvtC5INC90LXRgNCy0L3QvtC5INGB0LjRgdGC0LXQvNC+0Lkg0L3QsCDRgdC10YDQtNGG0LUuINCn0KHQoSDQuCDQp9CU0JQg0LzQvtC20LXRgiDQvNC10L3Rj9GC0YzRgdGPINC/0YDQuCDQs9GA0LjQv9C/0LUg0YPQsi3QuCDRgtC10LzQv9C10YDQsNGC0YPRgNGLINGC0LXQu9CwLCDQuNC30LzQtdC90LXQvdC40Y8g0L/QvtC70L7QttC10L3QuNC5INGC0LXQu9CwINC4INC00YDRg9Cz0LjRhSDRhNCw0LrRgtC+0YDQvtCyLiDQktGL0YHQvtC60LjQuSDQvtGB0L3QvtCy0L3QvtC5INC+0LHQvNC10L06INGDINC00LXRgtC10Lkg0L/QvtCy0YvRiNC10L3QsCDQvNC10YLQsNCx0L7Quy3RjyDQsNC60YLQuNCy0L3QvtGB0YLRjCwg0YLQutCw0L3QuCDRgtGA0LXQsdGD0LXRgiDQsdC+0LvRjNGI0LUg0LrQuNGB0LvQvtGA0L7QtNCwLCDRgdC10YDQtNGG0LUg0YDQsNCx0L7RgtCw0LXRgiDRh9Cw0YnQtS4g0JzQtdC90YzRiNC40Lkg0YPQtNCw0YDQvdGL0Lkg0L7QsdGK0LXQvDog0YHQtdGA0LTRhtC1INGDINGA0LXQsdC10L3QutCwINC+0YLQvdC+0YHQuNGC0LXQu9GM0L3QviDQvNC10L3RjNGI0LUg0Lgg0YHQvtC60YDQsNGC0LjRgtC10LvRjNC90YvQtSDRhNGD0L3QutGG0LjQuCDQvNC40L7QutCw0YDQtNCwINC90LXQtNC+0YHRgtCw0YLQvtGH0L3QviDRgNCw0LfQstC40YLRiy4g0KfRgtC+0LHRiyDQvtCx0LXRgdC/0LXRh9C40YLRjCDQvdGD0LbQvdGL0Lkg0LzQuNC90YPRgtC90YvQuSDQvtCx0YrQtdC8INC60YDQvtCy0Lgg0L7RgNCz0LDQvdC40LfQvCDRjdGC0L4g0LrQvtC80L/QtdC90YHQuNGA0YPQtdGCINGD0YfQsNGJ0LXQvdC90YvQvCDRgdC10YDQtNGG0LXQsdC40LXQvdC40LXQvC4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не все функции кожи перечислены</text:p>
          </table:table-cell>
          <table:table-cell office:value-type="float" office:value="0" table:style-name="ce1">
            <text:p>0</text:p>
          </table:table-cell>
          <table:table-cell table:number-columns-repeated="16376"/>
        </table:table-row>
        <table:table-row table:style-name="ro1">
          <table:table-cell office:value-type="float" office:value="914650" table:style-name="ce1">
            <text:p>914650</text:p>
          </table:table-cell>
          <table:table-cell office:value-type="string" table:style-name="ce1">
            <text:p>english</text:p>
          </table:table-cell>
          <table:table-cell office:value-type="string" table:style-name="ce1">
            <text:p>Ticket 24.&amp;lt;br /&amp;gt; 1.What are the functional features of the skin in young children.&amp;lt;br /&amp;gt; 2. Mother of a 5-years-old child contacted a pediatrician with a medical examination request. The doctor conducted an examination, no pathology was detected. Weight 20 kg, height 105 cm. RR 25. What is the heart rate of this child? What functional features of the cardiovascular system is this related to?&amp;lt;br /&amp;gt;</text:p>
          </table:table-cell>
          <table:table-cell office:value-type="string" table:style-name="ce1">
            <text:p>MSkgU2tpbiBtYXR1cmF0aW9uIHN0YXJ0cyBpbiBhIGNoaWxkIHN0YXJ0cyBpbiBwZXJpb2Qgb2YgZW1icnlvZ2VuZXNpcy4gVGhlaXIgc2tpbiBoYXMgc2V2ZXJhbCB1bmlxdWUgZmVhdHVyZXMuIFRoZSBkZXJtaXMgYW5kIGVwaWRlcm1pcyBvZiB5b3VuZyBjaGlsZCBpcyB1bmRlcmRldmVsb3BlZCB3aGljaCBtYWtlcyBza2luIG1vcmUgcHJlYW1lYWJsZSB0byBzdWJzdGFuY2VzIGFuZCBtb3JlIHByb25lIHRvIGRlaHlkcmF0aW9uLiBBcyB0aGUgYm9keSBncm93cyB0aGUgY2hpbGQgdW5kZXJnb2VzIHZhcmlvdXMgZGV2ZWxvcG1lbnRhbCBjaGFuZ2VzIGluIHRoZSBzdXBlcmZpY2lhbCBsYXllcnMuICBBbHNvIHRoZSB3YXRlciBjb250ZW50IG9mIHNraW4gaXMgdmVyeSBoaWdoIGJ1dCBpcyBzdXNjZXB0aWJsZSB0byBkZWh5ZHJhVGlvbi4gVmFzY3VsYXRyaXR5IG9mIHRoZSBza2luIGhlbHBzIGluIHRoZXJtb3JlZ3VsYXRpb24gd2hpY2ggaXMgdmVyeSBuZWNlc3NhcnkgaW4geW91bmcgY2hpbGRyZW4uIFRoZSBzd2VhdCBnbGFuZHMgYXJlIGltbWF0dXJlIGxlYWRpbmcgdG8gaW1tYXR1cmUgdGhlcm1vcmVndWxhdGlvbiBwcm9jZXNzICwgc2VidW0gcHJvdGVjdGlvbiBpcyBhbHNvIGxvdy4gT25lIHVuaXF1ZSBmZWF0dXJlIG9mIHlvdW5nIGNoaWxkJ3Mgc2tpbiBpcyB0aGF0IGl0IGhlYWxzIGZhc3RlciB0aGFuIHRoZSBncm93bi11cCAgcGVyc29uLiAgIDIpIEZvciBjYWxjdWxhdGluZyB0aGUgaGVhcnQgcmF0ZSBvZiB0aGUgY2hpbGQgb2Ygd2VpZ2h0IDIwIGtnICwgaEVpZ2h0IDEwNSBjbSBhbmQgUlIgMjUuIFRIRSBmb3JNdWxhIHVzZWQgaXMgSGVhcnQgUmF0ZSA9IFJSKjQgPSAyNSo0ID0gMTAwIGJwbS4gRm9yIHlvdW5nIGNoaWxkcmVuIHRoZSByYW5nZSBpcyA4MC0xMjAuIFNvIGhlcmUgdGhlIGhlYXJ0IHJhdGUgaXMgbm9ybWFsIGFuZCBoYXMgbm8gcGF0aG9sb2d5LiBGdW5jdGlvbmFsIGZlYXR1cmVzIG9mIGNhcmRpb3Zhc2N1bGFyIHN5c3RlbSBpbiB5b3VuZyBjaGlsZHJlbiBhcmUgYXMgZm9sbG93cy4gVGhlIGhlYXJ0IHJhdGUgaW4geW91bmcgY2hpbGRyZW4gaXMgbW9yZSB0aGFuIGFzIGNvbXBhcmVkIHRvIHRoZSBhZHVsdHMgZHVlIHRvIGZhY3QgdGhhdCBjaGlsZHJlbiBoYXMgZmFzdGVyIG1ldGFib2xpYyByYXRlIGFuZCB0aGVpciBveHlnZW4gZGVtYW5kIGlzIHZlcnkgaGlnaC4gVGhlaXIgIHNtYUxsZXIgaGVhcnQgc2l6ZSBjb21wZW5zYXRlcyB0aGUgZGVtYW5kIGJ5IGluY3JlYXNpbmcgdGhlIGhlYXJ0IHJhdGUgaW5zdGVhZCBvZiBzdHJva2Ugdm9sdW1lLiBUaGUgcGFyYXN5bXBhdGhldGljIG5lcnZvdXMgc3lzdGVtIGluIGFsc28gdW5kZXJkZXZlbG9wZWQgd2hpY2ggY2FuIGNhdXNlIHZhcmlhdGlvbnMgaW4gaGVhcnQgcmF0ZS4gQXJ0ZXJpZXMgb2YgeW91bmcgY2hpbGQgYXJlIHZlcnkgZWxhc3RpYyBhbmQgdGhlIHBlcmlwaGVyYWwgcmVzaXN0YW5jZSBpUyBhbHNvIHZlcnkgbGVzcyBhcyBjb21wYXJlZCB0byB0aGUgYWR1bHRzIHdoaWNoIGNhdXNlcyBsb3dlciBibG9vZCBwcmVzc3VyZS4gV2hlbiBjb21wYXJlZCB3aXRoIHRoZSBib2R5IHByb3BvcnRpb24gLCB0aGV5IGhhdmUgbGFyZ2VyIGJsb29kIHZvbHVtZSB0byBhaWQgaW4gb3h5Z2VuIGRlbGl2ZXJ5IGZvciB0aGVpciBwcm9wZXIgbm91cmlzaG1lbnQ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16" table:style-name="ce1">
            <text:p>915016</text:p>
          </table:table-cell>
          <table:table-cell office:value-type="string" table:style-name="ce1">
            <text:p>english</text:p>
          </table:table-cell>
          <table:table-cell office:value-type="string" table:style-name="ce1">
            <text:p>Ticket 24.&amp;lt;br /&amp;gt; 1.What are the functional features of the skin in young children.&amp;lt;br /&amp;gt; 2. Mother of a 5-years-old child contacted a pediatrician with a medical examination request. The doctor conducted an examination, no pathology was detected. Weight 20 kg, height 105 cm. RR 25. What is the heart rate of this child? What functional features of the cardiovascular system is this related to?&amp;lt;br /&amp;gt;</text:p>
          </table:table-cell>
          <table:table-cell office:value-type="string" table:style-name="ce1">
            <text:p>QU5TOi0gMS4gRlVOQ1RJT05BTCBGRUFUVVJFUyBPRlRIRSBTS0lOIElOIFlPVU5HIENISUxEUkVOIEFSRSBBUyBGT0xMT1dTIDotICAgICAgICAgICAgICAgICAgICAgICAgICAgICAgICAgICAgICAgICAgICAgICAgICAgICAgICAgICAgICAgICAgICAgIGEuIFRIRVJNQUwgUkVHVUxBVElPTiA6LSBpbiB5b3VuZyBjaGlsZHJlbiBoYXZlIGEgaGlnaGVyIHN1cmZhY2UgYm9keSBtYXMgcmF0aW8gLi4sLCB3aGljaCBtYWtlIHRoZW0gbW9yZSBzdXNwZWN0aWFibGUgdG8gdGVtcGVyYXR1cmUgY2hhbmdlcyAuLi4vLyBUSEUgc2tpbiBwbGF5cyBhIGNydWNpYWwgcm9sZSBpbiB0aGUgVEhFUk1PUkVHVUxBVElPTiAsIHdoaWNoIGhlbHAgaW4gdGhlIG1haW50YWluY2Ugb2YgYSBzdGFibGUgYm9keSB0ZW1wZXJhdHVyZSAuLi4sLCwgICAgICAgICAgICAgICAgICAgICAgICAgICAgICAgICAgICAgICAgICAgICAgICAgICAgICAgICAgICAgICAgICAgICAgICAgICAgICAgICAgICAgICAgICAgICAgICAgICAgICAgICAgICAgICAgICAgICAgICAgICAgICBiLiBTRU5TSVRJVkUgQkFSUklFUlMgOi0gdGhlIHNraW4gYWN0cyBhIGJhcnJpZXIgLCwgd2hpY2ggaXMgcHJvdGVjdGl2ZSBhZ2VudCBhZ2FpbnN0IHRoZSBwYXRob2dlbnMgLCBhbGxlcmdpZXMgYW5kIG1vc3QgaW1wb3J0bmF0IGVudmlvcm5tZW50YWwgZmFjdG9ycyAuLi8vIEJBU0lDQUxMWSBJVCBJUyBNT1JFIFNFTlNJVElWRSBJTiBUSEUgWU9VTkcgQ0hJTERSRU4gLCwgV0hJQ0ggTUFLRSBUSEVNIFBST05FIFRPIFRIRSBTS0lOIElSUklUQVRJT05TIEFORCBDT05ESVRJT05TIExJS0UgRVNDSEVNQSAuLi8vLyAgICAgICAgICAgICAgICAgICAgICAgICAgICAgICAgICAgICAgICAgICAgICAgICAgICAgICAgICAgICAgICAgICAgICAgICAgICAgICAgICAgICAgICAgICAgICAgICAgICAgICAgICAgICAgICAgICAgICAgICAgICAgICAgICAgICAgICAgICAgICAgICAgICAgICAgICAgICAgICAgICAgIGMuIExJTUlURUQgTUVUQUJPTElDIFBST0RVQ1RJT04gOi0gdGhlIGNoaWxkcmVuIGhhdmUgbGVzcyBtZWxhbnVpbiAsLCB3aGljaCBwcm92aWRlcyB0aGVtIG1vcmUgcHJvdGVjdGlvbiBhZ2FpbnN0IHRoZSBVViBSQURJQVRJT04gQU5EICwsLCB0aGV5IGFyZSBtb3JlIHZhbG51cmFibGUgdG8gc3VuIGJ1cm4gYW5kIGJlY2F1c2Ugb2YgdGhpcyB0aGV5IHJlcWlyZSBtb3JlIHN1biBwcm90ZWN0aW9uIC4uLi8vICAgICAgICAgICAgICAgICAgICAgICAgICAgICAgICAgICAgICAgICAgIGQuIFFVSUNLIEhFQUxJTkcgOi0gc2tpbiBpbiB0aGUgeW91bmcgY2hpbGRyZW4gdGVuZHMgdG8gaGVhbCBtb3JlIHJhcGlkZWx5IHRoZW4gaW4gdGhlIGFkdWx0cyBjb250cmlidXRpbmcgdG8gUkVEVUNFRCBSSVNLIE9GIHNjYXJyaW5nIC4uLy8gICAgICAgICAgICAgICAgICAgICAgICAgICAgICAgICAgICAgICAgICAgICAgICAgICAgICAgICAgICAgICAgICAgICAgICAgICAgICAgICAgICAgICAgICAgICAgICAgICAgICAgICAgICAgICAgICAgICAgICAgICAgICAgICAgICAgIDIuIFRvIGNhbGN1bGF0ZSB0aGUgaGVhcnQgcmF0ZSBvZiB0aGlzIGNoaWxkcmVuIG9uZSBtdXN0IGtub3cgdGhlIGR1cmF0aW9uIG9mIHRoZSByZXNwaXJhdG9yeSBjeWNsZSAuLi8vIEFORCBsZXRzIGFzc3VtZSB0aGF0IHRoZSByZXNwaXJhdG9yeSByYXRlIGlzIDI1IGhlYXJ0YmVhdHMgcGVyIG1pbnV0ZSBhbmQgdGhlIGhlYXJ0IHJhdGUgY2FuIGJlIGVzdGltYXRlZCAgYXMgZm9sbG93cyBIUiA9IDQqUlIuIFNPIElOIFRISVMgQ0FTRSBvbmUgY2FuIHNheSBpcyB0aGF0IEhSID0gNCoyNSA9IDEwMGJlYXRzIHBlciBtaW51dGUgLi4vLyAgICAgICAgICAgICAgICAgICAgICAgICAgICAgICAgICAgICAgICAgICAgICAgICAgICAgICAgICAgICAgICAgICAgICAgICAgICAgICAgICAgICAgICAgICAgICAgICAgICAgICAgICAgICAgICBGVU5DVElPTkFMIEZFQVRVUkVTIEFSRSA6LSAgICAgICAgICAgICAgICAgICAgICAgICAgICAgICAgICAgICAgICAgICAgICAgICAgICAgICAgICAgICAgICAgICAgICAgICAgICAgICAgICAgICAgICAgICAgICAgICAgICAgICAgICAgICAgICAgICAgICAgICBhLiBISUdIRVIgUkVTVElORyBIRUFSVCBSQVRFIDotIG1vc3RseSBjaGlsZHJlbiBoYXZlIG1vcmUgcmVzdGluZyBoZXJhdCByYXRlIHRoZW4gaW4gdGhlIGFkdWx0cy4gQSByZXN0aW5nIGhlYXJ0IHJhdGUgYXJvdW5kIDEwMCBiZWF0cyBwZXIgbWludXRlIGluIGEgNSB5ZWFyIG9sZCBjaGlsZCBpcyB3aXRoaW4gdGhlIG5vcm1hbCByYW5nZSAuLi8vICAgICAgICAgICAgICAgICAgICAgICAgICAgICAgICAgICAgICAgICAgICAgICAgICAgICAgICAgICAgICAgICAgICAgICAgICAgICAgIGIuIEFEQVBUQUJJTElZIDotIHRoZSBjYXJkaW92YXNjdWxhciBzeXN0ZW0gaW4gY2hpbGRyZW4gaXMgaGlnaGx5IGFkYXB0YXRpdmUgd2hpY2ggcmVzcG9uZHMgbW9yZSBlZmZpY2F0aXZlbHkgaW4gdGhlIGNoYW5nZXMgaW4gdGhlIGFjdGl2aXR5IGxldmVscyBhbmQgbWV0YWJvbGljIGRlbWVuZHMgLi4vLyAgICAgICAgICAgICAgICAgICAgICAgICAgICAgICAgICAgICAgICAgICAgICAgICAgICAgICAgICAgICAgICAgICAgICAgICAgICAgICAgICAgICAgICAgICAgICAgICAgIGMuIFNNQUxMRVIgU1RST0tFIFZPTFVNRSA6LSBkdWUgdG8gc21hbGxlciBoZWFydCBzaXplLCB0aGUgc3Ryb2tlIHZvbHVtZSBpcyBsb3dlciAsIHdoaWNoIGlzIG5lY2Nlc3NpdGF0aW5nIGluIGhpZ2hlciByYXRlIHRvIG1haW5hdGluIGNhcmRpYWMgb3V0cHV0IC4uLy8gICAgICAgICAgICAgICAgICAgICAgICAgICAgICAgICAgICAgICAgICAgICAgICAgICAgICAgICAgICAgICAgICAgICAgICAgICAgICAgICAgICAgICAgICAgICAgICAgICAgICAgICAgICAgICAgICBUSEUgQUJTQ0VOQ0UgT0YgUEFUSE9MR1kgSU4gVEhFIEVYQU1JTkFUSU9OIElORElBQ1RFUyBBIFdFTEwgRlVOQ1RJT05JTkcgQ0FSRElPVkFTQ1VMQVIgU1lTVEVNICwsLi4gRU5TVVJJTkcgUFJPUEVSIENJUkNVTEFUSU9OIEFORCBPWFlHRU5BVElPTiAuLiwsIFJFR1VMQVIgTU9ORVRSSU5HIEFORCBBR0UgQVBQUk9QUklBVEUgSEVBUlQgUkFURSBBU1NFU01FTlRTIEhFTFAgSU4gVEhFIEFTU0VTUyBUSEUgQ0hJTEQgT1ZFUkFMTCBIRUFMVEggQU5EIERFVkVMT1BNRU5UUyAuLi8vICA=</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Your answer is not written completely and there are many spelling errors in the form of many punctuation marks</text:p>
          </table:table-cell>
          <table:table-cell office:value-type="float" office:value="0" table:style-name="ce1">
            <text:p>0</text:p>
          </table:table-cell>
          <table:table-cell table:number-columns-repeated="16376"/>
        </table:table-row>
        <table:table-row table:style-name="ro1">
          <table:table-cell office:value-type="float" office:value="915058" table:style-name="ce1">
            <text:p>915058</text:p>
          </table:table-cell>
          <table:table-cell office:value-type="string" table:style-name="ce1">
            <text:p>english</text:p>
          </table:table-cell>
          <table:table-cell office:value-type="string" table:style-name="ce1">
            <text:p>Ticket 24.&amp;lt;br /&amp;gt; 1.What are the functional features of the skin in young children.&amp;lt;br /&amp;gt; 2. Mother of a 5-years-old child contacted a pediatrician with a medical examination request. The doctor conducted an examination, no pathology was detected. Weight 20 kg, height 105 cm. RR 25. What is the heart rate of this child? What functional features of the cardiovascular system is this related to?&amp;lt;br /&amp;gt;</text:p>
          </table:table-cell>
          <table:table-cell office:value-type="string" table:style-name="ce1">
            <text:p>MS5USEUgRlVOQ1RJT05BTCBGRUFUVVJFUyBPRiBUSEUgU0tJTiBJTiBUSEUgWU9VTkcgQ0hJTERSRU4gSVMgVEhBVCBUSEVZIEhBVkUgQSBISUdIIFNVUkZBQ0UgQVJFQSBUTyBCT0RZIE1BUyBSQVRJTywgIHRoZSBza2luIG9mIHRoZSBjaGlsZCBwbGF5cyBhIGh1Z2Ugcm9sZSBpbiB0aGVybW9ycmVndWxhdGluZyB0aGUgYm9keSwgYWxzbyBtYWludGFpbmcgYSBiYWxhbmNlZCBhbmQgc3RhYmxlZGQgYm9keSB0ZW1wZXJhdHVyZSAuICAgICAgICAgICAgICAgICAgICAgICAgICAgICAgICAgICAgICAgICAgICAgICAgICAgICAgICAgICAgICAgICAgICAgICAgICAgICAgICAgICAgICAgICAgICAgICAgICAgICAgICAgICAgICAgICAgICAgICAgIFRIRSBTS0lOIE9GIFRIRSBDSElMRCBQTEFZUyBST0xFIE9GRiBTS0lOIEJBUlJJRVIgLCBETyBQUk9URUNUIEFHQUlOU1QgVEhFIGFsbGVyZ2VucyBhbmQgcGF0aG9nZW5zIG9yIGFubnkga2luZCBvZiBlbnZpcm9ubWVudGFsIGZhY3RvcnMudGhlIHNraW5zIGNoaWxkIGlzIHZlcnJ5IG11Y2ggc2Vuc2l0aXZlIHRvIHBhdGhvZ2VucyBhbmQgaW5mZWN0aW9ucyBsaWtlIGVjemVtYSAsIHRoZWlyIHNraW4gYWxzbyBtb3JlIHNlbnNpdGl2ZSBhcyBjb21wYXJlZCB0byBhZHVsdHMgLiAgICAgICAgICAgICAgICAgICAgICAgICAgICAgICAgICAgICAgICAgICAgICAgICAgICAgICAgICAgICAgICAgICAgICAgICAgICAgICAgICAgICAgICAgICAgICAgICAgICAgICAgICAgICAgICAgIGl0IGFsc28gZG9lcyBhIHZlcnJ5IHF1aWNrIGhlYWxpbmcgLCB0aGUgY2hpbGQgc2tpbiB3b3JrcyBtb3JlIHJhcGlkbHkgb24gaGVhbGluZyBwcm9jZXNzIGFzIGNvbXBhcmVkIHRvIGFkdWx0cyAuICAgICAgICAgICAgICAgICAgICAgICAgICAgICAgICAgICAgICAgICAgIDIuIHRoZSBoZWFydCByYXRlIG9mIHRoZSBjaGlsZCBpcyBtb3JlIHRoYW4gdGhlIGhlYXJ0IHJhdGUgb2YgYW4gYWR1bHQgLEFOIEFWRVJBR0UgUkVTUElSQVRPUlkgUkFURSBJRiAyNSBCRUFUUyBQRVIgTUlOIFRIRU5OIFRIRSBIRUFSVCBSQVRFIENBTiBCRSAgNCpIRUFSVCBSQVRFICBJUyBFUVVBTFNTIFRPICAxMDAgQkVBVFMgUEVSICBNSU4uIHRoZSBSRVNUSU5HIEhFQVJUIFJBVEUgSVNTIDEwMCBCRUFUUyAgUEVSIE1JTlVURSBJTiBUSEUgQ0hJTEQgT0YgNSBZRUFSUyBBR0UgVEhST1VHSCBUSEUgUkVTVElORyBSQVRFIElOIENISUxEIElTIEhJR0hFUiBUSEFOIFRIRSBBRFVMVFMgIC4gdGhlIGNhcmRpb3Zhc2N1bGFyIFNZU1RFTSAgaW5uIHRoZSBjaGlsZCBpcyBzbyBtdWNoIHJlc3BvbnNpYmxlIGFuZCB2ZXJ5eSBhZGFwdGFibGUgdG8gdGhlIGNoYW5nZSAgaW4gdGhlIGxldmVsIG9mIGFjdGl2aXR5IGFuZCBhbHNvIHRoZSB2b2x1bSBlIG9mZiBzdHJlY2ggYW5kZCB0aGUgZGVtYW5kIG9mIG1ldGFib2xpYyAgd2hpY2ggcmVzdWx0aW5nIGluIHRoZSBoaWdoZXIgb2YgdGhlIGhlYXJ0IHJhdGUgZm9yIG1haW50YW5hbmNlIG9mIHRoZWUgQ0FSRElBQyBPVVRQVVQuICBUSEUgQU5PVEhFUiAgQ0FSRElPVkFTQ1VMQVIgRkVBVFVSRSBJUyBzbWFsbCBzdHJva2Ugdm9sdW1lIGR1ZSB0byB0aGUgc21hbGwgc2l6ZSBvZmYgdGhlIGhlYXJ0IC4gICAg</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08" table:style-name="ce1">
            <text:p>915108</text:p>
          </table:table-cell>
          <table:table-cell office:value-type="string" table:style-name="ce1">
            <text:p>english</text:p>
          </table:table-cell>
          <table:table-cell office:value-type="string" table:style-name="ce1">
            <text:p>Ticket 24.&amp;lt;br /&amp;gt; 1.What are the functional features of the skin in young children.&amp;lt;br /&amp;gt; 2. Mother of a 5-years-old child contacted a pediatrician with a medical examination request. The doctor conducted an examination, no pathology was detected. Weight 20 kg, height 105 cm. RR 25. What is the heart rate of this child? What functional features of the cardiovascular system is this related to?&amp;lt;br /&amp;gt;</text:p>
          </table:table-cell>
          <table:table-cell office:value-type="string" table:style-name="ce1">
            <text:p>MX0gVEhFIEZVTkNUSU9OQUwgRkVBVFVSRSBPRiBUSEUgU0tJTiBJTiBUSEUgWU9VTkcgQ0hJTERSRU4tIFRIRVJNT1JFR1VMQVRJT04gLSBUSEUgQk9EWSBQTEFZUyBUSEUgQ1JVQ0lBTCBST0xFIElOIE1BSU5UQUlOSU5HIFRIRSBCT0RZIFRFTUVSQVRVUkUgQlVUIElOIFRIRSBDSElMRFJFTiBJVCBJUyBOT1QgWUVUIEZVTExZIERFRVZFTE9QRUQgU08gVEhFIFRIRSBURU1FUkFUVVJFIENIQU5HRSAsVEhFIFNLSU4gSEVMUCBUTyBESVNTSVBBVEUgVEhST1VHSCBUSEUgRVhDRVNTIFJFTEVBU0UgT0YgVEhFIFNXRUFUIC0gUFJPVEVDVElPTiAtIFRIRSBTS0lOIEFMU08gU0VSVkVTIEFTIFRIRSBQSFlTSUNBTCBCQVJSSUVSICBBTkQgUFJPVEVDVCBCT0RZIEZST00gVEhFIFZJUlVTIEJBQ1RFUklBICBBTkQgVEhFIElOSlVSWSBUSEUgQ0hJTERTIFNLSU4gSVMgVEhJTk5FUiBNQUtJTkcgVEhFTSBNT1JFIFZVTkVSQUJMRSBUTyBUSFIgSVJSSVRBTlRTIEFORCBUSEUgSU5GRUNUSU9OIC0gSU1NVU5FIEZVTlRJT04gLSBUSEUgU0tJTiBBQ1QgQVMgVEhFIFBST1RFQ1RJT04gQkFSUklFUiBBTkQgUFJPVEVDVCBVUyBGUk9NIFRIRSBPVVRFUlNJREUgSU5GRUNUSU9OIEJVVCBUSEUgQ0hJTEQgU0tJTiBJUyBUSElOTkVSIFRIRVkgRUFTSUxZIEdFVCBJTkZFQ1RJT04gT1IgU09NRSBDT01NT04gU0tJTiBJTkZFQ1RJT04gTElLRSBESUFQRVIgUkFTSEVTIC0gU1JOU09SWSBQRVJDRVBUSU9OLSBUSEUgU0tJTiBIQVMgVEhFIExBUkdFIEFNT1VOVCBPRiBUSEUgTkVSVkUgRU5ESU5HUyBXSElDSCBNQUtFIElUIE1PUkUgU0VOU0lCTEUgVE8gVEhFIFRFTVBFUkFUVVJFICwgVE9VQ0ggQU5EIE9USEVSIFNFTlNBVElPTiB0aGUgc2tpbiBpcyB0aGUgb3JnYW4gdGhhdCBwcm90ZWN0cyBvdXIgYm9keSBmcm9tIHRoZSBpbnRlcm5hbCBhbmQgdGhlIGV4dGVybmFsIGhhcm1zIGludGVybmFsbHkgdGhleSBjYW4gYmUgdGhlIGluZmVjdGlvbiBvciBhdHRhY2tzIGZyb20gdGhlIGJhY3RlcmlhIGFuZCBleHRlcm5hbGx5IHRoZXkgY2FuIGJlIHRoZSBhbnkgaGFybSBpbmp1cnkgb3IgdHJhdW1hLlRIRSBDaGlsZCBza2luIHZlcnkgZGVsaWNhdGUgYW5kIGVsYXN0aWMgaXQgaXMgbW9yZSBzb2Z0ZXIgZnJvbSB0aGUgYWR1bHRzIHNraW4uIHRoZSBlbGFzdGljaXR5IG9mIHNraW4gY29tcGFyZWFibHkgaXMgbW9yZSBpbiBuZXdib3JuIHRoYW4gdGhlIGNoaWxkLCB0aGUgc2tpbiBoYXMgdGhyZWUgbGF5ZXJzIDFFUElERVJNSVMgMiBERVJNSVMgMyBTVUJDVVRFTk9VUyAsMSBFUElkZXJtaXMgaXRzIHRoZSBtb3N0IG91dGVybW9zdCBsYXllciBhbmQgYWN0IGFzIHRoZSBmaXJzdCBsaW5lIGJhcnJpZXIgZ2l2ZXMgcHJvdGVjdGlvbiBmcm9tIGFsbCB0aGUgZXh0ZXJuYWwgYWdlbnRzIDIgc2tpbiBhbHNvIGNvbnRhaW4gc2VhYnVtIGFuZCBtdWN1cyBjZWxscyB3aGljaCByZWxlYXNlIHRoZXJlIHNlY3JlYXRpb24gYW5kIG1ha2UgdGhlIGJvZHkgaHlkcmF0ZWQgZnJvbSBvdXRzaWRlIGFuZCBrZWVwIGl0IGF3YXkgZnJvbSB0aGUgZHJ5bmVzc3t7e1tbe3sgMn19XX19fUhFQVJUIEFORCBUSEUgQ0FSRElPVkFTQ1VMQVIgU1lTVEVNIC0gVEhFIEhFQVJUIFJBVEUgQ0FOIEJFIEVTVElNQVRFRCBVU0lORyBUSEUgUkVTUElSQVRPUlkgUkFURSBJTiBUSEUgQURVTFRTIEFTIFdFTEwgQVMgVEhFIENISUxEICBJTiBUSElTIENBU0UgIFRIRSBCUkVBVEhTIEFSRSAyNSAgQSBST1VHSCBFU1RJTUFURSAgT0YgVEhFIFRIRSBIRUFSVCBSQVRFIENBTkUgVEhFIDEwMCBCUkVBVEhTIFBFUiBNSU5VVEUgU08gSEVBUlQgUkFURSB7SFJ9PTRNVUxUSVBMWSBSUiB7UkVTUElSQVRPUlkgUkFURX0gLy8vLy8vIFRIRSBGVU5DVElPTkFMIEZFQVRVUkVTIE9GIFRIRSBDQVJESU9WQVNDVUxBUiBTWVNURU0gQVJFIC0gSElHSCBSRVNUSU5HIEhFQVJUIFJBVEUgLSBUSEUgQ0hJTERSRU4gVEVORCBUTyBIQVZFICBISUdIRVIgSEVBUlQgUkFURSAgQkVDQVVTRSBDQVJESU9WQVNDVUxBUiBTWVNURU0gSVMgU1RJTEwgREVWRUxPUElORyAgQU5EIFRIRSBTTUFMTEVSIEhFQVJUIE5FRURTIFRPIFBVTVAgTU9SRSBGUkVRVUVOVExZICBUTyBNRUVUIFRIRSBCT0RZIE9YWUdFTiBBTkQgVEhFIE5VVFJJRU5UIERFTUFORCAtIEFEQVBUSUJJTElUWSAgLSBDSElMRFJFTlMgIEhFQVJUIEFSRSBISUdITFkgQURBUFRBQkxFIFNPIEhFQVJUIFJBVEUgQ0FOIEVBU0lMWSBJTkNSRUFTRSAgRFVSSU5HIEFOWSBQSFlTSUNBTCBTVFJFU1MgT1IgREVDUkVBU0UgRFVFIFdIRU4gQ0hJTERSRU4gQVJFIFJFU1RJTkcgLSA0RUZGSUNJRU5DWS0gIEFTIFRIRSBDSElMRFJFTiBHUk9XIFRIRSBTWVNURU0gQkVDT01FIE1PUkUgRUZGRUlDSUVOVCAgQU5EIEhFQVJUIFRFTkRTIFRPIERFQ1JFQVNFIEdSQURVQUxMWS4vLyAgICAg</text:p>
          </table:table-cell>
          <table:table-cell office:value-type="float" office:value="170348" table:style-name="ce1">
            <text:p>170348</text:p>
          </table:table-cell>
          <table:table-cell office:value-type="float" office:value="78" table:style-name="ce1">
            <text:p>7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24" table:style-name="ce1">
            <text:p>1067124</text:p>
          </table:table-cell>
          <table:table-cell office:value-type="string" table:style-name="ce1">
            <text:p>english</text:p>
          </table:table-cell>
          <table:table-cell office:value-type="string" table:style-name="ce1">
            <text:p>Ticket 24.&amp;lt;br /&amp;gt; 1.What are the functional features of the skin in young children.&amp;lt;br /&amp;gt; 2. Mother of a 5-years-old child contacted a pediatrician with a medical examination request. The doctor conducted an examination, no pathology was detected. Weight 20 kg, height 105 cm. RR 25. What is the heart rate of this child? What functional features of the cardiovascular system is this related to?&amp;lt;br /&amp;gt;</text:p>
          </table:table-cell>
          <table:table-cell office:value-type="string" table:style-name="ce1">
            <text:p>RnVuY3Rpb25hbCBmZWF0dXJlcyBvZiB0aGUgc2tpbiBpbiB5b3VuZyAgY2hpbGRyZW4gLXRoZXJtb3JlZ3VsYXRpb24gLSB5b3VuZyBjaGlsZHJlbiBoYXZlIGEgaGlnaGVyIHN1cmZhY2UgYXJlYSwgdG8gYm9keSBtYXNzIHJhdGlvLG1ha2luZyB0aGVtIG1vcmUgc3VzZXB0aWJsZSB0byB0ZW1wZXJ0YXVyZSBjaGFuZ2VzICx0aGUgc2tpbiBwbGF5cyBhIGNydWNpYWwgcm9sZSBpbiB0aGVybW9yZWd1bGF0aW9uICxoZWxwaW5nIG1haW50YWluIGEgc3RhYmxlIGJvZHkgdGVtcGVydHVyZS4uU2Vuc2l0aXZlIGJhcnJpZXItIHRoZSBza2luIGFjdHMgYXMgYW4gYmFycmllciBwcm90ZWN0aW5nIGFnYXNpbnN0IHRoZWUgcGF0aG9nZW5zIGFsbGVyZ2VucyBhbmQgZW52aXJvbm1lbnRhbCBmYWN0b3JzICxob3dlZXZlciBpdCBpc3MgbW9yZSBzZW5zaXRpdmUgaW4geW91bmcgY2hpbGRyZW4gbWFraW5nIHRoZW0gcHJvbmUgdG8gc2tpbiBpcnJpdGF0aW9ucyBhbmQgY29uZGl0aW9ucyBsaWtlIGVjemVtYS5MaW1pdGVkIG1lbGFuaW4gcHJvZHVjdGlvbnMgLWNoaWxkcmVucyAsaGF2ZSBsZXNzIG1lbGFuaW4gLHdoaWNoIHByb3ZpZGVzIHByb3RlY3Rpb24gYWdhaW5zdCB1bHRyYXZvaWxldCByYWRpYXRpb25zIHRoZXJlZm9yZSB0aGV5IGFyZSBtb3JlIHZ1bG5hcmFibGUgdG8gc3VuYnVybiBhbmQgcmVxdWlyZXMgc3VuIHByb3RlY3Rpb24uUXVpY2sgaGVhbGluZy0taXQgaXMgYWxzbyBhIGNydWljaWFsIGZlYXR1cmUgb2Ygc2tpbiAscXVpY2sgaGVhbGluZyBpbiB5b3VuZyBjaGlsZHJlbiB0ZW5kcyB0byBoZWFsIG1vcmUgcmFwaWRseSB0aGFuIGluIGFkdWx0cyBjb250aWJ1dGluZyAgdG8gYSByZWR1Y2VkIHJpc2sgb2Ygc2NhcnJpbmcuMi5IRUFSVCBSQVRFIEFORCBGVU5DVElPTkFMIEZFQVRVUkVTIE9GIENBRElPVkFTQ1VMQVIgU1lTVEVNLWNpcmN1bHRpb24gb2YgdGhlZSBoZWFydCByYXRlIC10byBjYWxjdWxhdGUgdGhlZSBoZWFydCByYXRlIGl0IGlzcyBuZWNlc3NhcnkgdG8ga25vdyB0aGUgZHVyYXRpb24gb2YgdGhlZSBvbmUgcmVzcGlyYXRvcnkgY3ljbGUgLGFzc3VtaW5nIGFuIGF2ZXJhZ2UgcmVzcGlyYXRvcnkgcmF0ZSBvZmYgMjUgYmVhdHMgcGVyIG1pbnV0ZSAsdGhlZSBoZWFydCByYXRlIGNhbiBiZSBlc3RpbWF0ZWQgYXMgZm9sbG93cyA7SGVhcnQgcmF0ZSA9NCpSUixJbiB0aGlzIGNhc2UgaGVhcnQgcmF0ZSA9NCogMjU9MTAwIGJlYXRzIHBlciBtaW51dGUgLkZVTkNUSU9OQUwgRkVBVFVSRVMtaGlnaGVyIHJlc3RpbmcgaGVhcnQgcmF0ZSAtY2hpbGRyZW4gZ2VuZXJhbGx5IGhhdmUgaGlnaGVyICxyZXN0aW5nIGhlYXJ0eSByYXRlIHRoYW4gYWR1bHRzICxhIHJzdGluZyBoZWFydCByYXRlIGlzIGFyb3VuZCAxMDAgYmVhdHMgcGVyIG1pbnV0ZSBpbiBhIDUgeWVhciBvbGQgaW4gd2l0aGluIHRoZWUsbm9ybWFsIHJhbmdlIC5BZGFwdGFiaWxpdHktdGhlIGNhcmRpb3Zhc2N1bGFyIHN5c3RlbSxpbiB0aGVlIGNoaWxkcmVuIGluIGhpZ2hseSBhZGFwdGFibGUgcmVzcG9uZGluZyBlZmZpZWNpZW5jdGx5IHRvICB0aGUgY2hhbmdlcyBpbiBhY3Rpdml0eSBsZXZlbHMgYW5kZCBtZXRhYm9saWMgZGVtYW5kcyAuU21hbGxlciBzdHJva2Ugdm9sdW1lIC1kdWUgdG8gc21hbGxlciBoZWFydCBzaXplIHN0cm9rZSB2b2x1bWUgaXMgbG93ZXIsbmVjZXNzaXRhdGluZyBhIGhpZ2hlciBoZWFydCByYXRlIHRvIG1haW50YWluICxjYXJkaWFjIG91dHB1dC4=</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the answer is incomplete, the text is short.anti-plagiarism index 42.59%</text:p>
          </table:table-cell>
          <table:table-cell office:value-type="float" office:value="0" table:style-name="ce1">
            <text:p>0</text:p>
          </table:table-cell>
          <table:table-cell table:number-columns-repeated="16376"/>
        </table:table-row>
        <table:table-row table:style-name="ro1">
          <table:table-cell office:value-type="float" office:value="915241" table:style-name="ce1">
            <text:p>915241</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0JHRltGA0ZbQvdGI0ZYg0YHSsdGA0LDSmyDQtdGA0YLQtSDQttCw0YHRgtCw0pPRiyDQsdCw0LvQu9Cw0YDQtNCwINGB0LjQvdGD0YHRgtCw0YDQtNGL0L0g0YLQvtC70YvSmyDQtNCw0LzRi9C80LDRg9GLINC+0LvQsNGA0LTRi9KjINC20LXQtNC10Lsg0YHQuNC90YPRgdC/0LXQvSDQsNGD0YDRg9GL0L3QsCDQttC+0Lsg0LHQtdGA0LzQuNGC0ZbQvSDQvdC10LPRltC30LPRliDQsNC90LDRgtC+0LzQuNGP0LvRi9KbINC10YDQtdC60YjQtdC70ZbQui7QttCw0psg0YHSr9C50LXQuiDSm9C+0LnQvdCw0YPQu9Cw0YDRiyAyINC20LDRgdKb0LAg0LTQtdC50ZbQvdCz0ZYg0LHQsNC70LDQu9Cw0YDQtNCwINGC0L7Qu9GL0psg0pvQsNC70YvQv9GC0LDRgdC/0LDSk9Cw0L0g0LbQsNC90LUg0LrRltGI0LrQtdC90YLQsNC5INCx0L7Qu9GL0L/QutC10LvQtdC00ZYg0L7Qu9Cw0YDQtNGL0L0g0YLQvtC70YvSmyDQutOp0LvQtdC80LTQtSDQtNCw0LzRg9GLIDUgNiDQttCw0YHSm9CwINGC0LDQvNCw0L0g0LDRj9Kb0YLQsNC70LDQtNGLLtC80LDQvdC00LDQuSDSm9C+0LnQvdCw0YPQu9Cw0YDRiyDQvtC70LDRgCDRgtGD0pPQsNC90LDQvSDQutC10LnRltC90LPRliDQsNC70pPQsNGI0pvRiyDQttGL0LvQtNCw0YDRiyDSm9Cw0LvRi9C/0YLQsNGB0LDQtNGLINCx0ZbRgNCw0psgNyA4INC20LDRgdGC0LAg0pPQsNC90LAg0LDQudKb0YvQvSDQtNCw0LzQuNC00ZYg0LHSr9C7INC20LDRgdKb0LAg0LTQuNGW0L0g0LHSsdC7INKb0L7QudC90LDRg9C70LDRgCDQutGW0YjQutC10L3RgtCw0Lkg0L3QtdC80LXRgdC1INC80q/Qu9C00LUg0LHQvtC70LzQsNGD0Ysg0LzSr9C80LrRltC9LtGB0LjRgtCw0YHQvtC50LTRiyDSm9C+0LnQvdCw0YPQu9Cw0YAg0L7Qu9Cw0YAg0YLRg9KT0LDQvdCw0L0g0LHQsNGB0YLQsNC/INCx0LDRgCDQttOZ0L3QtSDQtdGA0YLQtSDQttCw0YHRgtCw0pPRiyzQttC10LTQtdC70Ywg0LPQsNC50LzQvtGA0LjRgiDQsdKx0Lsg0LHQsNC70LDQu9Cw0YDQtNCw0pPRiyDQttGW0YLRliDRgNC40L/RgNC+0YLQvtGA0LvRi9KbINCy0LjRgNGD0YLRi9KbINC40L3RhNC10LrRgdC40Y/Qu9Cw0YDRiyDQttC40ZYg0LDRgdKb0YvQvdGD0Ysg0LHQvtC70YvQvyDRgtCw0LHRi9C70LDQtNGLINC80rHRgNGL0L0g0LrRg9GL0YHRi9C90YvQvSDSm9Cw0LHRi9C90YPRiyDQsdC+0LvRi9C/INGC0LDQsdGL0LvQsNC00Ysg0LTQtdCz0LXQvdC80LXQvSDQutC10LnQsdGW0YAg0LbQsNKT0LTQsNC50LvQsNGA0LTQsCDQttC10LTQtdC7INGA0LjQvdC40L0g0YPQt9Cw0psg0YPQsNKb0YvRgiDQsdC+0LnRiyDRgdC40L3Rg9GB0LrQtSDQsNC50L3QsNC70LzQsNC5INGB0LDSm9GC0LDQu9GD0Ysg0LzSr9C80LrRltC9INCx0rHQuyDQttCw0YEg0LHQsNC70LDQu9Cw0YDQtNCw0pPRiyDQv9Cw0YDQsNC90L7Qt9Cw0LvRjNC00ZYg0YHQuNC90YPRgdGC0LDRgNC00YvQvSDQsNC90LDRgtC+0LzQuNGP0LvRi9KbINC10YDQtdC60YjQtdC70ZbQutGC0LXRgNGW0L3QtSDQsdCw0LnQu9Cw0L3Ri9GB0YLRiy7QttCw0L3QsCDRgtGD0pPQsNC9INC905nRgNC10YHRgtC10LvQtdGAINC80LXQvSDQvdOZ0YDQtdGB0YLQtdC70LXRgNCz0LUg0YHQuNC90YPRgdGC0LDRgCDTmdC70ZYg0LTQsNC80YvQvNCw0pPQsNC9INC+0LvQsNGA0LTRi9C9INKb0LDQu9GL0L/RgtCw0YHRg9GLLNC20LDRgdOp0YHQv9GW0YDRltC80LPQtSDQtNC10LnRltC9INC20LDQu9KT0LDRgdCw0LTRiy7RgdC+0L3Ri9C80LXQvSDSm9Cw0YLRgtCw0YAgMTIg0LbQsNGB0pvQsCDQtNC10LnRltC9INC60YPRi9GB0YLQsNGAINGC0L7Qu9GL0psg0LTQsNC80YvQvNCw0LnQtNGLINCw0LsgNiDQttCw0YHSk9CwINC00LXQudGW0L0g0LzSsdGA0YvQvSDQutGD0YvRgdGL0L3Ri9C9INC00YDQtdC90LDQttGLINGC0L7Qu9GL0psg0LbQtdGC0ZbQu9C80LXQs9C10L0g0LbQsNGBINCx0LDQu9Cw0LvQsNGA0LTQsNKT0Ysg0YHQuNC90YPRgSAg0LXQutGW0L3RiNGWINGB0rHRgNCw0psg0LrRltGI0LrQtdC90YLQsNC5INCx0LDQu9Cw0LvQsNGA0LTRi9C9INC+0LzRi9GA0YLSm9Cw0L3Ri9C9INCx0q/Qu9GW0L3Rg9GW0L3RltC9INKb0LDQu9GL0L/RgtCw0YHRg9GLINC+0LvQsNGA0LTRi9C9INC+0LvQsNGA0LTRi9C9INOp0YHRltC/INKb0LDQu9GL0L/RgtCw0YHRg9GL0L3QsNC9INCx0L7Qu9Cw0YLRi9C9INCx0ZbRgNGC0ZbQvdC00LXQvyDQv9GA0L7RhtC10YEs0J7QvNGL0YDRgtKb0LAgNCDRgtCw0LHQuNKT0Lgg0pvQuNGB0YvSm9GC0LDQvSDRgtKx0YDQsNC00Ysg0LzQvtC50YvQvSzQutC10YPQtNC1LNCx0LXQuyDQttCw0L3QtSDRgdCw0pvQsNGA0LDQu9GM0LTRliDSm9C40YHRi9Kb0YLQsNGAINCe0LzRi9GA0YLSm9Cw0L3Ri9C9INCx0ZbRgNGW0L3RiNGWINGA0LXRgtGW0Log0pvQuNGB0LDRjtGLINKx0YDRi9Kb0YLRi9KbINC00LDQvNGDINC60LXQt9GW0L3QtNC1INKb0LDQu9GL0L/RgtCw0YHQsNGC0YvQvSDQutC10YPQtNC1INKb0LjRgdGL0pPRiyDQsdC+0LvRi9C/INGC0LDQsdGL0LvQsNC00Ysg0LbQsNC90LUg0L7QuyDQsdCw0LvQsCDQvtGC0YvRgNGL0L8gLNC20q/RgNC1INCx0LDRgdGC0LDSk9Cw0L3Sk9CwINC00LXQudGW0L0g0LHQsNGB0YLQsNC70LDQtNGLLtCR0LDQu9CwINCx0LDRgdGL0L3QtNCwINC20L7Sk9Cw0YDRiyDQutOp0YLQtdGA0ZbQvyDQttC+0pPQsNGA0LvQsNGD0LTRiyDSr9C50YDQtdC90LPQtdC9INC60LXQt9C00LUg0LzQvtC50YvQvSDQttCw0L3QtSDQsdC10Lsg0L7QvNGL0YDRgtKb0LDRgdGL0L3Ri9C9INKb0LDQudGC0LDQu9Cw0LzQsCDSm9C40YHRi9Kb0YLQsNGA0Ysg0pvQsNC70YvQv9GC0LDRgdCwINCx0LDRgdGC0LDQudC00Ysg0YHQvtC90LTRi9Kb0YLQsNC9INCx0LDQu9CwINC20q/RgNC1INCx0LDRgdGC0LDSk9Cw0L3QtNCwINGB0LDQutGA0LDQu9GM0LTRliDSm9C40YHRi9KbINC00LDQvNC40LTRli7QkdKx0Lsg0pvQuNGB0YvSm9GC0LDRgCDQvtC80YvRgNGC0pvQsNC90YvQvSDRgtC10L/QtdGC0LXQvdC00ZbQs9GW0L0g0LbQsNC90LUg0YLSsdGA0LDSm9GC0YvQu9GL0pPRi9C9INC20LDQvdC1INC40LrQtdC80LTRltC70ZbQs9GW0L0g0YHQsNKb0YLQsNGDINKv0YjRltC9INKb0LDQttC10YIu0J7QvNGL0YDRgtKb0LDQvdCw0L0g0LjRltC70YMg0L/RgNC+0YbQtdGB0ZYgMTAgMTIg0LbQsNGB0YLQsCDQsNGP0pvRgtCw0LvQsNC00Ysu06nQvNGW0YDQtNGW0L0g0LDQu9KT0LDRiNKb0Ysg0LDQudC70LDRgNGL0L3QtNCwINCx0LDQu9CwINCx0LDRgdGL0L3QtNCwINOp0Lcg0LHQtdGC0ZbQvdGI0LUg0LrTqdGC0LXRgNGD0LPQtSDQttCw0L3QtSDSsdGB0YLQsNGD0pPQsCDRgtGL0YDRi9GB0pvQsNC90LTQsCzQttCw0YLRi9GAINC80L7QudGL0L0g0pvQudGB0YvSk9GLINKb0LDQu9GL0L/RgtCw0YHQsNC00Ysu06nQudGC0LrQtdC90ZYg0LbQsNC90LAg0YLRg9KT0LDQvSDQvdOZ0YDQtdGB0YLQtdC90ZbQvSDQsdCw0YHRiyDQutOp0LHRltC90LXRgdC1INC+0LzRi9GA0YLSm9Cw0L3Ri9C9INCw0LvQtNGL0L3QtNCwINC+0YDQvdCw0LvQsNGB0pvQsNC9LNGB0L7QvdC00YvSm9GC0LDQvSDQvtC90Ysg0LbQvtKT0LDRgNGLINC60q/QudC00LUg0rHRgdGC0LDRgyDSr9GI0ZbQvSDQvNC+0LnRi9C9INCw0LnQvNCw0pPRi9C90LTQsNKT0Ysg0L7QvNGL0YDRgtKb0LDQvdGL0L0g0LDQu9KT0LAg0LTQvtKT0LDSk9CwINCx0q/Qs9GW0L8s0LbQsNGC0YvRgCDQvNC+0LnQvdGL0L0g0LvQvtGA0LTQsNGB0YvQvSDSm9Cw0LvRi9C/0YLQsNGB0YLRi9GA0YMg0pvQsNC20LXRgi40IDYg0LDQudC00LAg0LHQsNC70LAg0L7RgtGL0YDRg9C00Ysg0q/QudGA0LXQvdCz0LXQvSDQutC10LfQtNC1INC+0LvQtNGL0LzQtdC9INGB0YvRgNGC0YvQvSDQutOp0LzQtdCz0ZbQvNC10L0g0YHQvtC00LDQvSDQutC10LnRltC9INOp0Lcg0LHQtdGC0ZbQvdGI0LUs0L7QvNGL0YDRgtKb0LDQvdGL0L0g0LrQtdGD0LTQtSDQutC40YHRi9KT0Ysg0pvQsNC70YvQv9GC0LDRgdCw0LTRiy4=</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8" table:style-name="ce1">
            <text:p>915288</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kg0JHQsNC70LDQtNCwINC20LXQtNC10Lsg0YDQuNC90LjRgiDSsdC30LDSmyDRgdCw0pvRgtCw0LvSk9Cw0L0gLCDQvtKT0LDQvSDQttC10LTQtdC7INGB0LjQvdGD0YHQuNGCINCw0YPRgNGD0YvQvdGL0qMg0LTQuNCw0LPQvdC+0LfRiyDSm9C+0LnRi9C70pPQsNC9LtCv0pPQvdC4INGB0LjQvdGD0YHQuNGCINKb0L7QudC90LDRg9GL0L3Ri9KjINKb0L7QudC90LDRg9GL0L3Ri9KjINKb0LDQsdGL0L3Rg9GLLNGW0YDRltKj0LTQtdC90YPRliDQsdC+0LvQsNC00Ysu0KHQuNC90YPRgdC40YIg0pvQvtC50L3QsNGD0YvQvdGL0qMg0ZbRgNGW0qPQtNC10YPRliDRgdGD0YvSmyDRgtC40LPRltC30YPQtNC00LXQvSDQvdC10LzQtdGB0LUg0LjQvdGE0LXQutGG0LjRjyDRgtKv0YHRg9GW0L3QtdC9INCx0L7Qu9GD0Ysg0LzSr9C80LrRltC9LtCW0LXQtNC10Lsg0YDQuNC90LjRgiDQtNC10LPQtdC90ZbQvNGW0Lcs0JzSsdGA0YvQvSDSm9GD0YvRgdGL0L3QtNCwINCz0LDQudC80L7RgNC40YIg0LHQvtC70YPRiyAu0JPQsNC50LzQvtGA0LjRgiDQsdCw0LvQsNC70LDRgNC00LDSk9GLINC20ZbRgtGWINCy0LjRgNGD0YHRgtGL0psg0LjQvdGE0LXQutGG0LjRj9C70LDRgNC00YvSoyDQttC40ZYg0LDRgdKb0YvQvdGD0YvQvdCw0L0g0LHQvtC70LDRgtGL0L0g0LzSsdGA0YvQvSDSm9GD0YvRgdGL0L3Ri9KjINKb0LDQsdGL0L3Rg9GLLtCa0LXQuSDQttCw0pPQtNCw0LnQtNCwINC20LXQtNC10Lsg0YDQtdC90LjRgiAs0YHQuNC90YPRgdC+0LnQtNKb0LAg0LDQudC90LDQu9C80LDRg9GLINC80q/QvNC60ZbQvS7QkdCw0LvQsNC70LDRgNC00LDSk9GLINC/0LDRgNCw0L3QsNC30LDQu9C00Ysg0YHQuNC90LjRgdC+0LjQtNGC0LDRgNC00YvSoyDQsNC90LDRgtC+0LzQuNGP0LvRi9KbINC10YDQtdC60YjQtdC70ZbQutGC0LXRgNGW0L3QtSDQsdCw0LnQu9Cw0L3Ri9GB0YLRiy7QodC40L3QuNGB0L7QuNC00YLQsNGAINC20LXRgtGW0LvRg9GWINC20LDRgdOp0LzQv9GW0YDRltC80LTRltC6INC60LXQt9C10qPQs9C1INC00LXQudGW0L0g0LbRg9GA0LXQtC4xMiDQttCw0YHSm9CwINC00LXQudGW0L0g0pvRg9GL0YHRgtCw0YAg0YLQvtC70YvSmyDQttC10YLRltC70LzQtdC50LTRli7QkNC7IDYg0LbQsNGB0pvQsCDQtNC10LnRltC9INC80rHRgNGL0L0g0pvRg9GL0YHRiyDQtNGA0LXQvdCw0LbRiyDRgtC+0LvRi9KbINC20LXRgtGW0LvQvNC10LPQtdC9INCx0L7Qu9Cw0LTRiy7RgdKv0LnQtdC60LrQtSDQutCw0LvRhtC40LTQuSDQstC40YLQsNC80LjQvdGWICDQttC10YLRltGB0L/QtdGD0YjRltC70ZbQs9GWINGB0LDQu9C00LDRgNGLINCx0L7Qu9GD0YvQtNCw0LzSr9C80LrRltC9LtCc0rHRgNGL0L0g0pvQvtC50L3QsNGD0YsgMTIg0LbQsNGB0pvQsCDQtNC10LnRltC9INGC0L7Qu9GL0psg0LbQtdGC0ZbQu9C10LTRljxiciAvPg0KPGJyIC8+DQoyKSDQkdCw0LvQsNC70LDRgNC00LAg0L7QvNGL0YDRgtKb0LAg0LjRltC70ZbQvNGW0L3RltKjINKb0LDQu9GL0L/RgtCw0YHRg9GLIC7QndOZ0YDQtdGB0YLQtSDQutC10LfRltC90LTQtSDQvtC7INC10YjSm9Cw0L3QtNCw0Lkg0pvQvtC30pPQsNC70YvRgSDRltGB0YLQtdC5INCw0LvQvNCw0LnQtNGLLNC+0LzRi9GA0YLSm9CwLdCx0YPRi9C90LTQsNGA0Ysg0YLQvtC70YvSmyDQtNCw0LzRi9C80LDSk9Cw0L0g0YHQtdCx0LXQv9GC0LXQvS7QntC80YvRgNGC0pvQsCDQuNGW0LvRltC80ZYg0LzQvtC50YvQvSDQvtC80YvRgNGC0pvQsNC00LDQvSDQsdCw0YHRgtCw0L8g0pvQsNGC0LDRj9C00Ysu0J3TmdGA0LXRgdGC0LUg0LbQsNGA0YLRhCDQttGL0LvQtNCwINC80L7QudGL0L3Ri9C9INKx0YHRgtCw0YPSk9CwICzRj9KT0L3QuCDQsdCw0YHRi9C9INCx0rHRgNCwINCw0LvRg9GLLCDQttCw0YLSm9Cw0L0g0LrQtdC30LTQtSDQsdCw0YHRi9C9INC606nRgtC10YDRltC/INKx0YHRgtCw0L8g0YLSsdGA0LAg0LDQu9Cw0LTRiy7QntC00LDQvSDQutC10LnRltC9INCx0LDQu9CwINC10qPQsdC10LrRgtC10L8g0LbSr9GA0YPQs9C1INKb0LDQu9GL0L/RgtCw0YHQsNC00YsuMTAtMTIg0LDQudC70LDRgNGL0L3QtNCwINCx0LDQu9CwINOp0LfRliDQvtGC0YvRgNCwINCw0LvRg9GLINC60LXRgNC10Los0L7QuyDQsdC10Lsg0L7QvNGL0YDRgtKb0LDQu9Cw0YDRi9C90YvSoyDQvdGL0pPQsNC50Y7Riy7QntC00LDQvSDQutC10LnRltC90LPRliAzLTQg0LDQudC00LAg0LHQsNC70LAg0LHRltGAINC30LDRgtGC0Ysg0rHRgdGC0LDRgyDQsNGA0pvRi9C70Ysg0LbSr9GA0LUg0LDQu9Cw0LTRiy7Qr9KT0L3QuCDRgtOp0YHQtdC6LNC00LjQstCw0L0g0YjQtdGC0YLQtdGA0ZbQvSDQttCw0pPQsNC70LDQvyDQttKv0YDRg9GWINC80q/QvNC60ZbQvS7QntGB0YvQu9Cw0Lkg0LHQsNC70LAg0LbSr9GA0YPQs9C1INKb0LDQu9GL0L/RgtCw0YHQsNC00YsuMSw1LTIg0LbQsNGB0YvQvdC00LAg0LHQsNC70LAg0LbSr9GA0LUg0LDQu9Cw0LTRiyAsINCx0ZbRgNCw0psg0LrQvtGA0LTQuNC90LDRhtC40Y8g0YLQvtC70YvSmyDQtNCw0LzRi9C80LDSk9Cw0L3QtNGL0pvRgtCw0L0g0LHQsNC70LDQtNCwINGC0LXQv9C1INGC0LXSo9C00ZbQuiDTmdC70YHRltC3INCx0L7Qu9Cw0LTRiy7Qr9KT0L3QuCDSm9C40LzRi9C7INKb0L7Qt9KT0LDQu9GL0YHSm9CwINC20LDRg9GD0LDQvyDQsdC10YDQtdGC0ZbQvSDQvNC40YjRi9Kb0YLRi9KjINOZ0LvRliDRgtC+0LvRi9KbINC00LDQvNGL0LzQsNGD0Ysu0JHQsNC70LDQvdGL0qMg0LbSr9GA0ZbQvyDSr9C50YDQtdC90YPRliDQutC10LfRltC90LTQtSDQvtC90YvSoyDTqdC30ZbQvSDTqdC30ZYg0YLQvtC70YvSmyDSsdGB0YLQsNGD0YsgLNC00LXQvdC10YHRltC9INCx0LDRgdKb0LDRgNCwINCw0LvRg9GLINC90LDRiNCw0YAg0LHQvtC70LDQtNGLLtCv0pPQvdC4INCx0LDQu9Cw0LTQsCDQsdGW0YDRltC90YnRliDQsdCw0YHRi9C9INKx0YHRgtCw0YMgLNC+0LTQsNC9INC60LXQudGW0L0g0LXSo9Cx0LXQutGC0LXQvyDQttKv0YDQtSDQsNC70YPRiy7QodC+0YHRi9C9INOp0LfRliDQvtGC0YvRgNCwINCw0LvRg9GLINGP0pPQvdC4INCx0LXQuyDQvtC80YvRgNGC0pvQsCDQvdGL0pPQsNGO0Ysg0LHQvtC70LDQtNGLLtCe0LzRi9GA0YLSm9CwIDQg0LjRltC70ZbQvNC90LXQvSDRgtKx0YDQsNC00YstINC80L7QudGL0L0s0LrQtdGD0LTQtSzQsdC10Lss0YHQsNC60YDQsNC70LTRiyDSm9C40YHRi9GL0pvRgtCw0YAg0LHTqdC70ZbQvdC10LTRli7QntC80YvRgNGC0pvQsCDQuNGW0LvRltC80ZYg0pvQsNC70YvQv9GC0LDRgdGD0YsgLtCR0ZbRgNGW0L3RiNGWINGA0LXRgtGC0ZbQuiDQuNGW0LvRltC8INKx0YDRi9Kb0YLRi9KjINC00LDQvNGDINC60LXQt9GW0L3QtNC1INCx0L7Qu9Cw0LQu0JHQsNC70LAg0LHQsNGB0YvQvSDQutC+0YLQtdGA0L8g0q/QudGA0LXQvdCz0LXQvSDQutC10LfQtNC1ICwg0LrQtdGD0LTQtSDQsdC10Lsg0pvQuNGB0YvSm9GC0LDQvtGA0Ysg0pvQsNC70YvQv9GC0LDRgdCwINCx0LDRgdGC0LDQudC00Ys=</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05" table:style-name="ce1">
            <text:p>915305</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kgMiDQttCw0YHQsNGAINCx0LDQu9Cw0LTQsCDSsdC30LDSmyDRg9Cw0pvRi9GCINGA0LjQvdC40YIg0LHQtdC70LPRltC70LXRgNGWINGB0LDSm9GC0LDQu9KT0LDQvS4g0KDQuNC90LjRgiDQsdCw0LvQsNC70LDRgNC00LAg0Y3RgtC40L7Qu9C+0LPQuNGP0YHRiyDQttC40ZYg0LLQuNGA0YPRgdGC0Ysg0LHQvtC70YvQvyDRgtCw0LHRi9C70LDRgtGL0L0sINC80rHRgNGL0L0g0pvRg9GL0YHRi9C90YvSoyDRiNGL0YDRi9GI0YLRiyDSm9Cw0LHQsNGC0YvQvdGL0qMg0pvQsNCx0YvQvdGD0YvQvdCwINOZ0LrQtdC70LXRgtGW0L0g0LDRg9GA0YMuINCV0YDRgtC1INC20LDRgdGC0LDSk9GLICgyLTMg0LbQsNGB0pvQsCDQtNC10LnRltC90LPRlikg0LHQsNC70LDQu9Cw0YDQtNCwINGA0LjQvdC40YLRgtGW0qMg0LPQsNC50LzQvtGA0LjRgtC60LUg0rHQu9Cw0YHRg9GLINGB0LjRgNC10Log0LrQtdC30LTQtdGB0LXRgtGW0L0g0LbQsNKT0LTQsNC5LiDQkdKx0Lsg0LHQsNC70LDQu9Cw0YDQtNGL0qMg0LDQvdCw0YLQvtC80LjRj9C70YvSmyDQtdGA0LXQutGI0LXQu9GW0LrRgtC10YDRltC90LUg0L3QtdCz0ZbQt9C00LXQu9Cz0LXQvS4g0K/Sk9C90Lgg0LHQsNC70LDQu9Cw0YDQtNGL0qMg0pvQvtC50L3QsNGD0LvQsNGA0YvQvdGL0qMg0LrQtdGIINC00LDQvNGD0YvQvdCwINCx0LDQudC70LDQvdGL0YHRgtGLLiDQkNGC0LDQvyDQsNC50YLSm9Cw0L3QtNCwIDIg0LzQsNKj0LTQsNC5INKb0L7QudC90LDRg9C70LDRgNGLINCx0LDQu9CwIDE4LTIwINC20LDRgdKb0LAg0pvQsNGA0LDQuSDSm9Cw0LvRi9C/0YLQsNGB0LDRgtGL0L0g0LHQvtC70YHQsCDSm9Cw0LvSk9Cw0L0sINCz0LDQudC80LDRgNC+0LIsINGC0L7RgNC70Ysg0YHSr9C50LXQuiDQttOZ0L3QtSDQttKx0L8g0LHQtdGCINGB0q/QudC10LrRgtC10YDRltC90ZbSoyDSm9C+0LnQvdCw0YPQu9Cw0YDRiyDQsdCw0LvQsNC90YvSoyDRgtC10LogMi0zINC205nQvdC1IDYg0LDQudC70LDRgNGL0L3QtNCwINC/0LDQudC00LAg0LHQvtC70YvQvyA2INC20LDRgdGL0L3QsCDQtNC10LnRltC9INC00LDQvNC40LTRiy4g0K/Sk9C90Lgg0LHSsdC7INKb0L7QudC90LDRg9C70LDRgNC00YvSoyDTmdC70ZYg0YLQvtC70YvSmyDQttC10YLRltC70LzQtdCz0LXQvSwg0LrRltGI0ZbQs9GW0YDRltC8INCx0L7Qu9GD0YssINCw0Lsg0LzQsNKj0LTQsNC5INKb0L7QudC90LDRg9C70YvRgNGL0L3Ri9KjINGC0ZbQv9GC0ZYg0L/QsNC50LTQsCDQsdC+0LvRi9C/INKv0LvQs9C10YDQvNC10YPRliDRgNC40L3QuNGCINC60LXQt9GW0L3QtNC1INKb0LDQsdGL0L3Rg9C00YvQvSDSm9C+0LnQvdCw0YPQu9Cw0YDQtNGL0qMg0pvQsNCx0YvQvdGD0YvQvdCwINC00LXQudGW0L0g0rHQu9Cw0YHRgyDQvNKv0LzQutGW0L3RiNGW0LvRltCz0ZbQvSDRgtOp0LzQtdC90LTQtdGC0LXQtNGWLjxiciAvPg0KMikg0JbQsNKj0LAg0YLRg9GL0LvSk9Cw0L0g0L3TmdGA0LXRgdGC0LXQu9C10YDQtNGW0qMg0YLRltGA0LXQuiDSm9C40LzRi9C7INCw0L/Qv9Cw0YDQsNGC0YvQvdGL0qMg0LXRgNC10LrRiNC10LvRltC60YLQtdGA0ZbQvdGW0qMg0LHRltGA0ZbQvdC1INC+0LzRi9GA0YLSm9CwINC20L7RgtCw0YHRi9C90YvSoyDRgtC10LPRltGB0YLRltCz0ZYg0LHQvtC70YvQvyDRgtCw0LHRi9C70LDQtNGLLiDQntC80YvRgNGC0pvQsCDQttC+0YLQsNGB0YvQvdGL0qMg0YTQuNC30LjQvtC70L7Qs9C40Y/Qu9GL0psg0LnRltC70ZbQvNC00LXRgNGWINC60LXQudGW0L3Qs9GWINC00LDQvNGDINCx0LDRgNGL0YHRi9C90LTQsCDQv9Cw0LnQtNCwINCx0L7Qu9Cw0LTRiy4g0JHRltC3INC+0LzRi9GA0YLSm9CwINC20L7RgtCw0YHRi9C90YvSoyAzINGE0LjQt9C40L7Qu9C+0LPQuNGP0LvRi9KbINC50ZbQu9GW0LzQtNC10YDRltC9INCw0LbRi9GA0LDRgtCw0LzRi9C3LCDQvtC70LDRgDogMSkg0LzQvtC50YvQvSDQsdOp0LvRltCz0ZbQvdGW0qMg0LvQvtGA0LTQvtC30YstINCx0LDQu9Cw0LvQsNGA0LTQsCAyLDUtMyDQsNC50YvQvdC00LAg0LHQsNC70LAg0LHQsNGB0YvQvSDQutOp0YLQtdGA0LUg0LHQsNGB0YLQsNKT0LDQvdC00LAg0pvQsNC70YvQv9GC0LDRgdCw0LTRiywg0L7QvNGL0YDRgtKb0LAg0LHTqdC70ZbQvNGW0L3RltKjINCw0LvQtNGL0pPQsCDSm9Cw0YDQsNC5INC50ZbQu9GD0ZYg0LHQvtC70YvQvyDRgtCw0LHRi9C70LDQtNGLOyAyKSDQutC10YPQtNC1INCx06nQu9GW0LPRltC90ZbSoyDQutC40YTQvtC30YsgLSDQsdCw0LvQsNC90YvSoyA2INCw0LnRi9C90LTQsCAo0LHQsNC70LAg0L7RgtGL0YDRi9C/INKv0LnRgNC10L3Qs9C10L0g0LrQtdC30LTQtSkg0L/QsNC50LTQsCDQsdC+0LvQsNC00YsuINC+0LzRi9GA0YLSm9CwINC20L7RgtCw0YHRi9C90YvSoyDQsNGA0YLSm9CwINC50ZbQu9GD0ZYg0LHQvtC70YvQvyDRgtCw0LHRi9C70LDQtNGLOyAzKSDQsdC10Lsg0LHTqdC70ZbQvNGW0L3RltKjINC70L7RgNC00L7Qt9GLIC0gMSDQttCw0YHSm9CwINGC0L7Qu9KT0LDQvSDQutC10LfQtNC1INC/0LDQudC00LAg0LHQvtC70LDQtNGLLiDQkdKx0Lsg0LrQtdC30LTQtSDQsdCw0LvQsCDQttKv0YDRltC/INKv0LnRgNC10L3Rg9GW0LzQtdC9INCx0LDQudC70LDQvdGL0YHRgtGLLiDQkdKx0Lsg0YTQuNC30LjQvtC70L7Qs9C40Y/Qu9GL0psg0LnRltC70ZbQvNC00LXRgCDSm9Cw0LvRi9C/0YLRiyDQsdC+0LvRi9C/INGC0LDQsdGL0LvQsNC00YssINCw0Lsg0L/QsNGC0L7Qu9C+0LPQuNGP0LvRi9KbINC20LDSk9C00LDQudC70LDRgNC00LAg0LzRi9GB0LDQu9KT0LAg0YDQsNGF0LjRgiDQsNGD0YDRg9GLINC60LXQt9GW0L3QtNC1INCx0LXQuyDQsdOp0LvRltC80ZbQvdGW0qMg0LrQuNGE0L7Qt9GLINGB0LXQutGW0LvQtNGWINC50ZbQu9GW0LzQtNC10YAg0L/QsNC50LTQsCDQsdC+0LvRg9GLINC80q/QvNC60ZbQvS4=</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5" table:style-name="ce1">
            <text:p>1066875</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7QltC10LTQtdC7INGA0LjQvdC40YIt0LHSsdC7INCx0LDQu9Cw0LvQsNGA0LTQsCDQutC10LfQtNC10YHQtdGC0ZbQvSDQttC10LTQtdC7INCw0pPRi9C80LTRiyDRgNC10YHQv9C40YDQsNGC0L7RgNC70YvSmyDQuNC90YTQtdC60YbQuNGP0LvQsNGA0LTRi9KjINC20LjRliDQsNGB0pvRi9C90YPRiyDRgdCw0LvQtNCw0YDRi9C90LDQvSDQsdC+0LvQsNGC0YvQvSDQvNKx0YDRi9C9INKb0YPRi9GB0YvQvdGL0qMg0YjRi9GA0YvRiNGC0Ysg0pvQsNCx0LDRgtGL0L3Ri9KjINKb0LDQsdGL0L3RgyDQv9GA0L7RhtC10YHRli7QoNC40L3QuNGCINC60LXQudCx0ZbRgCDQttCw0pPQtNCw0LnQu9Cw0YDQtNCwINGA0LjQvdC40YIg0rHQt9Cw0psg0YPQsNKb0YvRgiDQsdC+0LnRiyDRgdCw0pvRgtCw0LvRi9C/INGB0LjQvdGD0YHQuNGC0LrQtSDSsdC70LDRgdC/0LDRg9GLINC80q/QvNC60ZbQvS4yINC20LDRgdGC0LDSk9GLINCx0LDQu9Cw0L3Ri9KjINC80LDQutGB0LjQu9GP0YDQu9GLINC205nQvdC1INGE0YDQvtC90YLQsNC70YzQtNGLINGB0LjQvdGD0YLQsNGA0Ysg0LbQtdGC0ZbQu9C80LXQs9C10L0u0JzQsNC60YHQuNC70Y/RgNC70Ysg0YHQuNC90YPRgSA0LTYg0LbQsNGB0YLQsCDSm9Cw0LvRi9C/0YLQsNGB0YvQvyzQtNCw0LzRi9GB0LAu0JDQuyDRhNGA0L7QvdGC0LDQu9GM0LTRiyDRgdC40L3QvdGD0YEgMy00INC20LDRgdKb0LAg0LTQtdC50ZbQvSDQsdCw0LnSm9Cw0LvQvNCw0LksNS02INC20LDRgdGC0LDQvSDRgtC+0LvRi9KbINC00LDQvNGD0Ysg0LbSr9GA0LXQtNGWLjIg0LbQsNGB0pvQsCDQtNC10LnRltC9INC00LDQvNC40YLRi9C9INGN0YLQvNC+0LjQtNGC0Ysg0YHQuNC90YPRgdGC0LDRgCDQv9Cw0LnQtNCwINCx0L7Qu9KT0LDQvdGL0LzQtdC9LNGC0L7Qu9GL0psg0LbQtdGC0ZbQu9C80LXQs9C10L0g0LrSr9C50LTQtSDQsdC+0LvQsNC00Ysu0J7QuyDQvNKx0YDRi9C9INCw0YDQsNC70YvSmyDQv9C10L0g0LrTqdC3INGB0q/QudC10LrRgtC10YDRltC90ZbSoyDQsNGA0LDRgdGL0L3QtNCwINC+0YDQvdCw0LvQsNGB0LDQtNGLLtCW0LDSo9CwINGC0YPRi9C70pPQsNC9INGB05nQsdC40LvQtdGAINC80LXQvSDQvdOZ0YDQtdGB0YLQtdC70LXRgNC00LUg0YHQuNC90YPRgdGC0LDRgCDSm9Cw0LvRi9C/0YLQsNGB0YPRiyDRgtC+0LvRi9KbINC10LzQtdGBLNC+0Lsg0LbQsNGB06nRgdC/0ZbRgNGW0LzQtNGW0Log0LrQtdC30LXSo9Cz0LUg0LTQtdC50ZbQvSDQttKv0YDQtdC00ZYu0J7RgdGL0LTQsNC9INC/0LDRgNCw0L3QsNC30LDQu9GM0LTRiyDRgdC40L3Rg9GB0YLQsNGA0LTRi9KjINCw0L3QsNGC0L7QvNC40Y/Qu9GL0psg0LXRgNC10LrRiNC10LvRltC60YLQtdGA0ZYg0LTQtSDTmdGB0LXRgCDQtdGC0LXQtNGWLtCd0LDSm9GC0YvRgNCw0psg0LDQudGC0LDRgCDQsdC+0LvRgdCw0pssMTIg0LbQsNGB0pvQsCDQtNC10LnRltC9INKb0YPRi9GB0YLQsNGAINGC0L7Qu9GL0psg0LbQtdGC0ZbQu9C80LXQs9C10L0s0LDQuyA2INC20LDRgdKb0LAg0LTQtdC50ZbQvSDQvNKx0YDRi9C90L3Ri9KjINKb0YPRi9GB0YvQvdGL0qMg0LTRgNC10L3QsNC20Ysg0YLQvtC70YvSmyDQtNCw0LzRi9C80LDSk9Cw0L0u0JHQsNC70LDQu9Cw0YDQtNCwINC80LDSo9C00LDQuSDRgdC40L3Rg9GB0Ysg0LHQvtC70LzQsNC50LTRiy7Qn9C10YDQuNC90LDRgtCw0LvQtNGL0psg0LrQtdC30LXSo9C00LXQs9GWINCx0LDQu9Cw0LTQsCDRgtC+0YDQu9GLINC205nQvdC1INGB0YvQvdCwINGC05nRgNGW0LfQtNGWINGB0LjQvdGD0YHRgtCw0YAg0LHQvtC70pPQsNC90YvQvNC10L0s0YLQvtC70YvSmyDQttC10YLRltC70LzQtdCz0LXQvSDQvNOp0LvRiNC10YDQtNC1INCx0L7Qu9Cw0LTRiy7QldGA0LXRgdC10LrRgtC10YDQs9C1INKb0LDRgNCw0pPQsNC90LTQsCDQsdCw0LvQsNC70LDRgNC00YvSoyDQvNKx0YDRi9C9INKb0YPRi9GB0Ysg0pvRi9GB0pvQsCDTmdGA0ZYg0LrQtdKjLNC+0YHRi9KT0LDQvSDQsdCw0LnQu9Cw0L3Ri9GB0YLRiyDRiNGL0YDRi9GI0YLRi9KjINC20LjRliDQsNKT0YvQvyDQutC10YLRg9GWINGB0LjQvdGD0YHQuNGC0YLRliDQsdC+0LvQtNGL0YDQvNCw0YPSk9CwINOZ0YHQtdGAINC10YLQtdC00ZYuMTUg0LbQsNGB0YLQsCDQsdCw0YDQu9GL0psg0YHQuNC90YPRgdGC0LDRgCDQttC10YLRltC70LXQtNGWLNGB0L7QuyDRgdC10LHQtdC/0YLQtdC9INCx0LDQu9Cw0LvQsNGA0LTQsCDRgdC40L3Rg9GB0LjRgiDRgdC40YDQtdC6INC60LXQt9C00LXRgdC10LTRli48YnIgLz4NCjxiciAvPg0KMi7QldGA0YLQtSDQttCw0YHRgtCw0pPRiyDQsdCw0LvQsNC70LDRgNC00YvSoyDQvtC80YvRgNGC0pvQsCDQuNGW0LvRltC80ZbQvdGW0qMg0pvQsNC70YvQv9GC0LDRgdGD0Ysg0L7QvdGL0qMg06nRgdGDINC/0YDQvtGG0LXRgdGB0ZbQvNC10L0g0pvQsNGC0LDRgCDQttKv0YDQtdGC0ZbQvSDQsdCw0Y/RgyDSr9C00LXRgNGW0YEu0J7QvNGL0YDRgtKb0LAgNCDRgtCw0LHQuNKT0Lgg0pvQuNGB0YvSmyDSm9Kx0YDRi9C70YvQvNC00LDRgNC00LDQvSDRgtKx0YDQsNC00Yss0L7Qu9Cw0YAg0LzQvtC50YvQvSzQutC10YPQtNC1LNCx0LXQuyDQvNC10L0g0YHQsNC60YDQsNC70YzQtNGLINKb0LjRgdGL0pvRgtCw0YAu0J3TmdGA0LXRgdGC0LXQu9GW0Log0LrQtdC30LXSo9C00LXQs9GWINCx0LDQu9Cw0L3Ri9KjINC+0LzRi9GA0YLSm9Cw0YHRiyDQsNC70pPQsCDQuNGW0LvQs9C10L0g0LTQvtKT0LAg0L/RltGI0ZbQvdC00ZYg0LHQvtC70LDQtNGLLtCU0LDQvNGD0LTRi9KjIDMtNCDQsNC50LvQsNGA0YvQvdC00LAg0YTQuNC30LjQvtC70L7Qs9C40Y/Qu9GL0psg0LjRltC70ZbQvNC00LXRgCDSm9Cw0LvRi9C/0YLQsNGB0YvQvyDQsdCw0YHRgtCw0LnQtNGLLtCb0L7RgNC00L7QtyDQttOZ0L3QtSDQutC40YTQvtC3INC/0ZbRiNGW0L3QtNGWINC00LDQvNGD0LTRiyDQsNC20YvRgNCw0YLQsNC80YvQty7TmNGAINKb0LDQudGB0YvRgdGL0L3Ri9KjINOp0LfRltC90ZbSoyDQtNCw0LzRgyDRg9Cw0pvRi9GC0Ysg05nRgNGC0q/RgNC70ZYu0JzQvtC50YvQvSDQu9C+0YDQtNC+0LfRiyAzINCw0LnRi9C90LTQsCDQtNCw0LzQuNC00Yss0L7QuyDQsdCw0LvQsNC90YvSoyDQsdCw0YHRi9C9INKx0YHRgtCw0Lkg0LHQsNGB0YLQsNKT0LDQvSDRg9Cw0pvRi9GC0YvQvdCw0L0g0LHQsNGB0YLQsNC70LDQtNGLLtCa0LXRg9C00LUg0LrQuNGE0L7Qt9GLINCx0LDQu9Cw0LvQsNGA0LTRi9KjINC+0YLRi9GA0LAg0LHQsNGB0YLQsNKT0LDQvSDRg9Cw0pvRi9GC0YvQvdCw0L0s0L7QuyDTqdC3INCx0LXRgtGW0L3RiNC1INC90LXQvNC10YHQtSDRgdGL0YDRgtKb0Ysg0LrTqdC80LXQuiDQsNGA0pvRi9C70Ysg0LbSr9GA0YPRliDQvNKv0LzQutGW0L0uNS02INCw0LnQtNCwINC00LDQvNC40LTRiy7QkdKx0Lsg0LrQtdGD0LTQtSDSm9C40YHRi9KT0Ysg0pvQsNC70YvQv9GC0LDRgdGD0YvQvdCwINCw0LvRi9C/INC60LXQu9C10LTRlizQvtC90YvSoyDRhNC40LfQuNC+0LvQvtCz0LjRj9C70YvSmyDRhNCw0LrRgtC+0YDRiyDQvNGL0L3QsNC00LAs0LHSsdC7INC/0ZbRiNGW0L0g0L7QvNGL0YDRgtKb0LAg0LHQsNGBINC/0LXQvSDSm9C+0LvQtNGLINKx0YHRgtCw0L8g0YLSsdGA0YPRiyDSr9GI0ZbQvSDQvNCw0qPRi9C30LTRiyzQsNC7INGW0YjQutGWINCw0LnQvNCw0pPRiyDQsNC70pPQsNC9INC205nQvdC1INGC06nQvNC10L0g0YLQsNGA0YLRi9C70LDQtNGLLtCe0YHRiyDRgdC10LHQtdC/0YLQtdGA0LTQtdC9INC00L7Sk9Cw0LvQsNC90YvQvyDQutC10YPQtNC1INC60LjRhNC+0LfRiyDQtNCw0LzQuNC00Ysu0JHQtdC7INC70L7RgNC00L7Qt9GLINCx0LDQu9Cw0L3Ri9KjIDYtNyDQsNC50YvQvdCw0L0g0LHQsNGB0YLQsNC/INC00LDQvNC40LTRiyzQvtC7INCx0LDQu9Cw0L3Ri9KjINCw0Y/Sm9Kb0LAg0YLSsdGA0LAg0LDQu9GDINKb0LDQsdGW0LvQtdGC0ZbQvdGW0qMg0LTQsNC80YPRi9C80LXQvSDRgtGL0pPRi9C3INCx0LDQudC70LDQvdGL0YHRgtGLLtCR0rHQuyDSm9Cw0LHRltC70LXRgtGC0ZbSoyDQv9Cw0LnQtNCwINCx0L7Qu9GD0YsgMSDQttCw0YHSm9CwINC00LXQudGW0L0g06nQt9GW0L3QtNGW0Log0LbTmdC90LUg0YHRi9GA0YLRgtGL0qMg0LrTqdC80LXQs9GWINCw0YDSm9GL0LvRiyDQttKv0LfQtdCz0LUg0LDRgdGD0Ysg0LzSr9C80LrRltC9LtCR0LDQu9CwINC00LXQvdC1INKb0LDQu9GL0L/Ri9C9INCy0LXRgNGC0LjQutCw0LvQtNGLINGC0ZbQuiDSsdGB0YLQsNGD0Ysg0L3TmdGC0LjQttC10YHRltC90LTQtSDQsdC10Lsg0LDQu9KT0LAg0pvQsNGA0LDQuSDQtNC+0pPQsNC70LDQvdGD0Ysg0LbSr9GA0LXQtNGWLtCR0LDQu9CwINC20q/RgNC1INCx0LDRgdGC0LDSk9Cw0L0g0YHTmdGC0YLQtdC9INC+0LzRi9GA0YLSm9CwINC60L7QvNC/0LXQvdGB0LDRgtC+0YDQu9GLINGC0q/RgNC00LUg0YHQtdCz0ZbQt9C606nQtyDQutC40YTQvtC30YvQvdGL0qMg0LTQsNC80YMg0L/RltGI0ZbQvdGW0L3QtSDQtdC90LXQtNGWLtCR0rHQuyDTqdC30LPQtdGA0ZbRgdGC0LXRgNC00ZbSoyDQsdCw0YDQu9GL0pPRiyDQtNCw0LzRgyDRgdCw0YLRi9GB0YvQvdC00LDSk9GLINCx0LDQu9Cw0L3Ri9KjINGC0LXQv9C1LdGC0LXSo9C00ZbQs9GW0L0s0LTQtdC90LUg0pvQsNC70L/Ri9C9INC205nQvdC1INC40LrQtdC80LTRltC70ZbQs9GW0L0g0YHQsNKb0YLQsNGDINKv0YjRltC9INC80LDSo9GL0LfQtNGLLtCQ0LvSk9Cw0YjSm9GLINC60LXQt9C00LUg0pvQuNGB0Y7RiyDSr9C00LXRgNGW0YHRliDQsdCw0Y/RgyDQttKv0YDQtdC00ZYs0LDQuyDRg9Cw0pvRi9GCINOp0YLQtSDQutC10LvQtSDQsdKx0Lsg0LbRi9C70LTQsNC80LTQsNC50LTRiy7QodC10LHQtdCx0ZYg0LHQsNC70LDQvdGL0qMg0pvQvtC30pPQsNC70YvRgSDQsdC10LvRgdC10L3QtNGW0LvRltCz0ZbQvdGW0qMg0LDRgNGC0YPRi9C90LAg0LHQsNC50LvQsNC90YvRgdGC0Ysu0J7QvNGL0YDRgtKb0LAg0LHSsdC70YjRi9Kb0LXRgtGC0LXRgNGWINGC0L7Qu9GL0psg0LTQsNC80YvQvNCw0YPRi9C90LAg0LHQsNC50LvQsNC90YvRgdGC0Ysg0LrQtdC50LTQtSDQv9Cw0YLQvtC70L7Qs9C40Y/Qu9GL0psg0q/QtNC10YDRltGB0YLQtdGAINC00LDQvNGD0Ysg0LzSr9C80LrRltC9LtCc0YvRgdCw0LvRiyzRgdC60L7Qu9C40L7QtyDRgdC10LrRltC70LTRli7QltCw0LvQv9GLINCw0LvSk9Cw0L3QtNCwIDEwLTEyINC20LDRgdKb0LAg0LTQtdC50ZbQvSDQvtC80YvRgNGC0pvQsCDSm9C40YHRi9KT0Ysg0pvQsNC70YvQv9GC0LDRgdGD0Ysg0LbSr9GA0LXQtNGW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9" table:style-name="ce1">
            <text:p>1066949</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3RgdKx0YDQsNKbLiAyINC20LDRgdCw0YAg0LHQsNC70LDQtNCwINC20LXQtNC10Lsg0YHQuNC90YPRgdC40YLRgtGW0qMg0LTQsNC80YPRiyDRgdC40YDQtdC6INC60LXQt9C00LXRgdC10LTRli4g0KHQtdCx0LXQsdGWLNC+0LvQsNGA0LTRi9KjINC80rHRgNGL0L0g0pvRg9GL0YHRi9C80LXQvSDQv9Cw0LfRg9GF0LDQu9Cw0YDRi9C90YvSoyDRgtC+0LvRi9KbINC20LXRgtGW0LvQvNC10YPRlizRgdC+0pPQsNC9INCx0LDQudC70LDQvdGL0YHRgtGLINCw0L3QsNGC0L7QvNC40Y/Qu9GL0pst0YTQuNC30LjQvtC70L7Qs9C40Y/Qu9GL0psg0LXRgNC10LrRiNC10LvRltC60YLQtdGA0ZY60LHSsdC7INGB0LjQvdGD0YHQuNGC0YLRltKjINC00LDQvNGD0Ysg0YvSm9C/0LDQu9GL0L0g0YLTqdC80LXQvdC00LXRgtC10LTRli4g0KHQvtC7INGB0LXQsdC10L/RgtGWINCb0J7QoCDQtNOZ0YDRltCz0LXRgNGWINC20LXQtNC10Lsg0YHQuNC90YPRgdC40YLRgtGWINC20L7Sm9Kb0LAg0YjRi9KT0LDRgNGL0L8g0L7QvtGC0YvRgC4g0JHQsNC70LDQu9Cw0YDQtNCw0pPRiyDRgdC40L3Rg9GB0LjRgtGC0ZbSoyDQtNCw0LzRg9GL0L3QsCDQutC10LTQtdGA0LPRliDQutC10LvRgtGW0YDQtdGC0ZbQvSDQsNC90LDRgtC+0LzQuNGP0LvRi9KbINC10YDQtdC60YjQtdC70ZbQutGC0LXRgDoxLdC80rHRgNGL0L3QtNCw0pPRiyDSm9C+0YHQsNC70pvRiyDSm9GD0YvRgdGC0LDRgNC00YvSoyDRgtC+0LvRi9KbINC00LDQvNGL0LzQsNGD0Ysu0KHQvtC90YvQvNC10L0g0pvQsNGC0LDRgCwg0L7Qu9Cw0YAg0YLQsNGAINCx0L7Qu9GL0L8g0LrQtdC70LXQtNGWINC205nQvdC1INKb0LDQsdGL0L3RgyDQv9GA0L7RhtC10YHRliDQvtGA0YvQvSDQsNC70YMg0YvSm9GC0LjQvNCw0LvQtNGL0pPRiyDRgtOp0LzQtdC9LiDQnNCw0qPQtNCw0Lkg0LbTmdC90LUg0YTRgNC+0L3RgtCw0LvRjNC00Ysg0YHQuNC90YPRgdGC0LDRgCDRgtC+0LvRi9KbINC20LXRgtGW0LvQvNC10YPRli4g0KTRgNC+0L3RgtCw0LvRjNC00Ysg0YHQuNC90YPRgSDTmdC00LXRgtGC0LUgMiDQttCw0YHRgtCw0L0g0LrQtdC50ZbQvSwgNS02INC20LDRgdGC0LAg0LTQsNC80LjQtNGLLiDQkNC7INGB0YvQvdCwINGC05nRgNGW0LfQtNGWINGB0LjQvdGD0YEgMy01INC20LDRgdGC0LDQvSDQutC10LnRltC9INKb0LDQu9GL0L/RgtCw0YHQsNC00YsuINCQ0Lsg0LbQsNKbINGB0q/QudC10LrRgtGW0Log0LbTmdC90LUg0YLQvtGA0LvRiyDRgdKv0LnQtdC6INGB0LjQvdGD0YHRgtCw0YDRiyDQsdCw0LvQsCDRgtGD0YvQu9KT0LDQvSDQutC10LfQtNC1INCx0LDRgCwg0LHRltGA0LDSmyDRgtC+0LvRi9KbINC00LDQvNGL0LzQsNKT0LDQvSDQsdC+0LvQsNC00YsuINCh0L7QuyDRgdC10LHQtdC/0YLRliDSm9Cw0LHRi9C90YMg0L/RgNC+0YbQtdGB0ZbQvdGW0qMg0LrQu9Cw0YHRgdC40LrQsNC70YvSmyDRgdC40L3Rg9GB0LjRgtC60LUg0LDQudC90LDQu9GD0YvQvdCwINCw0L3QsNGC0L7QvNC40Y/Qu9GL0psg0YLSr9GA0LTQtSDQvNKv0LzQutGW0L3QtNGW0Log0LHQtdGA0LzQtdC50LTRli4g0KHQvtC90YvQvNC10L0g0pvQsNGC0LDRgCDQv9C90LXQstC80LDRgtC40LfQsNGG0LjRj9C90YvSoyDQsdC+0LvQvNCw0YPRi9C00LAg0YHQtdCx0LXQvyDQsdC+0LvQsNC00YsuMi0g0KHQtdC60YDQtdGC0YLRliDQsdOp0LvRgyDQttKv0LnQtdGB0ZbQvdGW0qMg0LbQtdGC0ZbQu9C80LXRg9GWLiDQkdCw0LvQsNC70LDRgNC00LAg0pvRg9GL0YHRgtCw0YDQtNGLINC80rHRgNGL0L0g0pvRg9GL0YHRi9C80LXQvSDQsdCw0LnQu9Cw0L3Ri9GB0YLRi9GA0LDRgtGL0L0g0YLQsNGAINOp0YLQutC10Lsg0LbQvtC70LTQsNGAINOZ0LvRliDRgtC+0LvRi9KbINKb0LDQu9GL0L/RgtCw0YHQv9Cw0pPQsNC9LtCh0L7QuyDSr9GI0ZbQvSDQsdCw0LrRgtC10YDQuNGP0LvQsNGA0LTRi9KjINKv0LvQutC10L0g0pvRg9GL0YHRgtCw0YDQtNCwINC20LjQvdCw0pvRgtCw0LvRg9GL0L3QsCDQutC10LTQtdGA0LPRliDQutC10LvRgtGW0YDQtdC00ZYuIDMt0JHQsNC70LDQu9Cw0YDQtNGL0qMg0LzSsdGA0YvQvSDSm9GD0YvRgdGL0L3Ri9KjINGI0YvRgNGL0YjRgtGLINKb0LDQsdGL0pPRiyDSm9Cw0L3QvNC10L0g0LbQsNKb0YHRiyDSm9Cw0LzRgtCw0LzQsNGB0YvQtyDQtdGC0ZbQu9C10LTRliDQttOZ0L3QtSDRltGB0ZbQvdGD0LPQtSDQsdC10LnRltC8INCx0L7Qu9GL0L8g0LrQtdC70LXQtNGWLtCQ0Lsg0LHSsdC7INCy0LjRgNGD0YHRgtCw0YDQvNC10L0g0LHQsNC60YLQtdGA0LjRj9C70LDRgNC00Ysg0YHRi9GA0YLSm9CwINGI0YvSk9Cw0YDQsNGC0YvQvSDRgtCw0LHQuNKT0Lgg0pvQvtGA0pPQsNC90YvRgSDQvNC10YXQsNC90LjQt9C80ZbQvSDQttC10qPRltC70LTQtdGC0LXRgtGW0L0g0LHQvtC70YvQvyDRgtCw0LHRi9C70LDQtNGLLtCV0LPQtdGAINC90LDRg9Kb0LDRgdGC0LAg0rHQt9Cw0psg0YPQsNKb0YvRgiDRgdCw0pvRgtCw0LvQsNGC0YvQvSDRgNC40L3QuNGCINCx0LXQtNCz0ZbQu9C10YDRliDQsdCw0LnSm9Cw0LvRgdCwINCx0rHQuyDQutOp0LHRltC90LXRgdC1INC20LXQtNC10Lsg0YDQtdGB0L/QuNGA0LDRgtC+0YDQu9GL0psg0LLQuNGA0YPRgdGC0YvSmyDQuNC90YTQtdC60YbQuNGP0L3Ri9KjINGB0LDQu9C00LDRgNGLINCx0L7Qu9GD0Ysg0LzSr9C80LrRltC9LtCd0LXQvNC10YHQtSDQsNC00LXQvdC+0LjQtNGC0YvSmyDRgtGW0L3QtNC10YDQtNGW0qMg0LPQuNC/0LXRgNGC0YDQvtGE0LjRj9GB0YvQvNC10L0g0LHQvtC70YPRi9C00LAg0LzSr9C80LrRltC9LiDSmtC+0YDRi9GC0YvQvdC00YvQu9Cw0Lkg0LrQtdC70LUsINCx0LDQu9Cw0LvQsNGA0LTQsNKT0Ysg0L7RgdGLINCw0L3QsNGC0L7QvNC40Y/Qu9GL0psg0LXRgNC10LrRiNC10LvRltC60YLQtdGAINC20LXQtNC10Lsg0YHQuNC90YPRgdC40YIg0LTQsNC80YPRi9C90LAg0LrQtdC00LXRgNCz0ZYg0LHQvtC70YvQvyDRgtCw0LHRi9C70LDQtNGLLiAgICAgICAgICAgICAgICAgICAgICAgICAgICAgICAgICAgPGJyIC8+DQogICAgICAgPGJyIC8+DQoyLdGB0rHRgNCw0psu0JHQsNC70LDQu9Cw0YDQtNCwINC+0LzRi9GA0YLSm9Cw0L3Ri9KjINGE0LjQt9C40L7Qu9C+0LPQuNGP0LvRi9KbINC40ZbQu9GW0LzQtNC10YDRliDRgtGD0pPQsNC90L3QsNC9INC60LXQudGW0L3Qs9GWINC00LDQvNGDINCx0LDRgNGL0YHRi9C90LTQsCDSm9Cw0LvRi9C/0YLQsNGB0LDQtNGLLiDQr9KT0L3QuCDQsdCw0LvQsNC90YvSoyDQsdCw0YEg0LrTqdGC0LXRgNGDLCDQvtGC0YvRgNKT0LDQvSDQutC10LfRltC90LTQtSwg0LXSo9Cx0LXQutGC0LXQs9C10L0sINC20q/RgNCz0LXQvSDQutC10LfQtNC10YDRltC90LTQtS4g0KHQvtC90LTQsNC5LdCw0psg0LHSsdC7INC00LXQvdC1INKb0rHRgNGL0LvRi9C80YvQvdKjINKb0LDQu9GL0L/RgtCw0YHRg9GL0L3QsCDSr9C70LrQtdC9INOZ0YHQtdGAINC10YLQtdC00ZYu0JDRiNGL0L8g0LDQudGC0LDRgtGL0L0g0LHQvtC70YHQsNC8LCAxLSDQttCw0qPQsCDRgtGD0pPQsNC9INC905nRgNC10YHRgtC10LvQtdGA0LTRltKjINC+0LzRi9GA0YLSm9Cw0LvQsNGA0Ysg0YLQvtC70YvSm9GC0LDQuSDRgtGW0Log0Y/Sk9C90Lgg0LbQsNC30YvSmyDQsdC+0LvRi9C/INC60LXQu9C10LTRliwg0YLQtdC6INCw0LfQtNCw0pPQsNC9INC00L7Sk9CwINGC05nRgNGW0LfQtNGWINC40ZbQu9GDKNC60LjRhNC+0LcpINCx0L7Qu9Cw0LTRiy4g0J7QuyDQvdOZ0YDQtdGB0YLQtdC90ZbSoyDQttCw0YLRi9GAINGW0YjRltC90LTQtSDQvtGA0L3QsNC70LDRgdGD0YvQvdCwINCx0LDQudC70LDQvdGL0YHRgtGLLiDQmtC10LvQtdGB0ZYtINC80L7QudGL0L0g0LvQvtGA0LTQvtC30YsuINCc0L7QudGL0L3QvdGL0qMg0LDQu9KT0LAg0LjRltC70YPRli3QsdCw0LvQsNC70LDRgNC00LAgMi0zINCw0LnQu9GL0psg0LrQtdGJ0LTQtdGA0ZbQvdC00LUg0LHQsNGB0YLQsNC70YvQvywgNi03INCw0LnRi9C90LTQsCDRgtC+0LvRi9Kb0YLQsNC5INKb0LDQu9GL0L/RgtCw0YHQsNGC0YvQvSDQsdC+0LvQsNC00YsuINCf0LDQudC00LAg0LHQvtC70YPRi9C90YvSoyDRgdC10LHQtdCx0ZYs0LHQsNC70LAg0LHQsNGB0YvQvSDQutOp0YLQtdGA0YPQtNGWINKv0LnRgNC10L3QtSDQsdCw0YHRgtCw0pPQsNC9INC60LXQt9GW0L3QtNC1INC80L7QudGL0L0g0L7QvNGL0YDRgtKb0LDQu9Cw0YDRi9C90LAg0LrSr9GIINGC0q/RgdC10YLRltC9INCx0L7Qu9Cw0LTRiy4g0JzRi9GB0LDQu9GLINCx0LDQu9Cw0L3RiyDQtdGC0LHQtdGC0ZbQvdC10L0g0LbQsNGC0pvRi9C30pPQsNC90LTQsCDQsdCw0YHRi9C9INC606nRgtC10YDRg9GWLiAzLSDQmtC10YPQtNC1INC60LjRhNC+0LfRiyDQutC10YPQtNC10L3RltKjINCw0YDRgtKb0LAg0pvQsNGA0LDQuSDQuNGW0LvRg9GWLiA2INCw0LnQtNCw0L0gMSDQttCw0YHSm9CwINC00LXQudGW0L0g0pvQsNC70YvQv9GC0LDRgdCw0LTRiy7QodC10LHQtdCx0ZYg0LHQsNC70LAg0L7RgtGL0YDSk9Cw0L0g0LrQtdC30LTQtSwg0LXSo9Cx0LXQutGC0LXQs9C10L0g0LrQtdC30LTQtSDQutC10YPQtNC1INC+0LzRi9GA0YLSm9Cw0LvQsNGA0YvQvdCwINC20q/QutGC0LXQvNC1INGC0q/RgdGD0ZbQvdC10L0g0YLRg9GL0L3QtNCw0LnQtNGLLiA0LdCR0LXQuyDQu9C+0YDQtNC+0LfRiyDQsdC10LvQtNGW0qMg0LDQu9KT0LAg0pvQsNGA0LDQuSDQuNGW0LvRg9GWLCA5LTEyINCw0LnQtNCwINC606nRgNGW0L3RltGBINCx0LXRgNGW0L8g0LbTmdC90LUg0LHQsNC70LAg0LbSr9GA0LUg0LHQsNGB0YLQsNKT0LDQvSDQutC10LfQtNC1IDEtMSw1INC20LDRgdGC0LAg0YLQvtC70YvSk9GL0LzQtdC9INKb0LDQu9GL0L/RgtCw0YHQsNC00YsuINCh0LXQsdC10LHRliDRgtGW0Log0LbSr9GA0LPQtdC9INC60LXQt9C00LXQs9GWINCx0LXQuyDQvtC80YvRgNGC0pvQsNC70LDRgNGL0L3QsCDQutKv0YjRgtC10YDQtNGW0qMg06nQt9Cz0LXRgNGD0ZYuINCh0L7QvdGL0LzQtdC9INKb0LDRgtCw0YAg0LHQsNC70LAg0LbSr9GA0LUg0LHQsNGB0YLQsNKT0LDQvSDQutC10LfRltC90LTQtSDRgdC+0LrRgNCw0LvRjNC00Ysg0pvQuNGB0YvSmyDQtNCw0LzQuNC00YsuIDUt0KHQvtC60YDQsNC70YzQtNGLINC60LjRhNC+0Lct0YHQtdCz0ZbQt9C606nQt9C00ZbSoyDQsNGA0YLSm9CwINC40ZbQu9GD0ZYsINC20LDRgdOp0YHQv9GW0YDRltC80LTRltC6INC60LXQt9C10qPQs9C1INC00LXQudGW0L0g0pvQsNC70YvQv9GC0LDRgdCw0LTRiy7QodC10LHQtdCx0ZYg0YHQtdCz0ZbQt9C606nQt9C00ZbSoyDRgdKv0LnQtdC60YLQtdGA0ZYg0LHRltGA0ZbQs9GW0L8sINGC0rHRgNCw0pvRgtGLINCw0YDRgtKb0LAg0pvQsNGA0LDQuSDQuNGW0LvRgyDSm9Cw0LvRi9C/0YLQsNGB0LDQtNGLLiDQntC80YvRgNGC0pvQsNC90YvSoyDQvdC10LPRltC30LPRliDQuNGW0LvRgyDQv9GA0L7RhtC10YHRliAxMC0xMiDQttCw0YHSm9CwINKb0LDRgNCw0Lkg0LDRj9Kb0YLQsNC70LDQtNGLLiDSmtC+0YDRi9GC0YvQvdC00YvQu9Cw0Lkg0LrQtdC70LUsINCx0rHQuyDSm9C40YHRi9Kb0YLQsNGAINC+0LzRi9GA0YLSm9Cw0L3Ri9KjINGC0LXQv9C1INGC0LXSo9C00ZbQs9GW0L0sINGC0rHRgNCw0pvRgtGL0LvRi9KT0LDQvSDQttOZ0L3QtSDQuNC60LXQvNC00ZbQu9GW0LMg0YHQsNKb0YLQsNGDINKv0YjRltC9INKb0LDQttC10YIuINCW0LDQu9C/0Ysg0LHQsNC70LDQvdGL0qMg06nQvNGW0YDRltC90ZbSoyDQsdGW0YDRltC90YjRliDQttGL0LvRi9C90LTQsCDQvtC80YvRgNGC0pvQsNC90YvSoyDQtdC60ZYg0LDQu9KT0LAg0LjRltC70ZbRgdGWINC80L7QudGL0L0g0LbTmdC90LUg0LHQtdC7INC70L7RgNC00L7Qt9GLINC205nQvdC1INC10LrRliDQsNGA0YLSm9GLINKb0LjRgdGL0psg0LrQtdGD0LTQtSDQttOZ0L3QtSDRgdC+0LrRgNCw0LvRjNC00Ysg0LrQuNGE0L7QtyDQtNCw0LzQuNC00Ys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0" table:style-name="ce1">
            <text:p>1066950</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nQodKw0KDQkNKbOiDQltC10LTQtdC7INCz0LDQudC80L7RgNC40YIg0LHRg9C7INC20LXQtNC10Lsg0YDQtdGB0L/QuNGA0LDRgtC+0YDQu9GL0psg0LLQuNGA0YPRgdGC0YvSmyDQuNC90YTQtdC60YbQuNGP0LvQsNGA0LTRi9KjINC20LjRliDQsNGB0pvRi9C90YPRiyDQsdC+0LvRi9C/INGC0LDQsdGL0LvQsNGC0YvQvSDQvNKx0YDRi9C9INC60YPRi9GB0YvQvdGL0qMg0pvQsNCx0YvQvdGD0YsuINC00LXQs9C10L3QvNC10L0g0LrQtdC50LHRltGAINC20LDSk9C00LDQudC70LDRgNC00Ysg0LXQs9C10YAg0YDQtdC90LjRgiDSsdC30LDSmyDRg9Cw0pvRi9GCINCx0L7QudGLINGB0LjQvdGD0YHQuNGC0LrQtSDQsNC50L3QsNC70LzQsNC5INGB0LDSm9GC0LDQu9GD0Ysg0LzRg9C80LrRltC9INCx0YPQuyDQttCw0YEg0LHQsNC70LDQu9Cw0YDQtNCw0pPRiyDQv9Cw0YDQsNC90LDQt9Cw0LvRjNC00ZYg0YHQuNC90YPRgdGC0LDRgNC00YvSoyDQsNC90LDRgtC+0LzQuNGP0LvRi9KbINC10YDQtdC60YjQtdC70ZbQutGC0LXRgNGW0L3QtSDQsdCw0LnQu9Cw0L3Ri9GB0YLRiyDQttCw0qPQsCDRgtGD0pPQsNC9INC90LDRgNC10YHRgtC10LvQtdGA0LTQtSDRgdC40L3Rg9GB0YLQsNGAINOZ0LvRliDQtNCw0LzRi9C80LDSk9Cw0L0sINC+0LvQsNGA0LTRi9KjINKb0LDQu9GL0L/RgtCw0YHRg9GLINC20LDRgdOp0YHQv9GW0YDRltC80LPQtSDQtNC10LnRltC9INC20LDQu9KT0LDRgdCw0LTRiy4g0KHQvtC90YvQvNC10L0g0pvQsNGC0LDRgCAxMiDQttCw0YHSm9CwINC00LXQudGW0L0g0YHQuNC90YPRgdGC0LDRgCDRgtC+0LvRi9KbINC20LXRgtGW0LvQvNC10LPQtdC9INCw0Lsg0LDQu9GC0Ysg0LbQsNGB0pvQsCDQtNC10LnRltC9INC80YPRgNGL0L0g0pvRg9GL0YHRi9C90YvSoyDQtNGA0LXQvdCw0LbRiyDRgtC+0LvRi9KbINC20LXRgtGW0LvQvNC10LPQtdC9LiDQltCw0YEg0LHQsNC70LDQu9Cw0YDQtNCw0pPRiyDRgdC40L3Rg9GB0LjRgiDQttCw0L3QsCDRgtGD0pPQsNC9INCx0LDQu9Cw0LvQsNGA0LTQsCDRgtC+0YDQu9GLINC20LDQvdC1INGB0YvQvdCwINGC05nRgNGW0LfQtNGWINGB0LjQvdGD0YHRgtCw0YAg0LHQvtC70LDQtCDQsdGW0YDQsNKbINC806nQu9GI0LXRgNGWINCx0L7QudGL0L3RiNCwINGC0L7Qu9GL0psg0LbQtdGC0ZbQu9C80LXQs9C10L0g0LHQvtC70YvQvyDRgtCw0LHRi9C70LDQtNGLLiDQnNCw0qPQtNCw0Lkg0YHQuNC90YPRgdGLINCx0L7Qu9C80LDQudC00YssINGC0L7Qu9GL0pPRi9C80LXQvSDQsdCw0YDQu9GL0psg0YHQuNC90YPRgdGC0LDRgCAxNSDQttCw0YHSm9CwINKb0LDRgNCw0Lkg0YLQvtC70YvSmyDQttC10YLRltC70LXQtNGWLiDQodC+0L3Ri9KjINGB0LXQsdC10LHRltC90LXQvSDRgdC40L3Rg9GB0LjRgiDQsdCw0LvQsNC70YDQtNCwINCw0Lcg0LHQvtC70YvQvyDQutC10LvQtdC0LiAyINC20LDRgdKb0LAg0LbQtNC10LnRltC90LPRliDQsdCw0LvQsNC70LDRgNC00LAg0LbQvtKT0LDRgNKT0Ysg0LbQsNKbINC205nQvdC1INGC0L7RgNC70Ysg0YHQuNC90YPRgdGC0LDRgCDQsNC30LTQsNC/INC00LDQvNGL0pPQsNC9INCx0L7Qu9Cw0LTRiyDQvNCw0qPQtNCw0Lkg0LbTmdC90LUg0LrRgNC40L3QvtC30LjRgtGC0ZYg0YHQuNC90YPRgdGC0LDRgCDQsdKx0Lsg0LbQsNKb0YLQsCDRgtC+0LvRi9KbINC00LDQvNGL0LzQsNKT0LDQvSDQvdC10LzQtdGB0LUg06nRgtC1INKx0YHQsNKbINCx0L7Qu9Cw0LTRiyDRgdC40L3Rg9GB0YLQsNGA0LTRi9KjINCx0YPQuyDQttC10YLRltC70LzQtdCz0LXQvdGWINC+0L3Ri9KjINGW0YjRltC9INCw0YDQsNKT0LDQvdCwINC90LXQvNC10YHQtSDQvNGD0LvQtNC1INC00YDQtdC90LDQttKT0LAg0LTQtdC50ZbQvSDQsdC+0LvQvNCw0YPRi9C90LAg0LDQutC10LvQtdC00ZYg0YHQvtC90YvSoyDQvdCw0YLQuNC20LXRgtGW0L3QtNC1INC40L3RhNC10LrRhtC40Y/QvdGL0qMg0YLQsNGA0LDQu9GDINC80YPQvNC60ZbQvdC00ZbQs9GWINGI0LXQutGC0LXQu9C10LTRli4gMinQodKx0YDQsNKb0pvQsCDQttCw0YPQsNC/OiDQmtOZ0YjQutC10L3RgtCw0Lkg0LHQsNC70LDQu9Cw0YDQtNCwINC+0LzRi9GA0YLSm9CwINC40ZbQu9GW0LzRltC90ZbSoyDSm9Cw0LvRi9C/0YLQsNGB0YPRiyDQvtC70LDRgNC00YvSoyDTqdGB0ZbQvyDQtNCw0LzRg9GLINC60LXQt9GW0L3QtNC1INC/0LDQudC00LAg0LHQvtC70LDRgtGL0L0g0L/RgNC/0L7RhtC10YEuINCe0LzRi9GA0YLSm9CwIDQg0YLQsNCx0YvSk9GLINKb0LjRgdGL0pvRgtCw0L0g0YLRg9GA0LDQtNGLINCc0J7QmdCr0J0sINCa0JXQo9CU0JUsINCR0JXQmywg0LbTmdC90LUg0KHQkNCa0KDQkNCb0YzQlNCrINKa0JjQodCr0rDQotCQ0KAuINC+0Lsg0pvQuNGB0YvSm9GC0LDRgCDQvtC80YvRgNGC0rHQsNC90YvSoyDRgtC10L/QtdGC0LXSo9C00ZbQs9Kj0L0g0YLSsdGA0LDSm9GC0YvQu9GL0pPRi9C9INC20LDQvdC1INC40LrQtdC80LTRltC70ZbQs9GW0L0g0YHQsNKb0YLQsNGDINGD0YjRltC9INKb0LDQttC10YIuINCe0LzRi9GA0YLSm9Cw0L3Ri9KjINC40ZbQu9GDINC/0YDQvtGG0LXRgdGWIDEwLTEyINC20LDRgdGC0LAg0LDRj9Kb0YLQsNC70LDQtNC70Ysg06nQvNGW0YDQtNGW0qMg0LDQu9KT0LDRiNKb0Ysg0LDQudC70LDRgNGL0L3QtNCwINCx0LDQu9CwINCx0LDRgdGL0L0g06nQtyDQsdC10YLRltC90YjQtSDQutOp0YLQtdGA0YPQs9C1INC20LDQvdC1INGD0YHRgtCw0YPSk9CwINGC0YvRgNGL0YHSm9Cw0L3QtNCwINC20LDRgtGL0YAg0LzQvtC50L3RiyDSm9C40YHRi9KT0Ysg0pvQsNC70YvQv9GC0LDRgdCw0LTRiy4g06jQudGC0LrQtdC90ZYg0LbQsNKj0LAg0YLRg9KT0LDQvSDQvdCw0YDQtdGB0YLQtdC90ZbSoyDQsdCw0YEg0LrTqdCx0ZbQvdC10YHQtSDQvtC80YvRgNGC0pvQsNC90YvSoyDQsNC70LTRi9C90LTQsCDQvtGA0L3QsNC70LDRgdCw0LTRiywg0LXQs9C10YAg0YHRltC3INC90LDRgNC10YHRgtC10LPQtSDRgtGA0LDRhNC40LvQtNC1INKb0LDRgNCw0YHQsNKj0YvQty4g0KHQvtC90LTRi9Kb0YLQsNC9INC+0L3RiyDQttC+0pPQsNGA0Ysg0LrRg9C50LTQtSDSm9GB0YLQsNGDINGD0YjRltC9INC+0YDQvdCw0LvQsNGB0LDQtNGLLCDQnNC+0LnRi9C9INCw0LnQvNCw0pPRi9C90LTQsNKT0Ysg0L7QvNGL0YDRgtKb0LDQvdGLINCw0LvSk9CwINC00L7Sk9Cw0pPQsCDQsdGD0LPRltC/LCDQttCw0YLRi9GAINC80L7QudC90Ysg0L7RgNC00L7Qt9GL0L0g0pvQsNC70YvQv9GC0LDRgdGC0YvRgNGDINC60LXRgNC10LouIDQtNiDQsNC50LTQsCDQsdCw0LvQsCDQvtGC0YvRgNGD0LTRiyDRg9C50YDQtdC90LPQtdC9INC60LXQt9C00LUg0LDQu9C00YvQvNC10L0g0YHRgNGC0YvQvSDQutOp0LzQtdCz0ZbQvNC10L0g0YHQvtC00LDQvSDQutC10LnRltC9INOp0Lcg0LHQtdGC0ZbQvdGI0LUg0L7QvNGL0YDRgtKb0LAg0LHQtdC7INKb0LjRgdGL0pPRiyDSm9Cw0LvRi9C/0YLQsNGB0LDQtNGLLiDQqNGL0L3Ri9C90LTQsNC00LAg0LHRg9C7INC/0L7Qt9C40YbQuNGP0LTQsCDQvtC80YvRgNGC0pvQsCDQsdCw0YEg0L/QtdC9INKb0L7Qu9C00YvSoyDRgdCw0LvQvNCw0pPRi9C9INOp0YHRgtCw0L8g0YLRg9GA0YMg0LrRgNC10Log0LDQuyDRltGI0LrRliDQttCw0pPRiyDQsdGD0LrRltC7INC80LDRgdGB0LDRgdGLINC80LXQvSDQsNC70pPQsCDQttCw0L3QtSDRgtOp0LzQtdC9INGC0LDRgNGC0YvQu9Cw0LTRiy4g0YHQvtC90LTRi9Kb0YLQsNC9INC+0YLRi9GA0pPQsNC9INC60YPQudC00LUg0YLQtdC/0LUg0YLQtdKj0LTRltC60YLRliDRgdCw0pvRgtCw0YMg0YPRiNGW0L0g0L7QvNGL0YDRgtKb0LAg0LDRgNGC0pvQsCDSm9Cw0YDQsNC5INC00L7Sk9Cw0YDQu9Cw0L3Ri9C/INC60LXRg9C00LUg0LrQuNGE0L7Qt9GLINC/0LDQudC00LAg0LHQvtC70YPRiyDQutC10YDQtdC6LiAxINC20LDRgdKb0LAg0LTQtdC50ZbQvSDQsdCw0LvQsCDQsNC70LTRi9C80LXQvSDRgdGL0YDRgtGC0YvSoyDQutOp0LzQtdCz0ZbQvNC10L0g0YHQvtC00LDQvSDQutC10LnRltC9INGB0L7QtNCw0L0g0LrQtdC50ZbQvSDRgtOp0YDRi9C/INC20YPRgNGD0LTRliDRg9C50YDQtdC90LXQtNGWINKb0L7Qu9C00LDRg9C00LAg0rHRgdGC0LDQvyDRgtKw0YDRgyDRgdC+0LTQsNC9INC60LXQudGW0L0g0LTQtdGA0LHQtdGBLiDQkdKx0Lsg0LbQsNKT0LTQsNC50LTQsCDQtNC10L3QtdC90ZYg0YLRltC6INC60YPQudC00LUg0YPRgdGC0LDRgyDRg9GI0ZbQvSDQvtC80YvRgNGC0pvQsNC90Ysg0LHQtdC7INCw0LnQvNCw0pPRi9C90LTQsCDQtNC+0pPQsCDQvNC10L0g0LDQu9KT0LAg0pvQsNGA0LDQuSDQsdGD0LPRgyDQutC10YDQtdC6IC4gINCe0YHRi9C70LDQudGI0LAg0LHQtdC7INC+0YDQtNC+0LfQsNC90YvSoyDQvdC10LPRltC30LPRliDSm9GL0YHRi9KbINGB0YvQt9GL0pPRiyDSm9Cw0LvRi9C/0YLQsNGB0LDQtNGLLiDQndOZ0YLQuNC20LXQtNC1INOp0LzRltGA0ZbQvdGW0qMg0LHRltGA0ZbQvdGI0ZYg0LbRi9C70YvQvdC00LAg0L3TmdGA0LXRgdGC0LUg0L7QvNGL0YDRgtKb0LDQvdGL0qMg0LXQutGWINCw0LvSk9CwINC40ZbQu9GW0YHRliDQvNC+0LnRi9C9INC20LDQvdC1INCx0LXQuyDQvtGA0LTQvtC30Ysg0LbTmdC90LUg0L7Qu9Cw0YDQtNGLINOp0YLQtdC50YLRltC9INC10LrRliDQsNGA0pvQsCDSm9C40YHRi9KbINC60LXRg9C00LUg0LbTmdC90LUg0YHQsNC60YDQsNC70YzQtNGWINC60LjRhNC+0Lcg0LTQsNC80LjQtNGLLiDQpNCY0JfQmNCe0JvQntCT0JjQr9Cb0KvSmiDQuNGW0LvRltC80LTQtdGA0LTRltKjINKb0LDQu9GL0L/RgtCw0YHRgyDQutC10LfQtdC90LTQtdGA0ZYsINCW0LDRgtGL0YAg0ZbRiNGW0L3QtNC1INC+0LzRi9GA0YLSm9CwINC20L7RgtCw0YHRiyDQsdGW0YDQutC10LvQutKj0ZYg0LjRltC70ZbQvdCz0LXQvSwg0YjQsNC80LDQvNC10L0g0LXQutGWINGD0Ygg0LDQudC00LAg0LzQvtC50YvQvSDQu9Cw0YDQtNC+0LfRiyDQv9Cw0LnQtNCwINCx0L7Qu9Cw0LTRiyDRgdC10LHQtdCx0ZYg0LHQsNC70LAg0LHQsNC70LAg0LHQsNGB0YvQvSDQutOp0YLQtdGA0LUg0LHQsNGB0YLQsNC50LTRiyA2LTcg0LDQudC00LAg0LrQtdGD0LTQtSDQutC40YTQvtC30Ysg0LDQvdGL0pvRgtCw0LvQsCDQsdCw0YHRgtCw0LnQtNGLLCDRgdC10LHQtdCx0ZYg0LHQsNC70LAg0L7RgtGL0YDRg9KT0LAg0YLRi9GA0YvRgdCw0LTRiyDRgtC+0LvRi9KbIDEyINCw0LnQtNCwINCx0LXQuyDQm9Cw0YDQtNC+0LfRiyDQtNCw0LzQuNC00Ysg0YHQtdCx0LXQsdGWINCx0LDQu9CwINGC0ZbQuiDRgtKb0YDRi9C/INC20YPRgNGD0LPQtSDRgtCw0LvQv9GL0L3QsNC00YsuICAgICAg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4" table:style-name="ce1">
            <text:p>1066954</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MS7QkdCw0LvQsNC70LDRgNC00LDSk9GLINGB0LjQvdC40YHRg9C40YLRgtGW0qMg0LTQsNC80YPRi9C90LAg0LrQtdC00LXRgNCz0ZYg0LrQtdC70YLRltGA0LXRgtGW0L0g0LDQvdCw0YLQvtC80LjRj9C70YvSmyDRhNC40LfQuNC+0LvQvtCz0LjRj9C70YvSmyDQtdGA0LXQutGI0LXQu9GW0LrRgtC10YDQs9C1INCx0LDQudC70LDQvdGL0YHRgtGLINGC0L7Sm9GC0LDQu9Cw0YLRi9C9INCx0L7Qu9GB0LDQvCwyINC20LDRgdGC0LDSk9GLINCx0LDQu9Cw0L3Ri9KjINC80LDQutGB0LjQu9GP0YDQu9GLINGP0pPQvdC4ICDQttC+0pPQsNGA0pPRiyDQttCw0psg0LbTmdC90LUg0YTRgNC+0L3RgtCw0LvRjNC00Ysg0LbQsNKb0YLQsCDRgdC40L3Rg9GB0YLQsNGA0Ysg05nQu9GWINGC0L7Qu9GL0psg0LbQtdGC0ZbQu9C80LXQs9C10L0u0JzQsNC60YHQuNC70Y/RgNC70YvSmyDRgdC40L3Rg9GBIDQtNiDQttCw0YHSm9CwINC00LXQudGW0L0g0LDRgNCw0LvRi9Kb0YLQsCAgINKb0LDQu9GL0L/RgtCw0YHRi9C/LNC+0Lsg0YLQvtC70YvSmyDQutOp0LvQtdC80LTQtSDQtNCw0LzQuCDQsdCw0YHRgtCw0LnQtNGLLtCe0YHRi9KT0LDQvSDQsdCw0LnQu9Cw0L3Ri9GB0YLRiyDQsdCw0LvQsNC70LDRgNC00LDSk9GLINC80rHRgNGL0L0g0pvRg9GL0YHRi9C90YvSoyDRiNGL0YDRi9GI0YLRiyDQutCw0LHQsNGC0YLQsNGA0Ysg0pvQsNCx0YvQvdGD0Yss0Y/Sk9C90Lgg0YDQuNC90LjRgtGC0ZYgINGC0YPRi9C90LTQsNGC0LDQtNGLINC10LrQtdC9Li7QkdGW0YDQsNKbINGB0LjQvdGD0YHRgtGL0qMg0LTQsNC80YPRiyDSr9GI0ZbQvSDQttC10YLQutGW0LvRltC60YLRliDRgtKx0YDQtNC1LNC20LXRgtC60ZbQu9GW0LrRgtGWICDQutOp0LvQtdC80LTQtSDRgdC40L3Rg9GB0YLQsNGAINOZ0LvRliDQtNCw0LzRi9C80LDSk9Cw0L0uINCt0YLQvNC+0LjQtNGC0Ysg0YHQuNC90YPRgdGC0LDRgCzRj9KT0L3QuCDQvNKx0YDRi9C9INCw0YDQsNC70YvSmyDQttOZ05nQvdC1INC606nQtyDRgdKv0LnQtdC60YLQtdGA0ZbQvdGW0qMg0LDRgNCw0YHRi9C90LTQsCDQvtGA0L3QsNC70LDRgdC60LDQvSDRgdC40L3Rg9GB0L7QuNGC0LTQsNGAINOZ0LvRltC00LUg0LTSsdGA0YvRgSDQtNCw0LzRi9C80LDSk9Cw0L0uINCe0YHRiyAyINC20LDRgdKb0LAg0pvQsNGA0LDQuSDQsdGW0YDRiNCw0LzQsCDQtNCw0LzRi9KT0LDQvdGL0LzQtdC9LNOZ0LvRliDRgtC+0LvRi9KbINKb0LDQu9GL0L/RgtCw0YHQv9Cw0pPQsNC9LtCR0rHQuyDRgdC40L3Rg9GBINGB0LjQvdGD0YHQuNGC0YLRltKjINC00LDQvNGD0YvQvdC00LAg0LzQsNKj0YvQt9C00Ysg0LHQvtC70YvQvyDRgtCw0LHRi9C70LDQtNGLIC7QkdGW0YDQsNKbINC10YDQtdGB0LXQutGC0LXRgNCz0LUg0pvQsNGA0pPQsNC90LTQsCDSm9GL0YHSm9CwINC205nQvdC1INC60LXSo9GW0YDQtdC6INCx0L7Qu9Cw0LTRiy7QkdKx0Lsg0YjRi9GA0YvRiNGC0YvSoyDQtNKx0YDRi9GBLNCw0pPRi9C/INC60LXRgtGD0ZbQvdC1INGL0pvQv9Cw0Lsg0LXRgtC10LTRli7QkdKx0Lsg0LDQvdCw0YLQvtC80LjRj9C70YvSmyDRhNC40LfQuNC40L7Qu9C+0LPQuNGP0LvRi9KbINC10YDQtdC60YjQtdC70ZbQutGC0LXRgNGW0L3QtSDQsdCw0LnQu9Cw0L3Ri9GB0YLRiyAg0YjRi9GA0YvRiNGC0YvSoyDRgdC40L3Rg9GB0YLQsNGA0pPQsCDQttC40L3QsNC70YPRi9C9INCx0L7Qu9C00YvRgNC80LDQudC00Ysu0KHQvtC90LTRi9Kb0YLQsNC9INGB0LjQvdGD0YHRgtGL0qMg0LTQsNC80YPRiyDQsNC3INC60LXQt9C00LXRgdC10LTRli4u0JHQsNC70LDQu9Cw0YDQtNCwINC80rHRgNGL0L3QvdGL0qMg0YjRi9GA0YvRiNGC0Ysg0pvQsNCx0LDRgtGLINC80LXQvSDQvNKx0YDRi9C9INOp0YLQutC10LvQtNC10YDRliDQsNC90LDSm9Kx0YDQu9GL0Lwg0LrQtdKjIC0g0YjRi9GA0YvRiNGC0YvSoyDRgdC40L3Rg9GB0pvQsCDQttC40LjQvdCw0LvRi9C/INKb0LDQsdGL0L3Rg9GLINC/0YDQvtGG0LXRgdGW0L0g0YLRg9C00YvRgNGDINGL0pvRgtC40LzQsNC70LTRi9KT0Ysg0YLRgtOp0LzQtdC9LiDSmtC+0YDRi9GC0YvQvdC00YvQu9Cw0Lkg0LrQtdGC0YHQtdC8OiDQkdCw0LvQsNC70LDRgNC00LAg0YHQuNC90YPRgdGC0ZbSoyDQtNCw0LzRgyDQvNKv0LzQutGW0L3QtNGW0LPRliDQtdGA0LXRgdC10LrRgtC10LXRgNCz0LUgINKb0LDRgNCw0pPQsNC90LTQsCDRgtOp0LzQtdC9LNGB0LXQsdC10LHRliDQvtC70LDRgNC00YvSoyDQsNC90LDRgtC+0LzQuNGP0LvRi9KbINGE0LjQt9C40L7Qu9C+0LPQuNGP0LvRi9KbINC10YDQtdC60YjQtdC70ZbQutGC0LXRgNGWINCx0LDQu9Cw0LvQsNGA0LTQsCDRgdC40L3Rg9GB0LjRgtGC0ZbSoyDQttC40ZYg0LTQsNC80YPRi9C90YvSoyDQutC10LTQtdGA0LPRliDQutC10LvRgtGW0YDQtdC00ZYs0LHRltGA0LDSmyDRgNC40L3QuNGCINGB0LjRj9Kb0YLRiyDQsdCw0YHSm9CwINCw0YPRgNGDINGC0q/RgNGW0L3QtNC1ICDRgdCw0pvRgtCw0LvRg9GLINC80q/QvNC60ZbQvS4g0KHQvtC90LTRi9Kb0YLQsNC9INC10YDRgtC1INCx0LDQu9CwINC20LDRgdGC0LDSk9GLINCx0LDQu9Cw0YDQtNGLINC80ZbQvdC00LXRgtGC0ZYg0YLSr9GA0LTQtSDQsdCw0LvQsCDQtNOZ0YDRltCz0LXRgNGWINC/0LXQtNC40LDRgtGA0pPQsCDSm9Cw0YDQsNGC0YvQvSDQvtGC0YvRgNGDINC60LXRgNC10Lou0KHQtdCx0LXQsdGWINCx0LDQu9CwINC20LDRgSDQsdC+0LvSk9Cw0L3QtNGL0pvRgtCw0L0g0L7QvdGL0qMg0q/RgdGC0ZbQvdC1INOZ0YDRgtKv0YDQu9GWINC40L3RhNC10LrRhtC40Y8g0YHQtdC60LvQtNGWINC90LXQvNC10YHQtSDQsdCw0LrRgtC10YDQuNGPINC606nQt9C00LXRgNGWINGC0q/RgdC10YLRltC9INCx0L7Qu9GB0LAg0L7QvdGLINOp0Lcg0YPQsNKb0YvRgtGL0L3QtNCwINC10LzQtNC10YMg0LbTmdC90LUg0LHQsNC70LAg0LTQtdC90YHQsNGD0LvRi9KT0YvQvSDSm9Cw0LTQsNKT0LDQu9Cw0Lwg0L7RgtGL0YDRgyDQutC10YDQtdC6LjxiciAvPg0KMi7QldGA0YLQtSDQttCw0YHRgtCw0pPRiyDQsdCw0LvQsNC70LDRgNC00YvSoyDQvtC80YvRgNGC0pvQsCDQuNGW0LvRltC80L3RltKjINKb0LDQu9GL0L/RgtCw0YHRgyDQvNC10YDQt9GW0LzRltC90LUg0LrQtdC70LXRgtGW0L0g0LHQvtC70YHQsNKbINC+0LzRi9GA0YLSm9CwINC40ZbQu9GD0ZYg0LHRltGA0L3QtdGI0LUg0LrQtdC30LXSo9C00LXRgNC00LXQvSDRgtKx0YDQsNC00Ysu0J7QvNGL0YDRgtKb0LAg0LjRltC70YPRliDQsdKx0Lsg0L7QvNGL0YDRgtKb0LAg0LHQsNKT0LDQvdCw0YHRi9C90YvSoyDRgtCw0LHQuNKT0Lgg0pvQuNGB0YvSm9GC0LDRgNGLLCDQvtC70LDRgCDQsNC00LDQvNC90YvSoyDQttKv0YDRltGBLdGC0rHRgNGL0YEg0LrQtdC30ZbQvdC00LUs0ZbRgS3TmdGA0LXQutC10YIg0LrQtdC30ZbQvdC00LUgINC00rHRgNGL0YEg0pvQuNC80YvQuyDQttCw0YHQsNC70pPQsNC9INC60LXQt9C00LUg0pvQsNC80YLQsNC80LDRgdGL0Lcg0LXRgtGW0LvQs9C10L3QtNC1INKb0LDQu9GL0L/RgtCw0YHQsNC00Ysu0KLRg9GL0LvSk9Cw0L0g0LrQtdC30LTQtSDQsdCw0LvQsNC70LDRgNC00YvSoyDQvtC80YvRgNGC0pvQsNGB0Ysg0L3QtdCz0ZbQt9GW0L3QtdC9INCy0LXRgNGC0LjQutCw0LvRjNC00Ysg0LbQsNKT0LTQsNC50LTQsCDRgtKx0YDQsNC00YsuINCV0qMg0LHRltGA0ZbQvdGI0ZYg0L7QvNGL0YDRgtKb0LAgINC80LXQvSDQsdKx0LvRiNGL0pvQtdGC0YLQtdGAINC60q/RiNC10LnQtSDQsdCw0YHRgtCw0LnQtNGLLtCW0LDQu9C/0Ysg0LbQsNGC0YvRgNC00LAg0LHQsNC70LAg0LbQsNGC0pvQsNC9INC60LXQt9C00LUg0L7QuyDQsdCw0LvQsCDRgtGL0L3Ri9GBINCw0LvRgyDSr9GI0LjQvSDQttCw0YLQsNGC0YvQvSAg0YvSo9KT0LDQudC70Ysg0pvQsNC70YvQv9GC0LAg0LHQvtC70LDQtNGLLiDQltOZ0L3QtSDRgdC+0pPQsNC9INGB05nQudC60LXRgdGW0L3RiNC1ICDQvtC90YvSoyDQvtC80YvRgNGC0pvQsNGB0Ysg0LTQsCDRgtGW0Log0LHQvtC70YvQvyDSm9Cw0LvQsNC00YsuINCe0LzRi9GA0YLSm9CwINCx0qPQt9C00LUg0YLTqdGA0YIg0YLQsNCx0LjSk9C4INKb0LjRgdGL0pvRgtCw0L0g0YLSsdGA0LDQtNGLOtC80L7QudGL0L0s0LrQtdGD0LTQtSwg0LHQtdC7INC205nQvdC1INGB0LDQutGA0LDQu9GM0LTRiyDSm9C40YHRi9Kb0YLQsNGALtCe0LzRi9GA0YLSm9Cw0L3Ri9KjINCx0ZbRgNGW0L3RiNGWINCx0LXRgtGC0ZbQuiDQuNGW0LvRg9GWINKx0YDRi9Kb0YLRi9KjINC00LDQvNGD0Ysg0LrQtdC30ZbQvdC00LUg0pvQsNC70YvQv9GC0LDRgdCw0YLRi9C9INC60LXRg9C00LUg0pvQuNGB0YvSk9GLINCx0L7Qu9GL0L8g0YLQsNCx0YvQu9Cw0LTRiyDQttOZ0L3QtSDQvtC7INCx0LDQu9CwINC+0YLRi9GA0YvQvywg0LbSr9GA0LUg0LHQsNGB0YLQsNKT0LDQvdKT0LAg0LTQtdC50ZbQvSDRgdCw0pvRgtCw0LvQsNC00Yss0JHQsNC70LAg0LHQsNGB0YvQvSDQttC+0pPRgNGLINC606nRgtC10YDRltC/LNC20L7RgNKT0LDQu9Cw0YPQtNGLINKv0LnRgNC10L3Qs9C10L0g0LrQtdC30LTQtSDQvNC+0LnRi9C9INC205nQvdC1INCx0LXQuyDQvtC80YvRgNGC0pvQsNGB0YvQvdGL0qMg0pvQsNC50YLQsNC70LDQvNCwINC40ZbQu9GD0LvQtdGA0ZYg0pvQsNC70YvQv9GC0LDRgdCwINCx0LDRgdGC0LDQudC00Ysu0KHQvtKj0YvQvdC00LAsINCx0LDQu9CwINC20q/RgNC1INCx0LDRgdGC0LDSk9Cw0L3QtNCwINGB0LDQutGA0LDQu9GM0LTRiyAg0pvQuNGB0YvSmyDQtNCw0LzQuNC00YsuINCR0rHQuyDSm9C40YHRi9Kb0YLQsNGAINC+0LzRi9GA0YLSm9Cw0L3Ri9KjINGC0LXQv9C1LdGC0LXSo9C00ZbQs9GW0L0g0LbTmdC90LUg0YLSsdGA0LDSm9GC0YvQu9GL0pPRi9C9INGB0LDSm9GC0LDRgyDSr9GI0ZbQvSDQutC10YDQtdC6LiDQntC80YvRgNGC0pvQsCDQuNGW0LvRg9GWINC/0YDQvtGG0LXRgdGWINC20LDQu9C/0Ysg0LHRltC30LTQtSAxMC0xMiDQttCw0YHRgtCwINGC0L7Qu9GL0pvSm9Cw0L3QtNGLINCw0Y/Sm9GC0LDQu9Cw0LTRiyDQtdC60LXQvS4g0JDQuyDQvtGB0Ysg0L/RgNC+0YbQtdGB0YLRltKjINGC0L7Qu9GL0psg0LDQu9KT0LDRiNKb0Ysg0LjRltC70YPRliAzLTQg0LDQudC00LAg0LHQsNGB0YLQsNC/INCx0LDQu9CwINCx0LDRgdGL0L0g0LrTqdGC0LXRgNC1INCx0LDRgdGC0LDQudC00Yss0L7QuyDQutC10LfQtNC1INC80L7QudGL0L3QvdGL0qMgINGG0LXRgNCy0LjQutCw0LvRjNC00Ysg0LjRltC70YPRliDSm9Cw0LvRi9C/0YLQsNGB0LDQtNGLLtCR0rHQuyDQutC10LfQtNC1INCx0LDQu9CwINOp0LfRltC90ZbSoyDQsdCw0YHRi9C9INOp0Lcg0LHQtdGC0ZbQvdGI0LUg0rHRgdGC0LDQuSDQsNC70LDRgtGL0L0g0LTQtdKj0LPQtdC50LPQtSDQttC10YLQtdC00ZYuLNCw0Lsg0LzQvtC50YvQvSAg0L7QvNGL0YDRgtKb0LDRgdGLINKb0LjRgdCw0Y/QtNGLINC10LrQtdC9LtCQ0Lsg0LXQutGW0L3RiNGWINC40ZbQu9GD0ZYg0LHQsNC70LDQvdGL0qMgOS0xMiDQsNC50LvQsNGA0YvQvdC00LAg0LHQvtC70LDQtNGLINC10LrQtdC9LtCv0pPQvdC4INCx0LDQu9CwINOp0Lcg0LHQtdGC0ZbQvdGI0LUg0LDRj9Kb0YLQsNGA0YvQvSDRgtKx0YDRg9KT0LAg0YHQtdC30ZbQvdGW0L8s0LHRltGAINKb0LDQu9GL0L/RgtGL0LvRi9KbINC00LXSo9Cz0LXQudGW0L0g0YHQtdC30ZbQvdC1INCw0LvSk9Cw0L3Sk9CwINC00LXQudGW0L0g0LbSr9GA0LXQtNGWINC205nQvdC1INOZ0YDRliDSm9Cw0YDQsNC5INC+0YHRiyDQsdC10Lsg0LDQudC80LDSk9GL0L3Ri9KjINC70Y7QvNCx0LDQu9GM0LTRliDQttCw0LzQsdCw0YEg0LjRltC70YPRliDSm9Cw0LvRi9C/0YLQsNGB0LDQtNGLINC10LrQtdC9LtCW05nQvdC1INGB0L7So9KT0Ysg0L7RgdGLINKv0YjRltC90YjRliDQuNGW0LvRg9GWICDQsdCw0LvQsNC90YvSoyAyLTMg0LbQsNGB0YvQvdC00LAg0L7QvNGL0YDRgtKb0LDQvdGL0qMg0YLQvtGA0LDQutCw0LvRjNC00Ysg0LrQtdGD0LTQtSDQuNGW0LvRg9GWINC/0LDQudC00LAg0LHQvtC70LDQtNGLLiDQkdKx0Lsg0LrQtdC30LXSo9C00LUg0LHQsNC70LDQvdGL0qMg0LTQtdC90LXRgdGWINGC0ZbQuiDQsdGW0YAg0pvQsNC70YvQv9GC0LAg0LHQvtC70LDQtNGLLtCQ0LvSk9Cw0YjSm9GLINCx0rHQuyDQuNGW0LvRltC80LTQtdGAINGB05nQuyDQsdCw0Y/RgyDRgtKv0YDQtNC1INCx0LDRgdGC0LDQu9GL0L8g0pvQsNC70YvQv9GC0LDRgdCw0LTRiy7QodC10LHQtdCx0ZYg0LHQsNC70LDQu9Cw0LTRi9KjINKb0L7Qt9KT0LDQu9GL0YEg0LHQtdC70YHQtdC90LTRltC70ZbQs9GWINGI0LXQutGC0LXRg9C70ZYg0LHQvtC70LDQtNGLINC10LrQtdC9LtCR0ZbRgNCw0psg0YHQvtC90LTQsNC00LAg0YPQsNKb0YvRgiDTqdGC0LUg0LrQtdC70LUg0pvQvtC30pPQsNC70YMg0LzQtdC9INGC0rHRgNGD0LTRi9KjINC00LDQvNGD0Ysg0LDRgNCw0pvQsNGB0YvQvdC00LAg0L7QvNGL0YDRgtKb0LAg0LTQtdC90LXQvdGW0qMg0YTRg9C90LrRhtC40L7QvdCw0LvRjNC00Ysg0YLQsNC70LDQv9GC0LDRgNGLICDQvNC10L0g0pvQsNC70YvQv9GC0Ysg0pvQuNC80LDQu9C00LDQvdGD0YvSk9CwINCx0LXQudGW0LzQtNC10LvRltC/INC60LXRgtC10LTRliDQtNC10YHQtdC60YLQtSDQsdC+0LvQsNC00Ysu0J7RgdGL0LvQsNC50YjQsCDQsNC70pPQsNGI0pvRiyDQsdCw0LvQsNC90YvSoyDQvtC80YvRgNGC0pvQsCDQuNGW0LvRg9GWINC+0YHRi9C90LTQsNC5INGB0LDRgtGL0LvQsNGA0LTQsNC9INOp0YLQtdC00ZY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53" table:style-name="ce1">
            <text:p>1067053</text:p>
          </table:table-cell>
          <table:table-cell office:value-type="string" table:style-name="ce1">
            <text:p>kazakh</text:p>
          </table:table-cell>
          <table:table-cell office:value-type="string" table:style-name="ce1">
            <text:p>Билет 25.&amp;lt;br /&amp;gt; 1. 2 жастағы бала. Жедел риниттын белгілері ұзақ сақталғандықтан, ЛОР-дәргеріне жіберілген болжам диагнозы – жедел синусит. Бірақ ЛОР-дәргері бүл диагнозды қолдамады. Балаларда қандай анатомиялық ерекшеліктер, синуситтің дамуына кедергі еттеді.&amp;lt;br /&amp;gt; 2.Ерте жастағы балалардың омыртқа иілімнің қалыптасуы мерізімі.&amp;lt;br /&amp;gt;</text:p>
          </table:table-cell>
          <table:table-cell office:value-type="string" table:style-name="ce1">
            <text:p>0JHQsNC70LDQu9Cw0YDQtNCw0pPRiyDRgdC40L3Rg9GB0LjRgtGC0ZbSoyDQtNCw0LzRg9GL0L3QsCDQttC+0Lsg0LHQtdGA0LzQtdC50YLRltC9INCw0L3QsNGC0L7QvNC40Y/Qu9GL0psg0LbTmdC90LUg0YTQuNC30LjQvtC70L7Qs9C40Y/Qu9GL0psg0LXRgNC10LrRiNC10LvRltC60YLQtdGA0ZbQvdC1ICDRgtOp0LzQtdC90LTQtdCz0ZbQu9C10YAg0LbQsNGC0LDQtNGLLiDQn9Cw0YDQsNC90LDQt9Cw0LvQsNC70LTRiyDRgdC40L3Rg9GB0LjRgtGC0LXRgNC00ZbSoyDQtNCw0LzRg9GLLjxiciAvPg0K0JHQsNC70LDQu9Cw0YDQtNCw0pPRiyDRgdC40L3Rg9GB0LjRgtGC0LXRgNC00ZbSoyAg0L/QsNGA0LDQvdCw0LfQsNC70LDQu9C00YvSoyDQtNCw0LzRg9GLINC10YDQtdGB0LXQutGC0LXRgNCz0LUg0pvQsNGA0LDSk9Cw0L3QtNCwINOZ0LvRliDRgtC+0LvRi9KbINC20LXRgtGW0LvQvNC10LPQtdC9ICAyINC20LDRgdKb0LAg0LTQtdC50ZbQvSDQsdCw0LvQsNC90YvSoyDRhNGA0LDQvdGC0LDQu9C00Ysg0YHQuNC90YPRgdC40YLRgtCw0YDRiyDQttOZ0L3QtSAg06nQt9Cz0LXQtNC1INGB0LjQvdGD0YHQuNGC0YLQsNGAINOZ0LvRliDQtNKx0YDRi9GBINKb0LDQu9GL0L/RgtCw0YHQv9Cw0pPQsNC9INCx0L7Qu9GL0L8g0YLQsNCx0YvQu9Cw0LTRiy48YnIgLz4NCtCh0L7QvdC00YvSm9GC0LDQvSDRgdC40L3Rg9GB0LjRgtGC0LDRgNC00YvSoyDQtNCw0LzRg9GLINOp0YLQtSDRgdC40YDQtdC6INC60LXQt9C00LXRgdC10LTRliwzLTQg0LbQsNGB0pvQsCDQtNC10LnRltC9INGB0LjQvdGD0YHRgtCw0YDQtNGL0qMg0pvSsdGA0YvQu9GL0LzQtNCw0YDRiyDQttOZ0Lkg0pPQsNC90LAg0LTQsNC80YvQvyDQutC10LvQtdGC0ZbQvSDQsdC+0LvRi9C/INGC0LDQsdGL0LvQsNC00YsuPGJyIC8+DQrQodC+0L3QtNGL0pvRgtCw0L0g0LHQsNC70LDQu9Cw0YDQtNCwINGB0LjQvdGD0YHQuNGCINOp0YLQtSDRgdC40YDQtdC6INC205nQvdC1INC606nQsdGW0L3QtdGB0LUgINCx0LDRgdKb0LAg0LjQvdGE0LXQutGG0LjRj9C70YvSmyDQsNGD0YDRg9C70LDRgNC00LDQvSDQutC10LnRltC9INGC0YPRi9C90LTQsNC50LTRiy4gPGJyIC8+DQrQodC40L3Rg9GB0LDQu9C00Ysg06nRgtGW0LzRgdGW0LfQtNGW0LPRltC90LUuINCx0LDQu9Cw0LvQsNGA0LTQsCDRgdC40L3Rg9GB0YLQsNGA0pPQsCDRiNGL0pPQsNGC0YvQvSDQttC+0LvQtNCw0YAg06nRgtC1INC60LXSoyDQttOZ0L3QtSDQuNC90YTQtdC60YbQuNGP0pPQsCDSm9Cw0YDRgdGLINGC0rHRgNGDINKb0LDQsdGW0LvQtdGC0ZYg06nRgtC1INC20L7Sk9Cw0YDRiyDQsdC+0LvRi9C/INGC0LDQsdGL0LvQsNC00YsuINCR0rHQuyDQsdCw0LvQsNC70LDRgNC00LAg0YHQuNC90YPRgdC40YIg0LTQsNC80YPRi9C9INC80q/QvNC60ZbQvdC00ZbQuiDQsdC10YDQvNC10LnQtNGWLjxiciAvPg0K0LzSsdGA0YvQvSDSm9GD0YvRgdGL0L3Ri9KjINKb0rHRgNGL0LvRi9GB0YsuPGJyIC8+DQrQsdCw0LvQsNC70LDRgNC00LAg0LzSsdGA0YvQvSDSm9GD0YvRgdGLINGB0LDQu9GL0YHRgtGL0YDQvNCw0LvRiyDRgtKv0YDQtNC1INGC0LDRgCDQttOZ0L3QtSDQsNGD0LAg0LDSk9GL0YHRiyDRiNC10LrRgtC10YPQu9GWINCx0L7Qu9KT0LDQvdC00YvSm9GC0LDQvSzQvtC7INC40L3RhNC10LrRhtC40Y/Qu9Cw0YDQtNGL0L0g0YHQuNC90YPRgdGC0LDRgNKT0LAg0LbQtdGC0YPRltC90LUg0LrQtdC00LXRgNCz0ZYg0LbQsNGB0LDQudC00YsuPGJyIC8+DQrQmNC80YPQvdC00YvSmyDQttKv0LnQtdC90ZbSoyDQsdC10LvRgdC10L3QtNGW0LvRltCz0ZYu0JHQsNC70LDQu9Cw0YDQtNCwINC40LzRg9C90LTRi9KbINC20q/QudC1INOZ0LvRliDQtNKx0YDRi9GBINKb0LDQu9GL0L/RgtCw0YHQv9Cw0pPQsNC9INGB0L7Sk9Cw0L0g0pvQsNGA0LDQvNCw0Lkg0LjQvdGE0LXQutGG0LjRj9C80LXQvSDTqdGC0LUg0LbQsNKb0YHRiyDQutKv0YDQtdGB0LXQtNGWLtCR0rHQuyDQttCw0pPQtNCw0LnQtNCwINGB0LjQvdGD0YHQuNGC0ZbSoyDQtNCw0LzRg9GL0L3QsCDRgtC+0YHSm9Cw0YPRi9C7INCx0L7Qu9Cw0LTRiyDQttCw0pvRgdGLINC60q/RgNC10YHQtdC0LjxiciAvPg0KMi4g0JXRgNGC0LUg0LbQsNGB0YLQsNKT0Ysg0LHQsNC70LDQu9Cw0YDQtNCwINC+0LzRi9GA0YLSm9CwINC20L7RgtCw0YHRi9C90YvSoyDQuNGW0LvRg9GW0L3RltKjINKb0LDQu9GL0L/RgtCw0YHRg9GLLjxiciAvPg0K0JHQsNC70LDQu9Cw0YDQtNCwINC+0LzRi9GA0YLSm9CwINC20L7RgtCw0YHRi9C90YvSoyDQuNGW0LvRg9GWIDIg0LbQsNGB0pvQsCDQtNC10LnRltC9INKb0LDQu9GL0L/RgtCw0YHQsCDQsdCw0YHRgtCw0LnQtNGLLjxiciAvPg0K0LHRltGA0ZbQvdGI0ZYg0LHQvtC70YvQvyDQvNC+0LnRi9C9ICDQvtC80YvRgNGC0pvQsNGB0YvQvdGL0qMg0LjRltC70YPRliDRhtC10YDQstC40LrQsNC70LTRiyDQuNGW0LvRgyDSsdGB0YLQsNC50LTRiyzQvtC7INCx0LDQu9Cw0L3Ri9KjINCx0LDRgdGL0L0g0LrTqdGC0LXRgNGW0L8g0LDQudC90LDQu9GL0L8g0LHSsdGA0YvQu9GL0L8gINKb0LDRgNCw0YPRi9CdLNCw0LnQvdCw0LvQsNC90Ysg0LrTqdGA0YPRltC9ICDSm9Cw0LzRgtCw0LzQsNGB0YvQtyDQtdGC0LXQtNGWLiA8YnIgLz4NCtCV0L3QtNGW0LPRliDQvNOZ0YHQtdC70LUg0LHQsNC70LAg0LbSr9GA0LUg0LHQsNGB0YLQsNKT0LDQvdC00LAg0LHQtdC7INC+0LzRi9GA0YLSm9CwINC40ZbQu9GD0ZbQvSAg0LvRjtC80LHQsNC70LTRi9KbINC40ZbQu9GDICDQsdC+0LvRi9C/INGC0LDQsdGL0LvQsNC00YsuPGJyIC8+DQrQntC70LDRgCDQtNC10L3QtdC90ZYg0YLRltC6INKx0YHRgtCw0YPSk9CwLNC+0YLRi9GA0YPRi9C9INC60LjRltC9INC20q/RgNC1INCx0LDRgdGC0LDRg9GL0L3QsCDQvNC10qPQs9C10YDQs9C10L0g0LrQtdC30LTQtSDQv9Cw0LnQtNCwINCx0L7Qu9Cw0LTRiy4g0JbSr9GA0LPQtdC9INC60LXQt9C00LUg0L7QvNGL0YDRgtKb0LDQvdGL0qMg0LHQtdC7INCx06nQu9GW0LPRltC90LTQtSDQuNGW0LvRgyDSm9Cw0LvRi9C/0YLQsNGB0LDQtNGLLNGB0L7QvdGL0LzQtdC9ICDSm9Cw0YLQsNGAINKb0L7Qt9KT0LDQu9GL0YEg0LbSr9GA0ZbQvyDRgtKx0YDRgyAg0pvQvtC30pPQsNC70YvRgSDQsNGD0YDQu9GL0psgINC+0YDRgtCw0LvRi9KT0YvQvSDRgNC10YLRgtC10YPQs9C1INC606nQvNC10LrRgtC10YHQtdC00ZYuPGJyIC8+DQrQntGB0Ysg0LjRltC70YPQu9C10YDQtNGW0qMg0pvQsNC70YvQv9GC0LDRgdGD0Ysg0LHQsNC70LDQvdGL0qMg0LTQtdC90LXRgdGW0L3QtSAg0LbTmdC90LUg0pvQvtC30pPQsNC70YvRgSDQtNCw0pPQtNGL0LvQsNGA0YvQvdCwINCx0LDQudC70LDQvdGL0YHRgtGLLg==</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6" table:style-name="ce1">
            <text:p>915316</text:p>
          </table:table-cell>
          <table:table-cell office:value-type="string" table:style-name="ce1">
            <text:p>russian</text:p>
          </table:table-cell>
          <table:table-cell office:value-type="string" table:style-name="ce1">
            <text:p>Билет 25.&amp;lt;br /&amp;gt; 1.Какие анатомо-физиологические особенности обуславливают наличие пуэрильного дыхания у детей.&amp;lt;br /&amp;gt; 2.В какие сроки происходит формирование изгибов позвоночника у детей раннего возраста. &amp;lt;br /&amp;gt;</text:p>
          </table:table-cell>
          <table:table-cell office:value-type="string" table:style-name="ce1">
            <text:p>0J7RgtCy0LXRgiAxOiDQmNC30L3QsNGH0LDQu9GM0L3QviAsINGDINGA0LXQsdC10L3QutCwINC90LDQsdC70Y7QtNCw0LXRgtGB0Y8g0L7RgdC70LDQsdC70LXQvdC90L7QtSDQstC10LfQuNC60YPQu9GP0YDQvdC+0LUg0LTRi9GF0LDQvdC40LUg0LTQviA2INC80LXRgdGP0YbQtdCyICwg0LTQsNC70LXQtSDQtNC+IDYtNyAg0LvQtdGCINC+0L3QviDQt9Cw0LzQtdC90Y/QtdGC0YHRjyDQv9GD0Y3RgNC40LvRjNC90YvQvCDQtNGL0YXQsNC90LjQtdC8LiDQn9GD0Y3RgNC40LvRjNC90L7QtSDQtNGL0YXQsNC90LjQtSAtINGN0YLQviDQtNGL0YXQsNC90LjQtSwg0L/RgNC4INC60L7RgtC+0YDQvtC8INC00YvRhdCw0YLQtdC70YzQvdGL0LUg0YjRg9C80Ysg0YHRgtCw0L3QvtCy0Y/RgtGB0Y8g0LHQvtC70LXQtSDQt9Cy0YPRh9C90YvQvNC4KNCz0YDQvtC80LrQuNC80LgpINC4INC/0YDQvtC00L7Qu9C20LjRgtC10LvRjNC90YvQvNC4INCyINC+0LHQtdC40YUg0YTQsNC30LDRhSDQtNGL0YXQsNC90LjRjywg0YLQviDQtdGB0YLRjCwg0LrQsNC6INCyINGE0LDQt9C1INCy0LTQvtGF0LAsINGC0LDQuiDQuCDQsiDRhNCw0LfQtSDQstGL0LTQvtGF0LAuINCd0LDQsdC70Y7QtNCw0LXQvNC+0LUg0L/Rg9GN0YDQuNC70YzQvdC+0LUg0LTRi9GF0LDQvdC40LUg0L7QsdGD0YHQu9C+0LLQu9C10L3QviDRgNGP0LTQvtC8INCw0L3QsNGC0L7QvNC+LdGE0LjQt9C40L7Qu9C+0LPQuNGH0LXRgdC60LjRhSDQvtGB0L7QsdC10L3QvdC+0YHRgtC10Lkg0LPRgNGD0LTQvdC+0Lkg0LrQu9C10YLQutC4INC4INC+0YDQs9Cw0L3QvtCyINC00YvRhdCw0L3QuNGPINGDINC00LXRgtC10LkuINCY0YLQsNC6LCDQv9GA0LXQttC00LUg0LLRgdC10LPQviwg0LPRgNGD0LTQvdCw0Y8g0LrQu9C10YLQutCwINGDINGA0LXQsdC10L3QutCwINC80LXQvdGM0YjQuNGFINGA0LDQt9C80LXRgNC+0LIg0Lgg0Log0YLQvtC80YMg0LbQtSwg0LjQvNC10LXRgiDQsdC+0YfQutC+0L7QsdGA0LDQt9C90YPRjiDRhNC+0YDQvNGDLCDRgtC+INC10YHRgtGMINC/0LXRgNC10LTQvdC1LdC30LDQtNC90LjQuSDRgNCw0LfQvNC10YAg0YPQstC10LvQuNGH0LXQvSDQuCDRgNCw0LLQvdGP0LXRgtGPINC/0L7Qv9C10YDQtdGH0L3QvtC80YMg0YDQsNC30LzQtdGA0YMuINCY0LzQtdC90L3QviDRgtCw0LrQuNC1INC+0YHQvtCx0LXQvdC90L7RgdGC0Lgg0LPRgNGD0LTQvdC+0Lkg0LrQu9C10YLQutC4INC+0LHRg9GB0LvQsNCy0LvQuNCy0LDRjtGCINGC0L4sINGH0YLQviDQstC+INCy0YDQtdC80Y8g0LDRg9GB0LrRg9C70YzRgtCw0YbQuNC4INC70LXQs9C60LjRhSDRg9C00LDQtdGC0YHRjyDQstGL0YHQu9GD0YjQuNCy0LDRgtGMINGI0YPQvNGLLCDQutC+0YLQvtGA0YvQtSDRgtCw0LrQttC1INC/0L7RgdGC0YPQv9Cw0Y7RgiDQuCDQuNC3INCy0LXRgNGF0L3QuNGFINC00YvRhdCw0YLQtdC70YzQvdGL0YUg0L/Rg9GC0LXQuSwg0YLQsNC60LjRhSDQutCw0Log0LPQvtGA0YLQsNC90Ywg0Lgg0YLRgNCw0YXQtdGPLCAg0Log0YLQvtC80YMg0LbQtSwg0LjRgdGF0L7QtNGPINC40Lcg0Y3RgtC+0LPQviwg0LPQvtC70L7RgdC+0LLQsNGPINGJ0LXQu9GMINGA0LDRgdC/0L7Qu9Cw0LPQsNC10YLRgdGPINCx0LvQuNC20LUuINCh0LvQtdC00YPRjtGJ0LXQuSDQvtGB0L7QsdC10L3QvdC+0YHRgtGM0Y4g0Y/QstC70Y/QtdGC0YHRjyDRgtC+LCDRh9GC0L4g0YMg0LTQtdGC0LXQuSDQs9GA0YPQtNC90LDRjyDQutC70LXRgtC60LAg0LHQvtC70LXQtSDRjdC70LDRgdGC0LjRh9C90LAsINGC0L4g0LXRgdGC0YwsINCx0L7Qu9C10LUg0L/QvtC00LDRgtC70LjQstCwLCDRh9GC0L4g0L/RgNC40LLQvtC00LjRgiDQuiDQsdC+0LvRjNGI0LjQvCDRgNC10LfQvtC90LjRgNGD0Y7RidC40Lwg0YTQtdC90L7QvNC10L3QsNC8LCDQutC+0YLQvtGA0YvQtSDQuCDQvtCx0YPRgdC70LDQstC70LjQstCw0Y7RgiDQtNCw0L3QvdC+0LUg0Y/QstC70LXQvdC40LUuINCU0LDQu9C10LUsINGDINC00LXRgtC10Lkg0LHRgNC+0L3RhdC4INC40LzQtdGO0YIg0LzQtdC90YzRiNC40Lkg0LTQuNCw0LzQtdGC0YAsINC4INCx0L7Qu9GM0YjQtSDRgdGD0LbQtdC90Ysg0L7RgdC+0LHQtdC90L3QviDQv9C+0YHQu9C1IDE1INC00LXQu9C10L3QuNGPINC4INGB0LDQvNC4INC+0L3QuCDRj9Cy0LvRj9GO0YLRgdGPINCx0L7Qu9C10LUg0LrQvtGA0L7RgtC60LjQvNC4LCDQuNGB0YXQvtC00Y8g0LjQtyDRgtC+0LPQviwg0YfRgtC+INC00LjQsNC80LXRgtGAINC80LDQu9C10L3RjNC60LjQuSAtINCx0L7Qu9GM0YjQtSDRgdC+0L/RgNC+0YLQuNCy0LvQtdC90LjQtSwg0LHQvtC70YzRiNC1INGB0LrQvtGA0L7RgdGC0Ywg0Lgg0YHQvtC+0YLQstC10YLRgdGC0LLQtdC90L3QviDQsdC+0LvQtdC1INC30LLRg9GH0L3RiyDQtNGL0YXQsNGC0LXQu9GM0L3Ri9C1INGI0YPQvNGLLiDQmtGA0L7QvNC1INGC0L7Qs9C+LCDQutCw0Log0LjQt9Cy0LXRgdGC0L3Qviwg0YXQvtGC0Ywg0Lgg0YTQvtGA0LzQuNGA0L7QstCw0L3QuNC1INCw0LvRjNCy0LXQvtC7INC90LDRh9C40L3QsNC10YLRgdGPINGBINC80L7QvNC10L3RgtCwINGA0LDQt9Cy0LjRgtC40Y8g0LLQvdGD0YLRgNC4INGD0YLRgNC+0LHQuCDQvNCw0YLQtdGA0LgsINC90LDRh9C40L3QsNGPINGBIDYg0LzQtdGB0Y/RhtCwIC0g0LDQu9GM0LLQtdC+0LvRj9GA0L3Ri9C5INC/0LXRgNC40L7QtCwg0L3QviDRgtC10Lwg0L3QtSDQvNC10L3QtdC1LCDQtNCw0L3QvdGL0Lkg0L/RgNC+0YbQtdGB0YEg0Log0LzQvtC80LXQvdGC0YMg0YDQvtC20LTQtdC90LjRjyDQtdGJ0LUg0L3QtSDQt9Cw0LrQvtC90YfQtdC9LCDQuCDQv9GA0L7QtNC+0LvQttCw0LXRgtGB0Y8g0LTQviA4INC70LXRgiwg0YLQsNC6INC90LAg0LzQvtC80LXQvdGCINGA0L7QttC00LXQvdC40Y8g0LjRhSDQutC+0LvQuNGH0LXRgdGC0LLQviDQtNC+0YHRgtC40LPQsNC10YIgMjQg0LzQu9C9LCDQsNC60YLQuNCy0L3QviDRg9Cy0LXQu9C40YfQsNC10YLRgdGPINCyINC/0LXRgNCy0YvQtSAyINCz0L7QtNCwINC4INC00L7RgdGC0LjQs9Cw0LXRgiA2MCDQvNC70L0g0Lgg0YLQvtC70YzQutC+INC6IDgtOSDQs9C+0LTQsNC8INC00L7RgdGC0LjQs9Cw0LXRgiAzNzUg0LzQu9C9LCDRgtCw0LrQuNC8INC+0LHRgNCw0LfQvtC8LCDQvNC+0LbQvdC+INC/0YDQvtGB0LXQu9C00LjRgtGMINGH0LXRgtC60YPRjiDQstC30LDQuNC80L7RgdCy0Y/Qt9GMLCDQutC+0YLQvtGA0LDRjyDQv9C+0L/QsNC00LDQtdGCINC/0L7QtCDRgdGA0L7QutC4INC/0YDQvtC00L7Qu9C20LjRgtC10LvRjNC90L7RgdGC0Lgg0L/Rg9GN0YDQuNC70YzQvdC+0LPQviDQtNGL0YXQsNC90LjRjy4g0KLQviDQtdGB0YLRjCwg0YLQsNC6INC60LDQuiDQsNC70YzQstC10L7QuyDQvNCw0LvQviAtINC80LXQvdGM0YjQtSDRgdC70YvRiNC90L4g0LLQtdC30LjQutGD0LvRj9GA0L3QvtC1INC00YvRhdCw0L3QuNC1LCDQuCDQsiDQsdC+0LvRjNGI0LUg0YHRgtC10L/QtdC90Lgg0YHQu9GL0YjQvdC+INGBINCx0YDQvtC90YXQvtCyLCDQutC+0YLQvtGA0YvQtSDRgtCw0LrQttC1INC40LzQtdGO0YIg0L7RgdC+0LHQtdC90L3QvtGB0YLQuCwg0Lgg0L/QvtGN0YLQvtC80YMgINCx0L7Qu9C10LUg0LfQstGD0YfQvdC+0LUg0LTRi9GF0LDQvdC40LUuINCi0LDQutC20LUsINGB0YDQtdC00Lgg0L7RgdC+0LHQtdC90L3QvtGB0YLQtdC5INC80L7QttC90L4g0LLRi9C00LXQu9C40YLRjCDQsdC+0LvRjNGI0LXQtSDQutC+0LvQuNGH0LXRgdGB0YLQstC+INC40L3RgtC10YDRgdGC0LjRhtC40LDQu9GM0L3QvtC5INGC0LrQsNC90Lgg0YMg0LTQtdGC0LXQuSDQsiDQv9Cw0YDQtdC90YXQuNC80LUsINGH0YLQviDQsiDRhtC10LvQvtC8INGD0LzQtdC90YzRiNCw0LXRgiDQstC+0LfQtNGD0YjQvdC+0YHRgtGMLiAgICAg0J7RgtCy0LXRgiAyIDog0KMg0LTQtdGC0LXQuSDRgNCw0L3QvdC10LPQviDQstC+0LfRgNCw0YHRgtCwINC/0YDQvtC40YHRhdC+0LTQuNGCINGE0L7RgNC80LjRgNC+0LLQsNC90LjQtSDQuNC30LPQuNCx0L7QsiDQv9C+0LfQstC+0L3QvtGH0L3QuNC60LAg0L/QviDQvNC10YDQtSDQsNC00LDQv9GC0LDRhtC40Lgg0Log0L3QvtCy0YvQvCDQtNCy0LjQs9Cw0YLQtdC70YzQvdGL0Lwg0YHQv9C+0YHQvtCx0L3QvtGB0YLRj9C8LCDRgtC+INC10YHRgtGMINC6INGB0LjQtNC10L3QuNGOLCDQv9C+0LvQt9Cw0L3QuNGOLCDRgdGC0L7Rj9C90LjRjiAsINGF0L7QtNGM0LHQtS4g0JjQt9C90LDRh9Cw0LvRjNC90L4g0LbQtSwg0L/QvtC30LLQvtC90L7Rh9C90YvQuSDRgdGC0L7Qu9CxINGDINGA0LXQsdC10L3QutCwINGP0LLQu9GP0LXRgtGB0Y8g0L/RgNCw0LrRgtC40YfQtdGB0LrQuCDQv9GA0Y/QvNGL0LwuINCY0YLQsNC6LCAxLtCo0LXQudC90YvQuSDQu9C+0YDQtNC+0LcgLSDRhNC+0YDQvNC40YDRg9C10YLRgdGPINCyINCy0L7Qt9GA0LDRgdGC0LUgMyDQvNC10YHRj9GG0LXQsi4g0J7QvSDQvtCx0YPRgdC70L7QstC70LXQvSDRgtC10LwsINGH0YLQviDQuNC80LXQvdC90L4g0LIg0Y3RgtC+0YIg0L/QtdGA0LjQvtC0INGA0LXQsdC10L3QvtC6INC90LDRh9C40L3QsNC10YIg0LTQtdGA0LbQsNGC0Ywg0LPQvtC70L7QstGDLCDRgtC+INC10YHRgtGMINCyINGN0YLQviDQstGA0LXQvNGPINC60L7RgdGC0L3Ri9C1INGB0YLRgNGD0YLQutGD0YDRiywg0Lgg0LIg0LHQvtC70YzRiNC10Lkg0YHRgtC10L/QtdC90Lgg0LzRi9GI0YbRiyDRg9C20LUg0LPQvtGC0L7QstGLINC6INGC0L7QvNGDLCDRh9GC0L7QsdGLINGD0LTQtdGA0LbQuNCy0LDRgtGMINCz0L7Qu9C+0LLRgywg0YfRgtC+INCy0L7Qt9C70LDQs9Cw0LXRgiDRg9C20LUg0LHQvtC70YzRiNGD0Y4g0L3QsNCz0YDRg9C30LrRgyDQvdCwINGI0LXQudC90YvQuSDQvtGC0LTQtdC7LCDQuCDQv9GA0LjQstC+0LTQuNGCINC6INGE0L7RgNC40YDQvtCy0LDQvdC40Y4g0YjQtdC50L3QvtCz0L4g0LvQvtGA0LTQvtC30LAsINGH0YLQviDQvdC10L7QsdGF0L7QtNC40LzQviDQtNC70Y8g0LLQtdGA0YLQuNC60LDQu9GM0L3QvtCz0L4g0L/QvtC70L7QttC10L3QuNGPINCz0L7Qu9C+0LLRiy4gIDIuINCT0YDRg9C00L3QvtC5INC60LjRhNC+0LcgLSDRhNC+0YDQvNC40YDRg9C10YLRgdGPINCyINCy0L7Qt9GA0LDRgdGC0LUgNS02INC80LXRgdGP0YbQtdCyLCDQuCDRgdCy0Y/Qt9Cw0L0g0YEg0YPRgdCy0L7QtdC90LjQtdC8INGC0LDQutC+0LPQviDQtNCy0LjQs9Cw0YLQtdC70YzQvdC+0LPQviDQvdCw0LLRi9C60LAsINC60LDQuiDRgdC/0L7RgdC+0LHQvdC+0YHRgtGMINGB0LjQtNC10YLRjC4g0KLQviDQtdGB0YLRjCwg0LrQvtCz0LTQsCDRgNC10LHQtdC90L7QuiDRgdC40LTQuNGCLCDQstC+0LfQu9Cw0LPQsNC10YLRgdGPINC90LDQs9GA0YPQt9C60LAg0L3QsCDQs9GA0YPQtNC90L7QuSDQvtGC0LTQtdC7LCDQt9CwINGB0YfQtdGCINGC0L7Qs9C+LCDRh9GC0L4g0L7RgNCz0LDQvdGLINCx0YDRjtGI0L3QvtC5INC/0L7Qu9C+0YHRgtC4INC00LDQstGP0YIg0L3QsCDQtNC40LDRhNGA0LDQs9C80YMsINCwINC00LDQvdC90L7QtSDQtNCw0LLQu9C10L3QuNC1INC/0LXRgNC10LTQsNC10YLRgdGPINC90LAg0LPRgNGD0LTQvdC+0Lkg0L7RgtC10LsgLdGD0LLQtdC70LjRh9C40LLQsNC10YLRgdGPINC00LDQstC70LXQvdC40LUg0LIg0LPRgNGD0LTQvdC+0Lkg0LrQu9C10YLQutC1ICwg0YfRgtC+INC4INCy0YvQt9GL0LLQsNC10YIg0L/QvtCy0YvRiNC10L3QuNC1INC90LDQs9GA0YPQt9C60Lgg0L3QsCDQv9C+0LfQstC+0L3QvtGH0L3Ri9C5INGB0YLQvtC70LEg0LTQsNC90L3QvtCz0L4gINC+0YLQtNC10LvQsCDQuCDRgNCw0LfQstC40YLQuNC1INC60LjRhNC+0LfQsC4gMy4g0J/QvtGP0YHQvdC40YfQvdGL0Lkg0LvQvtGA0LTQvtC3IC0g0YHQstGP0LfQsNC9INGBINGA0LDQt9Cy0LjRgtC40LXQvCDRgdC/0L7RgdC+0LHQvdC+0YHRgtC4INGD0LbQtSDRgdGC0L7QudC60L4g0YHRgtC+0Y/RgtGMINC4INCyINCx0L7Qu9GM0YjQtdC5INGB0YLQtdC/0LXQvdC4INGF0L7QtNC40YLRjCAtINC90LDRh9C40L3QsNGPINCyIDctOCDQvNC10YHRj9GG0LXQsi4g0JIg0LTQsNC90L3QvtC8INC/0LXRgNC40L7QtNC1INC+0LTQvdC+0LLRgNC10LzQtdC90L3QviDRgSDQv9C+0Y/RgdC90LjRh9C90YvQvCDQu9C+0YDQtNC+0LfQvtC8INGA0LDQt9Cy0LjQstCw0LXRgtGB0Y8g0Lgg0LrRgNC10YHRgtGG0L7QstGL0Lkg0LrQuNGE0L7QtyAtINCyINC+0YHQvdC+0LLQtSDRgNCw0LfQstC40YLQuNGPINC60L7RgtC+0YDRi9GFINGC0LDQutC20LUg0Y/QstC70Y/QtdGC0YHRjyDQv9C+0LvRg9GH0LXQvdC40LUg0LHQvtC70YzRiNC10Lkg0YHRgtCw0LHQuNC70YzQvdC+0YHRgtC4INCyINC80YvRiNGG0LDRhSDRgdC/0LjQvdGLINC4INC20LjQstC+0YLQsCwg0LAg0LjRgdGF0L7QtNGPINC40Lcg0Y3RgtC+0LPQviDRg9Cy0LXQu9C40YfQtdC90LjQtSDQvdCw0LPRgNGD0LfQutC4INC90LAgINC00LDQvdC90YvQuSDQvtGC0LTQtdC70YsgLS0tINGE0L7RgNC80LjRgNC+0LLQsNC90LjQtSDQuNC30LPQuNCx0L7QsiAsINC60L7RgtC+0YDRi9C1INC90LXQvtCx0YXQvtC00LjQvNGLINC00LvRjyDRg9C70LDQstC70LjQstCw0L3QuNGPINC4INC/0L7QtNC00LXRgNC20LDQvdC40Y8g0YDQsNCy0L3QvtCy0LXRgdC40Y8gLCDRh9GC0L4g0L3QtdC+0LHRhdC+0LTQuNC80L4g0LTQu9GPINC/0YDQsNCy0LjQu9GM0L3QvtC5INGF0L7QtNGM0LHRiy4g0KLQsNC60LjQvCDQvtCx0YDQsNC30L7QvCwg0LLRgdC1INC40LfQs9C40LHRiyDQv9C+0LfQstC+0L3QvtGH0L3QuNC60LAgLSDRgdC70LXQtNGB0YLQstC40LUg0L/QvtGB0LvQtdC00L7QstCw0YLQtdC70YzQvdC+0LPQviDRg9C60YDQtdC/0LvQtdC90LjRjyDQvNGL0YjRhiwg0YPQstC10LvQuNGH0LXQvdC90L7QuSDQvdCw0LPRgNGD0LfQutC4INC90LAg0YHQvtC+0YLQstC10YLRgdGC0LLRg9GO0YnQuNC1INC+0YLQtNC10LvRiyDQsiDRhdC+0LTQtSDRg9GB0LLQvtC10L3QuNGPINC90L7QstGL0YUg0LTQstC40LPQsNGC0LXQu9GM0L3Ri9GFINGB0L/QvtGB0L7QsdC90L7RgdGC0LXQuS4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грудной кифоз сроки 6-8 мес, поясничный лордоз 6-7 мес, крестцовый кифоз 10-11 меся, когда начинает ходить.</text:p>
          </table:table-cell>
          <table:table-cell office:value-type="float" office:value="0" table:style-name="ce1">
            <text:p>0</text:p>
          </table:table-cell>
          <table:table-cell table:number-columns-repeated="16376"/>
        </table:table-row>
        <table:table-row table:style-name="ro1">
          <table:table-cell office:value-type="float" office:value="1066971" table:style-name="ce1">
            <text:p>1066971</text:p>
          </table:table-cell>
          <table:table-cell office:value-type="string" table:style-name="ce1">
            <text:p>russian</text:p>
          </table:table-cell>
          <table:table-cell office:value-type="string" table:style-name="ce1">
            <text:p>Билет 25.&amp;lt;br /&amp;gt; 1.Какие анатомо-физиологические особенности обуславливают наличие пуэрильного дыхания у детей.&amp;lt;br /&amp;gt; 2.В какие сроки происходит формирование изгибов позвоночника у детей раннего возраста. &amp;lt;br /&amp;gt;</text:p>
          </table:table-cell>
          <table:table-cell office:value-type="string" table:style-name="ce1">
            <text:p>0J3QuNC20LUg0L/RgNC40LLQtdC00YMg0L7RgdC+0LHQtdC90L3QvtGB0YLQuCDQutC+0YLQvtGA0YvQtSDQvtCx0YPRgdC70LDQstC70LjQstCw0Y7RgiDQvdCw0LvQuNGH0LjQtSDQs9GA0L7QvNC60L7Qs9C+INCy0LXQt9C40LrRg9C70Y/RgNC90L7Qs9C+INC00YvRhdCw0L3QuNGPINGC0L4g0LXRgdGC0Ywg0L/Rg9GN0YDQuNC70YzQvdC+0LPQviwg0YMg0LTQtdGC0LXQuS4g0JrQsNC6INC80Ysg0LfQvdCw0LXQvCDRgyDRgNC10LHQtdC90LrQsCDQs9GA0YPQtNC90LDRjyDQutC70LXRgtC60LAg0LzQsNC70LXQvdGM0LrQuNGFINGA0LDQt9C80LXRgNC+0LIg0LIg0L7RgtC70LjRh9C40LUg0L7RgiDQstC30YDQvtGB0LvRi9GFLCDQuCDQv9C+0Y3RgtC+0LzRgyDQs9C+0LvQvtGB0L7QstCw0Y8g0YnQtdC70Ywg0YDQsNGB0L/QvtC70LDQs9Cw0LXRgtGB0Y8g0LHQu9C40LfQutC+INC6INC80LXRgdGC0YMg0LDRg9GB0LrRg9C70YzRgtCw0YbQuCAg0YfRgtC+INCyINGB0LvQtdC00YHRgtCy0LjQuCDQv9GA0LjQstC+0LTQuNGCINC6INGH0LDRgdGC0LjRh9C90L7QvNGDINCy0YvRgdC70YPRiNC40LLQsNC90LjRjiDQtNGL0YXQsNGC0LXQu9GM0L3Ri9GFINGI0YPQvNC+0LIg0LPQvtGA0YLQsNC90LguINCi0LDQutC20LUg0YPQt9C60LjQuSDQv9GA0L7RgdGB0LLQtdGCINCx0YDQvtC90YXQvtCyLiDQkdC+0LvRjNGI0LDRjyDRjdC70LDRgdGC0LjRh9C90L7RgdGC0YIg0Lgg0LzQsNC70LDRjyDRgtC+0LvRidC40L3QsCDRgdGC0LXQvdC60Lgg0LPRgNGD0LTQvdC+0Lgg0LrQu9C10YLQutC4LiDQkdC+0LvRjNGI0LDRjyDQv9C+0LTQstC40LbQvdC+0YHRgtGCINCz0YDRg9C00L3QvtC5INC60LvQtdGC0LrQuC4g0J3QtdC00L7RgNCw0LfQstC40YLQvtGB0YLRjCDQsNC70YzQstC10L7Qu9GP0YDQvdC+0Lkg0YLQutCw0L3QuCDQsCDRgtCw0LrQttC1INGB0YPRgNGE0LDQutGC0LDQvdGC0LAuICDQl9C90LDRh9C40YLQtdC70YzQvdC+0LUg0YDQsNC30LLQuNGC0LjQtSDQuNC90YLQtdGA0YHRgtC40YbQuNCw0LvRjNC90L7QuCDRgtC60LDQvdC4INC60L7RgtC+0YDQsNGPINGB0L/QvtGB0L7QsdGB0YLQstGD0LXRgiDRg9C80LXQvdGM0YjQtdC90LjRjiDQstC+0LfQtNGD0YjQvdC+0YHRgtC4INC70LXQs9C+0YfQvdC+0Lkg0YLQutCw0L3QuC4g0J/QvtGB0LvQtSA2LTcg0LvQtdGCINGF0LDRgNCw0LrRgtC10YAg0LTRi9GF0LDQvdC40Y8g0L/QvtGB0YLQtdC/0LXQvdC90L4g0L/QtdGA0LXRhdC+0LTQuNGCINCyINCy0LXQt9C40LrRg9C70Y/RgNC90L7QtS4gPGJyIC8+DQo8YnIgLz4NCtCf0L7Qt9Cy0L7QvdC+0YfQvdC40Log0YMg0L3QvtCy0L7RgNC+0LbQtNC10L3QvdC+0LPQviDQuNC80LXQtdGCINCy0LjQtCDQtNGD0LPQuCDQutC+0YLQvtGA0LDRjyDQv9GA0LjRhdC+0LTQuNGC0YHRjyDRgdC70LXQs9C60LAg0LLQvtCz0L3Rg9GC0L7QuSDRgdC/0LXRgNC10LTQuCAuINCk0L7RgNC80LjRgNC+0LLQsNC90LjQtSDQuNC30LPQuNCx0L7QsiDQv9C+0LfQstC+0L3QvtGH0L3QuNC60LAg0L3QsNGH0LjQvdCw0LXRgtGB0Y8g0YEgMi3Rg9GFIDMt0LXRhSDQvNC10YHRj9GG0LXQsi4g0KjQtdC50L3Ri9C4INC70L7RgNC00L7QtyDRhNC+0YDQvNC40YDRg9C10YLRgdGPINGBIDMt0YzQtdCz0L4g0LzQtdGB0Y/RhtCwINC60L7Qs9C00LAg0YDQtdCx0LXQvdC+0Log0LLQv9C10YDQstGL0LUg0YHQsNC80L7RgdGC0L7Rj9GC0LXQu9GM0L3QviDQvdCw0YfQuNC90LDQtdGCINC00LXRgNC20LDRgtGMINCz0L7Qu9C+0LLRgy4g0JrQuNGE0L7QtyDQs9GA0YPQtNC90L7QuSDRh9Cw0YHRgtC4INGE0L7RgNC80LjRgNGD0LXRgtGB0Y8g0LIg0L/RgNC+0LzQtdC20YPRgtC60LUg0LLRgNC10LzQtdC90Lgg0L7RgiA1LTYg0LzQtdGB0Y/RhtC10LIg0LrQvtCz0LTQsCDRgNC10LHRkdC90L7QuiDQvdCw0YfQuNC90LDQtdGCINC/0L7RgtC40YXQvtC90YzQutGDINGB0LjQtNC10YLRjC4g0J/QvtGP0YHQvdC40YfQvdGL0Lkg0LvQvtGA0LTQvtC3INC90LDRh9C40L3QsNC10YIg0YTQvtGA0LzQuNGA0L7QstCw0YLRjNGB0Y8g0LIgNy04INC80LXRgdGP0YbQtdCyINC60L7Qs9C00LAg0YDQtdCx0LXQvdC+0Log0YPQttC1INC90LDRh9C40L3QsNC10YIg0L/QvtGC0LjRhdC+0L3RjNC60YMg0LLRgdGC0LDQstCw0YLRjC4g0JrQvtC80L/QtdC90YHQsNGC0L7RgNC90L4g0YEg0L/QvtGP0YHQvdC40YfQvdGL0Lwg0LjQt9Cz0LjQsdC+0Lwg0YTQvtGA0LzQuNGA0YPQtdGC0YHRjyDQuCDQutGA0LXRgdGC0YbQvtCy0YvQuSDQutC40YTQvtC3ICA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согласно лиги честности оценка снижена на 5%</text:p>
          </table:table-cell>
          <table:table-cell office:value-type="float" office:value="5" table:style-name="ce1">
            <text:p>5</text:p>
          </table:table-cell>
          <table:table-cell table:number-columns-repeated="16376"/>
        </table:table-row>
        <table:table-row table:style-name="ro1">
          <table:table-cell office:value-type="float" office:value="1067027" table:style-name="ce1">
            <text:p>1067027</text:p>
          </table:table-cell>
          <table:table-cell office:value-type="string" table:style-name="ce1">
            <text:p>russian</text:p>
          </table:table-cell>
          <table:table-cell office:value-type="string" table:style-name="ce1">
            <text:p>Билет 25.&amp;lt;br /&amp;gt; 1.Какие анатомо-физиологические особенности обуславливают наличие пуэрильного дыхания у детей.&amp;lt;br /&amp;gt; 2.В какие сроки происходит формирование изгибов позвоночника у детей раннего возраста. &amp;lt;br /&amp;gt;</text:p>
          </table:table-cell>
          <table:table-cell office:value-type="string" table:style-name="ce1">
            <text:p>MS7Qn9GD0Y3RgNC40LvRjNC90L7QtSDQtNGL0YXQsNC90LjQtSDRgyDQtNC10YLQtdC5LSDRjdGC0L4g0LTRi9GF0LDQvdC40LUg0LLRi9GB0LvRg9GI0LjQstCw0LXQvNC+0LUg0L/RgNC4INCw0YPRgdC60YPQu9GM0YLQsNGG0LjQuCDQvdC10L/QvtGB0YDQtdC00YHRgtCy0LXQvdC90L4g0LTQtdGC0LXQuS4g0JXQs9C+INGF0LDRgNCw0LrRgtC10YDQuNGB0YLQuNC60LAt0Y3RgtC+INCy0LXQt9C40LrRg9C70Y/RgNC90L7QtSwg0YPRgdC40LvQtdC90L3QvtC1INC00YvRhdCw0L3QuNC1ICzRhdCw0YDQsNC60YLQtdGA0L3QvtC1INC00LvRjyDQtNC10YLQtdC5INCyINCy0L7Qt9GA0LDRgdGC0LUg0L7RgiA2INC80LXRgdGP0YbQtdCyINGC0L4g0LXRgdGC0Ywg0L3QvtCy0L7RgNC+0LbQtNC10L3QvdC+0LPQviDRgNC10LHQtdC90LrQsCAg0LTQviAg0L/RgNC40LzQtdGA0L3QviA1LTcg0LvQtdGCLiDQlNGL0YXQsNC90LjQtSDQt9Cy0YPRh9C40YIg0L/RgNC+0LTQvtC70LbQuNGC0LXQu9GM0L3QtdC1LCDQs9GA0L7QvNGH0LUs0LLRi9GA0LDQttC10L3QvdC10LUg0Lgg0YDQtdC30YfQtSAsINC+0YHQvtCx0LXQvdC90L4g0LIg0L7QsdC1INGE0LDQt9GLINC00YvRhdCw0L3QuNGPIC0g0YLQviDQtdGB0YLRjCDQuCDQv9GA0Lgg0LLQtNC+0YXQtSDQuCDQv9GA0Lgg0LLRi9C00L7RhdC1LiDQn9GA0LjRh9C40L3RiyAg0L/QvtGP0LLQu9C10L3QuNGPINGC0LDQutC+0LPQviDQtNGL0YXQsNC90LjRjyDRgdCy0Y/Qt9Cw0L3RiyDRgSDQsNC90LDRgtC+0LzQvi3RhNC40LfQuNC+0LvQvtCz0LjRh9C10YHQutC40LzQuCDQvtGB0L7QsdC10L3QvdC+0YHRgtGP0LzQuCDQtNC10YLQtdC5INGN0YLQvtCz0L4g0LLQvtC30YDQsNGB0YLQsCAuINCe0YHQvtCx0LXQvdC90L7RgdGC0Lgg0YHQu9C10LTRg9GO0YnQuNC1LSDQv9GA0LXQstC+0LUg0Y3RgtC+INGA0LDRgdGB0YLQvtGP0L3QuNC1INC+0YIg0LPQvtC70L7RgdC+0LLQvtC5INGJ0LXQu9C4INC00L4g0LPRgNGD0LTQvdC+0Lkg0YHRgtC10L3QutC4INC60L7RgNC+0YLQutC+0LUgLSDRgtCw0LrQuNC8INC+0LHRgNCw0LfQvtC8INC30LLRg9C60Lgg0LjQtyDQstC10YDRhdC90LjRhSAg0LTRi9GF0LDRgtC10LvRjNC90YvRhSDQv9GD0YLQtdC5INC/0YDQsNC60YLQuNGH0LXRgdC60Lgg0LHQtdC3INC40YHQutCw0LbQtdC90LjRjyAg0L/QtdGA0LXQtNCw0Y7RgtGB0Y8gINC6INC80LXRgdGC0YMg0LDRg9GB0LrRg9C70YzRgtCw0YbQuNC4LSDQstGL0YHQu9GD0YjQuNCy0LDQvdC40Y8uINCX0LDRgtC10Lwg0LPRgNGD0LTQvdCw0Y8g0YHRgtC10L3QutCwINC00LXRgtC10Lkg0YLQvtC90LrQsNGPINC4INGN0LvQu9Cw0YHRgtC40YfQvdCw0Y8gLSDRjdGC0L4g0YPRgdC40LvQuNCy0LDQtdGCINCy0LjQsdGA0LDRhtC40Lgg0Lgg0L/RgNC+0LLQvtC00LjQvNC+0YHRgtGMINC30LLRg9C60L7Qsi7QodC70LXQtNGD0Y7RidCw0Y8g0L7RgdC+0LHQtdC90L7RgdGC0YwtINGN0YLQviDQvdC10LTQvtGB0YLQsNGC0L7Rh9C90LDRjyDQstC+0LfQtNGD0YjQvdC+0YHRgtGMINC70LXQs9C+0YfQvdC+0Lkg0YLQutCw0L3QuCAg0LTQtdGC0LXQuSDQuNC3LdC30LAg0YDQsNC30LLQuNGC0L7QuSDQuNC90YLQtdGA0YHRgtC40YbQuNCw0LvRjNC90L7QuSDRgtC60LDQvdC4LCDRh9GC0L4g0YLQsNC6INC20LUg0LTQtdC70LDQtdGCINC00YvRhdCw0YLQtdC70YzQvdGL0LUg0YjRg9C80Ysg0LHQvtC70LXQtSDQstGL0YDQsNC20LXQvdC90YvQvNC4INC4INGD0YHQuNC70LXQvdC90YvQvNC4LiDQoyDQvdC+0LLQvtGA0L7QttC00LXQvdC90YvRhSDQtNC10YLQvtC6INC00L4gIDYg0LzQtdGB0Y/RhtC10LIg0LTRi9GF0LDQvdC40LUg0LzQvtC20LXRgiDQsdGL0YLRjCDQvtGB0LvQsNCx0LvQtdC90L3Ri9C8LCAg0L/QviDQv9GA0LjRh9C40L3QtSDRgdC70LDQsdC+0Lkg0Y3QutGB0LrRg9GA0YHQuNC4INCz0YDRg9C00L3QvtC5INC60LvQtdGC0LrQuC4g0KMg0LTQtdGC0LXQuSDQv9C+0YHQu9C1IDcg0LvQtdGCINC00YvRhdCw0L3QuNC1INGB0YLQsNC90L7QstC40YLRgdGPINGC0LjQv9C40YfQvdC+INCy0LXQt9C40LrRg9C70Y/RgNC90YvQvCAsINGC0L4g0LXRgdGC0Ywg0LrQsNC6INGDINCy0LfRgNC+0YHQu9GL0YUuIDIuINCk0L7RgNC80LjRgNC+0LLQsNC90LjQtSDRhNC40LfQuNC+0LvQvtCz0LjRh9C10YHQutC40YUg0LjQt9Cz0LjQsdC+0LIg0L/QvtC30LLQvtC90L7Rh9C90LjQutCwINGDINC00LXRgtC10Lkg0L/RgNC10LTRgdGC0LDQstC70Y/QtdGCINGB0L7QsdC+0Lkg0L7Rh9C10L3RjCDQstCw0LbQvdGL0Lkg0Y3RgtCw0L8g0LIg0YDQsNC30LLQuNGC0LjQuCDQvtC/0L7RgNC90L4t0LTQstC40LPQsNGC0LXQu9GM0L3QvtC5INGB0LjRgdGC0LXQvNGLINC+0YDQs9Cw0L3QuNC30LzQsC4gINCi0LDQuiDQutCw0Log0Y3RgtC+INC+0LHQtdGB0L/QtdGH0LjQstCw0LXRgiDRgNCw0LLQvdC+0LzQtdGA0L3QvtC1INGA0LDRgdC/0YDQtdC00LXQu9C10L3QuNC1ICDQvdCw0LPRgNGD0LfQutC4INC4INGD0YHRgtC+0LnRh9C40LLQvtGB0YLRjCAg0YLQtdC70LAg0LIg0LLQtdGA0YLQuNC60LDQu9GM0L3QvtC8INC/0L7Qu9C+0LbQtdC90LjQuCAsINGH0YLQviDQvtGH0LXQvdGMINCy0LDQttC90L4g0LIg0LHRg9C00YPRidC10LwuINCjINC90L7QstC+0YDQvtC20LTQtdC90L3QvtCz0L4g0YDQtdCx0LXQvdC60LAg0L/QvtC30LLQvtC90L7Rh9C90LjQuiDQuNC80LXQtdGCIFMt0L7QsdGA0LDQt9C90YPRjiDRhNC+0YDQvNGDICwg0LrQvtGC0L7RgNCw0Y8g0LLQvtCz0L3Rg9GC0LAg0LLQv9C10YDQtdC0LdGN0YLQviDQvdC+0YHQuNGCINC90LDQt9Cy0LDQvdC40LUg0YLQvtGC0LDQu9GM0L3Ri9C5INC60LjRhNC+0LcuINCU0LDQu9C10LUg0YTQuNC30LjQvtC70L7Qs9C40YfQtdGB0LrQuNC1INC40LfQs9C40LHRiyAg0L3QsNGH0LjQvdCw0Y7RgiDRhNC+0YDQvNC40YDQvtCy0LDRgtGM0YHRjyDQv9C+INC80LXRgNC1INGA0L7RgdGC0LAg0YDQtdCx0LXQvdC60LAg0LggINC10LPQviDQtNCy0LjQs9Cw0YLQtdC70YzQvdC+0Lkg0LDQutGC0LjQstC90L7RgdGC0LgtINC+0L0g0L3QsNGH0LjQvdCw0LXRgiDQv9C+0LLQvtGA0LDRh9C40LLQsNGC0Ywg0LPQvtC70L7QstGDLCDQv9C+0LTQvdC40LzQsNGC0Ywg0LPQvtC70L7QstGDLCDQt9Cw0YLQtdC8INGB0LDQtNC40YLRgdGPLCDQstGB0YLQsNCy0LDRgtGMLNGF0L7QtNC40YLRjCAs0LHQtdCz0LDRgtGMLiAg0KjQtdC50L3Ri9C5INC70L7RgNC00L7QtyDRhdCw0YDQsNC60YLQtdGA0LjQt9GD0LXRgtGB0Y8g0LLRi9C/0YPQutC70L7RgdGC0YzRjiDQstC/0LXRgNC10LQgLSDRjdGC0L7RgiDQuNC30LPQuNCxINGE0L7RgNC80LjRgNGD0LXRgtGB0Y8gINC/0YDQuNC80LXRgNC90L4g0LIgMy00INC80LXRgdGP0YbQsCAgLCDQsiDRgtC+INCy0YDQtdC80Y8g0LrQvtCz0LTQsCDRgNC10LHQtdC90L7QuiDQvdCw0YfQuNC90LDQtdGCINC00LXRgNC20LDRgtGMINCz0L7Qu9C+0LLRgy4g0JPRgNGD0LTQvdC+0Lkg0LrQuNGE0L7Qty3RhdCw0YDQsNC60YLQtdGA0LjQt9GD0LXRgtGB0Y8g0LLQvtCz0L3Rg9GC0L7RgdGC0YzRjiDQvdCw0LfQsNC0INGE0L7RgNC80LjRgNGD0LXRgtGB0Y8g0LIgNS02INC80LXRgdGP0YbQtdCyICAsINCyINGC0L4g0LLRgNC10LzRjyDQutC+0LPQtNCwINGA0LXQsdC10L3QvtC6INC90LDRh9C40L3QsNC10YIg0YHQuNC00LXRgtGMLiDQn9C+0Y/RgdC90LjRh9C90YvQuSDQu9C+0YDQtNC+0LctINGE0L7RgNC80LjRgNGD0LXRgtGB0Y8gINC/0YDQuNCx0LvQuNC30LjRgtC10LvRjNC90L4g0LIgNi04INC80LXRgdGP0YbQtdCyICwg0LIg0YLQviDQstGA0LXQvNGPLCDQutC+0LPQtNCwINGA0LXQsdC10L3QvtC6INCy0YHRgtCw0LXRgiDQvdCwINC90L7QttC60Lgg0Lgg0L3QsNGH0LjQvdCw0LXRgiDRhdC+0LTQuNGC0YwuICDQmCDQutGA0LXRgdGC0YbQvtCy0YvQuSDQutC40YTQvtC3LSDQv9C+0YHQu9C10LTQvdC40Lwg0LfQsNC60YDQtdC/0LvRj9C10YLRgdGPINC6IDMtNSDQs9C+0LTQsNC8INC20LjQt9C90Lgg0YDQtdCx0LXQvdC60LAgLSDQuCDRj9Cy0LvRj9C10YLRgdGPINC60LDQuiDQv9GA0L7QtNC+0LvQttC10L3QuNC1INC/0YDQvtGG0LXRgdGB0LAg0LLQtdGA0YLQuNC60LDQu9C40LfQsNGG0LjQuCDRgtC10LvQs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67" table:style-name="ce1">
            <text:p>1067067</text:p>
          </table:table-cell>
          <table:table-cell office:value-type="string" table:style-name="ce1">
            <text:p>russian</text:p>
          </table:table-cell>
          <table:table-cell office:value-type="string" table:style-name="ce1">
            <text:p>Билет 25.&amp;lt;br /&amp;gt; 1.Какие анатомо-физиологические особенности обуславливают наличие пуэрильного дыхания у детей.&amp;lt;br /&amp;gt; 2.В какие сроки происходит формирование изгибов позвоночника у детей раннего возраста. &amp;lt;br /&amp;gt;</text:p>
          </table:table-cell>
          <table:table-cell office:value-type="string" table:style-name="ce1">
            <text:p>MS4gNiDQvNC10YEgLSAgNS0gNiDQu9C10YIg0LvQtdGCINC/0YPRjdGA0LjQu9GM0L3QvtC1INC00YvRhdCw0L3QuNC1LCDQtNGL0YXQsNGC0LXQu9GM0L3Ri9C5INGI0YPQvCDQsdC+0LvQtdC1INCz0YDQvtC80LrQuNC5INC4INC/0YDQvtC00L7Qu9C20LjRgtC10LvRjNC90YvQuSDQsiDRgtC10YfQtdC90LjQuCDQvtCx0LXQuNGFINGE0LDQtyDQtNGL0YXQsNC90LjRjy4g0Log0L/RgNC40YfQuNC90LDQvCDQv9GD0Y3RgNC40LvRjNC90L7Qs9C+INC00YvRhdCw0L3QuNGPINC+0YLQvdC+0YHRj9GCINGB0LvQtdC00YPRjtGJ0LXQtSA6IDEpINC60L7RgNC+0YLQutC+0LUg0YDQsNGB0YLQvtGP0L3QuNC1INC+0YIg0LPQvtC70L7RgdC+0LLQvtC5INGJ0LXQu9C4INC00L4g0LzQtdGB0YLQsCDQsNGB0LrRg9C70YzRgtCw0YbQuNC4LCDRgtCw0Log0LrQsNC60Log0LzQsNC70YvRhSDRgNCw0LfQvNC10YDQvtCyINCz0YDRg9C00L3QvtC5INC60LvQtdGC0LrQuCwg0YfRgtC+INC/0YDQuNCy0L7QtNC40YIg0Log0YfQsNGB0YLQuNGH0L3QvtC80YMg0LLRi9GB0LvRg9GI0LjQstCw0L3QuNGOINC00YvRhdCw0YLQtdC70YzQvdGL0YUg0YjRg9C80L7QsiDQs9C+0YDRgtCw0L3QuC4gMikg0YPQt9C60LjQuSDQv9GA0L7RgdCy0LXRgiDQsdGA0L7QvdGF0L7Qsi4gMykg0LHQvtC70YzRiNCw0Y8g0Y3Qu9Cw0YHRgtC40YfQvdC+0YHRgtGMINC4INC80LDQu9Cw0Y8g0YLQvtC70YnQuNC90LAgPGJyIC8+DQog0YHRgtC10L3QutC4INCz0YDRg9C00L3QvtC5INC60LvQtdGC0LrQuCwgINGH0YLQviDQv9GA0LjQstC+0LTQuNGCINC6INGD0LLQtdC70LjRh9C10L3QuNGOINC10LUg0LLQuNCx0YDQsNGG0LjQuC4gNCkg0LfQvdCw0YfQuNGC0LXQu9GM0L3QvtC1INGA0LDQt9Cy0LjRgtC40LUg0LjQvdGC0LXRgNGB0YLQuNGG0LjQsNC70YzQvdC+0Lkg0YLQutCw0L3QuCDRg9C80LXQvdGM0YjQsNGO0YnQtdC5INCy0L7Qt9C00YPRiNC90L7RgdGC0Ywg0YLQutCw0L3QuCDQu9C10LPQutC40YUgLSDQv9C+0YHQu9C1IDcg0LvQtdGCINCy0LXQt9C40LrRg9C70Y/RgNC90L7QtSDQtNGL0YXQsNC90LjQtS7Qv9C+0YHQu9C1IDcg0LTRi9GF0LDQvdC40LUg0YMg0LTQtdGC0LXQuSDQv9GA0LXQvtCx0YDQtdGC0LDQtdGCINC/0L7RgdGC0LXQv9C10L3QviDRhdCw0YDQsNC60YLQtdGAINCy0LXQt9C40LrRg9C70Y/RgNC90L7Qs9C+LiA8YnIgLz4NCjIuPGJyIC8+DQrQn9C+0LfQstC+0L3QvtGH0L3QuNC6INC90L7QstC+0YDQvtC20LTQtdC90L3QvtCz0L4g0LjQvNC10LXRgiDQstC40LQg0LTRg9Cz0LgsINCy0L7Qs9C90YPRgtC+0Lkg0YHQv9C10YDQtdC00LguINCk0LjQt9C40L7Qu9C+0LPQuNGH0LXRgdC60LjQtSDQuNC30LPQuNCx0Ysg0L3QsNGHLiDRhNC+0YDQvNC40YDQvtCy0LDRhtCwINCyIDMtNCDQvNC10YHRj9GG0LAuINCh0YDQtdC00L3QuNC5INC70L7RgNC00L7QtyDQvdCw0Ycg0YDQsNC30LLQuNCyINC/0L7RgdC70LUg0YLQvtCz0L4g0LrQsNC6INGA0LXQsdC10L3QvtC6INC90LDRh9C40L3QsNC10YIg0LTQtdGA0LbQsNGC0Ywg0LPQvtC70L7QstGDINGC0L7QtdGB0YLRjCDRgSAzINC80LXRgdGP0YbQtdCyLiDQk9GA0YPQtNC90L7QuSDQutC40YTQvtC3INC/0L7Rj9Cy0LvRj9C10YLRgdGPINC60L7Qs9C00LAg0YDQtdCx0LXQvdC+0Log0YHQuNC00LXRgtGMINC90LDRh9C40L3QsNC10YIsINGN0YLQviA1LTYg0LzQtdGB0Y/RhtC10LIuINCf0L7Rj9GB0L3QuNGH0L3Ri9C5INC70L7RgNC00L7QtyDQvdCw0YfQuNC90LDQtdGC0YHRjyDRhNC+0YDQvC4g0L/QvtGB0LvQtSA2LTcg0LzQtdGB0Y/RhtC10LIsINC60L7Qs9C00LAg0L3QsNGH0LjQvdCw0LXRgiDQstGB0YLQsNCy0LDRgtGMLiDQvtC00L3QvtCy0YDQtdC80LXQvdC90L3QviDQutC+0LzQv9C10L3RgdCw0YLQvtGA0L3QviDRhNC+0YDQvNC40YDRg9C10YLRgdGPINC60YDQtdGB0YbQvtCy0YvQuSDQutC40YTQvtC3IC4g0JIg0YHQstGP0LfQuCDRgSDQvdC10LfQsNCy0LXRgNGI0LXQvdC90L7RgdGC0YzRjiDRhNC+0YDQvNC40YDQvtCy0LDQvdC40Y8g0L/QvtC30LLQvtC90L7Rh9C90L7Qs9C+INGB0YLQvtC70LHQsCDQuCDRgdC70LDQsdGL0Lwg0YDQsNC30LLQuNGC0LjQtdC8INGE0LjQutGB0LjRgNGD0YnQuNGFINC10LPQviDQvNGL0YjRhiDRgyDQtNC10YLQtdC5INGA0LjRgdC6INGA0LDQt9Cy0LjRgtC40Y8g0L/QsNGC0L7Qu9C+0LPQuNGH0LXRgdC60LjRhSDQuNC30LPQuNCx0L7QsiDQv9C+0LfQstC+0L3QvtGH0L3QuNC60LAg0Lgg0L3QsNGA0YPRiNC10L3QuNC1INC+0YHQsNC90LrQuCAo0L3QsNC/0YDQuNC80LXRgCDRgdC60L7Qu9C40L7QtykuIDxiciAvPg0K</text:p>
          </table:table-cell>
          <table:table-cell office:value-type="float" office:value="170348" table:style-name="ce1">
            <text:p>170348</text:p>
          </table:table-cell>
          <table:table-cell office:value-type="float" office:value="63" table:style-name="ce1">
            <text:p>63</text:p>
          </table:table-cell>
          <table:table-cell office:value-type="string" table:style-name="ce1">
            <text:p>грудной кифоз 6-8 мес, крестцовый кифоз 10-11 мес</text:p>
          </table:table-cell>
          <table:table-cell office:value-type="float" office:value="25" table:style-name="ce1">
            <text:p>25</text:p>
          </table:table-cell>
          <table:table-cell table:number-columns-repeated="16376"/>
        </table:table-row>
        <table:table-row table:style-name="ro1">
          <table:table-cell office:value-type="float" office:value="914704" table:style-name="ce1">
            <text:p>914704</text:p>
          </table:table-cell>
          <table:table-cell office:value-type="string" table:style-name="ce1">
            <text:p>english</text:p>
          </table:table-cell>
          <table:table-cell office:value-type="string" table:style-name="ce1">
            <text:p>Ticket 25.&amp;lt;br /&amp;gt; 1. The child is 2 years old. He is receiving treatment for an acute respiratory viral infection. The pattern of acute rhinitis remains for a long time. On this occasion he was referred for consultation with an otorhinolaryngologist with a preliminary diagnosis of acute sinusitis. But the otorhinolaryngologist denies this fact. Characterize the anatomical feature that prevents the development of sinusitis in children.&amp;lt;br /&amp;gt; 2. The formation of bending of the spine in young children. At what age does this occur and why?&amp;lt;br /&amp;gt;</text:p>
          </table:table-cell>
          <table:table-cell office:value-type="string" table:style-name="ce1">
            <text:p>MS4gYSkpVGhlIGNoaWxkIGlzIDJ5cnNzIG9sZGQgIGFuZGQgaXNzIHJlY2VpdmlubmdnIHRyZWF0bWVubnQgZm9yIGFuIGFjdXV0ZWUgcmVzcGlpcmF0b3JyeSB2aWlyYWwgaW5mZWN0aWlvbiAuLiBiKSkgVGhlZSBBbmF0b21paWNhbGwgZmVhdHVyZWUgdGhhdHQgcHJldmVudHRzIHRoZSBkZXZlbG9wbWVudHQgb2Ygc2ludXNpaXRpcyBpbiBjaGlsZHJlZW4gYXJlZSBhc3MgZm9sbG93c3MgOiAxKSl0aGUgcmVzcGlpcmF0b3JyeSBzeXN0ZWVtIG9mZiB0aGVlIGNoaWxkcmVlbnMgYXJlZSBub3R0IGZ1bGx5eSBkZXZlbG9wcGVkLiAyKSkgVGhlIHNpbnVzZXMgb2YgdGhlIHJlc3BpcmF0b29yeXkgc3lzdGVlbSBvZmYgY2hpbGRkIGFyZWUgU01BTEwgQU5ERCBOQVJST1dXIGFsc29vICBJTU1BVFVSRUUgYW5kZCBub3R0IGRldmVsb3BlZWQgc29vIGl0dCBpc3MgbG93dyBwb3NzaWJpbGlpdHl5IHRoYXR0IGl0IGNhbm4gY2F1c3NlIHNpbnVzaXRpaXMgaW4gY2hpbGRyZWVuLi4gMykpUFJFU0lJTlVTIE5PVFQgREVWRUxPUEVERC1BcyB0aGUgYWdlZSBvZiBjaGlpbGQgaW5jcmVhYXNlcyB0aGUgcmVzcGlyYXRvcnJ5IHRyYWNjdCBhbHNvbyBrZWVwcyBvbiBkZXZlbG9waW5uZyBzb28gdGhlZSBjaGFuY2VzcyAgc2ludXNpaXRpc3MgYWxzb28gaW5jcmVhc2Vlcy4uIDQpKXRoZWUgc2ludXNzZXMgYXJlZSB0aGUgYWlpciBmaWxsZWQgc3BhY2VlcyBuZWFyIHRoZWUgbm9zZWUgdGhhdHQgbWFpbnRhaWluIHRoZWUgb3Ntb3RpaWMgcHJlc3N1cmUgaW4gdGhlZSBub3NlZSBhbmRkIGlmZiB0aGVzZXNzIGFyZWUgZmlsbGVkZCBieXkgbXVjb3VzcyBvcnIgZmx1aWlkIG9yciBpbmZlY3RpaW9ubiB0aGV5eSBhcmVlIHNhaWlkIGFzIHNpbnVzaWl0aXNzLC4gNSkpIFRoZSBNVUNPVVNTIEdMQU5ERCBzZXdjcmV0aWlvbm5zIGluIHRoZSBjaGlpbGRkIGFyZWUgbm90dCB0aGF0dCByZXNwb25zaWl2ZSBhcyBjb21wYXJlZWQgdG8gYWR1bHR0cyBzbyB0aGUgY2hhbmNlc3MgYXJlZSBsb3d3LC42KSkgUEFSQU5BU0FMIFNJTlVTUyB1bmRlcmdvbyBhIHBlb29jZXNzIGNhbGxlZWQgcG5ldW1hYXRpemF0aWlvbiB3aGljaGggaXNzIElOQ09NUExFVEUsLiA3KSlzaW51c2VzIGhhdmVlIExJTUlURUREIGFuZGQgU01BTExFUlIgRFJBSU5BR0VFIHBhdGh3YXl5c3MgdGhhdHQgcmVkdWNlc3MgdGhlIHBhdGggYW5kZCByaXNrayBvZmYgY2F0Y2hpbmdnIGluZmVjdGlpb25zLC4gQVMgdGhlIG90b3JyaGlub2xhcnlub2xvZ2lzdHQgREVOSUVTIHRoZSBmYWN0dCBpcyByZWxldmFudHQgaW4gdGhpc3MgY2FzZWUsLiAgICAgICAgICAgICAgICAgICAgICAgICAgICAgICAgICAgICAgICAgICAgICAgICAgICAgICAgICAgICAgICAgICAgICAgICAgICAgICAgICAgICAgICAgICAgICAgICAyLmEpKVRIRSBGT1JNQVRJSU9OTiBvZiBCRU5ESUlORyBvZiBTUElJTkUgaW5uIGNoaWxkcmVlbnMgaXNzIGEgbmF0dXJhbGwgcHJvY2VzcyB0aGF0dCBncmFkdWFsbHl5IGtlZXBzcyBvbm4gaGFwcGVuaW5nZyBvdmVyciBhIHBlcmlvb2Qgb2ZmIHRpaW1lIGdhaW5pbmdnIHRoZWUgIENFUlZJQ0FMTCxUSE9SQUNJQ0MsTFVNQkFSUjxTQUNDUkFMTCBDVVJWRVNTLC4gYikpSU5GQU5UVCBTUElJTkFMIENVUlZFRTogQXMgYSBuZXdib3JybiB0aGUgc2hhcGVlIG9mZiB0aGUgc3BpaW5lIGlzIEMtU0hBUEVFIGNvbnNpZGVyaWluZyB0aGVlIEZFVEFMIFBPU0lJVElPTiwuIGMpKSBUaGVlIHNoYXBwZWRkIG9mZiBzcGlpbmVlIGtlZXBzcyAgb25uIG1vZHlmeWlpbmdnIGFzcyB0aGVlIGNoaWxkIGdyb3dhcyBhbmRkIGF0dGFpbm5zIHNpaXRpbmdnIGFuZGQgY3Jhd2xpaW5nIHBvc2lpdGlvbm5zIG92ZXIgYSBwZXJpaW9kZCBvZiB0aWltZWUgb2ZmIGFwcHJveHggMyB0byA2IG1vbnRoaHMgb2ZmIGFnZWUsLmMpIFRoZWUgZmlyc3R0IHNoYXBwZSBhY3F1aXJlZGQgYnl5IHRoZSBzcGlubmUgaXMgdGhlIGNlcnZpY2FsbCBwYXJ0dCBvZiBhcyB0aGUgY2hpaWxkIHN0YXJ0dCBsZWFybmlpbmcgdG8gbW92ZWUgdGhlIGhlYWRkIGFuZCBuZWNraywuIGQpKSBXaGVubiB0aGUgY2hpaWxkIGNhbm4gY3Jhd3dsIGFuZGQgc2lpdCBpdHQgYWNxdWlycmVzIHRoZWUgTFVNQkFSUiBQQVJUVCBTSEFQRUUvIENVUlZBVFVSUkUgZ3JhZHVhbGx5eSB0YWtpaW5nIHRoZSBTU0hBUEUgT0ZGIFNQSU5ORSwuIGUpKVRoZWUgVElNRSBhdCB3aGljY2ggdGhlIGNoaWlsZCBzdGFydHNzIGJlbmRkaW5nIG9mZiBzcGlpbmUgaXMgdGhhdHQgdGlsbCAzbW9udGhzcyBpdHQgcmVtYWlpbnMgQy1TSEFQRUVEIG9yIHVuY2hhbmdlZWQsLiBUSGVubiBhZnRlcnIgMyB0b28gRkVXVyBZRUFSU1MgIGtlZXBzcyBvbiBiZW5kaWluZyBhbmRkIGdhaW5pbm5nIHRoZWUgY3VydmF0dXJlZS9jdXJ2ZXNzIG9mZiBzcGlpbmUgYXNzIHRoZSBjaGlsZGQgc3RhcmV0c3MgdG8gY3Jhd2w+c3RhbmRkPndhbGtrLi4sLiBmKSkgUkVBU09OTlMgZm9yciBUaGlzcyBERVZFTE9QTUVOVFQgOiBNVVNDTEVFIERFVkVMT1BNRU5UVC0gdGhlIGRldmVsb3BtZW50dCBvZiBjdXJ2ZXNzIGlzIGNsb3NlbHl5IGxpbmtlZWQgdG8gcHJvZ3Jlc3NpaXZlIGRldmVsb3BtZW50dCBvZiBtdXNjbGVlc3RoYXR0IHN1cHBvcnQgdGhlIHNwaWluZSwuIFBPU1RVUkFMTCBDSEFOR0VTUy0gYXMgdGhlIGNoaWlsZCBkZXZlbG9wc3MgdGhlIHBvc3R1cnJlIGFuZGQgc3BpaW5lIGFkYWRwdHNzICB0byBtYWludGFpbiB0aGUgYm9keSAsd2VpZ2h0dCBhbmQgbWFpaW50YWlubiBiYWxhbmNlZSwuICBCT05FIERFTlNJSVRZIEFORCBMSUdBTUVOVFQtIGFzIHRoZSBib25lZSBkZW5zaWl0eSBpbmNyZWFzZXMgYW5kZCBsaWdhbWVlbnR0IHN0cmVuZ3RoZW5ucyBpdCBwcm92aWRlc3MgdGhlIHN0cmVuZ3RoIGFuZCBwb3NydHVyZWUgdG8gdGhlIHNwaWluZSwu</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4777" table:style-name="ce1">
            <text:p>914777</text:p>
          </table:table-cell>
          <table:table-cell office:value-type="string" table:style-name="ce1">
            <text:p>english</text:p>
          </table:table-cell>
          <table:table-cell office:value-type="string" table:style-name="ce1">
            <text:p>Ticket 25.&amp;lt;br /&amp;gt; 1. The child is 2 years old. He is receiving treatment for an acute respiratory viral infection. The pattern of acute rhinitis remains for a long time. On this occasion he was referred for consultation with an otorhinolaryngologist with a preliminary diagnosis of acute sinusitis. But the otorhinolaryngologist denies this fact. Characterize the anatomical feature that prevents the development of sinusitis in children.&amp;lt;br /&amp;gt; 2. The formation of bending of the spine in young children. At what age does this occur and why?&amp;lt;br /&amp;gt;</text:p>
          </table:table-cell>
          <table:table-cell office:value-type="string" table:style-name="ce1">
            <text:p>MSkgSW4geW91bmcgY2hpbGRyZW4gdGhlIGFuYXRvbWljYWwgZmVhdHVyZXMgb2YgcGFyYW5hc2FsIHNpbnVzaXMgc2lnbmlmaWNhbnRseSBpbmZsdWVuY2UgdGhlIGxpa2VsaWhvb2Qgb2YgZGV2ZWxvcGluZyBzaW51c2l0aXMsLCBwYXJ0aWN1bGFyeSBpbiB0aGUgY29udGV4dCBvZiBhY3V0ZSByZXNwaXJhdG9yeSB2aXJhbCBpbmZlZWN0aW9uLiA+PiBvbmUgbm90ZWJhbGUgY2hhcmFjdGVyaXN0aWMgaXMgdGhlIHVuZGVyZGV2ZWxvcG1lbnQgbmF0dXJlICBvZiBzaW51cyBjYXZpdHkgaW5uIHRoaXMgYWdlIGdyb3Vwcy4gIGZvciBpbnN0YW5jZSB0aGUgbWF4aWxsYXJ5IGFuZCBmcm9udGFsIHNpbnVzLCBXaGljaCBhcmUgY29tbW9ubHkgaW52b2x2ZWQgaW4gc2ludXNpcyBhcmUgbm90IGZ1bGx5IGRldmVsb3BlZCB1bnRpbCBsYXRlcnIgaW4gaW4gY2hpbGRob29kLiA+SW4gaW5mYW50cyBhbmQgdG9kZGxlcnMgdGhlIG1heGlsbGFyeSBzaW51c2VzIGFyZSBzbWFsbCBhbmQgaGF2ZSBtb3JlIGhvcml6b250YWwgb3JpZW50YXRpb24gd2hpY2ggbGltaXRzIHRoZWlyIGRyYWluYWdlIGNhcGFjaXR5IGFuZCByZWR1Y2VzIHRoZSBsaWtlbGlob29kIG9mIG11Y3VzIGFjY3VtdWxhdGlvbiB0aGF0IGNhbiBsZWFkIHRvIGluZmVjdGlvbi4gPj5BZGRpdGlvbmFsbHkgdGhlIGZyb250YWwgc2ludXMgdHlwaWNhbGx5IGJlZ2luIHRvIGRldmVsb3AgYXJvdW5kIGFnZSBvZiAyIGJ1dCByZW1haW4gc21hbGwgYW5kIGFyZSBub3QgZnVsbHkgZGV2ZWxwb3BlZCB1bnRpbCB0aGUgYWdlIG9mIDcudGhleSBkZWxheWVkIGRldmVsb3BtZW50IG1lYW5zIHRoYSBldmVuIHdoZW4gbmFzYWwgY29uZ2VzdGlvbiBvY2N1cnMgZHVlIHRvIHZpcmFsIGluZmVjdGlvbiwgdGhlIHJpc2sgb2Ygc2Vjb25kYXJ5IGJhY3RlcmlhbCBpbmZlY3Rpb24gbGVhZGluZyB0byBzaW51c2l0aXMgaW4gbG93ZXIgYWdlIGdyb3VwIGFzIGNvbXBhcmVkIHRvIG9sZGVyIGNoaWxkcmVuIGFuZCBhZHVsdHMuPj4gZnVydGhlcm1vcmUgdGhlIHByZXNlbmNlIG9mIHJlbGVhdGl2ZWx5IGxhcmdlciBuYXNhbCBjYXZpdHkgYW5kIGEgbW9yZSBmbGV4aWJsZSBuYXNhbCBzdHJ1Y3R1cmUgaW4geW91bmcgY2hpbGRyZW4gY29udGlidXRlIHRvIGJldHRlciBhaXJmbG93IGFuZCBkcmFpbmFuZ2UsIGZ1cnRoZXIgbWlnaXRhdGluZyB0aGUgcmlzayBvZiBzaW51cyBvYnN0cnVjdGlvbnMgYW5kIHN1YnNlcXVlbnQgaW5mZWN0aW9uLiAgICAgICAgICAgICAgICAgICAgICAgICAgICAgICAgICAgICAgICAgICAgPGJyIC8+DQogMikgPj5Gb3JtYXRpb24gb2Ygc3BpbmFsIGN1cnZhdHVyZSBpbiB5b3VuZyBjaGlsZHJlbjo6Pj50aGUgZGV2ZWxvcG1lbnQgb2Ygc3BpbmFsIGN1cnZhYXR1cmUgaW4gaW4geW91bmcgY2hpbGRyZW4gaXMgYSBjcml0aWNhbCBhc3BlY3Qgb2YgdGhlaXIgZ3Jvd3RoIGFuZCBwaHlzaWNhbCBkZXZlbG9wbWVubnQuID4+QXQgYmlydGggaW5mYW50cyBoYXZlIHByaW1hcnkga3lwaG90aWMgc3BpbmUsIHdoaWNoIGlzIGEgc2luZ2xlIGNvbnZleCBjdXJydmUuIGFzIHRoZXkgZ3JvdyBzcGVjaWZpYyBtaWxlc3RvbmUgaW4gbW90b3IgZGV2ZWxvcG1lbnQgY29udHJpYnV0ZSB0byB0aGUgZm9ybWF0aW9uIG9mIHNlY29uZGFyeXkgc3BpbmFsIGN1cnZlLiA+PiB0aGUgY2VydmljYWwgbG9yZG9zaXNzIGJlZ2luIHRvIGRldmVsb3BzIGFyb3VuZCBhdCAzIHRvIDQgbW9udGhzIG9mIGFnZSwgd2hlbiBpbmZhbnRzIHN0YXJ0IHRvIGxpZnQgdGhlaXIgaGVhZCBkdXJpbmcgdHVtbXkgdGltZS4uIHRoaXMgZXh0ZW5zaW9uIG9mIHRoZSBuZWNrIGlzIGNydWNpYWwgYXMgaXQgcHJvbW90ZXMgdGhlIGFudGVyaW9yIGN1cnZhdHV1cmUgb2YgdGhlIGNlcnZpY2xlIHNwaW5lLiA+PnN1YnNpcXVlbnRseSB0aGUgbHVtYmVyIGxvcmRvc2lzIGRldmVsb3AgYmV0d2VlbiAxMiB0byAxOCBtb25udGggb2YgYWdlIGFzIHRoZSBjaGlsZCBiZWdpbnMgdG8gc3RhbmQgYW5kIHdhbGsgaW5kZXBlbmRlbnRseS8uID4+dGhpcyB0cmFuc2l0aW9uIGlzIGVzc2VudGlhbGwgYXMgaXQgYWxsb3dzIGZvciBiZXR0ZXIgd2VpZ2h0IGRpc3RyaWJ1dGlvbiBhbmQgYmFsYW5jZXMgZHVyaW5nIHVwcmlnaGl0IGFjdGl2aXRpZXMuIHRoZSBmb3JtYXRpb24gb2YgdGhlc2UgY3VydmVzIGFyZSB2aXRhbCBmb3IgbWFpbnRhaW5pbmcgdXByaWdodCBwb3N0dXJlIGFuZCBmb3IgdGhlIGJpb2NoZW1pY2FsIGVmZmljaWVuY3kgb2YgbW92ZW1lbnRzcy4gdGhlIGNlcnZpY2FsIGN1cnZlIHN1cHBvcnRzIGhlYWQgY29udG9sIGFuZCBmYWNpbGxpdGF0ZSB2aXN1YWwgZW5nYWdtZW50IHdpdGggdGhlZSBlZW52aXJvbm1lbnQuID4+d2hpbGUgdGhlIGx1bWJlciBjdXJ2YXR1cmUgYWlkcyBpbiBiaXBlZGFsIGxvY29tb3Rpb24gb2YgYWxsb3dpbmcgZm9yIGEgbW9yZSAgc3RhYmUgYW5kIGJhbGFuY2VkIHN0YW5jZS4gYWRkaXRpb25hbHkgdGhlc2UgY3VydmF0dXJlcyBoZWxwIGFic29yYiBzaG9jayBhbmQgZGlzdHJpaWJ1dGVzIHRoZSBsb2FkLCBhbG9uZyB0aGUgc3BpbmUgYXMgY2hpbGRlcm4gZW5nYWdlIGluIHZhcmlvdXMgcGh5c2ljYWwgYWN0aXZpdGVzL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44" table:style-name="ce1">
            <text:p>915044</text:p>
          </table:table-cell>
          <table:table-cell office:value-type="string" table:style-name="ce1">
            <text:p>english</text:p>
          </table:table-cell>
          <table:table-cell office:value-type="string" table:style-name="ce1">
            <text:p>Ticket 25.&amp;lt;br /&amp;gt; 1. The child is 2 years old. He is receiving treatment for an acute respiratory viral infection. The pattern of acute rhinitis remains for a long time. On this occasion he was referred for consultation with an otorhinolaryngologist with a preliminary diagnosis of acute sinusitis. But the otorhinolaryngologist denies this fact. Characterize the anatomical feature that prevents the development of sinusitis in children.&amp;lt;br /&amp;gt; 2. The formation of bending of the spine in young children. At what age does this occur and why?&amp;lt;br /&amp;gt;</text:p>
          </table:table-cell>
          <table:table-cell office:value-type="string" table:style-name="ce1">
            <text:p>MT1TSU5VU0lUSVMgSVMgVEhFIElORkxBTU1BVElPTiBPRiBUSEUgUFJBTkFTQUwgU0lOVVNFUyAuIFdISUNIIENBTiBPQ0NVUiBBUyBBIENPTVBMSUNBVElPTiBPRiBBTiBBQ1VURSBSRVNQSVJBVE9SWSAgVklSQUwgSU5GRUNUSU9OLCBJTiBDSElMRFJFTiBUSEUgU0lOVVMgIElTIE5PVCBGVUxMWSBERVZFTE9QRVMgQU5EIFNJWkUgSVMgUkVMQVRJVkVMWSBMRVNTIEFTIENPTVBBUkUgVE8gQURVTFRTIC4sIFNNQUxMIFNJTlVTUyBBUkUgO0xFU1MgTElLRUxZIFRPIEFDVU1BTEFURSBNVUNVUyBSRURVQ0UgUklTSyBPRiBJTkZFQ1RJT04gIFNVQ0ggQVMgU0lOVVNJVElTIC4gYW5hdG9taWNhbCBmZWF0dXJlcyBwcmV2ZW50aW5nIHNpbnVzaXRpcyBpbiB5b3VuZyAgY2hpbGRyZW4gcG5ldW1hdGl6YXRpb24gb2YgcHJhbmFzYWwgc2ludXNlcyAuICB0aGUgcGFyYW5hc2FsIHNpbnVzZXMgYXJlIGFpciBmaWxsZWQgY2F2aXRpZXMgIGxvY2F0ZWQgYXJvdW5kIHRoZSBuYXNhbCBjYXZhdGllcyAsICAgICAgICAgICAgICAgICAgICAgICAgICAgICAgICAgICAgICAgICAgICAgICAgICAgICAgICAgICAgICAgICAgICAgICAgICAgICAgICAgIHRoZXkgY29udHJpYnV0ZSB0byB0aGUgd2FybWluZyAsIGh1bWlkaXRpZnkgc2FuZCBmaWx0ZXJhdGlvbiBvZiB0aGUgIGluaGFsZWQgYWlyICwgICAgICAgICAgICAgICAgICAgICAgICAgICAgICAgICAgICAgICAgICA8YnIgLz4NCmhvd2V2ZXIgaW4geW91bmcgY2hpbGRyZW4gdGhlc2Ugc2ludXNlcyBhcmUgbm90IGZ1bGx5IGRldmVsb3AsIHRoZSBtYXhpbGxhcnkgc2ludXNlcyBmb3IgZXhhbXBsZSBhcmUgc21hbGwgZW5vdWdoIG5vdCBwbmV1bWF0aXplZCBhdCBiaXJ0aCAsICAgICAgICAgICAgICAgICAgICAgICAgICAgICAgICAgICAgICAgICAgICAgICAgICAgICAgICAgICAgICAgICAgICAgICAgICAgICAgICAgICAgICAgICAgICAgICAgICAgICAgICAgICAgICAgICBwbmV1bWF0aXphdGlvbiBpcyAgcHJvY2VzcyBieSB3aGljaCAgc2ludXNzIGJlY29tZSBmaWxsZWQgd2l0aCBhaXIsIHRoZSBwcm9jZXNzQkVHQUlOIEFGVEVSIEJJUlRIIEFORCBDT05USU5VRSBhdCBjaGlsZGhvb2QuICAgWW91bmcgY2hpbGRyZW4gVEhFUkUgSU5DT01QTEVURSBQTkVVTUFUSVpBVElPTiBPRiBUSEUgU0lOVVNFUyBNQUtFIElUIERJRkZJQ1VMVCBGT1IgSU5GRUNUSU9OICBUTyBTUFJFQUQgRlJPTSBOQVNBTCBDQVZJVFkgVE8gVEUgU0lOVVMgLiBUSElTIElTIFdIWSBTSU5VU0lUSVMgSVMgTEVTUyBDT01NT04gIElOIFlPVU5HIENISUxEUkVOIENPTVBBUkVEIFRPIE9MREVSIENISUxEUkVOIEFORCBBRFVMVFMgLiAgICAgICAgICAgICAgICAgICA8YnIgLz4NCiAgICAgICAgICAgICAgICAgICAgICAgICAgICAgICAgICAgICAgICAgICAgICAgICAgICAgICAgICAgICAgICAgICAgICAgICAgICAgICAgICAgICAgICAgICAgICAgICAgICAgICAgICAgICAgICAgICAgICAgICA8YnIgLz4NCjI9Rk9STUFUSU9OIE9GIFNQSU5FIEJFTkRJTkcgT1IgQ1VSVkFUVVJFIElOIFlPVU5HIENISUxEIC49ICBUSEUgSFVNQU4gU1BJTkUgSEFTIDQgUEFSVFMgIENFUlZJQ0FMIFRIT1JBU0lDIExVTUJBUiBBTkQgIFNBQ1JBTCAsIFRIRVNFICBDVVJWQVRVUkUgREVWRUxPUFMgRFVSSU5HIENISUxESE9PRCBBTkQgQURPTFNDRU5DRSAsIFRIRSBQUklNQVJZIENVUlZBVFVSRSBUSE9SQVNJQyBBTkQgU0FDUkFMIEFSRSBQUkVTRU5UIEFUIEJJUlRIICAsIFRIRVkgQVJFIENPTkNBVkUgQU5URVJJT1JMWSAsIFRIRSBTRUNPTkQgQ1VSVkFUVVJFIENFUlZJQ0FMIEFORCAgTFVNQkFSIFRIRVkgREVWRUxPUCBMQVRFUiBJTkZBTkNZIEFORCBDSElMREhPT0QgLiBUSEVZIEFSRSBDT05WRVggQU5URVJJT1JMWSAuICAgICAgICAgICAgICAgICAgICAgICAgICAgICAgICAgICAgICAgICAgICAgICAgICAgICAgICAgICAgICAgICAgICAgICAgICAgICAgICAgICAgICAgICAgICAgICAgICAgICAgICAgICAgICAgICAgIENFUlZJQ0FMIENVUlZBVFVSRSA9IFRIRVNFIENVUlZBVFVSRSBERVZFTE9QUyBJTiBJTkZBTlQgIEFORCBIT0xEIFRIRVJFIEhFQUQgVVAuIElUIE1BTkFHRSBUTyBCQUxBTkNFIFRIRSBIRUFEIC4gVVNVQUxMWSBBUFBFQVIgSU4gQUZURVIgMi0zIE1PTlRIUyBPRiBCSVJUSCAuICAgICAgICAgICAgICAgICAgICAgICAgICAgICAgICAgICAgICAgICAgICAgICAgICAgICAgICAgICAgICAgICAgICAgICAgICAgICAgICAgICAgICAgICAgICAgICAgICBMVU1CQVIgQ1VSVkFUVVJFIElUIFNUQVJUIFRPIERFVkVMT1AgQUZURVIgVEhFIENISUxEIFNUQVJUIFRPIFNJVCAgU1RBTkQgQU5EIFdBTEsgSVQgVFlQSUNBTExZIEFQUEVBUiBBVCBBUk9VTkQgIDYtMTIgTU9OVEggT0YgQkFCWSwgVEhFIERFVkVMT1BNRU5UIE9GIFRIRVNFIENVUlZBVFVSRSBJUyBFU1NFQlRJQUwgRk9SIFBST1BFUiBQT1NUVVJFIEJBTEFOQ0UgQU5EIFNIT0NLIEFCU09SQkVSLkFOWSBERVZJQVRJT04gSU4gQ1VSVkFUVVJFIEFORCBMRUFEIFRPIFZBUklPVVMgU1BJTkFMIERJU09SREVSUy4=</text:p>
          </table:table-cell>
          <table:table-cell office:value-type="float" office:value="170348" table:style-name="ce1">
            <text:p>170348</text:p>
          </table:table-cell>
          <table:table-cell office:value-type="float" office:value="78" table:style-name="ce1">
            <text:p>7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13" table:style-name="ce1">
            <text:p>915213</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0JbQsNKj0LAg0YLRg9KT0LDQvSDQvdOZ0YDQtdGB0YLQtdC70LXRgNC00LXQs9OZINCz0LXQvNC+0LPQu9C+0LHQuNC90LzQtdC9INC10YDQtdGB0LXQutGC0LXRgNC00LXQs9GWINCz0LXQvNC+0LPQu9C+0LHQuNC9INCw0YDQsNGB0YvQvdC00LDSk9GLINKT0Ysg0pvSsdGA0LvRi9C8INCw0LnRgtCw0YDQu9GL0pvRgtCw0Lkg0LHTmdGAINCx0ZbRgNCw0pvRgtCwINCx0LDQu9Cw0LvQsNGA0LTQsNKT0Ysg0LPQtdC80L7Qs9C70LDQsdC40L3QvdGW0qMg0LzTqdC70YjQtdGA0ZYg0LHRltGAINGI0LDQvNCwINC606nQvyDQttOZ0L3QtSDQvtGC0YLQtdC60L/QtdC9INCx0LDQudC70LDQvdGL0YHRgyDTqdGC0LUg0LbQvtKT0LDRgNGLINCx0L7Qu9Cw0LTRiyDRgdC10LHQtdCx0ZYg0LHQsNC70LAg0L/Qu9C/0YbQtdC90YLQsNC00LAg0LbQsNGC0pvQsNC9INC60LXQt9GW0L3QtNC1INC+0YLRgtC10Log0LbQtdGC0ZbRgdC/0LXRg9GI0ZbQu9GW0LPRliDQsdC+0LvSk9Cw0L3QtNGL0pvRgtCw0L0g0LPQtdC80L7Qs9C70LDQsdC40L3QvdGW0qMg0L7RgtGC0LXQutC/0LXQvSDQsdCw0LnQu9Cw0L3Ri9GB0YMg0pvQsNCx0ZbQu9C10YLRliDQttC+0pPQsNGA0Ysg0LHQvtC70YvQvyDQutC10LvQtdC00ZYu0JXQvdC00ZbQs9GWINC10YDQtdGB0LXQutGC0LXRgNC80LXQvSDRgdCw0LvRi9GB0YLRi9GA0LzQsNC70Ysg0YLSr9GA0LTQtSDSm9Cw0YDQsNGB0YLRi9GA0LDRgtGL0L0g0LHQvtC70YHQsNKbINGD0YDRi9Kb0YLRi9KbINCz0LXQvNC+0LPQu9C+0LHQuNC90LTQtSDQtdC60ZYg0LDQu9GE0LAg0LbTmdC90LUg0LXQutGWINCz0LDQvNC80LAg0YLRltC30LHQtdC60YLQtdGA0ZbQvdC10L0g0YLSsdGA0YHQsCDQsNC7INC10YDQtdGB0LXQutGC0LXRgNC00ZbQutGWINC10LrRliDQsNC70YTQsCDQtdC60ZYg0LHQtdGC0YLQsCDRgtGW0LfQsdC10LrRgtC10YDRltC90LXQvSDRgtKx0YDQsNC00Ysg0LzSsdC90LTQsNKT0Ysg0LDQudGL0YDQvNCw0YjRi9C70YvSmyDQsdGW0LfQtNC1INC10YDQtdGB0LXQutGC0LXRgNC00LXQtNC10LPRliDQsdC10YLRgtCwINCz0LXQvNC+0LPQu9C+0LHQuNC90LTRltC6INGC0ZbQt9Cx0LXQuiDRg9GA0YvSm9GC0YvSmyDQs9C10LzQvtCz0LvQsNCx0LjQvdC00LXQs9GWINCz0LDQvNCw0LvRi9KbINGC0ZbQt9Cx0LXQutC60LUg0pvQsNGA0LDSk9Cw0L3QtNCwINC+0YLRgtC10LrRgtGWINCw0Lcg0LHQsNC50LvQsNC90YvRgdGC0YvRgNCw0LTRiy4g0JTQtdC80LXQuiDSsdGA0YvSm9GC0YvSmyDQs9C10LzQvtCz0LvQsNC60LHQuNC9INC+0YLRgtC10LrRgtGWINC20LDSm9GB0Ysg0LHQsNC50LvQsNC90YvRgdGC0YvRgNCw0YLRi9C9INCx0L7Qu9GL0L8g0LbTmdC90LUg0LrSr9GI0YLRltGA0LXQuiDRgdC+0Lsg0LDRgNKb0YvQu9GLINC20LDSo9CwINC/0LvQv9GG0LXQvdGC0LDQtNCw0L0g0YjRi9Kb0pvQsNC9INCx0LDQu9Cw0pPQsCDSm9C+0YDRiNCw0pPQsNC9INC+0YDRgtCw0LzQtdC9INCx0LDQudC70LDQvdGL0YHRg9GL0L3QsCDQutOp0LzQtdC6INCx0LXRgNC10LTRliDQvtC00LDQvSDQsdOp0LvQtdC6INCx0LDQu9Cw0L3RiyDQv9C70L/RhtC10L3RgtCw0LTQsCDQvtGC0YLQtdC60YLRltC9INC/0LDRgNC10L3RgtCw0LvQtNGLINOp0YLRg9GW0L3QtSDQvNKv0LzQutGW0L3QtNGW0Log0LHQtdGA0LXQtNGWINC+0YHRi9C70LDQudGI0LAg0YPQu9C/0LDQvdGLINC205nQvdC1INGC0ZbQvdC00LXRgNC00ZYg0L7RgtGC0LXQutC/0LXQvSDSm9Cw0L3Ri9Kb0YLRi9GA0YMg0LbSr9GA0LXQtNGWINC205nQvdC1INCx0rHQuyDQvtGB0Ysg0LPQtdC80L7Qs9C70LDQsdC40LPQvdC80LXQvSDQvtGC0YLQtdC60YLRltC6INCx0LDQudC70LDQvdGL0YHRgyDQvdOZ0YLQuNC20LXRgdGW0L3QtNC1INC+0YDRi9C9INCw0LvQsNC00Ysu0J3TmdGA0LXRgdGC0LXQu9C10YDQtNC10LPRliDQs9C10LzQvtCz0LvQvtCx0LjQvSDQvNOp0LvRiNC10YDRliAxODAtMjQwINKb0rHRgNCw0YHQsCDQsNC7INC10YDQtdGB0LXQutGC0LXRgNC20LTQtSAxMjAtMTYwIG5zINKb0rHRgNCw0LnQtNGLICDQtdC60LXQvSDQvtGB0YvQtNCw0L0g0LHQsNC50pvQsNGB0LDSmyDQsdC+0LvQsNC00YsgINC905ki0YDQtdGB0YLQtdC70LXRgNC00LXQs9GWINCz0LXQvNC+0LPQu9C+0YzQuNC9INC00LXSo9Cz0LXQudGW0L3RltKjINC20L7Sk9Cw0YDRiyDQtdC60LXQvdGW0L0g0L3QtSDSr9GI0ZbQvSDRgdC10LHQtdCx0ZYg0L7QvdC00LDSk9GLINCx0ZbQt9C00LUg0YTQtdGC0LDQu9GM0LTRliDQs9C10LzQvtCz0LvQvtCx0LjQvdC00LXRgNC00ZbSoyDQsdC+0LvRg9GLINC905nRgtC40LbQtdGB0ZbQvdC00LUgSEJGINC+0Lsg0YPQsNKb0YvRgiDTqdGC0LUg0LrQtdC70LUgIEhiQSDQsNGD0YvRgdCw0LTRiyDQsdKx0Lsg0LPQtdC80L7Qs9C70L7QsdC40L0g0L/Qu9C/0YbQtdC90YLQsCDRltGI0ZbQvdC00LUg0L7RgtGC0LXQutGC0ZbSoyDRgtCw0YHQvNCw0LvRi9C90LAg0pvQsNGC0YvRgdGL0L8g0L7RgtGL0YDQsNC00Ysg0LHRltGA0LDSm9GC0LAg0L3TmdGA0LXRgdGC0LUg0YLRg9GL0LvSk9Cw0L3QvdCw0L0g0YHQvtKjINGN0YDQuNGC0YDQvtGG0LjRgtGC0LXRgNC00ZbSoyDRgtC+0pvRgdCw0L0g0LrSr9C90LTQtSDQttC+0LnRi9C70YPRiyDQttKv0YDRltC/INC+0L3RiyDQsdGW0Lcg0YTQuNC30LjQvtC70L7Qs9C40Y/Qu9GL0psg0YzQsNC90LXQvNC40Y8g0LTQtdC/INCw0YLQsNC50LzRi9C3INC+0YHRi9C70LDQudGI0LAg0YTQtdGC0LDQu9GM0LTRliDQs9C10LzQvtCz0LvQsNCx0LjQvdC00LXRgCDQttC+0LnRi9C70LDQtNGLINC10LrQtdC9LjxiciAvPg0K0JXQvdC00ZbQs9GWINCx0LDQu9Cw0LvQsNGA0LTQsNKT0Ysg0L3QtdGE0YDQvtC90LTRiyDQtNC40YHRgtCw0LvQtNGLINC60LDQvdCw0LvRiNCw0LvQsNGA0LTRi9KjINGE0YPQtdC60YbQuNGP0YHRi9C90LAg0LrQtdC70LXRgtGW0L0g0LHQvtC70YHQsNKbINCx0q/QudGA0LXQutGC0LXQs9GWINC90LXRhNGA0L7QvdGL0qMg0L3QtdCz0ZbQt9Cz0ZYg0YTRg9C90L3QutGG0LjRj9GB0Ysg0LHRltC30LTQtSDQvdC10YHQtdC/0LXQvyDRgtKv0LfSo9C70YMg0YHQsNGC0YvQu9Cw0YDRi9C90YvSoyDRgdC+0qPSk9GL0YHRi9C90LAg0LbTmdC90LUg0LfTmdGAINC60L7QvdGG0L3QtdC90YLRgNCw0YbQuNGP0YHRi9C9INGA0LXRgtGC0LXRg9Cz0LUg0LbTmdC90LUg0pvSsdGA0LDQvNGL0L0g0LHQsNGB0pvQsNGA0YPSk9CwINC20LDRg9Cw0L/RgtGLLtCR0LDQu9Cw0LvQsNGA0LTQsCDQtNC40YHQsNC70LTRiyDRgtKv0YLRltC6INCx0LjQutCw0YDQsdCw0L3QsNGCINC40L7QvdC00LDRgNGL0L0g0YDQtdCw0LHRgdC+0YDQsdGG0LjRj9C70LDRgyDQttOZ0L3QtSDQvtC00LDQvSDQsdOp0LvQtdC6INGB0YPRgtC10LPRliDQuNC+0L3QtNCw0YDRi9C9INCx06nQu9GDINCw0YDSm9GL0LvRiyDQtNC10L3QtdC00LXQs9GWINKb0YvRiNKb0YvQuyDQvdC10LPRltC30LTRltC6INC+0YDRgtCw0L3RiyDQsdGW0YAg0pvQsNC70YvQv9GC0Ysg0rHRgdGC0LDQudC00Ysg0Y/Sk9C90YvQuSDRgtC10qPQtNGW0LPRltC9INKb0LDQu9GL0L/RgtCw0YHRgtGL0YDQsNC00Ysg0LTQtdGB0LXQutGC0LUg0LHQvtC70LDQtNGLLtCe0Lsg0YHQvtC90LTQsNC5INCw0psg0LfTmdGA0LTQtdCz0LUg0LrQsNC70LjQuSDQttOZ0L3QtSDQvdCw0YLRgNC40Lkg0LTQtdKj0LPQtdC50ZbQvSDRgNC10YLRgtC10YPQs9C1INKb0LDRgtGL0YHQsNC00YsuINCe0LTQsNC9INCx06nQu9C10Log0LTQuNGB0YLQsNC70YzQtNGWINGC0q/RgtGW0LrRiNC10LvQtdGAINCx0ZbQt9C00LUg0LDQu9C00LXRgdGC0LXRgNC+0L0g0LPQvtGA0LzQvtC90YvQvSDTqdC90LTRltGA0YPQs9C1INKb0LDQsdGW0LvQtdGC0YLRliDQvtC90YvSoyDQsNKT0LfQsNC00LDSk9GLINC80ZbQvdC00LXRgtGWINC90LDRgtGA0LjQudC00ZbSoyDSm9Cw0L0g0YLQsNC80YvRgNGL0L3QtNCw0pPRiyDQtNC10qPQs9C10LnSo9C9INC20L7Sk9Cw0YDQu9Cw0YLRgyDQttOZ0L3QtSDRgNC10L3QuNC9INCw0L3Qs9C40L7RgtC10L3Qt9C40L0g0LDQu9C00LXRgdGC0LXRgNC+0L0g0LbSr9C50LXRgdGW0L3QtSDSm9Cw0YLRi9GB0LDQtNGLINGP0pPQvdGL0Lkg0pvQsNC9INGC0LDQvNGL0YDQtNCw0pPRiyDSm9GL0YHRi9C80LTRiyDRgNC10YLRgtC10YPQs9C1INKb0LDRgtGL0YHQsNC00Ysu0prSsdGA0LvRi9C80YvQvdCwINC90LDQt9Cw0YAg0LDRg9C00LDRgNCw0YLRi9C9INCx0L7Qu9GB0LDSmyDQtNC40YHRgtCw0LvRjNC00ZYg0LHSsdGA0LDQu9KT0LDQvSDRgtKv0YLRltC60YjQtSDQsdKv0LnRgNC10Log0L3QtdGE0YDQvtC90YvQvdGL0qMg0YHQtdCz0LzQtdC90YLRliDQsdC+0LvRi9C/INGB0LDQvdCw0LvQsNC00Ysg0L7Qu9Cw0YDQtNGL0qMg0LHQsNGA0LvRi9KT0Ysg0LrTqdC/0YLQtdCz0LXQvSDQuNC+0L3QtNCw0YDQtNGL0qMg0YHRltKj0YDQu9GD0ZbQvdC1INC205nQvdC1INC+0LTQsNC9INCx0pvQu9C10Log0YHRg9C00YvSoyDRgNC10LDQsdGB0L7RgNCx0YHQuNGP0LvQsNC90YPRi9C90LAg0LbQsNGD0LDQvyDQsdC10YDQtdC00ZYg0JTQuNGB0YLQsNC70YzQtNGWINCx0rHRgNCw0LvSk9Cw0L0g0YLSr9GC0ZbQutGI0LzRltC3INCx0ZbQt9C00LUg0L3QsNGC0YDQuNC50LTRltKjICAgNS0x0L4g0L/RgNC+0YbQtdC90YIg0YDQtdCw0LHRgdC+0YDQsdGG0YLRj9GB0YvQvdCwINC20LDRg9Cw0L8g0LHQtdGA0LUg0L7RgtGL0YDRi9C/INGB0YPQtNGLINOp0YLQutGW0LfQsdC10LnQtNGWINC+0YHRi9C70LDQudGI0LAg0LPQtdC90LDRgNCw0YbQuNGP0LvQsNC90pPQsNC9INCz0LjQv9C+0YHQvtC80L7Qu9GP0YDQu9GLINKb0rHQsdGL0YDQu9Cw0YAg0YHSsdC50YvSm9GC0Ysg0LHRltGAINC00LXSo9Cz0LXQudC00LUg0rHRgdGC0L8g0YHQsNKb0YLQsNC/INC+0YLRi9GA0LDQtNGLLtCh0L7QvdGL0LzQtdC9INKb0LDRgtCw0YAg0LTQuNGB0YLQsNC70YzQtNKjINGC0q/RgtGW0LrRiNC1INC60LDRhtC40Lkg0LzQtdC9INC80LDQs9C90LjQudC00ZbSoyDRgNC10LDQsdGB0L7RgNCx0YbQuNGP0YHRi9C90LAg0LbTmdC90LUg0LTTmdC70LTRltC6INC/0LXQvSDRgNC10YLRgtC10LvQtdGD0ZbQvdC1INC20LDRg9Cw0L8g0LHQtdGA0LXQtNGWLiDQvdOZ0YLQuNC20LXRgdGW0L3QtNC1INGB0q/Qt9GW0LvQs9C10L0g0LHQtdGBINC/0YDQvtGG0LXQvdGCINC60LvRjNGG0LjQuSDQvNC10L0g0LzQsNCz0L3QuNC5INC90LXRgdC10L/Qv9C10L0g0YjRi9KT0LDRgNGL0LvQsNC00Ysg0LrQu9GG0LjQuSDQvNC1INC80LDQs9C90LjQudC00ZbSoyDQsNKT0LfQsNC00LDSk9GLINGE0YPQvdGG0LjRj9GB0Ysg0L7Qu9Cw0YAg0LHRltC30LTQtSDRgdKv0LnQtdC6INCx0YPRi9C90LTQsNGA0LTRi9KjINC80L7RgNGE0L7Qu9C+0LPQuNGP0LvRi9KbINKb0rHRgNC70YvQvNGLINCx0L7Qu9GL0L8g0YHQsNC90LDQu9Cw0LTRiyDQtdC60LXQvS7QldC90LTRltCz0ZYg0LHSsdC70LDRgNC00YvSoyDRgNC10YLRgtC10LvRg9GW0L3QtSDQutC10LvQtdGC0ZbQvSDQsdC+0LvRgdCw0psg0L7QuyDTmdGA0LjQvdCwINCw0LvRjNC00L7RgdGC0LXRgNC+0L0g0LPQvtGA0LzQvtC90Ysg0LDRgNKb0YvQu9GLINC20q/RgNC10LTRliDRj9KT0L3Ri9C5INCx0rHQuyDQs9Cw0YDQvNC+0L0g0LHTqdC70ZbQvdC10YLRltC9INCx0L7Qu9GB0LAg0LHRltC30LTQtdCz0ZYg0YLSr9GC0ZbQutGI0LXQu9C10YDQtNC10LPRliDQvdCw0YLRgNC40LnQtNGW0qMg0YDQtdCw0LHRgdC+0YDQsdGG0LjRj9GB0Ysg0LrSr9GI0LXQudGW0L8g0pvQsNC90LTQsNKT0Ysg0YHSsdC50YvSm9GC0YvSo9GC0YvSoyDQutOp0LvQtdC80ZbQvSDQutOp0LHQtdC50YLQtdC00ZYg0LrQsNC70LjQuSDRgdGD0YLQtdCz0ZYg0LjQvtC90LTQsNGA0YvQvdGL0qMg0YHQtdC60YDQtdGG0LjRj9GB0Ysg0LbQvtKT0LDRgNC70LDQudC00Ysg0pvQsNC9INGC0LDQvNGL0YDRi9C90LTQsNKT0Ysg0LLQvtC30L7QutC+0L3RgdGC0YDQuNC60YLQvtGA0LvQsNGA0LTRi9KjINGB0LXQt9GW0LzRgtCw0LvQtNGL0pPRiyDQsNGA0YLRi9C/INKb0LDQvSDSm9GL0YHRi9C80YvQvdGL0qMg0LbQvtKT0LDRgNC70LDRgtCw0LTRiyDRj9KT0L3Ri9C5INGC0L7Qu9GL0psg0LDQudGC0pvQsNC90LTQsCDQsNC70YzQtNC10YHRgtC+0YDQvtC9INKb0YvQt9C80LXRgtGWINKb0LDQvSDSm9GL0YHRi9C80YvQvSDRgNC10YLRgtC10YMg0LDSk9C30LDQtNCw0pPRiyDQuNC+0L0g0LHQsNC70LDQvdGL0YHRgtCw0YDRi9C90YvSoyDRgtC10L/QtSDRgtC10qPQtNGW0LPRltC9INGB0LDSm9GC0LDRgyDRgdC+0L3Ri9C80LXQvSDSm9Cw0YLQsNGAINCw0pPQt9Cw0LTRiyDQvdCw0YLRgNC40Lkg0LDQvNCw0YHRg9C90LAg0YHRg9C00YvSoyDQvNOp0LvRiNC10YDTmdC90LUg0LbQsNGD0LDQvyDQsdC10YDQtdC00ZYg0LbQsNGB0YPRiNCw0LTQsNC9INGC0YvRgSDRgdKx0LnRi9Kb0YLRi9KbINC606nQu9C10LzRltC9INGA0LXRgtGC0LXQudC00ZYu0JXQvdC00ZbQs9GWINCx0LDQu9Cw0LvQsNGA0LTQsNKT0Ysg0YTRg9C90YbQuNGP0YHRi9C90YvSoyDQsNC50YvRgNC80LDRiNGL0LvRi9KT0YvQvdCwINC60LXQu9C10YLRltC9INCx0L7Qu9GB0LDSmyDQvtC70LDRgNC00LDSk9GLINC90LXRhNGA0L7QvdC90YvSoyDRgtC+0LvRi9KbINC20LXRgtGW0LvQvNC10LPQtdC90LTRltC60YLQtdC9INCx0LjQutCw0YDQsdCw0L3QsNGC0YLQsNGA0LTRi9KjINGB0ZbSo9GW0YDQu9GD0ZYg0YLTqdC80LXQvSDQsdC+0LvRi9C/INCz0L7RgNC80L7QvSDQsdOp0LvRg9C00LUg0YHQvtKT0LDQvSDQttCw0YDQsNGB0LAg0YLTqdC80LXQvSDQsdC+0LvRi9C/INC60LXQu9C10LTRliDQvtC00LDQvSDQsdOp0LvQtdC6INCx0LDQu9Cw0YDQtNCwINC305nRgNC00ZYg0YPRgdGC0LDQvyDRgtGD0YDRg9GL0LTQsCDSm9GL0LnRi9C9INC+0pPQsNC9INGB0LXQsdC10L8g0LDQtNCzINC90YvSoyDRgdC10LfRltC80YLQsNC70LTRi9KT0Ysg0YHQvtC90YvSoyDQvdOZ0YLQuNC20LXRgdGW0L3QtNC1INC305nRgCDRiNGL0pPQsNGA0Ysg0LHQsNC70LDQu9Cw0YDQtNCwINC20LjRliDQsdC+0LvQsNC00Ysg0L7QtNCw0L0g0LHTqdC70LXQuiDRgdGD0LTRi9KjINC60L7QvdGG0LXQvdGA0LDRhtC40Y/RgdGL0L0g0LHRltGAINKb0LDQu9GL0L/RgtCwINGD0YHRgtCw0Lkg0LDQu9C80LDRgyDQutOp0LHRltC90LUg0YDQtdCw0LHRhtC+0YDQsdGG0LjRjyDQutC10LfRltC90LTQtSDRgdGD0LTRi9GWINC606nQvyDQsdOp0LvRltCz0ZYg0LrQtdGA0ZYg06nQsNC50YLQsNGA0YvQu9C80Lkg0LfTmdGAINCw0YDSm9GL0LvRiyDRiNGL0pPRi9C/INC60LXRgtC10LTRli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49" table:style-name="ce1">
            <text:p>915249</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kg0J3QtdCz0ZbQt9GWINCz0LXQvNC+0LPQu9C+0LHQuNC90L3RltKjINKv0Ygg0YLSr9GA0ZYg0LHQvtC70LDQtNGLLiDQpNC10YLQsNC70LTRi9KbINCz0LXQvNC+0LPQu9C+0LHQuNC9IChIYkYpICwg0rDRgNGL0pvRgtGL0psg0LPQtdC80L7Qs9C70L7QsdC40L0gKEhiUCksINC10YDQtdC60YHQtdC60YLRltC6INCz0LXQvNC+0LPQu9C+0LHQuNC9IChIYkEpINCx0L7Qu9Cw0LTRiy4g0KTQtdGC0LDQu9C00YvSmyDQs9C10LzQvtCz0LvQvtCx0LjQvSDSsdGA0YvSmyDQv9C10L0g0LbQsNKj0LAg0YLRg9KT0LDQvSDQsdCw0LvQsNC00LAg0LHQvtC70LDQtNGLLiDQltCw0qPQsCDRgtGD0pPQsNC9INCx0LDQu9Cw0LvQsNGA0LTQsCDQs9C10LzQvtCz0LvQvtCx0LjQvdC90ZbSoyDQvNOp0LvRiNC10YDRliDTqdGC0LUg0LbQvtKT0LDRgNGLINCx0L7Qu9Cw0LTRiy4g0KjQsNC80LDQvNC10L0gMTYwLTE4MCAg0LzTqdC70YjQtdGA0LTQtS4g0JbTmdC90LXQtNC1INC+0LvQsNGA0LTQsCDQtdGA0LXRgdC10LrRgtC10YDQtNGW0qMg0LPQtdC80L7Qs9C70L7QsdC40L3RliDQtdC80LXRgSDRhNC10YLQsNC70LTRi9KbINC205nQvdC1INKx0YDRi9Kb0YLRi9KbINCz0LXQvNC+0LPQu9C+0LHQuNC9INCx0L7Qu9Cw0LTRiy4g0KTQtdGC0LDQu9C00YvSmyDQttOZ0L3QtSDSsdGA0YvSm9GC0YvSmyDQs9C10LzQvtCz0LvQvtCx0LjQvdC90ZbSoyDSm9Cw0LvRi9C/0YLRiyDQs9C10LzQvtCz0LvQvtCx0LjQvdC10L0g0LXRgNC10LrRiNC10LvRltCz0ZYg0L7Qu9Cw0YAg0L7RgtGC0LXQs9GW0LzQtdC9INKx0pvRgdCw0YHRgtGL0pPRiyDQttOZ0L3QtSDQttCw0pvRi9C90LTRi9KT0Ysg0LrTqdC/INCx0L7Qu9Cw0LTRiyAsINGP0pPQvdC4INC+0YLRgtC10LPRltC80LXQvSDQutOp0LHRltGA0LXQuiDQsdCw0LnQu9Cw0L3Ri9GB0LDQtNGLLiDQntC7INC+0YHRiyDQtdGA0LXQutGI0LXQu9GW0LPRliDQv9C70LDRhtC10L3RgtCwINCw0YDSm9GL0LvRiyDQvtGC0YLQtdCz0ZbQvSDQtNCw0LzRi9C/INC20LDRgtKb0LDQvSDSsdGA0YvSm9Kb0LAg0LbQtdGC0LrRltC30LXQtNGWLiDQltOZ0L3QtdC00LUg0LXRgNC10YHQtdC60YLRltC6INCz0LXQvNC+0LPQu9C+0LHQuNC9INC90LXQs9GW0LfRliDQtdC60ZYg0LDQu9GM0YTQsNC70YvSmyDQttOZ0L3QtSDQsdC10YLRgtCw0LvRi9KbINGC0ZbQt9Cx0LXQutGC0LXRgNC00LXQvSDRgtKx0YDQsNC00YssINCw0Lsg0YTQtdGC0LDQu9C00YvSmyDSm9Kx0YDRi9C70YvQvNGLICDQtdGA0LXQutGI0LXQu9C10L3QtdC00ZYuICAgICAgICAgICAgICAgICAgICAgICAgICAgICAgICAgICAgICAgICAgICAgICAgICAgICAgICAgICAgICAgICAgICAyKdCR0LDQu9Cw0LvQsNGA0LTQsCDQvdC10YTRgNC+0L3QvdGL0qMg0LTQuNGB0YLQsNC70LTRiyDQutCw0L3QsNC70LTQsNGA0Ysg0YDQtdCw0LHRgdC+0YDQsdGG0LjRjyDSr9C00LXRgNGW0YHRgtC10YDRltC90LUsINCw0LvRjNC00L7RgdGC0LXRgNC+0L3QvdGL0qMg06nQvdC00ZbRgNGW0LvRg9GW0L3QtSAsINCw0LvSk9Cw0YjSm9GLINGC0q/Qt9GW0LvQs9C10L0g0LfTmdGA0LTQtdCz0ZYg0YHRg9C00YvSoyDQttOZ0L3QtSDQvdCw0YLRgNC40LnQtNGL0qMg0YHRltKj0YPRltC90LUgLCDRjdC70LXQutGC0YDQvtC70LjRgtGC0ZbQuiDRgdGD0LvRi9KbINCx0LDQu9Cw0L3RgdGC0Ysg0YHQsNKb0YLQsNGD0LTQsCDQvNCw0qPRi9C30LTRiyDRgNOp0Lsg0LDRgtKb0LDRgNCw0LTRiy4g0JDQudC90LDQu9GL0LzQtNCw0pPRiyAg0pvQsNC90L3Ri9KjINC806nQu9GI0LXRgNGWINCw0LfQsNC50pPQsNC90LTQsCDQvtGB0Ysg0LDQu9GM0LTQvtGB0YLQtdGA0L7QvSDQs9C+0YDQvNC+0L3Ri9KjINOZ0YHQtdGA0ZbQvdC10L0g0L3QtdGE0YDQvtC90L3Ri9KjINC00LjRgdGC0LDQu9C00Ysg0LrQsNC90LDQu9GL0L3QtNCwINGB0YPQtNGL0qMg0LbTmdC90LUg0L3QsNGC0YDQuNC5INGC0rHQt9C00LDRgNGL0L3Ri9KjICDRgdGW0qPRltGA0ZbQu9GD0ZYg0LbSr9GA0LXQtNGWLiDQr9KT0L3QuCDRgdGD0LTRi9KjINKb0LDQudGC0LAg0YHRltKj0YPRliDTmdGB0LXRgNC/0ZbQvdC10L0g0LDQudC90LDQu9GL0LzQtNCw0pPRiyDSm9Cw0L0g0LzTqdC70YjQtdGA0ZYg0LrTqdCx0LXQudC10LTRli4g0KLQsNKT0YvQtNCwINCx0LDRgdKb0LAg0Y3Qu9C10LrRgtC+0YDQu9C40YLRgtC10YDQtNGW0qMg0YHRltKj0YPRltC90LUg0LbTmdC90LUg0LDRgNGC0YvSmyDQvNOp0LvRiNC10YDQtNC10LPRliDRgtKx0LfQtNCw0YDQtNGL0qMg0YHRltKj0ZbRgNGW0LvQvNC10Lkg0LHTqdC70ZbQvdGW0L8gINGI0YvSk9Cw0YDRg9GL0L3QsCDRi9Kb0L/QsNC7INC10YLQtdC00ZYu0JrQsNC70LjQuSDQvNC10L0g0L3QsNGC0YDQuNC5INGC0rHQt9C00LDRgNGL0L3Ri9KjICDSm9Cw0LnRgtCwINGB0ZbSo9GD0ZbQvSDQttKv0YDQs9GW0LfQtdC00ZYuICDQndC10LPRltC30ZbQvdC10L0g0LHSsdC7INC90LXRhNGA0L7QvSDQutCw0L3QsNC70YjQsNC70LDRgNGL0L3QtNCwINC+0YHRiyDSm9Cw0LnRgtCwINGB0ZbSo9GW0YDRltC70YMg0q/QtNC10YDRltGB0YLQtdGA0ZYg0LbSr9GA0LXQtNGWLiDQkdC40LrQsNGA0LHQvtC90LDRgiDQuNC+0L3QtNCw0YDRi9C90YvSoyDRgtC10L/QtSDRgtC10qPQtNGW0LPRltC9INGB0LDSm9GC0LDRg9KT0LAg05nRgdC10YDRltC9INGC0LjQs9GW0LfQtdC00ZYuICAgIC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75" table:style-name="ce1">
            <text:p>915275</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kg0JbQsNC70L/RiyDQsdGW0LfQtNC1INCx0LDQu9Cw0L3Ri9KjINKb0LDQu9GL0L/RgtGLINC20LDSk9C00LDQudGL0L0sINGB0LDQu9C80LDSk9GLINC80LXQvSDQsdC+0LnRi9C90YvSoyDQvdC+0YDQvNCw0LTQsCDQtdC60LXQvdGW0L0g0LrTqdGA0LXQvNGW0LcuINCW0LDSo9CwINGC0YPRi9C70pPQsNC9INGB0LDRgyDQsdCw0LvQsNC70LDRgNC00LAg0LPQtdC80L7Qs9C70L7QsdC40L3QvdGW0qMg0LzTqdC70YjQtdGA0ZYgMTYwLTE4MCDQsdC+0LvRi9C/INC60LXQu9C10LTRli4g0JrQtdC50ZbQvSDQvtC7INCw0LvSk9Cw0YjSm9GLINCw0LnRi9C90LAg0pvQsNGA0LDQuSDRgtOp0LzQtdC90LTQtdC50LTRliwg0Y/Sk9C90LggMTQwLTE2MCDQvtC00LDQvSDQsNGA0LzQtdC9INKb0LDRgNCw0Lkg0YHQvtC70LDQuSAxINCw0LnQu9GL0pPRi9C90LAg0LbQsNC70pPQsNGB0LDQtNGLLiDQltCw0YEg0rHQu9KT0LDQudKT0LDQvSDRgdCw0LnRi9C9INCz0LXQvNC+0LPQu9C+0LHQuNC9INGC06nQvNC10L3QtNC10L8sINKb0LDQu9GL0L/RgtGLIDEyMC0xNDAg0LTQtdC50ZbQvSDTqdC30LPQtdGA0LXQtNGWLtCR0ZbRgCDQtdGA0LXQutGI0LXQu9GW0LPRliDQttCw0qPQsCDRgtGD0YvQu9KT0LDQvSDRgdCw0YMg0LHQsNC70LDQu9Cw0YDQtNCwINGE0LXRgtCw0LvRjNC00Ysg0LPQtdC80L7Qs9C70L7QsdC40L0gSGJGINC80LXQvSDQnWJBINKb0LDRgtCw0YAg0LbSr9GA0LXQtNGWLiAxLdC60q/QvdC00ZbQuiDQsdCw0LvQsNC00LAg0YTQtdGC0LDQu9GM0LTRiyDQs9C10LzQvtCz0LvQvtCx0LjQvSA3MCUg0pvSsdGA0LDRgdCwLCBIYkEgMTUtMjAlINCw0LvRi9C/INC20LDRgtCw0LTRiy4g0prQsNC70pPQsNC9IDUlINCx0LDRgdKb0LAg0LPQtdC80L7Qs9C70L7QsdC40L0g0pvSsdGA0LDQudC00YsuINCT0LXQvNC+0LPQu9C+0LHQuNC9INCQINGC0LXQuiDQtdGA0LXRgdC10Log0LDQtNCw0LzQtNCw0YAg0pPQsNC90LAgINC60LXQt9C00LXRgdC10LTRli4g0J7QuyDQvtGC0YLQtdC60YLRliDQutOp0LHRltGA0LXQuiDRgdGW0qPRltGA0ZbQvywg0LHQsNGB0pvQsCDRgtGW0L3QtNGW0LTQtdGA0LPQtSDRgtC10Lcg0LDRgNCw0LTQsCDRgtCw0YDQsNGC0LDQtNGLLiDQkdKx0Lsg0YTQtdGC0LDQu9GM0LTRiyDQs9C10LzQvtCz0LvQvtCx0LjQvdC90LXQvSDQtdGA0LXQutGI0LXQu9GW0LPRliDQsdC+0LvRi9C/INC60LXQu9C10LTRli4g0JDQuyDRhNC10YLQsNC70YzQtNGLINCz0LXQvNC+0LPQu9C+0LHQuNC9INGB05nQsdC40LTRltKjINKx0YDRi9Kb0YLRi9KbINC00LDQvNGDINC60LXQt9C10qPRliAzLTQg0LDQv9GC0LDRgdGL0L3QsNC9INCx0LDRgdGC0LDQvyDSm9Cw0LvRi9C/0YLQsNGB0LDQtNGLLiDQltOZ0L3QtSDQvtC7INC00q/QvdC40LXQs9C1INC60LXQu9Cz0LXQvSDRgdOZ0YLRgtC10L0gMS0yINC20LDRgSDQsNGA0LDQu9GL0pPRi9C90LAg0LTQtdC50ZbQvSDQsdC+0LvQsNC00YsuINCR0rHQuyDQs9C10LzQvtCz0LvQvtCx0LjQvdC90ZbSoyDQtdGA0LXQutGI0LXQu9GW0LPRliDSsdGA0YvSm9GC0LAg0LrRltC90LTRltC6INCw0YDRgtC10YDQuNGP0YHRiyDQsNGA0pvRi9C70Ysg0LHQsNC70LDQvdGLINKb0L7RgNC10LrRgtGW0Log0YLQsNGB0YvQvNCw0LvQtNCw0YPRiNGLLCDRgtGL0L3Ri9GBINCw0LvRgyDSm9GL0LfQvNC10YLRgtC10YDRltC9INKb0LDQvNGC0LDQvNCw0YHRi9C3INC10YLRltC/INC+0YLRi9GA0LDQtNGLINC205nQvdC1INKb0rHRgNCw0LzRi9C90LTQsCAyINCw0LvRjNGE0LAg0LbTmdC90LUg0LPQsNC80LzQsCDRgtGW0LfQsdC10LrRgtC10YDRltC90LXQvSDRgtKx0YDQsNC00YsuINCQ0Lsg0LXRgNC10YHQtdC60YLQtdGA0LTQtSAyINCw0LvRjNGE0LAg0LbTmdC90LUg0LHQtdGC0LAg0YLRltC30LHQtdC60YLQtdGA0ZYg0LHQvtC70LDQtNGLLiDQodC+0L3Ri9C80LXQvSDSm9Cw0YLQsNGALCDQttCw0qPQsCDRgtGD0YvQu9KT0LDQvSDRgdOZ0LHQuNC00LUg0Y3RgNC+0YLRgNC+0YbQuNGC0YLQtdGAINC00LXSo9Cz0LXQudGWINC00LUg0LbQvtKT0LDRgNGLINCx0L7Qu9GL0L8g0LrQtdC70LXQtNGWLiDQkdKx0Lsg0LPQtdC80L7Qs9C70L7QsdC40L3Qu9C00ZbQuiDQtNC10qPQs9C10LnQs9C1INGB0LDQuSDQsdC+0LvRgyDSr9GI0ZbQvS4gPGJyIC8+DQoyKSDQkdCw0LvQsNC70LDRgNC00LAg0L3QtdGE0YDQvtC90L3Ri9KjINC00LjRgdGC0LDQu9GM0LTRiyDQutCw0L3QsNC70YjQsNC70LDRgNGL0L3Ri9KjINC90LXQs9GW0LfQs9GWINKb0YvQt9C80LXRgtGWINGA0LXQsNCx0YHQvtGA0LHRhtC40Y/QvdGL0qMg0YHQvtKj0pPRiyDQutC10LfQtdKj0LTRltC6INKb0YvQt9C80LXRgtGW0L0g0LDRgtKb0LDRgNCw0LTRiy4g0JbQsNKj0LAg0YLRg9GL0LvSk9Cw0L0g0LHQsNC70LDQu9Cw0YDQtNCwINC305nRgCDRiNGL0pPQsNGA0YMg0LbQvtC70LTQsNGA0Ysg0YLQvtC70YvSmyDQttC10YLRltC70LzQtdCz0LXQvS4g0J3QtdCz0ZbQt9Cz0ZYg0LTQsNC80YMg0LrTqdC30ZYg0LzQtdC30LXQvdGF0LjQvNCw0LTQsNC9INGC0LDQsdCw0pvRiNCw0LvQsNGA0YssINC90LXRhNGA0L7QvSDRgtKv0YLRltC60YjQtdC70LXRgNGWINC00LDQvNC40YLRi9C9INCx0L7Qu9Cw0LTRiy4g0J3QtdGE0YDQvtC90L3Ri9KjINC00LjRgdGC0LDQu9GM0LTRiywg0L/RgNC+0LrRgdC40LzQsNC70YzQtNGLINGC0q/RgtGW0LrRiNC10LvQtdGA0ZYg0LbTmdC90LUg0LPQtdC90LvQtSDRltC70LzQtdCz0ZYg0LHQvtC70LDQtNGLLiAg0KHQvtC90YvSoyDQtNC40YHRgtCw0LvRjNC00Ysg0LrQsNC90LDQu9GI0LDQu9Cw0YDRiyDRgNC10LDQsdGB0L7RgNCx0YbQuNGPINKb0YvQt9C80LXRgtGC0LXRgNGW0L0g0LDRgtKb0LDRgNCw0LTRiy4g0K/Sk9C90LgsINC60LXRgNGWINGB0ZbSo9GW0YDRgyDSm9GL0LfQvNC10YLRgtC10YDRliwg0LDQu9Cw0LnQtNCwLCDQttCw0qPQsCDRgtGD0YvQu9KT0LDQvSDQsdCw0LvQu9Cw0YDQtNCwINC305nRgCDRgtC10Lcg0YLQtdC30LTQtdC9INGI0YvSk9GL0L8g0L7RgtGL0YDQsNC00YsuINCR0rHQuyDSm9GD0YvSm9GC0YvSoyDQt9OZ0YDQtNGWINKx0YHRgtCw0L8g0YLSsdGA0LDRgtGL0L0g0YDQtdGG0LXQv9GC0L7RgNC70LDRgNGLINC80LXQvSDQsdCw0YEg0LzQuNGL0L3QtNCw0pPRiyDQvtGA0YLQsNC70YvSm9GC0LDRgNGL0L3Ri9KjINC00rHRgNGL0YEg0LbQtdGC0ZbQu9C80LXRg9GW0L3RltKjINOZ0YHQtdGA0ZbQvdC10L0uINCW0LDSo9CwINGC0YPRi9C70pPQsNC9INGB05nQsdC40LvQtdGA0LTQtSAzMC00MNC80Lsg0LPQtSDQtNC10LnRltC9INC305nRgCDQvNOp0LvRiNC10YDRltC9INKx0YHRgtCw0L8g0YLSsdGA0LAg0LDQu9Cw0LTRiy4g0JfTmdGAINGC0LXQtyDQsdOp0LvRltC90YPRltC90LUg0LHQsNC50LvQsNC90LDRgdGC0Ysg0LbQsNKj0LAg0YLRg9GL0LvSk9Cw0L0g0LHQsNC70LAg0YHRgyDQvNOp0LvRiNC10YDRltC00LUg0LDQt9Cw0LnRi9C/LCDRgdCw0LvQvNCw0psg0LbQvtKT0LDQu9GC0LDQtNGLLiDQkdKx0Lsg0L3QtdGE0YDQvtC9INC00LjRgdGC0LDQu9GM0LTRiyDQsNC50LzQsNKb0YLQsNGA0YvQvdC00LAg0LfTmdGA0LTRltKjINC60L7QvdGG0LXQvdGC0YDQsNGG0LjRj9GB0YvQvdCwINC205nQvdC1INGA0LXRgtGC0YPRltC90LUg0LHQsNC50LvQsNC90YvRgdGC0Ysg0LHQvtC70YvQvyDQutC10LvQtdC00ZYuINCh0L7QvdGL0LzQtdC9INKb0LDRgtCw0YAsINCx0rHQuyDQutCw0L3QsNC70YjQsNC70LDRgNGL0LzRi9C3INCx0LjQutC+0YDQsdCw0L3QsNGCINC40L7QvdC00LDRgNGL0L0g0YDQtdCw0LHRgdC+0YDQsdGG0LjRj9C70LDQvywg0YHRg9GC0LXQs9GWINC40L7QvdC00LDRgNGL0L0g0LHTqdC70YMg0LDRgNKb0YvQu9GLINC+0YDQs9Cw0L3QuNC30LzQvdGW0qMg0pvRi9GI0pvRi9C70LTRi9KbLdGB0ZbQu9GC0ZbQu9GW0Log0YLQtdC/0LUt0YLQtdKj0LTRltC60YLRliDRgdCw0pvRgtCw0L8g0YLSsdGA0LDQtNGLLiDQndCw0YLRgNC40Lkg0LjQvtC90LTQsNGA0YvQvSDRgNC10LDQsdGB0L7RgNCx0YbQuNGP0LvQsNC50LTRiyDQttOZ0L3QtSDQtNC1INCw0LvRjNC00LXRgdGC0LXRgNC+0L0g0LPQvtGA0LzQvtC90YvQvSDRgNC10YLRgtC10YMg0LDRgNKb0YvQu9GLINKb0LDQvSDSm9GL0YHRi9C80YvQvdC00LAg0LzQsNKj0YvQt9C00Ysg0YDTqdC7INCw0YLSm9Cw0YDQsNC00YsuINCQ0YLQsNC/INCw0LnRgtGB0LDSmywg0LTQuNGB0YLQsNC70YzQtNGLINGC0q/RgtGW0LrRiNC10L3RltKjINC80LDSo9GL0LfRiyDQt9C+0YAg0LbTmdC90LUg0LrTqdC/0YLQtdCz0LXQvSDSm9GL0LfQvNC10YLRgtC10YAg0LDRgtKb0LDRgNCw0LTRiy4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4" table:style-name="ce1">
            <text:p>915284</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nQltCw0qPQsCDRgtGD0pPQsNC9INCx0LDQu9C00LDRgNC00LAg0LHQvtC50YvQvNC10L0g0YHQsNC70LzQsNKT0YsgM9C60LMg0LzQtdC9IDUxINGB0Lwg0LHQvtC70YPRiyDQvdC+0YDQvNCwINCx0L7Qu9GL0L8g0YHQsNC90LDQu9Cw0LTRiy4g0JbQsNKj0LAg0YLRg9KT0LDQvSDQsdCw0LvQtNCw0YDQtNCwINCz0LXQvNC+0LPQu9C+0LHQuNC9INGE0LXRgtCw0LvRliDQs9C10LzQvtCz0LvQvtCx0LjQvSwg0L7QuyDQs9C10LzQvtCz0LvQvtCx0LjQvdC90ZbSoyDQvtGC0YLQtdC60L/QtdC9INC20LDSm9GL0L3QtNGL0pPRiywg0YHRgNC+0LTRgdGC0LLQvtGB0Ysg0LbQsNKb0YvQvSDQsdC+0LvSk9Cw0L3QtNGL0pvRgtCw0L0g0L7QuyDQvtGC0YLQtdC10LrQv9C10L0g0LbQsNKb0YHRiyDQsdCw0LnQu9Cw0L3Ri9GB0LAg0LTRiy4g0LbTmdC90LUg0LHQsNC70LTQsNGA0LTQsCDQs9C10LzQvtCz0LvQvtCx0LjQvSDQvNC+0LvRiNC10YDRliAyNDAg0LbQsNKb0YvQvS4g0LHSsdC7INC60L7RgNGB0LXRgtC60ZbRiCDRg9Cw0pvRi9GCINOp0YLQtSDQutC10LvQtSDRgtC+0LzQtdC90LTQtdC50LTRliwg0YHQvtC90LTQsNC9INC10YDQu9C10YDQtNC1IDEzMC0xNjAg0LzQtdC9INOZ0LnQtdC70LTQtdGA0LTQtSAxMjAtMTQwINCx0L7Qu9GL0L8g06nQt9Cz0LXRgNC10LTRli4g0YTQtdGC0LDQu9C00ZYg0LPQtdC80L7Qs9C70L7QsdC40L0g0LHQsNC70LDRgNC00LAg0rHRgNGL0pvRgtCwINCx0L7Qu9Cw0LTRiyDQvtC7INCw0L3QsCDSm9Cw0L3Ri9C90LTQsNKT0Ysg0L7RgtGC0LXQutGC0ZYg0LDQvdCwINKb0LDQvdGL0L3QtNCw0pPRiyDQs9C10LzQvtCz0LvQvtCx0LjQvdC90LXQvSDRgtCw0YDRgtGL0L8g0LDQu9Cw0LTRiy4g0L7QuyAg0JDQv9Cz0LDRgCDRiNC60LDQu9Cw0YHRiyDQsdC+0LnRi9C90YjQsCDQutC+0YDRgdC10YLQutGW0YjRgtC10YDRliDQutC10YDQtdC80LXRgi4g0L7QuyDQttC10YDQtNC10L0gOSAg0LHQsNC70LTRi9KbINC20q/QudC1INCx0L7QudGL0L3RiNCwIDgg0LHQsNC70Lsg0LDQu9KT0LDQvS4gINGE0LXRgtCw0LvQtNGWINCz0LXQvNC+0LPQu9C+0LHQuNC90L3RltKjINGC0LDSk9GLINCx0ZbRgCDQtdGA0LXQtdC60YjQtdC70ZbQs9GWINC+0L3Ri9KjINKx0LvQutC10L0g0LDQtNCw0LzQtNCw0YDQtNGL0qMg0LPQtdC80L7Qs9C70L7QsdC40L3RltC90LXQvSDQsNC50YvRgNC80LDRiNGL0LvRi9KT0Ysg0L7RgtGC0LXQutC/0LXQvSDQttCw0pvRi9C90LTRi9KT0Ysu0L7QuyDQsNC90LDQvdGL0qMg0pvQsCDQsNKT0YvQvNGL0L3QsNC9INC+0YLRgtC10LrRgtGWINGC0LjRltC80LTRliDRiNGL0pPQsNGA0YvQvywg0LHQsNC70LDSk9CwINC20LXRgtC60ZbQt9C10LTRli7RhNC10YLQsNC70LTRliDQs9C10LzQvtCz0LvQvtCx0LjQvSAyINCw0LvRhNCwIDIg0LPQsNC80LzQsCDRgtGW0LfQsdC10LrRgtC10L0g0YLSsdGA0LDQtNGLLiDQsNC7INC10YDQtdGB0LXQuiDQsNC00LDQvNC90YvSkyDQs9C10LzQvtCz0LvQvtCx0LjQvdGWIDIg0LDQu9GE0LAgMtCx0LXRgtCwINGC0ZbQt9Cx0LXQutGC0LXQvSDRgtKx0YDQsNC00YsuMiDQs9Cw0LzQvNCwINGC0ZbQt9Cx0LXQuiDQvtC7IDIg0LHQtdGC0YLQsCDRgtGW0LfQsdC10LrQutC1INKb0LDRgNCw0pPQsNC90LTQsCDQvtGC0YLQtdC60L/QtdC9INC20LDSm9GL0L3QtNGL0pPRiyDQttC+0pPQsNGA0Ysu0LHSsdC7INGE0LXRgtCw0LTRliDQs9C10LzQvtCz0LvQvtCx0LjQvSDQttCw0pvRgdGLINCx0LDQudC70LDQvdGL0YHSm9Cw0L0g0L7RgtGC0LXQutGC0ZbSoyDQsNC90LDQtNCw0L0g0LHQsNC70LDSk9CwINC/0YDQtdC90LDRgtCw0LvQtNGWINOp0YLRg9GW0L3QtSAg0LzSr9C80LrRltC90LTRltC6INCx0LXRgNC10LTRli7QvtGB0YvQvdGL0qMg0L3TmdGC0LjQttC10YHRltC90LTQtSDQsdCw0LvQsNC00LAg0rHQu9C/0LDQu9Cw0YDRiyDRgtGL0L3Ri9GBINCw0LvQsNC00YsuPGJyIC8+DQoyKSDQvdC10LPRltC30ZYg0LXRgNC10YHQtdC60YLQtdGA0LTQtSDQvdC10YTRgNC+0L0gMyDQsdC+0LvRltC60YLQtdC9INGC0rHRgNCw0LTRiy4g0L/RgNC+0LrRgdC40LzQsNC70LTRliwg0LTQuNGB0YLQsNC70LTRliwg0ZbQu9C80LXQui4g0JTQuNGB0YLQsNC70LTRliDQttOZ0L3QtSDQv9GA0L7QutGB0LjQvNCw0LvQtNGLINC60LDQvdCw0LvQtNCw0YAg0YLSo9C6INC205nQvdC1INC40YDQtdC60YLQtdC70LPQtdC9INC60LDQvdCw0LvQtNCw0YAg0LTQtdC/INCw0LbRi9GA0LDRgtGL0LvQsNC00YsuINC+0LvQsNGAINGA0LXQsNCx0YHQvtGA0LHRhtC40Y/Sk9CwLCDQutC10LnQsdGW0YAg0LDQvNC40LDQuiwg0LrRgNC10LDRgtC40L3QuNC9INGI0YvSk9GD0YvQvdCwLCDQvdCw0YLRgNC40Lkg0LzQtdC9INC60LDQu9C40Lgg0LDQu9C80LDRgdGD0YvQvdCwINGA0L7QuyDQvtC50L3QstC50YLRi9C9INC80LDSo9GL0LfQtNGLINKb0rHRgNGL0LvRi9C80LTQsNGALiDQldGA0LXRgdC10LrRgtC10YDQtNC1INC00LjRgdGC0LDQu9GM0LTRliDRgtKv0YLRltC60YjQtSDRgdGD0LTRi9KjINC80LjQvdC10YDQsNC70LTQsNGA0LTRiywg0YDQtdCw0LHRgdC+0YDQsdGG0LjRj9GB0YvQvdCwINC20LDRg9Cw0L8g0LHQtdGA0LXQtNGWLiDQvtC7INCz0LjQv9C+0YLQsNC70LDQvNGD0YHRgtCw0L0g0LHQvtC70ZbQvdC10YLRltC9INCQ0JTQkyDQs9C+0YDQvNC+0L3RiyDQsNGA0pvRi9C70Ysg0LbSsdC80YvRgdGLINC60q/RiNC10LnQtdC00ZYuINCQ0JTQkyDQs9C+0YDQvNC+0L3RiyDQutC+0L8g0LHQvtC70ZbQvdGB0LUg0YDQtdCw0LHRgdC+0YDQsdGG0LjRjyDQttCw0pvRgdGLINC20q/RgNC10LTRli7Rj9KT0L3QuCDQt9OZ0YDQtNGW0qMg0LrQvtC90YbQtdC90YLRgNCw0YbQuNGP0YHRiyDQvNC10L0g0pvSsdGA0LDQvNGL0L0g0YDQtdGC0YLQtdGD0LPQtSDSm9Cw0YLRi9GB0LDQtNGLLiDQkNC7INCx0LDQu9Cw0LvQsNGA0pPQsCDQutC10LvRgdC10LogINCx0LDQu9Cw0YDQtNCwINC90LXRhNGA0L7QvSDRgtKv0YLRltC60YjQtdC70LXRgNGWINGC0YPRgNCwINGB0L7QvdC00LDQuSDSm9GL0LfQvNC10YIg0LDRgtKb0LDRgNCw0LTRiyDQsdGW0YDQsNKbINGC0L7Qu9GL0psg0LbQtdGC0ZbQu9C80LXQs9C10L0uINCe0Lsg0LHQsNC70LDQu9Cw0YDQtNCwINCx0LjQutCw0YDQsdC+0L3QsNGC0YLQsNGA0LTRiyDRgNC10LDQsdGG0LjRj9C70LDRgywg0YHRg9GC0LXQuiDQuNC+0L3QtNCw0YDRi9C9INCx0L7Qu9GDINCw0YDSm9GL0LvRiyDQtNC10L3QtdC90ZbSoyDSm9GL0YjSm9GL0LvQtNGLINGB0ZbQu9GC0ZbQu9GW0Log0YLQtdC/0LUg0YLQtdKj0LTSo9Cz0qPQvSDRgNC10YLRgtC10YPQtNC1INC80LDSo9GL0LfQtNGLINGA0L7QuyDQsNGC0pvQsNGA0LDQtNGLLiDQutCw0LvQu9C4INGB0LjRj9Kb0YLRiyDRjdC70LXQutGC0YDQvtC70LjRgtGC0LXRgNC00ZbSoyDQutC+0L3RhtC10L3RgtGA0LDRhtC40Y/RgdGL0L0g0YDQtdGC0YLQtdGD0LPQtSDQutC+0LzQtdC60YLQtdGB0LXQtNGWLiDQvtC7INC20LXRgNC00LXQvSDQsNC70LTQvtGB0YLQtdGA0L7QvSDTqdC90LTRltGA0ZbQu9C10LQg0L3QsNGC0YDQuCDQvNC10L0g0YHRg9C00YvSoyDQutC+0L3RhtC10L3RgtGA0LDRhtC40Y/RgdGL0L0g0pvQsNC00LDSk9Cw0LvQsNGDINCw0YDSm9GL0LvRiyDSm9Cw0L0g0pvRi9GB0YvQvNGL0L0g0YDQtdGC0YLQtdGD0LPQtSDSm9Cw0YLRi9GB0LDQtNGLIDUtMTAg0L/QsNC50YvQt9KT0LAg0LTQtdC50ZbQvSAuINC60LDQu9GG0Lgg0LzQtdC9INC80LDQs9C90LjQtNGW0qMg0YDQtdCw0LHRgdC+0YDQsdGG0LjRj9GB0YvQvdGL0qMg0YDQtdGC0YLQtdC70YPRltC90LUg0LbQsNGD0LDQvyDQsdC10YDQtdC00ZYsNdC/0LDQudGL0LfQtNCw0L0g0YLQvtC80LXQvSDRiNGL0pPQsNGA0YvQu9Cw0LTRiy4g0JDQu9C00L7RgdGC0LXRgNC+0L0g05nRgdC10YDRltC90LXQvSDSm9Cw0L3QtNCw0pPRiyDQvtGB0LzQvtGB0YLRi9KbINKb0YvRgdGL0Lwg0YDQtdGC0YLQtdC70LXQtNGWLiDQnNKv0L3Ri9KjINCx0LDRgNGWINC00LjRgdGC0LDQu9C00ZYg0YLSr9GC0ZbQutGI0LXQtNC1INC20q/RgNC10LTRli4g0JDSk9C30LDQs9CwINC60LXRgNC10LrRgtGWINC30LDRgtGC0LDRgNC00YvSkyDSm9Cw0LnRgtCwINGB0ZbSo9GW0YDRltC70YPRltC90LUg0q/Qu9C60LXQvSDQutC+0LvQtdC80LTQtSDSm9Cw0YLRi9GB0LDQtNGLLiDQutCw0LvQu9C4INC80LXQvSDRgdGD0LTRi9KjINC60L7QvyDRgdC10LrRgNC10YbQuNGP0YHRiyDQsNC50L3QsNC70YvQvNC00LDSk9GLINKb0LDQvSDQutC+0LvQtdC80ZbQvSDRgtC+0LzQtdC90LTQtdGC0YHQtSDQv9C10YDQuNGE0LXRgNC40Y/Qu9GL0psg0YLQsNC80YvRgNC00LDRgNC00LAg0YHQv9Cw0LfQvCDRgtGD0YvQvdC00LDRg9GLINC80q/QvNC60ZbQvS4g0Y/Sk9C90Lgg0pvQsNGA0LDRgdCw0psg0LHQsNC70LDQu9Cw0YDQtNCwINGC0rHRgtGW0LrRiNC1INC305nRgNC00ZbSoyDQutC+0L3RhtC10L3RgtGA0LDRhtC40Y/RgdGL0L0gLCDQvtGB0LzQvtGB0YLRi9KbINKb0YvRgdGL0LzQtNGLLCDSm9Cw0L0g0pvRi9GB0YvQvNGL0L0sINKb0YvRiNKb0YvQu9C00Ysg0YHRltC70YLRltC70ZbQuiDRgtC10L/QtdGC0LXSo9C00ZbQutGC0ZYsINC60LDQu9GG0Lgg0LzQtSDQvdGE0L7RgdGE0L7RgCDQsNC70LzQsNGB0YPRi9C9LCDQvdCw0YDRgtC4INC80LXQvSDRgdGDINCw0LvQvNCw0YHRg9GL0L0sICDRgNC10YLRgtC10LnQtNGWLiDQtdC90LTRliDRgtC+0LvRiyDQttC10YLRltC70LzQtdCz0LXQvdC00ZbQutGC0LXQvSDQt9OZ0YDQtNGW0qMg0LrQvtC90YbQtdC90YLQsNGA0YbQuNGP0YHRiyDRgtC+0LzQtdC9INCx0L7Qu9GD0Ysg0LzSr9C80LrRltC9LNKb0YvRiNKb0YvQu9C00Ysg0YHRltC70YLRltC70ZbQuiDRgtC10L/QtSDRgtC10qPQtNGW0LrRgtGWINGC0L7Qu9GL0psg0YDQtdGC0YLQtdC5INCw0LvQvNCw0YPRiyDQvNKx0LzQutGW0L0g0LTQtdCz0LXQvdC00LXQuS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40" table:style-name="ce1">
            <text:p>915340</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dGI0ZYg0YHSsdGA0LDSm9Kb0LAg0LbQsNGD0LDQvyAtINCW0LDSo9CwINGC0YPSk9Cw0L0g0YHQsNGDINCx0LDQu9Cw0LvQsNGA0LTQsCDQs9C10LzQvtCz0LvQvtCx0LjQvSDQvNOp0LvRiNC10YDRli0xNDAtMjIwINCzL9C7INCw0YDQsNC70YvSk9GL0L3QtNCwINCx0L7Qu9GL0L8g0LrQtdC70LXQtNGWLiDSsNGA0YvSm9GC0YvSmyDQs9C10LzQvtCz0LvQvtCx0LjQvSAtINCx0rHQuyDQvdOZ0YDQtdGB0YLQtdC90ZbSoyDQttCw0YLRi9GAINGW0YjRltC90LTQtdCz0ZYg0LTQsNC80YMg0LrQtdC30LXSo9GW0L3QtNC1INC+0YLRgtC10LPRltC90ZYg0YLQsNGB0YvQvNCw0LvQtNCw0YPSk9CwINC20LDRg9Cw0L/RgtGLINC90LXQs9GW0LfQs9GWINCz0LXQvNC+0LPQu9C+0LHQuNC9LiDQntC7INC905nRgNC10YHRgtC1INGC0YPSk9Cw0L0g0LrQtdC30LTQtSDQsdCw0YDQu9GL0psg0LPQtdC80L7Qs9C70L7QsdC40L3QvdGW0qMgNjAtODUg0L/QsNC50YvQt9GL0L0g0pvSsdGA0LDQudC00YsuINCa0LXQudGW0L0g0LHRltGA0YLRltC90LTQtdC/INC10YDQtdGB0LXQutGC0LXRgNC00ZbSoyDQs9C10LzQvtCz0LvQvtCx0LjQvdGW0L3QtSDQsNGD0YvRgdCw0LTRiy4g0rDRgNGL0pvRgtGL0psg0LPQtdC80L7Qs9C70L7QsdC40L3QvdGW0qMg0LHRltGA0pvQsNGC0LDRgCDTqdC30ZbQvdC00ZbQuiDQtdGA0LXQutGI0LXQu9GW0LrRgtC10YDRliDQsdCw0YAuINCV0qMg0LHRltGA0ZbQvdGI0ZYg0pvSsdGA0YvQu9GL0LzRiyDQsdC+0LnRi9C90YjQsCDQtdGA0LXQutGI0LXQu9GW0LrQutC1INC60LXQu9C10YAg0LHQvtC70YHQsNC8LSDSsdGA0YvSm9GC0YvSmyDQs9C10LzQvtCz0LvQvtCx0LjQvSDQtdC60ZYg0LDQu9GM0YTQsCDQttOZ0L3QtSDQtdC60ZYg0LPQsNC80LzQsCDRgtGW0LfQsdC10LPRltC90LXQvSDRgtKx0YDQsNC00YsuINCQ0Lsg0LXRgNC10YHQtdC60YLQtdGA0LTRltKjINCz0LXQvNC+0LPQu9C+0LHQuNC90ZYg0LXQutGWINCw0LvRjNGE0LAg0LbTmdC90LUg0LXQutGWINCx0LXRgtGC0LAg0YLRltC30LHQtdC60YLQtdC9INGC0rHRgNCw0LTRiy4g0JXQutGW0L3RiNGWINC10YDQtdC60YjQtdC70ZbQuiDSsdGA0YvSm9GC0YvSmyDQs9C10LzQvtCz0LvQvtCx0LjQvdC90ZbSoyDQvtGC0YLQtdCz0ZbQvdGWINCx0LDQudC70LDQvdGL0YHRgtGL0YDRgyDSm9Cw0LHRltC70LXRgtGWINC10YDQtdGB0LXQutGC0LXRgNC00ZbSoyDQs9C10LzQvtCz0LvQvtCx0LjQvdGW0L3QtSDSm9Cw0YDQsNKT0LDQvdC00LAg0LbQvtKT0LDRgNGLLiDQkdKx0Lsg0rHRgNGL0pvRgtGL0qMg0L/Qu9Cw0YbQtdC90YLQsNC00LDQvSDQttC10YLQutGW0LvRltC60YLRliDQvtGC0YLQtdCz0ZbQvdGWINCw0LvRg9GL0L0g0pvQsNC80YLQsNC80LDRgdGL0Lcg0LXRgtC10LTRli4g0KHQtdCx0LXQsdGWINC20LDRgtGL0YDQtNCw0pPRiyDQvtGC0YLQtdCz0ZYg0LrQvtC90YbQtdC90YLRgNCw0YbQuNGP0YHRiyDRgtOp0LzQtdC9INCx0L7Qu9Cw0LTRiy4g0KHQvtC90LTQsNC5IC0g0LDSmyDSsdGA0YvSm9GC0YvSmyDQs9C10LzQvtCz0LvQvtCx0LjQvSDQvtGC0YLQtdCz0ZbQvdGWINCw0L3QsNGB0YvQvdGL0qMg0pvQsNC90YvQvdCw0L0g0YLQsNGA0YLRi9C/INCw0LvRgyDSm9Cw0YHQuNC10YLRltC90LUg0LjQtS4g06jQudGC0LrQtdC90ZYg0L7QvdGL0qMgMiwzLSDQtNC40YTQvtGB0YTQvtCz0LvQuNGG0LXRgNCw0YLQv9C10L0g0LHQsNC50LvQsNC90YvRgdGD0Ysg05nQu9GB0ZbQty4g0JHSsdC7INC+0YLRgtC10LPRltC90ZYg0LzRi9Kb0YLRi9GA0LDSmyDSsdGB0YLQsNGD0pPQsCDQvNKv0LzQutGW0L3QtNGW0Log0LHQtdGA0LXQtNGWLiDSrtGI0ZbQvdGI0ZYg0LXRgNC10LrRiNC10LvRltC60LrQtSDQutC10LvQtdGAINCx0L7Qu9GB0LDQvCwg0rHRgNGL0pvRgtGL0psg0LPQtdC80L7Qs9C70L7QsdC40L3RliDQsdCw0YAg0Y3RgNC40YLRgNC+0YbQuNGC0YLQtdGA0LTRltKjINOp0LzRltGAINGB0q/RgNGDINKx0LfQsNKb0YLRi9KT0Ysg0YjQsNC80LDQvNC10L0gODAtOTAg0LrSr9C90LTRliDSm9Kx0YDQsNC50LTRiy4g0JrQtdC70LXRgdGWINC10YDQtdC60YjQtdC70ZbQuiwg0rHRgNGL0pvRgtGL0psg0LPQtdC80L7Qs9C70L7QsdC40L0g0L3TmdGA0LXRgdGC0LUg0YLRg9KT0LDQvSDQutC10LfQtNC1INCx0LDRgNC70YvSmyDSm9Cw0L0g0LPQtdC80L7Qs9C70L7QsdC40L3QvdGW0qMgNjAtODUg0L/QsNC50YvQt9GL0L0g0LDQu9Cw0LTRiy4g0KLRg9KT0LDQvdC90LDQvSDQutC10LnRltC9INCw0LvSk9Cw0YjSm9GLIDYg0LDQudC00LAg0L7QvdGL0qMg0LTQtdKj0LPQtdC50ZYg0LHRltGA0YLRltC90LTQtdC/INGC06nQvNC10L3QtNC10L8sIDEg0LbQsNGB0YvQvdC00LAgMTUg0L/QsNC50YvQtywgMyDQttCw0YHRi9C90LTQsCAyINC/0LDQudGL0LfQtNCw0L0g0LDRgdC/0LDQudC00Ysg0LbTmdC90LUg0YHQvtC70LDQuSDQtdGA0LXRgdC10Log0LPQtdC80L7Qs9C70L7QsdC40L3Qs9C1INCw0LnQvdCw0LvQsNC00YsuINCV0LPQtdGAINC10YDQtdGB0LXQuiDQs9C10LzQvtCz0LvQvtCx0LjQvdCz0LUg0LDQudC90LDQu9GDINC00rHRgNGL0YEg0LbSr9GA0LzQtdGB0LUsINOZ0YDRgtKv0YDQu9GWINGC0rHSm9GL0Lwg0pvRg9Cw0LvQsNC50YLRi9C9INC90LXQvNC10YHQtSDSm9Cw0L0g0LDRg9GA0YPQu9Cw0YDRiyDQtNCw0LzRg9GLINC80q/QvNC60ZbQvS4g0JzRi9GB0LDQu9GLLCDQs9C10LzQvtCz0LvQvtCx0LjQvdC+0L/QsNGC0LjRj9C70LDRgC4g0rDRgNGL0pvRgtGL0psg0LPQtdC80L7Qs9C70L7QsdC40L3QvdGW0qMg0LHQtdGB0ZbQvdGI0ZYg0LXRgNC10LrRiNC10LvRltCz0ZYsINC+0Lsg0rHRgNGL0pvRgtGL0qMg0LPQuNC/0L7QutGB0LjRjyDQttCw0pPQtNCw0LnRi9C90LTQsCDTqdC80ZbRgCDRgdKv0YDRg9GW0L0g0pvQsNC80YLQsNC80LDRgdGL0Lcg0LXRgtC10LTRli4g0rDRgNGL0pvSm9CwINC+0YLRgtC10LPRltC90ZYg0LbQtdGC0LrRltC30YPQtNGW0qMg0YLQuNGW0LzQtNGW0LvRltCz0ZYg0LbQvtKT0LDRgNGLINCx0L7Qu9KT0LDQvdC00YvSm9GC0LDQvSwg0LHSsdC7INC80LXRhdCw0L3QuNC30Lwg0LbQsNGC0YvRgNGW0YjRltC70ZbQuiDQtNCw0LzRg9C00LAg06nRgtC1INC80LDSo9GL0LfQtNGLLiA8YnIgLz4NCjxiciAvPg0KMtGI0ZYg0YHSsdGA0LDSm9Kb0LAg0LbQsNGD0LDQvyAtINCU0LjRgdGC0LDQu9GM0LTRiyDQvdC10YTRgNC+0L0g0LrQsNC90LDQu9GI0LDQu9Cw0YDRiywg0Y/Sk9C90Lgg0LTQuNGB0YLQsNC70YzQtNGLINC40YDQtdC6INC205nQvdC1INC20LjQvdCw0YPRiNGLINC60LDQvdCw0LvRiNCw0LvQsNGAIC0g0LHSr9C50YDQtdC6INC90LXRhNGA0L7QvdGL0L3Ri9KjINC80LDSo9GL0LfQtNGLINCx06nQu9GW0LPRli4g0JHQsNC70LDQu9Cw0YDQtNCw0pPRiyDQtNC40YHRgtCw0LvRjNC00Ysg0L3QtdGE0YDQvtC9INC60LDQvdCw0LvRiNCw0LvQsNGA0Ysg0YHRgy3RgtKx0Lcg0LDQu9C80LDRgdGD0YvQvSwg0pvRi9GI0pvRi9C7LdC90LXQs9GW0Lcg0YLQtdC/0LUt0YLQtdKj0LTRltCz0ZbQvSDQttOZ0L3QtSDQt9OZ0YAg0LrQvtC90YbQtdC90YLRgNCw0YbQuNGP0YHRi9C9INGA0LXRgtGC0LXRg9C00LUg0LzQsNKj0YvQt9C00Ysg0YDTqdC7INCw0YLSm9Cw0YDQsNC00YsuINCQ0LvQsNC50LTQsCDQvtC70LDRgCDSm9GL0LfQvNC10YLRliDQsdC+0LnRi9C90YjQsCDQtdGA0LXRgdC10LrRgtC10YDQtNC10L0g0LXRgNC10LrRiNC10LvQtdC90LXQtNGWLiDQodC10LHQtdCx0ZYg0LHQsNC70LDQu9Cw0YDQtNCwINCx0q/QudGA0LXQuiDRgtC+0LvRi9KbINC20LXRgtGW0LvQvNC10LPQtdC9LiDQkdCw0LvQsNC70LDRgNC00LDSk9GLINCx0rHQuyDQutCw0L3QsNC70YjQsNC70LDRgNGL0L3Ri9KjINGE0YPQvdC60YbQuNGP0LvQsNGA0YvQvdCwINC60LXQu9GB0LXQvCwg0LHRltGA0ZbQvdGI0ZYg0YTRg9C90LrRhtC40Y/RgdGLIC0g0LTQuNGB0YLQsNC70YzQtNGLINC60LDQvdCw0LvRiNCw0LvQsNGA0LTQsCDQvdCw0YLRgNC40LksINGF0LvQvtGAINC205nQvdC1INGB0YPQtNGL0qMg0YDQtdCw0LHRgdC+0YDQsdGG0LjRj9GB0Ysg0LbSr9GA0LXQtNGWLiDQndCw0YLRgNC40LnQtNGWINGB0ZbSo9GW0YDRgyDQutC10LfRltC90LTQtSDQutCw0LvQuNC5INC90LXRgdC10L/QutC1INGI0YvSk9Cw0YDRi9C70LDQtNGLLiDQkdKx0Lsg0LrQsNC70LjQuSDQtNC10qPQs9C10LnRltC9INGA0LXRgtGC0LXQudC00ZYuINCQ0Lsg0LHQsNC70LDQu9Cw0YDQtNCwINCx0rHQuyDQv9GA0L7RhtC10YHRgSDRgtC+0LvRi9KbINC20LXRgtGW0LvQvNC10LPQtdC90LTRltC60YLQtdC9LCDRgdGDINC80LXQvSDRjdC70LXQutGC0YDQvtC70LjRgtGC0LXRgNC00ZbSoyDRgtC10L/QtS3RgtC10qPQtNGW0LPRliDQvtKj0LDQuSDQsdKx0LfRi9C70LDQtNGLLiDQldC60ZbQvdGI0ZYg0YTRg9C90LrRhtC40Y/RgdGLLCDQvtC70LDRgCDQsdKv0LnRgNC10LrRgtC1INGB0YPRgtC10Log0LjQvtC90LTQsNGA0YvQvSDQsdC10LvRgdC10L3QtNGWINGC0q/RgNC00LUg0YjRi9KT0LDRgNGL0L8sINCx0LjQutCw0YDQsdC+0L3QsNGC0YLRiyDRgdGW0qPRltGA0YMg0LDRgNKb0YvQu9GLINKb0YvRiNKb0YvQuy3QvdC10LPRltC3INGC0LXQv9C1LdGC0LXSo9C00ZbQs9GW0L0g0YHQsNKb0YLQsNC50LTRiy4g0JHQsNC70LDQu9Cw0YDQtNCwINCx0rHQuyDRhNGD0L3QutGG0LjRjyDQttC10YLQutGW0LvRltC60YHRltC3INCx0L7Qu9GD0Ysg0LzSr9C80LrRltC9LCDRgdC+0L3QtNGL0pvRgtCw0L0g0L7Qu9Cw0YDQtNCwINC80LXRgtCw0LHQvtC70LjQutCw0LvRi9KbINCw0YbQuNC00L7Qt9KT0LAg0LHQtdC50ZbQvNC00ZbQu9GW0Log0LbQvtKT0LDRgNGLINCx0L7Qu9GL0L8g0LrQtdC70LXQtNGWLiDSrtGI0ZbQvdGI0ZYg0YTRg9C90LrRhtC40Y/RgdGLLCDQsdKx0Lsg0LrQsNC90LDQu9GI0LDQu9Cw0YDQtNCwINGB0YMg0pvQsNC50YLQsCDRgdGW0qPRltGA0ZbQu9C10LTRliwg0LHSsdC7INC/0YDQvtGG0LXRgdC60LUg0LLQsNC30L7Qv9GA0LXRgdGB0LjQvSDRi9Kb0L/QsNC7INC10YLQtdC00ZYuINCR0LDQu9Cw0LvQsNGA0LTQsCDQstCw0LfQvtC/0YDQtdGB0YHQuNC9INOZ0YHQtdGA0ZYg0YLQvtC70YvSmyDQttC10YLRltC70LzQtdCz0LXQvdC00ZbQutGC0LXQvSwg0L3QtdGB0LXQvyDQutC+0L3RhtC10L3RgtGA0LDRhtC40Y/RgdGLINGC06nQvNC10L0g0LHQvtC70LDQtNGLLiDQkdKx0Lsg0L7Qu9Cw0YDQtNGLINGB0YPRgdGL0LfQtNCw0L3Rg9KT0LAg0LHQtdC50ZbQvCDQtdGC0LXQtNGWLiDQotOp0YDRgtGW0L3RiNGWINGE0YPQvdC60YbQuNGP0YHRiywg0LTQuNGB0YLQsNC70YzQtNGLINC60LDQvdCw0LvRiNCw0LvQsNGAINC60LDQu9GM0YbQuNC50LTRltKjINKb0LDQudGC0LAg0YHRltKj0ZbRgNGW0LvRg9GW0L0g0YDQtdGC0YLQtdC50LTRli4g0JHSsdC7INC/0YDQvtGG0LXRgdGBINC/0LDRgNCw0YLQs9C+0YDQvNC+0L0g0LDRgNKb0YvQu9GLINCx0LDSm9GL0LvQsNC90LDQtNGLLiDQkdCw0LvQsCDQsNKT0LfQsNGB0YvQvdC00LAg0YHSr9C50LXQuiDRgtGW0L3RltC90ZbSoyDSm9Cw0LvRi9C/0YLQsNGB0YPRiyDQvNC10L0g06nRgdGD0ZbQvdC1INCx0LDQudC70LDQvdGL0YHRgtGLINC60LDQu9GM0YbQuNC5LdGE0L7RgdGE0LDRgiDQsNC70LzQsNGB0YPRiyDSm9Cw0YDSm9GL0L3QtNGLINCx0L7Qu9Cw0LTRiy4g0KHQvtC90YvQvNC10L0g0pvQsNGC0LDRgCDQutCw0L3QsNC70YjQsNC70LDRgNC00LAg0LHQsNGB0YLQsNC/0pvRiyDQt9OZ0YDQtNGW0qMg0pvSsdGA0LDQvNGL0L3QtNCw0pPRiyDQt9Cw0YLRgtCw0YAg0YHQvtKj0pPRiyDRgNC10YIg06nQt9Cz0LXRgNGC0ZbQu9GW0L8sINC90LXRgdC10L/RgtGW0qMg0YLSr9C/0LrRltC70ZbQutGC0ZYg0pvSsdGA0LDQvNGLINKb0LDQu9GL0L/RgtCw0YHQsNC00YsuICA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28" table:style-name="ce1">
            <text:p>915428</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DRgdGD0YDQsNC6LiAxICDQutKv0L3QtNGW0Log0pvRi9C3INCx0LDQu9CwINGP0pPQvdC4INC20LDSo9CwINGC0YPSk9Cw0L0g0L3TmdGA0LXRgdGC0LXQtNCwINKx0YDRi9Kb0YLRi9KbICDRj9KT0L3QuCDRhNC10YLQsNC70YzQtNGWINCz0LXQvNC+0LPQu9C+0LHQuNC9INCx0L7Qu9Cw0LTRiy4g0KTQtdGC0LDQu9GM0LTRliDRj9KT0L3QuCDSsdGA0YvSm9GC0YvSmyDQs9C10LzQvtCz0LvQvtCx0LjQvdC90ZbSoyDQtdGA0LXQutGI0LXQu9GW0LrRgtC10YDRltC90LUg0YLQvtC60YLQsNC70LAg0LrQtdGC0LXRgtGW0L0g0LHQvtC70YHQsNC8INC+0Lsg0rHRgNGL0psg0L/QtdC9INC20LDSo9CwINGC0YPSk9Cw0L0g0L3TmdGA0LXRgdGC0LXQu9C10YDQtNC1INC60LXQt9C00LXRgdC10LTRli4g0JXRgNC10YHQtdC6INCz0LXQvNC+0LPQu9C+0LHQuNC9INCd0LLQkCDQsNC50YvRgNC80LDRiNGL0LvRi9KT0Ysg0L7RgtGC0LXQs9GW0LPQtSDQttC+0pPQsNGA0Ysg0pvQsNC90YvSk9GD0YvQvdC00LAg0LHQvtC70YvQvyDRgtCw0LHRi9C70LDQtNGLLtCh0L7QvdC00YvSm9GC0LDQvSDQttKv0LrRgtGWINOZ0LnQtdC70LTQtSAg0LXRgdGC0LXQvSDRgtCw0L3RgyDQsdCw0LnSm9Cw0LvQsNC00Ysg0L7QvdGL0qMg0pvQsNC9INGB0LDRgNCw0L/RgtCw0LzQsNGB0YvQvdC00LAg0LPQtdC80L7Qs9C70L7QsdC40L3QvNC10L0g0Y3RgNC40YLRgNC+0YbQuNGCINKb0LDQu9GL0L/RgtGLINC00LXQvdCz0LXQudC00LUg0LHQvtC70YHQsNC00LAg0YHQtdCx0LXQsdGWINC+0YLRgtC10LPRltC90ZYg0YTQtdGC0LDQu9C00Ysg0LPQtdC80L7Qs9C70L7QsdC40L0g0LbQvtKT0LDRgNGLINCx0LDQudC70LDQvdGL0YHRgtGL0YDRgyDQutCw0LHRi9C70LXRgtGL0L3QtSDQsdCw0LnQu9Cw0L3Ri9GB0YLRiy7Qn9C70LDRhtC10L3RgtCwINCw0YDSm9GL0LvRiyDQsNC90LDQvdGL0qMg0pvQsNC9INCw0pPRi9C80YvQvdGL0qMg0L7RgtGC0LXQs9GW0LPRltC9INGC0LjRltC80LTRliDSm9Cw0LHRi9C70LTQsNC/INCw0LvRi9C/INC00LDQvNGL0L8g0LrQtdC70LUg0LbQsNGC0pvQsNC9INKx0YDRi9C60LrQsCDQttC10YLQutGW0LfQtdC00YsuINKa0rHRgNGL0LvRi9GB0YvQvdGL0qMg0LXRgNC10LrRiNC10LvRltCz0ZbQvdC1INGC0L7Sm9GC0LDQu9CwINC60LXRgtC10YLRltC9INCx0L7Qu9GB0LDQvCDQtdGA0LXRgdC10Log0LPQtdC80L7Qs9C70L7QsdC40L3Qs9C1INKb0LDRgNCw0pPQsNC90LTQsCDRgtC30LHQtdC6INKb0rHRgNGL0LvRi9GB0YvQvNC10L0g0LXRgNC10LrRiNC10LvQtdC90LXQtNGWIDIg0LDQu9GM0YTQsCAyINCz0LDQvNC80LAg0YLRltC30LHQtdC60YLQtdC9INGC0rHRgNCw0LTRiyDQsNC7INC10YDQtdGB0LXQuiDQs9C10LzQvtCz0LvQvtCx0LjQvSAyINCw0LvRjNGE0LAgMiDQstC10YLRgtCwINGC0ZbQt9Cx0LXQs9GW0L3QtdC9INKb0rHRgNGL0LvQsNC00Ysg0J7RgdGLINKb0rHRgNGL0LvRi9GB0YvQvdGL0qMg0LXRgNC10LrRiNC10LvRltCz0L3RltC90LUg0LHQsNC50LvQsNC90YvRgdGC0Ysg0L7RgtGC0LXQs9GL0L3RiyDQttC+0pPQsNGA0Ysg0L7Qt9GL0L3QtSDRgtCw0YDRgtCw0LTRiyDRj9KT0L3QuCDQtdGA0LXRgdC10Log0LPQtdC80L7Qs9C70L7QsdC40L3QtNC10LPRiyDQstC10YLRgtCwINGC0ZbQt9Cx0LXQutC60LUg0pvQsNGA0LDSk9Cw0L3QtNCwINCz0LDQvNC80LAg0YLRi9C30LHQtdC6INC20L7Qs9Cw0YDRiyAg0L7RgtGC0LXQutC/0LXQvSDQutGD0YjRgtGL0YDQtdC6INCx0LDQudC70LDQvdGL0YHQsNC00Ysg0LHSsdC7INCw0L3QsNC00LDQvSDSsdGA0YvSm9Kb0LAg0L/RgNC10L3QsNGC0LDQu9GM0LTRliDQvtGC0YPRltC90LUg0LzSr9C80LrRltC90LTRltC6INCx0LXRgNC10LTRli7QntGB0YvQu9Cw0LnRiNCwINKx0LvQv9Cw0LTQsNKT0Ysg0L7RgtGC0LXQs9GW0L3RltKjINCw0LvQvNCw0YHRg9GL0L3QsCDQs9C10LzQvtCz0LvQvtCx0LjQvdC80LXQvSDQvtGC0YLQtdCz0ZbQvdGWINCx0LDQudC70LDQvdGL0YHRgtGL0YDRgyDQutKv0YjRliDTmdGB0LXRgCDQtdGC0LXQtNGWLiAg0JbQsNKj0LAg0YLRg9GL0LvSk9Cw0L0g0LHQsNC70LDQu9Cw0YDQtNCwINCd0JJmINCx0LDRgNC70YvSmyDQvdOZ0YDQtdGB0YLQtdC70LXRgNC00LUg0LrQtdC30LTQtdGB0LXQtNGWINC205nQvdC1INCx0LDRgNC70YvQuiDQs9C10LzQvtCz0LvQvtCx0LjQvdC90ZbSoyA2NS04NSDQv9Cw0LnRi9C3INGI0LDQvNCw0YHRi9C90LTQsCDQutKx0YDQsNC50LTRiy4g0J7QuyDQsdGW0YDRgtGW0L3QtNC10L8g0LHQsNC70LDQu9Cw0YDQtNCwINGB0YvRgNGC0pvRiyDQvtGA0YLQsNKT0LAg0LHQtdC50ZbQvNC00LXQu9GDINC10YDQtdC60YjQtdC70ZbQutGC0LXRgNGW0L3QtSDQsdCw0LnQu9Cw0L3Ri9GB0YLRiyDQttOZ0L3QtSDTqdC60L/QtSDQtNCw0LzRg9GL0L3QsCDQsdCw0LnQu9Cw0L3Ri9GB0YLRjCDQndCS0JAg0LPQtdC80L7Qs9C70L7QsdC40L3RltC90LUg0LDQudC90LDQu9Cw0LTRiy7Qr9Cz0L3QuCDQsdCw0LvQsNC00LAg0LrQsNC9INC+0L3QtNGL0YDRi9C70YMg0LbTmdC90LUg0L7Qt9GL0L3QtNGL0Log0YLRi9C90YvRgSDQsNC70YPRi9C90LAg0LHQsNC50LvQsNC90YvRgdGC0YsuINCW0LDSo9CwINGC0YPSk9Cw0L0g0L3TmdGA0LXRgdGC0LXQtNC1INGB0L7QvdGL0LzQtdC9INKb0LDRgtCw0YAg0L7RgdGLINGE0LXRgtCw0LvRjNC00ZYg0LPQtdC80L7Qs9C70L7QsdC40L0g0YvQtNGL0YDQsNGDINC905nRgtC40LbQtdGB0ZbQvdC00LUg0LHQsNC70LDQtNCwINGE0LjQt9C40L7Qu9C+0LPQuNGP0LvRi9KbINGB0LDRgNKT0LDRjiDQsdCw0LnSm9Cw0LvQsNC00YsuINCv0pPQvdC4INCz0LXQvNC+0LPQu9C+0LHQuNC9INCz0LXQvCDQttGW0L3QtSDQs9C70L7QsdC40L3Qs9C1INCx0L7Qu9GL0L3Ri9C/IC4g0LPQtdC8INGC0LXQvNGW0YAg0LbTmdC90LUg0LHQvtGBINCx0LjQu9C70YPRgNC40LHQuNC90LPQtSDQsNC50L3QsNC70LDQtNGLLiDQsdKx0Lsg0pvQsNGA0LrRi9C90LTRiyDQttGD0YDQs9C10L3QtNGL0LrRgtC10L0g0LHQuNC70LvRg9GA0LjQsdC40L0g0LTQtdKj0LPQtdC50Ysg0LbQvtCz0LDRgNC70LDQvyDRgdCw0YDSk9Cw0Y7QvNC10L0g0LrQvtGA0YvQvdGL0YEg0LHQtdGA0LXQtNGWIDEg0LbQsNGB0pvQsCDSm9Cw0YDQsNC5INCx0LDQu9Cw0LTRiyDRhNC10YLQsNC70YzQtNGWINCz0LXQvNC+0LPQu9C+0LHQuNC9INCx0LDRgNC70YvSmyDQs9C10LzQvtCz0LvQvtCx0LjQvdC90ZbSoyAxNSDQv9Cw0LnRi9C30YvQvSDQutKx0YDQsNGB0LAg0LDQuyAyINC20LDRgdC60LAg0LrQsNGA0LDQuSDSm9Cw0LvRi9C/0YLRi9C00LAgMiDQv9Cw0LnRi9C30LTQsNC9INCw0YHQv9Cw0LnQtNGLLjIg0YHRg9GA0LDQuiAg0JHSr9C50YDQtdC60YLRltKjINKb0rHRgNGL0LvRi9C80LTRi9KbINKb0YvQt9C80LXRgtGC0ZbQuiDQsdGW0YDQu9GW0LPRliDQvdC10YTRgNC+0L0g0LHQvtC70YvQvyDRgtCw0LHRi9C70LDQtNGLLiDQntC90Ysg0LHRltGA0L3QtdGI0LUg0LHTqdC70ZbQutC60LUg0LHQvtC70YvQvyDQutCw0YDQsNGB0YLRi9GA0YPQs9CwINCx0L7Qu9Cw0LTRiy4g0J/RgNC+0LrRgdC40LzQsNC70YzQtNGWINCz0LXQvdC70LUg0ZbQu9C80LXQs9GWINC00LjRgdGC0LDQu9GM0LTRliAg0LbTmdC90LUg0LbQuNC90LDSm9GC0LDRg9GI0Ysg0YLSr9GC0ZbQutGI0LUu0J7RgdGLINC60YPRgNGL0LvRi9C80LTQsNGA0YvQvdGL0qMg05nRgNKb0LDQudGB0YvRgdGL0L3Ri9KjINOp0LfRltC90LTRltC6INCw0YLSm9Cw0YDQsNGC0YvQvSDSm9GL0LfQvNC10YLRliDQsdCw0YAg0JTQuNGB0YLQsNC70YzQtNGWINGC0q/RgtGW0Log0LHQsNC70LDQu9Cw0YDQtNCw0pPRiyDQvdC10YTRgNC+0L3QvdGL0qMg0LHTqdC70ZbQs9GWINC90LXRgdC10L8g0YLSr9C30ZbQu9GD0ZbQvdGW0qMg0YHQvtKj0pPRiyDRgdCw0YLRi9C70LDRgNGL0L3QsCDRgdC+0L3Ri9KjINGW0YjRltC90LTQtSDQt9OZ0YAg0LrQvtC90YbQtdC90YLRgNCw0YbQuNGP0YHRiyDQvNC10L0g0pvSsdGA0LDQvNGL0L0g0YDQtdGC0YLQtdGD0LPQtSDQttCw0YPQsNC/INCx0LXRgNC10LTRiy7QkdCw0LvQsNC70LDRgNC00LAg0LTQuNGB0YLQsNC70YzQtNGWINGC0q/RgtGW0LrQutC1INGC0L7QutGC0LDQu9Cw0YLRi9C9INCx0L7Qu9GB0LDQvCDQkdCw0LvQsNC00LDSk9GLINC90LXRhNGA0L7QvSDQsdC40LrQsNGA0LHQvtC90LDRgiDQuNC+0L3QtNCw0YDRi9C9INGA0LXQsNCx0YHQvtGA0LHRhtC40Y/Qu9Cw0YMg0LbTmdC90LUg0YHRg9GC0YLQtdCz0ZYg0LjQvtC90LTQsNGA0YvQvSDQsdC+0LvRgyDSm9Cw0LHRltC70LXRgtGW0L3QtSDQuNC1INC205nQvdC1INGB0YPRgtGC0LXQs9GLINC40L7QvdC00LDRgNGL0L0g0LHQvtC70YMg0LDRgNKb0YvQu9GLINKb0YvRiNKb0YvQuyDQvdC10LPRltC30LTRltC6INGC0LXQv9C1INGC0LXSo9C00ZbQutGC0ZYg0YHQsNKb0YLQsNGD0LTQsCDQvNCw0qPRi9C30LTRiyDRgNC+0Lsg0LDRgtKb0LDRgNCw0LTRiy4g0J7QuyDQt9OZ0YDQtNC10LPRiyDQvdCw0YLRgNC40Lkg0LbQsNC90LUg0LrQsNC70LvQuNC5INGB0LjRj9Kb0YLRiyDRjdC70LXQutGC0YDQvtC70LjRgtGC0LXRgNC00ZbSoyDQtNC10qPQs9C10LnRltC9INGA0LXRgtGC0LXRg9Cz0LUg0LrTqdC80LXQutGC0LXRgdC10YLRltC9INC80LDSo9GL0LfQtNGLINKb0rHRgNGL0LvRi9C8LiDQkdKv0LnRgNC10Log0q/RgdGC0ZYg0LHQtdC30ZbQvdC10L0g0LHTqdC70ZbQvdC10YLRltC9INC80LjQvdC10YDQsNC70L7QutC+0YDRgtC40LrQvtC50LTRgtGL0psg0LPQvtGA0LzQvtC9ICDQkNC70YzQtNC10YHRgtC10YDQvtC9INCz0L7RgNC80L7QvdGL0L3Ri9C90YvSoyDQvtC90LTRi9GA0YvQu9GD0L3QtSDRgdC10L/RgtC10YHQtdC00Ysg0L7QuyDQsdKv0LnRgNC10LrRgtC10LPRliDQvdCw0YLRgNC40Lkg0LzQtdC9INGB0YPQtNGL0L0gINGA0LXQsNCx0YHQvtGA0LHRhtC40Y/RgdGL0L0g0LHQsNC60YvQu9Cw0YMg0LDRgNKb0YvQu9GLINC60LDQvdGLINC60YvRgdGL0LzRi9C9INGA0LXRgtGC0LXRg9Cz0LUg0LrQvtC80LXQutGC0LXRgdC10LTRiy4g0JbQsNC70L/RiyDQsNC50YLQsCDQutC10YLQtdGC0ZbQvSDQsdC+0LvRgdCw0Lwg0LTQuNGB0YLQsNC70YzQtNGWINGC0YPRgtGL0LrRiNC1INCx0q/QudGA0LXQuiDQvdC10YTRgNC+0L3QvdGL0qMg0YHQtdCz0LzQtdC90YLRliDQntC7INC606nQv9GC0LXQs9C10L0g0LjQvtC90LTQsNGA0LTRiyDQvtC90LTRi9GA0YPQtNC1INC205nQvdC1ICDRgdGDINGA0LXQsNCx0YHQvtGA0LHRhtC40Y/RgdGL0L3QtNCwINC80LDSo9GL0LfQtNGLIC4g0KHSr9C30ZbQu9Cz0LXQvSDQvdCw0YLRgNC40LnQtNGW0qMgNS0xMCDQv9Cw0LnRi9C30YvQvdGL0qMg0YDQtdCw0LHRgdC+0YDQsdGG0LjRj9GB0YvQvdCwINC20LDRg9Cw0L8g0LHQtdGA0LXQtNGWINC205nQvdC1INGB0YPQtNGLINC+0YLQutGL0LfQsdC10LnQtNGWINC+0YHRi9C70LDQudGI0LAg0LPQtdC90LXRgNC10LvQuNC30LDRhtC40Y/Qu9Cw0L3Sk9Cw0L0g0LPQuNC+0YHQvtC80LjQu9GP0YDQu9GLINKb0rHQsdGL0YDQu9GLINGB0rHQudGL0pvRgtGL0pvRgtGLINGB0LDSm9GC0LDQudC00Ysu0JTQuNGB0YLQsNC70YzQtNGWINGC0q/RgtGW0LrRiNC1INC60LDQu9GG0LjQuSDQvNC10L0g0LzQsNCz0L3QuNC50LTRltKjINGA0LXQsNCx0YHQvtGA0LHRhtC40Y/RgdGL0L3Ri9KjINC005nQuyDRgNC10YLRgtC10LvRg9GW0L3QtSDQttCw0YPQsNC/INCx0LXRgNC10LTRli4g0J3TmdGC0LjQttC10YHRltC90LTQtSDQsNC70pPQsNGI0pvRiyDQt9OZ0YDQtNC10L0gINGB0q/Qt9GW0LvQs9C10L0g0LrQsNC70YbQuNC5INC80LXQvSDQvNCw0LPQvdC40LnQtNGW0qMg0LHQtdGBINC/0LDQudGL0LfQtNCw0L0g0YLQvtC80LXQvdGLINC90LXRgdC10L/Qv9C10L0g0YjRi9KT0LDRgNGL0LvQsNC00YsuINCQ0LvRjNC00LXRgdGC0LXRgNC+0L0g0L3QtdGE0YDQvtC90L3Ri9KjINC00LjRgdGC0LDQu9GM0LTRliDRgtKv0YLRltC60YjQtdC70LXRgNGW0L3QtSDTmdGB0LXRgCDQtdGC0YMg0LDRgNKb0YvQu9GLINC90LDRgtGA0LjQuSDQuNC+0L3QtNCw0YDRi9C90YvSoyDRgNC10LDQsdGB0L7RgNCx0YbQuNGP0YHRi9C9INC60q/RiNC10LnRgtC10LTRli7QntGA0LPQsNC90LjQt9C80LTQtSDQvdCw0YLRgNC40LnQtNGW0qMg0LbTmdC90LUg0LbQsNGB0YPRiNCw0LTQsNC9INGC0YvRgSDRgdKx0LnRi9C60YLRi9C60YLRi9C9INC60L7Qu9C10LzRliDQttC+0pPQsNGA0LvQsNC50LTRiyDQkS4g0JHSr9C50YDQtdC60YLQtdC9INGB0YPRgtGC0LXQs9GWINC80LXQvSDQutCw0LvQuNC5INC40L7QvdC00LDRgNGL0L3Ri9KjICDRgdC10LrRgNC10YbQuNGP0YHRi9C90LAg0pvQsNGC0YvRgdGL0L8g0LrQsNC9INGC0LDQvNGL0YDQu9Cw0YDQtNCw0pPRiyDQsdGW0YDRltKj0LPQsNC5INGC0YHQsNC70LDQu9GLINCx0rHQu9GI0YvQutC10YIg0LbQsNGB0YPRiNCw0LvQsNGA0YvQvdGL0L0g0LLQsNC30L7QutC+0L3RgdGC0YDQuNC60YLQvtGA0LvRiyDRgdC10LfRltC80YLQsNC70LTRi9Cz0YvQvSDQttC+0pPQsNGA0LvQsNGC0LDQtNGLLCDQkNC70YzQtNC10YHRgtC10L7QvdC90YvSoyDSm9GL0LfQvNC10YLRiyDRgdGD0LTRiyDSsdGB0YLQsNC5INKb0LDQvSDSm9GL0YHRi9C80YvQvSDRgNC10YLRgtC10YMgLCDRjdC70LXQutGC0YDQvtC70LjRgiDQsdCw0LvQu9Cw0L3RgdGL0L0g0YHQsNKb0YLQsNGDLCDRgtC10YAg0LbTmdC90LUg0YHRltC70LXQutC10Lkg0LHQtdC30LTQtdGA0ZbQvdC00LXQs9GWINC205nQvdC1INGW0YjRltC60YLQtdGA0LTQtdCz0ZYg0LjQvtC90LTQsNGA0YvQvdGL0qMg0YLQsNGB0YvQvNCw0LvQtNCw0L3Rg9GL0L0g0YDQtdGC0YLQtdGDICwg0LDSk9C30LDQtNCw0pPRiyDQttCw0YHRg9GI0LDQtNCw0L0g0YLRi9GBINGB0rHQudGL0pvRgtGL0pvRgtGL0qMg0LrTqdC70LXQvNGW0L0g0YHQsNKb0YLQsNGD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59" table:style-name="ce1">
            <text:p>1066859</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4gMSDQttCw0YHSm9CwINC00LXQudGW0L3Qs9GWINCx0LDQu9Cw0LvQsNGA0pPQsCDQsNGA0L3QsNC70pPQsNC9INCz0LXQvNC+0LPQu9C+0LHQuNC90L3RltKjINKb0LDQu9GL0L/RgtGLINC806nQu9GI0LXRgNGWIDExMC0xNDDQsy/QuyDSm9Kx0YDQsNGD0Ysg0pvQsNC20LXRgi4gINCV0YDQtdGB0LXQuiDQsNC00LDQvNC90YvSoyDQs9C10LzQvtCz0LvQvtCx0LjQvdGW0L3QtSDSm9Cw0YDQsNKT0LDQvdC00LAsINC905nRgNC10YHRgtC10LvQtdGA0LTQtSDQtdGA0LXQutGI0LXQu9C10L3Qs9C10L0g0rHRgNGL0pvRgtGL0psg0LPQtdC80L7Qs9C70LDQsdC40L0g0LHQvtC70LDQtNGLLiDQntC7INGE0LXRgtCw0LvRjNC00Ysg0LPQtdC80L7Qs9C70L7QsdC40L0gKEhiRinQtNC10L8g0LDRgtCw0LvQsNC00YsuINCR0rHQuyDQs9C10LzQvtCz0LvQvtCx0LjQvSDRgtKv0YDRliDSsdGA0YvSm9GC0YvSoyDQtNCw0LzRg9GLINC60LXQt9GW0L3QtNC1INOp0YLQtSDQttC+0pPQsNGA0pPRiyDQvNCw0qPRi9C30LTRi9C70YvSm9Kb0LAg0LjQtSwg0YHQtdCx0LXQsdGWINC+0Lsg0LDQvdCw0YHRi9C90YvSoyDSm9Cw0L3Ri9C90LTQsNKT0Ysg0L7RgtGC0LXQs9GW0L0g0LbQsNKb0YHRi9GA0LDSmyDQsdCw0LnQu9Cw0L3Ri9GB0YLRi9GA0YPSk9CwINKb0LDQsdGW0LvQtdGC0YLRli4g0KTQtdGC0LDQu9GM0LTRiyDQs9C10LzQvtCz0LvQvtCx0LjQvSDQtdC60ZYg0LDQu9GM0YTQsCDQttOZ0L3QtSDQtdC60ZYg0LPQsNC80LzQsCAg0YLRltC30LHQtdC60YLQtdC9INGC0rHRgNCw0LTRiy4g0JDQuyDQtdGA0LXRgdC10LrRgtC10YDQtNC1INC10LrRliDQsNC70YzRhNCwLCDQtdC60ZYg0LHQtdGC0YLQsCDRgtGW0LfQsdC10LrRgtC10L0g0YLSsdGA0LDQtNGLLiDQkdKx0Lsg0LbQtdGA0LTQtSDQs9Cw0LzQvNCwINGC0ZbQt9Cx0LXQutGC0LXRgCDQsdC10YLRgtCw0pPQsCDSm9Cw0YDQsNKT0LDQvdC00LAg0L7RgtGC0LXQs9GW0LzQtdC9INC20LDSm9GL0L3QtNCw0YHRgyDSm9Cw0LHRltC70LXRgtGWINC20L7Sk9Cw0YDRiy4g0JHSsdC7INC10YDQtdC60YjQtdC70ZbQs9GWINKx0YDRi9Kb0YLQsCDQs9C40L/QvtC60YHQuNGPINC20LDSk9C00LDQudGL0L3QtNCw0LTQsCDQvtGC0YLQtdCz0ZYg0LDQu9GD0pPQsCDQvNKv0LzQutGW0L3QtNGW0Log0LHQtdGA0LXQtNGWLiBIYkYt0YLRltKjINC20L7Sk9Cw0YDSk9GLINCw0YTQuNC90LjRgtC10YLRliwg0L7RgtGC0LXQs9GW0L3RliDQsNC90LAg0pvQsNC90YvQvdGL0qMg0YLTqdC80LXQvdGW0YDQtdC6INC/0LDRgNGG0LjQsNC70LTRiyDSm9GL0YHRi9C80YvQvdC00LAgKHBPMikg0LTQsCDRgtC40ZbQvNC00ZYg0YLQsNGB0YvQvNCw0LvQtNCw0YPSk9CwINC80q/QvNC60ZbQvdC00ZbQuiDQsdC10YDQtdC00ZYuINKw0YDRi9Kb0YLRi9KbINCz0LXQvNC+0LPQu9C+0LHQuNC9IDIsMy3QsdC40YTQvtGB0YTQvtCz0LvQuNGG0LXRgNCw0YLQv9C10L0g05nQu9GB0ZbQtyDQsdCw0LnQu9Cw0L3Ri9GB0LDQtNGLLCDRgdC+0Lsg0YHQtdCx0LXQv9GC0ZYg0L7RgtC10LPRltC90ZYg0YLRltC90LPQtSDQsdC10YDQtdGAINC60LXQt9C00LUg0L7So9Cw0Lkg0LDQttGL0YDQsNC50LTRiy4gINCR0rHQuyDQvtGC0YLQtdCz0ZYg0LHQsNC50LvQsNC90YvRgdKb0LDQvSDSm9C40YHRi9KbINGB0YvQt9GL0pvRgtGLINGB0L7Qu9KT0LAg0pvQsNGA0LDQuSDRi9KT0YvRgdGD0YvQvNC10L0g0LrTqdGA0ZbQvdC10LTRli4gINCW0LDSo9CwINGC0YPSk9Cw0L0g0L3TmdGA0LXRgdGC0LXQtNC1INGE0LXRgtCw0LvRjNC00Ysg0LPQtdC80L7Qs9C70L7QsdC40L0g0LrTqdC/INCx0L7Qu9GL0L8sINC+0Lsg0YPQsNKb0YvRgiDTqdGC0LUg0LrQtdC70LUgSGJBLdKT0LAg0LDRg9GL0YHQsNC00YsuINCQ0LvSk9Cw0YjSm9GLINCw0LnQu9Cw0YDQtNCwINC806nQu9GI0LXRgNGWIDUwLTgwJSDSm9Kx0YDQsNC50LTRiy4gMSDQttCw0YHSm9CwINKb0LDRgNCw0LkgMTUlINCw0Lsg0q/RiCDQttCw0YHRgtCwIDIlINCw0YHQv9Cw0LnQtNGLLiDSsNGA0YvSm9GC0YvSmyDQs9C10LzQvtCz0LvQvtCx0LjQvdC90LXQvS0tINCQINCz0LXQvNC+0LPQu9C+0LHQuNC90LPQtSDQsNGD0YvRgdGDINGE0LjQt9C40L7Qu9C+0LPQuNGP0LvRi9KbINC/0YDQvtGG0LXRgdGBINCx0L7Qu9GL0L8g0YLQsNCx0YvQu9Cw0LTRiy4g0JHSsdC7INC/0YDQvtGG0LXRgdGBIDYg0LDQuSDRiNCw0LzQsNGB0YvQvdC00LAg06nRgtC10LTRli4gINCV0LPQtdGAINCw0YPRi9GB0YMg0LTSsdGA0YvRgSDQttKv0YDQvNC10YHQtSDQsdKx0Lsg0L/QvtGC0L7Qu9C+0LPQuNGP0LvRi9KbINC60LvQuNC90LjQutCw0LvRi9KbINC606nRgNGW0L3RltGBINCx0LXRgNC1INCw0LvQsNC00YsuINCi0LDSk9GLINCx0ZbRgCDQtdGA0LXQutGI0LXQu9GW0LosINGE0LXRgtCw0LvRjNC00Ysg0LPQtdC80L7Qs9C70L7QsdC40L3QvdGW0qMg06nQvNGW0YAg0YHSr9GA0YMg0rHQt9Cw0pvRgtGL0pPRiyAxMiDQutKv0L0g0YjQsNC80LDRgdGL0L3QtNCw0LksINGB0L7QvdGL0qMg0LXRgdC10LHRltC90LXQvSDQs9C10LzQvtC70LjQt9Cz0LUg0LbQuNGWINKx0YjRi9GA0LDQudC00YssINC+0Lsg0L3TmdGA0LXRgdGC0LXQtNC1INGE0LjQt9C40L7Qu9C+0LPQuNGP0LvRi9KbINC90LUg0YLRgNCw0L3Qt9C40YLQvtGA0LvRi9KbINGB0LDRgNKT0LDRjtC80LXQvSDQutOp0YDRltC90ZbRgSDQsdC10YDQtdC00ZYuIDIuINCd0LXRhNGA0L7QvdC90YvSoyDQtNC40YHRgtCw0LvRjNC00YsgINC60LDQvdCw0LvRiNCw0LvQsNGA0YvQvdC00LAg0YDQtdCw0LHRgdC+0YDQsdGG0LjRjyDQttOZ0L3QtSDRgdC10LrRgNC10YbQuNGPINC/0YDQvtGG0LXRgdGC0LXRgNGWINC20q/RgNC10LTRli4g0J3QtdGE0YDQvtC9INOp0LfQtdC60YjQtdC70LXRgNGWINC20LDQu9C/0YsgMyDQsdOp0LvRltC80L3QtdC9INGC0rHRgNCw0LTRiy4gMSnQv9GA0L7QutGB0LjQvNCw0LvQtNGLINC60LDQvdCw0LvRiNCwICAyKdCT0LXQvdC70LUg0ZbQu9C80LXQs9GWIDMp0LTQuNGB0YLQsNC70YzQtNGLINC60LDQvdCw0LvRiNCwLiDQlNC40YHRgtCw0LvRjNC00Ysg06nQt9C10LrRiNC1INC90LXRhNGA0L7QvdC90YvSoyDRgdC+0qPSk9GLINCx06nQu9GW0LzQtNC10YDRliDQsdC+0LvRi9C/INGC0LDQsdGL0LvQsNC00YssINC205nQvdC1INC+0YDQs9Cw0L3QuNC30LzQvdGW0qMg0LPQvtC80LXQvtGB0YLQsNC30YvQvSDSm9Cw0LvRi9C/0YLQsNGB0YLRi9GA0YPSk9CwINKb0LDRgtGL0YHQsNC00YsuICDQlNC40YHRgtCw0LvRjNC00Ysg06nQt9C10LrRiNC10LTQtSDRgdGD0LTRi9KjINCx05nRgdC10qMg0YTQsNC60YPQu9GM0YLQsNGC0LjQstGC0ZYg0YDQtdCw0LHRgdC+0YDQsdGG0LjRj9GB0YssINCz0LjQv9C+0YTQuNC30LTRltKjINCw0L3RgtC40LTQuNGD0YDQtdGC0LjQutCw0LvRi9KbINCz0L7RgNC80L7QvdGL0LzQtdC9INGA0LXRgtGC0LXQu9C10LTRli4g0JTQuNGB0YLQsNC70YzQtNGLINC60LDQvdCw0LvRiNCwINCw0LvRjNC00L7RgdGC0LXRgNC+0L0g0LPQvtGA0LzQvtC90Ysg0q/RiNGW0L0g0L3Ri9GB0LDQvdCwINC20LDRgdGD0YjQsCDQsdC+0LvRi9C/INGC0LDQsdGL0LvQsNC00YsuINCR0rHQuyDQttC10YDQtNC1INGN0LvQtdC60YLRgNC+0LvQuNGC0YLQtdGA0LTRltKjLCDRgdGD0YLQtdCz0ZYg0LjQvtC90LTQsNGA0YvQvdGL0qMsINCw0LzQvNC40LDQutGC0YvSoywg0LrQsNC70LjQuSDQttOZ0L3QtSDRhNC+0YHRhNCw0YLRgtCw0YDQtNGL0qMg0LHQtdC70YHQtdC90LTRliDRgdC10LrRgNC10YbQuNGP0YHRiywg0LzQvtGH0LXQstC40L3QsCDQttOZ0L3QtSDQsdCw0YHSm9CwINC00LAg0LDQt9C+0YLRgtGLINC30LDRgtGC0LDRgNC00YvSoyDQtNC40YTRhNGD0LfQuNGP0YHRiyDQttKv0YDQtdC00ZYuINCU0LjRgdGC0LDQu9GM0LTRiyDRgtKv0YLRltC60YjQtdC70LXRgCDQsNC80LzQuNCw0LrRgtGLINGB0LXQutGA0LXRhtC40Y/Qu9Cw0YMg0LDRgNKb0YvQu9GLINGD0YvRgtGC0Ysg0LfQsNGC0YLQsNGA0LTRiyDQvtGA0LPQsNC90LjQt9C80L3QtdC9INGI0YvSk9Cw0YDRi9C/LCDQsNKT0LfQsNC90YvSoyDSm9GL0YjSm9GL0LvQtNGLLdGB0ZbQu9GC0ZbQu9GW0Log0LTQtdKj0LPQtdC50ZbQvSDQsdCw0pvRi9C70LDQvyDQvtGC0YvRgNCw0LTRiy4gINCh0YPRgtC10LPRliDQuNC+0L3QtNCw0YDRi9C90YvSoyDRgdC10LrRgNC10YbQuNGP0YHRiyDQttOZ0L3QtSDQsdC40LrQvtGA0LHQvtC90LDRgtGC0LDRgNC00YvSoyDRgNC10LDQsdGB0L7RgNCx0YbQuNGP0YHRiyDQsNGA0pvRi9C70YssINKb0LDQvdC90YvSoyBwSCDQtNC10qPQs9C10LnRltC9INGA0LXRgtGC0LXRg9Cz0LUg0pvQsNGC0YvRgdCw0LTRiy4g0JHQsNC70LDQu9Cw0YDQtNCwINCx0rHQuyDQttKv0LnQtSDQttC10YLQutGW0LvRltC60YHRltC3INC00LDQvNGL0pPQsNC9LCDRgdC+0Lsg0YHQtdCx0LXQv9GC0ZYg0L7Qu9Cw0YDQtNCwINC80LXRgtCw0LHQvtC70LjQutCw0LvRi9KbINCw0YbQuNC00L7QtyDRgtC10LfRltGA0LXQuiDQvtGA0YvQvSDQsNC70YPRiyDQvNKv0LzQutGW0L0uICAg0JXSoyDQvNCw0qPRi9C30LTRi9C70LDRgNGL0L3Ri9KjINCx0ZbRgNGWLCDQvdC10YHQtdC/0YLRltKjICDQutC+0L3RhtC10L3RgtGA0LDRhtC40Y/Qu9Cw0L3Rg9GLINC80LXQvSAg0pvSsdGA0LDQu9GD0Ysg0L7RgdGLINC00LjRgdGC0LDQu9GM0LTRiyDQutCw0L3QsNC70YjQsNC80LXQvSDQvNC10L0g0LbQuNC90LDRg9GI0Ysg0YLSr9GC0ZbQutGI0LXQu9C10YDQtNC1INC20q/RgNC10LTRli4g0JHQsNC70LDQu9Cw0YDQtNCwINCx0q/QudGA0LXQuiDRgtKv0YLRltC60YjQtdC70LXRgNGWINGC0L7Qu9GL0psg0LTQsNC80YvQvyDQsdGW0YLQv9C10LPQtdC90ZbQvdGW0L0g0L3TmdGC0LjQttC10YHRltC90LTQtSwg0L3QtdGB0LXQv9GC0ZYg0LrQvtC90YbQtdC90YLRgNCw0YbQuNGP0LvQsNGDINC00rHRgNGL0YEg0LbSr9GA0LzQtdC5LCDQvtC7INCx0LDQu9Cw0L3RiyDRgdGD0YHRi9C30LTQsNC90LTRi9GA0YPSk9CwINCx0LXQudGW0Lwg0LXRgtC10LTRli4gICDQkdCw0LvQsNC70LDRgNC00LAg0LHSsdC7INKb0YvQt9GL0LzQtdGC0YLQtdGAINC20LXRgtGW0LvQvNC10LPQtdC9LiDQkdCw0LvQu9Cw0YDQtNCwINC60LDQu9C40Lkg0YHQtdC60YDQtdGG0LjRj9GB0Ysg0YLTqdC80LXQvSDQsdC+0LvSk9Cw0L3QtNGL0pvRgtCw0L0sINCz0LjQv9C10YDQutCw0LvQuNC10LzQuNGPINKb0LDRg9C/0ZYg0LbQvtKT0LDRgNGLLiDQoNC10L3QuNC9LdCw0L3Qs9C40L7RgtC10L3Qt9C40L0t0LDQu9GM0LTQvtGB0YLQtdGA0L7QvSDQttKv0LnQtdGB0ZYg0L7RgdGLINOp0LfQtdC60YjQtdCz0LUg05nRgdC10YAg0LXRgtC60LXQvdC00ZbQutGC0LXQvSwg0LHQsNC70LDQu9Cw0YDQtNCwINC+0Lsg0LHQsNGP0YMg0pvQsNC70YvQv9GC0LDRgdKb0LDQvdC00YvSm9GC0LDQvSwg0LPQuNC/0L7RgtC10L3Qt9C40Y8g0L3QtSDQs9C40L/QtdGA0YLQtdC90LfQuNGP0pPQsCAg0LHQtdC50ZbQvNC00ZbQu9GW0Log0L7RgNGL0L0g0LDQu9Cw0LTRiy4g0J3TmdGA0LXRgdGC0LXQu9C10YDQtNC1INC00LjRgtCw0LvRjNC00Ysg0YLSr9GC0ZbQutGI0LXQu9C10YDQtNC10LPRliDRgdGD0LTRiyDQttOZ0L3QtSDRjdC70LXQutGC0YDQvtC70LjRgtGC0LXRgNC00ZYg0pvQsNC50YLQsCDRgdGW0qPRgNGDINGE0YPQvdC60YbQuNGP0YHRiyDRiNC10LrRgtC10YPQu9GWLCDRgdC+0L3QtNGL0pvRgtCw0L0g0L7Qu9Cw0YAg0YLQtdC3INC00LXQs9C40LTRgNCw0YLQsNGG0LjRj9KT0LAg0LbTmdC90LUg0Y3Qu9C10LrRgtGA0L7Qu9C40YLRgtC10YAg0LTQuNGB0LHQsNC70LDQvdGB0YvQvdCwINKx0YjRi9GA0LDQudC00YsuINCU0LjRgdCw0LvRjNC00Ysg0LrQsNC90LDQu9GI0LAg0LrQsNC70YzRhtC40LnQtNGL0qMg0pvQsNC50YLQsCDSm9Cw0L3Sk9CwINGA0LXQsNCx0YHQvtGA0LHRhtC40Y/Qu9Cw0L3Rg9GL0L0g0LbSr9GA0LPRltC30LXQtNGWLCDQsdCw0LvQsNC70LDRgNC00LAg0LrQtdC50LTQtSDQvtGB0Ysg0LbQtdGC0LrRltC70ZbQutGB0ZbQt9C00ZbQuiDRgdC10LHQtdCx0ZbQvdC10L0g0LTQtSDRgdKv0LnQtdC60YLQtdGA0ZbQvdGW0qMg0LHSsdC30YvQu9GL0YHRi9C90LAg05nQutC10LvQtdC00ZYuIA==</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81" table:style-name="ce1">
            <text:p>1066881</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PGJyIC8+DQogICAgIDEu0JHSsdC7INC905nRgNC10YHRgtC10L3RltKjINC20LDRgtGL0YAg0ZbRiNGW0L3QtNC10LPRliDQtNCw0LzRgyDQutC10LfRltC90LTQtSDQvtGC0YLQtdCz0ZbQvdGWINGC0LDRgdGL0LzQsNC70LTQsNGDINC60LXQt9GW0L3QtNC10LPRliDQs9C10LzQvtCz0LvQvtCx0LjQvSDQvtC7INC905nRgNC10YHRgtC1INGC0YPRi9C70pPQsNC9INC60LXQt9C00LUg0LHQsNGA0LvRi9KbINCz0LXQvNC+0LPQu9C+0LHQuNC9IDYwLTg1INC/0LDQudGL0LfRi9C9INKb0rHRgNCw0LnQtNGLLiDQmtC10LnRltC9INC10YDQtdGB0LXQutGC0LXRgCDQs9C10LzQvtCz0LvQvtCx0LjQvdCz0LUg0LDRg9GL0YHQsNC00YsuINCV0YDQtdC60YjQtdC70ZbQutGC0LXRgNGWIDIg0LDQu9GE0LAg0LbQsNC90LUg0LPQsNC80LzQsCDRgtGW0LfQsdC10LPRltC90LTQtdC9INGC0YPRgNCw0LTRiy4g0JPQtdC80L7Qs9C70L7QsdC40L3QvdGW0qMg0L7RgtGC0LXQs9GW0L3RliDQsdCw0LnQu9Cw0L3Ri9GB0YLRi9GA0YMg0pvQsNCx0ZbQu9C10YLRltC9INC10YDQtdGB0LXQutGC0LXRgNCz0LUg0pvQsNGA0LDQs9Cw0L3QtNCwINC20L7Sk9Cw0YDRiy4g0JHSsdC7INKx0YDRi9Kb0YLRi9KjINC/0LvQsNGG0LXQvdGC0LDQtNCw0L0g0LbQtdGC0LrRltC70ZbQutGC0ZYg0LDRg9CwINCw0LvRg9C00Ysg0pvQsNC80YLQsNC80LDRgdGL0Lcg0LXRgtC10LTRliDRgdC10LHQtdCx0ZYg0LbQsNGC0YvRgNC00LDSk9GLINC+0YLRgtC10LPRliDQutC+0L3RhtC10L3RgtGA0LDRhtC40Y/RgdGLINGC0L7QvNC10L0g0LHQvtC70LDQtNGLLiDQk9C10LzQvtCz0LvQvtCx0LjQvSDQoSDQsNC90LDRgdGL0L3Ri9KjINC60LDQvdGL0L0g0YLQsNGA0YLRi9C/INCw0LvRgyDQutCw0LHRltC70LXRgtGW0L3QtSDQuNC1LiDQodC10LHQtdCx0ZYg0L7QvdGL0qMgMi0zINCx0LjRhNC+0YHRhNCw0YLQs9C70LjRhtCw0YIg0L/QtdC9INCx0LDQudC70LDQvdGL0YHQsNC00Ysg0L7RgtGC0LXQs9GW0L3RliDQttCw0pvRgdGLINGC0LDRgNGC0LDQtNGLLiDQk9C10LzQvtCz0LvQvtCx0LjQvSDQpCDQsdCw0YAg0Y3RgNC40YLRgNC+0YbQuNGC0YLQtdGAINOp0LzRltGAINGB0q/RgNGDINGD0LfQsNKb0YLRi9Cz0YsgOTAg0LrRg9C9INC10YDQtdGB0LXQutGC0LXRgNC00LUgMTIwINC60rHQvS4g0JPQtdC80L7Qs9C70LDQsdC40L0g0KEg0L3TmdGA0LXRgdGC0LUg0YLRg9Cz0LDQvSDQutC10LfQtNC1IDYwLTg1INC/0LDQudGL0LfRi9C9INKb0rHRgNCw0LnQtNGLLiDQotGD0pPQsNC90L3QsNC9INC60LXQudGW0L0gNiDQsNC50LTQsCDQs9C10LzQvtCz0LvQvtCx0LjQvSDQpCDQtNC10L3Qs9C10LnRliDQsdGW0YDRgtGW0L3QtNC10L8g0YLTqdC80LXQvdC00LXQvyAxINC20LDRgdGC0LAgMdC/0LDQudGL0LfQtNCw0L0gMyDQttCw0YHRgtCwIDLQv9Cw0LnRi9C30LTQsNC9INCw0YHQv9Cw0LnQtNGLINC20LDQvdC1INCz0LXQvNC+0LPQu9Cw0LHQuNC9INCQINCz0LUg0LDQudC90LDQu9Cw0LTRiy4g0JXQs9C10YAg0LPQtdC80L7Qs9C70LDQsdC40L0g0JAg0LPQtSDQsNC50L3QsNC70YMg0LTSsdGA0YvRgSDQttKv0YDQvNC10YHQtSDQutCw0L0g0LDRg9GA0YPQu9Cw0YDRiyDQtNCw0LzRg9GLINC80q/QvNC60ZbQvdC9LiDQk9C10LzQvtCz0LvQsNCx0LjQvSDQoSDQs9C10L/QvtC60YHQuNGPINC20L7Qu9GL0L3QtNCwINKx0YDRi9C60LrQsCDQvtGC0YLQtdCz0ZbQvdGWINC20LXRgtC60ZbQt9GD0LTQtSDRgtC40ZbQvNC00ZbQu9GW0LPRliDQttC+0pPQsNGA0Ysg0LHQvtC70LDQtNGLINC205nQvdC1INC80LXRhdCw0L3QuNC30LzQtNC1INOp0LfQs9C10YDQtdC00ZYuIDxiciAvPg0KPGJyIC8+DQoyLtCU0LjRgdGC0LDQu9C00Ysg0L3QtdGE0YDQvtC9INGC0q/RgtGW0LrRiNC10LvQtdGA0ZYg0LHSr9C50YDQtdC60YLRltKjINC90LXQs9GW0LfQs9GWINCx0L7Qu9GW0LPRliDQsdCw0LvQsNC70LDRgNC00LAg0L3QtdGE0YDQvtC9INGC0q/RgtGW0LrRiNC10LvQtdGA0ZYg0YHRgyDRgtKx0Lcg0LDQu9C80LDRgdGD0Ysg0LbTmdC90LUg0LfTmdGAINC60L7QvdGG0LXQvdGC0YDQsNGG0LjRj9GB0YvQvdC9INC30LXRgNGC0YLQtdGD0LTQtSDQvNCw0qPRi9C30LTRiyDRgNC+0Lsg0LDRgtC60LDRgNCw0LTRiy4g0JDQu9Cw0LnQtNCwINC+0LvQsNGAINKb0YvQt9C80LXRgtGWINCx0L7QudGL0L3RiNCwINC10YDQtdGB0LXQutGC0LXRgNC00LXQvSDQtdGA0LXQutGI0LXQu9C10L3QtdC00ZYg0YHQtdCx0LXQsdGWINCx0q/QudGA0LXQuiDRgtC+0LvRi9C6INC20LXRgtGW0LvQvNC10LPQtdC9LiDQndC10LPRltC30LPRliDQutGL0LfQvNC10YLRgtC10YDRliDQtNC40YHRgtCw0LvQtNGLINGC0q/RgtGW0LrRiNC10LvQtdGA0LTQtSDQvdCw0YLRgNC40Lkg0YXQu9C+0YAg0LbQsNC90LUg0YHRg9C00YvSoyDRgNC10LDQsdGB0L7RgNCx0YbQuNGP0YHRiyDQttKv0YDQtdC00ZYuINCd0LDRgtGA0LjQudC00Ysg0YHRltKj0ZbRgNGD0LTQtSDQutCw0LvQuNC50LTRiyDRiNGL0LPQsNGA0LDQtNGLINC20LDQvdC1INC60LDQu9C40Lkg0LTQtdC90LPQtdC50ZbQvSDRgNC10YLRgtC10LnQtNGWLiDQkdCw0LvQsNC70LDRgNC00LAg0LHSsdC7INC/0YDQvtGG0LXRgdGBINGC0L7Qu9GL0psg0LbQtdGC0ZbQu9C80LXQs9C10L3QtNGW0LrRgtC10L0g0YHRgyDQvNC10L0g0Y3Qu9C10LrRgtGA0L7Qu9C40YIg0YLQtdC/0LUg0YLQtdKj0LTRltCz0ZYg0LHSsdC30YvQu9Cw0LTRiy4g0J7Qu9Cw0YAg0LHSr9C50YDQtdC60YLQtSDRgdGD0YLQtdC6INC40L7QvdC00LDRgNGL0L0g0LHQtdC70YHQtdC90LTRltGA0LUg0YjRi9Cz0LDRgNCwINC+0YLRi9GA0YvQvyDQsdC40LrQsNGA0LHQsNC90LDRgtGC0Ysg0YHRltKj0ZbRgNGDINCw0YDQutGL0LvRiyDQutGL0YjQutGL0Lsg0L3QtdCz0ZbQtyDRgtC10L/QtSDRgtC10qPQtNGW0LrRgtGWINGB0LDQutGC0LDQudC00YsuINCh0L7QvdC00YvSm9GC0LDQvSDQvtC70LDRgNC00LAg0LzQtdGC0LDQsdC+0LvQuNC60LDQu9GL0psg0LDRhtC40LTQvtC30pPQsCDQttC+0LPQsNGA0YsuINCh0L7QvdC00LDQuSDQsNC6INC+0LvQsNGA0LTQsCDRgdGDINC60LDQudGC0LAg0YHRltKj0ZbRgNC70LXQtNGWINCx0rHQuyDQv9GA0L7RhtC10YHQutC10LUg0LLQvtC30L7Qv9GA0L7RgdGB0LjQvSDTmdGB0LXRgCDQtdGC0LXQtNGWLi4g0JHQsNC70LDQu9Cw0YDQtNCwINCy0L7Qt9C+0L/RgNC+0YHRgdC40L0g0L/RgNC+0YbQtdGB0ZYg0YLQvtC70YvSmyDQttC10YLRltC70LzQtdCz0LXQvSDQvdC10YHQtdC/INC60L7QvdGG0LXQvdGC0YDQsNGG0LjRj9GB0Ysg0YLTqdC80LXQvSDQsdC+0LvQsNC00YsuINCa0LDQu9GG0LjQuSDQutCw0LnRgtCwINGB0ZbSo9GW0YDQu9GD0ZbQvSDRgNC10YLRgtC10LnQtNGWINCx0rHQuyDQv9GA0L7RhtC10YHRgSDQv9C+0YDQvtC0INCz0L7RgNC80L7QvSDQsNGA0LrRi9C70Ysg0YDQtdGC0LXQu9C10LTRli4g0JHQsNC70LAg0LDSk9C30LDRgdGL0L3QtNCwINGB0q/QudC10Log0YLRltC90ZYg0LzQtdC9INC+0YHRg9GW0L3QtSDQsdCw0LnQu9Cw0L3Ri9GB0YLRiyDQutCw0LvRhtC40Lkg0YTQsNGB0YTQsNGCINCw0LvQvNCw0YHRg9GLINGC0L7QvNC10L0g0LHQu9Cw0LTRiy4uLiDQotKv0YLRltC60YjQtdC70LXRgCDQutKx0YDQsNC80YvQvdC00LDSk9GLINC30LDRgtCw0YAg0L7Qt9Cz0LXRgNGC0ZbRgNGW0LvRltC/INC90LXRgdC10L8g0L7Qt9Cz0LXRgNC10LTRltGWLi4gICA=</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тары толық емес және к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975" table:style-name="ce1">
            <text:p>1066975</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nQltCw0qPQsCDRgtGD0pPQsNC9INGB0LDRgyDQsdCw0LvQsNC70LDRgNC00LAg0YTQtdGC0LDQu9GM0LTRliDQs9C10LzQvtCz0LvQvtCx0LjQvdC90ZbSoyDQvNOp0LvRiNC10YDRliBIYkYg05nQu9C00LXSm9Cw0LnQtNCwINC20L7Sk9Cw0YDRiyDQsdC+0LvRi9C/INC60LXQu9C10LTRli4g0J7QvdGL0qMg0L3QtdCz0ZbQt9Cz0ZYg0pvQsNGB0LjQtdGC0YLQtdGA0ZbQvdC1IC0g0L7RgtGC0LXQs9GW0LPQtSDQtNC10LPQtdC9INC20L7Sk9Cw0YDSk9GLINCw0YTQuNC90LjRgtC10YLRgtGW0LvRltC6INCx0L7Qu9GL0L8g0YHQsNC90LDQu9Cw0LTRiy4g0JHSsdC7INCz0LXQvNC+0LPQu9C+0LHQuNC9INC/0LvQsNGG0LXQvdGC0LAg0LDRgNKb0YvQu9GLINCw0L3QsNGB0YvQvdCw0L0g0YjRi9Kb0pvQsNC9INKb0LDQvdC90YvSoyDSm9Kx0YDQsNC80YvQvdCw0L0g0rHRgNGL0pvRgtGL0qMg0ZbRiNGW0L3QtNC10LPRliDQvtGA0LPQsNC90L7Qs9C10L3QtdC3INGB0LDRgtGL0YHRi9C90LTQsNKT0Ysg0LzSr9GI0LXQu9C10YDQs9C1LCDRgtGW0L3QtNC10YDQs9C1LCDQt9Cw0YfQsNGC0L7QutGC0LDRgNKT0LAg0L7RgtGC0LXQs9GW0L3RliDTmdC70LTQtdKb0LDQudC00LAg0YLQuNGW0LzQtNGWINGC0LDRgdGL0LzQsNC70LTQsNGD0pPQsCDQvNKv0LzQutGW0L3QtNGW0Log0LHQtdGA0LXQtNGWLiDQltC+0pPQsNGA0Ysg0LDRhNC40L3QuNGC0LXRgtGC0ZbQu9GW0Log0LTQtdCz0LXQvdC80ZbQtyAtINGP0pPQvdC4INC+0YLRgtC10LPRltCz0LUgINC00LXQs9C10L0g0LbQvtKT0LDRgNGLINGC0YPRi9GB0YLQsNKT0Ysg0LHQvtC70YvQvyDQutC10LvQtdC00ZYuINCe0YHRi9C70LDQudGI0LAg0rHQu9C/0LDQtNCw0pPRiyDRgtC40ZbQvNC00ZYg0L7RgtGC0LXQs9GWINCw0YPRi9GB0YPSk9CwLCDQttOZ0L3QtSDQutOp0L/RgtC10LPQtdC9INC80LXRgtCw0LHQvtC70LjRgtC40LrQsNC70YvSmyAo0LDQvdCw0LHQvtC70LjQt9C80LTRltC6LCDQutCw0YLQsNCx0L7Qu9C40LfQvNC00ZbQuikg0LzQtdGF0LDQvdC40LfQvNC00LXRgNCz0LUg0LbQsNKb0YHRi9GA0LDSmyDTmdGB0LXRgCDQutOp0YDRgdC10YLQtSDQsNC70LDQtNGLLiDQpNC10YLQsNC70YzQtNGWINCz0LXQvNC+0LPQu9C+0LHQuNC90L3RltKjINKb0rHRgNCw0LzRiyAyINCw0LvRjNGE0LAg0LbTmdC90LUgMiDQs9Cw0LzQvNCwINGC0ZbQt9Cx0LXQutGC0LXQvSDSm9Kx0YDQsNC70pPQsNC9INCx0L7Qu9GB0LAsINC10YDQtdGB0LXQutGC0LXRgNC00LUg0L7QuyAyINCw0LvRjNGE0LAg0LbTmdC90LUgMiDQsdC10YLRgtCwINGC0ZbQt9Cx0LXQutGC0LXQvSDSm9Kx0YDQsNC70pPQsNC9INCx0L7Qu9GL0L8g0LrQtdC70LXQtNGWLiDQntGB0Ysg0LHQsNC50LvQsNC90YvRgdGC0LDRgCDQtdGA0LXQutGI0LXQu9GW0LrRgtC10YDRltC90LUg0L7RgNCw0Lkg0L7QuyDQvtGC0YLQtdCz0ZbQvNC10L0g0LbQsNKb0YHRi9GA0LDSmyDSm9Cw0L3Ri9KT0LAg0LDQu9Cw0YLRi9C9INCx0L7Qu9GL0L8g0LrQtdC70LXQtNGWLCDRgdC+0L3Ri9KjINCw0YDSm9Cw0YHRi9C90LTQsCDRgtC40ZbQvNC00ZYg0YLSr9GA0LTQtSDQvtGA0LPQsNC90L7Qs9C10L3QtdC30LHQtdC9INCx0LDRgdKb0LDQtNCwINOp0YHRgyDQv9GA0L7RhtC10YHRgdGC0LXRgNGW0L3QtSDSm9C+0Lsg0LbQtdGC0LrRltC30ZbQu9C10YLRltC9INCx0L7Qu9GL0L8g0LrQtdC70LXQtNGWLiDQodC+0L3Ri9C80LXQvSDSm9C+0YHQsCwg0LHRltC30LTQtSDRgtGD0YvQu9KT0LDQvSDQutC10LfQtNC1INGE0LXRgtCw0LvRjNC00ZYg0LPQtdC80L7Qs9C70L7QsdC40L0g0pvQsNC9INKb0rHRgNCw0LzRi9C90LTQsNKT0Ysg0LHSr9GC0LrRltC7INCz0LXQvNC+0LPQu9C+0LHQuNC90L3RltKjIDYwLTg1JSDSm9Kx0YDQsNC50YLRi9C9INCx0L7Qu9GL0L8g0LrQtdC70LXQtNGWLiDQodC+0YHRi9C9INC+0Lsg0LHRltGA0YLQtSDQsdGW0YDRgtC1INGC0YPRi9C70pPQsNC90L3QsCDQsdCw0YHRgtCw0L8g0LzTmdC9LdKb0LDRgtGL0L3QsNGB0Ysg0LDQt9Cw0Y8g0YLSr9GB0LXRgtGW0L0g0LHQvtC70YvQvyDQutC10LvQtdC00ZYuINCv0pPQvdC4IEhiRiDTqdC30ZbQvdGW0qMg0LrQvtC90YTQvtGA0LzQsNGG0LjRj9GB0YvQvSDTqdC30LPQtdGA0YLRgyDQsNGA0pvRi9C70Ysg0LHRltGA0YLRltC90LTQtdC/IEhiQS3Sk9CwINCw0LnQvdCw0LvRi9C/INCx0LDRgdGC0LDQudGC0YvQvSDQsdC+0LvRi9C/INC60LXQu9C10LTRli4gMSDQttCw0YHSm9CwINKb0LDRgNCw0Lkg05nQttC10L/RgtOZ0YPRltGAINGC0q/RgdC60LXQvdGW0L0g0LHQsNC50pvQsNGB0LDSmyDQsdC+0LvQsNC00YssINC606nQvyDQttCw0pPQtNCw0LnQtNCwINC+0LsgMTUlLdKT0LAg0LTQtdC50ZbQvSDQsNC30LDRj9GC0YvQvSDQsdC+0LvRi9C/INC60LXQu9C10LTRliwg0LDQuyAzINC20LDRgdKb0LAg0LTQtdC50ZbQvSDQvtC90YvSoyDQvNOZ0L3RltGB0ZYgMiUt0LrQtSDQtNC10LnRltC9INGC06nQvNC10L0g0YLSr9GB0ZbQvyDQutC10YLQtdGC0ZbQvSDQsdC+0LvRi9C/INGB0LDQvdCw0LvQsNC00YsuINCW0LDSo9CwINGC0YPSk9Cw0L0g0L3TmdGA0LXRgdGC0LXQtNC1INCz0LXQvNC+0LPQu9C+0LHQuNC90L3RltKjINC00LXSo9Cz0LXQudGWINOp0YLQtSDQttC+0pPQsNGA0Ysg0LHQvtC70YvQvyDQutC10LvQtdC00ZYsINC606nQsdGW0L3QtSAxNzAtMjIw0LMv0Lsg0YjQsNC80LDRgdGL0L3QtNCwINCx0L7Qu9GL0L8g0YLSsdGA0LDQtNGLLCDQsNC7INC80YvRgdCw0Lsg0q/RiNGW0L0g0Y3RgNC40YLRgNC+0YbQuNGC0YLQtdGAIDUsMC03LDAgeCAxMF4xMiDQutOp0LvQtdC80ZbQvdC00LUg0LHQvtC70YvQvyDQutC10LvQtdC00ZYsINCw0Lsg0JPQtdC80LDRgtC+0LrRgNC40YIgNDQtNjQlINC00LXSo9Cz0LXQudGW0L3QtNC1INCx0L7Qu9GL0L8g0LrQtdC70LXQtNGWLiDQkdGW0YDQsNKbINC+0YHRi9C90YjQsCDQttC+0pPQsNGA0pPRiyDRiNCw0LzQsNC70LDRgCDQvdOZ0YDQtdGB0YLQtSDSr9GI0ZbQvSDSm9Cw0LvRi9C/0YLRiyDQvNOZ0L0g0LHQvtC70YvQvyDRgdCw0L3QsNC70LDQtNGLLiDQodC+0L3Ri9C80LXQvSDRhNC10YLQsNC70YzQtNGWINCz0LXQvNC+0LPQu9C+0LHQuNC9IEhiRiAtINC20L7Sk9Cw0YDSk9GLINCw0YTQuNC90LjRgtC10YLRgtGW0LvRltC60LrQtSDQuNC1LCAyINCw0LvRjNGE0LAg0LbTmdC90LUgMiDQs9Cw0LzQvNCwINGC0ZbQt9Cx0LXQutGC0LXQvSDSm9Kx0YDRi9C70pPQsNC9INGC0LXQuiDSsdGA0YvSm9C/0LXQvSDQttCw0qPQsCDRgtGD0YvQu9KT0LDQvSDQvdOZ0YDQtdGB0YLQtdC70LXRgNC00LUg0LrQtdC30LTQtdGB0LXRgtGW0L0g0LzRi9Kb0YLRiyDQvtGC0YLQtdCz0ZYg0YLQsNGB0YvQvNCw0LvQtNCw0pPRi9GIINCx0LXQu9C+0Log0LHQvtC70YvQvyDRgtCw0LHRi9C70LDQtNGLLjxiciAvPg0KMinQkdCw0LvQsNC70LDRgNC00LAg0L3QtdGE0YDQvtC90L3Ri9KjINC00LjRgdGC0LDQu9GM0LTRliDRgtKv0YLRltC60YjQtdC70LXRgNGWIC0g0LHRltC30LTQtSDQvdC10YHQtdC/INGC0rHQt9GW0LvRg9GW0L3RltKjINGB0L7So9KT0Ysg0YHQsNGC0YvQu9Cw0YDRi9C9INKb0LDQvNGC0LDQvNCw0YHRi9C3INC10YLQtdGC0ZbQvSDRgdC+0qPSk9GLINC60L7QvdGG0LXQstC+0Lkg0LHTqdC70ZbQvNC00LXRgNGW0L3RltKjINCx0ZbRgNGWINCx0L7Qu9GL0L8g0YHQsNC90LDQu9Cw0LTRiy4g0J7QvdGL0qMg0L3QtdCz0ZbQt9Cz0ZYg0pvRi9C30LzQtdGC0ZYgLSDQt9OZ0YDQtNGWINC60L7QvdGG0LXQvdGC0YDQu9C10YMg0LzQtdC9INC+0L3Ri9KjINKb0rHRgNCw0LzRi9C9INGA0LXRgtGC0LXRgyDQsdC+0LvRi9C/INGB0LDQvdCw0LvQsNC00YsuINCR0LDQu9Cw0LvQsNGA0LTQsCDQsdKx0Lsg0LHTqdC70ZbQvCDQsdC40LrQsNGA0LHQvtC90LDRgiDQutCw0YLQuNC+0L3QtNCw0YDRi9C9INGA0LXRgtGC0LXRg9Cz0LUsINGP0pPQvdC4INC+0LvQsNGA0LTRi9KjINKb0LDQudGC0YvQvyDSm9Cw0L3Sk9CwINGB0ZbSo9GW0YDRltC70YPRltC9INKb0LDQvNGC0LDQvNCw0YHRi9C3INC10YLQtSDQsNC70LDQtNGLLCDQttOZ0L3QtSDRgdC+0L3Ri9C80LXQvSDSm9C+0YHQsCwg0YHRg9GC0LXQs9GWINCw0L3QuNC+0L3QtNCw0YDRi9C9INGN0LrRgdC60YDQtdGG0LjRj9C70LDRgyDQsNGA0pvRi9C70Ysg0LDSk9C30LDQvdGL0qMg0pvRi9GI0pvRi9C70LTRi9KbLdC90LXQs9GW0LfQtNGW0Log0YLQtdC/0LUt0YLQtdKj0LTRltC6INCx0LDQu9Cw0L3RgdGL0L3RgdCw0pvRgtCw0YPSk9CwINKb0LDRgtGL0YHQsNGC0YvQvSDQsdC+0LvRi9C/INC60LXQu9C10LTRli4g0KHQvtC90YvQvNC9INKb0LDRgtCw0YAg0LHRltC30LTQtSDQtNC40YHRgtCw0LvRjNC00ZYg0YLSr9GC0ZbQutGI0LXQu9C10YAgLSDQsdGW0LfQtNC1IE5hINC205nQvdC1IEsg0Y3Qu9C10LrRgtGA0L7Qu9C40YLRgtC10YDRltC90ZbSoyDQtNC10qPQs9C10LnRltC9INGA0LXRgtGC0LXQvyDQvtGC0YvRgNGD0pPQsCDSm9Cw0YLRi9GB0LDRgtGL0L0g0LHQvtC70YvQvyDQutC10LvQtdC00ZYsINC805nRgdC10LvQtdC9INGB0L7QuyDQsNGA0pvRi9C70Ysg0LjQvtC90LTRi9KbINCx0LDQu9Cw0L3RgdGC0Ysg0YLQtdKj0LXRgdGC0ZbRgNGD0LPQtSDQttCw0YPQsNC/0YLRiyDQsdC+0LvRi9C/INC60LXQu9C10LTRli4g0JHRltC30LTQtSDRgdC+0L3Ri9C80LXQvSDSm9C+0YHQsCDQsNC80LzQvtC90LjQuSDRgtKx0LfQtNCw0YDRi9C90YvSo9C00LAg0YHTmdC70LTQtdC9INGA0LXQsNCx0YHQvtGA0LHRhtC40Y/RgdGL0L3QsCDSm9Cw0YLRi9GB0LDRgtGL0L0g0LHQvtC70YvQvyDQutC10LvQtdC00ZYuINCR0rHQuyDQvNC10YXQsNC90LjQt9C80LTQtdGA0LTRliDQvdC10LPRltC30ZYg0YDQtdGC0YLQtdC50YLRltC9INCx0q/QudGA0LXQutKv0YHRgtGWINCx0LXQt9GW0L3RltKjINGI0YPQvNCw0pvRgtGLINKb0LDQsdCw0YLRi9C90LDQvSDQsdOp0LvRltC90LXRgtGW0L0g0LDQu9GM0LTQvtGB0YLQtdGA0L7QvSDQs9C+0YDQvNC+0L3Ri9C90LTQsCDTqdC90LTRltGA0YPQs9C1INKb0LDRgtGL0YHQsNGC0YvQvSDQsdC+0LvRi9C/INC60LXQu9C10LTRli4g0J7QuyDTqdC3INC60LXQt9C10LPRltC90LTQtSDQsNC70YzQtNC+0YHRgtC10YDQvtC9INGB0YMg0LzQtdC9INC90LDRgtGA0LjQuSDQtNC10qPQs9C10LnRltC9INGA0LXRgtGC0LXQudGC0ZbQvSDQsdC+0LvRi9C/INC60LXQu9C10LTRli4g0J7RgdGL0LvQsNGA0LTRiyDRgNC10YLRgtC10YMg0LDRgNKb0YvQu9GLINCw0YDRgtC10YDQuNGP0LvRi9KbINKb0LDQvSDSm9GL0YHRi9C80YvQvdC00LAg0YDQtdGC0YLQtdC5INCw0LvQsNGC0YvQvSDQsdC+0LvRi9C/INC60LXQu9C10LTRli4g0JHRltC30LTQtSDQtNC40YHRgtCw0LvRjNC00ZYg0YLSr9GC0ZbQutGI0LUg0L3QtdGE0YDQvtC90L3Ri9KjINGB0L7So9KT0Ysg0YHQtdCz0LzQtdC90YLRgtC10YDRltC90ZbSoyDQsdGW0YDRliDQsdC+0LvRi9C/INGC0LDQsdGL0LvQsNC00YssINC+0Lsg0LHRltC30LTQtSDRhNC40LvRjNGC0YDQsNGG0LjRj9C70LDQvdKT0LDQvSDQvdCw0YLRgNC40LnQtNGW0qMgNS0xMCUt0L3QtSDQtNC10LnRltC9INGA0LXQsNCx0YHQvtGA0LHRhtC40Y/Qu9Cw0LnRgtGL0L0g0LHQvtC70YvQvyDQutC10LvQtdC00ZYsINCw0Lsg0YHRg9C00Ysg06nRgtC60ZbQt9Cx0LXQudC00ZYsINGB0L7QuyDQsNGA0pvRi9C70Ysg0LPQtdC90LXRgNCw0YbQuNGP0LvQsNC90pPQsNC9INCz0LjQv9C+0L7RgdC80L7Qu9GP0YDQu9GLINKb0rHQsdGL0YDQu9GLINGB0rHQudGL0pvRgtGL0pvRgtGLINGB0LDSm9GC0LDQudGC0YvQvSDQsdC+0LvRi9C/INC60LXQu9C10LTRli4g0prQvtGB0YvQvNGI0LAg0pvRi9C30LzQtdGC0YLQtdGA0ZbQvdC1INC+0YDQsNC70LDRgtGL0L0g0LHQvtC70YHQsNKbLCDQsdGW0LfQtNC1INC60LDQu9GM0YbQuNC5INC80LXQvSDQvNCw0LPQvdC40LnQtNGW0qMg0YDQtdCw0LHRgdC+0YDQsdGG0LjRj9GB0YvQvdCwINC005nQu9C80LUt0LTTmdC7INGA0LXRgtGC0LXQu9GD0ZbQvdC1INKb0LDRgtGL0YHQsNGC0YvQvSDQsdC+0LvRi9C/INC60LXQu9C10LTRliwg0YHQvtC7INCw0YDSm9GL0LvRiyDQvNCw0LPQvdC40Lkg0LzQtdC9INC60LDQu9C40LnQtNGW0qMgPjUlINC90LXRgdC10L/Qv9C10L0g0YjRi9KT0LDRgNGL0LvQsNGC0YvQvSDQsdC+0LvRi9C/INC60LXQu9C10LTRli4g0JbQsNC70L/RiyDQsdKx0Lsg0LbQtdGA0LTQtdCz0ZYg0LzSr9C80LrRltC9INC10qMg0q/Qu9C60LXQvSDQvNOZ0L3Qs9C1INC40LUg0YTRg9C90LrRhtC40Y/RgdGLINGB0L7QuyDQsNC70YzQtNC+0YHRgtC10YDQvtC90LTRiyDQsdOp0LvRgyDQsNGA0pvRi9C70Ysg0L7QvdGL0qMg0L3QsNGC0YDQuNC50LTRliDRgNC10LDQsdGB0L7RgNCx0YbQuNGP0LvQsNGDINKb0YvQt9C80LXRgtGW0LzQtdC9INCx0LDQudC70LDQvdGL0YHRgtGLINCx0L7Qu9GD0YjRiyDQutC10YDQtdC6LiDQodC+0L3QtNCwLCDQsdGW0LfQtNC1INCw0pPQt9Cw0LTQsNKT0Ysg0YLRltC90LTQtdCz0ZYg0L3QsNGC0YDQuNC5INC00LXSo9Cz0LXQudGWINC205nQvdC1INGC0ZbQvdC90LXQvSDRgtGL0YEg0YHSsdGL0pvRgtGL0psg0LTQtdKj0LPQtdC50ZbQtNC1INOZ0LbQtdC/0YLTmdGD0ZbRgCDQttC+0pPQsNGA0YvQu9Cw0L8sINC60LXRgNGW0YHRltC90YjQtSDQutCw0LvQuNC5INC80LXQvSDRgdGD0YLQtdCz0ZbQvdGW0qMg0LrTqdC/0YLQtdC/INGN0LrRgdC60YDQtdGG0LjRj9C70LDQvdGD0YvQvdCwINOZ0YHQtdGAINC10YLQtdGC0ZbQvSDQsdC+0LvRi9C/INC60LXQu9C10LTRliwg0YHQvtC7INC80LXRhdCw0L3QuNC30Lwg0LDRgNKb0YvQu9GLINKb0LDQvS3RgtCw0LzRi9GAINKb0LDQsdGL0YDSk9Cw0YHRi9C90LTQsNKT0Ysg0YLQtdCz0ZbRgSDRgdCw0LvQsNC70Ysg0LHSsdC70YjRi9Kb0LXRgtGC0LXRgNC00ZbSoyDQstCw0LfQvtC60L7QvdGB0YLRgNC40LrRgtC+0YDQu9Cw0YDSk9CwINGB0LXQt9GW0LzRgtCw0LvQtNGL0pPRiyDTmdC20LXQv9GC05nRg9GW0YAg0LbQvtKT0LDRgNGL0LvQsNC50YLRi9C9INCx0L7Qu9GL0L8g0LrQtdC70LXQtNGWLiDQntGB0YvSk9Cw0L0g0LHQsNC50LvQsNC90YvRgdGC0Ysg0L7QvdGL0qMg0LDRgNGC0LXRgNC40Y/Qu9GL0psg0pvRi9GB0YvQvNC00Ysg0YDQtdGC0YLQtdC50YLRltC9INGE0YPQvdC60YbQuNGP0YHRiyDRgtKv0YHRltC90LTRltGA0ZbQu9C10YLRltC9INCx0L7Qu9Cw0LTRiy4g0J7RgdGL0LvQsNC50YjQsCwg0LHQsNC70LDQu9Cw0YDQtNCwINCx0rHQuyDQvdC10YTRgNC+0L3QvdGL0qMg0YHQtdCz0LzQtdC90YLRliDSsdC70LrQtdC9INC805nQvdCz0LUg0LjQtSDQsdC+0LvRi9C/INC60LXQu9C10LTRliwg0LbTmdC90LUg0LrTqdC/0YLQtdCz0LXQvSDRgNC10LDQsdGB0L7RgNCx0YbQuNGP0LvRi9KbINC205nQvdC1INGN0LrRgdC60YDQtdGC0L7RgNC70YvSmywgcEgg0LTQtdKj0LPQtdC50ZbQvSDRgNC10YLRgtC10YPRiNGWINGE0YPQvdC60YbQuNGP0LvQsNGA0LTRiywg0YIu0LEg0pvQsNC80YLQsNC80LDRgdGL0Lcg0LXRgtC10YLRltC9INCx0L7Qu9GL0L8g0LrQtdC70LXQtNGWL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2" table:style-name="ce1">
            <text:p>1067142</text:p>
          </table:table-cell>
          <table:table-cell office:value-type="string" table:style-name="ce1">
            <text:p>kazakh</text:p>
          </table:table-cell>
          <table:table-cell office:value-type="string" table:style-name="ce1">
            <text:p>Билет 26.&amp;lt;br /&amp;gt; 1.1- күндік қыз бала,перезатханада жатыр. Туғандағы салмағы 3300 г, бойы 51 см. Апгар шкаласы бойынша 8/9 балл. Балаға жалпы қан анализы алынған.Жаңа туған сау балаларда гемоглобиның мөлшері қанша?Фетальды гемоглобиның ерекшеліктерің қандай?&amp;lt;br /&amp;gt; 2.Балаларда нефроның дистальды каналшалары қандай функцияны атқарады?&amp;lt;br /&amp;gt;</text:p>
          </table:table-cell>
          <table:table-cell office:value-type="string" table:style-name="ce1">
            <text:p>MSnQkdC10YDRltC70LPQtdC90ZYg0LHQvtC50YvQvdGI0LAg0LHRltGAINC60q/QvdC00ZbQuiDSm9GL0Lcg0LHQsNC70LAu0KLRg9Cz0LDQvSDQutC10LfQtNC10LPRliDRgdCw0LvQvNCw0pPRiyAzMzAwINCz0YAg0LDQuyDQsdC+0LnRiyDQsdC+0LvRgdCwIDUxINGB0Lwg0LTRiyDSm9Kx0YDQsNC50LTRiy7QkNC/0LPQsNGAINGI0LrQsNC70LDRgdGLINCx0L7QudGL0L3RiNCwIDgvOSDQutOp0YDRgdC10YLRltC/INGC0rHRgC7QltCw0L3QsCDRgtGD0pPQsNC9INGB0LDRgyDQsdCw0LvQsNC70LDRgNC00LAg0LPQtdC80L7Qs9C70L7QsdC40L0g0LzTqdC+0YjQtdGA0ZYg0pvQsNC70YvQv9GC0YvQtNCw0L0g0LbQvtKT0LDRgNGLINCx0L7Qu9Cw0LTRiy7SsNGA0YvSm9GC0YvQvSDQs9C10LzQvtCz0LvQvtCx0LjQvdGWINC20LDSo9CwINGC0YPSk9Cw0L0g0YHTmdCx0LjQu9C10YDQtNC1INC10YDQtdC60YjQtdC70LXQvdC10YLRltC9INCx0L7Qu9GL0L8g0LrQtdC70LXQtNGWINC205nQvdC1INC+0Lsg0LPQtdC80L7Qs9C70L7QsdC40L0gRiDRj9KT0L3QuCDRhNC10YLQsNC70YzQtNGLINCz0LXQvNC+0LPQu9C+0LHQuNC9INCx0L7Qu9GL0L8g0YLQsNCx0YvQu9Cw0LTRiy7QkdGD0Lsg0LPQtdC80L7Qs9C70L7QsdC40L3QvdGW0L0g0YLSr9GA0ZYg0rHRgNGL0pvRgtGL0L0g0LTQsNC80YPRiyDQutC10LfRltC90LTQtSDQvNCw0L3Ri9C30LTRiyDRgNOp0Lsg0LDRgtKb0LDRgNCw0LTRiy7QodC10LHQtdCx0ZYg0L7QuyDQsNC90LDRgdGL0L3Ri9C9INKb0LDQvdGL0L3QtNCw0pPRiyDQvtGC0YLQtdCz0ZbQvdGWINC20LDSm9GB0YvRgNCw0psg0LHQsNC50LvQsNC90YvRgdGC0YvRgNCw0LTRiy7SsNGA0YvSm9GC0YvQvSDQs9C10LzQvtCz0LvQvtCx0LjQvdGWINC10LrRliDQsNC70YzRhNCwINC205nQvdC90LUg0LTQtSDQtdC60ZYg0LPQsNC80LzQsCDRgtGW0LfQsdC10LrRgtC10L0g0YLSsdGA0LDQtNGLLtCQ0Lsg0LXRgNC10YHQtdC6INCz0LXQvNC+0LPQu9C+0LHQuNC9INCx0L7Qu9GB0LAg0LXQutGWINCw0LvRjNGE0LAg0LbTmdC90LUg0LXQutGWINCx0LXRgtCwINGC0ZbQt9Cx0LXQutGC0LXQvSDRgtKx0YDQsNC00Ysu0rDRgNGL0pvRgtGL0L0g0LPQtdC80L7Qs9C70L7QsdC40L3RltC90LTQtdCz0ZYg0JPQsNC80LzQsCDRgtGW0LfQsdC10LrRgtC10YAg0LPQtdC+0LzQs9C70L7QsdC40L3QtNC10LPRliDQsdC10YLQsCDRgtGW0LfQsdC10LrRgtC10YDQs9C1INKb0LDRgNCw0pPQsNC90LTQsCDQvtGC0YLQtdCz0ZbQvNC10L0g0LbQvtKT0LDRgNKT0Ysg0LbQsNKb0YvQvdC00YvSm9Kb0LAg0LjQtSDQsdC+0LvRi9C/INC60LXQu9C10LTRli7QltCw0L3QsCDRgtGD0pPQsNC9INC905nRgNC10YHRgtC10L3RltC9INKb0LDQvdGL0L3QtNCwINGE0LXRgtCw0LvRjNC00Ysg0LPQtdC80L7Qs9C70L7QsdC40L0g0LTQtdC90LPQtdC50ZYg0LbQvtKT0LDRgNGLINCx0L7Qu9Cw0LTRiy7QkdGW0YDQsNKbINGC0LAg0L7QuyDQsdGW0YDRgtC1INCx0ZbRgNGC0LUg0L1iQSDSk9CwINCw0YPRi9GB0LDQtNGLLtOY0LTQtdGC0YLQtSzQsNC70pPQsNGI0pvRiyDQsNC50LvQsNGA0LTQsCDRhNC10YLQsNC70YzQtNGLINCz0LXQvNC+0LPQu9C+0LHQuNC90L3RltC9INC806nQu9GI0LXRgNGWIDUwINC205nQvdC1IDgwINC/0LDQudGL0LfQtNGLINKb0rHRgNCw0LnQtNGLLtCQ0Lsg0LrQtdC50ZbQvdGW0YDQtdC6ICDQtdGA0LXRgdC10Log0LPQtdC80L7Qs9C70L7QsdC40L3QvdGW0L0g0LTQtdC90LPQtdC50ZYg0LbQvtKT0LDRgNGL0LvQsNC50LTRiyDQtNCwINC905nRgtC40LbQtdGB0ZbQvdC00LUg0L7QuyDRgtOp0LzQtdC90LTQtdC50LTRli7QotGD0YvQu9KT0LDQvSDQutC10LfQtNC1INCx0LDQu9Cw0LTQsCDRhNC10YLQsNC70YzQtNGLINCz0LXQvNC+0LPQu9C+0LHQuNC9INCx0LDRgNC70YvSmyDSm9Cw0L0g0LPQtdC80L7Qs9C70L7QsdC40L3RltC90ZbQvSA2MC04NdC/0LDQudGL0LfRi9C9INKb0rHRgNCw0LnQtNGLLtCe0Lsg0LHRltGA0YLRltC90LTQtdC/IEhiQSDQsNC50L3QsNC70LDQtNGLLjEg0LbQsNGB0pvQsCDSm9Cw0YDQsNC5INGE0LXRgtCw0LvRjNC00Ysg0LPQtdC80L7Qs9C70L7QsdC40L0gMTUg0L/QsNC50YvQt9C00Ysg0LDQuyAzINC20LDRgdKb0LAg0pvQsNGA0LDQuSDSm9Cw0LvRi9C/0YLQsNKT0YvQtNCw0LkgMiDQv9Cw0LnRi9C30LTRiyDQtNCw0L0g0LDRgdC/0LDQudGC0YvQvSDQsdC+0LvQsNC00Ysu0KHQvtC90YvQvNC10L0g0pvQsNGC0LDRgCDSsdGA0YvSm9GC0YvSmyDQs9C10LzQvtCz0LvQvtCx0LjQvdC90ZbQvSDTqdC80ZbRgCDRgdKv0YDRgyDRg9Cw0pvRi9GC0YsgMTIg0LrRg9C90LPQtSDSm9GL0YHSm9CwLtCh0L7QvdGL0L0g0LXRgdC10LHRltC90LXQvSDQs9C10LzQvtC70LjQt9Cz0LUg0LbQuNGWINKx0YjRi9GA0LDQudC00Ysu0J7QuyDQvdOZ0YDQtdGB0YLQtdC00LUg0YLRgNCw0L3Qt9C40YLQvtGA0LvRi9KbINGB0LDRgNKT0LDRjtC80LXQvSDQsdGW0LvRltC90LXRgtGW0L0g0LHQvtC70LDQtNGLLiAgMinQkdCw0LvQsNC70LDRgNC00LDSk9GLICDQvdC10YTRgNC+0L3QvdGL0L0g0LTQuNGB0YLQsNC70YzQtNGLINC60LDQvdCw0LvRiNCw0LvQsNGA0YvQvdGL0L0g0YTRg9C90LrRhtC40Y/RgdGL0L3QsCDRgtC+0pvRgtCw0LvQsNGC0YvQvSDQsdC+0LvRgdCw0Lwu0KDQtdCw0LHRgdC+0YDQsdGG0LjRjyDQttOZ0L3QtSDRgdC10LrRgNC10YbQuNGPINC/0YDQvtGG0LXRgdGC0LXRgNGWINC90LXRhNGA0L7QvdC90YvQvSDQtNC40YHRgtCw0LvRjNC00Ysg0LHTqdC70ZbQutGC0LXRgNGW0L3QtNC1INC20q/RgNC10LTRli7QntC7INCx0ZbQt9C00LUg0q/RiCDQsdOp0LvRltC80L3QtdC9INGC0rHRgNCw0LTRiy7QkdGW0YDRltC90YjRltGB0ZYg0L/RgNC+0LrRgdC40LzQsNC70YzQtNGLINOp0LfQtdC60YjQtSzQsNC7INC10LrRltC90YjRltGB0ZYg0L7QuyDQk9C10L3Qu9C1INGW0LvQvNC10LPRliDQttOZ0L3QtSDSr9GI0ZbQvdGI0ZbRgdGWINC+0Lsg0LTQuNGB0YLQsNC70YzQtNGLINOp0LfQtdC60YjQtSDQsdC+0LvRi9C/INGC0LDQsdGL0LvQsNC00Ysu0J/RgNC+0LrRgdC40LzQsNC70YzQtNGLINOp0LfQtdC60YjQtdC70LXRgNC00LUg0YHRg9C00YvQvSzQvdCw0YLRgNC40Lkg0LbTmdC90LUg0YXQu9C+0YDQtNGL0L0gODAg0L/QsNC50YvQt9KT0LAg0LbRg9GL0pPRiyDQsdC10LvRgdC10L3QtNGWINGA0LXQsNCx0YHQvtGA0LHRhtC40Y/Qu9Cw0L3QsNC00Ysu0JrQsNC70LjQudC00ZbQvSAs0pvQsNC90YLRgtGL0L0s0YHQvtC90YvQvNC10L0g0pvQsNGC0LDRgCDQutOp0L/RgtC10LPQtdC9INCw0LzQuNC9INKb0YvRiNKb0YvQu9C00LDRgNGL0L3Ri9C9INCw0LfQtNCw0L8g0LHQuNC60LDRgNCx0L7QvdCw0YIg0L/QtdC9INCx0LjQvtC+0YDQs9Cw0L3QuNC60LDQu9GL0psg0YTQvtGB0YTQsNGC0YLRi9C9LNGB0YPQu9GM0YTQsNGC0YLRi9C9LNGD0YDQsNGC0YLRi9C9INGC0L7Qu9GL0psg0YDQtdCw0LHRgdC+0YDQsdGG0LjRj9GB0Ysg0LbSr9GA0LXQtNGWLtCa0LXQudCx0ZbRgCDRjdC60LfQvtCz0LXQvdC00ZYg0LfQsNGC0YLQsNGA0LTRi9C9INGB0LXQutGA0LXRhtC40Y/RgdGLINC20q/RgNC10LTRli7Qk9C10L3Qu9C1INGW0LvQvNC10LPRliDQttCw0LvQv9GLINCx0ZbQt9C00LUg0L7RgdC80L7RgdGC0Ysg0LHQtdC70YHQtdC90LTRliDRgNC10LDQsdGB0L7RgNCx0YbQuNGP0YHRiyzQvdC10YHQtdC/INC60L7QvdGG0LXQvdGC0YDQsNGG0LjRj9GB0YvQvdGL0L0g0pvQsNGA0LDQvNCwINKb0LDRgNGB0Ysg0LDQu9C80LDRgdGDINC80LXRhdCw0L3QuNC30LzRliDSm9Cw0LzRgtCw0LzQsNGB0YvQtyDQtdGC0ZbQu9C10LTRli7QlNC40YHRgtCw0LvRjNC00Ysg06nQt9C10LrRiNC10LvQtdGA0LPQtSDQutC10LvQtdGC0ZbQvSDQsdC+0LvRgdCw0Lwg0L7QuyDRgdGD0LTRi9C9INCx05nRgdC10L0g0YTQsNC60YPQu9GM0YLQsNGC0LjQstGC0ZYg0YDQtdCw0LHRgdC+0YDQsdGG0LjRj9GB0Ysg0LHQvtC70YvQvyDQutC10LvQtdC00ZYu0J3QtdC50YDQvtCz0LjQv9C+0YTQuNC30LTRltC9INCw0L3RgtC40LTQuNGD0YDQtdGC0LjQutCw0LvRi9KbINCz0L7RgNC80L7QvdGL0LzQtdC9INGA0LXRgtGC0LXQu9C10YLRltC9INC60LXQu9C10LTRli7QlNC40YHRgtCw0LvRjNC00Ysg06nQt9C10LrRiNC10LvQtdGAINCw0LvRjNC00LXRgdGC0LXRgNC+0L0g0LPQvtGA0LzQvtC90Ysg0q/RiNGW0L0g0LzQuNGI0LXQvdGMINCx0L7Qu9GL0L8g0YLQsNCx0YvQu9Cw0LTRiy7QnNKw0L3QtNCwINGN0LvQtdC60YLRgNC+0LvQuNGC0YLQtdGA0LTRltC9INCw0LvRjNC00LXRgdGC0LXRgNC+0L3QvNC10L0g0YDQtdGC0YLQtdC70ZbQvdC10YLRltC90ZYg0YTQsNC60YPQu9GM0YLQsNGC0LjQstGC0ZbQuiDRgNC10LDQsdGB0L7RgNCx0YbQuNGP0YHRiy7QodGD0YLQtdCz0ZYg0JjQvtC90LTQsNGA0YvQvdGL0L0gLNCw0LzQvNC40LDQutGC0YvQvSzQutCw0LvQuNC5INC205nQvdC1INGE0L7RgdGE0LDRgtGC0LDRgNC00YvQvSDQsdC10LvRgdC10L3QtNGWINGB0LXQutGA0LXRhtC40Y/RgdGLLtCc0L7Rh9C10LLQuNC90LDQvdGL0L0g0LbTmdC90LUg0LHQsNGB0pvQsCDQtNCwINC30LDRgtGC0LDRgNC00YvQvSDQtNC40YTRhNGD0LfQuNGP0YHRiyDQttKv0YDQtdC00ZYu0J3QtdGB0LXQv9GC0ZbQvSDQutC+0L3RhtC10L3RgtGA0LDRhtC40Y/Qu9Cw0L3Rg9GLINC80LXQvSDSm9Kx0YDQsNC70YPRiyDQtNCwINC+0YHRiyDQtNC40YHRgtCw0LvRjNC00Ysg06nQt9C10LrRiNC10LvQtdGAINC80LXQvSDQttC40L3QsNGD0YjRiyDRgtKv0YLRltC60YjQtdC70LXRgNC00LUg0LbSr9GA0LXQtNGWLg==</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43" table:style-name="ce1">
            <text:p>915243</text:p>
          </table:table-cell>
          <table:table-cell office:value-type="string" table:style-name="ce1">
            <text:p>russian</text:p>
          </table:table-cell>
          <table:table-cell office:value-type="string" table:style-name="ce1">
            <text:p>Билет 26.&amp;lt;br /&amp;gt; 1.Девочка, 1-е сутки жизни, находится в родильном доме. Роды срочные, самостоятельные. Масса тела при рождении 3300 г, длина тела 51 см. Оценка по шкале Апгар 8/9 баллов. Ребенку был сделан общий анализ крови. Какая особенность фетального гемоглобина у новорожденных?&amp;lt;br /&amp;gt; 2.Какую функцию выполняет дистальный каналец нефронов у детей.&amp;lt;br /&amp;gt;</text:p>
          </table:table-cell>
          <table:table-cell office:value-type="string" table:style-name="ce1">
            <text:p>MS4g0KTQtdGC0LDQu9GM0L3Ri9C5INCz0LXQvNC+0LPQu9C+0LHQuNC9IEhiRiAt0YLQuNC/INCz0LXQvNC+0LPQu9C+0LHQuNC90LAsINC60L7RgtC+0YDRi9C5INC40LzQtdC10YLRgdGPINGDINC90L7QstC+0YDQvtC20LTQtdC90L3Ri9GFICDQuCDQv9C70L7QtNC+0LIuINCV0LPQviDRgNC+0LvRjCDQsCDRgtC+0YfQvdC10LUg0YTQtdGC0LDQu9GM0L3QvtCz0L4g0LPQtdC80L7Qs9C70L7QsdC40L3QsCwg0YLQviDRh9GC0L4g0L7QvSDQvtCx0LvQsNC00LDQtdGCINCx0L7Qu9GM0YjQuNC8INGB0YDQvtC00YHRgtCy0L7QvCDQuiDQnjIg0LrQuNGB0LvQvtGA0L7QtNGDLCDRh9C10Lwg0J3QstCQLiDQn9C+0LvRg9GH0LDQtdGC0YHRjyDQvtC90L4g0LjQvNC10LXRgiDQvtCz0YDQvtC80L3Rg9GOINGA0L7Qu9GMINC/0YDQuCDQvtCx0LXRgdC/0LXRh9C10L3QuNC4INC/0LvQvtC00LAg0LrQuNGB0LvQvtGA0L7QtNC+0Lwg0LIg0L/RgNC10L3QsNGC0LDQu9GM0L3QvtC8INGN0YLQsNC/0LUg0YDQsNC30LLQuNGC0LjRjy4g0J/QvtGH0LXQvNGDINC+0L0g0L7QsdC70LDQtNCw0LXRgiDQsdC+0LvRjNGI0L7QtSDRgdGA0L7QtNGB0YLQstC+INGBIEhiZiDQv9C+0YLQvtC80YMg0YfRgtC+INGN0YLQviDRgyBIYkYg0YHRgtGA0YPQutGC0YPRgNCwINC/0L7Qt9Cy0L7Qu9GP0LXRgiDQsCDRgtC+0YfQvdC10LUg0YHQvtGB0YLQvtC40YIg0LjQtyDQtNCy0YPRhSDQsNC70YzRhNCwINC4INCz0LDQvNC80LAg0YbQtdC/0LXQuSDRgtC+INC10YHRgtGMINCw0LvRjNGE0LAg0LTQstCwLCDQs9Cw0LzQvNCwINC00LLQsCwg0Lgg0Y3RgtC+INC/0YDQuNCy0L7QtNC40YIg0Log0YHQvdC40LbQtdC90LjRjiDQtdCz0L4g0YHQv9C+0YHQvtCx0L3QvtGB0YLQuCDRgdCy0Y/Qt9GL0LLQsNGC0YzRgdGPINGBIDIsMy3QlNCk0JMuPGJyIC8+DQo8YnIgLz4NCjIuINCU0LjRgdGC0LDQu9GM0L3Ri9C5INC60LDQvdCw0LvQtdGGIC0g0Y3RgtC+INGH0LDRgdGC0Ywg0L3QtdGE0YDQvtC90LAg0LIg0L/QvtGH0LrQtSwg0LrQvtGC0L7RgNCw0Y8g0L7RgtCy0LXRh9Cw0LXRgiDQt9CwINC+0LHRgNCw0LfQvtCy0LDQvdC40LUg0L/QvtGB0LvQtdC00L3QtdC5INGB0YLQsNC00LjQuCDQvNC+0YfQuCDQuCDRgtCw0LrQttC1INC80L7QttC10YIg0YDQtdCz0YPQu9C40YDQvtCy0LDRgtGMINC60L7QvdGG0LXQvdGC0YDQsNGG0LjRjiDQuCDRgdC+0YHRgtCw0LIg0LzQvtGH0LguINCjINC00LXRgtC10Lkg0Y3RgtC+0YIg0LTQuNGB0YLQsNC70YzQvdGL0Lkg0LrQsNC90LDQu9C10YYg0LjQs9GA0LDQtdGCINCx0L7Qu9GM0YjRg9GOINGA0L7Qu9GMINCyINC/0L7QtNC00LXRgNC20LrQtSDQutC40YHQu9C+0YLQvdC+LdGJ0LXQu9C+0YfQvdC+0LPQviDQsdCw0LvQsNC90YHQsCDRgtC+INC10YHRgtGMINGA0LXQsNCx0YHQvtGA0LHQuNGA0YPQtdGCINC40L7QvdGLINCx0LjQutCw0YDQsdC+0L3QsNGC0LAg0Lgg0YHQtdC60YDQtdGC0LjRgNGD0LXRgiDQuNC+0L3RiyDQstC+0LTQvtGA0L7QtNCwLiDQlNCw0LvRjNGI0LUg0L/QvtC70YPRh9Cw0LXRgtGB0Y8g0L/QvtC80L7Qs9Cw0LXRgiDRgNC10LPRg9C70LjRgNC+0LLQsNGC0Ywg0YPRgNC+0LLQtdC90Ywg0Y3Qu9C10LrRgtGA0L7Qu9C40YLQvtCyINC60L7RgtC+0YDRi9C1INC90LDRhdC+0LTRj9GC0YHRjyDQsiDQvNC+0YfQtSDRgtCw0LrQuNGFINC60LDQuiDQvdCw0YLRgNC40Lkg0Lgg0LrQsNC70LjQuS4g0KLQsNC6INC20LUg0LTQuNGB0YLQsNC70YzQvdGL0LUg0LrQsNC90LDQu9GM0YbRiyDRg9GH0LDRgdGC0LLRg9GO0YIg0LIg0LLRi9GA0LDQsdC+0YLQutC1INCz0L7RgNC80L7QvdCwINGC0LDQutC+0LPQviDQutCw0Log0LDQu9GM0LTQvtGB0YLQtdGA0L7QvSDQutC+0YLQvtGA0YvQuSDQv9C+0LzQvtCz0LDQtdGCINGA0LXQs9GD0LvQuNGA0L7QstCw0YLRjCDQutGA0L7QstGP0L3QvtC1INC00LDQstC70LXQvdC40LUg0JDQlCDQuCDRgtCw0LrQttC1INC60L7QvdGC0YDQvtC70LjRgNGD0LXRgiDRgNC10LDQsdGB0L7RgNCx0YbQuNGOINC90LDRgtGA0LjRjyDQuCDQstC+0LTRiyDQsiDQv9C+0YfQutCw0YU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99" table:style-name="ce1">
            <text:p>915299</text:p>
          </table:table-cell>
          <table:table-cell office:value-type="string" table:style-name="ce1">
            <text:p>russian</text:p>
          </table:table-cell>
          <table:table-cell office:value-type="string" table:style-name="ce1">
            <text:p>Билет 26.&amp;lt;br /&amp;gt; 1.Девочка, 1-е сутки жизни, находится в родильном доме. Роды срочные, самостоятельные. Масса тела при рождении 3300 г, длина тела 51 см. Оценка по шкале Апгар 8/9 баллов. Ребенку был сделан общий анализ крови. Какая особенность фетального гемоглобина у новорожденных?&amp;lt;br /&amp;gt; 2.Какую функцию выполняет дистальный каналец нефронов у детей.&amp;lt;br /&amp;gt;</text:p>
          </table:table-cell>
          <table:table-cell office:value-type="string" table:style-name="ce1">
            <text:p>0KTQtdGC0LDQu9GM0L3Ri9C5INCz0LXQvNC+0LPQu9C+0LHQuNC9LSBIYmYg0Y/QstC70Y/QtdGC0YHRjyDQvtGB0L3QvtCy0LLQvdGL0Lwg0YLQuNC/0L7QvCDQs9C10LzQvtCz0LvQu9C+0LHQuNC90LAg0YMg0L3QvtCy0L7RgNC+0LbQtNC10L3QvdGL0YUuINCa0L7RgtC+0YDRi9C5INGE0L7RgNC80LjRgNGD0LXRgtGB0Y8g0LIg0L/QtdGA0LjQvtC0INC/0LXRh9C10L3QvtGH0L3QvtCz0L4g0LrRgNC+0LLQtdGC0LLQvtGA0LXQvdC40Y8sINC90LDRh9C40L3QsNGO0YnQuNGB0Y8g0L3QsCA3INC90LXQtNC10LvQtSDQs9C10YHRgtCw0YbRhtC40LjQuCDQuCDQtNC+0YHRgtC40LPQsNGO0YnQuNC1INGB0LLQvtC5INC80LDQutGB0LjQvNC80YPQvCDQvdCwIDUg0LzQtdGB0Y/RhtC1LiDQldCz0L4g0L7RgdC+0LHQtdC90L3QvtGB0YzRjiDRj9Cy0LvRj9C10YLRgdGPINCx0L7Qu9C10LXQtSDQstGL0YHQvtC60L7QtSDRgdC/0L7RgdC+0LHQvdC+0YHRgtGMINGB0LLRj9C30YvQstCw0YLRjCDQutC40YHQu9C+0YDQvtC0INC/0L4g0YHRgNCw0LLQvdC10L3QuNGOINGBINCz0LXQvNC+0LPQu9C+0LHQuNC90L7QvCDQstC30YDQvtGB0LvQvtCz0L4g0YLQuNC/0LAuINCi0LDQuiDQutCw0Log0YTQtdGCLtCz0LXQvNC+0LPQu9C+0LHQuNC9INC40LzQtdC10YIg0LHQvtC70LXQtSDQstGL0YHQvtC60L7QtSDRgdGA0L7QtNGB0YLQstC+INC6INC60LjRgdC70L7RgNC+0LTRgyzRh9GC0L4g0L/QvtC30LLQvtC70Y/QtdGCINC/0LvQvtC00YMg0Y3RhNGE0LXQutGC0LjQstC90L4g0L/QvtC70YPRh9Cw0YLRjCDQutC40YHQu9C+0YDQvtC+0LQg0LjQtyDQvNCw0YLQtdGA0LjQvdC90YHQutC+0Lkg0LrRgNC+0LLQuCDRh9C10YDQtdC3INC/0LvQsNGG0LXQvdGC0YzRgy7Qn9C+0LLRi9GI0LXQvdC90L7QtSDRgdGA0L7RgdC00YLQstC+INC6INC60LjRgdC70L7RgNC+0LTRgyDQvtC/0YDQtdC00LXQu9GP0LXRgtGB0Y8g0LXQs9C+INC/0LXRgNCy0LjRh9C90L7QuSDRgdGC0YDRg9C60YLRg9GA0YDQvtC5LNGB0L7RgdGC0L7Rj9GJ0LXQuSDQuNC3INC00LLRg9GFINCw0LvRjNGM0YTQsCDRhtC10L/QtdC5INC4INC00LLRg9GFINCz0LDQvNCw0LAg0YbQtdC/0LXQuSDRgSDQs9C70L7QsdC40L3QvtC80Lwu0K3RgtC+INC/0L7Qt9Cy0L7Qu9GP0LXRgiDRgdGA0LDQstC90LjRgtC10LvRjNC90L4g0LzQsNC70L7QvNGDINC+0LHRitC10LzRgyDQutGA0L7QstC4INGDINC/0LvQvtC00LAg0LLRi9C/0L7Qu9C90Y/RgtGMINGE0YPQvdC60LrRhtC40Y4g0LrQuNGB0LvQvtGA0L7QtNC+LdC+0LHQtdGB0L/QtdGH0LXQvdC40Y8g0LHQvtC70LXQtSDRjdGE0LXQutGC0LjQstC90L4uINCf0YDQuCDRgNC+0LbQtNC10L3QuNC4INGA0LXQsdC10L3QutCwINGB0L7RgdGC0LDQstC70Y/QtdGCINGE0LXRgi7Qs9C10LzQvtCz0LsuINC+0LrQvtC70L7QviA2MC04NSUg0L7RgiDQvtCx0YnQtdCz0L4g0LrQvtC7LdCy0LAg0LPQtdC80L7Qs9C70L7QsdC40L3QsCwg0L/QvtGB0LvQtSDRh9C10LPQviDQvtC9INC90LDRh9C40L3QsNC10YIg0YDQsNGB0L/Qv9Cw0LTQsNGC0YzRgdGPLCDQvtCx0YrRj9GB0L3Rj9GPINC/0L7Rj9Cy0LvQuNC90LjQtSDRgyDQtNC10YLQtdC5INGE0LjQt9C40L7Qu9C+0LPQuNGH0LXRgdC60L7QuSDRgtGA0LDQvdC30LjRgtGC0L7RgNC90L7QuSDQttC10LvRgtGD0YXQuC4g0JIg0YLQtdGH0LXQvdC40Lgg0L/QtdGA0LLRi9GFINC80LXRgdGP0YbQtdCyINC20LjQt9C90Lgg0L/RgNC+0LjRgdGF0L7QtNC40YIg0LXQs9C+INC/0L7RgdGC0LXQv9C10L3QvdC+0LUg0LfQsNC80LXRidC10L3QuNC1INC90LAg0LPQtdC80L7Qs9C70L7QsdC40L0g0LLQt9GA0L7RgdC70L7Qs9C+INGC0LjQv9CwIEhiQS7QmiDQv9C10YDQstC+0LzRgyDQs9C+0LTRgyDQv9C+0YDQtNC60LAtMTUlLCDQuCDQuiAzINCz0L7QtNCw0Lwg0LrQvtC70LjRh9C10YHRgtCy0L4g0LPQtdC80L7Qs9C70L7QsdC40L3QsNCyINC90L7RgNC80LUg0L3QtSDQv9GA0LXQstGL0YjQsNC10YIgMiUgMi4g0JTQuNGB0YLQsNC70YzQvdGL0YUg0LrQsNC90LDQu9GM0YzRhtCw0YUg0L/RgNC+0LjRgdGF0L7QtNC40YIg0LDQutGC0LjQstC90LDRjyDRgNC10LDQsdGB0L7RgNCx0YbQuNGPINC40L7QvdC+0LIg0L3QsNGC0YDQuNGPINC4INGF0LvQvtGA0LAg0L/QvtC0INC60L7QvdGC0YDQvtC70LXQvCDQs9C+0YDQvNC+0L3QsCDQsNC70YzQtNC+0YHRgtC10YDQvtC90LAuINCf0LDRgNCw0LvQtdC70LvRjNC90L4g0L/RgNC+0LjRgdGF0L7QtNC40YIg0YDQtdCw0LHRgdC+0YDQsdGG0LjRjyDQstC+0LTRiyDQv9GA0Lgg0YPRh9Cw0YHRgtC40Lgg0LDQvdGC0LjQtNC40YPRgNC40YLQuNGH0LXRgdC60LrQvtCz0L4g0LPQvtGA0LzQvtC90LAs0YfRgtC+INGB0L/QvtGB0L7QsdGB0YLQstGD0LXRgiDQutC+0L3RhtC10L3RgtGA0LDRhtC40Lgg0LzQvtGH0LgsINC60YDQvtC80LUg0YLQvtCz0L4g0LTQuNGB0YLQsNC70YzQvdGL0LUg0LrQsNC90LDQu9GM0YbRiyDQsNC60YLQuNCy0L3QviDRgdC10LrRgNC10YLQuNGA0YPRjtGC0YIg0LjQvtC90Ysg0LrQsNC70LjRjyzQstC+0LTQvtGA0L7QtNCwLCDQuCDQsNC80LzQvtC+0L3QuNGPLCDRh9GC0L4g0LLQsNC20L3QviDQtNC70Y8g0YDQtdCz0YPQu9GP0YbQuNC4INC60LjRgdC70L7RgtC90L4t0YnRidC10LvQvtGH0L3QvtCz0L4g0YDQsNCy0L3QvtCy0LXRgdC40Y8g0Lgg0L/QvtC00LTQtdGA0LbQsNC90LjRjyDRjdC70LXQutGC0YDQvtC70LvQuNGC0L3QvtCz0L4g0LHQsNC70LDQvdGB0LAuINCt0YLQviDQtNC+0YHRgtC40LPQsNC10YLRgdGPLCDQsiDRh9Cw0YHRgtC90L7RgdGC0Lgg0L/Rg9GC0LXQvCDRgdC10LrRgNC10YbQuNC4INC40L7QvdC+0LIg0LLQvtC00L7RgNC+0LTQsCDQuCDQsNC80LzQvNC40LDQutCwLCDQsiDQtNC40YHRgtCw0LvRjNC90YvQtSDQutCw0L3QsNC70YzRhtGLINGD0YfQsNGB0YLQstGD0Y7RgiDQsiDRgNC10LPRg9C70Y/RhtC40Lgg0YDQnSDQutGA0L7QstC4INC60L7QvNC/0LXQvdGB0LjRgNGD0Y8g0LzQtdGC0LDQsdC+0LvQuNGH0LXRgdGB0LrQuNC5INCw0YbQuNC00L7Qty4g0KPQtNC10YLQtdC5INGE0YPQvdC60YbQuNGPINC60L7QvdGG0LXQvdGC0YDQsNGG0LjQuCDQvNC+0YfQuCDQstGL0YDQsNC20LXQvdCwINGB0LvQsNCx0LXQtSwg0YfQtdC8INGDINCy0LfRgNC+0YHQu9GL0YUg0Y3RgtC+INGB0LLRj9C30LDQvdC+INGBINC90LXQt9GA0LXQu9C70L7RgdGC0YzRjiDQv9C+0YfQtdGH0LXQvdGL0YUg0LrQsNC90LDQu9GM0YbQtdCyINC+0YHQvtCx0LXQvdC90L4g0YMg0LTQtdGC0LXQuSDQv9C10YDQstGL0YUg0L3QtdC00LXQu9GMINC20LjQt9C90LguINCd0LXQtNC+0YHRgtCw0YLQvtGH0L3QsNGPINGA0LXQsNCx0YHQvtGA0LHRhtC40LjQvtC90L3QsNGPINGE0YPQvdC60YbQuNGPINC60LDQvdCw0LvRjNGG0LXQstC+0LPQviDQsNC/0L/QsNGA0LDRgtCw0LAg0LzQvtC20LXRgiDQv9GA0LjQstC+0LTQuNGC0Ywg0Log0LHQvtC70YzRiNC+0Lkg0L/QvtGC0LXRgNC1INCy0L7QtNGLLCDQuCDRgdC+0LvQtdC5LSDQsiDQv9C10YDQstGL0YvQtSDQvNC10YHRj9GG0Ysg0LbQuNC30L3QuC4g0KLQsNC6INC20LUg0YMg0LTQtdGC0LXQuSDQvdCwINC/0LXRgNCy0L7QvtC8INCz0L7QtNGDINC20LjQt9C90Lgg0L3QtdGCINGA0LXQsNC60YbQuNC4INC/0YDQuCDQstCy0LXQtNC10L3QuNC4INCQ0JTQkywg0Lgg0LzQuNC90LXRgNCw0LDQu9C60L7RgNGC0LjQutC+0LnQtNC+0LIg0LrQvtGC0L7RgNGL0LUg0L7QsdC90LDRgNGD0LbQuNCy0LDRjtGC0YHRjyDRgyDQstC30YDQvtGB0LvRi9GFLtCX0LDQtNC10YDQttC60LAg0L3QsNGC0YDQuNGPINCy0LXQtNC10YIg0Log0YDQsNC30LLQuNGC0LjRjiDQvtGC0LXQutC+0LIsINC4INC00YDRg9Cz0LjRhSDQv9GA0L7Rj9Cy0LvQvdC40Lkg0LPQuNC/0LXRgNGB0L7Qu9C10LzQuNC4LtCS0YHQtSDRjdGC0L4g0YPRh9C40YLRi9Cy0LDRgtGMICzQv9GA0Lgg0L3QsNC30L3QsNGH0LXQvdC40Lgg0YDQtdCx0LXQvdC60YMg0YHQvtC70LXQstGL0YUg0YDQsNGB0YLQstC+0YDQvtCyINC40LvQuCDQtNGA0YPQs9C40YUg0LzQtdC00LjQutCw0LzQtdC90YLQvtCy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05" table:style-name="ce1">
            <text:p>915405</text:p>
          </table:table-cell>
          <table:table-cell office:value-type="string" table:style-name="ce1">
            <text:p>russian</text:p>
          </table:table-cell>
          <table:table-cell office:value-type="string" table:style-name="ce1">
            <text:p>Билет 26.&amp;lt;br /&amp;gt; 1.Девочка, 1-е сутки жизни, находится в родильном доме. Роды срочные, самостоятельные. Масса тела при рождении 3300 г, длина тела 51 см. Оценка по шкале Апгар 8/9 баллов. Ребенку был сделан общий анализ крови. Какая особенность фетального гемоглобина у новорожденных?&amp;lt;br /&amp;gt; 2.Какую функцию выполняет дистальный каналец нефронов у детей.&amp;lt;br /&amp;gt;</text:p>
          </table:table-cell>
          <table:table-cell office:value-type="string" table:style-name="ce1">
            <text:p>MSnQpNC10YLQsNC70YzQvdGL0Lkg0LPQtdC80L7Qs9C70L7QsdC40L0t0Y3RgtC+INGC0LDQuiDRgdC60LDQttC10Lwg0LLQuNC0INCz0LXQvNC+0LPQu9C+0LHQuNC90LAg0LrQvtGC0L7RgNGL0Lkg0L3QsNGF0L7QtNC40YIt0YHRjyDRgtC+0LvRjNC60L4g0YMg0L3QvtCy0L7RgNC+0LbQtNC10L3QvdGL0YUg0Lgg0L/Qu9C+0LTQvtCyIC7QldCz0L4g0L7RgdC+0LHQtdC90L3QvtGB0YLRjCDQt9Cw0LrQu9GO0YfQsNC10YIt0YHRjyDQsiDRgtC+0Lwg0YfRgtC+LNCx0L7Qu9GM0YjQvtC1INC/0YDQuNGC0Y/QttC10L3QuNC1ICjRgdGA0L7QtNGB0YLQstC+KSDQuiDQutC40YHQu9C+0YDQvtC00YMo0J4yKSwg0YfQtdC8INGDINCy0LfRgNC+0YHQu9C+0LPQviDQs9C10LzQvtCz0LvQvtCx0LjQvdCwIChIYmEpLtCt0YLQviDQuCDQuNCz0YDQsNC10YIg0LHQvtC70YzRiNC+0LUg0YDQvtC70Ywg0LIg0L7QsdC10YHQv9C10YfQtdC90LjQtSDQutC40YHQu9C+0YDQvtC00LAo0J4yKSDQv9C70L7QtNCwINCy0L4g0LLRgNC10LzRjyDQv9GA0LXQvdCw0YLQsNC70YzQvdC+0LPQviDQv9C10YDQuNC+0LTQsCAu0KHQsNC80L7QtSDQs9C70LDQstC90L7QtSDQvtGC0LvQuNGH0LjQtSDRhNC10YLQsNC70YzQvdC+0LPQviDQs9C10LzQvtCz0LvQvtCx0LjQvdCwINC+0YIg0LLQt9GA0L7RgdC70L7Qs9C+INCz0LXQvNC+0LPQu9C+0LHQuNC90LAoSGJBKSAs0LLRi9GB0L7QutC+0Lkg0LDRhNGE0LjQvdC+0YHRgtC4INC6INC60LjRgdC70L7RgNC+0LTRgyjQnjIpICzRh9GC0L4g0Lgg0L/QvtC80L7Qs9Cw0LXRgiDQv9C+0LvRg9GH0LDRgtGMINGA0LXQsdC10L3QutGDINC60LjRgdC70L7RgNC+0LTQsCjQnjIpINC+0YIg0Log0LzQsNGC0LXRgNC4INC6INC/0LvQvtC00YMs0YfQtdGA0LXQtyDQv9C70LDRhtC10L3RgtGDIC7QrdGC0L4g0YTRg9C90LrRhtC40Y8g0Lgg0YHQv9C+0YHQvtCx0YHRgi3QstGD0LXRgiDQsNC00LDQv9GC0LDRhtC40Lgg0L/Qu9C+0LTQsCDQuiDQvdC40LfQutC+0LzRgyDRg9GA0L7QstC90Y8g0LrQuNGB0LvQvtGA0L7QtNCwKNCeMikg0LIg0LrRgNC+0LLQuCDQvNCw0YLQtdGA0LguICAgICAgICAgICAgICAgICAgICAgICAgICAgICAgICAgICAgICAgICAgICAgICAgICAgICAgICAgICAgICAgICAgICAgICAgIDIp0JTQuNGB0YLQsNC70YzQvdGL0Lkg0LrQsNC90LDQu9C10YYg0L3QtdGE0YDQvtC90LAgLSDRjdGC0L4gINGH0LDRgS3RgtGMINC90LXRhNGA0L7QvdCwINC/0L7Rh9C60Lgg0Lgg0L/QvtGH0LXRh9C90L7QuSDRgdGC0YDRg9C60YLRg9GA0Yss0LrQvtGC0L7RgNCw0Y8g0YDQtdCz0YPQu9C40YDRg9C10YIg0LLQvtC00L3Qvi3RjdC70LXQutGC0YDQvtC70LjRgtC90YvQuSDQsdCw0LvQsNC90YEuICDQstGL0L/QvtC7LdC90Y/QtdGCINC60LvRjtGH0LXQstGD0Y4g0YTRg9C90LrRhtC40Y4g0LIg0LfQsNCy0LXRgNGI0LXQvdC40Lgg0YTQvtGA0LzQuNGA0L7QstCw0L3QuNC1INC80L7Rh9C4LCDQuCDRgtCw0LrQttC1ICDRgNC10LPRg9C70LjRgNC+0LLQsNC90LjQtSDQutC+0L3RhtC10YLRgNCw0YbQuNC4INC80L7Rh9C4INC4INGB0L7RgdGC0LDQstCwINC80L7Rh9C4LtCjINC80LDQu9Cw0YjQtdC5INC00LjRgdGC0LDQu9GM0L3Ri9C5INC60LDQvdCw0LvQtdGGINC90LXRhNGA0L7QvdCwINC40LPRgNCw0LXRgiDQt9C90LDRh9C40LzQvtC1INGA0L7Qu9GMINCyINCx0LDQu9Cw0L3RgdC40YDQvtCy0LDQvdC40LUg0LrQuNGB0LvQvtGC0L3QvtGB0YLQuCDQuCDRidC10LvQvtGH0L3QvtGB0YLQuCDRh9C10YDQtdC3LCDQv9C+0LLRgtC+0YDQvtC90L7QtSDQv9C+0LPQu9C+0YnQtdC90Lgg0LHQuNC60L7RgNCx0LDQvdCw0YIt0LjQvtC90L7QsiDQuCDQstGL0LTQtdC70LUt0L3QuNC1INCy0L7QtNC+0YDQvtC0LdC40L7QvdC+0LIgLtCt0YLQvtGCINC/0YDQvtGG0LXRgdGBINGC0LDQutC20LUg0YHQv9C+0YHQvtCx0YHRgtCy0YPQtdGCICDRgNC10LPRg9C70LjRgNC+0LLQsNC90LjQtSDRg9GA0L7QstC90Y8g0Y3Qu9C10LrRgtGA0L7Qu9C40YLQvtCyLNGC0LDQutC40YUg0LrQsNC6INC90LDRgtGA0LjQuShOYSkg0Lgg0LrQsNC70LjQuSAoSykg0LIg0LzQvtGH0LUu0JrRgNC+0LzQtSDRgtC+0LPQviDQtNC40YHRgtCw0LvRjNC90YvQuSDQutCw0L3QsNC70LXRhiDRg9GH0LDRgdGC0LLRi9C10YIg0LIg0LLRi9GA0L7QsdC+0YLQutC1INCz0L7RgNC80L7QvdCwLNGC0LDQutC+0Lkg0LrQsNC6INCw0LvRjNC00LXRgdGC0LXRgNC+0L0gLNC60L7RgtC+0YDRi9C5INGA0LXQs9GD0LvQuNGA0YPQtdGCINC60YDQvtCy0Y/QvdC+0LUg0LTQsNCy0LvQtdC90LjQtSDQv9GD0YLQtdC8INC60L7RgtC90YDQvtC70Y8g0LfQsCDQvtCx0YDQsNGC0L3Ri9C8INCy0YHQsNGB0YvQstCw0L3QuNC10Lwg0J3QsNGC0YDQuNGPKE5hKSDQuCDQstC+0LTRiyhIMk8pINCyINC/0L7Rh9C60LDRhS4gICAgICAgICA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первый ответ не полный</text:p>
          </table:table-cell>
          <table:table-cell office:value-type="float" office:value="0" table:style-name="ce1">
            <text:p>0</text:p>
          </table:table-cell>
          <table:table-cell table:number-columns-repeated="16376"/>
        </table:table-row>
        <table:table-row table:style-name="ro1">
          <table:table-cell office:value-type="float" office:value="1067008" table:style-name="ce1">
            <text:p>1067008</text:p>
          </table:table-cell>
          <table:table-cell office:value-type="string" table:style-name="ce1">
            <text:p>russian</text:p>
          </table:table-cell>
          <table:table-cell office:value-type="string" table:style-name="ce1">
            <text:p>Билет 26.&amp;lt;br /&amp;gt; 1.Девочка, 1-е сутки жизни, находится в родильном доме. Роды срочные, самостоятельные. Масса тела при рождении 3300 г, длина тела 51 см. Оценка по шкале Апгар 8/9 баллов. Ребенку был сделан общий анализ крови. Какая особенность фетального гемоглобина у новорожденных?&amp;lt;br /&amp;gt; 2.Какую функцию выполняет дистальный каналец нефронов у детей.&amp;lt;br /&amp;gt;</text:p>
          </table:table-cell>
          <table:table-cell office:value-type="string" table:style-name="ce1">
            <text:p>MS4g0JTQu9C40YLQtdC70L3Ri9C5INGN0YDQuNGC0YAw0YbQuNGCMNC3INGDINC9YdCy0L7RgNC+0LZk0JXQndCr0KUg0L7QsdCj0YPRgdC70L7QstC10L0g0LLRi9GB0L7QutC40Lwg0YHQvtC00LXRgNC20LDQvdC10Lwg0YTQtdGC0LDQu9C90L7Qs9C+INCz0LXQvNC+0LPQu9C+0LHQuNC90LAtSGJGLiDQpNC10YLQsNC7L9C5INCz0Y3QvNC+0LPQu9Cw0LHQuNC9INGDINC90LDQstCw0YDQvtC2L9GFINCw0YLQu9C40YfQsNC10YLRgdC40Y8g0YHQstC+0LXQuSDQs9C70L7QsdC40L3QvtCy0L7QuSDRh9Cw0YHRgtGM0Y4uICDQpNC10YLQsNC70L3Ri9C5ICDQs9C10LzQvtCz0LvQvtCx0LjQvSDQvtCx0LvQsNC00LDQtdGCINCx0L7Qu9C10LUg0LLRi9GB0L7QutC10Lwg0YHRgDDQtNGB0YLQstC+0Lwg0Log0LrQuNGB0LvQvtGA0L7QtNGDINGH0LXQvCDQstC30YDQvtGB0LvRi9C5INCz0LXQvNC+0LPQu9Cw0LHQuNC9LtCt0YLQviDQvdC10L7QsdGF0L7QtNC40LzQviDQtNC70Y8g0L7QsdC10YHQv9C10YfQtdC90LjRjyAg0YzRjdGE0YTQtdC60YLQuNCy0L3QvtCz0L4g0L/QtdGA0LXQvdC+0YHQsCDQutC40YHQu9C+0YDQvtC00LAg0L7RgiDQvNCw0YLQtdGA0LjQvdGB0LrQvtC5INC60YDQvtCy0LggINGBINC+0YLQvdC+0YHQuNGC0LXQu9GM0L3QviAg0L3QuNC30LrQuNC8INC/0LDRgNGG0LjQsNC70L3Ri9C8INC00LDQstC70LXQvTHQuNC10Lwg0LrQuNGB0LvQvtGA0L7QtNCwINC6INC/0Lsw0LTRgy4gPGJyIC8+DQrQldGJ0LUgINC+0LTQvdCwINC+0YHQvtCx0LXQvdC+0YHRgjHRjC0g0YHQuNC90KIx0LXQtyBIYkYg0L/RgNC10L7QsdC70LDQtNCw0LjQtdGCINCyINGC0LXRh9C10L3QuNC1INCy0L3Rg9GC0YDQuNGD0YLRgNC+0LHQvdC+0LPQviDRgNCw0LfQstC40YLQuNGPLiAg0JAg0LHQvtC70YzRiNC40Lkg0YHRgNC+0Log0LbQuNC30L3QuCBIYkYg0YHQv9C+0YHQvtCx0YHRgtCy0YPQtdGCINC/0L7QtNC00LXRgNC20LDQvdC40Y4gICDQtDDRgdGC0LDRgtC+0YfQvdCw0LPQviDRg9GA0L7QstC90Y8g0LrQuDEg0YHQu9C+0YDQvtC00LAgINC/0L7RgdC70LUg0YDQvtC20LTQtdC90LjRjyDQtNC+INC90LDRh9Cw0LvQsCDQsNC60YLQuNCy0L3QvtCz0L4g0YHQuNC90YLQtdC30LAuPGJyIC8+DQog0J/QvtGB0LvQtSDRgNC+0LbQtNC10L3QuNGPICDQv9C+0YLRgNC10LHQvdC+0YHRgtGMINCyINCy0YvRgdC+0LrQvtC8INGB0YAw0LTRgdGC0LLQtSDQvtGC0L/QsNC00LDQtdGCLiAgINC/0J7QodCi0JXQn9CV0J3QkNCvINCX0JDQnNCV0J3QkCDQvdCwINCy0LfRgNC+0YHQu9C40Lkg0LPQtdC80L7Qs9C70L7QsdC40L3RjCAg0L/RgNC+0LjRgdGF0L7QtNC4MdGCINCyINGC0LXRh9C10L3QuCAg0L/QtdGA0LLRi9GFINC80LXRgdGP0YbQtdCyINC20LjQt9C90LjQuC4uINCSINGN0YLQvtGCINC/0LXRgNC40L7QtCDRgdC+0YXRgNCw0L3QuNGP0LXRgtGB0Y8gINC/0L7QstGL0YjQtdC90L7QtSDQutC+0Lst0LLQviDRjdGA0LjRgtGA0L7RhtC40YLQvtCyKNGE0LjQt9C40L7Qu9C+0LPQuNGH0LXRgdC60LjQuSDRjdGA0LjRgtGA0L7RhtC40YLQvtC3KSwg0LrQsNGC0L7RgNGL0LUg0L/QsNGB0YLQtdC/0LXQvdC90L3QviDRgNCw0LfRgNGD0YjQsNGO0YLRgdGPINCuLCDQv9GA0LjQstC+0LTRjyDQuiDRhNC40LfQuNC+0LvQvtCz0LjRh9C10YHQutC+NtC5INC20LXQu9GC0YPRhdC1INC90LDQstC+0YDQvtC20LTQtdC90L3Ri9GFINC40Lct0LfQsCDQv9C+0LLRi9GI0LXQvdC+MNCz0L4g0L7QsdGA0LDQt9C+0LLQsNC90Lgx0Y8g0LHQuNC70LjRgNGD0LHQuNC90LAuPGJyIC8+DQo8YnIgLz4NCtCj0YfQuNGC0YvQstGL0LDRjyDRgdCw0YHRgtCw0Y/QvdC40Y8g0L/QviDRiNC60LDQu9C1INCQ0L/Qs9Cw0YAg0LzQvtC20L3QviDRgdGD0LTQuNGC0Ywg0L4g0L3QvtGA0LzQsNC70YzQvTDQvCDRgdCw0YHRgdGC0L7Rj9C90LjQuCDQvdCw0LLQvtGAMNC20LTQtdC9MNC+0LPQvi4g0JXRgdC70Lgg0YHQtNC10LvQsNGC0YwgIDDQsdGJ0LXQuSDQsNC90LDQu9C40Lcg0LrRgNC+0LLQuCwg0YLQviDQvNC+0LPRg9GCINC+0YLQvNC10YfQsNGC0YzRgdGPINCy0YvRgTDQutC40LUg0LfQvdCw0YfQtdC90LjRjyDQs9C10LzQvtCz0Lsw0LHQuNC90LAg0LIg0L/QtdGA0YvQtSDQtNC90Lgg0LbQuNC30L3QuCwg0YfRgtC+INGB0LLRj9C30LDQvdC+ICDRgSDRhNC40LfQuNC+0LvQvtCz0LjRh9C10YHQutC40Lwg0Y3RgNC40YLRgNC+0YbQuNGC0L7Qt9C+0LwuICAgPGJyIC8+DQo8YnIgLz4NCjIuINGDINCU0JXQotCV0Jkg0LTQuNGB0YLQsNC70Ywg0LrQsNC90LDQuy4g0L3QtdGE0YDQvtC90L7QsiAg0LLRi9C/0L7Qu9C90Y/RjtGCINGC0LDQutC40LUg0LbQuNC30L3QtdC90L3QviDQstCw0LbQvdGL0LUgINGE0YPQvdC60YbQuNC4INC60LDQujo8YnIgLz4NCjEg0YDQldCQ0JHQodCe0KDQkdGG0YbQmNCvINCd0JDQotCg0JjQryDQmCDQktCe0JTQqy3RgNC10LPRg9C70LjRgNGD0LUx0YHRjyDQs9C+0YDQvNC+0L3QvtC8INCw0LvRjNC00L7RgdGC0LXRgNC+0L3QvtC8LiDQnzDQlCDQtNC10LnRgdGC0LLQuNC10Lwg0Y3RgjDQszAg0LPQvtGA0LzQvtC90LAgINC/0YDQsNC40YHRhdC+0LTQuNGCINGA0LXQsNCx0YHQvtGA0LHRhtC40Y8g0LjQvtC90L7QsiDQvdCw0YLRgNC40Y8g0LjQtyDQv9GA0L7RgdCy0LXRgtCwINC60LDQvdCw0LvRhtC10LIg0LIg0LrRgNC+0LIuINCS0L7QtNCwICDRgdC70LXQtNC00YPQtdGCINC30LAg0Y3RgtC40LzQuCDQuNC+0L3QsNC80Lgg0L/QviDQs9GA0LDQtNC40LXQvdGC0YMg0LrQvtC90YbRjdC90YLRgNCw0YbQuDHQuC48YnIgLz4NCjIuINCh0JXQmtCg0JXQptCY0K8g0JrQkNCb0JjQry4gPGJyIC8+DQozIC4g0KDQtdCz0YPQu9GP0YbQuNGPINGA0J0g0Lgg0LrQvtC90YbRjdC90YLRgNCw0YbQuNC4INC80L7Rh9C4PGJyIC8+DQo0KdGA0JXQkNCR0KHQntCg0JEv0Y8g0KXQm9Ce0KDQkCA8YnIgLz4NCjUp0KDQtTHQs9GD0LvRj9GG0LjRjyDRgNCdINC60YDQvtCy0LggLSDQtNC40YHRgiDQutCw0L3QsNC70YYv0Ysg0L3QtdGE0YDQvtC90L4v0LIg0YPRh9Cw0YHRgtCy0YPQudGO0YIgINCyINGB0LXQutGA0LXRhtC40Lgg0LjQvtC90L7QsiDQstC+0LTRgNC+0YDQvtC00LAg0Lgg0YDQtdCw0LHRgdC+0YDQsS/QuCDQsdC40LrQsNGA0LHQvtC90LDRgtCwLCDRh9GC0L4g0L/QvtC30LLQvtC70Y/QtdGCINGD0YDQtdCz0YPQu9C40YDQvtCy0LDRgtGMINC60LjRgdC70L7RgtC90L4g0YnQtdC70L7Rh9C90L7QuSDQsdCw0LvQsNC90YEuPGJyIC8+DQo2KSDQoNC10LA20LHRgdC+0YDQsdGB0LjRjyDQutCw0LvRjNGG0LjRjy0g0Y3RgtC+INC/0YDQvtC40YHRhdC+0LTQuNGCINC/0L7QtCDQtNC10LnRgdGC0LLQuNC10Lwg0L/QsNGA0LDRgtCz0L7RgNC80L7QvdCwLiDQoNC10LDQsdGB0L7RgNCx0YbQuNGPINC60LDQu9GM0YbQuNGPICDQstCw0LbQvdC+INC00LvRjyDQv9Cw0LTQtNC0MdC10YDQttCw0L3QuDHRjyDQvdC+0YDQvNCw0LvQvdC+0LPQs9C+INGD0YDQvtCy0L3RjyDQutCw0LvRhtC40Y8g0LIg0L7RgNCz0LDQvdC40LfQvNC1INC4INGE0L7RgNC80LjRgNC+0LLQsNC90LjRjyDQutC+0YHRgtC90L7QuSDRgtC60LDQvdC4INGDINC00LXRgtC10LkuINCQINGN0YLQviAw0YfQtdC90Ywg0LLQsNC20L0wINC00LvRjyDQtNC10YLQtdC5LiA8YnIgLz4NCjYpINCg0LXQsNCx0YHQvtGALdGPINC80L7Rh9C10LLQuNC90YsuIC0g0L3QtdC60L7RgtC+0YDQvtC1INC60L7Qu9C40YfQtdGB0LLQviDQvtGB0YLQsNGC0L7Rh9C90L7QuSDQvNC+0YfQtdCy0LjQvdGLLSDQvdC10L7QsdGF0L7QtNC40LzQviDQsdGD0LTRjdGCINC00LvRjyDQtNCw0LvQvdC10LnRiNC10LPQviDQujDQvdGG0Y3QvdGC0YDQuNGA0LDQstCw0L3QuNGP0Y8g0LzQvtGH0LguPGJyIC8+DQo8YnIgLz4NCtC+0KLQm9CY0KfQmNGPINCe0KIg0JLQl9Cg0L7QvtCh0JvQq9ClLiAg0KMg0L3QvtCy0L7RgNC+0LbQtNC10L3QvdGL0YUgINC4INC00LXRgtC10Lkg0L/QtdGA0LLRhSDQvNC10YHRj9GG0LXQsiDQttC40LfQvdC4ICDQtNC40YHRgtCw0LvRjCDQutCw0L3QsNC70YbRiyAg0L3QtdGE0YDQvtC90L7QsiAg0L3QsNGF0L7QtNGP0YLRgdGPINC90LAg0YHRgtCw0LTQuNC4INGE0YPQvdC60YbQuNC+0L3QsNC70L3QvtCzN9C+INGB0LDQt9GA0LXQstCw0L3QmNGPLiDQrdGC0L4g0L7Qt9C90LDRh9Cw0LXRgiAg0YfRgtC+INC40YUg0YzRgdC/0LDRgdC+0LHQvdC+0YHRgtGMINC6INC60L7QvdGG0LXQvdGC0YDQuNGA0L7QstCw0L3QuNGOICDQvNC+0YfQuCDQuCDRgNC10LPRg9C70Y/RhtC40Lgg0Y3Qu9C10LrRgtGAMNC70LjRgtC90L7Qs9C+INCx0LDQu9Cw0L3RgdCwINC80LXQvdC10LUg0Y3RhNC10LrRgtC40LLQvdCwINGH0LXQvCDRgyDQstC30YDQvtGB0LvRi9GFLiAuINCd0LDQstC+0YDQvtC20LTQtdC90YvQtSDQuNC80LXRjtGCICDQvtGC0L3QvtGB0LjRgtC10LvRjNC90L4gINGB0L3QuNC20LXQvdC90YPRjiDRgdC/0LDRgdC+0LHQvdC+0YHRgiDQuiDRgNC10LDQsdGB0L7RgNCx0YbQuNC4ICDQvdCw0YLRgNC40Y8g0Lgg0Y3QutGB0LrRgNC10YbQuNC4INC60LDQu9C40Y8uINCt0YLQviDQtNC10LvQsNC10YIg0LjRhSDQsdC+0LvQtdC1INGD0Y/Qt9Cy0LjQvNGL0LzQuCDQvdCwINC/0L7RgtC10YDRjiAg0LIw0LTQvTAt0Y3Qu9C10LrRgtGA0L7Qu9C40YLQvdC+0LPQviDQsdCw0LvQu9Cw0L3RgdGB0LAuINCf0L7RjdC+0LzRgyDRh9Cw0YnQtSDRgyDQtNC10YLQtdC5INC60L7QttC90YvQtSDQv9C+0LrRgNC+0LLRiyDRgdGD0YXQuNC1INC4INGDINC90LjRhSDQstGL0YHQvtC60LDRjyDQv9C+0YLRgNC10LHQvdC+0YHRgiDQuiDQstC+0LTQtS4gIC4g0KHQv9Cw0YHQvtCx0L3QvtGB0YLRjCDQvdC+0LLQvtGA0LbQtCAg0Log0Y3RgdC60YDQtdGG0Lgg0LrQuNGB0LvQvtGCINC4INGA0LXQsNCx0YHQvtGA0LHRhtC40LggINCx0LjQutCw0YDQsdC+0L3QsNGC0LAgINC80L7QttC1MdGCINCx0YvRgtGMINC10YnQtSDQvdC10LfRgNC10LvQvtC5LiDQrdGCMCDQv9GA0LXQtNC/0LDQuzDQs9Cw0LXRgiDRh9GC0L4g0L/QvtCy0YvRidCw0LXRgtGC0YHRjyDRgNC40YHQuiDQvNC10YLQsNCxMNC70LjRh9C10YHQutC+0LPQvi4g0LDRhtC40LTQvtC30LAg0LIg0L7Qv9GA0LXQtNC10LvQtdC90LjRhSDRgdC40YLRg9Cw0YbQuNGP0YUuINCa0LvQuNC90LjRh9C10YHQutC4ICDRhNGD0L3QutGG0LjQvtC90LDQu9C90LDRjyDQvdC10LfRgNC10LvQvtGB0YLRjNGMICDQtNC40YHRgiDQutCw0L3QsNC70YbQsCAg0YMg0LTQtdGC0LXQuSDQvNC+0LbQtdGCINC/0YDQvtGP0LLQu9GP0YLRjNGB0Y8gICDQsiDQsdC+0LvRjNGI0LXQuSDRgdC60Lsw0L3QvdC+0YHRgtC4INC6INC00LXQs9C40LTRgNCw0YLQsNGG0LjQuCDQuCDQs9C40L8w0LrQsNC70LjQtdC80LjQuC4g0J3QsCDQn9CQ0JvQndCQ0KbQldCd0J3QntCVINCYINCf0KDQkNCS0JjQm9Cd0J7QlSDQoNCQ0JfQktCY0KLQmNCV0LUg0JTQkNCd0KvQpSDQodCi0KDQo9Ca0KLQo9GA0Y0g0JLQm9CY0K/QldCiINGC0LDQutC20LUg0J/QmNCi0JDQndCY0JUg0YDQtdCx0LXQvdC60LA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91" table:style-name="ce1">
            <text:p>914691</text:p>
          </table:table-cell>
          <table:table-cell office:value-type="string" table:style-name="ce1">
            <text:p>english</text:p>
          </table:table-cell>
          <table:table-cell office:value-type="string" table:style-name="ce1">
            <text:p>Ticket 26.&amp;lt;br /&amp;gt; 1. Тhe girl, the 1st day of life, is in the maternity hospital. Delivery is urgent, independent. Body weight at birth 3300 g, body length 51 cm. Apgar score 8/9 points. The child underwent a general blood test.What is the peculiarity of fetal hemoglobin?&amp;lt;br /&amp;gt; 2. What is the function of the distal tubule of nephrons in children.&amp;lt;br /&amp;gt;</text:p>
          </table:table-cell>
          <table:table-cell office:value-type="string" table:style-name="ce1">
            <text:p>MSwudGhlIGdpcmwgLHRoZSAxIHN0IGRheSBvZiBsaWZlLGJvZHkgd2VpZ2h0IDMzMDBnbSxib2R5IGxlbmd0aCA1MSBjbSAgYXBnYXIgc2NvcmUgOC85IHBvaW50LCBmZXRhbCBoZW1vZ2xvYmluIGlzIHRoZSBtYWluIG94eWdlbiBjYXJyaW5ncHJvdGVpbiBpbiB0aGUgYmxvb2Qgb2YgYSBmZXRhdXMgYW5kIG5ld2Jvcm4uaXRzIG1haW4gcGVjdWxpcmFpdHkgaXMgaXRzIGhpZ2hlciBveHlnZW4gYWZmaW5pdHkgY29tcGFyZSB0byBhZHVsdCBoZW1vZ2xvYmluIDxoYkE+LlRIRSBBTExPVyBIRU1PR0xPQklOIHRvIGJpbmQgb3h5Z2VuIG1vcmUgZWZmZWN0aXZlbHksZmFjaWxpdGluZyB0aGUgdHJhbnNmZXIgb2Ygb3h5Z2VuIGZyb20gdGhlIG1vdGhlciBibG9vZCBhY3Jvc3MgdGhlIHBsYWNlbnRhIHRvIHRoZSBmZXR1cy50aGUgcHJvcGVydHkgZW5hYmxlcyBveHlnZW4gdHJhbnNmZXIgdG9wbGFjZW50YSB0byBtb3RoZXIgYmxvb2RzdHJlbSB0byB0aGUgZmV0YWwgYmxvb2QgY2lyY3VsYXRpbiAsdHdvIGFsZmEgYW5kIHR3byBnYW1tYSBjaGFpbiAsLmZldGFsIGhlbW9nbG9iaW4gY29uc2lzdCB0byB0d28gYWxmYSBhbmQgdHdvIGdhbW1hIGNoYWluICxnbG9iaW4gY2hhaW4gMmFsZmEgMmdhbW1hICwuYWR1bGQgaGVtb2Jsb2JpbiBjb25zaXMgMiBhbGZhIDIgYmV0YSBjaGluIGdsb2JpIDJhbGZhIDIgYmV0YSwudGhlIHByZXNlbmNlIG9mIGdhbW1hIGNoYWluIGFyZSBjb250cmlidXRlIHRvIHRoZSBkaXN0aW50IG94eWdlbiBiaW5kaW5nIGNoYXJhY3RlcmlzdGUgLnByb21vdGUgb3h5Z2VuIHRyYW5zZmVyIHRoZSBpbmNyZWFzZSBveHlnZW4gYWZmZWNpbnR5IHRvIGZhY2l0aXRlcyB0aGUgdHJhbnNmZXIgb2Ygb3h5Z2VuIG1hdGVybmFsIGJsb29kIHRvIGZldGFsIGJsb29kIHN0cmVhbSAsZW5zdXJpbmcgYWR1cXVlbnQgb3h5Z2VuIHN1cHBseSB0byB0aGUgZGV2ZWxwb2luZyBmZXR1cyAuR1JBRFVMRSBSRVBMRUNNRU5UIDphZnRlciBiaXJ0aCAsdGhlcmUgaXMgYSBncmFkdWxlIHJlcGxhY2VtZW50IG9mIGZldGFsIGhlbW9nbGliaW4gd2l0aCBhZHVsdCBoZW1vZ2xvYmluIGFuZCwgYnkgYXBwcm94IHNpeCBtb250aCBvZiBhZ2UgbW9zdCBhbmZhbnQgcHJlZG9taW5hdGluZyBoYXZlIGFkdWx0IGhlbW9nbG9iaW4gLC4gICAgICAgICAgICAgICAgICAgICAgICAgICAgICAgICAgICAgICAgICAgICAgICAgICAgICAgICAgICAgICAgICAgICAgICAgICAgICAgICAgICAgICAgICAgICAgICAgICAgICAgICAgICAgICAgICAgICAgICAgICAyLnRoZSBkaXN0YWwgdHVidWxlIG9mIG5lcGhyb25zIGluIGNoaWxkcmVuIGFyZSBwbGF5IGEgY3J1Y2lhbCByb2xlIG9mIHJlYWJzb3JiaW5nIGlvbnMgYW5kIHdhdGVyICxtYWludGFpbmNlIGFjaWQtIGJhc2UgYmFsYW5jZSBhbmQgcmVndWxhdGluZyBibG9vZCBwcmVzc3VyZSAsLjEuLlJFQUJTT1JCVElPTiBPRiBJT05TLXNvZGl1bTxuYSs+LGNsb3JpZGUgPGNsLT4sY2FsY2l1bTxjYT4uYXJlIHJlYWJzb3JiZWQgYWN0aXZlbHkgaW4gdGhlIGRpc3RhbCB0dWJ1bGUgLHVuZHIgaG9ybW9uIHJlZ3VsYXRpb24gcGFydGljdWxhcnkgYWxkZXN0ZXJvbiBhbmQgcGFyYXRoeXJvaWQgaG9ybW9uIDxQVEg+LC4yLi5BQ0lEIEJBU0UgQkFMQU5DRSA6OnRoZSBkaXN0YWwgdHVidWxlIGFyZSBzZWNyYXRlIGh5ZHJvZ2VuIGlvbnMgSCsgYW5kIHJlYWJzb3JiZWQgYmljYXJib25hdGVzIDxIQ08zLT5UTyBNQUlOVEFJTiBCTE9PRCBwaC4zLi5XQVRFUiBCQUxBTkNFIDo6dGhyb3VnaCB0aGUgZGlzdGFsIHR1YnVsZSBwYXJ0aWN1bGFyeSBpbXBlcm1lYWJsZXRvIHdhdGVyIHVuZGVyIHRoZSBpbmZsdWVuY2Ugb2YgYW50aWRpdXJldGljIGhvcm1vbjxBREg+LCx3YXRlciBwZXJtZWFiaWxpdHkgaW5jcmVhc2UgLGFsbG93aW5nIHdhdGVyIHJlYWJzb3J0aW9uIHRvIGNvbnNlcnZlIGZsdWlkLDQuLlJFR1VMQVRJT04gT0YgQkxPT0QgUFJFU1NVUkU6OkJZIHJlYWJzb3J0aW9uIHNvZGl1bSBhbmQgYW5kIHdhdGVyIC5pdCBjb250cmlidXRlIHRvIHRoZSByZWd1bGF0aW9uIG9mIGJsb29kIHZvbHVtZSBhbmQgYmxvb2QgcHJlc3N1cmUuICAgICAgICAgICAgICAgICAgICAgICAgICAgICAgICAgICAgICAgICAgICAgICAgICAgICAgICAgICAgICAgICAgICAgICAgICAgICAgICAgICAgICAgICAgICAgICBpbiBjaGlsZHJlbiB0aGVzZSBmdW5jdGlvbiBhcmUgbWF0dXJpbmcgLHRoZXNlIG1lYW5lIGtpZG5leSBhcmUgbGVzcyBlZmZpY2VudCBhdCBjb25jZW50cmF0aW9uIHVyaW5lIGFuZCByZWd1bGF0aW5nIGVsZWN0cm9seXRlIGNvbXBhcmUgdG8gYWR1bHQsLiA=</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5076" table:style-name="ce1">
            <text:p>915076</text:p>
          </table:table-cell>
          <table:table-cell office:value-type="string" table:style-name="ce1">
            <text:p>english</text:p>
          </table:table-cell>
          <table:table-cell office:value-type="string" table:style-name="ce1">
            <text:p>Ticket 26.&amp;lt;br /&amp;gt; 1. Тhe girl, the 1st day of life, is in the maternity hospital. Delivery is urgent, independent. Body weight at birth 3300 g, body length 51 cm. Apgar score 8/9 points. The child underwent a general blood test.What is the peculiarity of fetal hemoglobin?&amp;lt;br /&amp;gt; 2. What is the function of the distal tubule of nephrons in children.&amp;lt;br /&amp;gt;</text:p>
          </table:table-cell>
          <table:table-cell office:value-type="string" table:style-name="ce1">
            <text:p>VEhFIEdJUkwsIFRIRSAxc3QgREFZIE9GIExJRkUgLCBJUyBJTiBUSEUgTUFURVJOSVRZIEhPU1BJVEFMIC4uLi4uLiAgICAgICAgICAgICBQRUNVTElBUklUWSBPRiBGRVRBTCBIRU1PR0xPQklOICAuSElHSEVSIEFGRklOSVRZIEZPUiBPWFlHRU4sIEhFTU9HTE9CSU4gSEFTIEEgSElHSEVSIEFGRklOSVRZIEZPUiBPWFlHRU4gQVMgQ09NUEFSRUQgVE8gQURVTFQgSEVNT0dMT0JJTi4gVEhJUyBQUk9QRVJUIEVOQUJMRVMgRUZGSUNJRU5UIE9YWUdFTiBUUkFOU0ZFUiBBQ1JPU1MgVEhFIFBMQUNFTlRBIEZST00gVEhFIE1PVEhFUiBUTyBGRVRBTFMgQkxPT0RTVFJFQU0gQ0lSQ1VMQVRJT04gLCBUV08gQUxQSEEgTkFBTkQgVFdPIEdBTUEgQ0hBSU5TLCAuIEZFVEFMIEhFTU9HTE9CSU4gQ09OU0lTVCBPRiBUV08gQUxQSEEgQ0hBSU5TQU5EIFRXTyBHQU1BIENIQUlOUyAuIFdISUxFIEFEVUxUIEhFTU9HTE9CSU4gQ09OU0lTVCBPRiBUV08gQUxQSEEgQU5EIFRXTyBCRVRBIEdMT0JJTiBDSEFJTlMuIFRIRSBQUkVTRU5DRSBPRiBHQU1BIENIQUlOUyBDT05UUklCVVRFUyBUTyBJVFMgRElTVElOQ1QgT1hZR0VOIEJJTkRJTkcgQ0FQQUNJVFkgLiAuIFBST01PVEVTIE9YWUdFTiBUUkFOU0ZFUiAsIFRIRSBJTkNSRVNFRCBBRkZJTklUWSBPRiBIRU1PR0xPQklOIEZBU0NJTElUQVRFUyBUSEUgT1hZR0VOIFRSQU5TRkVSIEZST00gRlJPTSBNQVRFUk5BTCBCTE9PRCBJTiBUSEUgUExBQ0VOVEEgVE8gRkVUQUxTIEJMT09EU1RSRUFNLiBFTlNVUklORyBBREVRVUFURVMgT1hZR0VOIFNVUFBMWSBGUFIgVEhFIERFVkVMT1BJTkcgRkVUVVMuLi4uICAgICAyKSBGVU5DVElPTiBPRiBUSEUgRElTVEFMIFRVQlVMRSBPRiBUSEUgTkVQSFJPTkUgSU4gQ0hJTEQuLi4uRklORS1UVU5OSU5HIEFORCBFTEVDVE9MWVRFIEFORCBXQVRFUiBCQUxBTkNFLi4gVEhFIERJU1RBTCBUVUJVTEUgU1BFQ0lGSUNBTExZIFRIRSBESVNUQUwgQ09OVlVMQVRFRCBJUyBSRVNQT05TSUJMRSBGT1IgRklORSBUVU5OSU5HIEVMRUNUT0xZVEUgQkFMQU5DRSBXQVRFUiBSRUFCU09SUFRJT04gSU4gVEhFIE5FUEhST05FIE9GIFRIRSBLSURORVkgLi4uLiBTT0RJVU0gQU5EIENBTENJVU0gUkVHVUxBVElPTiAsLCBTT0RJVU0gUkVBQlNPUlBUSU9OIEFORCBDQUxDSVVNIFJFR1VMQVRJT04gT0NDVVJTIElOIFRIRSBESVNUQUwgVFVCVUxFLi4gVEhFIFJFQlNPUlBUSU9OIE9GIFNPRElVTSBJTkZMVUVOQ0VTIEJMT09EIFBSRVNTU1VSRSBBTkQgRkxVSUQgQkFMQU5DRS4uIEhZRFJPR0VOIElPTiBTRUNSRVRJT04gLi4uIElUIFJFR1VMQVRFUyBUSEUgQkxPT0QgUGgsICBBTERPU1RFUk9ORSBJTkZMVUVOQ0VTLi4gSE9STU9ORVMgTElLRVMgQUxET1NURVJPTkUgUkVMRUFTRSAgSU4gUkVTUE9OU0UgVE8gQ0hOQUdFIElOIEJMT09EIFZPTFVNRSBBTkQgUFJFU1NVUkUsIEFDVCBPTiBUSEUgRElTVEFMIFRVQlVMRSBFTkhBTkNJTkcgU09ESVVNIFJFQUJTT1JQWVRJT04gQU5EIFBPVFRBU0lVTSBTRUNSRVRJT04uLi4u</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57" table:style-name="ce1">
            <text:p>915257</text:p>
          </table:table-cell>
          <table:table-cell office:value-type="string" table:style-name="ce1">
            <text:p>kazakh</text:p>
          </table:table-cell>
          <table:table-cell office:value-type="string" table:style-name="ce1">
            <text:p>Билет 27.&amp;lt;br /&amp;gt; 1.Балалардың асқорыту жүйесінің дамуы эмбриогенезы.&amp;lt;br /&amp;gt; 2.3 жасар бала. Шағымдары температурасының жоғарлануына, ылғалды жөтел көп қақырықпен, тынысы қйіндалған. Қарағанда: жағдайы орташа дәрежеде, бозғылт, экспираторлық ентігу. Перкуторлық дыбыс қороп тәрізді, аускультация кезінде қатан тыныс,қүрғақ және әр түрлі ылғалды сырылдар естіледі.Балалада қандай ентігу? Қандай зерттеулер жүргізу қажет диагноз қойюшын?&amp;lt;br /&amp;gt;</text:p>
          </table:table-cell>
          <table:table-cell office:value-type="string" table:style-name="ce1">
            <text:p>MS3RgdKx0YDQsNKbKSDQkdCw0LvQsNC70LDRgNC00YvSoyDQsNGB0pvQvtGA0YvRgtGDINC20q/QudC10YHRltC90ZbSoyDRjdC80LHRgNC40L7Qs9C10L3QtdC30ZYg0LPQtdGB0YLQsNGG0LjRj9C90YvSoyDTqdGC0LUg0LXRgNGC0LUg0LrQtdC30LXSo9C00LXRgNGW0L3QtNC1INCx0LDRgdGC0LDQu9Cw0LTRiy4g0K3QvNCx0YDQuNC+0L3QsNC70LTRiyDQtNCw0LzRg9C00YvSoyDQtdC60ZbQvdGI0ZYg0LDQv9GC0LDRgdGL0L3QtNCwICjQsdCw0YHRi9C90LTQsCkg0YjQsNC80LDQvNC10L0gNy04INC60q/QvdGWICDRjdC90LTQvtC00LXRgNC80LDQtNCw0L0g0LDQu9KT0LDRiNKb0Ysg0ZbRiNC10LogKNCx0ZbRgNGW0L3RiNGW0LvRltC6INGW0YjQtdC6KSDQvy/QsS4g0JDQuyDQtdC60ZbQvdGI0ZYg0LDQv9GC0LDQvdGL0qMg0YHQvtKj0YvQvdCwINKb0LDRgNCw0LksIDEyINC60q/QvdGWINCx0ZbRgNGW0L3RiNGW0LvRltC6INGW0YjQtdC6INC10LrRliDQsdOp0LvRltC60LrQtSDQsdOp0LvRltC90LXQtNGW05kuINKw0YDRi9Kb0ZbRiNGW0LvRltC6INC205nQvdC1INKx0YDRi9Kb0YHRi9GA0YLRi9C70YvSmyDQsdC+0LvRi9C/LiDSsNGA0YvSm9GW0YjRltC70ZbQuiDQsdOp0LvRltC6INGC0ZbQutC10LvQtdC5INCw0YHSm9C+0YDRi9GC0YMg0LbSr9C50LXRgdGW0L3RltKjINCx0LDRgdGC0LDQvNCw0YHRiywg0LDQuyDSsdGA0YvSm9GB0YvRgNGC0YvQu9GL0pvRgtCw0L0g0YHQsNGA0Ysg0YPRi9C3INKb0LDQv9GI0YvSk9GLINC/L9CxLiDQkdCw0YHRgtCw0L/Sm9GL0LTQsCDQsdGW0YDRltC90YjRltC70ZbQuiDRltGI0LXQuiDQttCw0LHRi9KbINC60q/QudC00LUg0LHQvtC70LDQtNGLLCDQvtC90LTQsCDQutC70L7QsNC60LDQu9GM0LTRiyDQttOZ0L3QtSDRgNC+0YLQvtCz0LvQvtGC0L7Rh9C90YvQuSDQvdC10LzQtdGB0LXQtSDQsNGD0YvQt9C20rHRgtKb0YvQvdGI0LDSm9GC0YvSmyDQvNC10LzQsdGA0LDQvdCwINCx0L7Qu9Cw0LTRiy4g0JPQtdGB0YLQsNGG0LjRj9C90YvSoyDSr9GI0ZbQvdGI0ZYg0LDQv9GC0LDRgdGL0L3QtNCwINCw0YPRi9C30LbSm9GC0pvRi9C90YjQsNKb0YLRi9KbINC80LXQvNCx0LDRgNCw0L3Ri9KjLCDQsNC7ICAzINCw0LnRi9C90LAg0LTQtdC50ZbQvSDQutC70L7QsNC60LDQu9GM0LTRiyDQvNC10LzQsdGA0LDQvdCw0L3Ri9KjINC10YDRg9GWINC20q/Qt9C10LPQtSDQsNGB0LDQtNGLLiDQkNC7INC+0LvQsNGA0LTRi9KjINC10YDRltC80LXQuSDSm9Cw0LvRi9C/INKb0L7RjtGLINKx0YDRi9Kb0ZbRiNGW0LvRltC6INC00LDQvNGDINCw0L3QvtC80LDQu9C40Y/Qu9Cw0YDRi9C90LAg0L3QtSDQsNKb0LDRg9C70LDRgNGL0L3QsCDQsNC70YvQvyDQutC10LvQtdC00ZYuINKw0YDRi9Kb0ZbRiNGW0LvRltC6INC00LDQvNGDINC60LXQt9GW0L3QtNC1INGN0L3QtNC+0LTQtdGA0LzQsCDQvNC10LfQvtC00LXRgNC80LDQvdGL0qMg0LLQuNGB0YbQtdGA0LDQu9C00Ysg0LbQsNC/0YvRgNCw0pvRiNCw0YHRi9C80LXQvSDQsdCw0LnQu9Cw0L3Ri9GB0YvQvywg0Y3QvdC00L7QtNC10YDQvNCwINC80LXQvSDQvNC10LfQvtC00LXRgNC80LAg0LDRgNCw0YHRi9C90LTQsCDQvNC10LfQtdC90YXQuNC80LAg06nRgdC10LTRli4g0K3QvdC00L7QtNC10YDQvNCw0LTQsNC9IC0g0Y3Qv9C40YLQtdC70LjQuSDRgtGW0L3QtNC10YDRltC90ZbSoyDQtNCw0LzRg9GLLCAg0LDQuyDQvNC10LfQtdC90YXQuNC80LDQtNCw0L0gLSDSm9Cw0L0g0YLQsNC80YvRgNC70LDRgNGLINCx0LDRgCDQtNOZ0L3QtdC60LXRgCDRgtGW0L3Rliwg0LHSsdC70YjRi9Kb0LXRgtGC0ZbQuiDSm9Cw0LHQsNGCINC/0LXQvSDRgdC10YDQvtC30LTRiyDSm9Cw0LHRi9Kb0YjQsNC90YvSoyDQtNCw0LzRg9GLINC20q/RgNC10LTRli4g0JHRltGA0ZbQvdGI0ZYg0LDQudC00YvSo9KTINGB0L7So9GL0L3QsCDSm9Cw0YDQsNC5INCx0ZbRgNGW0L3RiNGW0LvRltC6INGW0YjQtdC6IDMg0LHTqdC70ZbQutC60LUg0LHTqdC70ZbQvdC10LTRidGWLiDQntC70LDRgDog0LDQu9C00YvSo9KT0YssINC+0YDRgtCw0qPSk9GLINC205nQvdC1INCw0YDRgtKb0YsgKNC60LDRg9C00LDQu9GM0LTRlikg0LHQvtC70YvQvy4g0JDQu9C00YvSo9KT0Ysg0ZbRiNC10LrRgtC10L0g0L0v0LUg0LHTqdC70ZbQutGC0LXQvSAtINC20rHRgtKb0YvQvdGI0LDSmywg06nSo9C10YgsINCw0YHSm9Cw0LfQsNC9INC205nQvdC1INCx0LDRg9GL0YAg0LzQtdC9INKx0LnSm9GLINCx0LXQt9GW0L3RltKjINGA0YPQtNC40LzQtdC90YLRgtC10YDRliDQvdC1INKb0LDQu9C00YvSm9GC0LDRgNGLINCx0LDRgCDQvtC9INC10LrRliDQtdC70ZYg0ZbRiNC10LrRgtGW0qMg0LHRltGAINCx06nQu9GW0LPRliDQv9Cw0LnQtNCwINCx0L7Qu9Cw0LTRiy4g0JDQuyDQvtGA0YLQsNKj0pPRiyDQsdOp0LvRltC60YLQtdC9IC0g0L7QvSDQtdC60ZYg0LXQu9GWINGW0YjQtdC60YLRltKjINCx06nQu9GW0LPRliDQvNC10L0g0LDRiCDRltGI0LXQutGC0ZbSoyDQsdOp0LvRltC80LTQtdGA0ZYsINC80YvSm9GL0L0g0ZbRiNC10Log0pvQsNC70YvQv9GC0LDRgdCw0LTRiy4g0JDQuyDQsNGA0YLSm9GL0LTQsNC9IC0g0LHQsNGA0LvRi9KbINGC0L7SmyDRltGI0LXQuiDQsdOp0LvRltC80LTQtdGA0ZbRgSDQvy/QsS4g0KHQvtC90YvQvNC10L0g0pvQsNGC0LDRgCDQsdKx0Lsg0YPQsNKb0YvRgtGC0LAg0ZbRiNC10LrRgtGW0qMg0YLSr9GC0ZbQutGI0LUg0YLTmdGA0ZbQt9C00ZYg0LHRltGC0LXQu9GD0ZYg0LHQsNGB0YLQsNC70LDQtNGLLiDQntGB0YvQu9Cw0YDQvNC10L0g0LHRltGAINGD0LDSm9GL0YLRgtCwINGB0YvRgNGL0YPRi9C3INKb0LDQv9GB0YvSk9GL0L3QsCDQttOZ0L3QtSDRltGI0LXQutC60LUg0LHQsNGA0LDRgtGL0L0g0pvQsNC90YLQsNC80YvRgNC70LDRgNGL0L3Ri9KjINKb0LDQu9GL0L/RgtCw0YHRg9GLINC20q/RgNC10LTRli4g0JDRgNGC0LXRgNC40Y/Qu9Cw0YAgLSDQsNC+0YDRgtCw0LTQsNC9LCDQsNC7INCy0LXQvdCw0LvQsNGAIC0g0LLQtdC90LDQu9GL0psg0pvQvtC50L3QsNGD0LvQsNGA0LTQsNC9INCx0LDRgdGC0LDRgyDQsNC70LDQtNGLLiDSmtKx0YDRgdCw0pvRltGI0ZbQu9GW0Log0LTQsNC80YPQtNGL0qMgMSw1LTIg0LDQudGL0L3QsNC9INC60LXQudGW0L0g0LDRgdKb0L7RgNGL0YLRgyDQttKv0LnQtdGB0ZbQvdGW0qMg0LbRi9C70LTQsNC8INOp0YHRg9GWINCx0LDQudKb0LDQu9Cw0LTRiy4g0JDRgdKb0LDQt9Cw0L0t0ZbRiNC10Log0L3QtSDQsNGB0pvQvtGA0YvRgtGDINC20L7Qu9C00LDRgNGL0L0g0LPQtdGB0YLQsNGG0LjRj9C90YvSoyAxNi0yMCDQsNC/0YLQsNGB0YvQvdCw0L0g0LHQsNGB0YLQsNC/INC20rHQvNGL0YEg0ZbRgdGC0LXQvyDQsdCw0YHRgtCw0LnQtNGLLC4gICAgICAgICAgICAgICAgICAgICAgICAgICAgICAgICAgICAgICAgICAgICAgICAgICAgICAgICAgICAgICAgICAgICAgICAgICAgICAgICAgICAgMi3RgdKx0YDQsNKbKSDSmtCw0LHRi9C70LTQsNGD0pPQsCDQutC10LvQs9C10L0g0LHQsNC70LDRgdGLINC80LXQvSDQsNC90LDRgdGL0L3Ri9KjINGI0LDSk9GL0LzQtNCw0YDRi9C90LAg0LHQsNC50LvQsNC90YvRgdGC0Ysg0LDQu9C00YvQvNC10L0g0L7QsdGB0YLRgNGD0LrRhtC40Y/QvdGL0qMg0YHQtdCx0LXQv9GC0LXRgNGW0L3QtSDQutC10LvRgdC10Lo6INCx0LDQu9Cw0LvQsNGA0LTQsNKT0Ysg0KLRi9GL0L3Ri9GBINCw0LvRgyDQttC+0LvQtNCw0YDRi9C90YvSoyDRgtCw0YDQu9GL0pPRiywg0Y/Sk9C90Lgg0LHQsNC70LDQu9Cw0YDQtNCwINCx0ZbQu9C10YLRltC90ZbQvNGW0LfQtNC10Lkg0YLRi9C90YvRgSDQsNC70YMg0LbQvtC70LTQsNGA0Ysg0LTQuNCw0LzQtdGC0YDRliDQtdGA0LXRgdC10LrRgtC10YDQs9C1INKb0LDRgNCw0pPQsNC90LTQsCDQutGW0YjQutC10L3RgtCw0LkuINCe0L3Ri9KjINCw0LfQtNCw0L8g0pvQsNCx0YvQvdGD0Ysg0L0v0LUg0ZbRgdGW0L3Rg9GWINC70Y7QvNC10L3RltC90ZbSoyDRgdOZ0LnQutC10LXRgdGW0L3RiNC1INC10LTTmdGD0ZbRgCDRgtCw0YDQu9GL0L8g0LrQtdGC0YPRltC90LUg0L3QtSDQsdGW0YLQtdC70YPRltC90LUg05nQutC10LvQtdC00ZYuINCc0YvRgdCw0LvRizog0L7Qu9Cw0YDQtNGL0qMg0LHRgNC+0L3RhdGC0LDRgNGL0L3Ri9KjINC00LjQsNC80LXRgtGA0ZYgMCwxINC80LwsINCw0Lsg0LXRgNC10YHQtdC60YLQtdGA0LTQtSAwLDUg0LzQvC4g0KHTmdC50LrQtdGB0ZbQvdGI0LUsINC+0LvQsNGA0LTRi9KjINCx0ZbRgtC10LvRg9GWINCw0YPQsCDQsNKT0YvQvdGL0L3QsCDQutCw0YDRgdGL0LvRi9Kb0YLRiyAxNiDQtdGB0LUg0LDRgNGC0YLRi9GA0LDQtNGLLCDQsNC7INC10YDQtdGB0LXQutGC0LXRgNC00LUg0YLQtdC6IDIg0LXRgdC1INKT0LDQvdCwLCAg0KHQvtC90YvQvNC10L0g0pvQsNGC0LDRgCwg0LHQsNC70LDQu9Cw0L/RgNC00YvSoyDQsdGA0L7QvdGF0YLQsNGA0YvQvdGL0qMg0pvQsNCx0YvRgNKT0LDQu9Cw0YDRi9C90YvSoyDQuNC60LXQvNC00ZbQu9GW0LPRliDQttC+0pPQsNGA0YssINGB05nQudC60LXRgdGW0L3RiNC1INKb0LDQsdGL0YDSk9Cw0YHRi9C90LTQsCDSm9Cw0LHRi9C90YMg0LHQvtC70YPRiywg0YLRi9C90YvRgSDRiNGL0pPQsNGA0pPQsNC9INC60LXQt9GW0L3QtNC1INC+0LvQsNGA0LTRi9KjINC60L7Qu9C70LDQv9GB0YvQvdCwINC90LUg0YHQv9Cw0LfQvNGL0L3QsCDTmdC60LXQu9C10LTRli4g0JHQsNC70LDQu9Cw0YDQtNCwINC00LjQsNGE0YDQsNCz0LzQsCDRj9KT0L3QuCDQutOp0LrQtdGCINC/0LXQvSDRgtGL0L3Ri9GBINCw0LvRg9KT0LAg0pvQsNGC0YvRgdCw0YLRi9C9INCx0rHQu9GI0YvSm9C10YLRgtC10YAg0L3QsNGI0LDRgCDQtNCw0LzRi9KT0LDQvS4g0KHQvtC90LTRi9Kb0YLQsNC9INC+0LvQsNGA0LTRi9KjINC60LXRg9C00LXRgdGW0L3RltKjINKb0LDQsdGL0YDSk9Cw0LvQsNGA0Ysg0LbSsdKb0LAsINOZ0YDRliDQuNGW0LvQs9GW0Ygg0LEv0LouINCh0L7QvdGL0LzQtdC9INKb0LDRgtCw0YAsINCR0rHQuyDQsdGA0L7QvdGF0YLQsNGA0LTQsCDQttC40L3QsNC70pPQsNC9INKb0LDSm9GL0YDRi9Kb0YLRiyDRiNGL0pPQsNGA0YPQtNGLINKb0LjRi9C90LTQsNGC0LDQtNGLLiDTmNGA0ZYg0L7QvdC00LDSk9GLINGC0YvQvdGL0YHRgtGLINGA0LXRgtGC0LXRgyDQvtGA0YLQsNC70YvSm9GC0LDRgNGL0L3Ri9KjINC00rHRgNGL0YEg0LbQtdGC0ZbQu9C80LXQs9C10L3QtNGW0LPRliDQsdGA0L7QvdGF0L7QvtCx0YHRgtGA0YPQutGG0LjRj9KT0LAg0YLTqdGC0LXQvyDQsdC10YDRg9C00ZYg0pvQuNGL0L3QtNCw0YLQsNC00YsuINCR0LDQu9C70LDRgNC00LDSk9GLICDRgtGL0L3Ri9GBINCw0LvRgyDQttC+0LvQtNCw0YDRi9C90YvSoyDRiNGL0YDRi9GI0YLRiyDSm9Cw0LHQsNGC0Ysg0LPQuNC/0LXRgNGB0LXQutGA0LXRhtC40Y/Sk9CwINOp0YLQtSDQsdC10LnRltC8LiDQodOZ0LnQutC10YHRltC90YjQtSwg0pvQsNCx0YvQvdGDINC/0YDQvtGG0LXRgdGW0L3RltKjINCx0L7Qu9GD0Ysg0L7Qu9Cw0YDQtNGL0qMg0YjRi9GA0YvRiCDQsdC10LfQtNC10YDRltC90ZbSoyDRgtC10Lcg0LHQtdC70YHQtdC90ZbQvywg0YjRi9GA0YvRiCDQsdOp0LvRgyDSm9Cw0LHRltC70LXRgtGW0L0g0YHRgtC40LzRg9C70LTQsNC/INC20ZbQsdC10YDQtdC00ZYg0LTQsCwg0LHSsdC7INC+0LHRgdGC0YDRg9C60YbQuNGP0L3RiyDQsdC+0LvQtNGL0YDQsNC00YsuINCW0LDSk9C00LDRj9GC0YLRi9KbINC10YHQtdC/0YLQtSDQsdC10YDRltC70LPQtdC90ZbQvdC00LXQuSDQsdCw0LvQsNC00LAg0Y3QutGB0L/QuNGA0LDRgtC+0YDQu9GL0psg0LXQvdGC0ZbQs9GDLiDQotGL0L3Ri9GBINGI0YvSk9Cw0YDRg9GLINKx0LfQsNGA0pPQsNC9LiDQkNC7INC+0L3Ri9KjINC005nQu9C10LvRliDQv9C10YDQutGD0YLQvtGA0LvRi9KbINC00YvQsdGL0YHRgtGL0qMg0pvQvtGA0LDQvyDRgtOZ0YDRltC30LTRliDQsdC+0LvRg9GLLiDQr9KT0L3QuCDQv9C10YDQutGD0YHRgdC40Y8g0LrQtdC30ZbQvdC00LUg0pvQvtGA0LDQvyDRgtOZ0YDRltC30LTRliDQtNGL0LHRi9GB0YLRi9KjINGI0YvSk9GD0Ysg0LHQsNC70LDQu9Cw0YDQtNCw0pPRiyDQsdGA0L7QvdGF0L7QvtCx0YHRgtGA0YPQutGG0LjRj9C70YvSmyDQsdGA0L7QvdGF0LjRgtGC0ZbSoyDQsdC+0LvRg9GL0L0g0LTTmdC70LXQu9C00LXQudC00ZYuINCQ0Lsg0LXQvdC00ZYg0LTQuNCw0LPQvdC+0LfRi9C80YvQt9C00Ysg0YDQsNGB0YLQsNGDINKv0YjRltC9INKb0L7Qu9C00LDQvdGL0LvQsNGC0YvQvSDQvdC10LzQtdGB0LUg0LbSr9GA0LPRltC30YPRltC80ZbQtyDQutC10YDQtdC6INC30LXRgNGC0YLQtdGDINOZ0LTRltGB0YLQtdGA0ZbQvdC1INC60LXQu9GB0LXQujogMSkg0JvQsNCx0L7RgNCw0YLQvtGA0LjRj9C70YvSmyDQt9C10YDRgtGC0LXRg9C70LXRgDog0J7QkNCaLiDQltCw0LvQv9GLINKb0LDQvSDQsNC90LDQu9C40LfRltC90LXQvSDQodCe0K0g0LzQtdC9INC70LXQudC60L7RhtC40YLQvtC30LTRiywg0LvQuNC80YTQvtGG0LjRgtC+0LfQtNGLINC606nRgNC1INCw0LvQsNC80YvQty4g0JHSsdC7INCx0LDQu9Cw0LvQsNGA0LTQsNKT0Ysg0LjQvdGE0LXQutGG0LjRj9C70YvSmyDRgNC10LDQs9C10L3RgtGC0LXRgNC00ZbSoyDQsdC+0LvRg9GL0L0sINKb0LDQsdGL0L3RgyDQv9GA0L7RhtC10YHRgtC10YDRltC90ZbSoyDQvtGA0YvQvSDQsNC70YPRi9C9LCDTmdGA0ZYg0L7RgNCz0LDQvdC40LfQvNC90ZbSoyDRgdC+0Lsg0pvQvtC30LTRi9GA0pPRi9GI0L/QtdC9INC60q/RgNC10YHRltC/INC20LDRgtKb0LDQvdC00YvSk9GL0L0g0LrTqdGA0YHQtdGC0LXQtNGWLiDQn9GD0LvRjNGB0L7QutGB0LjQvNC10YLRgNC40Y86INKb0LDQvdC90YvSoyDQvtGC0YLQtdCz0ZbQvNC10L0g0pvQsNC90YvSk9GDINC00LXSo9Cz0LXQudGW0L0g0LHQsNKT0LDQu9Cw0YPSk9CwINC606nQvNC10LrRgtC10YHQtdC00ZYuINCQ0YPRi9GAINC+0LHRgdGC0YDRg9C60YbQuNGP0LTQsCDRgdCw0YLRg9GA0LDRhtC40Y8gOTUg0L/QsNC50YvQt9C00LDQvSDQsNC3INCx0L7Qu9Cw0LTRiy4g0JDQuyDQvdC+0YDQvNCwIDk1LTEwMCDQv9Cw0LnRi9C3INCw0YDQsNGB0YvQvdC00LAuINCQ0YHQv9Cw0L/RgtGL0psg05nQtNGW0YHRgtC10YDQs9C1INC60LXQu9GB0LXQujog0JrQtdGD0LTQtSDSm9GD0YvRgdGL0L3Ri9KjINGA0LXQvdCz0LXQvdC+0LPRgNCw0YTQuNGP0YHRiy4g0JHSsdC7INCw0YPRi9GAINCw0YHSm9GL0L3Rg9C70LDRgNC00YvSoyDQsdC+0LvQvNCw0YPRi9C90LAg0LrTqdC80LXQutGC0LXRgdC10LTRli4g0JzRi9GB0LDQu9GLOiDQsNGC0LXQu9C10LrRgtCw0LcsINGN0LzRhNC40LfQtdC80LAg0YHRi9C90LTRiy4g0JHSsdC7INOp0LrQv9C1INGB0YPRgNC10YLRltC90ZbSoyDQttC+0pPQsNGA0YvQu9Cw0YPRi9C9LCDSm9Cw0LHRi9GA0pPQsNC70LDRgNC00YvSoyDQutOp0LvQtNC10L3QtdKjINC+0YDQvdCw0LvQsNGB0YPRi9C9LCDRj9KT0L3QuCDQutC10YPQtNC1INKb0YPRi9GB0YvQvdC00LDSk9GLINKb0LDQvdC00LDQuSDQtNCwINCx0ZbRgCDTqdC30LPQtdGA0ZbRgdGC0LXRgNC00ZYg0LrTqdGA0YHQtdGC0LXQtNGWLiDSmtCw0pvRi9GA0YvSm9GC0YsgKNC80L7QutGA0L7RgtCwKSDRgtCw0LvQtNCw0YM6INCx0rHQuyDSm9C+0LfQtNGL0YDSk9GL0YjRgtGLLCDRj9KT0L3QuCDQsdCw0LrRgtC10YDQuNGP0LvQsNKbINC60YPQu9GM0YLRg9GA0LDQvdC90Ysg05nRgNGWINC+0LvQsNGA0LTRi9KjINCw0L3RgtC40LHQuNC+0YLQuNC60LrQtSDRgdC10LfRltC80YLQsNC70LTRi9KT0YvQvSDQsNC90YvSm9GC0LDRg9KT0LAsINCw0Lsg0LLQuNGA0YPRgdGC0YvSmyDQuNC90YTQtdC60YbQuNGPINCx0L7Qu9GB0LAg0pvQsNKb0YvRgNGL0psg0LzQuNC60YDQvtGB0LrQvtC/0LjRj9GB0YvQvNC10L0g0LvQuNC80YTQvtGG0LjRgtCw0YDQu9GL0psg0YDQtdCw0LrRhtC40Y/QvdGLINCw0L3Ri9Kb0YLQsNC5INCw0LvQsNC80YvQty4g0KHQvtC90YvQvNC10L0g0pvQsNGC0LDRgCwg0pvQsNC20LXRgiDQsdC+0LvSk9Cw0L0g0LbQsNKT0LTQsNC50LTQsCDQsdGA0L7QvdGF0L7RgdC60L7Qv9C40Y/QvdGLINC00LAg0pvQvtC70LTQsNC90YPSk9CwINCx0L7Qu9Cw0LTRiy4g0J7QuyDQsNGD0YvRgCDQttCw0pPQtNCw0LnQu9Cw0YDQtNGLINCw0L3Ri9Kb0YLQsNGD0pPQsCDQutOp0LzQtdC60YLQtdGB0LXQtNGWLiDQkNC7INC90LXQs9GW0LfRltC90LXQvSDQtNC40LDQs9C90L7QtyDSm9C+0Y4g0q/RiNGW0L06INC20LDQu9C/0Ysg0pvQsNC9INCw0L3QsNC70LjQt9GWLCDQutC10YPQtNC1INKb0YPRi9GB0YvQvdGL0qMg0YDQtdC90YLQs9C10L3QvtCz0YDQsNGE0LjRj9GB0Ysg0LbTmdC90LUg0pvQsNKb0YvRgNGL0pvRgtGLINGC0LDQu9C00LDRgyDQvNGW0L3QtNC10YLRgtGWINGC0q/RgNC00LUg0LbSr9GA0LPRltC30ZbQu9GD0ZYg0pvQsNC20LXRgi4g0JDQuyDRgdC40LzQv9GC0L7QvNC00LDRgNC00YvSoyDQvtC00LDQvSDTmdGA0ZYg0LTQsNC80YPRiyDQvNC10L0g0LHQsNC70LAg0LbQsNKT0LTQsNC50YvQvdGL0qMg0LDRg9GL0YDQu9Cw0YPRiyDQsdGA0L7QvdGF0L7RgdC60L7Qv9C40Y/QvdGLINKb0LDQttC10YIg0LXRgtGD0ZYg0LzSr9C80LrRltC9ICjQutC10Lkg0LbQsNKT0LTQsNC50LvQsNGA0LTQsCku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Қате жіберілген</text:p>
          </table:table-cell>
          <table:table-cell office:value-type="float" office:value="0" table:style-name="ce1">
            <text:p>0</text:p>
          </table:table-cell>
          <table:table-cell table:number-columns-repeated="16376"/>
        </table:table-row>
        <table:table-row table:style-name="ro1">
          <table:table-cell office:value-type="float" office:value="915285" table:style-name="ce1">
            <text:p>915285</text:p>
          </table:table-cell>
          <table:table-cell office:value-type="string" table:style-name="ce1">
            <text:p>kazakh</text:p>
          </table:table-cell>
          <table:table-cell office:value-type="string" table:style-name="ce1">
            <text:p>Билет 27.&amp;lt;br /&amp;gt; 1.Балалардың асқорыту жүйесінің дамуы эмбриогенезы.&amp;lt;br /&amp;gt; 2.3 жасар бала. Шағымдары температурасының жоғарлануына, ылғалды жөтел көп қақырықпен, тынысы қйіндалған. Қарағанда: жағдайы орташа дәрежеде, бозғылт, экспираторлық ентігу. Перкуторлық дыбыс қороп тәрізді, аускультация кезінде қатан тыныс,қүрғақ және әр түрлі ылғалды сырылдар естіледі.Балалада қандай ентігу? Қандай зерттеулер жүргізу қажет диагноз қойюшын?&amp;lt;br /&amp;gt;</text:p>
          </table:table-cell>
          <table:table-cell office:value-type="string" table:style-name="ce1">
            <text:p>MS4g0JDRgSDSm9C+0YDRi9GC0YMg0LbSr9C50LXRgdGW0L3RltKjINC00LDQvNGD0Ysg0LHQsNC70LDQu9Cw0YDQtNCwINKb0rHRgNGB0LDSm9GW0YjRltC70ZbQuiDQtNCw0LzRg9C00YvSoyDQtdGA0YLQtSDRgdCw0YLRi9GB0YvQvdC00LAg0L7RgNGL0L0g0LDQu9Cw0LTRiy4g0K3QvNCx0YDQuNC+0LPQtdC90LXQt9C00ZbSoyA3LTgg0LrSr9C90ZbQvdC00LUgINGN0L3RgtC+0LTQtdGA0LzQsNC00LDQvSDQsdGW0YDRltC90YjRltC70ZbQuiDRltGI0LXQuiDQtNCw0LzQuNC00YsuINCU0LDQvNGD0LTRi9KjIDEyINC60q/QvdGW0L3QtNC1INCx0ZbRgNGW0L3RiNGW0LvRltC6INGW0YjQtdC6INC10LrRltCz0LUg0LHTqdC70ZbQvdC10LTRljog0rHRgNGL0pvRltGI0ZbQu9GW0Log0LbTmdC90LUg0rHRgNGL0pvRgtCw0L0g0YLRi9GBLiDSsNGA0YvSm9GW0YjRltC70ZbQuiDQsdOp0LvRltCz0ZbQvdC10L0g0LHQvtC70LDRiNCw0pvRgtCwINCw0YEg0pvQvtGA0YvRgtGDINC20q/QudC10YHRliDQtNCw0LzQuNC00YssINCw0Lsg0rHRgNGL0pvRgtCw0L0g0YLRi9GBINCx06nQu9GW0LPRltC90LXQvSDRgdCw0YDRg9GL0Lcg0pvQsNC/0YjRi9KT0Ysg0LTQsNC80LjQtNGLLiDQkdCw0YHRgtCw0L/Sm9GL0LTQsCDQsdGW0YDRltC90YjRltC70ZbQuiDRltGI0LXQuiDQsNGD0YvQt9C20rHRgtKb0YvQvdGI0LDSm9GC0YvSmyDQttOZ0L3QtSDQutC70L7QsNC60LDQu9GM0LTRiyDQvNC10LzQsdGA0LDQvdCw0pPQsCDQuNC1LiAg0rDRgNGL0pvRgtGL0psg0LTQsNC80YPQtNGL0qMgM9GI0ZYg0LDQv9GC0LDRgdGL0L3QtNCwINCw0YPRi9C30LbSsdGC0pvRi9C90YjQsNKb0YLRi9KbLCDQsNC7IDPRiNGWINCw0LnRi9C90LTQsCDQutC70L7QsNC60LDQu9GM0LTRiyDQvNC10LzQsdGA0LDQvdCw0L3Ri9KjINGL0LTRi9GA0LDRg9GLINC20q/RgNC10LTRli4g0prSsdGA0YHQsNKb0ZbRiNGW0LvRltC6INC00LDQvNGD0LTRi9KjINCx0ZbRgNGW0L3RiNGWINCw0LnRi9C90YvSoyDRgdC+0qPRi9C90LAg0pvQsNGA0LDQuSAzINGC0q/RgtGW0LrRiNC10L3RliDQsNC20YvRgNCw0YLRg9KT0LAg0LHQvtC70LDQtNGLLiAg0K3QvNCx0YDQuNC+0LPQtdC90LXQt9C00ZbSoyDQsdGW0YDRltC90YjRliDQsNC/0YLQsNGB0Ysg0LDRgdKb0L7RgNGL0YLRgyDQttKv0LnQtdGB0ZbQvdGW0qMg05nRgNGC0q/RgNC70ZYg0LHTqdC70ZbQvNC00LXRgNGW0L3RltKjINKb0LDQu9GL0L/RgtCw0YHRg9GLINC20q/RgNC10LTRli4g0JXSoyDQsNC70LTRi9C80LXQvSDQsNGBINKb0L7RgNGL0YLRgyDRgtKv0YLRltCz0ZbQvdGW0qMg0pvQsNC70YvQv9GC0LDRgdGD0Ysg0LbSr9GA0LXQtNGWLiDQrdC80LHRgNC40L7Qs9C10L3QtdC30LTRltKjIDMg0LDQv9GC0LDRgdGL0L3QtNCwINKx0YDRi9Kb0YLRi9KjINCw0LvQtNGL0qPSk9GLINC+0YDRgtCw0pPRiyDQsNGA0YLSm9GLINGW0YjQtdC60YLQtdGA0ZYg0pvQsNC70YvQv9GC0LDRgdCwINCx0LDRgdGC0LDQudC00LvRiy4g0JDRgSDSm9C+0YDRi9GC0YMg0YLSr9GC0ZbQs9GWINGN0L3RgtC+0LTQtdGA0LzQsNC00LDQvSDRgtKv0LfRltC70LXQtNGWLtCG0YjQtdC60YLRltC9INGB0YvRgNGC0pvQsCDSm9Cw0LHQsNGC0Ysg0LzQtdC30L7QtNC10YDQvNCw0LTQsNC9INGC0q/Qt9GW0LvQtdC00ZYuICDQmtC10LvQtdGB0ZYg0LDQu9C00YvSo9KT0Ysg0ZbRiNC10LrRgtGW0qMg0LTQsNC80YPRiyDQttKv0YDQtdC00ZYg0Y/Sk9C90Lgg0YTQsNGA0LjQvdCz0LXQsNC70YzQtNGLINCw0LnQvNCw0psg0LTQsNC80YPRiyDQttKv0YDQtdGC0ZbQvSDQsdC+0LvQsNC00YsuINCR0rHQuyDQutC10LfQtdKj0LTQtSDTqdKj0LXRiCDQttOZ0L3QtSDQttKx0YLSm9GL0L3RiNCw0psg0pvQsNC70YvQv9GC0LDRgdCw0LTRiy7QkNGB0pvQsNC30LDQvSDRjdC80LHRgNC40L7Qs9C10L3QtdC30LTRltKjIDTRiNGWINCw0L/RgtCw0YHRi9C90LvQsCDQsNC70LTRi9Kj0pPRiyDRltGI0LXQutGC0ZbSoyDQutC10qPQtdGO0ZbQvdC10L0g0YLSr9C30ZbQu9C10LTRli4g0J7RgdGL0LvQsNC50YjRiywg0LDQu9C00YvSo9KT0Ysg0ZbRiNC10Log06nQtyDQutC10LfQtdCz0ZbQvdC00LUg0LbSsdGC0pvRi9C90YjQsNKb0pvQsCwg06nSo9C10YjQutC1LCDQsNGB0pvQsNC30LDQvdKT0LAg0LbTmdC90LUgMTIg0LXQu9GWINGW0YjQtdC60YLRltKjINCx06nQu9GW0LrRgtC10YDRltC90LUg0LHQsNGB0YLQsNC80LAg0LHQvtC70YvQvyDRgtCw0LHRi9C70LDQtNGLLiAg0JHQsNGD0YvRgCAzLTQg0LDQv9GC0LDQtNCwINCy0LXQvdGC0YDQsNC70LTRiyDTqdGB0ZbQvdC00ZYg0YDQtdGC0ZbQvdC00LUg0L7RgNGC0LDSo9KT0Ysg0ZbRiNC10LrRgtC10L0g0LTQsNC80LjQtNGLLiDSsNC50pvRiyDQsdC10LfRliDQtNC+0YDRgdCw0LvRjNC00Ysg0LbTmdC90LUg0LLQtdC90YLRgNCw0LvQtNGLINOp0YHRltC90LTRltC70LXRgNC00LXQvSDQtNCw0LzQuNC00YsuINCe0YDRgtCw0qPSk9GLINGW0YjQtdC60YLQtdC9INCw0Ygg0ZbRiNC10Log0LbTmdC90LUg0YLQvtKbINGW0YjQtdC60YLRltKjINC/0YDQvtC60YHQuNC80LDQu9GM0LTRiyDQsdOp0LvRltCz0ZYg0pvQsNC70YvQv9GC0LDRgdCw0LTRiy4g0JHSsdC7INC60LXQt9C00LUg0YTQuNC30LjQvtC70L7Qs9C40Y/Qu9GL0psg0L/Rg9C/0LjQu9C00ZbSo9C6INCz0YDRi9C20LAg0pvQsNC70YvQv9GC0LDRgdGD0Ysg0LzSr9C80LrRltC9IDYtMTAg0LDQv9GC0LDQtNCwIC4g0IbRiNC10Log0ZbQu9C80LXQutGC0LXRgNGWINGC0q/Qt9GW0LvQtdC00ZYg0LbTmdC90LUgMTAtMTIg0LDQv9GC0LDQtNCwINGW0Ygg0pvRg9GL0YHRi9C90LAg0LXQvdC10LTRli4g0JDRgNGC0pvRiyDRltGI0LXQutGC0LXQvSDRgtC+0psg0ZbRiNC10LrRgtGW0qMg0LTQuNGB0YLQsNC70YzQtNGLINCx06nQu9GW0LPRliDQttOZ0L3QtSDRgtGW0Log0ZbRiNC10Log0pvQsNC70YvQv9GC0LDRgdCw0LTRiy4g0JDRgtCw0LvSk9Cw0L0g06nQt9Cz0LXRgNGW0YHRgtC10YDQvNC10L0g0pvQsNGC0LDRgCDRgdCw0YDRg9GL0Lcg0pvQsNC/0YjRi9KT0YvQvdCwINCx0LDRgNCw0YLRi9C9INCw0YDRgtC10YDQuNGP0LvQsNGAINC80LXQvSDRltGI0LXQuiDQsNGA0YLQtdGA0LjRj9C70LDRgNGLINGC0q/Qt9GW0LvQtSDQsdCw0YHRgtCw0LnQtNGLLiAg0JbQsNGC0YvRgNGW0YjRltC70ZbQuiDQtNCw0LzRg9C00YvSmyAxLDUtMiDQsNC50YvQvdC00LAg0LDRgdKb0L7RgNGL0YLRgyDQttC+0LvRi9C90YvSoyDSsdC30YvQvdC00YvSk9GL0L3Ri9KjINOp0YHRgyDQtNC10qPQs9C10LnRliDQutKv0YDRgiDQsNGA0YLQsNC00YsuIDYg0LDQv9GC0LDQtNCw0L0g0LHQsNGB0YLQsNC/INGW0YjQtdC6INKb0LDQsdGL0YDSk9Cw0YHRiyDSr9GIINKb0LDQsdCw0YLRgtCw0L0g0YLSsdGA0LDQtNGLOiDRjdC90LTQvtC00LXRgNC80LDQu9GM0LTRiywg0LzQtdC30LXQvdGF0LjQvNCw0LvRjNC00Ysg0LbTmdC90LUg0LzQtdC30L7RgtC10LvQuNCw0LvRjNC00YsuINCQ0YHSm9C+0YDRi9GC0YMg0LzSr9GI0LXQu9C10YDRltC90ZbSoyDQtNCw0LzRg9GLINKb0rHRgNGB0LDSm9GC0LDQvSDRgtGL0YEg0LTQsNC80YMg0LrQtdC30ZbQvdC00LUg0LTQtSwg0Y/Sk9C90Lgg0LHQsNC70LAg0LTSr9C90LjQtdCz0LUg0LrQtdC70LPQtdC9INGB0L7SoyDQtNCwINC20LDQu9KT0LDRgdCw0YLRi9C90YvQvSDSsdC80YvRgtC/0LDSk9Cw0L0g0LbTqdC9LiDQndC10LPRltC30ZbQvdC10L0g0LDRgdKb0L7RgNGL0YLRgyDQttC+0LvQtNCw0YDRi9C90YvSoyDRhNC40LfQuNC+0LvQvtCz0LjRj9C70YvSmyDSm9GL0LfQvNC10YLRgtC10YDRltC90ZbSoyDRgtC+0LvRi9KbINKb0LDQu9GL0L/RgtCw0YHRg9GLINCx0LDQu9Cw0LvQsNGA0LTRi9KjINGC0LDQvNCw0pvRgtCw0L3Rg9GLINCx0LDRgdGC0LDQu9KT0LDQvSDQutC10LfQtNC1INC00LDQvNC40LTRiy48YnIgLz4NCjxiciAvPg0KIDIuINCQ0YLQsNC70pPQsNC9INC60LvQuNC90LjQutCw0LvRi9KbINC606nRgNGW0L3RgdGC0LXRgCDRgtGW0LrQtdC70LXQuSDQtdGA0YLQtSDQttCw0YHRgtCw0pPRiyDQsdCw0LvQsNC70LDRgNC00YvSoyDRgtGL0L3Ri9GBINCw0LvRgyDQttC+0LvQtNCw0YDRi9C90YvSoyDQsNC90LDRgtC+0LzQvi3RhNC40LfQuNC+0LvQvtCz0LjRj9C70YvSmyDQtdGA0LXQutGI0LXQu9GW0LrRgtC10YDRltC90LUg0LHQsNC50LvQsNC90YvRgdGC0YsuINOo0LrQv9C1INKv0YHRgtGW0L3QtdC9INC/0LXRgNC60YPRgdGB0LjRjyDQvdC10LPRltC30ZbQvdC00LUg0LDQvdGL0pvRgtCw0LvSk9Cw0L0g0pvQvtGA0LDQvyDRgtOZ0YDRltC30LTRliDQtNGL0LHRi9GBINCx0LDQu9Cw0L3Ri9KjINOp0LrQv9C10YHRltC90ZbSoyDSm9Cw0LvRi9C/0YLRi9C00LDQvSDRgtGL0YEg0LDRg9Cw0pPQsCDRgtC+0LvSk9Cw0L3Ri9C9INC606nRgNGB0LXRgtC10LTRliAo0LPQuNC/0LXRgNCy0L7Qt9C00YPRiNC90L7RgdGC0YwpLiDQkNGC0LDQu9KT0LDQvSDQttCw0pPQtNCw0Lkg0YLRi9C90YvRgSDQsNC70YMg0LbQvtC70LTQsNGA0YvQvdGL0qMg0L7QsdGB0YLRgNGD0LrRhtC40Y/RgdGLINC60LXQt9GW0L3QtNC1INC606nRgNGW0L3RltGBINCx0LXRgNC10LTRliwg0LbQuNGWINCx0YDQvtC90YXQuNGCINC205nQvdC1INCx0YDQvtC90YXQuNC+0LvQuNGCINC60LXQt9GW0L3QtNC1LtCh0L7QvdGL0LzQtdC9INKb0LDRgtCw0YAsINKb0LDRgtCw0L0g0YLRi9C90YvRgSwg0YLRi9C90YvRgdGC0YvSoyDSm9C40YvQvdC00LDRg9GLLCDSm9Kx0YDSk9Cw0psg0YHRi9GA0YvQu9C00LDRgNC00YvSoyDQsdC+0LvRg9GLINCw0YLQsNC70pPQsNC9INC00LjQsNCz0L3QvtC30LTRiyDRgNCw0YHRgtCw0LnQtNGLLiDTmNGA0YLSr9GA0LvRliDRi9C70pPQsNC7INGB0YvRgNGL0LvQtNCw0YAg05nRgCDRgtKv0YDQu9GWINC60LDQu9C40LHRgNC00LXQs9GWINCx0YDQvtC90YXRgtCw0YDQtNGL0qMg0LfQsNKb0YvQvNC00LDQu9GLINGC0YPRgNCw0LvRiyDQsNC50YLQsNC00YsuINCV0YDRgtC1INC20LDRgdGC0LDSk9GLINCx0LDQu9Cw0LvQsNGA0LTRi9KjINGC0YvQvdGL0YEg0LDQu9GDINC20L7Qu9C00LDRgNGLINGB0LDQu9GL0YHRgtGL0YDQvNCw0LvRiyDRgtKv0YDQtNC1INGC0LDRgCwg0pvRi9GB0pvQsCDQttOZ0L3QtSDRiNGL0YDRi9GI0YLRiyDSm9Cw0LHQsNGC0Ysg06nRgtC1INC20LDSm9GB0Ysg0pvQsNC90LzQtdC9INKb0LDQvNGC0LDQvNCw0YHRi9C3INC10YLRltC70LPQtdC9INCx0L7Qu9Cw0LTRiy4g0KHQvtC90YvQvNC10L0g0pvQsNGC0LDRgCDQvtC70LDRgNC00YvSoyDSm9C+0YDSk9Cw0L3Ri9GBINKb0YvQt9C80LXRgtGWINOZ0LvRgdGW0Lcg0LTQsNC80YvSk9Cw0L0sINC+0YHRi9KT0LDQvSDRgdOZ0LnQutC10YEg05nRgNGC0q/RgNC70ZYg0YLQuNC/0YLQtdCz0ZYg0pvQvtC30LTRi9GA0pPRi9GI0YLQsNGAINGC0YvQvdGL0YEg0LDQu9GDINC20L7Qu9C00LDRgNGL0L3QsCDQvtKj0LDQuSDTqdGC0LXQtNGWINC205nQvdC1INC+0LvQsNGA0LTRiyDQvtKj0LDQuSDQt9Cw0pvRi9C80LTQsNC50LTRiy4g0KLRi9C90YvRgSDQsNC70YMg0LbQvtC70LTQsNGA0YvQvdGL0qMg0YHQsNC70YvRgdGC0YvRgNC80LDQu9GLINGC0LDRgNC70YvSk9GL0L3QsCDQsdCw0LnQu9Cw0L3Ri9GB0YLRiyDQvtC70LDRgNC00YvSoyDRiNGL0YDRi9GI0YLRiyDSm9Cw0LHQsNGC0YvQvdGL0qMg0LrRltGI0LrQtdC90LUg0ZbRgdGW0L3Rg9GWINC90LXQvNC10YHQtSDRiNGL0YDRi9GI0YLRi9KjLCDSm9Cw0pvRi9GA0YvSm9GC0YvSoyDQsNC3INC806nQu9GI0LXRgNC00LUg0LHTqdC70ZbQvdGD0ZbQvdGW0qMg06nQt9GWINC+0LHRgdGC0YDRg9C60YbQuNGP0pPQsCDQvtKj0LDQuSDQsNC70YvQvyDQutC10LvQtdC00ZYuINCd05nRgtC40LbQtdGB0ZbQvdC00LUsINCw0YPQsCDQsNKT0YvQvdGLINGC0YvQvdGL0YEg0LDQu9GDINC60LXQt9GW0L3QtNC1INGC0YvQvdGL0YEg0LDQu9GDINC20L7Qu9C00LDRgNGL0L3QsNC9INC+0qPQsNC5INOp0YLQtdC00ZYsINCx0ZbRgNCw0psg0YLRi9C90YvRgSDRiNGL0pPQsNGA0YMg0LrQtdC30ZbQvdC00LUg0LHRgNC+0L3RhdC40L7Qu9Cw0LvQsNGA0LTRi9KjINC00LjQvdCw0LzQuNC60LDQu9GL0psg0pvRi9GB0YvQu9GD0YvQvdGL0qMg0LDRgNKb0LDRgdGL0L3QtNCwINCx0LDQu9Cw0LTQsCDRgtGL0L3Ri9GBINGI0YvSk9Cw0YDRgyDSm9C40YvQvdC00LDQudC00YsuINCv0pPQvdC4LCDQutOp0YDRgdC10YLRltC70LPQtdC9INC20LDSk9C00LDQudC00LAg0LHQsNC70LDQtNCwINGN0LrRgdC/0LjRgNCw0YLQvtGA0LvRi9KbINC10L3RgtGW0LPRgyDQtNCw0LzQuNC00YsuINCU0LjQsNCz0L3QvtC30LTRiyDRgNCw0YHRgtCw0YMg0q/RiNGW0L0g0LbSr9GA0LPRltC30ZbQu9Cz0LXQvSDRhNC40LfQuNC60LDQu9C00Ysg0pvQsNGA0LDRg9C00LDQvSDQsdOp0LvQtdC6LCDQttCw0LvQv9GLINKb0LDQvSDQsNC90LDQu9C40LfRliwg0LHQuNC+0YXQuNC80LjQu9GL0psg0LDQvdCw0LvQuNC3INCx0LXQvSDQt9OZ0YAg0LDQvdCw0LvQuNC30ZbQvSDRgtCw0L/RgdGL0YDSk9Cw0L0g0LbTqdC9LiDSmtCw0L0g0LDQvdCw0LvQuNC30ZbQvdC00LUg0LvQtdC50LrQvtGG0LjRgtC+0LcsINCh0J7QrSDQsNGA0YLRg9GLINGB0LjRj9Kb0YLRiyDQutOp0YDRgdC10YLQutGW0YjRgtC10YAg0LHQsNC70LDQtNCw0pPRiyDSm9Cw0LHRi9C90YMg0q/QtNC10YDRltGB0ZbQvSDRgNCw0YHRgtCw0LnRgtGL0L0g0LHQvtC70LDQtNGLLiDSmtCw0L3QvdGL0qMg0LHQuNC+0YXQuNC80LjRj9C70YvSmyDQsNC90LDQu9C40LfRltC90LTQtSDQoS3RgNC10LDQutGC0LjQstGC0ZYg0LHQtdC70L7QutGC0YvQvSDQsNGA0YLRg9GLINCx0LDQudKb0LDQu9Cw0YLRi9C9INCx0L7Qu9Cw0LTRiy4g0prQsNKb0YvRgNGL0pvRgtGLINC30LXRgNGC0YLQtdGDINC80LDSm9GB0LDRgtGL0L3QtNCwINCx0LDQuiDQv9C+0YHQtdCyINC80L7QutGA0L7RgtGLINGC0LDQv9GB0YvRgNGD0pPQsCDQsdC+0LvQsNC00YsuINKa0LDSm9GL0YDRi9Kb0YLRi9KjINKb0rHRgNCw0LzRiyDQt9C10YDRgtGC0LXQu9GW0L8sINCw0L3RgtC40LHQuNC+0YLQuNC60YLQtdGA0LPQtSDQtNC10LPQtdC9INGB0LXQt9GW0LzRgtCw0LvQtNGL0psg0LDQvdGL0pvRgtCw0LvQsNC00YsuINCh0L7QvdGL0LzQtdC9INKb0LDRgtCw0YAsINGA0LXQvdGC0LPQtdC90L7Qs9GA0LDRhNC40Y8g0YLRi9C90YvRgSDQsNC70YMg0LbQvtC70LTQsNGA0YvQvdGL0qMg0L/QsNGC0L7Qu9C+0LPQuNGP0LvQsNGA0YvQvSDQsNC90YvSm9GC0LDRg9C00LAg0LzQsNKj0YvQt9C00Ysg0LTQuNCw0LPQvdC+0YHRgtC40LrQsCDRgtKv0YDRliDQsdC+0LvRi9C/INGC0LDQsdGL0LvQsNC00YsuINCV0LPQtdGAINCx0YDQvtC90YXQuNGC0LrQtSDQutKv0LTRltC60YLQtdC90LXRgtGW0L0g0LHQvtC70YHQsNKbLCDRgNC10L3RgtCz0LXQvdC00LUg06nQutC/0LUg0YLSr9Cx0ZbRgNGW0L3RltKjINC60L7QvdGC0YPRgNC70LDRgNGL0L3Ri9KjINOp0LfQs9C10YDQs9C10L3QtNGW0LPRltKjLCDQvtC70LDRgNC00YvSoyDSm9Cw0LvRi9Kj0LTQsNKT0LDQvdGL0L0g0LrTqdGA0LUg0LDQu9Cw0LzRi9C3LiDQkdGA0L7QvdGF0L7RgdC60L7Qv9C40Y8sINC/0YPQu9GM0YHQvtC60YHQuNC80LXRgtGA0LjRjyDQttOZ0L3QtSDRgdC/0LjRgNC+0LzQtdGC0YDQuNGPINKb0L7RgdGL0LzRiNCwINC30LXRgNGC0YLQtdGDINOZ0LTRltGB0YLQtdGA0ZYg0LHQvtC70YvQvyDRgtCw0LHRi9C70LDQtNGLL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2" table:style-name="ce1">
            <text:p>915332</text:p>
          </table:table-cell>
          <table:table-cell office:value-type="string" table:style-name="ce1">
            <text:p>kazakh</text:p>
          </table:table-cell>
          <table:table-cell office:value-type="string" table:style-name="ce1">
            <text:p>Билет 27.&amp;lt;br /&amp;gt; 1.Балалардың асқорыту жүйесінің дамуы эмбриогенезы.&amp;lt;br /&amp;gt; 2.3 жасар бала. Шағымдары температурасының жоғарлануына, ылғалды жөтел көп қақырықпен, тынысы қйіндалған. Қарағанда: жағдайы орташа дәрежеде, бозғылт, экспираторлық ентігу. Перкуторлық дыбыс қороп тәрізді, аускультация кезінде қатан тыныс,қүрғақ және әр түрлі ылғалды сырылдар естіледі.Балалада қандай ентігу? Қандай зерттеулер жүргізу қажет диагноз қойюшын?&amp;lt;br /&amp;gt;</text:p>
          </table:table-cell>
          <table:table-cell office:value-type="string" table:style-name="ce1">
            <text:p>MS4g0JbQsNC70L/RiyDQsdCw0LvQsNC70LDRgNC00YvSoyDQsNGB0pvQvtGA0YvRgtGDINC20q/QudC10YHRltC90ZbSoyDQtNCw0LzRg9GLINOp0YLQtSDQtdGA0YLQtSDQutC10LfQtdKj0LTQtdGA0LTQtSDQsdCw0YHRgtCw0LvQsNC00YsuINCt0LzQsdGA0LjQvtCz0LXQvdC00ZYg0LTQsNC80YPQtNGL0qMgNyDQvdC10LzQtdGB0LUgOCDQutKv0L3RltC90LTQtSDRjdC90LTQvtC00LXRgNC80LDQtNCw0L0g0LHRltGA0ZbQvdGI0ZbQu9GW0Log0ZbRiNC10LrRgtGW0qMg0LTQsNC80YPRi9C90LDQvSDQsdCw0YHRgtCw0YMg0LDQu9Cw0YLRi9C9INCx0L7Qu9Cw0LTRiy4gMTIg0LrSr9C90ZbQvdC00LUg0LHRltGA0ZbQvdGI0ZbQu9GW0Log0ZbRiNC10Log0LXQutGW0LPQtSDQsdOp0LvRltC90LXRgtGW0L0g0LHQvtC70LDQtNGLLiDQntC70LDRgCDSsdGA0YvSm9GW0YjRltC70ZbQuiwg0Y/Sk9C90Lgg0LHQvtC70LDRiNCw0psg0LDRgdKb0L7RgNGL0YLRgyDQttKv0LnQtdGB0ZYg0LbTmdC90LUg0LTQtSDSsdGA0YvSm9GB0YvRgNGC0YvQu9GL0pssINGP0pPQvdC4INGB0LDRgNGL0YPRi9C3INKb0LDQsdGLLiDQldKjINCw0LvSk9Cw0L3RiNGL0L3QtNCwINCx0ZbRgNGW0L3RiNGW0LvRltC6INGW0YjQtdC60YLQtdC9INCw0YPRi9C30LbSsdGC0pvRi9C90YjQsNKb0YLRi9KbINC205nQvdC1INC60LvQvtCw0LrQsNC70YzQtNGLINC80LXQvNCx0YDQsNC90LAg0LTQsNC80LjQtNGLLiDSmtKx0YDRgdCw0pvRltGI0ZbQu9GW0Log0LTQsNC80YPQtNGL0qMgMyDQsNC/0YLQsNGB0YvQvdC00LAg0LDRg9GL0LfQttKx0YLSm9GL0L3RiNCw0pvRgtGL0pssINCw0LsgMyDQsNC50YvQvdC00LAg0LrQu9C+0LDQutCw0LvRjNC00Ysg0LzQtdC80LHRgNCw0L3QsNC90YvSoyDQsdCw0LvSm9GD0Ysg0L7RgNGL0L0g0LDQu9Cw0LTRiy4g0JDQu9KT0LDRiNKb0Ysg0LDQudC00YvSoyDRgdC+0qPRi9C90LAg0pvQsNGA0LDQuSDQsdGW0YDRltC90YjRltC70ZbQuiDRltGI0LXQutGC0ZbSoyDRgtKv0YLRltC60YjQtdCz0LUg0rHSm9GB0YEg0q/RiCDQsdOp0LvRltCz0ZbQvSDQutOp0YDQtSDQsNC70LDQvNGL0LcuINCW0LDQu9C/0Ysg0Y3QvNCx0YDQuNC+0LPQtdC90LXQt9C00ZbSoyDQsdGW0YDRltC90YjRliDQsNC/0YLQsNGB0YvQvdC00LAg0LDRgdKb0L7RgNGL0YLRg9C00YvSoyDQutOp0L/RgtC10LPQtdC9INCx06nQu9GW0LzQtNC10YDRltC90ZbSoyDQtNCw0LzRg9GLINKb0LDRgNKb0YvQvdC00Ysg0LHQsNGB0YLQsNC70LDQtNGLLiDQltCw0LvQv9GLINCw0LvQtNGL0qPSk9GLINGW0YjQtdC6INC20rHRgtKb0YvQvdGI0LDSm9Kb0LAsINOp0qPQtdGI0LrQtSwgMTIg0LXQu9GWINGW0YjQtdC60LrQtSDQttOZ0L3QtSDQsNGB0pvQsNC30LDQvdC90YvSoyDQsdOp0LvRltCz0ZYsINKx0LnSm9GLINCx0LXQt9C00ZbSoyDSm9Cw0LvSk9Cw0L3RiyDQvNC10L0g0LHQsNGD0YvRgCDQtNCw0LzQuNC00YsuINCe0YDRgtCw0qPSk9GLINGW0YjQtdC60YLQtdC9INC10LvRliDRltGI0LXQutC60LUsINCw0YjRltGI0LXQutC60LUg0LbTmdC90LUg0LzRi9Kb0YvQvSDRltGI0LXQuiDQtNCw0LzRi9GB0LAsINCw0Lsg0LDRgNGC0pvRiyDQsdOp0LvRltC80ZbQvdC10L0g0YLQvtC6INGW0YjQtdC60YLRltKjINCx0LDRgNC70YvSmyDQsdOp0LvRltC80LTQtdGA0ZbQvdC10L0g0LHQsNGB0YLQsNGDINCw0LvQsNGC0YvQvSDQsdC+0LvQsNC00YsuINCh0L7QvdGL0LzQtdC9INKb0L7RgdCwINCx0ZbRgCDQvNC10LfQs9GW0LvQtNC1INGB0LDRgNGL0YPRi9C3INKb0LDQsdGL0L3Ri9KjINC205nQvdC1INGW0YjQtdC60LrQtSDQsdCw0YDQsNGC0YvQvSDRgtCw0LzRi9GA0LvQsNGA0LTRi9KjINC00LzRg9GLINC+0YDRi9C9INCw0LvQsNC00YsuINCh0L7Qu9Cw0YDQtNGL0qMg0ZbRiNGW0L3QtNC1INCw0YDRgtC10YDQuNGP0LvQsNGAINC+0LDRgNGC0LDQtNCw0L0sINCw0Lsg0LLQtdC90LDQu9Cw0YAg0LHQvtC70YHQsCDQstC10L3QsNC70YvSmyDSm9C+0LnQvdCw0YPQtNCw0L0g0LTQsNC80Lgg0LHQsNGB0YLQsNC50LTRiy4g0prSsdGA0YHQsNKb0ZbRiNGW0LvRltC6INC00LDQvNGD0LTRi9KjINCx0ZbRgCDQttCw0YDRi9C8INC90LXQvNC10YEg0LXQutGWINCw0LnRi9C90LDQvSDQutC10LnRltC9INCw0YHSm9C+0YDRi9GC0YMg0LzSr9GI0LXQu9C10YDRltC90ZbSoyDSsdC30YvQvdC90LDQvSDTmdGA0ZYg0LbRi9C70LTQsNC8INOp0YHRg9GWINCw0LnSm9GL0L0g0LHQsNC50pvQsNC70LDRgtGL0L0g0LHQvtC70LDQtNGLLiDQkNC7INCw0LvRgtGL0L3RiNGLINCw0L/RgtCw0YHRi9C90LAg0pvQsNGA0LDQuSDRltGI0LXQutGC0LXRgNC00ZbSoyDSm9Cw0LHRi9GA0pPQsNGB0Ysg0q/RiCDSm9Cw0LHQsNCx0LDQvSDRgtKx0YDQsNGC0YvQvSDQsdC+0LvQsNC00YsuINCe0LvQsNGAINGN0L3QtNC+0LTQtdGA0LzQsNC70YzQtNGWLCDQvNC10LfQtdC90YXQuNC80LDQu9GLINC205nQvdC1INC00LUg0LzQtdC30L7RgtC10LvQuNCw0LvRjNC00ZYuICAgIDIuINCR0LDQu9Cw0LTQsCDRjdC60YHQv9C40YDQsNGC0L7RgNC70YvSmyDQtdC90YLRltCz0YPQtNGW0qMg0YLSr9GA0ZYg0LTQsNC80YvSk9Cw0L0uINCW0LDQu9C/0Ysg0YjQsNKT0YvQvNC00LDRgNGL0L3QsCDRgdKv0LnQtdC90LXRgtGW0L0g0LHQvtC70YHQsNKbINCx0YDQvtC90YXQv9C90LXQstC80L7QvdC40Y/Sk9CwINCx0L7Qu9GDINGL0pvRgtC40LzQsNC70LTRi9C70YvSk9GLINC20L7Sk9Cw0YDRiy4g0JHSsdC7INKb0LDQsdGL0L3Rg9C00Ysg0LbTmdC90LUg0pvQsNKb0YvRgNGL0pvRgtGLINGI0YvSk9Cw0YDQsNGC0YvQvSDTqdC60L/QtSDQuNC90YTQtdC60YbQuNGP0YHRiyDQsdC+0LvRi9C/INGC0LDQsdGL0LvQsNC00YsuINCV0L3RgtGW0LPRgyDQvtC7INC20LDQu9C/0Ysg0YLRi9C90YvRgSDRiNGL0pPQsNGA0YPQtNCw0L0g0YLRg9GL0L3QtNCw0YPRiyDQvNKv0LzQutGW0L0sICDRgdC10LHQtdCx0ZYg0YHRi9GA0YvQu9C00LDRgCDQvNC10L0g0YvRgdKb0YvRgNGL0pvRgtCw0YAg0YLRi9C90YvRgSDQsNC70YMg0LbQvtC70LTQsNGA0L3Ri9KjINGB0L/QsNC30YvQvNGL0L3QsNC9INC205nQvdC1INC00LUg0LDRg9Cw0L3RiyDRiNGL0pPQsNGA0YPRiyDSm9C40YvQvdC00LDRgtGL0LvQsNC00YsuINCW0LDQu9C/0Ysg0LDQvdGL0psg0pvQsNC90YvSk9GL0L3QsCDQttC10YLRgyDSr9GI0ZbQvSDQutC10YPQtNC1INKb0YPRi9GB0YvQvdGL0qMg0YDQtdC90YLQs9C10L3QvtCz0YDQsNGE0LjRj9GB0YvQvSDQttOZ0L3QtSDQtNC1INCW0prQkCAo0LbQsNC70L/RiyDSm9Cw0L0g0LDQvdCw0LvQuNC30ZYpINC20LDRgdCw0YMg0pvQsNC20LXRgi4g0KHQvtC90YvQvNC10L0g0LHRltGA0LPQtSDQsNGD0YDRg9C00Ysg0YLRg9GL0L3QtNCw0YLSm9Cw0L0g0pvQvtC30LTRi9GA0pPRi9GI0YLRiyDQsNC90YvSm9GC0LDRgy4g0JbTmdC90LUg0LXQvNC00LUg0LHQsNKT0YvRgtGL0L0g0YLQsNKT0LDQudGL0L3QtNCw0YMg0q/RiNGW0L0g0pvQsNKb0YvRgNGL0L8g0LrRg9C70YzRgtGD0YDQsNGB0YvQvSDQsNC70YPSk9CwINCx0L7Qu9Cw0LTRiy4gIA==</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тарда қателер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923" table:style-name="ce1">
            <text:p>1066923</text:p>
          </table:table-cell>
          <table:table-cell office:value-type="string" table:style-name="ce1">
            <text:p>kazakh</text:p>
          </table:table-cell>
          <table:table-cell office:value-type="string" table:style-name="ce1">
            <text:p>Билет 27.&amp;lt;br /&amp;gt; 1.Балалардың асқорыту жүйесінің дамуы эмбриогенезы.&amp;lt;br /&amp;gt; 2.3 жасар бала. Шағымдары температурасының жоғарлануына, ылғалды жөтел көп қақырықпен, тынысы қйіндалған. Қарағанда: жағдайы орташа дәрежеде, бозғылт, экспираторлық ентігу. Перкуторлық дыбыс қороп тәрізді, аускультация кезінде қатан тыныс,қүрғақ және әр түрлі ылғалды сырылдар естіледі.Балалада қандай ентігу? Қандай зерттеулер жүргізу қажет диагноз қойюшын?&amp;lt;br /&amp;gt;</text:p>
          </table:table-cell>
          <table:table-cell office:value-type="string" table:style-name="ce1">
            <text:p>0JDRgdKb0L7RgNGL0YLRgyDQttGD0LnQtdGB0ZbQvdGW0qMg0LTQsNC80YPRiyDQsdCw0LvQsNC90YvSoyDSsdGA0YvQutGC0YvQuiDQtNCw0LzRg9GL0L3Ri9KjINC80LDQvdGL0LfQtNGLINC60LXQt9C10qPQtNC10YDRltC90ZbSoyDQsdGW0YDRliDQsdC+0LvRi9C/INGC0LDQsdGL0LvQsNC00YsuINCe0Lsg0LHRltGA0L3QtdGI0LUg0LrQtdC30LXSo9C00LUg0LbSr9GA0LXQtNGWLtCV0L0g0LDQu9Cz0LDRiCDRjdC80LHRgNC40L7QvdC90YvSoyDSr9GIICDRjdC90YLQvtC00LXRgNC80LAs0LzQtdC30L7QtNC10YDQvNCwLNGN0LrRgtC+0LTQtdGA0LzQsCDQttCw0L/Ri9GA0LDSm9GI0LDRgdGLINKb0LDQu9GL0L/RgtCw0YHQsNC00Ysu0JDRgSDSm9C+0YDRi9GC0YMg0LbSr9C50LXRgdGW0L3RltKjINC90LXQs9GW0LfQs9GWINKb0rHRgNGL0LvRi9C80LTQsNGA0Ysg0Y3QvdGC0L7QtNC10YDQvNCw0LTQsNC9INKb0LDQu9GL0L/RgtCw0YHQsNC00Ysu0JXQvSDQsNC70LPQsNGIINGW0YjQtdC6INGC0q/RgtGW0LPRliDRjdC90YLQvtC00LXRgNC80LDQtNCw0L0g0YLSr9C30ZbQu9C10LTRliDQttOZ0L3QtSDQvtC90YvQvSAzINCx06nQu9GW0LPRliDQsdC+0LvQsNC00Ysu0J7Qu9Cw0YAg0JDQu9C00YvSo9KT0Ysg0ZbRiNC10Lot0LDRg9GL0Lcg0LrRg9GL0YHRi9C90LDQvSDRgtC+0psg0ZbRiNC10LrQutC1INC00LXQudGW0L3Qs9GWINCw0LnQvNCw0psuINCe0Lsg0LbSr9C60YLRltC70ZbQutGC0ZbSoyA0INCw0L/RgtCw0YHRi9C90LAg0LTQsNC80LjQtNGLLiDQodC+0YHRi9C9INOp0LrQv9C1INGD0LnQutGLINCx0LXQt9GWLNCx0LDRg9GL0YAg0L7RgdGLINCw0LvQtNGL0qPSk9GLINGW0YjQtdC60YLQtdC9INC20q/QutGC0ZbQu9GW0LrRgtGW0qMgOCDQsNC/0YLQsNGB0YvQvdC00LAg0LTQsNC80LjQtNGLLiDQntGA0YLQsNKj0pPRiyDRltGI0LXQui0g0LDRiCDRltGI0LXQuiDQttGW0qPRltGI0LrQtSDRltGI0LXQuiDQsdOp0LvRltC60YLQtdGA0ZYu0JbSr9C60YLRltC70ZbQutGC0ZbSoyA1INCw0L/RgtCw0YHRi9C90LTQsCDQtNCw0LzQuNC00YsuINCQ0YDRgtKb0Ysg0ZbRiNC10Lot0YLQvtKbINGW0YjQtdC6LNGC0ZbQuiDRltGI0LXQuiDQsNC90YPRgSDQtNCw0LzQuNC00Ysu0K3QvNCx0YDQuNC+0L3QvdGL0qMg06nRgdGD0ZbQvNC10L0g0ZbRiNC10Log0rHQt9Cw0YDRi9C/LNCx0rHRgNCw0LvRi9C/LNOp0LfRltC90ZbSoyDQvtGA0L3QsNC70LDRgdGD0YvQvSDQttOZ0L3QtSDQv9GW0YjRltC90ZbQvSDQsNC70LDQtNGLLiDQhtGI0LXQuiDQutCw0LHRi9GA0LPQsNGB0Ysg0LHRltGA0L3QtdGI0LUg0LrQsNCx0LHQsNGC0YLQsNC9INGC0rHRgNCw0LTRiyDRiNGL0YDRi9GI0YLRiyzQsdKx0LvRiNGL0pvQtdGC0YLRlizRgdC10YDQvtC30LTRiy7QntC70LDRgCDTmdGA0YLSr9GA0LvRliDQttCw0L/Ri9GA0LDSm9GI0LDQtNCw0L0g0LTQsNC80YvQvyzQsNGB0pvQvtGA0YvRgtGDINC60YvQt9C80LXRgtGW0L0g0LDRgtKb0LDRgNGD0pPQsCDQsdC10LnRltC80LTQtdC70LXQtNGWLiDQkNC00LDQvCDRjdC80LHRgNC40L7QvdGL0L3Ri9KjINCw0YHSm9C+0YDRi9GC0YMg0LbRg9C50LXRgdGW0L3RltKjINC00LDQvNGD0Ysg0LDRgSDSm9C+0YDRgtGL0YMg0LbRg9C50LXRgdGW0L3RltKjINGN0L/QuNGC0LXQu9C40LnQvdC1INC205nQvdC1INGN0L3RgtC+0LTQtdGA0LzQsNC00LDQvSDRiNGL0LrQutCw0L0g0L7QvdGL0L0g0YLRg9GL0L3QtNGL0LvQsNGA0YvQvdGL0qMg0L/QsNGA0LXQvdGF0LjQvNCw0YHRi9C90LAg0LHQsNC50LvQsNC90YvRgdGC0Ysu0JzQtdC30L7QtNC10YDQvNCw0LTQsNC9INC00LDQvdC10LrQtdGAINCx0rHQu9GI0YvSm9C10YIg0LrQvtC80L/QvtC90LXQvdGC0YLQtdGA0ZYg0YIu0LEg0LTQsNC80LjQtNGLLtCR0LDQu9CwINC00q/QvdC40LXQs9C1INC60LXQu9Cz0LXQvSDQvdC10L0g0LrQtdC50ZbQvdC00LUg0LDRgSDSm9C+0YDRgtGL0YLRgyDQttKv0LnQtdGB0ZbQvdGW0qMg0LTQsNC80YPRiyDTmdGA0ZYg0LrQsNGA0LDQuSDQttCw0LvQs9Cw0YHRi9C/LNC10LzRiNC10Log0YHSr9GC0ZbQvdC10L0g0LHQsNGB0YLQsNC/INC605nQtNGW0LzQs9GWINGC0LDSk9Cw0Lwg0LbQtdC/INGD0LnRgNC10L3Qs9C1INC00LXQudGW0L0g0LbQsNC70pPQsNGB0LDQtNGLLjxiciAvPg0KMi4gINCo0LDQs9GL0LzQtNCw0YDQs9CwINGB0q/QudC10L3QtSDQvtGC0YvRgNGL0L8s0LHQsNC70LDQtNCwINGC0YvQvdGL0YEg0LDQu9GDINC20L7Qu9C00LDRgNGL0L3Ri9C9INC30LDQutGL0LzQtNCw0L3Qs9Cw0L3Ri9C9INCx0LDQudKb0LDRg9KT0LAg0LHQvtC70LDQtNGLLtCR0LDQu9Cw0LTQsCDRjdC60YHQv9C40YDQsNGC0L7RgNC70Ysg0LXQvdGC0ZbQs9GDINC00LDQvNGL0pPQsNC9LiDQrdC60YHQv9C40YDQsNGC0L7RgNC70Ysg0LXQvdGC0ZbQs9GDLdGC0YvQvdGL0YEg0YjRi9KT0LDRgNGD0LTRi9KjINKb0LjRi9C90LTQsNGD0Ysu0JHQsNC70LDQtNCwINGL0LvSk9Cw0LvQtNGLINC206nRgtC10Lsg0LrTqdC/INC60LDQutGL0YDRi9C60L/QtdC9LNCx06nQu9GW0L3Qs9C10L3QvdC90LXQvSDQutC10LnRltC9INCx0LDQu9Cw0LTQsCDRgtGL0L3Ri9GBINCw0LvRgyDQutC40YvQvdC00LDQs9Cw0L0uICDQlNC40LDQs9C90L7QtyDQutC+0Y4g0q/RiNGW0L0g0LrQsNC60YvRgNGL0LrRgtGL0L0g0LDQvdCw0LvQuNC30ZYs0LbQsNC70L/RiyDQutCw0L0g0LDQvdCw0LvQuNC30ZYs0LrQtdGD0LTQtSDQutGD0YvRgdGL0L3Ri9KjINGA0LXQvdGC0LPQtdC90L7Qs9GA0LDRhNC40Y/RgdGLLNKb0L7Qt9C00YvRgNKT0YvRiNGC0Ysg0LDQvdGL0pvRgtCw0YMg0LrQtdGA0LXQui7QodC+0Lsg0LrQtdC30LTQtSDQtNC40LDQs9C90L7QtyDQutC+0LnRi9C70YvQvyzTmdGA0ZYg0LrQsNGA0LDQudKT0Ysg0LXQvNC00LXRgyDQsdCw0pPRi9GC0Ysg0LDQvdGL0pvRgtCw0LvQsNC00YsuINCh0LXQsdC10LHRliDQsdCw0LvQsNC70LDRgNC00YvSoyDTqdC60L/QtdGB0ZbQvdGW0qMg0LXRgNC10YHQtdC60YLQtdGA0LzQtdC9INGB0LDQu9GL0YHRgtGL0YDSk9Cw0L3QtNCwINCw0L3QsNGC0L7QvNC40Y8t0YTQuNC30LjQvtC70L7Qs9C40Y/Qu9GL0psg0LXRgNC10LrRiNC10LvRltC60YLQtdGA0ZYg0LHQsNGALiDQntC7INGB0LDQu9GL0YHRgtGL0YDQvNCw0LvRiyDQutGW0YjRltGA0LXQuizQsdGA0L7QvdGF0YLQsNGA0Ysg0YLQsNGALCDQsdGA0L7QvdGF0YLQsNGA0LTRi9KjINGI0YvRgNGL0YjRgtGLINKb0LDQsdCw0YLRiyDQvdOZ0LfRltC6INCx0L7Qu9GL0L8g0LrQtdC70LXQtNGWLNCw0LvRjNCy0LXQvtC70LDQu9Cw0YDRiyDQsNC30YvRgNCw0Lou06jRgtC1INGB0LXQt9GW0LzRgtCw0Lsg0LHQvtC70YvQvyDQutC10LvQtdC00ZYuINCh0L7QvdC00YvSm9GC0LDQvSDQsdCw0LvQsNC70LDRgCDQv9Cw0YLQvtC70L7Qs9C40Y/Qu9Cw0YDSk9CwINCx0LXQudGW0Lwg0LHQvtC70YvQvyDQutC10LvQtdC00Lgu</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0" table:style-name="ce1">
            <text:p>1067140</text:p>
          </table:table-cell>
          <table:table-cell office:value-type="string" table:style-name="ce1">
            <text:p>kazakh</text:p>
          </table:table-cell>
          <table:table-cell office:value-type="string" table:style-name="ce1">
            <text:p>Билет 27.&amp;lt;br /&amp;gt; 1.Балалардың асқорыту жүйесінің дамуы эмбриогенезы.&amp;lt;br /&amp;gt; 2.3 жасар бала. Шағымдары температурасының жоғарлануына, ылғалды жөтел көп қақырықпен, тынысы қйіндалған. Қарағанда: жағдайы орташа дәрежеде, бозғылт, экспираторлық ентігу. Перкуторлық дыбыс қороп тәрізді, аускультация кезінде қатан тыныс,қүрғақ және әр түрлі ылғалды сырылдар естіледі.Балалада қандай ентігу? Қандай зерттеулер жүргізу қажет диагноз қойюшын?&amp;lt;br /&amp;gt;</text:p>
          </table:table-cell>
          <table:table-cell office:value-type="string" table:style-name="ce1">
            <text:p>MSDQkdCw0LvQsNC70LDRgNC00LDQs9GLINCw0YEg0LrQvtGA0YvRgtGDINC20YPQudC10YHRi9C90YvQvSDQtNCw0LzRg9GLINCx0LDRgdC60LAg0LzRg9GI0LXQu9C10YAg0YHQtdC60YvQu9C00Ysg0Y3QvNCx0YDQuNC+0LPQtdC90LXQt9C00YvQvSDQtNCw0LzRgyDQsdCw0YDRi9GB0YvQvdC00LAg0LDQu9Cz0LDRiNC60Ysg0LDQv9GC0LDQu9Cw0YDQtNCwINC00LDQvNC4INCx0LDRgdGC0LDQudC00YsgLiDQldC9INCw0LvSk9Cw0YjSm9GLINCx0L7Qu9GL0L8gLCDRj9Cz0L3QuCDRjdC80LHRgNC40L7QvdCw0LvQtNGLINC00LDQvNGD0LTQtNGL0L0gMiDQsNC/0YLQsNGB0YvQvdGL0qMg0LHQsNGB0YvQvdC00LAgLCDQvtC7INC00LXQs9C10L3RltC80ZbQtyDQtNCw0LzRg9C00YvQvSA3LTgg0LrRg9C00LXRgNGL0L3QtSDRgdCw0LnQutC10YEg0LrQtdC70LXQtNGLICDQuCDQvtGB0Ysg0LDRgNCw0LvRi9C60YLQsCDRjdC90LTQvtC00LXRgNC80LDQtNCw0L0g0LHRltGA0ZbQvdGI0ZbQu9GW0Log0ZbRiNC10LrRgtGW0qMg0L3QtdC80LXRgdC1INCw0LvSk9Cw0YjQutGLINGL0YjQtdC60YLRltKjINC60LDQu9GL0L/RgtCw0YHRg9GLINCx0LDRgdGC0LDQu9Cw0LTRiyAuINC00LDQvNGD0LTRi9C9IDEyINGI0Ysg0LrRg9C90Ysg0LHSsdC7INCx0ZbRgNGW0L3RiNGW0LvRltC6INGW0YjQtdC6IDIg0LHTqdC70ZbQutC60LUg0LHTqdC70ZbQvdC10LXQtNGWICwg0Y/Sk9C90Lgg0rHRgNGL0pvRltGI0ZbQu9GW0Log0LbTmdC90LUg0rHRgNGL0pvRgdGL0YDRgtGL0LvRi9KbINCx0L7Qu9GL0L8u0KPRgNGL0LrRi9GI0YvQu9GL0LrRgtC10L0g0LHQvtC70LDRiNCw0Log0LDRgSDQutC+0YDRi9GC0YMg0LzSr9GI0LXQu9C10YDRltC90ZbSoyDQtNCw0LzRg9GLINC+0YDRi9C9INCw0LvQsNC00YsgLCDQsNC7INKx0YDRi9Kb0YHRi9GA0YLRi9C70YvSmyDRltGI0LXQutGC0LXQvSDRgdCw0YDRg9GL0LfSm9Cw0LHRiyDQtNCw0LzQuNC00Ysg0L7QuyDRiNCw0YDQsNC90LDQvdGL0qMg0LDQvdCw0YHRi9C90YvSoyDQutGD0YDRgdCw0pPRi9C90LTQsCDQtNCw0LzRgyDQsdCw0YDRi9GB0YvQvdC00LAg0LTQsNC80YPRi9C90LAg0LDRgiDRgdCw0LvRi9GB0LDRgtGL0L0g0L7RgNCz0LDQvSDRgNC10YLRltC90LTQtSDQutCw0YDQsNGB0YLRi9GA0LDQvNGL0LcuINCR0LDRgdGC0LDQv9C60Ysg0L/QsNC50LTQsCDQsdC+0LvSk9Cw0L0g0LHRltGA0ZbQvdGI0ZbQu9GW0Log0ZbRiNC10Log0LbQsNCx0YvQuiDQutC10LvQtdC00ZYg0Lgg0L7QvdC00LAg0LDRg9GL0LfQttGD0YLQutGL0L3RiNCw0LrRgtGL0Log0LbTmdC90LUg0LrQu9C+0LrQsNC70LTRiyDQvNC10LzQsdGA0LDQvdCwINCx0L7Qu9Cw0LTRiyAuINCR0rHQuyDQutGD0YDRi9C70YvQvNC00LDRgNC00YvSoyDQsNGC0LDQvyDQsNC50YLQutCw0L3QtNCwICwg0LDRg9GL0Lct0LbSsdGC0pvRi9C90YjQsNC60YLRi9C9ICDTqdGB0YPRliDQutGD0YDRgdCw0LrRi9GI0YvQu9GL0Log0LTQsNC80YPQtNGL0L0gMyDQsNC/0YLQsNGB0YvQvdC00LAgLCDQsNC7INC60LvQvtC60LDQu9GM0LTRiyDQvNC10LzQsdGA0LDQvdCw0L3Ri9C9INC10YDRg9GLINC60YPRgNGB0LDQutGL0YjRi9C70YvQuiDQtNCw0LzQuNC00YvQvSAzINCw0LnRi9C90LTQsCDQttGD0LfQtdCz0LUg0LDRgdCw0LTRiy4g0JXQs9C10YAg0LHRg9C7INC/0YDQvtGG0LXRgSDQsdGD0LfRi9C70LDRgtGL0L0g0LHQvtC70YHQsCAsINC00LDQvNGD0LTRi9KjINCx0LXQu9Cz0ZbQu9GWINCx0ZbRgCDQsNGD0YvRgtKb0YPRi9C70LDRgNGL0L0g0L/QsNC50LTQsCDQtdGC0LXQtNGWIC4g0K3QvdC00L7QtNC10YDQvNCwINC60LDQsdCw0YLRiyDQvNC10L0gINC80LXQt9C+0LTQtdGA0LzQsCDQutCw0LHQsNGC0YvQvdGL0L0g0LLQuNGB0YbQtdGA0LDQu9C00Ysg0LbQsNC/0YvRgNCw0LrRiNCw0YHRi9C80LXQvSDQsdCw0LnQu9Cw0L3Ri9GB0YPRiyDQvtGA0YvQvSDQsNC70YvQvyAsINCx0YPQuyDQttC10YDQtNC10L0g0Y/Qs9C90Lgg0LzQtdC30L7QtNC10YDQvNCwINC80LXQvSDRjdC90LTQvtGA0LTQtdGA0LzQsCDQsNGA0LDRgdGL0L3QsNC9INC80LXQt9C10L3RhdC40LzQsCDTqdGB0LXQtNGWIC4g0K3QvdC00L7QtNC10YDQvNCw0LTQsNC9INGN0L/QuNGC0LXQu9C40LnQtNGW0qMg0LTQsNC80YPRiyAsINCw0Lsg0LzQtdC30LXQvdGF0LjQvNCw0LTQsNC9INGC0LDQvNGL0YDQu9Cw0YDRiyDQsdCw0YAg0LTTmdC90LXQutC10YAg0YLRltC90ZbQvdGW0qMgLNCx0YPQu9GI0YvQuiDQtdGCINGC0ZbQvdGW0L3RltKjINC205nQvdC1INGB0LXRgNC+0LfQtNGLINC60LDQsdCw0YIg0LTQsNC80YPRiyDQvtGA0YvQvSDQsNC70LDQtNGLLiDQlNCw0LzRg9C00YvSoyDQsdGW0YDRltC90YjRliDQsNC50YvQvdGL0qMg0YHQvtKj0YvQvdCwINC60LDRgNCw0Lkg0LHRltGA0ZbQvdGI0ZbQu9GW0Log0ZbRiNC10LrRgtGW0qMg0YLSr9GC0ZbQutGI0LUg0YLTmdGA0ZbQt9C00ZYg0LTQsNC80YvSk9Cw0L0gMyDQsdC+0LvRi9Cz0YvQvSDQutC+0YDQtSDQsNC70LDQvNC3OiDQsNC70LTRi9C90LPRiyAsINC+0YDRgtCw0L3Qs9GLINC205nQvdC1INC60LDRg9C00LDQu9C00YsgLiDQttOZ0L3QtSDQvtGB0Ysg0LrQtdC30LTQtSDQsNC70pPQsNGI0LrRiyDRltGI0LXQutGC0ZbSoyDQsdGW0YLQtdC70YPRliDQsdCw0YHRgtCw0LDQu9Cw0LTRiyAuINCe0YHRiyDQsdC+0LvRi9C60YLQtdGA0LTQtdC9INCw0YDRiyDQutCw0YDQsNC5INCw0YEg0LrQvtGA0YvRgtGDINC80YPRiNC10LvQtdGA0YvQvdGL0L0g0LTQsNC80YPRi9C9INC60L7RgNC1INCw0LvQsNC80YvQtyAu0JDQu9C00YvQvdCz0Ysg0ZbRiNC10Log0LHQvtC70YvQs9GL0L3QtdC9IC0g0LbSsdGC0LrRi9C90YjQsNC6ICwg0L7QvdC10YggLCDQsNGB0LrQsNC30LDQvSAsINGD0LnQutGLINCx0LXQt9C00YvQvSAsINCx0LDRg9GL0YDQtNGL0L0g0YDRg9C00LjQvNC10L3RgtGC0LXRgNGL0L3Ri9KjICwg0L7QvSDQtdC60ZYg0LXQu9GWINGW0YjQtdC60YLRltKjINCx0ZbRgCDQsdC+0LvRi9Cz0YvQvdGL0L0g0LTQsNC80YPRiyAgLCDQvtGA0YLQsNC90LPRiyDRltGI0LXQuiDQsdC+0LvRi9Cz0YvQvdC10L0gLSDQvtC9INC10LrRliDQtdC70ZYg0ZbRiNC10LrRgtGW0qMg0LHRltGAINCx0L7Qu9GL0LPRiyAsINCw0Ygg0YvRiNC10Log0L/QtdC9INC80YvQutGL0L0g0YvRiNC10Log0LTQsNC80YvRgdCwICwgINCw0YDRgtC60Ysg0Y/Qs9C90Lgg0LrQsNGD0LTQsNC70LTRiyDRltGI0LXQuiDQsdC+0LvRi9Cz0YvQvdGL0LXQvSDRgtC+0Log0ZbRiNC10LrRgtGW0L0g0LHQsNGA0LvRi9C6INC80YPRiNC10LvQtdGA0ZbQvdGW0qMg0LrQsNC70YvQv9GC0LDQsNGB0YPRiyDQvtGA0YvQvSDQsNC70LDQtNGLLiDQvNCj0J3Qq9Cc0JXQnSDQmtCQ0KLQkNCgINC+0YHRiyDQsNGC0LDQu9Cz0LDQvSDQvNGD0YjQtdC70LXRgCDQvNC10L0g0LHRltGA0LTQtdC5INGB0LDRgNGD0YvQtyDQutCw0LHRi9C90LAg0LHQsNGA0LDRgtGL0L0g0ZbRiNC10LrRgtGW0L0g0LrQsNC90LzQtdC9INC60LDQvNGC0LDQvNCw0YHRi9C3INC10YLRg9Cz0LUg0LHQsNCz0YvRgtGC0LDQu9KT0LDQvSDRgtCw0LzRi9GA0LvQsNGA0LTRi9KjINC60LDQu9GL0L/RgtCw0YHRg9GLINC+0YDRi9C9INCw0LvQsNC00Ysu0JrRg9GA0YHQsNC60YvRiNGL0LvRi9C6INC00LDQvNGD0LTRi9C9IDEsNS0yINCw0LnRi9C90LAg0LrQsNGA0LDQuSDQvNGD0YjQtdC70LXRgNC00YvSoyDQtNCw0LzRg9GLINC60LDRgNC60YvQvdC00Ysg0LbRg9C30LXQs9C1INCw0YHQsNC00YsgLtCQ0YHQutCw0LfQsNC9IC0g0ZbRiNC10Log0LbQvtC70LTQsNGA0YvQvdGL0qMg0LrRi9C30LzQtdGC0ZYg0LPQtdGB0YLQsNGG0LjRj9C90YvSoyAsINGP0LPQvdC4IDE2LTIwINCw0L/RgtCw0YHRi9C90LAg0LrQsNGA0LDQuSDQsdCw0YHRgtCw0LvQsNC00Ysg0LTQtdC/INC60LDRgNCw0YHRgtGL0YDQsNC80YvQty4gICAgICAgICAgICAgICAgICAgICAgICAgICAgICAgICAgICAgICAgICAgICAgICAgMiwgMyDQttCw0YHRgtCw0LPRiyDQsdCw0LvQsNC00LAg0LHRgNC+0L3RhdGL0LvRi9C6INC+0LHRgdGC0YDRg9C60YbQuNGP0L3Ri9KjINC00LDQvNGL0LPQsNC90YTQvSDQutC+0YDQtSDQsNC70LDQvNGL0LcuINCe0LPQsNC9INC005nQu9C10Lsg0YDQtdGC0ZbQvdC00LUg0LHQsNC70LDQvdGL0L0g0YjQsNCz0YvQvNC00LDRgNGL0L0g0LDQudGC0YPRi9C80YvQt9KT0LAg0LHQvtC70LDQtNGLICwg0Y/Sk9C90Lgg0YvQu9KT0LDQu9C00Ysg0LbQvtGC0LXQuyDQutCw0LrRi9GA0YvQutC/0LXQvSAsINGC0YvQvdGL0YEg0LrQuNGL0L3QtNCw0YPRiywg0Y3QutC/0LjRgNCw0YLQvtGA0LvRiyDQtdC90YLRltCz0YMg0LzQtdC9INC/0LXRgNC60YPRgdGB0LjRj9C00LDSk9GLINC00YvQsdGL0YHRgtGL0qMg0LrQvtGA0LDQvyDRgtOZ0YDRltC30LTRliDQsdC+0LvRg9GLICwg0LDRg9GB0LrRg9C70YzRgtCw0YbQuNGP0LTQsNCz0Ysg0LHQtdC70LPRi9C70LXRgCDRgdC10LHQtdC/INCx0L7Qu9CwINCw0LvQsNC00YsuINCR0LDQu9Cw0LvQsNGA0LTQsNKT0Ysg0L7QsdGB0YLRgNGD0LrRhtC40Y/QvdGL0qMg0LTQsNC80YPRiyDRgdC10LHQtdC/0YLQtdGA0YvQvdC1INGC0L7QutGC0LDQu9GB0LDQuiAsINC10L0g0LHRltGA0ZbQvdGIINGC0YvQvdGL0YEg0LDQu9GDINC20L7Qu9C00LDRgNGL0L3Ri9KjINGC0LDRgNC70YvSk9GLICwg0LHQsNC70LDQu9Cw0YDQtNCwINCx0YDQvtC90YXRgtCw0YAg0LzQtdC9INGC0YvQvdGL0YEg0LDQu9GDINC20L7Qu9C00LDRgNGL0YTQvdGL0L0g0LTQuNCw0LzQtdGC0YDRiyDQsNC50YLQsNGA0LvRi9C60YLQsNC5INC60ZbRiNC60LXQvdGC0LDQuSAs0LDQt9C00LDQvyDQsdC+0LvSk9Cw0L0g0LrQsNCx0YvQvdGDINC80LXQvSDRltGB0ZbQvdGDINGC0YvQvdGL0YEg0LDQu9GDINC20L7Qu9C00LDRgNGL0L3Ri9KjINGC0LDRgNGL0LvRg9GLINC80LXQvSDQsdGW0YLQtdC70YPQvSDRgtGD0LTRi9GA0LDQtNGLICzRgdC+0L3Ri9C80LXQvSDQutCw0YLQsNGAINCx0YDQvtC90YXRgtCw0YDQtNGL0qMg0LrQsNCx0YvRgNKT0LDQu9Cw0YDRi9C9INC10YDQtdC60YjQtdC70ZbQutGC0LXRgNGW0L3QtSDQtNC1INCx0LDQudC70LDQvdGL0YHRgtGLINGB0L/QsNC30Lwg0YLRg9GL0L3QtNCw0YPRi9C90LAgINCx0LXQudGL0Lwg0LrQtdC70LXQtNGWIC4g0JHQsNC70LDQtNCwINGN0LrRgdC/0LjRgNCw0YLQvtGA0LvRiyDQtdC90YLRltCz0YMg0LTQsNC80YvSk9Cw0L0g0LrQvtGA0LUg0LDQu9Cw0LzRi9C3ICwg0Y/Sk9C90Lgg0LTQtdC8INGI0YvSk9Cw0YDRgyDQutC10LfRltC90LTQtSDQutC40YvQvdC00YvQutC/0LXQvSDQutC+0YDRi9C90YvRgSDQsdC10YDQtdC00YsgLCDQsdGD0Lsg0YLRltC60LXQu9C10Lkg0LHRgNC+0L3RhdGC0LDRgNC00YvQvSDRiNGL0YDRi9GI0L/QtdC9INGC0LDRgNGL0LvRg9GLINC90LXQvNC10YEg0LHRi9GC0LXQu9GD0Ysg0LrQtdC30L3QtNC1INC+0YDRi9C9INCw0LvQsNC00Ysg0LDQudGC0LAg0LDQu9Cw0LzRi9C3IC4g0JTQuNCw0LPQvdC+0LfQtNGLINC005nQu9C10LvQtNC10YMg0LzQsNC60YHQsNGC0YvQvdC00LAg0LXQvSDQsNC70LTRi9C80LXQvSDQutC10YPQtNC1INC80YPRiNC10LvQtdGA0YvQvdGL0L0g0YDQtdC90YLQs9C10L3QvtCz0YDQsNGE0LjRj9GB0Ysg0LbQsNGB0LDQu9GL0L3QsNC00YsgLCDRgdC+0L3Ri9C80LXQvSDQutCw0YLQsNGAINCx0LDQu9Cw0LTQsNC9INC/0YPQu9GM0YHQvtC60YHQuNC80LXRgtGA0LjRj9C90YsgICwgINC60LDQvdC90YvQvSDQvtGC0YLQtdCz0YvQvNC10L0g0LrQsNC90YvSk9GDINC00LXSo9Cz0LXQudGW0L0g0LHQsNKT0LDQu9Cw0YMg0LbSr9GA0LPRltC30LXQvNGW0LcgLCDQsdGD0Lsg0LDRgNC60YvQu9GLINGB0LDRgtGD0YDQsNGG0LjRjyDQtNC10qPQs9C10LnRltC9INCw0L3Ri9C60YLQsNC5INCw0LvQsNC80YvQtyAuINCR0LDQu9Cw0LTQsNC9INCx0L7Qu9GL0L3Qs9C10L0g0LrQsNC60YvRgNGL0LrRgtGLINGC0LDQu9C00LDRg9KT0LAg0LbRltCx0LXRgNC10LzRltC3LCDQodC+0L3Ri9C80LXQvSDQutCw0YLQsNGAINCx0LDQu9Cw0pPQsCDQsdGA0L7QvdGF0YHQutC+0L/QuNGPINC20LDRgdCw0LnQvNGL0LcgLiDQodC+0L3Ri9C80LXQvSDQutCw0YLQsNGAINC20LDQu9C/0Ysg0LbTmdC90LUg0LHQuNC+0YXQuNC80LjRj9C70YvQuiDQutCw0L0g0LDQvdCw0LvQuNC30ZbQvSDQsNC70LDQvNGL0LcgLCDQvtGB0Ysg0LDRgNC60YvQu9GLINC10LPQtdGAINCx0LDQu9Cw0LTQsCDQutCw0LHRi9C90YMg0L7QvtGA0YvQvSDQsNC70YHQsCDQodCe0K0gLCDQutCw0LHRi9C90YMg0Y3Qu9C10LzQtdC90YLRgtC10YDRltC90ZbSoyDQu9C10LnQutC+0YbQuNGCINC90LXQudGC0YDQvtGE0LjQuyDQttC+0pPQsNGA0YvQu9Cw0pPQsNC90YvQvSDQutC+0YDQtSDQsNC70LDQvNGL0LcuINCe0YHRiyDQt9C10YDRgtGC0LXRg9C70LXRgNC00ZYg0LbRg9GA0LPRi9C30YMg0LDRgNC60YvQu9GLINCx0LDQu9Cw0LTQsCDQtNCw0LzRi9C/INC20LDRgtC60LDQvSDQsNGD0YDRg9C00Ysg0LXRgNGC0LUg0LDQvdGL0LrRgtCw0YPSk9CwICwg0LTQuNCw0LPQvdC+0Lcg0LrQvtGPINCw0LvQsNC80YvQtyAuIC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1" table:style-name="ce1">
            <text:p>1066951</text:p>
          </table:table-cell>
          <table:table-cell office:value-type="string" table:style-name="ce1">
            <text:p>russian</text:p>
          </table:table-cell>
          <table:table-cell office:value-type="string" table:style-name="ce1">
            <text:p>Билет 27.&amp;lt;br /&amp;gt; 1.Опишите эмбриогенез развития пищеварительной системы у детей.&amp;lt;br /&amp;gt; 2.Ребенок 3 лет. Жалобы на повышение температуры, влажный кашель с обильной мокротой, затрудненное дыхание. Объективно: состояние средней тяжести, бледный, одышка. Над легкими коробочный оттенок перкуторного звука. При аускультации на фоне жесткого дыхания выслушиваются сухие свистящие и разнокалиберные влажные хрипы. Какая одышка при данном состоянии? Какие исследования необходимо сделать для подтверждения диагноза?&amp;lt;br /&amp;gt;</text:p>
          </table:table-cell>
          <table:table-cell office:value-type="string" table:style-name="ce1">
            <text:p>MS4g0J/QuNGJ0LXQstCw0YDQuNGC0LXQu9GM0L3QsNGPINGB0LjRgdGC0LXQvNCwINGA0LXQsdC10L3QutCwINC90LDRh9C40L3QsNC10YIg0YDQsNC30LLQuNCy0LDRgtGM0YHRjyDQuNC3INGN0L3RgtC+0LTQtdGA0LzRiyAo0L3QsCAzLTQg0L3QtdC00LXQu9C4INGN0LzQsdGA0LjQvtCz0LXQvdC10LfQsCkuINCY0Lcg0L3QtdC1INC+0LHRgNCw0LfRg9C10YLRgdGPINC/0LXRgNCy0LjRh9C90LDRjyDQutC40YjQutCwLCDQutC+0YLQvtGA0LDRjyA0LTUg0L3QtdC00LXQu9C1INGN0LzQsdGA0LjQvtCz0LXQvdC10LfQsCDRgNCw0LfQtNC10LvRj9C10YLRgdGPINC90LAg0LLQvdGD0YLRgNC40LfQsNGA0L7QtNGL0YjQtdCy0YvQuSDQuCDQstC90LXQt9Cw0YDQvtC00YvRiNC10LLRi9C5INC70LjRgdGC0LrQuC4g0KLQsNC6INC20LUg0L/RgNC+0LjRgdGF0L7QtNC40YIg0YDQsNC30LTQtdC70LXQvdC40LUg0LXQtSDQvdCwINGA0L7RgtC+0LPQu9C+0YLQvtGH0L3Rg9GOINC4INC60LvQvtCw0LrQsNC70YzQvdGL0LUg0LzQtdC80LHRgNCw0L3Riy4g0JLQvdC10LfQsNGA0L7QtNC10YjQtdCy0YvQuSDRjdGC0L4g0LHRg9C00YPRidC40Lkg0LbQtdC70YLQvtGH0L3Ri9C5INC80LXRiNC+0LouINCS0L3Rg9GC0YDQuNC30LDRgNC+0LTRi9GI0LXQstGL0Lkg0LIg0L/QvtGB0LvQtdC00YHRgtCy0LjQuCDQtNC10LvQuNGC0YHRjyDQvdCwIDMg0YfQsNGB0YLQuCDQvtCx0YDQsNC30YPQtdGCINCy0YHQtSDQvtGA0LPQsNC90Ysg0JbQmtCiLiDQndCw0YfQsNC70YzQvdCw0Y8g0YfQsNGB0YLRjC0g0YDQvtGC0L7QstCw0Y8g0L/QvtC70L7RgdGC0YwsINCz0LvQvtGC0LrQsCwg0L/QuNGJ0LXQstC+0LQsINC20LXQu9GD0LTQvtC6INC4INC90LDRh9Cw0LvRjNC90LDRjyDRh9Cw0YHRgtGMIDEyLdC/0LXRgNGB0YLQvdC+0Lkg0LrQuNGI0LrQuCwg0L/QtdGH0LXQvdGMINC4INC/0L7QtNC20LXQu9GD0LTQvtGH0L3QsNGPINC20LXQu9C10LfQsDsg0YHRgNC10LTQvdGP0Y8tINC60L7QvdC10YfQvdCw0Y8g0YfQsNGB0YLRjCAxMi3Qv9C10YDRgdGC0L3QvtC5INC60LjRiNC60LgsINGC0L7RidCw0Y8g0Lgg0L/QvtC00LLQt9C00L7RiNC90YvQtSDQutC40YjQutC4OyDQutC+0L3QtdGH0L3QsNGPLSDQstGB0LUg0L7RgtC00LXQu9GLINGC0L7Qu9GB0YLQvtC5INC60LjRiNC60LguINCg0L7RgdGCINGB0L7RgdGD0LTQvtCyINC/0YDQvtC40YHRhdC+0LTQuNGCINC40Lcg0LDQvtGA0YLRiyDQuCDQstC10L3QvtC30L3QvtCz0L4g0YHQuNC90YPRgdCwLiDQotCw0Log0Log0LrQvtC90YbRgyA3LTgg0L3QtdC00LXQu9C4INC30LDQu9C+0LbQtdC90Ysg0LLRgdC1INC+0YDQs9Cw0L3RiyDQltCa0KIuINCSINC00LDQu9GM0L3QtdC50YjQtdC8INC/0YDQvtC40YHRhdC+0LTQuNGCINC40YUg0YPQstC10LvQuNGH0LXQvdC40LUg0LIg0YDQsNC30LzQtdGA0LUg0Lgg0LzQvtGA0YTQvi3RhNGD0L3QutGG0LjQvtC90LDQu9GM0L3QsNGPINC/0LXRgNC10YHRgtGA0L7QudC60LAuIDIuINCt0YLQviDRjdC60YHQv9C40YDQsNGC0L7RgNC90LDRjyDQvtGC0LTRi9GI0LrQsCwg0LrQvtGC0L7RgNCw0Y8g0YXQsNGA0LDQutGC0LXRgNC40LfRg9C10YLRgdGPINC30LDRgtGA0YPQtNC90LXQvdC90YvQvCDQstGL0LTQvtGF0L7QvC4g0J7QvdCwINCy0L7Qt9C90LjQutCw0LXRgiDQv9GA0Lgg0L7QsdGC0YPRgNCw0YbQuNC4INCy0L7Qt9C00YPRhdC+0L3QvtGB0L3Ri9GFINC/0YPRgtC10LkuINCf0YDQuCDQsNGD0YHQutGD0LvRjNGC0LDRhtC40Lgg0YHQstC40YHRgtGP0YnQuNC1INGF0YDQuNC/0Yst0LrQsNC6INGB0LvQtdC00YHRgtCy0LjQtSDRgdGD0LbQtdC90LjRjyDQsdGA0L7QvdGF0L7QsiDQuNC3LdC30LAg0LLQvtGB0L/QsNC70LXQvdC40Y8sINGC0LDQuiDQttC1INCy0LvQsNC20L3Ri9C1INGF0YDQuNC/0YssINC60L7RgtC+0YDRi9C1INC/0L7Rj9Cy0LjQu9C40YHRjCDQuNC3LdC30LAg0LzQvtC60YDQvtGC0YssINC80L7QutGA0L7RgtCwINCw0LrRgtC40LLQvdC+INCy0YvQtNC10LvRj9C10YLRgdGPINC4INC30LDQutGD0L/QvtGA0LjQstCw0LXRgiDQv9GA0L7RgdCy0LXRgiwg0LTQtdC70LDRjyDQstGL0LTQvtGFINC30LDRgtGA0YPQtNC90LjRgtC10LvRjNC90YvQvCwg0LfQsNGB0YLQsNCy0LvRj9GPINC/0YDQuNC70L7QttC40YLRjCDQsdC+0LvRjNGI0LjQtSDRg9GB0LjQu9C40Y8uINCa0L7RgNC+0LHQvtGH0L3Ri9C5INC+0YLRgtC10L3QvtC6INC30LLRg9C60LAg0YXQsNGA0LDQutGC0LXRgNC40LfRg9C10YIg0L/QvtCy0YvRiNC10L3QvdGD0Y4g0LLQvtC30LTRg9GI0L3QvtGB0YLRjCDQu9C10LPQutC40YUsINC+0LHRg9GB0LvQsNCy0LvQuNCy0LDRjyDQsdGA0L7QvdGF0L7QsdGB0YLRgNGD0LrRhtC40Y4uINCU0LjQsNCz0L3QvtC3LSDQstC10YDQvtGP0YLQvdC10LUg0LLRgdC10LPQviDRjdGC0L4g0L7RgdGC0YDRi9C5INCx0YDQvtC90YXQuNGCLCDQutC+0YLQvtGA0YvQuSDRh9Cw0YHRgtC+INCy0L7Qt9C90LjQutCw0LXRgiDRgyDQtNC10YLQtdC5INGN0YLQvtCz0L4g0LLQvtC30YDQsNGB0YLQsCDQuNC3LdC30LAg0YPQt9C60L7Qs9C+INC/0YDQvtGB0LLQtdGC0LAg0LHRgNC+0L3RhdCwINC4INCx0L7Qs9Cw0YLQvtCz0L4g0LrRgNC+0LLQvtGB0L3QsNCx0LbQtdC90LjRjyDRgdC70LjQt9C40YHRgtC+0LksINC60L7RgtC+0YDQsNGPINGH0LDRgdGC0L4g0LLQvtGB0L/QsNC70Y/QtdGC0YHRjzsg0LzQvtC20LXRgiDQsdGL0YLRjCDQuCDQsdGA0L7QvdGF0L7Qv9C90LXQstC80L7QvdC40Y8sINC90L4g0L3Rg9C20L3QviDQv9GA0L7QstC10YHRgtC4INCw0L3QsNC70LjQtyDQvNC+0LrRgNC+0YLRiyDQuCDRgNC10L3RgtCz0LXQvSDQs9GA0YPQtNC90L7QuSDQutC70LXRgtC60LgsINCz0LTQtSDQvNGLINGD0LLQuNC00LjQvCDQvtGH0LDQsyDQstC+0YHQv9Cw0LvQtdC90LjRjyDQu9C10LPQvtGH0L3QvtC5INGC0LrQsNC90LguINCY0L3RgdGC0YDRg9C80LXQvdGC0LDQu9GM0L3Ri9C1INC80LXRgtC+0LTRiyDQuNGB0YHQu9C10LTQvtCy0LDQvdC40Y8tINCx0YDQvtC90YXQvtGB0LrQvtC/0LjRjywg0LPQtNC1INC80Ysg0YPQstC40LTQuNC8INC30LDQutGD0L/QvtGA0LXQvdC90YvQuSDQv9GA0L7RgdCy0LXRgiDQsdGA0L7QvdGF0LAg0LPQvdC+0LnQvdGL0Lwg0Y3QutGB0YHRg9C00LDRgtC+0LwuINCb0LDQsdC+0YDQsNGC0L7RgNC90YvQtS0g0J7QkNCaICjQv9C+0LLRi9GI0LXQvdC40LUg0LvQtdC50LrQvtGG0LjRgtC+0LIsINGB0LTQstC40LMg0LLQu9C10LLQviksINCx0LjQvtGF0LjQvNC40Y8gKNChLdGA0LXQsNC60YLQuNCy0L3Ri9C5INCx0LXQu9C+0LopLSDQv9C+0LTRgtCy0LXRgNC00Y/RgiDQstC+0YHQv9Cw0LvQtdC90LjQtS4g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23" table:style-name="ce1">
            <text:p>1067023</text:p>
          </table:table-cell>
          <table:table-cell office:value-type="string" table:style-name="ce1">
            <text:p>russian</text:p>
          </table:table-cell>
          <table:table-cell office:value-type="string" table:style-name="ce1">
            <text:p>Билет 27.&amp;lt;br /&amp;gt; 1.Опишите эмбриогенез развития пищеварительной системы у детей.&amp;lt;br /&amp;gt; 2.Ребенок 3 лет. Жалобы на повышение температуры, влажный кашель с обильной мокротой, затрудненное дыхание. Объективно: состояние средней тяжести, бледный, одышка. Над легкими коробочный оттенок перкуторного звука. При аускультации на фоне жесткого дыхания выслушиваются сухие свистящие и разнокалиберные влажные хрипы. Какая одышка при данном состоянии? Какие исследования необходимо сделать для подтверждения диагноза?&amp;lt;br /&amp;gt;</text:p>
          </table:table-cell>
          <table:table-cell office:value-type="string" table:style-name="ce1">
            <text:p>MSDQvtGC0LLQtdGCLtCX0LDQutC70LDQtNC60LAg0L7RgNCz0LDQvdC+0LIg0L/QuNGJ0LXQstCw0YDQuNGC0LXQu9GM0L3QvtC5INGB0LjRgdGC0LXQvNGLINC90LDRh9C40L3QsNC10YLRgdGPINC90LAg0YHQsNC80YvRhSDRgNCw0L3QvdC40YUg0Y3RgtCw0L/QsNGFINGN0LzQsdGA0LjQvtC90LDQu9GM0L3QvtCz0L4g0YDQsNC30LLQuNGC0LjRjyDRg9C20LUg0L3QsCA3LTgg0LTQtdC90Ywg0LjQtyDRjdC90YLQvtC00LXRgNC80Ysg0YTQvtGA0LzQuNGA0YPRjtGC0YHRjyDQv9C10YDQstC40YfQvdCw0Y8g0LrQuNGI0LrQsCAs0LrQvtGC0L7RgNCw0Y8g0LogMTIg0LzRgyDQtNC90Y4g0LTQtdC70LjRgtGB0Y8g0L3QsCAyINGH0LDRgdGC0Lgg0LLQvdGD0YLRgNC40LfQsNGA0L7QtNGL0YjQtdCy0YPRjiAo0LjQtyDQvdC10LUg0YDQsNC30LLQuNCy0LDQtdGC0YHRjyDQv9C40YnQtdCy0LDRgNC40YLQtdC70YzQvdGL0Lkg0YLRgNCw0LrRgiApINCYINCy0L3QtdC30LDRgNC+0LTRi9GI0LXQstGD0Y4g0L7QsdGA0LDQt9GD0LXRgiDQttC10LvRgtC+0YfQvdGL0Lkg0LzQtdGI0L7QuiDQuNC30L3QsNGH0LDQu9GM0L3QviDQv9C10YDQstC40YfQvdCw0Y8g0LrQuNGI0LrQsCDQt9Cw0LrRgNGL0YLQsCDRgNC+0YLQvtCz0LvQvtGC0L7Rh9C90LDRjyDQuCDQutC70L7QsNC60L7Qu9GM0L3QvtC5INC80LXQvNCx0YDQsNC90LDQvNC4INC90LAgMyDQvdC10LTQtdC70Lgg0LHQtdGA0LXQvNC10L3QvdC+0YHRgtC4INGA0L7RgtC+0LPQu9C+0YLQvtGH0L3QsNGPINC80LXQvNCx0YDQsNC90LAg0YDQsNC30YDRg9GI0LDQtdGC0YHRjyAs0LAg0LrQu9C+0LDQutCw0LvRjNC90LDRjyDQuiAzIC3QvNGDINC80LXRgdGP0YbRgy4g0Jog0LrQvtC90YbRgyAxINCz0L4g0LzQtdGB0Y/RhtCwINC80L7QttC90L4g0YDQsNC30LvQtdGH0LjRgtGMIDMg0L7RgtC00LXQu9CwINC/0LXRgNCy0LjRh9C90L7QuSDQutC40YjQutC4INCyINCy0LjQtNC1INGC0YDRg9Cx0YfQsNGC0L7Qs9C+INC+0LHRgNCw0LfQvtCy0LDQvdC40Y8g0Lgg0Log0L/QtdGA0LXQtNC90LXQuSDQutC40YjQutC4INGE0L7RgNC80LjRgNGD0LXRgtGB0Y8g0LPQu9C+0YLQutCwINC/0LjRidC10LLQvtC0LNC20LXQu9GD0LTQvtC6INC4INGH0LDRgdGC0Ywg0LTQstC10L3QsNC00YbQsNGC0LjQv9C10YDRgdGC0L7QuSDQutC40YjQutC4ICzQsCDRgtCw0Log0LbQtSDQt9Cw0LrQu9Cw0LTQutC4INC/0LXRh9C10L3QuCDQuCDQv9C+0LTQttC10LvRg9C00L7Rh9C90L7QuSDQttC10LvQtdC30YsgLtCh0YDQtdC00L3Rj9GPINC60LjRiNC60LAg0LTQsNC10YIg0L3QsNGH0LDQu9C+INC+0YHRgtCw0LvRjNC90L7QuSDRh9Cw0YHRgtC4INC00LLQtdC90LDQtNGG0LDRgtC40L/QtdGA0YHRgtC90L7QuSDQutC40YjQutC4ICzRgtC+0YnQtdC5INC4INC/0L7QtNCy0LfQtNC+0YjQvdC+0Lkg0LrQuNGI0LrQtS4g0JjQtyDQt9Cw0LTQvdC10Lkg0YfQsNGB0YLQuCDRgNCw0LfQstC40LLQsNC10YLRgdGPIDIg0L7RgtC00LXQu9CwINGC0L7RidC10Lkg0LrQuNGI0LrQuCDQv9Cw0YDQsNC70LXQu9GM0L3QviDRgSDRjdGC0LjQvCDQv9GA0L7QuNGB0YXQvtC00LjRgiDRgNCw0LfQstC40YLQuNC1INGB0L7RgdGD0LTQuNGB0YLQvtC5INGB0LjRgdGC0LXQvNGLINGB0L7RgdGD0LTRiyDQv9C40YLQsNGO0YnQuNC1INC20LXQu9GC0L7Rh9C90YvQuSDQvNC10YjQvtC6INC4INC60LjRiNC10YfQvdC40Loo0LDRgNGC0LXRgNC40Lgg0Lgg0LLQtdC90L7Qt9C90L7Qs9C+INGB0LjQvdGD0YHQsCAs0LLQtdC90YspINC6IDEsNS0yINC80LXRgdGP0YbQtdC8INGN0LzQsdGA0LjQvtC90LDQu9GM0L7Qs9C+INGA0LDQt9Cy0LjRgtC40Y8g0L3QsNCx0LvRjtC00LDQtdGC0YHRjyDQuNC90YLQtdC90YHQuNCy0L3Ri9C5INGA0L7RgdGCINC/0LjRidC10LLQsNGA0LjRgtC10LvRjNC90L7QuSDRgdC40YHRgtC10LzRiyDQsiDQtNC70LjQvdGDIC7Qo9C20LUg0YEgNiDQvdC10LTQtdC70Lgg0YHRgtC10L3QutC4INC60LjRiNC10YfQvdC40LrQsCDRgdC+0YHRgtC+0Y/RgiDQuNC3IDMg0LrQu9C10YLQvtGH0L3Ri9GFINGB0LvQvtC10LIg0Y3QvdC00L7QtNC10YDQvNCw0LvRjNC90L4g0LzQtdC30LXQvdGF0LjQvNCw0LvRjNC90L7Qs9C+INC4INC80LXQt9C+0YLQtdC70LjQsNC70YzQvdC+0LPQvi48YnIgLz4NCjIg0L7RgtCy0LXRgjrRgyDRgNC10LHQtdC90LrQsCDRgNCw0LfQstC40LvQsNGB0Ywg0Y3QutGB0L/QuNGA0LDRgtC+0YDQvdCw0Y8g0L7RgtC00YvRiNC60LAg0KDQtdCx0LXQvdC60YMg0YLRgNGD0LTQvdC+INCy0YvQtNC+0YXRg9GC0Ywu0LTRi9GF0LDQvdC40LUg0YjRg9C80L3QvtC1INGBINGD0YfQsNGB0YLQuNC1INCy0YHQv9C+0LzQvtCz0LDRgtC10LvRjNC90L7QuSDQvNGD0YHQutGD0LvQsNGC0YPRgNGLINCy0L7Qt9C80L7QttC10L0g0YHQstC40YHRgi4g0JTQu9GPINC90LDRh9Cw0LvQsCDQv9GA0L7QstC10YHRgtC4INC+0LHRidC40Lkg0L7RgdC80L7RgtGALNC40LfQvNC10YDQuNGC0Ywg0YHQsNGC0YPRgNCw0YbQuNGOINCU0LvRjyDQuNGB0YHQu9C10LTQvtCy0LDQvdC40Y8g0L/RgNC40LzQtdC90Y/RjtGC0YHRjyDQutCw0Log0LvQsNCx0LDRgNCw0YLQvtGA0L3Ri9C1INGC0LDQuiDQuCDQuNC90YHRgtGA0YPQvNC10L3RgtCw0LvRjNC90YvQtSDQvNC10YLQvtC00Ysu0Jog0LvQsNCx0LDRgNCw0YLQvtGA0L3Ri9C8INC+0YLQvdC+0YHRj9GC0YHRjzrQvtCx0YnQuNC5INCw0L3QsNC70LjQtyDQutGA0L7QstC4LCDRgdC+0Y0g0LvQtdC50LrQvtGG0LjRgtGLLtGN0L7Qt9C40L3QvtGE0LjQu9GLINC4INCw0LvQtdGA0LPQuNGH0LXRgdC60LjQuSDQutC+0LzQv9Cw0L3QtdC90YIgLCDQsNC70LDQu9C40Lcg0LzQvtGH0LguIC7QmiDQuNC90YHRgtGA0YPQvNC10L3RgtCw0LvRjNC90YvQvCDQvtGC0L3QvtGB0Y/RgiDRgNC10L3RgtCz0LXQvdC+0LPRgNGE0LjRjyDQvtGA0LPQsNC90L7QsiDQs9GA0YPQtNC90L7QuSDQutC70LXRgtC60Lgs0LHRgNC+0L3RhdC+0YHQutC+0L/QuNGPINGB0L/QuNGA0L7QvNC10YLRgNC40Y8g0LrQvtC80L/RjNGO0YLQtdGA0L3QsNGPINC4INC80LDQs9C90LjRgtC90L4t0YDQtdC30L7QvdCw0L3QsNGB0L3QsNGPINGC0L7QvNC+0LPRgNCw0YTQuNGPINC/0YDQuNC80LXQvdGP0LXRgtGB0Y8g0L/QviDQv9Cw0LrQsNC30LDQvdC40Y/QvCDQuCDQuNGB0YHQv9C+0LvRjNC30YPQtdGC0YHRjyDRgNC10LbQtS7QkNC90LDQu9C40Lcg0LzQsNC60YDQvtGC0YssINGG0LjRgtC+0LvQvtCz0LjRjyDQuCDQsdCw0LrRgtC10YDQuNC+0LvQvtCz0LjRh9C10YHQutC40LUg0LjRgdGB0LvQtdC00L7QstCw0L3QuNGPINCwINGC0LDQuiDQttC1INCf0KbQoCDRgtC10YHRgiDQvdCwINCy0LjRgNGD0YHRiyAuINCY0YHRgdC70LXQtNC+0LLQsNC90LjRjyDQuNC80LzRg9C90L7Qs9C70L7QsdGD0LvQuNC90L7QsiDQtNC70Y8g0LjRgdC60LvRjtGH0LXQvdC40Y8g0LDQu9C70LXRgNCz0LjQuC4=</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51" table:style-name="ce1">
            <text:p>915051</text:p>
          </table:table-cell>
          <table:table-cell office:value-type="string" table:style-name="ce1">
            <text:p>english</text:p>
          </table:table-cell>
          <table:table-cell office:value-type="string" table:style-name="ce1">
            <text:p>Ticket 27.&amp;lt;br /&amp;gt; 1. Describe the embryogenesis of digestive system in children.&amp;lt;br /&amp;gt; 2. A 3-year-old child. Complaints of fever, productive cough with profuse sputum, dyspnea. Objectively: moderate severity of general condition, pale, dyspnea . Box sound on percussion of lungs. At auscultation the respiration is rigid with dry wheezing and various-sized moist rales.&amp;lt;br /&amp;gt; Specify the dyspnea at this condition? What tests need to be done to confirm the diagnosis?&amp;lt;br /&amp;gt;</text:p>
          </table:table-cell>
          <table:table-cell office:value-type="string" table:style-name="ce1">
            <text:p>MS50aGUgIGVtYnJveW9nZW5lc2lzICBvZiAgZGlnZXN0aXZlIHN5c3RlbSAgaW4gY2hpbGRyZW4gLiAgICAgICAgICAgICAgICAgICAgICAgICAgICAgICAgICAgICAgICAgICAgICAgICAgICAgICAgICAgICAgICAgICAgICAgaXQgZGV2ZWxvcHMgdGhyb3VnaCBhICBzZXJpZXMgb2YgaW5kaWNhdGUgcHJvY2VzcyAuIGFycm91bmQgdGhpcmQgd2VlayBvZiBnZXN0YXRpb24gdGhlIGVuZG9kZXJtIGRpZmZlcmFuY2lhdGlvbiBpbnRvIHRoZSBmb3JndXQgbWlkZ3V0IGFuZCBoaW5kIGd1dCAuIGJ5IHRoZSBmb3V0aCB3ZWVrIG9mIGdlc3RhdGlvbiB0aGUgZm9yZ3V0IGZvcm1zIHRoZSBwaW1pdGl2ZSBwaGFyeW54IGFuZCB0aGUgc3RvbWFjaCAuYW5kIHRoZSBtaWRndXQgY29udHJpYnV0ZXMgdGhlIHNtYWxsIGludGVzdGluZSBhbmQgdGhlIGhpbmQgZ3V0IGNvbnRyaWJ1dGUgdG8gdGhlIGNvbG9uIGFuZCB0aGUgcmVjdHVtIC4gYXJyb3VuZCB0aGUgc2V2ZW50aCB3ZWVrIHRoZSBsaXZlciwgZ2FsbGJsYWRlciwgcGFuY3JlYXNlIGVtZXJnZSBhcyB0aGUgb3V0IGdyb3d0aC4gYXMgZGV2ZWxvcG1lbnQgcHJvY2VzcyAgaGluZCBndXQgdW5kZXJnbyB0aGUgZm9sZGluZyByb3RhdGlvbiBhbmQgZWxvbmdhdGlvbiBieSB0aGUgZW5kaW5nIG9mIHRoZSBlbWJyb25pYyBwZXJpb2QgYW5kIGVzc2VudGlhbCBzdHJ1Y3R1cmVzIGFyZSBzdGFiZWxpc2VkIGxheWluZyB0aGUgZm91bmRhdGlvbiBmb3IgdGhlIGZ1bGx5ICBmdW5jdGlvbmFsIGRpZ2VzdGl2ZSBzeXN0ZW0gaW4gdGhlIGNoaWxkcmVuIC4uICAgICAgICAgICAgICAgICAgICAgICAgICAgICAgICAgICAgICAgICAgICAgICAgICAgICAgICAgICAgICAgICAgICAgICAgICAgICAgICAgICAgICAgICAgICAgICAgICAgICAgIDIudGhlIGR5c3BuZXNhIGluIHRoZSAgMyB5ZWFyIG9sZCBjaGlsZCBpcyBsaWtlbHkgZHVlIHRvIGxvd2VyIHJlc3BpcmF0b3J5IHRyYWN0IGluZmVjdGlvbiAuIHBvc3NpYmx5IHRvICBwbmV1bW9uaWEgLiB0aGUgcHJlc2VuY2Ugb2YgcHJvZHVjdGl2ZSBjb3VnaCB3aXRoICBwcm9mdXNlIHNwdXR1bSBib3ggc291bmQgb24gbHVuZyAgcGVyZnVzc2lvbiBhbmQgYWJub3JtYWwgYnJlYXRoIHNvdW5kIG9uICBhdXNjYWx0YXRpb24gKCByaWdpZCByZXNwaXJhdGlvbiAsIGRyeSB3aGVlemluZywgbW9pc3QgcmFsZXMpIGluZGljYXRlcyByZXNwaXJhdG9yeSBkaXN0cmVzcyAuIGNvbmZvcm1hdG9yeSB0ZXN0ICBpbmRpY2F0ZXMgIGEgY2hlc3QgeC0gcmF5ICB0byBhc3Nlc3MgbHVuZyBpbnZvbHZtZW50IC4gY29tcGxldGUgYmxvb2QgY291bnQgdG8gY2hlY2sgdGhlIGVsZXZhdGVkIHdoaXRlICBibG9vZCBjZWxscyBjb3VudCAgYW5kIHJlc3BpcmF0b3J5IHZpcmFsIHBhbmVscyB0byBpZGVudGlmeSB0aGUgY2F1c2F0aXZlIGFnZW50IC4gaW4gc2V2ZXJlIGNhc2VzIGJsb29kIGN1bHR1cmVzIGFuZCAgYXJ0ZXJpYWwgYmxvb2QgZ2FzIGFuYWx5c2lzICBtYXkgIGJlIG5lc3Nlc2FyeS4gIHByb210IGRpYWdub3NpcyBhbmQgYXBwcm9wcmlhdGUgIHRyZWF0cm1lbnQgIHRwaWNhbGx5ICB3aXRoICBhbnRpYmlvdGljcyAgYXJlICBjcnVjaWFsIGluICAgcGVkaWF0cmljICBwbmV1bW9uaWEgICAuL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90" table:style-name="ce1">
            <text:p>915090</text:p>
          </table:table-cell>
          <table:table-cell office:value-type="string" table:style-name="ce1">
            <text:p>english</text:p>
          </table:table-cell>
          <table:table-cell office:value-type="string" table:style-name="ce1">
            <text:p>Ticket 27.&amp;lt;br /&amp;gt; 1. Describe the embryogenesis of digestive system in children.&amp;lt;br /&amp;gt; 2. A 3-year-old child. Complaints of fever, productive cough with profuse sputum, dyspnea. Objectively: moderate severity of general condition, pale, dyspnea . Box sound on percussion of lungs. At auscultation the respiration is rigid with dry wheezing and various-sized moist rales.&amp;lt;br /&amp;gt; Specify the dyspnea at this condition? What tests need to be done to confirm the diagnosis?&amp;lt;br /&amp;gt;</text:p>
          </table:table-cell>
          <table:table-cell office:value-type="string" table:style-name="ce1">
            <text:p>MS1lbWJyb2dlbnNpcyBvZiB0aGUgZGlnZXN0aXZlIHN5c3RlbSBmb3JtYXRpb24gb2YgcHJpbWl0aXZlIGd1dCB0dWJlIGR1cmluZyBlbWJyeW9nZW5zaXMgdGhlIGRpZ2VzdGl2ZSBzeXN0ZW0gZ3V0IHR1YmUgcHJpcG1pdGl2ZSAgPGJyIC8+DQogZ3V0IHR1YmUgZHVyaW5nIGVtYnJvZ2Vuc2lzICB0aGUgZG9nZXN0aXZlIHN5c3RlbSAgYmVpbmcgZnJvbSB0aGUgd2l0aCB0aGUgZGV2ZXBsbWVudCB0aGUgcHJpbWlyeSBndXQgdHViZSB3aGljaCBhcmlzZSBmcm9tIHRoZSBwcmltaXRpdmUgZ3V0IHR1YmUgZm9tYXRpb24gb2YgZm9yZ3V0IG1pZGd1dCBhbmQgaGluZGd1dCB0dWJlICB0aGUgcHJpbWl0aXZlICBndXQgdHViZSBpcyBkaWZmcmVudCBpbnRvIGZvcmVndXQgbWlkZ3V0IGFuZCBoaW5kZ3V0IHJlZ2lvbiBlc29waHVzICB0aGUgdXBwZXIgcGFydCBvZiBwcmltaXRpdmUgZ3V0IHR1YmUgZGV2bGFwbWVudCBvZiB0aGUgZm9yIGd1dCBlc29waHVzIHRoZSB1cGVyIHBhcnQgb2YgZGV2ZXBsYXBtZW50IGVzb3BodXMgdGhlIHVwcGVyIHBhcnQgb2YgcHJpbWl0aXZlIGd1dCBvZiBlc29waGFndXMgc3RvbWFjaCB0aGUgZXhwcmVzcyBwZiB0aGUgZm9yZ3V0IGdpdmVzIHJpc2UgdG8gdGhlIHN0b21hY2guIGxpdmVyIGFuZCBwYW5jcmVhc2UgYnVyZCByaXNlIG91dGdyb3d0aCBmcm9tIHRoZSBmb3JndXQgZGV2ZXBsYXBtZW50IG9mIHRoZSBoaW5kZ3V0ICBsYXJnZSBpbnRlcnN0aW5lIHRoZSBoaWRndXQgZm9ybSB0aGUgbGFyZ2UgaW50ZXJzdGluZWluY3VsZGUgY2VjdW0gY29sb24gYW5kIHJldHVuIGZvcm1hdGlvbiBvZiBhY2Nlc29yeSBzdHJ1Y3R1cmUgc3RydWN0dXJlIHN1Y2ggYXMgZ2FsYmxhZGVyIHNhbGl2YXJ5IGdsYW5kcyBhY2NpY290ZWQgZHVjdGFsc28gZGV2bGVwICBjb29yZGluYXRpb24gd2l0aCB0aGUgZGlnZXN0aXZlIHN5c3RlbSBtYXR1cmF0aW9uIGFuZCBmdW5jYXRpb24gd2l0aCB0aGUgYXMgZW1icnlvZ2VuZXNpcyBwcm9jZXNzIHRoZSBkaWdlc3RpdGl2ZSBvcmdlbiB1bmRlcmdvIG1hdHVyYWN0aW9uIGFuZCBmdW5jYXRpb24vICAgICAyLi0gQSAzIHllYXIgb2xkIGNoaWxkIHdpdGggcmVzcGlyYXRvcnkgc3lzdGVtIDsgY2hhcmFjdHphdGlvbiBkeXNwbmVhIGludGhlIGNvbnRleHQgbGlrZWx5IGludm9sdmUgbGFib3JlZCBvciBkaWZmaWN1bHRpIGluIGJyZWFodGhpbmcgaW5jcmVhc2UgcmVzcGFyaSByYXRlICB0aGUgY2hpZCBtYXkgZXhoaWJpdCBhbiBpbmNyZWFzZSByZXNwYXJpIHJhdGUgaW4gZWZmZXJ0IHRvIG1lZXQgb3h5Z2VuIGRlbWFuZCAgYWNjZXNvcnkgbXVzdWNsZSBvZiB0aGUgcmVzcGlyYXRpb24gIGluY2x1ZGluZyBuZWNrIG11c3VsZSB0byBhaWRicmVhdGhpbmcgY2hlc3RyZXRyYWN0aW9uLyB2aXNpYmxlIHJlY3J0aW9uIG9mIHRoZSBjaGVzdCBkdXJpbmcgaW5paGljYXRpb24gbWF5IGJlIGluZmFjdGlvbiBnaXZpbmcgdGhlIHN5bXRlbSBvZiBmZXZlciBwcm9kdWN0aXZlIGNvdWYgYW5kIHJlc3BpcmF0b3J5IHNvdW5kIGEgcmVzcGlyYXRvcnkgaW5mZWN0aW9uIHN1Y2ggYXMgcGhldW1vaWEgb3IgYnJvbmNvY2hpb2xpdHMgaXMgYSBwb3NzaWJsZSBjYXVzZSBhdXNjbHV0aW5nIGZpbmRpbmdzICBkcnkgd2hlZXppbmcgYW5kIG1vaXN0IHJhbGVzIHN1Z2dlc3QgYWlyd2F5cyBpbmZsYW1hdGlvbiBhbmQgbXVjdXMgcHJvZHVjdGlvbiAgZGlhZ25vc2lzICBDSEVTVCBYUkFZIEFORCBDT01QTEVURSBCTE9PRCBDT1VOVC8g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90" table:style-name="ce1">
            <text:p>915290</text:p>
          </table:table-cell>
          <table:table-cell office:value-type="string" table:style-name="ce1">
            <text:p>kazakh</text:p>
          </table:table-cell>
          <table:table-cell office:value-type="string" table:style-name="ce1">
            <text:p>Билет 28.&amp;lt;br /&amp;gt; 1.Нәрестенің беткей тыныс алуы немен байланысты?&amp;lt;br /&amp;gt; 2. Табиғи тамақтанудағы сау балалардың ішектің микрофлорасының қалыптасуы немен байланысты? &amp;lt;br /&amp;gt;</text:p>
          </table:table-cell>
          <table:table-cell office:value-type="string" table:style-name="ce1">
            <text:p>MSDQltCw0LvQv9GLINC905nRgNC10YHRgtC10LvQtdGA0LTRltKjINGC0YvQvdGL0YEg0LDQu9GD0YvQvdC00LAg0LXRgNC10YHQtdC60YLQtdGA0LPQtSDSm9Cw0YDQsNKT0LDQvdC00LAg0LHRltGA0L3QtdGI0LUg0LDQvdCw0YLQvtC80LjRjyDRhNC40LfQuNC+0LvQvtCz0LjRj9C70YvSmyDQtdGA0LXQutGI0LXQu9GW0LrRgtC10YDRliDQsdCw0YAg0LzRi9GB0LDQu9GLINC10qMg0LbQuNGWINC10YHRgtGW0LvQtdGC0ZbQvSDRgtGL0L3Ri9GBINGC0q/RgNGWINGA0LXRgtGW0L3QtNC1INC/0YPRjdCw0YDQu9C00Ysg0YLRi9C90YvRgdGC0Ysg0LDQudGC0YHQsNKbINCx0L7Qu9Cw0LTRiyDQvtC7INCx0ZbQt9C00LUg0LHQsNC70LDQvdGL0qMg0LbQuNC1INC205nQvdC1INGC0LXRgNC10qMg0YLRi9C90YvRgSDQsNC70LDRgtGL0L0g0YLSr9GA0ZYg0LHQvtC70YvQvyDRgtCw0LHRi9C70LDQtNGLINC+0Lsg0LXRiNKb0LDQvdC00LDQuSDQv9Cw0YLQsNC70L7Qs9C40Y8g0LHQvtC70YvQvyDRgtCw0LHRi9C70LzQsNC50LTRiy48YnIgLz4NCtCQ0Lsg0LHQtdGC0LrQtdC5INGC0YvQvdGL0YEg0LDQu9GD0pPQsCDQutC10LvQtdGC0ZbQvSDQsdC+0LvRgdCw0psg0Y/Sk9C90Lgg0LHQsNC70LDQu9Cw0YDQtNCwINGC0YvQvdGL0YEg0LDQu9GDINC20q/QudC10YHRliDTmdC70ZYg0YLQvtC70YvSk9GL0LzQtdC9INKb0LDQu9GL0L/RgtCw0YHQv9Cw0pPQsNC90LTRi9Kb0YLQsNC9ICAg0LHQtdGC0LrQtdC5INGC0YvQvdGL0YEg0LDQu9GD0LTRiyDQvdC10LzQtdGB0LUg0LzSr9C70LTQtSDRgtGL0L3Ri9GBINCw0LvQvNCw0YPQtNGLINCx0LDQudKb0LDQudC80YvQtyDQvtC7INC90LXQs9GW0LfRltC90LXQvSDSm9Cw0LvRi9C/0YLRiyDRhNC40LfQuNC+0LvQvtCz0LjRj9C70YvSmyDQttCw0pPQtNCw0Lkg0LHQvtC70YvQvyDRgtCw0LHRi9C70LDQtNGLLtCv0pPQvdC4INC905nRgNC10YHRgtC10LvQtdGA0LTQtSDRgtGL0L3Ri9GBINCw0LvRgyDQttC+0LvQtNCw0YDRiyDRgtCw0YAg0YHQvtC90YvQvNC10L0g0pvQsNGC0LDRgCDQvNKv0YjQtdC70LXRgNGWINC205nQvdC1INC+0LvQsNGA0LTRi9KjINCx0rHQu9GI0YvSm9C10YLRgtC10YDRliDRgdC+0L3Ri9C80LXQvSDSm9C+0YHQsCDQtNC40LDRhNGA0LDQs9C80LAg05nQu9GWINGC0L7Qu9GL0pPRi9C80LXQvSDQttC10YLRltC70LzQtdCz0LXQvdC00ZbQutGC0LXQvSDQvdOZ0YDQtdGB0YLQtSAg0LHQtdGC0LrQtdC5INGC0YvQvdGL0YEg0LDQu9Cw0LTRiyAg0LbTmdC90LUg0YLRi9C90YvRgSDQsNC70YMg0LbQuNGW0LvRltCz0ZbQvdC1INGB0YPRgNCw0L3Ri9GBINCw0YDRgtCw0LTRiyDQvtGB0Ysg0YTQsNC60YLQvtGA0LvQsNGA0LTRi9KjINOZ0YHQtdGA0ZbQvdC10L0g0LHRltC30LTQtSDQv9GD0Y3RgNCw0LvQtNGLINGC0YvQvdGL0YEg0LTQsNC80LjQtNGLINGP0pPQvdC4INC20L7Sk9Cw0YDQtNCwINCw0LnRgtGL0LvSk9Cw0L0g0YTQsNC60YLQvtGA0LvQsNGA0pPQsCDQsdCw0LnQu9Cw0L3Ri9GB0YLRiyDQsdCw0LvQsCDRgtC10YDQtdKjINOZ0YDRliDSsdC30LDSmyDRgtGL0L3Ri9GBINCw0LvQsCDQsdCw0YHRgtCw0LnQtNGLLtCW0LDQu9C/0Ysg0LDQudGC0pvQsNC90LTQsCDQsdKx0Lsg0YLRi9C90YvRgSDQsNC70YMg0YLSr9GA0LvQtdGA0ZYg0L7RgdGLINC/0YPQtdGA0LDQu9C00Ysg0YLRi9C90YvRgSDQsNC70YPSk9CwINOZ0LrQtdC70LXQtNGWINC205nQvdC1INC+0Lsg0L3TmdGA0LXRgdGC0LXQu9C10YDQs9C1INKb0LDQu9GL0L/RgtGLINC/0YDQvtGG0LXRgdGBINCx0L7Qu9GL0L8g0YLQsNCx0YvQu9Cw0LTRiyA8YnIgLz4NCtCh0L7QvdGL0LzQtdC9INKb0LDRgtCw0YAg0LDQudGC0LAg0LrQtdGC0LXRgtGW0L0g0LbQsNKT0LTQsNC5INC10LPQtdGAINCx0LDQu9Cw0LTQsCDRgtGL0L3Ri9GBINCw0LvRgyDQttC+0LvQtNCw0YDRi9C90LTQsCDQv9Cw0YLQsNC70L7Qs9C40Y/Qu9Cw0YAg0LHQvtC70YHQsCAg0Y/Sk9C90Lgg0YDQtdC90LjRgizQv9C70LXQstGA0LjRgizQv9C90LXQstC80L7QvdC40Y8s0LDRgdGC0LzQsCDQsdC+0LvQsNGC0YvQvSDQsdC+0LvRgdCw0LTQsCDQsdC10YLQutC10Lkg0YLRi9C90YvRgSDQsNC70YMg0L/QsNC50LTQsCDQsdC+0LvQsNC00Yss0YHQvtC90YvQvNC10L0g0pvQsNGC0LDRgCDQttKv0LnQutC1INC20q/QudC10YHRliDQt9Cw0pvRi9C80LTQsNC70pPQsNC9INCx0L7Qu9GB0LAg0LTQsCDQsdC10YLQutC10Lkg0YLRi9C90YvRgSDQsNC70YMg0L/QsNC50LTQsCDQsdC+0LvRg9GLINC80q/QvNC60ZbQvSA8YnIgLz4NCtC60LvQuNC90LjQutCw0LvRi9KbINC606nRgNGW0L3RltGB0YLQtdGA0ZbQvdC1INGI0LDRgNGI0LDSk9GL0YjRgtGL0psg0LzQsNC30LDRgdGL0LfQtNGL0psg0rHQudKb0YvRgdGL0LfQtNGL0psg0LrTqdGA0ZbQvdGW0YEg0LHQtdGA0LXQtNGWLjxiciAvPg0KICAgICAgICAgICAgICAgICAgICAgICAgICAgICAgICAgICAgICA8YnIgLz4NCjIg0KLQsNCx0LjSk9C4INGC0LDQvNCw0pvRgtCw0L3Rg9C00LDSk9GLINGB0LDRgyDQsdCw0LvQsNC70LDRgNC00YvSoyDRltGI0LXQuiDQvNC40LrRgNC+0YTQu9C+0YDQsNGB0Ysg0L3QtdCz0ZbQt9GW0L3QtdC9INCx0ZbRgNGC0LUg0LHRltGA0YLQtSDSm9Cw0LvRi9C/0YLQsNGB0LDQtNGLINGP0pPQvdC4ICDQvtC90YvSoyDSm9Cw0LvRi9C/0YLQsNGB0YPRiyAzINC60LXQt9C10qPQvdC10L0g0YLSsdGA0LDQtNGLIDEg0JDRgdC10L/RgtC40LrQsNC70YvSmyDRhNCw0LfQsC4gMiDQmNC90YTQuNGG0LXRgNC70LXRgyDRhNCw0LfQsNGB0Ysg0L7QuyDQttC10YDQtNC1INC80LjQutGA0L7QsdGC0LDRgCDQutOp0LHQtdC50LUg0LHQsNGB0YLQsNC50LTRiy4gMyDQnNC40LrRgNC+0YTQu9C+0YDQsNC90YvSoyDRgtGA0LDQvdGB0YTQvtGA0LzQsNGG0LjRj9C70LDQvdGDINC60LXQt9C10qPRliDQsdKx0Lsg0LbQtdGA0LTQtSDSm9Cw0LvRi9C/0YLRiyDQvNC40LrRgNC+0YTQu9C+0YDQsCDSm9Cw0LvRi9C/0YLQsNGB0LDQtNGLLjxiciAvPg0KMSDRhNCw0LfQsNC00LAg0L3TmdGA0LXRgdGC0LXQvdGW0qMg0LzQuNC60YDQvtGE0LvQvtGA0LDRgdGLINGC0LDQt9CwINGP0pPQvdC4INC10YjSm9Cw0L3QtNCw0Lkg0LHQsNC60YLQtdGA0LjRjyDQsdC+0LvQvNCw0LnQtNGLLiAyINGE0LDQt9Cw0LTQsCDRltGI0LXQuiDRgtCw0Y/Sm9GI0LDRgdGLINCx0LjRhNGD0LTRi9C8INCz0YDQsNC8INC+0qMg0LHQsNC60YLQtdGA0LjRj9C70LDRgCDQutOp0LHQtdC50LXQtNGWLiAzINGE0LDQt9Cw0LTQsCDQsdCw0LvQsCDQtdC80YjQtdC6INGB0q/RgtGW0LzQtdC9INKb0L7RgNC10LrRgtC10L3Rg9C00LUg0LHQuNGE0YPQtNCw0LHQsNC60YLQtdGA0LjRj9C70LDRgCDQutOp0LHQtdC50LUg0LHQsNGB0YLQsNC50LTRiyDQttOZ0L3QtSDQvtC70LDRgCDQsdCw0YHSm9CwINCx0LDQutGC0LXRgNC40Y/Qu9Cw0YDQtNGLINGA0LXRgtGC0LXQvyDQvtGC0YvRgNGDINKv0YjRltC9INKb0LDQttC10YIg0LHQvtC70YvQvyDRgtCw0LHRi9C70LDQtNGLLNCQ0Lsg0YLQsNCx0LjSk9C4INC20L7Qu9C80LXQvSDQtdC80LXRgSDSm9C+0YDQtdC60YLQtdC90LPQtdC90LTQtdGA0LTQtSDRltGI0LXQuiDRgtCw0Y/Sm9GI0LDRgdGLINC80LjQutGA0L7RhNC70L7RgNCw0L3Ri9KjIDY1INC/0LDQudGL0LfRi9C9INKb0rHRgNCw0LnQtNGLINC205nQvdC1INC+0Lsg0LHQsNC70LDQu9Cw0YAg0LjQvdGE0LXQutGG0LjRj9C70LDRgNKT0LAg0LHQtdC50ZbQvCDQutC10LvQtdC00ZYuPGJyIC8+DQrQmtC10LnRltC9INCx0LDQu9CwINOp0YHQtSDQutC10LvQtSDRgtCw0LzQsNKb0YLRiyDSm9C+0YDRi9GC0YMg0q/RiNGW0L0g0LHQsNC70LAgINCw0pPQt9Cw0YHRi9C90LTQsNKT0Ysg0YTQtdGA0LzQtdC90YLRgtC10YAg0L3QtdCz0ZbQt9Cz0ZYg0YDQvtC70Ywg0LDRgtKb0LDRgNCw0LTRiyAx0JDQvNC40LvQsNC30LAg0YHRltC70LXQutC10Lkg0YTQtdGA0LzQtdC90YLRliDQsdCw0LvQsCDQsNGD0LfRi9C90LAg0YLSr9GB0LrQtdC9INGC0LDQvNCw0pvRgtGLINC10YDRltGC0YPQs9C1INC606nQvNC10LrRgtC10YHQtdC00ZYgMiDTmNGA0ZYg0pvQsNGA0LDQuSDQvtC7INCw0YHSm9Cw0LfQsNC9INGW0YjQtdC6INC20L7Qu9C00LDRgNGL0L3QsCDRgtKv0YHQtdC00ZYg0L7QuyDQttC10YDQtNGWINCw0YHSm9Cw0LfQsNC90L3Ri9C9INC+0LfRltC90ZbSoyDSm9GL0YjSm9GL0LvQtNGL0psg0L7RgNGC0LDRgdGLINC205nQvdC1INC00LUg0rHQudKb0Ysg0LHQtdC30ZbQvdC10L0g0LHTqdC70ZbQvdC10YLRltC9INGE0LXRgNC80LXQvdGC0YLQtdGAINGP0pPQvdC4INC+0LvQsNGAINC/0LXQv9GB0LjQvSDRgtGA0LXQv9GB0LjQvSDRhdC10LzQvtGC0YDQtdC/0YHQuNC9INCw0YLRgtGLINGE0LXRgNC80LXQvdGC0YLQtdGAINCx06nQu9GW0L3QtdC00ZYu0J7Qu9Cw0YAg0LDRgdKb0LDQt9Cw0L0g0ZbRiNC10Log0LbQvtC70YvQvdCwINGC0q/RgdC60LXQvSDRgtCw0LzQsNKb0YLRiyDRi9C00YvRgNCw0YLRgyDQttOZ0L3QtSDSm9C+0YDRi9GC0YMg0q/RiNGW0L0g0pvQsNC20LXRgi4g0JXRgdC60LXRgNC1INC60LXRgtC10YLRltC9INC20LDSk9C00LDQuSDQtdC80ZbQt9GD0LvRiyDQsdCw0LvQsNC70LDRgNC00YsgINCw0L3QsCDRgdKv0YLRltC9INC60L7QsNCz0YPQu9GP0YbQuNGP0LvQsNGDINKv0YjRltC9INCx06nQu9GW0L3QtdGC0ZbQvSDRhNC10YDQvNC10L3RgtGC0LXRgCDQsdC+0LvQsNC00Ysg0LbTmdC90LUg0L7Qu9Cw0YAg0YHQvtC7INC70LDQutGC0L7Qt9Cw0L3RiyDQuNCz0LXRgNGD0LPQtSDQutOp0LzQtdC60YLQtdGB0LXQtNGWINC205nQvdC1INCx0q/QuyDRg9Cw0pvRi9GC0YLQsCDQsdCw0LvQsNC70LDRgNC00YvSoyDQsNGB0pvQsNC30LDQvSDRltGI0LXQuiDQttC+0LvRi9C90LTQsNKT0Ysg0pvRi9GI0pvRi9C70LTRi9KbINC+0YDRgtCwINGC06nQvNC10L0g0LHQvtC70LDQtNGLINOp0LnRgtC60LXQvdGLINGB06nQuyDQsdOp0LvQtdGC0ZbQvSDRjdC90LTQvtC60YDQuNC90LTRltC6INCx0LXQt9C00LXRgCDRgtC+0LvRi9KbINKb0LDQu9GL0L/RgtCw0YHQsCDSm9C+0LnQvNCw0pPQsNC9IC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25" table:style-name="ce1">
            <text:p>1066925</text:p>
          </table:table-cell>
          <table:table-cell office:value-type="string" table:style-name="ce1">
            <text:p>kazakh</text:p>
          </table:table-cell>
          <table:table-cell office:value-type="string" table:style-name="ce1">
            <text:p>Билет 28.&amp;lt;br /&amp;gt; 1.Нәрестенің беткей тыныс алуы немен байланысты?&amp;lt;br /&amp;gt; 2. Табиғи тамақтанудағы сау балалардың ішектің микрофлорасының қалыптасуы немен байланысты? &amp;lt;br /&amp;gt;</text:p>
          </table:table-cell>
          <table:table-cell office:value-type="string" table:style-name="ce1">
            <text:p>0JXSoyDQsNC70LTRi9C80LXQvSDQtdC60ZbQvdGI0ZYg0YHSsdGA0LDSm9Kb0LAg0LbQsNGD0LDQvyDQsdC10YDQtSDQutC10YLRgdC10Lwg0YLQsNCx0LjSk9C4INGC0LDQvNCw0pvRgtCw0L3Rg9C00LDSk9GLINGB0LDRgyDQsdCw0LvQsNC70LDRgNC00YvSoyDRltGI0LXQutGC0ZbSoyDQvNC40LrRgNC+0YTQu9C+0YDQsNGB0YvQvdGL0qMg0pvQsNC70YvQv9GC0LDRgdGD0Ysg0L3QtdC80LXQvSDQsdCw0LnQu9Cw0L3Ri9GB0YLRiz8g0JbQsNC70L/RiyDQttCw0qPQsCDRgtGD0pPQsNC9INC905nRgNC10YHRgtC10LTQtSDRgtGD0YvQu9KT0LDQvdC90LDQvSDQutC10LnRltC9INGW0YjQtdC6INC80LjQutGA0L7RhNC70L7RgNCw0YHRi9C90YvSoyDSm9Cw0LvRi9C/0YLQsNGB0YPRiyDQvdC10LPRltC30ZbQvdC10L0g0LHQvtGB0LDQvdGDINC205nQvdC1INC10LzRiNC10Log0YHSr9GC0ZbQvSDSm9Cw0LHRi9C70LTQsNGDINC60LXQt9GW0L3QtNC1INCw0L3QsNC90YvSoyDQstCw0LPQuNC90LDQu9GM0LTRliDQttOZ0L3QtSDRhNC10LrQsNC70YzQtNGLINGE0LvQvtGA0LDRgdGL0L3Ri9KjINOZ0YHQtdGA0ZbQvdC10L0g0LHQvtC70LDQtNGLLtCV0LzRiNC10Log0YHSr9GC0ZbQvdC00LUg0LHQuNGE0LjQtNC+0LHQsNC60YLQtdGA0LjRj9C70LDRgCDQvNC10L0g0LvQsNC60YLQvtCx0LDQutGC0LXRgNC40Y/Qu9Cw0YAg0YHQuNGP0pvRgtGLINC/0LDQudC00LDQu9GLINCx0LDQutGC0LXRgNC40Y/Qu9Cw0YDQtNGL0qMg0LrTqdCx0LXRjtGW0L3QtSDRi9Kb0L/QsNC7INC10YLQtdGC0ZbQvSDQvtC70LjQs9C+0YHQsNGF0LDRgNC40LTRgtC10YAg0LHQsNGALtCR0rHQuyDQsdCw0LrRgtC10YDQuNGP0LvQsNGAINC40LzQvNGD0L3QtNGL0psg0LbSr9C50LXQvdGW0qMg0LTQsNC80YPRiyDQvNC10L0g0LbQsNC70L/RiyDQtNC10L3RgdCw0YPQu9GL0psg0q/RiNGW0L0g0LzQsNKj0YvQt9C00Ysg0YHQsNGDINGW0YjQtdC6INC80LjQutGA0L7QsdC40L7QvNCw0YHRi9C9INC20LDRgdCw0YPSk9CwINC606nQvNC10LrRgtC10YHQtdC00ZYuINCW0LDQu9C/0Ysg0LHSsdC7INC60LXQt9C00LUg0LDQvdCwINGB0q/RgtGWINCx0LDQu9Cw0LvQsNGA0LTRi9KjINGW0YjQtdC6INC80LjQutGA0L7RhNC70L7RgNCw0YHRi9C90YvSoyDSm9Cw0LvRi9GB0YLQsNGB0YPRi9C90LAg0LrTqdC/INOZ0YHQtdGAINC10YLQtdC00ZYs0Y/Sk9C90Lgg0LbQvtKT0LDRgNGL0LTQsCDQsNC50YLQsCDQutC10YLQutC10L3RltC80LTQtdC5INCw0L3QsCDRgdKv0YLRltC90ZbSoyDSm9Kx0YDQsNC80YvQvdC00LDQuNC80LzRg9C90LTRi9KbINC60L7QvNC/0L7QvdC10L3RgtGC0LXRgCDQvNC10L0g0L/QsNC50LTQsNC70Ysg0LHQsNC60YLQtdGA0LjRj9C70LDRgCDQsdCw0YAs0L7Qu9Cw0YAg0LHQsNC70LAg0LDSk9C30LDRgdGL0L3Ri9KjINC00rHRgNGL0YEg0LzQuNC60YDQvtGE0LvQvtGA0LDRgdGL0L0g0pvQsNC70YvRgdGC0LDRgdGC0YvRgNGD0pPQsCDQutOp0LzQtdC60YLQtdGB0LXQtNGWLiDQodC+0L3Ri9C80LXQvSDSm9Cw0YLQsNGAINCw0L3QsCDRgdKv0YLRltC90LTQtdCz0ZYg0L/RgNC+0LHQuNC+0YLQuNC60YLQtdGAINC80LXQvSDQv9GA0LXQsdC40L7RgtC40LrRgtC10YAg0LDRgtCw0L8g0LDQudGC0pvQsNC90LTQsCDQvtC70LjQs9C+0YHQsNGF0LDRgNC40LTRgtC10YAg0L7Qu9Cw0YAg0ZbRiNC10LrRgtC10LPRliDQv9Cw0LnQtNCw0LvRiyDQsdCw0LrRgtC10YDQuNGP0LvQsNGA0LTRiyDSm9C+0LvQtNCw0LnRgtGL0L0g0LHQvtC70YvQvyDRgtCw0LHRi9C70LDQtNGLLjxiciAvPg0KPGJyIC8+DQrQltCw0qPQsCDRgtGD0pPQsNC9INC905nRgNC10YHRgtC10LTQtdCz0ZYg0YLQsNGP0Lcg0L3QtdC80LXRgdC1INCx0LXRgtC60LXQuSDRgtGL0L3Ri9GBINCw0LvRgyDTmdGA0YLSr9GA0LvRliDRhNCw0LrRgtC+0YDQu9Cw0YDSk9CwINCx0LDQudC70LDQvdGL0YHRgtGLINCx0L7Qu9GD0Ysg0LzSr9C80LrRltC9LiDQkdKx0Lsg0YLRi9C90YvRgSDQsNC70YMg0LHSsdC70YjRi9Kb0LXRgtGC0LXRgNGW0L3RltKjINC20LXRgtGW0LvQvNC10LPQtdC90LTRltCz0ZbQvdC1LNGA0LXRgdC/0LjRgNCw0YLQvtGA0LvRi9KbINC00LjRgdGC0YDQtdGB0YEg0YHQuNC90LTRgNC+0LzRi9C90LAs0LjQvdGE0LXQutGG0LjRj9KT0LAs0YLRg9CwINCx0ZbRgtC60LXQvSDQttKv0YDQtdC6INCw0pvQsNGD0YvQvdCwINC90LXQvNC10YHQtSDQsdCw0YHSm9CwINC20LDSk9C00LDQudC70LDRgNKT0LAg0LHQsNC50LvQsNC90YvRgdGC0Ysg0LHQvtC70YPRiyDQvNKv0LzQutGW0L0u0JbQsNC70L/RiyDQvdC10LPRltC30LPRliDRgdC10LHQtdC/0YLQtdGA0ZbQvSDQsNC90YvSm9GC0LDRgyDSr9GI0ZbQvSDQv9C10LTQuNCw0YLQvtGA0LTQsCDQsdC+0LvRgyDTqdGC0LUg0LzQsNKj0YvQt9C00Ysu0prQsNCx0YvRgNKT0LDQu9Cw0YDQtNGL0qMg0LrQtdGD0LTQtSDSm9GD0YvRgdGL0L3QtNCwINC+0YDQvdCw0LvQsNGB0YPRiyzQutOp0LrQtdGC0YLRltKjINC20L7Sk9Cw0YDRiyDRgtKx0YDRg9GLLNCw0LvRjNCy0LXQvtC70LDQu9Cw0YDQtNGL0qMg0LHQsNGA0LvRi9KT0YvQvdGL0qMg0LHRltGA0LTQtdC5INKb0YvQt9C80LXRgiDQsNGC0pvQsNGA0LAg0LDQu9C80LDRg9GLLNC80LXQvNCx0YDQsNC90LDQvdGL0qMg0pvQsNC70YvSo9C00LDRg9GLLNCx0LDQu9CwINC+0YDQs9Cw0L3QuNC30LzRltC90ZbSoyDQvtGC0YLQtdCz0ZbQvdGWINC606nQvyDSm9Cw0LbQtdGCINC10YLRg9GWINGB0LDQu9C00LDRgNGL0L3QsNC9INGC0YvQvdGL0YEg0LDQu9GDINC20LjRltC70ZbQs9GWINC/0LDQudC00LAg0LHQvtC70LDQtNGLLtCR0rHQuyDSm9Kx0LHRi9C70YvRgSDRhNC40LfQuNC+0LvQvtCz0LjRj9C70YvSmyDQtdC90YLRltCz0YMg0LTQtdC/INC90LXQvNC10YHQtSDQsdC10YLQutC10Lkg0YLRi9C90YEg0LDQu9GDINC00LXQvyDQsNGC0LDQu9GL0L8g0LbQsNGC0LDQtNGLLtCR0LXRgtC60LXQuSDRgtGL0L3Ri9GBINCw0LvRgyDRhNC40LfQuNC+0LvQvtCz0LjRj9C70YvSmyDQtdGA0LXQutGI0LXQu9GW0LPRliDSm9Cw0L3QtNCw0pPRiyDQutOp0LzRltGAINKb0YvRiNKb0YvQuyDQs9Cw0LfRi9C90YvSoyDQutOp0LvQtdC80ZbQvSDQutC+0LzQv9C10L3RgdCw0YLQvtGA0LvRiyDSsdC70pPQsNC50YLRi9C/INC20ZbQsdC10YDQtdC00ZYs0LDQuyDQsdC40LrQsNGA0LHQvtC90LDRgiDQv9C10L0g0LHRg9GE0LXRgNC70ZYg0L3QtdCz0ZbQt9C00LXRgCDQutKv0YDRgiDQsNC30LDRj9C00Ysu0J3QsNKb0YLRi9GA0LDSmyDQsNC50YLRgdCw0Lwg0LHSsdC7INC60L7QvNC/0LXQvdGB0LDRgtC+0YDQu9GLINCz0LjQv9C10YDQstC10L3RgtC40LvRj9GG0LjRj9C70YvSmyDRhNC40LfQuNC+0LvQvtCz0LjRj9C70YvSmyDQsNC70pPQsNGI0pvRiyDQvNC10YLQsNCx0L7Qu9GC0YLRliDQsNGG0LjQtNC+0LfQsdC10L0g0LHQsNC50LvQsNC90YvRgdGC0Ysg0LHQvtC70YvQvyDQtdGB0LXQv9GC0LXQu9GW0L3QtdC00ZYuIA==</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1-ші сұрақтың жауабы толық жазылмаған. 2-ші сұрақтың жауабы академическая политикаға сүйене отырып плагиат деңгейің ескергенде жауабыңызда интернет ресурстарың қолданғаны, яғни өз бетіңізбен орындалмағаны байқалады.</text:p>
          </table:table-cell>
          <table:table-cell office:value-type="float" office:value="0" table:style-name="ce1">
            <text:p>0</text:p>
          </table:table-cell>
          <table:table-cell table:number-columns-repeated="16376"/>
        </table:table-row>
        <table:table-row table:style-name="ro1">
          <table:table-cell office:value-type="float" office:value="915318" table:style-name="ce1">
            <text:p>915318</text:p>
          </table:table-cell>
          <table:table-cell office:value-type="string" table:style-name="ce1">
            <text:p>russian</text:p>
          </table:table-cell>
          <table:table-cell office:value-type="string" table:style-name="ce1">
            <text:p>Билет 28.&amp;lt;br /&amp;gt; 1.Чем обусловлено поверхностное дыхание у новорожденного?&amp;lt;br /&amp;gt; 2.С чем связано становление микрофлоры кишечника после рождения ребенка при грудном вскармливании?&amp;lt;br /&amp;gt;</text:p>
          </table:table-cell>
          <table:table-cell office:value-type="string" table:style-name="ce1">
            <text:p>MS4g0JIg0L3QvtGA0LzQtSDRgyDQvdC+0LLQvtGA0L7QttC00LXQvdC90YvRhSDQv9C+0LLQtdGA0YXQvdC+0YHRgtC90L7QtSDQtNGL0YXQsNC90LjQtSwg0Y3RgtC+INC+0LHRg9GB0LvQsNCy0LvQuNCy0LDQtdGCINGB0LvQtdC00YPRjtGJ0LXQtSDRh9GC0L4g0YMg0YDQtdCx0LXQvdC60LAg0LXRidC1INC90LUg0YDQsNC30LLQuNGC0LAgINGG0LXQvdGC0YDQsNC70YzQvdCw0Y8g0YDQtdCz0YPQu9GP0YbQuNGPINC00YvRhdCw0L3QuNGPLNGC0L4g0LXRgdGC0Ywg0JTQpiAo0JTQq9Cl0JDQotCV0JvQrNCd0KvQmSDQptCV0J3QotCgKSAg0LrQvtGC0L7RgNGL0Lkg0LvQvtC60LDQu9C40LfQvtCy0LDQvSDQsiDQv9GA0L7QtNC+0LvQs9C+0LLQsNGC0L7QvCDQvNC+0LfQs9C1LiDQntGC0LTQtdC70Ysg0JPQnCAo0JPQntCb0J7QktCd0J7Qk9CeINCc0J7Ql9CT0JAwICkgINC10YnQtSDQvdC1INGA0LDQt9Cy0LjRgtGLINCy0YHQu9C10LTRgdGC0LLQuNC1INGH0LXQs9C+INC90LDRgNGD0YjQsNC10YLRgdGPINC/0LXRgNC10LTQsNGH0LAg0LjQvNGD0L/Rg9C70YzRgdC+0LIu0JrQvtC80L/QtdC90YHQsNGC0L7RgNC90L4g0LHRg9C00LXRgiDQstC+0LfQvdC40LrQsNGC0Ywg0YLQsNGF0LjQv9C90L7RjSwg0YLQviDQtdGB0YLRjCDRg9GH0LDRidC10L3QuNC1INGH0LDRgdGC0L7RgtGLINC00YvRhdCw0YLQtdC70YzQvdGL0YUg0LTQstC40LbQtdC90LjQuSwg0YfQtdC8INC80LvQsNC00YjQtSDRgNC10LHQtdC90L7QuiDRgtC10Lwg0LLRi9GI0LUg0KfQlNCULiDQodGC0L7QuNGCINC+0YLQvNC10YLQuNGC0Ywg0YfRgtC+INGDINC90L7QstC+0YDQvtC20LTQtdC90L3Ri9GFINC00YvRhdCw0YLQtdC70YzQvdCw0Y8g0LzRg9GB0LrRg9C70LDRgtGD0YDQsCDRgNCw0LfQstC40YLQsCDQvtGH0LXQvdGMINGB0LvQsNCx0L4g0YLQsNC60LjQtSDQutCw0Log0LTQuNCw0YTRgNCw0LPQvNCwINC4INC80LXQttGA0LXQsdC10YDQvdGL0LUg0LzRi9GI0YbRiyDQvtGB0L3QvtCy0L3Ri9C1INC00YvRhdCw0YLQtdC70YzQvdGL0LUg0LzRi9GI0YbRiy4g0KLQsNC60LbQtSDQuNC80LXRjtGC0YHRjyDQtNC+0L/QvtC70L3QuNGC0LXQu9GM0L3Ri9C1INC00YvRhdCw0YLQtdC70YzQvdGL0LUg0LzRi9GI0YbRiywg0L3QsNC/0YDQuNC80LXRgCDQsdC+0LvRjNGI0LDRjyDQuCDQvNCw0LvQsNGPINCz0YDRg9C00L3QsNGPINC80YvRiNGG0YssINC+0L3QuCDRgtCw0LrQttC1INGA0LDQt9Cy0LjRgtGLINGB0LvQsNCx0L4uINCi0LDQutC20LUg0YMg0L3QvtCy0L7RgNC+0LbQtNC10L3QvdGL0YUg0YTQvtGA0LzQsCDQs9GA0YPQtNC90L7QuSDQutC70LXRgtC60Lgg0L7RgtC70LjRh9Cw0LXRgtGB0Y8g0L7RgiDQstC30YDQvtGB0LvRi9GFINC40LzQtdC10YIg0YTQvtGA0LzRgyDQsdC+0YfQutC4LNGB0L7QvtGC0LLQtdGC0YHQstC10L3QvdC+ICDQvdCw0LfRi9Cy0LDRjtGCICAgItCx0L7Rh9C60L7QvtCx0YDQsNC30L3QsNGPIiDRhNC+0YDQvNCwINCz0YDRg9C00L3QvtC5INC60LvQtdGC0LrQuCAs0Y3RgtC+INGB0LLRj9C30LDQvdC+INGBINGC0LXQvCDRh9GC0L4g0YHQsNCz0LjRgtGC0LDQu9GM0L3Ri9C5INGA0LDQt9C80LXRgCAo0L/QtdGA0LXQtNC90LXQt9Cw0LTQvdC40LkpINGA0LDQstC10L0g0L/QvtC/0LXRgNC10YfQvdC+0LzRgy4g0KMg0L3QvtCy0L7RgNC+0LbQtNC10L3QvdGL0YUg0L/RgNC4INCy0L3Rg9GC0YDQuNGD0YLRgNC+0LHQvdC+0Lwg0L/QtdGA0LjQvtC00LUg0L3QtSDRhNGD0L3QutGG0LjQvtC90LjRgNGD0Y7RgiDQu9C10LPQutC40LUsINC60LDQuiDRgtC+0LvRjNC60L4g0L7QvdC4INGA0L7QttC00LDRjtGC0YHRjyDQtNC10LvQsNGO0YIg0L/QtdGA0LLRi9C5INCy0LTQvtGFLNC/0YDQvtC40YHRhdC+0LTQuNGCINGE0YPQvdC60YbQuNC+0L3QuNGA0L7QstCw0L3QuNC1INC70LXQs9C60L7Qs9C+ICwg0Y3RgtC+INCy0LvQuNGP0LXRgiDQvdCwINGC0L4g0YfRgtC+INGDINC90L7QstC+0YDQvtC20LTQtdC90L3Ri9GFINC80LXQvdGM0YjQtSDQsNC70YzQstC10L7QuyzRh9C10Lwg0YMg0LLQt9GA0L7RgdC70YvRhSwg0L/QviDQvNC10YDQtSDQstC30YDQvtGB0LvQtdC90LjRjyDRgdC40L3RgtC10LfQuNGA0YPRjtGC0YHRjyDQvdC+0LLRi9C1INCw0LvRjNCy0LXQvtC70Yss0YPQstC10LvQuNGH0LjQstCw0LXRgtGB0Y8g0LTRi9GF0LDRgtCw0YLQtdC70YzQvdCw0Y8g0L/QvtCy0LXRgNGF0L3QvtGB0YLRjC4g0J3QtdGB0L7QvtGC0LLQtdGB0YLQstC40LUg0YDQsNC30LLQuNGC0LjRjyDQv9C10YDQuNGE0LXRgNC40YfQtdGB0LrQuNGFINGA0LXRhtC10L/RgtC+0YDQvtCyINC60L7RgtC+0YDRi9C1INC70L7QutCw0LvQuNC30L7QstCw0L3RiyDQsiDQu9C10LPQutC40YUuINCjICDQvdC+0LLQvtGA0L7QttC00LXQvdC90YvRhSDQv9C+INGB0YDQsNCy0L3QtdC90LjRjiDRgSDQstC90YPRgtGA0LjRg9GC0YDQvtCx0L3Ri9C8INC/0LXRgNC40L7QtNC+0Lwg0LLQvtC30YDQsNGB0YLQsNC10YIg0L/QvtGC0YDQtdCx0L3QvtGB0YLRjCDQsiDQutC40YHQu9C+0YDQvtC00LUsINGH0YLQviDRgtCw0LrQttC1INGB0L/QvtGB0L7QsdGB0YLQstGD0LXRgiDQv9C+0Y/QstC70LXQvdC40Y4g0L/QvtCy0LXRgNGF0L3QvtGB0YLQvdC+0LPQviDQtNGL0YXQsNC90LjRjy4gINCS0YHQtSDQstGL0YjQtdC/0LXRgNC10YfQuNGB0LvQtdC90L3Ri9C1INGE0LDQutGC0L7RgNGLINC/0YDQuNCy0L7QtNGP0YIg0Log0YLQvtC80YMg0YfRgtC+INGDINC90L7QstC+0YDQvtC20LTQtdC90L3QvtCz0L4g0L/QvtCy0LXRgNGF0L3QvtGB0YLQvdC+0LUg0LTRi9GF0LDQvdC40LUuICAgMi4g0JIg0YHQstC+0Y4g0L7Rh9C10YDQtdC00Ywg0LzQuNC60YDQvtGE0LvQvtGA0LAg0LrQuNGI0LXRh9C90LjQutCwINGDINGA0LXQsdC10L3QutCwINCy0YvQv9C+0LvQvdGP0LXRgiDQstCw0LbQvdGL0LUg0YTRg9C90LrRhtC40LgsINC10YHQu9C4INC/0LXRgNC10YfQuNGB0LvRj9GC0Ywg0YLQviDRgdC/0L7RgdC+0LHRgdGC0LLRg9C10YIg0YDQsNGB0YnQtdC/0LvQtdC90LjRjiDQv9C40YnQuCwg0LrQvtGC0L7RgNGL0LUg0L3QtdC60L7RgtC+0YDRi9C1INGE0LXRgNC80LXQvdGC0Ysg0L7RgNCz0LDQvdC40LfQvNCwINC90LUg0LzQvtCz0YPRgiDRgNCw0YHRidC10L/Qu9GP0YLRjCDQuCDQstGB0LvQtdC00YHRgtCy0LjQtSDRh9C10LPQviDQvtC90Lgg0LHRi9GB0YLRgNC+INGD0YHQstCw0LjQstCw0Y7RgtGB0Y8sINGD0YfQsNGB0YLQstGD0LXRgiDQsiDRgdC40L3RgtC10LfQtSDQttC40YDQvtGA0LDRgdGC0LLQvtGA0LjQvNGL0YUg0LLQuNGC0LDQvNC40L3QvtCyICgg0Jos0JUs0JQs0JApLCDRgtCw0LrQttC1INC+0LrQsNC30YvQstCw0LXRgiDQt9Cw0YnQuNGC0L3Rg9GOINGE0YPQvdC60YbQuNGOINGC0L4g0LXRgdGC0Ywg0YHQv9C+0YHQvtCx0YHRgtCy0YPQtdGCINC90LUg0LfQsNGB0LXQu9C10L3QuNGOINC/0LDRgtC+0LPQtdC90L3Ri9GFINC80LjQutGA0L7QvtGA0LPQsNC90LjQt9C80L7QsiDRgtCw0Log0LrQsNC6INC+0L3QuCDQsdGD0LTRg9GCINC60L7QvdC60YPRgNC40YDQvtCy0LDRgtGMINC30LAg0LbQuNC30L3RjCDQsiDQutC40YjQtdGH0L3QuNC60LAgLNCwINGC0LDQutC20LUg0LfQsCDRgNC10YHRg9GA0YHRiy4g0KLQsNC60LbQtSDQvdC+0YDQvNCw0LvRjNC90LDRjyDQvNC40LrRgNC+0YTQu9C+0YDQsCDQutC40YjQtdGH0L3QuNC60LAg0YHQv9C+0YHQvtCx0YHRgtCy0YPQtdGCINC40L3QsNC60YLQuNCy0LDRhtC40Lgg0L3QtdC60L7RgtC+0YDRi9GFINGE0LXRgNC80LXQvdGC0L7Qsi7QodGC0L7QuNGCINC+0YLQvNC10YLQuNGC0Ywg0YDQvtC70Ywg0LrQuNGI0LXRh9C90L7QuSDQvNC40LrRgNC+0YTQu9C+0YDRiyDQsiDRhtC40YDQutGD0LvRj9GG0LjQuCDQutC40YjQtdGH0L3Qvi3Qv9C10YfQtdC90L7Rh9C90YvRhSDQttC10LvRh9C90YvRhSDQutC40YHQu9C+0YIuINCSINGB0LLQvtGOINC+0YfQtdGA0LXQtNGMINC/0YDQuCDRgNC+0LbQtNC10L3QuNC4INGA0LXQsdC10L3QvtC6INGP0LIt0YHRjyDRgdGC0LXRgNC40LvRjNC90YvQvCDQsiDQv9C10YDQstGL0LUgMTYtMjAg0YfQsNGB0L7QsizRh9GC0L4g0Y/QstC70Y/QtdGC0YHRjyDQv9C10YDQstC+0Lkg0YTQsNC30L7QuSAs0YLQsNC60LbQtSDQvdCw0LfRi9Cy0LDRjtGCINCw0YHQtdC/0YLQuNGH0LXRgdC60L7QuSDRhNCw0LfQvtC5LiDQkiDQtNCw0LvRjNC90LXQudGI0LXQvCDQv9GA0L7QuNGB0YXQvtC00LjRgiDQt9Cw0YHQtdC70LXQvdC40LUg0LzQuNC60YDQvtC+0YDQs9Cw0L3QuNC30LzQvtCyINCyINC60LjRiNC10YfQvdC40LogINC/0LXRgNCy0YvQtSAyLTQg0LTQvdGPINGH0YLQviDRj9CyLdGB0Y8g0LLRgtC+0YDQvtC5INGE0LDQt9C+0Lku0Jgg0YHQsNC80LDRjyDQv9C+0YHQu9C10LTQvdGP0Y8g0Y3RgtC+INGC0YDQtdGC0YzRjyDRhNCw0LfQsCAs0LPQtNC1INC80LjQutGA0L7QvtGA0LPQsNC90LjQt9C80Ysg0YPRgdCy0LDQuNCy0LDRjtGC0YHRjywg0L/QviDQstGA0LXQvNC10L3QuCDQt9Cw0L3QuNC80LDQtdGCIDItNCDQvdC10LTQtdC70LggLtCSINC90L7RgNC80LUg0YMg0L3QvtCy0L7RgNC+0LbQtNC10L3QvdC+0LPQviDQutC40YjQtdGH0L3QsNGPINC80LjQutGA0L7RhNC70L7RgNCwINC/0YDQtdC00YHRgtCw0LLQu9C10L3QsCDQm9Cw0LrRgtC+0LHQsNGG0LjQu9Cw0LzQuCDQuCDQkdC40YTQuNC00L7QsdCw0LrRgtC10YDQuNGP0LzQuC7QkiDRgdCy0L7RjiDQvtGH0LXRgNC10LTRjCDQv9GA0Lgg0LPRgNGD0LTQvdC+0Lwg0LLRgdC60LDRgNC80LvQuNCy0LDQvdC40LggPGJyIC8+DQog0YDQtdCx0LXQvdC60YMg0L/QtdGA0LXQtNCw0Y7RgtGB0Y8g0LHQuNGE0LjQtNC+0LHQsNC60YLQtdGA0LjQuCDRh9C10YDQtdC3INCz0YDRg9C00L3QvtC1INC80L7Qu9C+0LrQvi4g0KLQsNC60LbQtSDRgdGC0LDQvdC+0LLQu9C10L3QuNC4INC80LjQutGA0L7RhNC70L7RgNGLINGB0L/QvtGB0L7QsdGB0YLQstGD0LXRgiDQv9GA0LXQsdC40L7RgtC40LrQuCzQutC+0YLQvtGA0YvQtSDRgdC+0LTQtdGA0LbQsNGC0YHRjyDQsiDQvNC+0LvQvtC60LUuINCt0YLQuCDRhNCw0LrRgtC+0YDRiyDRgdC/0L7RgdC+0LHRgdGC0LLRg9GO0YIg0Y3Rg9Cx0LjQvtC30YMuINCSINC00LDQu9GM0L3QtdC50YjQtdC8INC/0L4g0LzQtdGA0LUg0YDQvtGB0YLQsCDQuCDRgNCw0LfQstC40YLQuNGPINGA0LXQsdC10L3QutCwINC/0YDQvtC40YHRhdC+0LTQuNGCINC30LDRgdC10LvQtdC90LjQtSDQuCDQtNGA0YPQs9C40YUg0LzQuNC60YDQvtC+0YDQs9Cw0L3QuNC30LzQvtCyL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состояние обусловлено горизонтальным положением ребер, небольшой массой легких, недоразвитием эластической ткани. Легкие менее воздушны и более полнокровны.</text:p>
          </table:table-cell>
          <table:table-cell office:value-type="float" office:value="0" table:style-name="ce1">
            <text:p>0</text:p>
          </table:table-cell>
          <table:table-cell table:number-columns-repeated="16376"/>
        </table:table-row>
        <table:table-row table:style-name="ro1">
          <table:table-cell office:value-type="float" office:value="915386" table:style-name="ce1">
            <text:p>915386</text:p>
          </table:table-cell>
          <table:table-cell office:value-type="string" table:style-name="ce1">
            <text:p>russian</text:p>
          </table:table-cell>
          <table:table-cell office:value-type="string" table:style-name="ce1">
            <text:p>Билет 28.&amp;lt;br /&amp;gt; 1.Чем обусловлено поверхностное дыхание у новорожденного?&amp;lt;br /&amp;gt; 2.С чем связано становление микрофлоры кишечника после рождения ребенка при грудном вскармливании?&amp;lt;br /&amp;gt;</text:p>
          </table:table-cell>
          <table:table-cell office:value-type="string" table:style-name="ce1">
            <text:p>MS4g0KMg0L3QvtCy0L7RgNC+0LbQtNC10L3QvdC+0LPQviDQv9C+0LLQtdGA0YXQvdC+0YHRgtC90L7QtSDQtNGL0YXQsNC90LjQtSDQvtCx0YPRgdC70L7QstC70LXQvdC+INCx0L7Rh9C60L7QvtCx0YDQsNC30L3QvtC5INCz0YDRg9C00L3QvtC5INC60LvQtdGC0LrQvtC5LCDQv9C10YDQtNC90LXQt9Cw0LTQvdC40Lkg0YDQsNC30LzQtdGAINCx0L7Qu9GM0YjQtSDRh9C10Lwg0YHQsNCz0LjRgtCw0LvRjNC90YvQuSDRgNCw0LfQvNC10YAuINCj0LPQvtC7INC+0YLRhdC+0LbQtNC10L3QuNGPINGA0LXQsdC10YAg0L7RgiDQv9C+0LfQstC+0L3QvtGH0L3QuNC60LAg0L/QvtC0INC/0YDRj9C80YvQvCDRg9Cz0LvQvtC8LCDRjdC/0LjQs9Cw0YHRgtGA0LDQu9GM0L3Ri9C5INGD0LPQvtC7INGC0YPQv9C+0LksIDkwINCz0YDQsNC00YPRgdC+0LIuINCU0LjQsNGE0YDQsNCz0LzQsCDRgNCw0YHQv9C+0LvQvtC20LTQtdC90LAg0LLRi9GI0LUsINC4INCy0YHQu9C10LTRgdGC0LLQuNC1INGN0YLQvtCz0L4g0YMg0L3QvtCy0L7RgNC+0LbQtNC10L3QvdGL0YUg0L/RgNC10LjQvNGD0YnQtdGB0YLQstC10L3QvdC+INC00LjQsNGE0YDQsNCz0LzQsNC70YzQvdC+0LUsINC/0L7QstC10YDRhdC90L7RgdGC0L3QvtC1INC00YvRhdCw0L3QuNC1LCDRh9Cw0YHRgtC+0LUo0YLQsNGF0LjQv9C90L7RjSkg0LTRi9GF0LDQvdC40LUuINCn0JTQlCA0MCAsINCn0KHQoSAxNDAtMTYwINC60LDQuiDQutC+0LzQv9C10L3RgdCw0YbQuNGPINC4INCw0LTQsNC/0YLQsNGG0LjRjyDQuiDQstC90LXRg9GC0YDQvtCx0L3Ri9C8INGD0YHQu9C+0LLQuNGP0LwuINCjINC90LjRhSDQvdCw0YfQuNC90LDRjtGCINGA0LDRgdC/0YDQsNCy0LvRj9GC0YzRgdGPINC70LXQutCz0LjQtSDQuCDRhNGD0L3QutGG0LjQvtC90LjRgNC+0LLQsNGC0Ywg0LzQsNC70YvQuSDQutGA0YPQsyDQutGA0L7QvtCx0YDQsNGJ0LXQvdC40Y8uINCSINC00LDQu9GM0L3QtdC50YjQtdC8INC+0L0g0L/RgNC40L7QsdGA0LXRgtCw0LXRgiDQs9GA0YPQtNC90L7QuSAg0LvQuNCx0L4g0LHRgNGO0YjQvdC+0Lko0YMg0LzQsNC70YzRh9C40LrQvtCyKSDRhdCw0YDQsNC60YLQtdGAINC00YvRhdCw0L3QuNGPLCDQuNC30LzQtdC90Y/RjtGC0YHRjyDRgNCw0LfQvNC10YDRiyDQs9GA0YPQtNC90L7QuSDQutC70LXRgtC60LgsINCyINC30LDQstC40YHQuNC80L7RgdGC0Lgg0L7RgiDRgtC10LvQvtGB0LvQvtC20LTQtdC90LjRjyDRgNC10LHQtdC90LrQsCjQsNGB0YLQtdC90LjQuiwg0L3QvtGA0LzQvtGB0YLQtdC90LjQuiwg0LPQuNC/0LXRgNGB0YLQtdC90LjQuiksICDRgNC10LHRgNCwINC90LDRh9C40L3QsNGO0YIg0L7RgtGF0L7QtNC40YIg0LIg0LrQvtGB0L7QvCDQvdCw0L/RgNCw0LLQu9C10L3QuNC4LCDRjdC/0LjQs9Cw0YHRgtGA0LDQu9GM0L3Ri9C5INGD0LPQvtC7INC80LXQvdGP0LXRgtGB0Y8g0Lgg0LzQtdC20YDQtdCx0LXRgNC90YvQtSDQv9GA0L7QvNC10LbRg9GC0LrQuCDRgdGC0LDQvdC+0LLRj9GC0YHRjyDRiNC40YDQtS48YnIgLz4NCjIuINCc0LjQutGA0L7RhNC70L7RgNCwINC60LjRiNC10YfQvdC40LrQsCDQstC+INCy0L3Rg9GC0YDQuNGD0YLRgNC+0LHQvdC+0Lwg0L/QtdGA0LjQvtC00LUg0YHRgtC10YDQuNC70YzQvdCwINC4INGE0L7RgNC80LjRgNGD0LXRgtGB0Y8g0LXRidC1INC/0YDQuCDQv9GA0L7RhdC+0LbQtNC10L3QuNC4INGH0LXRgNC10Lcg0YDQvtC00L7QstGL0LUg0L/Rg9GC0Lgg0LzQsNGC0LXRgNC4KCDQvtC90LAg0YPQttC1INGB0YLQsNC90L7QstC40YLRgdGPINC90LUg0YHRgtC10YDQuNC70YzQvdCwKSwg0L/RgNC40L7QsdGA0LXRgtCw0LXRgiDQsdC40YTQuNC00L4sINC70LDQutGC0L7QsdCw0LrRgtC10YDQuNC5LiDQn9GA0Lgg0LPRgNGD0LTQvdC+0Lwg0LLRgdC60LDRgNC80LvRgtC40LLQsNC90LjQtSDQvtGCINC80LDRgtC10YDQuCDQuiDRgNC10LHQtdC90LrRgyDQv9C10YDQtdGF0L7QtNGP0YIg0YLQsNC60LbQtSDQsdC40YTQuNC00L7QsdCw0LrRgtC10YDQuNC5KNCyINCx0L7Qu9GM0YjQtdC8INC60L7Qu9C40YfQtdGB0YLQstC1KSwg0LvQsNC60YLQvtCx0LDQutGC0LXRgNC40LksINC60YDQvtC80LUg0YLQvtCz0L4g0LLQuNGC0LDQvNC40L3RiyDQs9GA0YPQv9C/0Ysg0JIsINCULCDQoSwg0JAsINCaLCDQlSwg0LjQvNC80YPQvdC+0LPQu9C+0LHRg9C70LjQvSBHKNC/0LvQsNGG0LXQvdGC0LDRgNC90YvQuSksINCQKCDQtNC70Y8g0LfQsNGJ0LjRgtGLINGB0LvQuNC30LjRgdGC0YvRhSDQvtCx0L7Qu9C+0YfQtdC6KSwg0LHQtdC70LrQuCwg0LbQuNGA0YssINGD0LPQu9C10LLQvtC00Ysu0J/RgNC4INGB0LzQtdGI0LDQvdC90L7QvCDQvNC+0LbQtdGCINC00L7QsdCw0LLQuNGC0YzRgdGPIEUuQ29saS4g0JzQvtC20LXRgiDQuNC80LXRgtGMINC90LXQsdC+0LvRjNGI0L7QtSDQutC+0LvQuNGH0YHQtdGC0LLQviDQutC40YjQtdGH0L3QvtC5INC/0LDQu9C+0YfQutC4LCDQutC70L7RgdGC0YDQuNC00LjQuSwg0YHRgtCw0YTQuNC70L7QutC+0LrQutC+0LIg0LrQvtGC0L7RgNC+0LUg0L/QvtC00LTQtdGA0LbQuNCy0LDQtdGCINC10YHRgtC10YHRgtCy0LXQvdC90YvQuSDQsdCw0LvQsNC90YEuINCc0LjQutGA0L7RhNC70L7RgNCwINC60LjRiNC10YfQvdC40LrQsCDQv9C+0YHQu9C1INCz0YDRg9C00L3QvtCz0L4g0LLRgdC60LDRgNC80LvQuNCy0LDQvdC40LUg0L7QsdC10YHQv9C10YfQuNCy0LDQtdGCICDQvdC+0YDQvNCw0LvRjNC90YPRjiDRgdGA0LXQtNGDLCDQtNC70Y8g0LLRgdCw0YHRi9Cy0LDQvdC40Y8gINCy0LDQttC90YvRhSDRjdC70LXQvNC10L3RgtC+0LIgINC00LvRjyDQttC40LfQvdC4INGC0LDQutC40YUg0LrQsNC6INC20LXQu9C10LfQviDQuCDRgi7QtC4g0J3QtSDQv9GA0L7QuNGB0YXQvtC00Y/RgiDQv9GA0L7RhtC10YHRgdGLINCx0YDQvtC20LXQvdC40Y8g0Lgg0LPQvdC40LXQvdC40Y8uINCT0YDRg9C00L3QvtC1INC80L7Qu9C+0LrQviDRgdC+0LTQtdGA0LbQuNGCINC+0LvQuNCz0L7RgdCw0YXQsNGA0LjQtNGLLCDQutC+0YLQvtGA0L7QtSDRgdGC0LjQvNGD0LvQuNGA0YPQtdGCINGA0L7RgdGCINC/0L7Qu9C10LfQvdGL0YUg0LHQsNC60YLQtdGA0LjQuSwg0YHQvtC00LXRgNC20LjRgiDQu9Cw0LrRgtC+0LfRgywg0LrQvtGC0L7RgNCw0Y8g0YHQv9C+0YHQvtCx0YHRgtCy0YPQtdGCINGA0L7RgdGC0YMg0LvQsNC60YLQvtCx0LDQutGC0LXRgNC40LkuINCR0LjRhNC40LTQvtCx0LDQutGC0LXRgNC40Lkg0L/QvtC00LDQstC70Y/RjtGCINGA0L7RgdGCINC/0LDRgtC+0LPQtdC90L3Ri9GFINCx0LDQutGC0LXRgNC40LksINGB0L/QvtGB0L7QsdGB0YLQstGD0Y7RgiDQstGB0LDRgdGL0LLQsNC90LjRjiDQvNC+0LvQvtC60LAg0Lgg0YHQuNC90YLQtdC30YMg0LLQuNGC0LDQvNC40L3QvtCyINCz0YDRg9C/0L/RiyDQki4g0JrRgNC+0LzQtSDRgtC+0LPQviDQs9GA0YPQtNC90L7QtSDQvNC+0LvQvtC60L4g0YHQv9C+0YHQvtCx0YHRgtCy0YPQtdGCINGA0LDQt9Cy0LjRgtC40Y4g0LzQtdGB0YLQvdC+0LPQviDQuNC80LzRg9C90LjRgtC10YLQsCDQutC40YjQtdGH0L3QuNC60LAsINGC0LXQvCDRgdCw0LzRi9C8INGB0L7Qt9C00LDQstCw0Y8g0LHQsNGA0YzQtdGAINC00LvRjyDQv9Cw0YLQvtCz0LXQvdC+0LIuINCYINGDINC00LXRgtC10Lkg0L3QsCDQs9GA0YPQtNC90L7QvCDQstGB0LrQsNGA0LzQu9C40LLQsNC90LjQtSDRgdGC0YPQuyDQuNC80LXQtdGCINC80Y/Qs9C60YPRjiDQutC+0L3RgdC40YHRgtC10L3RhtC40Y4sINC60LjRgdC70YvQuSDQt9Cw0L/QsNGFLCDQttC10LvRgtGL0Lkg0YbQstC10YIoINC90L4g0LIg0LfQsNCy0LjRgdC40LzQvtGB0YLQuCDQvtGCINCx0LjQu9C70LjRgNGD0LHQuNC90LAo0LfQvtC70L7RgtC40YHRgtC+INC20LXQu9GC0YvQuSkg0LjQu9C4INCx0LjQu9C40LLQtdGA0LTQuNC90LAo0YLQtdC80L3Qvi3Qt9C10LvQtdC90YvQuSkg0LzQvtC20LXRgiDQuNC80LXRgtGMINC00YDRg9Cz0L7QuSDRhtCy0LXRgik=</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ответ на первый вопрос не совсем верный.Состояние обусловлено небольшой массой легких, недоразвитием эластической ткани. Легкие менее воздушны и более полнокровны.</text:p>
          </table:table-cell>
          <table:table-cell office:value-type="float" office:value="0" table:style-name="ce1">
            <text:p>0</text:p>
          </table:table-cell>
          <table:table-cell table:number-columns-repeated="16376"/>
        </table:table-row>
        <table:table-row table:style-name="ro1">
          <table:table-cell office:value-type="float" office:value="1066937" table:style-name="ce1">
            <text:p>1066937</text:p>
          </table:table-cell>
          <table:table-cell office:value-type="string" table:style-name="ce1">
            <text:p>russian</text:p>
          </table:table-cell>
          <table:table-cell office:value-type="string" table:style-name="ce1">
            <text:p>Билет 28.&amp;lt;br /&amp;gt; 1.Чем обусловлено поверхностное дыхание у новорожденного?&amp;lt;br /&amp;gt; 2.С чем связано становление микрофлоры кишечника после рождения ребенка при грудном вскармливании?&amp;lt;br /&amp;gt;</text:p>
          </table:table-cell>
          <table:table-cell office:value-type="string" table:style-name="ce1">
            <text:p>MS7Qn9C+0LLQtdGA0YXQvdC+0YHRgtC90L7QtSDQtNGL0YXQsNC90LjQtSDRgyDQvdC+0LLQvtGA0L7QttC00LXQvdC90L7Qs9C+INC+0LHRg9GB0LvQvtCy0LvQtdC90L4g0LDQvdCw0YLQvtC80LjRh9C10YHQutC4LdGE0YPQvdC60YbQuNC+0L3QsNC70YzQvdGL0LzQuCDQvtGB0L7QsdC10L3QvdC+0YHRgtGP0LzQuCDQtdCz0L4g0LTRi9GF0LDRgtC10LvRjNC90L7QuSDRgdC40YHRgtC10LzRiywg0YLQviDQtdGB0YLRjCDRgSDRgtC10LwsINGH0YLQviDQvtC90LAg0L3QtdC00L7RgdGC0LDRgtC+0YfQvdC+INGA0LDQt9Cy0LjRgtCwLCDQsCDQuNC80LXQvdC90L46INC90LXQtNC+0YHRgtCw0YLQvtGH0L3QviDQtdGJ0ZEg0YDQsNC30LLQuNGCINC10LPQviDQtNGL0YXQsNGC0LXQu9GM0L3Ri9C5INGG0LXQvdGC0YAg0YDQsNGB0L/QvtC70L7QttC10L3QvdGL0Lkg0LIg0L/RgNC+0LTQvtC70LPQvtCy0LDRgtC+0Lwg0LzQvtC30LPQtSwg0YHQvtCx0YHRgtCy0LXQvdC90L4g0LjQty3Qt9CwINGH0LXQs9C+INC00YvRhdCw0L3QuNC1INC90LXRg9GB0YLQvtC50YfQuNCy0YvQuSDQuCDQvdC10YHRgtCw0LHQuNC70YzQvdGL0Lkg0L3QvtGB0LjRgiDRhdCw0YDQsNC60YLQtdGALiDQmtGA0L7QvNC1INGC0L7Qs9C+INGH0LXRgNC10LTRg9GO0YLRgdGPINCy0LTQvtGF0Lgg0YEg0LrRgNCw0YLQutC+0LLRgNC10LzQtdC90L3Ri9C80Lgg0L/QsNGD0LfQsNC80LgoNS0xMCDRgdC10LrRg9C90LQ90YTQuNC30LjQvtC70L7Qs9C40YfQtdGB0LrQvtC1INCw0L/QvdC+0Y0g0L3QvtCy0L7RgNC+0LbQtNC10L3QvdGL0YUpLiDQoyAg0L3QtdCz0L4g0LzRj9Cz0LrQsNGPLCDQv9C+0LTQsNGC0LvQuNCy0LDRjyDQs9GA0YPQtNC90LDRjyDQutC70LXRgtC60LAo0L/RgNC10L7QsdC70LDQtNCw0L3QuNC1INGF0YDRj9GJ0LXQstC+0Lkg0YLQutCw0L3QuCk7INGA0ZHQsdGA0LAg0YDQsNGB0L/QvtC70L7QttC10L3RiyDQs9C+0YDQuNC30L7QvdGC0LDQu9GM0L3Qvjsg0L3QtdC00L7RgNCw0LfQstC40YLRiyDQvNC10LbRgNGR0LHQtdGA0L3Ri9C1INC80YvRiNGG0YssINC40Lct0LfQsCDRh9C10LPQviDQstC80LXRgdGC0LUg0YEg0YLQtdC8INC60LDQuiDRgNCw0YHQv9C+0LvQvtC20LXQvdGLINGA0ZHQsdGA0LAg0Y3RgtC+INCy0YHRkSDQvNC10YjQsNC10YIg0L/QvtC70L3QvtC5INGN0LrRgdC60YPRgNGB0LjQuCDQu9GR0LPQutC40YUg0Lgg0L7RgdC90L7QstC90YPRjiDRgNCw0LHQvtGC0YMg0LLRi9C/0L7Qu9C90Y/QtdGCINC00LjQsNGE0YDQsNCz0LzQsC4g0JIg0YbQtdC70L7QvCDQstC00L7RhdC4INGDINC90LjRhSDQstGL0LPQu9GP0LTRj9GCINC80LXQvdC10LUg0LLRi9GA0LDQttC10L3QvdGL0LzQuCwg0LjQty3Qt9CwINC/0YDQtdC+0LHQu9Cw0LTQsNC90LjRjyDRgyDQvdC+0LLQvtGA0L7QttC00LXQvdC90YvRhSDQs9GA0YPQtNC+0LHRgNGO0YjQvdC+0LPQviDRgtC40L/QsCDQtNGL0YXQsNC90LjRjywg0YLQviDQtdGB0YLRjCDQs9GA0YPQtNC90LDRjyDQutC70LXRgtC60LAg0LLQuNC30YPQsNC70YzQvdC+INC80L7QttC10YIg0L/QvtGH0YLQuCDQvdC1INC/0L7QtNC90LjQvNCw0YLRjNGB0Y8g0L/RgNC4INCy0LTQvtGF0LUg0Lgg0L7RgdC90L7QstC90YvQvCDQstC90LXRiNC90LjQvCDQv9C+0LrQsNC30LDRgtC10LvQtdC8INC00YvRhdCw0L3QuNGPINC00LvRjyDRgNC+0LTQuNGC0LXQu9C10Lkg0Y/QstC70Y/QtdGC0YHRjyDQtNCy0LjQttC10L3QuNC1INC20LjQstC+0YLQsC4g0JIg0L3QvtGA0LzQtSDRh9Cw0YHRgtC+0YLQsCDQtNGL0YXQsNGC0LXQu9GM0L3Ri9GFINC00LLQuNC20LXQvdC40Lkg0YMg0L3QvtCy0L7RgNC+0LbQtNC10L3QvdC+0LPQviDRgdC+0YHRgtCw0LLQu9GP0LXRgiA0MC02MCDQsiDQvNC40L3Rg9GC0YMuINCi0L4g0LXRgdGC0Ywg0LTQtdC70LDRjyDQstGL0LLQvtC0LCDQv9C+0LLQtdGA0YXQvdC+0YHRgtC90L7QtSDQtNGL0YXQsNC90LjQtSDRgyDQvdC+0LLQvtGA0L7QttC00LXQvdC90YvRhSAtINC90L7RgNC80LAuICAgICAgICAgICAgICAgICAgICAgICAgICAgICAgICAgICAgICAgICAgICAgICAgICAgICAgICAgICAgICAgICAgICAgICAgICAgICAgICAgICAgICAgICAgICAgICAgICAgICAgIDIu0KHRgNCw0LfRgyDQv9C+0YHQu9C1INGA0L7QttC00LXQvdC40Y8g0LzQvtC20L3QviDRgdC60LDQt9Cw0YLRjCwg0YfRgtC+INC60LjRiNC10YfQvdC40Log0YDQtdCx0ZHQvdC60LAg0L/RgNCw0LrRgtC40YfQtdGB0LrQuCDRgdGC0LXRgNC40LvQtdC9LiDQn9C+0YHQu9C1INGA0L7QttC00LXQvdC40Y8g0YDQtdCx0ZHQvdC60LAg0YHRgtCw0L3QvtCy0LvQtdC90LjQtSDQtdCz0L4g0LzQuNC60YDQvtGE0LvQvtGA0Ysg0LvQuNGI0Ywg0L3QsNGH0LjQvdCw0LXRgtGB0Y8g0LXRidGRINC90LAg0LzQvtC80LXQvdGC0LUg0LrQvtC90YLQsNC60YLQsCDRgSDQvNCw0YLQtdGA0YzRjiwg0LIg0YLQvtC8INGH0LjRgdC70LUg0YEg0YDQvtC00L7QstGL0LzQuCDQv9GD0YLRj9C80Lgg0LXRkSwg0YEg0LrQvtC90YLQsNC60YLQsCDRgSDQvNC10LQuINC/0LXRgNGB0L7QvdCw0LvQvtC8LiDQkiDQtNCw0LvRjNC90LXQudGI0LXQvCDQvtGB0L3QvtCy0LAg0LXRkSDRgdGC0LDQvdC+0LLQu9C10L3QuNC1INC70LXQttC40YIg0LIg0LPRgNGD0LTQvdC+0Lwg0LrQvtGA0LzQu9C10L3QuNC4KNC00LDQttC1INCyINC/0YDQvtGG0LXRgdGB0LUg0LrQvtGC0L7RgNC+0LPQviDRgNC10LHRkdC90L7QuiDQv9C+0LvRg9GH0LDQtdGCINGI0YLQsNC80LzRiyDQu9Cw0LrRgtC+LSDQuCDQsdC40YTQuNC00L7QsdCw0LrRgtC10YDQuNC5LCDRgtC+INC10YHRgtGMINC90LUg0YLQvtC70YzQutC+INC40Lcg0LzQvtC70L7QutCwLCDQvdC+INC4INGBINC60L7QttC4INGB0L7RgdC60LAg0Lgg0LPRgNGD0LTQuCDQvNCw0YLQtdGA0LgpLiDQndC+INC+0YHQvdC+0LLQsCDQu9C10LbQuNGCINC40LzQtdC90L3QviDQsiDRgdC+0YHRgtCw0LLQtSDRgdCw0LzQvtCz0L4g0LPRgNGD0LTQvdC+0LPQviDQvNC+0LvQvtC60LA6INGC0L4g0LXRgdGC0Ywg0LIg0L3RkdC8INGB0L7QtNC10YDQttCw0YLRgdGPINC/0YDQvtCx0LjQvtGC0LjQutC4KNC+0LvQuNCz0L7RgdCw0YXQsNGA0LjQtNGLKSwg0LrQvtGC0L7RgNGL0LUg0YHRgtC40LzRg9C70LjRgNGD0Y7RgiDQuNC30LHQuNGA0LDRgtC10LvRjNC90L4g0YDQvtGB0YIg0L/QvtC70LXQt9C90YvRhSDQsdCw0LrRgtC10YDQuNC5LCDQsCDQuNC80LXQvdC90L4g0LvQsNC60YLQvtCx0LDRhtC40LvQuyDQuCDQsdC40YTQuNC00L7QsdCw0LrRgtC10YDQuNC5LiDQo9C20LUg0Log0LrQvtC90YbRgyDQv9C10YDQstC+0Lkg0L3QtdC00LXQu9C4INGDINGA0LXQsdC10L3QutCwINC/0YDQtdC+0LHQu9Cw0LTQsNGO0YIg0YHQsNC80Lgg0LHQuNGE0LjQtNC+0LHQsNC60YLQtdGA0LjQuCwg0YTQvtGA0LzQuNGA0YPRjyDRgtC10Lwg0YHQsNC80YvQvCDRgtGDINGB0LDQvNGD0Y4gItCx0LjRhNC40LTRg9C80YTQu9C+0YDRgyIuINCi0LDQutC20LUsINC/0L7QvNC40LzQviDRjdGC0L7Qs9C+LCAg0LIg0LPRgNGD0LTQvdC+0Lwg0LzQvtC70L7QutC1INGB0L7QtNC10YDQttC40YLRgdGPINC70LjQt9C+0YbQuNC8LCDQu9Cw0LrRgtC+0YTQtdGA0YDQuNC9LCDQuNC80LzRg9C90L3Ri9C1INC60LvQtdGC0LrQuCwg0LDQutGC0LjQstC90YvQtSDQuNC80LzRg9C90L7Qs9C70L7QsdGD0LvQuNC90Ysg0JAgLSDQuCDQuNGFINGA0L7Qu9GMINC30LDQutC70Y7Rh9Cw0LXRgtGB0Y8g0LIg0L/QvtC00LDQstC70LXQvdC40Lgg0LIg0LrQuNGI0LXRh9C90LjQutC1INGA0L7RgdGC0LAg0YPRgdC70L7QstC90L4t0L/QsNGC0L7Qs9C10L3QvdC+0Lkg0LzQuNC60YDQvtGE0LvQvtGA0L7QuS4g0J3QvtGA0LzQsNC70YzQvdCw0Y8g0LzQuNC60YDQvtGE0LvQvtGA0LAo0YMg0LfQtNC+0YDQvtCy0L7Qs9C+INGA0LXQsdGR0L3QutCwKSDRgdC/0L7RgdC+0LHRgdGC0LLRg9C10YIg0LTQsNC20LUg0YHQvtC30YDQtdCy0LDQvdC40Y4g0LjQvNC80YPQvdC90L7QuSDRgdC40YHRgtC10LzRizsg0YPQu9GD0YfRiNCw0LXRgiDQv9C10YDQtdCy0LDRgNC40LLQsNC90LjQtSAsINCwINGC0LDQutC20LUg0LLRgdCw0YHRi9Cy0LDQvdC40LUg0L3Rg9GC0YDQuNC10L3RgtC+0LI7INC/0YDQtdC00L7RgtCy0YDQsNGJ0LDQtdGCINGA0L7RgdGCINGD0YHQu9C+0LLQvdC+LdC/0LDRgtC+0LPQtdC90L3Ri9GFINCx0LDQutGC0LXRgNC40Lk7INC4INC6INGC0L7QvNGDINC20LUg0YPRh9Cw0YHRgtCy0YPQtdGCINCyINGB0LjQvdGC0LXQt9C1INCy0LjRgtCw0LzQuNC90L7QsiDQs9GA0YPQv9C/0Ysg0JIg0Lgg0JouINCi0L4g0LXRgdGC0Ywg0L3QvtGA0LzQsNC70YzQvdCw0Y8g0LzQuNC60YDQvtGE0LvQvtGA0LAg0L7QsdC10YHQv9C10YfQuNCy0LDQtdGCINGA0LXQsdGR0L3QutCwINC/0L7QvNC40LzQviDRgtC+0LPQviwg0YfRgtC+INC/0LjRidC10LLQsNGA0LjRgtC10LvRjNC90L7QuSDRhNGD0L3QutGG0LjQtdC5LCDQvdC+INCyINGC0L7QvCDRh9C40YHQu9C1INC10YnRkSDQuCDQuNC80LzRg9C90L3QvtC5LiDQmNC80LXQvdC90L4g0L/QvtGN0YLQvtC80YMg0LPRgNGD0LTQvdC+0LUg0LLRgdC60LDRgNC80LvQuNCy0LDQvdC40LUg0YLQsNC6INCy0LDQttC90L4g0LTQu9GPINGA0LXQsdGR0L3QutCw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39" table:style-name="ce1">
            <text:p>1067139</text:p>
          </table:table-cell>
          <table:table-cell office:value-type="string" table:style-name="ce1">
            <text:p>russian</text:p>
          </table:table-cell>
          <table:table-cell office:value-type="string" table:style-name="ce1">
            <text:p>Билет 28.&amp;lt;br /&amp;gt; 1.Чем обусловлено поверхностное дыхание у новорожденного?&amp;lt;br /&amp;gt; 2.С чем связано становление микрофлоры кишечника после рождения ребенка при грудном вскармливании?&amp;lt;br /&amp;gt;</text:p>
          </table:table-cell>
          <table:table-cell office:value-type="string" table:style-name="ce1">
            <text:p>0YMg0L3QvtCy0L7RgNC+0LbQtNC20LXQvdC90L7Qs9C+INC00YvRhdCw0L3QuNC1INC/0L7QstC10YDRhdC90L7RgdGC0L3QvtC1LCDQv9GD0LXRgNC40LvRjNC90L7QtSDRh9GC0L4g0LfQvdCw0YfQuNGCINC00LvQuNGC0LXQu9GM0L3QvtGB0YLRjCDQutCw0Log0LLQtNC+0YXQsCDRgtCw0Log0Lgg0LLRi9C00L7RhdCwINC+0LTQuNC90LDQutC+0LLQvtC1LCDRgtCw0Log0LbQtSDQtNC70Y8g0L3QvtCy0L7RgNC+0LbQtNC10L3QvdC+0LPQviDRhdCw0YDQsNC60YLQtdGA0L3QviDQtNGL0YXQsNC90LjQtSDRh9C10LnQvdCwLdGB0YzQvtC60YHQsCDQstC+INCy0YDQtdC80Y8g0YHQvdCwINC+0YHQvtCx0LXQvdC90L4sINGH0YLQviDRgdCy0Y/Qt9Cw0L3QviDRgSDQvdC10LTQvtGA0LDQt9Cy0LjRgtC40LXQvCDQtNGL0YXQsNGC0LXQu9GM0L3QvtCz0L4g0YbQtdC90YLRgNCwLiDRgyDQvdC+0LLQvtGA0L7QttC00LXQvdC90L7Qs9C+INC00YvRhdCw0L3QuNC1INC60L7QvNC/0LXQvdGB0LjRgNGD0LXRgtGB0Y8g0LLRi9GB0YfQvtC60LjQvCDRh9C00LQsINGC0LDQuiDQutCw0Log0L3QtSDQstGB0LUg0LDQu9GM0LLQstC10L7Qu9GLICDQvNC70LDQtNC10L3RhtCwINGA0LDQt9Cy0LjRgtGLLCDRgtCw0Log0LbQtSDQutC+0LvQuNGH0LXRgdGC0LLQviDQtNCw0L3QvdGL0YUg0LDQu9GM0LLQtdC+0Lsg0L/QvtGH0YLQuCDQsiAyLDUg0YDQsNC30LAg0LzQtdC90YzRiNC1INGH0LXQvCDRgyDQstC30YDQvtGB0LvQvtCz0L4uINC00LvRjyDQvdC+0LLQvtGA0L7QttC00LXQvdC90YvRhSDRhdCw0YDQsNC60YLQtdGA0LXQvSDQs9GA0YPQtNC90L7QuSDQv9C+0LLQtdGA0YXQvdC+0YHRgtGL0Lkg0LjQu9C4INC00LjQsNGE0YDQsNCz0LzQsNC70YzQvdGL0Lkg0YLQuNC/INC00YvRhdCw0L3QuNGPLCDQuNC3LdC30LAg0L3QtdGA0LDQt9Cy0LjRgtGL0YUg0LzRi9GI0YYsINC90LXQvdGA0LLQvdC+0Lkg0YDQvtGA0LXQs9GD0LvRj9GG0LjQuCDQuCDQtNGA0YPQs9C40YUg0YTQsNC60YLQvtGA0L7Qsi4g0YMg0L3QvtCy0L7QvtGA0L7QttC00LXQvdC90L7Qs9C+INGH0LTQtCDQv9GA0LjQvNC10YDQvdC+INGA0LDQstC10L0gNDAtNjAu0LIg0LTQsNC70YzQvdC10LnRiNC10Lwg0LrQvtCz0LTQsCDQv9Cw0YDQtdC90YXQuNC80LAg0LvQtdCz0LrQuNGFINC90LDRh9C40L3QsNC10YIg0YDQsNGB0YLQuCwg0YLQsNC60LbQtSDQuCDQsNGG0LjQvdGD0YHRiyDRgdC+0L7RgtCy0LXRgtGB0YLQstC10L3QvdC+LCDQvdCw0YfQuNC90LDQtdGCINGD0LLQtdC70LjRh9C40LLQsNGC0YzRgdGPINGA0LDQt9C80LXRgCDQu9C10LPQutC40YUsINC80YvRiNGG0Ysg0LrQsNC6INCz0YDRg9C00Lgg0YLQsNC6INC4INCx0YDRjtGI0L3QvtC5INCz0YDRg9C/0L/RiyDQvdCw0YfQuNC90LDQtdGCINGA0LDQsNC30LLQuNCy0LDRgtGM0YHRjywg0LTRi9GF0LDRgtC10LvRjNC90YvQtSDRhtC10L3RgtGA0Ysg0L/QvtC70L3QvtGB0YLRjNGOINGE0L7RgNC80LjRgNGD0LXRgtGB0Y8sINCz0YDRg9C00L3QsNGPINC60LvQtdGC0YzQutCwINGB0YLQsNC90L7QstC40YLRgdGPINCx0L7Qu9C10LUg0Lgg0LzQtdC90LXQtSDRhtC40LvQuNC90LTRgNC40YfQtdGB0LrQvtC5INCy0YHQtSDRjdC+INC/0YDQuNCy0LXQtNC10YIg0Log0YPQstC10LvQuNC40YfQtdC90YzRjiDQtNGL0YXQsNGC0LXQu9GM0L3QvtCz0L4g0L7QsdGM0LXQvNCwINC4INGB0L7QvtGC0LLQtdGC0YHRgtCy0LXQvdC90L4g0LbQtdC7INC4INC00YDRg9Cz0LjRhSDQv9C+0LrQsNC30LDRgtC10LvQtdC5LCDRgtC40L8g0LTRi9GF0LDQvdC40LUg0LjQt9C80LXQvdC40YLRgdGPINC90LAg0LLQtdC30LjQutGD0LvRj9GA0L3Ri9C5LCDQsdC+0LvQtdC1INCz0LvRg9GM0L7Rg9C40LkgLCDRh9C00LQg0YHQvdC40LbQtdGC0YHRjywg0Lgg0YLQtC4g0Lgg0YLQsNC6INCyINC+0YHQvdC+0LLQvdC+0Lwg0L/QvtCy0LXRgNGF0L3QvtGB0YLQvdC+0LUg0LTRi9GF0LDQvdC1INC90L7QstC+0YDQvtC20LTQtdC90L3QvtCz0L4g0L7QsdGD0YHQu9C+0LLQu9C10L0g0L3QuNC30LrQuNC8INC60L7Qu9C40YfQtdGB0YLQstC+0Lwg0YTRg9C90LrRhtC40L7QvdC40YDRg9GO0YnQuNGFINCw0LvRjNCy0LXQvtC7ICjQsiDQu9C10LPQutC40YUg0L/RgNC10LHQu9Cw0LTQsNC10YIg0LjQvdGC0LXRgNGB0YLQuNGG0LjQuCwg0YHQvtGB0YPQtNGLINC4INC20LjQuNC00LrQvtGB0YLRjCDQuNC3INCw0LzQvdC40L7RgtC40YfQtdGB0LrQvtC5INC20LjQtNC60L7RgdGC0Lgg0LrQvtGC0L7RgNGL0Lkg0L7RgdGC0LDQu9GB0Y8g0YDQu9GB0LvQtSDQstC90YPRgtGA0LjRg9GC0YDQvtCx0L3QvtCz0L4g0YDQtdGA0LjQvtC00LAp0LzQsNC70LXQvdGM0LrRgNC5INCz0YDRg9C00L3QvtC5INC60LvQtdGC0LrQvtC5IC0g0YDQtdGM0YDQsCDQvdCw0L/RgNCw0LLQu9C10L3RiyDQs9C+0YDQuNC30L7QvdGC0LDQu9GM0L3Qviwg0YPQs9C+0Lsg0Y3Qv9C40LPQsNGB0YLRgNCw0LvRjNC90YvQuSDRgtGD0L/QvtC5LCDQvdC1INGA0LDQt9Cy0LjRgtC40LXQvCDQvNGL0YjRhiDRg9GH0LDRgdGC0LLRg9GO0YnQuNGFINCyINC00YvRhdCw0L3QuNC4INCwINGC0LDQutC20LUg0L3QtdGA0LLQvdC+0Lkg0L/QtdCz0YPQu9GP0YbQuNC4LiDQsNC70YzQstC10L7Qu9GLINC/0L7Qu9C90L7RgdGC0YzRjiDRhNGD0L3QutGG0LjQvtC90LjRgNGD0LXRgiDQutCw0Log0YMg0LLQt9GA0L7RgdC70YvRhSDQuiA4INC70LXRgiwg0LAgMTIg0LLRgdC1INC+0YDQs9Cw0L3RiyDQs9GA0YPQtNC90L7QuSDQutC70LXRgtC60Lgg0YHRhdC+0LbQuCDRgdC+INCy0LfRgNC+0YHQu9GL0LzQuNC8LiDQstC00L7RhdC4INC4INCy0YvQtNC+0YXQuCDRgyDQvdC+0LLQvtGA0L7QttC00LXQvdC90L7Qs9C+INC/0YDQvtC40YHRhdC+0LTQuNGCINCyINC+0YLQstC10YIg0L3QsCDQv9Cw0YDRhtC40LDQu9GM0L3QvtC1INC00LDQstC70LXQvdC40LUg0Lgg0LrQvtC70LjRh9C10YHRgtCy0L4g0YHQvjIg0YHQvdCw0YDRg9C20Lgg0Lgg0LLQvdGD0YLRgNC4INC+0YDQs9Cw0L3QuNC30LzQsC0g0L7QvdC+INC90LjQttC1IDcw0LzQvCDRgNGCINGB0YItINC90LjQttC1INGH0LXQvCDQstC90YPRgtGA0Lgg0YPRgtGA0L7QsdCwPGJyIC8+DQrQvNC40LrRgNC+0YTQu9C+0YDQsCDQvdC+0LLQvtGA0L7QttC00LXQvdC90L7Qs9C+INC90LDRh9C40L3QsNC10YIg0YTQvtGA0LzQuNGA0L7QstCw0YLRgdGPINGD0LbQtSDQstC+INCy0L3Rg9GC0YDQtdGD0YLRgNC+0LHQvdC+0Lwg0L/QtdGA0LjQvtC00LUsINC+0LTQvdCw0LrQviDQsdC+0LvQtdC10LUg0LjQvdGC0LXQvdGB0LjQstC90L7QtSDQt9Cw0YHQtdC70LXQvdC40LUg0LXQs9C+INC/0YDQvtC40YHRhdC+0LTQuNGCINC/0L7RgdC70LUg0YDQvtC20LTQtdC90LjRjywg0L3QsCDRgdCw0LzQvtC8INC00LXQu9C1INC+0L0g0L3QsNGH0LjQvdCw0LXRgtGB0Y8g0L/RgNC4INGA0L7QtNCw0YUuINGD0YfQtdC90YvQtSDQstGL0Y/RgdC90LjQu9C4INGH0YLQviDQvNC40LrRgNC+0LHQuNC+0YLQsCDQvdC+0LLQvtGA0L7QttC00LXQvdC90YvRhSDRh9GM0Lgg0YDQvtC00Ysg0L/RgNC+0YLQtdC60LDQu9C4INGH0LXRgNC10Lcg0LLQsNCz0LjQvdGDINC4INGH0LXRgNC10Lcg0LrQtdGB0LDRgNC10LLQviAtINGA0LDQt9C90YvQtS4g0L/RgNC4INC60LXRgdCw0YDQtdCy0L4g0L3QvtCy0L7RgNC+0LbQtNC10L3QvdGL0Lkg0L/RgNC40L3QuNC80LDQtdGCINGC0YMg0LzQuNC60YDQvtCx0LjQvtGC0YMg0LrQvtGC0L7RgNCw0Y8g0LfRhdCw0YHQtdC70Y/QtdGCINC60L7QttGDINC80LDRgtC10YDQuC0g0YHRgtGA0LXQv9GC0L7QutC+0LrQutC4LCDRgdGC0LDRhNC40LvQvtC60L7QutC60Lgg0Lgg0YLQsNC6INC00LDQu9C10LUuINCyINGC0L4g0LLRgNC10LzRjyDQutCw0Log0L/RgNC4INGC0YDQsNC00LjRhtC40L7QvdC90YvRhSDRgNC+0LTQsNGFINC60LjRiNC10YfQvdC40Log0YDQtdCx0LXQvdC60LAg0LfQsNGB0LXQu9GP0LXRgiDQtNGA0YPQs9Cw0Y8g0LzQuNC60YDQvtCx0LjQvtGC0LAt0YLQsCDQutC+0YLQvtGA0LDRjyDQt9Cw0YHQtdC70Y/QtdGCINGB0L7QvtGC0LLQtdGC0YHQstGD0Y7RidC40LUg0L7RgNCz0LDQvdGLLiDRgtCw0LrQttC1INC+0LPRgNC+0LzQvdGD0Y4g0YDQvtC70YzRjCDQsiDRhNC+0YDQvNC40YDQvtCy0LDQstC90LjQuCDQvNC40LrRgNC+0LHQuNC+0YLRiyDQutC40YjQtdGH0L3QuNC60LAg0LLQvtC40Y/QtdGCINGC0LjQvyDQutC+0YDQvNC70LXQvdC40Y8uINCyINCz0YDRg9C00L3QvtC8INC80L7Qu9C+0LrQtSDQuNC80LXRjtGC0YHRjyDRgtCw0LrQuNC1INCy0LDQttC90YvQtSDQv9GA0LXQsdC40L7RgtC40LrQuCDQutC+0YLQvtGA0YvQtSDQtNCw0LXRgiDRgNC+0YHRgiDQsdC40YTQuNC00L7QsdCw0LrRgtC10YDQuNGP0LwgLSDQstCw0LbQvdGL0LUg0LHQsNC60YLQtdGA0LjQuCDRgdC/0L7RgdC+0LHQvdGL0LU6INC/0YDQtdC00L7RgtCy0YDQsNGJ0LDRgtGMINCy0L7RgdC/0LDQu9C40YLQtdC70YzQvdGL0LUg0L/RgNC+0YbQtdGB0YHRiyDQsiDQttC60YIsINC/0LXRgNC10LLQsNGA0LjQstCw0L3QuNGOINC4INC+0YHQstC+0LXQvdC40Y4g0LLQsNC20L3Ri9GFINC20LTQu9GPINC+0YDQs9Cw0L3QuNC30LzQsCDQv9C40YLQsNGC0LXQu9GM0L3Ri9GFINCy0LXRidC10YHRgtCyLCDQvdC+0YDQvNCw0LvQuNC30LDRhtC40Lgg0L/QuNGJ0LXQstCw0YDQtdC90LjQtSAo0L/RgNC10LTQvtGC0LLRgNCw0YnQsNGO0YIg0LfQsNC/0L7RgNGLLCDQtNC40LDRgNC10Lgg0Lgg0YLQtCksICwg0YLQsNC60LbQtSDQvtC90Lgg0LLQu9C40Y7RgiDQv9C+0LvQvtC20LjRgtC10LvRjNC90L4g0L3QsCDQv9C10YDQuNGB0YLQsNC70YzRgtC40LrRgywgINC40Lcg0L/QuNGJ0LjQuCDQvNC10YLQsNCx0L7Qu9C40LfQuNGA0YPQtSDRhtC10L/QvtGH0Lgg0LbQuNGA0YDQvdGL0YUg0LrQuNGB0L7RgNGCINC00LvRjyAg0L3QvtGA0LzQsNC70LjQt9Cw0YbQuNC4INC40LzQvNGD0L3QuNGC0LXRgtCwINC60LjRiNC10YfQvdC40LrQsCDQuCDQsiDRhtC10LvQvtC8INC40LzQvNGD0L3QuNGC0LXRgtCwLCDRgtCw0LrQttC1INC60L7QvdC60YPRgNC40YDRg9GO0YIg0YEg0L/QsNGC0L7Qs9C10L3QvdC+0Lkg0LzQuNC60YDQvtGE0LvQvtGA0L7QuSDQv9GA0LXQtNC+0YLQstGA0LDRidCw0Y8g0LfRhdCw0LHQvtC70LXQstCw0L3QuNC4LiDQv9GA0Lgg0LjRgdC60YPRgdGB0YLQstC10L3QvdC+0Lwg0LbQtSDRgdC60LDRgNC80LvQuNCy0LDQvdC40Lgg0LIg0LrQuNGI0LXRh9C90LjQutC1INC30LDQu9C10LPQsNGO0YIg0LIg0L7RgdC90L7QstC90L7QvCDQsNGG0LjQtNC+0YTQuNC70YzQvdGL0LUg0LHQsNC60YLQtdGA0LjQuCDQvdC1INC40LzQtdGO0YnQuNC1INCy0YvRiNC10L/QtdGA0LXRh9C40YHQu9C10L3QvdGL0YUg0YHQstC+0LnRh9GC0LIu0L/QvtGB0LvQtSDQs9GA0YPQtNC90L7Qs9C+INCy0YHQutCw0YDQvNC70LjQstCw0L3QuNGPINC80LjQutGA0L7QsdC40L7RgtGDINC90LDRh9C40L3QsNGO0YIg0LfQsNGB0LXQu9GP0YLRgdGPICjQvtGH0L3QtdC1INC80L7Qu9C+0LrQviDRgdC+0LTQtdGA0LbQuNGCINC/0YDQtdCx0LjQvtGC0LjQutC4INC00LDRjtGJ0LjQtSDRgNC+0YHRgikg0LPRgNCw0LwrINCx0LDQutGC0LXRgNC40Y/QvCDRh9GC0L4g0YLQsNCy0LrQttC1INC+0LHQvtCz0L7RidCw0LXRgiDQvNC40LrRgNC+0LHQuNC+0YLRgyDQtNC10LvQsNGPINC10LUg0YDQsNC30L3QvtC+0LHRgNCw0LfQvdC+0Lkg0Lgg0YHQvtC+0YLQstC10YLQstC10L3QvdC+INCx0L7Qu9C10LUg0YHRgtCw0LHQuNC70YzQvdC+0Lkg0Lgg0LLRi9C90L7RgdC70LjQstC10LUg0LLQvdC10YjQvdC40Lwg0Lgg0LLQvdGD0YLQtdC90L3QuNC8INGE0LDQutGC0L7RgNC+0Lw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87" table:style-name="ce1">
            <text:p>914687</text:p>
          </table:table-cell>
          <table:table-cell office:value-type="string" table:style-name="ce1">
            <text:p>english</text:p>
          </table:table-cell>
          <table:table-cell office:value-type="string" table:style-name="ce1">
            <text:p>Ticket 28.&amp;lt;br /&amp;gt; 1. During the patronage of the newborn, the mother of the child complained about the shallow breathing of her child. What is the reason for this condition?&amp;lt;br /&amp;gt; 2. What is the reason for the formation of intestinal microflora after the birth of a baby with breastfeeding?&amp;lt;br /&amp;gt;</text:p>
          </table:table-cell>
          <table:table-cell office:value-type="string" table:style-name="ce1">
            <text:p>MS5UaGUgY2hlYXN0IHdhbGwgaXMgbW9yZSBwbGlhYmxlIHRoYW4gdGhlIGFkdWx0IGJlY2F1c2UgaXQgaXMgbWFqb3JseSBtYWRlIHVwIG9mIGNhcnRpbGFnZXMsIGFuZCB0aGUgcmVzcGlyYXRpb24gaXNuJ3QgZnVsbHkgZGV2ZWxvcGVkIHNpbmNlIHRoZXkgaGF2ZSB0byBzdGlsbCB1c2UgdGhlaXIgbm9zZSBhbmQgdGhlaXIgYnJlYXRoaW5nIHBhdHRlcm4gbWF5IGFwcGVhciBzaGFsbG93IGFuZCBpcnJlZ3VsYXIgYW5kIHRoZSBhc3NvY2lhdGVkIG11Y29uaXVtIHdoaWNoIGlzIHByZXNlbnQgZHVyaW5nIHRoZWlyIGJpcnRoLiAgICAgICAgICAgICAgICAgICAgICAgICAgICAgICAgICAgICAgICAgICAgICAgICAgICAgICAgICAgICAgICAgICAgICAgICAgICAgIFByZW1hdHVyZSBiYWJpZXMgaGF2ZSBpbml0aWFsIHByb2JsZW0gb2YgYnJlYXRoaW5nIGJlY2F1c2UgdGhlaXIgbHVuZ3MgYXJlIG5vdCBmdWxsdXkgZGV2ZWxvcGVkLiAgICAgICAgICAgICAgICAgICAgICAgICAgICAgICAgICAgICAgICAgZnVsbCB0ZXJtIGJhYmllcyBjYW4gYWxzbyBkZXZlbG9wIHRoaXMgcHJvYmxlbXMgZHVlIHRvIGxhYm91ciBhbmQgZGVsaXZlcnksIGFsc28gZHVlIHRvIGJpcnRoaCBkZWZlY3RzLCBhbmQgaW5mZWN0aW9ucy4gICAgICAgICAgICAgICAgICAgICAgICAgICAgICAgICAgICAgICAgIDxiciAvPg0KICAgICAgICAgICAgICAgICAgICAgICAgICAgICAgICAgICAgICAgICAgICAgICAgICAgICAgICAgICAgICAgICAgICAgICAgICAgICAgICAgICAgICAgICAgICAgICAgICAgICAgICAgICAgICAgICAgICAgICAgICAgICAgICAgIDxiciAvPg0KMi4gQnJlYXN0IGZlZWRpbmcgaGVscCB0byBkZXZlbG9waW5nIGEgaGVhbHRoeSBndXQgbWljcm9iaW90YSAgICAgICAgICAgICAgICAgICAgICAgICAgICAgICAgICAgICAgICAgICAgICAgICAgICAgICAgICAgICAgICAgICAgICAgICAgICAgICAgICAgICAgICAgICAgICAgICAgICAgICAgICAgICAgICAgICAgICAgICAgICAgICAgVGhlIGd1dCBtaWNyb2JpbyBwcm92aWRlcyBlbm9ybW91cyBjYXBhY2l0aWVzIHRvIGRldmVsb3AgIGZvciB0aGUgZmVybWVudGF0aW9uIG9mIHRoZSBub24gZGlnZXN0aWJsZSBzdWJzdHJhdGVzIGxpa2UgZGlhdGVyeSBmaWJyZXMgYW5kIGVuZG9nZW5vdXMgaW50ZXN0aW5hbCBtdWNvdXMsIHRoZSBmZXJtZW50YXRpb24gc3VwcG9ydHMgdGhlIGdyb3d0aCBvZiBzcGVjaWFsaXN0IGFuZCBtaWNyb2Jpb3MgdGhhdCBwcm9kdWNlIHNob3J0IGNoYWluIGZhdHR5IGFjaWRzIGFuZCBnYXNlcy4gICAgICAgICAgICAgICAgICAgICAgICAgICAgICAgICAgICAgICAgICAgICAgICAgICAgICAgICAgICAgICAgICAgICAgICAgICAgICAgICAgICAgICAgICAgICAgICAgICAgICAgICAgICAgICAgICAgICAgICAgICAgICAgICAgT25lIG9mZiB0aGUgcmVhc29uIGlzIDEtIHByZXNlbmNlIG9mIGh1bWFuIG1pbGsgb2xpZ29zYWNjaGFyaWRlcy0gdGhleSBhY3QgYXMgcHJlYmlvdGljcyBhbmQgcHJvbW90ZSBncm93dGggb2YgaGVhbHRoeSBiYWN0ZXJpYS4gICAgICAgICAgICAgICAgICAgICAgICAgICAgICAgICAgICAgICAgICAgICAgICAgICAgICAgICAgICAgICAgICAgICAgICAgICAgICAgICAgICAgICAgICAgICAgICAgICAgICAgICAgICAgICAgICAgICAgICAgICAgICAgICAgICAgICAgMi1JbW11bm9sb2dpY2FsIGNvbXBvbmVudHMtIGxpa2UgbHlzb3p5bWVzIGFuZCBhbnRpYm9kaWVzIHdoaWNoIHN1cHBvcnQgYSBoZWFsdGh5IG1pY3JvYmlvIGVudmlyb21lbnQuICAgICAgICAgICAgICAgICAgICAgICAgICAgICAgICAgICAgICAgIDMtdGhlIGVhcmx5IGNvbG9uaXphdGlvbiBvZiBtaWNyb2Jpb3RhIGhlbHBzIGluIGRldmVsb3BlbWVudCBvZiBpbmZhbnQgaW1tdW5lIHN5c3RlbSBhbmQgb3ZlcmFsbCBoZWFsdGguICAgICAgICAgICAgICAgICAgICAgICAgICAgICAgICAgICAgICAgICAgICAgICAgICAgICAgICAgICAgICAgICAgICAgICAgICAgICAgICAgICAgICAgICAgICAgICAgICAgICAgICAgICAgICAgICAgICAgICAgICAgICAgICAgICAgICAgICAgICAgICAgICAgICAgICAgICA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737" table:style-name="ce1">
            <text:p>914737</text:p>
          </table:table-cell>
          <table:table-cell office:value-type="string" table:style-name="ce1">
            <text:p>english</text:p>
          </table:table-cell>
          <table:table-cell office:value-type="string" table:style-name="ce1">
            <text:p>Ticket 28.&amp;lt;br /&amp;gt; 1. During the patronage of the newborn, the mother of the child complained about the shallow breathing of her child. What is the reason for this condition?&amp;lt;br /&amp;gt; 2. What is the reason for the formation of intestinal microflora after the birth of a baby with breastfeeding?&amp;lt;br /&amp;gt;</text:p>
          </table:table-cell>
          <table:table-cell office:value-type="string" table:style-name="ce1">
            <text:p>MS4udGhlIGR1cmluZyB0aGUgcGF0aG9nZW5lcyBpbiB0aGUgbmV3Ym9ybmUgdGhlIHNoYWxsb3cgZCBicmVhdGhpbmcgaW4gbmV3Ym9ybiB0aGlzIGlzIHMgbm9ybWFseSBjYXVzZXMgdGhlIHJlc3BpcmF0b3JleSBwYXR0ZXJuOyAgICAgICB0aGUgc2hhbGxvdyBicmVhdGhpbmcgaXMgdGhlIG5vcm1hbCBjaGFyYWN0ZXJzdGljZXMgaW4gdGhlIG5ldyBib3JuLi4gdGhpcyBpcyBzcGVjaWFsbHkgZHVyaW5nIHRoZSBwZXJpb2Qgb2YgdGhlIGxpZ2h0IHNsZWVwLi4gdGhlIG5ld2Jvcm4gb2Z0ZW4gdGhlYiBleGhpYml0IGlycmVndWxhciBicmVhdGhpbmcgcGF0dGVybmVzLi4uIGluY2x1ZGluZyB0aGUgc2hhbGxvdyBicmVhdGhpbmcgZmFjdG9yZXMgbGlrZSAgICAgICAgICAgICAgICAgICAgICAgICAgICAgICBwaHlzaW9sb2dpY2FsIGZhY3RvcmVzIC0gc3VjaCBhcyB0aGUgcmVzcGlyYXRvcmV5IGNlbnRlciBpbiB0aGUgYnJhaW4gYW5kIHRoZXkgYXJlIGluZmx1ZW5jZWQgdGhlIG1ldGVybmFsIGhvcm1vbmVzIGR1cmluZyB0aGUgZyBjaGlsZCBiaXJ0aGNhbiBjb250cmlidXRlc3MgdG8gdGhlIHZhcmlvdWVzIHJlc3BpcmF0b3JleSBwYXR0ZXJucy4uIHRoZSBuYXNhbCBjb2dlc3Rpb247LSBpbiB0aGUgbmV3IGJvcm4gbm9ybWFsbHkgZXhwZXJpZW5jZSB0aGlzIGIgbmFzYWwgY29nZXN0aW9uZXMsIGR1ZSB0byB0cmhlIHByZXNlbmNlICBvZiB0aGUgYW1uaW90aWMgZmx1aWQgb3IgdGhlIG11Y3VzLi4gdGhqaXMgY2FuIGFmZmV0IHRoZSBwcmVzY3JpcHRpb25lcyBvZiB0aGUgYnJlYXRoaW5nIGRlcHRoZS4uICAgICAgICAgICAgICAgICAgICAgICAgICAgICAgICAgICAgICAgICAgICAgICAgICAgICAgICAgICAgICAgICAgICAgICAgICAgICAgICAgICAgICAgICAgICAgICAgICAgICAgICAgICAgICAgICAgICAgICAgICAgICAgICAgICAgICAgMi4uIHRoZSByZWFzb24gb2YgdGhlIGZvcm1hdGlvbiBvZiBpbnRlc3RpbmFsIG1pY3JvZmxvcmEgaW4gYWZ0ZXIgdGhlIGJpcnRoIGluIG0gdGhlIG5ldyBib3JuZXMgYnJlYXN0ZmVlZGluZy4uIHJlYXNvbiBpcyB0aGUgdHJhbnNtaXNzaW9uZXMgb2YgdGhlIG1hdGVybmFsIG1pY3JvZmxvcmEgZHVyaW5nIGYgdGhlIGJpcnRoIGFuZCBicmVhc3RmZWVkaW5nIHMgdGhlIG5ldyBib3JuIGFyZSBleHBvc2VkIHRoZSBtb3RoZXIgcyBtaWNyb2Zsb3JhIHdoaWNoIGFyZSBwbGF5IHRoZSBjcnVjaWFsIGVyIHJvbGUgaW4gdGhlIGNvbG9uaXphdGlvbmVzIHMgb2YgaW5mYW50cyBndXQuLiB0aGUgYnJlYXN0IG1pbGsgY29tcG9uZW50ZXMgYXJlIC0gdGhlIGJyZWFzdCBtaWxrIGNvbXBvbmVudGVzIGlzIHRoZSB0aGF0IGFyZSBwcm9tb3RlcyB0aGUgZ3Jvd3RoIG9mIGJlbmlmaWNpYWwgYmFjdGVyaWEgbGlrZSBwcm9iaW90aWNlcyAsLHRoYXQgd2hpbGUgaW5oaWJpdGluZ2UgdGhlIGhhcm1mdWwgYmFjdGVyaWEgLi4gdGhlc2UgY29tcG9uZW50ZXMgaW5jbHVkaW5nIHRoZSBvbGlnb3NhY2NoYXJpZGVzcyBhbmQgaW1tdW5vZ2xvYnVsaW5lcywsYW5kIGN0aGUgb3RoZXJlcyBiaW9hY3RpdmVzIHN1YnN0YW5jZXMuLnRoaXMgaXMgZXN0YWJpbGlzaG1lbnQgLCBvZiB0aGUgYmlmaWRvYmFjdGVyaWEuLiB0aGUgYnJlYXN0IG1pbGsgYXJlIHBhcnRpY3VsYXJsbHkgc3VwcG9ydGVzIHRoZWJlc3RhYmlsaXNobWVudGVzIG9mIHRoZSBiaWZpZG9iYWN0ZXJpYSAgIC4uIHRoZSBiZW5pZmljaWFsIGdlbnVlcyBzIG9mIHRoZSBiYWN0ZXJpYSBpcyBpbmZhbnRzIGd1dGVzLi4geSB0aGUgcHJvYmlvdGljZXMgaW4gdGhlIGJyZWFzdGVzIG1pbGsgdGhlIGJyZWFzdCBzIG1pbGsgYXJlIGNvbnRhaW5lcyBwcm9iaW90aWNlc3Mgd2hpY2ggYXJlIGNvbnRhaW5lcyBzdWJzdGFuY2VzIHRoYXQgdGhlIG5vdXJpc2ggYW5kIGYgdGhlIHN1cHBvcnRlcyB0eWhlIGdyb3d0aCBvZiB0aGUgYmVuaWZpY2lhbGVzIGJhY3RlcmlhLi4gdGhlIG1hdHVyYXRpb25lcyBvZiB0aGUgIG4gaW1tdW5lcyBzeXN0ZW1lcyAtLSB0aHcgZSBlc3RhYmxpc2htZW50ZXMgb2YgdGhlIGhlYWx0aHllcyBndXQgcyBtaWNyb2Zsb3JhIHMgaXMgdGhpcyBlc3NlbnRpYWxlcyBmb3IgdGhlIG1hdHVyYXRpb25lcyBvZiB0aGUgaW5mYW50ZXMgbiBpbW11bmUgc3lzdGVtZXMgdGhhdCBwcm92aWRlcyBwcm90ZWN0aW9uZXMgYWdhaW5zdGVzIGluZmVjdGlvbmVzIGFuZCBzdXBwb3J0aW5nIHRoZSBvdmVyYWxsIHMgZ3Jvd3RoZXMgLi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Your answer is not written completely and there are many spelling errors in the form of many punctuation marks.</text:p>
          </table:table-cell>
          <table:table-cell office:value-type="float" office:value="0" table:style-name="ce1">
            <text:p>0</text:p>
          </table:table-cell>
          <table:table-cell table:number-columns-repeated="16376"/>
        </table:table-row>
        <table:table-row table:style-name="ro1">
          <table:table-cell office:value-type="float" office:value="915035" table:style-name="ce1">
            <text:p>915035</text:p>
          </table:table-cell>
          <table:table-cell office:value-type="string" table:style-name="ce1">
            <text:p>english</text:p>
          </table:table-cell>
          <table:table-cell office:value-type="string" table:style-name="ce1">
            <text:p>Ticket 28.&amp;lt;br /&amp;gt; 1. During the patronage of the newborn, the mother of the child complained about the shallow breathing of her child. What is the reason for this condition?&amp;lt;br /&amp;gt; 2. What is the reason for the formation of intestinal microflora after the birth of a baby with breastfeeding?&amp;lt;br /&amp;gt;</text:p>
          </table:table-cell>
          <table:table-cell office:value-type="string" table:style-name="ce1">
            <text:p>MS4gU2hhbGxvdyBicmVhdGhpbmcgZW4gbmV3Ym9ybiBkdXJpbmdnIHBhdHJvbmFnZSA6IHBvc2libGUgY2F1c2VzIC0gc2hhbGxvdyBicmVhdGhpbmcgY2FuIGJlIG5vcm1hbCBjaGFyYWN0ZXJzdGljIGVuIG5ld2Jvcm4gLCBlc3BlY2lhbGx5IGR1cmluZ2cgdGhhIHBlcnJpb2Qgb2YgbGlnaHQgc2xlZXAgLCBOZXdib3JuIG9mdGVuIGV4aGliaXQgaXJyZWd1bGFyIGJyZWF0aGluZyBwYXR0ZXJucywgaW5jbHVkaW5nZyBzaGFsbG93IGJyZWF0aHMuIFBoeXNpb2xvZ2ljYWwgZmFjdG9yczogZmFjdG9ycyBsaWtlIGltYXR1cmUgYnJlYXRoaW5nIGNlbnRlciBlbiBicmFpbiBlbmQgaW5mbHVlbmNlIG9mZiBtYXRlcm5hbCBob3Jtb25lcyBkdXJpbmcgY2hpbGRiaXJ0aCBlbmQgY2FuIGNvbnRyaWJ1dGUgdG8gdmFyaWF0aW9ucyBlbiBicmVhdGhpbmcgcGF0dGVybi4gbmFzYWwgY29uZ2VzdGlvbjogTmV3Ym9ybiBvZnRlbm4gZmVlbHMgbmFzYWwgY29uZ2VzdGlvbm4gZHVlIHRvIGltYXR1cmUgYnJhaW4gY2VudGVycyBlbmQgc29tZSBvZmYgdGhhIGhvcm1vbmFsIGNoYW5nZXMgLiAgICAgICAgICAgICAgICAgICAgICAgICAgICAgICAgICAgICAgICAgICAgICAgICAgICAgICAgICAgICAgICAgICAgICAgICAgICAgICAgICAgICAgPGJyIC8+DQogIDIuIFJlYXNvbiBmb3JyIHRoYSBmb3JtYXRpb24gb2YgaW50ZXN0aW5hbCBtaWNyb2Zsb3JhIGFmdGVyIHRoYSBiaXJ0aCBvZmYgYSBiYWJ5IHdpdGggYnJlYXN0ZmVlZGluZyBhcnJlIDogZHVyaW5nIGJyZWFzdGZlZWRpbmcgZW5kIGNoaWxkYmlydGggdHJhbnNmZXIgb2YgbWF0ZXJuYWwgbWljcm9mbG9yYSB0byB0aGEgY2hpbGQgZHVlIHRvIHRoaXNzIHRoYSBuZXdib3JuIGVzIGV4cG9zZWQgdG8gbWF0ZXJuYWwgbWljcm9mbG9yYSAuIEJyZWFzdCBtaWxrIGNvbXBvbmVudHM6IGJyZWFzdCBtaWxrIGNvbnRhaW5zIGVzc2VudGlhbCBjb21wb25lbnRzIHRoYXQgIHByb21vdGVzIGdyb3d0aCBvZiBiZW5pZmljYWwgYmFjdGVyaWEgd2l0aGggaW5oaWJpdGluZyB0aGEgZ3Jvd3RoIG9mZiBoYXJtZnVsIGJhY3RlcmlhICwgdGhlc2UgY29tcG9uZW50cyBlbmNsdWRlIGltbXVub2dsb2J1bGlucyBlbmQgb3RoZXIgYmlvYWN0aXZlIHN1YnN0YW5jZXMuUHJlYmlvdGljIGVuIGJyZWFzdCBtaWxrOiBicmVhc3RtaWxrIGNvbnRhaW5zIHByZWJpb3RpY3MgdGhlc2UgYXJyZSB0aGEgc3Vic3RhbmNlc3MgdGhhdCBwcm9tb3RlcyBncm93dGggb2ZmIGJlbmlmaWNpYWwgYmFjdGVyaWEuIE1hdHVyYXRpb25uIG9mIHRoYSBpbW11bmUgc3lzdGVtIC4gdGhhIGVzdGFibGlzaG1lbnQgb2ZmIGEgaGVhbHRoeSBndXQgbWljcm9mbG9yYSBlcyBlc3NlbnRpYWwgZm9yciB0aGEgZ3Jvd3RoIG9mZiBpbmZhbnQgaW1tdW5lIHN5c3RlbSAscHJvdmlkaW5nIHByb3RlY3Rpb25uIGFnYWluc3QgZW5kIHN1cHBvcnRpbmdnIG92ZXJhbGwgaGVhbHRoLg==</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09" table:style-name="ce1">
            <text:p>1067109</text:p>
          </table:table-cell>
          <table:table-cell office:value-type="string" table:style-name="ce1">
            <text:p>english</text:p>
          </table:table-cell>
          <table:table-cell office:value-type="string" table:style-name="ce1">
            <text:p>Ticket 28.&amp;lt;br /&amp;gt; 1. During the patronage of the newborn, the mother of the child complained about the shallow breathing of her child. What is the reason for this condition?&amp;lt;br /&amp;gt; 2. What is the reason for the formation of intestinal microflora after the birth of a baby with breastfeeding?&amp;lt;br /&amp;gt;</text:p>
          </table:table-cell>
          <table:table-cell office:value-type="string" table:style-name="ce1">
            <text:p>QU5TV0VSIDE6IHRoZSBzaGFsbG93IGJyZWF0aGluZyBvZiBhIGNoaWxkIGlzIGNvbnNpZGVyZWQgYSBub3JtYWwgY2hhcmFjdGVyaXN0aWMgb24gbmV3Ym9ybnMsIGVzcGVjaWFsbHkgZHVyaW5nIHBlcmlvZHMgb2YgbGlnaHQgc2xlZXAuIG5lYm9ybnMgb2Z0biBleGhpYml0IGlycmVndWxhciBwYXR0ZXJucywgaW5jbHVkaW5nIHNoYWxsb3cgYnJhdGhpZyBwYXR0ZXJucy4gZmFjdG9ycyBzdWNoIGFzIGltbWF0dXJlIHJlc3BpcmF0b3J5IGNudHJlcyBpbiB0aGUgYnJhaW4gYW5kIHRoZSBpbmZsdWVuY2Ugb2YgbWF0ZXJuYWwgaG9ybW9uZXMgZHVyaW5nIGNoaWxkYnJpdGggY2FuIGNvbnRpYnV0ZSB0byB2YXJpYXRpb25zIGluIHJlc3BpcmF0b3J5IHBhdHRlcm5zLiBuZXdib3JuIGNvbW1vbmx5IGV4cGVyaWVuY2UgbmFzYWwgY29uZ2VzdGlvbiBkdWUgdG8gdGhlIHByZXNlbmNlIG9mIGFtbmlvdGljIGZsdWlkIGFuZCBtdWN1cyBpbiB0aGVpciByZXNwaXJhdG9yeSB0cmFjdCB3aGl1Y2ggY2FuIGFmZmVjdCB0aGUgcmVzcGlyYXRvcnkgcGF0dGVybnMgb2YgYnJlYXRoaW5nLiAgICAgICAgICAgICAgICAgICAgICAgICAgICAgICAgICAgICAgICAgICAgICAgICAgICAgICAgICAgICAgICAgICAgICAgICAgICAgICAgICAgICAgIDxiciAvPg0KQU5TV0VSIDI6IHRoZSByZWFzb24gZm9yIHRoZSBmb3JtYXRpb24gb2YgaW50ZXN0aW5hbCBtaWNyb2Zsb3JhIGFmdGVyIHRoZSBiaXJ0aCBvZiBhIGJhYnkgd2hpbGUgYnJlYXN0ZmVlZGluZyBpcyBtYWlubHkgZHVlIHRvIHRoZSB0cmFuc21pc3Npb24gb2YgbW90aGVycyBtaWNyb2Zsb3JhIHdoaWNoIHBsYXlzIGEgY3J1Y2lhbCByb2xlIGluIHRoZSBpbml0aWFsIGNvbG9uaXphdGlvbiBvZiB0aGUgaW5mYW50cyBndXQuIGJyZWFzdCBtaWxrIGNvbnRhaW5zIGNlcnRhaW4gYW1vdW50IG9mIHRoZSBjb21wb3VuZHMgYWxzbyBjYW4gYmUgY2FsbGVkIGFzIHByZWJpb3RpY3Mgd2hpY2ggaGVscHMgaW4gdGhlIGdyb3d0aCBvZiBiZW5lZmljaWFsIGJhY3RlcmlhIGFuZCBpbmhpYml0aW5nIHRoZSBoYXJtZnVsIGJhY3RlcmlhbCBncm93dGguIHRoZXNlIGNvbnRlbnRzIGluY2x1ZGVzIG9saWdvc2FjY2hhcmlkZXMsIGltbXVub2dsb2J1bGlucyBhbmQgb3RoZXIgYmlvYWN0aXZlIHN1YnN0YW5jZXMuIGJyZWFzdGZlZWQgcGFydGljdWFybHkgc3VwcG9ydHMgdGhlIGVzdGFibGlobWVudCBvZiBiaWZpZG9iYWN0ZXJpYSwgYSBiZW5lZmljaWFsIGJhY3RlcmlhIGluIHRoZSBpbmZhbnQgZ3V0LiBicmVhc3QgbWlsayBjb250YWlucyBwcmViaW90aWNzLCB3aGljaCBhcmUgdGhlIHN1YnN0YW5jZXMgdGhhdCBub3VyaXNoZXMgYW5kIHN1cHBvcnQgdGhlIGdyb3d0aCBvZiBiZW5lZmljaWFsIGJhY3RlcmlhLiB0aGUgZXN0YmxzaWhtZW50IG9mIGhhZWx0aHkgZ3VpdCBtbWljcm9nZmxvcmEgaGVscHMgdGhlIG1hdHV0YXJpb24gb2YgdGhlIGluZmFudHMgaW1tdW5lIHN5c3RlbSwgcHJvdmlkaW5nIHByb3RlY3Rpb24gYWdhaWFudHMgdGhlIG1pY3JvYmVzIGFuZCBidWlsZGluZyBhIGhlYWx0aHkgYm9keS4=</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the answer is incomplete, the text is short</text:p>
          </table:table-cell>
          <table:table-cell office:value-type="float" office:value="0" table:style-name="ce1">
            <text:p>0</text:p>
          </table:table-cell>
          <table:table-cell table:number-columns-repeated="16376"/>
        </table:table-row>
        <table:table-row table:style-name="ro1">
          <table:table-cell office:value-type="float" office:value="915266" table:style-name="ce1">
            <text:p>915266</text:p>
          </table:table-cell>
          <table:table-cell office:value-type="string" table:style-name="ce1">
            <text:p>kazakh</text:p>
          </table:table-cell>
          <table:table-cell office:value-type="string" table:style-name="ce1">
            <text:p>Билет 29.&amp;lt;br /&amp;gt; 1.Нәрестелерде тиреоидтық гормондардын негізгі функциясы қандай?&amp;lt;br /&amp;gt; 2.6 айлық бала. Аймақ дәргері эндокринологқа жіберген.Бала әлсіз. Физикалық және нерв-психикалық дамуынан арта қалған. Деңе бітімі диспропорционалды, аяқ қолы қысқа. Терісі ақшыл мрамор тәрізді, қүрғақ. Қол аяқтарының саусақтары ісіңген. Қалқанша безі балаларда қандай функцияны атқарады?&amp;lt;br /&amp;gt;</text:p>
          </table:table-cell>
          <table:table-cell office:value-type="string" table:style-name="ce1">
            <text:p>IDEp0J3TmdGA0LXRgdGC0LXQu9C10YDQtNC1INGC0LjRgNC+0LjQtNGC0YvSmyDQs9C+0YDQvNC+0L0g0L7QuyDQojMg0YLRgNC40LnQvtC00YLQtdGA0L7QvdC40L0g0LbTmdC90LUg0KI0INCi0LjRgNC+0LrRgdC40L3QvdGW0qMg0LzQsNKj0YvQt9GLINC30L7RgCDQsdC+0LvRi9C/INGC0LDQsdGL0LvQsNC00YsuINCe0L3Ri9KjINC90LXQs9GW0LfQs9GWINGE0YPQvdC60YbQuNGP0LvQsNGA0YvQvdGL0qMg0LHRltGA0ZYg0L7RgNGC0LDQu9GL0psg0LbSr9C50LrQtSDQttKv0LnQtdGB0ZbQvdGW0qMg0LTQsNC80YPRiy4g0YLQuNGA0L7QuNC00YLRiyDQs9C+0YDQvNC+0L3QtNCw0YAg0LzQuNC00YvSoyDQtNCw0LzRg9GL0L3QtNCwINC80LDSo9GL0LfRiyDQt9C+0YAg0Y/Sk9C90Lgg0L7Qu9Cw0YAg0L3QtdC50YDQvtC90LTQsNGA0LTRi9KjINKb0LDQu9GL0L/RgtCw0YHRg9GL0L3QsCwg0LzQuNC10LvQuNC90LTQtdC90YMg0L/RgNC+0YbQtdGB0YLQtdGA0ZbQvdC1INGB0LjQvdCw0L/RgdGC0LDRgNC00LvRi9KjINC00LDQvNGD0YvQvdCwINGL0pvQv9Cw0Lsg0LXRgtC10LTRli4g0LPQvtGA0LzQvtC9INGC0LDQv9GI0YvQu9GL0pPRiyDRgtGD0YvQvdC00LDSk9Cw0L0g0LrQtdC30LTQtSDQsdCw0LvQsNC00LAg0LjQvdGC0LXQu9C10LrRgtGD0LDQu9C00Ysg0LTQsNC80YPQtNGL0qMg0LHSsdC30YvQu9GD0Ysg0LHQvtC70YPRiyDQvNKv0LzQutGW0L0uINCa0LXQu9C10YHRliDRhNGD0L3QutGG0LjRj9GB0Ysg06nRgdGDINC205nQvdC1INGE0LjQt9C40LrQsNC70YvSmyDQtNCw0LzRgyDRj9KT0L3QuCDRgdKv0LnQtdC60YLQtdGA0LTRltKjINOp0YHRg9GW0L3QtSDSm9Cw0qPSm9Cw0L3Ri9KjINKb0LDQu9GL0L/RgtCw0YHRg9GL0L3QsCDRi9Kb0L/QsNC7INC10YLQtdC00ZYuINCz0L7RgNC80L7QvSDQttC10YLQutGW0LvRltC60YHRltC3INCx0L7Qu9KT0LDQvdC00LAg0LHQsNC70LDQvdGL0qMg0LHQvtC50Ysg06nRgdGD0ZYg0LHQsNGP0YPQu9Cw0LnQtNGLLiDRgdC+0L3Ri9C80LXQvSDSm9Cw0YLQsNGAINC30LDRgiDQsNC70LzQsNGB0YMg0L/RgNC+0YbQtdGB0YLQtdGA0ZYg0Y/Sk9C90Lgg0LHQtdC70L7QuiDQvNCw0Lkg0LrTqdC80ZbRgNGB0YMg0LDQu9C80LDRgdGD0YssINC20YvQu9GDINGA0LXRgtGC0LXQu9GDLCDQttKv0YDQtdC6INKb0LDQvSDRgtCw0LzRi9GAINC20q/QudC10YHRltC90LUg0pvQsNC9INGC0LDQvNGL0YDQu9Cw0YDQtNGL0qMg0YLQvtC90YPRgdGL0L0g0LbTmdC90LUg0LDQudC90LDQu9GL0LzRi9C90LAg05nRgdC10YAg0LXRgtC10LTRliwg0LDRgSDSm9C+0YDRi9GC0YMg0LbSr9C50LXRgdGW0L3QtSDQsNGB0pvQsNC30LDQvSDRltGI0LXQuiDQttC+0LvQtNCw0YDRi9C90YvSoyDQvNC+0YLQvtGA0LjQutCw0YHRiyDQvNC10L0g0YTQtdGA0LzQtdC90YLRgtC10YAg0YHQtdC60YDQtdGG0LjRj9GB0YvQvSDRgNC10YLRgtC10LnQtNGWLiDQvdOZ0YDQtdGB0YLQtdC70LXRgNC00LUg0YLQuNGA0L7QuNC00YLRiyDQs9C+0YDQvNC+0L0g0LbQtdGC0LrRltC70ZbQutGB0ZbQtyDQsdC+0LvRgdCwINCx0LDQu9Cw0LTQsCDRgtGD0LAg0LHRltGC0LrQtdC9INCz0LjQv9C10YDRgtC10YDQuNC+0Lcg0LHQvtC70YPRiyDQvNKv0LzQutGW0L0g0YHQvtC7INKv0YjRltC9INC905nRgNC10YHRgtC10LvQtdGA0LPQtSDRgdC60YDQuNC90LjQvdCzINC20LDRgdCw0LvRi9C/INGC0LjRgNC+0LjQtNGC0Ysg0LPQvtGA0LzQvtC90L3Ri9KjINC00LXSo9Cz0LXQudGWINGC0LXQutGB0LXRgNGW0LvQtdC00ZYuIDIp0YHQuNC/0LDRgtGC0LDQu9KT0LDQvSDQsdC10LvQs9GW0LvQtdGA0LPQtSDSm9Cw0YDQsNC/INCx0ZbQtyDQs9C40L/QtdGA0YLQtdGA0LjQvtC30pPQsCDQutKv0LTRltC60YLQtdC90YMg0LzSr9C80LrRltC9LiDRgdC10LHQtdCx0ZYg0pvQsNC70pvQsNC90YjQsCDQsdC10LfRliDQttC10YLQutGW0LvRltC60ZbQtyDTqdC90LTRltGA0ZbQu9C80LXRg9GW0L3QtdC9INCx0LDQu9Cw0LTQsCDQvtGB0Ysg0YHQuNC80L/RgtC+0LzQtNCw0YAg0L/QsNC50LTQsCDQsdC+0LvSk9Cw0L0uINKa0LDQu9Kb0LDQvdGI0LAg0LHQtdC30ZYg0LzQtdGC0LDQsdC+0LvQuNC30LzQtNGWLCDTqdGB0YPQtNGWLCDQtNCw0LzRg9C00Ysg0YDQtdGC0YLQtdGD0LTQtSDRiNC10YjRg9GI0ZYg0YDTqdC7INCw0YLSm9Cw0YDQsNC00YsuINCW0LXRgtGW0YHQv9C10YPRiNGW0LvRltCz0ZYg0LHQvtC70pPQsNC9INC20LDSk9C00LDQudC00LAg0LTQsNC80YPQtNGL0qMg0LrQtdGI0ZbQs9GD0ZYsINKb0L7QuyDQsNGP0pvRgtCw0YDQtNGL0qMg0ZbRgdGW0L3Rg9GWINGB0LjRj9Kb0YLRiyDQsdGW0YDSm9Cw0YLQsNGAINCx0LXQu9Cz0ZbQu9C10YDQs9C1INOZ0LrQtdC70YPRliDQvNKv0LzQutGW0L0uINC+0L3RiyDQtdC80LTQtdGDINKv0YjRltC9INKb0LDQu9Kb0LDQvdGI0LAg0LHQtdC30ZbQvdGW0qMg0LTQtdKj0LPQtdC50ZbQvSDSm9Cw0LvQv9GL0L3QsCDQutC10LvRgtGW0YDRgyDSm9Cw0LbQtdGCLiDSmtCw0LvSm9Cw0L3RiNCwINCx0LXQt9GW0L3RltKjINGC0LDSk9GLINCx0ZbRgCDRhNGD0L3QutGG0LjRj9GB0Ysg0LrQsNC70YzRhtC40YLQvtC90LjQvSDQsdOp0LvRgy4g0L7QuyDQtdGA0YLQtSDQutC10LfQtNC10L0g0LHQsNGB0YLQsNC70LDQtNGLINC205nQvdC1INC/0L7RgdGC0L3QsNGC0LDQu9GM0LTRi9KbINC60LXQt9C10qPQtNC1INC806nQu9GI0LXRgNGWINCw0LfQsNGP0LTRiy4g0J7QuyDQsNKT0LfQsNC00LAg0LrQsNC70YzRhtC40LnQvNC10L0g0YTQvtGB0YTQvtGA0LTRi9KjINCw0LvQvNCw0YHRg9GL0L0g0YDQtdGC0YLQtdC50LTRli7QntC7INC/0LDRgNCw0YLQs9C+0YDQvNC+0L3Sk9CwINC60LXRgNGWINKb0YvQt9C80LXRgiDQsNGC0pvQsNGA0LDQtNGLLiDQr9KT0L3QuCDQsNKT0LfQsNC00LAg0LrQsNC70YzRhtC40LnQtNGW0qMg0LTQtdKj0LPQtdC50ZbQvSDRgtOp0LzQtdC90LTQtdGC0LXQtNGWLiA8YnIgLz4NC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Жауаптары толық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915634" table:style-name="ce1">
            <text:p>915634</text:p>
          </table:table-cell>
          <table:table-cell office:value-type="string" table:style-name="ce1">
            <text:p>kazakh</text:p>
          </table:table-cell>
          <table:table-cell office:value-type="string" table:style-name="ce1">
            <text:p>Билет 29.&amp;lt;br /&amp;gt; 1.Нәрестелерде тиреоидтық гормондардын негізгі функциясы қандай?&amp;lt;br /&amp;gt; 2.6 айлық бала. Аймақ дәргері эндокринологқа жіберген.Бала әлсіз. Физикалық және нерв-психикалық дамуынан арта қалған. Деңе бітімі диспропорционалды, аяқ қолы қысқа. Терісі ақшыл мрамор тәрізді, қүрғақ. Қол аяқтарының саусақтары ісіңген. Қалқанша безі балаларда қандай функцияны атқарады?&amp;lt;br /&amp;gt;</text:p>
          </table:table-cell>
          <table:table-cell office:value-type="string" table:style-name="ce1">
            <text:p>MS7SmtCw0LvSm9Cw0L3RiNCwINCx0LXQt9GWINGC0LDSmyDQsdC10LcsINC+0L3Ri9KjINC10LrRliDQttCw0pPRi9C90LTQsCDSsdGB0LDSmyDSm9Cw0LvSm9Cw0L3RiNCwINC80LDSo9GLINCx0LXQt9C00LXRgNGWINC+0YDQvdCw0LvQsNGB0LDQtNGLLiDQotC40YDQtdC+0LjQtNGC0YvSmyDQs9C+0YDQvNC+0L3QtNCw0YAg0L3TmdGA0LXRgdGC0LXQu9C10YDQtNC1INC90LXQs9GW0LfQs9GWINGE0YPQvdC60YbQuNGP0LvQsNGA0YvQvdCwINC60LDQu9GM0YbQuNC5INC205nQvdC1INGE0L7RgdGE0LDRgiDQsNC70LzQsNGB0YPRi9C9INGA0LXRgtGC0LXRgyDQttCw0YLQsNC00YsuINKa0LDQu9Kb0LDQvdGI0LAg0LHQtdC30ZbQvdC10L0g0LrQsNGM0YbQuNGC0L7QvdC40L0sINCiMyDQttOZ0L3QtSDQojQsINKb0LDQu9Kb0LDQvdGI0LAg0LzQsNKj0Ysg0LHQtdC30LTQtdGA0ZbQvdC10L0g0L/QsNGA0LDRgtCz0L7RgNC80L7QvSDRgdC10LrRltC70LTRliDQs9C+0YDQvNC+0L3QtNCw0YAg0LHTqdC70ZbQvdC10YLRltC9INCx0L7Qu9Cw0LTRiy4g0J7Qu9Cw0YAg0YHSr9C50LXQutGC0LXRgNC00ZbQvSDQvNC40L3QtdGA0LDQu9C00LDQvdGDINC/0YDQvtGG0LXRgdGW0L0g0YDQtdGC0YLQtdC/LCDSm9Cw0L3QtNCw0pPRiyDQutCw0LvRjNGG0LjQuSDQvNC10L0g0YTQvtGB0YTQvtGAINCw0LvQvNCw0YHRg9GL0L0g0pvQsNC80YLQsNC80LDRgdGB0YvQtyDQtdGC0LXQtNGWLiDQn9Cw0YDQsNGC0LPQvtGA0LzQvtC9INC205nQvdC1INC60LDQu9GM0YbQuNGC0L7QvdC40L0g0LHRltGAINCx0ZbRgNGW0L0g0YDQtdGC0YLQtdC/INC+0YLRi9GA0LDQtNGLLNGP0pPQvdC4INKb0LDQvdC00LAg0LHQvtGBINC60LDQu9GM0YbQuNC50LTRliDQutC10YDRliDQvNC40L3QtdGA0LDQu9C00LDQvdGD0pPQsCwg0LDQuyDRgdKv0LnQtdC60YLQtdCz0ZYg0LDRgNGC0YvSmyDQutCw0LvRjNGG0LjQudC00Ysg0pvQsNC90pPQsCDRiNGL0pPQsNGA0YMg0LDRgNKb0YvQu9GLINGA0LXRgtGC0LXQudC00ZYsINGA0LXRgtGC0LXRg9Cz0LUg0LrQsNC70YzRhtC40YLRgNC40L7Qu9C00YvSoywg0JQg0LLQuNGC0LDQvNC40L3RliDRgtGD0YvQvdC00YvRgdGLINOZ0YHQtdGA0ZYg0LHQsNGALtCf0LDRgNCw0YLQs9C+0YDQvNC+0L0g0LHSr9C50YDQtdC60YLRltC9INC00LjRgdGC0LDQu9GM0LTRiyDRgtKv0YLRltC60YjQtdC70LXRgNGWINCw0YDSm9GL0LvRiyDQutCw0LvRjNGG0LjQuSDQvNC10L0g0YTQvtGB0YTQvtGAINC60LXRgNGWINGB0ZbQvdGW0YDRltC70YPRltC9INGA0LXRgtGC0LXQudC00ZYuINCW0LDQu9C/0Ysg0LHSsdC7INCz0L7RgNC80L7QvdC00LDRgCDQsNKT0LfQsNC00LDSk9GLINC606nQv9GC0LXQs9C10L0g0L/RgNGG0LXRgdGC0LXRgNC00ZYg0YDQtdGC0YLQtdC/LCDQsdGW0YDQvdC10YjQtSDQvtGA0LPQsNC90LTQsNGA0pPQsCDTmdGB0LXRgCDQtdGC0LXRgtGW0L0g0LHQvtC70LDQtNGLLiDQojMgMyDQudC+0LQg0LDRgtC+0LzRi9C90LDQvSwg0LDQuyDQojQgNNC50L7QtCDQsNGC0L7QvNGL0L3QsNC9INGC0rHRgNCw0YLRi9C9INCz0L7RgNC80L7QvSDQsdC+0LvRi9C/INGC0rHRgNCw0LTRiy4g0KLQuNGA0L7QutGB0LjQvSDQttOZ0L3QtSDRgtGA0LjQudC+0LTRgtC40YDQvtC90LjQvSDQs9C+0YDQvNC+0L3QtNCw0YDRiyDQsNKT0LfQsNC90YvSoyDQttCw0LvQv9GLINOp0YHRg9GW0L3QtSDQttOZ0L3QtSDQtNCw0LzRg9GL0L3QsCDTmdGB0LXRgCDQutOp0YDRgdC10YLQtdC00ZYu0J7Qu9Cw0YDQtNGL0L0g0LbQtdGC0ZbRgdC/0LXRg9GWINCx0LDQu9Cw0L3Ri9C9INGE0LjQt9C40LrQsNC70YvSmyDQttOZ0L3QtSDQv9GB0LjRhdC40LrQsNC70YvSmyDQtNCw0LzRg9GL0L3Ri9KjINCw0YDRgtGC0LAg0pvQsNC70YPRi9C90LAg05nRgdC10YAg0LXRgtC10LTRli4g0prQsNC70pvQsNC90YjQsCDQsdC10LfRltC90ZbSoyDQttKx0LzRi9GB0YvQvSDSm9C+0YDSk9Cw0YMg0q/RiNGW0L0g0LHQsNC70LDQu9Cw0YDSk9CwINKb0L7RgdGL0LzRiNCwINGC0LDQvNCw0psg0LHQtdGA0LPQtdC90LTQtSDQudC+0LTRgtGLINKb0L7RgdGL0L8g0LHQtdGA0YMg0LzQsNKj0YvQt9C00Ysg0LHQvtC70YvQvyDRgtCw0LHRi9C70LDQtNGLLiDSmtCw0LvSm9Cw0L3RiNCwINCx0LXQtyDRhNGD0L3QutGG0LjRj9GB0Ysg0LHSsdC30YvQu9GD0Ysg0Y3QvdC00L7QutGA0LjQvdC00ZYg0L7RgdGC0LXQvtC/0LDRgtC40Y8sINC+0YHRgtC10L7QvNCw0LvRj9GG0LjRjyDRgdC10LrRltC70LTRliDQsdKx0LfRi9C70YvRgdGC0LDRgCDRgtGD0YvQvdC00LDRgtCw0LTRiy4g0JbQsNC70L/RiyDRgtC40YDQtdC+0LjQtNGC0Ysg0LPQvtGA0LzQvtC90LTQsNGAINC20LDRgSDQsdCw0LvQsNC90YvSoyDRgtC+0LvRi9Kb0pvQsNC90LTRiyDQtNCw0LzRi9C/INC20LXRgtGW0LvRg9GW0L3QtSDQttCw0YPQsNC/0YLRiyDQs9C+0YDQvNC+0L3QtNCw0YAg0LHQvtC70LLQvyDRgtCw0LHRi9C70LDQtNGLLiDQntC70LDRgNC00YvQvSDQs9C40L/QviDQvdC10LzQtdGB0LUg0LPQuNC/0LXRgNGE0YPQvdC60YbQuNGP0YHRiyDRgtKv0YDQu9GWINC60LXRgNGWINOZ0YHQtdGA0LvQtdGALCDRgdC+0L3Ri9KjINGW0YjRltC90LTQtSDRgdKv0LnQtdC6INKb0LDQvdKb0LAg0LbSr9C50LXRgdGWINCx0rHQt9GL0LvRi9GB0YLQsNGA0YssINC/0YHQuNGF0LjQutCw0LvRi9KbINC00LDQvNGDINCx0rHQt9GL0LvRi9GB0YLQsNGA0YssINC80LDSo9GL0LfQtNGLINC+0YDQs9Cw0L3QtNCw0YDQtNGL0L0g0LfQsNKb0YvQvNC00LDQu9GD0YvQvdCwINOZ0LrQtdC70LXQtNGWLjxiciAvPg0KMi7QkdCw0LvQsNC00LDSk9GLINCx0LDRgdGC0Ysg0YHQuNC80L/RgtC+0LzQtNCw0YDSk9CwINC90LDQt9Cw0YAg0LDRg9C00LDRgNGB0LDSmywg0pvQsNC70pvQsNC90YjQsCDQsdC10LfRliDQs9C+0YDQvNC+0L3QtNCw0YDRi9C90YvSoyDQttC10YLRltGB0L/QtdGD0ZbQvdGW0qMg0LHQtdC70LPRltC70LXRgNGWINCx0LDQudKb0LDQu9Cw0LTRiy4g0JTQtdC90LUg0LHRltGC0ZbQvNGWINC205nQvdC1INC90LXRgNCyLdC/0YHQuNGF0LjQutCw0LvRi9KbINC00LDQvNGD0Ysg0LDRgNGC0YLQsCDSm9Cw0LvRg9GLLCDRgtC10YDRltGB0ZbQvdGW0qMg0LzRgNCw0LzQvtGAINGC05nRgNGW0LfQtNGWINCx0L7Qu9GD0Ysg0LbTmdC90LUg0ZbRgdGW0L3Rg9C70LXRgCDQs9C40L/QvtGC0LjRgNC10L7Qt9C00YvSoyDQsdC10LvQs9GW0YHRliDQsdC+0LvRg9GLINC80q/QvNC60ZbQvS7SmtC+0Lsg0LDRj9KbINGW0YHRltC90YPRliDQsdKv0LnRgNC10Log0LbSsdC80YvRgdC90YvSoyDQtNKx0YDRi9GBINCw0YLSm9Cw0YDRi9C70LzQsNGD0YvQvdCwINCx0LDQudC70LDQvdGL0YHRgtGLLiDSmtCw0LvSm9Cw0L3RiNCwINCx0LXQt9GWINCx0LDQu9Cw0LvQsNGA0LTRi9KjINC00LDQvNGD0YvQvSDRgNC10YLRgtC10LnQtNGWLCDRgdKv0LnQtdC60YLRltC9INC80LjQvdC10YDQsNC70LTQsNC90YPRi9C9LCDQutCw0LvRjNGG0LjQuS3RhNC+0YHRhNC+0YAg0LDQu9C80LDRgdGD0YvQvSDRgNC10YLRgtC10LnQtNGWLtCR0rHQuyDRgNC10YLRgtC10YPQtNGW0L0g0LHSsdC30YvQu9GD0Ysg0LbQsNC70L/RiyDQtNC10L3QtSDQsdGW0YLRltC80ZYg0LHSsdC30YvQu9GD0YvQvdCwLNGP0pPQvdC4INGB0q/QudC10Log0LTQtdGE0L7RgNC80LDRhtC40Y/RgdGL0L3QsCwg0LHSr9C50YDQtdC6INCw0YDSm9GL0LvRiyDQutCw0LvRjNGG0LjQuSDQvNC10L0g0YTQvtGB0YTQvtGAINC60LXRgNGWINGB0ZbSo9GW0YDRltC70YPRliDQsdKx0LfRi9C70YPRi9C90LAg05nQutC10LvQtdC00ZYu0J3QtdGA0LIt0L/RgdC40YXQuNC60LDQu9GL0psg0LbTmdC90LUg0YTQuNC30LjQutCw0LvRi9KbINCw0YDRgtGC0LAg0pvQsNC70YPRiyDQojMg0LbTmdC90LUg0KI0INCz0L7RgNC80L7QvdC00LDRgNGLINC20LXRgtGW0YHQv9C10YPRltC90LXQvSDQsdC+0LvQsNC00Ysu0KLQtdGA0ZbQtNC10LPRliDQtNCw0pvRgtCw0YAg0pvQsNC70YzRhtC40Lkg0LTQtdKj0LPQtdC50ZbQvNC10L0g0LHQsNC50LvQsNC90YvRgdGC0Ysg0LHQvtC70YPRiyDQvNKv0LzQutGW0L0uINCg0LXRgtGC0LXRg9Cz0LUg0LbQsNGD0LDQv9GC0Ysg0LHQsNGB0YLRiyDQs9C+0YDQvNC+0L3QtNCw0YAg0L/QsNGA0LDRgtC40YDQtdC+0LjQtNGC0Ysg0LPQvtGA0LzQvtC9INC205nQvdC1INC60LDQu9GM0YbQuNGC0L7QvdC40L0g0LHQvtC70YvQvyDRgtCw0LHRi9C70LDQtNGLLiDSmtCw0LvSm9Cw0L3RiNCwINCx0LXQtyDQs9C+0YDQvNC+0L3QtNCw0YDRi9C90YvSoyDQvNOp0LvRiNC10YDRliDQsNGA0YLRg9GLINC00LAsINCw0LfQsNGO0Ysg0LTQsCDQt9C40Y/QvSDQsdC+0LvRi9C/INGC0LDQsdGL0LvQsNC00YsuINCQ0LfQsNC50pPQsNC9INC60LXQt9C00LUg0LPQuNC/0L7RgtC40YDQtdC+0LfQtNGLLCDQsNC7INC606nQsdC10LnRgdC1INGC0LjRgNC10L7RgtC+0LrRgdC40LrQvtC3INCx0LXQu9Cz0ZbQu9C10YDRltC9INCx0LDQudKb0LDQudGC0YvQvSDQsdC+0LvQsNC80YvQty4=</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Жауабында қате жіберілген</text:p>
          </table:table-cell>
          <table:table-cell office:value-type="float" office:value="0" table:style-name="ce1">
            <text:p>0</text:p>
          </table:table-cell>
          <table:table-cell table:number-columns-repeated="16376"/>
        </table:table-row>
        <table:table-row table:style-name="ro1">
          <table:table-cell office:value-type="float" office:value="1066866" table:style-name="ce1">
            <text:p>1066866</text:p>
          </table:table-cell>
          <table:table-cell office:value-type="string" table:style-name="ce1">
            <text:p>kazakh</text:p>
          </table:table-cell>
          <table:table-cell office:value-type="string" table:style-name="ce1">
            <text:p>Билет 29.&amp;lt;br /&amp;gt; 1.Нәрестелерде тиреоидтық гормондардын негізгі функциясы қандай?&amp;lt;br /&amp;gt; 2.6 айлық бала. Аймақ дәргері эндокринологқа жіберген.Бала әлсіз. Физикалық және нерв-психикалық дамуынан арта қалған. Деңе бітімі диспропорционалды, аяқ қолы қысқа. Терісі ақшыл мрамор тәрізді, қүрғақ. Қол аяқтарының саусақтары ісіңген. Қалқанша безі балаларда қандай функцияны атқарады?&amp;lt;br /&amp;gt;</text:p>
          </table:table-cell>
          <table:table-cell office:value-type="string" table:style-name="ce1">
            <text:p>MS7QltCw0qPQsCDRgtGD0LPQsNC9INC90LDRgNC10YHRgtC10LTQtdCz0ZYg0pvQsNC70pvQsNC90YjQsCDQsdC10LfRltC90ZbSoyDQs9C+0YDQvNC+0L3QtNCw0YDRiyAo0YLQuNGA0LXQvtC40LTRgtGLINCz0L7RgNC80L7QvdC00LDRgCkg0YLQuNGA0L7QutGB0LjQvSDQojQg0LbTmdC90LUg0YLRgNC40LnQvtC00YLQuNGA0L7QvdC40L0g0KIzINOp0LzRltGA0LTRltKjINCw0LvSk9Cw0YjQutGLINC60q/QvdC00LXRgNGLINC80LXQvSDQsNC/0YLQsNC70LDRgNGL0L3QtNCwINC80LDSo9GL0LfQtNGLINGA06nQuyDQsNGC0pvQsNGA0LDQtNGLLiDQntC70LDRgCDQvdOZ0YDQtdGB0YLQtdC90ZbSoyDSm9Cw0LvRi9C/0YLRiyDTqdGB0YPRliDQvNC10L0g0LTQsNC80YPRi9C9INKb0LDQvNGC0LDQvNCw0YHRi9C3INC10YLQtdGC0ZbQvSDQvdC10LPRltC30LPRliDQvNC10YLQsNCx0L7Qu9C40LfQvNC00ZbQuiDQttOZ0L3QtSDRhNC40LfQuNC+0LvQvtCz0LjRj9C70YvQuiDQv9GA0L7RhtC10YHRgtC10YDQtNGLINGA0LXRgtGC0LXQudGC0ZbQvSDQs9C+0YDQvtC80L7QvdC00LDRgCDQsdC+0LvRi9C/INGC0LDQsdGL0LvQsNC00YsuINKa0LDQu9Kb0LDQvdGI0LAg0LHQtdC3INCz0L7RgNC80L7QvdC00LDRgNGL0L3Ri9KjINC90LXQs9GW0LfQs9GWINKb0YvQt9C80LXRgtGC0LXRgNGWOiAqINCd0LXQudGA0L7Qv9GB0LjRhdC40LrQsNC70YvSmyDQtNCw0LzRg9C00Ysg0YDQtdGC0YLQtdGDOiDQnNC40LXQu9C40L3QuNC30LDRhtC40Y86INCi0LjRgNC10L7QuNC00YLRiyDQs9C+0YDQvNC+0L3QtNCw0YAg0LbSr9C50LrQtSDRgtCw0LvRiNGL0pvRgtCw0YDRi9C9INC80LjQtdC70LjQvSDSm9Cw0LHRi9Kb0YjQsNGB0YvQvNC10L0g0pvQsNC80YLQsNC80LDRgdGL0Lcg0LXRgtC10YPQs9C1INGL0pvQv9Cw0Lsg0LbQsNGB0LDQudC00YsuINCR0rHQuyDQsdCw0LvQsNC90YvSoyDQttKv0LnQutC1INC20q/QudC10YHRltC90ZbSoyDRgtC+0LvRi9KbINKb0LDQu9GL0L/RgtCw0YHRg9GL0L3QsCDQutCw0LbQtdGCLiDQnNC40LTRi9KjINC00LDQvNGD0Ys6INCc0LjQtNGL0qMg06nRgdGD0ZYg0LzQtdC9INC60L7Qs9C90LjRgtC40LLRgtGWINGE0YPQvdC60YbQuNGP0LvQsNGA0LTRi9KjINKb0LDQu9GL0L/RgtCw0YHRg9GLINKv0YjRltC9INGC0LjRgNC10L7QuNC00YLRiyDQs9C+0YDQvNC+0L3QtNCw0YAg0LzQsNKj0YvQt9C00Ysg0YDTqdC70LTRliDQsNC70LDQtNGLLiDQltCw0qPQsCDRgtGD0pPQsNC9INC905nRgNC10YHRgtC10LvQtdGA0LTQtSDQvtC70LDRgNC00YvSoyDQttC10YLRltGB0L/QtdGD0YjRltC70ZbQs9GWINGC0YPQsCDQsdGW0YLQutC10L0g0LPQuNC/0L7RgtC40YDQtdC+0Lcg0LbQsNKT0LTQsNC50YvQvdC00LAg0LjQvdGC0LXQu9C10LrRgtGD0LDQu9C00YvSmyDQsNGA0YLRgtCwINKb0LDQu9GD0pPQsCDRgdC+0pvRgtGL0YDRg9GLINC80q/QvNC60ZbQvS4gKtCt0L3QtdGA0LPQtdGC0LjQutCw0LvRi9KbINCw0LvQvNCw0YHRg9C00Ysg0YDQtdGC0YLQtdGDOiDQndC10LPRltC30LPRliDQvNC10YLQsNCx0L7Qu9C40LfQvCDQtNC10qPQs9C10LnRltC9INCw0YDRgtGC0YvRgNGDOiDQotC40YDQtdC+0LjQtNGC0Ysg0LPQvtGA0LzQvtC90LTQsNGAINC00LXQvdC1INC20LDRgdGD0YjQsNC70LDRgNGL0L3Ri9KjINGN0L3QtdGA0LPQuNGPINOp0L3QtNGW0YDRgyDQtNC10qPQs9C10LnRltC9INC20L7Sk9Cw0YDQu9Cw0YLQsNC00YsuINCR0rHQuyDQv9GA0L7RhtC10YHRgtC10YAg0L3TmdGA0LXRgdGC0LXQvdGW0qMg06nRgdGD0ZYg0LzQtdC9INOp0LzRltGA0YjQtdKj0LTRltCz0ZYg0q/RiNGW0L0g0LrQsNC20LXRgi4g0JbRi9C70YMg06nQvdC00ZbRgNGDOiDQltCw0qPQsCDRgtGD0pPQsNC9INC905nRgNC10YHRgtC10LvQtdGA0LTQtSDQttGL0LvRgyDRgNC10YLRgtC10LvRg9GWINGC0L7Qu9GL0psg0LbQtdGC0ZbQu9C80LXQs9C10L0uINCi0LjRgNC10L7QuNC00YLRiyDQs9C+0YDQvNC+0L3QtNCw0YAg0L7RgNCz0LDQvdC40LfQvNC90ZbSoyDQttGL0LvRgyDTqdC90LTRltGA0YPRltC9INKb0LDQvNGC0LDQvNCw0YHRi9C3INC10YLQtdC00ZYsINOZ0YHRltGA0LXRgdC1INCw0LvSk9Cw0YjSm9GLINC60q/QvdC00LXRgNC00LUg0LPQuNC/0L7RgtC10YDQvNC40Y/QvdGL0qMg0LDQu9C00YvQvSDQsNC70YMg0q/RiNGW0L0g0LzQsNKj0YvQt9C00YsuICrTqNGB0YMg0LzQtdC9INGC0ZbQvdC00LXRgNC00ZbSoyDQttC10YLRltC70YPRltC9INGA0LXRgtGC0LXRgzog0KHSr9C50LXQuiDQttKv0LnQtdGB0ZY6INKa0LDQu9Kb0LDQvdGI0LAg0LHQtdC3INCz0L7RgNC80L7QvdC00LDRgNGLINGB0q/QudC10Log0YLRltC90LTQtdGA0ZbQvdGW0qMg0pvQsNC70YvQv9GC0LDRgdGD0YvQvSDQttOZ0L3QtSDQvtC70LDRgNC00YvSoyDQvNC40L3QtdGA0LDQu9C00LDQvdGD0YvQvSDSm9Cw0LzRgtCw0LzQsNGB0YvQtyDQtdGC0LXQtNGWLiDQkdKx0LvRiNGL0pvQtdGC0YLQtdGAOiDQkdKx0LvRiNGL0pvQtdGCINKx0LvQv9Cw0LvQsNGA0YvQvdGL0qMg0LTQsNC80YPRiyDQvNC10L0g0L7Qu9Cw0YDQtNGL0qMg0YTQuNC30LjQvtC70L7Qs9C40Y/Qu9GL0psg0pvRi9C30LzQtdGC0ZbQvSDRgNC10YLRgtC10LnQtNGWLiAq0JbSr9GA0LXQuiDSm9Cw0L3RgtCw0LzRi9GAINC20q/QudC10YHRltC90LUg05nRgdC10YDRljog0JbSr9GA0LXQuiDQttC40YvRgNGL0LvRg9GL0L0g0YDQtdGC0YLQtdGDOiDQotC40YDQtdC+0LjQtNGC0Ysg0LPQvtGA0LzQvtC90LTQsNGAINC20q/RgNC10Log0LbQuNGL0YDRi9C70YMg0LbQuNGW0LvRltCz0ZbQvdC1INC205nQvdC1INKb0LDQvSDSm9GL0YHRi9C80YvQvdCwINOZ0YHQtdGAINC10YLQtdC00ZYuINKa0LDQvSDQsNC50L3QsNC70YvQvNGLOiDQntC70LDRgNC00YvSoyDTmdGB0LXRgNGW0LzQtdC9INC20q/RgNC10Log0pvQsNC90YLQsNC80YvRgCDQttKv0LnQtdGB0ZbQvdGW0qMg0LbSsdC80YvRgdGLINC20LDSm9GB0LDRgNGL0L8sINGC0ZbQvdC00LXRgNCz0LUg0L7RgtGC0LXQs9GLINC80LXQvSDSm9C+0YDQtdC60YLRltC6INC30LDRgtGC0LDRgCDQttGC0LrRltC30ZbQu9C10LTRli4gKtCQ0YHSm9Cw0LfQsNC9INGW0YjQtdC6INC20L7Qu9GL0L3QsCDTmdGB0LXRgNGWOiDQkNGB0pvQsNC30LDQvSDRltGI0LXQuiDQttKv0LnQtdGB0ZbQvdGW0qMg0LzQvtGC0L7RgNC40LrQsNGB0YvQvSDQttOZ0L3QtSDRhNC10YDQvNC10L3RgtGC0LXRgNC00ZbSoyDRgdC10LrRgNC10YbQuNGP0YHRi9C9INGA0LXRgtGC0LXQudC00ZYuINCd05nRgNC10YHRgtC10LvQtdGA0LTQtSDRgtCw0pPQsNC80L3Ri9KjINGB0ZbSo9GW0YDRltC70YPRliDQvNC10L0g06nSo9C00LXQu9GD0ZYg0q/RiNGW0L0g0pvQsNC20LXRgi4gKtCY0LzQvNGD0L3QtNGL0psg0LbSr9C50LXQvdGWINKb0L7Qu9C00LDRgzog0prQsNC70pvQsNC90YjQsCDQsdC10Lcg0LPQvtGA0LzQvtC90LTQsNGA0Ysg0LjQvNC80YPQvdC00YvSmyDQttKv0LnQtdC90ZbSoyDQttC10YLRltC70YPRltC90LUg0LbTmdC90LUg0LjQvdGE0LXQutGG0LjRj9C70LDRgNC80LXQvSDQutKv0YDQtdGB0YMg0pvQsNCx0ZbQu9C10YLRltC90LUg0YvSm9C/0LDQuyDQtdGC0LXQtNGWLiAyINGB0rHRgNCw0pvSm9CwINC60LXQu9C10YLRltC9INCx0L7Qu9GB0LDQvCwg0LbQsNC70L/RiyDSm9Cw0LvSm9Cw0L3RiNCwINCx0LXQt9GWINC+0Lsg0LzQvtC50YvQvdC90YvSoyDQsNC70LTRi9Kj0pPRiyDQsdC10YLRltC90LTQtSDQvtGA0L3QsNC70LDRgdKb0LDQvSwg0L/RltGI0ZbQvdGWINC606nQsdC10LvQtdC60LrQtSDSsdKb0YHQsNGBLCDRltGI0LrRliDRgdC10LrRgNC10YbQuNGPINCx0LXQt9GWLiDQndC10LPRltC30LPRliDQs9C+0YDQvNC+0L3QtNCw0YDRiyDQotC40YDQvtC60YHQuNC9KNKb0LDQvdC00LAg0LrTqdC/INCx0ZbRgNCw0psg0LHQtdC70YHQtdC90LTRltC70ZbQs9GWINGC06nQvNC10L0pLCDQotGA0LjQudC+0LTRgtC40YDQvtC90LjQvSjQsdC10LvRgdC10L3QtNGWINGE0L7RgNC80LAg0YI0INC/0LXQvSDQsdCw0YPRi9GA0LTQsCwg0LHSr9C50YDQtdC60YLQtSwg0LHSsdC70YjRi9Kb0LXRgtGC0LUg0YLSr9C30ZbQu9C10LTRli4pLCDQmtCw0LvRjNGG0LjRgtC+0L3QuNC9KNC60LDQu9GM0YbQuNC5LdGE0L7RgdGE0L7RgCDQsNC70LzQsNGB0YPRi9C90LAg05nRgdC10YAg0LXRgtC10LTRliwg0L7RgdGC0LXQvtC60LvQsNGB0YIg0LHQtdC70YHQtdC90LTRltC70ZbQs9GW0L0g0YLQtdC20LXQudC00ZYpLtKa0YvQt9C80LXRgtGC0LXRgNGW0L3QtSDQutGW0YjQutC10L3QtSDSm9C+0YHQsCDQutC10YLRgdC10LwsICrQltCw0YHRg9GI0LDQu9GL0psg0LzQtdGC0LDQsdC+0LvQuNC30LzQtNGWINGA0LXRgtGC0LXRgzog0JPQvtGA0LzQvtC90LTQsNGAINC20LDRgdGD0YjQsCDRltGI0ZbQvdC00LXQs9GWINC80LjRgtC+0YXQvtC90LTRgNC40Y/Qu9Cw0YDSk9CwINOZ0YHQtdGAINC10YLRltC/LCDQkNGC0YQg0YLSr9C30ZbQu9GD0ZbQvSDQsNGA0YLRgtGL0YDQsNC00YsuINCi0LXQvNC/0LXRgNCw0YLRg9GA0LDQvdGLINGC0L7RgtGL0pPRgyDRgtC+0YLRi9Kb0YHRi9C30LTQsNC90YMg0YDQtdCw0LrRhtC40Y/Qu9Cw0YDRi9C9LCDRgtGL0L3Ri9GBINCw0LvRgyDQttC40ZbQu9GW0LPRltC9INGA0LXRgtGC0LXQudC00ZYuICrQntGA0YLQsNC70YvSmyDQttKv0LnQutC1INC20q/QudC10YHRltC90ZbSoyDQtNCw0LzRg9GLOiDQndC10LnRgNC+0L3QtNCw0YDQtNGL0qMg0LTQuNGE0YTQtdGA0LXQvdGG0LjQsNGG0LjRj9GB0YssINC80LjQtdC70LjQvdC10LfQsNGG0LjRj9GB0YssINGB0LjQvdCw0L/RgdGC0LDRgNC00YvSoyDSm9Cw0LvRi9C/0YLQsNGB0YPRiyDSr9GI0ZbQvSDSm9Cw0LbQtdGCLiDQldGA0YLQtSDQttCw0YHRgtCwINC20LXRgtGW0YHQv9C10YHQtSwg0pvQsNC50YLRi9C80YHRi9C3INC40L3RgtC10LvQu9C10LrRgtGD0LDQu9C00YvSmyDQutC10LzRltGB0YLRltC60YLQtdGAINC00LDQvNC40LTRiyjQutGA0LXRgtC40L3QuNC30LwpLiAq0KTQuNC30LjQutCw0LvRi9KbINC205nQvdC1INGB0q/QudC10Log06nRgdGW0LzRltC9INKb0LDQvNGC0LDQvNCw0YHRi9C3INC10YLRgzog0KHQvtC80LDRgtC+0YLRgNC+0L/RgtGLINCz0L7RgNC80L7QvdC90YvSoyDTmdGB0LXRgNGW0L0g0LrSr9GI0LXQudGC0LXQtNGWLiDQodKv0LnQtdC6INGI0LXQvNGW0YDRiNC10Log0YLRltC90LTQtdGA0ZbQvdGW0qMg0L/RgNC+0LvQuNGE0LXRgNCw0YbQuNGP0YHRi9C9LCDRjdC/0LjRhNC40LfQsNGA0LvRiyDTqdGB0YPQtNGWINGA0LXRgtGC0LXQudC00ZYuINCW0q/RgNC10Log0pvQsNC90YLQsNC80YvRgCDQttKv0LnQtdGB0ZbQvdC00LUg0JbSr9GA0LXQuiDQttC40YvRgNGL0LvRg9GL0L0sINC80LjQvdGD0YLRgtGL0psg0LrTqdC70LXQvNC00ZYsINC20q/RgNC10Log0LvQsNKb0YLRi9GA0YvRgdGL0L0g0LDRgNGC0YLRi9GA0LDQtNGLLiDQltC10YLQutGW0LvRltC60YHRltC3INC20LDSk9C00LDQudC00LA6INCx0YDQsNC00LjQutCw0YDQtNC40Y8sINC20q/RgNC10Log0YLSsdGB0YvQvdC00LAg05nQu9GB0ZbQt9C00ZbQuiwg0LPQuNC/0L7RgtC+0L3QuNGPINC00LDQvNC40LTRiy4gKtCh0YMg0YLSsdC3INCw0LvQvNCw0YHRg9GL0L3QtNCwINGC0ZbQvdC00ZbQuiDQtNGA0LXQvdCw0LbRiywg0LrQsNC/0LjQu9C70Y/RgNC70YvSmyDTqdGC0LrRltC30LPRltGI0YLRltC60YLRliDRgNC10YLRgtC10LnQtNGWLiDQk9C40L/QvtGC0LjRgNC10L7QtyDQutC10LfRltC90LTQtSDQvNC40LrRgdC10LTQtdC80LAg0L/QsNC50LTQsCDQsdC+0LvQsNC00YsuINCQ0Lsg0LrQu9C40L3QuNC60LDQu9GL0psg0LrTqdGA0ZbQvdGW0YHRgtC10YDQs9C1INC60LXQu9C10YLRltC9INCx0L7Qu9GB0LDQvCwg0LHSsdC7OiDRgtGD0LAg0LHRltGC0LrQtdC9INCz0LjQv9C+0YLQuNGA0LXQvtC3LiDQkdKx0Lsg0LHQsNC70LDQvdGL0qMg0pvQsNC70pvQsNC90YjQsCDQsdC10LfRliDQttC+0psg0L3QtdC80LXRgdC1INC00LDQvNGL0LzQsNKT0LDQvSwg0L3QtSDQvtC90YvSoyDQs9C+0YDQvtC80L3QtNCw0YDRiyDRgdC40L3RgtC10LfQtNC10LvQvNC10LnRgtGW0L0g0LDRg9GL0YAg0Y3QvdC00L7QutGA0LjQvdC00ZbQuiDQttCw0pPQtNCw0LkuINCV0LPQtdGAIDItNCDQsNC/0YLQsCDRltGI0ZbQvdC00LUg0LDQvdGL0pvRgtCw0LvQvNCw0YHQsCwg0LDSm9GL0Lsg0L7QuSDQttOZ0L3QtSDRhNC40LfQuNC60LDQu9GL0psg0LTQsNC80YMg0YLQtdC20LXQu9GW0YHRliDSm9Cw0LnRgtGL0LzRgdGL0Lcg0LHQvtC70LDQtNGLLiDQndOZ0YDQtdGB0YLQtdC70ZbQuiDQutC10LfQtdKj0LTQtdCz0ZYg0LHQtdC70LPRltC70LXRgDog0rDQt9Cw0psg0YHQsNGA0pPQsNGOINGP0pPQvdC4INC90LXQvtC90LDRgtCw0LvRjNC00Ysg0LPQuNC/0LXRgNCx0LjQu9C40YDRg9Cx0LjQvdC10LzQuNGPOyDSmtCw0LvRi9KjLCDTqdGA0LXRgdC60LXQuyDQsdC10YIt05nQu9C/0LXRgjsg0q7Qu9C60LXQvSDRgtGW0Ls7INCc0rHRgNC90Ysg0LbQsNC70L/QsNKbLCDQtdGA0ZbQvdC00LXRgNGWINKb0LDQu9GL0qM7INKa0rHRgNKT0LDSmyzQvNOZ0YDQvNOZ0YAg0YDQtdKj0LTRliDRgtC10YDRljsg0KjQsNC80LDQtNCw0L0g0YLRi9GBINGC0YvQvdGL0YjRgtGL0pssINC10LzRg9C00LXQvSDQsdCw0YEg0YLQsNGA0YLRgzsg0IbRiCDSm9Cw0YLRgzsg0JTQsNGD0YHRiyDSm9Cw0YDQu9GL0pPRi9C/INGI0YvSk9GD0YvQvdC00LAg0LDQudGC0YHQsNKbINCx0L7Qu9Cw0LTRizsg0q7Qu9C60LXQvSDQtdKj0LHQtdC6INKx0LfQsNKbINC20LDQsdGL0LvQvNCw0LnQtNGLLiA2INCw0LnQtNCw0L0g0LrQtdC50L3Qs9GWINCx0LXQu9Cz0ZbQu9C10YDRljog0J/RgdC40YXQvtC80L7RgtGA0LvRi9KbINC205nQvdC1INGB06nQudC70LXRgyDQtNCw0LzRg9GLINGC0LXQttC10LvQtdC00ZYg0Y/Sk9C90Lgg0LHQsNGB0YvQvSDQutC10Ygg0LrTqdGC0LXRgNGDLNC+0YLRi9GA0LAg0LDQu9C80LDRgywg0LHRi9C70LTRi9GAINCx0L7Qu9C80LDRg9GLOyDQpNC40LfQuNC60LDQu9GL0psg0LDRgNGC0YLQsCDSm9Cw0LvRgzog0LTQtdC90LUg0LHRltGC0ZbQvNGWINC00LjRgdC/0YDQvtC/0L7RgNGG0LjQvtC90LDQu9C00YssINCw0Y/SmyDSm9C+0Lsg0pvRi9GB0pvQsCzRgtKx0LvSk9CwINC60LXSozsg0IbRgdGW0L3Rg9C70LXRgDog0pvQsNCx0LDSm9GC0YvSoywg0YLQsNCx0LDQvdC90YvSoywg0LDQu9Cw0pvQsNC90L3Ri9KjINC/0LDRgdGC0L7Qt9C00YvQu9GL0pPRizsg0prQvtC70LTRi9KjINGB0LDQu9Kb0YvQvdC00YvSk9GLLNGC0LXRgNGW0L3RltKjINC006nRgNC10LrRltC70ZbQs9GWOyDQltKv0YDQtdC6INGB0L7Sk9GL0YHRi9C90YvSoyDQsdCw0Y8g0LHQvtC70YPRizsg0JPQuNC/0L7RgtC10YDQvNC40Y8sINCz0LjQv9C+0YLQvtC90LjRjy4g0JfQtdGA0YLRhdCw0L3QsNC70YvSmyDQsdC10LvQs9GW0LvQtdGA0ZbQvdC1INC60LXQu9C10YLRltC9INCx0L7Qu9GB0LDQvDog0LbQvtKT0LDRgNGLIFRTSCDRgtC40YDQtdC+0YLRgNC+0L/RgtGLINCz0L7RgNC+0LzQvtC9LCDQojMs0KI0INGC06nQvNC10L0uINCd05nRgNC10YHRgtC10LvRltC6INGB0LrRgNC40L3QuNC90LPRgtC1INCw0L3Ri9Kb0YLQsNC70LDQtNGLLiDQltCw0LvQv9GLINC+0YHRiyDQutC70LjQvdC40LrQsNC70YvSmyDQutOp0YDRltC90ZbRgdGC0LXRgNC00ZbSoyDQtNCw0LzRgyDQvNC10YXQsNC90LjQt9C80ZbQvdC1INGC0L7Sm9GC0LDQu9CwINC60LXRgtGB0LXQvCwg0prSsdGA0pPQsNKbLCDQvNOZ0YDQvNOZ0YAg0YDQtdKj0LTRliDRgtC10YDRliDQttOZ0L3QtSDRltGB0ZbQvdGD0LvQtdGAOiDQojMs0KI0INC20LXRgtGW0YHQv9C10LPQtdC90LTQtSwg0YLRltC90LTQtdGA0LTQtdCz0ZYg0LPQu9C40LrQvtC30LDQvNC40L3QvtCz0LvQuNC60LDQvdC00LDRgCDTmdGB0ZbRgNC10YHQtSDQs9C40LDQu9GD0YDQvtC9INKb0YvRiNKb0YvQu9GLINGL0LTRi9GA0LDQvNCw0Lkg0YHRg9C00Ysg0rHRgdGC0LDQvyDSm9Cw0LvQsNC00YsuINCa0L7Qu9C70L7QuNC00YLRiyDRltGB0ZbQvdGDINC00LDQvNC40LTRiywg0L7QuyDQttKx0LzRgdCw0pssINGI0rHSo9Kb0YvRgCDSm9Cw0LvQtNGL0YDQvNCw0LnRgtGL0L0g0L3QtdC/0LDRgdGC0L7Qt9C00Ysg0ZbRgdGW0L3Rg9C70LXRgC4g0JvQtdGC0LDRgNCz0LjRjyDRj9KT0L3QuCDQttCw0LvQv9GLINOZ0LvRgdGW0LfQtNGW0LrRgtGW0qMg0LzQtdGF0LDQvdC40LfQvNGW0L3QtSDQutC10LvQtdGC0ZbQvSDQsdC+0LvRgdCw0LwsINKb0LDQu9Kb0LDQvdGI0LAg0LHQtdC30LTRltKjINCz0L7RgNC80L7QvdC00LDRgNGLINC80LjQtNGL0qMg0L3QtdC50YDQvtC90LTRi9KbINCx0LXQu9GB0LXQvdC00ZbQu9GW0LPRltC9INCw0YDRgtGC0YvRgNCw0LTRiywg0LPQu9GO0LrQvtC30LDQvdGLINKb0L7Qu9C00LDQvdGD0pPQsCwg0L7RgtGC0LXQs9GW0L0g0YLSsdGC0YvQvdGD0pPQsCDRi9Kb0L/QsNC7INC10YLQtdC00ZYuINCe0LvQsNGA0LTRi9KjINC20LXRgtGW0YHQv9C10YPRiNGW0LvRltCz0ZYg0L3QtdC50YDQvtC90LTQsNGA0LTQsCDRjdC90LXRgNCz0LXRgtC40LrQsNC70YvSmyDRgtCw0L/RiNGL0LvRi9KbINGC0YPRi9C90LTQsNGC0YvQvywg0L/RgdC40YXQuNC60LDQu9GL06kg0LbTmdC90LUg0YHQvtC80LDRgtC40LrQsNC70YvSmyDQsdC10LvRgdC10L3QtNGW0LvRltC60YLRliDRgtC10LbQtdC50LTRli4g0J/RgdC40YXQvtC80L7RgtC+0YDQu9GL0psg0LTQsNC80YPQtNGL0qMg0YLQtdC00LXQu9GD0ZY6INKa0LDQu9Kb0LDQvdGI0LAg0LHQtdC3INCz0L7RgNC80L7QvdC00LDRgNGLINC80Lgg0LTQsNC80YPRi9C90LAg0LbQsNGD0LDQv9GC0YsuINCe0LvQsNGAINGB0LjQvdCw0L/RgSDRgtKv0LfRltC70YPRltC90LUsINC80LjQtdC70LjQvdC40LfQsNGG0LjRj9KT0LAg0LbTmdC90LUg0L3QtdC50YDQvtC90LTQsNGA0LTRi9KjINC80LjQs9GA0LDRhtC40Y/RgdGLINC80LXQvSDQtNC40YTRhNC10YDQtdC90YbQuNCw0YbQuNGP0YHRiyDRgdC40Y/Sm9GC0Ysg0L/RgNC+0YbQtdGB0YLQtdGA0LTRliDRgNC10YLRgtC10LnQtNGWLiDQk9C+0YDQvNC+0L3QtNCw0YAg0LbQtdGC0ZbRgdC/0LXRgdC1INC90LXQudGA0L7QvdC00LDRgNC00YvSoyDQsNGA0LDRgdGL0L3QtNCw0pPRiyDQsdCw0LnQu9Cw0L3Ri9GB0YLRi9KjINC00LDQvNGD0Ysg0YLQvtKb0YLQsNC50LTRiywg0LHSsdC7INGB06nQudC70LXRg9C00ZbSoywg0pvQvtC30pPQsNC70YvRgdGC0YvSoyDRgtCw0L3Ri9C80L3Ri9KjINGC0LXQttC10LvRg9GW0L3QtSDTmdC60LXQu9GW0L8g0YHQvtKb0YLRi9GA0LDQtNGLLiDQlNC40YHQv9GA0L7Qv9C+0YDRhtC40L7QvdCw0LvQtNGLINC00LXQvdC1INCx0ZbRgtGW0LzRliwg0LDRj9KbINKb0L7QuyDSm9GL0YHSm9CwINCx0L7Qu9GD0Ys6INKa0LDQu9Kb0LDQvdGI0LAg0LHQtdC30ZYg0YHQvtC80LDRgtC+0YLRgNC+0L/RgtGLINCz0L7RgNC80L7QvdC00L3Ri9KjINOZ0YHQtdGA0ZbQvSDQutKv0YjQtdC50YLQtdC00ZYuINCe0LvQsNGAINGB0q/QudC10LrRgtGW0qMg0Y3Qv9C40YTQuNC30LDRgNC70YvSmyDQsNC50LzQsNKT0YvQvdC00LDSk9GLINGF0YXQvtC90LTRgNC+0YbQuNGC0YLQtdGA0LTRltKjINC/0YDQvtC70LjRhNC10YDQsNGG0LjRj9GB0Ysg0LzQtdC9INC+0YHRgtC10L7Qs9C10L3QtdC30ZbQvSDRi9C90YLQsNC70LDQvdC00YvRgNCw0LTRiy4g0JPQvtGA0L7QvNC9INC20LXRgtGW0YHQv9C10YHQtSDRgdOZ0LnQutC10YHRltC90YjQtSDQqNC10LzRltGA0YjQtdC6INC60LvQtdGC0LrQsNC70LDRgNGL0L3Ri9KjINC/0YDQvtC70LjRhNC10YDQsNGG0LjRj9GB0Ysg0LHQsNGP0YPQu9Cw0LnQtNGLLCDSmtC+0Lsg0LDRj9Kb0YLRi9KjINOp0YHRg9GWINGC0LXQttC10LvQtdC00ZYuICDQldC80ZbQvdC1INC60LXQu9C10YLRltC9INCx0L7Qu9GB0LDQvDog0JvQtdCy0L7RgtC40YDQvtC60YHQuNC9KEwt0YLQuNGA0L7QutGB0LjQvSkt06nQvNGW0YAg0LHQvtC50YssINC60q/QvdC00LXQu9GW0LrRgtGWINGC0LDSo9C10YDRgtC10qMg0LDRiNKb0LDRgNGL0L3Sk9CwLiDQlNC+0LfQsNGB0Ysg0LHQsNC70LDQvdGL0qMg0LbQsNGB0YvQvdCwLCDRgdCw0LvQvNCw0pPRi9C90LAg0LbTmdC90LUgVFNIL1Q0INC00LXSo9Cz0LXQudGW0L3QtSDQsdCw0LnQu9Cw0L3Ri9GB0YLRiy4g0JDQu9KT0LDRiNKb0Ysg0LXQutGWINCw0L/RgtCw0LTQsCDQsdCw0YHRgtCw0LvRgdCwLCDQsdC+0LvQttCw0Lwg0LbQsNKb0YHRiywg0LrQtdGI0ZbQutGC0ZbRgNGW0LvRgdC1LSDQt9C40Y/RgtC60LXRgNC70ZbQuiDQtNCw0LzRgyDSm9Cw0LvQv9GL0L3QsCDQutC10LvQvNC10YPRliDQvNKv0LzQutGW0L0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5" table:style-name="ce1">
            <text:p>1066945</text:p>
          </table:table-cell>
          <table:table-cell office:value-type="string" table:style-name="ce1">
            <text:p>kazakh</text:p>
          </table:table-cell>
          <table:table-cell office:value-type="string" table:style-name="ce1">
            <text:p>Билет 29.&amp;lt;br /&amp;gt; 1.Нәрестелерде тиреоидтық гормондардын негізгі функциясы қандай?&amp;lt;br /&amp;gt; 2.6 айлық бала. Аймақ дәргері эндокринологқа жіберген.Бала әлсіз. Физикалық және нерв-психикалық дамуынан арта қалған. Деңе бітімі диспропорционалды, аяқ қолы қысқа. Терісі ақшыл мрамор тәрізді, қүрғақ. Қол аяқтарының саусақтары ісіңген. Қалқанша безі балаларда қандай функцияны атқарады?&amp;lt;br /&amp;gt;</text:p>
          </table:table-cell>
          <table:table-cell office:value-type="string" table:style-name="ce1">
            <text:p>0J3TmdGA0LXRgdGC0LXQu9C10YDQtNC10LPRliDRgtC40YDQtdC+0LjQtNGC0Ysg0LPQsNGA0LzQvtC90LTQsNGA0pPQsCDRgtC40YDQvtC60YHQuNC9INCiMyDQttOZ0L3QtSDRgtGA0LjQudC+0LTRgtC40YDQvtC90LjQvSDQojQg0LHSsdC7INCz0LDRgNC80L7QvdC00LDRgCDQsNKT0LfQsNC00LDSk9GLINC90LXQs9GW0LfQs9GWINGE0YPQvdC60YbQuNGP0LvQsNGA0pPQsCDQttCw0YPQsNC/INCx0LXRgNC10YLRltC9INCx0L7Qu9GL0L8g0YLQsNCx0YvQu9Cw0LTRiy7TqNC80ZbRgNC00ZbSoyDQsNC70pPQsNGI0pvRiyDQutKv0L3QtNC10YDRltC90LXQvSDQsdCw0YHRgtCw0L8g0LbQsNGBINC905nRgNC10YHRgtC10L3RltKjINC20LDSm9GB0Ysg0LTQsNC80YvQvyDQttC10YLRltC70YPRltC90LUg0LbQsNKT0LTQsNC5INC20LDRgdCw0LnQtNGLLjEu0J3QtdC50YDQvtC/0YHQuNGF0LjQutCw0LvRi9KbINC00LDQvNGD0LTRiyDRgNC10YLRgtC10YMtL9Cc0LjQsNC70LXQvdC40LfQsNGG0LjRjy8t0KLQuNGA0LXQvtC50LTRgtGLINCz0LDRgNC80L7QvdC00LDRgCDQttKv0LnQutC1INGC0LDQu9GI0YvSm9GC0LDRgNGL0L3Ri9KjINC80LjQtdC70LjQvdC00ZYg0pvQsNCx0YvSm9GI0LDRgdGL0L0g0pvQsNC80YLQsNC80LDRgdGB0YvQtyDQtdGC0YPQs9C1INGL0pvQv9Cw0Lsg0LXRgtC10LTRli7QkdKx0Lsg0LHQsNC70LDQvdGL0qMg0LbSr9C50LrQtSDQttKv0LnQtdGB0ZbQvSDRgtC+0LvRi9Kb0YLQsNC5INKb0LDQu9GL0L/RgtCw0YHRg9GL0L3QsCDSm9Cw0LbQtdGCLtCc0LjQtNGL0qMg0LbQtdGC0ZbQu9GD0ZYt0JzQuNC00YvSoyDSm9Cw0YDSm9GL0L3QtNGLINOp0YHRg9GWINC80LXQvSDQutC+0LPQvdC40LPQvdC40YLQstGC0ZYg0YTRg9C90LrRhtC40Y/Qu9Cw0YDRi9C90YvSoyDSm9Cw0LvRi9C/0YLQsNGB0YPRiyDSr9GI0ZbQvSDRgtC40YDQtdC+0LjQtNGC0Ysg0LPQsNGA0LzQvtC90LTQsNGAINOp0YLQtSDQvNCw0qPRi9C30LTRiy7QltCw0qPQsCDRgtGD0pPQsNC9INC905nRgNC10YHRgtC10LvQtdGA0LTQtSDQvtC70LDRgNC00YvSoyDRgtCw0L/RiNGL0LvRi9KT0Ysg0YLRg9CwINCx0ZbRgtC60LXQvSDQs9C40L/QvtGC0LXRgNC40L7Qt9KT0LAg0LDQu9GL0L8g0LrQtdC70LXQtNGWLtCY0L3RgtC10LvQtdC60YLRg9Cw0LvQtNGLINCw0YDRgtGC0LAg0pvQsNC70YPSk9CwKNC60YDQtdGC0LjQvdC40LfQvCkg0pPQsCDQsNC70YvQvyDQutC10LvQtdC00ZYuMi7QrdC90LXRgNCz0LjRjyDQsNC70LzQsNGB0YPQtNGLINGA0LXRgtGC0LXRgy3QndC10LPRltC30LPRliDQvNC10YLQvtCx0L7Qu9C40LfQvCDQtNC10qPQs9C10LnRltC9INCw0YDRgtGC0YvRgNCw0LTRiy7QotC40YDQtdC+0LnQtNGC0Ysg0LPQsNGA0LzQvtC90LTQsNGAINC00LXQvdC1INC20LDRgdGD0YjQsNC70LDRgNGL0L3Ri9KjINGN0L3QtdCz0LjRjyDTqdC90LTRltGA0YPQvdC1INGL0pvQv9Cw0Lsg0LbQsNGB0LDQudC00Ysu0JHSsdC7INC/0YDQvtGG0LXRgdGC0LUg0L3TmdGA0LXRgdGC0LXQvdGW0qMg06nRgdGD0ZbQvNC10L0g0L3TmdGA0LXRgdGC0LXQvdGW0qMg06nQvNGW0YDRiNC10qPQtNGW0LPRliDSr9GI0ZbQvSDSm9Cw0LbQtdGCLtCW0YvQu9GDINOp0L3QtNGW0YDRgy3QltCw0qPQsCDTqdC80ZbRgNCz0LUg0LrQtdC70LPQtdC9INC905nRgNC10YHRgtC10LvQtdGA0LTQtSDQttGL0LvRgyDRgNC10YLRgtC10LvRgyDRgtC+0LvRi9KbINC00LDQvNGL0LzQsNKT0LDQvSDRj9KT0L3QuCDQttC10YLRltC70LzQtdCz0LXQvS7QotC40YDQtdC+0LjQtNGC0Ysg0LPQsNGA0LzQvtC90LTQsNGAINCw0pPQt9Cw0L3Ri9KjINC00LXQvdC1INGC0LXQvNC/0LXRgNC10YLRg9GA0LDRgdGL0L0g0pvQsNC70YvQv9GC0YvQtNCwINKx0YHRgtCw0L8g0YLSsdGA0LDQtNGLLNCw0LvSk9GL0YjRi9C90LTQsCDQs9C40L/QvtGC0LXRgNC40Y/QvdGL0qMg0LDQu9C00YvQvSDQsNC70LDQtNGLINC10LrQtdC9LjMu06jRgdGDINC80LXQvSDRgtGW0L3QtNC10YDQtNGW0qMg0LbQtdGC0ZbQu9GD0ZbQvSDRgNC10YLRgtC10YMu0KHSr9C50LXQuiDQttKv0LnQtdGB0ZYt0pvQsNC70pvQsNC90YjQsCDQsdC10Lcg0LPQsNGA0LzQvtC90LTQsNGA0Ysg0YHSr9C50LXQuiDRgtGW0L3QtNC10YDRltC90ZbSoyDSm9Cw0LvRi9C/0YLQsNGB0YPRi9C9INC205nQvdC1INC+0LvQsNGA0LTRi9KjINC80LjQvdC40YDQsNC70LTQsNC90YPRi9C8INKb0LDQvNGC0LDQvNCw0YHRgdGL0Lcg0LXRgtC10LTRli400JHSsdC70YjRi9KbINC10YIg0LbSr9C50LXRgdGWLtCR0rHQu9GI0YvSmyDQtdGCINKx0LvQv9Cw0LvQsNGA0YvQvdGL0qMg0LTQsNC80YPRiyDQvNC10L0g0L7Qu9Cw0YDQtNGL0qMg0YTQuNC30LjQsNC70L7Qs9C40Y/Qu9GL0psg0pvRi9C30LzQtdGC0ZbQvSDRgNC10YLRgtC10LnQtNGWLtKa0LDQvSDQsNC50L3QsNC70YvQvC3QotC40YDQtdC+0LjQtNGC0Ysg0LPQsNGA0LzQvtC90LTQsNGA0LTRi9KjINOZ0YHQtdGA0ZbQvNC10L0g0LbSr9GA0LXQuiDSm9Cw0L0g0YLQsNC80YvRgCDQttKv0LnQtdGB0ZYgINC20LDSm9GB0LDRgNGL0L8g0L7Qu9Cw0YDQtNGL0qMg0YDQuNGC0ZbQvNGWINGA0LXRgtGC0LXQu9C10LTRliDQttOZ0L3QtSDRgtGW0L3QtNC10YDQs9C1INC+0YLRgtC10LPRliDQsdCw0YDRg9GLINGC0rHRgNCw0pvRgtCw0L3QtNGL0YDRi9C70LDQtNGLLjUu0JDRgdKb0LDQt9Cw0L0g0ZbRiNC1INC20L7Qu9C00LDRgNGLLdCQ0YHSm9Cw0LfQsNC9INGW0YjQtdC6INC20L7Qu9C00LDRgNGL0L3Ri9KjINC80L7RgtC+0YDQuNC60LDRgdGL0L0g0LbTmdC90LUg0YTQtdGA0LzQtdC90YLRgtC10YDQtNGW0qMg0YHQtdGA0LXRhtC40Y/RgdGL0L0g0YDQtdGC0YLQtdC50LTRli7QndOZ0YDQtdGB0YLQtdC70LXRgNC00LUg0YLQsNKT0LDQvNC90YvSoyDRgdGW0qPRltGA0ZbQu9GD0ZYg0LzQtdC9INOp0YLRltC80LTRltC70ZbQs9GWINCw0YDRgtCw0LTRiy42LtCY0LzRg9C90LTRi9KbINC20q/QudC10L3RliDSm9C+0LvQtNCw0YMt0prQsNC70pvQsNC90YjQsCDQsdC10Lcg0LPQvtGA0LzQvtC90LTQsNGA0Ysg0LjQvNGD0L3QtNGL0psg0LbSr9C50LXQvdGWINC00LUg0YDQtdGC0YLQtdGD0LPQtSDSr9C70LXRgSDSm9C+0YHQsNC00Ysg0LXQutC10L0u0JXSoyDQvNCw0qPRi9C30LTRi9GB0Ysg0LjQvdGE0LXQutGG0LjRj9C80LXQvSDSm9Cw0YDRgdGLINC60q/RgNC10YHRgyDSm9Cw0LHRltC70LXRgtGW0L0g0LDRgNGC0YLRi9GA0LDQtNGLLtCh0LjQv9Cw0YLRgtCw0LvSk9Cw0L0g0Y7QtdC70LPRltC70LXRgNCz0LUg0YHSr9C50LXQvdC1INC+0YLRi9GA0YvQvyDRjdC90LTQvtC60YDQuNC90L7Qu9C+0LMg0LPQuNC/0L7RgtC10YDQuNC+0LfSk9CwINC60q/QtNGW0LrRgtC10L3Rg9GWINC80q/QvNC60ZbQvS7QkdKx0Lsg0LbQsNKT0LTQsNC50LTQsCDSm9Cw0LvSm9Cw0L3RiNCwINC205nQvdC1INKb0LDQu9Kb0LDQvdGI0LAg0LzQsNKj0Ysg0LHQtdC30LTQtdGA0ZYg0LbQtdGC0LrRltC70ZbQutGB0ZbQtyDQtNC10qPQs9C10LnQtNC1INOp0L3QtNGW0YDRltC70LzQtdC50LTRli7SmtCw0LvSm9Cw0L3RiNCwINCx0LXQt9GWINC80LXRgtC+0LHQvtC70LjQt9GW0LzQtNGWLNOp0YHRg9C00ZYg0LbTmdC90LUg0LTQsNC80YPQtNGLINGA0LXRgtGC0LXRg9C00LUg0YjQtdGI0YPRiNGWINGA06nQuyDQsNGC0pvQsNGA0LDQtNGLLtCe0YHRiyDQsNC50YLQsNC70LzRi9GIINCz0LDRgNC80L7QvdC00LDRgNC00YvSoyDQttC10YLQutGW0LvRltC60YHRltC30LTRltCz0ZYg0LHQvtC70pPQsNC9INC60LXQt9C00LUg0LvQtdGC0LDRgNCz0LjRjyzQtNCw0LzRg9C00YvSoyDQutC10YjRltCz0YPRliDQttOZ0L3QtSDSm9C+0LvQtNCw0YAg0LzQtdC9INCw0Y/Sm9GC0LDRgNC00YvSoyDRltGB0ZbQvdGD0ZYg0LHQsNC50pvQsNC70LDQtNGLLtCV0LzQtNC10YMg0YjQsNGA0LDQu9Cw0YDRiyDTmdC00LXRgtGC0LUg0pvQsNC70pvQsNC90YjQsCDQsdC10LfRltC90ZbSoyDQs9Cw0YDQvNC+0L3QtNCw0YDRi9C90YvSoyDQvNOp0LvRiNC10YDRltC9INKb0LDQu9GL0L/Sm9CwINC60LXQu9GC0ZbRgNGDINCx0L7Qu9GL0L8g0YHQsNC90LDQu9Cw0LTRiy7QntGA0YvQvdCx0LDRgdGDINC90LXQvNC10YHQtSDQsNC70LzQsNGB0YLRi9GA0YMg0YLQtdGA0LDQv9C40Y/RgdGLINGC0LDSk9Cw0LnRi9C90LTQsNC70LDQtNGL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6" table:style-name="ce1">
            <text:p>1066956</text:p>
          </table:table-cell>
          <table:table-cell office:value-type="string" table:style-name="ce1">
            <text:p>russian</text:p>
          </table:table-cell>
          <table:table-cell office:value-type="string" table:style-name="ce1">
            <text:p>Билет 29.&amp;lt;br /&amp;gt; 1.Какие основные функции тиреоидных гормонов у новорожденного?&amp;lt;br /&amp;gt; 2.Ребенку 6 месяцев. Участковым врачом был направлен на консультацию к эндокринологу. Ребенок вялый. Отстает в физическом и нервно-психическом развитии. Телосложение диспропорциональное, конечности короткие, бледный. Кожа сухая, грубая, с мраморным оттенком. Веки отечные. Припухлость кистей и стоп. Какую функцию выполняет щитовидная железа?&amp;lt;br /&amp;gt;</text:p>
          </table:table-cell>
          <table:table-cell office:value-type="string" table:style-name="ce1">
            <text:p>MS4g0JPQvtGA0LzQvtC90Ysg0YnQuNGC0L7QstC40LTQvdC+0Lkg0LbQtdC70LXQt9GLINGDINC00LXRgtC10LkgKNCiMyDQuCDQojQpLCDQsiDRhtC10LvQvtC8LCDRgdC/0L7RgdC+0LHRgdGC0LLRg9GO0YIg0YDQvtGB0YLRgyDQuCDRgNCw0LfQstC40YLQuNGOLCDQvtC60LDQt9GL0LLQsNGPINC/0YDQtdC40LzRg9GJ0LXRgdGC0LLQtdC90L3QviDQsNC90LDQsdC+0LvQuNGH0LXRgdC60LjQtSDRjdGE0YTQtdC60YLRiy4g0JIg0L/QtdGA0LLRi9C1INC00L3QuCDQv9C+0YHQu9C1INGA0L7QttC00LXQvdC40Y8g0L3QsNCx0LvRjtC00LDQtdGC0YHRjyDQv9C+0LLRi9GI0LXQvdC90YvQuSDRg9GA0L7QstC10L3RjCDRgtC40YDQtdC+0LjQtNC90YvRhSDQs9C+0YDQvNC+0L3QvtCyINCyINC60YDQvtCy0Lgg0L3QvtCy0L7RgNC+0LbQtNC10L3QvdC+0LPQviwg0LrQsNC6INC/0YDQvtGP0LLQu9C10L3QuNC1INGB0YLRgNC10YHRgS3RgNC10LDQutGG0LjQuCDQuCDQsNC00LDQv9GC0LDRhtC40Lgg0Log0L3QvtCy0YvQvCDRg9GB0LvQvtCy0LjRj9C8INGB0YPRidC10YHRgtCy0L7QstCw0L3QuNGPLiDQkiDQtNCw0LvRjNC90LXQudGI0LXQvCDRg9GA0L7QstC10L3RjCDRgtGC0LMsINCwINCy0YHQu9C10LQg0LfQsCDQvdC40Lwg0Lgg0YIzLNGCNCDQvdC10YHQutC+0LvRjNC60L4g0YHQvdC40LbQsNGO0YLRgdGPLiDQotC40YDQtdC+0LjQtNC90YvQtSDQs9C+0YDQvNC+0L3RiyDQuNCz0YDQsNGO0YIg0LLQsNC20L3Rg9GOINGA0L7Qu9GMINCyINC90LXRgNCy0L3Qvi3Qv9GB0LjRhdC40YfQtdGB0LrQvtC8INGA0LDQt9Cy0LjRgtC40Lgg0L3QvtCy0L7RgNC+0LbQtNC10L3QvdC+0LPQviwg0YHRgtC40LzRg9C70LjRgNGD0Y8g0YHQvtC30YDQtdCy0LDQvdC40LUg0KbQndChINC30LAg0YHRh9C10YIg0LTQuNGE0YTQtdGA0LXQvdGG0LjRgNC+0LLQutC4INC60LvQtdGC0L7QuiDQutC+0YDRiyDQs9C+0LvQvtCy0L3QvtCz0L4g0LzQvtC30LPQsC4g0J/QvtC80LjQvNC+INGN0YLQvtCz0L4sINCiMyDQuCDQojQg0L7QutCw0LfRi9Cy0LDRjtGCINGB0YLQuNC80YPQu9C40YDRg9GO0YnQtdC1INCy0LvQuNGP0L3QuNC1INC90LAg0L3QtdGA0LLQvdGD0Y4g0YHQuNGB0YLQtdC80YMsINC/0L7QstGL0YjQsNGPINGC0L7QvdGD0YEg0YHQuNC80L/QsNGC0LjRh9C10YHQutC+0Lkg0L3QtdGA0LLQvdC+0Lkg0YHQuNGB0YLQtdC80YsuINCi0YDQuNC50L7QtNGC0LjRgNC+0L3QuNC9INC00LXQudGB0YLQstGD0LXRgiDQvdCwINC00L3QuiDQutC70LXRgtC+0LosINGB0YLQuNC80YPQu9C40YDRg9GPINGC0YDQsNC90YHQutGA0LjQv9GG0LjRjiDQs9C+0YDQvNC+0L3QsCDRgNC+0YHRgtCwLCDRgtCw0LrQuNC8INC+0LHRgNCw0LfQvtC8INGP0LLQu9GP0Y/RgdGMINC10LPQviDRgdC40L3QtdGA0LPQuNGB0YLQvtC8INC4INC+0LHQtdGB0L/QtdGH0LjQstCw0Y8g0LDQtNC10LrQstCw0YLQvdGL0Lkg0YDQvtGB0YIg0YDQtdCx0LXQvdC60LAuINCh0LDQvNC4INC/0L4g0YHQtdCx0LUg0LPQvtGA0LzQvtC90Ysg0YnQuNGC0L7QstC40LTQvdC+0Lkg0LbQtdC70LXQt9GLINGC0LDQutC20LUg0L7RgtCy0LXRh9Cw0Y7RgiDQt9CwINC/0YDQsNCy0LjQu9GM0L3QvtC1INGA0LDQt9Cy0LjRgtC40LUg0LrQvtGB0YLQvdC+0Lkg0YLQutCw0L3QuC4g0KLQuNGA0LXQvtC40LTQvdGL0LUg0LPQvtGA0LzQvtC90Ysg0L7QutCw0LfRi9Cy0LDRjtGCINCy0LvQuNGP0L3QuNC1INC90LAg0LzQtdGC0LDQsdC+0LvQuNC30LwuINCd0LAg0LHQtdC70LrQvtCy0YvQuSDQvtCx0LzQtdC9INCyINGE0LjQt9C40L7Qu9C+0LPQuNGH0LXRgdC60LjRhSDQutC+0L3RhtC10L3RgtGA0LDRhtC40Y/RhSDQvtC90Lgg0L7QutCw0LfRi9Cy0LDRjtGCINGB0YLQuNC80YPQu9C40YDRg9GO0YnQtdC1INCy0LvQuNGP0L3QuNC1LCDRgi7Qui4g0L/QvtCy0YvRiNCw0LXRgtGB0Y8g0L/RgNC+0L3QuNGG0LDQtdC80L7RgdGC0Ywg0LrQu9C10YLQvtC6INC00LvRjyDQsNC80LjQvdC+0LrQuNGB0LvQvtGCLCDRgdC40L3RgtC10Lcg0LHQtdC70LrQsC4g0J/QvtGB0LvQtdC00L3QtdC1INC+0YHQvtCx0L4g0LLQsNC20L3QviDQtNC70Y8g0YDQsNGB0YLRg9GJ0LXQs9C+INC+0YDQs9Cw0L3QuNC30LzQsC4g0KPQs9C70LXQstC+0LTQvdGL0Lkg0L7QsdC80LXQvTog0YHQv9C+0YHQvtCx0YHRgtCy0YPRjtGCINC/0L7QstGL0YjQtdC90LjRjiDRg9GA0L7QstC90Y8g0LPQu9GO0LrQvtC30Ysg0LIg0LrRgNC+0LLQuCDQt9CwINGB0YfQtdGCINCz0LvRjtC60L7QvdC10L7Qs9C10L3QtdC30LAg0Lgg0YPRgdC40LvQtdC90LjRjyDRgNCw0YHQv9Cw0LTQsCDQs9C70LjQutC+0LPQtdC90LAsINGH0YLQviDQuNC80LXQtdGCINC+0YHQvtCx0L7QtSDQt9C90LDRh9C10L3QuNC1INCyINGA0LDQvdC90LjQuSDQvdC10L7QvdCw0YLQsNC70YzQvdGL0Lkg0L/QtdGA0LjQvtC0INCyINGD0YHQu9C+0LLQuNGP0YUg0LDQtNCw0L/RgtCw0YbQuNC4INC90L7QstC+0YDQvtC20LTQtdC90L3QvtCz0L4g0Lgg0L/QvtCy0YvRiNC10L3QvdGL0YUg0Y3QvdC10YDQs9C10YLQuNGH0LXRgdC60LjRhSDQv9C+0YLRgNC10LHQvdC+0YHRgtC10LkuINCW0LjRgNC+0LLQvtC5INC+0LHQvNC10L06INGB0YLQuNC80YPQu9C40YDRg9C10YLRgdGPINC70LjQv9C+0LvQuNC3LiDQmtCw0Log0Lgg0YMg0LLQt9GA0L7RgdC70YvRhSwg0YLQuNGA0LXQvtC40LTQvdGL0LUg0LPQvtGA0LzQvtC90Ysg0L7RgtCy0LXRh9Cw0Y7RgiDQt9CwINC/0L7QstGL0YjQtdC90LjQtSDQvtGB0L3QvtCy0L3QvtCz0L4g0L7QsdC80LXQvdCwLCDRg9GB0LjQu9C10L3QuNC1INGC0LXRgNC80L7Qs9C10L3QtdC30LAg0LfQsCDRgdGH0LXRgiDQv9C+0LLRi9GI0LXQvdC40Y8g0L/RgNC+0YbQtdGB0YHQvtCyINC+0LrQuNGB0LvQtdC90LjRjy4g0JTQvtC/0L7Qu9C90LjRgtC10LvRjNC90L4g0YLQuNGA0LXQvtC40LTQvdGL0LUg0LPQvtGA0LzQvtC90Ysg0YHRgtC40LzRg9C70LjRgNGD0Y7RgiDRjdGA0LjRgtGA0L7Qv9C+0Y3Qtywg0L/QvtGN0YLQvtC80YMg0LTQtdGE0LjRhtC40YIg0Y3RgtC40YUg0LPQvtGA0LzQvtC90L7QsiDRh9Cw0YHRgtC+INGB0L7Qv9GA0L7QstC+0LbQtNCw0LXRgtGB0Y8g0L3QvtGA0LzQvtGG0LjRgtCw0YDQvdC+0Lkg0LDQvdC10LzQuNC10LkuIDIuINCjINC00LDQvdC90L7Qs9C+INGA0LXQsdC10L3QutCwINC80L7QttC90L4g0L/RgNC10LTQv9C+0LvQvtC20LjRgtGMINCz0LjQv9C+0YLQuNGA0LXQvtC3LCDRgi7QtS4g0YHQvdC40LbQtdC90L3Rg9GOINGE0YPQvdC60YbQuNGOINGJ0LjRgtC+0LLQuNC00L3QvtC5INC20LXQu9C10LfRiy4g0JIg0LrRgNCw0LnQvdC10Lwg0YHQu9GD0YfQsNC1INGN0YLQviDQv9GA0L7Rj9Cy0LvRj9C10YLRgdGPINC60YDQtdGC0LjQvdC40LfQvNC+0LwgKNC+0YLRgdGC0LDQstCw0L3QuNC1INCyINC90LXRgNCy0L3Qvi3Qv9GB0LjRhdC40YfQtdGB0LrQvtC8INGA0LDQt9Cy0LjRgtC40LgpINC4INC80LjQutGB0LXQtNC10LzQvtC5ICjRgdC70LjQt9C40YHRgtGL0Lwg0L7RgtC10LrQvtC8KS4g0JIg0YHQvtC+0YLQstC10YLRgdGC0LLQuNC4INGBINC80LXRhdCw0L3QuNC30LzQvtC8LCDQvtC/0LjRgdCw0L3QvdGL0Lwg0YDQsNC90LXQtSwg0L7RgtGB0YLQsNCy0LDQvdC40LUg0LIg0YDQsNC30LLQuNGC0LjQuCDRgyDRgNC10LHQtdC90LrQsCDRgdCy0Y/Qt9Cw0L3QviDRgSDQtNC10YTQuNGG0LjRgtC+0Lwg0Y3RhNGE0LXQutGC0L7QsiDRgtC40YDQtdC+0LjQtNC90YvRhSDQs9C+0YDQvNC+0L3QvtCyLCDQv9GA0L7QtNGD0YbQuNGA0YPQtdC80YvRhSDRidC40YLQvtCy0LjQtNC90L7QuSDQttC10LvQtdC30L7QuS4g0KMg0LTQsNC90L3QvtCz0L4g0YDQtdCx0LXQvdC60LAg0L3QsNGA0YPRiNC10L3QviDRgdC+0LfRgNC10LLQsNC90LjQtSDQvdC10YDQstC90L7QuSDRgdC40YHRgtC10LzRizsg0YHQvdC40LbQtdC90LAg0YDQtdCw0LvQuNC30LDRhtC40Y8g0Y3RhNGE0LXQutGC0L7QsiDQs9C+0YDQvNC+0L3QsCDRgNC+0YHRgtCwLCDRh9GC0L4g0L/RgNC+0Y/QstC40LvQvtGB0Ywg0LrQvtGA0L7RgtC60LjQvNC4INC60L7QvdC10YfQvdC+0YHRgtGP0LzQuCDQuCDQtNC40YHQv9GA0L7Qv9C+0YDRhtC40L7QvdCw0LvRjNC90L7RgdGC0YzRjiDRgtC10LvQvtGB0LvQvtC20LXQvdC40Y8uINCS0Y/Qu9C+0YHRgtGMINGB0LLRj9C30LDQvdCwINGBINC+0YLRgdGD0YLRgdGC0LLQuNC10Lwg0YHRgtC40LzRg9C70LjRgNGD0Y7RidC10LPQviDQstC70LjRj9C90LjRjyDRgtC40YDQtdC+0LjQtNC90YvRhSDQs9C+0YDQvNC+0L3QvtCyINC90LAg0YbQvdGBLCDRgdC+INGB0L3QuNC20LXQvdC40LXQvCDQvtGB0L3QvtCy0L3QvtCz0L4g0L7QsdC80LXQvdCwLiDQqdC40YLQvtCy0LjQtNC90LDRjyDQttC10LvQtdC30LAg0YLQsNC60LbQtSDQstC70LjRj9C10YIg0L3QsCDQstC+0LTQvdC+LdC80LjQvdC10YDQsNC70YzQvdGL0Lkg0L7QsdC80LXQvSwg0YPRgdC40LvQuNCy0LDRjyDQstGL0LLQtdC00LXQvdC40LUg0L3QsNGC0YDQuNGPLCDQtNC40YPRgNC10LcuINCf0L7RjdGC0L7QvNGDINGDINC00LDQvdC90L7Qs9C+INGA0LXQsdC10L3QutCwINC90LDQsdC70Y7QtNCw0LXRgtGB0Y8g0L7RgtC10YfQvdC+0YHRgtGMINCy0LXQuiwg0LrQuNGB0YLQtdC5INC4INGB0YLQvtC/IC0g0L/QvtC00LrQvtC20L3QsNGPINC60LvQtdGC0YfQsNGC0LrQsCDRgdGC0LDQvdC+0LLQuNGC0YHRjyDQsdC+0LvQtdC1INCz0LjQtNGA0L7RhNC40LvRjNC90L7QuSwg0L3QsNC60LDQv9C70LjQstCw0LXRgtGB0Y8g0LbQuNC00LrQvtGB0YLRjCwg0YfRgtC+INGD0YXRg9C00YjQsNC10YIg0LzQtdGB0YLQvdC+0LUg0LrRgNC+0LLQvtGB0L3QsNCx0LbQtdC90LjQtSDQuCDQv9GA0LjQstC+0LTQuNGCINC6INC60L7QttC90YvQvCDQuNC30LzQtdC90LXQvdC40Y/QvC4gKNCc0L7QttC90L4g0YPRgtC+0YfQvdC40YLRjCwg0YfRgtC+INC+0YLQtdC6INC60LDQuiDQv9GA0LDQstC40LvQviDRgdC70LjQt9C40YHRgtGL0LksINGCLtC1LiDQv9GA0Lgg0LTQsNC90L3QvtC8INGB0L7RgdGC0L7Rj9C90LjQuCDQsiDQv9C20Log0YHQuNC90YLQtdC30LjRgNGD0LXRgtGB0Y8g0LHQvtC70YzRiNC1INC80YPRhtC40L3QvtCyKS4g0KTRg9C90LrRhtC40Y8g0YnQuNGC0L7QstC40LTQvdC+0Lkg0LbQtdC70LXQt9GLINGDINCz0YDRg9C00L3QvtCz0L4g0YDQtdCx0LXQvdC60LAsINC60LDQuiDQuCDRgyDQvdC+0LLQvtGA0L7QttC00LXQvdC90L7Qs9C+LCDRgdCy0L7QtNC40YLRgdGPINC6INGB0YLQuNC80YPQu9C40YDQvtCy0LDQvdC40Y4g0YDQvtGB0YLQsCDRgNC10LHQtdC90LrQsCwg0LXQs9C+INGE0LjQt9C40YfQtdGB0LrQvtCz0L4g0Lgg0L3QtdGA0LLQvdC+LdC/0YHQuNGF0LjRh9C10YHQutC+0LPQviDRgNCw0LfQstC40YLQuNGPLCDQvtCx0LzQtdC90LAg0LLQtdGJ0LXRgdGC0LIuINCf0L7QvNC40LzQviDQojMg0Lgg0KI0INGJ0LjRgtC+0LLQuNC00L3QsNGPINC20LXQu9C10LfQsCDQvtGC0LLQtdGC0YHRgtCy0LXQvdC90LAg0LfQsCDQv9GA0L7QtNGD0LrRhtC40Y4g0LrQsNC70YzRhtC40YLQvtC90LjQvdCwINCyINC/0LDRgNCw0YTQvtC70LvQuNC60YPQu9GP0YDQvdGL0YUg0LrQu9C10YLQutCw0YUuINCa0LDQu9GM0YbQuNGC0L7QvdC40L0g0Y/QstC70Y/QtdGC0YHRjyDQsNC90YLQsNCz0L7QvdC40YHRgtC+0Lwg0J/QotCTINC4INGB0L3QuNC20LDQtdGCINGD0YDQvtCy0LXQvdGMINC60LDQu9GM0YbQuNGPINCyINC60YDQvtCy0LgsINGD0LzQtdC90YzRiNCw0Y8g0LXQs9C+INCy0YHQsNGB0YvQstCw0L3QuNC1INCyINC60LjRiNC10YfQvdC40LrQtSDQuCDRgNC10LDQsdGB0L7RgNCx0YbQuNGOINCyINC/0L7Rh9C60LDRhS4g0JrQsNC70YzRhtC40YLQvtC90LjQvSDRgdC/0L7RgdC+0LHRgdGC0LLRg9C10YIg0L/QtdGA0LXRhdC+0LTRgyDQutCw0LvRjNGG0LjRjyDQsiDQutC+0YHRgtGMLCDQsNC60YLQuNCy0LjRgNGD0LXRgiDQvtGB0YLQtdC+0LHQu9Cw0YHRgtGLLCDRgi7QtS4g0LrQvtC90YLRgNC+0LvQuNGA0YPQtdGCINC80LjQvdC10YDQsNC70LjQt9Cw0YbQuNGOLCDRh9GC0L4g0L7RgdC+0LHQtdC90L3QviDQstCw0LbQvdC+INGDINC00LXRgtC10Lkg0LIg0YHQstGP0LfQuCDRgSDQsNC60YLQuNCy0L3Ri9C80Lgg0L/RgNC+0YbQtdGB0YHQsNC80Lgg0L/QtdGA0LXRgdGC0YDQvtC50LrQuCDQuCDQvtGB0YHQuNGE0LjQutCw0YbQuNC4INCyINC60L7RgdGC0L3QvtC5INGC0LrQsNC90LguIA==</text:p>
          </table:table-cell>
          <table:table-cell office:value-type="float" office:value="170348" table:style-name="ce1">
            <text:p>170348</text:p>
          </table:table-cell>
          <table:table-cell office:value-type="float" office:value="94" table:style-name="ce1">
            <text:p>9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48" table:style-name="ce1">
            <text:p>1067148</text:p>
          </table:table-cell>
          <table:table-cell office:value-type="string" table:style-name="ce1">
            <text:p>russian</text:p>
          </table:table-cell>
          <table:table-cell office:value-type="string" table:style-name="ce1">
            <text:p>Билет 29.&amp;lt;br /&amp;gt; 1.Какие основные функции тиреоидных гормонов у новорожденного?&amp;lt;br /&amp;gt; 2.Ребенку 6 месяцев. Участковым врачом был направлен на консультацию к эндокринологу. Ребенок вялый. Отстает в физическом и нервно-психическом развитии. Телосложение диспропорциональное, конечности короткие, бледный. Кожа сухая, грубая, с мраморным оттенком. Веки отечные. Припухлость кистей и стоп. Какую функцию выполняет щитовидная железа?&amp;lt;br /&amp;gt;</text:p>
          </table:table-cell>
          <table:table-cell office:value-type="string" table:style-name="ce1">
            <text:p>MS7QntGB0L3QvtCy0L3Ri9C80Lgg0YTRg9C90LrRhtC40Y/QvNC4INGC0LjRgNC10L7QuNC00L3Ri9GFINCz0L7RgNC80L7QvdC+0LIoINCz0L7RgNC80L7QvdC+0LIg0KnQuNGC0L7QstC40LTQvdC+0Lkg0LbQtdC70LXQt9GLKS4g0JLRi9C/0L7Qu9C90Y/QtdGCINGA0Y/QtCDRgdC70LXQtNGD0Y7RidC40YUgINGE0YPQvdC60YbQuNC5INC60L7RgtC+0YDRi9C1INC+0YLQstC10YfQsNGOINC30LAg0YDQtdCz0YPQu9GP0YbQuNGOINC+0YDQs9Cw0L3QuNC30LzQsC4g0JLRi9C/0L7Qu9C90Y/QtdGCINGB0LvQtdC00YPRjtGJ0LjQtSDRhNGD0L3QutGG0LjQuToxKSDQn9C10YDQstC+0Lkg0Lgg0L/QvtGH0YLQuCDRgdC+0YHRgtCw0LLQvdC+0Lkg0YfQsNGB0YLRjNGOINGE0YPQvdC60YbQuNC5INCiMyDQuCDQojQg0Y/QstC70Y/QtdGC0YHRjyDQvtGC0LLQtdGC0YHRgtCy0LXQvdC90L7RgdGC0Ywg0LfQsCDRgdC60L7RgNC+0YHRgtGMINC+0LHQvNC10L3QvdGL0YUg0L/RgNC+0YbQtdGB0YHQvtCyINCyINC+0YDQs9Cw0L3QuNC30LzQtS4gMinQntGC0LLQtdGH0LDRjtGCINC30LAg0YDQvtGB0YIg0Lgg0YDQsNC30LLQuNGC0LjQtSDQvtGA0LPQsNC90LjQt9C80LAuINCR0LXQtyDQvdC40YUg0LHRg9C00LXRgiDRgNGP0LQg0LjQt9C80LXQvdC10L3QuNC5INCyINC+0YDQs9Cw0L3QuNC30LzQtSDRgyDQvdC+0LLQvtGA0L7QttC00LXQvdC90L7Qs9C+LiDQlNCw0L3QvdGL0LUg0LPQvtGA0LzQvtC90Ysg0L7Rh9C10L3RjCDQstCw0LbQvdGLINC00LvRjyDQvtGA0LPQsNC90LjQt9C80LAg0L3QvtCy0L7RgNC+0LbQtNC10L3QvdC+0LPQviDRgNC10LHRkdC90LrQsCDQtNC70Y8g0L/QvtC70L3QvtGG0LXQvdC90L7Qs9C+INGA0L7RgdGC0LAg0Lgg0YDQsNC30LLQuNGC0LjRjyDQutCw0YDRiyDQs9C+0LvQvtCy0L3QvtCz0L4g0LzQvtC30LPQsCwg0YDQsNC30LLQuNGC0LjRjyDQvNC+0LPQt9CwINC+0YfQtdC90Ywg0LLQsNC20L3QsCDQtNC70Y8g0YDQtdCx0ZHQvdC60LAg0Lgg0YLQsNC60LUg0L7QvdC4INC+0YLQstC10YLRgdGC0LLQtdC90Ysg0LfQsCDRgNCw0LfQstC40YLQuNC1INC60LDQuiDQvNGL0YnQtdGH0L3QvtC5INGC0LDQuiDQuCDQutC+0YHRgtC90L7QuSDRgdC40YHRgtC10LzRiyDRgyDRgNC10LHRkdC90LrQsC4gIDxiciAvPg0KMi4g0KnQuNGC0L7QstC40LTQvdCw0Y8g0LbQtdC70LXQt9CwINGP0LLQu9GP0LXRgtGB0Y8g0LbQtdC70LXQt9C+0Lkg0Y3QvdC00L7QutGA0LjQvdC90L7QuSDRgdC40YHRgtC10LzRiyDQutC+0YLQvtGA0LDRjyDQstGL0L/QvtC70L3Rj9C10YIg0L7QtNC90Lgg0LjQtyDQsdCw0LfQvtCy0YvRhSDRhNGD0L3QutGG0LjQuSDQvtGA0LPQsNC90LjQt9C80LAg0LLRi9GA0LDQsdC+0YLQutC+0Lkg0YLQsNC60LjRhSDQs9C+0YDQvNC+0L3QvtCyINC60LDQuiDQojMg0Lgg0KI0LiDQrdGC0Lgg0LPQvtGA0LzQvtC90Ysg0LLRi9C/0L7Qu9C90Y/RjtGCINGA0Y/QtCAg0LLQsNC20L3Ri9GFINGE0YPQvdC60YbQuNC5INCyINC+0YDQs9Cw0L3QuNC30LzQtSDRgyDRgNC10LHRkdC90LrQsCwg0YLQsNC6INC60LDQuiDRgNC10LHQtdC90L7QuiDRgyDQvdCw0YEgNiDQvNC10YHRj9GH0L3Ri9C5INGA0LXQsdGR0L3QvtC6INC80L7QttC90L4g0L/RgNC10LTQv9C+0LvQvtC20LjRgtGMINGH0YLQviDQv9GA0Lgg0L3QtSDRhdCy0LDRgtC60LUg0LTQsNC90L3Ri9GFINCz0L7RgNC80L7QvdC+0LIg0LIg0LXRkSDQvtGA0LPQsNC90LjQt9C80LUg0LHRg9C00YPRgiDQvdCw0LHQu9GO0LTQsNGC0YzRgdGPINGB0LvQtdC00YPRjtGJ0LjQtSDQuNC30LzQtdC90LXQvdC40Y8g0LrQsNC6INCx0YvQu9C+INC/0LXRgNC10YfQuNGB0LvQtdC90L4g0YLQviDQtdGB0YLRjCDRjdGC0L4g0LLRj9C70L7RgdGC0Ywg0YDQtdCx0ZHQvdC60LAsINC60L7QttCwINGDINGA0LXQsdGR0L3QutCwINCx0LvQtdC00L3QsNGPINC4INC+0L0g0L7RgtGB0YLQsNGO0YIg0LIg0L3QtdGA0LLQvdC+LdC/0YHQuNGF0LjRh9C10YHQutC+0Lwg0YDQsNC30LLQuNGC0LjQuSDQuCDRgtCw0LrQttC1INCx0YvQu9C+INC00LjRgdC/0YDQvtC/0L7RgNGG0LjQvtC90LDQu9GM0L3QvtC1INGC0LXQu9C+0YHQu9C+0LbQtdC90LjRjywg0LrQvtC20LAg0YLQsNC60LbQtSDQsdGD0LTQtdGCINGB0YPRhdC+0LksINCz0YDRg9Cx0L7QuSDQuCDRgSDQvNGA0LDQvNC+0YDQvdGL0LzQuCDQvtGC0YLQtdC90LrQsNC80LgsINCy0LXQutC4INC+0YLRkdGH0L3Ri9C1LCDQv9GA0LjQv9GD0YXQu9C+0YHRgtGMINCyINC+0LHQu9Cw0YHRgtC4INC60LjRgdGC0LXQuSDQuCDRgdGC0L7QvyDRgyDRgNC10LHRkdC90LrQsCAg0YLQviDQtdGB0YLRjCDQutCw0Log0LzRiyDQstC40LTQuNC8INGA0LXQsdGR0L3QvtC6INC+0YLRgdGC0LDQstCw0Lsg0LIg0YDQsNC30LLQuNGC0LjQuS4g0Jgg0YLQsNC6INC80Ysg0LHRg9C10Lwg0L3QsNCx0LvRjtC00LDRgtGMINC40LfQvNC10L3QtdC90LjQtSDQsiDRgdC70LXQtNGD0Y7RidC40YUg0YTRg9C90LrRhtC40Y/RhSDRidC40YLQvtCy0LjQtNC90L7QuSDQttC10LvQtdC30Ysg0LLRi9C/0L7Qu9C90Y/QtdGCINGA0LXQs9GD0LvRj9GG0LjRjiDQstGB0LXRhSDQvtCx0LzQtdC90L7QsiDQsiDQvtGA0LPQsNC90LjQt9C80LUsINCwINC/0YDQuCDRgtCw0LrQuNGFINGB0LjQvNC/0YLQvtC80LDRhSDQvNGLINC80L7QttC10Lwg0L3QsNCx0LvRjtC00LDRgtGMINC90LDRgNGD0YjQtdC90LjQtS4g0JPQvtGA0LzQvtC90Ysg0YnQuNGC0L7QstC40LTQvdC+0Lkg0LbQtdC70LXQt9GLINGC0LDQuiDQttC1INC+0YfQtdC90Ywg0L7RgtCy0LXRgtGB0LLQtdC90L3RiyDQsiDQvtCx0LXRgdC/0LXRh9C10L3QuNC5INGA0L7RgdGC0LAg0Lgg0YDQsNC30LLQuNGC0LjRjyDRgtC60LDQvdC10Lkg0LzQvtC30LPQsCwg0LrQvtGB0YLQtdC5INC4INC80YvRidGGLiDQotCw0LrQttC1INC90LAg0YLQtdC20LUg0LPQvtGA0LzQvtC90Ysg0LzQvtC10YIg0L/QvtCy0LvQuNGP0YLRjCDQs9C40L/QvtGC0LXRgNC40L7Qtywg0LrQvtCz0LTQsCDQsdGD0LXRgiDQvdC10LTQvtGB0YLQsNGC0L7QuiDQs9C+0YDQvNC+0L3QvtCyINCp0LjRgtC+0LLQuNC00L3QvtC5INC20LXQu9C10LfRiyDQstC10LTRg9GCINC6INC90LDRgNGD0YjQtdC90LjRj9C8INC60L7RgtC+0YDRi9C1INCx0YvQu9C4INC+0L/QuNGB0LDQvdGLLCDQutC+0L7RgNGL0LUg0LIg0L7RgdC90L7QstC90L7QvCDQvtGC0LLQtdGH0LDRjtGCINC30LAg0L7QsdC80LXQvSDQstC10YnQtdGB0YLQsiDQuCDRgNCw0LfQstC40YLQuNC1L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36" table:style-name="ce1">
            <text:p>915036</text:p>
          </table:table-cell>
          <table:table-cell office:value-type="string" table:style-name="ce1">
            <text:p>english</text:p>
          </table:table-cell>
          <table:table-cell office:value-type="string" table:style-name="ce1">
            <text:p>Ticket 29.&amp;lt;br /&amp;gt; 1. What are the main functions of thyroid hormones in a newborn.&amp;lt;br /&amp;gt; 2. A family physician sends a 6-month-old child for consultation with an endocrinologist. The child is lethargic. Lagging behind in physical and neuropsychic development. disproportionate build, short limbs pale. Dry skin, rough, with a marble tint. Eyelids are swollen. Swelling of the hands and feet. What function does the thyroid gland perform?&amp;lt;br /&amp;gt;</text:p>
          </table:table-cell>
          <table:table-cell office:value-type="string" table:style-name="ce1">
            <text:p>VEhZUk9JRCBJUyBBTiBFTkRPQ1JJTkUgR0xBTkQgTE9DQVRFRCBJTiBUSEUgTkVDSyBBTkQgQklMT0JFRCBTVFJVQ1RVUkUgLklOIFRIRSBORVdCT1JOIEFORCBDSElMRFJFTiBUSFlST0lEIEdMQU5ERCBJUyBMRVNTIERFVkVMT1BFRCBUSEFOIENPTVBBUkUgVE8gVEhFIEFEVUxULi5JVCBJUyBSRVNQT05TSUJMRSBGT1IgVEhFIFNFQ1JFVElPTiBPRiBUSEUgVEhZUk9YSU4gSE9STU9ORSBUMyBBTkQgTCBUSFlST05JTiBUNCBIT1JNT05FLlRIRSBSRUdVTEFUSU9OIE9GIFRIRSBTRUNSRVRJT04gT0YgVEhFU0UgSE9STU9ORSBNRURJQVRFRCBCWSBQSVRVSVRBUlkgQlkgVEhZUk9JRCBTVElNVUxBVElORyBIT1JNT05FLiBBTkQgVEhFIFJFR1VMQVRJT05OIE9GIFRIRSBUSFlST0lEIFNUSU1VTEFUSU5HIEhPUk1PTkUgSVMgRE9ORSBCWSBIWVBPVEhBTEFNVVMgQlkgUkVMRUFTSU5HIFRIWVJPSUQgUkVMRVNJTkcgSE9STU9ORS4uVEhFIEZVTkNUSU9OTiBPRiBUSEUgVEhZUk9JRCBHTEFORCBJUyBGT0xMT1dJTkcgLiBJVCBSRUdVTEFURSBUSEUgTUVUQUJPTElTTSBPRiBUSEUgQk9EWSAuIElUIElTIFJFU1BPTlNJQkxFRSBGT1IgVEhFIEdST1dUSCBBTkQgREVWRUxPUE1FTlQuQlkgUkVHVUxBVElORyBUSEUgTUVUQUJPTElDIFJBVEUgSVQgTUFJTlRBSU4gQUxTTyBCT0RZIFRFTVBSQVRVUkUgRk9SIFRIRSBBREFQVEFUSU9OIElOIFRIRSBDT05ESVRJT04gLklUIEFMU08gQ09OVFJPTCBUSEUgR1JPV1RIIEFORCBERVZFTE9QTUVOVCBPRiBUSEUgUEVSU09OIElOQ0xVRElORyBCT05FICwgVElTU1VFIEFORCBNVVNDTEUgQUxTT08uLi5JVCBBTFNPIFJFR1VMQVRFIFRIRSBFTkVSR1kgUEVPRFVDVElPTiBBTkQgVEhFIEJPRFkgTlVUUklFTlRTUyxJVCBJUyBBTFNPIE1BSU5UQUlOTiBUSEUgVEVNUFJBVFVSRSBCWSBSRUdVTEFUSU5HRyBNRVRBQk9MSUMgUkFURS4gIDIpIDYgTU9OVEggQ0hJTEQgQ09NRSBUTyBUSEUgRU5ET0NSSU5PTE9HSVNUIFdJVEggRk9MTE9XSU5HRyBTWU1QVE9NUyBMSUtFIExFVEhBUkdJQyBCRUhJTkQgVEhFIFBIWVNJQ0FMTCBBTkQgTkVVUk9OQUxMIERFVkVMT1BNRU5UICwgRElTUFJPUE9SVElPTkFURUUgQlVJTEQgRFJZIFNLSU4gLEVZRUxJRFMgU1dBTExPRU4gQU5EIFNXRUxJTkcgT0YgVEhFIEhBTkQgQU5EIEZFRVQgLiBUSEVTRSBBTEwgU1lNUFRPTVMgQ09NTU9OTFkgQVNTT0NJQVRXRUQgV0lUSCBUSEUgQ09ORElUSU9OIEhZUE9USFlST0lESVNNLiBJTiBUSElTIENPTkRJVElPTiBUSFlST0lEIEdMQU5EIEJFQ09NRSBMRVNTIEZVTkNUSU9OQUwgT1IgTUFZIEJFIExPU1MgVEhFIFRPVEFMIEZVTkNUSU9OLi5JTiBUSEUgQ09ORElUSU9OIEhZUE9USFlST0lESVNNICBIRVJFIElTIExFU1MgU0NSRVRJT04gT0YgTCBUWVJPTklOIEFORCBUSFlST1hJTiAuVEhFU0UgSE9STU9ORSBSRVNQT05TSUJMRSBGT1IgVEhFIEdST1dUSCBBTkQgREVWRUxPUE1FTlQgQUxTTyBTTyBUSEVFIExFU1MgU0VDUkVUSU9OIE9GIFRIRVNFIEhPUk1PTkUgUkVTVUxUIElOIFRIRSBERUxFWUVEIERFVkVMT1BNRU5UIC4gRFVFIFRPIExFU1MgU0VDUkVUSU9OIE9GIFRIRSBIT1JNT05FRSBUSEUgTUVUQUJPTElDIFJBVEUgSVMgREVDUkVBU0VEIExFQURJTkcgVE8gVEhFIFdFSUdIVCBHQUlOIE9GIFRIRSBQQVRJRU5ULlRIRVNFIFBBVElFTlQgVFlQSUNBTExZIFBSRVNFTlRUIFdJVEggVEhFIENPTEQgSU5UT0xSQU5DRS5JTiBUSEVTRSBQQVRJRU5UIENPTlNJVElQQVRJT04gQU5EIFdFSUdIVCBHQUlOIEFMU08gUFJFU0VOVC4uU08gVEhFIFBBVElFTlQgV0lUSCBGT0xMT1dJTkcgU1lNUE9UT01TIENPTlNVTFQgVE8gQSBET0NUT1JSIEFTIFNPT04gQVMgUE9TSUJMRUUuVEhFIE5PUk1BTCBGVU5DVElPTiBPRiBUSEUgVEhZUk9JRCBJUyBUTyBTQ1JFVEUgVEhFIFRIWVJPWElOIEFORCBMIFRIWVJPTklOIEhPUk1PTkUgU0VDUkVUSU9OIC5USEVTRSBIT1JNT05FRSBNQUlOVEFJTiBNRVRBQk9MSUMgUkFURSAsIEdST1dUSCAsIERFVkVMT1BNRU5UICwsQU5EIFJFR1VMQVRJT04gT0YgVEhFIFRFTVBSQVRVUkUgQlkgUkVHVUxBVElORyBUSEUgTUVUQUJPTElDQyBSQVRFLi4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49" table:style-name="ce1">
            <text:p>915049</text:p>
          </table:table-cell>
          <table:table-cell office:value-type="string" table:style-name="ce1">
            <text:p>english</text:p>
          </table:table-cell>
          <table:table-cell office:value-type="string" table:style-name="ce1">
            <text:p>Ticket 29.&amp;lt;br /&amp;gt; 1. What are the main functions of thyroid hormones in a newborn.&amp;lt;br /&amp;gt; 2. A family physician sends a 6-month-old child for consultation with an endocrinologist. The child is lethargic. Lagging behind in physical and neuropsychic development. disproportionate build, short limbs pale. Dry skin, rough, with a marble tint. Eyelids are swollen. Swelling of the hands and feet. What function does the thyroid gland perform?&amp;lt;br /&amp;gt;</text:p>
          </table:table-cell>
          <table:table-cell office:value-type="string" table:style-name="ce1">
            <text:p>MS4gVGhlIG1haW4gZnVuY3Rpb25zIG9mIHRoeXJvaWQgZ2xhbmQgaW4gbmV3IGJvcm4gYXJlIG1ldGFib2xpYyByZWd1bGF0aW9uOyB0aHlyb2lkIGhvcm1vbmVzLCBwcmltYXJpbHkgVGh5cm94aW5lW1Q0XSwgYW5kIHRyaWlkb3RoeW9yaW5lW1QzXXBsYXkgYSBjcnVjaWFsIHJvbGUgaW4gbmV3IGJvcm4gZm9yIG1ldGFib2xpYyByYXRlLlRoZXkgaW5mbHVuY2UgdGhhIGJvZHkgb2YgY2hpbGQgdG8gaG93IHRvIHVzZSB0aGEgZW5lcmd5IGFuZCBudXRyaWVudHMgZm9yIHRoYSBib2R5LiBHcm93dGggYW5kIGRldmVsb3BtbnQ6LVRoeXJvaWQgaG9ybW9uZXMgcGxheSBhIGNydWNpYWwgcm9sZSBpbiBpbiB0aGEgZ3Jvd3loIGFuZCBkZXZlbG9wbW50IGFuZCB0aGV5IGRldmVscG8gdGhhIHRpc3N1ZXMgb2YgdGhhIGJyYWluLCBib25lcyBhbmQgbXVzY2xlcyBvZiB0aGEgY2hpbGQuQWRlcXVhdGUgdGh5cm9pZCBob3Jtb25lcyBpcyBjcnVjaWFsIGZvciBhY2hpZXZpbmcgZGV2ZWxvcG1udC5CcmFpbiBkZXZlbG9tbnQ6LVRoeXJvaWQgaG9lbW9uZXMgYXJlIGNyaXRpa2FsIGZvciBkZXZlbG9wbW50IG9mIGJyYWluLGFuZCBmb3JtYXRpb24gb2YgbmV1cmFsIGNvbm5lY3Rpb25zLlRlbXBlYXJ1cmUgcmVndWxhdGlvbjotVGh5cm9pZCBob3Jtb25lcyBoZWxwIHJlZ3VsYXRpbmcgdGhhIGJvZHkncyB0ZW1wZXJhdHVyIGJ5IGluZmx1ZW5jaW5nIHRoYSBib2R5IGhlYXQgcHJvZHVjdGlvbiBhbmQgZW5yZ3kgZXhwZW5kaXR1ci4gICAgICAgICAgICAgICAgICAgICAgICAgICAgICAgICAgICAgICAgICAgICAgICAgICAgICAgICAgICAgPGJyIC8+DQogICAgICAgICAgICAgICAgICAgICAgIDIuIEluIHRoaXMgY2FzZSBhIDYtbW9udGhzIG9sZCBjaGlsZCBpcyBmb3IgY29uc3VsdGF0aW9uLCBoYXMgbGVzcyBkZXZlbG9wbWVudCBpbiBwaHlzaWNhbCBhbmQgbmV1cm9wc3ljaGljLCBhbmQgYWxzbyBoYXZlIHNob3J0IGxpbWJzIGFuZCBkcnkgc2tpbiwgcm91Z2ggd2l0aCBtYXJibCB0aW50LGV5ZWxpZHMgYXJlIHN3b2xlbiAsd2hpY2ggaW5kaWNhdGVzIGRlZmljaWVuY3kgb2YgdGhhIHRoeXJvaWQgaG9ybW9uZSBhbmQgcG9zc2libHkgaGF2ZSBoeXBvdGh5cm9pZGlzbS4gVGhlcmUgaXMgbG93IHByb2RjdGlvbiBvZiBUaGEgVDMgYW5kIFQ0IGhvcm1vbmVzIGV3aGljaCBhcmUgZXNzbnRpdGlhbCBmb3IgbWV0YWJvbGljIHJhdGUsZ3Jvd3RoIGFuZCBkZXZlbHBtbnQuSHlwb3RoeXJvaWRpc20gY2FuIGxlYWQgdG8gbG93IHByb2R1Y3Rpb24gb2YgdGhlc2UgaG9ybW9ucyBhbmQgc2lnbmlmaWNudCBpbXBhY3Qgb24gZW5lcmd5IG1ldGFib2xpc20sIGdyb3d0aCBhbmQgb3ZlcmFsbCBkZXZlbG9wbW50LiBFZGVtYSBhbmQgbGV0aGVyZ3k6LSBpdCBpcyBzd2VsbGluZyBvZiBoYW5kIGFuZCBmZWV0cyAsIGFsc28gZHJ5IHNraW4gYW5kIGxldGFocmd5IGFyZSBzeW1wdG9tcyBhc3NvY2lhdGVkIHdpdGggbXl4ZWRlbWEsIGEgY29uZGl0b24gd2hpY2ggaXMgcmVsYXRlZCB0byBoeXBvdGh5cm9pZGlzbS5JbXBvcnRuY2Ugb2YgcHJvbXB0IGRpYWdub3NpczotVGltZWx5IGRpYWduc2lzIGFuZCBtYW5hZ21udCBhenJlIGNydWNpYWwgZm9yIHByZXZlbnRpb24gYW5kIHN1cHBvcnQgIHRoYSBjaGlsZCdzIG5vcm1hbCBncm93dGggYW5kIGRldmVsb3BtbnQuLg==</text:p>
          </table:table-cell>
          <table:table-cell office:value-type="float" office:value="170348" table:style-name="ce1">
            <text:p>170348</text:p>
          </table:table-cell>
          <table:table-cell office:value-type="float" office:value="68" table:style-name="ce1">
            <text:p>6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14" table:style-name="ce1">
            <text:p>915214</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kg0J3QtdCz0ZbQt9GW0L3QtNC1INGB0rHRgNCw0pvSm9CwINC20LDRg9Cw0L8g0YDQtdGC0ZbQvdC00LUg0LDQvdCw0YLQvtC80LjRj9C70YvSmyDQtdGA0LXQutGI0LXQu9GW0LPRltC9INC20LDQt9Cw0YLRi9C9INCx0L7Qu9GB0LDQvCwg0L3QtdCz0ZbQt9Cz0ZYg0LDQvdCw0YLQvtC80LjRj9C70YvSmyDQtdGA0LXQutGI0LXQu9GW0LPRliDQsdGW0LfQtNC1INGC0ZbQuiDRltGI0LXQutGC0ZbSoyDQv9GA0L7Qu9Cw0LHRgdGLLCDRgtGW0LrQtSDRltGI0LXQutGC0ZbSoyDSm9Cw0LHRi9KT0YvQvdGL0qMg0LDQvdCw0LvRjCDRgtC10YHRltCz0ZYg0LDRgNKb0YvQu9GLINGI0YvSk9GDINCx0L7Qu9GL0L8g0LrQtdC70LXQtNGWLiDQkNC50YLQsCDQutC10YLRgdC10Log0LrRltGI0LrQtdC90YLQsNC5INCx0LDQu9Cw0LvQsNGAINC00LAg0YLRltC6INGW0YjQtdC6INC/0YDQvtC70LDQutGC0LjQvdC90ZbSoyDRgdC10LHQtdCx0ZbQvSDQttCw0LfQsNGC0YvQvSDQsdC+0LvRgdCw0LwsINC20LjRliDQsNC90LDRgtC+0LzQuNGP0LvRi9KbINC10YDQtdC60YjQtdC70ZbQutGC0LXRgNGW0LzQtdC9INCx0LDQudC70LDQvdGL0YHRgtGLINCx0L7Qu9GL0L8g0LrQtdC70LXQtNGWLiDQnNGL0YHQsNC70YvSk9CwLCDQsdCw0LvQsNC70LDRgNC00LDSk9GLINGC0ZbQuiDRltGI0LXQuiDQsNC70pPQsNGIINC60LXQt9GW0L3QtNC1INC90LDRiNCw0YAg0LbQtdGC0ZbQu9Cz0LXQvSwg0L3QtdC80LXRgdC1INC00LDQvNGL0LzQsNKT0LDQvSDQtNC10L8g0YLQtSDQsNC50YLRg9KT0LAg0LHQvtC70LDQtNGLLCDRgdC40L/QsNGC0YLQsNGDINCx0LDRgNGL0YHRi9C90LTQsCDRgtGW0Log0ZbRiNC10Log0LHQsNC70LDQu9Cw0YDQtNCwINKx0LfRi9C9LCDRgdC10LHQtdCx0ZYg0LzQsNC50LvRiyDRgtCw0LvRiNGL0psg0LbQtdGC0LrRltC70ZbQutGB0ZbQtyDQtNCw0LzRi9KT0LDQvdC90YvSoyDTmdGB0LXRgNGW0L3QtdC9INC205nQvdC1INGI0YvRgNGL0YjRgtGLINKb0LDQsdGL0pvRgtGL0qMg0YHQsNC70YvRgdGC0YvRgNC80LDQu9GLINGC0q/RgNC00LUg05nQu9GB0ZbQtyDQsdC+0LvRi9C/INC60LXQu9GD0ZbQvdC10L0g0LDQudGC0LAg0LDQu9Cw0LzRi9C9LiDQkdC10LrRltGC0ZbQu9GDINC/0YDQvtGG0LXRgdGWINC90LXQs9GW0LfRltC90LXQvSDRgtGW0Log0ZbRiNC10LrRgtGW0qMg0L/RgNC+0LvQsNC60YLQuNC90LPQtSDTmdC60LXQu9C10LTRliwg0YHQvtC90LTQsNC5INCw0psg0YHQtdCx0LXQv9GC0LXRgNGW0L3QtSDQttC10YLQutGW0LvRltC60YHRltC3INC00LDQvNGL0pPQsNC9INCw0L3Rg9GBLCDQutGW0YjQutC10L3RgtCw0Lkg0LHQsNC70LDQu9Cw0YDQtNCwINC90LXQs9GW0LfRltC90LXQvSDRgtGW0Log0ZbRiNC10Log0LbQsNC80LHQsNGBINKb0YPRi9GB0YvQvdGL0qMg0ZbRiNGW0L3QtNC1INGC06nQvNC10L0g0LHQuNGW0LrRgtGW0LrRgtC1INC+0YDQvdCw0LvQsNGB0LDQtNGLLCDQttOZ0L3QtSDTmdC70YHRltC3INCx0rHQu9GI0YvSm9C10YIg0pvQsNCx0YvRgNKT0LDRgdGL0LzQtdC9INCw0LnRgtCwINC60LXRgtGB0LXQuiDSm9C+0YDRiNCw0LvSk9Cw0L0g0LHQvtC70YvQvyDQutC10LvQtdC00ZYg0LbTmdC90LUg0YLRltC6INGW0YjQtdC60L/QtdC9INC20LDQvNCx0LDRgSDQsNC50LzQsNKT0YvQvdGL0qMg0LTQsNC80YMg0YTQsNC30LDRgdGL0L3QtNCw0pPRiyDRgtGD0LAg0LHRltGC0LrQtdC9INCw0YPRi9GC0pvRg9C70LDRgNKT0LAg0LzRi9GB0LDQuyDQutC10LvRgtGW0YDQtSDQsNC70LDQvNGL0L0uINCc0YvRgdCw0LvRiywg0LDQvdGD0YEg0LjQvdGC0LXRgNGC0L7RgNCw0YbQuNGP0YHRiyDRgtGW0Log0ZbRiNC10LrRgtGW0qMg0L/RgNC+0LvQsNC60YLQuNC90L3RltKjINC/0LDQudC00LAg0LHQvtC70YPRi9C9INC90LDSm9GC0Ysg0YHQtdCx0LXQsdGWINCx0L7Qu9GDINC80q/QvNC60ZbQvdC00ZbQu9GW0LPRliDQsdCw0YDRiNGL0LvRi9KbINC00LXQvyDQsNC50YLRi9C70pPQsNC9LCDQvtC00LDQvSDQsdCw0YHSm9CwINKb0LDRgNCw0L/QsNC50YvQvCDRgtGW0LvQvNC10L0g0ZbRiCDSm9Cw0YLRgyDQvdC10LzQtdGB0LUg0LTQuNCw0YDQtdGPINGC0ZbQuiDRltGI0LXQuiDQv9GA0L7Qu9Cw0LrRgtC40L3QvdGW0qMg0LTQsNC80YPRi9C90LAg0YvSm9C/0LDQuyDQtdGC0YPRliDTmdCx0LTQtdC9INC80q/QvNC60ZbQvS4gMikg0JHQsNC70LDQu9Cw0YDQtNCwINC305nRgCDRiNGL0pPQsNGA0YMg0L7RgNGC0LAg0LXRgdC10L/Qv9C10L0g0LDQu9Cw0YLRi9C9INCx0L7Qu9GB0LDSmyDQttC40YvRgNC80LAg0L3QtdC80LXRgdC1INC20LjRi9GA0LzQsCDQsdC10YEg0YDQtdGCINCx0L7Qu9Cw0LTRiywg0L3TmdGA0LXRgdGC0LXQu9C10YDQtNC1INC305nRgCDRiNGL0pPQsNGA0YMg0LbQuNGW0LvRltCz0ZYg0LHRltGA0L3QtdGI0LUg0YTQsNC60YLQvtGA0LvQsNGA0pPQsCDSm9Cw0YDQsNC5INC90LXQs9GW0LfRltC90LXQvSDTmdC60LXQu9C10LTRli4g0KHQvtC90YvSoyDRltGI0ZbQvdC00LUg0LDQu9Cw0YLRi9C9INCx0L7Qu9GB0LDSmywg0L3QtdCz0ZbQt9GW0L3QtdC9INC10LzRltC30YMg0L3QtdC80LXRgdC1INC20LDRgdCw0L3QtNGLINGC0LDQvNCw0pvRgtCw0L3QtNGL0YDRg9C00YvSoyDQvNOp0LvRiNC10YDRliDQutOp0L8sINC20LjRliDRgtCw0LzQsNKbINCx0LXRgNGD0ZYg0LTQtSDTmdC60LXQu9C10LTRliwg0L3TmdGA0LXRgdGC0LXQvdGW0qMg0YTQuNC30LjQvtC70L7Qs9C40Y/Qu9GL0psg0YLSsdGA0pPRi9C00LDQvSDQttCw0YHRi9C90LAsINGB0LDQu9C80LDSk9GL0L3QsCDQttOZ0L3QtSDQt9OZ0YAg0YjRi9KT0LDRgNGDINC20q/QudC10YHRltC90LUg0pvRi9C30LzQtdGC0ZbQvdC1INCx0LDQudC70LDQvdGL0YHRgtGLINCx0L7Qu9GL0L8g06nQt9Cz0LXRgNGW0LvRg9GWINC80q/QvNC60ZbQvS4g0J7RgNGC0LDRiNCwINCw0LvSk9Cw0L3QtNCwINC205nQvdC1INCx0YvQu9Cw0LnRiNCwINCw0LnRgtKb0LDQvdC00LAg0YLRg9KT0LDQvSDQvdOZ0YDQtdGB0YLQtdC00LUg0LrSr9C90ZbQvdC1INC20LjRi9GA0LzQsCDQsdC10YEg0YDQtdGCINC90LXQvNC10YHQtSDRgdC+0Lsg0LTQuNCw0L/QvtC30L7QvdC00LAg0LfTmdGAINGI0YvSk9Cw0YDRg9GLINC80q/QvNC60ZbQvSDQsdC+0LvRi9C/INC60LXQu9C10LTRliwg0LDQuyDQsdGW0YAg0LDQudC70YvSmyDQvdOZ0YDQtdGB0YLQtdC90ZYg0LDQudGC0LDRgtGL0L0g0LHQvtC70YHQsNC8LCDQutKv0L3RltC90LUg0L3QtdCz0ZbQt9GW0L3QtdC9INC20LjRi9GA0LzQsCDRgNC10YIg0LfTmdGAINGI0YvSk9Cw0YDRg9GLINOZ0LHQtNC10L0g0LzSr9C80LrRltC9INCx0L7Qu9GL0L8g0LrQtdC70LXQtNGWLiDQkNC90LDRgtC+0LzQuNGP0LvRi9KbINGC0rHRgNKT0YvQtNCw0L0g0LbQsNC30LDRgtGL0L0g0LHQvtC70YHQsNC8LCDQsdOZ0YDRltC80ZbQt9Cz0LUg0LzTmdC70ZbQvCDRhNCw0LrRgiwg0L7QuyDQvdOZ0YDQtdGB0YLQtdC70LXRgNC00ZbSoyDSm9GD0YvSmyDRgdC40YvQvNC00YvQu9GL0pPRiyDQsNC3INCx0L7Qu9GL0L8g0LrQtdC70LXQtNGWLCDQttOZ0L3QtSDQvtC70LDRgNC00YvSoyDQsdKv0LnRgNC10LrRgtC10YDRliDQtNC10L3QtSDRgdCw0LvQvNCw0pPRi9C90LAg0pvQsNGA0LDQudGC0YvQvSDQsdC+0LvRgdCw0psg0YLRltC60LXQu9C10Lkg0YHQtdCx0LXQvyDQsdC+0LvRi9C/INC60LXQu9C10LTRli4g0J3QtdGB0LXQv9GC0ZbSoyDQutOp0L8g0LzTqdC70YjQtdGA0LTQtSDRiNGL0pPQsNGA0YvQu9GD0Ysg0L7RgdGLINCx0q/QudGA0LXQutGC0ZbSoyDQsNC90LDRgtC+0LzQuNGP0YHRi9C90LAg0LHQsNC50LvQsNC90YvRgdGC0Ysg0LHQvtC70YPRiy4g0J3TmdGA0LXRgdGC0LUg06nRgdC60LXQvSDRgdCw0LnRi9C9INC90LXQvNC10YHQtSDQtNCw0LzRgyDRhNCw0LfQsNGB0YvQvdC00LAg0pvRg9GL0pvRgtGL0qMg0YHQuNGL0LzQtNGL0LvRi9KT0Ysg0LDRgNGC0LDQtNGLLCDQt9OZ0YAg0YjRi9KT0LDRgNGD0Ysg0LbQuNGW0LvRltCz0ZYg0LDQt9Cw0LnRi9C/INC60LXQu9C10LTRliDRg9Cw0pvRi9GC0YvQvNC10L0uINCV0LPQtdGAINC20LDQu9C/0Ysg0LfTmdGAINCw0L3QsNC70LjQt9GW0L3QtNC1INKb0LDRgNCw0LnRgtGL0L0g0LHQvtC70YHQsNKbLCDQv9Cw0YLQvtC70L7Qs9C40Y/Qu9GL0psg06nQt9Cz0LXRgNGW0YHRgtC10YAg0LDQvdGL0pvRgtCw0LvQvNCw0YHQsCwg0LHRltGAINCw0LnQu9GL0psg0L3TmdGA0LXRgdGC0LXQtNC1INC20LjRliDQt9OZ0YAg0YjRi9KT0LDRgNGDINKb0LDQu9GL0L/RgtGLINGE0LjQt9C40L7Qu9C+0LPQuNGP0LvRi9KbINC/0YDQvtGG0LXRgdGBINCx0L7Qu9GD0Ysg0LzSr9C80LrRltC9Lg==</text:p>
          </table:table-cell>
          <table:table-cell office:value-type="float" office:value="170348" table:style-name="ce1">
            <text:p>170348</text:p>
          </table:table-cell>
          <table:table-cell office:value-type="float" office:value="72" table:style-name="ce1">
            <text:p>72</text:p>
          </table:table-cell>
          <table:table-cell office:value-type="string" table:style-name="ce1">
            <text:p>1-ші сұраққа нақты жауап жоқ.Пролактиннің тік ішекке қандай қатысы болуы мүмкін</text:p>
          </table:table-cell>
          <table:table-cell office:value-type="float" office:value="0" table:style-name="ce1">
            <text:p>0</text:p>
          </table:table-cell>
          <table:table-cell table:number-columns-repeated="16376"/>
        </table:table-row>
        <table:table-row table:style-name="ro1">
          <table:table-cell office:value-type="float" office:value="915215" table:style-name="ce1">
            <text:p>915215</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3QsdKx0Lsg0L3QtdCz0ZbQt9GW0L3QtdC9INGC0ZbQuiDRltGI0LXQutGC0ZbSoyDQsNC90LDQu9C00Ysg0YHQsNKj0YvQu9Cw0YPRi9C90LDQvSDRiNGL0YDRi9GI0YLRiyDSm9Cw0LHQsNGC0YvQvdGL0qMg0YjRi9KT0YvQvyDRgtKx0YDRg9GLIC7QmtGW0YjQutC10L3RgtCw0Lkg0LHQsNC70LDQu9Cw0YDQtNCwINGC0ZbQuiDRltGI0LXQuiDQsNC50L3QsNC70LzQsNGB0Ysg0LbQuNGWINCw0L3RgtC+0LzQuNGP0LvRi9KbINC10YDQtdC60YjQtdC70ZbQutGC0LXRgCDQsNGA0pvQsNGB0YvQvdC00LAg0LHQvtC70LDQtNGLIC4g0LzRi9GB0LDQu9GLINGC0ZbQuiDRltGI0LXQutGC0ZbSoyDRgtGW0YDQtdGD0YvQvdGW0qMg0LHSsdC30YvQu9GD0YvQvdCwICDTmdC10LrQu9C10YLRltC9INOZ0LvRgdGW0Lcg0LbQsNC80LHQsNGBINCx0rHQu9GI0YvSm9C10YLRliDTqdC50YLQutC10L3RliDQvtC70LDRgNC00LAg0LHSsdC70YjRi9Kb0LXRgiDTmdC70YHRltC3LCAg05nQu9GWINGC0L7Qu9GL0psg0LTQsNC80YvQvNCw0pPQsNC9ICzRgdC+0L3Ri9C80LXQvSDQsdGW0YDQs9C1INKb0YvRgdKb0LAg0LDQvdCw0LvQtNGLINC60LDQvdCw0Lsg0LbTmdC90LUg0YPQu9C60LXQvSDRgtGW0Log0ZbRiNC10Log0LDQvNC/0YPQu9Cw0YHRiyAu0ZbRiCDSm9Cw0YLRgyDQvNC10L0g0LTQuNCw0YDQtdGPINGC0ZbQuiDRltGI0LXQuiDQsNC50L3QsNC70LzQsNGB0YvQvSDQtNCw0LzRi9GC0YPRiyDQvNGD0LzQutGW0L0gLiA8YnIgLz4NCjIt0JHSsdC7INC90LDRg9Kb0LDRgdGC0LAg0L3QtdGB0LXQvyDRiNGL0pPQsNGA0YMg0LbRg9C50LXRgdGW0L3QtNC1INC/0L7RgtC+0LvQvtCz0LjRjyDQsNC90YvSm9GC0LDQu9C80LDSk9Cw0L0gLiDQndC10YHQtdC/INGI0YvSk9Cw0YDRgyDQttC40ZbQu9GW0LPRliDQsdGW0YDQvdC10YjQtSDRhNCw0LrRgtC+0YDQu9Cw0YDSk9CwINCx0LDQudC70LDQvdGL0YHRgtGLIC4g0LXQvNGI0LXQuiDRgdKv0YLRltC90ZbSoyDQttOZ0L3QtSDQttCw0YHQsNC90LTRiyDRgdKv0YLRgtGW0qMg0LzTqdC70YjQtdGA0ZbQvdC1ICAs0L3TmdGA0LXRgdGC0LUg0LbQsNGB0Ysg0LzQtdC9INGB0LDQu9C80LDSk9GL0L3QsCAsINC305nRgCDRiNGL0pPQsNGA0YMg0LbRg9C50LXRgdGW0L3RltKjINKb0YvQt9C80LXRgtGW0L3QtSDQsdCw0LnQu9Cw0L3Ri9GB0YLRiyDTqdC30LPQtdGA0YPRgyDQvNGD0LzQutGW0L0gLiDQvtGA0YLQsNGI0LAg0LDQu9Cz0LDQvdC00LAg0LbQsNKj0LAg0YLRg9KT0LDQvSDQvdOZ0YDQtdGB0YLQtSDRiNCw0LzQsNC80LXQvSAyMCDRgNC10YIgLCDQsNC7IDEg0LDQudC70YvSmyDQsdCw0LvQsCDQutGD0L3RltC90LUgMTMg0YDQtdGCINC305nRgCDRiNGL0pPQsNGA0YPRgyDQvNGD0LzQutGW0L0gLiDQsNC90LDRgtC+0LzQuNGP0LvRi9KbINGC0rHRgNKT0YvQtNCw0L0g0L3TmdGA0LXRgdGC0LXQu9C10YDQtNC1INKb0rHRi9KbINGB0LjQudGL0LzQtNGL0LvRi9KT0Ysg0LDQtywg0LDQuyDQvtC70LDRgNC00YvSoyDQsdGD0LnRgNC10LrRgtC10YDRliDQtNC10L3QtSDRgdCw0LvQvNCw0pPRi9C90LAg0pvQsNGC0YvRgdGC0Ysg0LrTqdC/INC90LXRgdC10L8g0LHTqdC70LXQtNGWICwg0L3TmdGA0LXRgdGC0LUg06nRgdC60LXQvSDRgdCw0LnRi9C9INKb0q/Ri9Kb0YLRi9KjINC806nQu9GI0LXRgNGWINCw0YDRgtCw0LTRiyAsINCx0rHQuyDQt9OZ0YAg0YjRi9KT0LDRgNGDINGB0LDQvdGLINCw0LfQsNGP0LTRiyAuINC90LDSsdKb0LDRgSDQsdCw0LvQsNC90YvSoyDQsNC90LDQu9C40LfRltC90LTQtSAg0L/QvtGC0L7Qu9C+0LPQuNGPINCw0L3Ri9Kb0YLQsNC70LzQsNGB0LAgLCDQsdKx0Lsg0pvQsNC70YvQv9GC0Ysg0YTQuNC30LjQvtC70L7Qs9C40Y/Qu9GL0psg0L/RgNC+0YLRhtC10YEg0LHQvtC70YPRiyDQvNGD0LzQutGW0L0gLiA=</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Жауап толық емес</text:p>
          </table:table-cell>
          <table:table-cell office:value-type="float" office:value="0" table:style-name="ce1">
            <text:p>0</text:p>
          </table:table-cell>
          <table:table-cell table:number-columns-repeated="16376"/>
        </table:table-row>
        <table:table-row table:style-name="ro1">
          <table:table-cell office:value-type="float" office:value="915258" table:style-name="ce1">
            <text:p>915258</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7QltCw0qPQsCDRgtGD0YvQu9KT0LDQvSDQsdCw0LvQsNC70LDRgNC00LAg0YLRltC6INGW0YjQtdC6ICDRgdCw0LvRi9GB0YLRi9GA0LzQsNC70Ysg0YLSr9GA0LTQtSDSr9C70LrQtdC90LTQtdGA0LPQtSDSm9Cw0YDQsNKT0LDQvdC00LAg0rHQt9GL0L0uINCW05nQvdC1INGC0ZbQuiDRltGI0LXQutGC0ZbSoyDQsNC80L/Rg9C70LDRgdGLINGC0L7Qu9GL0psg0LTQsNC80YvQvNCw0pPQsNC9LiDQotGW0Log0ZbRiNC10LrRgtGW0qMg0YjRi9GA0YvRiNCw0YHRgtGLINC90LXQs9GW0Lcg0pvQsNCx0LDRgtGLINKb0LDQu9GL0qMg0LHQvtC70pPQsNC90LTRi9Kb0YLQsNC9LCDRiNGL0YDRi9GI0YLRiyDSm9Cw0LHQsNGC0Ysg0LHQtdGA0ZbQuiDRhNC40LrRgdCw0YbQuNGP0LvQsNC90LHQsNC50LTRiy4g0KLRltC6INGW0YjQtdC60YLRltKjINCw0L3QsNC70YzQtNGL0psg0LHTqdC70ZbQs9GW0L3QtNC1INC+0YDQvdCw0LvQsNGB0pvQsNC9INC60L7Qu9C+0L3QsNC70LDRgCDQvNC10L0g0pvQsNGC0L/QsNGA0LvQsNGAINOZ0LvRliDRgtC+0LvRi9KbINC20LXRgtGW0LvQvNC10LPQtdC9INC205nQvdC1INGB0YvRgNGC0pvRiyDRgdGE0LjQvdC60YLQtdGAINOZ0LvRgdGW0Lcg0LHQvtC70YvQvyDQutC10LvQtdC00ZYu0KHQvtC90YvQvNC10L0g0pvQsNGC0LDRgCDRgtGW0Log0ZbRiNC10LrRgtGWINKb0L7RgNGI0LDQvyDRgtKx0YDQsNGC0YvQvSDQvNCw0Lkg0YLRltC90LTQtdGA0ZYg0LDQtyDQsdC+0LvQsNC00YsuINCe0YHRiyDRgdC10LHQtdC/0YLQtdGA0LPQtSDQsdCw0LnQu9Cw0L3Ri9GB0YLRiyAg0LTQtdGE0LXQutCw0YbQuNGPINC60LXQt9GW0L3QtNC1INGC0ZbQuiDRltGI0LXQutGC0ZbSoyDQv9GA0L7Qu9Cw0L/RgdGLINCx0L7Qu9Cw0LTRiy7QkdCw0LvQsCDQttC10YLRltC70LUg0LrQtdC70LUg0YLRltC6INGW0YjQtdC60YLRltKjINGE0LjQutGB0LDRhtC40Y/Qu9GL0psg0LDQv9C/0LDRgNCw0YLRiyDQtNCw0LzQuNC00YsuMi4g0JHSsdC7INC20LDRgdGC0LDSk9GLINCx0LDQu9Cw0LvQsNGAINC10LPQtdGAINC20LXRgtGW0LvQs9C10L0g0LHQvtC70YHQsCDQutKv0L3RltC90LUgMjAw0LzQuyDQt9OZ0YAgLCDQtdCz0LXRgCDQtdGA0YLQtSDRgtGD0YvQu9KT0LDQvSDQsdC+0LvRgdCwIDk1LTEyNdC80Lsg0LfTmdGAINGI0YvSk9Cw0YDQsNC00Ysu0K/Sk9C90LgsINC60q/QvdGW0L3QtSAxNS0yMCDRgNC10YIuINCR0ZbRgNGW0L3RiNGW0LTQtdC9INCx0q/QudGA0LXQutGC0LUg0LfTmdGA0LTRliDSm9C+0LnRi9C70YLRgyDRgtOp0LzQtdC9INCx0L7Qu9Cw0LTRiy4g0JXQvdC00ZYg0YLRg9GL0LvSk9Cw0L0g0LHQsNC70LDQu9Cw0YDQtNCwINC305nRgNC00ZbSoyDRgtGL0pPRi9C30LTRi9KT0YsgMTAxOCDRgtC10qMsINCx0rHQuyDSr9C70LrQtdC90LTQtdGA0LPQtSDQttCw0pvRi9C9INC90L7RgNC80LAuINCh0LXQsdC10LHRliDQvdC+0LLQvtGA0L7QttC00LXQvdC90YvQudC70LDRgCDQsdGW0YDRltC90YjRliDQutC10LfQtNC1INOp0YLQtSDQsNC3INC305nRgCDRiNGL0pPQsNGA0LDQtNGLLNC60LXQudGW0L0gINC305nRgCDRgdKx0LnRi9C70pPQsNC90LTQsCDRgtGL0pPRi9C30LTRi9KT0YsgMTAxMNC90LDQvSDRgtOp0LzQtdC9INGC0YPRgdC10LTRlizQvdOZ0YLQuNC20LXRgdGW0L3QtNC1INC606nQvyDQvNOp0LvRiNC10YDQtNC1INC80L7Rh9C10LLQuNC90LAg0LrQvtC90YYuINCw0Lcg0LfTmdGAINGI0YvSk9Cw0YDQsNC00YsuINCh0L7QvdC00YvSm9GC0LDQvSDQsdCw0LvQsNC70LDRgNC00YvSoyDQt9OZ0YDRliDRgdGD0pPQsCDSsdKb0YHQsNGBINCx0L7Qu9Cw0LTRiy7QldC60ZbQvdGI0ZbQtNC10L0g0LPQuNC00YDQvtGB0YLQsNGC0LjQutCw0LvRi9KbINKb0YvRgdGL0Lwg0YLTqdC80LXQvSDQsdC+0LvQsNC00YsuINCd05nRgtC40LbQtdGB0ZbQvdC00LUg0YTQuNC70YzRgtGA0LDRhtC40Y8g0Y3RhNGE0LXQutGC0LjQstGC0ZbQu9GW0LPRliDRgtOp0LzQtdC9INCx0L7Qu9Cw0LTRiy4g0q7RiNGW0L3RiNGW0LTQtdC9INCz0L7RgNC80L7QvdC00LDRgCDRgNOp0LvRli4g0JHQsNC70LDQu9Cw0YDQtNGL0qMg0L3QtdGE0YDQvtC90LTQsNGA0YvQvdGL0qMg0L/RgNC+0LrRgdC40LzQsNC70YzQtNGWLCDQtNC40YHRgtCw0LvRjNC00ZYg0YLSr9GC0ZbQutGI0LXQu9C10YDRliDQkNCU0JMs0LDQu9GM0LTQvtGB0YLQtdGA0L7QvSDQs9C+0YDQvNC+0L3QtNCw0YDRi9C90LAg0YHQtdC30ZbQvNGC0LDQu9C00YvSk9GLINGC06nQvNC10L0uINCT0LXQvdC40YbQuNC90YHQutC40LksINC+0YHRiyDQsNCy0YLQvtGAINCx0L7QudGL0L3RiNCwINCx0LDQu9Cw0pPQsCDRjdC60LfQvtCz0LXQvdC00ZYg0JDQlNCTLCDQsNC70YzQtNC+0YHRgtC10YDQvtC9INGB0LDQu9KT0LDQvdC00LAg0pvQsNC90L3Ri9KjINC+0YHQvNC+0YLQuNC60LDQu9GL0psg0pvRi9GB0YvQvNGL0L0g06nQt9Cz0LXRgNC80LXQudGC0ZbQvdC00ZbQs9GW0L0g0LDQudGC0pvQsNC9LiAg0JDQvdCw0YLQvtC80LjRj9C70YvSmyDQtdGA0LXQutGI0LXQu9GW0LrRgtC10YDRltC90LUg0pvRg9GL0pvRgtGL0qMg0LrTqdC70LXQvNGWINC60ZbRiNC60LXQvdGC0LDQuSwgMzUtNDDQvNC7LCDRgdC+0YHRi9C9INCz0LXQvdC70LUg0ZbQu9C80LXQs9GW0L3RltKjINGB0LDQu9GL0YHRgtGL0YDQvNCw0LvRiyDRgtKv0YDQtNC1INKb0YvRgdKb0LAg0LHQvtC70YPRiyDQttCw0YLQsNC00YsuICA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61" table:style-name="ce1">
            <text:p>915261</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7QotGW0Log0ZbRiGXQutGC0ZbSoyDRgtKv0YHRltC/INC60LXRgtGD0ZYo0L/RgNC+0LvQsNC/0YHRiykt0LHSsdC7INGC0ZbQuiDRltGI0LXQutGC0ZbSoyDQsdGW0YAg0LHQvtC70ZbQs9GWIGHQvdGD0YEg0LDRgNKb0YvQu9GLINGI0YvSk9GL0L8g0LrQtdGC0LXRgtC10YLRltC9INC20LDSk9C00LDQuSDQsdC+0LvRi9C/INGC0LDQsdGL0LvQsNC00YsuINCR0LDQu2HQtNCwINCx0rHQuyDQsdC10LvQs9GW0LvRliDQsdGW0YAg0LDQvWHRgtC+0LzQuNGPINGE0LjQt9C4b9C70L7Qs9C40Y/Qu9GL0Log0LXRgNC10LrRiNC10LvRltC60YLQtdGAINOZ0YHQtdGA0ZbQvdC10L0g0L7RgNGL0L0g0LDQu9GD0Ysg0LzSr9C80LrRltC9LtCW0LDQvNCx0LDRgSDRgtKv0LHRliDQvNC10L0gYdC90YPRgSDQsdKx0LvRiNGL0pvQtdGC0YLQtdGA0ZbQvdGW0qMg0YLQvtC70YvSmyDQtNCw0LzRi9C80LDRg9GLLdCx0LDQu9Cw0LvQsNGA0LTQsCDQsdKx0LvRiNGL0ptl0YLRgtC10YAg0LbQtdGC0LrRltC70ZbQutGC0ZYg0LTTmdGA0LXQttC10LTQtSDRgdC10YDQv9GW0LzQtNGW0LvRltC60LrQtSDQttOZ0L3QtSDQutKv0YjQutC1INC40LUg0LXQvNC10YEuINCh0L7QuyDRgdC10LHQtdC/0YLRliDRgtGW0Log0ZbRiNC10Log0YLSr9GB0ZbQvyDQutC10YLRg9GW0L3QtSDRi9Kb0L/QsNC7INC20LDRgdCw0LnQtNGLLNOY0YHRltGA0LXRgdC1INCx0LDQu9Cw0LTQsCDRltGIINC60LDRgtGDINC90LXQvNC10YHQtSDQtNC10YTQtdC60LDRhtC40Y8g0LrQtdC30ZbQvdC00LUg0LrSr9GIINGB0LDQu9GL0L8g0ZbRiNGC0LXQs9GWINC60YvRgdGL0LzQvdGL0L0g0LbQvtKT0LDRgNGL0LvQsNGD0Ysg0L3TmdGC0LjQttC10YHQuNC90LTQtSDQtNC1INC+0YDRi9C9INCw0LvRg9GLINC80YPQvNC60ZbQvSDRgdC+0L3Ri9C80LXQvSDQutCw0YLQsNGALNCx0LDQu9Cw0LvQsNGA0LTQsNCz0Ysg0ZbRiNC10Log0LXRgNC10LrRiNC10LvQuNC60YLQtdGA0LjQvdC00LUg0YPQvNGL0YLQv9Cw0YMg0LrQsNC20LXRgizRj9KT0L3QuCAzINC20LDRgdKb0LAg0LTQtdC50ZbQvdCz0ZYg0LHQsNC70LDQu9Cw0YDQtNCwINGC0ZbQuiDRltGI0LXQuiDRiNGL0YDRi9GI0YLRiyDSm9Cw0LHRi9KT0Ysg0pvQsNC70YvSoyzQsdKx0LvRiNGL0LrQtdGC0YLQtdGA0Lgg0pvQvtC30LPQsNC70LzQsNC70Ysg05nQu9GB0ZbQtyDQttOZ0L3QtSDRgdC+0LfRi9C70LzQsNC70Ysg0LHQvtC70YvQvyDQutC10LvQtdC00Lgs0YTRg9C90LrRhtC40L7QvdCw0LvQtNGLINC20LXRgtGW0LvQvNC10LPQtdC9LtCR0rHQuyDQtNCwINGC0ZbQuiDRltGI0LXQuiDRgtKv0YHRltC/INC60LXRgtGDINC60LDRg9C/0ZbQvSDQsNGA0YLRgtGL0YDQsNC00Ysu0IbRiCDQutCw0YLRgyDQvtGB0Ysg0LbQsNGB0YLQsNKT0Ysg0LHQsNC70LDQu9Cw0YDQtNCwINGC0ZbQuiDRltGI0LXQuiDQv9GA0L7Qu9Cw0L/RgdGL0L3QsCDQsNC70YvQvyDQutC10LvQtdGC0LjQvSDQvdC10LPQuNC30LPQuCDRhNCw0LrRgtC+0YDQu9GL0YDQtNGL0qMg0LHRltGA0ZYg0LHQvtC70YvQvyDRgdCw0L3QsNC70LDQtNGLLtCG0Ygg0pvQsNGC0YMg0LTSsdGA0YvRgSDRgtCw0LzQsNKb0YLQsNC90YMg0YDQtdC20LjQvNGW0L0g0YHQsNKb0YLQsNC80LDQs9Cw0L3QtNGL0LrRgtCw0L0g0LrTqdCx0LjQvdC1INC60LvQtdGC0YfQsNGC0LrQsCDQvdC10LzQtdGB0LUg0YHSsdC50YvSm9GC0YvSmyDQttC10YLRltGB0L/QtdGD0YjQuNC70LjQs9C40L3QtdC9INC/0LDQudC00LAg0LHQvtC70LDQtNGLLiDQodC+0L3Ri9C80LXQvSDQutCw0YLQsNGAINKb0LDRgtGC0Ysg0LrSr9GIINGB0LDQu9GL0L8g0LbRi9C70LDRgyDQv9GB0LjRhdC+0Y3QvNC+0YbQuNC+0L3QsNC70LTRiyDRgdGC0YDQtdGB0YEg0YLQtSDRltGI0LrQtSDQutKv0Ygg0YHQsNC70YvQvyzQsdKx0LfRi9C70YvRgdGC0LDRgNKT0LAg0LDQu9GL0L8g0LrQtdC70YPRliDQvNKv0LzQutGW0L0u0KLRltC6INGW0YjQtdC6INC905nRgNC10YHRgtC10LvQtdGA0LTQtSDRhtC40LvQuNC90LTRgCDRgtOZ0YDRltC30LTRliDQsNC80L/Rg9C70LAs0LjRltGA0ZbQvNC00LXRgNGWINCx0L7Qu9C80LDQudC00Ysu0prQsNGC0L/QsNGA0LvQsNGA0Ysg0YLQvtC70YvQuiDQtNCw0LzRi9C80LDQs9Cw0L0uMiDQttCw0YHQutCwINC00LXQudGW0L3Qs9GWINCx0LDQu9Cw0LvQsNGA0LTQsCDRgtGW0Log0ZbRiNC10Log0LzQsNC50LvRiyDQttCw0YHRg9C90YvQuiDQtNCw0LzRi9C80LDQs9Cw0L3QtNGL0LrRgtCw0L0g0LTSsdGA0YvRgSDQsdC10LrRltGC0ZbQu9C80LXQs9C10L0uMiDQttCw0YHRgtCwINCz0LDQvdCwINGC0L7Qu9GL0Log0YHQvtC90LPRiyDQvtGA0L3QsNC70LDRgdGD0Ysg0LHQvtC70LDQtNGLLiDQodGE0LjQvdC60YLQtdGA0LvQtdGA0ZbQvdGW0qMg0LTSr9GA0YvRgSDQttC10YLRltC70LzQtdGD0ZYg0L7RgdGLINGC0ZbQuiDRltGI0LXQuiDRgtKv0YHRltC/INC60LXRgtGD0ZbQvSDRgtGD0LTRi9GA0LDQtNGLLiDQkdCw0LvQsNC70YDQtNCwINCw0L3Rg9GBINC00L7RgNGB0LDQu9C00Lgg0L7RgNC90LDQu9Cw0YHQutCw0L0s0LrRg9C50YvQvNGI0LDQutGC0LDQvSAyMCDQvNC8INCw0YDQsNC60LDRiNGL0LrRgtGL0LrRgtCwINC+0YDQvdCw0LvQsNGB0LrQsNC9LjxiciAvPg0KMi4xINCw0LnQu9GL0Log0LHQsNC70LDQtNCw0LPRiyDQt9OZ0YAg0YjRi9Cz0LDRgNGDINC20LjRltC70ZbQs9GW0L0g0YLRg9KT0YvQt9Cw0YLRi9C9INCx0LDQu9Cw0LvQsNGA0LTQsNCz0Ysg0LfTmdGAINGI0YvQs9Cw0YDRgyDQttC+0LvQtNCw0YDRi9C90YvSoyDQsNC90LDRgtC+0LzQuNGPINGE0LjQt9C40L7Qu9C+0LPQuNGP0LvRi9KbINC10YDQtdC60YjQtdC70ZbQutGC0LXRgNGWLtCR0LDQu9Cw0LvQsNGA0LTQsCDQtdGA0LXRgdC10LrRgtC10YDQs9C1INKb0LDRgNCw0LPQsNC90LTQsCDQt9OZ0YAg0YjRi9Cz0LDRgNGDINC20LjRltC70ZbQs9GWINC20LjRliDQsdC+0LvQsNC00Ysu0J3QsNGA0LXRgdGC0LUg0LrSr9C90ZbQvdC1IDEwLTIwINGA0LXRgiDQt9OZ0YAg0YjRi9Cz0LDRgNGD0Ysg0LzSr9C80LrRltC9LjEg0LDQudC70YvQuiDQsdCw0LvQsNC00LAgMi0zINGB0LDSk9Cw0YIg0YHQsNC50YvQvSDQsdC+0LvQsNC00YsuMS4g0JHQsNC70LDQtNCw0LPRiyDQsdKv0LnRgNC10Log0LbSsdC80YvRgdGL0L3Ri9KjINC10YDQtdC60YjQtdC70ZbQutGC0LXRgNGWLtCW0LDQvdCwINGC0YPQs9Cw0L0g0L3QsNGA0LXRgdGC0LXQvdC40L0g0LHSr9C50YDQtdCz0ZYg0YLQvtC70YvQuiDQtNCw0LzRi9C80LDQs9Cw0L0s0LfTmdGA0LTRliDQutC+0L3RhtC10L3RgtGA0LvQtdGDINC60YvQt9C80LXRgtGWINC20LXRgtC60ZbQu9GW0LrRgdGW0Lcg0LHQvtC70YPRi9C90LDQvSDQsdCw0LvQsCDQttC40ZYg0LfQsNGAINGI0YvQs9Cw0YDQsNGC0YvQvSDQsdC+0LvQsNC00Ysu0JfTmdGAINC606nQvyDRgdKx0LnRi9Kb0YLQutGC0YvQutGC0LDQvSDRgtGD0YDQsNC00YsuINCQ0Lsg0LHSr9C50YDQtdC6INGB0YMg0LzQtdC9INGC0YPQt9C00LDRgNC00Ysg0LTRg9GA0YvRgSDRg9GB0YLQsNC5INCw0LvQvNCw0LnQtNGLLjIu0KHSsdC50YvQutGC0YvQutGC0YvQvSDQutOp0L8g0YLSr9GB0YPRli7QldC80YjQtdC6INC10LzQtdGC0ZbQvSDQvdC10LzQtdGB0LUg0LHQvtGC0LXQu9C60LXQvNC10L0g0YLQsNC80LDSm9GC0LDQvdCw0YLRi9C9INCx0LDQu9Cw0LvQsNGAINOp0Lcg0YHQsNC70LzQsNCz0YvQvdCwINCx0LDQudC70LDQvdGL0YHRgtGLINC606nQvyDRgtKx0YLRi9C90YPRiyDQvNGD0LzQutGW0L0uMy4g05nRgCDRiNGL0LPQsNGA0YMg0L/RgNC+0YbQtdGB0ZbQvdC1INC00rHRgNGL0YEg0YHQsNC90LDQu9GLINGC0q/RgNC00LUg0LHQsNKb0YvQu9Cw0YMg0LHQvtC70LzQsNGD0YsuMSDQsNC50LvRi9C6INCx0LDQu9Cw0LTQsCDRgtC+0LvRi9C6INC00LDQvNGL0LzQsNGD0YvQvdCwINCx0LDQudC70LDQvdGL0YHRgtGLINCx0rHQuyDRgNC10YTQu9C10LrRgtC+0YDQu9GLINGC0q/RgNC00LUg0LbSr9GA0ZbQvyDQsdCw0LvQsCDQutOp0L8g0LfTmdGAINGI0YvSk9Cw0YDRg9GLINC80q/QvNC60ZbQvS4gNC7QtdC80ZbQt9GD0LvRliDQsdCw0LvQsNC70LDRgCDQvNC10YLQsNCx0L7Qu9C40LfQvNGWINC10YDQtdGB0LXQutGC0LXRgNCz0LUg0pvQsNGA0LDQs9Cw0L3QtNCwINKb0LDRgNC60YvQvdC00Ysg0YLSr9GA0LTQtSDQttKv0YDQtdC00ZYu0JHSsdC7INCx0q/QudGA0LXQuiDQttKx0LzRi9GB0YvQvdGL0qMg0LDRgNGC0YPRiyDQsNC70YvQvyDQutC10LvQtdC00ZYuINCa0LXQudGW0L3QvdC10L0g0LHSsdC7INC305nRgCDRiNGL0LNh0YDRgyDQttC40ZbQu9GW0LPRliDQttCw0LnQu2HQvyDQsNC30LDRjyDQsdCw0YHRgmHQudGC0YvQvSDQsdC+0LvQsNC00Yss0LHRg9C7INCx0LDQu2HQvdGL0L0g0LfTmdGA0LTRliDQutC+0L3RhtC10L3RgtGA0LvQtdGDINC60LDQsdGW0LvQtdGC0ZYg0LDRgNGC0YPRi9C80LXQvSDRgtKv0YHRltC90LTRltGA0ZbQu2XQtNGWLtCh0L7QvdGL0LzQtdC9INC60LDRgtCw0YAg0LHQsNC70LDQvdGL0L0g0LfTmdGAINGI0YvQs2HRgNGD0Ysg0YDQtdGE0LvQvtC60YLQvtGA0LvRi9C00LDQvSBl0YDRltC60YLRltCz0LUg06nRgtGD0ZYs0YHSsdC50YvSm9GC0YvSm9GC0Ysg0rHQt9Cw0psg0rHRgdGC0LDQvyDRgtKx0YDRg9KT0LAg0YvSm9C/0LDQuyDQtmHRgdCw0LnQtNGLLtCd05nRgtC40LbQtdGB0LjQvdC00LUg0LbQuNGW0LvRltCz0ZYg0LTQtSDQsNC30LDRj9C00YsuINCV0YDQtdGB0LXQuiDQsNC00LDQvCAyINGB0LDQs9Cw0YLRgtCwINGW0YjQutC10L0g0YHRg9GL0L0g0YLQvtC70YvQs9GL0LzQtdC9INGI0YvQs9Cw0YDQsNC00YsuIDEg0LrSr9C90LTRltC6INC20LDSo9CwINGC0YPRi9C70pPQsNC9INC905nRgNC10YHRgtC1IDE1JSwgNyDQutKv0L3QtNGW0Log0L3TmdGA0LXRgdGC0LUgNDUlLCAxNCDQutKv0L3QtNGW0Log0L3TmdGA0LXRgdGC0LUgNjAlLdGL0L0g0YjRi9Cz0LDRgNCw0LTRiy7QndC10LPRltC30ZbQvdC10L0g0LHSsdC7INC/0YDQvtGG0LXRgSDQsdKv0LnRgNC10LrRgtGW0qMg0YTQuNC70YzRgtGA0LDRhtC40Y/Qu9Cw0YMg0LrQsNCx0ZbQu9C10YLRltC90LUg0LHQsNC50LvQsNC90YvRgdGC0Ysu0JHQsNC70LDQu9Cw0YDQtNCwINC60LDQvdCw0LvQtNCw0YDQtNCwINC20q/RgNC10YLRltC9INGA0LXQsNCx0YHQvtGA0LHRhtC40Y/Qu9GL0psg0L/RgNC+0YbQtdGB0YLQtdGAINGC0L7Qu9GL0psg0LbSr9GA0LzQtdGD0ZbQvdC1INCx0LDQudC70LDQvdGL0YHRgtGLINC+0YHRi9C90LTQsNC5INC10YDQtdC60YjQtdC70ZbQutGC0LXRgCDQvtGA0YvQvSBh0LvQsNC00Ysu0JbQsNC90LAg0YLRg9Cz0LDQvSDQvdCw0YDQtdGB0YLQtdC70LXRgNCz0LUg0YLRgNCw0L3Qt9C40YLQvtGA0LvRiyDQvtC70LjQs9GD0YDQuNGPINGC05nQvS7QndOZ0YDQtdGB0YLQtSDQsdCw0LvQsNC00LAg0LrSr9C90ZbQvdC1INC20LjRltC70ZbQs9GWIDIwLTI1INGA0LXRgiDQsdC+0LvRgdCwLjYg0LDQudC00LDQvSDQutC10LnRltC9IDE1INGC0LXQvSDQutC10Lwg0LXQvNC10YEu0KHQvtC00LDQvSDQttCw0YEg0L7RgdC60LXQvSDRgdCw0LnRi9C9INGB0LjRgNC10Lkg0LFh0YHRgtCw0LnQtNGL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65" table:style-name="ce1">
            <text:p>915265</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4g0KLRltC6INGW0YjQtdC60YLRltKjINC20LDQu9C/0Ysg0pvRi9C30LzQtdGC0ZYt0LXRgNC10YHQtdC60YLQtdGA0LTQtSDQtNC1INC905nRgNC10YHRgtC10LvQtdGA0LTQtSDQtNC1INKv0LvQutC10L0g0LTTmdGA0LXRgtGC0ZYg0YHRi9GA0YLSm9CwINGI0YvSk9Cw0YDRgy4g0KLRltC6INGW0YjQtdC60LrQtSDQtNC10LnRltC9INCw0LTQsNC8INC+0YDQs9Cw0L3QuNC30LzRltC90LTQtSDRgdC40LPQvNCwINGC05nRgNGW0LfQtNGWLNGC06nQvNC10L3QtNC10LPQtdC9INGC0L7SmyDRltGI0LXQuizQutOp0LvQtNC10L3QtdKjINGC0L7SmyDRltGI0LXQuizQttC+0pPQsNGA0LvQsNKT0LDQvSDRgtC+0psg0ZbRiNC10Los0LDQv9C/0LXQvdC00LjQutGBLNCw0L/Qv9C10L3QtNC40LrRgdGC0ZbSoyDSm9Kx0YDRgiDRgtOZ0YDRltC30LTRliDTqdGB0ZbQvdC00ZbRgdGWINCx0L7Qu9Cw0LTRiy4g0KLRltC6INGW0YjQtdC6INGG0LjQu9C40L3QtNGAINC/0ZbRiNGW0L3QtNGWINCx0L7Qu9Cw0LTRiy4gMyDQttCw0YHQsNGAINCx0LDQu9Cw0L3Ri9KjINC60LXRg9C00LUg0YLQvtGA0Ysg0LzQtdC9INC20LDQvNCx0LDRgSDSm9GD0YvRgdGL0L3Ri9KjINC60ZbRiNC60LXQvdGC0LDQudC70YvSk9GL0L0g0LXRgdC60LXRgNGB0LXQuiDRgtGW0Log0ZbRiNC10Log0LHQsNC70LDQu9Cw0YDQtNCwINKb0YvRgdKb0LAg0LHQvtC70LDQtNGLLiDQkdKx0L3Ri9C80LXQvSDSm9C+0YHQsCDQsdCw0LvQsNC70LDRgNC00LAg0YLRltC6INGW0YjQtdC6INCw0LzQv9GD0LvQsNGB0Ysg0LzQtdC9INC40ZbRgNGW0LzQtNC10YDRliDQtNKx0YDRi9GBINC20LXRgtGW0LvQvNC10LnQtNGWLiDQr9KT0L3QuCDQsNC90YPRgdGC0Ysg0pvRi9GB0LDRgtGL0L0g0LbTmdC90LUg0LHQvtGB0LDRgtCw0YLRi9C9INGB0YTQuNC90LrRgtC10YDRliDQtNKx0YDRi9GBINC20LXRgtGW0LvQvNC10LnQtNGWLtCe0YHRi9C90YvSoyDRgdCw0LvQtNCw0YDRi9C90LDQvSDQsdCw0LvQsNC00LAg0q/Qu9C60LXQvSDQtNOZ0YDQtdGC0LrQtSDQsdCw0YDRgyDSm9C40YvQvdC00YvSk9GL0L3Ri9KjINGC0YPSk9Cw0L3Ri9C9INC606nRgNC10LzRltC3LtCU0LXRhNC10LrQsNGG0LjRjyDRj9KT0L3QuCDQvdOZ0LbRltGB0YLRltKjINC606nQvyDQsdOp0LvRltC90YPRltC90LXQvSDQsdKx0LvRiNGL0pvQtdGC0YLQtdGA0LTRltKjINCx0L7RgdCw0qPRgdGD0Ysg0YLTqdC80LXQvdC00LXQs9C10L0uINCQ0L3Rg9GB0YLQsNC9INKv0LvQutC10L0g0LTTmdGA0LXRgiDQutKv0L3QtNC10LvRltC60YLRliDQvNOp0LvRiNC10YDQtNC10L0g0LrTqdC/INGI0YvSm9Kb0LDQvSDRgdC+0YHRi9C9INC+0L3RiyDQttC40ZYg0YLQsNC30LDQu9Cw0pPQsNC9INGB0L7SoyDQsNC90YPRgdGC0LAg0pvRi9C30LDRgNGD0LvQsNGAINC80LXQvdC20LDRgNCw0LvQsNGAINC/0LDQudC00LAg0LHQvtC70pPQsNC9IC4g0J7RgdGLINGB0LXQsdC10L/RgtC10YDQs9C1INKb0LDRgNCw0Lkg0YXQuNGA0YPRgNCzINCx0LDQu9Cw0pPQsCDRgtGW0Log0ZbRiNC10Log0LDQudC90LDQu9C80LDRgdGLINC00LjQsNCz0L3QvtC30YvQvSDSm9C+0LnSk9Cw0L0yLtCW0LDQu9C/0Ysg0LbQsNKj0LAg0YLRg9KT0LDQvSDQvdOZ0YDQtdGB0YLQtdC70LXRgNC00LUg0L3QtdGB0LXQv9GC0ZbSoyDQutC+0L3RhtC10L3RgtGA0LDRhtC40Y/RgdGLINGB0rHQudGL0psg0LrSr9C50LTQtSDQsdC+0LvQsNC00Yss0pvQvtGO0LvQsNC90YMg0L/RgNC+0YbQtdGB0YHRliDRgtOp0LzQtdC9LtCR0ZbQt9C00ZbSoyDRgdC40YLRg9Cw0YbQuNGP0LTQsCAxINCw0LnQu9GL0psg0LHQsNC70LAg0LTTmdC7INC80YvRgdCw0Lsg0LHQvtC70LAg0LDQu9Cw0LTRiy7QkdKx0Lsg0LrQtdC30LTQtSDRgtOp0LzQtdC9INKb0L7RjtC70LDQvdC00YvRgNGD0LTRi9KjINCx0rHQt9GL0LvRi9GB0Ysg0pvQsNGA0YHRiyDQsNKT0YMg0LbSr9C50LXRgdGW0L3RltKjINCw0pvQsNGD0YvQvdCw0L0g0LHQvtC70YvQvyDRgtKx0YAuINCR0ZbQt9C00ZbSoyDQv9Cw0YbQuNC10L3RgiDTqdGB0LrQtdC9INGB0L7SoyAg0LHSr9C50YDQtdCz0ZbQvdC00LXQs9GWINCT0LXQvdC70LUg0YLSsdC30LDSm9GC0LDRgNGLINKx0LfQsNGA0LDQtNGLINC00LAg0pvQvtGO0LvQsNC90YMg0L/RgNC+0YbQtdGB0YHRliDQttKv0YDQtdC00ZYu0JPQtdC90LvQtSDRgtKx0LfQsNKb0YLQsNGA0YvQvdGL0qMg0pvRi9GB0pvQsCDQsdC+0LvRg9GL0L3QsNC9INCx0LDQu9Cw0LvQsNGA0LTQsCDQt9OZ0YDQtNGW0qMg0YLSr9GB0ZYg0YHRgyDRgdC40Y/Sm9GC0Ysg0YLSr9GB0YHRltC3INC205nQvdC1INCx0ZbRgNC60LXQu9C60ZYg0LHQvtC70YvQvyDQutC10LvQtdC00ZYu0J7RgdGLINC60LXQt9C00LUg0L3TmdGA0LXRgdGC0LXQu9C10YDQs9C1INGB0YMg0LrTqdC/INC806nQu9GI0LXRgNC00LUg0LHQtdGA0ZbQu9GB0LUg0L7Qu9Cw0YAg0YHRi9GA0YLSm9CwINGI0YvSk9Cw0YDQsCDQsNC70LzQsNC50LTRiyzQvtKT0LDQvSDQvNGL0YHQsNC7INC10YDQtdGB0LXQutGC0LXRgCAyINGB0LDSk9Cw0YLRgtGL0qMg0ZbRiNGW0L3QtNC1INGW0YjQutC10L0g0YHRg9GL0L0g0YLQvtC70YvSm9GC0LDQuSDRiNGL0pPQsNGA0LAg0LDQu9Cw0LTRiyAxINC60q/QvdC00ZbQuiDQvdOZ0YDQtdGB0YLQtSAxNSDQv9Cw0LnRi9C30YvQvSwgNyDQutKv0L0tNDUg0L/QsNC50YvQtywxNCDQutKv0L3QtNGW0Log0LHQsNC70LAgNjAg0L/QsNC50YvQtyDRiNGL0pPQsNGA0LDQtNGLLtCR0rHQuyDQutC10LfQtNC1INCx0ZbQtyDQsdCw0LvQsNC70LDRgNC00LDSk9GLINC305nRgNC00ZbSoyDRiNGL0pPRg9GLINGE0LjQu9GM0YLRgNCw0YbQuNGP0pPQsCDQsdCw0LnQu9Cw0L3Ri9GB0YLRiyDQsdC+0LvQsNC00YsuINCe0YHRiyDQttC10YDQtNC10L0g0LrTqdGA0YPQs9C1INCx0L7Qu9Cw0LTRiyDQvdOZ0YDQtdGB0YLQtdC70LXRgNC00ZbSoyDQutCw0L3QsNC70YjQsNC70LDRgNGL0L3QtNCwINGA0LXQsNCx0YHQvtGA0LHRhtC40Y/Qu9GL0psg0L/RgNC+0YbQtdGB0YHRgtC10YAg0YLQvtC70YvSmyDQtNCw0LzRi9C80LDSk9Cw0L0u0J3TmdGA0LXRgdGC0LXQu9C10YDQs9C1INGC0YDQsNC90LfQuNGC0L7RgNC70YvSmyDQvtC70LjQs9GD0YDQuNGPINGC05nQvSDSm9Kx0LHRi9C70YvRgSDQsdC+0LvRi9C/INC60LXQu9C10LTRli7SmtCw0LfRltGAINGC05nRg9C70ZbQutGC0ZbSoyDQvdC+0YDQvNCw0LvQsNGA0YvQvSDSm9Cw0YDQsNGB0YLRi9GA0LDQvNGL0Lcu0JbQsNKj0LAg0YLRg9KT0LDQvSDQvdOZ0YDQtdGB0YLQtdC70LXRgNC00LUg0LfTmdGAINC60q/QvdGW0L3QtSAyMC0yNSDRgNC10YIuNiDQsNC50LTQsNC9INCw0YHSm9Cw0L0g0LHQsNC70LDQu9Cw0YDQtNCwIDE1INGA0LXRgtC60LUg0YLQtdKjINCw0YDRiyDSm9Cw0YDQsNC5INC20LDRgdGLINOp0YHQutC10L3QtNC1INC305nRgCDRiNGL0pPQsNGA0YMg0LbQuNGW0LvRltCz0ZYg0YLTqdC80LXQvdC00LXQudC00ZYu0prRg9GL0psg0LrTqdC70LXQvNGW0L3RltKjINC60ZbRiNGWINCx0L7Qu9GD0Ysg0JHSr9C50YDQtdC60YLRltKjINCw0L3QsNGC0L7QvNC40Y/Qu9GL0pst0YTRg9C90LrRhtC40L7QvdCw0LvQtNGL0pst0YTQuNC30LjQvtC70L7Qs9C40Y/Qu9GL0psg0LXRgNC10LrRiNC10LvRltC60YLQtdGA0ZYuINCR0q/QudGA0LXQuiDQs9C+0LzQtdC+0YHRgtCw0YLQuNC60LDQu9GL0psg0pvRi9C30LzQtdGCINCw0YLSm9Cw0YDQsNC00YsuINCQ0Lsg0L3TmdGA0LXRgdGC0LXQu9C10YDQtNC1INGE0LjQu9GM0YLRgNCw0YbQuNGPINKb0YvQt9C80LXRgtGWINC90LDRiNCw0YAg0LHQvtC70YvQvyDQutC10LvQtdC00ZYu0KTQuNC70YzRgtGA0LDRhtC40Y/QvdGL0qMg0L3QsNGI0LDRgNC70YvSk9GL0L0g0YjRg9C80LDSmyDSm9Cw0L/RgtCw0LzQsNGB0YvQvdGL0qMg0LLQuNGB0YbQtdGA0LDQu9GM0LTRiyDQsdC10YLRltC90ZbSoyDQs9C40YHRgtC+0LvQvtCz0LjRj9C70YvSmyDQtdGA0LXQutGI0LXQu9GW0LPRltC90LUu0LHSsdC7INC20LXRgNC00LUg0LrRg9CxINGC05nRgNGW0LfQtNGWINGN0L/QuNGC0LXQu9C40Lkg0LbQsNGB0YPRiNC70LDRgNGL0L3Ri9KjINC10YDQtdC60YjQtdC70ZbQutGC0LXRgNGWINGA06nQuyDQsNGC0pvQsNGA0LDQtNGLLtCo0YPQvNCw0pvRgtCw0YAg0LrTqdC70LXQvNGW0L3RltKjINC606nQv9GI0ZbQu9GW0LPRltC90LUs0YLTqdC80LXQvSDQs9C40LTRgNC+0YHRgtCw0YLQuNC60LDQu9GL0psg0pvRi9GB0YvQvC3QsdKv0LnRgNC10LrRgtC10L0g0LDSk9GL0L8g06nRgtC10YLRltC9INKb0LDQvSDQutOp0LvQtdC80ZYg0LbSr9GA0LXQuiDRiNGL0pPQsNGA0YvQu9GL0LzRi9C90YvSoyAyNSDQv9Cw0LnRi9C30YvQvSDSm9Kx0YDQsNGB0LAg0L3TmdGA0LXRgdGC0LXQu9C10YDQtNC1INGC0LXQuiA1INC/0LDQudGL0LfRi9C9INKb0rHRgNCw0LnQtNGLLtGB0L7QuyDRgdC10LrRltC70LTRliDQt9OZ0YDQtNGWINCw0LnQtNCw0YPSk9CwINKb0LDQttC10YLRgtGWINKb0YvRgdGL0Lwg0LDQtyDQsdC+0LvQsNC00Ysu0JHQsNC70LAg06nRgdC60LXQvSDRgdCw0LnRi9C9INGI0YPQvNCw0psg0YTQuNC70YzRgtGA0LDRhtC40Y/RgdGL0L3Ri9KjINC606nQu9C10LzRliDSsdC70pPQsNGP0LTRiyAxINC20LDRgdKb0LAg0LrQtdC70LPQtdC90LTQtSDSr9C70LrQtdC90LTQtdGA0LrRltC80LXQvSDQsdGW0YDQtNC10Lkg0LrTqdC70LXQvCDQsNC70LDQtNGLLtCR0q/QudGA0LXQutGC0LUg05nRgNGC0q/RgNC70ZYg0LfQsNGC0YLQsNGA0LTRi9KjINGA0LXQsNCx0YHQvtGA0LHRhtC40Y/RgdGL0L3QsNC00LAg0LrTqdKj0ZbQuyDQsdOp0LvQtSDQsNC70LDQvNGL0Lcu0JHSsdC7INC20LXRgNC00LUg0LfTmdGA0LTQtdCz0ZYg0Y3Qu9C10LrRgtGA0L7Qu9C40YLRgtC10YAg0LbTmdC90LUg0YLTqdC80LXQvSDQvNC+0LvQtdC60YPQu9Cw0LvRi9KbINC30LDRgtGC0LDRgNC00YvSoyDSm9Kx0LHRi9GA0LvRi9KbINGA0LXQsNCx0YHQvtGA0LHRhtC40Y/RgdGLINGC06nQvNC10L0g0LHQvtC70LDQtNGLLiDRgdC+0L3QtNGL0pvRgtCw0L0g0LHSsdC7INC20L7Qu9C00LAg0LDQvNC40L3Sm9GL0YjSm9GL0LvQtNCw0YDRiyDQvNC10L0gINGE0L7RgdGE0LDRgtGC0LDRgCDQt9OZ0YDQs9C1INOp0YLRltC/INGN0LrRgdC60YDQtdGG0LjRj9GB0YvQvSDSr9C00LXRgtGW0L8g0LbRltCx0LXRgNC10LTRli7QltC+0pPQsNGA0YvQtNCw0L0g0LDQudGC0pvQsNC9INC60q/QvdC00LXQu9GW0LrRgtGWINC305nRgCDRiNGL0pPQsNGA0YMg0LzTqdC70YjQtdGA0LvQtdGA0ZYg0LrTqdGA0ZbQvdGD0ZYg0YvSm9GC0LjQvNCw0Lsu06jQvNGW0YDRltC90ZbSoyAxLTIg0LDQv9GC0LDQu9Cw0YDRi9C90LDQvSDQsdCw0YHRgtCw0L8g0LPQu9GO0LrQvtC30LDQvdGL0qMg0YDQtdCw0LHRgdC+0YDQsdGG0LjRj9GB0Ysg0q/Qu9C60LXQvdC00LXRgNC00ZbQutGW0LzQtdC9INGC0LXSo9C00LXQuS7QndOZ0YDQtdGB0YLQtdC70LXRgCDQvdCw0YLRgNC40Lkg0YXQu9C+0YDQuNC00ZYg0LzQtdC9INGB0YPQtNGLINCw0LTQtdC60LLQsNGC0YLRiyDRgtKv0YDQtNC1INGI0YvSk9Cw0YDQsCDQsNC70LzQsNC50LTRiyDRgtC10Log0LHRltGAINGC05nRg9C70ZbQutGC0LUg0LHRltGA0L3QtdGI0LUg0YDQtdGCINCx06nQu9GW0L8g0YjRi9KT0LDRgNCw0LTRiy7QndOZ0YDQtdGB0YLQtdC70LXRgNC00LUg0LHSr9C50YDQtdC60YLRltKjINC60L7QvdGG0LXQvdGC0YDQsNGG0LjRj9C70YvSmyDRhNGD0L3QutGG0LjRj9GB0Ysg0YLTqdC80LXQvS4g0JDQvdC00LjRg9GA0LXRgtC40LrQsNC70YvSmyDQs9C+0YDQvNC+0L3QtNCw0YDQtNGL0qMg0YLTqdC80LXQvdC00ZbQs9GWINC90LXRgdC10L8g0LrQvtC90YbQtdC90YLRgNCw0YbQuNGP0YHRi9C90LAg0YLRltC60LXQu9C10LkgINOZ0YHQtdGAINC606nRgNGB0LXRgtC10LTRli7QkdKx0Lsg0LbQtdGA0LTQtSDRgdC+0YHRi9C9INC90LXRhNGA0L7QvSDRltC70LzQtdCz0ZbQvdGW0qMg0pvRi9GB0pvQsNC70YvSk9GL0L0sINC00LjRgdGC0LDQu9GM0LTRiyDRjdC/0LjRgtC10LvQuNC50LvQtdGA0LTRltKjINGE0YPQvdC60YbQuNC+0L3QsNC70LTRiyDQttC10YLRltGB0L/QtdGD0YjQu9GW0LPRltC9INC606nRgNC1INCw0LvQsNC80YvQty7SmtC+0YDRi9GC0YvQvdC00YvQu9Cw0Lkg0LrQtdGC0YHQtdC8LSDQvdC10YHQtdC/0YLRltKjINC20LjRliDRiNGL0pPRg9GLINCx0q/QudGA0LXQutGC0ZbSoyDSm9GL0LfQvNC10YLRltC90ZbSoyDQsdKx0LfRi9C70YvRgdGL0L3QsCDRgtGW0LrQtdC70LXQuSDSm9Cw0YLRi9GB0YLRiyDQtdC60LXQvdGW0L0g0LrTqdGA0LUg0LDQu9Cw0LzRi9C3LiDQntGB0YvQvdC00LDQuSDQsNGE0L4g05nRgdC10YDQu9C10YDRltC90LXQvSDQtdC90LTRliDQttC10YLRltC70ZbQvyDQutC10LvQtSDQttCw0YLSm9Cw0L0g0LHQsNC70LDQu9Cw0YDQtNCwINC+0YHQu9Cw0LbQtdC90LjQtdC70LXRgCDQtNCw0LzRg9GLINGL0pvRgtC40LzQsNC7LiAg0JDQu9C00YvQvSDQsNC70YMg0q/RiNGW0L0g0LTTmdGA0ZbQs9C10YDQu9C10YDQtNGW0qMg0pvQsNGA0LDQu9GL0LzRi9C90LDQvSDSm9Cw0LvQvNCw0YMg0LrQtdGA0LXQui4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67" table:style-name="ce1">
            <text:p>915267</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4g0JbQsNC70L/RiyDQsdCw0LvQsNC70LDRgNC00LDSk9GLINGC0ZbQuiDRltGI0LXQuiDQvdC10LzQtdGB0LUg0LDQvdGD0YEg0LHQsNGB0pvQsCDQvtGA0LPQsNC90LTQsNGAINGB0LXQutGW0LvQtNGWINCx0LDQu9Cw0LvQsNGA0LTQsCDQtdGA0LXRgdC10LrRgtC10YDQs9C1INKb0LDRgNCw0pPQsNC90LTQsCDQsdGW0YDSm9Cw0YLQsNGAINC10YDQtdC60YjQtdC70ZbQutGC0LXRgNGW0L3RltKjINCx0L7Qu9GD0YvQvNC10L0g0YHQuNC/0LDRgtGC0LDQu9Cw0LTRiy4g0JDQudGC0LAg0LrQtdGC0YHQtdC8LCDQvtC70LDRgNC00YvSoyDRgtGW0Log0ZbRiNC10LrRgtC10YDRliDQv9GW0YjRltC90ZYg0LHQvtC50YvQvdGI0LAg0YbQuNC70LjQvdC00YAg0YLTmdGA0ZbQt9C00LXRgSDQsdC+0LvRi9C/INC60LXQu9C10LTRliwg0LXRgNC10YHQtdC60YLQtdGA0LTRltKj0LrRliDRgdC10LrRltC70LTRliDQsNC80L/Rg9C70LDRgdGLINC80LXQvSDQuNGW0YDRltC80LTQtdGA0ZYg0LHQvtC70LzQsNC50LTRiywg0LDQuyDQsdC+0LnRi9C90LTQsNKT0Ysg0pvQsNGC0L/QsNGA0LvQsNGA0pPQsCDQutC10LvRgdC10Log0L7Qu9Cw0YAg0LDQudKb0YvQvSDQtdC80LXRgSDQsdC+0LvRi9C/INC60LXQu9C10LTRli4g0JHQsNC70LAg06nRgdC1INC60LXQu9C1INC80q/RiNC1INC00LUg0LHRltGA0LPQtSDTqdGB0ZbQvyDQttC10YLRltC70LUg0YLSr9GB0LXQtNGWLCDQvNOZ0YHQtdC70LXQvSwg0LHRltGAINCw0LnQu9GL0psg0LHQsNC70LDQtNCwINGC0ZbQuiDRltGI0LXQuiDQsdGW0YDRiNCw0LzQsCDSsdC30YvQvSwg0LzQsNC50LvRiyDQutC70LXRgtGH0LDRgtC60LDSk9CwINOp0YLQtSDQsdCw0Lkg0LHQvtC70LDQtNGLINC00LAsINCw0Lsg0LHSsdC70YjRi9Kb0LXRgtGC0ZYg0pvQsNCx0LDRgtGLINC90LDRiNCw0YAg0LTQsNC80YvSk9Cw0L0g0LHQvtC70YvQvyDQutC10LvQtdC00ZYuINCQ0Lsg0LXRgNGC0LUg0LbQsNGB0YLQsNKT0Ysg0LHQsNC70LDQu9Cw0YDQtNCwINGI0YvRgNGL0YjQsNGB0YLRiyDSm9Cw0LHQsNGC0Ysg0L3QsNGI0LDRgCDQtNCw0LzRi9KT0LDQvSDQsdC+0LvQsNC00Ysg0LTQsCwg0L7QuyDTqdC3INC60LXQt9C10LPRltC90LTQtSDRiNGL0YDRi9GI0YLRiyDSm9Cw0LHQsNGC0pvQsCDQsdC10LrRg9GWINC90LDRiNCw0YDQu9Cw0LnQtNGLLiDQltC+0pPQsNGA0YvQtNCwINCw0LnRgtGL0L8g06nRgtC60LXQvdGW0LzQtNC10Lkg0LDQvdGD0YEg0YHRhNC40L3QutGC0LXRgNC70LXRgNGWLCDQvdCw0YjQsNGAINC00LDQvNGD0YvQvdCw0L0g0YLRltC6INGW0YjQtdC60YLRltKjINGC06nQvNC10L3Qs9C1INKb0LDRgNCw0Lkg0YLSr9GB0YPRliwg0Y/Sk9C90LgsINC/0YDQvtC70LDQv9GB0Ysg0L7RgNGL0L0g0LDQu9Cw0YLRi9C9INCx0L7Qu9Cw0LTRiy4g0JDQuyDQsdGW0YDRiNCw0LzQsCDQutGW0YjRliDQttCw0YHRgtCw0pPRiyDQsdCw0LvQsNC70LDRgNC00LAg0LbQsNC80LHQsNGBINGC0q/QsdGWINGC0L7Qu9GL0psg0pvQsNC70YvQv9GC0LDRgdGL0L8sINGP0pPQvdC4LCDRgtC+0LvRi9KbINC20LXRgtGW0LvRltC/INKv0LvQs9C10YDQvNC10LPQtdC9LiDQkdCw0LvQsNC70LDRgNC00LDSk9GLINGC0ZbRgNC10Log0LDQv9C/0LDRgNCw0YLRgtCw0YDRi9C90YvSoywg0YHQvtC90YvSoyDRltGI0ZbQvdC00LUg0LHSsdC70YjRi9Kb0LXRgtGC0LXRgNC00ZbSoywg0YHRltKj0ZbRgNC70LXRgNC00ZbSoyDRgtC+0LvRi9KbINC20LXRgtGW0LvQvNC10LPQtdC90LTRltCz0ZYg0LHQsNC70LDQu9Cw0YDQtNCw0pPRiyDRgtGW0Log0ZbRiNC10LrRgtGW0qMg0L/RgNC+0LvQsNC/0YHRi9C90YvSoyDQsdC+0LvRgyDRi9Kb0YLQuNC80LDQu9C00YvQu9GL0pPRi9C9INCw0YDRgtGC0YvRgNCw0LTRiy4g0KHQvtC90YvQvNC10L0g0pvQsNGC0LDRgCwg0L7QuyDQsNC90LDQu9GM0LTRi9KbINC60LDQvdCw0LvQvNC10L0g0LHSsdGA0YvRiNGC0YvSmyDSm9Cw0LvRi9C/0YLQsCDQvtGA0L3QsNC70LDRgdCw0LTRiy4g0JHSsdC7INC00LAg0L/RgNC+0LvQsNC/0YHRgtGL0qMg0L7RgNGL0L0g0LDQu9GD0YvQvdGL0qMg0LHRltGA0LTQtdC9INCx0ZbRgCDRgdC10LHQtdCx0ZYg0LHQvtC70YvQv9GC0LDQsdGL0LvQsNC00YsuINCi0LDSk9GLINCx0ZbRgCDRgdC10LHQtdCx0ZYg0YDQtdGC0ZbQvdC00LUg0LzTmdGB0LXQu9C10L0sINC00LjQsNGA0LXRjyDQttOZ0L3QtSDQtNC1INGW0Ygg0pvQsNGC0YPRi9C90YvSoyDRgdCw0LvQtNCw0YDRiyDRgNC10YLRltC90LTQtSDRgtGD0YvQvdC00LDSk9Cw0L0g0ZbRiNC10LrQutC1INGC0q/RgdC10YLRltC9INKb0YvRgdGL0LzQtNGLINC60LXQu9GC0ZbRgNC1INCw0LvQsNC80YvQty4g0J7QuyDQtNCwINGW0YjQtdC60YLRltKjINGC06nQvNC10L0g0YLSr9GB0YPRltC90LUg05nRgdC10YAg0LXRgtC10LTRli4g0JHQsNC70LDQu9Cw0YAg0LXRgNC10YHQtdC60YLQtdGA0LPQtSDSm9Cw0YDQsNKT0LDQvdC00LAg0YLRi9C8INKb0L7Qt9KT0LDQu9KT0YvRiCDQsdC+0LvRi9C/INC60LXQu9C10LTRli4g0J7RgdGL0L3QtNCw0Lkg0LHRltGAINKb0L7Qt9KT0LDQu9GL0YEg0YLSr9GA0LvQtdGA0ZbQvdGW0qMg0LTQtdGE0L7RgNC80LDRhtC40Y/RgdGLINC60LXQt9GW0L3QtNC1INGW0YjQutC1INGC0q/RgdC10YLRltC9INKb0YvRgdGL0LzQvdGL0qMg0LDRgNGC0YPRiyDQtNCwINC/0YDQvtC70LDQv9GB0pvQsCDRgdC10LHQtdC/INCx0L7Qu9CwINCw0LvQsNC00YsuICAgICAgICAgICAgICAgICAgICAgICAgICAgICAgICAgICAgICAgICAgICAgICAgICAgICAgICAgICAgICAgICAgICAgICAgICAgICAgICAgICAgICAgICAgPGJyIC8+DQoyLtCR0LDQu9Cw0LvQsNGA0LTRi9KjINC10YDQtdGB0LXQutGC0LXRgNC00LXQvSDQutC10Lct0LrQtdC70LPQtdC9INC20q/QudC10LvQtdGAINC80LXQvSDQvNKv0YjQtdC70LXRgNC00ZbSoyDSm9Kx0YDRi9C70YvQvNGLINCx0L7QudGL0L3RiNCwINC10YDQtdC60YjQtdC70LXQvdGD0ZbQvNC10L0g0pvQsNGC0LDRgCwg0YHQvtC7INKb0rHRgNGL0LvRi9C80LTQsNGA0LTRi9KjINKb0YvQt9C80LXRgtGC0LXRgNGWINCx0L7QudGL0L3RiNCwINC00LAg0LHRltGA0YjQsNC80LAg0LXRgNC10LrRiNC10LvQtdC90LXQtNGWLiDQl9OZ0YAg0YjRi9KT0LDRgNGDINC20LjRltC70ZbQs9GWICjQl9Co0JYpINC00LXQvyDQsdCw0LvQsNC90YvSoyAxINGC05nRg9C70ZbQutGC0LUg0YjRi9KT0LDRgNKT0LDQvSDQt9OZ0YDRltC90ZbSoyDQvNOp0LvRiNC10YDRliDQtdC80LXRgSwg0L7QvdGL0qMg0YHQsNC90Ysg0LXRgdC10L/RgtC10LvQtdGC0ZbQvSDRiNCw0LzQsNC90Ysg0LDQudGC0LDQvNGL0LcuINCR0rHQuyDRiNCw0LzQsCDTqdC3INC60LXQt9C10LPRltC90LTQtSDQsdCw0LvQsNC90YvSoyDQttCw0YHRi9C90LAsINGC0LDQvNCw0pvRgtCw0L3RgyDRgdC40L/QsNGC0YvQvdCwLCDQsdGW0YDRiNCw0LzQsCDQs9C10L3RltC90LUsINGC0rHRgtGL0L3QsNGC0YvQvSDRgdGDINC606nQu9C10LzRltC90LUgKNGB0L7So9KT0YvQu9Cw0YDRiyDQtdGA0YLQtSDQttCw0YHRgtCw0pPRiyDQsdCw0LvQsNC70LDRgNC00LAg0YLQuNGW0LzQtNGW0YDQtdC6KSDSm9Cw0YDQsNC5INOp0LfQs9C10YDRltC/INC+0YLRi9GA0YPRiyDQvNKv0LzQutGW0L0uINCR0rHQuyDQttCw0pPQtNCw0LnQtNCwLCDQsNGC0LAt0LDQvdCw0L3Ri9KjICLQsdCw0LvQsCDQttC40ZYg0L3QtdGB0LXQvyDRiNGL0pPQsNGA0LDQtNGLIiDQtNC10LPQtdC9INGI0LDSk9GL0LzRi9C9INC90LXQs9GW0LfQtNC10YMg0q/RiNGW0L0g0L7QsdGK0LXQutGC0LjQstGC0ZYg0LbTmdC90LUg0JbQl9OYINGB0LXQutGW0LvQtNGWINC30LXRgNGC0YXQsNC90LDQu9GL0psg0LfQtdGA0YLRgtC10YPQu9C10YAg0LbQsNGB0LDQu9KT0LDQvS4g0J7Qu9Cw0YDQtNGL0qMg0L3TmdGC0LjQttC10YHRliDRgNC10YLRltC90LTQtSDQsdCw0LvQsNC00LAg0LXRiNKb0LDQvdC00LDQuSDQv9Cw0YLQvtC70L7Qs9C40Y8g0LDQvdGL0pvRgtCw0LvQvNCw0pPQsNC9LiDQkdKx0Lsg0LHQsNC70LDQvdGL0qMg0pvQsNC70YvQv9GC0Ysg0LfTmdGAINGI0YvSk9Cw0YDRgyDQttC40ZbQu9GW0LrRgtC1INC10LrQtdC90ZbQvSDQsNC90YvSmyDQutOp0YDRgdC10YLQtdC00ZYuINCQ0Lsg0LXQvdC00ZYg0LfTmdGAINGI0YvSk9Cw0YDRgyDQttC40ZbQu9GW0LPRltC90ZbSoyDQttCw0YHRi9C90LAg0LHQsNC50LvQsNC90YvRgdGC0Ysg0pvQsNC70YvQv9GC0Ysg0LbQsNKT0LTQsNC50LTQsNKT0Ysg0YjQsNC80LDQu9Cw0YDRi9C90LAg0LrQtdC70YHQtdC6LCAxINCw0LnQu9GL0psg0LHQsNC70LDQtNCwINKb0LDQu9GL0L/RgtGLINCX0KjQliDQutKv0L3RltC90LUgMTUtMjAg0YDQtdGC0YLRliDSm9Kx0YDQsNC50LTRiywgNiDQsNC5INC80LXQvSAxINC20LDRgSDQsNGA0LDQu9GL0pPRi9C90LTQsCAxMC0xNSDRgNC10YLRgtGWINKb0rHRgNCw0YHQsCwgMi0zINC20LDRgSDQsNGA0LDQu9GL0pPRi9C90LTQsCA3LTgg0YDQtdGC0YLRliDSm9Kx0YDQsNC50YLRi9C9INCx0L7Qu9Cw0LTRiy4g0JDQuyDQsdCw0LvQsCDQvNC10LrRgtC10L8g0LbQsNGB0YvQvdCwINC20LXRgtC60LXQvdC00LUg0JfQqNCWIDUtNiDRgNC10YLRgtGWINKb0rHRgNCw0LnRgtGL0L0g0LHQvtC70LDQtNGLLiDQkdKx0Lsg0LrTqdGA0YHQtdGC0LrRltGI0YLQtdGA0LTRltKjINCx0LDRgNC70YvSk9GLINC20L7Sk9Cw0YDRi9C00LAg0LDQudGC0pvQsNC90YvQvNC00LDQuSwg0L7Qu9Cw0YDQtNGL0qMg0LDQvdCw0YLQvtC80LjRj9C70YvSmy3RhNC40LfQuNC+0LvQvtCz0LjRj9C70YvSmyDQtdGA0LXQutGI0LXQu9GW0LrRgtC10YDRltC90LUg0YLRltC60LXQu9C10Lkg0LHQsNC50LvQsNC90YvRgdGC0YsuINCc0YvRgdCw0LvRiyDRgNC10YLRltC90LTQtSwg0LHQsNC70LDQu9Cw0YDQtNGL0qMg0LXSoyDQsdCw0YHRgtGLINC305nRgCDRiNGL0pPQsNGA0YMg0LbSr9C50LXRgdGW0L3RltKjINC80q/RiNC10YHRliAtINCx0q/QudGA0LXQutGC0LXRgNGWINCw0L3QsNGC0L7QvNC40Y/Qu9GL0psg0pvSsdGA0YvQu9GL0LzRiyDQsdC+0LnRi9C90YjQsCDRgtC+0LvRi9KbINC00LDQvNGL0LzQsNKT0YvQvS4g0J7Qu9Cw0YDQtNGL0qMg0YTRg9C90LrRhtC40L7QvdCw0LvQtNGL0psg0LzSr9C80LrRltC90LTRltC60YLQtdGA0ZbQvdGW0qMg0YLQvtC70YvSk9GL0LzQtdC9INC20LXRgtGW0LvQvNC10YPRliDRgdCw0LvQtNCw0YDRi9C90LDQvSwg0YjRg9C80LDSm9GC0LDRgNGL0L3QtNCw0pPRiyDRhNC40LvRjNGC0YDQsNGG0LjRjyDQvdCw0YjQsNGAINC20q/RgNC10LTRliDQtNC1LCDQt9OZ0YAg0LbQuNGWLCDQsdGW0YDQsNKbINCw0LfQtNCw0pPQsNC9INC806nQu9GI0LXRgNC00LUg0YjRi9KT0YvQvyDQvtGC0YvRgNCw0LTRiy4gINCR0q/QudGA0LXQutGC0ZbSoyDRgtCw0pPRiyDQsdGW0YAg0LzQsNKj0YvQt9C00Ysg0YTRg9C90LrRhtC40Y/RgdGLIC0g0pvQsNC50YLQsCDRgdC+0YDRgywg0Y/Sk9C90LgsINGA0LXQsNGA0LHRgdC+0YDQsdGG0LjRjyDQv9GA0L7RhtC10YHRliDQtNC1INGC0LjRltC80YHRltC3INCx0L7Qu9GL0L8g0LrQtdC70LXQtNGWLiDQodC10LHQtdCx0ZYsINGC0q/RgtGW0LrRiNC10LvQtdGA0LTQtSwg0pvSsdGA0YvQu9GL0LzRiyDQsdC+0LnRi9C90YjQsCDRgtC+0LvRi9KbINC20LXRgtGW0LvQvNC10LPQtdC9LiDQntGB0YvQvdGL0qMg0YHQsNC70LTQsNGA0Ysg0YDQtdGC0ZbQvdC00LUsINCx0LDQu9CwINCw0pPQt9Cw0YHRi9C90LTQsNKT0Ysg0YHRg9C00YvSoyDQsNKT0LfQsNC00LAg0rHQt9Cw0psg0YHQsNKb0YLQsNC70LAg0LDQu9C80LDQuSDRgtC10Lcg0YjRi9KT0LDRgNGD0YvQu9GLINC20q/RgNC10LTRli4g0prRg9GL0pvRgtGL0qMg0LDQvdCw0YLQvtC80LjRj9C70YvSmyDQv9GW0YjRltC90ZbSoyDQutGW0YjRliDQsdC+0LvRg9GLINC+0L3Ri9KjINGB0YvQudGL0LzQtNGL0LvRi9KT0YvQvdCwINGC0ZbQutC10LvQtdC5INOZ0YHQtdGAINC10YLRltC/INC20LjRliDQt9OZ0YAg0YjRi9KT0LDRgNGD0LTRi9KjINGC0LDSk9GLINCx0ZbRgCDRgdC10LHQtdCx0ZYg0LHQvtC70LDQtNGLLiDQkNC7INCw0LnQu9GL0psg0L3TmdGA0LXRgdGC0LXQu9C10YDQtNC1INCx0rHQuyDQkNCk0JUg0LfTmdGA0LTRltKjINGB0rHQudGL0psg0LrSr9C50ZbQvdC00LUg0LbTmdC90LUg0LbQuNGWINGI0YvSk9Cw0YDRi9C70YPRi9C90YvSoyDQsdCw0YHRgtGLINGB0LXQsdC10LHRliDQsdC+0LvQsNC00Ys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86" table:style-name="ce1">
            <text:p>915286</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4g0KLRltC6INGW0YjQtdC60YLRltKjINCx0LDQu9Cw0LvQsNGA0LTQsNKT0Ysg0LXRgNC10LrRiNC10LvRltC60YLQtdGA0ZbQvdC1INC60LXQu9C10YLRltC9INCx0L7Qu9GB0LDSmyzQvtC70LDRgNC00LAg0YLRltC6INGW0YjQtdC6INGG0LjQu9C40L3QtNGA0LvRltC6INGE0L7RgNC80LDQtNCwINCx0L7Qu9Cw0LTRiyDQttOZ0L3QtSDRgtGW0Log0ZbRiNC10LrRgtGW0qMg0LDQvNC/0YPQu9Cw0YHRiyDQsNC70pPQsNGI0pvRiyDQsdCw0LvQsNC70YvSmyDRiNCw0pvRgtCwINKT0LDQvdCwINC20LXRgtGW0LvQtdC00ZYsINGP0pPQvdC4INC10YDRgtC1INC20LDRgdGC0LDSk9GLINCx0LDQu9Cw0LvQsNGA0LTRiyDRgtGW0Log0ZbRiNC10Log0LDQvNC/0YPQu9Cw0YHRiyDQsdC+0LvQvNCw0LnQtNGLLCDQsNC7INKb0LDRgtC/0LDRgNC70LDRgNGLIDUtNiDQsNC50pPQsCDSm9Cw0YDQsNC5INC20LXRgtGW0LvQtdC00ZYsINGB0L7QvdC00YvSm9GC0LDQvSDQvtC70LDRgCA1LTbQsNC50pPQsCDQtNC10LnRltC9INOp0LfRltC90ZbSoyDQvdOZ0LbRltGB0ZbQvSDSsdGB0YLQsNC5INCw0LvQvNCw0LnQtNGLLiDQltOZ0L3QtSDRgtGW0Log0ZbRiNC10Log0LjRltC70ZbQvNGWINC00LDQvNGL0LzQsNKT0LDQvSwg0L7QuyDQvtC80YvRgNGC0pvQsNC90YvSoyDRgdC10LPRltC30LrTqdC30LTRltC6INC205nQvdC1INKb0rHQudGL0LzRiNCw0pvRgtGL0psg0LjRltC70ZbQvNC00LXRgNGWINC00LDQvNGL0pPQsNC90LTQsCDQtNCw0LzQuNC00YsuINCi0ZbQuiDRltGI0LXQuiDQsdCw0LvQsNC70LDRgNC00LAg0LDQu9KT0LDRiNKb0Ysg0LDQudC70LDRgNGL0L3QtNCwINGB0LDQu9GL0YHRgtGL0YDQvNCw0LvRiyDSsdC30YvQvSDQttOZ0L3QtSDRhNC40LrRgdCw0YbQuNGP0YHRiyDQvdCw0YjQsNGAINGB0LXQsdC10LHRliDQvNCw0LnQu9GLINGC0ZbQvdGWINOZ0LvRgdGW0Lcg0LbQtdGC0ZbQu9Cz0LXQvSwg0LDQvdGD0YHRgtGL0qMg0LDQudC90LDQu9Cw0YHRi9C90LTQsNKT0Ysg0LDQudC90LDQu9C80LDQu9GLINCx0rHQu9GI0YvSm9C10YLRgtC10L0g0YLSsdGA0LDRgtGL0L0g0YHRhNC40L3QutGC0LXRgNGWINOZ0LvRgdGW0Lcg0LTQsNC80YvSk9Cw0L0sINCw0YDRgtKb0Ysg06nRgtGW0YEg0LbQvtC70YvQvSDQsdC10LrRltGC0LXRgtGW0L0g0LvQuNCz0LDQvNC10L3RgtGC0LXRgCDQvNC10L0g0LHSsdC70YjRi9Kb0LXRgtGC0LXRgNC00LUg05nQu9GB0ZbQtyDQtNCw0LzRi9KT0LDQvSwg0LbQsNKb0YHRiyDQtNCw0LzRi9KT0LDQvSDRiNGL0YDRi9GI0LDRgdGC0Ysg0pvQsNCx0LDRgtGL0L3QsCDQttOZ0L3QtSDTmdC70YHRltC3INC00LDQvNGL0pPQsNC9INGI0YvRgNGL0YjRgtGLINKb0LDQsdCw0YLRi9C90YvSoyDTmdGB0LXRgNGW0L3QtdC9INGC0ZbQuiDRltGI0LXQutGC0ZbSoyDQv9GA0L7Qu9Cw0L/RgdGLLCDRj9KT0L3QuCDRgdGL0YDRgtKb0LAg0pvQsNGA0LDQuSDRiNGL0pPRg9GLINC90LXQvNC10YHQtSDRgtGW0Log0ZbRiNC10Log0LDQudC90LDQu9C80LDRgdGLINC10YDRgtC1INC20LDRgdGC0LDSk9GLINCx0LDQu9Cw0LvQsNGA0LTQsCDQttC40ZYg0LrQtdC30LTQtdGB0LXQtNGWLiDQkdCw0LvQsNC70LDRgNC00LAg0LDRgNGC0pvRiyDTqdGC0ZbRgSDQttC+0LvRiyDQtdGA0LXRgdC10LrRgtC10YDQs9C1INKb0LDRgNCw0pPQsNC90LTQsCDQtNC+0YDRgdCw0LvRjNC00Ysg0L7RgNC90LDQu9Cw0YHSm9Cw0L0uINCi0ZbQuiDRltGI0LXQutGC0ZbSoyDQvdCw0pvRgtGLINGE0LjQutGB0LDRhtC40Y/RgdGLIDLQttCw0YHSm9CwINKb0LDRgNCw0Lkg0LbSr9GA0LXQtNGWLiDQotGW0Log0ZbRiNC10LrRgtGW0qMg0YHRi9GA0YLSm9CwINGI0YvSk9GD0YvQvdGL0qMg0LbQsNGA0YLRi9C70LDQuSDQttOZ0L3QtSDRgtC+0LvRi9KbINGC0q/RgNC70LXRgNGW0L0g0LDQttGL0YDQsNGC0LDQvNGL0Lc8YnIgLz4NCjIuINCd05nRgNC10YHRgtC10LvQtdGA0LTQtSDQt9OZ0YAg0YjRi9KT0LDRgNGDINGC05nRg9C70ZbQs9GW0L3QtSAyMC0yNSDRgNC10YIg0LHQvtC70YPRiyDQvNKv0LzQutGW0L0sINCw0LsgMdCw0LnQu9GL0psg0LHQsNC70LDQu9Cw0YDQtNCwIDEwLTEy0YDQtdGCINCx0L7Qu9GD0Ysg0LzSr9C80LrRltC9LCDQsdKx0Lsg0LHQsNC70LDQu9Cw0YDQtNCwINCw0L3RgtC40LTQuNGD0YDQtdGC0LjQutCw0LvRi9KbINCz0L7RgNC80L7QvdC90YvSoyDQsdKv0LnRgNC10Log0YLSr9GC0ZbQutGI0LXQu9C10YDRltC90LUg05nQu9GB0ZbQtyDTmdGB0LXRgCDQtdGC0YPRltC80LXQvSDQsdCw0LnQu9Cw0L3Ri9GB0YLRiywg0L3TmdGC0LjQttC10YHRltC90LTQtSDQt9OZ0YAg0LrQvtC90YbQtdC90YLRgNCw0YbQuNGP0LvQsNC90LHQsNKT0LDQvSzRj9KT0L3QuCDRgdKx0LnRi9KbINCx0L7Qu9Cw0LTRiy4g0J3QtdCz0ZbQt9GW0L3QtdC9INCw0L3RgtC40LTQuNGD0YDQtdGC0LjQutCw0LvRi9KbINCz0L7RgNC80L7QvdC90YvSoyDSm9GL0LfQvNC10YLRltC90LUg0LrQtdC70YHQtdC8LCDQvtC7INCx0q/QudGA0LXQutGC0ZbSoyDRgtKv0YLRltC60YjQtdC70LXRgNGW0L3QtNC10LPRliDQsNC00LMg0YDQtdGG0LXQv9GC0L7RgNC70LDRgNGL0LzQtdC9INOZ0YDQtdC60LXRgtGC0LXRgdGW0L8sINCw0LrQstCw0L/QvtGA0LjQvSDQvdOZ0YDRg9GL0LfRi9C90YvSoyDQutC+0L3RhNC+0YDQvNCw0YbQuNGP0YHRi9C9INOp0LfQs9C10YDRgtC10LTRliwg0Y/Sk9C90Lgg0ZbRgdC60LUg0pvQvtGB0LDQtNGLLCDQvdOZ0YLQuNC20LXRgdGW0L3QtNC1INGB0YMg0pvQsNC90pPQsCDSm9Cw0YDQsNC5INGA0LXQsNCx0YHQvtGA0LHRhtC40Y/Qu9Cw0L3QsNC00YssINGB06nQudGC0ZbQvyDQt9OZ0YAg0LrQvtC90YbQtdC90YLRgNCw0YbQuNGP0LvQsNC90YvQvywg0LrTqdC70LXQvNGWINCw0LfQsNGP0LTRiywg0LDQuyDQsNC00LMg05nRgdC10YAg0LXRgtC/0LXRgdC1INGB0YMg0pvQsNC90pPQsCDQutC10YDRliDRgdGW0qPQsdC10LksINC305nRgNC00ZbSoyDQutOp0LvQtdC80ZYg0LrTqdCx0ZbRgNC10Log0LHQvtC70LDQtNGLLiDQltOZ0L3QtSAx0LDQudC70YvSmyDQsdCw0LvQsCDRgtC10Log0LDQvdCwINGB0q/RgtGW0LzQtdC9INKb0L7RgNC10LrRgtC10L3Qs9C10L3QtNGW0LrRgtC10L0g0L7QuyDQtNCwINC305nRgNC00ZbSoyDQttC40ZYg0LHQvtC70YPRi9C90LAg05nRgdC10YAg0LXRgtC10LTRli4g0KHQvtC90YvQvNC10L0g0pvQsNGC0LDRgCDQsdCw0LvQsNC70LDRgNC00LAg0LrQsNC90LDQu9GM0LTRi9KbINGA0LXQsNCx0YHQvtGA0LHRhtC40Y8g05nQu9GB0ZbQtyDQtNCw0LzRi9KT0LDQvS4g0JbTmdC90LUg0L3TmdGA0LXRgdGC0LXQu9C10YDQtNC1INKb0YPRi9Kb0pvQsCDRgdGL0Y/RgtGL0L0g0LfTmdGAINC606nQu9C10LzRliDQsNC3INKT0LDQvdCwINGP0pPQvdC4INGI0LDQvNCw0LzQtdC9IDjQvNC7INCx0L7Qu9Cw0LTRiywg0pvRg9GL0pvRgtGL0qMg0LHSsdC70YjRi9Kb0LXRgiDSm9Cw0LHQsNGC0Ysg0L3QsNGI0LDRgCDQttC10YLRltC70LPQtdC9LCDRjdC70LDRgdGC0LjQvdC00ZbQu9GW0LPRliDRgtOp0LzQtdC9INCx0L7Qu9Cw0LTRiywg0LHSsdC7INC00LAg0LfTmdGA0LTRltKjINKx0LfQsNKbINKx0YHRgtCw0LvQvNCw0YPRi9C90LAg05nQutC10LvQtdC00ZYuINCd0LXRgdC10L/QsNKT0LDRgCDSm9GL0YHSm9CwINC205nQvdC1INC40YDQtdC60YLQtdC70LPQtdC9INCx0L7Qu9Cw0LTRiy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519" table:style-name="ce1">
            <text:p>915519</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DQvNC10L0g0LTTmdGA0ZbQs9C10YAg0pvQvtC50pPQsNC9INC00LjQsNCz0L3QvtC30LHQtdC9INC60LXQu9GW0YHQtdC8INOp0LnRgtC60LXQvdGWINCx0ZbQt9C00LUg0YLRltC6INGW0YjQtdC6INC+0Lsg0YLQvtKbINGW0YjQtdC60YLRltKjINGB0L7So9KT0Ysg0LHTqdC70ZbQvNGWINCx0L7Qu9GL0L8g0YLQsNCx0YvQu9Cw0LTRiyDQvtC7INGC0YPRi9C70pPQsNC9INC60LXQt9C1INGC0L7Qu9GL0psg0LTQsNC80YvQvNCw0LnQtNGLINC205nQvdC1INKb0LDQvdC80LXQvSDQttCw0pvRgdGLINKb0LDQvNGC0LDQvNCw0YHRi9C3INC10YLRltC70LXQtNGWINC205nQvdC1INGW0YjQtdC60YLRltKjINCx0rHQu9GI0YvSm9C10YLRgtC10YDRltC90ZbSoyDQttC40ZYg0pvQvtC30YPRi9C90LDQvSDQsdGW0LfQtNC1INC20LjRliDQtNC10YTQsNC60LDRhtC40Y8g0LHQvtC70LDQtNGLINC205nQvdC1INGC0L7SmyDRltGI0LXQutGC0ZbSoyDRgdGW0qPRltGA0LPRltGIINKb0LDQsdGW0LvQtdGC0ZYg0q/Qu9C60LXQvSDQsNC00LDQvNC00LDRgNKT0LAg0pvQsNGA0LDSk9Cw0L3QtNCwINC20LDSm9GB0Ysg0YHRltKj0ZbRgNC10LTRliDQsdGW0YDQsNKbINC+0LvQsNGA0LTRi9KjINCx0LDRgNC10YDQu9GW0Log0YTRg9C90LrRhtC40Y/RgdGLINC20LXRgtGW0YHQv9C10LPQtdC90L3QtdC9INCx0LDQu9CwINC40L3RhNC10LrRhtC40Y/Qu9GL0psg0LDRg9GA0YPQu9Cw0YDQvNC10L0g0LDRg9GA0YPRiyDQvNKv0LzQutGW0L0g0LHRltC30LTQtSDQuNC80LzRg9C90LjRgtC10YIg0L3QtdCz0ZbQt9Cz0ZYg0LHTqdC70ZbQs9GWINC+0YHRiyDRgtC+0psg0ZbRiNC10LrRgtC10LPRliDQsdCw0LrRgtC10YDQuNGP0LvQsNGA0LTRi9KjINCw0YDSm9Cw0YHRi9C90LTQsCDQsdC+0LvQsNC00Ysg0LbTmdC90LUg0LHSsdC7INCx0LDQutGC0LXRgNC40Y/Qu9Cw0YDQtNGLINC+0Lsg0LDQvdCw0YHRi9C90LDQvSDQsNC70LDQtNGLLtC205nQvdC1INCx0ZbQt9C00LUg0YLRltC6INGW0YjQtdC60YLRltKjINCz0LjRgdGC0L7Qu9C+0LPQuNGP0LvRi9KbINGC0q/RgNC00LXQvSDSm9Cw0YDQsNGB0LDSmyDQvtC70LDRgNC00Ysg0YjRi9GA0YvRiNCw0YHRgtGLINKb0LDQsdCw0YLRiyDQttCw0pvRgdGLINC00LDQvNGL0pPQsNC9INC205nQvdC1INCx0ZbRgNCw0psg0L7RgdGLINKb0LDQsdCw0YLRiyDSsdGB0YLQsNC/INGC0rHRgNCw0YLRi9C9INKb0LDQsdGW0LvQtdGC0ZYg0YLTqdC80LXQvSDQsdC+0LvSk9Cw0L3QtNGL0pvRgtCw0L0g0L7RgdGLINKb0LDQsdCw0YIg0YHRi9GA0YLSm9CwINGI0YvSk9GD0Ysg0LzSr9C80LrRltC9LtC205nQvdC1INC+0YHRiyDRgtC+0psg0ZbRiNC10Log0YLRg9GL0LvSk9Cw0L3QtNCwIDYzINGB0Lwg0LHQvtC70LDQtNGLINC205nQvdC1INKx0YHRgtCw0L8g0YLSsdGA0LDRgtGL0L0g0LHQsNC50LvQsNC80LTQsNGA0LTRi9KjINOZ0LvRgdGW0Lcg0LHQvtC70pPQsNC90LTRi9Kb0YLQsNC9INC+0Lsg0LrRltGI0ZYg0LbQsNC80LHQsNGBINCw0YHRgtCw0YPRi9C90LAg0LTQtdC50ZbQvSDRgtOp0LzQtdC90LTQtdC/INC60LXRgtGD0ZYg0LzSr9C80LrRltC9LtC+0YHRiyDTqdGB0LUg0LrQtdC70LUg0LHQsNC50LvQsNC80LTQsNGA0LzQtdC9INKb0LDQsdCw0YLRgtCw0YDRiyDQtNCw0LzRi9C/INCx0rHQvdC00LDQuSDQttCw0pPQtNCw0LnQu9Cw0YAg0YHQuNGA0LXQuiDQutC10LfQtNC10YHQtdC00ZYg0L3QtdCz0ZbQt9GWINCx0LDQu9Cw0LvQsNGA0LTRiyDQutOp0L8g0L3TmdGA0YHQtdC70LXRgCDSm9Cw0LvRi9C/0YLRiyDQsdC+0LvRi9C/INGB0LDQvdCw0LvQsNC00Ysg0LDQuyDSr9C70LrQtdC90LTQtdGA0LTQtSDQsdKx0Lsg0L/QvtGC0L7Qu9C+0LPQuNGPINGA0LXRgtGW0L3QtNC1INC10YHQtdC/0YLQtdC70YHQtS7QttOZ0L3QtSDQvtGB0Ysg0YLRltC6INGW0YjQtdC60L/QtdC9INC305nRgCDRiNGL0pPQsNGA0LDRgtGL0L0g0YPRgNC10YLRgNCw0L3Ri9KjINC20LDSm9GL0L0g0YLSsdGA0pPQsNC90LTRi9Kb0YLQsNC9INC80q/RiNC10L3RliDQttGD0YMg0LrQtdC30ZbQvdC00LUg05nRgdGW0YDQtdGB0LUg0pvRi9C3INCx0LDQu9Cw0LvQsNGA0LTQsCDRhtC40YHRgtC40YIg0LDRg9GA0YvQvSDQttKx0pvRgtGL0YDRg9KT0LAg0LHQvtC70LDQtNGLICA8YnIgLz4NCjIg0YHSsdGA0LDSmyDQsdGW0LfQtNC10LPRliDQttC40ZYg0LfTmdGAINC20YvSk9Cw0YDRgyDSm9Cw0LvRi9C/0YLRiyDQsdC+0LvRi9C/INGB0LDQvdCw0LvQsNC00Ysg06nQudGC0LrQtdC90ZYg0LHSsdC7INCx0LDQu9Cw0L3Ri9KjINC305nRgCDRiNGL0pPQsNGA0LDRgtGL0L0g0LbSr9C50LXRgdGW0L3RltKjINC10YDQtdC60YjQtdC70ZbQutGC0LXRgNGW0L3QtSDQsdCw0LnQu9Cw0L3Ri9GB0YLRiyDQvtC70LDRgCDSm9GD0YvSmyDRgdC40YvQvNC00YvQu9GL0pPRiyDRgtOp0LzQtdC9INCx0L7Qu9KT0LDQvdC00YvSm9GC0LDQvSDQttOZ0L3QtSDQsdCw0LvQsNC70LDRgCDTqdC3INC305nRgNC70LXRgNGW0L0g0YHQsNC90LDQu9GLINGC0q/RgNC00LUg0rHRgdGC0LDQvyDRgtKx0YDQsCDQsNC70LzQsNC50LTRiy7Qt9OZ0YAg0YjRi9KT0LDRgNGDINCx0LDQu9Cw0LvQsNGA0LTQsCDRiNCw0YDRgtGB0YvQtyDRgNC10YTQu9C10LrRgdC60LUg0LHQsNKT0YvQvdCw0LTRiyDQttOZ0L3QtSDQt9OZ0YAg0YjRi9KT0LDRgNGDINOZ0LTQtdGC0YLQtSDQvtGB0Ysg0LHRltGAINCw0LnSk9CwINC00LXQudGW0L3Qs9GWINCx0LDQu9Cw0LvQsNGA0LTQsCDSm9Cw0L3RiNCwINGA0LXRgiDQsNC90LAg0YHSr9GC0ZYg0LHQtdGA0ZbQu9Cz0LXQvdCz0LUg0YLQtdKjINCx0L7Qu9Cw0LTRiyDQttOZ0L3QtSDRgdC+0pPQsNC90LTQsCDQsdCw0LnQu9Cw0L3RgdGC0Ysg0LrTqdCx0LXQudGW0L8g0L3QtSDQutC10LzRltC/INC+0YLRi9GA0LDQtNGLLiDQttOZ0L3QtSDQsdCw0LvQsCDTqdGB0LUg0LrQtdC70LUg0LHSsdC7INC305nRgCDRiNGL0pPQsNGA0YPQu9Cw0YDRiyDRgtOp0LzQtdC90LTQtdC50LTRlizQttOZ0L3QtSDQutC10LnQtNC1INC905nRgNC10YHRgtC10LvQtdGAINC80q/Qu9C00LUgIDIgMyDQutKv0L0g0LfTmdGAINGI0YvSk9Cw0YDQvNCw0YPRiyDQvNKv0LzQutGW0L0g0LHSsdC70LTQsCDSm9Cw0LvRi9C/0YLRiyDQsdC+0LvRi9C/INC10YHQtdC/0YLQtdC70LXQtNGWLtC10L3QtNGWINCx0q/QudGA0LXQutGC0ZbSoyDQtdGA0LXQutGI0LXQu9GW0LrRgtC10YDRltC90LUg0LrQtdC70YHQtdC6INOp0LnRgtC60LXQvdGWINCx0rHQuyDQvNKv0YjQtSDQvtGB0Ysg0LbSr9C50LTQtdCz0ZYg0L3QtdCz0ZbQt9Cz0ZYg0LfTmdGAINGC0q/Qt9C10YLRltC9INC80q/RiNC1INC+0Lsg0YLRg9GL0LvSk9Cw0L3QtNCwINC/0ZbRiNGW0L3RliDQvtCy0LDQu9C00Ysg0YHQvtGB0YvQvSDTqdGB0LUg0LrQtdC70LUg0LHQvtCx0L7QstC40LTQvdGL0Lkg0LHQvtC70LDQtNGLINC205nQvdC1INGB0L7QuyDQttCw0psg0LHSr9C50YDQtdC6INC+0qMg0LbQsNKb0pvQsCDSm9Cw0YDQsNKT0LDQvdC00Ysg0LHQuNGW0Log0L7RgNC90LDQu9Cw0YHQsNC00Ysg0YLRi9KT0Ysg0YDQsNC30LzQtdGA0LvQtdGA0ZbQtNC1INC60ZbRiNC60LXQvdGC0LDQuS7QvtC7INC20LXRgNC00LXQs9GWINC10YDQtdC60YjQtdC70ZbQutGC0LXRgCDQutC70YPQsdC+0YfQutC+0LLRi9C5INGE0LjQu9GM0YLRgNCw0YbQuNGPINGC0q/RgtGW0LrRiNC10LvQtdGA0ZbQvdC00LUg06nQudGC0LrQtdC90ZYg0L7Qu9Cw0YDQtNCwINGE0LjQu9GC0YDQsNGG0LjRj9C70YvSmyDSm9Cw0LHRltC70LXRgtGC0LXRgNGWINKv0LvQutC10L3QtNC10LTRltC60ZbQvdC1INKb0LDRgNCw0pPQsNC90LTQsCDRgtOp0LzQtdC9INC205nQvdC1INKb0YvRgdKb0LAg0LbTmdC90LUg0L7Qu9Cw0YDQtNGL0qMg0pvRi9C30LzQtdGC0qPQvSDQs9C+0YDQvNC+0L3QtNCw0YAg0LHSsdC30YPRiyDQvNKv0LzQutGW0L0g0LHRltC30LTQtSDQsdKx0Lsg0YLSr9GC0ZbQutGC0LXRgNC00ZYg0L/RgNC+0LrRgdC40LzQsNC70Ysg0L/QtdGC0LvRjCDQs9C10L3Qu9C1INC205nQvdC1INC00LjRgdGC0LDQu9GM0LTRliDRgtKv0YLRltC60YjQtdGB0ZYg0YHRg9C00YvSoyDRgNC10LDQsdGB0L7RgNCx0YbQuNGP0YHRi9C90LAg0LbQsNGD0LDQv9GC0Ysg0LbTmdC90LUg0L7Qu9Cw0YAg0L3QsNGC0YDQuNC50LTRltKjIDUgMTAgINC/0LDQudGL0LfRi9C9INKT0LDQvdCwINGA0LXQsNCx0YHQvtGA0LHRhtC40Y/Qu9Cw0LnQtNGLINC205nQvdC1INCx0ZbQt9C00LUg0L3QsNGC0YDQuNC5INGI0YvSm9GB0LAg0L7QuyDTqdC30ZbQvNC10L0g0YHRg9C00Ysg0LDQu9Cw0L8g0LrQtdGC0ZbQvyDQvtGC0YDQsNC00Ysu0LbTmdC90LUg0L7RgdGL0L3Ri9KjINGA0LXQsNCx0YHQvtGA0LHRhtC40Y/RgdGL0L3QsCDQsNC70YzQtNC10YHRgtC10YDQvtC9INCz0L7RgNC80L7QvdGLINCw0YDSm9GL0LvRiyDRgNC10YLRgtC10LvRltC/INC305nRgCDRgtKv0LfRltC70YMg0YDQtdGC0YLQtdC70LXQtNGWINGC0LDSk9GLINC+0LvQsNGA0LTRiyDQvdC10YTRgNC+0L0g0YLQvtC70YvSmyDQttC10YLRltC70LzQtdCz0LXQvSDQttOZ0L3QtdC00LUg0L7Qu9Cw0YAg0LDQtNCzINCz0L7RgNC80YvQvtC90YvQvdCwINGB0LXQt9GW0LzRgtCw0Lsg0LHQvtC70LDQtNGLINGB0L7Sk9Cw0L3QtNCwINCx0LDQudC70LDQvdGL0YHRgtGLINC20LjRliDQt9OZ0YAg0YjRi9KT0LDQtNGLINGC0LDSk9GLINC305nRgNC00ZbSoyDQutC+0L3RhtC10L3RgtGA0LDRhtC40Y/RgdGL0L0g0LTSsdGA0YvRgSDSsdGB0YLQsNC5INCw0LvQvNCw0LnQtNGLINGB0L7QtNCw0L3QtNCwINCx0L7Qu9Cw0LTRiy7QttOZ0L3QtSDQsdGW0LfQtNC1INC305nRgCDRiNGL0pPQsNGA0YPRiNGLINGC0q/RgtGW0LrRgtC10YAg0pvRi9GB0pvQsCDQttOZ0L3QtSDQuNGW0LvQs9GW0Ygg0LHQvtC70LDQtNGLLtGC0LDSk9GLINCx0q/QudGA0LXQutC60LUg0LrQtdC70LXRgtGW0L0g0pvQsNC9INCx0L7QudGL0L3RiNCw0LTQsCDSr9C70LrQtdC90LTQtdGA0LTQtSDQttKv0YDQtdC6INC20LjRi9GA0LDQu9KT0LDQvdC90LDQvSDQutC10LnRltC9INCx0q/QudGA0LXQutC60LUg0q/Qu9C60LXQvdC00LXRgNC00LUgMjXQv9Cw0LnRi9C3INCx0L7Qu9GB0LAg0LDQuyDQvdOZ0YDQtdGB0YLQtdC70LXRgNC00LUgNSDQv9Cw0LnRi9C30pPQsCDRgtC10qMu</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671" table:style-name="ce1">
            <text:p>915671</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4gMyDQttCw0YHQsNGAINCx0LDQu9Cw0LTQsCDQtNC10YTQtdC60LDRhtC40Y/QtNCw0L0g0YLRltC6INGW0YjQtdC60YLRltKjINCw0LnQvdCw0LvQvNCw0YHRiyDRj9KT0L3QuCDQsdCw0YHSm9CwINKb0LDQsdCw0YLSm9CwINC60ZbRgNGW0L8g0LrQtdGC0YPRliDQsdCw0LnSm9Cw0LvQsNGC0YvQvSDQsdC+0LvRi9C/INC60LXQu9C10LTRli4g0J/QsNGC0L7Qu9C+0LPQuNGP0LvRi9KbINC20LDSk9C00LDQuSDQsdC+0LvRgdCwINCx0rHQuyDQutOp0LHRltC90LXRgdC1LCDQuNC90YTQtdC60YbQuNGP0LvQsNGAINGC0ZbQuiDRltGI0LXQutGC0ZbSoyDSm9Cw0LHRi9GA0pPQsNC70LDRgNGL0L3Ri9KjINC905nQt9GW0Log0LbSsdKb0LAg0LHQvtC70pPQsNC90LTRi9Kb0YLQsNC9INC60LXQudGW0L0gINC+0LvQsNGA0pPQsCDSm9Cw0YLRgtGL0YDQsNKbINOZ0YHQtdGAINC10YLQtdC00ZYg0LTQtSDQvtC70LDRgNC00Ysg0LHQvtGB0LDRgtGD0Ysg0LzSr9C80LrRltC9INC205nQvdC1INC00LUg0LbQsNC70L/RiyDQv9Cw0YLQvtC70L7Qs9C40Y/Qu9GL0psg0q/QtNC10YDRltGBINKb0LDQsdGL0L3RgyDRgtGW0Log0ZbRiNC10LrRgtGW0qMg0pvQsNCx0LDRgtGC0LDRgNGL0L3Ri9KjINC30LDSm9GL0LzQtNCw0YPRi9C90LAg0LDQu9GL0L8g0LrQtdC70YPRliDQvNKv0LzQutGW0L0sINC/0L7Qu9C40L/RgtC10YAg0LbTmdC90LUg0LTQtSDRgtGW0Log0ZbRiNC10LrRgtGW0qMg0LDQudC90LDQu9C80LDRgdGLINKv0LvQutC10L0g0LbQsNGB0YLQsCDQttC10YLQutGW0LvRltC60YHRltC3INC00LDQvNGL0LzQsNGD0YvQvdCw0L0g0LHQvtC70YvQvyDQutC10LvQtdC00ZYuINCR0rHQuyDQsdCw0LvQsNC70LDRgNC00LAg0LrTqdCx0ZbQvdC10YHQtSAxLTIg0LbQsNGB0YLQsCDQttC40ZYg0LHQsNC50pvQsNC70LDQtNGLINCe0Lsg0LHQsNC70LDQvdGL0qMg0LDQvdCw0YLQvtC80LjRj9C70YvSmyDRhNC40LfQuNC+0LvQvtCz0LjRj9C70YvSmyDQtdGA0LXQutGI0LXQu9GW0LrRgtC10YDRltC90LUg0LHQsNC50LvQsNC90YvRgdGC0Ysg0LHQvtC70YvQvyDQutC10LvQtdC00ZYuINCa0LXQt9C10Lot0LrQtdC30LXQutGC0LXQvSDQttGW0LrRgtC10L8g0LDQudGC0LDRgtGL0L0g0LHQvtC70YHQsNKbINC+0Lsg0LHRltGA0ZbQvdGI0ZbQtNC10L0sINGC0ZbQuiDRltGI0LXQutGC0ZbSoyDQsdOp0LvRltCz0ZYg0LDQvNC/0YPQu9Cw0L3Ri9KjINC20LXRgtC60ZbQu9GW0LrRgdGW0Lcg0LTQsNC80YPRi9C90LDQvSDQsdC+0LvQsNC00YsuINCe0Lsg0LrTqdCx0ZbQvdC10YHQtSDQttCw0YHRgtGL0psg0LXRgNC10LrRiNC10LvRltC60YLQtdGA0LPQtSDQsdCw0LnQu9Cw0L3Ri9GB0YLRiyDQvtC7INCx0ZbRgNGW0L3RiNGW0LTQtdC9LCDQtdC60ZbQvdGI0ZbQtNC10L0g0LHQsNC70LDQu9Cw0YDQtNCwINC20LjRliDRiNGL0YDRi9GI0YLRiyDSm9Cw0LHQsNGC0Ysg0LbQtdGC0LrRltC70ZbQutGB0ZbQtyDQtNCw0LzRi9KT0LDQvSDQsdC+0LvRi9C/INGC0LDQsdGL0LvQsNC00YssINC+0Lsg0YjRi9GA0YvRiNGC0Ysg0pvQsNCx0LDRgtGL0L3Ri9KjINC00LDQvNGL0LzQsNGD0Ysg05nRgdC10YDRltC90LXQvSDQvtC90YvSoyDSm9Kx0YDQsNC80YvQvdCwINC60ZbRgNC10YLRltC9INC205nQvdC1INC+0LTQsNC9INC60LXQudGW0L0g0YLTqdC80LXQvSDQvtGA0L3QsNC70LDRgdCw0YLRi9C9INCx0rHQu9GI0YvSmy3QtdGC0YLRliDSm9Cw0LHQsNGC0YLRi9C9INGB0L7QvdGL0LzQtdC9INCx0ZbRgNCz0LUg0LTQsNC80YvQvNCw0YMg0LHQvtC70LDQtNGLINC00LXQs9C10L0g0LHQtdC70LPRliDRj9KT0L3QuCDQvtC70LDRgNC00YvSoyDQtNKx0YDRi9GBINC00LDQvNGL0LzQsNGD0YvQvdCw0L0g0pvQsNCx0YvRgNKT0LAg0LHQtdC60ZbQu9GDINC00rHRgNGL0YEg0LbSr9C30LXQs9C1INCw0YHQv9Cw0LnQtNGLLCDRgdC+0L3Ri9C80LXQvSDSm9Cw0YLQsNGAINCw0L3Rg9GB0YLRi9KjINGB0YTQuNC90LrRgtC10YDQu9C10YDQtNGW0qMg0LbQtdGC0LrRltC70ZbQutGB0ZbQt9C00ZbQs9GWINCx0L7Qu9Cw0LTRiy4g0KHQvtC90YvQvNC10L0g0pvQsNGC0LDRgCDRgtGW0Log0ZbRiNC10LrRgtGW0qMg0pvQsNCx0YvRgNKT0LDQu9Cw0YDRiyDQsdCw0LvQsNC70LDRgNC00LAg0LjQutC10LzQtNGWINGN0LvQsNGB0YLQuNC60LDQu9GL0psg0pvQsNCx0ZbQu9C10YLRgtC10YDQs9C1INC40LUg0LHQvtC70LDQtNGLLCDQu9C40LzRhNCwINGC0q/QudGW0L3QtNC10YDRliDQtNC1INKv0LvQutC10L0g0LHQvtC70LDQtNGLLCDQvNC10LfQtdC90YLQtdGA0LjQuSDQtNC1INKx0LfRi9C90YvRgNCw0psg0LHQvtC70LDQtNGLINC+0Lsg0LDQudC90LDQu9C80LDSk9CwINC20LDRg9Cw0L/RgtGLINCx0L7Qu9GD0Ysg0LzSr9C80LrRltC9INC205nQvdC1INC00LUg0YHQvtC90pPRi9GB0Ysg0YLRltC6INGW0YjQtdC60YLQtSDQtNC40YHQsdCw0LrRgtC10YDQuNC+0Lcg0LrQtdC30ZbQvdC00LUg0LHSsdC70YjRi9KbLdC10YLRgtC10YDQtNGW0qMg0LbQuNGL0YDRi9C70YPRi9C90YvSoyDRgNC10YLRgtGW0LvQs9GWINCx0rHQt9GL0LvQsNC00Ysg0L7Qu9C00LAg06nQtyDQutC10LfQtdCz0ZbQvdC00LUg0L7RgdGLINCw0LnQvdCw0LvQvNCw0pPQsCDQsNC70YvQvyDQutC10LvRg9GWINC80q/QvNC60ZbQvSDQttOZ0L3QtSDQtNC1INKv0Lkg0LbQsNKT0LTQsNC50YvQvdC00LAg0LDRgtCwLdCw0L3QsNC70LDRgCDQutOp0LHRltC90LXRgdC1INCx0LDQu9Cw0LvQsNGA0LTRi9KjINC00LXRhNC10LrQsNGG0LjRj9GB0YvQvSDQsdCw0pvRi9C70LDQvNCw0LnQtNGLLCDQs9C+0YDRiNC+0LrRgtCwINCx0LDQu9CwINKx0LfQsNKbINGD0LDSm9GL0YIg0L7RgtGL0YDRi9C/INC60q/RiNC10L3QtSDQsdC10YDQs9GW0L3QtNGW0LrRgtC10L0g0LTQtSDRltGI0LXQuiDQsNC50L3QsNC70LzQsNGB0Ysg0LHQvtC70YPRiyDQvNKv0LzQutGW0L0uINCe0Lsg0L7RgtCwINCw0YDSm9GL0LvRiyDQtdC80LTQtdC70LXQtNGWLNKb0LDQu9C/0YvQvdCwINC60LXQu9C10LTRliDQvtGB0Ysg0LbQsNKT0LTQsNC50LTQsCDQtNOZ0YDRltCz0LXRgC3RhdC40YDRg9GA0LMg0LDRgNKb0YvQu9GLLiAgPGJyIC8+DQoyLiDQn9C10LTQuNCw0YLRgNC00LAgMSDQsNC50LvRi9KbINCx0LDQu9CwINKb0LDRgNCw0LvQtNGLLiDQkNC90LDRgdGL0L3Ri9KjINGI0LDSk9GL0LzQtNCw0YDRiyDQsdC+0LnRi9C90YjQsCDQsdCw0LvQsCDQttC40ZYg0L3QtdGB0LXQvyDRiNGL0pPQsNGA0LDQtNGLINCx0ZbRgNCw0psgLCDQtdGI0pvQsNC90LTQsNC5INC/0LDRgtC+0LvQvtCz0LjRj9C70YvSmyDSr9C00LXRgNGW0YHRgtC10YAg0LHQsNC50pvQsNC70LzQsNC50LTRiy4g0J7QuyDQsdGW0LfQtNC1INCx0rHQuyDSr9C00LXRgNGW0YHRgtC10YAg0LDQvdCw0YLQvtC80L4t0YTQuNC30LjQvtC70L7Qs9C40Y/Qu9GL0psg0LXRgNC10LrRiNC10LvRltC60YLQtdGA0LPQtSDQsdCw0LnQu9Cw0L3Ri9GB0YLRiyDQtdC60LXQvdGW0L3QtSDQsNC70YvQvyDQutC10LvQtdC00ZYuINCR0LDQu9Cw0YDQtNCwINCx0L7Qu9Cw0YLRi9C9INC10YDQtdC60YjQtdC70ZbQutGC0LXRgNC00ZYg0LDQudGC0LDRgtGL0L0g0LHQvtC70YHQsNKbLCDQttCw0qPQsCDRgtGD0YvQu9KT0LDQvSDQvdOZ0YDQtdGB0YLQtdC70LXRgNC00LUg0LbTmdC90LUg0LTQtSDQsdCw0YDQu9GL0psg0LHQsNC70LDQu9Cw0YDQtNGLIDcg0LbQsNGB0pvQsCDQtNC10LnRltC9INCx0q/QudGA0LXQuiDRhNGD0L3QutGG0LjQvtC90LDQu9C00Ysg0pvQsNCx0ZbQu9C10YLRgtC10YDRliDRgtC+0LvRi9KbINGC0q/RgNC00LUg0LbQtdGC0ZbQu9C80LXQs9C10L0g0LHQvtC70YvQvyDQutC10LvQtdC00ZYg0YHQvtC7INGB0LXQsdC10L/RgtGWINC90LXRgdC10L/RgtGW0L3QtNC1INC20LjRliDRiNGL0pPRg9GLINC80q/QvNC60ZbQvSwg0LXQutGW0L3RiNGW0LTQtdC9INGE0YPQvdC60YbQuNC+0L3QsNC70LTRiyDQsNC50YLSm9Cw0L3QvdCw0L0g0LrQtdC50ZbQvSDQsdKv0LnRgNC10LrRgtGW0qMg0LXSoyDQvNCw0qPRi9C30LTRiyDRhNGD0L3QutGG0LjRj9C70LDRgNGL0L3Ri9KjINCx0ZbRgNGWINC+0Lsg0YTQuNC70YzRgtGA0LDRhtC40Y8g0YHSr9C30YMg0pvQsNCx0ZbQu9C10YLRliDQsdC+0LvRi9C/INC60LXQu9C10LTRliAtINC+0L3Ri9C9INC805nQvdGWINCR0L7Rg9C80LXQvSDQutCw0L/RgdGD0LvQsNGB0Ysg0LDRgNKb0YvQu9GLINGB0L7QvdGL0L0g0ZbRiNGW0L3QtNC1INCx0L7Qu9Cw0YLRi9C9INGN0YTRhNC10LrRgtC40LLRgtGWINGE0LjQu9GM0YLRgNCw0YbQuNGP0LvRi9KbINKb0YvRgdGL0Lwo0L7QvdC60L7RgtC40LrQsNC70YvSmyzQvtGB0LzQvtGB0YLRi9KbLNCz0YDQsNC00LjQtdC90YIpINCw0YDSm9GL0LvRiyDQt9Cw0YLRgtCw0YDQtNGLINGB0q/Qt9GDINCx0L7Qu9GL0L8g0LrQtdC70LXQtNGWLiDQndOZ0YDQtdGB0YLQtdC70LXRgNC00ZbSoyDQtNC40YPRgNC10LfQtNGW0qMg0YLTmdGD0LvRltC60YLRltC6INC606nQu9C10LzRliDQsNC3INCx0ZbRgNCw0psg0LbQuNGW0LvRltCz0ZYg0LbQvtKT0LDRgNGLIDEwLTIwINGA0LXRgiDRgtOZ0YPQu9GW0LPRltC90LUuINCe0LTQsNC9INCx06nQu9C10Log0L3TmdGA0LXRgdGC0LXQu9C10YDQtNC1INCx0q/QudGA0LXQutGC0ZbSoyDRgNC10LDQsdGB0L7RgNCx0YbQuNGP0LvRi9KbINKb0LDQsdGW0LvQtdGC0YLQtdGA0ZYg0YLTqdC80LXQvSjRgtKv0YLRltC60YjQtdC70LXRgNC00ZbSoyDQttC10YLQutC10LvQutGB0ZbQtyDQtNCw0LzRg9GL0L3QsNC9KSDRgdC+0Lsg0YHQtdCx0LXQv9GC0ZYg0YHRgyDQvNC10L0g0Y3Qu9C10LrRgtGA0L7Qu9C40YLRgtC10YDQtNGW0qMg0YDQtdCw0LHRgdC+0YDQsdGG0LjRj9GB0Ysg0YLQvtC70YvSmyDQttKv0LfQtdCz0LUg0LDRgdC/0LDQudC00Ysg0YHQvtC7INGB0LXQsdC10L/RgtGWINC90LXRgdC10L/Sm9GD0YvSmyDRgtC10LfRltGA0LXQuiDRgtC+0LvRi9C/INC60LXRgtC10LTRli7QndC10YHQtdC/0pvRg9GL0psg0LHQsNC70LDQu9Cw0YDQtNGLINOp0Lcg0LHQtdGC0ZbQvNC10L0g0LrRltGI0LrQtdC90YLQsNC5INC205nQvdC1INC00LUg0YHRi9C50YvQvNC00YvQu9GL0pPRiyDRgtOp0LzQtdC9INCx0L7Qu9GL0L8g0YLQsNCx0YvQu9Cw0LTRiy4g0JbSr9C50LrQtSDQttKv0LnQtdGB0ZbQvdGW0qMg0YDQtdGC0YLQtdC70YPRliDQtNC1INGC0L7Qu9GL0pPRi9C80LXQvSDQtNCw0LzRi9C80LDSk9Cw0L0g0YHQvtC7INGB0LXQsdC10L/RgtGWINC90LXQudGA0L7RgNC10YLRgtC10LvRg9GWINCx0L7Qu9C80LDSk9Cw0L3QtNGL0pvRgtCw0L0g0L3QtdGB0LXQvyDRiNGL0pPQsNGA0YMg0LrTqdCx0ZbRgNC10Log0LHQvtC70LDQtNGLINC+0Lsg0YDQtdGE0LvQtdC60YLQvtGA0LvRi9KbINKb0LDQsdGW0LvQtdGC0YLQtdGA0LzQtdC90LTQtSDQsdCw0LnQu9Cw0L3Ri9GB0YLRiy4g0JfQsNGCINCw0LvQvNCw0YHRgyDQsdCw0LvQsNC70LDRgNC00LAg0LXRgNC10YHQtdC6INCw0LTQsNC80LTQsNGA0LzQtdC9INGB0LDQu9GL0YHRgtGL0YDSk9Cw0L3QtNCwINGC0LXQt9GW0YDQtdC6INCx0L7Qu9Cw0LTRiyDRgdC+0Lsg0YHQtdCx0LXQv9GC0ZYg0LTQtSDQvdC10YHQtdC/INC20LjRltGA0ZbRgNC10Log0LbTmdC90LUg0YHQvtC90YvQvdC00LAg0LHQsNC70LDQu9Cw0YAg0LDQvdCw0YHRi9C90LDQvSDQsdOp0LvQtdC6INC40YHRgdC60YPRgdGC0LXRgdGC0LLQtdC90L3QvtC1INCy0YHQutCw0YDQvNC70LjQstCw0L3QuNC10LTQtSDQsdC+0LvQsNC00Ysg0L7QuyDQutOp0L8g0LHQtdGA0LUg0LHQtdGA0LXQtNGWINGB0L7QtNCw0L0g0L3QtdGB0LXQv9GC0LUg0LbQuNGW0YDRltGA0LXQuiDRiNGL0pPRg9GLINC80q/QvNC60ZbQvS4g0J7RgdGL0L3Ri9KjINCx0q/QutGW0LvRliDQvdC10YHQtdC/0YLRliDRiNGL0pPQsNGA0YPQtNGL0qMg0LXRgNC10LrRiNC10LvRltGC0LXRgNGWINCx0L7Qu9GL0L8g0YLQsNCx0YvQu9Cw0LTRiy4g0KHQvtC7INGB0LXQsdC10L/RgtGWINC90LXRgdC10L/RgtC1INC606nQsdGW0YDQtdC6INGI0YvSk9Cw0YDRi9C70LDQtNGLL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99" table:style-name="ce1">
            <text:p>1066899</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kgMyDQttCw0YHQsNGAINCx0LDQu9Cw0L3Ri9KjINCw0L3Rg9GBINCw0LnQvNCw0pPRi9C90LTQsCDQsdC+0LvSk9Cw0L0g06nQt9Cz0LXRgNGW0YHRgtC10YAg0L7QuyAg0YLRltC6INGW0YjQtdC6INC+0LvQsNGAINC00rHRgNGL0YEg0L7RgNC90LDQu9GL0YHQv9Cw0pPQsNC9INGP0pPQvdC4ICDQsdKx0YDQvNCw0LvQsNC90YvQvyDQvtGA0L3QsNC70LDRgdCw0LTRiy4g0JbTmdC90LUg0L3TmdC20ZbRgSDQtNKx0YDRi9GBINGI0YvSm9C/0LDQudC00Ysg0L3TmdGC0LjQttC10YHRltC90LTQtSDQsdKx0LfRi9C70YvRgdGC0LDRgCDQuNC90YTQtdC60YbQuNGP0LvQsNGAINC606nQv9GC0LXQvyDQsdC+0LvQsNC00YsuINCc0YvRgdCw0LvSk9CwINCw0LnRgtGB0LDSmyDQsdOp0YDRgtC/0LXQu9C10YAg0LHQvtC70LDQtNGLLiDQltOZ0L3QtdC00LUg0YLRltC6INGW0YjQtdC6INKb0YvRgdKb0LAg0LHQvtC70YvQvyDQutC10LvQtdC00ZYg0LTQsNC80YvSk9Cw0L0g0LTQtdGB0LXQutGC0LUg0LHQvtC70LDQtNGLLiDQltOZ0L3QtSDQsNGB0pvQvtGA0YvRgtGDINC20q/QudC10YHRltC90LTQtSDQsdCw0LvQsNC70LDRgNC00LAg0ZbRiNC10LrRgtC1INCx0LDRgCDQsdCw0LrRgtC10YDQuNGP0LvQsNGAINCx0L7Qu9C80LDQudC00Ysg0Y/Sk9C90Lgg0pvQsNC20LXRgtGC0ZYg0LHQsNC60YLQtdGA0LjRj9C70LDRgCDQttC10YLRltGB0L/QtdC50LTRli4g0JHQsNC70LDQu9Cw0YDQtNCwINGW0YjQtdC60YLQtdGA0ZbQvdC00LUg0YLQtdC6INKb0LDQvdCwINKb0LDQttC10YIg0LzQuNC60YDQvtGE0LvQvtGA0LDQu9Cw0YDQtNCw0L0g0LvQsNC60YLQvtC/0YDQvtCx0LjQvtGC0LjQutGC0LXRgCDQsdC+0LvQsNC00YsuINCv0pPQvdC4INC70LDQutGC0LDRgtGC0Ysg0YvQtNGL0YDQsNGC0YvQvSDQvNC40LrRgNC+0YTQu9C+0YDQsCDQsdC+0LvRi9C/INGC0LDQsdGL0LvQsNC00Ysu0KHTmdC50LrQtdGB0ZbQvdGI0LUg0LHQsNGB0pvQsNC00LAg0LfQsNGCINC+0YDQs9Cw0L3QuNC30LzQs9C1INC60ZbRgNGB0LUsINC+0L3RiyDQvtGA0LPQsNC90LjQt9C8INC00LjQt9C10L3RhNC40LrQsNGG0LjRj9GB0YvQvSDQttKv0YDQs9GW0LfQtSDQsNC70LzQsNC50LTRiy4g0JbTmdC90LXQtNC1INC+0Lsg0YLRltC6INGW0YjQtdC60LrQtSDQttOZ0L3QtSDQsNC90YPRgSDQsNC50LzQsNKT0YvQvdCwINC00rHRgNGL0YEg0pvQvtGA0YvRgtGL0LvQvNKT0LDQvSDQsdC+0LvRi9C/INCx0LDRgNCw0LTRiy4g0JbTmdC90LUg0LDQvdGD0YEg0LDQudC80LDSk9GL0L3QtNCwINCx06nRgNGC0L/QtSDQtNCw0LzRg9GL0L3QsCDQsNC70YvQvyDQutC10LvQtdC00ZYuINCW05nQvdC1INCx0LDQu9Cw0LvQsNGA0LTQsCDRiNGL0YDRi9GI0YLRiyDQsdOp0LvRltCz0ZYg0LbQsNKb0YHRiyDQtNCw0LzRi9KT0LDQvSDQsdC+0LvRi9C/INC60LXQu9C10LTRliwg0LDQuyDRiNGL0YDRi9GI0LDRgdGC0Ysg0L3QtdCz0ZbQt9GWINOZ0LvRgdGW0Lcg0LTQsNC80YvSk9Cw0L0g0LHQvtC70LDQtNGLLjxiciAvPg0KMikg0J7QuyDQsdCw0LvQsNC70LDRgNC00LAg0LbSr9C50LrQtSDQttKv0LnQtdGB0ZbQvdGW0qMg0LTSsdGA0YvRgSDQtNCw0LzRi9C80LDRg9GL0L3Ri9KjINC205nQvdC1INCx0rHQu9GI0YvSm9C10YIg0LbSr9C50LXRgdGW0L3RltKjINC00rHRgNGL0YEg0LTQsNC80YvQvNCw0YPRiyDQsdC+0LvQsNC00YsuINCc0YvRgdCw0LvSk9CwINCw0LnRgtGB0LDSmyDQsdGW0LfQtNC1INCx0LDRgdKb0LDRgNGD0YjRiyDSm9GL0LfQvNC10YLRgtGWINC20q/QudC60LUg0LbSr9C50LXRgdGWINCw0YLSm9Cw0YDQsNC00Ysg0LHRltGA0LDSm9GC0LAg0L7QuyDQsdCw0LvQsNC70LDRgNC00LAg0LTSsdGA0YvRgSDQtNCw0LzRi9C80LDSk9Cw0L3QtNGL0pvRgtCw0L0g0LHRltC30LTQtSDQsdCw0LvQsNC70LDRgNC00LAg0LrTqdC/0YLQtdCz0LXQvSDQv9GA0L7QsdC70LXQvNCw0LvQsNGAINCx0L7Qu9Cw0LTRiy4g0JzRi9GB0LDQu9KT0LAg0LDQudGC0YHQsNKbINKb0YPRi9KbINGB0YTQuNC90LrRgtC10YDRltC90ZbSoyDRgdC40LPQvdCw0Lsg0LHQsNGA0LzQsNGDINC905nRgtC40LbQtdGB0ZbQvdC00LUg0rHRgdGC0LDQuSDQsNC70LzQsNGD0YssINC205nQvdC10LTQtSDQvtC00LDQvSDQtNCwINC606nQv9GC0LXQs9C10L0g0L/RgNC+0LHQu9C10LzQsNC70LDRgCDQsdC+0LvQsNC00Ysu0LbTmdC90LUg0LHSsdC70YjRi9Kb0LXRgiDQttKv0LnQtdGB0ZbQvdGW0qMg0LTSsdGA0YvRgSDQtNCw0LzRi9C80LDRg9GLINC60LXRgdGW0YDQvdC10L0g0LTQtSDQsdC+0LvQsNC00Ysg0L7QuyDQsdGW0LfQtNC1INC90LXRgdC10L8g0Lgg0YjRi9KT0LDRgNGDINGC0q/RgtGW0LPRltC90ZbSoyDRgdGE0LjQvdCz0YLQtdGA0ZbQvdGW0qMg0rHRgdGC0LDQuSDQsNC70LzQsNGD0Ysg0LrQtdGB0ZbRgNGW0L3QtdC9INCx0L7Qu9Cw0LTRiy4g0J7QtNCw0L0g0LHTqdC70LXQuiDQutGW0YjQutC10L3RgtCw0Lkg0LHQsNC70LDQu9Cw0YDQtNCwINCx0q/QudGA0LXQuiDQtNKx0YDRi9GBINC00LDQvNGL0LzQsNC50LTRiywg0YHQtdCx0LXQsdGWINC+0Lsg0pvSsdGA0YHQsNKbINGW0YjRltC90LTQtSDQsdC+0LvQvNCw0pPQsNC90LTQsCDQvtC7INC60ZbQvdC00ZbQuiDQsNGA0pvRi9C70Ysg0YTQuNC70YzRgtGA0LDRhtC40Y8g0L/RgNC+0YbQtdGB0YHRliDQttKv0YDQtdC00ZYuINCQ0Lsg0LrRltGI0LrQtdC90YLQsNC5INCx0LDQu9Cw0LvQsNGA0LTQsCDQvtC7INKb0YvQt9C80LXRgtGC0ZYg0LDRgtKb0LDRgNGDINKv0YjRltC9INCx0q/QudGA0LXQuiDRgtC+0LvRi9KT0YvQvNC10L0g0LTQsNC80YMg0LrQtdGA0LXQuiDRgdC+0Lsg0YHQtdCx0LXQv9GC0ZYg0LHQsNC70LDQu9Cw0YAg0LHSr9C50YDQtdC6ICDQtNCw0LzRi9C80LDSk9Cw0L0g0LbTmdC90LUg0YTQuNC70YzRgtGA0LDRhtC40Y8g0YDQtdGC0ZbQvdC00LUg0YHRgyDQutOp0L/RgtC10L0g0YjRi9KT0LDQtNGLLCDQvtC7INCx0ZbQt9C00LUg0LfTmdGA0LTRltKjINC606nQvyDQsdOp0LvRltC90YPRltC90LUg0LDQu9GL0L8g0LrQtdC70LXQtNGWLiAo0JzSsdKT0LDQu9GW0Lwg0LHQsNGAINCx0ZbQu9Cz0LXQvdGW0LzQtNGWINC20LDQt9C00YvQvCDQsdGW0YDQsNKb0YLQsCDQsdKx0Lsg0LbQtdGA0LTQtSDQtNGL0Lwg0LbQvtKbINC00LXRgdC10LrRgtC1INCx0L7Qu9Cw0LTRiywg0LDQv9Cw0Lkg0LzQtdC9INCx0rHQuyDQttC10YDQtNC1INOp0LfRltC80LTRliAxMCDQsdCw0LvSk9CwINCx0LDSk9Cw0LvQsNC50YLRi9C9INC10LTRltC8INGB0ZbQt9Cz0LUg0LHRltGAINOp0YLRltC90ZbRiNGW0LwgMjYg0LHQsNC7INKb0L7QudGL0L8g0LHQtdGA0ZbSo9GW0LfRiNGLINC/0LXRgNC10YHQtNCw0YfQsCDRgtCw0L/RgdGL0YDQsNC50YvQvSDQnNC10L0g0LzQvtC50YvQvdC00LDQudGL0L0gMzAg0LHQuNC70LXRgtC60LUg0LTQsNC50YvQvdC00LDQu9C80LDSk9Cw0L0g0LXQtNGW0LwuINCQ0LvQtNGL0L0g0LDQu9CwINC606nQvyDRgNCw0YXQvNC10YIp</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04" table:style-name="ce1">
            <text:p>1066904</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3RgdKx0YDQsNKbLtCW0LDSo9CwINGC0YPSk9Cw0L3QvdCw0L0g0L3TmdGA0LXRgdGC0LXQu9C10YDQtNGW0qMg0ZbRiNC60ZYg0LDSk9C30LDQu9Cw0YDRiyDQsdGW0YDRgtC1INCx0ZbRgNGC0LUg0LTQsNC80LjQtNGLLCDRgdC+0L3Ri9KjINGW0YjRltC90LTQtSDQsNGBINKb0L7RgNGL0YLRgyDQttKv0LnQtdGB0ZYg0LTQtS4g0JHRltC30LTRltKjINC90LDRg9Kb0LDRgdGL0LzRi9C3IDMg0LbQsNGB0YLQsC7QldC90LTRliDRgtGW0Log0ZbRiNC10Log0LDQudC90LDQu9C80LDRgdGL0L3Ri9KjINC80q/QvNC60ZbQvSDRgdC10LHQtdC/0YLQtdGA0ZbQvSDQsNC50YLQsCDQutC10YLRgdC10LwuINCR0ZbRgNGW0L3RiNC00LXQvSDRgtGW0Log0ZbRiNC10LrRgtGW0qMg0YLRltGA0LXQutGC0ZbQuiDSm9Kx0YDRi9C70YvQvNC00LDRgNGL0L3Ri9KjKNCx0rHQu9GI0YvSmyDQtdGC0YLQtdGA0ZbQvdGW0qMpINOZ0LvRgdGW0LfQtNGW0LPRliDQsdC+0LvRi9C/INGC0LDQsdGL0LvQsNC00YssINGB0LXQsdC10LHRliDQvtC70LDRgNC00YvSoyDQtNCw0LzRg9GLINOZ0LvRliDRgtC+0LvRi9KbINC10LzQtdGBLtCR0rHQu9GI0YvSmyDQtdGC0YLQtdGA0LTRltKjINOZ0LvRgdGW0LfQtNGW0LPRliDQutOp0LHRltC90LUg0LDRg9GL0YDRgdGL0L3Rg9C00Ysg0L3QtdC80LXRgdC1INGW0Ygg0pvQsNGC0YPQtNGLINC20LXSo9GW0LvQtNC10YLQtdGC0ZbQvSDQttCw0pPQtNCw0LnQu9Cw0YDQtNCwINCx0ZbQu9GW0L3QtdC00ZYuINCh0LDQt9C00Ysg0ZbRiNC10Log0pvQsNCx0YvRgNKT0LDRgdGLLSDRj9KT0L3QuCDRltGI0LXQutGC0LXRgNC00ZbSoyDRiNGL0YDRi9GI0YLRiyDSm9Cw0LHRi9GC0YvQvdGL0qMg0L3TmdC30ZbQuiDTmdGA0ZYg05nQu9GB0ZbQtyDQsdC+0LvRg9GLLiDSmtKx0YDRgdCw0psg0pvRg9GL0YHRi9C90LTQsCwg0ZbRiNC10LrRgtGW0qMg06nQt9GW0L3QtNC1INKb0YvRgdGL0Lwg0LrSm9GC0LXRgNGW0LvRg9GWINCw0LnQvdCw0LvQvNCw0pPQsCDQsNC70YvQvyDQutC10LvRg9GWINC80q/QvNC60ZbQvS4g0IbRiNC10LrRgtC10YDQtNGW0qMg0rHQt9GL0L3QtNGL0pPRiy0g0LHQsNC70LDQu9Cw0YDQtNCwINGW0YjQtdC60YLQtdGAINKv0LvQutC10L3QtNC10YDQs9C1INKb0LDRgNCw0pPQsNC90LTQsCDSm9GL0YHSm9CwLCDQvNKx0L3QtNCw0Lkg0pvSsdGA0YvQu9GL0YEg0YLRltC6INGW0YjQtdC60LrQtSDSm9C+0YHRi9C80YjQsCDSm9C+0LvQtNCw0YPRiNGLINKb0rHRgNGL0LvRi9C80LTQsNGA0LTRiyDSm9Cw0LbQtdGCINC10YLQutGW0LfQtdC00ZYuINKa0YvRgdKb0LAg0ZbRiNC10Log0L7QvdGL0qMg0YLSsdGA0LDSm9GC0YvQu9GL0pPRi9C9INCw0LfQsNC50YLRi9C/INC/0YDQvtC70LDQv9GBINKb0LDRg9C/0ZbQvSDQsNGA0YLRgtGL0YDQsNC00Ysu0IbRiNC10LrRgtGW0qMg0LbQvtKT0LDRgNKT0Ysg0LHTqdC70ZbQs9GW0L3RltKjINOp0LfQs9C10YDQvNC10LPQtdC9INC20LDSk9C00LDQudC00LAg0LHQvtC70YPRiy0g0Y/Sk9C90Lgg0ZbRiNC10Log0YLQvtC70YvSmyDQtNCw0LzRi9C/INKv0LvQs9C10YDQvNC10LksINKb0LDQu9GL0L/RgtGLINC20rHQvNGL0YEg0ZbRgdGC0LXRg9GWINCx0ZbRgNGC0LUg0LHRltGA0YLQtSDQttCw0pvRgdCw0YDQsNC00Ysu0KLQsNC80LDSm9GC0LDQvdGD0LTRi9KjINC00rHRgNGL0YEg0LXQvNC10YHRgtGW0LPRliDQvdC10LzQtdGB0LUg0ZbRiNC10Log0LjQvdGE0LXQutGG0LjRj9C70LDRgNGLLSDQsdCw0LvQsNC70LDRgNC00YvSoyDRltGI0LXQutGC0LXRgNGW0L3RltKjINC80LjQutGA0L7RhNC70L7RgNCw0YHRiyDTmdGAINGC0LDQvNCw0pvRgtCw0L3Sk9Cw0L0g0YHQsNC50YvQvSDQsdGW0YDRgtC1INCx0ZbRgNGC0LUg0LTQsNC80LjQtNGLLCDRgdC+0Lsg0YHQtdCx0LXQv9GC0ZYg0L7Qu9Cw0YDQtNCwINGW0YjQtdC60YLRliDQuNC90YTQtdC60YbQuNGP0LvQsNGAINC20LjRliDQtNCw0LzQuNC00YvQtNCwLCDRltGIINKb0LDRgtGDLCDQtNC40LDRgNC10Y8sINKb0rHRgdGLINGB0YvQvdC00Ysg0YHQuNC80L/RgtC+0LzQtNCw0YAg0ZbRiNC10Log0L/RgNC+0LvQsNC/0YHRiyDSm9Cw0YPRltC/0ZbQvSDQsNGA0YLRgtGL0YDQsNC00Ysu0KLRltC6INGW0YjQtdC60YLRltKjINCw0LnQvdCw0LvQsNGB0YvQvdC00LDSk9GLINC80LDQudC70Ysg0LrQu9C10YLQsNGH0LDRgtC60LDQvdGL0qPQtNCwINGC0L7Qu9GL0psg0LbQtdGC0ZbQu9C80LXRg9GWINKb0LDRg9GW0L/RgtGWINCw0YDRgtGC0YvRgNCw0LTRiy7SmtC+0YHRi9C80YjQsCDQsNC50YLQsCDQutC10YLRg9Cz0LUg0LHQvtC70LDQtNGLLCDQsdCw0LvQsNC70LDRgNC00LAg0LbQsNC70L/RiyDRgtC+0psg0ZbRiNC10LrRgtGW0qMg0L/QtdGA0LjRgdGC0LDQu9GM0YLQuNC60LDRgdGLINC90LDRiNCw0YAsINGC0L7SmyDRltGI0LXQutGC0LUg0L3TmdC20ZbRgdGC0ZbSoyDQutOp0L8g0LrRltC00ZbRgNGD0ZYg0LrQtdGB0ZbRgNGW0L3QtdC9INCx0LDQu9CwINGW0Ygg0pvQsNGC0YPSk9CwINC90LUg0ZbRiCDTqdGC0YPRltC90LUg0LHQtdC50ZbQvCDQsdC+0LvQsNC00YsuINCd05nQt9GW0Log0YLRltC6INGW0YjQtdC6INKv0YjRltC9INCx0rHQuyDQsNGD0YvRgCDQttKv0YHQutGC0LXQvNC1INGB0LDQu9Cw0LTRiy4yLdGB0rHRgNCw0psuICDQsNC50LvRi9KbINCx0LDQu9Cw0L3Ri9KjINC305nRgNC00ZYg0LbQuNGWINGI0YvSk9Cw0YDRg9GLINC10LPQtdGA0LTQtSDQsdCw0YHSm9CwINC80q/RiNC10LvQtdGA0LTQtSDQsNCw0LnRgtCw0YDQu9GL0pvRgtCw0Lkg0L/QsNGC0L7Qu9C+0LPQuNGPINCx0L7Qu9C80LDRgdCwINKb0LDQu9GL0L/RgtGLINC20LDSk9C00LDQuSwg0JDQu9Cw0YPQtNCw0LzQsNGD0pPQsCDQsdC+0LvQsNC00YsuINCh0LXQsdC10LHRliDQsdGW0YAg0LDQudC70YvSmyDQsdCw0LvQsCDQutKv0L3RltC90LUgMTAtMTIg0YDQtdGC0LrQtSDQtNC10LnRltC9INC305nRgCDRiNGL0pPQsNGA0YPRiyDQvNKv0LzQutGW0L0uINCe0pPQsNC9INGB0LXQsdC10L/RgtC10YA6INCR0q/QudGA0LXQutGC0LXRgNC00ZbSoyDQttC10YLRltC70LzQtdCz0LXQvdC00ZbQs9GWLSDQtNKx0YDRi9GBINC20LXRgtGW0LvQvNC10LPQtdC9INCx0q/QudGA0LXQutGC0LXRgNC00ZbSoyDRgNC10LDQsdGB0L7RgNCx0YbQuNGPINKb0LDQsdGW0LvQtdGC0ZYg0L3QsNGI0LDRgC4g0KHQvtC7INGB0LXQsdC10L/RgtGWINGC0rHQt9C00LDRgNC00YssINGA0LXQsNCx0YHQvtGA0LHRhtC40Y/RgdGLINGB0L7QvdGL0qMg05nRgdC10YDRltC90LXQvSDRgdGDINGA0LXQsNCx0YHQvtGA0LHRhtC40Y/RgdGLINC00LAg0L3QsNGI0LDRgC7QodC+0L3QtNGL0pvRgtCw0L0g0LfTmdGAINC20LjRliDQsdOp0LvRltC90LXQtNGWLtCR0LDQu9Cw0LvQsNGAINCw0L3QsNGBINKv0YLRltC80LXQvSDQttOZ0L3QtSDQsdCw0YHSm9CwINC00LAg0pvQvtGA0LXQuiDQutOp0LfQtNC10YDRltC80LXQvSDQutOp0L8g0LzTqdC70YjQtdGA0LTQtSDRgdKx0LnRi9Kb0YLRi9KbINKb0LDQsdGL0LvQtNCw0YPRiy0g0L7QvdGL0qMg05nRgdC10YDRltC90LXQvSDQtNOZINGC05nRg9C70ZbQutGC0ZbQuiDQtNC40YPRgNC10Lcg0LrTqdCx0LXQudC10LTRli4g0JHQsNC70LDQu9Cw0YDQtNGL0qMg0pvRg9GL0pPRi9C90YvSoyDQutOp0LvQtdC80ZYtINCx0LDQu9Cw0LvQsNGA0LTRi9KjINKb0YPRi9KT0YvQvdGL0qMg0YHRi9C50YvQvNC00YvQu9GL0pPRiyDQsNC3INC20ZbQvdC1INC+0L3QtNCwINC606nQvyDQvNOp0LvRiNC10YDQtNC1INC305nRgCDRgdCw0pvRgtCw0LvRi9C90LAg0LDQu9C80LDQudC00YsuINCh0L7QuyDRgdC10LHQtdC/0YLRliDQsdGW0Lcg0LHRltGAINCw0LnQu9GL0psg0LHQsNC70LDQu9Cw0YAg0LbQuNGWINC20LjRliDQt9OZ0YAg0YjRi9KT0LDRgNCw0LTRiyDQtNC10LnQvNGW0Lcu0KHQvtC90YvQvNC10L0g0pvQsNGC0LDRgCDQsdCw0LvQsNC70LDRgNC00YvSoyDQsdKv0LnRgNC10LrRgtC10YDRltC90ZbSoyDSm9GL0LfQvNC10YLRliDRgtC+0LvRi9KbINC00LDQvNGL0LzQsNGD0Ysg0LrQtdGB0ZbRgNGW0L3QtdC9IDEg0LbQsNGB0pvQsCDQtNC10LnRltC9INC305nRgNC00ZbSoyDRgtGL0pPRi9C30LTRi9KT0Ysg0LTQsCDRgtOp0LzQtdC9INCx0L7Qu9Cw0LTRiyDRgdC10LHQtdCx0ZYg0L7QvdGL0qMg0LzTqdC70YjQtdGA0ZYg0LrTqdC/LiDQr9KT0L3QuCAxINC20LDRgdKb0LAg0LTQtdC50ZbQvSDQt9OZ0YAg0YLRi9KT0YvQt9C00YvSk9GLLTEwMDItMTAwNiDQsdC+0LvQsNC00YsuINCa0LXQudGW0L3QvdC10L0g0LHSsdC7INC606nRgNGB0LXRgtC60ZbRiNGC0LXRgCDQttCw0LnQu9Cw0L8g0LbQvtKT0LDRgNGL0LvQsNC50LTRiywg0LzRi9GB0LDQu9GLIDEtNSDQttCw0YEg0LDRgNCw0LvRi9KT0YvQvdC00LAgMTAwMi0xMDE1LCA2LTEyINC20LDRgSAxMDEyLTEwMjAsIDEyINC20LDRgdGC0LDQvSDQsNGA0Ysg0pvQsNGA0LDQuSAxMDE1LTEwMjUuINCe0YHRi9C90LTQsNC5INCw0L3QsNGC0L7QvNC+INGE0LjQt9C40L7Qu9C+0LPQuNGP0LvRi9KbINC10YDQtdC60YjQtdC70ZbQutGC0LXRgCDQsdKx0Lsg0LHQsNC70LDQvdGL0qMg0LbQuNGWINC305nRgCDRiNGL0pPQsNGA0YPRi9C9INGC0q/RgdGW0L3QtNGW0YDQtdC00ZYu0JHQsNC70LAg06nRgdC60LXQvSDRgdCw0LnRi9C9INCx0ZbRgNGC0LUg0LHRltGA0YLQtSDQt9OZ0YAg0YjRi9KT0LDRgNGDINC20LjRltC70ZbQs9GWINOp0LfQtNGW0LPQtdC90LXQvSDQsNC30LDRj9C00YssIDItMyDQttCw0YHRgtCw0pPRiyDQsdCw0LvQsNC70LDRgCDQutOp0L3RltC90LUgNy04LCDQsNC7INC80LXQutGC0LXQvyDQttCw0YHRi9C90LTQsNKT0Ysg0LHQsNC70LDQu9Cw0YAgNS02INGA0LXRgiDQt9OZ0YAg0YjRi9KT0LDRgNCw0LTRiy4g0J3QtdGB0LXQv9GC0LUg0LbTmdC90LUg0LHQsNGB0pvQsCDQvNKv0YjQtdC70LXRgNC00LUg0LXRiNKb0LDQvdC00LDQuSDQv9Cw0YLQvtC70L7Qs9C40Y8g0LDQvdGL0pvRgtCw0LvQvNCw0pPQsNC90LTRi9Kb0YLQsNC9INCw0L3QsNGB0YvQvdCw0L0g0YPQsNC50YvQvNC00LDQvNCw0YPQtNGLINGB0rHRgNCw0L8s0pvQsNC70YvQv9GC0Ysg0LbQsNKT0LTQsNC5INC10LrQtdC90ZbQvSDRgtKv0YHRltC90LTRltGA0YPRltC80ZbQtyDQutC10YDQtdC6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2" table:style-name="ce1">
            <text:p>1066942</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kgMyDQttCw0YHQsNGAINCx0LDQu9Cw0LTQsCDRgtGW0Log0ZbRiNC10LrQtdCz0ZYg0LXRgNC10YHQtdC60YLQtdGA0LTQtdC9INKb0LDRgNCw0pPQsNC90LTQsCDQsNC90LDRgtC+0LzQvi3RhNC40LfQuNC+0LvQvtCz0LjQu9GP0LvRi9KbINC10YDQtdC60YjQtdC70LXQvdC10LTRliDRgdC10LHQtdCx0ZYg0YLRltC6INGW0YjQtdC60YLRltKjINC/0YDQvtC70LDQv9GB0YvQvdGL0qMg0LrQtdC30ZbQvdC00LUgINC+0Lsg0LbQsNC80LHQsNGBINKb0LDQsdCw0YLRi9C90YvSoyDQsdKx0LvRiNGL0pvQtdGC0ZbQvdGW0qMg05nQu9GB0ZbQt9C00ZbQs9GWINCx0L7Qu9GL0L8g0YHQsNC90LDQu9Cw0LTRiyDQttOZ0L3QtSAg0LHSsdC7INGC0ZbQuiDRltGI0LXQutGC0ZbSoyDRhNGD0L3QutGG0LjRj9GB0YvQvdGL0qMg0LHSsdC30YvQu9GD0YvQvNC10L0g0LbSr9GA0LXQtNGWIC4g0KLQsNKT0Ysg0LXRgNC10LrRiNC10LvRltC60YLQtdGA0ZbQvdC1INC20LDRgtKb0YvQt9GB0LDSmyDQvtC7INCw0L3QsNC70YzQtNGLINC60LDQvdCw0LvQvNC10L0g0YLRltC6INGW0YjRltC60YLRltKjINKv0LvQutC10L0g0LDQvNC/0YPQu9Cw0YHRiyDQsdC+0LvRi9C/INGB0LDQvdCw0LvQsNC00Ysg0LbTmdC90LUg0YLQsNKT0Ysg05nRgdC10YAg0LXRgtGD0YjRliDRhNCw0LrRgtC+0YAg0LHQvtC70YvQvyDQvtC7INGW0Ygg0pvQsNGC0YMg0LzQtdC9INC00LjQsNGA0LXRjyDRgtGW0Log0ZbRiNC10LrRgtGW0qMg0L/RgNC+0LvQsNC/0YHRi9C90YvSoyDQtNCw0LzRg9GL0L3QsCDRi9Kb0L/QsNC7INC10YLRg9GWINC80q/QvNC60ZbQvSDQttOZ0L3QtSDRgtGW0Log0ZbRiNC10LrRgtGW0qMg06nQt9GW0L3RltKjINGI0YvRgNGL0YjRgtGLINKb0LDQsdCw0YLRi9C90LTQsNKT0Ysg0LXRgNC10LrRiNC10LvRltC60YLQtdGA0ZbQvSDQsNC50YLQsCDQsNC70LDQvNGL0LcuINCw0L3QsNC70Ywg0YLQtdGB0ZbQs9GWINKb0YvRgdKb0LAg0LHQvtC70pPQsNC9INGB0L7SoyDQttOZ0L3QtSAzINC20LDRgdCw0YAg0LHQsNC70LDQvdGL0qMg0LjQvNGD0L3QuNGC0LXRgtGW0qMg0LTQsNC80YPRiyDQsdCw0YDRi9GB0YvQvdC00LAg0LXQutC10L3RltKjINC20LDRgtKb0YvQt9CwINCw0LvQsNC80YvQtywg0Y/Sk9C90Lgg0LHQsNC70LAgMy00INC60q/QvdC00LXRgNGWINGC0ZbQuiDRltGI0LXQutGC0LXQvSDQsNGD0YvQt9C00LDQvSDQttOZ0L3QtSDRgtCw0pPRiyDQtNCwINCx0LDRgdKb0LAg0LbQtdGA0LvQtdGA0LTQtdC9INC80LjQutGA0L7RhNC70L7RgNCw0L3Ri9KjINC20LDQudC70LDRg9GLINCx0L7Qu9Cw0LTRiyDQsdGW0YDQsNKbINCx0rHQuyDQttCw0pPQtNCw0LnQtNCwINC+0L3RiyDQttCw0YLSm9GL0LfQsCDQsNC70LzQsNC50LzRi9C3LiDSmtC+0YDRgtGL0L3QtNGL0LvQsNC5INC60LXQu9C1INC005nRgNGW0LPQtdGALdGF0LjRgNGD0YDQs9GC0ZbSoyDQvtC90LTQsNC5INC00LjQsNCz0L3QvtC30Ysg0LHQsNC70LDQvdGL0qMg0LDQvdCw0YLQvtC80L4t0YTQuNC30LjQvtC70L7Qs9C40Y/Qu9GL0psg0LXRgNC10LrRiNC10LvRltC60YLQtdGA0ZbQvSDSm9Cw0YDQsNC/INC00rHRgNGL0YEg0pvQvtC50pPQsNC9LjxiciAvPg0KPGJyIC8+DQoyKSAxINCw0LnQu9GL0psg0LHQsNC70LAg0LfTmdGAINGI0YvSk9Cw0YDRgyDQttKv0LnQtdGB0ZYg0LXQvdC00ZYg0LTQsNC80YPQtNGL0qMg05nRgdC10YDRltC90LXQvSDQvtC70LDRgNC00LAg0LfTmdGAINGI0YvSk9Cw0YDRgyDQttC40ZYg0LHQvtC70LDQtNGLINC60q/QvdGW0L3QtSAxNS0yMCDRgNC10YIuINCe0L3Ri9KjINGB0LXQsdC10LHRliDQsdCw0LvQsNC70LDRgNC00Ysg0LXRgNC10YHQtdC60YLQtdGA0LPQtSDSm9Cw0YDQsNKT0LDQvdC00LAg0pvRg9GL0psg0LrRltGI0LrQtdC90YLQsNC5INCx0L7Qu9Cw0LTRiyDQttOZ0L3QtSDRgtC10Lcg0YLQvtC70LDQtNGLINGB0L7QvdGL0qMg05nRgdC10YDRltC90LXQvSDQvtC70LDRgCDQtdGA0ZbQutGB0ZbQtyDQutGW0YjRliDQtNOZ0YDQtdGC0LrQtSDQsdCw0YDQsNC00Ysg0LbTmdC90LUg0LDQvdCw0LvQuNC30pPQsCDRgdKv0LnRltC90YHQtdC6INCx0LDQu9Cw0LTQsCDQsdKv0LnRgNC10LrRgtC1INCx0rHQt9GL0LvRi9GBINC20L7SmyDRj9KT0L3QuCDQsdKx0Lsg0LDQvdCw0YLQvtC80L4t0YTQuNC30LjQvtC70L7Qs9C40Y/Qu9GL0psg0L/RgNC+0YbQtdGB0YEg0LHQvtC70YvQvyDRgdCw0L3QsNC70LDQtNGLLiDQkdCw0LvQsNC70LDRgNC00Ysg0YLQsNKT0YvQtNCwINCw0L3QsNGC0L7QvNC+LdGE0LjQt9C40L7Qu9C+0LPQuNGP0LvRi9KbINC10YDQtdC60YjQtdC70ZbQutGC0LXRgNGW0L3QtSDQutC10LvRgdC10Log0L7QuyDQsdKv0LnRgNC10LrRgtGW0L0g0YLRg9GL0LvSk9Cw0L3QtNCwINGB0LDQu9GL0YHRgtGL0YDQvNCw0LvRiyDSr9C70LrQtdC9INCx0L7Qu9GD0Ysg0LHQvtC70YvQvyDRgdCw0L3QsNC70LDQtNGLINC205nQvdC1ICA0INCx0LXQuyDQvtC80YvRgNGC0pvQsNGB0YvQvdCwINC20LXRgtGD0ZYg0LzSr9C80LrRltC9LiDQkdCw0LvQsNC90YvSoyDQsNC90LAg0YHSr9GC0ZbQvSDRltGI0YPRltC90LUg0L3QtdC80LXRgdC1INGC0LDQvNCw0psg0LbQtdGD0LTRltKjINC806nQu9GI0LXRgNGW0L3QtSDQttOZ0L3QtSDRgNC10YLRltC90LUg0LbTmdC90LUg0YLQsNKT0YvQtNCwINCx0LDRgdKb0LAg0LTQsCDQsdGW0YAg05nRgdC10YDQs9C1INCx0LDQudC70LDQvdGL0YHRgtGLINC305nRgCDRiNGL0pPQsNGA0YMg0LbQuNGW0LvRg9GWINC606nQvyDQvdC10LzQtdGB0LUg0LDQt9Cw0Y7RiyDQsdC+0LvRg9GLINC80q/QvNC60ZbQvS4gIDEgINCw0LnQu9GL0psg0LHQsNC70LAgMTUg0YDQtdGCINC305nRgCDRiNGL0pPQsNGA0LAg0LDQu9Cw0LTRiywg0LbTmdC90LUg0LHQsNC70LAg06nRgdC60LXQvSDRgdCw0LnRi9C9INKb0YPRi9Kb0YLRi9C9INGB0YvQudGL0LzQtNGL0LvRi9KT0Ysg0LDRgNGC0LDQtNGLINGP0pPQvdC4INCx0ZbRgCDQsNC50LvRi9KbINCx0LDQu9Cw0LTQsCDQttC40ZYg0LfTmdGAINGI0YvSk9Cw0YDRgyDSr9C00LXRgNGW0YHRliDSm9Cw0LvRi9C/0YLRiyDQv9GA0L7RhtGG0LXRgSDQsdC+0LvRi9C/INGB0LDQvdCw0LvQsNC00Ysu0J7Qu9Cw0YDQtNGL0qMg0L3QtdGB0LXQvyDRiNGL0pPQsNGA0YMg0YLSr9GC0ZbQs9GW0L3RltKjINOZ0LvRgdGW0LfQtNGW0LPRltC9INC80LXQvSDSm9GL0YHSm9CwINCx0L7Qu9GD0YvQvSDRgtCw0pPRiyDQtNCwINCx0ZbRgCDQtdGA0LXQutGI0LXQu9GW0LrRgtC10YDRltC90LUg0LbQsNGC0pvRi9C30LDQvNGL0LcuINKa0L7RgNGC0YvQvdC00YvQu9Cw0YMg0LrQtdC70YHQtdC6IDEg0LDQudC70YvSmyDQsdCw0LvQsNC90YvSoyDQttC40ZYg0LbTmdC90LUg0LXRgNC60ZbQvdGB0ZbQtyDQt9OZ0YAg0YjRi9KT0LDRgNGD0Ysg0L7QuyDQsNC90LDRgtC+0LzQvi3RhNC40LfQuNC+0LvQvtCz0LjRj9C70YvSmyDQtdGA0LXQutGI0LXQu9GW0LrRgtC10YDRltC90LUg0LbTmdC90LUg0LHQsNC70LDQvdGL0qMg0YLQsNC80LDSm9GC0LDQvdGD0YvQvdCwINCx0LDQudC70LDQvdGL0YHRgtCwINC305nRgCDRiNGL0pPQsNGA0YMg0LbQuNGW0LvRltCz0ZYg0LrTqdC/INCx0L7Qu9GD0YvQvSDQsdCw0LnSm9Cw0LnQvNGL0Lc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5" table:style-name="ce1">
            <text:p>1066955</text:p>
          </table:table-cell>
          <table:table-cell office:value-type="string" table:style-name="ce1">
            <text:p>kazakh</text:p>
          </table:table-cell>
          <table:table-cell office:value-type="string" table:style-name="ce1">
            <text:p>Билет 30.&amp;lt;br /&amp;gt; 1.3-жасар баланың ата-анасы дефекациядан соң анус айналасында өзгеріс пайда болғаның байқаған. Дәрігер-хирург тік ішек айналмасы диагнозың қойған. Осы патологияны туындататын тік ішектің анатомиялық ерекшелігін атаңыз.&amp;lt;br /&amp;gt; 2.Педиатрға 1 айлық бала қаралды, анасынын шағымдары бала жиі несеп шығарады, қарағанда патология анықталмаған, жалпы несеп анализынде патологиялық өзгерістер жоқ. Осы жастағы балаларда несеп шығару жиілігі қандай анатомо-физиологиялық ерекшіліктерімен байланысты?&amp;lt;br /&amp;gt; &amp;lt;br /&amp;gt;</text:p>
          </table:table-cell>
          <table:table-cell office:value-type="string" table:style-name="ce1">
            <text:p>MS3QttCw0pPQtNCw0Y/RgtGC0YvSmyDQtdGB0LXQv9GC0ZbSoyDQsdC10YDRltC70LPQtdC90ZY6IDMg0LZhY2HRgCDQsdCw0LvQsC4g0Khh0pPRi9C80Ys6INC00LXRhNC10LrQsNGG0LjRj9C00LDQvSjQvdOZ0LbRltGBLCDSr9C70LrQtdC9INC005nRgNC10YIpINC60LXQuWnQvSDQsNC90YPRgSDQsNC50L3QsNC70LDRgdGL0L3QtNCw0pPRiyDTqdC30LPQtXDRltGBLiDQlNC40LDQs9C90L7Qt9GLOiDRgtGW0Log0ZbRiNC10Log0LDQudC90LDQu9C80LDRgdGLLiDQotGW0Log0ZbRiNC10Log0LDQudC90LDQu9C80LDRgdGLICjQv9GA0L7Qu9Cw0L/RgdGLKSDQtNC10LPQtdC90ZbQvNGW0LctINGCadC6IGnRiNC10Log0YjRi9GA0YvRiNGC0Ysg0pvQsNCx0YvSk9GL0L3Ri9KjINCw0YDRgtKb0Ysg0LDQvdCw0LvRjCDRgtC10YFp0LPRliDQsNGA0pvRi9C70Ysg0YHRi9GA0YLSm9CwINGI0YvSk9GL0L8g0YLSsdGA0YPRiy4g0JDRgtCw0LvSk9Cw0L0g0LTQuNCw0LPQvdC+0Lcg0LrTqdCx0ZbQvdC1INCx0LDQu9Cw0LvQsNGAINC00LDQvNGD0YvQvdGL0qMg0LbQsNGB0YLRi9KbINC205nQvdC1INGCadC6INGW0YjQtdC60YLRltKjINCw0L3QsNGC0L7QvNC40Y/Qu9GL0psg0LXRgNC10LrRiNC10LvRltC60YLQtdGA0ZbQvdC1INCx0LDQudC70LDQvdGL0YHRgtGLINGC0YPRi9C90LTQsNC50LTRiy4g0JbQsNC70L/Riywg0LbQsNC80LHQsNGBINCw0YHRgtGLINCx0rHQu9GI0YvSm9C10YLRgtC1cNGWLCDQsdCw0LnQu9Cw0Lwg0LDQv9C/0LBw0LDRgtGC0LDRgNGLINOp0Lcg0LrQtdC30LXQs9GW0L3QtNC1INGW0YjQumkg0LzSr9GI0LXQu9C1cNCz0LUg0YLRltGA0LXRgyDQttCw0YHRgtGL0pvRiNCw0YHRiywg0YLRltGA0LXRg9GI0ZYg0pvRi9C30LzQtdGC0ZbQvSDQsNGC0pvQsNGA0LDRgtGL0L0uIEHQuyDQsdKx0Lsg0LbQsNGB0YJh0pPRiyDQsdCw0LvQsNC70LDRgNC00LAg0LZh0LzQsdCw0YEg0LDRgdGC0Ysg0LHSsdC70YjRi9Kb0LXRgtGC0LXRgGkg05nQu9GBadC3INCx0L7Qu9GL0L8g0LrQtdC70LXQtGkuINCh0L7QvdC00YvSm9GC0LDQvSwg0YJp0Log0ZbRiNC10LrRgtGWaSDRgmnRgNC10L8g0YLSsdGA0pPQsNC9INCx0rHQu9GI0YvSm9C10YLRgtC1cNGWINOZ0LvRgdGWcNC10LPQtdC90LTRltC60YLQtdC9LCDQvtC90YvSoyDTqdC3INC+0YDQvdGL0L3QsNC9INC20YvQu9C20YvQvywg0LDRgNGC0pvRiyDQvdOZ0LbRltGBINGI0YvSk9Cw0YDRgyDTqdC30LXQs9GW0L3QtdC9INGI0YvSk9GL0L8g0YLSsXDRg9GLINCx0LDQudKb0LDQu9Cw0LTRiy4g0KHQvtC90LTQsNC5LdCw0pssINCw0L3QsNC70YzQtNGLINGC0LXRgdGW0Log0LrQsNC90LDQu9GL0L3Ri9KjINGB0YTQuNC90LrRgtC10YDRliDTmdC70YHRltC3INCx0L7Qu9GD0Ysg0LbTmdC90LUg0YLRltC6IGnRiNC10Log0LDQvNC/0YPQu9Cw0YHRi9C90YvSoyDSr9C70LrQtdC90ZbRgNC10Log0LHQvtC70YPRi9C90LAg05nQutC10LvQtdC00ZYuINCiadC6INGW0YjQtdC6INGI0YvRgNGL0YjRgtGLINKb0LDQsdCw0YLRiyDQvNC10L0g0LHSsdC70YjRi9Kb0LXRgiDSm9Cw0LHQsNGC0Ysg0LDRgNCw0YHRi9C90LTQsNKT0Ysg0LHQvnDQv9GL0LvQtNCw0psg0YLRltC9INC606nQvyDQsdC+0LvRg9GLINC00LAg05nRgdC10YAg0LXRgtC10LTRli4g0JTQtdCz0LXQvdC80LXQvSwg0LHQsNC70LDQtNCw0pPRiyDRltGIINKb0LDRgtGDLCBp0Ygg06nRgtGDaSAo0LTQuNCw0YDQtdGPKSDRgdC10LrRltC70LTRliDQttCw0pPQtNCw0LnQu9Cw0YDQtNGL0qMg0LrTqdC/0YLQtdC/INC+0YDRi9C9INCw0LvRg9GLINC00LAg0YLRltC6IGnRiNC10Log0LDQudC90LDQu9C80LDRgdGL0L0g0LTQsNC80YvRgtGDINGE0LDQutGC0L7RgNGLINCx0L7Qu9CwINCw0LvQsNGC0YvQvdC00YvSk9GL0L0g0LDQudGC0LAg0LrQtdGC0LrQtdC9INC206nQvSDQtNC10L8g0L7QudC70LDQudC80YvQvS4g0KHQvtC90LTRi9Kb0YLQsNC9LCDQsNGC0LAt0LDQvdCw0YHRi9C90LDQvSDQvtC7INGC0YPRgNCw0LvRiyDQtNCwINKb0L7RgdGL0LzRiNCwINGB0rHRgNCw0YHRgtGL0YDRi9C/INCx0ZbQu9GDINC60LXRgNC10Log0YHQtdC60ZbQu9C00ZYuIDxiciAvPg0KMi3QttCw0pPQtNCw0Y/RgtGC0YvSmyDQtdGB0LXQv9GC0ZbSoyDQsdC10YDRltC70LPQtdC90ZY6IDEg0LDQudC70YvSmyDQsdCw0LvQsC4g0KjQsNKT0YvQvNGLOiDQttC4aSDQvdC10YHQtdC/INGI0YvSk9Cw0YDRg9GLLCDQsdGW0YDQsNKbINCw0L3QsNC70LjQtyDQutOp0YDRgdC10YLQutGW0YjRgtC10YDRltC90LTQtSDQv9Cw0YLQvtC70L7Qs9C40Y8g0LDQvdGL0pvRgtCw0LvQvNCw0pPQsNC9LiDQkdCw0LvQsNC90YvSoyDQt9OZ0YDQtNGWINGI0YvSk9Cw0YDRg9GL0L3Ri9KjINC20Lhp0LvRltCzaSDQv9Cw0YLQvtC70L7Qs9C40Y/Qu9GL0psg06nQt9Cz0LXRgNGW0YHRgtC10YDQvNC10L0g0LXQvNC10YEsINC20LDRgdGC0YvSmyDQttOZ0L3QtSDQsNC90LDRgtC+0LzQvi3RhNC40LfQuNC+0LvQvtCz0LjRj9C70YvSmyDQtdGA0LXQutGI0LXQu9GW0LrRgtC10YBp0L3QtSDQttOZ0L3QtSDQsWnRgNC90LXRiNC1INGE0LDQutGC0L5w0LvQsNGA0pNhINCx0LDQudC7YdC90YvRgdGC0Ysg0LHQvtC70YPRiyDQvNKv0LzQumnQvS4g0JzRi9GB0LDQu9GLLCAxINCw0LnQu9GL0psg0LbQsNKj0LAg0YLRg9KT0LDQvSDQsdCw0LvQsCDRgtC10Log0LDQvdCwINGB0q/RgtGW0LzQtdC9INKb0L5w0LXQutGC0LXQvdC10YLRltC90LTRltC60YLQtdC9LCDQsNC90LDRgdGL0L3Ri9KjINCx0LDQu9Cw0L3RiyDQtdC80ZbQt9GDINGD0LDSm9GL0YLRiyDQvNC10L0g0LbQuNGW0LvRltCzadC90LUg0LTQtSDQsdCw0LnQu9Cw0L3Ri9GB0YLRiyDQsdC+0LvRg9GLINC80q/QvNC60ZbQvS4g0J5wcNGC0LAg0LXRgdC10L/Qv9C10L0g0LDQu9KT0LDQvdC00LAsIDEg0LDQudC70YvSmyDQvdOZcNC10YHRgtC1INC60q/QvdGW0L3QtSAxNS0xNyBw0LXRgtC60LUg0LTQtdC50ZbQvdCz0ZYg0LbQuGnQu2nQutGC0LUg0LfTmXAg0YjRi9KT0LBw0YPRiyDQvNKv0LzQutGW0L0uINCQ0L3QsNGC0L7QvNC40Y/Qu9GL0psg0YLSsdGA0pPRi9C00LDQvSDQvtC70LDRgNC00YvSoyDSm9GD0YvSk9GL0L3Ri9KjINGB0YvQudGL0LzQtNGL0LvRi9KT0Ysg0YHQsNC70YvRgdGC0YvRgNC8YdC70Ysg0YLSr9GA0LTQtSDQsNC3LCDQsNC7INCx0q/QudGAZdC60YLQtXDRliDQtNC1INC00LXQvdC1IGNh0LvQvNCw0pPRi9C90LAg0LFh0LnQu9Cw0L3Ri9GB0YLRiyDQt9OZcNC00ZbSoyDQutOp0L8g0LzTqdC70YjQtdGA0ZbQvSDRgtKv0LfRltC/INC+0YLRi9GA0LDQtNGLLCDRgdC10LHQtdCx0ZYg0L7QvdGL0qMg0LrQvtC90YbQtdC90YJw0LDRhtC40Y/Qu9GL0psg0pvQsNCx0ZbQu9C10YLRliDRgtKv0LfRltC70LzQtdCz0LXQvdC00ZbQutGC0LXQvSDRgdKx0LnRi9KbINC60q/QudC00LUg0LHQvtC70LDQtNGLLiDQntGB0Ysg0LXRgNC10LrRiNC10LvRltC60YLQtdGA0ZYg0LHQsNC70LAg0LZhYyDSm29j0pth0L0gY2HQudGL0L0g0pvRg9GL0psg0YHRi9C50YvQvNC00YvQu9GL0pPRiyDQsNGA0YLRg9GL0L3QsCDQsdCw0LnQu9Cw0L3Ri9GB0YLRiyDQsNC30LDRj9C00YsuINCh0L7QuyDRgdC10LHQtdC/0YLRliDQt9OZ0YDQtNGWINC30LXRgNGC0YLQtdGDINCw0L3QsNC70LjQt9C00LXRgNGW0L3QtNC1INC/0LDRgtC+0LvQvtCz0LjRjyDQsNC90YvSm9GC0LDQu9C80LDSk9Cw0L0g0LHQvtC7Y2EsINCw0YLQsC3QsNC90LDRgdGLINC305nRgCDRiNGL0pPQsNGA0YMg0LbQuNGW0LvRltCz0ZbQvdGW0qMg0YHQsNC90YvQvdCwINC805nQvSDQsdC10YDRgyDQutC1cNC1aywg0LXQs9C1cCAxNS0yMCBw0LXRgtGC0ZbQuiDQttC40ZbQu2nQutGC0LXQvSDQsNGB0L/QsNGB0LAsIDEg0LDQudC70YvSmyDQsdCw0LvQsNC90YvSoyDQt9OZcCDRiNGL0pPQsHDRg9GL0L3Ri9KjINC20LjRliDQsdC+0LvRg9GLINCx0LDQu9Cw0LvQsHDQtNGL0qMg0pvQsNC70YvQv9GC0Ysg0YTQuNC30LjQvtC70L7Qs9C40Y/Qu9GL0psg0L/RgNC+0YbQtdGB0ZYg0LHQvtC70YvQvyDRgdCw0L3QsNC7YdC00YsuINCdYdC3YXDRi9Kj0YvQt9KT0LAgcGHSm9C80LXRgiEgIA==</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1" table:style-name="ce1">
            <text:p>915351</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MS4g0LIg0YDQsNC90L3QtdC8INCy0L7Qt9GA0LDRgdGC0LUg0YMg0LTQtdGC0LXQuSDQv9GA0Y/QvNCw0Y8g0LrQuNGI0LrQsCDRgyDQuNC80LXQtdGCINGG0LjQu9C40L3QtNGA0LjRh9C10YHQutGD0Y4g0YTQvtGA0LzRgyDQuCDQvdC1INC40LzQtdC10YIg0YfQtdGC0LrQuNGFINC40LfQs9C40LHQvtCyLCDQtdC1INC/0LvQvtGJ0LDQtNGMINCyINC+0YHQvdC+0LLQvdC+0Lwg0L/QvtC70L3QvtGC0YzRjiDQt9Cw0L/QvtC70L3Rj9C10YIg0YLQsNC3LCDRgtCw0Log0LbQtSDQv9GA0Y/QvNCw0Y8g0LrQuNGI0LrQsCDRgyDQtNC10YLQtdC5INC90LUg0LjQvNC10LXRgiDQsNC80L/Rg9C70YssINCyINC00LDQsNC90L7QvCDRgdC70YPRh9Cw0LUg0LrQsNC6INGPINGB0YfQuNGC0LDRjiDQtdC1INCy0YvQv9Cw0LTQtdC90LjQtSDQvNC+0LbQtdGCINCx0YvRgtGMINGB0LvQtdC00YHRgtCy0LjQtdC8INC/0LvQvtGF0L7QuSDRhNC40LrRgdCw0YbQuNC4INC4INC90LUg0LTQviDQutC+0L3RhtCwINGA0LDQt9Cy0LjRgtC+0Lkg0LzRi9GI0LXRh9C90L7QuSDRgdC40YHRgtC10LzRiyDRgtCw0Log0LbQtSDRhdC+0YDQvtGI0L4g0YDQsNC30LLQuNGC0L7QuSDQv9C+0LTRgdC70LjQt9C40YHRgtC+0Lkg0L7QsdC+0LvQvtGH0LrQuCDQuCDQvdC10LTQvtGB0YLQsNGC0L7Rh9C90L4g0YDQsNC30LLQuNGC0L7Qs9C+INGB0YTQuNC90LrRgtC10YDQsC4g0YLQsNC6INC20LUg0L/RgNC40YfQuNC90L7QuSDQvNC+0LbQtdGCINGP0LLQu9GP0LXRgtGB0Y8g0L7RgtC70LjRh9Cw0Y7RidC40LXRgdGPINC+0YIg0LLQt9GA0L7RgdC70YvRhSAg0LrRgNC10YHRgtC10YYg0YIu0LUuINC10LPQviDQs9C+0YDQuNC30L7QvdGC0LDQu9GM0L3QvtC1INGA0LDRgdC/0L7Qu9C+0LbQtdC90LjQtSwg0YLQsNC6INC20LUg0L/RgNGP0LzQsNGPINC60LjRiNC60LAg0YMg0LTQtdGC0LXQuSDQuNC80LXQtdGCINC+0YLQvdC+0YHQuNGC0LXQu9GM0L3QviDQtNC70LjQvdC90YvQtSDRgNCw0LfQvNC10YDRiy4g0Log0YLQsNC60L7QvNGDINC80L7QttC10YIg0L/RgNC40LLQtdGB0YLQuCDQs9C10LvRjNC80LjQvdGC0L7Qty4gICAyLiDQvNC+0YfRgtC+0YfQvdC40Log0YMg0LTQtdGC0LXQuSDRgNCw0L3QvdC10LPQviDQstC+0LfRgNCw0YHRgtCwINC+0YLQvdC+0YHQuNGC0LXQu9GM0L3QviDRiNC40YDQtSDRh9C10Lwg0YMg0LLQt9GA0L7RgdC70YvRhS4g0YHRgtC10L3QutC4INC80L7Rh9C10YLQvtGH0L3QuNC60L7QsiDRgdC90LDQsdC20LXQvdGLINC/0LvQvtGF0L4g0YHRhNC+0YDQvNC40YDQvtCy0LDQvdGL0LzQuCDQvNGL0YjQtdGH0L3Ri9C80Lgg0Lgg0Y3Qu9Cw0YHRgtC40YfQtdGB0LrQuNC80Lgg0LLQvtC70L7QutCw0L3QsNC80LguINC+0LTQvdCw0LrQviDQvNC+0YfQtdGC0L7Rh9C90LjQutC4INGDINC00LXRgtC10Lkg0LjQvNC10LXRgiDQvtGC0L3QvtGB0LjRgtC10LvRjNC90L4g0LzQvdC+0LPQviDQuNC30LPQuNCx0L7Qsi4g0LIg0YHRgNC10LTQvdC10Lwg0YLQvtC70YnQuNC90LAg0LXQs9C+INC80L7QtNC10YIg0YHQvtGB0YLQvtCy0LvRj9GC0Ywg0L7RgiAwLjIg0LTQviAwLjQg0YHQvC4g0LTQu9C40L3QsCDQvNC+0YfQtdC40YHQv9GD0YHQutCw0YLQtdC70L3QvtCz0L4g0LrQsNC90LDQu9CwINGDINC80LDQu9GM0YfQuNC60L7QsiDQuCDQtNC10LLQvtGH0LXQuiDRgNCw0LfQvdCw0Y8g0L3QviDRgyDQtNC10LLQvtGH0LXQuiDQvtC9INGI0LjRgNC1LiDQv9C+0YfQutC4INGDINC00LXRgtC10Lkg0LjQvNC10Y7RgiDQvdC40LfQutGD0Y4g0YTQuNC70YzRgtGA0LDRhtC40L7QvdC90YPRjiDRhNGD0L3QutGG0LjRjiwg0L3QuNC30LrQuNC8INCz0LjQtNGA0L7RgdGC0LDRgtC40YfQtdGB0LrQuNC8INC00LDQstC70LXQvdC40LXQvCDQuCDQvdC10LfRgNC10LvQvtGB0YLRjNGOINCz0LjRgdGC0L7Qu9C+0LPQuNGH0LXRgdC60L7QuSDRgdGC0YDRg9C60YLRg9GA0YsuINC60LvRjtCx0L7Rh9C60L7QstCw0Y8g0YTQuNC70YzRgtGA0LDRhtC40Y8g0YMg0L3QvtCy0L7RgNC+0LbQtNC10L3QvdGL0YUg0YHQvtGB0YLQvtCy0LvRj9C10YIgMjAtMzAg0LzQuy/QvNC40L0uINCyINC/0LXRgNCy0YvQtSAyLTMg0LTQvdGPINGDINGA0LXQsdC10L3QutCwINGB0LvRg9GH0LDQtdGC0YHRjyDQvtC70LjQs9GD0YDQuNGPLiDQutC+0LvQuNGH0LXRgdGC0LLQviDQvNC+0YfQtdC40YHQv9GD0YHQutCw0L3QuNGPINGDINC00LXRgtC10Lkg0YHQvtGB0YLQvtCy0LvRj9C10YIgMjAtMjUg0LIg0LTQtdC90YwuINGH0LDRgdGC0L4g0YMg0LTQtdGC0LXQuSDRgNCw0L3QvdC10LPQviDQstC+0LfRgNCw0YHRgtCwINC/0YDQuNGH0LjQvdC+0Lkg0YfQsNGB0YLQvtCz0L4g0LzQvtGH0LXQuNGB0L/Rg9GB0LrQsNC90LjRjyDQvNC+0LbQtdGCINGP0LLQu9GP0YLRgdGPINC90LXQt9GA0LXQu9C+0YHRgtGMINC80L7Rh9C10LLQvtCz0L4g0L/Rg9C30YvRgNGPLCDQtdCz0L4g0YDQsNC30LzQtdGAINGDINC00LXRgtC10Lkg0LPQsNGA0LDQt9C00L4g0LzQtdC90YzRiNC1INC4INC10LPQviDRgdGC0LXQvdC60Lgg0LjQvNC10LXRjtGCINC/0L7QstGL0YjQtdC90L3Rg9GOINGH0YPQstGB0YLQstC40YLQtdC70YzQvdC+0YHRjCDQuiDRgNCw0YHRgtGP0LbQuNC80L7RgdGC0LgsINGH0YLQviDQv9GA0LjQstC+0LTQuNGCINC6INGH0LDRgdGC0L7QvNGDINC80L7Rh9C10LjRgdC/0YPRgdC60LDQvdC40Y4uINCz0LjQv9C10YDQsNC60YLQuNCy0L3QvtGB0YLRjCDQtNC40YHRgtGA0YPRgdC+0YDQsC4g0LrQsNC6INGPINC00YPQvNCw0Y4g0LzQsNC80LAg0YDQtdCx0LXQvdC60LAg0L/RgNC+0YHRgtC+INGA0LDQt9C90LXRgNCy0L3QuNGH0LDQu9Cw0YHRjCDQuCDRgNC10LHQtdC90L7QuiDQsiDQtNC10LnRgdGC0LLQuNGC0LXQu9GM0L3QvtGB0YLQuCDQuNC80LXQtdGCINC90L7RgNC80YMg0LzQvtGH0LXQuNGB0L/Rg9GB0LrQsNC90LjRjyDQsiDQtNC10L3RjCwg0L3QviDQuNC3INC30LAg0L3QtSDQt9C90LDQvdC40Y8g0LXQs9C+INCQ0KTQniDQvtC90LAg0LzQvtCz0LvQsCDRg9Cy0LjQtNC10YLRjCDQsiDRjdGC0L7QvCDQv9Cw0YLQvtC70L7Qs9C40Y4uINCy0YvRgdC+0LrQsNGPINCz0LjQtNGA0L7RgtCw0YbQuNGPINGC0L7QttC1INC80L7QttC10YIg0Y/QstC70Y/RgtGB0Y8g0L/RgNC40YfQuNC90L7QuSDQuiDRh9Cw0YHRgtC+0LzRgyDQvNC+0YfQtdC40YHQv9GD0YHQutCw0L3QuNGOLCDQvdC10LfRgNC10LvQvtGB0YLRjCDQvdC10YDQstC90L7QuSDRgNC10LPRg9C70Y/RhtC40LgsINGC0LDQuiDQutCw0Log0L7QvdCwINC+0LHRi9GH0L3QviDRgNCw0LfQstC40LLQsNC10YLRgdGPINC/0L4g0LzQtdGA0LUg0LLQt9GA0L7RgdC70LXQvdC40Y8g0YDQtdCx0LXQvdC60LAg0LIg0YDQsNC90L3QtdC8INCy0L7Qt9GA0LDRgdGC0LUg0L7QvSDQsNC90LUg0LjQvNC10LXRgiDQsdC+0LvRjNGI0L7Qs9C+INC60L7QvdGC0YDQvtC70Y8g0LTQuyDRj9GA0LXQs9GD0LvQuNGA0L7QstCw0L3QuNGPINC80L7Rh9C10LjRgdC/0YPRgdC60LDRgtC10LvRjNC90L7Qs9C+INC/0YDQvtGG0LXRgdGB0LAu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94" table:style-name="ce1">
            <text:p>915394</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MS4g0JIg0YDQsNC90L3QtdC8INC00LXRgtGB0LrQvtC8INC/0LXRgNC40L7QtNC1INGB0LjQu9CwINGB0YTQuNC90LrRgtC10YDQvtCyINC90LXQv9C+0LvQvdC+0YbQtdC90L3QsCDQuNC3LdC30LAg0YHQu9Cw0LHQvtCz0L4g0YDQsNC30LLQuNGC0LjRjyDQvNGL0YjQtdGH0L3QvtCz0L4g0YHQu9C+0Y8g0LIg0YHRgNCw0LLQvdC10L3QuNC4INGBINGF0L7RgNC+0YjQviDRgNCw0LfQstC40YLQvtC5INC/0L7QtNGB0LvQuNC30LjRgdGC0L7QuTsg0L3QtSDQuNC80LXQtdGC0YHRjyDQv9C70L7RgtC90L7Qs9C+INC60L7QvdGC0LDQutGC0LAg0LzQtdC20LTRgyDRgdC70LjQt9C40YHRgtC+0Lkg0Lgg0L/QvtC00YHQu9C40LfQuNGB0YLQvtC5INC+0LHQvtC70L7Rh9C60LDQvNC4LiDQotCw0LrQttC1INC40LzQtdC10YLRgdGPINC90LXQtNC+0YDQsNC30LLQuNGC0L7RgdGC0Ywg0LDQvNC/0YPQu9GLINC/0YDRj9C80L7QuSDQutC40YjQutC4LiDQn9C+0LzQuNC80L4g0Y3RgtC+0LPQviDRgyDQtNC10YLQtdC5INGA0LDQvdC90LXQs9C+INCy0L7Qt9GA0LDRgdGC0LAg0YHQu9Cw0LHQviDRgNCw0LfQstC40YIg0YTQuNC60YHQuNGA0YPRjtGJ0LjQuSDQsNC/0L/QsNGA0LDRgiAo0L3QtdC00L7RgNCw0LfQstC40YLQsCDQv9C+0LTQutC+0LbQvdC+LdC20LjRgNC+0LLQsNGPINC60LvQtdGC0YfQsNGC0LrQsCDQuCDQsdGA0YvQttC10LnQutC4INGB0L4g0YHQstGP0LfQutCw0LzQuCksINCyINGB0LvQtdC00YHRgtCy0LjQtSDRh9C10LPQviDQvtGA0LPQsNC90Ysg0L3QtSDQv9GA0LXQutGA0LXQv9C70LXQvdGLINC/0L7Qu9C90L7RgdGC0YzRjiDQuCDQuNC80LXRjtGCINGE0LjQt9C40L7Qu9C+0LPQuNGH0LXRgdC60YPRjiDQv9C+0LTQstC40LbQvdC+0YHRgtGMLiDQoNCw0YHQv9C+0LvQvtC20LXQvdC40LUg0YLQvtC20LUg0LjQs9GA0LDQtdGCINGA0L7Qu9GMOiDQsNC90YPRgSDRgyDQtNC10YLQtdC5INGA0LDRgdC/0L7Qu9C+0LbQtdC9INC00L7RgNGB0LDQu9GM0L3QtdC1LCDRh9C10Lwg0YMg0LLQt9GA0L7RgdC70YvRhSAoMjAg0LzQvCDQvtGCINC60L7Qv9GH0LjQutCwKS4g0JLRgdC1INGN0YLQuCDRhNCw0LrRgtC+0YDRiyDRgdC60LvQsNC00YvQstCw0Y7RgtGB0Y8g0LIg0YHQv9C+0YHQvtCx0YHRgtCy0YPRjtGJ0LjQtSDRg9GB0LvQvtCy0LjRjyDQuiDQstGL0L/QsNC00LXQvdC40Y4g0L/RgNGP0LzQvtC5INC60LjRiNC60LguPGJyIC8+DQoyLiDQnNC+0YfQtdGC0L7Rh9C90LjQutC4INGDINC00LXRgtC10Lkg0LjQvNC10Y7RgiDQvdC10LHQvtC70YzRiNGD0Y4g0LTQu9C40L3Rgywg0LHQvtC70LXQtSDRiNC40YDQvtC60LjQtSwg0LjQt9Cy0LjRgtGL0LUg0Lgg0LPQuNC/0L7RgtC+0L3QuNGH0L3Ri9C1LiDQo9GA0LXRgtGA0LAg0LrQvtGA0L7RgtC60LAgLSAxLTLRgdC8LiDQnNC+0YfQtdCy0L7QuSDQv9GD0LfRi9GA0Ywg0YMg0LTQtdGC0LXQuSDQvdC10LHQvtC70YzRiNC40YUg0YDQsNC30LzQtdGA0L7QsiDQuCDQstC80LXRidCw0LXRgiDQsiDRgdC10LHRjyDQstGB0LXQs9C+IDMwLTUw0LzQuyDQvNC+0YfQuC4g0J/QvtC80LjQvNC+INGN0YLQvtCz0L4g0L7QvSDQuNC80LXQtdGCINC80Y/Qs9C60YPRjiwg0YDRi9GF0LvRg9GOINC60L7QvdGB0LjRgdGC0LXQvdGG0LjRjiDQuCDRgdC70LDQsdGD0Y4g0YHQv9C+0YHQvtCx0L3QvtGB0YLRjCDQuiDRgNCw0YHRgtGP0LbQtdC90LjRjiDQuNC3LdC30LAg0YHQu9Cw0LHQvtCz0L4g0YDQsNC30LLQuNGC0LjRjyDRjdC70LDRgdGC0LjRh9C10YHQutC40YUg0Y3Qu9C10LzQtdC90YLQvtCyINC+0LHQvtC70L7Rh9C60LguINCi0LDQutC20LUg0L/QvtCy0YvRiNC10L3QvdC+0LzRgyDQvNC+0YfQtdCy0YvQtNC10LvQtdC90LjRjiDRgdC/0L7RgdC+0LHRgdGC0LLRg9C10YIg0L/QvtCy0YvRiNC10L3QvdC+0LUg0L7QsdGA0LDQt9C+0LLQsNC90LjQtSDQv9C10YDQstC40YfQvdC+0Lkg0Lgg0LLRgtC+0YDQuNGH0L3QvtC5INC80L7Rh9C4INCyINC/0L7Rh9C60LDRhSDQsiDRgdC70LXQtNGB0YLQstC40Lgg0L/QvtCy0YvRiNC10L3QvdC+0LPQviDQutGA0L7QstC+0L7QsdGA0LDRidC10L3QuNGPINC+0YDQs9Cw0L3QsC4g0JjQty3Qt9CwINC80LDQu9C+0Lkg0LTQu9C40L3RiyDQvNC+0YfQtdGC0L7Rh9C90LjQutC+0LIg0Lgg0YPRgNC10YLRgNGLINC80L7QttC10YIg0YDQsNC30LLQuNGC0YzRgdGPINCy0YLQvtGA0LjRh9C90LDRjyDQuNC90YTQtdC60YbQuNGPINCyINGB0LvQtdC00YHRgtCy0LjQuCDQt9Cw0LHRgNC+0YHQsCDQvNC+0YfQuCDQvtCx0YDQsNGC0L3QviDQsiDQvNC+0YfQtdCy0L7QuSDQv9GD0LfRi9GA0Yw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не полный ответ 2 вопроса.</text:p>
          </table:table-cell>
          <table:table-cell office:value-type="float" office:value="0" table:style-name="ce1">
            <text:p>0</text:p>
          </table:table-cell>
          <table:table-cell table:number-columns-repeated="16376"/>
        </table:table-row>
        <table:table-row table:style-name="ro1">
          <table:table-cell office:value-type="float" office:value="915401" table:style-name="ce1">
            <text:p>915401</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MSkg0JLRi9C/0LDQtNC10L3QuNC1INC/0YDRj9C80L7QuSDQutC40YjQutC4INGDINC00LXRgtC10Lkg0YDQsNC90L3QtdCz0L4g0LLQvtC30YDQsNGB0YLQsCDRj9Cy0LvRj9C10YLRgdGPINC90LUg0YDQtdC00LrQvtC5INC/0LDRgtC+0LvQvtCz0LjQtdC5LCDQutC+0YLQvtGA0LDRjyDRhdCw0YDQsNC60YLQtdGA0LjQt9GD0LXRgtGB0Y8g0L3QsNGA0YPRiNC10L3QuNC10Lwg0LXQtSDQsNC90LDRgtC+0LzQuNGH0LXRgdC60L7Qs9C+INC/0L7Qu9C+0LbQtdC90LjRjyDQuCDRgdC80LXRidC10L3QuNC10Lwg0LXQtSDQtNC40YHRgtCw0LvRjNC90L7QuSDRh9Cw0YHRgtC4INC30LAg0L/RgNC10LTQtdC70Ysg0LDQvdCw0LvRjNC90L7Qs9C+INGB0YTQuNC90LrRgtC10YDQsC4g0KMg0LTQtdGC0LXQuSDQv9C+INGB0YDQsNCy0L3QtdC90LjRjiDRgSDQstC30YDQvtGB0LvRi9C80LgsINC/0YDRj9C80LDRjyDQutC40YjQutCwINGA0LDRgdC/0L7Qu9C+0LbQtdC90LAg0L/QvtGH0YLQuCDQstC10YDRgtC40LrQsNC70YzQvdC+LiDQkNC90LDRgtC+0LzQuNGH0LXRgdC60LjQtSDQvtGB0L7QsdC10L3QvdC+0YHRgtC4INC/0YDQuNCy0L7QtNGP0YnQuNC1INC6INCy0YvQv9Cw0LTQtdC90LjRjiDQv9GA0Y/QvNC+0Lkg0LrQuNGI0LrQuDog0L3QtdC00L7RgdGC0LDRgtC+0YfQvdCw0Y8g0YTQuNC60YHQsNGG0LjRjyDQv9GA0Y/QvNC+0Lkg0LrQuNGI0LrQuDsg0L3QtdC00L7RgdGC0LDRgtC+0YfQvdC+0LUg0LrQvtC70LjRh9C10YHRgtCy0L4g0LbQuNGA0L7QstC+0Lkg0LrQu9C10YLRh9Cw0YLQutC4OyDQvdC10LTQvtGA0LDQt9Cy0LjRgtGLINC80YvRiNGG0Ysg0LTQvdCwINC80LDQu9C+0LPQviDRgtCw0LfQsDsg0LzQtdC90LXQtSDQstGL0YDQsNC20LXQvSDQv9C+0Y/RgdC90LjRh9C90YvQuSDQu9C+0YDQtNC+0Lc7INC90LXQtNC+0YDQsNC30LLQuNGCINGB0YTQuNC90LrRgtC10YAg0LfQsNC00L3QtdCz0L4g0L/RgNC+0YXQvtC00LA7INC/0L7QtNGB0LvQuNC30LjRgdGC0LDRjyDQvtCx0L7Qu9C+0YfQutCwINGA0LDQt9Cy0LjRgtCwLCDQvtC00L3QsNC60L4g0YHQu9C40LfQuNGB0YLQsNGPINC+0LHQvtC70L7Rh9C60LAg0L3QtSDQtNC+0YHRgtCw0YLQvtGH0L3QviDRhNC40LrRgdC40YDQvtCy0LDQvdCwINC6INC/0L7QtNGB0LvQuNC30LjRgdGC0L7QuS4g0J/RgNC4INC/0L7QstGL0YjQtdC90LjQuCDQstC90YPRgtGA0LjQsdGA0Y7RiNC90L7Qs9C+INC00LDQstC70LXQvdC40Y8g0LLRgdC1INCy0YvRiNC10L/QtdGA0LXRh9C40YHQu9C10L3QvdGL0LUg0YTQsNC60YLQvtGA0Ysg0LzQvtCz0YPRgiDQv9GA0LjQstC10YHRgtC4INCy0YvQv9Cw0LTQtdC90LjRjiDQv9GA0Y/QvNC+0Lkg0LrQuNGI0LrQuC4g0KMg0LTQtdGC0LXQuSDRgNCw0L3QvdC10LPQviDQstC+0LfRgNCw0YHRgtCwINC/0YDRj9C80LDRjyDQutC40YjQutCwINC40LzQtdC10YIg0YbQuNC70LjQvdC00YDQuNGH0LXRgdC60YPRjiDRhNC+0YDQvNGDLCDQvdC1INC40LzQtdC10YLRgdGPINCw0LzQv9GD0LvQsCwg0YHQutC70LDQtNC60Lgg0L3QtSDQstGL0YDQsNC20LXQvdGLLjxiciAvPg0KMikg0J3QvtGA0LzQvtC5INGH0LDRgdGC0L7RgtGLINC80L7Rh9C10LjRgdC/0YPRgdC60LDQvdC40Y8g0YDQtdCx0LXQvdC60LAg0LIg0LLQvtC30YDQsNGB0YLQtSAxINC80LXRgdGP0YYgLSDRgdC+0YHRgtCw0LLQu9GP0LXRgiAyMC0yNSDRgNCw0Lcg0LIg0YHRg9GC0LrQuCAo0LfQsCDQuNGB0LrQu9GO0YfQtdC90LjQtdC8INC/0LXRgNCy0YvRhSAzINC00L3QtdC5LCDQutC+0LPQtNCwINGH0LDRgdGC0L7RgtCwINC80L7Rh9C10LjRgdC/0YPRgdC60LDQvdC40Y8g0LzQvtC20LXRgiDQsdGL0YLRjCAxLTIg0YDQsNC30LAsINGH0YLQviDRgtCw0Log0LbQtSDRj9Cy0LvRj9C10YLRgdGPINC90L7RgNC80L7QuSkuINCQ0L3QsNGC0L7QvNC+LdGE0LjQt9C40L7Qu9C+0LPQuNGH0LXRgdC60LjQtSDQvtGB0L7QsdC10L3QvdC+0YHRgtC4INC80L7Rh9C10LLRi9Cy0L7QtNGP0YnQtdC5INGB0LjRgdGC0LXQvNGLINGB0LLRj9C30LDQvdC90YvQtSDRgSDRg9GH0LDRidC10L3QvdGL0Lwg0LzQvtGH0LXQuNGB0L/Rg9GB0LrQsNC90LjQtdC8OiAxLtCQ0L3QsNGC0L7QvNC40YfQtdGB0LrQuCDQvNCw0LvQsNGPINC10LzQutC+0YHRgtGMINC80L7Rh9C10LLQvtCz0L4g0L/Rg9C30YvRgNGPLCDQv9C+0YfQutC4INCy0YvRgNCw0LHQsNGC0YvQstCw0Y7RgiDQsdC+0LvRjNGI0L7QuSDQvtCx0YrQtdC8INC80L7Rh9C4INC/0L4g0YHRgNCw0LLQvdC10L3QuNGOINGBINC40YUg0LzQsNGB0YHQvtC5INGC0LXQu9CwLiAyLtCd0LXQv9C+0LvQvdC+0LUg0YTQvtGA0LzQuNGA0L7QstCw0L3QuNC1INC90LXRgNCy0L3QvtC5INGB0LjRgdGC0LXQvNGLINGA0LXQs9GD0LvQuNGA0YPRjtGJ0LXQtSDQvNC+0YfQtdC40YHQv9GD0YHQutCw0L3QuNC1LiAzLtCS0YvRgdC+0LrQuNC5INC+0LHQvNC10L0g0LLQtdGJ0LXRgdGC0LIg0L3QvtCy0L7RgNC+0LbQtNC10L3QvdGL0YUg0L/RgNC40LLQvtC00LjRgiDQuiDQsdGL0YHRgtGA0L7QvNGDINC+0LHRgNCw0LfQvtCy0LDQvdC40Y4g0Lgg0LLRi9Cy0LXQtNC10L3QuNGOINC80L7Rh9C4LiA0LiDQldGB0LvQuCDRgNC10LHQtdC90L7QuiDQvdCwINC10YHRgtC10YHRgtCy0LXQvdC90L7QvCDQstGB0LrQsNGA0LzQu9C40LLQsNC90LjQuCwg0YLQviDQutC+0YDQvNC70LXQvdC40LUg0L7QsdGL0YfQvdC+INC/0YDQvtCy0L7QtNC40YLRgdGPINGH0LDRidC1INGH0LXQvCDQvdCwINC40YHQutGD0YHRgdGC0LLQtdC90L3QvtC8INC/0LjRgtCw0L3QuNC4LCDRjdGC0L4g0L/RgNC40LLQvtC00LjRgiDQuiDRg9Cy0LXQu9C40YfQtdC90LjRjiDRh9Cw0YHRgtC+0YLRiyDQvNC+0YfQtdC40YHQv9GD0YHQutCw0L3QuNGPINGC0LDQuiDQutCw0Log0LzQsNGC0LXRgNC40L3RgdC60L7QtSDQvNC+0LvQvtC60L4g0YHQvtC00LXRgNC20LjRgiDQvdC10LzQsNC70YvQuSDQvtCx0YrQtdC8INC20LjQtNC60L7RgdGC0LgsINC60L7RgtC+0YDRi9C5INC90LXQvtCx0YXQvtC00LjQvNC+INCy0YvQstC+0LTQuNGC0Ywg0YEg0L7RgNCz0LDQvdC40LfQvNCwLiDQn9C10LTQuNCw0YLRgNGDINC90LXQvtCx0YXQvtC00LjQvNC+INC+0LHRitGP0YHQvdC40YLRjCDQvNCw0LzQtSDRgNC10LHQtdC90LrQsCDRh9GC0L4g0LTQsNC90L3QvtC1INGP0LLQu9C10L3QuNC1INGP0LLQu9GP0LXRgtGB0Y8g0L3QvtGA0LzQvtC5INC4INC90LUg0YLRgNC10LHRg9C10YIg0LvQtdGH0LXQvdC40Y8u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47" table:style-name="ce1">
            <text:p>1066947</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IDEu0KMg0LTQtdGC0LXQuSDRgNCw0L3QvdC10LPQviDQstC+0LfRgNCw0YHRgtCwINCy0YvQv9Cw0LTQtdC90LjQtSDQv9GA0Y/QvNC+0Lkg0LrQuNGI0LrQuCDRgNCw0LfQstC40LLQsNC10YLRgdGPINC/0YDQtdC20LTQtSDQuNC3INC30LAg0L7RgdC+0LHQtdC90L3QvtGB0YLQtdC5INCw0L3QsNGC0L7QvNC40YfQtdGB0LrQvtCz0L4g0YHRgtGA0L7QtdC90LjRjyDQuCDQvdC10LTQvtGB0YLQsNGC0L7Rh9C90L7Qs9C+INGA0LDQt9Cy0LjRgtC40Y8g0YHRgtGA0YPQutGC0YPRgCDRgtCw0LfQsC4g0Y3RgtC+INC/0YDQvtC40YHRhdC+0LTQuNGCINC40Lcg0LfQsCDRgtC+0LPQviDRh9GC0L4g0YMg0LzQsNC70YvRiNC10Lkg0LzRi9GI0YbRiyDRgtCw0LfQvtCy0L7Qs9C+INC00L3QsCAg0LXRidGRINC90LUg0YHRhNC+0YDQvNC40YDQvtCy0LDQvdGLINC+0LrQvtC90YfQsNGC0LXQu9GM0L3Qviwg0YLQvtC90YPRgSDRgdC+0LLRgdC10Lwg0YHQu9Cw0LHRi9C5LiDQkiDRgNC10LfRg9C70YzRgtCw0YLQtSDQv9GA0Lgg0L/QvtCy0YvRiNC10L3QuNC4INCy0L3Rg9GC0YDQuNCx0YDRjtGI0L3QvtCz0L4g0LTQsNCy0LvQtdC90LjRjyDQvdCw0L/RgNC40LzQtdGAINC40Lcg0LfQsCDQutGA0LjQutCwLCDQv9C70LDRh9CwLCDQvdCw0YLRg9C20LjQstCw0L3QuNC4INC/0YDQuCDQtNC10YTQtdC60LDRhtC40Lgg0YLQsNC30L7QstC+0LUg0LTQvdC+INC90LUg0YHQv9C+0YHQvtCx0L3QviDQv9C+0LvQvdC+0YbQtdC90L3QviDQv9C+0LTQtNC10YDQttC40LLQsNGC0Ywg0L7RgNCz0LDQvdGLINC80LDQu9C+0LPQviDRgtCw0LfQsCwg0Lgg0YHRgtC10L3QutC4INC/0YDRj9C80L7QuSDQutC40YjQutC4INGB0LzQtdGJ0LDRjtGC0YHRjyDQuiDQsNC90YPRgdGDLiDRgtCw0Log0LbQtSDQuNC3INC30LAg0L3QtdCz0LvRg9Cx0L7QutC+0LPQviDRgNCw0YHQv9C+0LvQvtC20LXQvdC40LUg0LvQvtC90L3Qvi3Qv9GA0Y/QvNC+0LrQuNGI0LXRh9C90L7QuSDQv9C10YDQtdCz0L7RgNC+0LTQutC4INGDINC00LXRgtC10Lkg0LHQvtC70LXQtSDQv9C+0LLQtdGA0YXQvdC+0YHRgtC10L06INC/0YDRj9C80L7QutC40YjQtdGH0L3Qvi3QvNCw0YLQvtGH0L3QvtC1INGDINC00LXQstC+0YfQtdC6INC40LvQuCDQttC1INC/0YDRj9C80L7QutC40YjQtdGH0L3Qvi3QvNC+0YjQvtC90L7Rh9C90L7QtSDRgyDQvNCw0LvRjNGH0LjQutC+0LIg0YPQs9C70YPQsdC70LXQvdC40LUg0LfQsNC70LXQs9Cw0LXRgiDRgdGA0LDQstC90LjRgtC10LvRjNC90L4g0LLRi9GB0L7QutC+INC4INC90LXQs9C70YPQsdC+0LrQvi4g0J3QuNC20L3QuNC1INC+0YLQtNC10LvRiyDQv9GA0Y/QvNC+0Lkg0LrQuNGI0LrQuCDRg9C00LXRgNC20LjQstCw0Y7RgtGB0Y8g0LIg0LHRgNGO0YjQvdC+0Lkg0L/QvtC70L7RgdGC0Lgg0LzQtdC90LXQtSDQv9C70L7RgtC90L7QuSDRhNCw0YHRhtC40LDQu9GM0L3QvtC5INGC0LDQuiDQvdCw0LfRi9Cy0LDQtdC80L7QuSDRgdC10YLRjNGOLCDRh9GC0L4g0L7QsdC70LXQs9GH0LDQtdGCINC10ZEg0LLRi9C/0Y/Rh9C40LLQsNC90LjQtS4g0LHRgNGL0LbQtdC50LrQsCDQv9GA0Y/QvNC+0Lkg0LrQuNGI0LrQuCDRgyDQvNCw0LvRi9GI0LXQuSDQutC+0YDQvtGH0LUsINCwINC10LPQviDRgdC+0LXQtNC40L3QuNGC0LXQu9GM0L3Qvi3RgtC60LDQvdC90LDRjyDRh9Cw0YHRgtGMINC10YnRkSDRgNGL0YXQu9Cw0Y8g0Lgg0Y3Qu9Cw0YHRgtC40YfQvdCw0Y8uINCY0Lct0LfQsCDRjdGC0L7Qs9C+INC/0YDRj9C80LDRjyDQutC40YjQutCwINC40LzQtdC10YIg0LHQvtC70YzRiNGD0Y4g0L/QvtC00LLQuNC20L3QvtGB0YLRjCDQuCDRgdC60LvQvtC90L3QvtGB0YLRjCDQuiDQstGL0YHQutCw0LvRjNC30YvQstCw0L3QuNGOINC/0YDQuCDQvNCw0LvQtdC50YjQtdC8INC90LDRgtGD0LbQuNCy0LDQvdC40LguINCjINGA0LXQsdGR0L3QutCwINGD0LPQvtC7INGC0LDQt9CwINCx0L7Qu9C10LUg0L/Qu9C+0YHQutC40LksINC00L3QviDRgtCw0LfQsCDQutCw0Log0LHRiyDRgNCw0YHQv9GA0LDQstC70LXQvdC+LCDQuCDQvtGA0LPQsNC90Ysg0LHQu9GD0LbQtNCw0Y7RgiDQsiDQsdC+0LvQtdC1INGB0LLQvtCx0L7QtNC90L7QvCDQv9GA0L7RgdGC0YDQsNC90YHRgtCy0LUuINGC0LDQuiDQttC1INGDINC00LXRgtC10Lkg0LrQvtGA0L7RgtC60LjQuSDQsNC90LDQu9GM0L3Ri9C5INC60LDQvdCw0Lsg0Lgg0LzQsNC70L7RgNCw0LfQstC40YLRi9C1INGB0YTQuNC90LrRgtC10YDRiyDQtNC70LjQvdCwINCw0L3QsNC70YzQvdC+0LPQviDQutCw0L3QsNC70LAg0YMg0YDQtdCx0ZHQvdC60LAg0LrQvtGA0L7Rh9C1LCDQsCDQvdCw0YDRg9C20L3Ri9C5INGB0YTQuNC90LrRgtC10YAg0LXRidGRINC90LUg0L7QsdC70LDQtNCw0LXRgiDQv9C+0LvQvdC+0Lkg0YHQuNC70L7QuSDRgdC+0LrRgNCw0YnQtdC90LjRjy4gMtCS0J7Qn9Cg0J7QoS7QoyDQvdC+0LLQvtGA0L7QttC00ZHQvdC90YvRhSDQuCDQvNC70LDQtNC10L3RhtC10LIg0L/QtdGA0LLQvtCz0L4g0LzQtdGB0Y/RhtCwINC20LjQt9C90Lgg0Y/QstC70Y/QtdC90YLRgdGPINC90L7RgNC80L7QuSDQsdC+0LvRjNGI0L7QtSDQutC+0LvQuNGH0LXRgdGC0LLQviDQvNC+0YfQtdC40YHQv9GD0YHQutCw0L3QuNC5ICDQtNC+IDIw4oCTMzAg0YDQsNC3INCyINGB0YPRgtC60LguINCt0YLQuCDQvtGB0L7QsdC10L3QvdC+0YHRgtC4INGB0LLRj9C30LDQvdC90Ysg0LDQvdCw0YLQvtC80L4t0YTQuNC30LjQvtC70L7Qs9C40YfQtdGB0LrQuNC80Lgg0L7RgdC+0LHQtdC90L3QvtGB0YLRj9C80Lgg0LjRhSDQvNC+0YfQtdCy0YvQstC+0LTRj9GJ0LXQuSDRgdC40YHRgtC10LzRiy4g0YMg0YDQtdCx0ZHQvdC60LAgMSDQvNC10YHRj9GG0LAg0L7QsdGK0ZHQvCDQvdCw0L/QvtC70L3QtdC90LjRjyDQv9GD0LfRi9GA0Y8g0L7Rh9C10L3RjCDQvNCw0LvQtdC90YzQutC40LksINC/0YDQuCDQutC+0YLQvtGA0L7QvCDQstC+0LfQvdC40LrQsNC10YIg0L/QvtC30YvQsiDQuiDQvNC+0YfQtdC40YHQv9GD0YHQutCw0L3QuNGOLCDRgdC+0YHRgtCw0LLQu9GP0LXRgiDQstGB0LXQs9C+INC+0LrQvtC70L4gMzDigJM2MCDQvNC7LiDQn9GA0Lgg0LPRgNGD0LTQvdC+0Lwg0LLRgdC60LDRgNC80LvQuNCy0LDQvdC40Lgg0YDQtdCx0ZHQvdC+0Log0L/QvtC70YPRh9Cw0LXRgiDQlNCe0KHQotCQ0KLQntCn0J3QniDQttC40LTQutC+0YHRgtC4INC30LAg0L7QtNC90L4g0LrQvtGA0LzQu9C10L3QuNC1IDUwLTEwMCDQvNC7LCDQuCDRg9C20LUg0YfQtdGA0LXQtyAx4oCTMiDRh9Cw0YHQsCDQv9GD0LfRi9GA0Ywg0YHQvdC+0LLQsCDQv9C+0LvQvdC+0YHRgtGM0Y4g0LfQsNC/0L7Qu9C90Y/QtdGC0YHRjywg0YfRgtC+INCy0LXQtNGR0YIg0Log0YfQsNGB0YLRi9C8INC/0L7Qt9GL0LLQsNC8INC4INCw0LrRgtCw0YUg0LzQvtGH0LXQuNGB0L/Rg9GB0LrQsNC90LjRjy4gICDQktGL0YHQvtC60LjQuSDQv9C+0YfQtdGH0L3Ri9C5INC60YDQvtCy0L7RgtC+0Log0Lgg0LDQutGC0LjQstC90YvQuSDRhNC40LvRjNGC0YDQsNGG0LjQvtC90L3Ri9C5INC/0YDQvtGG0LXRgdGBINC/0YDQuNCy0L7QtNGP0YIg0Log0LHRi9GB0YLRgNC+0LzRgyDQvtCx0YDQsNC30L7QstCw0L3QuNGOINCx0L7Qu9GM0YjQvtCz0L4g0LrQvtC70LjRh9C10YHRgtCy0LAg0L/QtdGA0LLQuNGH0L3QvtC5INC80L7Rh9C4INC4INGC0LDQuiDQttC1INCy0L7Qt9C90LjQutCw0Y7RgiDQv9C+0LfRi9Cy0Ysg0Log0LzQvtGH0LXQuNGB0L/Rg9GB0LrQsNC90LjRji4gINGC0LDQuiDQttC1INGN0YLQviDRgdCy0Y/Qt9Cw0L3QvdC+INGBINGC0LXQvCDRh9GC0L4gINC/0L7Rh9C60Lgg0YMg0LzQu9Cw0LTQtdC90YbQsCDQtdGJ0ZEg0L3QtSDRgdC/0L7RgdC+0LHQvdGLINGN0YTRhNC10LrRgtC40LLQvdC+INGA0LXQsNCx0YHQvtGA0LHQuNGA0L7QstCw0YLRjCDQstC+0LTRgyDQuCDRgdC+0LvQuC4g0J7RgtGB0YPRgtGB0YLQstC40LUg0LLRi9GA0LDQttC10L3QvdC+0LPQviDQtNC40YPRgNC10YLQuNGH0LXRgdC60L7Qs9C+INGA0LjRgtC80LAg0Lgg0YHRg9GC0L7Rh9C90YvRhSDQutC+0LvQtdCx0LDQvdC40LkgINGDINC00LXRgtC10Lkg0L/QtdGA0LLQvtCz0L4g0LzQtdGB0Y/RhtCwINC20LjQt9C90Lgg0LXRidGRINC90LUg0YHRhNC+0YDQvNC40YDQvtCy0LDQvdGLINGH0ZHRgtC60LjQtSDRhtC40YDQutCw0LTQvdGL0LUg0YDQuNGC0LzRiyDQstGL0YDQsNCx0L7RgtC60Lgg0LLQsNC30L7Qv9GA0LXRgdGB0LjQvdCwINC90L7Rh9C90L7QuSDQtNC40YPRgNC10Lcg0L/RgNCw0LrRgtC40YfQtdGB0LrQuCDQvdC1INGB0L7QutGA0LDRidCw0LXRgtGB0Y8uINCS0LfRgNC+0YHQu9GL0Lkg0YfQtdC70L7QstC10Log0L3QvtGH0YzRjiDQstGL0YDQsNCx0LDRgtGL0LLQsNC10YIg0LHQvtC70YzRiNC1INC00LDQvdC90L7Qs9C+INCz0L7RgNC80L7QvdCwINGH0LXQvCDQvNC70LDQtNC10L3QtdGGLCDRg9C80LXQvdGM0YjQsNGPINC+0LHRitGR0Lwg0LzQvtGH0LXQuNGB0L/Rg9GB0LrQsNC90LjQuSwg0LAg0YMg0LzQu9Cw0LTQtdC90YbQsCDRjdGC0L7RgiDQvNC10YXQsNC90LjQt9C8INGA0LDQsdC+0YLQsNC10YIg0YHQu9Cw0LHQviDQv9C+0Y3RgtC+0LzRgyDQvNC+0YfQtdC40YHQv9GD0YHQutCw0L3QuNGPINGA0LDRgdC/0YDQtdC00LXQu9C10L3RiyDRgNCw0LLQvdC+0LzQtdGA0L3QviDQsiDRgtC10YfQtdC90LjQtSDRgdGD0YLQvtC6LiAg0J3QuNC30LrQuNC5INGC0L7QvdGD0YEg0Lgg0L7RgtGB0YPRgtGB0YLQstC40LUg0L/RgNC+0LjQt9Cy0L7Qu9GM0L3QvtCz0L4g0LrQvtC90YLRgNC+0LvRjy4g0LzQvtGH0LXQstC+0Lkg0LzRi9GI0LXRh9C90YvQuSDRgdC70L7QuSDQuCDRgdGE0LjQvdC60YLQtdGA0Ysg0YMg0YDQtdCx0ZHQvdC60LAg0LXRidGRINC90LUg0L/QvtC70YPRh9C40LvQuCDQtNC+0YHRgtCw0YLQvtGH0L3QvtC5INGA0LXQs9GD0LvRj9GG0LjQuCDRgSDQs9C+0LvQvtCy0L3QvtCz0L4g0LzQvtC30LPQsCAsINCwINC/0L7Qt9GL0LLRiyDRgyDQvNC70LDQtNC10L3RhtCwINGB0YfQuNGC0LDRjtGC0YHRjyAg0YDQtdGE0LvQtdC60YLQvtGA0L3Ri9C80LguINCc0L7Rh9C10LLQvtC5INC/0YPQt9GL0YDRjCDQvdC1INGB0L/QvtGB0L7QsdC10L0g0YPQtNC10YDQttC40LLQsNGC0Ywg0LfQvdCw0YfQuNGC0LXQu9GM0L3Ri9C1INC+0LHRitGR0LzRiywg0LvRjtCx0L7QuSDQvNC40L3QuNC80LDQu9GM0L3Ri9C5INGA0LDRgdGC0Y/QttC40YLQtdC70YzQvdGL0Lkg0YHQuNCz0L3QsNC7INGB0YDQsNC30YMg0L/RgNC40LLQvtC00LjRgiDQuiDQv9C+0LfRi9Cy0YMg0LzQvtGH0LXQuNGB0L/Rg9GB0LrQsNC90LjRjy4gINCY0L3RgtC10L3RgdC40LLQvdC+0LUg0L/QvtGC0YDQtdCx0LvQtdC90LjQtSDQttC40LTQutC+0YHRgtC4INC/0YDQuCDQutC+0YDQvNC70LXQvdC40Lgg0Lgg0L7RgtC90L7RgdC40YLQtdC70YzQvdCw0Y8g0LPQuNC00YDQsNGC0LDRhtC40Y8gINC/0YDQuCDQs9GA0YPQtNC90L7QvCDQstGB0LrQsNGA0LzQu9C40LLQsNC90LjQuCDQvtCx0YrRkdC8INC/0L7Qu9GD0YfQsNC10LzQvtC5INC20LjQtNC60L7RgdGC0LggINGDINC80LvQsNC00LXQvdGG0LAg0LfQvdCw0YfQuNGC0LXQu9GM0L3QviDQstGL0YjQtSDRh9GC0L4g0YLQsNC6INC20LUg0L/RgNC40LLQvtC00LjRgiDQuiDRh9Cw0YHRgtGL0L8g0L/QvtC30YvQstCw0Lwg0LzQvtGH0LXQuNGB0L/Rg9GB0LrQsNC90LjRjywg0YfQtdC8INGDINCy0LfRgNC+0YHQu9C+0LPQvi4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58" table:style-name="ce1">
            <text:p>1066958</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MS4g0KMg0YDQtdCx0LXQvdC60LAg0LIg0YDQsNC90L3QtdC8INCy0L7Qt9GA0LDRgdGC0LUg0L/RgNC+0LjRgdGF0L7QtNC40YIg0LLRi9C/0LDQtNC10L3QuNC1INC/0YDRj9C80L7QuSDQutC40YjQutC4INC/0L4g0YDQsNC30L3Ri9C8INC/0YDQuNGH0LjQvdCw0Lw6INCQ0L3QsNGC0L7QvNC+LdGE0LjQt9C40L7Qu9C+0LPQuNGH0LXRgdC60LjQtSDQvtGB0L7QsdC10L3QvdC+0YHRgtC4INC+0YDQs9Cw0L3QvtCyLiAg0K3RgtC+INC80L7QttC10YIg0LHRi9GC0Ywg0YHQstGP0LfQsNC90L3QviDRgSDRgtC10Lwg0YfRgtC+INGDINGA0LXQsdC10L3QutCwINC10YnQtSDQvdC1INGA0LDQt9Cy0LjRgiDRgdCw0Lwg0L7RgNCz0LDQvSDQuCDQv9C+0LTQu9C10LbQsNGJ0LjQtSDQuiDQvdC10LzRgyDQvtCx0LvQsNGB0YLQuC4g0JIg0YDQsNC90L3QtdC8INCy0L7Qt9GA0LDRgdGC0LUg0YMg0LTQtdGC0LXQuSDQvdC1INGA0LDQt9Cy0LjRgtC+INC20LjRgNC+0LLQsNGPINC60LvQtdGC0YfQsNGC0LrQsCDQuNC3LdC30LAg0YfQtdCz0L4g0L/RgNGP0LzQsNGPINC60LjRiNC60LAg0LzQvtC20LXRgiDQstGL0L/QsNC00LDRgtGMLiDQotCw0Log0LbQtSDRgdCw0LzQsCDQv9C+0LTRgdC70LjQt9C40YHRgtCw0Y8g0L7QsdC+0LvQvtGH0LrQsCDQvtGC0L3QvtGB0LjRgtC10LvRjNC90L4g0Log0YHQu9C40LfQuNGB0YLQvtC5INC90LUg0LTQvtGB0YLQsNGC0L7Rh9C90L4g0YDQsNC30LLQuNGC0L4g0LIg0YLQsNC60L7QvCDQstC+0LfRgNCw0YHRgtC1LiDQotCw0Log0LbQtSDQsNC90LDQu9GM0L3QvtC1INC+0YLQstC10YDRgdGC0LjQtSDRgyDRgNC10LHQtdC90LrQsCDRgNCw0YHQv9C+0LvQvtC20LXQvdC+INCx0L7Qu9C10LUg0LPQvtGA0LjQt9C+0L3RgtCw0LvRjNC90L4g0L3QsCAyMNC80Lwg0L/QviDRgdGA0LDQstC90LXQvdC40Y4g0YHQviDQstC30YDQvtGB0LvRi9C8INGH0LXQu9C+0LLQtdC60L7QvC4g0K3RgtC+INC80L7QttC10YIg0YLQsNC6INC20LUg0LfQsNCy0LjRgdC40YIg0L7RgiDQv9C40YLQsNC90LjRjyDRgNC10LHQtdC90LrQsC4g0JXRgdC70Lgg0YMg0YDQtdCx0LXQvdC60LAg0YXQuNC80YPRgSDQvdC+0YDQvNCw0LvRjNC90L4g0L3QtSDQv9C10YDQtdCy0LDRgNC40LLQsNC10YLRgdGPINGN0YLQviDQvNC+0LbQtdGCINC/0YDQuNCy0LXRgdGC0Lgg0Log0L7QsdGA0LDQt9C+0LLQsNC90LjRjiDQutCw0LvQsCDRgSDQvdC10L/QtdGA0LXQstCw0YDQtdC90L3QvtC5INC/0LjRidC10LkuINCt0YLQviDQsdC+0LvRjNGI0LUg0LfQsNCy0LjRgdC40YIg0L7RgiDRgdGA0LXQtNGLINC60LjRiNC10YfQvdC40LrQsCDQuCDRhNC10YDQvNC10L3RgtCw0YLQuNCy0L3QvtC5INGA0LXQsNC60YbQuNC10LkuINCQINGN0YLQuCDQutCw0LvQvtCy0YvQtSDQvNCw0YHRgdGLINGA0LXQsdC10L3QutCwINC80L7Qs9GD0YIg0YLRgNCw0LLQvNC40YDQvtCy0LDRgtGMINGB0LDQvNGDINC/0YDRj9C80YPRjiDQutC40YjQutGDINC4INCw0L3QsNC70YzQvdC+0LUg0L7RgtCy0LXRgNGB0YLQuNC1LCDQuNC3LdC30LAg0YfQtdCz0L4g0LzQvtCz0YPRgiDQv9GA0L7QuNGB0YXQvtC00LjRgtGMINCy0YvQv9Cw0LTQtdC90LjQtSDQv9GA0Y/QvNC+0Lkg0LrQuNGI0LrQuC4gIDxiciAvPg0KMi4g0KfQsNGB0YLQvtC1INC80L7Rh9C10LjRgdC/0YPRgdC60LDQvdC40LUg0YHQstGP0LfQsNC90L3QviDRgSDRgNCw0LfQu9C40YfQvdGL0LzQuCDQv9GA0LjRh9C40L3QsNC80Lg6INCQ0L3QsNGC0L7QvNC+LdGE0LjQt9C40L7Qu9C+0LPQuNGH0LXRgdC60LjQtSDQvtGB0L7QsdC10L3QvdC+0YHRgtC4INC80L7Rh9C10LLQvtCz0L4g0L/Rg9C30YvRgNGPLiDQn9C+INGB0YDQsNCy0L3QtdC90LjRjiDRgdC+INCy0LfRgNC+0YHQu9GL0Lwg0YfQtdC70L7QstC10LrQvtC8INGDINC90L7QstC+0YDQvtC20LTQtdC90L3Ri9GFINC80L7Rh9C10LLQvtC5INC/0YPQt9GL0YDRjCDQuNC80LXQtdGCINC80LDQu9C10L3RjNC60LjQtSDRgNCw0LfQvNC10YDRiywg0LjQty3Qt9CwINGH0LXQs9C+INC+0L3QsCDQvNC+0LbQtdGCINCx0YvRgdGC0YDQviDQvdCw0L/QvtC70L3Rj9GC0YHRjyDQuCDQvtC/0L7RgNC+0LbQvdGP0YLRgdGPLiDQmNC30LzQtdC90LXQvdC40LUg0YHRgNC10LTRiyDQuCDQv9C40YLQsNC90LjRjyDQv9C+0YHQu9C1INGA0L7QttC00LXQvdC40Y8uINCg0LXQsdC10L3QvtC6INC/0L7RgdC70LUg0YDQvtC20LTQtdC90LjRjyDRgdGA0LDQt9GDINC/0LXRgNC10YXQvtC00LjRgiDQuiDQuNC30LzQtdC90LXQvdC90L7QvNGDINC/0LjRgtCw0L3QuNGOLCDRgtC+INC10YHRgtGMINC6INC60L7RgNC80LvQtdC90LjRjiDRgSDQs9GA0YPQtNC4INC40LvQuCDRgdC80LXRgdC4LiDQotCw0Log0LrQsNC6INGB0LDQvCDRgNC10LHQtdC90L7QuiDQv9GM0LXRgiDQsdC+0LvRjNGI0L7QtSDQutC+0LvQuNGH0LXRgdGC0LLQviDQstC+0LTRiyDRjdGC0L4g0L/RgNC40LLQvtC00LjRgiDQuiDQsdGL0YHRgtGA0L7QvNGDINC30LDQv9C+0LvQvdC10L3QuNGOINC80L7Rh9C10LLQvtCz0L4g0L/Rg9C30YvRgNGPINC4INGH0LDRgdGC0YvQvCDQvNC+0YfQtdC40YHQv9GD0YHQutCw0L3QuNGP0LwuINCSINGC0LDQutC+0Lwg0LLQvtC30YDQsNGB0YLQtSDRjdGC0L4g0Y/QstC70Y/QtdGC0YHRjyDQvdC+0YDQvNC+0LksINGC0LXQvCDQsdC+0LvQtdC1INC10YHQu9C4INCyINCw0L3QsNC70LjQt9Cw0YUg0LzQvtGH0Lgg0YDQtdCx0LXQvdC60LAg0L3QtSDQuNC80LXQtdGC0YHRjyDQv9Cw0YLQvtC70L7Qs9C40LkuICA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 полностью раскрыты ответы .</text:p>
          </table:table-cell>
          <table:table-cell office:value-type="float" office:value="0" table:style-name="ce1">
            <text:p>0</text:p>
          </table:table-cell>
          <table:table-cell table:number-columns-repeated="16376"/>
        </table:table-row>
        <table:table-row table:style-name="ro1">
          <table:table-cell office:value-type="float" office:value="1066997" table:style-name="ce1">
            <text:p>1066997</text:p>
          </table:table-cell>
          <table:table-cell office:value-type="string" table:style-name="ce1">
            <text:p>russian</text:p>
          </table:table-cell>
          <table:table-cell office:value-type="string" table:style-name="ce1">
            <text:p>Билет 30.&amp;lt;br /&amp;gt; 1.Родители ребенка 3х лет обнаружили образование в области ануса после акта дефекации. Врач хирург диагностировал выпадение прямой кишки. Какие анатомические особенности приводят к данной патологии у детей раннего возраста?&amp;lt;br /&amp;gt; 2.К врачу педиатру обратилась мама с ребенком 1 месяца, со слов мамы ребенок часто мочится, при осмотре патологии не выявлено, в общем анализе мочи патологических изменений не обнаружено. С какими анатомо-физиологическими особенностями мочевыводящей системы связано учащенное мочеиспускание?&amp;lt;br /&amp;gt;</text:p>
          </table:table-cell>
          <table:table-cell office:value-type="string" table:style-name="ce1">
            <text:p>0LTQuGHQs9C90L7RgdGC0LjRgNC+0LLQsNC90L4g0LLRi9C/YdC00LXQvdC4ZSDQv9GA0Y/QvNC+0Lkg0LrQuNGI0LrQuC4g0K3RgtC+ICDQstC+0LfQvdC40LphZdGCINCy0YHQu9C10LTRgdGC0LLQuNC4IGHQvWHRgtC+0LzQuNGH0LXRgdC60LjRhSAg0L7RgdC+0LHQtdC90L3QvtGB0YLQtdC5INGA0LXQsdC10L3QumEs0YLQsNC6INC60LDQuiDQv9GA0Y/QvGHRjyDQutC40YjQutCwINGDINC00LXRgtC10LkgICDQv9C70L7RhdC+INGE0LjQutGB0LjRgNC+0LJh0L1hYSDQuCDQtNC70LjQvdC90LXQtS7RgtCw0LrQttC1ICDQttC40YDQvtCy0LDRjyDQutC70LXRgtGHYdGC0LphINC90LXQtNC+0YHRgtCw0YLQvtGH0L3QviDRgGHQt9Cy0LjRgtCwICsg0YDQsNC30LvQuNGC0LDRjyDQv9C+0LTRgdC70LjQt9C40YHRgmHRjyDQvtCx0L7Qu9C+0YfQumEg0Lgg0L7RgtC90L7RgdC40YLQtdC70YzQvdC+INGB0Lth0LHQsNGPINGE0LjQutGBYdGG0LjRjyDRgdC70LjQt9C40YHRgtC+0Lkg0L7QsdC+0LvQvtGH0LrQuCDQuCDQvdC10LTQvtGB0YLQsNGC0L7Rh9C90L4g0YDQsNC30LLQuNGC0YvQuSDRgdGE0LjQvdC60YJl0YAgINC30LDQtNC9ZdCz0L4g0L/RgNC+0YXQvtC0YTog0LLRgdC1INC/0LXRgNC10YfQuNGB0LvQtdC90L3Ri9C1IGHQvWHRgtC+0LzQuNGH0LXRgdC60LjQtSAg0L7RgdC+0LHQtdC90L3QvtGB0YLQuCDQvNC+0LPRg9GCINC/0YDQuNCy0L7QtNC40YLRjCDQuiDRgNCw0LfQstC40YLQuNGOINC00LDQvdC90L7QuSDQv9Cw0YLRjNC+0LvQvtCz0LjQuC7QodGC0L7QuNGCINGD0YfQtdGB0YLRjCDRh9GC0L4sINGDINC80LDQu9C10L3RjNC60LjRhSDQtNC10YLQtdC5INC/0YDRj9C8YdGPINC60LjRiNC6YSDQvWHRhdC+0LTQuNGC0YHRjyDQvdCwINC90LXQsdC+0LvRjNGI0L7QuSDQstGL0YHQvtGC0LUg0LLQvdGD0YLRgNC4INGC0LDQt9C+0LLQvtC5ICDQv9C+0LvQvtGB0YLQuCDQuCDQvtC60YDRg9C20LXQvWEg0YHQu9Cw0LHQvtC5ICDQvNGL0YjQtdGH0L3QvtC5INGB0YLQtdC90LrQvtC5LCAg0LrRgNC+0LzQtSDRgtC+0LPQviDQvdCw0YDRg9GI0LXQvWEgYdC9YdGC0L7QvNC40YfQtdGB0LrQsNGPINGB0LLRj9C30Ywg0Lwv0YMgINC/0YDRgNGP0LzQvtC5INC60LjRiNC60L7QuSDQuCDRgtCw0LfQvtCy0YvQvNC4INC80YvRiNGG0LDQvNC4LNGC0LDQuiDRh9GC0L4g0L/QvtC0INCy0L7Qt9C00LXQudGB0YLQstC40LXQvCDQvdCw0L/RgNGP0LbQtdC90LjRjyDQuCDRg9GB0LjQu9C40Lkg0L/RgNC4INC00LXRhNC10LrQsNGG0LjQuCDQvtC90LAg0LzQvtC20LXRgiDQstGL0LLQvtGA0LDRh9C40LLQsNGC0YzRgdGPINC90LDQuNC30L3QsNC90LrRgyDRgtCw0LrQvmUg0L/QsNGC0L7Qu9C+0LPQuNGH0LXRgdC60L7QtSAg0YHQvtGB0YLQvtGP0L3QuNC1INC90LDQt9GL0LLQsNC10YLRgdGPINC/0YDQvtC60YLQvtC30L7QvC4g0L/RgNC4INGN0YLQvtC8INCx0YPQtNC10YIg0L3QsNCx0LvRjtC00LDRgtGM0YHRjyDQstC+0LfQvdC40LrQvdC+0LLQtdC90LhlINCy0YvQv2HQtNC10L3QuNGPINC/0YDRj9C80L7QuSDQutC40YjQutC4LiA8YnIgLz4NCjIp0LrQvtC70LjRh9C10YHRgtCy0L4g0LzQvtGH0LXQuNGB0L/Rg9GB0LrQsNC90LjQuSDRgyDQvdC+0LLQvtGA0L7QttC00LXQvdC90YvRhSDQsiDQvdC+0YDQvGUg0YfQsNGB0YLQvtC1ICgwLS0tMSDQvNC10YHRj9GGINC00L4gMjAg0YDQsNC3INCyINGB0YPRgtC60LgsIDHQvGXRgS0tLTHQs9C+0LQ6IDEwLTE1INGA0LDQtyDQuCDRgSDQutCw0LbQtNGL0Lwg0LPQvtC00L7QvCDQutC+0LvQuNGH0LXRgdGC0LLQviDRgdC90LjQtmHQtdGC0YHRjyDQuCDQuiAxNS0xOCDQs9C+0LRh0Lwg0LTQvtGB0YLQuNCz0LDQtdGCIDQtNyDRgNCw0Lcg0LIg0YHRg9GC0LrQuCkgICDQvNC+0Ydl0LjRgdC/0YPRgdC60LDQvdC40LUg0YMg0LTQtdGC0LXQuSDQv9GA0L7QuNGB0YXQvtC00LjRgiDRgNC10YTQu9C10LrRgtC+0YDQvdC+INCy0YHQu9C10LTRgdCy0LjQuCDRh9C10LPQviDQtNC10YLQuCDQtNC+IDMtNSDQu9C10YIg0LzQvtCz0YPRgiDRh9Cw0YHRgtC+INC80L7Rh9C40YLRjNGB0Y8g0LjQt9C3YSAg0L3QtdC00L7RgGHQt9Cy0LjRgtC+0Lkg0L3QtdGA0LLQvdC+0LksINC/0YHQuNGF0L7RjdC80L7RhtC40L7QvdCw0LvRjNC90L7QuSDRgdC40YHRgmXQvNGLLCDQsCDRgmHQutC2ZSDQvdC10LTQvtGA0LDQt9Cy0LjRgtC40LXQvCDRgdGE0LjQvdC60YLQtdGA0L7Qsi4g0YIu0LUg0YMg0L3QvtCy0L7RgNC+0LbQtNC10L3QvdGL0YUg0L/RgNC+0LjQt9Cy0L7Qu9GM0L3QsNGPINC30LDQtNC10YDQttC60LAg0LzQvtGH0LXQuNGB0L/Rg9GB0LrQsNC90LjRjyDQvtGC0YHRg9GC0YHQstGD0LXRgiwg0LLRgdC70LXQtNGB0LLQuNC4INGH0LXQs9C+INCx0YPQtNC10YIg0L3QsNCx0LvRjtC0YdGC0YzRgdGPINGH0LDRgdGC0YvQuSDQtNC40YPRgNC10LcsICDQuCDRgdGC0L7QuNGCINC+0LHRitGP0YHQvdC40YLRjCDQvNCw0YLQtdGA0Lgg0YfRgtC+INGN0YLQviDRj9Cy0Y/Qu9C10YLRgdGPINCy0LDRgNC40LDQvdGC0L7QvCDQvdC+0YDQvNGLLiDRg9GB0LvQvtCy0L3QviDRgNC10YTQu9C10LrRgtC+0YDQvdC+0LUg0YLQvtGA0LzQvtC20LXQvdC40LUg0L/QvtC30YvQstCwINC6INC80L7Rh9C10LjRgdC/0YPRgdC60LDQvdC40Y4g0L3QsCDQvdC10LrQvtGC0L7RgNC+0LUg0LLRgNC10LzRjyDQstGL0YDQsNCx0LDRgtGL0LLQsNC10YLRgdGPICDQsiDQv9GA0L7RhtC10YHRgdC1INCy0L7RgdC/0LjRgmHQvdC40Y8g0YBl0LFl0L3QutCwIC4gINGB0L/QvtGB0L7QsdC90L7RgdGC0Ywg0L/RgNC+0LjQt9Cy0L7Qu9GM0L3QviDRgGXQs9GD0LvQuNGA0L7QsmHRgtGMINC80L7Rh9C10LjRgdC/0YPRgdC60LDQvdC40LUg0YDQsNC30LLQuNCyYdC10YLRgdGPINC70LjRiNGMINC6INC60L7QvdGG0YMg0L/QtdGA0LLQvtCz0L4g0LPQvtC0YSDQttC40LfQvdC4LiDQvdCwINCy0YLQvtGA0L7QvCDQs9C+0LTRgyDRjdGC0LAgINGB0L/QvtGB0L7QsdC90L7RgdGC0Ywg0YHRgtCw0L3QvtCy0LjRgtGB0Y8g0YPRgdGC0L7QudGH0LjQstC+0LkuINC+0LTQvdCw0LrQviDQv9GA0Lgg0LLQvtC70LXQvdC40Lgg0LjRgdC/0YPQs9C1INC40LvQuCDQv9C10YDQtdCy0L7Qt9Cx0YPQttC0ZdC90LjQuCDQvdC10YDQstC90L7QuSDRgdC40YHRgtC10LzRiyDQstC+INCy0YDQtdC80Y8g0LjQs9GAINC80L7QttC10YIg0L/RgNC+0LjRgdGF0L7QtNC40YLRjCDRgyDQtNC10YLQtdC5INC00L4gMyDQu9C10YIs0LzQvtGH0LXQuNGB0L/Rg9GB0LrQsNC90LjQtSDQstC+INGB0L3QtSDQtNC+IDUg0LvQtdGCLiA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Плагиат составил 30%. Согласно лиги честнтости оценка снижена на 15%</text:p>
          </table:table-cell>
          <table:table-cell office:value-type="float" office:value="0" table:style-name="ce1">
            <text:p>0</text:p>
          </table:table-cell>
          <table:table-cell table:number-columns-repeated="16376"/>
        </table:table-row>
        <table:table-row table:style-name="ro1">
          <table:table-cell office:value-type="float" office:value="914689" table:style-name="ce1">
            <text:p>914689</text:p>
          </table:table-cell>
          <table:table-cell office:value-type="string" table:style-name="ce1">
            <text:p>english</text:p>
          </table:table-cell>
          <table:table-cell office:value-type="string" table:style-name="ce1">
            <text:p>Ticket 30.&amp;lt;br /&amp;gt; 1. The parents of 3-years-old found a formation in the anus area after the act of defecation. The surgeon diagnosed a prolapse of the rectum. What are the anatomical features leading to this pathology in young children?&amp;lt;br /&amp;gt; 2. A mother with a baby of 1 month came to the pediatrician, according to the mother’s words, the baby often urinates, when examining the pathology, was not revealed, in the general analysis of the urine there were no pathological changes. How many times can the urination frequency in a child of this age, with what anatomical and physiological features of the urinary system is this connected?&amp;lt;br /&amp;gt;</text:p>
          </table:table-cell>
          <table:table-cell office:value-type="string" table:style-name="ce1">
            <text:p>MSA6IHRoZSBwZWFrIGFnZSBhdCB3aGljaCByZWN0YWwgcHJvbGFwc2UgIGlzIG9ic2VydmVkICBpbiB0aGUgY2hpZHJmZW4gLi4uIGlzIGFnZSAxLTMgeWVhciAgd2l0aG91ZCBhbnkgc2V4IHByZWRpbGljYXRpb24gIGFsdGhvdWdoICB0aGUgcGF0aG9nZW5lc2lzICBpcyB0aGUgY29tcGxldGUgcmVjdGFsIHByb3BsYXNlICBub3QgY29tcGxldGVseSBhcmUgdW5kZXJzdG9vZCAgLiBhbmQgIHRoZSBjdXJyZW50bHkgYXJlIGFjY2VwdGVkICBoeXBvdGhlc2lzIC4gIHN0YXRlICB0aGF0IGFyZSBjb21wbGV0ZSByZWN0YWwgcHJvbGFwc2Ugc3RzcnQgYXMgYWNpcmN1bWZlcmVudGlhbC8gICAuIGludHVzc3VzY2VwdGlvbiAgIG9mIHRoZSByZWN0dW0gIHdoaWNoIGFyZSB0aGUgZ3JhZHVsbHkgIHByb2dyZXMgdG8gY29tcGxldGUgIHJlY3RhbCAgcHJvbGFwc2UgIC4gdGhlIGFuYXRvbWljYWwgZmFjdG9ycyBvZiAgd2hpY2ggaGF2ZSBiZWVuIGZvdW5kICBwbGF5IGEgcm9sZSBpbiB0aGUgIGhpZ2hlciBzdXNjZXB0aWJpbGl0eW9mIHRoZSByZWN0YWwgIHByb2xhcHNlLiAgYW5kIGluIGNoaWxkcmVuICBpbmNsdWRlIHZlcnRpY2FsICBjb25maWd1cmF0aW9uICBvZiB0aGUgc2FjY3J1bSAgZ3JlYXRlciBtb2JpbGl0eSAgb2YgdGhlIHNpZ21vaWQgIGNvbG9uIGxvb3NlIGFuZCAuIGF0dGFjaG1lbnQgb2YgdGhlIHJlY3RhbCAgbXVjb3NhICB0byB0aGUgdW5kZXJseW5pbmcgIG11c2N1bGFyICBhbmQgcG9vcmx5ICBkZXZlbG9wZWQgIGhvdXN0b25zICB2YWx2ZXMgIC4gcHJlZGlzcG9zaW5nICBmYWN0b3JzICBjb250cmlidXRpbmcgdGhlIHJlY3RhbCAgcHJvbGFwc2UgaW5jbHVkZSBjaHJvbmljICBjb25zdGlwYXRpb24gLiBjaHJvbmljIGNvdWdoICBwZXJ0dXNpcyAgY3lzdGljIGZpYnJvc2lzICBtYWxudXRyYXRpb24gZXRjIC4gICAgICAgICAgICAgICAgICAgICAgICAgICAgICAgICAgICAgICAgICAgICAgICAgICAgICAgICAgICAgICAgICAgICAgICAgICAgICAgICAgICAgICAgICAgICAgICAgICAgICAgICAgICAgICAgICAgMiAuOnRoZSAgeW91ciAgYmFieSAgbWF5IGJlIHVyaW5hdGUgIGFzIG9mdGVuICBhcyBldmVleSBvbmUgdG8gdGhyZWUgaG91cnMgLiBvciBhcyBpbmZyaXF1ZW50bHkgIGFzIHRoZSBmb3VyIHRvIHNpeCAgdGltZXMgYSBkYXkgIGlmIHRoZXJlICBpbGwgb3IgZmV2ZXJpc2ggIG9yIHRoZSB3ZXRoZXIgIGlzIGV4dHJlbWx5ICBob3QgLiB0aGVyaSAgdXN1YWwgIG91dHB1dCAgb2YgdGhlIHVyaW5lLiBtYXkgZHJvcCBieSAgaGFsZiBhbmQgIHN0aWxsIGJlIG5vcm1hbCAgdXJpbmF0aW9uIC4gc2hvdWxkIG5ldmVyIGJlIHBhaW4gZnVsbCAuIHRoZSB1cmluYXJ5IHN5c3RlbSAgZnVuY3Rpb24gYXJlIGZpbHRlciAgYmxvb2QgIGFuZCBjcmVhdCAgdXJpbmUgIGFzIGEgd2FzdGUgIGJ5IHByb2R1Y3RzICB0aGUgIG9yZ2FuICBvZiB0aGUgdXJpbmFyeSBiIHN5c3RlbS50aHJlIGluY2x1ZGVkICB0aGUga2lkbmV5ICByZW5hbCBwZWx2aXMgIHVyZXRlciAgYmxhZGRlciBldGMgdGhlIHVyaW5hcnkgc3lzdGVtIGZ1Y3Rpb24gdGhlIHJlbW92ZSBvZiB0b3hpbiBzdWJzdGFuYW5jZSBhbmQgICB3YXN0ZSBldGMvLiAgZnJvbSBvdXIgYm9keSAgIHRocm91Z2ggdGhlIHVyaW5lIC4gaXQgdXNlcyAgYSBzZXJpZXMgb2YgdHViZSAgYW5kIGR1Y3RzICB0byBwYXNzICB0aGlzIHdhc3RlIGxpa2UgdXJpbmUgLmFuZCAgdGhpcyB0dWJlIGFyZSBjb25uZWN0ZWQgIHRvIG91ciBib2R5ICB2ZXNzZWxzICAvYW5kIGRpZ2VzdGl2ZSBzeXN0ZW0gLyBvdXIgdXJpbmFyeSBzeXN0ZW0gIC5oZWxwICB0aGUgcmVzdCBvdWIgYm9keSBuIHdvcmsgcHJvcGVybHkgIHRoZSBraWRuZXkgYXJlIGZpbHRlciB1bndhbnRlZCAuIHN1YnN0YW5jZSAgZnJvbSB0aGUgIGJsb29kICBhbmQgcHJvZHVzZSAgdXJpbmUgdG8gZXhjcmV0ZSAgdGhlcmUgYXJlIHRocmVlIG1haW4gc3RlcCBvZiB1cmluZSBmb3JtYXRpb24gLjEgZ2xvbWVydWx1cyAgZmlsdHJhdGlvbiAyIHJlYWJzb3JwdGlvbiAgYW5kMyBzZWNyZXRpb24gIHRoZXNlIHByb2Nlc3MgZW5zdXJlIHRoYXQgb25seSB3YXN0ZSBhbmQgZXhjZXNzICB3YXRlciBhcmUgcmVtb3ZlZCBmcm9tIHRoZSBib2R5IC4=</text:p>
          </table:table-cell>
          <table:table-cell office:value-type="float" office:value="170348" table:style-name="ce1">
            <text:p>170348</text:p>
          </table:table-cell>
          <table:table-cell office:value-type="float" office:value="66" table:style-name="ce1">
            <text:p>66</text:p>
          </table:table-cell>
          <table:table-cell office:value-type="string" table:style-name="ce1">
            <text:p>Your answer is not written completely and there are many spelling errors in the form of many punctuation marks. Similarity index 51.27%</text:p>
          </table:table-cell>
          <table:table-cell office:value-type="float" office:value="0" table:style-name="ce1">
            <text:p>0</text:p>
          </table:table-cell>
          <table:table-cell table:number-columns-repeated="16376"/>
        </table:table-row>
        <table:table-row table:style-name="ro1">
          <table:table-cell office:value-type="float" office:value="915020" table:style-name="ce1">
            <text:p>915020</text:p>
          </table:table-cell>
          <table:table-cell office:value-type="string" table:style-name="ce1">
            <text:p>english</text:p>
          </table:table-cell>
          <table:table-cell office:value-type="string" table:style-name="ce1">
            <text:p>Ticket 30.&amp;lt;br /&amp;gt; 1. The parents of 3-years-old found a formation in the anus area after the act of defecation. The surgeon diagnosed a prolapse of the rectum. What are the anatomical features leading to this pathology in young children?&amp;lt;br /&amp;gt; 2. A mother with a baby of 1 month came to the pediatrician, according to the mother’s words, the baby often urinates, when examining the pathology, was not revealed, in the general analysis of the urine there were no pathological changes. How many times can the urination frequency in a child of this age, with what anatomical and physiological features of the urinary system is this connected?&amp;lt;br /&amp;gt;</text:p>
          </table:table-cell>
          <table:table-cell office:value-type="string" table:style-name="ce1">
            <text:p>QW5zd2VycywxLS0gLiBUaGUgIGFudG9taWNhbCBmZWF0dXJlcyBsZWFkcyB0byB0aGlzIHBhdGhvbG9neSBpbiB5b3VuZyBjaGlsZHJlbiwgdGhlc2UgYXJlIG1haW5seSBpbmNsdWRlcyAgdGhlIGFudG9taWNhbCBmZWF0dXJlcyB0aGF0IGluY2x1ZGVzIGlzIGFmZmVjdGVkIGluIHN1Y2ggY2FzZXMgdGhlIGZlYXR1cmVzIGFyZSB0aGUgY2FzZXMgdGhhdCBpcyBkdWUgdG8gdGhlIGFuYXRvbWljYWwgZmVhdHVyZXMgYXJlIC0tICAgICAgICAgICAgICAgICAgICAgICAgICAgICAgICAgICAgMS8gd2VhayBkZXZlbG9wbWVudCBvZiBtdXNjbGVzIHBlbHZpYyBmbG9vciAgLS0gdGhpcyBpcyBkdWUgdG8gd2VhayBwZWx2aWMgZGV2ZWxvcG1lbnQgaW4gdGhlICBjaGlsZHJucywgbGVhZHMgdG8gdGhlIHBvb3Igc3VwcG9ydCBpbiByZWN0YWwgYXJlYSAgLiB0aGUgdGhlIHJlY3RhbCBwcm9sYXBzZSBpcyBhIGNvbmRpdGlvbiB3aGljaCB0aGUgZmxvb3Igb2YgdGhlIG11c2NsZXMgaXMgbm90IGZ1bGx5IGRldmVsb3BlZCBpbiB0aGUgcGVsdmlzIGFuZCB0aGUgICAgICAgICAgICAgICAgICAgICAgICAgICAgIDIvIHVuZGVyZGV2ZWxvcG1lbnQgb2YgdGhlIGNvb25lY3RpdmUgdGlzc3VlcyBhbmQgbGlnYW1lbnRzICcgaW4gdGhlIGNoaWxkcmVucywsIHRoaXMgY29uZGl0aW9uIG9jY3VycyBkdWUgdG8gdGhlIHVuZGVyIGRldmVsb3BtZW50IG9mIHRoZSBjb25uZWN0aXZlIHRpc3N1ZSBkdWUgdG8gdGhlIHRoZSB1bmRlciBkZXZlbG9wbWVudCBvZiB0aGUgbGlnYW1lbnQgdGhhdCBzdXBwb3J0cyB0aGUgcmVjdHVtIGluIGNoaWxkcmVuIGlzIGFmZmVjdGVkIGFuZCBtYWtlcyB0aGUgbW9yZSBwcm9uZSB0byBwcm9sYXBzZSAsIDMvZnJlcXVlbnQgc3RhaW5pbmcgZHVyaW5nIHRoZSB0aW1lIG9mIGRlZmVjYXRpb24sIGluICB3aGljaCBhcmlzZXMgdGhlIHlvdW5nIGNoaWxkcmVuIG1heSBmYWNlIHRoZSBwcm9ibGVtIFNVQ0ggQVMgdGhlIHVuY29vcmRpbnRpbmcgYW5kIHRoZSB1bmNvbnRyb2xsYWJsZSBtb3ZlbWVudCBvZiB0aGUgd2FzdGUgcHJvZHVjdHMgIGR1cmluZyB0aGVlICBkZWZlY2F0aW9uIHByb2Nlc3Msd2l0aCB0aGUgaXJydGF0YWJsZSBtb3ZlbWVudCBkdXJpbmcgdGhlIHN0YWluaW5nIHRoYXQgbGVhZHMgdG8gdGhlIGluY3JlYXNlIGluIHRoZSBwcmVzc3VyZSBkdXJpbmcgdGhlIGRlZmVjYXRpb24gaW4gdGhlIHJlY3RhbCBhcmVhLi5cICAgICAgICAgICAgICAgICAgICAgICAgICAgICAgICAgICAgICAgICAgICAgICAgICAgICAgICAgICAgICAgICAgICAgICAgICAgICAgICAgICAgICAgICA0LyBjb25zdGlwYXRpb24gLS0gaXQgaXMgdGhlIG1ham9yIHByb2JsZW0gaW4gdGhlIHlvdW5nIGNoaWxkcmVuIHRoYXQgb2NjdXJzIGJ5IHRoZSBkaWZmdWx0eSBmYWNlZCBkdXJpbmcgZGVmZWNhdGlvbiBhbmQgc3Rvb2wgZGlzY2hhcmdlICwgaW4gc29tZSBjYXNlcyB0aGUgaW5jb21wbGV0ZSBkaXNjaGFyZ2UgbWF5IGxlYWRzIHRvIHRoZSBwcm9ibGVtIG9mIHRoZSBwcmVzc3VyZSBpbmNyZWFzZWQgaW4gdGhlIHJlY3RhbCBhcmVhcyBpbiBjaGlsZHJlbi4uIHRpc3MgaXMgYSBtYWpvciBwcm9ibGVtIGluIGZhbnRzIGFzIHRoZSBwcmVzc3VyZSBpbmNyZWFzZXMgaW4gcmVjdGFsIGFyZWEgZHVyaW5nIHRoZSB3YXN0ZSBkaXNjaGFyZ2UuLiAvLyAgICAgICAgICAgICAgICAgICAgICAgICAgICAgICAgICAgICAgICAgICAgICAgICAgICAgICAgICAgICAgICAgICAgICAgICAgICAgICAgICAgICAgICAgICAgICAgICAgICAgICAgICAgICAgICAgICAgICAgICAgICAgICAgIEFOU1dFUiAyIC0tIHRoZSBhYm5vcm1hbCB1cmluYXRpb24gYW5kIGRpc3R1cmJhbmNlIGluIHBoeXNpb2xvZ2ljYWwgZmVhdHVyZXMgLSBpbiB0aGUgbm9ybWFsIGNhc2VzICwgdGhlIDEgbW9udGggY2hpbGQgaXMgYWJsZSB0byBkaXNjaGFyZ2UgdGhlIHVyaW5lIG9mdGVuIGFzIDEwIG9yIHRoZSAxMiB0aW1lcyBpbiB0aGUgZGF5ICwgaW4gc29tbWUgY2FzZXMgdGhlIHRoZSBoaWdoIGZyZXF1ZW5jeSBvZiB0aGUgdXJpbmF0aW9uIG1heSB0aGUgc21hbGwgc2l6ZSBvZiB0aGUgdXJpbmFyeSBibGFkZGVyIHRoYXQgYWZmZWN0IHRoZSBsaW1pdGVkIGNhcGFjaXR5IG9mIHRoZSB1cmluYXJ5IGJsYWRkZXIgaW4gdGhlIGNoaWxkcmVuICwgICAgICAgICAgICAgICAgICAgICAgICAgICAgICAgICAgdGhlIGltbWF0dXJlIGJsYWRkZXIgY29udHJvbCAtLSBpbiBzdWNoIGNvbmRpdGlvbnMsLCB0aGUgeW91bmcgY2hpbGRybiBtYXkgaW1tYXR1cmUgdXJpbmFyeSBibGFkZGVyICwgdGhlIGluZmFudHMgaGF2ZSBubyBjb250cm9sIG9uIHRoZSBibGFkZGVyIGNvbnRyYWN0aW9uIGFzIHJlc3VsdCB0aGUgc21hbGwgdm9sdW1lIG9mIHVyaW5hdGlvbiBoYXMgYSBsaW1pdGVkIGZ1bnRpb2luZyBjYXBhY2l0eSB3aGVyZSB0aGUgdGhlIG9uZSBtb250aCBjaGlsZCBuZWNjZXNzaXR5IGZvciB0aGUgcGh5c2lvbG9naWNhbC4gZi51bmN0aW9uZyBvZiB0aGUgdXJpbmFyeSBzeXN0ZW0sIHRoZSBmcmVxdWVudCB1cmluZSBkaXNjaGFyZ2UgaW4gaW5mYW50IG1heSBsZWFkcyBhZGFwdGF0aW9ucyBhbmQgdGhlIHJhcGlkIGludGFrZSBpbiB0aGUgYnJlYXN0IG1pbGssIGZvcm11bGEgYW5kIGVuc3VyaW5nIHRoZSBlbGltaW5hdGlvbiBvZiB0aCdlIHdhc3RlIHByb2R1Y3RzIG91dCBvZiB0aGUgYm9keS8gLi4uIA==</text:p>
          </table:table-cell>
          <table:table-cell office:value-type="float" office:value="170348" table:style-name="ce1">
            <text:p>170348</text:p>
          </table:table-cell>
          <table:table-cell office:value-type="float" office:value="70" table:style-name="ce1">
            <text:p>7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37" table:style-name="ce1">
            <text:p>915037</text:p>
          </table:table-cell>
          <table:table-cell office:value-type="string" table:style-name="ce1">
            <text:p>english</text:p>
          </table:table-cell>
          <table:table-cell office:value-type="string" table:style-name="ce1">
            <text:p>Ticket 30.&amp;lt;br /&amp;gt; 1. The parents of 3-years-old found a formation in the anus area after the act of defecation. The surgeon diagnosed a prolapse of the rectum. What are the anatomical features leading to this pathology in young children?&amp;lt;br /&amp;gt; 2. A mother with a baby of 1 month came to the pediatrician, according to the mother’s words, the baby often urinates, when examining the pathology, was not revealed, in the general analysis of the urine there were no pathological changes. How many times can the urination frequency in a child of this age, with what anatomical and physiological features of the urinary system is this connected?&amp;lt;br /&amp;gt;</text:p>
          </table:table-cell>
          <table:table-cell office:value-type="string" table:style-name="ce1">
            <text:p>MS1QUk9MQVBTRSBPRiBUSEUgUkVDVFVNICBpbiBhIDMgeWVhciBvbGQgOi1BTkFUT01JQ0FMIEZFQVRVUkVTUyBMRUFESU5HICBUTyBUSEUgUkVDVEFMIFBST0xBUFNFIHdlYWsgcGVsdmljIGZsb29yIG11c2NsZTtpbiB5b3VuZyBjaGlsZHJlbix0aGUgUEVMVklDJyBGTE9PUiBNVVNDTEUgaXMgbm90IGJlIGZ1bGx5IGRldmVsb3Agb3IgcmVsYXRpdmVseSB3ZWFrLCBDT05UUklCVVRJTmcgdG8nIHRoZSBsYWNrIG9mIHN1cHBvcnQgZm9yIHRoZSByZWN0YWwtdW5kZXJkZXZlbG9wZWQgY29ubmVjdGl2ZSB0aXNzdWUtIHRoZSBjb25uZWN0aXZlIHRpc3N1ZSBhbmQgbGlnYW1lbnQgc3VwcG9ydGluZyB0aGUgcmVjdHVtLHVuZGVyZGV2ZWxvcGVkLG1ha2luZyBpdCBtb3JlIHByb25lIHRvIHByb2xhcHNlLkZyZXF1ZW10IFNUUkFJTklORyBkdXJpbmcnIGRlZmVjYXRpb24geW91bmcgY2hpbGRyZWFuIG1heSAnb2Z0ZWIgc3RyYWluIGR1cmluZyBsb3dlciBtb3ZlbWVudHMscG90ZW50aWFsbHkgZHVlIHRvIGltbWF0dXJlIG9yIHVuY29yZGluYXRlZCAnZGVmZWNhcnRpb25uIHByb2Nlc3MsLCBsZWFkaW5nIHRvIGluY3JlYXNlIHByZXNzdXJlIG9uIHRoZSByZWN0YWwgYXJlYS5DT05TVElQQVRJT04tY29uc3RpcGF0aW9uIGNhbiBleGVyYmF0ZSB0aGUgdGlzc3VlIGFzIGhhcmQgc3Rvb2wgYW5kIHN0YWluaW5nIGNhbiBjb250cmlidXRlIHRvIHRoZSBwcm9sYXBzZSBvZiB0aGUgcmVjdHVtLiA8YnIgLz4NCjxiciAvPg0KPGJyIC8+DQo8YnIgLz4NCjItVVJJTkFUSU9OIEZSRVFVRU5DWSBpbiAxIG1vbnRoIG9mIEJBQlk7LU5PUk1BTCAgdXJpbmF0aW9uIGZyZXF1ZW5jeSBhbmQgUEhZU0lPTE9HSUNBTCBwcm9jZXNzLCBmcmVxdWVudCB1cmknbmF0aW9uIDstaXQgaXMgbm9ybWFsIGZvciBvbmUgbW9udGggYmFieXRvIHVyaW5hdGUgZnJlcXVlbnRseSBvZnRlbiBBUyBNQU5ZIDEwLTEyIHRpbWVzIGluIGEgZGF5LHRoaXMgaGlnaCBmcmVxdWVuY3kgaXMgQVRSSUJVVEUgdG8gdGhlIHNtYWxsJyBzaXplIGFuZCBsaW1pdGVkIGNhcGFjaXR5IG9mIGluZmFudHMgIGJsYWRkZXIsO0lNQVRVUkUgQkxBRERFUiBDT05UUk9MLXRoZSB1cmluYXJ5IHN5c3RlbSBpbiBuZXcgYm9ybiBpcyBpbW1hdHVyZSAsYW5kIGluZmFudHMgbWF5IG5vdCBoYXZlIGZ1bGx5IGNvbnRyb2wgb3ZlciBibGFkZGVyIGNvbnRyYWN0aW9uIGxlYWRpbmdmIHRvIGZyZXF1ZW50LCBzbWFsbCB2b2x1bWUgdXJpbmF0aW9uIDstTElNSVRFRCBCTEFEREVSIENBUEFDSVRZO3RoZSBibGFkZGVyIG9mIG9uZSBtb250aCBvbGQgYmFieSBoYXMgbGltaXRlZCBjYXBhY2l0eSxuZWNjZXNpdGluZyBtb3InZSBmcmVxdWVudCBlbXB5dGluZy47LVBIWVNJT0xPR0lDQUwgQURBUFRBVElPTi10aGUgbW9yZSBmcmVxdWVudCB1cmluYXRpb24gcGF0dGVybiBpcyBwaHlzaW9sb2dpY2FsIEFEQVBUQVRJT04gdG8gcmFwaWQgaW50YWtlIGFuZCBtZXRhYm9saXNtIGJyZWFzdCBtaWxrIG9yIGZvcm11bGEsZW5zdXJpbmcgdGhlIGVsaW1pbmF0aW9uIG9mIHdhc3RlIHByb2R1Y3Qu</text:p>
          </table:table-cell>
          <table:table-cell office:value-type="float" office:value="170348" table:style-name="ce1">
            <text:p>170348</text:p>
          </table:table-cell>
          <table:table-cell office:value-type="float" office:value="68" table:style-name="ce1">
            <text:p>6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2" table:style-name="ce1">
            <text:p>915232</text:p>
          </table:table-cell>
          <table:table-cell office:value-type="string" table:style-name="ce1">
            <text:p>kazakh</text:p>
          </table:table-cell>
          <table:table-cell office:value-type="string" table:style-name="ce1">
            <text:p>Билет 31.&amp;lt;br /&amp;gt; 1.Педиатрдың қабылдануында 1 жастағы бала. Қарағанда дәргер салыстырмалы жүрек түйықтығының шекараларын анықтаған. Салстырмалы жүрек тұйықтығының шекаралың атныз. &amp;lt;br /&amp;gt; 2.6 айлық бала, қарағанда сүйек жүйесінің пальпациясында анықтады: маңдай және төбе сүйектерінің төмпекшіктенуі,кеуденің деформациясын,рахиттік «тасбихтерді», «маржан тізбегі»,бүлшық ет тонусы төмен,тершен. Бүлшық ет тонусы төмен, буындары қійиілі жоғары.Шүйде аймағы тақырланған.Тершенді. Нерв-психиқалық дамуы қалыпты, физиқалық дамуы арта қалған. Қандай жүйе зақымдалған? Қандай лабораторлық зерттеулер жүргізу қажет.&amp;lt;br /&amp;gt;</text:p>
          </table:table-cell>
          <table:table-cell office:value-type="string" table:style-name="ce1">
            <text:p>IDEpINCh0LDQu9GL0YHRgtGL0YDQvNCwINC20q/RgNC10Log0YLSsdC50YvSk9GL0L3Ri9KjINGI0LXQutCw0YDQsNC70LDRgNGL0L0g0LDQvdGL0pvRgtCw0YMg0q/RiNGW0L0g0YHQsNC70YvRgdGC0YvRgNC80LDQu9GLINC/0LXRgNC60YPRgdGB0LjRjyDSm9C+0LvQtNCw0L3Ri9C70LDQtNGLLCDQv9C70LXRgdGB0LjQvNC10YLRgCDRgdCw0YPRgdCw0pPRi9C80YvQt9C00Ysg0LHQsNC70pPQsNGI0YvSmyDRgdCw0YPRgdCw0pPRi9C80YvQt9Cx0LXQvSDQvtGA0YLQsNGI0LAg0LrSr9GI0YLQtSDSsdGA0LDQvNGL0LcgLSDQsNGI0YvSmyDQtNGL0LHRi9GB0YLQsNC9INGC0rHQudGL0pvSm9CwINC20q/RgNC10LzRltC3LNCe0L3RiyDQttKv0YDQs9GW0LfRgyDQsdCw0YDRi9GB0YvQvdC00LAg0LHQsNC70LDQvdGL0qMg0LzQsNC30LDRgdGL0LfQtNCw0L3QsdCw0YPRiyDSr9GI0ZbQvSDSm9C+0LvRi9C80YvQtyDQttGL0LvRiyDQsdC+0LvRg9GLINGC0LjRltGBLiDTmNGA0ZYg0LHQsNC70LDQvdGL0qMg0YLQtdGA0ZbRgdGW0L3RltKjLCDQttCw0LvQv9GLINCw0LfSk9Cw0YHRiyDRgdC10LfRltGC0LzQsNC70LTRi9KT0Ysg0LzQtdC9INC905nQt9GW0LrRgtGW0LPRltC9INC10YHQutC10YDQtSDQsdCw0YDRi9C90YjQsCDSm9Cw0LzSm9C+0YDQu9GL0pvQv9C10L0g0LzSsdKb0LjRj9GCINC20LDRgdCw0LnQvNGL0LcuINCa06nRgNGB0LXRgtC60ZbRiNGC0LXRgNCz0LUg0YLQvtKb0YLQsNC70YHQsNC8KNCx0rHQuyDTmdGA0LjQvdC1INOZ0YAg0LHQsNC70LDQtNCwINC20LXQutC1INCx0L7Qu9Cw0LTRiywg0Y/Sk9C90Lgg0L7QvdGL0qMg0LTQtdC90LUg0YLSsdGA0pvRi9C90LAsINC20LDRgdGLINC80LXQvSDRgtGD0YvQu9GDINCw0LnRiy3QutKv0L3RliDRgtC+0LvRi9Kb0YLRi9KT0YvQvdCwINC00LAg0pvQsNGC0YvRgdGL0YLRiyDQsdC+0LvQsNGC0YvQvdC00YvSk9GL0L0g0LXRgdC60LXRgNGD0ZbQvNGW0Lcg0LrQtdGA0LXQuik6IDEg0LbQsNGB0LDRgCDQsdCw0LvQsCDQttKv0YDQtdCz0ZbQvdGW0qMg0YHQvtC7INC20LDSmyDRiNC10LrQsNGA0LDRgdGLIC0g0YHQvtC7INC/0LDRgNCw0YHRgtC10YDQvdCw0LvRjNC00Ysg0YHRi9C30YvSm9GC0LDQvSAxLTIg0YHQvCDRltGI0LrQtSAyINKb0LDQsdGL0YDSk9CwINCw0YDQsNC70YvSm9GC0LAg0LDQvdGL0pvRgtCw0LvQsNC00YsgOyDQvtKjINC20LDSmyDRiNC10LrQsNGA0LDRgdGLINC+0qMg0LHSsdKT0LDQvdCwINC+0YDRgtCwINGB0YvQt9GL0pvRgtCw0L0gMSw1LTLRgdC8INGW0YjQutC1IDTRiNGWINKb0LDQsdGL0YDSk9CwINCw0YDQsNC70YvSm9GC0LA7INC20q/RgNC10Log0rHRiNGLIC0g0LDQu9KT0LDRiNKb0Ysg0LHRltGAINC20YvQu9C00YvSm9GC0LAg0YHQvtC7INCx0rHSk9Cw0L3QsCDQvtGA0YLQsCDRgdGL0LfRi9KbINCx0L7QudGL0L3QtNCwIDUg0pvQsNCx0YvRgNKT0LDSk9CwINC90LUgNCDRiNGWINKb0LDQsdGL0YDSk9CwINCw0YDQsNC70YvSm9Kb0LAg0YHTmdC50LrQtdGBINC60LXQu9C10LTRli4g0JbSr9GA0LXQutGC0ZbSoyDRgdCw0LvRi9GB0YLRi9GA0LzQsNC70Ysg0YLSsdC50YvSm9GC0LDQu9GDINGI0LXQutCw0YDQsNC70LDRgNGL0L3Ri9KjINC+0YHRi9C90LTQsNC5INC805nQvdCz0LUg0LjQtSDQsdC+0LvRgyDRgdC10LHQtdCx0ZYg0LbSr9GA0LXQuiDQvNCw0YHRgdCw0YHRiyDQvdOZ0YDQtdGB0YLQtdC90ZbSoyDQsNC70pPRiNKb0Ysg0LbRi9C70LTQsNGA0YvQvdC00LAg0L7QvdGL0qMg0LzQsNGB0YHQsNGB0YvQvdCwINGI0LDSm9Kb0LDQvdC00LAg0pvQsNGC0YvQvdCw0YHRiyDQtdGA0LXRgdC10LrRgtC10YDQs9C1INKb0LDRgNCw0pPQsNC90LTQsCDQsdGW0YDQvdC10YjQtSDQtdGB0LXQs9C1INKv0LvQutC10L0g0LHQvtC70YPRi9C90LTQsCjQttKv0YDQtdC6INC606nQu9C10LzRli/QttCw0LvQv9GLINC00LXQvdC1INGB0LDQu9C80LDSk9GLINKb0LDRgtGL0L3QsNGB0YvQvdC00LApLiAyKdCR0LDQu9Cw0LTQsCDQutOp0YDRltC90LXRgtGW0L0g0LHQtdC70LPRltC70LXRgNC00ZYgLSDRj9KT0L3QuCDQvNCw0qPQtNCw0Lkg0LzQtdC9INGC06nQsdC1INGB0q/QudC10LrRgtC10YDRliDQtNC10YTQvtGA0LzQsNGG0LjRj9GB0Ysg0YLTqdC80L/QtdGI0ZbQs9GWINCw0L3Ri9Kx0YLQsNC70YPRiywg0LrQtdGD0LTQtSDRgtC+0YDRiyDQtNC10YTQvtGA0LzQsNGG0LjRj9C70LDQvdKT0LDQvSDQsdC+0LvRg9GLINC205nQvdC1INCx0ZbQu9C10LfRltC60YLQtdGA0ZbQvdC00LXQs9GWINGA0LDRhdC40YLRgtGW0Log0YLQsNGB0LHQuNGFINC90LUg0LzQsNGA0LbQsNC9INGC0ZbQt9Cx0LXQutGC0LXRgNGWLCDQsdKx0LvRiNGL0pvQtdGC0YLQtdGA0LTQtdCz0ZYg0LPQuNC/0L7RgtC+0L3QuNGPINC80LXQvSDQsdGD0YvQvdC00LDRgCDQs9C40L/QtdGA0LzQvtCx0LjQu9GM0LTRltC70ZbQs9GW0L0g0YLQsNKT0Ysg0LHQsNGB0pvQsNC70LDRgNGL0L0g0pvQvtGB0LAg0LXRgdC60LXRgNC1IC0g0KDQsNGF0LjRgiDQsNGD0YDRg9GLINC10LrQtdC90LTRltCz0ZbQvdC1INCx0L7Qu9C20LDQvCDQttCw0YHQsNC50LzRi9C9LiDTmNGA0LjQvdC1INC80rHQvdGLINGA0LDRgdGC0LDRgyDQvNCw0pvRgdCw0YLRi9C90LTQsCDQvdCw0pvRgtGLINGE0LjQt9C40LrQsNC70YvSm9GC0LDQvSDQsdOp0LvQtdC6INC70LDQsdC+0YDQsNGC0L7RgNC40Y/Qu9GL0psg0YHRi9C90LDQvNCw0LvQsNGAINC20LDRgdCw0LvRg9GLINGC0LjRltGBLiDQoNCw0YXQuNGCINCw0YPRgNGD0YvQvdGL0qMg0LHQsNC70LDQtNCwINGC0YPRi9C90LTQsNGDINGB0LXQsdC10LHRltC90LUg0YLQvtKb0YLQsNC70YHQsNC8INCx0rHQuyDQlDMg0LTTmdGA0YPQvNC10L3RliDQttC10YLQutGW0LvRltC60YHRltC30LTRltC6L9Cz0LjQv9C+0LLQuNGC0LDQvNC40L3QvtC3INC20LDSk9C00LDQudGLLiDQndC10LPRltC30ZbQvdC10L0g0pvSsdGA0YHQsNKb0ZbRiNGWINC00LDQvNGDINC60LXQt9GW0L3QtNC1INKx0YDRi9Kb0pvQsCDQsdKx0Lsg0LLQuNGC0LDQvNC40L0g0LDQvdCw0YHRi9C90LDQvSDRgtKv0YHRltC/INC+0YLRi9GA0LDQtNGLINC205nQvdC1INC+0L3Ri9KjINC20LXRgtC60ZbQu9GW0LrRgtGWINC806nQu9GI0LXRgNC00LUg0LHQvtC70YPRiyDSr9GI0ZbQvSDQsNC90LDRgdGLINC20q/QutGC0ZbQu9GW0Log0YPQsNKb0YvRgtGL0L3QtNCwINC+0YHRiyDQtNOZ0YDRg9C80LXQvdCz0LUg0LHQsNC5INGC0LDSk9Cw0LzQtNCw0YDQtNGLINGC0rHRgtGL0L3Rg9GLINKb0LDQttC10YIsINGB0LXQsdC10LHRliDQvtC90YvSoyDQttC10YLQutGW0LvRltC60YHRltC3INCx0L7Qu9GD0Ysg0LbQsNKT0LTQsNC50YvQvdC00LAg0rHRgNGL0pvRgtCwINC+0YHRgtC10L7Qs9C10L3QtdC3INC00rHRgNGL0YEg0LbSr9GA0LzQtdC50LTRli4g0J3TmdGA0LXRgdGC0LXQtNC10LPRliDRgtC10YDRltC90ZbSoyDRgdC40L3RgtC10YLQuNC60LDQu9GL0psg0pvQsNGB0LjQtdGC0ZYgNiDQsNC50YvQtdC00LAg05nQu9GWINKb0LDQu9GL0L/RgtCw0YHQsCDSm9C+0LnQvNCw0LnQtNGLLCDRj9KT0L3QuCDRgdCw0YPQu9C10LvQtdGA0LTQtdC9INCy0LjRgtCw0LzQuNC9INGB0LjQvdGC0LXQt9GWINC00rHRgNGL0YEg0LbSr9GA0LzQtdC50LTRljsg0LbQsNC70Ysg0LHQsNC70LAg0LHSsdC7INGD0LDSm9GL0YLRgtCwINC606nQvyDQutKv0L0g0LrTqdC30ZbQvdC1INGI0YvSk9CwINC00LAg0LHQtdGA0LzQtdC50YLRltC90ZbQvSDQtdGB0LrQtdGA0YMg0LrQtdGA0LXQui4g0KHQsNC70LTQsNGA0YvQvdCw0L0g0LHQsNC70LDQvdGL0qMg0YLRltGA0LXQui3Sm9C40LzRi9C7INC20q/QudC10YHRliDQt9Cw0pvRi9C80LTQsNC70pPQsNC9LCDQvtKT0LDQvSDQlDMg0LLQuNGC0LDQvNC40L3RliDQsdC+0LvQvNCw0YHQsCDQodCwINCw0YHSm9Cw0LfQsNC9LdGW0YjQtdC6INC20L7Qu9C00LDRgNGL0L3QtNCwINC00rHRgNGL0YEg0YHRltKj0LHQtdGD0ZYg0LHRltGA0LTQtdC9INCx0ZbRgCDRgdC10LHQtdC/INCx0L7Qu9Cw0LTRiy4g0KHQvtC90YvSoyDQvdOZ0YLQuNC20LXRgdGW0L3QtNC1INC60LDQu9GM0YbQuNC5LdGE0L7RgdGE0L7RgCDQsNC70LzQsNGB0YPRiyDQsdKx0LfRi9C70LDQtNGLINCw0YDQsNGB0YvQvdC00LDSk9GLINC+0qPRgtCw0LnQu9GLINCx0LDQu9Cw0L3RgdGC0YvSoyDQsdC+0LvQvNCw0YPRi9C90LDQvSDRgdKv0LnQtdC60YLRltKjINGC0q/Qt9GW0LvRg9GWINC80LXQvSDRgNC10LfQvtGA0YbQuNGP0LvQsNC90YPRiyjRgNC10LzQvtC00LXQu9C00LXQvdGD0ZYpINC00rHRgNGL0YEg0LbSr9GA0LzQtdC50LTRliAtINGB0q/QudC10LrRgtC10YDQtNC1INC00LXRhNC+0YDQvNCw0YbQuNGP0LvQsNGAKNGB0LjRi9Kb0YHRi9C30LTQsNC90YPQu9Cw0YApINGC0YPRi9C90LTQsNC50YLRi9C9INCx0L7Qu9Cw0LTRiy4g0JXQvdC00ZYg0LHSsdC7INCx0L7Qu9C20LDQvNC00Ysg0LTQuNCw0LPQvdC+0LfQtNGLINC90LDSm9GC0YvQu9Cw0YMg0LzQsNKb0YHQsNGC0YvQvdC00LAg0pvQsNC90LTQsNKT0Ysg0KHQsCDQvNC10L0g0KDQtNC10qPQs9C10LnRliwg0JQzINCy0LjRgtCw0LzQuNC90ZYg0LTQtdKj0LPQtdC50ZYg0LDQvdGL0pvRgtCw0LvRg9GLINGC0LjRltGBIC0g0LrQu9C40L3QuNC60LDQu9GL0psg0pvQsNC9INCw0L3QsNC70LjQt9GWOyDQltKa0JA7INCW0JfQkCDQttOZ0L3QtSDQvdCw0pvRgtGLINGB0q/QudC10LrRgtC10YDQtNC10LPRliDRgNC10LfQvtGA0LHRhtC40Y8g0LzQtdC9INC80LjQvdC10YDQsNC70LTQsNC90YMg0LHQuNC+0YXQuNC80LjRj9C70YvSmyDQvNCw0YDQutC10YDQu9C10YDRliDQsNC90YvSm9GC0LDRgyDQttOp0L0g0LHQvtC70LDQtNGLOiDQvNGL0YHQsNC70YssINGB0ZbQu9GC0ZbQu9GWINGE0L7RgdGE0LDRgtCw0LfQsNC90YvSoyDQoNCw0YXQuNGCINCw0YPRgNGD0YvQvdC00LAg0LTQtdKj0LPQtdC50ZYg06nRgtC1INC20L7Sk9Cw0YDRiyDQsdC+0LvRi9C/INC60LXRgtC10LTRli4g0J7QtNCw0L0g0LHTqdC70LXQuiDQsdC40L7QvNCw0YDQutC10YDQu9C10YDQs9C1IC0g0pvRi9GI0pvRi9C7INGE0L7RgdGE0LDRgtCw0LfQsCwg0L7RgdGC0LXQvtC60LDQu9GM0YbQuNC9KNC00LXSo9Cz0LXQudGWINGC06nQvNC10L0g0LHQvtC70LDQtNGLIC0g0L7QuyDQvtGB0YLQtdC+0LjQtNGC0LDSk9GLINC+0YDRgtCw0LvRi9KbINC+0YHRgtC10L7QsNC/0LDRgtC40YLQv9C10L0gOTAg0L/QsNC50YvQtyDQvNOp0LvRiNC10YDQtNC1INCx0LDQudC70LDQvdGB0LAg0YLSsdGA0LDSm9GC0LDQvdC00YvRgNGD0YjRiyDSm9GL0LfQvNC10YLQutC1INC40LUpLCDQvtGB0YLQtdC+0L3QtdC60YLQuNC9INC20LDRgtCw0LTRiy4g0JHSsdC7INCx0rHQt9GL0LvRi9GB0YLRi9KjINKb0LDQvdGI0LDQu9GL0pvRgtGLINC00LXSo9Cz0LXQudC00LUg0LXQutC10L3RltC9INC+0YHRiyDQutOp0YDRgdC10YLQutGW0YjRgtC10YAg0LzTmdC90LTQtdGA0ZYg0LHRltC70YPQs9C1INC606nQvNC10Log0LHQtdGA0LXQtNGWLiDQntGB0Ysg0YLSsdGB0YLQsCDSm9C+0YHRi9C80YjQsCDRgNC10L3RgtCz0LXQvdC+0LPRgNCw0YTQuNGPINC30LXRgNGC0YLQtdGDINOZ0LTRltGB0ZbQvSDSm9C+0LvQtNCw0L3QsCDRgNC10L3RgtCz0LXQvdC+0LPRgNCw0LzQvNCw0L3RiyDQsdCw0pPQsNC70LDRgyDQsNGA0YLRi9KbINC10YLQv9C10LnQtNGWLi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9" table:style-name="ce1">
            <text:p>915239</text:p>
          </table:table-cell>
          <table:table-cell office:value-type="string" table:style-name="ce1">
            <text:p>kazakh</text:p>
          </table:table-cell>
          <table:table-cell office:value-type="string" table:style-name="ce1">
            <text:p>Билет 31.&amp;lt;br /&amp;gt; 1.Педиатрдың қабылдануында 1 жастағы бала. Қарағанда дәргер салыстырмалы жүрек түйықтығының шекараларын анықтаған. Салстырмалы жүрек тұйықтығының шекаралың атныз. &amp;lt;br /&amp;gt; 2.6 айлық бала, қарағанда сүйек жүйесінің пальпациясында анықтады: маңдай және төбе сүйектерінің төмпекшіктенуі,кеуденің деформациясын,рахиттік «тасбихтерді», «маржан тізбегі»,бүлшық ет тонусы төмен,тершен. Бүлшық ет тонусы төмен, буындары қійиілі жоғары.Шүйде аймағы тақырланған.Тершенді. Нерв-психиқалық дамуы қалыпты, физиқалық дамуы арта қалған. Қандай жүйе зақымдалған? Қандай лабораторлық зерттеулер жүргізу қажет.&amp;lt;br /&amp;gt;</text:p>
          </table:table-cell>
          <table:table-cell office:value-type="string" table:style-name="ce1">
            <text:p>MS3RgdKx0YDQsNKb0YLRi9KjINC20LDRg9Cw0LHRizrQn9C10LTQuNCw0YLRgNC00YvSoyDSm9Cw0LHRi9C70LTQsNGD0YvQvdC00LDSk9GLIDHQttCw0YHRgtCw0LPRiyDQsdCw0LvQu9Cw0L3Ri9KjINC20q/RgNC10Log0YLSsdC50YvSm9GC0YvSk9GL0L3Ri9KjINGI0LXQutCw0YDQsNC70LDRgNGL0L0g0YHQsNC70YvRgdGC0YvRgNC80LDQu9GLINC/0LXRgNC60YPRgdGB0LjRjyDQttCw0YHQsNGDINCw0YDSm9GL0LvRiyDQsNC90YvSm9GC0LDQudC00Ysu0JHQsNC70LDQu9Cw0YDQtNCwINC20q/RgNC10LrRgtGW0qMg0YHQsNC70YvRgdGC0YvRgNC80LDQu9GLINGB0L7Sk9GD0YvQvSDQsNC90YvSm9GC0LDRgyDQvdC10LPRltC90LXQvSAg0LbSr9GA0LXQuiDSm9Cw0L0g0YLQsNC80YvRgNC70LDRgCDQttKv0LnQtdGB0ZbQvdGW0qMg0LDQvdCw0YLQvtC80LjRj9C70YvSmy3RhNC40LfQuNC+0LvQvtCz0LjRj9C70YvSmyDQtdGA0LXQutGI0LXQu9GW0LrRgtC10YDRltC90LUg0LHQsNC50LvQsNC90YvRgdGC0Ysg0LHQvtC70LDQtNGLLtCe0LvQsNGAINC60LXQu9C10YHRltC00LXQuTrQodC+0Lsg0LbQsNKbINGI0LXQutCw0YDQsNGB0YstICDRgdC+0Lsg0LbQsNKbINC+0YDRgtCw0qPQs9GLINCx0rHSk9Cw0L3QsCDRgdGL0LfRi9Kb0YLQsNC9IDEtMiDRgdC8INGW0YjQutC1INKb0LDRgNCw0LkgLCA0LdKb0LDQsdGL0YDQs9Cw0LDRgNCw0LvRi9Kb0YLQsCAg0L7RgNC90LDQu9Cw0YHSm9Cw0L0u0J7SoyDQttCw0psg0YjQtdC60LDRgNCw0YHRiyDQvtKjINC20LDSmyDQutC10YPQtNC1INGB0YvQt9GL0pPRi9C90LDQvSzTmdC00LXRgtGC0LUg0L7SoyDQttCw0pvQvtGA0YLQsNKj0pPRiyDQsdKx0pPQsNC90LAg0YHRi9C30YvSk9GL0L3QsNC9IDQtNSDSm9Cw0LHRi9GA0pPQsNCw0YDQsNC70YvSm9GC0LAgINC+0YDQvdCw0LvQsNGB0pvQsNC9LtCW0L7Sk9Cw0YDSk9GLINGI0LXQutCw0YDQsNGB0YsgMi3Sm9Cw0LHRi9GA0pPQsNCw0YDQsNC70YvSsdGC0LAg0L7RgNC90LDQu9Cw0YHSm9Cw0L0uMdC20LDRgdCw0YAg0LHQsNC70LDQu9Cw0YDQtNCwINC20q/RgNC10Log0YHQsNC70YvRgdGC0YvRgNC80LDQu9GLINC20L7Sk9Cw0YDSk9GLINC+0YDQvdCw0LvQsNGB0pvQsNC9LtCU0LXQvdGWINGB0LDRgyDQsdCw0LvQsNC70LDRgNC00LAg0LbSr9GA0LXQuiDRiNC10LrQsNGA0LDQu9Cw0YDRiyDQutC10YPQtNC1INKb0YPRi9GB0YvQvdC00LDQs9GLINC20q/RgNC10LrRgtGW0qMg0L7RgNC90LDQu9Cw0YHRg9GL0L3QsCzQutC10YPQtNC1INKb0YPRi9GB0Ysg06nQu9GI0LXQvNC00LXRgNGW0L3RltKjINC205nQvdC1INC20q/RgNC10LrQv9C10L0g0YjQtdC60YLQtdGB0LrQtdC9INC80q/RiNC10LvQtdGA0LTRltKjINOp0LfQs9C10YDRg9GW0L3QtSDRgdOZ0LnQutC10YEg0LrQtdC70LXQtNGWLjxiciAvPg0KMi3RgdKx0YDQsNKb0YLRi9KjINC20LDRg9Cw0LHRizog0KHQuNC/0LDRgtGC0LDQu9KT0LDQvSDQsdC10LvQs9GW0LvQtdGAINGA0LDRhdC40YLRgtGW0L0g0YvSm9GC0LjQvNCw0Lsg0LTQuNCw0LPQvdC+0LfRi9C9INCx0L7Qu9C20LDQudC00Ysu0KDQsNGF0LjRgi3QsdKx0Lsg0YHSr9C50LXQutGC0LXRgNC00ZbSoyDQttKx0LzRgdCw0YDRg9GL0LvRi9C90LAg05nQutC10LvQtdGC0ZbQvSDQlCDQstC40YLQsNC80LjQvdGW0L3RltKjLNC60LDQu9GM0YbQuNC50LTRltKjINC20LXRgtGW0YHQv9C10YPRiNGW0LvRltCz0ZbQtdC9INC00LDQvNC40YLRi9C9INCw0YPRgNGLINCx0L7Qu9GL0L8g0YLQsNCx0YvQu9Cw0LTRiy7QkdKx0Lsg0LDRg9GA0YPQvNC10L0g0LbQsNGBINCx0LDQu9Cw0LvQsNGAINCw0YPRi9GA0LDQtNGLLtCh0q/QudC10Log0LbSr9C50LXRgdGW0L3QtNC10LPRliDTqdC30LPQtdGA0ZbRgdGC0LXRgCzRiNCw0LzQsNC00LDQvSDRgtGL0YEg0YLQtdGA0LvQtdGDLNGI0q/QudC00LUgINCx06nQu9GW0LPRltC90LTQtdCz0ZYg0YLQsNKb0YvRgNC70LDRgCzQvNCw0qPQtNCw0Lkg0LbTmdC90LUg0YLTqdCx0LUg0YHSr9C50LXQutGC0LXRgNGW0L3RltC90qMg0YLTqdC80L/QtdGI0ZbQutGC0LXQvdGD0ZYs0LrQtdGD0LTQtdC90ZbSoyDQtNC10YTQvtGA0LzQsNGG0LjRj9GB0Yss0LHSsdC70YjRi9Kb0LXRgiDRgtC+0L3Rg9GB0YvQvdGL0qMgINGC06nQvNC10L0g0LHQvtC70YPRiyAg0YDQsNGF0LjRgtC60LUg0YLTmdC9INCx0LXQu9Cz0ZbQu9C10YAg0LHQvtC70YvQvyDRgdCw0L3QsNC70LDQtNGLLtCk0LjQt9C40LrQsNC70YvSmyDQtNCw0LzRg9C00YvSoyDQutC10YjRltCz0YPRltC00LUg0YHQvtC7INC20LDSk9C00LDQudKT0LAg0LHQsNC50LvQsNC90YvRgSDQsdC+0LvRg9GLINC80q/QvNC60ZbQvS7QkdKx0Lsg0LHQsNC70LDQtNCwINGB0q/QudC10Log0LbTmdC90LUg0LHSsdC70YjRi9Kb0LXRgiDQttKv0LnQtdGB0ZYg0LfQsNKb0YvQvNC00LDQu9KT0LDQvS7QlNC40LDQs9C90L7Qt9C00Ysg0YDQsNGB0YLQsNGDINKv0YjRltC9INCa0LDQu9GM0YbQuNC5LNGE0L7RgdGE0L7RgCDQttOZ0L3QtSDQlCDQstC40YLQsNC80LjQvdGW0L3RltKjINC00LXSo9Cz0LXQudGW0L0g06nQu9GI0LXRg9Cz0LUg0LDRgNC90LDQu9KT0LDQvSDSm9Cw0L0g0LDQvdCw0LvQuNC30ZYg0LbTmdC90LUg0YHSr9C50LXQuiDRgtGL0pPRi9C30LTRi9KT0Ysg0LzQtdC9INKb0rHRgNGL0LvRi9C80YvQvSDQsdCw0pPQsNC70LDRgyDSr9GI0ZbQvSDRgNC10L3RgtCz0LXQvSDRgdOZ0YPQu9C10LvQtdGA0ZYg0YHQuNGP0pvRgtGLINC30LXRgNGF0LDQvdCw0LvRi9KbINC30LXRgNGC0YLQtdGD0LvQtdGAINKb0LDQttC10YIg0LHQvtC70LDQtNGLLtCh0L7QvdC00LDQuSDQsNKbINC+0LHRitC10LrRgtC40LLRgtGWINC30LXRgNGC0YLQtdGDINOZ0LTRltGB0ZY6INCx0rHQuyDRgtC10LrRgdC10YDRltC/INKb0LDRgNCw0YPQtNGL0qMg0LDQu9C00YvQvdCw0L0s0LDRgNGC0YvQvdCw0L0g0LbTmdC90LUg0LHSr9C50ZbRgNGW0L3RltC10L0g0pvQsNGA0LDRgyDQsNGA0pvRi9C70Ysg0LfQtdGA0YLRgtC10YMg0LbSr9GA0LPRltC30LXQtNGWLtCQ0LvQtNGL0L3QsNC9INKb0LDRgNCw0pPQsNC90LTQsDog0LHQsNGB0YLRi9KjLNC80L7QudGL0L3QvdGL0qMs0LrQtdGD0LTQtSDSm9GD0YvRgdGL0L3Ri9KjLNKb0L7Quy3QsNGP0pvRgtCw0YDQtNGL0qMg0L/RltGI0ZbQvdGW0L0s0pvQsNC70L/Ri9C9LNC00LXQvdC1INC/0YDQvtC/0L7RgNGG0LjRj9GB0YvQvdGL0L0g0LDQvdGL0pvRgtCw0LnQtNGLLtCQ0YDRgtGL0L3QsNC9INKb0LDRgNCw0pPQsNC9INC60LXQt9C00LU6INC+0LzRi9GA0YLQutCwINC20L7RgtCw0YHRi9C90YvSoyDRhNC+0YDQvNCw0YHRi9C9LNC+0L3Ri9KjINKb0LjRgdCw0LnQs9Cw0L3QtNGL0LPRi9C9LNC40YvSmyDQv9C10L0g0LbQsNGD0YvRgNGL0L3Ri9C90qMg0LTQtdKj0LPQtdC50ZbQvdC1INC205nQvdC1INCx0LXQuyDSsdGI0LHSsdGA0YvRiNGC0LDRgNGL0L3Ri9KjINGB0LjQvNC80LXRgtGA0LjRj9C70YvSk9GL0L3QsCDQutOp0qPRltC7INCw0YPQtNCw0YDQsNC00Ysu0JHSr9C50ZbRgNGW0L3QtdC9INKb0LDRgNCw0pPQsNC9INC60LXQt9C00LU6INCW0LDQvNCx0LDRgSDQtdKj0ZbRgdGW0L0s0Y/Sk9C90Lgg0LHQtdC7INC70L7RgNC00L7Qt9GL0L3Ri9KjINC005nRgNC10LbQtdGB0ZbQvSDSm9Cw0YDQsNC50LTRiyzRgdC+0L3Ri9C80LXQvSDSm9Cw0YLQsNGAINC20LDQvNCx0LDRgdC/0LXQvSDQsNGP0pvRgtCw0YDQtNGL0qMg0LDRgNCw0pvQsNGC0L3QsNGB0YvQvSDRgtC10LrRgdC10YDQtdC00ZYs0L7QvNGL0YDRgtKb0LAg0LbQvtGC0LDRgdGL0L3Ri9KjINC40ZbRgNGW0LzQtNC10YDRltC9LNCx0YPRi9C90LTQsNGA0LTRi9KjINCx0q/Qs9GDINC205nQvdC1INC20LDQt9GL0LvRgyDQsdKx0YDRi9GI0YLQsNGA0YvQvSDQsdCw0pPQsNC70LDQudC00Ysu0JHQsNC70LDQvdGL0qMg0LbRi9C90YvRgdGC0YvSmyDQttC10YLRltC70YPRltC90LUg0LTQtdC50ZbQvdCz0ZYg0LrQtdC30LXSo9C00LXQs9GWINCx0LjQvtC70L7Qs9C40Y/Qu9GL0psg0LbQtdGC0ZbQu9GD0ZbQvSDRgdC40L/QsNGC0YLQsNC50YLRi9C9INC60YDQuNGC0LXRgNC40LnQu9C10YAg0LrTqdC/0YLQtdCz0LXQvSDRgdKv0LnQtdC60YLQtdGA0LTRltKjINGB0q/QudC10LrRgtC10L3Rg9GWINC606nRgNGB0LXRgtC60ZbRiNGC0LXRgNGW0L0o0YHRg9C50LXQuiDQttCw0YHRiyks0LHQsNGB0YLQsNC/0pvRiyDQttOZ0L3QtSDRgtKx0YDQsNKb0YLRiyDRgtGW0YHRgtC10YDQtNGW0qMg0YHQsNC90YssINC00LXQvdC1INKx0LfRi9C90LTRi9KT0Ysg0LbTmdC90LUg0L/RgNC+0L/QvtGA0YbQuNC90LDQu9C00YvSk9GLLNC20YvQu9C00YvSmyDTqdGB0YPRliDQsNGA0YLQsNC00Ysu0JbQsNGB06nRgdC/0ZbRgNGW0LzQtNC10YDQtNC1INCx0rHQuyDQutOp0YDRgdC10YLQutGW0YjRgtC10YDQs9C1INC20YvQvdGL0YHRgtGL0Log0LbQtdGC0ZbQu9GDINC60LXQt9C10qPRltC9INCx0LDSk9Cw0LvQsNGDINC20LDRgtCw0LTRiy7QotGW0YDQtdC6INKb0LjQvNGL0Lsg0LDQv9C/0LDRgNCw0YLRi9C9INC20LDQuSDQutKv0LnRltC9INC+0LHRitC10LrRgtC40LLRgtGWINKb0LDRgNCw0YPQtNGLINGA0LXQvdGC0LPQtdC90LTRltC6INC30LXRgNGC0YLQtdGDINC205nQvdC1INC80LjQvdC10YDQsNC70LTRiyDQt9Cw0YIg0LDQu9C80LDRgdGD0LTRiywo0Y/Sk9C90Lgg0pvQsNC9INGB0LDRgNGL0YHRg9GL0L3QtNCw0pPRiyzQvdC10YHQtdC/0YLQtdCz0ZYg0LrQsNC70YzRhtC40LnQtNGW0qMs0YTQvtGB0YTQvtGA0LTRi9KjINC205nQvdC1INC80LDQs9C90LjQudC00ZbSoyDQtNC10qPQs9C10LnRltC9KSDQt9C10YDRgtGC0LXRgyDQtNC10YDQtdC60YLQtdGA0ZbQvNC10L0g0YLQvtC70YvSm9GC0YvRgNGD0LPQsCDQsdC+0LvQsNC00Ys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51" table:style-name="ce1">
            <text:p>1066851</text:p>
          </table:table-cell>
          <table:table-cell office:value-type="string" table:style-name="ce1">
            <text:p>kazakh</text:p>
          </table:table-cell>
          <table:table-cell office:value-type="string" table:style-name="ce1">
            <text:p>Билет 31.&amp;lt;br /&amp;gt; 1.Педиатрдың қабылдануында 1 жастағы бала. Қарағанда дәргер салыстырмалы жүрек түйықтығының шекараларын анықтаған. Салстырмалы жүрек тұйықтығының шекаралың атныз. &amp;lt;br /&amp;gt; 2.6 айлық бала, қарағанда сүйек жүйесінің пальпациясында анықтады: маңдай және төбе сүйектерінің төмпекшіктенуі,кеуденің деформациясын,рахиттік «тасбихтерді», «маржан тізбегі»,бүлшық ет тонусы төмен,тершен. Бүлшық ет тонусы төмен, буындары қійиілі жоғары.Шүйде аймағы тақырланған.Тершенді. Нерв-психиқалық дамуы қалыпты, физиқалық дамуы арта қалған. Қандай жүйе зақымдалған? Қандай лабораторлық зерттеулер жүргізу қажет.&amp;lt;br /&amp;gt;</text:p>
          </table:table-cell>
          <table:table-cell office:value-type="string" table:style-name="ce1">
            <text:p>MS7QltKv0YDQtdC60YLRltKjINGB0LDQu9GL0YHRgtGL0YDQvNCw0LvRiyDRgtKx0LnRi9Kb0YLQsNGA0Ysg0L7QuyDQsdCw0LvQsNC70LDRgNC00LAg0LXRgNC10YHQtdC60YLQtdGA0LPQtSDSm9Cw0YDQsNKT0LDQvdC00LAgINC60ZbRiNC60LXQvdGC0LDQv9C5ICAs06nQudGC0LrQtdC90ZYg0LHQsNC70LAg0LrQtdGD0LTQtdGB0ZYg0LTQtdC90LXQvdGW0qMg0LrTqdC/INCx06nQu9GW0LPRltC9INCw0LvRi9C/INC20LDRgtGL0YAg0LbTmdC90LUg0LXRgNC10YHQtdC60YLQtdGA0LPQtSDQutCw0YDQsNKT0LDQvdC00LAg0LrRltGI0LrQtdC90YLQsNC5LCDQntKj0pPQsCDSm9Cw0YDQsNC5IC3RgtOp0YEg0YHSr9C50LXQs9GW0L3RltKjINGI0LXRgtGWINCx0L7Qu9Cw0LTRiyzQvtGA0YLQsNKj0pPRiyDQsdKx0pPQsNC90LAg0YHRi9C30YvSk9GL0L3QsNC9INGB0L7Qu9KT0LAgLNC20L7Sk9Cw0YDRiyDSm9Cw0YDQsNC5IDMg0pvQsNCx0YvRgNKT0LAg0LDRgNCw0LvRi9Kb0YLQsCDRgtC+0LzQtdC90LPQtSDQutCw0YDQsNC5INC60LXRg9C00LXQs9C1INC00LXQudGW0qMg0LbSr9GA0LPRltC30ZbQu9C10LTRliAs0KHQvtC7INC20LDSmyDRiNC10LrQsNGA0LDRgdGLINC20q/RgNC10Log0YLSr9GA0YLQutGW0YHRltC90LXQvSAxLTIg0YHQsNC90YLQuNC80LXRgNGC0YAg0YHRi9GA0YLSm9CwINC20q/RgNCz0ZbQt9GW0LvQtdC00ZYg0L7QuyA1INKb0LDQsdGL0YDSk9CwINGC0rHRgdGL0L3QtNCwINCx0L7Qu9Cw0LTRiywg0J7SoyDQttCw0psg0pvQsNCx0YvRgNKT0LDRgdGLIGxpbmVhIHBhcmVzdGVybmFsaXMg0LHQvtC70LDQtNGLLCAg0YHQsNC70YvRgdGC0YvRgNC80LDQu9GLINC20q/RgNC10Log0YLSr9C50YvSm9GC0YvSk9GL0L0g0L/QtdGA0LrRg9GB0YHQuNGPINCw0YDSm9GL0LvRiyDRgtCw0LHRi9C70LDQtNGLLNCd0LXQs9GW0LfRltC90LTQtSDQttKv0YDQtdC6INGC0rHQudGL0pvRgtGL0pPRi9C90YvSoyDRiNC10LrQsNGA0LDRgdGLINC20q/RgNC10LrRgtGW0L0g0L7RgNC90LDQu9Cw0YHRg9GL0L0g0LDQvdGL0pvRgtCw0YPSk9CwINC80q/QvNC60ZbQvdC00ZbQuiDQsdC10YDQtdC00ZYs0LbTmdC90LUg0L7QvdGL0qMg0LrQvtC90YLRg9GA0YvQvSDQutOp0LvQtdC80ZbQvSzTqdC70YjQtdC80ZbQvSDQsNC90YvSm9GC0LDRg9KT0LAg0LrTqdC80LXQs9GW0L0g0YLQuNCz0ZbQt9C10LTRli7QltOZ0L3QtSDQutC10YPQtNC1INGC0L7RgNGL0L3QtNCwINKb0LDQu9Cw0Lkg0L7RgNC90LDQu9Cw0YHSm9Cw0L3Ri9KjIDEg0LbQsNGB0YLQsNKT0Ysg0LHQsNC70LDQtNCw0L0g0LDQvdGL0LrRgtCw0YPRi9C80YvQt9KT0LAg0LrTqdC80LXQuiDQsdC10YDQtdC00ZYs0LHSsdC7INC+0L3Ri9KjINC00LXQvdGB0LDRg9C70YvSk9GL0L3Ri9KT0L0g0LrQsNC70YvQv9GC0Ysg0LXQutC10L3QtNGW0LPRltC00LUg0LbTmdC90LUg0LrQtdGD0LTQtSDQvNC10L0g0LbSr9GA0LXQutGC0LUg06nQt9Cz0LXRgNGW0YEg0LbQvtKb0YLRi9KT0YvQvSDQsNC90YvSm9GC0LDRg9GL0YHRi9C30LPQsNC606nQvyDQutOp0LzQtdCz0ZbQvSDRgtC40LPRltC30LXQtNGWLCA8YnIgLz4NCjIuINCd0LXQs9GW0LfRltC90LTQtSDQsdC10YDRltC70LPQtdC90ZbQvdC00LUg0YDQsNGF0LjRgtGC0YvQvSDRi9Kb0YLQuNC80LDQuyDQtNC40LDQs9C90L7Qt9GL0L0g0LHQvtC70LbQsNC50LzRi9C3LCDTqdC50YLQutC10L3RliDQsdKx0Lsg0LbQtdGA0LTQtSDRgdKv0LnQtdC6INC20q/QudC10YHRliAg0LbTmdC90LUg0LHSsdC70YjRi9Kb0LXRgiDRgtC+0L3Rg9GB0YvQvdGL0qMg0YLTqdC80LXQvdC00LXQs9C10L3RltKjICwg0LzQsNKj0LTQsNC5INC205nQvdC1INGC06nQsdC1INGB0q/QudC10LrRgtC10YDRltKj0ZbSoyDRgtOp0LzQv9C10YjRltC60YLQtdC90YPRliDQutC10YPQtNC10L3RltKjINC30LDSm9GL0LzQtNCw0LvSk9Cw0L3Ri9KjINCx0LDQudKb0LDRg9GL0LzRi9C30pPQsCDQsdC+0LvQsNC00Yss0LbTmdC90LUg0LzQsNKj0YvQt9C00Ysg0YDQsNGF0LjRgtGC0ZbQuiDRgtCw0YHQsdC40YXRgtC10YDRliwg0LzQsNGA0LbQsNC9INGC0ZbQt9Cx0LXQs9GWINGB0LXQutGW0LvQtNGWINCx0LXQu9Cz0ZbQu9C10YDQtNGWINC606nRgNGD0ZbQvNGW0LfQs9C1INCx0L7Qu9Cw0LTRiyzQttOZ0L3QtSA2INCw0LnQu9GL0psg0LHQsNC70LAg0YLQtdGA0YjQtdC9LNCx0rHQu9GI0YvSm9C10YIg0YLQvtC90YPRgdGLINGC06nQvNC10L0g0LHRg9GL0L3QtNCw0YDRi9C90LTQsCDTqdC30LPQtdGA0ZbRgSDQsdCw0YAu0LHSsdC7INC20LXRgNC00LUg0LHSsdC70YjRi9Kb0LXRgi0g0YHSr9C50LXQuiDQttKv0LnQtdGB0ZbQvdGW0qMg0LfQsNKb0YvQvNC00LDQu9KT0LDQvdGL0qMg0LHQsNC50pvQsNC5INCw0LvQsNC80YvQty7QltOZ0L3QtSDRgNCw0YXQuNGCINC60LXQt9GW0L3QtNC1INC60LDQu9GM0YbQuNC5LCDRhNC+0YHRhNC+0YAg0YHQtdC60ZbQu9C00ZYg0Y3Qu9C10LzQtdC90YLRgtC10YAg0YHRg9C50LXQuiDRgtGW0L3RltC90LTQtSDQsNC30LDRj9C00Yss0JQg0LTTmdGA0YPQvNC10L3RltC90ZbSoyDQttC10YLQutGW0LvRltC60YHRltC30LTRltCz0ZbQvSDQsdCw0LnSm9Cw0LnQvNGL0Lcs0YHQvtC90YvQvSDRgdC10LHQtdCx0ZbQvdC10L0g0YHSr9C50LXQutGC0LXRgNC00LUg0LTQtdGE0L7RgNC80LDRhtC40Y8g0LHQtdC70LPRltC70LXRgNGW0L0g0LHQsNC50pvQsNC50LzRi9C3LNGB0L7QvdGL0L0g0YHQtdCx0LXQsdGW0L3QtdC9INGE0LjQt9C40LrQsNC70YvSmyDQtNCw0LzRg9C00YvQvSDQsNGA0YLRgtCwINKb0LDQu9GD0YvQvSDQsdCw0LnSm9Cw0LnQvNGL0Lcs0YDQsNGF0LjRgiDQutC10LfRltC90LTQtSDQvdC10YDQsi3Qv9GB0LjRhdC40LrQsNC70YvSmyDQttKv0LnQtSDSm9Cw0LvRi9C/0YLRiyDQsdC+0LvRi9C/INC60LXQu9C10LTRlizQsdGD0YvQvdC00LDRgNC00LAg0LTQsCDTqdC30LPQtdGA0ZbRgdGC0LXRgNC00ZYg0LHQsNC50pvQsNC50LzRi9C3LNCh0L7QuyDRgdC10LHQtdC/0YLQtdC9INC70LDQsdC+0YDQsNGC0L7RgNC70YvSmyDQt9C10YDRgtGC0LXRg9C70LXRgNCz0LUg0LrQtdC70LXRgtGW0L0g0LHQvtC70YHQsNKbLNC20LDQu9C/0Ysg0pvQsNC9INCw0L3QsNC70LjQt9GW0L0g0LDQu9Cw0LzRi9C3LCDQsdC40L7RhdC40Y8g0LDQvdCw0LvQuNC30ZbQvSDQsNC70LDQvNGL0LcgLNC+0Lsg0LbQtdGA0LTQtdC9INGE0L7RgdGE0LDRgiDQv9C10L0g0LrQsNC70YzRhtC40Lkg0LbTmdC90LUg0JQg0LTTmdGA0YPQvNC10L3RltC9INC00LXQvdCz0LXQudGW0qMg0LDQvdGL0pvRgtCw0YMg0LrQtdGA0LXQuiDQsdC+0LvQsNC00Yss0JXQvdC00ZYg0J7QsdC10LrRgtC40LLRgtGWINKb0LDRgNCw0YPQtNGLINC20YPRgNCz0ZbQt9GB0LXQuiDQsdC+0LvQsNC00YssINC+0Lsg0LbQtdGA0LTQtSDQv9Cw0YbQuNC10L3RgtGC0ZYg0LDQu9C00YvQvdCw0L0g0LDRgNGC0YvQvdCw0L0g0LbQsNC90YvQvdCw0L0g0LrQsNGA0LDRgyDQsNGA0pvRi9C70Ysg0YHSr9C50LXQutGC0LXRgNC00ZbSoyDQtNC10YTQvtGA0LzQsNGG0LjRj9GB0YvQvSzRj9KT0L3QuCDQsNC70LTRi9C90LDQvSDSm9Cw0YDQsNKT0LDQvdC00LAg0LHQsNGB0YLRiyzQutC10YPQtNC10L3RliDQvNC+0LnRi9C90LTRiyAs0LrQvtC7INCw0Y/Sm9GC0LDRgNC00Ysg0LrQsNGA0LDRgyzQsNGA0YLRi9C90LDQvSDQsNGA0pvQsCDQvtC80YvRgNGC0LrQsNC90Ysg0L7QvdGL0L0g0LrQuNGB0LDQudGD0Ysg0LHQsNGA0LzQsCDQttC+0LrQv9CwINGB0L7QvdGLINKb0LDRgNCw0YMs0LbQsNC90YvQvdCw0L0g0LbQsNC90LHQsNGBINC10qPRltGB0ZbQvSDQutCw0YDQsNGDINGP0pPQvdC4INCx0LXQuyDQu9C+0YDQtNC+0LfRi9C90L3Ri9KjINC005nRgNC10LbQtdGB0ZbQvSDQutCw0YDQsNGDINCx0L7Qu9GL0L8g0YLQsNCx0YvQu9Cw0LTRiywg0JHQsNC70LDRgNC00YvQvSDRgdGD0LnQtdC6INCx0YPRi9C9INC20q/QudC10YHRltC9INC30LXRgNGC0YLQtdGD0LTQtSDQtdC9INCw0LvQtNGL0LzQtdC9INGC0ZbRgdGC0LXRgNC00ZbSoyDSm9Cw0Lkg0YPQsNKb0YvRgtGC0LAg0YjRi9Kb0pvQsNC90Ysg0L7Qu9Cw0YDQtNGL0L0g0YHQsNC90YsgLNCx0L7QudC00YvQvSDSsdC30YvQvdC00YvSk9GLLNC+0L3Ri9KjICDQv9GA0L7Qv9C+0YDRhtC40Y/RgdGL0L0s0YHQsNC70LzQsNKb0YLRiywg0LbTmdC90LUg0LbRi9C70LTRi9KbINOp0YHRg9GL0L0g0pvQsNGA0LDRgdGC0YvRgNCw0LzRi9C3LNC205nQvdC1INCx0rHQuyDQutOp0YDRgdGC0LrRltGI0YLQtdGAINC20YvQvdGL0YHRgtGL0psg0LbQtdGC0ZbQu9GDINC20LDRgdGL0L3QtNCwINKb0LDQudGC0LAg0pvQsNGA0LDQu9Cw0LTRiywg0KLRltGA0LXQuiDSm9C40LzRi9C7INC30LXRgNGC0YLQtdGD0LvQtdGA0ZbQvdC00LUg0L3QtdCz0ZbQt9GWINKb0L7Qu9C00LDQvdGL0LvQsNGC0YvQvSDRgNC10L3Qs9C10L0g0LHQvtC70YvQvyDRgtCw0LHRi9C70LDQtNGLLCDQttOZ0L3QtSDQutGCICzQvNC40L3QtdGA0LDQu9C00Ysg0LfQtdGA0YLRgtC10YPQu9C10YAg0LbSr9GA0LPRltC30ZbQu9C10LTRlizRj9KT0L3QuCDQutCw0L0g0YHQsNGA0YvRgdGD0Yss0pvQsNC9INCx0LjQvtGF0LjQvNC40Y/RgdGLINGB0LXQutGW0LvQtNGWINC30LXRgNGC0YLQtdGD0LvQtdGAINCw0LvRi9C90LDQtNGLLNC205nQvdC1INC00LUg0L/QsNC70L/QsNGG0LjRjyDQv9C10YDQutGD0YHRgdC40Y8g0LDRgNKb0YvQu9GLINCw0L3Ri9Kb0YLQsNGD0pPQsCDQsdC+0LvQsNC00YssINC+0YHRi9C70LDRgCDQsNGA0pvRi9C70Ysg0YLRltGA0LXQuiDSm9C40LzRi9C7INC20q/QudC10YHRltKjINC30LXRgNGC0YLQtdC5INCw0LvQsNC80YvQtyzQttOZ0L3QtSDQsdCw0pPQsNC90LDSk9GLINCw0LnRgtGL0L8g0LrQtdC60LXQvdC10Lkg0YDQsNGF0LjRgiDQsdCw0YAg0LzQsCDQttC+0psg0L/QsCDQvtC90YvQtNCwINC60LDRgNCw0YHRgtGL0YDQsCDQsNC70LDQvNGL0Lcu0KHRg9C50LXQuiDQttKv0LnQtdGB0ZbQvdGW0qMg0LfQsNKb0YvQvNC00LDQu9GD0YvQvdCw0L0g0YTQuNC30LjQutCw0LvRi9C6INC20LXRgtGW0LvRgyDQsNGA0YLRgtCwINC60LDQu9Cz0LDQvSAs0LbTmdC90LUg0LHQsNGB0YvQvdC00LAg0LbTmdC90LUg0LTQtSDQutC10YPQtNC10YHRltC90LTQtSDTqdC30LPQtdGA0ZbRgdGC0LXRgCDQsdCw0YA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42" table:style-name="ce1">
            <text:p>1067042</text:p>
          </table:table-cell>
          <table:table-cell office:value-type="string" table:style-name="ce1">
            <text:p>kazakh</text:p>
          </table:table-cell>
          <table:table-cell office:value-type="string" table:style-name="ce1">
            <text:p>Билет 31.&amp;lt;br /&amp;gt; 1.Педиатрдың қабылдануында 1 жастағы бала. Қарағанда дәргер салыстырмалы жүрек түйықтығының шекараларын анықтаған. Салстырмалы жүрек тұйықтығының шекаралың атныз. &amp;lt;br /&amp;gt; 2.6 айлық бала, қарағанда сүйек жүйесінің пальпациясында анықтады: маңдай және төбе сүйектерінің төмпекшіктенуі,кеуденің деформациясын,рахиттік «тасбихтерді», «маржан тізбегі»,бүлшық ет тонусы төмен,тершен. Бүлшық ет тонусы төмен, буындары қійиілі жоғары.Шүйде аймағы тақырланған.Тершенді. Нерв-психиқалық дамуы қалыпты, физиқалық дамуы арта қалған. Қандай жүйе зақымдалған? Қандай лабораторлық зерттеулер жүргізу қажет.&amp;lt;br /&amp;gt;</text:p>
          </table:table-cell>
          <table:table-cell office:value-type="string" table:style-name="ce1">
            <text:p>MS3QodKx0YDQsNKbINC20LDRg9Cw0LHRiyA8YnIgLz4NCtCh0LDQu9GL0YHRgtGL0YDQvNCw0LvRiyDQttKv0YDQtdC6INGC0rHQudGL0pvRgtGL0pPRi9C90YvSoyDRiNC10LrQsNC70LDRgNGLIDEg0LbQsNGB0YLQsNKT0Ysg0LHQsNC70LAg0q/RiNGW0L0g0pvQsNC70YvQv9GC0Ysg0L3QvtGA0LzQsNC00LAtPGJyIC8+DQrQntKjINGI0LXQutCw0YDQsNGB0YsgLdGC06nRgSDRgdKv0LnQtdCz0ZbQvdGW0qMg0L7SoyDQttCw0psg0LbQuNC10LPRliDQsdC+0LnRi9C90LTQsCA0LdGI0ZYg0pvQsNCx0YvRgNKT0LAg0LTQtdKj0LPQtdC50ZbQvdC00LUuINCh0L7QuyDQttCw0psg0YjQtdC60LDRgNCw0YHRiyDQsdKx0pPQsNC90LAg0L7RgNGC0LAg0YHRi9C30YvSk9GL0L3QsNC9INGW0YjQutC1INC60LDRgNCw0LkgMS0yINGB0LwgNS3RiNGWINKb0LDQsdGL0YDSk9CwINC00LXQvdCz0LXQudGW0L3QtNC1INC+0YDQvdCw0LvQsNGB0LrQsNC9IC4g0JbQvtKT0LDRgNKT0Ysg0YjQtdC60LDRgNCw0YHRiyAt0q/RiNGW0L3RiNGWINKb0LDQsdGL0YDSk9CwINC00LXSo9Cz0LXQudGW0L3QtNC1INGC06nRgSDRgdKv0LnQtdC60YLRltC9INGB0L7QuyDQttCw0psg0LbQuNC10LPRliDQsdC+0LnRi9C90LTQsCDQvtGA0L3QsNC70LDRgdC60LDQvSAuIDxiciAvPg0K0JbQsNC70L/RiyDQv9C10LTQuNCw0YLRgCDQtNOZ0YDRltCz0LXRgNC00ZbSoyDQvtGB0Ysg0YHQsNC70YvRgdGC0YvRgNC80LDQu9GLINC20q/RgNC10Log0YLSsdC50YvSm9GC0YvSk9GL0L3Ri9KjINGI0LXQutCw0YDQsNGB0YvQvSDQsNC90YvSm9GC0LDRgyDQvtKT0LDQvSAxINC20LDRgdGC0LDSk9GLICDQsdCw0LvQsNC90YvSoyAg0LbSr9GA0LXQs9GW0L3RltKjICDSsdC70pPQsNC50YPRiyDQvdC10LzQtdGB0LUg0LrRltGI0ZbRgNC10LPQtdC90ZbQvSDQsNC90YvSm9GC0LDRg9KT0LAgINC606nQvNC10Log0LHQtdGA0LXQtNGWLiA8YnIgLz4NCjIt0KHSsdGA0LDSmyDQttCw0YPQsNCx0YsgPGJyIC8+DQrQmtC70LjQvdC40LrQsNC70YvSmyDQsdC10LvQs9GW0LvQtdGA0ZbQvdC1INGB0q/QudC10L3QtSDQvtGA0YLRi9GA0LAgNi3QsNC50LvRi9KbINCx0LDQu9Cw0LTQsCDRgdKv0LnQtdC6INC20q/QudC10YHRltC90ZbSoyDQt9Cw0pvRi9C80LTQsNC70pPQsNC90YvQvSDQsNC90YvSmyDQsdCw0LnSm9Cw0YPSk9CwINCx0L7Qu9Cw0LTRiy7QntC70LDRgCDQutC10YPQtNC1INGC0L7RgNGL0L3Ri9KjINC00LXRhNC+0YDQvNCw0YbQuNGP0YHRiywg0LzQsNKj0LTQsNC5LdGC06nQsdC1INGB0q/QudC10LrRgtC10YDRltKjINGC06nQvNC/0LXRiNGW0LrRgtC10L3Rg9GWLCDSm9Cw0LHRi9GA0pPQsCDRgdKv0LnQtdC6INGI0LXQvNGW0YDRiNC10LrRgtC10YDRltC90ZbSoyDSsdC70pPQsNGO0Yss0LHSsdC70YjRi9KbINC10YIg0YLQvtC90YPRgdGLINGC06nQvNC10L0gLNCx0YPRi9C90LTQsNGA0Ysg0LHQvtGBINC40ZbQu9Cz0ZbRiCAs0YLQtdGA0YjQtdKj0LTRltC6ICwg0YjSr9C50LTQtSDQsNC50LzQsNKT0Ysg0YLQsNKb0YvRgNC70LDQvdKT0LDQvSzRhNC40LfQuNC60LDQu9GL0psg0LTQsNC80YPRiyDRgtC10LbQtdC70LPQtdC9LNCe0YHRiyDQutC70LjQvdC40LrQsNC70YvSmyDQutOp0YDRltC90ZbRgdGC0LXRgNCz0LUg0YHSr9C50LXQvdC1INC+0YLRi9GA0LAg0LHQvtC70LbQsNC80LTRiyDQtNC40LDQs9C90L7Qt9Kb0L7RjtKT0LAg0LHQvtC70LDQtNGLLiDQnNC10L3RltC8INC+0LnRi9C80YjQsCDQsdKx0Lsg0LHQtdC70LPRltC70LXRgCDQoNCw0YXQuNGCINCw0YPRgNGD0YvQvdCwINGB0LDQuSDQutC10LvQtdC00ZYuINCh0LXQsdC10LHRliDQsdKx0Lsg0LHQsNC70LDQtNCwLSDQlCDQtNOZ0YDRg9C80LXQvdGW0L3RltKjINC20LXRgtC60ZbQu9GW0LrRgdGW0LfQtNGW0LPRltC90LXQvSDQtNCw0LzQuNGC0YvQvSDQvNC10YLQvtCx0L7Qu9C40YLRgtGW0Log0LDRg9GA0YMg0LHQvtC70YvQvyDRgtCw0LHRi9C70LDQtNGLLtCh0L7QvdGL0LzQtdC9INKb0LDRgtCw0YAgNi3QsNC50LvRi9KbINCx0LDQu9Cw0LTQsCDQutCw0LvRjNGG0LjQuSDRhNC+0YHRhNC+0YAg0LDQu9C80LDRgdGDINC20q/QudC10YHRltKjINCx0rHQt9GL0LvRg9GL0L3QsNC9INC00LAg0YLRg9GL0L3QtNCw0YPRiyDQvNKv0LzQutGW0L0uIDxiciAvPg0K0JrQtdGA0LXQuiDQu9Cw0LHQvtGA0LDRgtC+0YDQu9GL0psg0LfQtdGA0YLRgtC10YPQu9C10YDQs9C1INCx0ZbRgNGW0YjRltC00LXQvS0g0pvQsNC90L3Ri9KjINCx0LjQvtGF0LjQvNC40Y/Qu9GL0psg0LDQvdCw0LvQuNC30ZYgLdGB0L7QvdGL0qMg0ZbRiNGW0L3QtNC1INC60LDQu9GM0YbQuNC5INGE0L7RgdGE0L7RgCDQvNC10L0g0LDQu9GELdGB0ZbQu9GC0ZbQu9GW0Log0YTQvtGB0YTQvtGC0LDQt9CwINC00LXSo9Cz0LXQudC70LXRgNGW0L0g0pvQsNGA0LDRgdGC0YvRgNGDINC60LXRgNC10LogLiDQnNGL0YHQsNC70pPQsCDQkNCb0KQtINGB0ZbQu9GC0ZbQu9GW0Log0YTQvtGB0YTQvtGC0LDQt9CwINC00LXSo9Cz0LXQudGWINGA0LDRhdC40YIg0LDRg9GA0YPRi9C90LTQsCDQsdGW0YDRiNCw0LzQsCDQutOp0L8g0LHQvtC70LDQtNGLLiDQldC60ZbQvdGI0ZbQtNC10L0tINC305nRgCDQsNC90LDQu9C40LfRliDQsNGA0pvRi9C70Ysg0LrQsNC70YzRhtC40Lkg0LzQtdC9INGE0L7RgdGE0L7RgNC00YvSoyDQt9OZ0YDQvNC10L0g0YjRi9KT0YMg0LzTqdC70LXRiNC10YDRltC9INCw0L3Ri9Kb0YLQsNGD0pPQsCDQsdC+0LvQsNC00Ysu0q7RiNGW0L3RiNGWLdKb0LDQvdC00LDSk9GLLSDQttCw0qPQsCDQt9C10YDRgtGC0LXRgyDRgtKv0YDRliDQntCdMjUg0LTQtdC/INCw0YLQsNC70LDRgtGL0L0g0JQg0LTTmdGA0YPQvNC10L0g0LTQtdKj0LPQtdC50ZbQvSDQsNC90YvSm9GC0LDQudC00YsuINCi06nRgNGC0ZbQvdGI0ZbQtNC10L0t0pvQsNC20LXRgiDQsdC+0LvSk9Cw0L0g0LbQsNKT0LTQsNC50LTQsCDQsNGP0pst0LrQvtC70LTRi9KjINGA0LXQvdCz0LXQvdC+0LPRgNCw0YTQuNGP0YHRi9C9INC20LDRgdCw0YPSk9CwINCx0L7Qu9Cw0LTRiy4g0JXQvdC00ZbQs9GWINC60LXQt9C10Log0LXQvNGW0L3QtSDRgtC+0pvRgtCw0LvQsNC00LAg0LrQtdGC0YHQtdC8INC20LDQu9C/0Ysg0LPQtdC70LjQvtGC0LXRgNCw0L/QuNGP0L3RiyDSsdGB0YvQvdGD0pPQsCDQsdC+0LvQsNC00YsuINGN0YLQuNC+0YLQtdGA0LDQv9C40Y8tINC20L7RjiDRgtC10YDQsNC/0LjRj9GB0Ysg0JQg0LTTmdGD0LzQtdC90ZYg0KXQvtC70LXQutC+0LrQsNC70YzRhtC10YTQtdGA0L7Qu9C80LXQvSDRgNCw0YXQuNGC0YLRltKjINGC0q/RgNC70LXRgNGW0L0g0LXQvNC00LXRg9Cz0LUg0LrTqdC80LXQuiDQsdC10YDQtdC00ZYu0JzRi9GB0LDQu9KT0LAg0L7RgNGC0LDRiNCwINC00LXQvdCz0LXQudC00LXQs9GWINGA0LDRhdC40YLRgtC1IDIwMDAtMzAwMCDRhdCxL9GC05nRgyDRgtOp0YDRgi0g0LDQu9GC0Ysg0LDQv9GC0LAsINCw0Lsg0LDRg9GL0YAg0LTQtdKj0LPQtdC50ZbQvdC00LUg0LTQvtC30LDRgdGL0L0g0LrSr9GI0LXQudGC0YMg0LDRgNC60YvQu9GLIDUwMDAg0YXQsS/RgtOZ0YMg0LTQtdC50ZbQvSDSm9Cw0LHRi9C70LTQsNGD0pPQsCDQsdC+0LvQsNC00YsuINCW0JDQu9C/0Ysg0LXQvCDQsNGP0pvRgtCw0LvSk9Cw0L0g0YHQvtKjINC/0YDQvtGE0LjQu9Cw0LrRgtC40LrQsNC70YvSmyDQtNC+0LfQsNKT0LAg0LrTqdGI0YMg0LrQtdGA0LXQuiDQvtC7INGI0LDQvNCw0LzQtdC9IDUwMC0xMDAwINGF0LEqL9GC05nRgyDSm9Kx0YDQsNC50LTRiy4g05jQtNC10YLRgtC1INCx0rHQuyDQtNC+0LfQsNKT0LAg0LrTqdGI0YMg0LrSr9C3INKb0YvRgSDQvNC10LfQs9GW0LvRltC90LTQtSDQsdC10YDRltC70LXQtNGWLjxiciAvPg0K</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93" table:style-name="ce1">
            <text:p>1067193</text:p>
          </table:table-cell>
          <table:table-cell office:value-type="string" table:style-name="ce1">
            <text:p>kazakh</text:p>
          </table:table-cell>
          <table:table-cell office:value-type="string" table:style-name="ce1">
            <text:p>Билет 31.&amp;lt;br /&amp;gt; 1.Педиатрдың қабылдануында 1 жастағы бала. Қарағанда дәргер салыстырмалы жүрек түйықтығының шекараларын анықтаған. Салстырмалы жүрек тұйықтығының шекаралың атныз. &amp;lt;br /&amp;gt; 2.6 айлық бала, қарағанда сүйек жүйесінің пальпациясында анықтады: маңдай және төбе сүйектерінің төмпекшіктенуі,кеуденің деформациясын,рахиттік «тасбихтерді», «маржан тізбегі»,бүлшық ет тонусы төмен,тершен. Бүлшық ет тонусы төмен, буындары қійиілі жоғары.Шүйде аймағы тақырланған.Тершенді. Нерв-психиқалық дамуы қалыпты, физиқалық дамуы арта қалған. Қандай жүйе зақымдалған? Қандай лабораторлық зерттеулер жүргізу қажет.&amp;lt;br /&amp;gt;</text:p>
          </table:table-cell>
          <table:table-cell office:value-type="string" table:style-name="ce1">
            <text:p>MS3RiNGWINGB0rHRgNCw0psg0LbQsNGD0LDQsdGL0L0g0L3QtdCz0ZbQt9C00LXQuSDQutC10YLQtdGC0ZbQvSDQsdC+0LvRgdCw0LwsINC20LDQu9C/0Ysg0LHQsNC70LDQu9Cw0YDQtNGL0qMg0YHQsNC70YvRgdGC0YvRgNC80LDQu9GLINC20q/RgNC10Log0YLSsdC50YvSmyDRiNC10LrQsNGA0LDQu9Cw0YDRi9C9INCw0L3Ri9Kb0YLQsNGDINCw0YDSm9GL0LvRiyDQsdCw0LvQsNC90YvSoyDQvdC10LPRltC30LPRliDQv9Cw0YLQvtC70L7Qs9C40Y8g0LHQsNGAINC20L7Sm9GC0YvSk9GL0L0g0L3QtdC80LXRgdC1INCw0pvQsNGD0LvRi9Kb0YLQsNGAINCw0L3Ri9Kb0YLQsNGDINCw0YDSm9GL0LvRiyDQttCw0YHQsNC70LDQtNGLLiDQltCw0LvQv9GLINCx0rHQuyDQv9C10YDQutGD0YHRgdC40Y8g0LDRgNKb0YvQu9GLINC20q/RgNC10Log0L7RgNC90LDQu9Cw0YHSm9Cw0L0g0LHTqdC70ZbQvNC00LXRgNGW0L0g0LDQvdGL0pvRgtCw0LnQtNGLLiDQkdKx0Lsg0YjQtdC60LDRgNCw0L3Ri9KjINC20L7Sk9Cw0YDSk9GLINGI0LXQutCw0YDQsNGB0YvQvSwg0L7SoyDQttCw0pvRgtCw0pPRiywg0LbTmdC90LUg0YHQvtC7INC20LDSm9GC0LDSk9GLINGI0LXQutCw0YDQsNC70LDRgNGLINCx0L7Qu9GL0L8g0LHTqdC70ZbQvdC10LTRli4gMSDQttCw0YHRgtCw0pPRiyDQsdCw0LvQsNC90YvSoyDQsdKx0Lsg0YjQtdC60LDRgNCw0LvQsNGA0YvQvSDQv9GA0LXQutGD0YHRgdC40Y8g0LDRgNKb0YvQu9GLINCw0L3Ri9Kb0YLQsNC50LTRiy4g0J3QtdCz0ZbQt9GWINCx0rHQuyDQv9C10YDQutGD0YHRgdC40Y8g0LXRgNC10YHQtdC60YLQtdGA0LTQtdC9INC10YDQtdC60YjQtdC70LXQvdGD0ZYg0LHQvtC70LDQtNGLLiDQkdKx0Lsg0L/QtdGA0LrRg9GB0YHQuNGPINC20LDQu9C/0Ysg0LbSr9GA0LXQutGC0ZbSoyDSm9Cw0YHRi9C90LTQsCDQvtGA0L3QsNC70LDRgdKb0LDQvSDQvdC10LzQtdGB0LUg0LbQsNKb0YvQvSDQvtGA0L3QsNC70LDRgdKb0LDQvSDRgtGW0L3QtNC10YDQtNGWINKx0YDRgyDQsNGA0pvRi9C70YssINGC0rHQudGL0pvRgtCw0LvSk9Cw0L0g0LTRi9Cx0YvRgdGC0Ysg0L3QtdCz0ZbQt9Cz0LUg0LDQu9Cw0YLRi9C9INCx0L7Qu9GL0L8g0LrQtdC70LXQtNGWLiDQkdKx0Lsg0LbSr9GA0LXQutGC0ZbSoyDQsNC90LDRgtC+0LzQuNGP0LvRi9KbINKb0rHRgNGL0LvRi9GB0YvQvdCwLCDRgdC+0L3Ri9C80LXQvSDSm9Cw0YLQsNGAINCx0LDQu9Cw0LvQsNGA0LTQsNKT0Ysg0LDQvdCw0YLQvtC80LjRjy3RhNC40LfQuNC+0LvQvtCz0LjRj9C70YvSmyDQtdGA0LXQutGI0LXQu9GW0LrRgtC10YDRliDQsNC90YvSm9GC0LDQu9Cw0LTRiy4gINCe0qMg0LbQsNKbINGI0LXQutCw0YDQsNGB0Ysg0YLQvtKb0YLQsNC70LDRgtGL0L0g0LHQvtC70YHQsNC8LCDQvtC7INGC06nRgSDRgdKv0LnQtdCz0ZbQvdC10L0g0L7SoyDSm9Cw0YDQsNC5IDEtMSw1INGB0Lwg0L7RgNC90LDQu9Cw0YHQsNGC0YvQvSDQsdC+0LvRi9C/INC60LXQu9C10LTRli4g0K/Sk9C90Lgg0LbSr9GA0LXQuiDSm9Kx0LvQsNKb0YjQsNGB0YvQvdCwINC20LDSm9GL0L0g0L7RgNC90LDQu9Cw0YHRg9GL0L3QsCDRgdOZ0LnQutC10YEg0LbQsNKb0LAg0pvQsNGA0LDQuS4g0JHSsdC7INCx0ZbQt9C00LUg0L7SoyDQttCw0psg0LbSr9GA0LXQutGI0LUg0LDQudC80LDSk9GL0L0g0LrTqdGA0YHQtdGC0LXQtNGWLiDQodC+0Lsg0LbQsNKbINGI0LXQutCw0YDQsNGB0YvQvdCw0L0g0LrQtdC70LXRgCDQsdC+0LvRgdCw0pssINCx0rHQuyDRgdC+0Lsg0LbQsNKbINCx0rHSk9Cw0L3QsCDRgdGL0LfRi9KT0YvQvdGL0qMg0L7RgNGC0LAg0YLTqdC80LXQvSDSm9Cw0YDQsNC5INC20q/RgNGW0L8g0LzQtdC00LjQsNC70LTRiyDRltGI0LrQtSDSm9Cw0YDQsNC5IDEtMSw1INGB0Lwg0L7RgNC90LDQu9Cw0YHQsNGC0YvQvSDQsdC+0LvRi9C/INC60LXQu9C10LTRli4g0JHSsdC7INCx0ZbQt9C00LUg0YHQvtC7INKb0LDRgNGL0L3RiNCwINCw0LnQvNCw0pPRiyDQtdC60LXQvdC00ZbQs9GW0L0g0LrTqdGA0YHQtdGC0LXQtNGWLiDQkNC7INC10L3QtNGWINC20L7Sk9Cw0YDSk9GLINGI0LXQutCw0YDQsNGB0YvQvdCwINC60LXQu9C10YAg0LHQvtC70YHQsNKbLCAyLdGI0ZYg0pvQsNCx0YvRgNKT0LDQsNGA0LDQu9GL0pvRgtCw0L0g0L7RgNC90LDQu9Cw0YHRi9C/LCDTqdC60L/QtSDQsNGA0YLQtdGA0LjRj9GB0YvQvNC10L0g0LbTmdC90LUg0YHQvtC7INC20LDSmyDQttKv0YDQtdC60YjQtdC80LXQvSwg0pvSsdC70LDSm9GI0LAg0LDQudC80LDSk9GL0L3QsCDRgdOZ0LnQutC10YEg0LHQvtC70YvQvyDQutC10LvQtdC00ZYuINCa0LXQuSDQutC10LfQtNC10YDRliDQsdCw0LvQsNC90YvSoyDQtdGA0LXQutGI0LXQu9GW0LPRltC90LUg0LHQsNC50LvQsNC90YvRgdGC0Ysg0LHQvtC70YvQvyDQutC10LvQtdC00ZYsINGP0pPQvdC4IDMt0YjRliDSm9Cw0LHRi9GA0pPQsNCw0YDQsNC70YvSm9Kb0LAg0YHTmdC50LrQtdGBINC60LXQu9C10LTRli4g0J3QtdCz0ZbQt9GWINC00LjQsNCz0L3QvtGB0YLQuNC60LDQu9GL0psg0LzQsNKj0YvQt9GL0L0g0LHQsNC50LvQsNC90YvRgdGC0Ysg06nQutC/0LUg0YLRltC90LTQtdGA0ZYg0LHQsNC70LDQu9Cw0YDQtNGL0qMg0LbSr9GA0LXQuiDQsdOp0LvRltC80ZbQvSDQutOp0L8g0LbQsNGD0YvQvyDQvtGA0L3QsNC70LDRgdCw0YLRi9C9INCx0L7Qu9GL0L8g0LrQtdC70LXQtNGWLiDQodC+0Lsg0YHQtdCx0LXQv9GC0LXQvSDRgdCw0LvRi9GB0YLRi9GA0LzQsNC70YvSmyDRgtKx0LnRi9Kb0YLQsNGDINGI0LXQutCw0YDQsNC70LDRgNGL0L0g0LDQvdGL0pvRgtCw0YMg0pvQuNGL0L0g0LHQvtC70YvQvyDQutC10LvQtdC00ZYuINCR0ZbRgNCw0psg0LHSsdC90Ysg0LDQvdGL0pvRgtCw0YMg0LHQsNC70LDQvdGL0qMg06nQvNGW0YDRltC90LTQtSDQvNCw0qPRi9C30LTRi9GA0LDSmyDQvtGA0YvQvSDQsNC70YvQvyDQutC10LvQtdC00ZYuINCV0LPQtdGAINC+0YHRiyDRiNC10LrQsNGA0LDQu9Cw0YDQtNCw0L0g0LDRg9GL0YLSm9GD0LvQsNGAINCx0L7Qu9Cw0YLRi9C9INCx0L7Qu9GB0LAsINCx0rHQuyDQsdCw0LvQsNC70LDRgNC00YvSoyDQttKv0YDQtdC6INCx06nQu9GW0LzQtNC10YDRltC90LTQtSDQsNKb0LDRg9C70YvSm9GC0LDRgCDQsdCw0YAg0LXQutC10L3QtNGW0LPRliDQsNC90YvSm9GC0LDQu9Cw0LTRiy4gPGJyIC8+DQrQldC90LTRliDQutC10LfQtdC6IDIt0YjRliDRgdKx0YDQsNKbINCx06nQu9GW0LzRltC90LUg0LbQsNGD0LDQvyDQsdC10YDQtSDQutC10YLRgdC10LwhINCR0LXRgNGW0LvQs9C10L0g0YHQuNC80L/RgtC+0LzQtNCw0YDSk9CwINCx0LDQudC70LDQvdGL0YHRgtGLINCx0LDQu9Cw0L3Ri9KjINC+0YDQs9Cw0L3QuNC30LzRltC90LTQtSDQlCDQstC40YLQsNC80LjQvdGW0L3RltKjINC20LXRgtGW0YHQv9C10YPRiNGW0LvRltCz0ZYg0L3QtdC80LXRgdC1INCg0JDRhdC40YIg0LDRg9GA0YPRi9C90LAg0LrSr9C00ZbQutGC0LXQvdGB0LXQuiDQsdC+0LvQsNC00YsuINCg0LDRhdC40YIg0LDRg9GA0YPRiyDQtNC10LPQtdC90ZbQvNGW0LcsINCx0rHQuyDQsNC00LDQvCDQvtGA0LPQsNC90LjQt9C80ZbQvdC00LUg0JQg0LbQtdGC0ZbRgdC/0LXRg9GI0ZbQu9GW0LPRltC90ZbSoyDRgdCw0LvQtNCw0YDRi9C90LDQvSDQtNCw0LzQuNGC0YvQvSDQsNGD0YDRgyDQsdC+0LvRi9C/INC60LXQu9C10LTRliwg0L3QtdC80LXRgdC1INC80LXRgtCw0LHQvtC70LjQutCw0LvRi9KbINCx0rHQt9GL0LvRgyDRgdCw0LvQtNCw0YDRi9C90LDQvSDQtNCw0LzQuNGC0YvQvSDQsNGD0YDRgy4g0JHSsdC7INCx0LDQu9Cw0L3Ri9KjINGC0ZbRgNC10Lot0pvQuNC80YvQuyDQttKv0LnQtdGB0ZbQvdC00LUg0LbTmdC90LUg0LHSsdC70YjRi9Kb0LXRgiDQsdOp0LvRltC80LTQtdGA0ZbQvdC00LUsINC20q/QudC60LUg0LbSr9C50LXRgdGW0L3QtNC1INCx0LXQu9GW0LPRltC70ZYg0LHSsdC30YvQu9GD0LvQsNGA0LTRi9KjINCx0LDRgCDQtdC60LXQvdC00ZbQs9GWINCw0L3Ri9Kb0YLQsNC70YvQvyDRgtKx0YAuINCh0L7QuyDRgdC10LHQtdC/0YLQtdC9INCx0LDQu9Cw0LTQsCDQsdGW0LfQtNC1INC+0YHRi9C90LTQsNC5INGB0LjQvNC/0YLQvtC80LTQsNGA0LTRi9KjINCx06nQu9GW0LzRliDQutOp0YDRltC90ZbRgSDRgtCw0YPRi9C/INC+0YLRi9GALiDQltCw0LvQv9GLINCUINCy0LjRgtCw0LzQuNC90ZYg0LHQsNC70LDQu9Cw0YDQtNGL0qMg06nQvNGW0YDRltC90LUg0LXSoyDSm9Cw0LbQtdGC0YLRliDQstC40YLQsNC80LjQvSDQsdC+0LvRi9C/INGB0LDQvdCw0LvQsNC00YsuINCd0LXQs9GW0LfQtNC10Lkg0LrQtdC70LUg0LHQsNC70LDQtNCwLCDQsdCw0LvQsNC00LAg0YHSr9C50LXQuiDQvNC40L3QtdGA0LDQu9C00LDRg9GL0L3Ri9KjINCx0rHQt9GL0LvRg9GLINC905nRgtC40LbQtdGB0ZbQvdC00LUg0YHSr9C50LXQuiDQsdOp0LvRltC80ZbQvdC00LUg0LTQtdGE0L7RgNC80LDRhtC40Y/Qu9Cw0YAg0LHQvtC70LDQtNGLLiDQodKv0LnQtdC60YLQtdGA0ZbQvdC00LUg0LbSsdC80YHQsNGA0YMsINGE0YDQvtC90YLQsNC70YzQtNGLINC205nQvdC1INC/0LDRgNC40LXRgtCw0LvQtNGLINGB0q/QudC10LrRgtC10YDRltC90LTQtSDRiNGL0pPRi9Kj0pvRiyDQsNC50LzQsNKb0YLQsNGAINC/0LDQudC00LAg0LHQvtC70pPQsNC90YvQvdC00LAg0LrTqdGA0YPRltC80ZbQt9Cz0LUg0LHQvtC70LDQtNGLLiDQldC90LTRltCz0ZYg0L7RgdGLINGB0LjQvNC/0YLQvtC80LTQsNGA0LTQsNC9INC60LXQudGW0L0sINC+0YHRiyDQsNGD0YDRg9C00Ysg0L3QsNKb0YvRgtCw0LvRgyDSr9GJ0ZbQvSDQvdCw0YPSm9Cw0YHSm9CwINC70LDQsdC+0YDRgtC+0YDQu9GL0psg0LfQtdGA0YLRgtC10YPQu9C10YAg0LbSr9GA0LPRltC30LXQvNGW0LcuINCc0YvRgdCw0LvSk9CwINCw0LvQsNGAINCx0L7Qu9GB0LDSmywg0JHQuNC+0YXQuNC80LjRjyDQttOZ0L3QtSDQltKa0JAg0LDQvdCw0LvQuNC30ZYg0LDRgNKb0YvQu9GLINKb0LDQvSDRgdCw0YDRi9GB0YPRi9C90LTQsNKT0Ysg0LrQsNC70YzRhtC40Lkg0LbTmdC90LUg0YTQvtGB0YTQvtGALCAyNS3Qs9C40LTRgNC+0LrRgdC40LLQuNGC0LDQvNC40L0g0JQg0LTQtdKj0LPQtdC50LvQtdGA0ZbQvdGW0qMg0YLTqdC80LXQvdC00LXQs9C10L0g0pvQsNGA0LDRg9GL0LzRi9C30pPQsCDQsdC+0LvQsNC00YsuINCQ0Lsg0YHRltC70YLRltC70ZbQuiDRhNC+0YHRhNCw0YLQsNC30LAg0LHSsdC7INC60LXQt9C00LUg0LbQvtKT0LDRgNC70LDSk9Cw0L0g0LrTqdGA0LXQvNGW0LcsINGP0pPQvdC4INGB0q/QudC10Log0YLRltC90ZbQvdGW0qMg0pvQsNC70YvQv9GC0LDRgdGD0YvQvdC00LDSk9GLINCw0pvQsNGD0LvQsNGA0LTRiyDQutOp0YDRltGD0ZbQvNGW0LfQs9C1INCx0L7Qu9Cw0LTRiy4g0prQsNC9INCz0LjQv9C+0LrQsNC70YzRhtC10LzQuNGP0pPQsCDQsdCw0LnQu9Cw0L3Ri9GB0YLRiyDQsdCw0LvQsNC90YvSoyDSm9Cw0L3Ri9C90LTQsCAg0L/QsNGA0LDRgtCz0L7RgNC80L7QvdGL0L3Ri9KjICDQtNC10qPQs9C10LnRliDQttC+0pPQsNGA0Ysg0LHQvtC70LDQtNGLLiDQkNC7INCx0rHQuyDQvdOZ0YLQuNC20LXQu9C10YAg0LDRgNKb0YvQu9GLINCx0LDQu9Cw0LTQsCDRgNCw0YXQuNGCINCw0YPRgNGDINCx0LDRgCDQtdC60LXQvdC00ZbQs9GW0L0g0YDQsNGB0YLQsNGD0YvQvNGL0LfSk9CwINCx0L7Qu9Cw0LTRiy4g0KHQvtC90YvQvNC10L0g0pvQsNGC0LDRgCDQttCw0LvQv9GLINC305nRgCDQsNC90LDQu9C40LfRltC90LTQtSDRhNC+0YHRhNC+0YDQvNC10L0g0LrQsNC70YzRhtC40Lkg0LTQtdKj0LPQtdC50ZbQvdGW0qMg0YLTqdC80LXQvSDQtdC60LXQvdC00ZbQs9GWINCw0YDSm9GL0LvRiyDQsNC90YvSm9GC0LDRg9GL0LzRi9C30pPQsCDQsdC+0LvQsNC00YsuINCh0L7QvdGL0LzQtdC9INKb0LDRgtCw0YAg0KDQtdC90YLQs9C10L3QvtCz0YDQsNGE0LjRjyDTmdC00ZbRgdGWINCw0YDSm9GL0LvRiyDQvNC10YLQsNGE0LjQt9C00LXRgNC00ZbSoyDQutC10qPQtdGO0ZYsICIg0YjRi9C90Ysg0LDRj9KbINGC05nRgNGW0LfQtNGWIiDSm9Kx0YDRi9C70YvQvNC00Ysg0LrTqdGA0LXQvNGW0LcuINCR0rHQuyDRgdKv0LnQtdC60YLQtdGA0LTQtdCz0ZYg0LzQuNC90LXRgNCw0LvQuNC30LDRhtC40Y/QvdGL0qMg0LHQsNGAINC20L7Sk9GL0L0g0LDQvdGL0pvRgtCw0L8g0LHQtdGA0LUg0LDQu9Cw0LTRiy4g0J7RgdGL0L3QtNCw0Lkg0LfQtdGA0YLRgtC10YMg0L3TmdGC0LjQttC10YHRltC90LTQtSDQsdGW0Lcg0LHQsNC70LDQvdGL0qMg06nQvNGW0YDRltC9LCDRgdCw0LvQsNGD0LDRgtGC0Ysg06nQvNGW0YAg0YHQsNC70YLRi9C9INGB0LDSm9GC0LDQvyDSm9Cw0LvRg9GL0LzRi9C30pPQsCDQsdC+0LvQsNC00YsuINCd0LXQs9GW0LfQs9GWINGA0LDRhdC40YIg0LDRg9GA0YPRi9C90YvSoyDTmdGB0LXRgNGW0L3QtdC9INKb0LDQt9GW0YAg0pvQsNC90YjQsNC80LAg0LHQsNC70LAg06nQvNGW0YDRltC90LUg0LfQuNGP0L0g0LrQtdC70ZbQvyDQttCw0YLRi9GALCDRgdC+0Lsg0YHQtdCx0LXQv9GC0LXQvSDQvtGB0YvQu9Cw0Lkg0LDQu9C00YvQvSDQsNC70YPRi9C80YvQtyDSm9Cw0LbQtdGCLi4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1" table:style-name="ce1">
            <text:p>915331</text:p>
          </table:table-cell>
          <table:table-cell office:value-type="string" table:style-name="ce1">
            <text:p>russian</text:p>
          </table:table-cell>
          <table:table-cell office:value-type="string" table:style-name="ce1">
            <text:p>Билет 31.&amp;lt;br /&amp;gt; 1.На приеме у педиатра ребенок 1 года, при осмотре врач определил границы относительной сердечной тупости. Укажите границы сердца относительной сердечной тупости детей данного возраста.&amp;lt;br /&amp;gt; 2.Ребенку 6 месяцев. При объективном осмотре обнаружены изменения со стороны костной системы: выражены лобные и теменные бугры, ладьевидная деформация грудной клетки, пальпируются реберные четки, «браслетки», «нити жемчуга». Мышечный тонус снижен, чрезмерная подвижность в суставах. Повышенная потливость. Облысение в затылочной части. В нервно-психическом развитии не отстает, но имеется задержка физического развития. О поражении какой системы можно подумать? Какие лабораторные исследования необходимо провести у данного ребенка.&amp;lt;br /&amp;gt;</text:p>
          </table:table-cell>
          <table:table-cell office:value-type="string" table:style-name="ce1">
            <text:p>MSkgINCjINC00LXRgtC10Lkg0LIg0YbQtdC70L7QvCAg0LIg0LTQsNC90L3QvtC8INCy0L7Qt9GA0LDRgdGC0LUg0L7RgtC90L7RgdC40YLQtdC70YzQvdCw0Y8g0YHQtdGA0LTQtdGH0L3QsNGPINGC0YPQv9C+0YHRgtGMINC+0L/RgNC10LTQtdC70Y/QtdGC0YHRjyDQv9C+INGB0LvQtdC00YPRjtGJ0LjQvCDQs9GA0LDQvdC40YbQsNC8IDog0JLQtdGA0YXQvdGP0Y8g0LPRgNCw0L3QuNGG0LAg0LIg0LLQvtC30YDQsNGB0YLQtSDQvtGCIDAtMiDQu9C10YIgMiDRgNC10LHRgNC+OyAyLTcg0LvQtdGCIDIg0LzQtdC20YDQtdCx0LXRgNGM0LU7ICA3LTEyINC70LXRgiAgMyDRgNC10LHRgNC+IDsg0JvQtdCy0LDRjyDQs9GA0LDQvdC40YbQsCAwLTIg0LvQtdGCIDEtMSw10YHQvCAg0LrQvdCw0YDRg9C20Lgg0L7RgiDRgdGA0LXQtNC40L3Qvi3QutC70Y7Rh9C40YfQvdC+0Lkg0LvQuNC90LjQuCA7IDItNyDQu9C10YIgLSAxLTEsNSDRgdC8INC60L3QsNGA0YPQttC4INC+0YIg0LvQtdCy0L7QuSDRgdGA0LXQtNC40L3Qvi3QutC70Y7Rh9C40YfQvdC+0Lkg0LvQuNC90LjQuDsgNy0xMiDQu9C10YIg0L/QviDQu9C10LLQvtC5INGB0YDQtdC00LjQvdC+LdC60LvRjtGH0LjRh9C90L7QuSDQu9C40L3QuNC4LiAgMikg0KHQutC+0YDQtdC1INCy0YHQtdCz0L4g0LfQtNC10YHRjCDQuNC00LXRgiDRgNC10YfRjCDQviDQv9C+0YDQsNC20LXQvdC40Lgg0L7Qv9C+0YDQvdC+LdC00LLQuNCz0LDRgtC10LvRjNC90L7QuSDRgdC40YHRgtC10LzRiywg0YLQviDQtdGB0YLRjCDQutC+0YHRgtC90L7QuSDRgtC60LDQvdC4LiDQktC10YDQvtGP0YLQvdC10LUg0LLRgdC10LPQviDQt9C00LXRgdGMINC40LTQtdGCINGA0LXRh9GMINC+INGC0LDQutC+0Lwg0LfQsNCx0L7Qu9C10LLQsNC90LjQuCDQutCw0Log0KDQsNGF0LjRgi4g0KDQsNGF0LjRgi0g0Y3RgtC+INC30LDQsdC+0LvQtdCy0LDQvdC40LUg0LrQvtGC0L7RgNC+0LUg0L3QsNCx0LvRjtC00LDQtdGC0YHRjyDQv9GA0Lgg0L3QtdGF0LLQsNGC0LrQtSDQstC40YLQsNC80LjQvdCwIEQgKNC60LDQu9GM0YbQuNGPINC4INGE0L7RgdGE0L7RgNCwKSDQuCDQvtCx0YPRgdC70LDQstC70LjQstCw0LXRgtGB0Y8g0YHQvdC40LbQtdC90LjQtdC8INC/0LvQvtGC0L3QvtGB0YLQuCDQutC+0YHRgtC10LkuINCi0LDQuiDQutCw0Log0LTQtdGC0Lgg0LXRidC1INC80LDQu9C10L3RjNC60LjQtSDQutC+0YHRgtC4INCx0YPQtNGD0YIg0YDQsNGB0YLQuCDQuCDQvdCwINC/0L7Qu9C+0LLQuNC90YMg0L7QvdC4INC40LzQtdGO0YIg0LPQuNC00YDQvtGE0LjQu9GM0L3QvtC1INGB0YLRgNC+0LXQvdC40LUgLCDQuNC3INC30LAg0Y3RgtC+0LPQviDQvtC90Lgg0YfQtdGA0LXQtyDRh9GD0YAg0L/QvtC00LLQuNC20L3Ri9C1INC4INC70LXQs9C60L4g0YDQsNGB0YLRj9Cz0LjQstCw0Y7RgtGB0Y8g0Lgg0L/QvtGN0YLQvtC80YMg0LzQvtC20L3QviDQu9C10LPQutC+INC/0L7Qu9GD0YfQuNGC0Ywg0YLRgNCw0LLQvNGDINGN0YLQuNC8INC4INC+0LHRg9GB0LvQvtCy0LvQtdC90LAg0YfQtdGA0LXQtyDQvNC10YDQvdCw0Y8g0L/QvtC00LLQuNC20L3QvtGB0YLRjCDRgdGD0YHRgtCw0LLQvtCyLiDQotCw0Log0LbQtSDQvdCw0Lwg0LPQvtCy0L7RgNGP0YIg0YfRgtC+INGB0L3QuNC20LXQvSDQvNGL0YjQtdGH0L3Ri9C5INGC0L7QvdGD0YEgLCDQt9C90LDRh9C40YIg0L3QsNCx0LvRjtC00LDQtdC8INC80YvRiNC10YfQvdGL0Lkg0LPQuNC/0L7RgtC+0L3Rg9GBLiDQrdGC0L4g0YPRgdGC0LDQvdCw0LLQu9C40LLQsNGO0YIg0L/RgNC4INC/0L7QvNC+0YnQuCDQvdC10YHQutC+0LvRjNC60LjRhSDRgtC10YHRgtC+0LI6INCU0LDQtdC8INGD0LrQsNC30LDRgtC10LvRjNC90YvQuSDQv9Cw0LvQtdGGINCyINC60LjRgdGC0Ywg0YDQtdCx0LXQvdC60LAg0Lgg0YLRj9C90LXQvCDQvdCwINGB0LXQsdGPICwg0LXRgdC70Lgg0YDQtdCx0LXQvdC+0Log0L3QtSDQvtC60LDQt9GL0LLQsNC10YIg0YHQvtC/0YDQvtGC0LjQstC70LXQvdC40Y8g0YLQviDQtdGB0YLRjCDQvdC1INGC0Y/QvdC10YIg0L/QsNC70LXRhiDQvdCwINGB0LXQsdGPINCwINC/0YDQvtGB0YLQviDRgdC+0L/RgNC+0LLQvtC20LTQsNC10YIg0Y3RgtC+INC4INCz0L7QstC+0YDQuNGCINC+INGB0L3QuNC20LXQvdC40Lgg0LzRi9GI0LXRh9C90L7Qs9C+INGC0L7QvdGD0YHQsC4gINCd0LXQvtCx0YXQvtC00LjQvNC+INC/0YDQvtCy0LXRgdGC0LggINGA0LXQvdGC0LPQtdC9ICwgINGC0LDQuiDQutCw0Log0L3QsCDRgNC10L3RgtCz0LXQvdC1INC80L7QttC10Lwg0YPQstC40LTQtdGC0Ywg0YHRgtGA0YPQutGC0YPRgNGLINC60L7RgdGC0LXQuSAg0LXQtSDQv9C70L7RgtC90L7RgdGC0YwgLCDQsiDQutCw0LrQvtC8INGB0L7RgdGC0L7Rj9C90LjQuCDQvdCw0YXQvtC00Y/RgtGB0Y8g0YHRg9GB0YLQsNCy0YsgLCDQvdC+0YDQvNCw0LvRjNC90L4g0LvQuCDRgdC+0LXQtNC40L3QtdC90Ysg0LrQvtGB0YLQuCDQvNC10LbQtNGDINGB0L7QsdC+0LkgLCDQvdC10YIg0LvQuCDQvdC40LrQsNC60LjRhSDRgdC80LXRidC10L3QuNC5LCDQtNC10YTQvtGA0LzQsNGG0LjQuSAsINCy0YvQstC40YXQvtCyLiDQrdGC0L4g0LHRi9C70L4g0LjQvdGB0YLRgNGD0LzQtdC90YLQsNC70YzQvdC+0LUg0LjRgdGB0LvQtdC00L7QstCw0L3QuNC1ICwg0LAg0LTQu9GPINC+0YbQtdC90LrQuCDRgdC+0YHRgtC+0Y/QvdC40Y8g0LjRgdC/0L7Qu9GM0LfRg9GO0YIg0YHQu9C10LTRg9GO0YnQuNC1INC70LDQsdC+0YDQsNGC0L7RgNC90YvQtSDQvNC10YLQvtC00YsgOiDQntCQ0Jog0LTQu9GPINC+0L/RgNC10LTQtdC70LXQvdC40Y8g0YPRgNC+0LLQvdGPINC60LDQu9GM0YbQuNGPINC4INGE0L7RgdGE0L7RgNCwINCyINC60YDQvtCy0LguINCV0YHQu9C4INCx0YPQtNC10YIg0L3QsNCx0LvRjtC00LDRgtGM0YHRjyDQvdC10LTQvtGB0YLQsNGC0L7QuiDQuNC70Lgg0LbQtSDQt9C90LDRh9C40YLQtdC70YzQvdC+0LUg0YHQvdC40LbQtdC90LjRjyDQuNGFINGD0YDQvtCy0L3RjyDQvNC+0LbQtdGCINC/0YDQuNCy0LXRgdGC0Lgg0YMg0LTQtdGC0LXQuSDQuiDRgtCw0LrQvtC80YMg0LfQsNCx0L7Qu9C10LLQsNC90LjRjiDQutCw0Log0KDQsNGF0LjRgi4g0J/QvtGN0YLQvtC80YMg0L7Rh9C10L3RjCDQstCw0LbQvdC+INGD0LTQtdC70Y/RgtGMINCy0L3QuNC80LDQvdC40LUg0L/QuNGC0LDQvdC40Y4g0YDQtdCx0LXQvdC60LAsPGJyIC8+DQog0LrQvtGA0YzQvNC70LXQvdC40Y4g0LXQs9C+INC80LDQvNCwINC00L7Qu9C20L3QsCDRhdC+0YDQvtGI0L4g0L/QuNGC0LDRgtGM0YHRjyDQtNC70Y8g0YLQvtCz0L4g0YfRgtC+0LHRiyDQstGB0LUg0L/QvtC70LXQt9C90YvQtSDQstC40YLQsNC80LjQvdGLINC/0LXRgNC10LTQsNCy0LDQu9C40YHRjCDRh9C10YDQtdC3INCz0YDRg9C00L3QvtC1INC80L7Qu9C+0LrQvi4=</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2 ответ неполный.Проба Сулковича. щел. фосфотаза. На Рентг. гр. гр. кл определяют костный возраст по ядрам окостенения.</text:p>
          </table:table-cell>
          <table:table-cell office:value-type="float" office:value="0" table:style-name="ce1">
            <text:p>0</text:p>
          </table:table-cell>
          <table:table-cell table:number-columns-repeated="16376"/>
        </table:table-row>
        <table:table-row table:style-name="ro1">
          <table:table-cell office:value-type="float" office:value="915357" table:style-name="ce1">
            <text:p>915357</text:p>
          </table:table-cell>
          <table:table-cell office:value-type="string" table:style-name="ce1">
            <text:p>russian</text:p>
          </table:table-cell>
          <table:table-cell office:value-type="string" table:style-name="ce1">
            <text:p>Билет 31.&amp;lt;br /&amp;gt; 1.На приеме у педиатра ребенок 1 года, при осмотре врач определил границы относительной сердечной тупости. Укажите границы сердца относительной сердечной тупости детей данного возраста.&amp;lt;br /&amp;gt; 2.Ребенку 6 месяцев. При объективном осмотре обнаружены изменения со стороны костной системы: выражены лобные и теменные бугры, ладьевидная деформация грудной клетки, пальпируются реберные четки, «браслетки», «нити жемчуга». Мышечный тонус снижен, чрезмерная подвижность в суставах. Повышенная потливость. Облысение в затылочной части. В нервно-психическом развитии не отстает, но имеется задержка физического развития. О поражении какой системы можно подумать? Какие лабораторные исследования необходимо провести у данного ребенка.&amp;lt;br /&amp;gt;</text:p>
          </table:table-cell>
          <table:table-cell office:value-type="string" table:style-name="ce1">
            <text:p>MSnQn9GA0Lgg0L/RgNC+0LLQtdC00LXQvdC40Lgg0L/QtdGA0LrRg9GB0YHQuNC4INGF0LDRgNCw0LrRgtC10YDQvdGL0LzQuCDQs9GA0LDQvdC40YbQsNC80Lgg0LTQu9GPINGA0LXQsdC10L3QutCwINCy0L7Qt9GA0LDRgdGC0L7QvCAxINCz0L7QtNCwINGP0LLQu9GP0Y7RgtGB0Y86MS4g0JLQtdGA0YXQvdGP0Y8g0LPRgNCw0L3QuNGG0LAg0L3QsCDRg9GA0L7QstC90LUgMiDRgNC10LHRgNCwLiAyLtCf0YDQsNCy0LDRjyDQs9GA0LDQvdC40YbQsCDQv9C+INC/0YDQsNCy0L7QuSDQv9Cw0YDQsNGB0YLQtdGA0L3QsNC70YzQvdC+0Lkg0LvQuNC90LjQuC4zLtCb0LXQstCw0Y8g0LbQtSDQs9GA0LDQvdC40YbQsCDQvdCw0YXQvtC00LjRgtGB0Y8g0L3QsCDRg9GA0L7QstC90LUgMSw1LTIg0YHQvCDQutC90LDRgNGD0LbQuCDQvtGCINGB0YDQtdC00L3QtS3QutC70Y7Rh9C40YfQvdC+0Lkg0LvQuNC90LjQuC4g0KMg0YDQtdCx0LXQvdC60LAg0L7QtNC90L7Qs9C+INCz0L7QtNCwINCz0YDQsNC90LjRhtGLINC+0YLQvdC+0YHQuNGC0LXQu9GM0L3QvtC5INGB0LXRgNC00LXRh9C90L7QuSDRgtGD0L/QvtGB0YLQuCDQvdCw0YXQvtC00Y/RgtGB0Y8g0L3QsCAxLDUg0YHQvCDQvtGCINGA0LXQsdC10YDQvdC+0Lkg0LTRg9Cz0LguIDIpINCjINC00LDQvdC90L7Qs9C+INGA0LXQsdC10L3QutCwINC40LzQtdC10YLRgdGPINC90LDRgNGD0YjQtdC90LjQtSDRgdC+INGB0YLQvtGA0L7QvdGLINC+0L/QvtGA0L3Qvi3QtNCy0LjQs9Cw0YLQtdC70YzQvdC+0Lkg0YHQuNGB0YLQtdC80YssINCwINC40LzQtdC90L3QviDQvdCw0YDRg9GI0LXQvdC40LUg0LrQvtGB0YLQvdC+0Lkg0YHRgtGA0YPQutGC0YPRgNGLICjRgdCy0LjQtNC10YLQtdC70YzRgdGC0LLRg9GO0YIg0LvQvtCx0L3Ri9C1INC4INGC0LXQvNC10L3QvdGL0LUg0LHRg9Cz0YDRiywg0LvQsNC00YrQtdCy0LjQtNC90LDRjyDQtNC10YTQvtGA0LzQsNGG0LjRjyDQs9GA0YPQtNC90L7QuSDQutC70LXRgtC60LgsINC/0LDQu9GM0L/QuNGA0L7QstCw0L3QuNC1INGA0LXQsdC10YDQvdGL0YUg0YfQtdGC0LrQvtCyLCDQsdGA0LDRgdC70LXRgtC60LgsINC90LjRgtC4INC20LXQvNGH0YPQs9CwKSwg0LAg0YLQsNC60LbQtSDRgNCw0LHQvtGC0Ysg0LzRi9GI0YYgKNGB0LLQuNC00LXRgtC10LvRjNGB0YLQstGD0LXRgiDRgdC90LjQttC10L3QuNC1INC80YvRiNC10YfQvdC+0LPQviDRgtC+0L3Rg9GB0LApINC4INGB0YPRgdGC0LDQstC+0LIgKNGH0YDQtdC30LzQtdGA0L3QsNGPINC/0L7QtNCy0LjQttC90L7RgdGC0YwpLiDQodC60L7RgNC10LUg0LLRgdC10LPQviwg0YMg0LTQsNC90L3QvtCz0L4g0YDQtdCx0LXQvdC60LAg0YDQsNGF0LjRgi4g0JfQsNCx0L7Qu9C10LLQsNC90LjQtSDRgdCy0Y/Qt9Cw0L3QviDRgSDQvdCw0YDRg9GI0LXQvdC40LXQvCDQvtCx0LzQtdC90LAg0YTQvtGB0YTQvtGA0LAg0Lgg0LrQsNC70YzRhtC40Y8sINCwINGC0LDQutC20LUg0L3QtdC00L7RgdGC0LDRgtC60L7QvCDQstC40YLQsNC80LjQvdCwINCz0YDRg9C/0L/RiyDQki4g0JTQu9GPINC00LDQvdC90L7QuSDQv9Cw0YLQvtC70L7Qs9C40Lgg0YLQuNC/0LjRh9C90Ysg0LfQsNC00LXRgNC20LrQsCDRhNC40LfQuNGH0LXRgdC60L7Qs9C+INGA0LDQt9Cy0LjRgtC40Y8sINCy0YvRgNCw0LbQtdC90L3Ri9C1INGC0LXQvNC10L3QvdGL0LUg0Lgg0LvQvtCx0L3Ri9C1INCx0YPQs9GA0YssINC70LDQtNGK0LXQstC40LTQvdCw0Y8g0LTQtdGE0L7RgNC80LDRhtC40Y8g0LPRgNGD0LTQvdC+0Lkg0LrQu9C10YLQutC4LCDCq9Cx0YDQsNGB0LvQtdGC0LrQuMK7LCDCq9C90LjRgtC4INC20LXQvNGH0YPQs9CwwrsuINCV0LzRgywg0L/RgNC10LbQtNC1INCy0YHQtdCz0L4sINC90YPQttC90L4g0YHQtNCw0YLRjCDQvtCx0YnQuNC5INCw0L3QsNC70LjQtyDQutGA0L7QstC4LCDRh9GC0L7QsdGLINCy0YvRj9Cy0LjRgtGMINGD0YDQvtCy0LXQvdGMINC60LDQu9GM0YbQuNGPINC4INGE0L7RgdGE0L7RgNCwLiDQktCw0LbQvdGLINCx0LjQvtGF0LjQvNC40YfQtdGB0LrQuNC1INCw0L3QsNC70LjQt9GLINC60YDQvtCy0LguINCd0LXQvtCx0YXQvtC00LjQvNC+INC+0L/RgNC10LTQtdC70LjRgtGMINGD0YDQvtCy0LXQvdGMINGE0LXRgNC40YLQuNC90YTQvtGB0YTQsNGC0LDQt9GLLCDRgtCw0LrQttC1INC40LzQtdC10YLRgdGPINC90LXQvtCx0YXQvtC00LjQvNC+0YHRgtGMINCyINC+0L/RgNC10LTQtdC70LXQvdC40Lgg0YPRgNC+0LLQvdGPIDI1LdCz0LjQtNGA0L7QutGB0Lgg0LLQuNGC0LDQvNC40L3QsCDQkiwg0LLQuNGC0LDQvNC40L3QsCDQlCwg0YPRgNC+0LLQtdC90Ywg0L/QsNGA0LDRgtCz0L7RgNC80L7QvdCwINGC0LDQutC20LUg0LLQsNC20LXQvSAo0L7QvSDRgNC10LPRg9C70LjRgNGD0LXRgiDQstC70LjRj9C90LjRjyDQvdCwINC60LDQu9GM0YbQuNC5INCyINC60YDQvtCy0LgsINGC0LDQutC20LUg0YPRh9Cw0YHRgtCy0YPQtdGCINCyINC/0LXRgNC10LLQvtC00LUg0L3QtdCw0LrRgtC40LLQvdC+0Lkg0YTQvtGA0LzRiyDQstC40YLQsNC80LjQvdCwINC0INCyINCw0LrRgtC40LLQvdGD0Y4pLiDQlNCw0L3QvdGL0LUg0LvQsNCx0L7RgNCw0YLQvtGA0L3Ri9C1INC40YHRgdC70LXQtNC+0LLQsNC90LjRjyDQstCw0LbQvdGLLCDRh9GC0L7QsdGLINC/0L7QtNGC0LLQtdGA0LTQuNGC0YwsINC70LjQsdC+INC20LUg0LjRgdC60LvRjtGH0LjRgtGMINC30LDQsdC+0LvQtdCy0LDQvdC40Y8g0YDQsNGF0LjRgtCwLCDQvtGG0LXQvdC40YLRjCDRgtGP0LbQtdGB0YLRjCDRgdC+0YHRgtC+0Y/QvdC40Y8uINCi0LDQutC20LUg0L7QvdC4INC90LXQvtCx0YXQvtC00LjQvNGLLCDRh9GC0L7QsdGLINC40YHQutC70Y7Rh9C40YLRjCDQuNC70Lgg0L/QvtC00YLQstC10YDQtNC40YLRjCDQv9Cw0YLQvtC70L7Qs9C40Y4g0YHQviDRgdGC0L7RgNC+0L3RiyDQutGA0L7QstC10YLQstC+0YDQvdC+0Lkg0YHQuNGB0YLQtdC80Ysg0Lgg0YHQtdGA0LTQtdGH0L3Qvi3RgdC+0YHRg9C00LjRgdGC0L7QuSDRgdC40YHRgtC10LzRiy4g0J/QvtGB0LrQvtC70YzQutGDINC90LDRgNGD0YjQtdC90LjRjyDQvtCx0LzQtdC90LAg0LrQsNC70YzRhtC40Y8g0Lgg0YTQvtGB0YTQvtGA0LAg0LzQvtCz0YPRgiDQvtGC0YDQsNC30LjRgtGM0YHRjyDQvdCwINGA0LDQsdC+0YLQtSDQutCw0YDQtNC40L7QvNC40L7RhtC40YLQvtCyINCyINGB0LXRgNC00YbQtS4g0JTQvtC/0L7Qu9C90LjRgtC10LvRjNC90YvQvCDQu9Cw0LHQvtGA0LDRgtC+0YDQvdGL0Lwg0LzQtdGC0L7QtNC+0Lwg0LjRgdGB0LvQtdC00L7QstCw0L3QuNGPINC80L7QttC90L4g0YHQtNCw0YLRjCDQsNC90LDQu9C40Lcg0LzQvtGH0LgsINC/0L7RgdC60L7Qu9GM0LrRgyDQv9C+0LLRi9GI0LXQvdC90LDRjyDQv9C+0YLQu9C40LLQvtGB0YLRjCDQvNC+0LbQtdGCINGB0LLQuNC00LXRgtC10LvRjNGB0YLQstC+0LLQsNGC0Ywg0L4g0L3QsNGA0YPRiNC10L3QuNGP0YUg0LIg0LLRi9C00LXQu9C40YLQtdC70YzQvdC+0Lkg0YHQuNGB0YLQtdC80Ysg0YMg0YDQtdCx0LXQvdC60LAuIC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по второму вопросы не полный ответ. Нет пробы Сулковича, опред. щелочной фосфотазы.</text:p>
          </table:table-cell>
          <table:table-cell office:value-type="float" office:value="0" table:style-name="ce1">
            <text:p>0</text:p>
          </table:table-cell>
          <table:table-cell table:number-columns-repeated="16376"/>
        </table:table-row>
        <table:table-row table:style-name="ro1">
          <table:table-cell office:value-type="float" office:value="915360" table:style-name="ce1">
            <text:p>915360</text:p>
          </table:table-cell>
          <table:table-cell office:value-type="string" table:style-name="ce1">
            <text:p>russian</text:p>
          </table:table-cell>
          <table:table-cell office:value-type="string" table:style-name="ce1">
            <text:p>Билет 31.&amp;lt;br /&amp;gt; 1.На приеме у педиатра ребенок 1 года, при осмотре врач определил границы относительной сердечной тупости. Укажите границы сердца относительной сердечной тупости детей данного возраста.&amp;lt;br /&amp;gt; 2.Ребенку 6 месяцев. При объективном осмотре обнаружены изменения со стороны костной системы: выражены лобные и теменные бугры, ладьевидная деформация грудной клетки, пальпируются реберные четки, «браслетки», «нити жемчуга». Мышечный тонус снижен, чрезмерная подвижность в суставах. Повышенная потливость. Облысение в затылочной части. В нервно-психическом развитии не отстает, но имеется задержка физического развития. О поражении какой системы можно подумать? Какие лабораторные исследования необходимо провести у данного ребенка.&amp;lt;br /&amp;gt;</text:p>
          </table:table-cell>
          <table:table-cell office:value-type="string" table:style-name="ce1">
            <text:p>IDEu0JPRgNCw0L3QuNGG0LAg0L7RgtC90L7RgdC40YLQtdC70YzQvdC+0Lkg0YHQtdGA0LTQtdGH0L3QvtC5INGC0YPQv9C+0YHRgtC4INGDINGA0LXQsdC10L3QutCwIDEg0LPQvtC00LAg0YLQsNC60L7QstGLOiDQstC10YDRhdC90Y/RjyDQs9GA0LDQvdC40YbQsCDRgdC+0L7RgtCy0LXRgtGB0LLRg9C10YIg0YPRgNC+0LLQvdGOIDIg0YDQtdCx0YDQsC4g0J/RgNCw0LLQsNGPINCz0YDQsNC90LjRhtCwINGA0LDRgdC/0L7Qu9C+0LbQtdC90LAg0L/QviDQv9GA0LDQstC+0Lkg0L/QsNGA0LDRgdGC0LXRgNC90LDQu9GM0L3QvtC5INC70LjQvdC40LguINCb0LXQstCw0Y8g0LPRgNCw0L3QuNGG0LAg0L3QsNGF0L7QtNGP0YLRgdGPINC90LAg0YPRgNC+0LLQvdC1IDEsNS0yINC6INC90LDRgNGD0LbQuCDQvtGCINGB0YDQtdC00L3QtSDQutC70Y7Rh9C40YfQvdC+0Lkg0LvQuNC90LjQuC4g0JPRgNCw0L3QuNGG0Ysg0L7RgtC90L7RgdC40YLQtdC70YzQvdC+0Lkg0YHQtdGA0LTQtdGH0L3QvtC5INGC0YPQv9C+0YHRgtC4INC+0L/RgNC10LTQtdC70Y/RjtGC0YHRjyDRgSDQv9C+0LzQvtGJ0Ywg0L/QtdGA0LrRg9GB0YHQuNC4LjIu0J/QvtGA0LbQtdC90LjQtSDRgdC40YHRgtC10LzRiyA6INC+0L/QvtGA0L3Qvi3QtNCy0LjQs9Cw0YLQtdC70YzQvdC+0Lkg0YHQuNGB0YLQtdC80LAgKNC60L7RgdGC0L3Qvi3QvNGL0YjQtdGH0L3QsNGPKS7QoyDQvtC/0LjRgdCw0L3QvdC+0LPQviDRgNC10LHQtdC90LrQsCDQvdCw0LHQu9GO0LTQsNGO0YLRgdGPINC/0YDQuNC30L3QsNC60Lgg0LrQvtGC0L7RgNGL0LUg0LzQvtCz0YPRgiDRg9C60LDQt9GL0LLQsNGC0Ywg0L3QsCDRgNCw0YXQuNGCIC7QrdGC0L4g0LfQsNCx0L7Qu9C10LLQsNC90LjQtSDRgdCy0Y/Qt9Cw0L3QvdC+0LUg0YEg0L3QsNGA0YPRiNC10L3QuNC10Lwg0L7QsdC80LXQvdCwINC60LDQu9GM0YbQuNGPINC4INGE0L7RgdGE0L7RgNCwINCyINC+0YDQs9Cw0L3QuNC30LzQtSzRh9Cw0YHRgtC+INC+0LHRg9GB0LvQvtCy0LvQtdC90LAg0LTQtdGE0LjRhtC40YLQvtC8INCy0LjRgtCw0LzQuNC9INCSLNGB0LjQvNC/0YLQvtC80Ysg0YLQsNC60LjQtSDQutCw0LogOiDQstGL0YDQsNC20LXQvdGLINC70L7QsdC90YvQtSDQuCDRgtC10LzQtdC90L3Ri9C1INCx0YPQs9GA0Yss0LvQsNC00YzQtdCy0LjQtNC90LDRjyDQtNC10YTQvtGA0LzQsNGG0LjRjyDQs9GA0YPQtNC90L7QuSDQutC70LXRgtC60Lgs0YDQtdCx0LXRgNC90YvQtSDRidC10YLQutC4LNGB0L3QuNC20LXQvdC40LUg0LzRi9GI0LXRh9C90L7Qs9C+INGC0L7QvdGD0YHQsCDQuCDQvtCx0LvRi9GB0LXQvdC40LUg0LfQsNGC0YvQu9C60LAu0KLQuNC/0LjRh9C90Ysg0LTQu9GPINGA0LDRhdC40YLQsC7QlNC70Y8g0L/QvtC00YLQstC10YDQttC00LXQvdC40Y8g0LTQuNCw0LPQvdC+0LfQsCDQuCDQvtGG0LXQvdC60Lgg0YHQvtGB0YLQvtGP0L3QuNGPINC80LjQvdC10YDQsNC70YzQvdC+0LPQviDQvtCx0LzQtdC90LAg0L3QtdC+0LHRhdC+0LTQuNC80L4g0L/RgNC+0LLQtdGB0YLQuCDRgdC70LXQtNGD0Y7RidC40LUg0LvQsNCx0L7RgNCw0YLQvtGA0L3Ri9C1INC40YHRgdC70LXQtNC+0LLQsNC90LjRjy4xLtCe0L/RgNC10LTQtdC70LjRgtGMINGD0YDQvtCy0LXQvdGMINC60LDQu9GM0YbQuNGPINC4INGE0L7RgdGE0L7RgNCwINC60YDQvtCy0LggLSDRjdGC0L4g0L/QvtC80L7QttC10YIg0L7RhtC10L3QuNGC0Ywg0LHQsNC70LDQvdGBINC00LDQvdC90YvRhSDQvNC40L3QtdGA0LDQu9C+0LIuIDIu0J7Qv9GA0LXQtNC10LvQuNGC0Ywg0YPRgNC+0LLQtdC90Ywg0YnQtdC70L7Rh9C90L7QuSDRhNC+0YHRhNC+0YLQsNC30Yss0L/QvtCy0YvRiNC10L3QvdGL0Lkg0YPRgNC+0LLQtdC90Ywg0LzQvtC20LXRgiDRg9C60LDQt9GL0LLQsNGC0Ywg0L3QsCDQsNC60YLQuNCy0L3QvtGB0YLRjCDQv9GA0L7RhtC10YHRgdCwINGA0LXQvNC+0LTQtdC70LjRgNC+0LLQsNC90LjRjyDQutC+0YHRgtC4LiAzLtCe0L/RgNC10LTQtdC70LXQvdC40Y8g0YPRgNC+0LLQvdGPIDI1LdCz0LjQtNGA0L7QutGB0Lgg0LLQuNGC0LDQvNC40L3QsCDQkiDQsiDRgdGL0LLQvtGA0L7RgtC60LUg0LrRgNC+0LLQuCDQtNC70Y8g0L7RhtC10L3QutC4INC+0LHQtdGB0L/QtdGH0LXQvdC90L7RgdGC0Lgg0L7RgNCz0LDQvdC40LfQvNCwINCy0LjRgtCw0LzQuNC90L7QvCDQki4gNC7Qn9GA0L7QstC10YDQutCwINGD0YDQvtCy0L3RjyDQv9Cw0YDQsNCz0L7RgNC80L7QvdCwIC0g0YfRgtC+0LHRiyDQvtGG0LXQvdC40YLRjCDRhNGD0L3QutGG0LjRjiDQv9Cw0YDQsNGJ0LjRgtC+0LLQuNC00L3Ri9GFINC20LXQu9C10Lcg0Lgg0LjRhSDQstC70LjRj9C90LjRjyDQvdCwINC60LDQu9GM0YbQuNC10LLRi9C5INC+0LHQvNC10L0uINCt0YLQuCDQsNC90LDQu9C40LfRiyDQv9C+0LzQvtCz0YPRgiDQtNC40LDQs9C90L7RgdGC0LjRgNC+0LLQsNGC0Ywg0LLQvtC30LzQvtC20L3Ri9C5INC00LXRhNC40YbQuNGCINCy0LjRgtCw0LzQuNC90LAg0JIg0LjQu9C4INC90LDRgNGD0YjQtdC90LjQtSDQvtCx0LzQtdC90LAg0LrQsNC70YzRhtC40Y8g0Lgg0YTQvtGB0YTQvtGA0LAgLNGH0YLQviDQv9C+0LfQstC+0LvQuNGCINGB0LrQvtGA0YDQtdC60YLQuNGA0L7QstCw0YLRjCDQu9C10YfQtdC90LjQtSDRgNC10LHQtdC90LrQsC4gIC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37" table:style-name="ce1">
            <text:p>1067037</text:p>
          </table:table-cell>
          <table:table-cell office:value-type="string" table:style-name="ce1">
            <text:p>russian</text:p>
          </table:table-cell>
          <table:table-cell office:value-type="string" table:style-name="ce1">
            <text:p>Билет 31.&amp;lt;br /&amp;gt; 1.На приеме у педиатра ребенок 1 года, при осмотре врач определил границы относительной сердечной тупости. Укажите границы сердца относительной сердечной тупости детей данного возраста.&amp;lt;br /&amp;gt; 2.Ребенку 6 месяцев. При объективном осмотре обнаружены изменения со стороны костной системы: выражены лобные и теменные бугры, ладьевидная деформация грудной клетки, пальпируются реберные четки, «браслетки», «нити жемчуга». Мышечный тонус снижен, чрезмерная подвижность в суставах. Повышенная потливость. Облысение в затылочной части. В нервно-психическом развитии не отстает, но имеется задержка физического развития. О поражении какой системы можно подумать? Какие лабораторные исследования необходимо провести у данного ребенка.&amp;lt;br /&amp;gt;</text:p>
          </table:table-cell>
          <table:table-cell office:value-type="string" table:style-name="ce1">
            <text:p>MS4g0JPRgNCw0L3QuNGG0Ysg0YHQtdGA0LTRhtCwINC+0YLQvdC+0YHQuNGC0LXQu9GM0L3QvtC5INGB0LXRgNC00LXRh9C90L7QuSDRgtGD0L/QvtGB0YLQuCDQtNC70Y8g0YDQtdCx0LXQvdC60LAgMSDQs9C+0LTQsCwg0LPRgNGD0LTQvdC+0LPQviDQstC+0LfRgNCw0YHRgtCwINGA0LDQt9C70LjRh9C90Ysg0L7RgiDRgtCw0LrQvtCy0L7Qs9C+INGDINC00LXRgtC10Lkg0LHQvtC70LXQtSDRgdGC0LDRgNGI0LXQs9C+INCy0L7Qt9GA0LDRgdGC0LAuINCf0YDQsNCy0LDRjyDQs9GA0LDQvdC40YbQsCDRgdC+0L7RgtCy0LXRgtGB0YLQstGD0LXRgiDQv9Cw0YDQsNGB0YLQtdGA0L3QsNC70YzQvdC+0Lkv0L7QutC+0LvQvtCz0YDRg9C00LjQvdC90L7QuSDQu9C40L3QuNC4INC90LAg0YPRgNC+0LLQvdC1IDQg0LzQtdC20YDQtdCx0LXRgNGM0Y8g0YHQv9GA0LDQstCwLCDQu9C10LLQsNGPINCz0YDQsNC90LjRhtCwINGB0L7QvtGC0LLQtdGC0YHRgtCy0YPQtdGCINC/0L4g0LvQtdCy0L7QuSDQvtC60L7Qu9C+0LPRgNGD0LTQuNC90L3QvtC5INC70LjQvdC40Lgg0L3QsCDRg9GA0L7QstC90LUgMi0zINC80LXQttGA0LXQsdC10YDRjNGPLCDQvdC40LbQvdGP0Y8g0LPRgNCw0L3QuNGG0LAg0L3QsCDRg9GA0L7QstC90LUg0LLQtdGA0YXRg9GI0LXRh9C90L7Qs9C+INGC0L7Qu9GH0LrQsCDQvdCwIDAsNS0x0YHQvCDQutC90YPRgtGA0Lgg0L7RgiDQu9C10LLQvtC5INGB0YDQtdC00L3QtdC60LvRjtGH0LjRh9C90L7QuSDQu9C40L3QuNC4LiAgICAgICAgICAgICAgIDIuINCjINC00LDQvdC90L7Qs9C+INC/0LDRhtC40LXQvdGC0LAg0LzQvtC20L3QviDQv9GA0LXQtNC/0L7Qu9C+0LbQuNGC0Ywg0L/QvtGA0LDQttC10L3QuNC1INC60L7RgdGC0L3QvtC5INGB0LjRgdGC0LXQvNGLINCy0L7Qt9C90LjQutGI0LXQtSDQuNC3LdC30LAg0L/RgNC+0LPRgNC10YHRgdC40YDRg9GO0YnQtdCz0L4g0YDQsNGF0LjRgtCwINGDINGA0LXQsdC10L3QutCwLiDQrdGC0L7QvNGDINGB0LLQuNC00LXRgtC10LvRjNGB0YLQstGD0Y7Rgjog0LLRi9GA0LDQttC10L3QvdC+0YHRgtGMINC70L7QsdC90YvRhSDQuCDRgtC10LzQtdC90L3Ri9GFINCx0YPQs9GA0L7Qsiwg0LTQtdGE0L7RgNC80LDRhtC40Y8g0LPRgNGD0LTQvdC+0Lkg0LrQu9C10YLQutC4LCDQv9Cw0LvRjNC/0LjRgNGD0LXQvNC+0YHRgtGMINGA0LXQsdC10YDQvdGL0YUg0YfQtdGC0L7Quiwg0YXQsNGA0LDQutGC0LXRgNC90YvRhSDRgNCw0YXQuNGC0L3Ri9GFICLQsdGA0LDRgdC70LXRgtC+0LoiINC90LAg0YDRg9C60LDRhSwgItC90LjRgtC10Lkg0LbQtdC80YfRg9Cz0LAiOyDRgdC90LjQttC10L3QuNC1INC80YvRiNC10YfQvdC+0LPQviDRgtC+0L3Rg9GB0LAsINGH0YDQtdC30LzQtdGA0L3QsNGPINC/0L7QtNCy0LjQttC90L7RgdGC0Ywg0LIg0YHRg9GB0YLQsNCy0LDRhSwg0L/QvtCy0YvRiNC10L3QvdCw0Y8g0L/QvtGC0LvQuNCy0L7RgdGC0YwsINC+0LHQu9GL0YHQtdC90LjQtSDQsiDQt9Cw0YLRi9C70L7Rh9C90L7QuSDRh9Cw0YHRgtC4LCDQt9Cw0LTQtdGA0LbQutCwINGE0LjQt9C40YfQtdGB0LrQvtCz0L4g0YDQsNC30LLQuNGC0LjRjy4g0JTQvtCy0L7Qu9GM0L3QviDRgtGP0LbQtdC70L7QtSDRgtC10YfQtdC90LjQtSDRgNCw0YXQuNGC0LAsINC+0LTQvdCw0LrQviDQtdGJ0LUg0L3QtSDQtNC+0YHRgtC40LPRiNC10LUg0LTQtdGE0L7RgNC80LDRhtC40Lgg0L3QuNC20L3QuNGFINC60L7QvdC10YfQvdC+0YHRgtC4INC60LDQuiDQsdGD0LTRgtC+INCx0Ysg0LIg0LHRg9C60LLRgyAi0J4iLCDQsCDRgtCw0LrQttC1INC/0L7Rj9Cy0LvQtdC90LjRjyAi0LvRj9Cz0YPRiNCw0YfRjNC10LPQviDQttC40LLQvtGC0LAiLiDQndC10L7QsdGF0L7QtNC40LzRi9C1INC70LDQsdC+0YDQsNGC0L7RgNC90YvQtSDQuNGB0YHQu9C10LTQvtCy0LDQvdC40Y8g0LTQu9GPINC/0YDQvtCy0LXQtNC10L3QuNGPINGDINC00LDQvdC90L7Qs9C+INGA0LXQsdC10L3QutCwINC00LvRjyDRgtC+0YfQvdC+0LPQviDQtNC40LDQs9C90L7Qt9CwINC4INC/0L7RgdC70LXQtNGD0Y7RidC10LPQviDQstC10LTQtdC90LjRjyDQu9C10YfQtdC90LjRjyDQstC60LvRjtGH0LDRjtGCOiDQn9GA0Lgg0L/QvtC00L7Qt9GA0LXQvdC40Lgg0L3QsCDRgNCw0YXQuNGCINC/0YDQvtCy0L7QtNGP0YIg0LDQvdCw0LvQuNC3INC90LAg0LLRi9GP0YHQvdC10L3QuNC1INGB0L7QtNC10YDQttCw0L3QuNGPINC40LzQtdC90L3QviDQutCw0LvRjNGG0LjRjyDQuCDRhNC+0YHRhNC+0YDQsC4g0JrQsNC70YzRhtC40Y8g0LIg0L3QvtGA0LzQtSDRgyDRgNC10LHQtdC90LrQsCDQv9C+0LvRg9Cz0L7QtNCwINC00L7Qu9C20L3QviDQsdGL0YLRjCAyLDI1LTIsNzUsINGDINC00LXRgtC10Lkg0YEg0YDQsNGF0LjRgtC+0Lwg0Lgg0LrQsNC70YzRhtC40LksINC4INGE0L7RgdGE0L7RgCDQsdGD0LTRg9GCINGB0L3QuNC20LXQvdGLLiDQn9GA0L7QstC+0LTRj9GCINC+0YbQtdC90LrRgyDRg9GA0L7QstC90Y8g0JLQuNGC0LDQvNC40L3QsCDQlCwg0YLQsNC6INC60LDQuiDRgNCw0YXQuNGCINCy0L7Qt9C90LjQutCw0LXRgiDQuNC80LXQvdC90L4g0L7RgiDQtdCz0L4g0L3QtdGF0LLQsNGC0LrQuC/QtNC10YTQuNGG0LjRgtCwINCyINC+0YDQs9Cw0L3QuNC30LzQtSDRgNC10LHQtdC90LrQsC4g0KLQsNC60LbQtSDQvNC+0LPRg9GCINC/0YDQvtCy0LXRgdGC0Lgg0J7QkNCaKNC+0LHRidC40Lkg0LDQvdCw0LvQuNC3INC60YDQvtCy0LgpIC0g0LTQsNCx0Ysg0L7RhtC10L3QuNGC0Ywg0YHQvtGB0YLQvtGP0L3QuNC1INC60YDQvtCy0Y/QvdGL0YUg0Y3Qu9C10LzQtdC90YLQvtCyLCDRgtCw0LrQttC1INC+0YbQtdC90LjRgtGMINC40LzQvNGD0L3QvtC70L7Qs9C40YfQtdGB0LrRg9GOINC60LDRgNGC0LjQvdGDLCDQstC10LTRjCDQstC+0LfQvNC+0LbQvdC+INC4INC+0YHQu9Cw0LHQu9C10L3QuNC1INC40LzQvNGD0L3QuNGC0LXRgtCwINC4INC40L3RhNC10LrRhtC40L7QvdC90L7QtSDQv9C+0YDQsNC20LXQvdC40LUsINGH0YLQviDQvNC+0LbQtdGCINGD0YHRg9Cz0YPQsdC40YLRjCDRgdC+0YHRgtC+0Y/QvdC40LUg0YDQtdCx0LXQvdC60LA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Не правильно указаны границы относит. сердечной тупости . Есть верхняя граница, левая и права. Верхняя 2 ребро, левая на 1,5-2,0 см кнаружи от ср/ ключичной динии. Правая парастернальная линия.</text:p>
          </table:table-cell>
          <table:table-cell office:value-type="float" office:value="0" table:style-name="ce1">
            <text:p>0</text:p>
          </table:table-cell>
          <table:table-cell table:number-columns-repeated="16376"/>
        </table:table-row>
        <table:table-row table:style-name="ro1">
          <table:table-cell office:value-type="float" office:value="1066828" table:style-name="ce1">
            <text:p>1066828</text:p>
          </table:table-cell>
          <table:table-cell office:value-type="string" table:style-name="ce1">
            <text:p>kazakh</text:p>
          </table:table-cell>
          <table:table-cell office:value-type="string" table:style-name="ce1">
            <text:p>Билет 32.&amp;lt;br /&amp;gt; 1.Балалардың бүйрегінің топографиялық орналасуы.&amp;lt;br /&amp;gt; 2.Балалардың буындарынын ерекшелiктерің атаныз. &amp;lt;br /&amp;gt;</text:p>
          </table:table-cell>
          <table:table-cell office:value-type="string" table:style-name="ce1">
            <text:p>0JHSr9C50LXQuiDQttKx0L8g0LzSr9GI0LUsINCx0q/QudGA0LXQutGC0ZbSoyDQvdC10LPRltC30LPRliDSm9GL0LfQvNC10YLRliDQt9OZ0YAg0YLSr9C30ZYsINGB0YvRgNGC0pvQsCDRiNGL0pPQsNGA0YMg0LHQvtC70YvQvyDRgtCw0LHRi9C70LDQtNGLLtCh0L7QvdGL0LzQtdC9INKb0LDRgtCw0YAg0LHSr9C50YDQtdC60YLQtSDQlCDQstC40YLQsNC80LjQvdGW0L3RltKjINGB0LjQvdGC0LXQt9GWLCDRjdGA0LjRgtGA0L7Qv9C+0Y3RgtC40L0sINC/0YDQvtGB0YLQvtCz0LvQsNC90LTQuNC90LTQtdGAINGB0LjQvdGC0LXQt9GWINC20q/RgNC10LTRli7QkdKv0LnRgNC10LrRgtGW0qMg0YTRg9C90LrRhtC40L7QvdCw0LvRjNC00ZYg0LHRltGA0LvRltCz0ZYtINC90LXRhNGA0L7QvS7QkdKv0LnRgNC10LrRgtGW0qMg0pvRi9GA0YLRi9GB0YLRiyDQttOZ0L3QtSDQvNC40LvRiyDSm9Cw0LHQsNGC0YvQvSDQsNC20YvRgNCw0YLQsNC80YvQty7QkdCw0LvQsNC70LDRgCDQsdKv0LnRgNC10LPRliDQvtC80YvRgNGC0pvQsCDQttC+0YLQsNGB0YvQvdGL0qMg0LXQutGWINC20LDSk9GL0L3QtNCwINC+0YDQvdCw0LvQsNGB0pvQsNC9LCDRgNC10YLRgNC+0L/QtdGA0LjRgtC+0L3QuNCw0LvRjNC00ZYg0LrQtdKj0ZbRgdGC0ZbQutGC0LUuINCi0L7Qv9C+0LPRgNCw0YTQuNGP0LvRi9KbINC+0YDQvdCw0LvQsNGB0YPRiyDQsdC+0LnRi9C90YjQsDog0J7SoyDQttCw0psg0LHSr9C50YDQtdC6INGB0L7QuyDQttCw0pvSm9CwINKb0LDRgNCw0pPQsNC90LTQsCDRgtOp0LzQtdC9INC+0YDQvdCw0LvQsNGB0LDQtNGLLiAg0J7SoyDQttCw0psg0LHSsdC50YDQtdC6INGB0L7QuyDQttCw0psg0LHSr9C50YDQtdC60LrQtSDSm9Cw0YDQsNKT0LDQvdC00LAg0YLTqdC80LXQvSDQvtGA0L3QsNC70LDRgdCw0LTRiywg0LbQvtKT0LDRgNKT0Ysg0LHQtdGC0ZYgIFRIIDEyLTExINGC06nRgSDQvtC80YvRgNGC0pvQsNGB0YvQvdCw0L0g0LHQsNGB0YLQsNC70YvQvywg0YLTqdC80LXQvdCz0ZYg0LHQtdGC0ZYgTDMg0LHQtdC7INC+0LzRi9GA0YLSm9Cw0YHRiyDQsdC+0LnRi9C90LzQtdC9INCw0Y/Sm9GC0LDQu9Cw0LTRiy4g0JHSr9C50YDQtdC6INC20L7Sk9Cw0YDSk9GLINC20LDSk9GL0L3QtNCwINCx0q/QudGA0LXQuiDSr9GB0YLRliDQsdC10LfRltC80LXQvSwg0L7SoyDQttCw0psg0LHSr9C50YDQtdC6INCx0LDRg9GL0YDQvNC10L0sINGB0L7QuyDQttCw0psg0LHSr9C50YDQtdC6INKx0LnSm9GLINCx0LXQt9GW0L3RltKjINKb0rHQudGA0YvSk9GL0LzQtdC9INGI0LXQutGC0LXRgdC10LTRli4g0JHSr9C50YDQtdC60YLRltKjINGB0YvRgNGC0Ysg0LHQtdGC0ZYg0YTQuNCx0YDQvtC30LTRiyDQutCw0L/RgdGD0LvQsNC80LXQvSDQttCw0LHRi9C70pPQsNC9LiDQkdKv0LnRgNC10LrRgtGW0qMg0LDRgdGC0YvQvdC00LAg0LzQsNC5INGC0ZbQvdGWINC+0YDQvdCw0LvQsNGB0pvQsNC9LCDQtdCz0LXRgCDQsdCw0LvQsNC90YvSoyDQtNC10L3QtdGB0ZbQvdGW0qMg0YHQsNC70LzQsNKT0Ysg0YLTqdC80LXQvSDQsdC+0LvRgdCwLCDQsdKv0LnRgNC10LrRgtGW0qMg0YLTqdC80LXQvSDQvtGA0L3QsNC70LDRgdGD0YvQvSDQsdCw0LnSm9Cw0LnQvNGL0LcuICAyLiDQkdCw0LvQsNC70LDRgNC00YvSoyDQsdGD0YvQvdC00LDRgNGL0L3Ri9KjINC10YDQtdC60YjQtdC70ZbQutGC0LXRgNGWINC+0LvQsNGA0LTRi9KjINOp0YHRg9GWLCDQtNCw0LzRg9GLINCx0L7QudGL0L3RiNCwINC10YDQtdC60YjQtdC70ZbQvdC10LTRli7QntC70LDRgCDQuNGW0LvQs9GW0YjRgtGW0LPRliDQttC+0pPQsNGA0YvQu9GL0pPRi9C80LXQvSDQtdGA0LXQutGI0LXQu9GW0L3QtdC00ZYuINCR0LDQu9Cw0LvQsNGA0LTQsCDQtNOZ0L3QtdC60LXRgCDRgtGW0L3RltC90ZbSoyDRgdC10YDQv9GW0LzQtNGW0LvRltCz0ZYg0LbTmdC90LXQtNC1INCw0Lcg0LTQsNC80YvSk9Cw0L0g0LHQsNC50LvQsNC80LTQsNC00YvSoyDQsdC+0LvRg9GL0LzQtdC9INCx0LDRg9GL0L3QtNCw0YDRiyDSm9C+0LfSk9Cw0LvQvNCw0LvRiywg0LjQutC10LzQtNGWINCx0L7Qu9GL0L8g0LrQtdC70LXQtNGWLtCh0L7QuyDRgdC10LHQtdC/0YLRliDQsdCw0LvQsNC70LDRgNC00LAg0LHRg9GL0L3QvdGL0qMg0YjRi9KT0YPRiyDTqdGC0LUg0LbQuNGWINC60LXQt9C00LXRgdC10LTRli4g06jRgdGDINC/0LvQsNGB0YLQuNC90LrQsNC70LDRgNGLLSDSsdC30YvQvSDRgdKv0LnRgNC10LrRgtC10YDQtNGW0qMg0rHRiNGC0LDRgNGL0L3QtNCwINC+0YDQvdCw0LvQsNGB0LDQtNGLLCDQvdC10LzQtdGB0LUg0LHQsNGB0pvQsNGI0LAg0L7Qu9Cw0YDQtNGLINGN0L/QuNGE0LjQt9C00ZbQuiDQv9C70LDRgdGC0LjQvdC60LDQu9Cw0YAg0LTQtdC/INCw0YLQsNC50LTRiy4g0JXQs9C10YAg0YHSr9C50LXQutGC0LXRgCDRgdGL0L3RgdCwINC90LXQvNC10YHQtSDQsdCw0LvQsCDQttCw0YDQsNKb0LDRgiDQsNC70pPQsNC9INC60LXQt9C00LUg0YDQtdCz0LXQvdC10YDQsNGG0LjRjyDQv9GA0L7RhtC10YHRgdGC0LXRgNGW0L3RltKjINGC0LXQt9C00LXRg9GW0L3QtSDQttCw0YPQsNC/INCx0LXRgNC10LTRli4g0JDQuyDRiNC10LzRltGA0YjQtdC60YLRltKjINC00LDQvNGD0Ysg0LXRgNGC0LUg0LHQsNC70LDQu9GL0psg0YjQsNKb0YLQsCDQsdGD0YvQvdC00LDRgNC00LDSk9GLINGI0LXQvNGW0YDRiNC10Log0LjQutC10LzQtNGW0LvRltKj0YLRliwg0Y3Qu9Cw0YHRgtC40LrQsNC70YvSmyDSm9Cw0LHRltC70LXRgtGW0L3RltKjINC20L7Sk9Cw0YDRiyDQsdC+0LvRg9GLINC205nQvdC1INC20LDRgdGC0YvSm9GC0Ysg0pvQsNC80YLQsNC80LDRgdGL0Lcg0LXRgtC10LTRli4g0JHQsNC70LAg06nRgdC60LXQvSDRgdCw0LnRi9C9INC+0YHRiyDRiNC10LzRltGA0YjQtdC60YLQtdGAINC+0YHRgtC40YTQuNC60LDRhtC40Y8g0L3QtdC80LXRgdC1INGB0q/QudC10LrRgtC10L3RgyDQv9GA0L7QtdGB0YHRgtC10YDRltC90LXQvSDTqdGC0LXQtNGWLtCR0LDQu9Cw0LvQsNGA0LTQsCDRgdKv0LnRgNC10LrRgtC10YAg0YLQtdC3INOp0YHRltC/LCDRgtC10Lcg0pvQsNC70L/Ri9C90LAg0LrQtdC70LXQtNGWINC10YDQtdGB0LXQutGC0LXRgNCz0LUg0pvQsNGA0LDSk9Cw0L3QtNCwLCDQsdKx0Lsg0L7RgdGC0LXQvtCx0LDRgdGC0YLQsNC00YvSoyDRhNGD0L3QutGG0LjRj9GB0YvQvdGL0qMg0LbQvtKT0LDRgNGL0LvRi9KT0YvQvNC10L3QtNC1INCx0LDQudKb0LDQu9Cw0LTRiy4g0KHQtdCx0LXQsdGWINCx0LDQu9Cw0LvQsNGA0LTQsCDQvNC10YLQvtCx0L7Qu9C40LfQvCDQv9GA0L7QtdGB0YHRgtC10YDRliDRgtC10Lcg0LbSr9GA0LXQtNGWLCDRgdC+0Lsg0YHQtdCx0LXQv9GC0ZYg0YHSr9C50YDQtdC6INOp0YHQutC10L0g0LrQtdC30LTQtSDQsdCw0LvQsNC00LAg0YHSr9C50LXQutGC0ZbSoyDQsNGD0YvRgNGB0YvQvdGD0YvQvdCwINGI0LDSk9GL0LzQtNCw0YAg0LHQvtC70YPRiyDQvNKv0LzQutGW0L0sINCx0rHQuyDQv9Cw0YLQvtC70L7Qs9C40Y8g0LXQvNC10YEg0L3QvtGA0LzQsCDQsdC+0LvRi9C/INGC0LDQsdGL0LvQsNC00YsuINCe0YHRiyDRgdC40L/QsNGC0YLQsNC70pPQsNC9INCx0LXQu9Cz0ZbQu9C10YAg0LHQsNC70LDQvdGL0L3Ri9KjINC20LDRgdGL0L3QsCwg0L7RgNCz0LDQvdC40LfRltC80ZbQvdGW0qMg0LXRgNC10LrRiNC10LvRltC60YLQtdGA0ZbQvdC1INCx0LDQudC70LDQvdGL0YHRgtGLINOp0LfQs9C10YjQtSDQsdC+0LvRg9GL0LTQsCDTmdCx0LTQtdC9INC80q/QvNC60ZbQvS4g0KHQvtC80LDRgtC+0YDQvtC/0YLRiyDQs9C+0YDQvNC+0L3QvdGL0qMg0LHQtdC70LPRltC70ZYg0YTRgNCw0LrRhtC40Y/QtNCwINGC0LXRgNCx0LXQu9GD0ZbQvdC10LTQtSDQsdCw0LnQu9Cw0L3Ri9GB0YLRiyDQsdCw0LvQsNC70LDRgNC00LAg0LbQsNGB06nRgdC/0ZbRgNGW0Lwg0LrQtdC30LTQtSwg05nRgdGW0YDRgdC1INKx0LvQtNCw0YDQtNCwINC/0YPQsdC10YDRgtCw0YLRgtGLICjRgdGC0LXRgNC+0LjQtNGLLCDRgtC40YDQtdC+0LjQtNGLINCz0L7RgNC80L7QvdC00LDRgNC00LApINC60LXQt9C10qPQtNC1INCx0L7QudC00YvSoyDSm9Cw0YLRgtGLINOp0YHRg9GW0L0g0LHQsNC50pvQsNC50LzRi9C3LtCe0YHRiyDQutC10LfQtdKj0LTQtSDRiNC10LzRltGA0YjQtdC60YLQtdGA0LTRltKjINGB0q/QudC10LrRgtC10L3Rg9GW0L0g0pvQsNGC0YLRiyDQsdCw0LnSm9Cw0YPSk9CwINCx0L7Qu9Cw0LTRiy4gMjAtMjUg0LbQsNGB0pvQsCDQtNC10LnRltC9LiDQkdGD0YvQvdC00LDRgCDQsdCw0LnQu9Cw0LzQtNCw0YDQtNCw0L0sINGB0LjQvdC+0LLQuNCw0LvRjNC00ZYg0YHSsdC50YvSm9GC0YvSm9GC0LDRgCwg0LzQuNC90LjRgdC60ZbQu9C10YDQtNC10L0sINCx0YPRi9C9INKb0LDQv9GI0YvSk9GL0L3QsNC9INGC0rHRgNCw0LTRiy4=</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екі сұрақта да балалардағы жас ерекшеліктері толық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43" table:style-name="ce1">
            <text:p>1066843</text:p>
          </table:table-cell>
          <table:table-cell office:value-type="string" table:style-name="ce1">
            <text:p>kazakh</text:p>
          </table:table-cell>
          <table:table-cell office:value-type="string" table:style-name="ce1">
            <text:p>Билет 32.&amp;lt;br /&amp;gt; 1.Балалардың бүйрегінің топографиялық орналасуы.&amp;lt;br /&amp;gt; 2.Балалардың буындарынын ерекшелiктерің атаныз. &amp;lt;br /&amp;gt;</text:p>
          </table:table-cell>
          <table:table-cell office:value-type="string" table:style-name="ce1">
            <text:p>MS7QkdCw0LvQsNC70LDRgNC00LDSk9GLINCx0q/QudGA0LXQutGC0ZbRltKjINC+0YDQvdCw0LvQsNGB0YPRi9C90Ysg0LXRgNC10YHQtdC60YLQtdGA0LPQtSDSm9Cw0YDQsNKT0LDQvdC00LAg0LXRgNC10LrRiNC10LvRltCz0ZYg0LHQvtC70LDQtNGLLtCR0LDQu9Cw0LvQsNGA0LTQsNKT0Ysg0L7QvNGL0YDRgtKb0LAg0LbQvtGC0LDRgdGL0L3Ri9KjINKb0YvRgdKb0LAg0LHQvtC70YPRi9C90LAg0LHQsNC50LvQsNC90YvRgdGC0Ysg0YLTqdC80LXQvdGW0YDQtdC6INC+0YDQvdCw0LvQsNGB0LDQtNGLLtCR0q/QudGA0LXQutGC0ZbSoyDQvtGA0L3QsNC70LDRgdGD0YvQvdCwINCx0LDQudC70LDQvdGL0YHRgtGLINC10LrRliDQv9C+0LvRjtGB0LrQtSDQsdOp0LvQtdC80Lcu0JbQvtKT0LDRgNKT0Ysg0L/QvtC70Y7RgdGWINCx0LDQu9Cw0LvQsNGA0LTQsCDQsdC10Lsg0L7QvNGL0YDRgtKb0LDRgdGL0L3Ri9C9INC00LXSo9Cz0LXQudGW0L3QtSDQsdCw0LnQu9Cw0L3Ri9GB0YLRiyDQvtC9INCx0ZbRgNGW0L3RiNGWINC+0L3QtdC60ZbQvdGI0ZYg0LrQtdGD0LTQtSDQvtC80YvRgNGC0LrQsNGB0YvQvdGL0L0g0LTQtdC90LPQtdC50ZbQvdC00LUg0L7RgNC90LDQu9Cw0YHRgdCwLtCi06nQvNC10L3Qs9GWINC/0L7Qu9GO0YHRliDRgtOp0YDRgtGW0L3RiNGWINCx0LXQuyDQvtC80YvRgNGC0LrQsNGB0Ysg0LTQtdC90LPQtdC50ZbQvdC00LUg0L7RgNC90LDQu9Cw0YHQsNC00Ysu0LHQsNC70LDQu9Cw0YDQtNCwINCx0q/QudGA0LXQuiDQutOp0LvQtdC80ZYg0LrRltGI0ZYs0LrQvtC90YLRg9GA0LvQsNGA0Ysg0YLQtdCz0ZbRgSzQv9Cw0LvRjNC/0LDRhtC40Y8g0LrQtdC30ZbQvdC00LUg0YHRi9GA0LPRi9C80LDQu9GLINGC0q/RgNC00LUg0LDQvdGL0pvRgtCw0Lkg0LDQu9Cw0LzRi9C3LtOY0LvRliDRgtC+0LvRi9C6INC00LDQvNGL0LzQsNCz0LDQvdC00YvQs9GL0L3QsCDQsdCw0LnQu9Cw0L3Ri9GB0YLRiyDQsNC90LDRgtC+0LzQuNGP0LvRi9C6INGE0LjQt9C40L7Qu9C+0LPQuNGP0LvRi9C6INC10YDQtdC60YjQtdC70ZbQutGC0LXRgCDQsdC+0LvQsNC00Ysu0KLQvtC70YvQuiDQtNCw0LzRg9GL0LzQsNGD0YvQvdCwINCx0LDQudC70LDQvdGL0YHRgtGLINCx0q/QudGA0LXQutGC0LUg0YLSr9C30ZbQu9C10YLRltC9INC305nRgCDQutOp0LvQtdC80ZYg0LTQtSDQsNC3INCx0L7Qu9Cw0LTRiy7QotOp0LzQtdC90LPQvdGWINC/0L7Qu9GO0YHRliDQttCw0LzQsdCw0YEg0pvRi9GA0YvQvdCw0L0g0YLTqdC80LXQvSDQsdC+0LvQsNC00Ysu0JHRg9C7INC10YDQtdC60YjQtdC70ZbQuiDQutCw0LvRi9C/0YLRi9C00LAgNyDQttCw0YHRgtCwINC20L7QudGL0LvQsNC00Ysu0JrQvtC70LDQtdGC0LDRgNC70YzQtNGLINC+0YDQvdCw0LvQsNGB0LrQsNC9INCx0q/QudGA0LXQuiDQutCw0LvRi9C/0YLRiyDQttCw0LPQtNCw0LnQu9Cw0YDQtNCwINCx0ZbRgCDQsdC10Lsg0L7QvNGL0YDRgtC60LAg0LTQtdC90LXRgdGW0L3RltC9INCx0LjRltC60YLRltCz0ZbQvdC10L0g0LDRgdC/0LDQudC00Ysu0LXRgNC10YHQtdC60YLQtdGA0LzQtdC9INGB0LDQu9GL0YHRgtGL0YDQs9Cw0L3QtNCwINCx0q/QudGA0LXQuiDQutC+0LfQs9Cw0LvQvNCw0LvRiyDQutC10LvQtdC00ZYu0KHQvtC90YvQvNC10L0g0LrQsNGC0LDRgCDQv9Cw0LvRjNC/0LDRhtC40Y/QtNCwINC+0L3QsNC5INCw0L3Ri9C60YLQsNC70LDQtNGLLtCe0L3Ri9C9INGB0LXQsdC10LHRliDQsdKv0LnRgNC10LrRgtGW0L0g0LDQu9C00YvQvdCz0Ysg0LDRgNGC0LrRiyDRiNCw0L3QtNGL0YDQu9Cw0YDRiyDQsdKv0LnRgNC10Log0LzQsNC90Ysg0YjQtdC70LzQsNC50Ysg0L3QsNGI0LDRgCDQttC10YLRltC70LPQtdC9LtCR0LXQutGW0YLRgyDQsNC/0L/QsNGA0LDRgtGL0L3Ri9C9INC80LXRhdCw0L3QuNC30LzRliA3LDgg0LbQsNGB0YLQsCDQsdGW0YDQsNC6INGC0L7Qu9GL0Log0LTQsNC80LjQtNGLLtCh0L7Qs9Cw0L0g0LHQsNC50LvQsNC90YvRgdGC0Ysg0LHQsNC70LvQsNGA0LTQsNCz0Ysg0LHSr9C50YDQtdC6INOZ0LvRgdGW0Lcg0LzSr9GI0LXQu9C10YDQtNGW0L0g0LHRltGA0ZYg0LHQvtC70YvQvyDRgtCw0LHRi9C70LDQtNGLLtCe0L3Ri9C9INGC05nRg9C70ZbQutGC0ZbQuiDQt9OZ0YAg0LzTqdC70YjQtdGA0ZYg0L3QtdCx05nRgNGWINCx0LXRgSDQttKv0Lcg0LbQtdGC0ZYg0LbSr9C3INC80Lsg0pvSsdGA0LDQudC00Ysu0JHRltGAINC20LDRgdC60LAg0LTQtdC50ZbQvdCz0ZYg0LHQsNC70LDQvdGL0L0g0LbQvtCz0LDRgNCz0Ysg0LbTmdC90LUg0YLTqdC80LXQvdCz0L3RliDQv9C+0LvRjtGB0YLQtdGA0ZYg0LbQsNC60YvQvSDQttCw0YLQsNC00Ysu0L7QuyDQtNOp0L3Qs9C10LvQtdC90LPQtdC9INCw0LPQt9Cw0L3RiyDQtdGB0LrQtSDRgdCw0LvQsNC00Ysu0JrQtdC50ZbQvSDQtNCw0LzRi9C/INC20LXRgtGW0LvQs9C10L0g0YHQvtC9INCx0rHRgNGI0LDQuiDQv9GW0YjRltC90LPQtSDQuNC1INCx0L7Qu9Cw0LTRiy4yINGB0rHRgNCw0Lo60LHQsNC70LDRgNC00LDQs9GLINCx0YPRi9C90LTQsNGA0LTRi9C9INC10YDQtdC60YjQtdC70ZbQs9GWINGC0YPRgyDQutC10LfQtdC90ZbQvdC1INC60LDRgNCw0Lkg0LHRg9GL0L3QvdGL0qMg0LDQvdCw0YLQvtC80LjRj9C70YvQuiDQsdCw0LnQu9Cw0Lwg0LDQv9C/0LDRgNCw0YLRgtCw0YDRiyDQtNCw0LzQuNC00Ysu0J7Qu9Cw0YDQtNGL0L0g0LXRgNC10YHQtdC60YLQtdGA0LTQtdC9INC10YDQtdC60YjQtdC70ZbQs9GWINCx0YPRi9C9INCx0LDQudC70LDQvNC00LDRgNGLINGB0L7Qt9GL0LvQvNCw0LvRiyDQutC10LvQtdC00ZYu0LHRltGA0LDQuiDQsdC10YDRltC6INCx0L7Qu9C80LDQudC00Ysu0KHQvtC90LTRi9C60YLQsNC9INCx0YPRi9C90LTQsNGA0LTRi9C9INC20LDRgNGC0YvQu9Cw0Lkg0YLQsNGOINC80q/QvNC60ZbQvdGI0ZbQu9C60YLQtdGA0ZYg0LbQvtKT0LDRgNGLINCx0L7Qu9GL0L8g0LrQtdC70LXQtNGWLtCe0YHRi9Cz0LDQvSDQsdCw0LnQu9Cw0L3Ri9GB0YLRiyDQsdCw0LvQu9Cw0YDQtNCwINC606nQv9GC0LXQs9C10L0g0LHRg9GL0L0g0YHQvtC30YvQu9GD0LvQsNGA0Ysg0LrTqdC/0YLQtdC/INC60LXQt9C00LXRgdC10LTRli7QkdGD0YvQvdC00LDRgNC00YvQvSDQttC10YLRltC70YPRiyDSr9GIINC20LDRgdC60LAg0LTQtdC50ZbQvSDQsdC10LvRgdC10L3QtNC4INCx0L7Qu9Cw0LTRiyAu0YHQtdCx0LXQsdGWINC+0Lsg0LHQsNC70LAg0LrQvtC30LPQsNC70YvRgdGL0L3Ri9KjINC606nQvyDQsdC+0LvRg9GL0L3QsCDQsdCw0LnQu9Cw0L3Ri9GB0YLRiy7QodC+0L3Ri9C80LXQvSDQutCw0YLQsNGAINCx0YPRi9C90LTQsNGA0LTRi9C9INCx0ZbRgCDQsdGW0YDRltC80LXQvSDQsdCw0LnQu9Cw0L3Ri9GB0LDRgtGL0L0g0Y3Qv9C40YTQuNC30ZbQtNC10YDRliDRiNC10LzQuNGA0YjQtdC60L/QtdC9INC20LDQsdGL0LvQs9Cw0L0g0LHQvtC70YvQvyDQutC10LvQtdC00ZYu0KHQvtC90LTRi9C60YLQsNC9INCx0YPRi9C9INCx0LXRgtGWINC80LXQvSDQutCw0LHRi9C90YvQvSDQtNCw0LzRg9GLINC+0L0g0q/RiCDQvtC9INCw0LvRgtGLINC20LDRgdC60LAg0LrQsNGA0LDQuSDRgtC+0LvRi9C6INCw0Y/QutGC0LDQu9Cw0LTRiy7QkdGD0YvQvdC00LDRgNC00YvQvSDRjNGD0Lsg0LXRgNC10LrRiNC10LvRltGW0LPRltC9INCx0ZbQtyDQsdGW0LvQtSDRgtKx0YDQsCDQvtC70LDRgNC00LDQs9GLINC/0LDRgtC+0LvQs9C40Y/Qu9Cw0YDQtNGLINCx0L7Qu9C80LDQuSDQsNC70LDQvNGL0Lcu0LzRi9GB0LDQu9GLINKv0LnRgNC10Log0LbSr9GA0ZbRgSDQsdGD0Lsg0rHRgNGI0YvQuiDQsdGD0YvQvdGLINGB0LjQvNC80LXRgtGA0LjRj9C70Ysg0YIu0YDQtNC1INCx0ZbRgNC00LXQuSDQttCw0LrRi9C90LTQsNCz0LDQvdC00LAg0LrTqdGA0ZbQvdC10LTRli7Qv9Cw0LvRjNC/0LDRhtC40Y8g0LDRgNC60YvQu9GLINCx0YPRi9C9INC80LDSo9GL0L3QtNCw0pPRiyDSm9GL0LfQsNGA0YPQu9Cw0YDQtNGLLNCw0YPRgNGDINGB0LXQt9GW0LzQtNC10YDRltC9INGW0YHRltC90YPRltC9INC60L7Qt9Cz0LDQu9Cz0YvRiNGC0YvQs9GL0L0g0YLRi9Cz0YvQt9C00YvQs9GL0L0g0LDQvdGL0LrRgtCw0Lkg0LDQu9Cw0LzRi9C3LtC60LDQuSDQttC10YDQu9C10YDQtNC1INCw0YPRgNGDINGB0LXQt9GW0LzQtNC10YDRltC90ZbSoyDRgtCw0YDQsNC70LPQsNC90LTRi9Cz0YvQvSDQsNC90YvQutGC0LDQudC80YvQty7QttGW0L3QtSDQsNGD0YDRgyDRgtKv0YDRltC9INCw0L3Ri9C60YLQsNC50LzRi9C3LtCh0L7QuyDRgdC10LHQtdC/0YLRliDQtdGA0YLQtSDQutC10LfQtdC90LTQtSDQsNC90YvQutGC0LDRgyDQvNCw0L3Ri9C30LTRiy7Sr9C70LrQtdC9INC/0LDRgtC+0LvQvtCz0LjRjyDRgtGD0YvQvdC00LDQudC00Ysg0LTQtdGAINC60LXQt9GW0L3QtNC1INC10LzQtNC10LvQvNC10YHQtS7QvNGL0YHQsNC70Ysg0rHRgNGI0YvQuiDQsdGD0YvQvdGL0L0g0LfQtdGA0YLRgtC10YMg0LrQtdC30ZbQvdC00LUg0LHQsNC70LDRgNC00LAg0LrQtdC30LTQtdGB0LXQtNGWINC+0LvQsNGA0LTRi9C9INC00rHRgNGL0YEg0LbQtdGC0ZbQu9C80LXRg9GWLtC+0L3RiyDQsdCw0LvQsNC70L3Ri9KjINC20LDRgtC60LDQvSDSm9Cw0LvRi9C/0YvQvdC00LAg0pvQsNGA0LDQvyDQsdGD0YvQvdC00LDRgNC00Ysg0LrQvtC30LPQsNC/INGC0LXQutGB0LXRgNC10LzRltC3LtGP0LPQvdC4INCw0Y/QutGC0LDRgNC00Ysg0ZbRiNC60LUg0YHRi9GA0YLQutCwINCw0LvRiNCw0LrRgtCw0YLRg9C00Ysg0LbQsNGB0LDRgtCw0LTRiy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48" table:style-name="ce1">
            <text:p>1066848</text:p>
          </table:table-cell>
          <table:table-cell office:value-type="string" table:style-name="ce1">
            <text:p>kazakh</text:p>
          </table:table-cell>
          <table:table-cell office:value-type="string" table:style-name="ce1">
            <text:p>Билет 32.&amp;lt;br /&amp;gt; 1.Балалардың бүйрегінің топографиялық орналасуы.&amp;lt;br /&amp;gt; 2.Балалардың буындарынын ерекшелiктерің атаныз. &amp;lt;br /&amp;gt;</text:p>
          </table:table-cell>
          <table:table-cell office:value-type="string" table:style-name="ce1">
            <text:p>MS7QkdCw0LvQsNC70LDRgNC00YvSoyDQsdKv0LnRgNC10LrRgtC10YDRliDQtdGA0LXRgdC10LrRgtC10YDQs9C1INKb0LDRgNCw0pPQsNC90LTQsCDRgtOp0LzQtdC90ZbRgNC10Log0L7RgNC90LDQu9Cw0YHQsNC00Ysu0JHQsNC70LDQu9Cw0YDQtNGL0qMg0YLQvtC/0L7Qs9GA0LDRhNC40Y/Qu9GL0psg0L7RgNC90LDQu9Cw0YHRg9GLINCx0L7QudGL0L3RiNCwLNCx0LDQu9Cw0LvQsNGA0LTRi9KjINCx0q/QudGA0LXQs9GW0L3RltKjINC20L7Sk9Cw0YDSk9GLINGI0LXQutCw0YDQsNGB0Ysg0L7QvSDQtdC60ZbQvdGI0ZYg0LrQtdGD0LTQtSDQvtC80YvRgNGC0pvQsNGB0YvQvdCw0L0g0LHQsNGB0YLQsNC70YvQvyzRgtOp0LzQtdC90LPRliDRiNC10LrQsNGA0LDRgdGLIDQg0YjRliDQsdC10Lsg0L7QvNGL0YDRgtKb0LDRgdGL0LzQtdC9INGI0LXQutGC0LXQu9C10LTRli7Qr9KT0L3QuCzQsdKx0LvQsNC5INC+0YDQvdCw0LvQsNGB0YPRiyDQsdCw0LvQsNC70LDRgNC00YvSoyDRgtKx0LvSk9Cw0YHRi9C90LAg0LHQsNC50LvQsNC90YvRgdGC0Ysg0LHQvtC70LDQtNGLLNGB0L7QvdC00YvSm9GC0LDQvSDQsdKv0LnRgNC10LrRgtC10YDRliDRgtOp0LzQtdC9INC+0YDQvdCw0LvQsNGB0LDQtNGLLtCR0rHQuyDRgtC+0L/QvtCz0YDQsNGE0LjRj9C70YvSmyDQtdGA0LXQutGI0LXQu9GW0LPRliDQsdCw0LvQsNC90YvSoyA3INC20LDRgdGL0L3QsCDQtNC10LnRltC9INCx0L7Qu9Cw0LTRiy43INC20LDRgdGC0LDQvSDQutC10LnRltC9INCx0LDQu9Cw0L3Ri9KjINCx0q/QudGA0LXQutGC0LXRgNGWINC10YDQtdGB0LXQutGC0LXRgNC00ZbQutGW0L3QtNC10LkgMS0yINGI0ZYg0LHQtdC7INC+0LzRi9GA0YLSm9Cw0YHRi9C90YvSoyDQtNC10qPQs9C10LnRltC90LUg0LrTqdGC0LXRgNGW0LvQtdC00ZYu0KHQvtC90YvQvNC10L0g0pvQsNGC0LDRgCzQsdCw0LvQsNC70LDRgNC00LAg0L7SoyDQttOZ0L3QtSDRgdC+0Lsg0LbQsNKbINCx0q/QudGA0LXQutGC0LXRgNGWINCx0ZbRgCDQsdGW0YDRltC90LUg0L/QsNGA0LDQu9C70LXRjCDQvtGA0L3QsNC70LDRgdCw0LTRiyDQttOZ0L3QtSDQv9C+0LvRjtGB0YLQtdGA0ZYg0LbQsNKb0YvQvSDQvtGA0L3QsNC70LDRgdCw0LTRiyzQtdGB0LXQudC1INC60LXQu9C1INKT0LDQvdCwLNC80YvRgdCw0LvRiyA3INC20LDRgdGC0LDQvSDQutC10LnRltC9INC+0qMg0LbTmdC90LUg0YHQvtC7INC20LDSmyDQsdKv0LnRgNC10LrRgtC10YDRltC90ZbSoyDQv9C+0LvRjtGB0YLQtdGA0ZYg0LHRltGALdCx0ZbRgNGW0L3QtdC9INCw0LvRi9GB0YLQsNC/LNC+0qMg0LbQsNKbINCx0q/QudGA0LXQs9GWINGB0L7QuyDQttCw0psg0LHSr9C50YDQtdC60YLQtdC9INGC06nQvNC10L3RltGA0LXQuiDQvtGA0L3QsNC70LDRgdGL0L8s0LXRgNC10YHQtdC60YLRltKjINCx0q/QudGA0LXQs9GW0L3QtSDRgdCw0Lkg0YLQvtC/0L7Qs9GA0LDRhNC40Y/Qu9GL0psg0YLSr9GA0pPRi9C00LAg0L7RgNC90LDQu9Cw0YHQsNC00Ysu0KHQvtC90YvQvNC10L0g0pvQsNGC0LDRgCzQsdCw0LvQsNC70LDRgNC00LAg0LHSr9C50YDQtdC60YLQtdGA0ZYg0YHQtdGA0L/RltC80LTRliDQttOZ0L3QtSDSm9C+0LfSk9Cw0LvQvNCw0LvRiyDQutC10LvQtdC00ZYg0LbTmdC90LUg0L/QsNC70YzQv9Cw0YbQuNGPINC20LDSm9GB0Ysg0LbSr9GA0LPRltC30ZbQu9C10LTRlizRgdC10LHQtdCx0ZYg0L7QuyDSm9C+0LfSk9Cw0LvQvNCw0LvRiy7QkNC7INCx0q/QudGA0LXQutGC0ZbSoyDQsdKx0Lsg0LXRgNC10LrRiNC10LvRltCz0ZYs0LHQsNC70LDQu9Cw0YDQtNCwINCx0q/QudGA0LXQutGC0ZbSoyDQsNC70LTRi9Kj0pPRiyDQttOZ0L3QtSDQsNGA0YLSm9GLINGI0LDQvdC00YvRgNC70LDRgNGLINGC0L7Qu9GL0psg0LTQsNC80YvQvNCw0pPQsNC9LNCx0q/QudGA0LXQutGC0ZYg0rHRgdGC0LDQvyDRgtKx0YDQsNGC0YvQvSDQsdKv0LnRgNC10Log0LzQsNKj0Ysg0YjQtdC70LzQsNC50Ysg0YLQvtC70YvSmyDQttC10YLRltC70LzQtdCz0LXQvSzRj9KT0L3QuCzQsdGW0YAg0YHTqdC30LHQtdC9INCw0LnRgtKb0LDQvdC00LAg0LHSr9C50YDQtdC60YLRltKjINCx0LXQutGW0YLRgyDQsNC/0L/QsNGA0LDRgtGLINGC0L7Qu9GL0psg0LbQtdGC0ZbQu9C80LXQs9C10L0u0KHQvtC90LTRi9Kb0YLQsNC9INC00LAg0LHQsNC70LDQu9Cw0YDQtNGL0qMg0LHSr9C50YDQtdC60YLQtdGA0ZYg0pvQvtC30pPQsNC70LzQsNC70Ysu0JDQuyDQsdKv0LnRgNC10LrRgtGW0qMg0YLQvtC70YvSmyDRgtKv0YDQtNC1INC20LXRgtGW0LvRg9GWLNKb0YvQt9C80LXRgtGW0L3RltKjLNGE0LjQu9GM0YLRgNCw0YbQuNGP0LvRi9KbLdGB0q/Qt9GW0LvRgyDQsNC/0L/QsNGA0LDRgtGL0L3Ri9KjINGC0L7Qu9GL0psg0YLSr9GA0LTQtSDQtNCw0LzRg9GLIDEwLTEyINC20LDRgdGC0LAg0YjQsNC80LDQvNC10L0g0LDRj9Kb0YLQsNC70LDQtNGLLjIu0JHQsNC70LDQu9Cw0YDQtNGL0qMg0LHRg9GL0L3QtNCw0YDRiyDQvtGB0YLQtdC+0LPQtdC90LXQtyDQv9GA0L7RhtC10YHRliDQutC10LfRltC90LTQtSDSm9Cw0LvRi9C/0YLQsNGB0LDRgtGL0L0g0YjQtdC80ZbRgNGI0LXQutGC0ZYg0YLRltC90L3QtdC9INKb0LDQu9GL0L/RgtCw0YHQsNC00Ysu0JbQsNC70L/RiyDQsdGD0YvQvdC00LDRgCDQsNC00LDQvNC00LAg0YHSr9C50LXQutGC0LXRgNC00ZbSoyDQsdC10LrRltGC0YMg0LDQv9C/0LDRgNCw0YLRi9C90YvSoyDRgNOp0LvRltC9INCw0YLSm9Cw0YDQsNC00Ysu0JXRgNC10YHQtdC60YLQtdGA0LTQtSDQsdGD0YvQvdC00LDRgNGLINOp0YLQtSDQsdC10YDRltC6LNGI0LXQutGC0LXQvSDRgtGL0YEg0pvQvtC30pPQsNC70pPRi9GI0YLRi9KT0YvQvSDRiNC10LrRgtC10LnQtNGWLNC10YDQtdGB0LXQutGC0LXRgNC00LUg0LDRg9GL0YAg0LzQtdGF0LDQvdC40LrQsNC70YvSmyDQutKv0Ygg0YLSr9GB0L/QtdGB0LUg0L7So9Cw0LnQu9GL0pvQv9C10L0g0YHSr9C50LXQs9GWINGI0YvSk9GL0L8g0L3QtdC80LXRgdC1INGB0YvQvdGL0L8g0LrQtdGC0L/QtdC50LTRli7QkNC7INCx0LDQu9Cw0LvQsNGA0LTQsCDQsdGD0YvQvdC00LDRgNGLINC10YDQtdGB0LXQutGC0LXRgNCz0LUg0pvQsNGA0LDSk9Cw0L3QtNCwLNGB0LXRgNC/0ZbQvNC00ZYs0LHQtdGC0ZYg0YLQtdCz0ZbRgSzTqdGC0LUg0pvQvtC30pPQsNC70LzQsNC70Ysg0LHQvtC70LDQtNGLLNGB0L7QvdC00YvSm9GC0LDQvSDQtNCwINCx0LDQu9Cw0LvQsNGA0LTQsCDQsdGD0YvQvdC00LDRgNGL0L3QsCDQsdCw0LnQu9Cw0L3Ri9GB0YLRiyDQsdC10LrRltGC0YMg0LDQv9C/0LDRgNCw0YLRiyDTmdC70YHRltC3INCx0L7Qu9Cw0LTRiy7QntGB0YvSk9Cw0L0g0LHQsNC50LvQsNC90YvRgdGC0Yss0LbTmdC90LUg0LHQsNC70LDQu9Cw0YDQtNGL0qMg06nQt9GW0L3QtNGW0Log0LHQtdC70YHQtdC90LTRltC70ZbQs9GW0L3QtSDQsdCw0LnQu9Cw0L3Ri9GB0YLRiyzQsdCw0LvQsNC70LDRgNC00LAg0L7So9Cw0LnQu9GL0pvQv9C10L0g0YHTmdC7INC80LXRhdCw0L3QuNC60LDQu9GL0pst0YTRg9C90LrRhtC40L7QvdCw0LvQtNGL0psg0LrSr9GIINGC0q/RgdC10YLRltC9INCx0L7Qu9GB0LAs0YHSr9C50LXQutGC0LXRgNGWINGI0YvSk9GL0L8g0L3QtdC80LXRgdC1INC20LDRgNGC0YvQu9Cw0Lkg0YLQsNC50YvQvyDQutC10YLRg9GWINC80q/QvNC60ZbQvS7QkdKx0Lsg0LHRg9GL0L3QtNCw0YDQtNGL0qMg0LXRgNC10LrRiNC10LvRltCz0ZYg0LHQsNC70LDQvdGL0qMgMyDQttCw0YHRi9C90LAg0LTQtdC50ZbQvSDQttCw0LvSk9Cw0YHQsNC00YsuMyDQttCw0YHRgtCw0L0g0LrQtdC50ZbQvSDQsdCw0LvQsNC70LDRgNC00YvSoyDQsdGD0YvQvdC00LDRgNGLINCx0LXQu9GB0LXQvdC00ZYg0YLSr9GA0LTQtSDQtNCw0LzQuCDQsdCw0YHRgtCw0LnQtNGLLtCh0L7QvdGL0LzQtdC9INKb0LDRgtCw0YAs0LHRg9GL0L0g0LDRgNKb0YvQu9GLINCx0LDQudC70LDQvdGL0YHSm9Cw0L0g0YHSr9C50LXQutGC0LXRgNC00ZbSoyDRjdC/0LjRhNC40LfRliDQtNC1INGI0LXQvNGW0YDRiNC10LrRgtGWINGC0ZbQvdC80LXQvSDQttCw0LHRi9C70pPQsNC9LNCW05nQvdC1INGC0LDSk9GLINCx0ZbRgCDQtdGA0LXQutGI0LXQu9GW0LPRlizQsdCw0LvQsNC70LDRgNC00YvSoyDQsdGD0YvQvSDRgdKx0LnRi9Kb0YLRi9KT0YvQvdGL0qMg0YHQuNC90YLQtdC30ZYg0LXRgNC10YHQtdC60YLQtdGA0LTRltC60ZbQvdC1INKb0LDRgNCw0pPQsNC90LTQsCDQsdC10LvRgdC10L3QtNGWINGC0q/RgNC00LUg0LbSr9GA0LXQtNGWLNCx0rHQuyDQvtGA0LPQsNC90LjQt9C80L3RltKjINOp0YHRg9GW0L3QtSDQsdCw0LnQu9Cw0L3Ri9GB0YLRiy7QkdCw0LvQsNC70LDRgNC00YvSoyDQsdC10LrRltGC0YMg0LDQv9C/0LDRgNCw0YLRi9C90YvSoyzQsdGD0YvQvdC00LDRgNC00YvSoyDSm9Cw0LHRiyDQvNC10L0g0LHQtdGC0LrQtdC50ZbQvdGW0qMg0YLQvtC70YvSmyDSm9Cw0LvRi9C/0YLQsNGB0YPRiyAxMy0xNiDQttCw0YEg0LDRgNCw0LvRi9KT0YvQvdC00LAg0LDRj9Kb0YLQsNC70LDQtNGLLNGP0pPQvdC4INCx0LDQu9Cw0L3Ri9KjINC/0YPQsdC10YDRgtCw0YLRgtGL0psg0LrQtdC30LXSo9GWINC60LXQt9GW0L3QtNC1INC00LXRgdC10Log0YLQtSDQsdC+0LvQsNC00Ysu0J7RgdGL0L3QtNCw0Lkg0LXRgNC10LrRiNC10LvRltC60YLQtdGA0ZbQvSDQsdGW0LvQtSDQvtGC0YvRgNGL0L8s0LHQsNC70LDQtNCw0pPRiyDQsdGD0YvQvSDQv9Cw0YLQvtC70L7Qs9C40Y/RgdGL0L0g0L7So9Cw0LnQu9GL0pvQv9C10L0g0YLQsNCx0YPSk9CwINCx0L7Qu9Cw0LTRiyzQvNGL0YHQsNC70Yss0LHQsNC70LDQvdGL0qMg0q/QudGA0LXQuiDRgdC40Y/Sm9GC0Ysg0LbSr9GA0ZbRgdGWLtCR0rHQuyDQsdCw0LvQsNC00LDSk9GLINKx0YDRiNGL0psg0LHRg9GL0L3Ri9KjINC00LXRhNC10LrQsNGG0LjRj9GB0YvQvdCwINCx0LDQudC70LDQvdGL0YHRgtGLLNGP0pPQvdC4INCx0LDQu9Cw0LTQsCDSsdGA0YjRi9KbINCx0YPRi9C90Ysg0LbQsNGA0YLRi9C70LDQuSDRgtCw0LnSk9Cw0L3QtNGL0pvRgtCw0L0g0LHQsNC70LAg0q/QudGA0LXQuiDRgdC40Y/Sm9GC0Ysg0LbSr9GA0LUg0LHQsNGB0YLQsNC50LTRiy7QkNC7INCx0rHQuyDQsNC50YLSm9Cw0L3QtNCw0Lks0LHQsNC70LDQvdGL0qMg0LHRg9GL0L3Ri9KjINKb0L7Qt9KT0LDQu9C80LDQu9GL0pPRi9C90LAs0YLRltGA0LXQui3Sm9C40LzRi9C7INCw0L/Qv9Cw0YDQsNGC0YvQvdGL0qMg0YLQvtC70YvSmyDQttC10YLRltC70LzQtdCz0LXQvdGW0L3QtSDQsdCw0LnQu9Cw0L3Ri9GB0YLRiy7Qn9Cw0LvRjNC/0LDRhtC40Y8g0LDRgNKb0YvQu9GLLNCx0LDQu9Cw0L3Ri9KjINCx0YPRi9C90LTQsNGA0YvQvdGL0qMg0YHQtdGA0L/RltC80LTRltC70ZbQs9GW0L0s0LDRg9GL0YDRgdGL0L3RgyzQsNGD0YvRgNGB0YvQvdCx0LDRg9GL0L0s0LHRg9GL0L0g0LDQudC80LDSk9GL0L3QtNCw0pPRiyDRgtC10YDRltGB0ZbQvdGW0qMg0LbQsNKT0LTQsNC50YvQvSzQsdGD0YvQvdC00LDRgNC00YvSoyDRgtGL0pPRi9C30LTRi9KT0YvQvSDQttOZ0L3QtSDSm9Cw0L3QtNCw0Lkg0LTQsCDQsdGW0YAg0YLSr9C30ZbQu9GW0YHRgtGW0qMg0LHQsNGALdC20L7Sm9GC0YvSk9GL0L0g0LDQudKb0YvQvdC00LDRg9KT0LAg0LHQvtC70LDQtNGLLiA=</text:p>
          </table:table-cell>
          <table:table-cell office:value-type="float" office:value="170348" table:style-name="ce1">
            <text:p>170348</text:p>
          </table:table-cell>
          <table:table-cell office:value-type="float" office:value="88" table:style-name="ce1">
            <text:p>88</text:p>
          </table:table-cell>
          <table:table-cell office:value-type="string" table:style-name="ce1">
            <text:p>балалардағы ерекшеліктерінің өзгерістері толық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65" table:style-name="ce1">
            <text:p>1066865</text:p>
          </table:table-cell>
          <table:table-cell office:value-type="string" table:style-name="ce1">
            <text:p>kazakh</text:p>
          </table:table-cell>
          <table:table-cell office:value-type="string" table:style-name="ce1">
            <text:p>Билет 32.&amp;lt;br /&amp;gt; 1.Балалардың бүйрегінің топографиялық орналасуы.&amp;lt;br /&amp;gt; 2.Балалардың буындарынын ерекшелiктерің атаныз. &amp;lt;br /&amp;gt;</text:p>
          </table:table-cell>
          <table:table-cell office:value-type="string" table:style-name="ce1">
            <text:p>MSDRgdKx0YBh0pvSm9CwINC20LDRg2HQvzog0JHQsNC70LDQu9Cw0YDQtNGL0qMg06nQvNGW0YDRltC90ZbSoyAx0YjRliDQttGL0LvQtNCw0YDRi9C90LTQsCDQsdKv0LnRgNC10Log0LrTqdC70LXQvNGWINGB0LDQu9GL0YHRgtGL0YDQvNCw0LvRiyDRgtKx0YDSk9GL0LTQsCDSr9C70LrQtdC9INCx0L7Qu9GD0Ysg0LbTmdC90LUg0L7QvNGL0YDRgtKb0LAg0LbQvtGC0LDRgdGL0L3Ri9KjINCx0LXQuyDQsdOp0LvRltC80ZYg0pvRi9GB0pvQsCDQsdC+0LvRg9GL0L3QsCDQsdCw0LnQu9Cw0L3Ri9GB0YLRiyDQvNKv0YjQtSDRgtOp0LzQtdC9INC+0YDQvdCw0LvQsNGB0LDQtNGLLiDQntC90YvSoyDQttC+0pPQsNGA0pPRiyDQv9C+0LvRjtGB0ZYg0LrQtdGD0LTQtSDQpdCGLdCl0IbQhiwg0LDQuyDRgtOp0LzQtdC90LPRliDQv9C+0LvRjtGB0ZYgSVYg0LHQtdC7LCDRj9KT0L3QuCDQttCw0LzQsdCw0YEg0pvRi9GA0YvQvdCw0L0g0YLTqdC80LXQvS4g0JHSr9C7INC10YDQtdC60YjQtdC70ZbQutGC0LXRgCDSm9Cw0LvRi9C/0YLRiyDQttCw0pPQtNCw0LnQtNCwIDcg0LbQsNGB0YLQsCDQttC+0LnRi9C70YvQvyDQutC10YLQtdC00ZYuINCa0L7Qu9C70LDRgtC10YDQsNC70YzQtNGLINC+0YDQvdCw0LvQsNGB0LDRgtGL0L0g0LzSr9GI0LUg0pvQsNC70YvQv9GC0YvQtNCwINCx0ZbRgCDQsdC10Lsg0L7QvNGL0YDRgtKb0LAg0LTQtdC90LXRgdGW0L3RltKjINCx0LjRltC60YLRltCz0ZYg0LTQtdKj0LPQtdC50ZbQvdC10L0g0LDRgdC/0LDQudC00YsuINCV0YDQtdGB0LXQutGC0LXRgNC80LXQvSDRgdCw0LvRi9GB0YLRi9GA0pPQsNC90LTQsCDQsdCw0LvQsNC70LDRgNC00LAg0LzSr9GI0LUg0pvQvtC30pPQsNC70LzQsNC70Ysg0LrQtdC70LXQtNGWLiDQodC10LHQtdCx0ZYsINCx0q/QudGA0LXQutGC0ZbSoyDQsNC70LTRi9Kj0pPRiywg0LDRgNGC0pvRiyDRiNCw0L3QtNGL0YDRiyDQttOZ0L3QtSDRiNC10LvQvNCw0LnRiyDQvdCw0YjQsNGAINC00LDQvNGL0pPQsNC9LiDQkdC10LrRltGC0YMg0LzQtdGF0LDQvdC40LfQvNGW0L3RltKjINGC0L7Qu9GL0psg0LTQsNC80YPRiyA1LTgg0LbQsNGB0YLQsCDRgtC+0LvRi9KbINCw0Y/Sm9GC0LDQu9Cw0LTRiy4gMSDQttCw0YHSm9CwINC00LXQudGW0L3Qs9GWINCx0LDQu9Cw0L3Ri9KjINOZ0YAg0LHSr9C50YDQtdCz0ZbQvdGW0qMg0LbQvtKT0LDRgNKT0Ysg0LbTmdC90LUg0YLTqdC80LXQvdCz0ZYg0L/QvtC70Y7RgdGC0LVw0ZYg0LbQsNKb0YvQvSDQttCw0YLQsNC00YssINC205nQvdC1INGE0L5w0LzQsNGB0Ysg0LTTqdKj0LPQtdC70LXQutGC0LXRgyDQutC10LvQtdC00ZYuINCQ0Lsg0LrQtdC50ZbQvdC90LXQvSDSm9Cw0LvRi9C/0YLRi9C00LDSk9GLINCx0rHRgNGI0LDSmyDRgtOZ0YDRltC30LTRliDQv9GW0YjRltC90LPQtSDQuNC1INCx0L7Qu9GL0L8g06nQt9Cz0LXRgNC10LTRli4gICAgICAgICAgICAgICAgICAgICAgICAgICAgICAgICAgICAgICAgICAgICAgICAgICAgICAgICAgICAgICAgICAgICAgICAgICAgICAgICAgICAgICAgICAgICAgICAgICAgICAgIDIg0YHSsdGAYdKb0pvQsCDQttCw0YPQsNC/OtCR0LDQu9Cw0LvQsNGA0LTQsNKT0Ysg0LHRg9GL0L3QtNCw0YDQtNGL0qMg0LbQsNGB0pvQsCDQsdCw0LnQu9Cw0L3Ri9GB0YLRiyDQtdGA0LXQutGI0LXQu9GW0LrRgtC10YDRliDQtdGA0LXRgdC10LrRgtC10YDQtNC10L0g0pvSsdGA0YvQu9GL0LzQtNGL0psg0LbTmdC90LUg0YTRg9C90LrRhtC40L7QvdCw0LvQtNGL0psg0YHQuNC/0LDRgtGC0LDQvNCw0LvQsNGA0Ysg0LHQvtC50YvQvdGI0LAg06nQt9Cz0LXRiNC10LvQtdC90LXQtNGWLiDQkdKx0Lsg0LDQudGL0YDQvGHRiNGL0LvRi9Kb0YLQsNGAINKb0LDSo9Kb0LAtINCx0rHRiNGL0pvQtdGCINC20q/QudC10YHRltC90ZbSoyDTqdGB0YPRliDQvNC10L0g0LRh0LzRg9GL0L3Ri9KjINOp0LfQs9C10YDRltGB0ZbQvNC10L0g0LHQsNC50Lth0L3Ri9GB0YLRi9GA0LDQvNGL0LcuINCR0LDQu9Cw0LvQsNGA0LTQsCDQsdGD0YvQvSDQsdC10YLRgtC10YDRliDQvdC10LPRltC30ZbQvdC10L0g0pvQsNC70YvSoyDRiNC10LzRltGA0YjQutC/0LXQvSDQttCw0LHRi9C70pPQsNC9LCDQsdKx0Lsg0L7Qu9Cw0YDQtNGL0qMg0LjQutC10LzQtNGW0LvRltCz0ZbQvSDQttOZ0L3QtSDSm9C+0LfSk9Cw0LvSk9GL0YjRgtGL0pPRi9C9INCw0YDRgtGC0YvRgNCw0LTRiy4g0KjQtdC80ZbRgNGI0LXQuiDRgtGW0L3RltC00LUg0YHRgyDQutOp0L8sINCx0rHQuyDQsdGD0YvQvdC00LDRgNC00Ysg0YHQtdGA0L/RltC80LTRliwg05nRgNGWINGB0L7Qt9GL0LvQvNCw0LvRiyDQtdGC0LXQtNGWLiDQkdCw0LnQu9Cw0LzQtNCw0YAg0LHQsNC70LDQu9Cw0YDQtNCwINGC0YvSk9GL0Lcg0LXQvNC10YEsINC40LrQtdC80LTRltC70ZbQs9GWINC20L7Sk9Cw0YDRiy4g0JHSsdC7INOp0Lcg0LDQu9C00YvQvdC00LAg0LHRg9GL0L3QtNCw0YDQtNGL0qMg0pvQvtC30pPQsNC70pPRi9GI0YLRi9KT0YvQvSDQsNGA0YLRgtGL0YDQsNC00YssINGB0L7QtNCw0L0g0YjRi9KT0YMg0L3QtdC80LXRgdC1INC20LDRgNGC0YvQu9Cw0Lkg0YjRi9KT0YMg0pvQsNGD0L/RltC9INC10YHQtdC70LXQvdC00ZbRgNC10LTRli4g0JFh0Lth0Lth0YDQtGFhINCx0YPRi9C9INC60LDQv9GB0YPQu9Cw0YHRiyDQttKx0pvQsCDQsdC+0LvQsNC00YssINCx0rHQuyDQttCw0YDQsNKb0LDRgtGC0LDRgNKT0LAg0LHQtdC50ZbQvNC00ZbQu9GW0LrRgtGWINCw0YDRgtGC0YvRgNCw0LTRiy4g0rDQt9GL0L0g0YHSr9C50LXQutGC0LXRgNC00ZbSoyDSsdGI0YLQsNGA0Ysg06nRgdGDINCw0LnQvNCw0pvRgtCw0YDRi9C90LDQvSDRgtKx0YDQsNC00YssINC+0Lsg0Y3Qv9C40YTQuNC30LDRgNC70Ysg0YjQtdC80ZbRgNGI0LXQutGC0LXRgCDQsdC+0LvRi9C/INGC0LDQsdGL0LvQsNC00YsuINCU05nQuyDQvtGB0Ysg0LDQudC80LDSm9GC0LAg0rHQt9GL0L3QtNGL0pPRi9C90LAg0pvQsNGA0LDQuSDRgdKv0LnQtdC60YLQtdGAINOp0YHQtdC00ZYuINCR0rHQuyDTqdGB0YMg0LDQudC80LDSm9GC0LDRgNGLINC20LDRgNCw0pvQsNGC0YLQsNGA0pPQsCDQttOZ0L3QtSDSm9Cw0LHRi9C90YPSk9CwINKb0LDRgNGB0Ysg0LbQvtKT0LDRgNGLINGB0LXQt9GW0LzRgtCw0LvQtNGL0pvSm9CwINC40LUsINC905nRgtC40LbQtdGB0ZbQvdC00LUg0YHSr9C50LXQuiDTqdGB0YPRliDQsdCw0Y/Rg9C70LDQudC00Ysg0LbRltC90LUg0LTQtdGE0L7RgNC80LDRhtC40Y/Qu9Cw0L3Rg9KT0LAg0LTQtdC50ZbQvSDTmdC60LXQu9GD0ZYg0YvSm9GC0LjQvNCw0LsuINCR0LDQu9Cw0LvQsNGA0LTQsCDQsdGD0YvQvdC00LDRgNC00YvSoyDQstCw0YHQutGD0LvRj9GA0LjQt9Cw0YbQuNGP0YHRiyDQttCw0pvRgdGLLiDQkdKx0Lsg0YLRltC90LTQtdGA0LTRltKjINKb0LDQu9C/0YvQvdCwINC60LXQu9GD0ZbQvdC1INC205nQvdC1INC30LDSm9GL0LzQtNCw0L3RgyDQttCw0pPQtNCw0LnRi9C90LDQvSDQutC10LnRltC90LPRliDQttGL0LvQtNCw0Lwg0YDQtdCz0LXQvdC10YDQsNGG0LjRj9C70LDQvdGD0pPQsCDRi9Kb0L/QsNC70YvQvSDRgtC40LPRltC30LXQtNGWLiDQkdGD0YvQvdC00LDRgCDSm9C+0LfSk9Cw0LvSk9GL0YjRgtGL0pPRiyDQtdGA0LXRgdC10LrRgtC10YDQvNC10L0g0YHQsNC70YvRgdGC0YvRgNKT0LDQvdC00LAg0LbQvtKT0LDRgNGLINC60LXQu9C10LTRli4g0KHQvtC90YvQvNC10L0g0pvQsNGC0LDRgCwg0LXRgNGC0LUg0LbQsNGB0YLQsNKT0Ysg0LHQsNC70LDQu9Cw0YDQtNCw0pPRiyDQs9C40L/QtdGA0LzQvtCx0LjQu9GM0LTRltC70ZbQuiDSm9Cw0LvRi9C/0YLRiyDRhNC40LfQuNC+0LvQvtCz0LjRj9C70YvSmyDQttCw0pPQtNCw0LkuINCU0LXQs9C10L3QvNC10L0sINGI0LDQvNCw0LTQsNC9INGC0YvRgSDSm9C+0LfSk9Cw0LvSk9GL0YjRgtGL0psg0LDRg9GL0YDRgdGL0L3Rg9KT0LAg0L3QtdC80LXRgdC1INC/0LDRgtC+0LvQvtCz0LjRj9C70YvSmyDQtNCw0LzRg9KT0LAg05nQutC10LvRg9GWINC80q/QvNC60ZbQvS4g0JzRi9GB0LDQu9KT0LAg0LbQsNC80LHQsNGBINGB0q/QudC10LPRltC90ZbSoyDQtNC40YHQv9C70LDQt9C40Y/RgdGL0L0g0LDQu9GD0pPQsCDQsdC+0LvQsNC00YsuINCR0LDQu9Cw0LvQsNGAINOp0YHRg9GWINC60LXQt9GW0L3QtNC1INC00LXQvdC1INCx0ZbRgtGW0LzRltC90ZbSoyDTqdC30LPQtdGA0YPRliDQvNC10L0g0LHSsdC70YjRi9Kb0LXRgtGC0LXRgNC00ZbSoyDQtNCw0LzRgyDQtdGA0LXQutGI0LXQu9GW0LrRgtC10YDRltC90LUg0LHQsNC50Lsg0LHRg9GL0L3QtNCw0YDSk9CwINGC0q/RgdC10YLRltC9INC20q/QutGC0LXQvNC1INCx0ZbRgNC60LXQu9C60ZYg0LXQvNC10YEg0LDRgtCw0L3QsNC00YsuINCh0L7QtNCw0L0g0LrQtdC50LTQtSDSm9GL0LfQvNC10YLRgtGW0Log0LHSsdC30YvQu9GL0YHRgtCw0YDSk9CwLCDRj9KT0L3QuCDQv9C70L7RgdC60L7RgdGC0L7Qv9C40LUg0LTQsNC80YPRiyDQtNCwINGL0pvRgtC40LzQsNC7LiDQltCw0YHSm9CwINCx0LDQudC70LDQvdGL0YHRgtGLINC10YDQtdC60YjQtdC70ZbQutGC0LXRgNCz0LUg0YLQvtKb0YJh0LthINC60LXRgtGDINKb0LDQttC10YIuINCW0LDSo2Eg0YLRg9KT0LDQvSDQvdOZcNC10YHRgtC10LvQtdGA0LTQtSDQsdGD0YvQvdC00LDRgCDRiNC10LzRltGA0YjQtdC6INGC0ZbQvdGW0L3QtdC9INGC0rHRgNCw0LTRiywg06nRgtC1INC20rHQvNGB0LDSmywg05nRgNGWINC40LrQtdC80LTRli4g0JHSsdC7INOp0Lcg0LDQu9C00YvQvdC00LAg0LbQsNC80LHQsNGBINCx0YPRi9C90LTQsNGA0Ysg0L/RltGI0ZbQvdGWINGC0L7Qu9GL0psg0LbQtdGC0ZbQu9C80LXQs9C10L3QtNGW0LrRgtC10L0sINCx0rHQuyDRgtKx0YDQsNKb0YHRi9C30LTRi9Kb0pvQsCDQsdCw0LnQu9Cw0L3Ri9GB0YLRiyDRhNC40LfQuNC+0LvQvtCz0LjRj9C70YvSmyDQtNC40YHQv9C70LDQt9C40pPQsCDQsdC10LnRltC8INC10YLQtdC00ZYuINCV0YDRgtC1INCx0LDQu9Cw0LvRi9KbINGI0LDSmzogMyDQttCw0YHRgtCw0pPRiyDQsdCw0LvQsNC70LDRgNC00LAg0LHRg9GL0L0g0LHQtdGC0YLQtdGA0ZYg0LXQvdC00ZYg0pvQsNC70YvQv9GC0LDRgdCwINCx0LDRgdGC0LDQudC00YssINGB0q/QudC10Log0rHRiNGC0LDRgNGL0L3QtNCw0pPRiyDRiNC10LzRltGA0YjQtdC6INGC0ZbQvdC00LXRgNGWINCx0ZbRgNGC0ZbQvdC00LXQvyDSm9Cw0YLQsNGP0LTRiy4g0JDQuyDQsdCw0LnQu9Cw0Lwg0LDQv9C/0LDRgNCw0YLRiyDTmdC70YHRltC3LCDRgdC+0Lsg0YHQtdCx0LXQv9GC0ZYg0LbQsNGA0LDSm9Cw0YIg0LDQu9GDINKb0LDRg9C/0ZYg05nQu9GWINC00LUg0LHQsNGALiDQnNC10LrRgtC10L/QutC1INC00LXQudGW0L3Qs9GWINC205nQvdC1INCx0LDRgdGC0LDRg9GL0Ygg0YHRi9C90YvQvyDQutC10LfQtdKj0ZbQvdC00LU6INCR0YPRi9C90LTQsNGAINC20q/QutGC0LXQvNC10LPQtSDRgtOp0LfRltC80LTRltC70ZbQs9GWINCw0YDRgtCw0LTRiywg0LDQuyDQsdCw0LnQu9Cw0LzQtNCw0YAg0LrSr9GI0LXQudGW0L8g0L7Qu9Cw0YDQtNGL0qMg0LjQutC10LzQtNGW0LvRltCz0ZYg0LTQtSDQttC+0pPQsNGA0Ysg0LHQvtC70YvQvyDSm9Cw0LvQsNC00YsuINCR0LDQu9Cw0LvQsNGA0LTRi9KjINGE0LjQt9C40LrQsNC70YvSmyDQsdC10LvRgdC10L3QtNGW0LvRltCz0ZYg0LDRgNGC0LAg0YLSr9GB0LXQtNGWLiDQltCw0YHTqdGB0L/RltGA0ZbQvNC00ZbQuiDQutC10LfQtdKjOiDQodKv0LnQtdC60YLQtdGA0LTRltKjINKb0LDRgNKb0YvQvdC00Ysg06nRgdGD0ZbQvdC1INCx0LDQudC70LDQvdGL0YHRgtGLINCx0YPRi9C90LTQsNGAINC80LXQvSDQsdKx0LvRiNGL0pvQtdGCLSDQsdCw0LnQu9Cw0Lwg0LDQv9C/0LDRgNCw0YLRiyDQsNGA0LDRgdGL0L3QtNCwINGD0LDSm9GL0YLRiNCwINGC0LXSo9Cz0LXRgNGW0LzRgdGW0LfQtNGW0Log0LHQsNC50pvQsNC70LDQtNGLLiDQkdKx0LsgItOp0YHRgyDQsNGD0YvRgNGB0YvQvdGD0LvQsNGA0YsiINC00LXQvyDQsNGC0LDQu9Cw0YLRi9C9INC20LDSk9C00LDQudC80LXQvSDRgdC40L/QsNGC0YLQsNC70LDQtNGLLiDQk9C40L/QtdGA0LzQvtCx0LjQu9GM0LTRltC70ZbQuiDQsdGW0YDRgtGW0L3QtNC10L8g0LDQt9Cw0LnRi9C/LCDQsdCw0LnQu9Cw0LzQtNCw0YAg0LzQtdC9INCx0YPRi9C9INC60LDQv9GB0YPQu9Cw0YHRiyDRgtGL0pPRi9C3LCDTmdGA0ZYg0YLTqdC30ZbQvNC00ZYg0LHQvtC70LDQtNGLLiDQodC+0L3Ri9C80LDQtdC9INKb0LDRgtCw0YAsINC+0YHRiyDQsdGD0YvQvdC00LDRgCDQtdGA0LXQutGI0LXQu9GW0LrRgtC10YDRltC9INKb0LDRgNCw0YHRgtGL0YDQsCDQvtGC0YvRgNGL0L8g0LHRltC3INC80q/QvNC60ZbQvSDQsdC+0LvQsNGC0YvQvSDQv9Cw0YLQvtC70L7Qs9C40Y/Qu9Cw0YDQtNGLINCx0L7Qu9C20LDQuSDQsNC70LDQvNGL0Lc6INC20LDQvNCx0LDRgSDQsdGD0YvQvdGLINC00LjRgdC/0LvQsNC30LjRj9GB0YssINGN0L/QuNGE0LjQt9C10L7Qu9C40LcsINGA0LDRhdC40YIsINC+0YHRgtC10L7RhdC+0L3QtNGA0L7Qv9Cw0YLQuNGP0LvQsNGAINC205nQvdC1INGC0LDSk9GLINCx0LDRgdKb0LDQu9Cw0YDRiy4g0prQvtGA0YvRgtGL0L3QtNGL0LvQsNC5INC60LXQu9C1LCDQsdCw0LvQsNC70LDRgNC00LDSk9GLINCx0YPRi9C90LTQsNGA0LTRi9KjINC10YDQtdC60YjQtdC70ZbQutGC0LXRgNGWLdC+0LvQsNGA0LTRi9KjINC40LrQtdC80LTRltC70ZbQs9GWLCDQsdCw0LnQu9Cw0Lwg0LDQv9C/0LDRgNCw0YLRiyDTmdC70YHRltC30LTRltCz0ZYg0LbTmdC90LUg06nRgdGDINCw0LnQvNCw0pvRgtCw0YDRi9C90YvSoyDQsdC+0LvRg9GLLiDQkdKx0Lsg0LXRgNC10LrRiNC10LvRltC60YLQtdGAINCx0LDQu9Cw0pPQsCDQsdC10LnRltC80LTQtdC70LPRltGI0YLRltC6INKb0LDRgdC40LXRgiDQsdC10YDRgdC1INC00LUsINC20LDRgNCw0pvQsNGC0YLQsNGAINC80LXQvSDQt9Cw0pvRi9C80LTQsNC90YPQu9Cw0YDSk9CwLCDQv9Cw0YLQvtC70L7Qs9C40Y/Qu9Cw0YDQtNGL0qMg0LTQsNC80YPRi9C90LAg0pvQsNGD0ZbQvyDRgtGD0LTRi9GA0LDQtNGLLiA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7" table:style-name="ce1">
            <text:p>915317</text:p>
          </table:table-cell>
          <table:table-cell office:value-type="string" table:style-name="ce1">
            <text:p>russian</text:p>
          </table:table-cell>
          <table:table-cell office:value-type="string" table:style-name="ce1">
            <text:p>Билет 32.&amp;lt;br /&amp;gt; 1.Опишите топографическое расположение почек у детей.&amp;lt;br /&amp;gt; 2.Опишите возрастные особенности суставов у детей.&amp;lt;br /&amp;gt;</text:p>
          </table:table-cell>
          <table:table-cell office:value-type="string" table:style-name="ce1">
            <text:p>MS7Qn9C+0YfQutC4INGDINC00LXRgtC10Lkg0L7Rh9C10L3RjCDQv9C+0LTQstC40LbQvdGLINC4INGB0LLRj9C30LDQvdC90L4g0Y3RgtC+INGBINC90LXQtNC+0YDQsNC30LLQuNGC0L7RgdGC0YzRjiDRgdCy0Y/Qt9C+0YfQvdC+0LPQviDQsNC/0L/QsNGA0LDRgtCwINC4INC90LUg0YTQuNC60YHQuNGA0L7QstCw0L3QvdC+0YHRgtGM0Y4g0LbQuNGA0L7QstC+0Lkg0YLQutCw0L3RjNGOLiAg0KDQsNGB0L/QvtC70L7QttC10L3RiyDQvtC90Lgg0L3QuNC20LUg0YfQtdC8INGDINCy0LfRgNC+0YHQu9GL0YUg0LLQtdGA0YXQvdC40Lkg0LrRgNCw0Lkg0L3QsCDRg9GA0L7QstC90LUgMTIg0LPRgNGD0LTQvdC+0LPQviDQv9C+0LfQstC+0L3QutCwINC90LjQttC90LjQuSDQutGA0LDQuSDRgNCw0YHQv9C+0LvQsNCz0LDQtdGC0YHRjyDQvdCwINGD0YDQvtCy0L3QtSAzLTQg0L/QvtGP0YHQvdC40YfQvdC+0LPQviDQv9C+0LfQstC+0L3QutCwLiDQodCy0LXRgNGF0YMg0YDQsNGB0L/QvtC70L7Qs9Cw0LXRgtGB0Y8g0L3QsNC00L/QvtGH0LXRh9C90LjQuiDQuCDQv9C10YfQtdC90Ywg0YHQv9GA0LDQstCwLCDQvNC10LTQuNCw0LvRjNC90LXQtSDQtNCy0LXQvdCw0LTRhtCw0YLQuNC/0LXRgNGB0YLQvdCw0Y8g0LrQuNGI0LrQsCwg0L/QvtC00LbQtdC70YPQtNC+0YfQvdCw0Y8g0LbQtdC70LXQt9CwLCDQv9C+0L/QtdGA0LXRh9C90LDRjyDRh9Cw0YHRgtGMINGC0L7Qu9GB0YLQvtC5INC60LjRiNC60LgsINGB0LXQu9C10LfQtdC90LrQsCDRgdC70LXQstCwLCDRgdC/0LXRgNC10LTQuCDQsdGA0Y7RiNC90LXQsNGPINGB0YLQtdC90LrQsCwg0YHQt9Cw0LTQuCDQv9C+0Y/RgdC90LjRhtCwLiAyLiDQoSDRgNC+0LbQtNC10L3QuNGPINGB0YPRgdGC0LDQstC90LDRjyDQutCw0L/RgdGD0LvQsCDRgNC10LHQtdC90LrQsCDRgtC+0LvRgdGC0LDRjywg0LTQuNCw0YTQuNC30Ysg0YLRgNGD0LHRh9Cw0YLRi9GFINC60L7RgdGC0LXQuSDRgtCy0LXRgNC00YvQtSDQsCDRjdC/0LjRhNC40LfRiyDRgdC+0YHRgtC+0Y/RgiDQuNC3INGF0YDRj9GJ0LXQstC+0Lkg0Lgg0YDRi9GF0LvQvtC5INGB0L7QtdC00LjQvdC40YLQtdC70YzQvdC+0Lkg0YLQutCw0L3QuCwg0YHQstGP0LfQutC4INC+0YLQvdC+0YHQuNGC0LXQu9GM0L3QviDQv9C+0LTQstC40LbQvdGL0LUsINGB0YPRgdGC0LDQstGLINCz0LjQv9C10YDQv9C+0LTQstC40LbQvdGLLiDRgdC+INCy0YDQtdC80LXQvdC10Lwg0L/RgNC+0LjRgdGF0L7QtNC40YIg0L7RgdGB0LjRhNC40LrQsNGG0LjRjyDQutC+0YHRgtC10Lkg0Lgg0YHRg9GB0YLQsNCy0Ysg0L7QsdGA0LXRgtCw0Y7RgiDQv9C+0LTQstC40LbQvdC+0YHRgtGMLCDQv9C+0LLQtdGA0YXQvdC+0YHRgtGMINGB0L7Qv9GA0LjQutC+0YHQvdC+0LLQtdC90LjRjyDQuCDRgtC+0LvRidC40L3QsCDRgNCw0LfQvNC10YAg0YHRg9GB0YLQsNCy0L3QvtC5INC/0L7QstC10YDRhdC90L7RgdGC0Lgg0LzQtdC90YzRiNC1INGH0LXQvCDRgyDQstC30YDQvtGB0LvRi9GFLiDQoSDQstC+0LfRgNCw0YHRgtCw0Y7RidC10Lkg0LDQutGC0LjQstC90L7RgdGC0YzRjiDRgyDQtNC10YLQtdC5INCy0YHQtSDQu9GD0YfRiNC1INC90LDRh9C40L3QsNC10YIg0YDQsNC30LLQuNCy0LDRgtGM0YHRjyDRgdCy0Y/Qt9C+0YfQvdGL0Lkg0LDQv9C/0LDRgNCw0YIsINC60L7RgdGC0L3QsNGPINGC0LrQsNC90Ywg0YHRgtCw0L3QvtCy0LjRgtGB0Y8g0LrRgNC10L/Rh9C1LCDQsCDRgdGD0YHRgtCw0LLQvdCw0Y8g0LrQsNC/0YHRg9C70LAg0YPRgtC+0L3RjNGI0LDRgtGM0YHRjy4g0JLRgdC1INC60L7RgdGC0Lgg0Lgg0YHQstGP0LfQutC4INC/0L7Qu9C90L7RgdGC0YzRjiDRgdGA0LDRgdGC0LDRjtGC0YHRjyDRgtC+0LvRjNC60L4g0LogMTgtMjAg0LPQvtC00LDQv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13" table:style-name="ce1">
            <text:p>915413</text:p>
          </table:table-cell>
          <table:table-cell office:value-type="string" table:style-name="ce1">
            <text:p>russian</text:p>
          </table:table-cell>
          <table:table-cell office:value-type="string" table:style-name="ce1">
            <text:p>Билет 32.&amp;lt;br /&amp;gt; 1.Опишите топографическое расположение почек у детей.&amp;lt;br /&amp;gt; 2.Опишите возрастные особенности суставов у детей.&amp;lt;br /&amp;gt;</text:p>
          </table:table-cell>
          <table:table-cell office:value-type="string" table:style-name="ce1">
            <text:p>0J/QvtGH0LrQuCDRgyDQtNC10YLQtdC5LiDQkiDRhtC10LvQvtC8INGA0LDRgdC/0L7Qu9C+0LbQtdC90LjQtSDQv9C+0YfQtdC6INGDINC00LXRgtC10Lkg0LfQsNCy0LjRgdC40YIg0L7RgiDQstC+0LfRgNCw0YHRgtCwLiDQoyDQtNC10YLQtdC5INC/0LXRgNCy0YvRhSDQu9C10YIg0LbQuNC30L3QuCwg0L/QvtGH0LrQuCDRgNCw0YHQv9C+0LvQvtC20LXQvdGLINC90LjQt9C60L4sINGN0YLQviDQv9GA0L7QuNGB0YXQvtC00LjRgiDQuNC3LdC30LAg0YLQvtCz0L4g0YfRgtC+INC+0L3QuCDQsdC+0LvRjNGI0LjQtSwg0LAg0YLQsNC6INC20LUg0LjQty3Qt9CwINC60L7RgNC+0YLQutC+0LPQviDQv9C+0Y/RgdC90LjRh9C90L7Qs9C+INC+0YLQtNC10LvQsCDQv9C+0LfQstC+0L3QutC+0LIuINCS0LXRgNGF0L3QuNC1INC/0L7Qu9GO0YHQsCDQv9C+0YfQutC4INC+0LHRi9GH0L3QviDRgNCw0YHQv9C+0LvQvtC20LXQvdGLINGDINC00LXRgtC10Lkg0L3QsCDRg9GA0L7QstC90LUgMTEtMTIg0LPRgNGD0LTQvdGL0YUg0L/QvtC30LLQvtC90LrQvtCyLiDQkCDQvdC40LbQvdC40Lkg0L/QvtC70Y7RgSDQsiDRgdCy0L7RjiDQvtGH0LXRgNC10LTRjCDQvdCwINGD0YDQvtCy0L3QtSDQstC10YDRhdC90LXQs9C+IDTQs9C+INC/0L7Rj9GB0L3QuNGH0L3QvtCz0L4g0L/QvtC30LLQvtC90LrQsC4g0KLQtdC8INGB0LDQvNGL0Lwg0L7QsdGJ0LXQtSDQv9C+0LvQvtC20LXQvdC40LUg0L/QvtGH0LXQuiDRgdGC0LDQvdC+0LLQuNGC0YHRjyDQvdC40LbQtSDQs9GA0LXQsdC10YjQutCwINC/0L7QtNCy0LfQtNC+0YjQvdC+0Lkg0LrQvtGB0YLQuC4g0J3QviDRjdGC0LAg0YXQsNGA0LDQutGC0LXRgNC90L7RgdGC0Ywg0L/QvtGB0YLQtdC/0LXQvdC90L4g0L3QsNGH0LjQvdCw0LXRgiDQuNGB0YfQtdC30LDRgtGMINC/0YDQuNC80LXRgNC90L4g0LogNyDQs9C+0LTQsNC8INC20LjQt9C90LguINCd0LAg0L3QsNGH0LDQu9GM0L3QvtC8INGN0YLQsNC/0LUg0L/QvtGH0LrQuCDQvdCw0YXQvtC00Y/RgtGB0Y8g0L/QvtGH0YLQuCDQv9Cw0YDQsNC70LXQu9GM0L3QviDQtNGA0YPQsyDQtNGA0YPQs9GDLiDQoyDQtNC10YLQtdC5INC80L7Qt9Cz0L7QstC+0LPQviDRgdC70L7RjyDQsdC+0LvRjNGI0LUg0YfQtdC8INC60L7RgNC60L7QstC+0LPQvi4gINCQINGD0LbQtSDQstC+INCy0LfRgNC+0YHQu9GL0LUg0LPQvtC00LAg0LbQuNC30L3QuCDQuNGFINCy0LXRgNGF0L3QuNC1INC/0L7Qu9GO0YHQsCDQvdCw0YfQuNC90LDRjtGCINGB0LHQu9C40LbQsNGC0YzRgdGPLiDQoyDRgtC+0LvRjNC60L4g0YDQvtC00LjQstGI0LjRhdGB0Y8g0Lgg0LXRidGRINC80LDQu9GL0YUg0LvQtdGCINC20LjQt9C90Lgg0LTQtdGC0LXQuSwg0L/QvtGH0LrQuCDQsdC+0LvQtdC1INCy0LXRgNGC0LjQutCw0LvRjNC90L4g0YDQsNGB0L/QvtC70LDQs9Cw0Y7RgtGB0Y8uINCi0LDQuiDQttC1INC/0L7Rh9C60Lgg0LjQvNC10Y7RgiDQsdC+0LvRjNGI0LUg0L3QsNC70LjRh9C40LUg0LrQu9GD0LHQvtGH0LrQvtCyINCyINC/0L7Rh9C10YfQvdC+0Lkg0YLQutCw0L3QuC4g0J3QviDQuCDRjdGC0L4g0YEg0LLQvtC30YDQsNGB0YLQvtC8INC80LXQvdGP0LXRgtGB0Y8sINC4INC/0L7Rh9C60Lgg0L3QsNGH0LjQvdCw0Y7RgiDQv9GA0LjQvdC40LzQsNGC0Ywg0LPQvtGA0LjQt9C+0L3RgtCw0LvRjNC90L7QtSDQv9C+0LvQvtC20LXQvdC40LUsINCyINC80LXRgNGDINGB0LLQvtC10LPQviDRgNC+0YHRgtCwINCwINGC0LDQutC20LUg0LfQsNCy0LjRgdC40LzQviDQvtGCINC/0L7Rj9GB0L3QuNGH0L3QvtCz0L4g0L7RgtC00LXQu9CwINC/0L7Qt9Cy0L7QvdC+0YfQvdC40LrQsC4g0KLQsNC6INC20LUg0Log0YXQsNGA0LDQutGC0LXRgNC40YHRgtC40LrQsNC8INC/0L7Rh9C10Log0YMg0LTQtdGC0LXQuSDQvNC+0LbQtdC8INC00L7QsdCw0LLQuNGC0Ywg0YfRgtC+INC+0L3QuCDQsdC+0LvQtdC1INC/0L7QtNCy0LjQttC90YsuINCV0YHQu9C4INC00L7QsdCw0LLQuNGC0Ywg0L/RgNC+INGE0YPQvdC60YbQuNC+0L3QsNC70YzQvdGL0LUg0YXQsNGA0LDQutGC0LXRgNC40YHRgtC40LrQuCwg0YLQviDRgdGC0L7QuNGCINC+0YLQvNC10YLQuNGC0Ywg0YfRgtC+INC90LjQt9C60LDRjyDQutC70YPQsdC+0YfQutC+0LLQsNGPINGE0LjQu9GM0YLRgNCw0YbQuNGPLiDQldGJ0ZEg0LzQvtC20LXQvCDQvtGC0LzQtdGC0LjRgtGMINGH0YLQviDRhNGD0L3QutGG0LjRjyDRgNC10LDQsdGB0L7RgNCx0YbQuNC4INGC0L7QttC1INC90LjQt9C60LDRjy4g0JIg0YbQtdC70L7QvCDQvdC40LfQutCw0Y8g0YTRg9C90LrRhtC40L7QvdCw0LvRjNC90L7RgdGC0Ywg0YXQsNGA0LDQutGC0LXRgNC90LAg0LjQvC4g0J3RgyDQtNCw0LbQtSDQu9C+0LPQuNGH0LXRgdC60Lgg0LXRidGRINC90LUg0L/QvtC70L3QvtGB0YLRjNGOINC+0LHRgNCw0LfQvtCy0LDQstGI0LjRgdGMLCDQutCw0Log0LzQvtC20LXRgiDQsdGL0YLRjCDQv9C+0LvQvdCw0Y8g0YTRg9C90LrRhtC40L7QvdCw0LvRjNC90L7RgdGC0YwuINCd0LUg0LzQsNC70L4g0LLQsNC20L3Ri9C8INGE0LDQutGC0L7QvCDQvNC+0LbQtdC8INC+0YLQvNC10YLQuNGC0Ywg0YHQvdC40LbQtdC90LjQtSDRgdC10LrRgNC10YLQvtGA0L3QvtC5INC4INC60L7QvdGG0LXQvdGC0YDQsNGG0LjQvtC90L3QvtC5INGE0YPQvdC60YbQuNC4LjxiciAvPg0KPGJyIC8+DQo8YnIgLz4NCtCSINGG0LXQu9C+0Lwg0LrQvtCz0LTQsCDRgNC10LHQtdC90L7QuiDRgNC+0LbQtNCw0LXRgtGB0Y8g0YHRg9GB0YLQsNCy0L3QviDRgdCy0Y/Qt9C+0YfQvdGL0Lkg0LDQv9C/0LDRgNCw0YIg0YMg0L3QuNGFICDRgdGE0L7RgNC80LjRgNC+0LLQsNC9LCDQvdC+INGC0L7Qu9GM0LrQviDQsNC90LDRgtC+0LzQuNGH0LXRgdC60LguINCSINGB0LLQvtGOINC+0YfQtdGA0LXQtNGMINGN0L/QuNGE0LjQt9GLINC60L7RgdGC0LXQuSDQutC+0YLQvtGA0YvQtSDRgdC+0YfQu9C10L3Rj9GO0YLRgdGPINGB0L7RgdGC0L7Rj9GCINC40Lcg0YXRgNGP0YnQsC4g0J3QviDQuNC3INC30LAg0YLQvtCz0L4g0YfRgtC+INC90LXRhdCy0LDRgtC60LAg0LTQuNGE0YTQtdGA0LjQvdGG0LjRgNC+0LIuINCy0L7Qu9C+0LrQvtC9INGB0LLRj9C30L7Quiwg0LzQvtC20LXQvCDQt9Cw0LzQtdGC0LjRgtGMINGH0YLQviDQvtC90Lgg0LHQvtC70LXQtSDRgNCw0YHRgtGP0LbQuNC80YssINGH0LXQvCDRgyDQstC30YDQvtGB0LvRi9GFINC70Y7QtNC10LkuINCd0L4g0L/RgNC+0YfQvdC+0YHRgtGMINGDINC90LjRhSDQvNC10L3RjNGI0LUsINC40Lcg0LfQsCDRjdGC0L7Qs9C+INC80Ysg0LzQvtC20LXQvCDRgdC00LXQu9Cw0YLRjCDQstGL0LLQvtC0INGH0YLQviDRgyDQtNC10YLQtdC5INCx0L7Qu9GM0YjQtSDRgNC40YHQuiDQvdCwINGA0LDQt9C90YvQtSDQstGL0LLQuNGF0LguINCSINGG0LXQu9C+0Lwg0LHQvtC70YzRiNC1INCy0YHQtdCz0L4g0YDQsNC30LLQuNGC0LjQtSDRgdGD0YHRgtCw0LLQvtCyINC/0YDQvtC40YHRhdC+0LTQuNGCINC00L4gMyDQu9C10YIg0LbQuNC30L3QuC4g0J/RgNGP0Lwg0LjQvdGC0LXQvdGB0LjQstC90L7QtSDRgNCw0LfQstC40YLQuNC1LCDRgtC+INC10YHRgtGMINC60L7Qs9C00LAg0YDQtdCx0LXQvdC+0Log0L3QsNGH0LjQvdCw0LXRgiDRg9C20LUg0LDQutGC0LjQstC90YvQuSDQvtCx0YDQsNC3INC20LjQt9C90LgsINCw0LrRgtC40LLQvdC+INC00LLQuNCz0LDRgtGM0YHRjyDQuCDRgi7QtC4g0J/QvtGB0LvQtSAzINC70LXRgiwg0L/RgNC40LzQtdGA0L3QviDQtNC+IDgg0LPQvtC00LAg0LbQuNC30L3QuCDRgNC10LHQtdC90LrQsCDRg9C70YPRh9GI0LDQtdGC0YHRjyDQv9GA0L7Rh9C90L7RgdGC0Ywg0YHQsNC80LjRhSDRgdGD0YHRgtCw0LLQvtCyLiDQodGC0L7QuNGCINC+0YLQvNC10YLQuNGC0Ywg0L7Rh9C10L3RjCDQstCw0LbQvdGL0Lkg0LzQvtC80LXQvdGCLCDRh9GC0L4g0YEgNiDQtNC+IDEwINC70LXRgiDQvdCw0YfQuNC90LDQtdGCINGD0YHQu9C+0LbQvdGP0YLRgdGPINGB0YLRgNGD0LrRgtGD0YDQsCDRgdGD0YHRgtCw0LLQvdC+0Lkg0LrQsNC/0YHRg9C70YsuINCi0LDQvCDQvNGLINC80L7QttC10Lwg0LTQvtCx0LDQstC40YLRjCDRh9GC0L4g0L7QsdGA0LDQt9GD0LXRgtGB0Y8g0YHQvtGB0YPQtNC40YHRgtCw0Y8g0YHQtdGC0YwsINC4INC10YnRkSDQv9C+0Y/QstC70Y/RjtGC0YHRjyDQvdC10YDQstC90YvQtSDQvtC60L7QvdGH0LDQvdC40Y8g0LrQvtC90LrRgNC10YLQvdC+INCyINGB0LjQvdC+0LLQuNCw0LvRjNC90L7QuSDQvNC10LzQsdGA0LDQvdC1LiDQkiDRhtC10LvQvtC8INC+0YHQvdC+0LLQvdC+0LUg0LfQsNCy0LXRgNGI0LXQvdC40LUg0L7QsdGA0LDQt9C+0LLQsNC90LjRjyDQuCDRg9C70YPRh9GI0LXQvdC40LUg0YHRg9GB0YLQsNCy0L3Ri9GFINC60LDQv9GB0YPQuywg0Lgg0YIu0LQuINC/0YDQuNC80LXRgNC90L4g0LIgMTItMTYg0LvQtdGCLiDQotCw0Log0LrQsNC6INGDINC60LDQttC00L7Qs9C+INC+0YDQs9Cw0L3QuNC30Lwg0LjQvdC00LjQstC40LTRg9Cw0LvRjNC90YvQuSwg0YLQviDRjdGC0L4g0LzQvtC20LXRgiDQstCw0YDQuNGA0L7QstCw0YLRjNGB0Y8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4" table:style-name="ce1">
            <text:p>1066914</text:p>
          </table:table-cell>
          <table:table-cell office:value-type="string" table:style-name="ce1">
            <text:p>russian</text:p>
          </table:table-cell>
          <table:table-cell office:value-type="string" table:style-name="ce1">
            <text:p>Билет 32.&amp;lt;br /&amp;gt; 1.Опишите топографическое расположение почек у детей.&amp;lt;br /&amp;gt; 2.Опишите возрастные особенности суставов у детей.&amp;lt;br /&amp;gt;</text:p>
          </table:table-cell>
          <table:table-cell office:value-type="string" table:style-name="ce1">
            <text:p>MSkg0J/QvtGH0LrQuCDQvtGC0L3QvtGB0Y/RgtGB0Y8g0Log0L7RgNCz0LDQvdCw0Lwg0LfQsNCx0YDRjtGI0LjQvdC90L7Qs9C+INC/0YDQvtGB0YLRgNCw0L3RgdGC0LLQsCAo0LPQvtC70L7RgtC+0L/QuNGPKSwg0YMg0LTQtdGC0LXQuSDQv9C+0YfQutC4INGC0L7Qv9C+0LPRgNCw0YTQuNGH0LXRgdC60Lgg0YDQsNGB0L/QvtC70L7QttC10L3RiyDQvdC40LbQtSDRh9C10Lwg0YMg0LLQt9GA0L7RgdC70YvRhSDQuNC3LdC30LAg0L3QtdC00L7RgNCw0LfQstC40YLQuNGPINC/0L7Rj9GB0L3QuNGH0L3Ri9GFINC4INCx0YDRjtGI0L3Ri9GFINC80YvRiNGGINC4INCx0L7Qu9GM0YjQvtCz0L4g0YDQsNC30LzQtdGA0LAg0L/QtdGH0LXQvdC4LiDQodC60LXQu9C10YLQvtGC0L7Qv9C40Y86INCy0LXRgNGF0L3QuNC1INC/0L7Qu9GO0YHQsCDQv9C+0YfQutC4INGA0LDRgdC/0L7Qu9C+0LbQtdC90Ysg0L3QsCDRg9GA0L7QstC90LUgVNK7MTIg0LPRgNGD0LTQvdC+0LPQviDQv9C+0LfQstC+0L3QutCwINCyINGC0L4g0LLRgNC10LzRjyDQutCw0Log0YMg0LLQt9GA0L7RgdC70L7Qs9C+INGH0LXQu9C+0LLQtdC60LAg0L7QvdC4INGA0LDRgdC/0L7Qu9C+0LbQtdC90Ysg0L3QsCDRg9GA0L7QstC90LUgVNK7MTEg0LPRgNGD0LTQvdC+0LPQviDQv9C+0LfQstC+0L3QutCwLiDQndC40LbQvdC40LUg0L/QvtC70Y7RgdCwINC/0L7Rh9C10Log0L7QutC+0LvQviDRg9GA0L7QstC90Y8g0KLSuzQg0L/QvtGP0YHQvdC40YfQvdC+0LPQviDQv9C+0LfQstC+0L3QutCwLCDRgtC+0LPQtNCwINC60LDQuiDRgyDQstC30YDQvtGB0LvQvtCz0L4g0L3QsCDRg9GA0L7QstC90LUg0KLSuzMg0L/QvtGP0YHQvdC40YfQvdC+0LPQviDQv9C+0LfQstC+0L3QutCwLiDQn9GA0Lgg0Y3RgtC+0Lwg0L/RgNCw0LLQsNGPINC/0L7Rh9C60LAg0YDQsNGB0L/QvtC70L7QttC10L3QsCDQvdC10YHQutC+0LvRjNC60L4g0L3QuNC20LUg0LLQvi3Qv9C10YDQstGL0YUg0LjQty3Qt9CwINC+0YLQvdC+0YHQuNGC0LXQu9GM0L3QvtCz0L4g0LHQvtC70YzRiNC10LPQviDRgNCw0LfQvNC10YDQsCDQv9C10YfQtdC90Lgg0L/QviDQvtGC0L3QvtGI0LXQvdC40Y4g0Log0LzQsNC70L7QvNGDINGA0LDQt9C80LXRgNGDINCx0YDRjtGI0L3QvtC5INC/0L7Qu9C+0YHRgtC4ICjQvtGCINC+0LHRidC10LPQviDQstC10YHQsCDRgtC10LvQsCDRgNC10LHQtdC90LrQsCDQv9C10YfQtdC90Ywg0LfQsNC90LjQvNCw0LXRgiDQvtC60L7Qu9C+IDQtNSUsINCyINGC0L4g0LLRgNC10LzRjyDQutCw0Log0YMg0LLQt9GA0L7RgdC70YvRhSDQvtC60L7Qu9C+IDItMyUpLiDQotCw0LrQttC1INC+0LTQvdC40Lwg0LjQtyDQtNC+0L/QvtC70L3QuNGC0LXQu9GM0L3Ri9GFINGE0LDQutGC0L7RgNC+0LIg0L/QvtGH0LXQvNGDINC/0L7Rh9C60Lgg0YDQsNGB0L/QvtC70L7QttC10L3RiyDQvdC40LbQtSDQvNC+0LbQtdGCINCx0YvRgtGMINC90LXQutC+0YLQvtGA0L7QtSDQvdC10LTQvtGA0LDQt9Cy0LjRgtC40LUg0L3QsCDQtNCw0L3QvdC+0Lwg0Y3RgtCw0L/QtSDRgdCy0Y/Qt9C+0YfQvdC+0LPQviDQsNC/0L/QsNGA0LDRgiDQv9C+0YfQtdC6LiDQlNC+0L/QvtC70L3QuNGC0LXQu9GM0L3QviDQvNC+0LbQvdC+INC+0YLQvNC10YLQuNGC0Ywg0L3QsNGA0YPQttC90YvQtSDRgtC+0L/QvtCz0YDQsNGE0LjRh9C10YHQutC40LUg0L7RgNC40LXQvdGC0LjRgNGLINC/0L7Rh9C10Log0YMg0LTQtdGC0LXQuSAtINGN0YLQviDQstC10YDRhdC90LjQuSDQv9C+0LvRjtGBINC/0L4gMTIg0YDQtdCx0LXRgNC90L7QuSDQtNGD0LPQtSwg0LAg0L3QuNC20L3QuNC5INC/0L7Qu9GO0YEg0YMg0L/QvtCy0LfQtNC+0YjQvdC+0LPQviDQs9GA0LXQsdC90Y8uINCh0LjQvdGC0L7Qv9C40Y8g0L/QvtGH0LrQuCDRgtC40L/QuNGH0L3QsNGPLCDQv9GA0LDQutGC0LjRh9C10YHQutC4INGC0LDQutCw0Y8g0LbQtSDQutCw0Log0YMg0LLQt9GA0L7RgdC70L7Qs9C+IC0g0Log0LLQtdGA0YXQvdC40Lwg0L/QvtC70Y7RgdCw0Lwg0L7QsdC10LjRhSDQv9C+0YfQtdC6INC/0YDQuNC80YvQutCw0Y7RgiDQvdCw0LTQv9C+0YfQtdGH0L3QuNC60LgsINGB0LLQtdGA0YXRgyDQv9GA0LDQstCw0Y8g0L/QvtGH0LrQsCDRgdC+0L/RgNC40LrQsNGB0LDQtdGC0YHRjyDRgSDQv9C10YfQtdC90YzRjiwg0LzQvtC20LXRgiDRgdC+0L/RgNC40LrQsNGB0LDRgtGM0YHRjyDRgSDRh9Cw0YHRgtGM0Y4gMTLQv9C6LCDQu9C10LLQsNGPINC/0L7Rh9C60LAg0YHQvtC/0YDQuNC60LDRgdCw0LXRgtGB0Y8g0YEg0LbQtdC70YPQtNC60L7QvC4g0JIg0YbQtdC70L7QvCDQv9C+0YfQutC4INC80L7Qs9GD0YIg0LTQvtGB0YLQuNCz0LDRgtGMINC00LjQsNGE0YDQsNCz0LzRiyDQuCDRgdC+0L/RgNC40LrQsNGB0LDRgtGM0YHRjyDRgSDQvdC10LkuIDIpINCf0L4g0YHRgNCw0LLQvdC10L3QuNGOINGB0L4g0YHRhNC+0YDQvNC40YDQvtCy0LDQvdC90L7QuSDRgdGD0YHRgtCw0LLQvdC+0Lkg0YHQuNGB0YLQtdC80L7QuSDQstC30YDQvtGB0LvQvtCz0L4g0YMg0YDQtdCx0LXQvdC60LAg0LjQvNC10Y7RgtGB0Y8g0LfQvdCw0YfQuNGC0LXQu9GM0L3Ri9C1INGB0YLRgNGD0LrRgtGD0YDQvdGL0LUg0L7RgtC70LjRh9C40Y8gLSDQstC+LdC/0LXRgNCy0YvRhSDRgdGD0YHRgtCw0LLRiyDRgyDQtNC10YLQtdC5INC/0L4g0YHRgtGA0L7QtdC90LjRjiDQsdC+0LvQtdC1INC/0LvQvtGB0LrQuNC1LCDRgdGD0YHRgtCw0LLQvdCw0Y8g0LrQsNC/0YHRg9C70LAg0L3QtdC00L7RgNCw0LfQstC40YLQsCDQuCDQvdC1INC/0L7Qu9C90L7RgdGC0YzRjiDQtNC+0YXQvtC00LjRgiDQtNC+INGB0YPRgdGC0LDQstC90L7Qs9C+INC60YDQsNGPIC0g0Y3RgtC+INC+0LHQtdGB0L/QtdGH0LjQstCw0LXRgiDQsdCe0LvRjNGI0YPRjiDQv9C+0LTQstC40LbQvdC+0YHRgtGMINCyINGB0YPRgdGC0LDQstC1LiDQotCw0LrQttC1INGB0L4g0YHRgtC+0YDQvtC90Ysg0YHQstGP0LfQvtGH0L3QvtCz0L4g0LDQv9C/0LDRgNCw0YLQsCDRgdCy0Y/Qt9C60Lgg0YMg0LTQtdGC0LXQuSDQsdC+0LvQtdC1INC80Y/Qs9C60LjQtSwg0Y3Qu9Cw0YHRgtC40YfQvdGL0LUsINC90LUg0YLRg9Cz0LjQtSwg0LjQty3Qt9CwINGH0LXQs9C+INC90LUg0YHQuNC70YzQvdC+INGE0LjQutGB0LjRgNGD0Y7RgiDRgdGD0YHRgtCw0LIuINCSINGB0LvQtdC00YHRgtCy0LjQtSDRjdGC0L7Qs9C+INGDINC00LXRgtC10Lkg0YfQsNGB0YLQviDQvdCw0LHQu9GO0LTQsNGO0YLRgdGPINC/0YHQtdCy0LTQvtCy0YvQstC40YXQuCDQuCDQstGL0LLQuNGF0LguINCU0L7Qv9C+0LvQvdC40YLQtdC70YzQvdC+INGB0LjQvdGC0LXQtyDRgdC40L3QvtCy0LjQsNC70YzQvdC+0Lkg0LbQuNC00LrQvtGB0YLQuCDQv9GA0L7RhdC+0LTQuNGCINC40L3RgtC10L3RgdC40LLQvdC10LUsINC10LUg0L7QsdGA0LDQt9GD0LXRgtGB0Y8g0LHQvtC70YzRiNC1INGH0LXQvCDRgyDQstC30YDQvtGB0LvRi9GFLCDRh9GC0L4g0L7QsdC10YHQv9C10YfQuNCy0LDQtdGCINCx0L7Qu9C10LUg0LvQtdCz0LrQvtC1INGB0LrQvtC70YzQttC10L3QuNC1INGB0YPRgdGC0LDQstCwLiDQnNC+0LbQvdC+INGC0LDQutC20LUg0L7RgtC80LXRgtC40YLRjCDQstGL0YHQvtC60L7QtSDRgdC+0LTQtdGA0LbQsNC90LjQtSDQutC+0LvQu9Cw0LPQtdC90LAgMtCz0L4g0YLQuNC/0LAsINGH0YLQviDQtNC10LvQsNC10YIg0LIg0L7RgdC+0LHQtdC90L3QvtGB0YLQuCDRgtGA0YPQsdGH0LDRgtGL0LUg0LrQvtGB0YLQuCDQsdC+0LvQtdC1INGN0LvQsNGB0YLQuNGH0L3Ri9C80LgsINCwINC00LDQvdC90YvQuSDRhNCw0LrRgiDQsiDRgdC+0LLQvtC60YPQv9C90L7RgdGC0Lgg0YEg0L/QvtCy0YvRiNC10L3QvdC+0Lkg0L/QvtC00LLQuNC20L3QvtGB0YLRjNGOINCyINGB0YPRgdGC0LDQstCw0YUg0LzQvtC20LXRgiDRgdC+0LfQtNCw0LLQsNGC0Ywg0L7RgtC90L7RgdC40YLQtdC70YzQvdC+INCy0YvRgdC+0LrQuNC5INGA0LjRgdC6INGC0YDQsNCy0LzQsNGC0LjQt9Cw0YbQuNC4INC/0YDQuCDQsNC60YLQuNCy0L3Ri9GFINC30LDQvdGP0YLQuNGP0YU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028" table:style-name="ce1">
            <text:p>1067028</text:p>
          </table:table-cell>
          <table:table-cell office:value-type="string" table:style-name="ce1">
            <text:p>russian</text:p>
          </table:table-cell>
          <table:table-cell office:value-type="string" table:style-name="ce1">
            <text:p>Билет 32.&amp;lt;br /&amp;gt; 1.Опишите топографическое расположение почек у детей.&amp;lt;br /&amp;gt; 2.Опишите возрастные особенности суставов у детей.&amp;lt;br /&amp;gt;</text:p>
          </table:table-cell>
          <table:table-cell office:value-type="string" table:style-name="ce1">
            <text:p>0JLQtdGA0YXQvdC40Lkg0L/QvtC70Y7RgSDQn9C+0YfQutC4INGDINC00LXRgtC10Lkg0YDQsNC90L3QtdCz0L4g0LLQvtC30YDQsNGB0YLQsCDQvdCw0YXQvtC00Y/RgtGB0Y8g0L3QsCDRg9GA0L7QstC90LUgMTEgLSAxMiDQs9GA0YPQtNC90L7Qs9C+INC/0L7Qt9Cy0L7QvdC60LAsINCwINC90LjQttC90LjQuSDQv9C+0LvRjtGBINC00L7RhdC+0LTQuNGCINC00L4g0LLQtdGA0YXQvdC10LPQviDQutGA0LDRjyA0INC/0L7Rj9GB0L3QuNGH0L3QvtCz0L4g0L/QvtC30LLQvtC90LrQsCDQuCDQs9GA0LXQsdC90Y8g0L/QvtCy0LfQtNC+0YjQvdC+0Lkg0LrQvtGB0YLQuC4g0K3RgtC+INGC0L7Qv9C+0LPRgNCw0YTQuNGH0LXRgdC60L7QtSDRgNCw0YHQv9C+0LvQvtC20LXQvdC40LUg0YHQvtGF0YDQsNC90Y/QtdGC0YHRjyDQtNC+IDcg0LvQtdGCINC/0YDQuNCx0LvQuNC30LjRgtC10LvRjNC90L4uINCf0YDQuNGH0LXQvCDQv9C+0YfQutC4INGDINC00LXRgtC10Lkg0YDQsNC90L3QtdCz0L4g0LLQvtC30YDQsNGB0YLQsCDQv9C+INC+0YLQvdC+0YjQtdC90LjRjiDQuiDQtNGA0YPQsyDQtNGA0YPQs9GDICDRgNCw0YHQv9C+0LvQvtC20LXQvdGLINC/0LDRgNCw0LvQu9C10LvRjNC90L4uINCf0L4g0LzQtdGA0LUg0YDQvtGB0YLQsCDQvtGA0LPQsNC90LjQt9C80LAg0L/RgNCw0LLQsNGPINC/0L7Rh9C60LAg0LHRg9C00LXRgiDQvtC/0YPRgdC60LDRgtGM0YHRjy4g0K3RgtC+INGB0LLRj9C30LDQvdC90L4g0YEg0LHQvtC70YzRiNC40LzQuCDRgNCw0LfQvNC10YDQsNC80Lgg0L/QtdGH0LXQvdC4INGBINC/0YDQsNCy0L7QuSDRgdGC0L7RgNC+0L3Riy4g0JIg0L7RgdGC0LDQu9GM0L3QvtC8INC20LUg0LrQsNC6INC4INGDINCy0LfRgNC+0YHQu9GL0YUsINC/0L7Rh9C60Lgg0YMg0LTQtdGC0LXQuSDRgNCw0YHQv9C+0LvQvtC20LXQvdGLINCyINC30LDQsdGA0Y7RiNC40L3QvdC+0Lwg0L/RgNC+0YHRgtGA0LDQvdGB0YLQstC1LiA8YnIgLz4NCtCSINC80L7QvNC10L3RgiDRgNC+0LbQtNC10L3QuNGPINGDINC00L7QvdC+0YjQtdC90L3Ri9GFINC00LXRgtC10Lkg0YHRg9GB0YLQsNCy0L3Qvi3QvNGL0YjQtdGH0L3Ri9C5INCw0L/Qv9Cw0YDQsNGCINC/0L7Qu9C90L7RgdGC0YzRjiDQsNC90LDRgtC+0LzQuNGH0LXRgdC60LjQuSDRgdGE0L7RgNC80LjRgNC+0LLQsNC9LiDQntGB0YHQvtCx0LXQvdC90L7RgdGC0Ywg0YHRg9GB0YLQsNCy0L3QvtCz0L4g0LDQv9C/0LDRgNCw0YLQsCDRgyDQtNC10YLQtdC5INGA0LDQvdC90LXQs9C+INCy0L7Qt9GA0LDRgdGC0LAg0LIg0YLQvtC8INGH0YLQviDRgdGD0YHRgtCw0LLQvdGL0LUg0L/QvtCy0LXRgNGF0L3QvtGB0YLQuCDQuNC80LXRjtGCINCx0L7Qu9GM0YjRg9GOINC/0LvQvtGJ0LDQtNGMINC4INC/0L7QstC10YDRhdC90L7RgdGC0Ywg0LIg0L7RgdC+0YHQsdC10L3QvdC+0YHRgtC4INGB0YPRgdGC0LDQstGLINC60L7QvdC10YfQvdC+0YHRgtC10LkuINCt0YLQviDRgdCy0Y/Qt9Cw0L3QviDQv9GA0LXQttC00LUg0LLRgdC10LPQviDRgSDQvdC1INC30LDRgNCw0YnQtdC90LjQtdC8INGN0L/QuNGE0LjQt9Cw0YDQvdGL0YUg0YXRgNGP0YnQtdC5LiDQotCw0Log0LbQtSDRgyDQtNC10YLQtdC5INC60LDQv9GB0YPQu9GLINC4INGB0LLRj9C30LrQuCDQv9C+0LTQtNC10YDQttC40LLQsNGO0YnQuNC1INGB0YPRgdGC0LDQsiDQuNC80LXRjtGCINC80LXQvdGM0YjRg9GOINC/0YDQvtGH0L3QvtGB0YLRjCDRh9C10Lwg0YMg0LLQt9GA0L7RgdC70YvRhSDQv9C+0Y3RgtC+0LzRgyDQvNGLINCz0L7QstC+0YDQuNC8INC+0LEg0YHQu9Cw0LHQvtC8INGB0LLRj9C30L7Rh9C90L7QvCDQsNC/0L/QsNGA0LDRgtC1LiDQrdGC0L4g0L3QtdC+0LHRhdC+0LTQuNC80L4g0YPRh9C40YLRi9Cy0LDRgtGMINGC0LDQuiDQutCw0Log0L/RgNC4INC90LXQsdGA0LXQttC90L7QvCDQvtGC0L3QvtGI0LXQvdC40Lgg0Log0YDQtdCx0LXQvdC60YMg0LzQvtCz0YPRgiDQsdGL0YLRjCDQstGL0LLQuNGF0Lgg0Lgg0YIuINC0LiDQotCw0LrQttC1INGDINC00LXRgtC10Lkg0YDQsNC90L3QtdCz0L4g0LLQvtC30YDQsNGB0YLQsCDQutC+0YHRgtC90YvQtSDQstGL0YHRgtGD0L/RiyDQs9GA0LXQsdC90Lgg0Lgg0YIg0LQg0YPRh9Cw0YHRgtCy0YPRjtGJ0LjQtSDQsiDQvtCx0YDQsNC30L7QstCw0L3QuNC4INGB0YPRgdGC0LDQstCwINC90LUg0LLRi9GA0LDQttC10L3QvdGL0LUg0Y3RgtC+INC/0L7QstGL0YjQsNC10YIg0L/QvtC00LLQuNC20L3QvtGB0YLRjCDRgdGD0YHRgtCw0LLQsC4g0J/QviDQvNC10YDQtSDRgNC+0YHRgtCwINGA0LXQsdC10L3QutCwINGD0LzQtdC90YzRiNCw0LXRgtGB0Y8g0YHRg9GB0YLQsNCy0L3QsNGPINC/0L7QstC10YDRhdC90L7RgdGC0YwsINC/0YDQvtGH0L3QvtGB0YLRjCDQutCw0L/RgdGD0Lsg0Lgg0YHRg9GB0YLQsNCy0L3Ri9GFINGB0LLRj9C30L7QuiDRg9Cy0LXQu9C40YfQuNCy0LDQtdGC0YHRjyDQuCDQutGA0LXQv9C70LXQvdC40LUg0YHQstGP0LfQvtC6INC6INC60L7RgdGC0Y/QvCDRgtC+0LbQtS4g0J3QviDQv9C+0LTQstC40LbQvdC+0YHRgtGMINCyINGB0YPRgdGC0LDQstC1INGB0L3QuNC20LDQtdGC0YHRjy4g0Lgg0LogNy0xMCDQs9C+0LTQsNC8INGB0YPRgdGC0LDQsiDRgdGC0LDQvdC+0LLQuNGC0YzRgdGPINC/0L4g0LDQvdCw0YLQvtC80L4t0YTQuNC30LjQvtC70L7Qs9C40YfQtdGB0LrQuNC8INC+0YHRgdC+0LHQtdC90L3QvtGB0YLRj9C8INGB0YLQsNC90L7QstC40YLRjNGB0Y8g0YHRhdC+0LbQuNC8INGBINGB0YPRgdGC0LDQstC+0Lwg0LLQt9GA0L7RgdC70L7Qs9C+INGH0LXQu9C+0LLQtdC60LAuIDxiciAvPg0K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95" table:style-name="ce1">
            <text:p>914695</text:p>
          </table:table-cell>
          <table:table-cell office:value-type="string" table:style-name="ce1">
            <text:p>english</text:p>
          </table:table-cell>
          <table:table-cell office:value-type="string" table:style-name="ce1">
            <text:p>Ticket 32.&amp;lt;br /&amp;gt; 1. Describe the topographic location of the kidneys in children.&amp;lt;br /&amp;gt; 2. Describe the age-related characteristics of joints in children.&amp;lt;br /&amp;gt;</text:p>
          </table:table-cell>
          <table:table-cell office:value-type="string" table:style-name="ce1">
            <text:p>VEhFIGtpZG5leSBpcyBsb2NhdGVkIGluIHRoZSB1cHBlciBwYXJ0IG9mIGFiZG9tZW4gbHlpbmcgYWdhaW5zdCB0aGUgYmFjayBtdXNjbGUgLiBlbmNsb3NlZCBpbiB0aGUgbWVtYnJhbmUgY2Fwc3VsZSB0aGV5IGxpZWQgb24gcmV0cm9wZXJpdG9uZWFsIHNwYWNlIGJlaGluZCB0aGUgcGVyaXRvbmVhbSAuIHRoZSBraWRuZXkgZXh0ZW5kIGZyb20gdDEyIHRvIGxvd2VyIHZlcnRlYnJhZSBsdW1iZXIgbDMgLiBpbiB0aGUgZWFybHkgc3RhZ2UgdGhlIGtpZG5leSBkb3JzaSBjYXVkYWwgaW4gcG9zaXRpb24gLmFuZCBkbyBub3QgaGF2ZSBhIGV4Y3JldG9yeSBmdW5jdGlvbi4gdGhlIHBlcml0b25lYW0gc3BhY2UgaXMgZmlsZWQgd2l0aCBmbHVpZCBidXQgaXQgd29yayBsaWtlIGluIGFkdWx0IC4gaW4gdGhlIGZvdXJ0aCB3ZWVrIHRoZSB0dWJlcmN1bGtlIHN0cnVjdHVyZSBpcyBiZWdpb24gdG8gZm9ybWVkIGxpa2UgcGN0ICAuICB0aGUgZmluYWwgc3RhZ2UgaXMgbWV0YW5lcGhyb3MgaW4gdHRoaXMga2lkbmJleSBpcyBkZXZlbG9wZWQgZnJvbSBtZXNvdGhlbGl1bSAuIHRoZSBtZXNvdGhlbGl1bSBidWQgYW5kIGR1Y3QgZGlmZmVyZWJ0aXVhdHJlIGludG8gdXJldGVyICwgcmVuYWwgcGVsdmlzIGFuZCBjb2xsZWN0aW5kIGR1Y3QgLmF0IGhlIHBlcmlwaGVlcmFsIGNlbGwgZ3JvdyBmYXN0ZXIgdG8gIGZvcm0gdmVpbiBhbmQgbmVydmUgLiAgICAgICAgICAgICAgICAgICAgICAgICAgICAgICAgICAgICAgICAgICAgICAgICAgICAgICAgICAgICAgICAgICAgICAgICAgICAgICAgICAgICAgICAgICAgICAgICAgICAgICAgICAgICAyKSAgICAgICAgICAgICAgICAgICAgICAgICAgICAgICAgICAgICAgICAgICAgICAgICAgICAgICAgICAgICAgICAgICAgICAgICAgICAgICAgICAgICAgICAgICAgICAgICAgICAgICAgICAgICAgICAgICAgICAgICAgICAgICAgICAgICAgICAgICAgICAgICAgICAgICAgICAgICBhZ2UgcmVsYXRlZCBjaGFyYWN0ZXJpc3RpY3Mgb2Ygam9pbnQgaW4gY2hpbGRyZW4gZGlmZmVyIHNpZ25pZmljYWFseSBmcm9tIHRoZSBhZHVsdCBkdWUgdG8gb25nb2luZyBwcm9jZXNzIG9mIGdyb3d0cmggLCBkZXZlbG9wZW1lbnQgYW5kIG1hdHVyYXRpb24uIGJlbG93IGFyZSBrcnkgZmVhdHVyZSA7ICAgICAgICAgICAgICAgICAgICAgICAgICAgICAgICAgICAgICAgICAgICAgICAgICAgICAgICAgICAgICAgICAgICAgICAgICAgICAgICAgICAgICAgICAxfSBjYXJ0aWxhZ2lub2l1cyBzdXJmYWNlIDsgdGhlIGFydGljdWxhciBjYXJ0aWxhZ2UgaXMgdGhpY2tlciBhcyAgY29tcGFpcmVkIHRvIGFkdWx0IC4gdGhpcyBwcm92aWRlIGJldHRlciByZXNpbGllbmNlIGFuZCBzaG9jayBhYnNvcnB0aW9uIGZvciBncm93aW5nIHRpc3N1ZSBhbmQgaGlnaCBhY3Rpdml0eSBsZXZlbCAuICAgICAgICAgICAgICAgICAgICAgICAgICAgICAgICAgICAgICAgICAgICAgICAgICAgICAgICAgICAgICAgICAgICAgICAgICAgICAgICAgICAgICAyfSBlcGlwaHlzZWFsIHBsYXRlIGNvbXBvc2VkIG9mIGh5bGluZSBjYXJ0aWxhZ2UgYXJlIHByZXNlbnQgYXQgdGhlIGVuZCBvZiBsb21nIGJvbmUgLiB0aGVzZSBwbGF0ZSBhcmUgcmVzcG9uc2libGUgZm9yIGxvbmd1aXR1ZGluYWwgYm9uZSBncm93dGggYW5kIGdyYWR1bGx5IG9zc2lmaWVzIGxhdGVyIGF0IGNoaWxkIHN0YWdlLiAgICAgICAgICAgICAgICAgICAgICAgICAgICAgICAgICAgICAgICAgICAgICAgICAgICAgICAgICAgICAgICAgICAgICAgICAgICAgICAgICAgICAgICAgICAgICAgICAzfSBtZXRhcGh5c2ljIHBsYXRlIGlzIGFsc28gc2VlbiBpbiB0aGUgY2hpbGQgbGF0ZXIgaXQgb3NzaWZpZWQgYW5kIG1ha2UgY2FydGlsYWdlbm91cyBqb2ludCBleGFtcGxlIFtwdWJpcyBzeW1waHlzaXNdIC4gICAgICAgICAgICAgICAgICAgICAgICAgIDR9IHRoZSBqb2ludCBpcyBtb3JlIHNvZnQgYW5kIGxvb3NlICBhcyBjb21wYWlyZWQgdG8gYWR1bHQgLiB0aGUgc2t1bGwgYm9uZSBpcyBvc3NpZmllZCBpbiAxIHRvIDIgeWVhciBvZiBhZ2UgLiBjYXJ0aWxhZ2UgaXMgZGVuc2UgYW5kIGVsYXN0aWMgcHJlc2VudCBpbiBqb2ludCBhbmQgcmlicyBhbGxvd2luZyBmb3IgYm9uZSBncm93dGguICAgICAgICAg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27" table:style-name="ce1">
            <text:p>915027</text:p>
          </table:table-cell>
          <table:table-cell office:value-type="string" table:style-name="ce1">
            <text:p>english</text:p>
          </table:table-cell>
          <table:table-cell office:value-type="string" table:style-name="ce1">
            <text:p>Ticket 32.&amp;lt;br /&amp;gt; 1. Describe the topographic location of the kidneys in children.&amp;lt;br /&amp;gt; 2. Describe the age-related characteristics of joints in children.&amp;lt;br /&amp;gt;</text:p>
          </table:table-cell>
          <table:table-cell office:value-type="string" table:style-name="ce1">
            <text:p>dGhlIHRvcG9ncmFwaGljIGxvY2F0aW9uIG9mIHRoZSBraWRuZXkgaW4gdGhlIGNoaWxkcmVucyA6IGluIGNoaWxkcmVuIHRoZSBraWRuZXkgYXJlIGxvY2F0ZWQgaW4gcmV0cm9wZXJpdG9uaWFsIHNwYWNlICwgd2hpY2ggaXMgdGhlIGFyZWEgYmV0d2VlbiBwb3N0ZXJpb3IgYWJkb21pbmFsIHdhbGwgYW5kIHRoZSBwYXJpZXRhbCBwZXJpdG9uaXVtIC50aGUga2lkbmV5IGF0cmUgdGhlIGJlYW4gc2hhcGVkIG9yZ2FucyB3aGljaCBhcmUgc2l0dWF0ZWQgb24gdGhlIGVpZ2h0ZXIgc2lkZSBvZiB0aGUgc3BpbmUgLiwgd2l0aCB0aGUgcmlnaHQga2lkbmV5IHR5cGljYWxseSBsb2NhdGVkIHNsaWdodGx5IGxvd2VyIHRoYW4gdGhlIGxlZnQgZHVlIHRvIHByZXNlbmNlIG9mIGxpdmVyIC4gLi4uLi4uaW4gY2hpbGRyZW5zIHRoZSBraWRuZXlzIGFyZSByZWxhdGl2ZWx5IGxhcmdld3IgY29tcGFyZWQgdG8gdGhlIGFkdWx0cyBraWRuZXkgLiBhbmQgdGhleSBhcmUgbG9jYXRlZCBtb3JlIGhvcml6b250YWxseSBkdWUgdG8gdGhlIHNtYWxsIHNpemUgb2YgYWJkb21hbiBpbiBjaGlsZHJlbiAuIC4gdGhlIGtpZG5leSBhbHNvIGhhdmUgbW9yZSBwcm9taW5hbnQgcmVuYWwgcGVsdmljYW5kIGNhbHljZXMgaW4gY2hpbGRyZW5zIHdoaWNoIGNhbiBtYWtlIHRoZW0gbW9yZSBwcm9uZSB0byB1cmluYXJ5IGluZmVjdGlvbiAuc28gIHRoaXMgd2FzIGFuIG92ZXIgdmlldyBvbiBsb2NhdGlvbiBvZiBraWRuZXkgaW4gdGhlIGNoaWxkcmVucyAuLi4uLi4uLi4uLjIuIGFnZSByZWxhdGVkIGNoYXJhY3RlcnN0aWNzIG9mIGpvaW50cyBpbiBjaGlsZHJlbnMgLi4uLi4uLi4uLi4uam9pbiBpbiBjaGlsZHJlbiBoYXZlIHNldmVyYWwgYWdlIHJlbGF0ZWQgY2hhcmFjdGVyc3RpcyB0aGF0IGRpc3Rpbmd1aXNoIHRoZW0gZnJvbSBhZHVsdHMgam9pbnRzIC4uLi4gc3VjaCBhcyAgLi4uSU5GQU5DWSAuLi4uMC0xIHllYXIgam9pbnRzIGFyZSByZWxhdGl2ZWx5IGxvb3NlIGFuZCBmbGV4aWJsZSAsIHdpdGggYSBoZWlnaGVyIGRlZ3JlZSBvZiBqb2ludCBtb2JpbGl0eSAuIHRoZSBqb2ludCBjYXBzdWxlcyBhbmQgbGlnYW1lbnRzIGFyZSBhbHNvIG1vcmUgZWxhc3RpYyAuLi4uLi4uLlRPRERMRVJIT09EIDEtMyB5ZWFycyAuLi4uLi5qb2ludHMgYmVnYW5zIHRvIHN0YWJsaXplIGFuZCB0aGUgam9pbnQgY2Fwc3VsZSBhbmQgbGlnYW1lbnRzIHN0YXJ0cyB0aWdodGVucyAuIGJ1dCBhdCB0aGlzIHN0YWdlIHRoZSBqb2ludCBzdGlsbCByZW1haW4gZmxleGlibGUgLiAuLi4uRUFSTFkgQ0hJTERIT09EIC4uLjQtNiB5ZWFycyAuLi4uLi4uam9pbnQgY29udGludWUgdG8gbWF0dXJlIGFuZCBqb2ludCBsaWdhbWVudCBhbmQgY2FwdXNlbGUgZ2V0IHRoZSBtb3JlIHJpZ2lkaXR5IC4gYnV0IGpvaW50cyBhcmUgc3RpbGwgbW9yZSBwcm9uZSB0byBpbmp1cnkgZHVlIHRvIHRoZSByZWxhdGl2ZWx5IGxvb3NlIGpvaW50IGNhcHN1bGUgYW5kIGxpZ2FtZW50cyAuIC4uLi5MQVRFIENISUxESE9PRCBvciBBRExFU0NBTkNFIC4uLi4uLi4uLi43LTE4IHllYXJzIC4uLi4uam9pbnQgcmVhY2ggbWF0dXJpdHkgLiBjYXBzdWxlIGFuZCBsaWdhbWVudHMgYmVjb21lIHJpZ2lkIC4gYnV0IHN0aWxsIG1vcmUgcHJvbmUgdG8gaW5qdXJ5IGR1ZSB0byByYXBpZCBncm93dGggYW5kIGRldmVsb3BtZW50IG9mIGJvbmUgYW5kIG11c2NsZXMgLiAuLi4gc28gdGhlIGpvaW50cyBvZiBjaGlsZHJlbnMgYXJlIG1vcmUgcHJvbmV0byBpbmp1cnkgZHVlIHRvIHJlbGF0aXZlIGxvb3NlbmVzcyBhbmQgZmxleGliaWxpdHkgLiAgYnV0IHRoZXkgaGF2ZSBncmVhdGVyIGNhcGljaXR5IG9mIGhlYWxpbmcgYW5kIHJlcGFpciBkdWUgdG8gaGlnaGVyIGRlZ3JlZSBvZiBjZWxsdWxhciBhY3Rpdml0eSBhbmQgdGlzc3VlIHJlZ2VuZXJhdGlvbiBjYXBpY2l0eSAu</text:p>
          </table:table-cell>
          <table:table-cell office:value-type="float" office:value="170348" table:style-name="ce1">
            <text:p>170348</text:p>
          </table:table-cell>
          <table:table-cell office:value-type="float" office:value="66" table:style-name="ce1">
            <text:p>66</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5194" table:style-name="ce1">
            <text:p>915194</text:p>
          </table:table-cell>
          <table:table-cell office:value-type="string" table:style-name="ce1">
            <text:p>kazakh</text:p>
          </table:table-cell>
          <table:table-cell office:value-type="string" table:style-name="ce1">
            <text:p>Билет 33.&amp;lt;br /&amp;gt; 1.Соматотропты гормоның гиперпродукциясы балаларда неге әкеледі?&amp;lt;br /&amp;gt; 2.14 жасар қыз бала вегето-тамырлық дистония бойынша зертеліп жүр. Шағымдары жиі басының ауырсынуына, айналуына, жүрек аймағының ауырсынуы. Эмоционалды лабилды.Алақаның және табаның гипергидрозы. Жалпы терлегіштік. АҚ 80/60 мм рт.ст. Жұрек соғу жиілігі минуттына 60. Қандай зерттеу әдісттерімен тамыр тонустарын анықтауға болады.&amp;lt;br /&amp;gt;</text:p>
          </table:table-cell>
          <table:table-cell office:value-type="string" table:style-name="ce1">
            <text:p>MS7QodCw0LzQvtGC0L7RgtGA0L7Qv9GC0Ysg0LPQvtGA0LzQvtC9LdCx0LDQu9Cw0LvQsNGAINC80LXQvSDQtdGA0LXRgdC10LrRgtC10YDQtNC1INC90LXQs9GW0LfRltC90LXQvSDTqdGB0YMg0YTRg9C90LrRhtC40Y/RgdGL0L0g0LbQtdC00LXQu9C00LXRgtC10YLRltC9INC205nQvdC1INCx0LDSm9GL0LvQsNC50YLRi9C9INCz0L7RgNC80L7QvSDQsdC+0LvRi9C/INGB0LDQvdCw0LvQsNC00Ysu0J3QtdCz0ZbQt9GWINCz0LjQv9C+0YTQuNC30LTRltGW0qMg0LDQtNC10L3QvtCz0LjQv9C+0YTQuNC30ZbQvdC00LUg0YHQuNC90YLQtdC30LTQtdC70ZbQvyDQvtGC0YvRgNCw0LTRiy7QntC90YvSoyAg0LHTqdC70ZbQvdGD0ZYg0LzQtdC9INOZ0YHQtdGAINC10YLRg9GWINCz0LjQv9C+0YTQuNC3LdCz0LjQv9C+0YLQsNC70LDQvNGD0YHRgtGL0psg0LbSr9C50LUg0LDRgNKb0YvQu9GLINGA0LXRgtGC0LXQu9GW0L8g0L7RgtGL0YDQsNC00Ysu0JHQsNC70LDQu9Cw0YDQtNCwINC90LXQs9GW0LfRltC90LXQvSDQtNKv0L3QuNC10LPQtSDQutC10LvQs9C10L0g0YPQsNKb0YvRgtGL0L3QsNC9INCx0LDRgdGC0LDQvyDQutOp0L/RgtC10LPQtdC9INCz0L7RgNC80L7QvdC00LDRgNC00YvSoyDQs9C40L/QtdGA0YTRg9C90LrRhtC40Y/RgdGLINCx0LDQudKb0LDQu9Cw0LTRiy7QntC90YvSoyDQutOp0LHRltGB0ZYg0LHQsNC70LDSm9Cw0LnQtNGL0qMg0YLQtdC3INC20LXRgtGW0LvRg9GW0L3QtSzQt9Cw0YIg0LDQu9C80LDRgdGD0LvQsNGA0YvQvSDQvtKj0LDQudC70LDRgtGD0pPQsCAs0pvQvtGA0YjQsNKT0LDQvSDQvtGA0YLQsNKT0LAg0LHQtdC50ZbQvNC00LXQu9GD0LPQtSDRgdC10L/RgtGW0LPRltC9INGC0LjQs9GW0LfQtdC00ZYu0J7RgdGLINCz0L7RgNC80L7QvdC00LDRgNC00YvSoyDQsdGW0YDRliDRgdC+0LzQsNGC0L7RgtGA0L7Qv9GC0Ysg0LPQvtGA0LzQvtC90L3Ri9KjINCz0LjQv9C10YDQv9GA0L7QtNGD0LrRhtC40Y/RgdGLINCx0LDQu9Cw0LvQsNGA0LTQsCDQvtC70LDRgNC00YvSoyDQsdC+0LnQu9Cw0YDRi9C90YvSoyDQttCw0YEg0YjQsNC80LDRgdGL0L3QsCDRgdCw0Lkg0LXQvNC10YEg0YLSr9GA0LTQtSDRgtC10Lcg06nRgdGW0L8g0LrQtdGC0YPRltC90LUgLNCw0Y/SmyDSm9C+0LvQtNCw0YDRi9C90YvSoyDQvNC10LfQs9GW0LvQvNGB0ZbQtyDRgtGL0Lwg0rHQt9Cw0YDRg9GL0L3QsCDTmdC60LXQu9C10LTRli7Qk9C+0YDQvNC+0L3QvdGL0qMg0LzSsdC90LTQsNC5INC20LDSk9GL0LzRgdGL0Lcg0LbQsNKT0LTQsNC50Ysg0LHQsNC70LDQu9Cw0YDQtNCwINGN0LzQvtGG0LjQvtC90LDQu9C00YvSmyDRgtKx0YDSk9GL0LTQsCDQttOZ0L3QtSDRhNC40LfQuNC60LDQu9GL0psg0YLSsdGA0pPRi9C00LAg0LrTqdC/0YLQtdCz0LXQvSDRi9Kj0pPQsNC50YHRi9C30LTRi9KbINGC0YPQtNGL0YDQsNC00Ysu0K3QvNC+0YbQuNC+0L3QsNC70LTRi9KbINC20LDSk9GL0L3QsNC9INCx0LDQu9Cw0pvQsNC5INOp0LfRltC9INC10L3QtNGWINC20LXRgtGW0LvRltC/INC60LXQu9C1INC20LDRgtKb0LDQvdC00YvSm9GC0LDQvSDQsdCw0YHSm9CwINCx0LDQu9Cw0LvQsNGA0LzQtdC9INOp0LfRltC9INGB0LDQu9GL0YHRgtGL0YDRg9GLINC80q/QvNC60ZbQvS7QpNC40LfQuNC60LDQu9GL0psg0YLSsdGA0pPRi9C00LAg0L7QvdGL0qMg0pvQvtC30pPQsNC70YvRgdGLINKb0LjRi9C90LTQsNC50LTRiy7QntC00LDQvSDQsdOp0LvQtdC6INGB0LDQvNC+0YLQvtGC0YDQvtC/0YLRiyDQs9C+0YDQvNC+0L3QvdGL0qMg0YDQtdGC0YLQtdC70ZbRgdGW0L0g0LbSr9GA0LPRltC30ZbQvyDQvtGC0YvRgNCw0YLRi9C9INCz0LjQv9C+0YLQsNC70LDQvNGD0YEg0LPQuNC/0L7RhNC40LfQsNGA0LvRi9KbINC20q/QudC1INC00LUg0LfQsNKb0YvQvNC00LDQvdCw0LTRiyAu0KHQvtC90YvSoyDTmdGB0LXRgNGW0L3RltC90LXQvSDQsdCw0YHSm9CwINCz0L7RgNC80L7QvdC00LDRgNC00YvSoyDRhNGD0L3QutGG0LjRj9GB0Ysg0LzQtdC9INCx06nQu9GW0L3Rg9GWINCx0rHQt9GL0LvQsNC00Ysu0JHSsdC7INCz0L7RgNC80L7QvdC90YvSoyDQs9C40L/QtdGA0L/RgNC+0LTRg9C60YbQuNGP0YHRi9C90LDQvSDQttGL0L3Ri9GB0YLRi9KbINC20LXRgtGW0LvRgyDQtNC1INC60LXRiNGW0LPRg9GWINC80q/QvNC60ZbQvS7QmtC10LnQtNC1INCz0LjQv9C+0L/RgNC+0LTRg9C60YbQuNGP0YHRiyDQutC10LfRltC90LTQtSDQsdCw0LvQsNC70LDRgNC00LAg06nRgtC60ZbQvdGI0ZYg0LbQtdGC0LrRltC90YjQtdC6INC20LDRgdGL0L3QtNCwINCx0L7QuSDTqdGB0L/QtdC5INKb0LDQu9GD0Ysg0LHQsNC50pvQsNC70LDQtNGLLtCv0pPQvdC4IDE0LTE1INC20LDRgdGC0LDSk9GLINKx0Lsg0LHQsNC70LDQu9Cw0YDQtNCwINC205nQvdC1IDEyLTEz0LbQsNGB0YLQsNKT0Ysg0pvRi9C3INCx0LDQu9Cw0LvQsNGA0LTQsCDQsNGC0LAg0LDQvdCw0YHRiyDQsdC+0Lkg06nRgdC/0LXRg9GW0L0g0LHQsNC50pvQsNGB0LAg0LDRgNC90LDQudGLINC60LvQuNC90LjQutCw0pPQsCDQutC10LvRltC/INGB0LDQvNC+0YLQvtGC0YDQvtC/0YLRiyDQs9C+0YDQvNC+0L3QvdGL0qMg0LDQvdCw0LvQvtCz0YLQsNGA0YvQvSDQvdC10LzQtdGB0LUg0LXQvNC00ZbQuiDRltGBINGI0LDRgNCw0LvQsNGAINCw0LvRg9GL0L3QsCDQsdC+0LvQsNC00Ysu0JDQuyDQs9C40L/QtdGA0L/RgNC+0LTRg9C60YbQuNGP0YHRiyDQutC10LfRltC90LTQtSDQvtC90YvSoyDQutC10YDRliDTmdGB0LXRgNC70LXRgNGW0L0g0LDQvdGL0pvRgtCw0YMg0pvQuNGL0L3Ri9GA0LDSmyDQutC10LvQtdC00ZYu0KLQtdC6INC20YvQvdGL0YHRgtGL0psg0LbQtdGC0ZbQu9GDINC10LzQtdGBLNCx0LDQu9Cw0pvQsNC50LTRi9KjINC80LjRi9C90YvSoyDQttC10YLRltC70YPRltC00LUg0LrQtdGI0ZbQs9C10LTRli7QntKT0LDQvSDRgdC10LHQtdC/INC+0YHRiyDRgdCw0LzQvtGC0YDQvtC/0YLRiyDQs9C+0YDQvNC+0L3QvdGL0qMg0LPQuNC/0LXRgNGE0YPQvdC60YbQuNGP0YHRi9C90LDQvSzQvtGA0LPQsNC90LjQt9C8INC+0L3Ri9KjINOZ0LrQtdC70ZbQvyDQttCw0YLSm9Cw0L0g0LbQsNKT0YvQvNGB0YvQtyDQttCw0pvRgtCw0YDRi9C9INC20L7RjiDSr9GI0ZbQvSDTmdGA0LXQutC10YIg0LXRgtC10LTRlizQsNC7INCx0LDQu9Cw0L3Ri9KjINC20LXRgtGW0LvRg9GW0L3QtSDQsNC50YLQsNGA0LvRi9Kb0YLQsNC5INOZ0YHQtdGA0ZYg06nQt9Cz0LXRgNC10LTRli7QkdKx0Lsg0LrTqdGA0ZbQvdGW0YHRgtC10YDQtNC10L0g0LHTqdC70LXQuiDQsdCw0LvQsNC00LAg0pvQsNGC0YLRiyDQsNGA0YvSm9GC0LDQvyDQutC10YLRgyDQsNC90YvSm9GC0LDQu9Cw0LTRiy7QodC10LHQtdCx0ZYg0LzQsNC5INGC0ZbQvdGWINGL0LTRi9GA0LDRg9GL0L3QsCDQodCi0JMg0pvQsNGC0YLRiyDTmdGB0LXRgNC1INC10YLQtdC00ZYu0JvQuNC/0L7Qu9C40LfQtNGWINCw0YDRgtGC0YvRgNCw0LTRiy7QkdCw0YDQu9GL0psg0LzQtdGC0LDQsdC+0LvQuNC30LzQtNGW0Log0LDQudC90LDQu9GL0YEg0YLQtdC6INKb0LDQvdCwINOp0YHRg9Cz0LUg0LDRgNC90LDQu9GL0L8s0L7RgNCz0LDQvdC40LfQvNC00LUg0pvQvtGAINGA0LXRgtGW0L3QtNC1INC20LjQvdCw0pvRgtCw0LvQsNGC0YvQvSDRjdC90LXRgNCz0LjRjyDSm9Cw0LvQvNCw0LnQtNGLLtCh0YLRgNC10YHRgdC60LUg0LHQtdC50ZbQvNC00LXQu9GD0YjRltC70ZbQuiDSm9Cw0LvRi9C/0YLQsNGB0LDQtNGLLtCd0LXQs9GW0LfQs9GWINKb0LDRg9GW0L8g0pvQsNGC0LXRgC3Qs9C40LPQsNC90YLQuNC30Lwg0LHQvtC70YvQvyDQutC10LvQtdC00ZYu0prRi9C3INCx0LDQu9Cw0LvQsNGAINC80YvRgdCw0LvRiyAxOTAg0YHQvNCz0LUg0LTQtdC50ZbQvSDSm9GB0ZbQvyzQsNC7INKx0Lsg0LHQsNC70LDQu9Cw0YAgMjAw0YHQvCDQvdC10LzQtdGB0LUg0L7QtNCw0L0g0LbQvtKT0LDRgNGLINC00LAg06nRgdGW0L8g0LrQtdGC0YPRliDQvNKv0LzQutGW0L0u0KHSr9C50LXQutGC0LXRgNC00ZbSoyDSm9Cw0YLRgtGLINOp0YHRltC/INC60LXRgtGD0ZYu0KHRgtCzINGA0LXQt9C+0YDQsdGG0LjRj9C90Ysg0LrSr9GI0LXQudGC0ZbQvyzQsdC10LvQvtC6INGB0LjQvdGC0LXQt9GW0L0g0YvQvdGC0LDQu9Cw0L3QtNGL0YDQsNC00Ysu0KHQvtC90YvSoyDQtdGB0LXQsdGW0L3QtdC9INGB0q/QudC10LrRgtC10YDQtNGW0qMg0LTQuNCw0YTQuNC30LTQtdGA0ZYg0rHQt9Cw0YDRi9C/INC60LXRgtC10LTRli7QodCw0LzQvtGC0YDQvtC/0YLRiyDQs9C+0YDQvNC+0L0g0YLQtdC6INKb0LDRgNGC0YLRi9KbINGI0LDSmyDQttCw0pPRi9C90LTQsNKT0LDQvSDRgdCw0LnRi9C9INKT0LDQvdCwINCx06nQu9GW0L3Rg9GW0L0g0LHQsNGP0YPQu9Cw0YLQsNC00YsuPGJyIC8+DQoyLjE00LbQsNGB0LDRgCDSm9GL0Lcg0LHQsNC70LAg0LLQtdCz0LXRgtC+INGC0LDQvNGL0YDQu9GL0psg0LTQuNGB0YLQvtC90LjRjyDQsdC+0LnRi9C90YjQsCDQt9C10YDRgtGC0LXQu9GW0L8g0LbSr9GA0LPQtdC90ZbQvdC1INCx0LDQudC70LDQvdGL0YHRgtGLICzQvtC90YvSoyDQvtGA0LPQsNC90LjQt9C80ZbQvdC00LUg0LHQvtC70YvQvyDQttCw0YLSm9Cw0L0g0LzQsNC30LDRgdGL0LfQtNGL0psg0L7RgNGL0L3QtNGLLtCY0L3RgtC+0LrRgdC40LrQsNGG0LjRj9C70YvSmyDQsdC10LvQs9GW0LvQtdGA0ZYg0LHQsNC50pvQsNC70LDQtNGLLtCQ0YDRgtC10YDQuNGP0LvRi9KbINCz0LjQv9C+0YLQvtC90LjRjyAs0Y/Sk9C90Lgg0LDRgNGC0LXRgNC40Y/Qu9GL0psg0pvQsNC9INKb0YvRgdGL0LzRi9C90YvSoyDQsdCw0LvQsCDSr9GI0ZbQvSDTqdGC0LUg0YLTqdC80LXQvSDQtdC60LXQvdC00ZbQs9GWINCw0L3Ri9Kb0YLQsNC70YvQvyDQvtGC0YvRgC7QkdCw0LvQsNKb0LDQudC00LAg0LbQsNC70L/RiyDRgtC10YDQu9C10LPRltGI0YLRltC6ICzQutOp0LHRltC90ZbRgdC1INCw0Y/SmyDSm9C+0LvQtNCw0YDRi9C90LTQsNKT0Ysg0LPQuNC/0LXRgNCz0LjQtNGA0L7QtyDQsNC90YvSm9GC0LDQu9KT0LDQvS7QntC90YvSoyDTmdGB0LXRgNGW0L3QtdC9INCx0LDQu9Cw0pvQsNC50LTQsCDRgtC10LzQv9C10YDQsNGC0YPRgNCwINC606nRgtC10YDQu9GW0L8g0YLSr9GB0ZbQvyzRgtKx0YDQsNKb0YHRi9C3INCx0L7Qu9C80LDQuSzQutOp0L8g0YLQvtKj0YvQvyDSm9Cw0LvRg9GLINC80q/QvNC60ZbQvS7QkdKx0Lsg0YLQtdGA0LvQtdCz0ZbRiNGC0ZbQuiAxNCDQttCw0YHQsNGAINKb0YvQtyDQsdCw0LvQsCDQs9C+0YDQvtC80L3QsNC70LTRiyDTqdC30LPQtdGA0ZbRgdGM0YLQtdGA0ZbQvdC1INCx0LDQudC70LDQvdGL0YHRgtGLINC00LDQvNGD0LTRiy7QldC90LTRltCz0ZYg0YLQsNC80YvRgCDRgtC+0L3Rg9GB0YvQvSDQsNC90YvSm9GC0LDQudGC0YvQvSDQt9C10YDRgtGC0LXRgyDTmdC00ZbRgdGC0LXRgNGW0L3QtSDRgtC+0pvRgtCw0LvRgdCw0pss0L7Qu9Cw0YDQtNGL0qMg0L3QtdCz0ZbQt9Cz0ZYg0YLSr9GA0LvQtdGA0ZYg0LrTqdC/INC10LzQtdGBLtCe0L3Ri9KjINGW0YjRltC90LTQtSDQsNGA0YLQtdGA0LjRj9C70YvSmyDQvtGB0YbQuNC70LvQvtCz0YDQsNGE0LjRjyDTmdC00ZbRgdGW0L0g0pvQvtC70LTQsNC90YHQsNKbINCx0L7Qu9Cw0LTRiy7QkdKx0Lsg05nQtNGW0YHRgtGWINCw0Y/Sm9GC0YvSoyDQsdGW0YAg0L0v0LUg0LHQsNGB0pvQsCDQtNC10qPQs9C10LnQtNC10LPRliDQsNC50LzQsNKb0YLQsNGA0YvQvdC00LDSk9GLINCw0YDRgtC10YDQuNGP0LvRi9KbINGC0LDQvNGL0YAg0YLQvtC90YPRgdGL0L0g0LDQvdGL0pvRgtCw0YPQtNCwICDRgtCw0LzRi9GA0LvQsNGA0LTQsNKT0Ysg0LjQvNC/0YPQu9GM0YEg06nRgtGD0ZbQvSAs0L/QsNGC0LXQvdGC0YLRltC70ZbQs9GW0L0g0LDQvdGL0pvRgtCw0YMg0LDRgNKb0YvQu9GLINGW0YHQutC1INCw0YHRi9GA0LDQtNGLLtCe0YHRhtC40LvQu9C+0LPRgNCw0YTQuNGP0LTQsCDQutOp0YDRgdC10YLRltC70LPQtdC9INKb0LjRgdGL0psg0LHQvtC50YvQvdGI0LAg0L7RgdGLINGC0LDQvNGL0YAg0L/QsNGC0LXQvdGC0YLRltC70ZbQs9GWINC80LXQvSDRgtC+0L3Rg9GB0YvQvSDQsdCw0pvRi9C70LDQvyDSm9Cw0YDQsNC/ICzQvNC+0L3QuNGC0L7RgNC40L3Qs9GC0LXQuSDQsNC70LDQvNGL0Lcu0JHSsdC7INOZ0LTRltGBINC10YDQtdGB0LXQutGC0LXRgNCz0LUg0LTQtSDQsdCw0LvQsNC70LDRgNKT0LDQtNCwINKb0L7Qu9C00LDQvdGL0LvQsNC00Ysu0JHRltGA0LDSmyDRgtCwINC60LXQvNGI0ZbQu9GW0LPRliDRgtC10Log0YLQsNC80YvRgCDRgtC+0L3Rg9GB0YvRi9C9INCw0L3Ri9Kb0YLQsNC5INCw0LvRg9GLINCx0L7Qu9GL0L8g0YHQsNC90LDQu9Cw0LTRiy4=</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32" table:style-name="ce1">
            <text:p>1066832</text:p>
          </table:table-cell>
          <table:table-cell office:value-type="string" table:style-name="ce1">
            <text:p>kazakh</text:p>
          </table:table-cell>
          <table:table-cell office:value-type="string" table:style-name="ce1">
            <text:p>Билет 33.&amp;lt;br /&amp;gt; 1.Соматотропты гормоның гиперпродукциясы балаларда неге әкеледі?&amp;lt;br /&amp;gt; 2.14 жасар қыз бала вегето-тамырлық дистония бойынша зертеліп жүр. Шағымдары жиі басының ауырсынуына, айналуына, жүрек аймағының ауырсынуы. Эмоционалды лабилды.Алақаның және табаның гипергидрозы. Жалпы терлегіштік. АҚ 80/60 мм рт.ст. Жұрек соғу жиілігі минуттына 60. Қандай зерттеу әдісттерімен тамыр тонустарын анықтауға болады.&amp;lt;br /&amp;gt;</text:p>
          </table:table-cell>
          <table:table-cell office:value-type="string" table:style-name="ce1">
            <text:p>Mi7QkdCw0LvQsNC70YvQuiDRiNCw0LrRgtCwINOp0YHRgyDQs9C+0YDQvNC+0L3Ri9C9INGI0LDQvNCw0LTQsNC9INGC0YvRgSDTqdC90LTRi9GA0LvRg9GLINCz0LjQs9Cw0L3RgtC40LfQvCDQtNC10L8g0LDRgtCw0LvQsNGC0YvQvSDQttCw0LPQtNCw0LnQs9CwINOZ0LrQtdC70YPRiyDQvNGD0LzQvNGL0L0u0JPQuNCz0LDQvdGC0LjQt9C8INGB0YPQudC10LrRgtGL0L0g06nRgdGD0YvQvdC1INC20LDRg9Cw0L8g0LHQtdGA0LXRgtGL0L0g0Y3Qv9C40L/QuNC30Lwg0L/Qu9Cw0YHRgtC40LrQsNC70LDRgNGLINC20LDQsdGL0LvQs9Cw0L3Qs9CwINC00LXQudGL0L0g06nRgdGDINCz0L7RgNC80L7QvdC90YvQvSDRiNCw0LzQsNC00LDQvSDTqdC90LTRi9GA0YvQu9GD0YvQvdC1INCx0LDQudC70LDQvdGL0YHRgtGLINGI0LDQvNCw0LTQsNC9INGC0YvRgSDTqdGB0YMg0LbQsNC90LUg0LrQsNC70YvQv9GC0LDQvSDRgtGL0YEg0LHQuNGW0LrRgtGW0LrQv9C10L0g0YHQuNC/0LDRgtGC0LDQu9Cw0LTRiy4g0LHRg9C7INC20LDQs9C00LDQuSDQsNC00LXRgtGC0LUg06nRgdGDINGC0LDQutGC0LDQu9Cw0YDRiyDTmdC70ZYg0LDRiNGL0Log0LHQvtC70LPQsNC9INC60LXQt9C00LUg0LbRi9C90YvRgdGC0YvQuiDQttC10YLRi9C70YMg0LDQu9Cw0L3Ri9C90LTQsCDQv9Cw0LnQtNCwINCx0L7Qu9Cw0LTRiy4g0YHQuNC/0LDRgtGC0LDQu9Cz0LDQvSDQttCw0LPQtNCw0LnQtNCwINGC0LXRgNGLINGC0LDQvNGL0YDQu9Cw0YDRi9C90YvQvSDRgtC+0L3Rg9GB0YvQvSDQsNC90YvQutGC0LDRgyDRg9GI0YvQvSDQttC40Ysg0LrQvtC70LTQsNC90YvQu9Cw0YLRi9C9INCw0LTRi9GBINGC0LXRgNC80L7Qs9GA0LDRhNC40Y/Qu9GL0Log0LfQtdGA0YLRgtC10YMg0LHQvtC70YMg0YLQsNCx0YvQu9Cw0LTRiy4g0YLQtdGA0LzQvtCz0YDQsNGE0LjRjyDRgtC10YDRiyDRiNGL0LPQsNGA0YLRi9C9INC40L3RhNGA0LDQutGL0LfRi9C7INGB0LDRg9C70LXQu9C10YDQtNC1INC+0LvRiNC10LnRgtGL0L0g0LjQvdCy0LDQt9C40L/RgtGLINC10LzQtdGBINCw0LTRi9GBLiDQvtC7INGC0LXRgNGL0LTQtdCz0Ysg0YLQtdC80L/QtdGA0LDRgtGD0YDQsNC90YsgINGC0LDRgNCw0LvRg9GLINGC0YPRgNCw0LvRiyDQsNC60L/QsNGA0LDRgtGC0Ysg0LHQtdGA0LUg0LDQu9Cw0LTRiy4g0LHRg9C7INC60LDQvSDRgtCw0LzRi9GA0LvQsNGA0LTRi9C9INC60LDQvSDQsNCz0YvQvNGL0L0g0LbQsNC90LUg0LLQsNC30L7QvNC+0YLQvtGA0LvRiyDRgtC+0L3Rg9GB0YvQvSDQttCw0L3QsNC80LAg0YLRg9GA0LTQtSDQutC+0YDRgdC10YLQtSDQsNC70LDQtNGLLiDRgtC10YDQvNC+0LPRgNCw0YTQuNGP0LvRi9C6INGB0YPRgNC10YLRgtC10YDQtNGLINGC0LDQu9C00LDRgyDQsNGA0LrRi9C70Ysg0YLQsNC80YvRgNC70LDRgNC00YvQvSDRgtCw0YDRi9C70YPRi9C9INC90LXQvNC10YHQtSDQstCw0LfQvtC00LjQu9Cw0LrRhtC40Y8g0LHQsNCz0LDQu9Cw0YPQs9CwINC20LDQvdC1INC20LDQu9C/0Ysg0YLQsNC80YvRgCDRgtC+0L3Rg9GB0YvQvSDQsdCw0LPQsNC70LDRg9Cz0LAg0LHQvtC70LDQtNGLLiA8YnIgLz4NCjEuINCh0L7QvNCw0YLRgNC+0L/RgtGLINCz0L7RgNC80L7QvdC90YvQvSDQs9C40L/QtdGA0L/RgNC00YPQutGG0LjRj9GB0Ysg0LHQsNC70LDQu9Cw0YDQtNCwINCz0LjQs9Cw0L3RgtC40LfQvCwg0LDQu9GL0L/RgtGL0LrQutCwINCw0LrQtdC70LXQtNGLLiDQs9C40LPQsNC90YLQuNC30Lwg0LHRg9C7INOp0YHRgyDQv9C70LDRgdGC0LjQvdC60LDQu9Cw0YDRiyDTmdC70ZYg0LbQsNCx0YvQu9C80LDQs9Cw0L0g0Y/Qs9C90Lgg0LHQvtC50Ysg06nRgdGD0ZYg0LDQu9GLINGC0L7QutGC0LDQvNCw0LPQsNC9INCx0LDQu9Cw0LvQsNGA0LzQtdC9INC20LDRgSDTqdGB0L/RltGA0ZbQvNC00LXRgNC00LUg0YHQsNC80LDRgtC+0YLRgNC+0L/RgtGLINCz0L7RgNC80L7QvdC90YvQvSDRiNCw0LzQsNC00LDQvSDRgtGL0YEg0LrTqdC/INC+0L3QtNGL0YDRi9C70YPRi9C90LXQvSDQsdC+0LvQsNGC0YvQvSDQsNGD0YDRgy4g0LHRg9C7INC60LXQt9C00LUg0LHQsNC70LDQvdGL0L0g0LHQvtC50Ysg0YLRi9C8INC20LDQvdC1INGI0LDQvNCw0LTQsNC9INGC0YvRgSDQvtGB0LXQtNGLLiDRgdGD0LnQtdC60YLQtdGA0Ysg0rHQt9Cw0YDRi9C/LCDQtNC10L3QtSDQv9GA0LDQv9C+0YDRhtC40Y/RgdGLINCx0YPQt9GL0LvRg9GLINC80YPQvNC60YvQvS4g0LHQsNGBINCw0YPRgNGD0YssINC606nRgNGDINC90LDRiNCw0YDQu9Cw0YPRiyDQtNC40L/QvtGE0LjQtyDRltGB0ZbQs9GWINCx0L7Qu9GB0LAsINC60L7Quywg0LDRj9C6INCx0LXRgiDRgdGD0LnQtdC60YLQtdGA0Ysg0YPQu9C60LXQudC10LTRiy4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2-ші сұрақтың жауабы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36" table:style-name="ce1">
            <text:p>1066836</text:p>
          </table:table-cell>
          <table:table-cell office:value-type="string" table:style-name="ce1">
            <text:p>kazakh</text:p>
          </table:table-cell>
          <table:table-cell office:value-type="string" table:style-name="ce1">
            <text:p>Билет 33.&amp;lt;br /&amp;gt; 1.Соматотропты гормоның гиперпродукциясы балаларда неге әкеледі?&amp;lt;br /&amp;gt; 2.14 жасар қыз бала вегето-тамырлық дистония бойынша зертеліп жүр. Шағымдары жиі басының ауырсынуына, айналуына, жүрек аймағының ауырсынуы. Эмоционалды лабилды.Алақаның және табаның гипергидрозы. Жалпы терлегіштік. АҚ 80/60 мм рт.ст. Жұрек соғу жиілігі минуттына 60. Қандай зерттеу әдісттерімен тамыр тонустарын анықтауға болады.&amp;lt;br /&amp;gt;</text:p>
          </table:table-cell>
          <table:table-cell office:value-type="string" table:style-name="ce1">
            <text:p>MSnQlmHQu9C/0Ysg0YHQvtC8YdGC0YDQvtC/0YLRiyDQs9C+0YDQvNC+0L3QvdGL0qMg0LPQuNC/0LXRgNC/0YDQvtC00YPQutGG0LjRj9GB0Ysg0LHQvtC70YHQsCzQsdKx0Lsg0LDSk9C30LDQvNGL0LfQtNGL0qMg0L/RgNC+0L/QvtGA0YbQuNC+0L3QsNC70LTRiyDQvdC10LzQtdGB0LUg0L/RgNC+0L/QvtGA0YbQuNC+0L3QsNC70LTRiyDQtdC80LXRgSDTqdGC0LUg0pth0YLRgtGLINOp0YHRltC/INC60LXRgtGD0ZbQvdC1INCw0LvRi9C/INC60LXQu9C10LTRli7QntC7INCx0ZbQt9C00LUg0L1l0LPRltC30L3QtdC9ICDTqdGB0YMg0LPQvtGA0LzQvtC90Ysg0LHQvtC70YvQvyDRgtCw0LHRi9C7YdC00Ysu0K/Sk9C90Lgs0LDSk9C3YdC80YvQt9C00YvSoyDRgtC+0LvRi9KbINOp0YHRg9GW0L3QtSDQttOZ0L3QtSDQtmHRgdGL0LzRi9C30pPQsCDRgdOZ0LnQutC10YEgINCw0pPQt2HQu9Cw0YDRi9C80YvQt9C00YvSoyDTqdGB0YPRltC90LUg0LrTqdC80LXQs9GW0L0g0YLQuNCz0ZbQt9C10YLRltC9INCz0L7RgNC80L7QvSDQsdC+0LvRi9C/INC10YHQtdC/0YJl0LvQtdC00ZYu0JXQs9C10YDQtNC1INCx0rHQuyDQs9C+0YDQvNC+0L0g0LrTqdC/INCx06nQu9GW0L3RgdC1INCxYdC70LDQu9Cw0YDQtNCwINCz0LjQs9Cw0L3RgtC40LfQvCzQsNC7INC10YBl0YHQtdC6INCw0LTQsNC80LRh0YDQtNCwIGHQutGA0L7QvNC10LPQsNC70LjRj9KT0LAg0LDQu9GL0L8g0LrQtdC70LXQtNGWLtCQ0Lsg0LDQtyDQsdOp0LvRltC90YHQtSDQsdKx0Lsg0LPQvtGA0LzQvtC9INC10YDQs9C10LbQtdC50LvRltC6INGC0YPQtNGL0YDQsNC00Ysu0KHQvtC90LTRi9Kb0YLQsNC9INC+0L3Ri9KjINKb0LDQu9GL0L/RgtGLINCx06nQu9GW0L3Rg9GWINOp0YLQtSDQvNCw0qPRi9C30LTRiyDQs9C+0YDQvNC+0L0g0LHQvtC70YvQvyDRgtCw0LHRi9C7YdC00Ysu0JPQuNCz0LDQvdGC0LjQt9C8INCx0rHQuyDQtNC10LNl0L0g06nRgdGDINC/0YDQvtGG0LXRgdGWINCw0Y/Sm9GCYdC70pNh0L3Sk9CwINC00LXQudGW0L0g0LHQsNC7YdC70YvSmyDRiNCw0pvRgmEg0L3QtdC80LXRgdC1INC20LDRgdOp0YHQv9GW0YDRltC8INC60LXQt9GW0L3QtNC1INOp0YHRgyDQs9C+0YDQvNC+0L3RiyDRiNCw0LzQsNC00LDQvSDRgtGL0YEg0LHTqdC70ZbQvdGD0ZbQvdC1INCxYdC50Lth0L3Ri9GB0YLRiyDQtNCw0LzQuNGC0YvQvSDQsNGD0YDRgy7QkNC7IGHQutGA0L7QvGXQs9Cw0LvQuNGPIC3Qs9C+0YDQvNC+0L3QvdGL0qMg0LPQuNC/0LXRgNC/0YDQvtC00YPQutGG0LjRj9GB0YsgINC20YvQvdGL0YHRgtGL0psg0LbQtdGC0ZbQu9GD0LTQtdC9INC60LXQudGW0L0g0LrTqdC/INCx06nQu9GW0L3Qs9C10L0g0LrQtdC30LTQtSDQv9Cw0LnQtGEg0LHQvtC70LDRgtGL0L0g0LbQsNKT0LTQsNC5LtCR0rHQuyDQutC10LfQtNC1INC00LXQvWXQvdGW0qMg0YLQtdGA0LzQuNC90LDQu9C00Ysg0LHTqdC70ZbQutGC0LXRgNGW0L3RltKjINOp0YHRg9GWINCw0Y/Sm9GC0LDQu9Cw0LTRiyDQtNCwLNCw0Y/Sm9GC0LDRgNGLINC80LXQvSDSm9C+0LvQtNCw0YDRi9C90YvSoyDQsNGA0LDRgdGL0L3QtNCw0pPRiyDQv9GA0L7Qv9C+0YDRhtC40Y8g0LHSsdC30YvQu9GL0L8g0Lpl0YLQtdC00ZYu0JHSsdC7INCz0L7RgNC80L7QvdC90YvSoyDQutOp0L8g0LHTqdC70YPRltC90ZbSoyDTmdGB0LXRgNGW0L3QtdC9INCx0LXRgiDRgdKv0LnQtdC60YLQtdGA0ZYg0LzQtdC9INGC06nQvNC10L3Qs9GWINC20LDSm9GC0YvSoyDQttCw0pPRi9C80YHRi9C3INGE0L7RgNC80LDQu9Cw0YDRiyDQv2HQudC00LAg0LHQvtC7YdC00Ysu0J3QtdCz0ZbQt9GWINCx0rHQuyDQs9C+0YDQvNC+0L3QvdGL0qMg0LDRgtKbYdGA0LDRgtGL0L0g0pvRi9C30LzQtdGC0YLQtdGA0ZbQvdC1INC60LXQu9C10YLRltC9INCx0L7Qu9GB0LDSmy7QkdGW0YDRltC90YjRltC00LXQvSDQttCw0YHTqdGB0L/RltGA0ZbQvNC00LXRgNC00LUg0LbTmdC90LUg0LXRgNC10YHQtdC60YLQtdGA0LTQtSDRhdC+0L3QtNGA0L7Qs9C10L3QtdC3INCx0LXQvSDQvtGB0YLQtdC+0LPQtdC90LXQt9C00ZYgYdGA0YLRgtGL0YDQsNC00Ysg0LbTmdC90LUg0YHSr9C50LXQutGC0LXRgNC00ZbSoyDTqdGB0YPRltC9IGHRgNGC0YLRi9GAYdC00Ysu0KHSr9C50LXQuiDRgtGW0L3RltC9INCw0LvQvGHRgdGD0YvQvSDQttC+0pPQsNGA0YvQu9Cw0YJh0LTRiy7QodC+0L3Ri9C80LXQvSDSm9Cw0YLQsNGAINGB0q/QuWXQutGC0ZbSoyDSm9Cw0LvRi9C/0YLQsNGB0YPRi9C9INC60q/RiNC10LnRgtC10LTRliDQttOZ0L3QtSDQsNC3INC806nQu9GI0LXRgNC00LUg0YHSr9C5ZdC60YLRltKjINGA0LXQt9C+0YDQsdGG0LjRj9GB0YvQvSDSm9Cw0LvRi9C/0YLQsNGB0YLRi9GA0LDQtNGLLtCh0L7QvdGL0LzQtdC9INKb0LDRgtCw0YAg0LvQuNC/0L7Qu9C40YLQuNC60LDQu9GL0psg05nRgWXRgCAg0Lxh0LnQu9GLINGC0ZbQvdC90ZbSoyDQutOp0LvQtdC80ZbQvSDQsNC30LDQudGC0LDQtNGLINC205nQvdC1INC606nQvNGW0YDRgdGDINCw0LvQvNCw0YHRg9GL0L3QtNCwINC10LrRliDRhNCw0LfQsNC00LAg05nRgdC10YAg0LrTqdGA0YHQtdGC0LXQtNGWLtCR0rHQuyDRgdC+0LzQsNGC0YDQvtC/0YLRiyDQs9C+0YDQvNC+0L0g0LPQuNC/0L7RhNC40LfQtNC10L0g0LDQu9C00YvSo9KT0Ysg0LHTqdC70ZbQs9GW0L3QtdC9INCx06nQu9GW0L3QtdC00ZYu0JXQs9C10YAg0LDQtGHQvCDQvdC10pPSr9GA0LvRi9C8INKv0LvQutC10L0g0LHQvtC70YHQsCzQvtC90LTQsCDQsdKx0Lsg0LPQvtGA0LzQvtC9INCw0Lcg0LzTqdC70YjQtdGA0LTQtSDQsdOp0LvRltC90LXRgtGW0L0g0LHQvtC70YvQvyDRgmHQsdGL0LvQsNC00Ysu0JbQsNC70L/RiyDQtdGA0LXRgdC10Log0LDQtNCw0LzQtGHRgNC00LAg0L7RgdGLINOp0YHRgyDQs9C+0YDQvNC+0L3RiyDRgdC40L3RgtC10LfRliDQttOZ0L3QtSDQtNC1INGB0LXQutGA0LXRhtC40Y/RgdGLINCw0Lcg0pNh0L3QsCDQvNOp0LvRiNC10YDQtNC1INGI0YvSk9Cw0YDRi9C70LDRgtGL0L0g0LHQvtC70YvQvyDRgtCw0LHRi9C70LDQtNGLLtCQ0Lsg0LZh0YEg0LHQsNC70LDQu2HRgNC00LAg0YHQvtC80LDRgtC+0YLRgNC+0L/RgtGLINCz0L7RgNC80L7QvSDTqdC30ZYg0LzQsNC60YHQuNC80YPQvCDQtNC10qPQs9C10LnQs9C1INC20LXRgtC10LTRliDQtNC1LNCx0LDQu2HQvdGL0qMg0pvQsNC70YvQv9GC0Ysg06nRgdGD0ZbQvdC1INGB0LXQv9GC0ZbQs9GW0L0g0YLQuNCz0ZbQt9C10LTRli7QltCw0YHTqdGB0L/RltGA0ZbQvCDQutC10LfQtdKj0LTQtSDQsdC10LvRgdC10L3QtNGWINOp0YHRgyDQumXQt9C10qPRliDQsdC+0LvQsNC00Ysg0LTQsCzQtNC10L1l0L3RltKjINKx0LfRi9C90LTRi9KT0Ysg0LrSr9GA0YIg0LDRgNGC0LDQtNGLLtCa0LXQudGW0L3QvdC10L0g0LbRi9C90YvRgdGC0YvSmyDQttC10YLRltC70YMg0LTQtdKj0LNl0LnRltC90LXQvSDRgdC+0qMg06nRgdGDINCz0L7RgNC80L7QvdGLIGHQtyDQsdOp0LvRltC90LXQtNGWINC00LUs0L7QvdGL0qMg0LrQvtC90YbQtdC90YLRgGHRhtC40Y/RgdGLINCw0LfQsNC50LDQtNGLLiDQkdKx0Lsg0LPQvtGA0LzQvtC9INCw0Lcg0LHQvtC70YFhINCx0rHQuyDQsdCw0LvQsNC7YdGA0LTRi9KjINCx0L7QudGL0L3Ri9KjINOp0YHRg9GW0L3RltKjINGC0LXQttC10LvRg9GW0L3QtSDQttOZ0L3QtSDQsNGI0YLRi9KbINCz0LjQv9C+0LPQu9C40LrQtdC80LjRj9GB0YvQvdCwLNCw0Lsg0LXRgNC10YHQtdC60YLQtdGA0LTQtSDQsNGD0YvQtyDQttOZ0L3QtSDQutOp0YDRgyDQsNC50L3QsNC70LDRgdGL0L3QtNCwINOZ0LbRltC80LTQtdGA0LTRltKjINC/0LDQudC00LAg0LHQvtC70YPRi9C90LAs0ZbRiCDRgtKx0YHRi9C90YvSoyDQvGHQudC70LDQvdGD0YvQvdCwLNGB0L7QvdGL0LzQtdC9INKb0LDRgtCw0YAg0LHSsdC70YjRi9Kb0LXRgiDQvGHRgdGB0LDRgdGL0L3Ri9KjINGC06nQvNC10L3QtNC10YPRltC9INGC0YPQtNGL0YBh0LTRiy4yKdCWYdC70L/RiyDQvdC10LPRltC30L1l0L0g0LDQu9Cw0pth0L3QvdGL0qMg0LbTmdC90LUg0YLQsNCxYdC90L3Ri9KjINCz0LjQv9C10YDQs9C40LTRgNC+0LfRiyDQttCw0YEg0LHQsNC7YdC70LDRgNC00LAg06nRgtC1INC20LjRliDQutC10LfQtNC10YHQtdGC0ZbQvSDQttCw0pPQtNCw0Lkg0LHQvtC70YvQvyDRgmHQsdGL0LvQsNC00Ysu0JbQsNGBINCx0LDQu2HQu9Cw0YDQtNCwINCz0L7RgNC80L7QvdC0YdGA0LTRi9KjINOp0LfQs9C10YDRltGB0YLQtdGA0ZbQvdC1INCxYdC50LvQsNC90YvRgdGC0Ysg0L7Qu9Cw0YAg0YLQtdGA0LvQtdCz0ZbRiNGC0LXQutC60LUg0LDQu9GL0L8g0LrQtdC70LXQtNGWLtCW0q/RgNC10Log0pvQsNC90YJh0LzRi9GA0LvQsNGAINC20q/QuWXRgdGW0L3QtSDSm9Cw0YBh0pPQsNC90LTQsCAg0LHRltC30LTQtSDQttKv0YDQtdC6INGCZdC3INC00LDQvNC40LTRiyzRgdC+0L3QtNGL0pvRgtCw0L0g0L1h0YPSm9Cw0YHRi9C80YvQtyDRgtC10Lcg0YjQsNGA0Yhh0LnQtNGLINC205nQvdC1INGC0LXRgNC70LXQudGC0ZbQvSDQsdC+0LvRi9C/INGC0LDQsdGL0LvQsNC00Ysu0J3QsNGD0pth0YHRgtCwINGC0LDQvNGL0YAg0YLQvtC90YPRgdGCYdGA0YvQvSDQt9C10YDRgtGC0LXRgyDSr9GI0ZbQvSDQvtGB0YbQuNC70LvQvtCz0YDQsNGE0LjRjyAg05nQtNGW0YHRltC9INKb0L7Qu9C00LDQvdGD0YvQvNGL0LfSk9CwINCx0L7Qu9Cw0LTRiy7QkNGP0pvRgtGL0qMg0LHRltGAINC90LXQvNC10YHQtSDQsdCw0YHSm9CwINC00LXSo9CzZdC50LTQtdCz0ZYg0pvRi9GB0YvQu9GD0LvQsNGA0LTRiyDTmdGA0YLSr9GA0LvRliDQtNOZ0YDQtdC2ZdC00LXQs9GWINCw0YDRgtC10YDQuNGP0LvRi9KbINKbYdCx0YvRgNKTYdC00LDSk9GLINC40LzQv9GD0LvRjNGB0YLRltC6INGC0LXRgNCx0LXQu9GW0YHRgtC10YDQtNGWINGC0ZbRgNC60LXRg9Cz0LUg0L1l0LPRltC30LTQtdC70LPQtdC9LtCX0LXRgNGC0YLQtdGDINGB0LjQv2HRgtGLINCx0L7QudGL0L3RiNCwINCx0rHQuyDTmdC00ZbRgSBh0YDRgtC10YDQuNGP0L3Ri9KjINC/YdGCZdC90YLRgtGW0LvRltCz0ZYg0LzQtdC9INGCYdC80YvRgNC70LDRgNC00YvSoyDRgtC+0L3Rg9GB0YvQvSDQttOZ0L3QtSDQtmHQuS3QutKv0LnRltC9INCx0ZbQu9GD0LNlINCx0L7Qu9Cw0LTRiy7QkdKx0Lsg05nQtNGW0YHRgtGW0qMg0LHQsNGB0YLRiyDQutC10LzRiNGW0LvRltCz0ZYg0LHQvtC70YvQvyDRgmHQvNGL0YDQu9Cw0YDQtNGL0qMg0pth0L0g0LDSk9GL0LzRi9C9INC30LXRgNGC0YLQtdGDINKTYdC90LAg0LHQvtC70YvQvyDRgmHQsdGL0LvQsNC00Ysu0KHQvtC90YvQvNC10L0g0pvQsNGC0LDRgCDQsdCw0YHSm9CwINC30LXRgNGC0YLQtdGDINOZ0LTRltGB0ZbQvdC1INC60LXQu9C10YLRltC9INCx0L7Qu9GBYdKbINC00L7Qv9C/0LvQtdGA0L7Qs9GA0LDRhNC40Y8g0LHSsdC7INC606nQsdGW0L3QtdGB0LUg0LHQsNGBINC205nQvdC1INC80L7QudGL0L0g0YLQsNC80YvRgNC70LDRgNGL0L3Ri9KjINKbYdC9INCw0pPRi9C80YvQvSDQt9C10YDRgtGC0LXQvyzRgtCw0LzRi9GAINGC0L7QvdGD0YHRi9C9INCx0LDSk9Cw0LvQsNC50LTRiy7QntC00LDQvSDQsdCw0YHSm9CwINGC0LDSk9GL0LTQsCDQsdGW0YAg0LfQtdGA0YLQtdGDINOZ0LTRltGB0ZYt0YDQtdC+0Y3QvdGG0LXRhNCw0LvQvtCz0YDQsNGE0LjRjyDQsdKx0LvQtNCwINC80Lgg0pvQsNC9IGHQudC90LDQu9GL0LzRi9C90YvSoyDQttOZ0L3QtSDQstC10LPQsNGC0LjQstGC0ZYg0LbSr9C50LrQtSDQttKv0LnQtdGB0ZbQvdGW0qMg0YLQsNC80YvRgCDRgtC+0L3Rg9GB0YvQvSDQsdCw0pPQsNC7YdGD0pPQsCDQvNKv0LzQutGW0L3QtNGW0Log0LHQtdGA0LXQtNGWL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2-ші сұрақтың 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1066864" table:style-name="ce1">
            <text:p>1066864</text:p>
          </table:table-cell>
          <table:table-cell office:value-type="string" table:style-name="ce1">
            <text:p>kazakh</text:p>
          </table:table-cell>
          <table:table-cell office:value-type="string" table:style-name="ce1">
            <text:p>Билет 33.&amp;lt;br /&amp;gt; 1.Соматотропты гормоның гиперпродукциясы балаларда неге әкеледі?&amp;lt;br /&amp;gt; 2.14 жасар қыз бала вегето-тамырлық дистония бойынша зертеліп жүр. Шағымдары жиі басының ауырсынуына, айналуына, жүрек аймағының ауырсынуы. Эмоционалды лабилды.Алақаның және табаның гипергидрозы. Жалпы терлегіштік. АҚ 80/60 мм рт.ст. Жұрек соғу жиілігі минуттына 60. Қандай зерттеу әдісттерімен тамыр тонустарын анықтауға болады.&amp;lt;br /&amp;gt;</text:p>
          </table:table-cell>
          <table:table-cell office:value-type="string" table:style-name="ce1">
            <text:p>MS7QodC+0LzQsNGC0L7RgtGA0L7Qv9GC0Ysg0LPQvtGA0LzQvtC90L3Ri9KjICjTqdGB0YMg0LPQvtGA0LzQvtC90YspINGI0LDQvNCw0LTQsNC9INGC0YvRgSDQutOp0L8g06nQvdC00ZbRgNGW0LvRg9GWINCz0LjQs9Cw0L3RgtC40LfQvNCz0LUg0LDQu9GL0L8g0LrQtdC70LXQtNGWLiDTqNGB0YMg0LPQvtGA0LzQvtC90L3Ri9KjINCx0LDRgdGC0Ysg0pvRi9C30LzQtdGC0ZYg0YHSr9C50LXQutGC0ZbSoyDTqdGB0YPRltC90LUsINGP0pPQvdC4INC+0YHRgtC10L7Qs9C10L3QtdC30LPQtSDSm9Cw0YLRi9GB0LDQtNGLLiDQodC+0L3Ri9C80LXQvSDSm9Cw0YLQsNGALCDQsdKx0Lsg0LPQvtGA0LzQvtC9INGI0LXQvNGW0YDRiNC10LrRgtGW0qMg0LTQsNC80YPRi9C9INKb0LDQvNGC0LDQvNCw0YHRi9C3INC10YLQtdC00ZYg0LbRltC90LUg0LHSsdC70YjRi9KbINC10YLRgtGW0qMg06nRgdGD0ZbQvdC1INC00LUg0LbQsNGD0LDQv9GC0YsuINCR0rHQuyDQs9C+0YDQvNC+0L0g0LPQuNC/0L7RhNC40LfQtNC10LPRliDRjdC+0LfQuNC90L7QuNC70YzQtNGWINC20LDRgdGD0YjQsNC70LDRgNC00LDQvSDQsdOp0LvRltC90LXQtNGWLiDQk9C40LPQsNC90YLQuNC30LzQvdGW0qMg0LrQu9C40L3QuNC60LDRgdGLOiDSsdC30YvQvSDQsNGP0pstINKb0L7Qu9C00LDRgCwg0LHQsNGBINGB0q/QudC10LPRliDQvNC10L0g0LHQtdGCINGB0q/QudC10LPRliDSr9C70LrQtdC9LCDSm9Cw0L3RgiDQtNC40LDQsdC10YLRliDQvNC10L0g0LbSr9GA0LXQuiDQsNGD0YDRg9C70LDRgNGL0L3QsCDRiNCw0LvQtNGL0pPRg9GLINC80q/QvNC60ZbQvSwg0pvRi9C30LTQsNGA0LTRi9KjINCx0L7QudGLIDE5MCDRgdC8LdC00LXQvSDQttC+0pPQsNGA0YssINKx0LvQtNCw0YDQtNGL0qMgMjAwINGB0Lwt0LTQtdC9INC20L7Sk9Cw0YDRiywg0LDQutGA0L7QvNC10LPQsNC70LjRj9KT0LAg0LDQu9GL0L8g0LrQtdC70LXQtNGWLCDRj9KT0L3QuCDQsNGP0pst0pvQvtC7INGB0LDRg9GB0LDSm9GC0LDRgNGL0L3Ri9KjINKx0LfRi9C9INCx0L7Qu9GD0YvQvdCwINC205nQvdC1INC80rHRgNGL0L0g0YjQtdC80ZbRgNGI0LXQutGC0LXRgNGW0L3RltKjINKx0LfQsNGA0YPRi9C80LXQvSDQutOp0YDRltC90ZbRgSDRgtCw0LHQsNC00YsuINCh0L7QvNCw0YLQvtGC0YDQvtC/0YLRiyDQs9C+0YDQvNC+0L3QvdGL0qMg0LPQuNC/0LXRgNC/0YDQvtC00YPQutGG0LjRj9GB0Ysg0LrTqdCx0ZbQvdC10YHQtSDQs9C40L/QvtGE0LjQt9C00LXQs9GWINGW0YHRltC60YLRltKjINOZ0YHQtdGA0ZbQvdC10L0g0LTQsNC80LjQtNGLLiAyLiDQktC10LPQtdGC0L4t0YLQsNC80YvRgNC70YvSmyDQtNC40YHRgtC+0L3QuNGPINCx0LDQu9Cw0YDQtNCwINC606nQsdGW0L3QtdGB0LUg0Y3QvNC+0YbQuNGP0LvQsNGAINC80LXQvSDRgdGC0YDQtdGB0YEg05nRgdC10YDRltC90LXQvSDQttC40ZYg0LHQsNC50pvQsNC70LDQtNGLLiDQkNGC0LDQu9KT0LDQvSDRiNCw0pPRi9C80LTQsNGA0LzQtdC9INC606nRgNGW0L3RltGBINGC0LDQsdCw0LTRiy4g0JDQuyDQkNKaINC80LXQvSDQltCW0JYg0pvQsNC70YvQv9GC0YsuINCT0LjQv9C10YDQs9C40LTRgNC+0LcgKNGI0LDQvNCw0LTRi9C9INGC0YvRgSDQutOp0L8g0YLQtdGA0YjQtdKj0LTRltC6KSDRhNC40LfQuNC+0LvQvtCz0LjRj9C70YvSmyDQttOZ0L3QtSDQv9Cw0YLQvtC70L7Qs9C40Y/Qu9GL0psg0YLSr9GA0LvQtdGA0ZbQvSDQsNC20YvRgNCw0YLRg9KT0LAg0LHQvtC70LDQtNGLLiDQpNC40LfQuNC+0LvQvtCz0LjRj9C70YvSmyDRgtC10YDRiNC10qPQtNGW0Lo6INC20YvQu9GDICDRgNC10YLRgtC10LvRltGB0ZbQvdGW0qMg0LXRgNC10LrRiNC10LvQtdCz0ZYgKNGC0q/QvdCz0ZYg0YPQsNKb0YvRgtGC0LAg0YLQtdGA0LvQtdGDKTsg0pvQvtC30pPQsNC70YvRgSDQutOp0L8g0LHQvtC70pPQsNC9INC20LDSk9C00LDQudC00LAg0YLQtdGA0LvQtdGDLCDRgdC/0L7RgNGC0L/QtdC9INGI0rHSk9GL0LvQtNCw0L3Sk9Cw0L3QtNCwLiDQn9Cw0YLQvtC70L7Qs9C40Y/Qu9GL0psg0YLQtdGA0YjQtdKj0LTRltC6OiDQttKv0YDQtdC6INC205nQvdC1INOp0LrQv9C1INCw0YPRgNGD0LvQsNGA0YvQvdGL0qMg0LrQu9C40L3QuNC60LDRgdGL0L3QtNCwINC60LXQt9C00LXRgdC10LTRliwg0pvQsNC70pvQsNC90YjQsCDQsdC10LfRltC90ZbSoyDQsNGD0YDRg9C70LDRgNGL0L3QtNCwLSDQs9C40L/QtdGA0YLQuNGA0LXQvtC3LCDRgNCw0YXQuNGCINCw0YPRgNGD0YvQvdC00LAg0LrQtdC30LTQtdGB0LXQtNGWLiDQlNC40LDQs9C90L7RgdGC0LjQutCw0LTQsCDRgtC10YDQvNC+0LPRgNCw0YTQuNGPINOZ0LTRltGB0ZYg0pvQvtC70LTQsNC90LDQtNGLLCDQvtC7INC40L3RhNGA0LDSm9GL0LfRi9C7INGB05nRg9C70LXQu9C10YAg0LDRgNKb0YvQu9GLINC20rHQvNGL0YEg0ZbRgdGC0LXQudC00ZYuINCe0Lsg0YLQtdGA0ZbQtNC10LPRliDRgtC10LzQv9C10YDQsNGC0YPRgNCw0L3Ri9KjINGC0LDRgNCw0LvRg9GLINC20LDQudC70Ysg0LDSm9C/0LDRgNCw0YIg0LHQtdGA0LXQtNGWLCDQsdKx0Lsg0pvQsNC90YLQsNC80YvRgNC70LDRgNC00YvSoyDSm9Cw0L0g0LDSk9GL0LzRi9C9INC205nQvdC1INCy0LDQt9C+0LzQvtGC0YDQu9GLINGC0L7QvdGD0YHRi9C9INCx0LDSk9Cw0LvQsNGD0pPQsCDQutOp0LzQtdC60YLQtdGB0LXQtNGWLiDQkdKx0Lsg0LfQtdGA0YLRgtC10YMg0LDRgNKb0YvQu9GLLCDQs9C40L/QtdGA0LPQuNC00YDQvtC3INC60LXQt9GW0L3QtNC1INGC0LXQvNC/0LXRgNCw0YLRg9GA0LAg0LzQtdC9INGL0LvSk9Cw0LvQtNGL0pvRgtGL0qMg0LDQudGL0YDQvNCw0YjRi9C70YvSk9GL0L0g0LHRltC70LUg0LDQu9Cw0LzRi9C3LiDQntGB0YbQuNC70LvQvtCz0YDQsNGE0LjRjyDTmdC00ZbRgdGWLSAg0Y3Qu9C10LrRgtGA0LvRltC6INGB0LjQs9C90LDQu9C00LDRgCDQsNGA0pvRi9C70Ysg0YPQsNKb0YvRgiDQsdC+0LnRi9C90YjQsCDRgtGW0YDQutC10L8sINCz0YDQsNGE0LjQuiDRgtKv0YDRltC90LTQtSDQutOp0YDRgdC10YLQtdC00ZYsICDQvtC90YvSoyDQvdC10LPRltC30LPRliDQvNCw0pvRgdCw0YLRizog0pvQsNC9INCw0LnQvdCw0LvRi9C80YvQvSDQsdCw0pPQsNC70LDRgywg0LbSr9C50LrQtS0g0pvQsNC90YLQsNC80YvRgNC70YvSmyDQsdKx0LfRi9C70YvRgdGL0L0g0LrTqdGA0YHQtdGC0LXQtNGWLCDQvtC7INGC0ZbQutC10LvQtdC5INGC0LXRgNGI0LXSo9C00ZbQuiDTqdC70YjQtdC80LXQudC00ZYsINC+0L3Ri9KjINGB0LXQsdC10L/RgtC10YDRltC9INC20LDQvdCw0LzQsCDRgtKv0YDQtNC1INCx0LDSk9Cw0LvQsNGD0pPQsCDQutOp0LzQtdC60YLQtdGB0LXQtNGWLiDQntGB0YbQuNC70LvQvtCz0LDRhCDSm9Kx0YDRi9C70pPRi9GB0Ysg0pvQsNC9INCw0LnQvdCw0LvRi9C80YvQvdGL0qMg06nQt9Cz0LXRgNGW0YHRltC9INC205nQvdC1INCy0LXQs9C10YLQsNGC0LjQstGC0ZbQuiDRgtC10qPQs9C10YDRltC80YHRltC30LTRltC60YLRliDQsNC90YvSm9GC0LDQudGL0LTRiy4g0J7RgdGG0LjQu9C70L7Qs9GA0LDRhNC40Y8g0LLQtdCz0LXRgtCw0YLQuNCy0YLRliDQttKv0LnQutC1INC20q/QudC10YHRltC90ZbSoyDQsdKx0LfRi9C70YvRgdGC0LDRgNGLINC60LXQt9GW0L3QtNC1INKb0L7Qu9C00LDQvdCw0LTRiy4=</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2-ші сұрақтың жауабы толық жазылмаған, мысалы- симпатикалық және парасимпатикалық, жергілікті дермографизм</text:p>
          </table:table-cell>
          <table:table-cell office:value-type="float" office:value="0" table:style-name="ce1">
            <text:p>0</text:p>
          </table:table-cell>
          <table:table-cell table:number-columns-repeated="16376"/>
        </table:table-row>
        <table:table-row table:style-name="ro1">
          <table:table-cell office:value-type="float" office:value="1066882" table:style-name="ce1">
            <text:p>1066882</text:p>
          </table:table-cell>
          <table:table-cell office:value-type="string" table:style-name="ce1">
            <text:p>kazakh</text:p>
          </table:table-cell>
          <table:table-cell office:value-type="string" table:style-name="ce1">
            <text:p>Билет 33.&amp;lt;br /&amp;gt; 1.Соматотропты гормоның гиперпродукциясы балаларда неге әкеледі?&amp;lt;br /&amp;gt; 2.14 жасар қыз бала вегето-тамырлық дистония бойынша зертеліп жүр. Шағымдары жиі басының ауырсынуына, айналуына, жүрек аймағының ауырсынуы. Эмоционалды лабилды.Алақаның және табаның гипергидрозы. Жалпы терлегіштік. АҚ 80/60 мм рт.ст. Жұрек соғу жиілігі минуттына 60. Қандай зерттеу әдісттерімен тамыр тонустарын анықтауға болады.&amp;lt;br /&amp;gt;</text:p>
          </table:table-cell>
          <table:table-cell office:value-type="string" table:style-name="ce1">
            <text:p>MS3RgdKx0YDQsNKbLtCh0L7QvNCw0YLRgNC+0L/RgtGLINCz0L7RgNC80L7QvSDQs9C40L/QvtGE0LjQt9C00ZbSoyDQsNC70LTRi9Kj0pPRiyDQsdOp0LvRltC80ZbQvdC90LXQvSzRj9KT0L3QuCDQsNC00LXQvdC+0LPQuNC/0L7RhNC40LfQtNC10L0g0LHTqdC70ZbQvdC10YLRltC9INCz0L7RgNC80L7QvSDQsdC+0LvRi9C/INGC0LDQsdGL0LvQsNC00Ysu0KHQvtC80LDRgtGA0L7Qv9GC0Ysg0LPQvtGA0LzQvtC9IC0g06nRgdGDINCz0L7RgNC80L7QvdGLINCx0LDQu9Cw0YDQtNGL0qMg0YHSr9C50LXQutGC0LXRgNGW0L3RltKjINOp0YHRg9GW0L3QtSAs05nRgdGW0YDQtdGB0LUsINGC0q/RgtGW0LrRiNC10LvRliDRgdKv0LnQtdC60YLQtdGA0LTRltKjINOp0YHRltGD0ZbQvdC1INC205nQvdC1INC20rHQvNGB0LDSmyDRgtGW0L3QtNC10YDQtNGW0qMg06nRgdGD0ZbQvdC1INC00LUgINOZ0YHQtdGAINC10YLQtdGC0ZbQvSDQs9C+0YDQvNC+0L0u06jRgdGDINCz0L7RgNC80L7QvdGLINC+0YDQs9Cw0L3QuNC30LzQtNC1INCx0LXQu9C+0Los0LzQsNC5LNC606nQvNGW0YDRgdGDINCw0LvQvNCw0YHRg9GL0L3QsCDTmdGB0LXRgCDQtdGC0LXQtNGWLiDQsdKx0Lsg0LPQvtGA0LzQvtC90L3Ri9KjINCx0rHQt9GL0LvRi9GB0Ysg05nQtNC10YLRgtC1LSDQs9C40L/QvtGE0LjQtyDQsNC00LXQvdC+0LzQsNGB0YvQvdCw0L0gLCDRj9KT0L3QuCDQs9C40L/QvtGE0LjQtyDRltGB0ZbQutGC0LXRgNGW0L3QtdC9INC00LDQvNC40LTRiyAu0J7QvdGL0qMg0LPQuNC/0LXRgNC/0YDQtNGD0LrRhtC40Y/RgdGLIC3QsdGW0LfQtNC1INCz0LjQs9Cw0L3RgtC40LfQvNCz0LUg05nQutC10LvQtdC00ZYg0LDQuyzQs9C40L/QvtC/0YDQtNGD0LrRhtC40Y/RgdGLLSDQtdGA0LPQtdC20LXQudC70ZbQutC60LUg05nQutC10LvQtdC00ZYuINCd0LDSm9GC0YvQu9Cw0Lkg0LPQuNC/0LXRgNC/0YDQvtC00YPQutGG0LjRj9KT0LAg0YLQvtKb0YLQsNC70LDRgtGL0L0g0LHQvtC70YHQsNKbIC0g0LHSsdC7INC60LXQt9C00LUg0pvQvtC7INGB0q/QudC10LrRgtC10YDQtNGW0qMg0YjQsNC80LDQtNCw0L0g0YLRi9GBINOp0YHRgyDQv9Cw0LnQtNCwINCx0L7Qu9Cw0LTRiyzRgdC10LHQtdCx0ZYg0LbQvtKT0LDRgNGL0LTQsCDQsNC50YLQsCDQutC10YLQutC10L3QtNC10LnQvNGW0LfQtNC1INGC0q/RgtGW0LrRiNC10LvRliDRgdKv0LnQtdC60YLQtdGA0LPQtSDTmdGB0LXRgCDQtdGC0LXQtNGWLtCR0LDQu9Cw0LvQsNGA0LTQsCDRjdC/0LjRhNC40LfQsNGA0LvRi9KbINOZ0LvRliDRgtC+0LvRi9KbINC20LDQsdGL0LvQvNCw0pPQsNC9LiDQttGL0Lsg0YHQsNC50YvQvSAxNS0yMCDRgdC8INCw0YDRgtGL0psg06nRgdGWINCx0LDQudKb0LDQu9Cw0LTRiyzQsdKx0Lsg0LHQvtC50LTRi9KjIDIg0LzQtdGC0YDQtNC10L0g0LDRgNGC0YvSmyDTqdGB0YPRltC90LUg05nQutC10LvQtdC00ZYuINCR0ZbRgNCw0psg0LTQtdC90LUg0L/RgNC+0L/QvtGA0YbQuNGP0YHRiyDRgdCw0Lkg0LHQvtC70LDQtNGLICwg0LDQuyDQsdKx0Lsg0LDQutGA0LXQvNCw0LPQuNGP0LvQsNC00LDQvSDSm9Cw0YDQsNKT0LDQvdC00LAg0LHQsNGB0YLRiyDQtdGA0LXQutGI0LXQu9GW0LPRliDQsdC+0LvRi9C/INGC0LDQsdGL0LvQsNC00YsuINCT0LjQs9Cw0L3RgtC40LfQvCDQutC10LfRltC90LTQtSDRgtCw0LHQsNC9LdCw0LvQsNKb0LDQvSDRgdKv0LnQtdC60YLQtdGA0ZbQvdGW0qMs0LHQtdGCINGB0q/QudC10LrRgtC10YDRltC90ZbSoyDTqdGB0YPRliDQsdCw0LnSm9Cw0LvQsNC00Ysg0LbTmdC90LUg0ZbRiNC60ZYg0LzSr9GI0LXQu9C10YDQtNGW0qPQtNC1INKx0LvSk9Cw0Y7RiyDQsdC+0LvQsNC00YsuINCG0YjQutGWINC80q/RiNC10LvQtdGA0LTQtSDTmdGB0ZbRgNC10YHQtSDQsdCw0YPRi9GALCDQutOp0LrQsdCw0YPRi9GAINKx0LvSk9Cw0Y7RiyDQttKv0YDQtdC00ZYuINCR0rDQuyDQvdCw0YPSm9Cw0YHRgtCw0YDQtNCwINCx0rHQu9GI0YvSmyDQtdGC0YLRltC90ZbSoyDTmdC70YHRltC30LTRltCz0ZbQvdC00LUg0LHQsNC50pvQsNGD0YvQvNGL0LfSk9CwINCx0L7Qu9Cw0LTRiyAuINCd0LXQs9C1INCx0rHQu9GI0YvSmyDQtdGCINOZ0LvRgdGW0LfQtNGW0LPRliDQsdC+0LvQsNC00Ys/ISDQodC10LHQtdCx0ZYgLCDQsdKx0LvRiNGL0psg0LXRgiDRgdKv0LnQtdC60L/QtdC9INCx0ZbRgNC00LXQuSDTqdGB0YPQs9C1INKv0LvQs9C10YDQvNC10LnQtNGWLtCh0L7QvNCw0YLQvtGC0YDQvtC/0YLRiyDQs9C+0YDQvNC+0L3QvdGL0qMg0LPQuNC/0LXRgNGE0YPQvdC60YbQuNGP0YHRi9C90YvSoyDTmdGB0LXRgNGW0L3QtdC9INC80LXRgtCw0LHQvtC70LjQt9C80L3RltKjINCx0rHQt9GL0LvRi9GB0Ysg0LHQvtC70LDQtNGLLiDSmtC+0YDRi9GC0YvQvdC00YvQu9Cw0Lkg0LrQtdC70LUgLCDQsdCw0LvQsNC70LDRgNC00LDSk9GLINGB0L7QvNCw0YLRgNC+0L/RgtGLINCz0L7RgNC80L7QvdC90YvSoyDQs9C40L/QtdGA0L/RgNC+0LTRg9C60YbQuNGP0YHRiyDQsdCw0LvQsNC70LDRgNC00YvSoyDSm9Cw0LvRi9C/0YLRiyDQtNCw0LzRg9GL0L3QsCDQutC10LTQtdGA0LPRliDQutC10LvRgtGW0YDQtdC00ZYg0LbTmdC90LUg0ZbRiNC60ZYg0LzSr9GI0LXQu9C10YDQtNGW0qMg0rHQu9KT0LDRjtGLICwg06nQtyDQutC10LfQtdCz0ZbQvdC00LUg0LzSr9GI0LXQu9C10YDQtNGW0qMg0pvQsNC70YvQv9GC0Ysg0LbSsdC80YvRgSDRltGB0YLQtdGD0ZbQvdC1INC60LXQtNC10YDQs9GWINC60LXQu9GC0ZbRgNC10LTRli4gPGJyIC8+DQoyLSDRgdKx0YDQsNKbLiAgINCR0rHQuyDQttC10YDQtNC1INC/0LDRhtC40LXQvdGC0YLQtSAg0LPQuNC/0L7RgtC+0L3QuNGP0L3Riywg0YLQtdGA0YjQtdKj0LTRltC60YLRliDQsdCw0LnSm9Cw0YPSk9CwINCx0L7Qu9Cw0LTRiy4g0JHSsdC7INC60LXQt9C00LUg0pvQvtC70LTQsNC90YvQu9Cw0YLRi9C9INC30LXRgNGC0YLQtdGDINOZ0LTRltGB0YLQtdGA0LPQtSDRgtC+0pvRgtCw0LvRgdCw0psuINCR0ZbRgNGW0L3RiNGWINC60LXQt9C10LrRgtC1INCi0LXRgNC80L7Qs9GA0LDRhNC40Y/QvdGLINC20LDRgtKb0YvQt9GD0LPQsCDQsdC+0LvQsNC00YsgLCDQvtC7INGC0LXRgNGW0LTQtdCz0ZYg0YLQtdC80L/QtdGA0LDRgtGD0YDQsNC90YvSoyDRgtCw0YDQsNC70YPRi9KjINC30LXRgNGC0YLQtdC50LTRliAs0YHQvtC90YvQvNC10L0g0pvQsNGC0LDRgCDRgtCw0LzRi9GA0LvQsNGA0LTRi9KjINGC0L7QvdGD0YHRi9C9INC30LXRgNGC0YLQtdGD0ZbQtNC1INKb0L7Qu9C00LDQvdGL0LvQsNGC0YvQvSDTmdC00ZbRgSDQsdC+0LvRi9C/INGC0LDQsdGL0LvQsNC00YsgLiDQntC90YvQvNC10L0g0LHRltGA0LPQtSDRgtCw0LzRi9GA0LvQsNGA0LTRi9KjINC00LjQsNC80LXRgtGA0ZbQvSDQsNC90YvSm9GC0LDRg9KT0LAg0LHQvtC70LDQtNGLINCg0LXQsNC90L7Qs9GA0LDRhNC40Y8tINGC0LDQvNGL0YDQtNGL0qMg0YLQvtC90YPRi9GB0YvQvSDQsNC90YvSm9GC0LDRg9KT0LAg0LbTmdC90LUg0YLQsNC80YvRgNC00LDSk9GLINGN0LvQtdC60YLRgNC70ZbQuiDQuNC80L/Rg9C70YzRgdGC0LDRgNC00YvSoyDQsdC10YDRltC70YPRltKjINCw0L3Ri9Kb0YLQsNGD0pPQsCDQsdC+0LvQsNC00YsuINCf0LDRhtC40LXQvdGC0YLQtdCz0LUg0LbSr9GA0LXQuiDQsNC50LzQsNKT0YvQvdGL0qMg0LDRg9GL0YDRgdGL0L3Rg9GL0L3QsCDQsdCw0LnQu9Cw0L3Ri9GB0YLRiyDRjdC60LMg0YLSr9GB0ZbRgNGD0LPQtdC00LUg0LHQvtC70LDQtNGLLCDQsdKx0Lsg0L3QsNGD0pvQsNGB0YLQsNKT0Ysg0LbSr9GA0LXQuiDRgtGW0YHRiNC10LvQtdGA0ZbQvdC00LUg0LjQvNC/0YPRjNGB0YLQsNGA0YvQvdGL0qMg0LHQtdGA0ZbQu9GD0ZbQvSDQsNC90YvSm9GC0LDRg9KT0LAg0LHQvtC70LDQtNGLLiDQo9CU0Jcg0LDQvdCz0LjQvtCz0YDQsNGE0LjRjyDQsNGA0pvRi9C70Ysg0LbQsNC70L/RiyDQttKv0YDQtdC6INCw0LnQvNCw0pPRi9C90LTQsNKT0Ysg0pvQsNC9INGC0LDQvNGL0YDQu9Cw0YDRi9C90YvSoyDRgtC+0L3Rg9GL0YHRi9C90YvSoyDRgtCw0YDRi9C70YPRi9KjLCDSm9Cw0L0g0LDSk9GL0YHRi9C90YvSoyDQttGL0LvQtNCw0LzQtNGL0pPRi9KjINCw0L3Ri9Kb0YLQsNGD0pPQsCDQsdC+0LvQsNC00YsuINCR0rHQuyDQt9C10YDRgtGC0LXRgyDTmdC00ZbRgdGC0LXRgNGWINCx0LDQu9Cw0LvQsNGA0pPQsCDQttKv0YDQs9GW0LfRg9Cz0LUg0LHQvtC70LDQtNGLINGB0LXQsdC10LHRliDQt9C40Y/QvdGLINC20LDSk9GL0L3QsNC9INGC06nQvNC10L3RltGA0LXQui4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жауаптар толық емес</text:p>
          </table:table-cell>
          <table:table-cell office:value-type="float" office:value="0" table:style-name="ce1">
            <text:p>0</text:p>
          </table:table-cell>
          <table:table-cell table:number-columns-repeated="16376"/>
        </table:table-row>
        <table:table-row table:style-name="ro1">
          <table:table-cell office:value-type="float" office:value="941833" table:style-name="ce1">
            <text:p>941833</text:p>
          </table:table-cell>
          <table:table-cell office:value-type="string" table:style-name="ce1">
            <text:p>russian</text:p>
          </table:table-cell>
          <table:table-cell office:value-type="string" table:style-name="ce1">
            <text:p>Билет 33.&amp;lt;br /&amp;gt; 1.К чему приводит гиперпродукция соматотропного гормона в детстве. &amp;lt;br /&amp;gt; 2.Девочка 14 лет обследуется по поводу вегето-сосудистой дистонии пубертатного периода. Жалуется на частые головные боли, головокружения, боли в области сердца. Гипергидроз ладоней и стоп. АД 80/60 мм рт.ст. ЧСС 60 в минуту. Какой метод исследования, позволяет определить тонус сосудов кожи?&amp;lt;br /&amp;gt;</text:p>
          </table:table-cell>
          <table:table-cell office:value-type="string" table:style-name="ce1">
            <text:p>MS7Qk9C40L/QtdGA0L/RgNC+0LTRg9C60YbQuNGPINGB0YLQsyDQv9GA0LjQstC+0LTQuNGCINC6INCz0LjQs9Cw0L3RgtC40LfQvNGDLiDQrdGC0L4g0YHQvtGB0YLQvtGP0L3QuNC1INGF0LDRgNCw0LrRgtC10YDQuNC30YPQtdGC0YHRjyDQuNC30LHRi9GC0L7Rh9C90YvQvCDRgNC+0YHRgtC+0Lwg0LrQvtGB0YLQtdC5LCDQvNGL0YjRhiDQuCDQtNGAINGC0LrQsNC90LXQuSwg0YfRgtC+INC/0YDQuNCy0L7QtNC40YIg0LDQvdC+0LzQsNC70YzQvdC+INCy0YvRgdC+0LrQvtC80YMg0YDQvtGB0YLRgyDQuCDQtNC40YHQv9GA0L7Qv9C+0YDRhtC40Y/QvCDQsiDRgtC10LvQtS4g0L7RgdC90L7QstC90YvQvNC4INC/0YDQuNC30L3QsNC60LDQvNC4INGP0LLQu9GP0LXRgtGB0Y8g0L7Rh9C10L3RjCDQstGL0YHQvtC60LjQuSDRgNC+0YHRgiDQt9C90LDRh9C40YLQtdC70YzQvdC+INC/0YDQtdCy0YvRiNCw0Y7RidC10LPQviDRgNC+0YHRgiDRgdC+0L7RgtCy0LXRgtGB0YLQsiDQstC+0LfRgNCw0YHRgtGDOyDRg9Cy0LXQu9C40YfQtdC90LjQtSDQutC+0L3QtdGH0L3QvtGB0YLQtdC5INC4INGH0LXRgNC10L/QsCDQt9Cw0LzQtdC00LvQtdC90LjQtSDQuNC70Lgg0L7RgtGB0YPRgtGB0YLQstC40LUg0L3QvtGA0LzQsNC70YzQvdC+0LPQviDQvtC60L7RgdGC0LXQvdC90LXQvdC40Y8g0LfQvtC9INGA0L7RgdGC0LAgKNGN0L/QuNGE0LjQt9Cw0YDRi9GFINC/0LvQsNGB0YLQuNC90L7Quikg0LLQvtC30LzQvtC20L3Ri9C1INC/0YDQvtCx0LvQtdC80Ysg0YEg0YHRg9GB0YLQsNCy0LDQvNC4INC4INGB0YHRgS4g0Y3RgtC+INC80L7QttC10YIg0LHRi9GC0Ywg0LjQty3Qt9CwINCw0LTQtdC90L7QvNGLINCz0LjQv9C+0YTQuNC30LAs0LPQtdC90LXRgtC40YfQtdGB0LrQuNGFINC90LDRgNGD0YjQtdC90LjQuS4gMi7QlNC70Y8g0L7Qv9GA0LXQtNC10LvQtdC90LjRjyDRgtC+0L3Rg9GB0LAg0YHQvtGB0YPQtNC+0LIg0LjRgdC/0Lsg0YDQtdC+0LLQsNC30L7Qs9GA0LDRhNC40Y4uINGN0YLQviDQvNC10YLQvtC0INC40YHRgdC70LXQtNC+0LLQsNC90LjRjyDQv9C10YDQtdGE0LjRgNC40Ycg0LrRgNC+0LLQvtC+0LHRgNGJLCDQutC+0YLQvtGA0YvQtSDQvtGG0LXQvdC40LLQsNC10YIg0YLQvtC9INC4INGN0LvQsNGB0YLQuNGH0L3QvtGB0YLRjCDRgdC+0YHRg9C00L7Qsiwg0LAg0YLQsNC60LbQtSDQuNGFINC90LDQv9C+0LvQvdC10L3QuNC1INC60YDQvtCy0YzRjiwg0YTQuNC60YEuINGN0LvQtdC60YLRgNC40YcuINGB0L7Qv9GA0L7RgtC40LLQuyDRgtC60LDQvdC10LksINC60L7RgtC+0YDQvtC1INC40LfQvCDQsiDQt9Cw0LLQuNGB0LjQvNC+0YHRgtC4INC+0YIg0YLQvtCz0L4g0LrQsNC6INC90LDQv9C+0LvQvdGP0LXRgtGB0Y8g0YHQvtGB0YPQtCDQutGA0L7QstGM0Y4uINGDINC00LXQstC+0YfQutC4INCz0LjQv9C+0YLQvtC90LjRh9C10YHQutC+0LPQviDRgtC40L/QsCDRgSDQktCh0JQg0LTQsNC90L3Ri9C5INC80LXRgtC+0LQg0LjRgdGB0LvQtdC00L7QstCw0L3QuNGPLdC90LXQuNC90LLQsNC30LjQstC90YvQuSDQuCDQsdC10LfQvtC/0LDRgdC90YvQuS4g0YLQsNC6INC20LUg0Y3RgtC+INC80LXRgtC+0LQg0LjRgdC/0Lsg0L3QtSDRgtC+0LvRjNC60L4g0LTQu9GPINCx0L7Qu9GM0L3Ri9GFINGBINCS0KHQlCDQvdC+INC4INCx0L7Qu9GM0L3Ri9GFINC+0YDRgtC+0YHRgtCw0YLQuNGH0LXRgdC60L7QuSDQs9C40L/QvtGC0LXQvdC30LjQtdC5LiDQoNC10L7QstCw0LfQvtCz0YDQsNGE0LjRjyDQvNC+0LbQtdGCINGD0LrQsNC30LDRgtGMINC+0LbQuNC00LDQtdCw0LzQsNGL0LUg0LjQt9C8OjEuINGB0L3QuNC20LXQuNC1INGA0LXQvtCz0YDQsNGE0LjRh9C10YHQutC+0LPQviDQuNC90LTQtdC60YHQsCwg0LrQvtGC0YDRi9C1INC+0YLRgNCw0LbQsNC10YIg0L3QtdC00L7RgdGC0LDQvtGC0L7Rh9C90L7RgdGCINGM0LrRgNC+0LLQvtC+0LHRgNCw0YnQtdC90LjRjyDQsCDQv9C10YDQuNGE0LXRgNC40YcuINGC0LrQsNC90Y/RhS4gMi4g0LjQvdC00LXQutGBINGC0L7QvdGD0YHQsCDRgdC+0YHRg9C00L7QsiDQstC10YDQvtGP0YLQvdC+INCx0YPQtNC10YIg0YHQvdC40LbQtdC9IDMu0LjQvdC00LXQutGBINGN0LvQsNGB0YLQuNGH0L3QvtGB0YLQuCDRgdC+0YHRg9C00L7QsiDQvNCxINCyINC90L7RgNC80LUg0LjQu9C4INGC0LDQutC20LUg0L3QtdGB0LrQvtC70YzQutC+INC/0L7QvdC40LbQtdC9LiDRgtCw0Log0LbQtSDQtNC70Y8g0L7RhtC10L3QutC4INC60LDQv9C40LvQu9GP0YDQvtCyINC40YHQv9C7INCU0L7Qv9C70LXRgNC+0LPRgNCw0YTQuNGOLg==</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Ответ на первый вопрос не полный. на второй вопрос не правильный ответ. Реовазография метод диагностики состояния сосудистой системы верхних и нижних конечностей. Вопрос был задан про тонус сосудов.Метод исследования. Речь идет о дермографизме белом и красном.</text:p>
          </table:table-cell>
          <table:table-cell office:value-type="float" office:value="0" table:style-name="ce1">
            <text:p>0</text:p>
          </table:table-cell>
          <table:table-cell table:number-columns-repeated="16376"/>
        </table:table-row>
        <table:table-row table:style-name="ro1">
          <table:table-cell office:value-type="float" office:value="1066918" table:style-name="ce1">
            <text:p>1066918</text:p>
          </table:table-cell>
          <table:table-cell office:value-type="string" table:style-name="ce1">
            <text:p>russian</text:p>
          </table:table-cell>
          <table:table-cell office:value-type="string" table:style-name="ce1">
            <text:p>Билет 33.&amp;lt;br /&amp;gt; 1.К чему приводит гиперпродукция соматотропного гормона в детстве. &amp;lt;br /&amp;gt; 2.Девочка 14 лет обследуется по поводу вегето-сосудистой дистонии пубертатного периода. Жалуется на частые головные боли, головокружения, боли в области сердца. Гипергидроз ладоней и стоп. АД 80/60 мм рт.ст. ЧСС 60 в минуту. Какой метод исследования, позволяет определить тонус сосудов кожи?&amp;lt;br /&amp;gt;</text:p>
          </table:table-cell>
          <table:table-cell office:value-type="string" table:style-name="ce1">
            <text:p>MS4g0KHQvtC80LDRgtC+0YLRgNC+0L/QuNC9INC/0YDQtdC00YHRgtCw0LLQu9GP0LXRgiDRgdC+0LHQvtC5INCz0L7RgNC80L7QvSDQuNC3INGB0LXQvNC10LnRgdGC0LLQsCDQv9C+0LvQuNC/0LXQv9GC0LjQtNC90YvRhSDQs9C+0YDQvNC+0L3QvtCyICjQsiDRjdGC0YMg0LbQtSDQs9GA0YPQv9C/0YMg0L7RgtC90L7RgdGP0YIg0Lgg0L/RgNC+0LvQsNC60YLQuNC9KSwg0LLRi9GA0LDQsdC+0YLQutCwINC60L7RgtC+0YDQvtCz0L4g0L7RgdGD0YnQtdGB0YLQstC70Y/QtdGC0YHRjyDQv9C10YDQtdC00L3QtdC5INC00L7Qu9C10Lkg0LPQuNC/0L7RhNC40LfQsCwg0LPQu9Cw0LLQvdC+0Lkg0YTRg9C90LrRhtC40LXQuSDQutC+0YLQvtGA0L7Qs9C+INGP0LLQu9GP0LXRgtGB0Y8g0LLQu9C40Y/QvdC40Y8g0L3QsCDQv9GA0L7RhtC10YHRgdGLINGA0L7RgdGC0LAg0L7RgNCz0LDQvdC40LfQvNCwLiDQkiDRh9Cw0YHRgtC90L7RgdGC0LgsINGB0YLQuNC80YPQu9C40YDRg9C10YIg0YDQvtGB0YIg0LrQvtGB0YLQtdC5ICjQv9GA0LXQuNC80YPRidC10YHRgtCy0LXQvdC90L4sINGC0YDRg9Cx0YfQsNGC0YvRhSDQuCDQsiDQvNC10L3RjNGI0LXQuSDRgdGC0LXQv9C10L3QuCDQs9GD0LHRh9Cw0YLRi9GFKSwg0YHRgtC40LzRg9C70LjRgNGD0Y8g0YXQvtC90LTRgNC+LSDQuCDQvtGB0YLQtdC+0LPQtdC90LXQty4g0KHRgtC40LzRg9C70LjRgNGD0LXRgiDQvtCx0LzQtdC9INCy0LXRidC10YHRgtCyINC60L7RgdGC0L3QvtC5INGC0LrQsNC90LgsINCyINGH0LDRgdGC0L3QvtGB0YLQuCDRg9GB0LjQu9C40LLQsNGPINC+0YHRgtC10L7QvtCx0YDQsNC30L7QstCw0L3QuNC1INC4INCy0LXQtNC10YIg0Log0YHQvdC40LbQtdC90LjRjiDQvtGB0YLQtdC+0YDQtdC30L7RgNCx0YbQuNC4LiDQmNC90LjRhtC40LjRgNGD0LXRgiDQtNC40YTRhNC10YDQtdC90YbQuNGA0L7QstC60YMg0LzQuNC+0LHQu9Cw0YHRgtC+0LIuINCe0LHQu9Cw0LTQsNC10YIg0LDQvdCw0LHQvtC70LjRh9C10YHQutC40Lwg0LTQtdC50YHRgtCy0LjQtdC8INC4INCy0LvQuNGP0LXRgiDRgtC10Lwg0YHQsNC80YvQvCDQvdCwINGB0LjQvdGC0LXQtyDQsdC10LvQutCwLiDQntC60LDQt9GL0LLQsNC10YIg0LvQuNC/0L7Qu9C40YLQuNGH0LXRgdC60L7QtSDQtNC10LnRgdGC0LLQuNC1LCDQv9GA0LjQstC+0LTQuNGCINC6INGD0LzQtdC90YzRiNC10L3QuNGOINC+0LHRitC10LzQsCDQttC40YDQvtCy0L7QuSDRgtC60LDQvdC4LiDQntC60LDQt9GL0LLQsNC10YIg0LTQstGD0YXRhNCw0LfQvdC+0LUg0LTQtdC50YHRgtCy0LjQtSDQvdCwINGD0LPQu9C10LLQvtC00L3Ri9C5INC+0LHQvNC10L0gKNGB0L3QsNGH0LDQu9C+INC40L3RgdGD0LvQuNC90L7Qv9C+0LTQvtCx0L3Ri9C5INGN0YTRhNC10LrRgiwg0LfQsNGC0LXQvCDQutC+0L3RgtGA0LjQvdGB0YPQu9GP0YDQvdGL0LksINCyINGA0LXQt9GD0LvRjNGC0LDRgtC1INCyINCy0YvRgdC+0LrQuNGFINC00L7Qt9Cw0YUg0LfQsCDRgdGH0LXRgiDQstC70LjRj9C90LjQtSDQvdCwINGA0LXRhtC10L/RgtC+0YDRiywg0YHQv9C+0YHQvtCx0LXQvSDQstGL0LfQstCw0YLRjCDQuNC90YHRg9C70LjQvdC+0YDQtdC30LjRgdGC0LXQvdGC0L3QvtGB0YLRjCkg0KHQu9C10LTQvtCy0LDRgtC10LvRjNC90L4sINC/0YDQuCDQs9C40L/QtdGA0L/RgNC+0LTRg9C60YbQuNC4INCh0KLQkyDRgyDQvdC+0LLQvtGA0L7QttC00LXQvdC90YvRhSDQuCDQtNC10YLQtdC5INGA0LDQvdC90LXQs9C+INCy0L7Qt9GA0LDRgdGC0LAg0L3QsNCx0LvRjtC00LDRjtGC0YHRjyDRj9Cy0LvQtdC90LjRjyDQs9C40LPQsNC90YLQuNC30LzQsCwg0L/RgNC+0Y/QstC70Y/RjtGJ0LjQvNGB0Y8g0YfRgNC10LfQvNC10YDQvdGL0Lwg0YDQvtGB0YLQvtC8INGC0LXQu9CwINCyINC00LvQuNC90YMg0L/RgNC4INGB0L7RhdGA0LDQvdC10L3QuNC4INC/0YDQvtC/0L7RgNGG0LjQuS4g0KMg0LTQtdGC0LXQuSDQsdC+0LvQtdC1INGB0YLQsNGA0YjQtdCz0L4g0LLQvtC30YDQsNGB0YLQsCDQv9GA0LjQstC+0LTQuNGCINC6INGA0LDQt9Cy0LjRgtC40Y4g0LDQutGA0L7QvNC10LPQsNC70LjQuCwg0YXQsNGA0LDQutGC0LXRgNC40LfRg9GO0YnQuNC10YHRjyDRg9Cy0LXQu9C40YfQtdC90L3Ri9C8INGA0L7RgdGC0L7QvCDQutC40YHRgtC10LksINGB0YLQvtC/LCDQu9C40YbQtdCy0YvRhSDQutC+0YHRgtC10Lkg0Lgg0LLQvdGD0YLRgNC10L3QvdC40YUg0L7RgNCz0LDQvdC+0LIuINCe0LHQsCDRgdC+0YHRgtC+0Y/QvdC40Y8g0YHQvtC/0YDQvtCy0L7QttC00LDRjtGC0YHRjyDRgNCw0LfRgNCw0YHRgtCw0L3QuNC10Lwg0YHQvtC10LTQuNC90LjRgtC10LvRjNC90L7QuSDRgtC60LDQvdC4LCDRh9GC0L4g0LzQvtC20LXRgiDQv9GA0LjQstC10LfRgtC4INC6INGB0LrQu9C10YDQvtC30YMg0Lgg0LDRgtGA0L7RhNC40Lgg0LLQvdGD0YLRgNC10L3QvdC40YUg0L7RgNCz0LDQvdC+0LIsINCwINGC0LDQutC20LUg0LzQtdGC0LDQsdC+0LvQuNGH0LXRgdC60LjQvCDQvdCw0YDRg9GI0LXQvdC40Y/QvCwg0YLQsNC60LjQvCDQutCw0Log0LPQuNC/0LXRgNC70LjQv9C40LTQtdC80LjRjyDQuCDQuNC90YHRg9C70LjQvdC+0YDQtdC30LjRgdGC0LXQvdGC0L3QvtGB0YLRjC4g0JTQvtC/0L7Qu9C90LjRgtC10LvRjNC90L4sINC/0YDQuCDQsNC60YDQvtC80LXQs9Cw0LvQuNC4INC80L7Qs9GD0YIg0L3QsNCx0LvRjtC00LDRgtGM0YHRjyDQvtCz0YDRg9Cx0LXQvdC40Y8g0YfQtdGA0YIg0LvQuNGG0LAsINGD0YLQvtC70YnQtdC90LjQtSDQutC+0LbQuCwg0LAg0YLQsNC60LbQtSDRgdC40LzQv9GC0L7QvNGLINC90LXQstGA0L7Qu9C+0LPQuNGH0LXRgdC60LjRhSDQvdCw0YDRg9GI0LXQvdC40Lkg0LIg0YDQtdC30YPQu9GM0YLQsNGC0LUg0LrQvtC80L/RgNC10YHRgdC40L7QvdC90YvRhSDQstC70LjRj9C90LjQuSDQvdCwINC90LXRgNCy0Ysg0Lgg0L3QtdGA0LLQvdGL0LUg0L7QutC+0L3Rh9Cw0L3QuNGPLCDQvdCw0L/RgNC40LzQtdGAINGB0LjQvdC00YDQvtC8INC30LDQv9GP0YHRgtC90L7Qs9C+INC60LDQvdCw0LvQsC4g0JPQuNC/0LXRgNGB0LXQutGA0LXRhtC40Y8g0KHQotCTINGH0LDRidC1INCy0YHQtdCz0L4g0YHQstGP0LfQsNC90LAg0YEg0LDQtNC10L3QvtC80L7QuSDQs9C40L/QvtGE0LjQt9CwLCDQutC+0YLQvtGA0LDRjyDQuCDQv9GA0LjQstC+0LTQuNGCINC6INCz0LjQv9C10YDRgdGC0LjQvNGD0LvRj9GG0LjQuCDQuCDQstGL0LHRgNC+0YHRgyDQs9C+0YDQvNC+0L3QsCDQsiDQutGA0L7QstGMLiAyLiDQoNC10L7Qs9GA0LDRhNC40Y8gLSDQvNC10YLQvtC0INC40YHRgdC70LXQtNC+0LLQsNC90LjRjyDQv9GD0LvRjNGB0L7QstGL0YUg0LrQvtC70LXQsdCw0L3QuNC5INC60YDQvtCy0LXQvdCw0L/QvtC70L3QtdC90LjRjyDRgNCw0LfQu9C40YfQvdGL0YUg0L7RgNCz0LDQvdC+0LIg0Lgg0YLQutCw0L3QtdC5LCDQvtGB0L3QvtCy0LDQvdC90YvQuSDQvdCwINCz0YDQsNGE0LjRh9C10YHQutC+0Lkg0LLQuNC30YPQsNC70LjQt9Cw0YbQuNC4INC/0L7Qu9C90L7Qs9C+INGN0LvQtdC60YLRgNC40YfQtdGB0LrQvtCz0L4g0YHQvtC/0YDQvtGC0LjQstC70LXQvdC40Y8g0YLQutCw0L3QtdC5LiDQp9C10Lwg0LHQvtC70YzRiNC1INC/0YDQuNGC0L7QuiDQutGA0L7QstC4INC6INGC0LrQsNC90Y/QvCwg0YLQtdC8INC80LXQvdGM0YjQtSDRgdC+0L/RgNC+0YLQuNCy0LvQtdC90LjQtS4g0KDQtdC+0LPRgNCw0LzQvNGDINC/0L7Qu9GD0YfQsNGO0YIg0L/Rg9GC0LXQvCDQv9GA0L7QstC10LTQtdC90LjRjyDRh9C10YDQtdC3INGC0LXQu9C+INC/0LDRhtC40LXQvdGC0LAg0L/QtdGA0LXQvNC10L3QvdC+0LPQviDRgtC+0LrQsC4g0JTQvtC/0L/Qu9C10YDQvtCz0YDQsNGE0LjRjyDRgdC+0YHRg9C00L7QsiAtINC10YnQtSDQvtC00LjQvSDQvNC10YLQvtC0INC40YHRgdC70LXQtNC+0LLQsNC90LjRjywg0L/QvtC30LLQvtC70Y/RjtGJ0LjQuSDQvtGG0LXQvdC40YLRjCDRgtC+0L3Rg9GBINGB0L7RgdGD0LTQvtCyLCDQsiDRh9Cw0YHRgtC90L7RgdGC0Lgg0LfQsCDRgdGH0LXRgiDQutC+0YLQvtGA0L7Qs9C+INC80L7QttC90L4g0LfQsNGE0LjQutGB0LjRgNC+0LLQsNGC0Ywg0YHQutC+0YDQvtGB0YLRjCwg0L3QsNC/0YDQsNCy0LvQtdC90LjRjyDRgtC+0LrQsCDQutGA0L7QstC4LCDQvtCx0YrQtdC8LCDQutC+0YLQvtGA0YvQuSDQv9GA0L7RhdC+0LTQuNGCINGH0LXRgNC10Lcg0LjRgdGB0LvQtdC00YPQtdC80YvQuSDQvtGA0LPQsNC9LCDQsCDRgtCw0LrQttC1INC+0L0g0LTQsNC10YIg0L7RhtC10L3QutGDINC+INGB0L7RgdGC0L7Rj9C90LjQuCDRgdGC0LXQvdC+0Log0YHQvtGB0YPQtNC+0LIuINCU0L7Qv9C/0LvQtdGA0L7Qs9GA0LDRhNC40Y8g0L/QvtC80L7Qs9Cw0LXRgiDQvtCx0L3QsNGA0YPQttC40YLRjCDQvdCw0YDRg9GI0LXQvdC40Y8g0LrRgNC+0LLQvtC+0LHRgNCw0YnQtdC90LjRjywg0L3QsNC70LjRh9C40LUg0YXQvtC70LXRgdGC0LXRgNC40L3QvtCy0YvRhSDQsdC70Y/RiNC10Log0L3QsCDRgdGC0LXQvdC60LDRhSwg0YLRgNC+0LzQsdGLINC4INC00YDRg9Cz0LjQtSDQv9Cw0YLQvtC70L7Qs9C40YfQtdGB0LrQuNC1INC40LfQvNC10L3QtdC90LjRjy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Не написано про Дермографизм. По нему определяют тонус сосудов кожи.</text:p>
          </table:table-cell>
          <table:table-cell office:value-type="float" office:value="0" table:style-name="ce1">
            <text:p>0</text:p>
          </table:table-cell>
          <table:table-cell table:number-columns-repeated="16376"/>
        </table:table-row>
        <table:table-row table:style-name="ro1">
          <table:table-cell office:value-type="float" office:value="1066935" table:style-name="ce1">
            <text:p>1066935</text:p>
          </table:table-cell>
          <table:table-cell office:value-type="string" table:style-name="ce1">
            <text:p>russian</text:p>
          </table:table-cell>
          <table:table-cell office:value-type="string" table:style-name="ce1">
            <text:p>Билет 33.&amp;lt;br /&amp;gt; 1.К чему приводит гиперпродукция соматотропного гормона в детстве. &amp;lt;br /&amp;gt; 2.Девочка 14 лет обследуется по поводу вегето-сосудистой дистонии пубертатного периода. Жалуется на частые головные боли, головокружения, боли в области сердца. Гипергидроз ладоней и стоп. АД 80/60 мм рт.ст. ЧСС 60 в минуту. Какой метод исследования, позволяет определить тонус сосудов кожи?&amp;lt;br /&amp;gt;</text:p>
          </table:table-cell>
          <table:table-cell office:value-type="string" table:style-name="ce1">
            <text:p>MSDQstC+0L/RgNC+0YEu0JPQuNC/0LXRgNC/0YDQvtC00YPQutGG0LjRjyDQodC+0LzQsNGC0L7RgtGA0L7Qv9C90L7Qs9C+INCz0L7RgNC80L7QvdCwINC40LvQuCDQttC1INCz0L7RgNC80L7QvdCwINGA0L7RgdGCICDQsiDQtNC10YLRgdC60L7QvCDQstC+0LfRgNCw0YHRgtC1INC80L7QttC10YIg0L/RgNC40LLQtdC30YLQuCDQuiDRgNCw0LfQstC40YLQuNGOINCz0LjQs9Cw0L3RgtC40LfQvNCwIC0g0YLQviDQtdGB0YLRjCDQv9Cw0YLQvtC70L7Qs9C40YfQtdGB0LrQvtC80YMg0YHQvtGB0YLQvtGP0L3QuNGOINGF0LDRgNCw0LrRgtC10YDQuNC30YPRjtGJ0LXQvNGDINGH0YDQtdC30LzQtdGA0L3Ri9C5INC70LjQvdC10LnQvdGL0Lkg0YDQvtGB0YIg0YDQtdCx0LXQvdC60LAg0LfQsCDRgdGH0LXRgiDRg9C00LvQuNC90LXQvdC40Y8g0YLRgNGD0LHRh9Cw0YLRi9GFINC60L7RgdGC0LXQuS4g0K3RgtC+INC/0YDQvtC40YHRhdC+0LTQuNGCINC/0L7RgtC+0LzRgyDRh9GC0L4g0LIg0LTQtdGC0YHQutC+0Lwg0Lgg0L/QvtC00YDQvtGB0YLQutC+0LLQvtC8INCy0L7Qt9GA0LDRgdGC0LUg0Y3Qv9C40YTQuNC30LDRgNC90YvQtSDRhdGA0Y/RidC4INC10YnQtSDQvtGC0LrRgNGL0YLRiyDQuCDRgdC60LXQu9C10YIg0LDQutGC0LjQstC90L4g0YDQsNGB0YLQtdGCINC/0L7QtCDQtNC10LnRgdGC0LLQuNC10Lwg0YHQvtC80LDRgtC+0YLRgNC+0L/QvdC+0LPQviDQs9C+0YDQvNC+0L3QsCjQs9C+0YDQvNC+0L3QsCDRgNC+0YHRgtCwKS4g0JjQt9Cx0YvRgtC+0Log0LTQsNC90L3QvtCz0L4g0LPQvtGA0LzQvtC90LAg0L/RgNC40LLQvtC00LjRgiDQuiDRh9GA0LXQt9C80LXRgNC90L7QvNGDINC00LXQu9C10L3QuNGOINC60LvQtdGC0L7QuiDRhdGA0Y/RidC10LLQvtC5INGC0LrQsNC90Lgg0YHRgtC40LzRg9C70LjRgNGD0Y8g0YHQuNC90YLQtdC3INCx0LXQu9C60L7QsiDQuCDQt9Cw0LzQtdC00LvRj9C10YIg0LfQsNC60YDRi9GC0LjQtSDQt9C+0L0g0YDQvtGB0YLQsCDRh9GC0L4g0L/RgNC40LLQvtC00LjRgiDQuiDQvdC10L/RgNC+0L/QvtGA0YbQuNC+0L3QsNC70YzQvdC+0LzRgyDQuCDRgdC40LvRjNC90L7QvNGDINGA0L7RgdGC0YMg0YLRgNGD0LHRh9Cw0YLRi9GFINC60L7RgdGC0LXQuSDRgNC10LHQtdC90LrQsC4g0KLQsNC60LbQtSDQtNCw0L3QvdGL0LkgINCz0L7RgNC80L7QvSDQstC70LjRj9C10YIg0L3QsCDQvtCx0LzQtdC90L3Ri9C1INC/0YDQvtGG0LXRgdGB0YsgLiDQkCDQuNC80LXQvdC90L4g0L/RgNC40LLQvtC00LjRgiDQuiDQvdCw0YDRg9GI0LXQvdC40Y4g0YPQs9C70LXQstC+0LTQvdC+0LPQviDQvtCx0LzQtdC90LAgINGH0YLQviDQstC10LTQtdGCINC6INC40L3RgdGD0LvQuNC90L3QvtGA0LXQt9C40YHRgtC10L3RgdGC0L3QvtGB0YLQuCjRgdC90LjQttCw0LXRgtGB0Y8g0YfRg9Cy0YHRgtCy0LjRgtC10LvRjNC90L7RgdGC0Ywg0YLQutCw0L3QtdC5INC6INC40L3RgdGD0LvQuNC90YMpINC4INC/0L7QstGL0YjQtdC90LjQtSDRg9GA0L7QstC90Y8g0LPQu9GO0LrQvtC30Ysg0LIg0LrRgNC+0LLQuCDRh9GC0L4g0LzQvtC20LXRgiDQv9GA0LjQstC10YHRgtC4INC6INGA0LDQt9Cy0LjRgtC40Y4g0YLQsNC60L7Qs9C+INC30LDQsdC+0LvQtdCy0LDQvdC40Y8g0LrQsNC6INCh0LDRhdCw0YDQvdGL0Lkg0LTQuNCw0LHQtdGCIDIg0YLQuNC/0LAu0JjQvNC10L3QvdC+INC/0L4g0Y3RgtC+0Lkg0L/RgNC40YfQuNC90LUg0YMg0LTQtdGC0LXQuSDRgyDQutC+0LPQviDQvdCw0LHQu9GO0LTQsNC10YLRgdGPINCz0LjQs9Cw0L3RgtC40LfQvCDRgdGC0YDQsNC00LDQtdGCINC00LDQvdC90L7QuSDQv9Cw0YLQvtC70L7Qs9C40LXQuSDRjdC90LTQvtC60YDQuNC90L3QvtC5INGB0LjRgdGC0LXQvNGLIC4g0KLQsNC60LbQtSDQuNC30LHRi9GC0L7QuiDQs9GA0YDQvNC+0L3QsCDRgNC+0YHRgtCwINC80L7QttC10YIg0L3QsNGA0YPRiNCw0LXRgiDQv9C+0LvQvtCy0L7QtSDRgdC+0LfRgNC10LLQsNC90LjQtSAu0K3RgtC+INGB0LLRj9C30LDQvdC90L4g0YEg0YTRg9C90LrRhtC40L7QvdCw0LvRjNC90YvQvCDQtNC40YHQsdCw0LvQsNC90YHQvtC8INC80LXQttC00YMg0LPQvtGA0LzQvtC90LDQvNC4INCz0LjQv9C+0YTQuNC30LAg0Lgg0L/QvtC70L7QstGL0LzQuCDQs9C+0YDQvNC+0L3QsNC80LguINCt0YLQviDQv9GA0LjQstC+0LTQuNGCINC6INC30LDQtNC10YDQttC60LUg0YDQsNC30LLQuNGC0LjRjyDQstGC0L7RgNC40YfQvdGL0YUg0L/QvtC70L7QstGL0YUg0L7RgNCz0LDQvdC+0LIg0LAg0YLQsNC60LbQtSDRhNGD0L3QutGG0LjQvtC90LjRgNC+0LLQsNC90LjRjiDQv9C+0LvQvtCy0YvRhSDQs9C+0LzQvtC90L7QsijRjdGB0YLRgNC+0LPQtdC90YsgLNGC0LXRgdGC0L7RgdGC0LXRgNC+0L0pIC4g0KLQsNC60LbQtSDQuNC30LHRi9GC0L7QuiDRjdGC0L7Qs9C+INCz0L7RgNC80L7QvdCwINCy0LvQuNGP0LXRgiDQvdCwINC40LzQvNGD0L3QvdGD0Y4g0YHQuNGB0YLQtdC80YMgLtCV0LPQviDRhdGA0L7QvdC40YfQtdGB0LrQuNC5INC40LfQsdGL0YLQvtC6INC/0YDQuNCy0L7QtNC40YIg0Log0YTQvtGA0LzQuNGA0L7QstCw0L3QuNGOINCy0YLQvtGA0LjRh9C90L7Qs9C+INC40LzQvNGD0L3QvtC00LXRhNC40YbQuNGC0LAg0YfRgtC+INC/0YDQvtGP0LLQu9GP0LXRgtGB0Y8g0L/QvtCy0YvRiNC10L3QvdC+0Lkg0YHQutC70L7QvdC90L7RgdGC0YzRjiDQuiDRgNCw0LfQu9C40YfQvdGL0Lwg0LjQvdGE0LXQutGG0LjRj9C8ICzQt9Cw0LzQtdC00LvQtdC90L3QvtC5INGA0LXQs9C10L3QtdGA0LDRhtC40LXQuSDRgtC60LDQvdC4INC4INGB0L3QuNC20LXQvdC40LUg0LjQvNC80YPQvdC90L7QuSDRgNC10LfQuNGB0YLQtdC90YLQvdC+0YHRgtC4LiAgICAgICAgICAgICAgICAgICAgICAgICAgICAgICAgICAgICAgICAgICAgICAgICAgICAgICAgICAgICAgICAgICAgICAgICAgICAgICAgICAgICAgICAgICAgICAgICAgICAgICAgICAgICAgICAgICAgICAgICAgICAgICAgICAgICAgICAgICAgICAgIDxiciAvPg0KMiDQstC+0L/RgNC+0YEuINCS0LXQs9C10YLQsNGC0LjQstC90L4t0YHQvtGB0YPQtNC40YHRgtCw0Y8g0LTQuNGB0YLQvtC90LjRjyDRjdGC0L4g0L/QsNGC0L7Qu9C+0LPQuNGH0LXRgdC60L7QtSDRgdC+0YHRgtC+0Y/QvdC40LUg0LrQvtGC0L7RgNC+0LUg0YXQsNGA0LDQutGC0LXRgNC40LfRg9C10YLRgdGPINGB0L3QuNC20LXQvdC40LXQvCAg0YLQvtC90YPRgdCwINGB0L7RgdGD0LTQvtCyKNCz0LjQv9C+0YLQvtC90YPRgSkg0LAg0YLQsNC60LbQtSDQv9GA0L7QuNGB0YXQvtC00LjRgiDRgdGD0LbQtdC90LjQtSDRgdC+0YHRg9C00L7QsiAo0LjRhSDQv9GA0L7RgdCy0LXRgtCwKSDQstGB0LvQtdC00YHRgtCy0LjQtSDQuNGFINGB0L/QsNC30LzQsC4g0YLQsNC60LbQtSDRgdC70LXQtNGD0LXRgiDQvtGC0LzQtdGC0LjRgtGMINGDINC/0LDRhtC40LXQvdC60Lgg0LLRi9GA0LDQttC10L3QvdCw0Y8g0LPQuNC/0L7RgtC+0L3QuNGPKCDQkNCUIDgwLzYwICwg0LPQvtC70L7QstC+0LrRgNGD0LbQtdC90LjQtSAs0LPQvtC70L7QstC90YvQtSDQsdC+0LvQuCzQs9C40L/QtdGA0LPQuNC00YDQuNC+0Lcg0LvQsNC00L7QvdC10LkpLiDQndCw0LjQsdC+0LvQtdC1INC/0YDQtdC00L/QvtGH0YLQuNGC0LXQu9GM0L3Ri9C8INC80LXRgtC+0LTQvtC8INC00LjQsNCz0L3QvtGB0YLQuNC60Lgg0YLQvtC90YPRgdCwINGB0L7RgdGD0LTQvtCyINC60L7QttC4INGP0LLQu9GP0LXRgtGB0Y8g0YDQtdC+0LPRgNCw0YTQuNGPINCwINGC0L7Rh9C90LXQtSDRgNC10LfQvtCy0LDQt9C+0LPRgNCw0YTQuNGPIC4g0JTQsNC90L3QvtC1INC40YHRgdC70LXQtNC+0LLQsNC90LjQtSAg0L3QsNC/0YDQsNCy0LvQtdC90L4gINC90LAg0L/QtdGA0LjRhNC10YDQuNGH0LXRgdC60LjQtSDRgdC+0YHRg9C00Ysg0LLQutC70Y7Rh9Cw0Y8g0YHQvtGB0YPQtNGLINC60L7QttC90YvRhSDQv9C+0LrRgNC+0LLQvtCyLiDQrdGC0L7RgiDQuNC90LLQsNC30LjQstC90YvQuSDQvNC10YLQvtC0INC90LDQv9GA0LDQstC70LXQvSDQvdCwINGA0LXQs9C40YHRgtGA0LDRhtC40Y4g0LjQt9C80LXQvdC10L3QuNC5INGN0LvQtdC60YLRgNC40YfQtdGB0LrQvtCz0L4g0YHQvtC/0YDQvtGC0LjQstC70LXQvdC40Y8g0YLQutCw0L3QtdC5INC/0YDQuCDQv9GA0L7RhdC+0LbQtNC10L3QuNGP0YUg0YfQtdGA0LXQtyDQvdC40YUgINC/0LXRgNC10LzQtdC90L3QvtCz0L4g0YLQvtC60LAu0K3RgtC4INC40LfQvNC10L3QtdC90LjRjyDQvdCw0L/RgNGP0LzRg9GOINGB0LLRj9C30LDQvdGLINGBINC60L7Qu9C10LHQsNC90LjRj9C80Lgg0LrRgNC+0LLQtdC90LDQv9C+0LvQvdC10L3QuNGPINGB0L7RgdGD0LTQvtCyINGC0L4g0LXRgdGC0Ywg0L/Rg9C70YzRgdC+0LLRi9C8INC/0YDQuNGC0L7QutC+0Lwg0LrRgNC+0LLQuC4g0K3RgtC4INC/0L7Qt9Cy0L7Qu9GP0LXRgiDQvtGG0LXQvdC40YLRjCDRgtC+0L3Rg9GBINGB0L7RgdGD0LTQvtCyICwg0LIg0YLQvtC8INGH0LjRgdC70LUg0Lgg0LrQvtC20L3Ri9GFINC/0L7QutGA0L7QstC+0LIuINCd0LAg0YDQtdC+0LPRgNCw0YTQuNC4INC/0L7QutCw0LfRi9Cy0LDQtdGC0YHRjyDQk9GA0LDRhNC40YfQtdGB0LrQvtC1INC/0L7Qu9C+0LbQtdC90LjQtSDQutGA0LjQstC+0Lkg0LrRgNC+0LLQvtGC0L7QutCwINGH0YLQviDQv9C+0LfQstC+0LvRj9C10YIg0YHRg9C00LjRgtGMINC+INGB0L7RgdGC0L7Rj9C90LjQuCDQsNGA0YLQtdGA0LjQsNC70YzQvdC+0LPQviDQuCDQstC10L3QvtC30L3QvtCz0L4g0LrRgNC+0LLQvtC+0LHRgNCw0YnQtdC90LjRjyAuINCSINGB0LvRg9GH0LDQtSAg0LLQtdCz0LXRgtCw0YLQuNCy0L3QviDRgdC+0YHRg9C00LjRgdGC0L7QuSDQtNC40YHRgtC+0L3QuNC4INGB0L3QuNC20LDQtdGC0YHRjyDQv9C10YDQuNGE0LXRgNC40YfQtdGB0LrQvtC1INGB0L7RgdGD0LTQuNGB0YLQvtC1INGB0L7Qv9GA0L7RgtC40LLQu9C10L3QuNC1ICzQsCDRgtCw0LrQttC1INGC0L7QuiDQutGA0L7QstC4LiDQlNCw0L3QvdGL0Lkg0LzQtdGC0L7QtCDQv9C+0LfQstC+0LvRj9C10YIg0LLRi9GP0LLQuNGC0Ywg0YHQv9Cw0LfQvCDRgdC+0YHRg9C00L7QsiAs0LfQsNC80LXQtNC70LXQvdC40LUg0LrRgNC+0LLQvtGC0L7QutCwINCc0LXRgtC+0LQg0Y/QstC70Y/QtdGC0YHRjyDQvdCw0LjQsdC+0LvQtdC1INCx0LXQt9C+0L/QsNGB0L3Ri9C8INC4INC/0YDQtdC00L/QvtGH0YLQuNGC0LXQu9GM0L3Ri9C8ICDRgtCw0Log0LrQsNC6INC90LUg0YLRgNC10LHRg9C10YIg0YHQv9C10YbQuNCw0LvRjNC90L7QuSDQv9C+0LTQs9C+0YLQvtCy0LrQuCDQt9Cw0YDQsNC90LXQtSDQuCDQv9C+0Y3RgtC+0LzRgyDRj9Cy0LvRj9C10YLRgdGPINGD0LTQvtCx0LXQvSDQtNC70Y8g0LTQuNCw0LPQvdC+0YHRgtC40LrQuCDQtNC10YLQtdC5INC4INCy0LfRgNC+0YHQu9GL0YUu</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Не написано про Дермографизм.Позволяет определить тонус сосудов кожи. Симпатику от парасимпатики.</text:p>
          </table:table-cell>
          <table:table-cell office:value-type="float" office:value="0" table:style-name="ce1">
            <text:p>0</text:p>
          </table:table-cell>
          <table:table-cell table:number-columns-repeated="16376"/>
        </table:table-row>
        <table:table-row table:style-name="ro1">
          <table:table-cell office:value-type="float" office:value="915010" table:style-name="ce1">
            <text:p>915010</text:p>
          </table:table-cell>
          <table:table-cell office:value-type="string" table:style-name="ce1">
            <text:p>english</text:p>
          </table:table-cell>
          <table:table-cell office:value-type="string" table:style-name="ce1">
            <text:p>Ticket 33.&amp;lt;br /&amp;gt; 1. Hyperproduction of growth hormone in childhood can lead to what? &amp;lt;br /&amp;gt; 2. A 14-year-old girl is being examined for vegetative-vascular dystonia of the puberty period. Complains of frequent headaches, dizziness, pain in the heart, in the abdomen of uncertain localization. Emotionally labile. Hyperhidrosis of the palms and feet. Increased overall sweating. Blood PRESSURE 80/60 mm Hg, heart rate 60 per minute. Define a research method that allows you to determine the tone of the vessels of the skin.&amp;lt;br /&amp;gt;</text:p>
          </table:table-cell>
          <table:table-cell office:value-type="string" table:style-name="ce1">
            <text:p>ICBBTlNXRVI7Oy1DT05TRVFVRU5DRVMgT0YgSFlQRVJQUk9EVUNUSU9OIE9GICBUSEUgR1JPV1RISCBIT1JNTkVTICBJTiBUSEUgQ0hJTERIT09ELipHSUdBTlNUSVNNLCxIWVBFUlBST0RVQ1RJT04gSU4gVEhFIEdST1dUSCBPRiBUSEUgSE9STU9ORVMoR0gpLkJFRk9SRSBUSEUgQ0xPT1NVUkUgT0YgVEhFIEVQSVBIU0VBTCBHUk9XVEggTEVBRCBUTyBUSEUgUExBVEVTIExFQUQgVE8gRVhDRVNTSVZFIExPTkdHSVRVTklBTCBCT05FIEdST1dUSCBSRVNVTFQgIEdJR0FOU1RJTS5USElTIE9DVVVSIERVUklORyBUSEUgUFJFUFVCUkFMIFBFUklPRC4uKkFDUk9NRUdBTFksOyAsSUYgVEhFIChHSCkgRUNFU1MgIE9DQ1VSUiBBRlRFUiBUSEUgQ0xPU0VSIE9GIFBFUklQSEFMIFRJU1NVU0UsLEVTUEFDSUxMQVkgSU4gVEhFIEZBQ0UgLCwsSEFORCAsLEFORCBGRUVUIEtOT1dOIEFTIEFDUk9BR0FOTFkuMjI7Oy0gUkVBU0FSRCBNRVRIT0QgVE8gREVSVE1JTkUgU0tJTk4gVkVFU1NTRUwgVElTU1VTRSwsREVURVJNQVRJT04gT0YgU0tJTiAgVkVTU0VMIFRJU1NVRTstVE8gQVNTQ0VTIFRIRSBUT05FIE9GIFNLSU4gVkVTU0VMICwsLEEgTk9OLUlOVkFTSVNTRSBNRVRIT0QgIENBTExFRCBERVJNQVRPTE9HSUNBTCAgVEhFUk9NRVJUWSBPRiBUSEUgU0tJTiBPUiBTS0lOIFRIRVJPTUVSVFJZICBDQU4gQkUgRU1QT0xZRUQuLlBSSU5DSVBMQUwiOzstVEhFIE1FVEhPRCBJTlZPTElOR0cgTUVBU1VSSU5HIFRIRSBURU1QVVJUQVVSRSBPRiBUSEUgU0tJTiBTVVJGQUNDRSAsLFdISUNISCBJTkZMVVNDRUQgQlkgVEhFIFRPTkUgT0YgVU5ERVJMWUlORyBCTE9PRCBWRUVTU0VMLipQUk9DRURVQ0VERVIgOzstSU5WT0xFUyBVU0lORyBBIFRIRVJNT0NPVVBMRSBPUiBJTkZSQUVEIFRIRVJPTUVURVJSIFRPIE1FQVNVUkVFIFRIRSBTS0lOIFRFTVBBVFVSRSBBVCBTUEVDRklDQyBTSVRFUyxPRlRFTiBPTk4gVEhFIEVYVEVNSVRJRVMuKklOVEVSUEVSVEFUSU9OIDs7Oy0gSU5DUkFFU0VERCAgU0tJTiBWRVNFRUwgIFRPTkUgTUFZICBSRVNVTFQgSU4gUkVEVUNFRUQgIEJMT09EIEZMT1csTEVBRElORyBUTyBDT09MRVIgIFNLSU4gVEVNUEVSQVRVUkUgLklOIFRIRSBDT05UUkFTVCAsREVDUkVBU0VEIFZFRVNFTCBUT05FIE1BWSBSRVNVTFQgSU4gV0FSTUVSIFNLSU4gVEVNUEVSQVRVUkVTLi4uICA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93" table:style-name="ce1">
            <text:p>915193</text:p>
          </table:table-cell>
          <table:table-cell office:value-type="string" table:style-name="ce1">
            <text:p>kazakh</text:p>
          </table:table-cell>
          <table:table-cell office:value-type="string" table:style-name="ce1">
            <text:p>Билет 34.&amp;lt;br /&amp;gt; 1.Жаңа туған және ерте жастағы балалардың пульсының ерекшелектері. Ол ерекшеліктер немен байланысты? &amp;lt;br /&amp;gt; 2. 5 күндік бала,күніңе жетіп туған.Туғандағы салмағы 3400 кг, бойы 52 см. Жағдайы қанағатты.Жалпы қан анализынде нейтрофиллдер 45%, лимфоциттер 45%. Неге нейтрофилдің және лимфоциттердің көрсеткіштері бірдей? &amp;lt;br /&amp;gt;</text:p>
          </table:table-cell>
          <table:table-cell office:value-type="string" table:style-name="ce1">
            <text:p>MS7QltCw0qPQsCDRgtGD0pPQsNC9INC205nQvdC1INC10YDRgtC1INC20LDRgdGC0LDSk9GLINCx0LDQu9Cw0LvQsNGA0LTRi9KjINC/0YPQu9GM0YHRi9C90YvSoyDQtdGA0LXQutGI0LXQu9GW0LrRgtC10YDRliDQtdGA0LXRgdC10Log0LDQtNCw0LzQtNCw0YDQtNGL0LrRltC90LUg0pvQsNGA0LDSk9Cw0L3QtNCwINC10YDQtdC60YjQtdC70LXRgyDQsdC+0LvRi9C/INC60LXQu9C10LTRli7QltCw0LvQv9GLINC/0YPQu9GM0YEg0LHSsdC7INCw0YDRgtC10YDQuNGPINKb0LDQsdGL0YDSk9Cw0LvQsNGA0YvQvdGL0qMg0YvRgNKT0LDSm9GC0Ysg0YLQtdGA0LHQtdC70ZbRgdGWINC+0LvQsNGAINC20q/RgNC10LrRgtGW0qMg0YHQvtKT0YPRi9C80LXQvSDQvdC10LzQtdGB0LUg0LbQuNGL0YDRi9C70YPRi9C80LXQvSDRgdOZ0LnQutC10YEg0LrQtdC70LXQtNGWINGP0pPQvdC4INC20q/RgNC10LrRgtGW0qMg0LbQuNGL0YDRi9C70YPRi9C80LXQvSDQttOZ0L3QtSDSm9GL0YHRi9C80L3Ri9KjINOp0LfQs9C10YDRg9GW0LzQtdC9INCx0LDQudC70LDQvdGL0YHRgtGLINKb0LDQvdC90YvSoyDQsdC10LvQs9GW0LvRliDQsdGW0YAg0LzTqdC70YjQtdGA0ZbQvdGW0qMg0LrQtdC70YPRltC40LXQvSDQv9Cw0LnQtNCwINCx0L7Qu9Cw0LTRiy7QltCw0qPQsCDRgtGD0pPQsNC9INCx0LDQu9Cw0LvQsNGA0LTQsCDQv9GD0LvRjNGBINGL0YDSk9Cw0pvRgdGL0Lcg0YLQvtC70pvRi9C90LTQsNGA0Ysg0LzQtdC9INKx0LfQsNKb0YLRi9KT0Ysg0LHRltGA0LrQtdC70LrRliDQtdC80LXRgSDQsdC+0LvRi9C/INC60LXQu9C10LTRli7QodC+0L3Ri9C80LXQvSDQsdGW0YDQs9C1INC80LXRgtCw0LHQvtC70LjQt9C80L3RltKjICDSm9Cw0YDSm9GL0L3QtNGL0Ysg0LHQvtC70YvRg9C90LAg0LHQsNC50LvQsNC90YvRgdGC0Ysg0L/Rg9C70YzRgSDQttC40LvRltCz0ZYg0LbQvtKT0LDRgNGLINCx0L7Qu9Cw0LTRiywg0JHQsNC70LDQu9Cw0LDRgNC00YvSoyDQttKv0YDQtdCz0ZYg0LXRgNC10YHQtdC60YLQtdGA0LTRltC60ZbQvdC1INKb0LDRgNCw0pPQsNC90LTQsCDRgtC10Lcg0YHQvtKT0YPRi9C90LAg0LHQsNC50LvQsNC90YvRgdGC0Ysg0L/Rg9C70YzRgdGC0LXRgNGWINC20L7Sk9Cw0YDRiyDQsdC+0LvQsNC00YsgKDEyMCDRgNC10YIv0LzQuNC9KSDQttGW0L3QtdC00LUg0LTQsNC80Lgg0LrQtdC70LUg0LXRgNC10YHQtdC60YLQtdGA0LTRltC60ZbQvNC10L0g0LHRltGA0LTQtdC5INCx0L7Qu9CwINCx0LDRgdGC0LDQudC00Ysu0J3TmdGA0LXRgdGC0LXQu9GWINC60LXQt9C10qPQtNC1INCW0JbQliAgMTQwINC80LXQvSAxNjDRgtGL0qMg0LDRgNCw0LvRi9KT0Ysg0LHQvtC70LDQtNGLINC60LXQudGW0L0g0LHSsdC7INC606nRgNGB0LXRgtC60ZbRiCDRgtOp0LzQtdC90LTQtdC50LTRltGWLtCQ0LvQtNGL0LzQtdC9IDEyMC0xNDDSm9CwINGC06nQvNC10L3QtNC10LnQtNGWLNGB0L7RgdGL0L0gODAtOTAg0LDRgNCw0LvRi9KT0Ysg0LHQvtC70LDQtNGLLtCe0LTQsNC9INC60LXQudGW0L0g0LXRgNC10YHQtdC60YLQtdGA0LTRltGW0LrRltC80LXQvSDQsdGW0YDQtNC10LnRhiDQsdC+0LvQsNC00YsgKDcwLTgwINCw0YDQsNC70YvSk9GLKS7Qn9GD0LvRjNGBINC20LjRltC70ZbQs9GW0L3RltKjINC20LDRgSDQtdGA0LXQutGI0LXQu9GW0LPRltC90LXQvdC9IDEwINC/0LDQudC30pPQsCDQsNGD0YvRgtKb0YPRiyDQsdGW0LfQtNC1INKb0LDQu9GL0L/RgtGL0pPQsCDQttCw0YLQsNC00Ysu0JDQuyDQvtC00LDQvSDRgdC40YDQtdC6INCx0L7Qu9GB0LAg0LHRgNCw0LTQuNC60LDRgNC00LjRjyAs0LDQuyAgINC20LjRliDQsdC+0LvQsNGC0YvQvSDQsdC+0LvRgdCwINGC0LDRhdC40LrQsNGA0LTQuNGPINCx0L7Qu9GL0L8g0YHQsNC90LDQu9Cw0LQuINCR0LDQu9Cw0LvQsNGA0LTRi9KjINC/0YPQu9GM0YHRltC90ZbSoyDQttC40ZbQu9GW0LPRltGWINGC05nRg9C70ZbQuiAg0LHQvtC50Ysg06nQt9Cz0LXRgNC80LXQu9GWINCx0L7Qu9GL0L8g0LrQtdC70LXQtNGWINC205nQvdC1INC+0Lsg0YLSsdGA0LDSm9GC0Ysg06nQt9Cz0LXRgNC10LTRli7QkdCw0LvQsNC90YvSo9KjINC/0YPQu9GM0YHRi9C9INGC0LDSo9C10YDRgtC10qMg0L7Rj9C90pPQsNC9INCx0LXRgtGC0LUg0YLQtdC60YHQtdGA0YMg0Y/Sk9C90Lgg0LHQsNKT0LDQu9Cw0YMg0LTSsdGA0YvRgSDQtNC10L8g0YHQsNC90LDQu9Cw0LTRiy7Rj9KT0L3QuCDQvtC7INCy0LXRgNGC0LjQutCw0LvRjNC00ZYgINC20LDSk9C00LDQudKT0LAg0LDRg9GL0YHSm9Cw0L3Sk9CwINC00LXQudGW0L0g0LbTmdC90LXQttC00LUg0LDRiCDSm9Cw0YDRi9C90pPQsCAs0LHSsdC7INC/0YPQu9GM0YHRgtGWINCx0LDQt9Cw0LvRjNC00ZYg0L/Rg9C70YzRgSDQtC7QsC4g0J/Rg9GG0LvRjNGB0YLRltKjINGL0YDSk9Cw0pPRiyDQtNKx0YDRi9GBINC90LXQvNC10YHQtSDQsdKx0YDRi9GBINCx0L7Qu9GD0YvQtNCwINC80q/QvNC60ZbQvS7QmtC10YDQvdC10YPQtNGW0qMg0LTTmdGA0ZbQttC10YHRliDQsdC+0LnRi9C90YjQsCDQkNKaINC205nQvdC1INC00LUg0LDRgNGC0LXRgNC40Y/QvdGL0qMg0pvQsNCx0YvRgNKT0LDQu9Cw0YDRi9C90YvSoyDRgtC+0L3Rg9GB0YTRiyDRgdC40L/QsNGC0YLQsNC70LDQtNGLLtKb0LDQu9GL0L/RgtGLINC20LDSk9C00LDQudC00LAg0L/Rg9C70YzRgdGC0ZbSoyDQutC10YDQvdC10YPRltC+0YDRgtCw0YjQsCAsINC60LXRgNC90LXRg9GWINKb0LDRgtGC0Ysg0L0v0LUg0LrQtdGA0L3QtdGD0YHRltC3INC20rHQvNGB0LDSm9GC0LAg0LHQvtC70LDQtNGLINC00LXQvyDSm9Cw0YDQsNGB0YLRi9GA0YvQu9Cw0LTRiy7RgtC+0LvRgyDQtNOZ0YDQtdC20LXRgdGWINGB0LjRgdGC0L7Qu9Cw0LvRi9KbINKb0LDQvSDQsNC50LTQsNC70YPRi9C90LAg0LbQsNC70L/Ri9GEINKb0LDQvSDQutOp0LvQtdC80ZbQvdC1INC205nQvdC1INC+0L3Ri9KjINGC0LDRgNCw0LvRg9GL0L3QsCDQsdCw0LnQu9Cw0L3Ri9GB0YLRiyDQsdC+0LvRi9C/INC60LXQu9C10LTRli7Qn9GD0LvRjNGBINKb0LDQvdCw0pPQsNGC0YLQsNC90LDRgNC70YssINGC0L7Qu9GL0LzQtNGL0YsgINC205nQvdC1INCx0L7RgdGBINCx0L7Qu9GL0L8g0LXRgNC10LrRiNC10LvQtdC90LXQtNGWLiDQkNC7INC/0YPQu9GM0YHRgtGW0qMg0LHQuNGW0LrRgtGW0LPRliDQv9GD0LvRjNGB0YLRltKjINGC0L7Qu9Kb0YvQvdGLINCw0YDSm9GL0LvRi9GLICDQsNGA0YLQtdGA0LjRh9GP0L3Ri9KjINC60LXSo9C10Y4g0LTTmdGA0LXQttC10YHRltC90LUg0YHTmdC50LrQtdC10YEg0LbTmdC90LUg0LDRgNGC0LXRgNC40Y/Qu9C00Ysg0pvRi9GB0YvQvNC90YvSoyDQsNC80L/Qu9C40YLRg9C00LDRgdGL0L3QsCDQv9GA0L7Qv9C+0YDRhtC40L7QvdCw0LvQtNGLLiDSrtC70LrQtdC9INC205nQvdC10LTQtSDQutGW0YjRliDQv9GD0LvRjNGB0YLQsNGAINCw0LbRi9GA0LDRgtGL0LvQsNC00Ysu0JDQuyDRhNC+0YDQvNCw0YHRi9C90LAg0LHQsNC50LvQsNC90YvRgdGC0Ysg0LHQsNGP0YMg0LbTmdC90LXQtNC1INGC0LXQtyDQsdC+0LvRi9C/INCx06nQu9GW0L3QtdGC0ZbQvSDQsdC+0LvRi9C/INC60LXQu9C10LTRli7Qn9GD0LvRjNGB0YLQtdGA0LTRltKjINC90LXQs9GW0LfQs9GWINC10LrRliDRgtKv0YDRliDQsdCw0YAg0YHQuNGB0YLQvtC70LDQu9GL0psg0LbTmdC90LXQtNC1INC00LjQsNGB0YLQvtC70LDQu9GL0psgLiDQodC40YHRgtC+0LvQsNC70YvSmyDSm9Cw0L0g0LDQudC00LDRgyDQutC10LfRltC90LTQtSDQsNC7INC00LjQsNGB0YLQvtC70LDQu9GL0psg0pvQsNC9INGC0L7Qu9GDINC60LXQt9GW0L3QtNC1LjxiciAvPg0KMi7QndOZ0YDQtdGB0YLQtdC70LXRgNC00ZbSoyDTqdC80ZbRgNGW0L3RltKj0ZYg0LDQu9KT0LDRiNKb0Ysg0LrSr9C90LTQtdGA0ZbQvdC00LUg0YTQuNC30LjQvtC70L7Qs9C40Y/Qu9GL0psg0L3QtdC50YLRgNC+0YTQuNC70LXQtyDQsdCw0LnSm9Cw0LvQsNC00Ysg0LbQsNC70L/RiyDQvdC10LnRgtGA0L7RhNC40LvQtNC10YAg0YHQsNC90YvQvNC10L0g0LvQuNC80YTQvtGG0LjRgtGC0LXRgCDRgdCw0L3RiyA5MNC/0LDQudGL0YXQtNGLINKb0rHRgNCw0LnQtNGLLNCw0Lsg0L3QtdC50YLRgNC+0YTQuNC70LTQtdGA0LTRltKjINGB0LDQvdGLIDYwLTY1INC/0LDQudGL0LfQtNGLICDSm9Kx0YDQsNC50YLRi9C9INCx0L7Qu9GL0L8g0LrQtdC70LXQtNGWLtCb0LjQvNGE0L7RhtC40YLRgtC10YAgMjAg0LzQtdC9IDI1INC/0LDQudGL0Lcg0LDRgNCw0LvRi9KT0YvQvdC00LAu0LHQsNC70LAg0YLRg9GL0LvSk9Cw0L3QvdCw0L3QsCDQutC10LnRltC9ICDQu9C10LnQutC+0YbQuNGC0LDRgNC70YvSmyDRhNC+0YDQvNGD0LvQsNGB0Ysg0LHRltGA0YjQsNC80LAg06nQt9Cz0LXRgNGW0YHRgtC10YDQs9C1INKx0YjRi9GA0LDQudGC0YvQvSDQsdC+0LvRi9C/INC60LXQu9C10LTRli4g0J3QtdC50YLRgNC+0YTQuNC70LTQtdGA0LTRltGW0qMg0YHQsNC90Ysg0YLQtdC30ZbRgNC10Log0YLTqdC80LXQvdC00LXQudGC0ZbQvSDQsdC+0LvRi9C/INC60LXQu9C10LTRliDQsNC7INC70LjQvNGE0L7RhtC40YLRgtC10YAg0LrQtdGA0ZbRgdGW0L3RiNC1INC20L7Sk9Cw0YDRi9Cw0LnRgtGL0L0g0LHQvtC70YvQvyDQutC10LvQtdC00ZYuNSDQvdC10LzQtdGB0LUgNiDQutKv0L3QtNC10YDRliDQsdC+0LvRgdCwINC/0LDQudGL0LfQtNGL0psg0LrTqdGA0YHQtdGC0LrRltGI0YLQtdGA0ZYg0YLQtdKj0LXRgdC10LTRliDQvNKx0L3QtNCw0Lkg0YLQtdKj0LXRgdGD0LTRltGWINCx0ZbRgNGW0L3RiNGWINGE0LjQt9C40LzQvtC70L7Qs9C40Y/Qu9GL0psg0pvQuNGL0LvRi9GB0YMg0LQu0LAuICDQodC+0LTQsNC9INC60LXQudGW0L0g0L3QtdC50YLRgNC+0YTQuNC70LTQtdGAINGB0LDQvdGLINCw0LfQsNGP0LTRi9C00LAg0LvQuNGE0L7RhtC40YLRgtC10YAg0LrTqdCx0LXQudC10LTRli4g0JHQsNC70LAg0LHRltGAINCw0LnSk9CwINGC0L7Qu9KT0LDQvSDRg9Cw0pvRi9GC0YvQvdC00LAg0L3QtdC50YLRgNC+0YTQuNC70LTQtdGA0LTRltKjINGB0LDQvdGLINC+0YDRgtCw0YjQsCDQtdGB0LXQv9C/0LXQvdC10L0gMjUg0L/QsNC50YvQt9C00Ysg0pvSsdGA0LDQudC00Yss0LDQuyDQu9C40LzRhNC+0YbQuNGC0YLQtdGAIDY1INC/0LDQudGL0LfSk9CwINCx0LDRgNCw0LTRiy7QntC00LDQvSDTmdGA0ZYgINC90LXQudGC0YDQvtGE0LjQu9C00LXRgCDRgdCw0L3RiyDQsNC30LDQudGL0L8g0LvQuNC80YTQvtGG0LjRgtGC0LXRgCDRgdCw0L3RiyDQutOp0LHQtdC50LXQtNGW0ZYu0JHRltGAINC20LDQsNGB0pvQsCDRgtC+0LvSk9Cw0L0g0LrQtdC30LTQtSAg0L7RgNGC0LDRiNCwINC10YHQtdC/0L/QtdC9INC90LXQudGC0YDQvtGL0YTQuNC70LTQtdGA0LTRltKjIDPQv9Cw0LnRi9C30pPQsCDQsNGA0YLRi9C/INC70LjQvNGE0L7RhtC40YLRgtC10YDQtNGW0qMgMyDQv9Cw0LnRi9C30pPQsCDQtNC10LnRltC9INGC06nQvNC10L3QtNC10L8g0L7RgtGL0YDSk9Cw0L3Ri9C9INCx0LDQudKb0LDRg9KT0LAg0LHQvtC70LDQtNGLLCDQttOZ0L3QtdC00LUg0L7QuyDQutOp0YDRgdC10YLQutGW0YjRgtC10YAgNSDQttCw0YHSm9CwINC60LXQu9Cz0LXQvdC00LUg0YLQtdKj0LXRgdC10YLRltC9INCx0L7Qu9GL0L8g0LrQtdC70LXQtNGWLtCQ0Lsg0L7QuyDQtdC60ZbQvdGI0ZbQu9GW0Log0YTQuNC30LjQvtC70L7Qs9C40Y/Qu9GL0psg0pvQuNGL0LvRi9GB0YPSk9CwINGB05nQudC60LXRgSDQutC10LvQtdGC0ZbQvSDQsdC+0LvRi9C/INGC0LDQsdGL0LvQsNC00Ys=</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41" table:style-name="ce1">
            <text:p>1066841</text:p>
          </table:table-cell>
          <table:table-cell office:value-type="string" table:style-name="ce1">
            <text:p>kazakh</text:p>
          </table:table-cell>
          <table:table-cell office:value-type="string" table:style-name="ce1">
            <text:p>Билет 34.&amp;lt;br /&amp;gt; 1.Жаңа туған және ерте жастағы балалардың пульсының ерекшелектері. Ол ерекшеліктер немен байланысты? &amp;lt;br /&amp;gt; 2. 5 күндік бала,күніңе жетіп туған.Туғандағы салмағы 3400 кг, бойы 52 см. Жағдайы қанағатты.Жалпы қан анализынде нейтрофиллдер 45%, лимфоциттер 45%. Неге нейтрофилдің және лимфоциттердің көрсеткіштері бірдей? &amp;lt;br /&amp;gt;</text:p>
          </table:table-cell>
          <table:table-cell office:value-type="string" table:style-name="ce1">
            <text:p>MS0g0YHSsdGA0LDSmyDQltCw0qPQsCDRgtGD0pPQsNC9INCx0LDQu9Cw0LvQsNGA0LTRi9KjINC/0YPQu9GM0YHRltC90ZbSoyDQtdGA0LXQutGI0LXQu9GW0LrRgtC10YDRltC90LUg0LrQtdC70LXRgtGW0L0g0LHQvtC70YHQsNKbINOp0YLQtSDRgtC10Lcg0LHQvtC70LDQtNGLLtCe0Lsg0LHQsNC70LDQu9Cw0YDQtNGL0qMg0YTQuNC30LjQvtC70L7Qs9C40Y/Qu9GL0rEg0LXRgNC10LrRiNC10LvRltC60YLQtdGA0ZbQvdC1INCx0LDQudC70LDQvdGL0YHRgtGLLiDQkdCw0LvQsNC70LDRgNC00Ysg0L7RgNCz0LDQvdC40LfRltC80ZYg0LTQsNC80YPRiyDRgtC10Lcg0LbSr9GA0LPQtdC90LTRltC60YLQtdC9LCDQvNC10YLQvtCx0L7Qu9C40LfQvNCz0LUg0LrQtdGA0LXQutGC0ZYg0LfQsNGC0YLQsNGAINC+0YLRgtC10LPRliDRgtCw0pPRiyDQsdCw0YHSm9CwINC30LDRgtGC0LDRgCDRgtC10Lcg0LbQtdGC0LrRltC30ZbQu9GD0ZYg0LrQtdGA0LXQui7QodC+0L3Ri9C80LXQvSDSm9Cw0YLQsNGAINOp0LrQv9C10L3RltKjINKb0YvQt9C80LXRgtGWINGC0L7Qu9GL0psg0LTQsNC80YvQvNCw0pPQsNC9INGB0L7SoyDQvtGC0YLQtdCz0ZYg0LrTqdC70LXQvNGWINCw0Lcg0LHQvtC70YPRiyDQvNKv0LzQutGW0L0u0KHQvtC7INGB0LXQsdC10L/RgtGWICDQttKv0YDQtdC60YLRltKjINGC0LXQtyDRgdC+0pPRg9GL0L3QsCDQsNC70YvQvyDQutC10LvQtdC00ZYg0LbTmdC90LUg0pvQsNC9INCw0LnQvdCw0LvRi9C8INC20L7Sk9Cw0YDQu9Cw0LnQtNGLLtCh0L7QtNCw0L0g0LHQsNC70LDQu9Cw0YDQtNGL0qMg0L/Rg9C70YzRgdGWINC10YDQtdGB0LXQutGC0LXRgNCz0LUg0pvQsNGA0LDSk9Cw0L3QtNCwINC20L7Sk9Cw0YDRiyDQsdC+0LvQsNC00Ysu0KHQvtC90YvQvNC10L0g0pvQsNGC0LDRgCDQsdCw0LvQsNGA0LTRi9KjINC20q/RgNC10LPRltC90ZbSoyDQutOp0LvQtdC80ZYg0LrRltGI0ZYg0LHQvtC70YvQvyDQutC10LvQtdC00ZYu0KHQvtC90LTRi9Kb0YLQsNC9INC20q/RgNC10Log0LDQtyDQutOp0LvQtdC80LTQtSDQsNC3INKb0LDQvSDQsNC50LTQsNC50LTRiy7QodC+0L3RiyDRgtC+0LvRi9Kb0YLRi9GA0YMg0q/RiNGW0L0g0LbSr9GA0LXQuiDRgtC10Lcg0YHQvtKT0LDQtNGLLtCV0YDQtdGB0LXQutGC0LXRgNC00LUgNjAtODAg0LzQuNC90YPRgtGL0L3QsCDRgdC+0pvSm9GLINCx0L7Qu9GB0LAsINC20LDSo9CwINGC0YPSk9Cw0L0g0LHQsNC70LDQu9Cw0YDQtNCwIC0xNDAg0LzQuNC90YPRgtGL0L3QsCAg0LHQvtC70YPRiyDQvdC+0YDQvNCwINCx0L7Qu9GL0L8g0YLQsNCx0YvQu9Cw0LTRiy7QkNC7IDEg0LbQsNGB0pvQsCDRgtC+0LvSk9Cw0L0g0LHQsNC70LDQu9Cw0YDQtNGLIDEzMC0xNDAg0LDRgNCw0LvRi9KT0YvQvdC00LAsIDUg0LbQsNGB0YLQsNKT0Ysg0LHQsNC70LDRgNC00LAgMTEwLTEyMCDQsdC+0LvRgdCwLCAxMCDQttCw0YHSm9CwINGC0L7Qu9KT0LDQvSDQsdCw0LvQsNC70LDRgNC00LAgODAtOTAg0LHQvtC70LDQtNGLLjIt0YHSsdGA0LDSmyDQkdCw0LvQsCDRgdCw0LvQvNCw0pPRiyDQttOZ0L3QtSDQsdC+0LnRiyDQsdC+0LnRi9C90YjQsCDQvdC+0YDQvNCw0LTQsCDRgtGD0YvQu9KT0LDQvS7QkNC7INC+0L3Ri9KjINKb0LDQvSDQsNC90LDQu9C40LfRltC90LUg0pvQsNGA0LDQudGC0YvQvSDQsdC+0LvRgdCw0psg0L3QtdC50YLRgNC+0YTQuNC70LTQtdGAINC205nQvdC1INC70LjQvNGE0L7RhtC40YLRgtC10YAgNDUg0L/QsNC50YvQt9C00Ysg0pvSsdGA0LDQvyDRgtKx0YDSk9Cw0L3Ri9C9INC606nRgNC10LzRltC3LtCR0rHQuyDQttCw0pPQtNCw0LnQtNGLICDQsdGW0YDRltC90YjRliDRhNC40LfQuNC+0LvQvtCz0LjRj9C70YvSmyDSm9C40YvQu9GL0YHRgyDQvdKv0LrRgtC10YHRliDQsdC+0LvQsNC00Ysu0J7Sk9Cw0L0g0YHQtdCx0LXQvyDQttCw0qPQsCDRgtGD0YvQu9KT0LDQvSAg0LHQsNC70LDQvdGL0qMg0YHQvtGA0YLSm9GLINC+0YDRgtCw0LTQsCDQsdC10LnRltC80LTQtdC70YPRiNGW0LvRltC6INCx0L7Qu9Cw0LTRiy7QndC10LPRltC30ZYgMS0yINC60q/QvdGW0L3QtNC1INC90LXQudGC0YDQvtGE0LjQu9C00LXRgCDRgdCw0L3RiyDQttC+0pPQsNGA0YssINC70LjQvNGE0L7RhtC40YLRgtC10YAg0YHQsNC90Ysg0YLTqdC80LXQvS4g0J3QtdC50YLRgNC+0YTQuNC70LTQtdGAKNKb0LDQsdGL0L3Rg9KT0LAg0pvQsNGA0YHRiyDQttCw0YHRg9GI0LDQu9Cw0YApINC+0LvQsNGAINC905nRgNC10YHRgtC10L3RltKjINCw0LvSk9Cw0YjSm9GLINC60q/QvdC00LXRgNGWIDcwINC/0LDQudGL0LfSk9CwINC20LXRgtGD0ZYg0LzSr9C80LrRltC9LtCh0L7QtNCw0L0gNSDQutKv0L0g0YPQsNKb0YvRgiDTqdGC0LrQtdC90LTQtSA0MC01MCDQv9Cw0LnRi9C3INGI0LDQvNCw0YHRi9C90LAg0YLTqdC80LXQvdC00LXQudC00ZYu0JHQsNC70LAg0LDQvdCw0LTQsNC9INC60LXQu9Cz0LXQvSDQsNC90YLQuNC00LXQvdC10LvQtdGAINCw0YDSm9GL0LvRiyDSm9C+0YDSk9Cw0L3QsNC00Ysu0JDQuyDQsdGW0YDQsNC3INGD0LDSm9GL0YLRgtCw0L0g0YHQvtKjINOp0LfRltC90LUg0YLTmdC9INC40LzRg9C90LTRi9KbINC20q/QudC1INGW0YHQutC1INKb0L7RgdGL0LvQsNC00YsuINCR0LDQu9Cw0LTQsCDQuNC80YPQvdC00YvSmyDRgNC10LDQutGG0LjRj9C70LDRgCDQv9Cw0LnQtNCwINCx0L7Qu9GL0L8sINC70LXQudC60L7RhtC40YLRgtC10YAg0YHQsNC90YvQvdGL0qMg0LDRgNGC0YPRi9C90LAg0LDQu9GL0L8g0LrQtdC70LXQtNGWINC205nQvdC1INC90LXQudGC0YDQvtGE0LjQu9C00LXRgCDQvNC10L0g0LvQuNC80YTQvtGG0LjRgtGC0LXRgCDQsNGA0LAg0pvQsNGC0YvQvdCw0YHRi9C90YvSoyDTqdC30LPQtdGA0ZbRgdGW0L3QtSDQsNC70YvQvyDQutC10LvQtdC00ZYu0JvQuNC80YTQvtGG0LjRgtGC0LXRgCAg0rHQt9Cw0psg0LzQtdGA0LfRltC80LTRliDQuNC80LzRg9C90LjRgtC10YLRgtGWINKb0LDQu9GL0L/RgtCw0YHRgtGL0YDQsNGC0YvQvSDQttCw0YHRg9GI0LDQu9Cw0YAg0LHQvtC70YvQv9C/INGC0LDQsdGL0LvQsNC00YssINC205nQvdC1INC+0LvQsNGA0LTRi9KjINGB0LDQvdGLINCw0YDRgtCw0LTRiy7QkdKx0Lsg0LHQsNC70LDQvdGL0qMg0LjQvNC80YPQvdC00YvSmyDQttKv0LnQtdGB0ZYg0L3QvtGA0LzQsNC00LAg0LXQutC10L3RltC9INC606nRgNGB0LXRgtC10LTRli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Ол ерекшеліктер немен байланысты? нақты сұраққа толық жауап жазылмаған. Анатомиялық-физиологиялық ерекшеліктер толық ескерілмеген</text:p>
          </table:table-cell>
          <table:table-cell office:value-type="float" office:value="0" table:style-name="ce1">
            <text:p>0</text:p>
          </table:table-cell>
          <table:table-cell table:number-columns-repeated="16376"/>
        </table:table-row>
        <table:table-row table:style-name="ro1">
          <table:table-cell office:value-type="float" office:value="1066857" table:style-name="ce1">
            <text:p>1066857</text:p>
          </table:table-cell>
          <table:table-cell office:value-type="string" table:style-name="ce1">
            <text:p>kazakh</text:p>
          </table:table-cell>
          <table:table-cell office:value-type="string" table:style-name="ce1">
            <text:p>Билет 34.&amp;lt;br /&amp;gt; 1.Жаңа туған және ерте жастағы балалардың пульсының ерекшелектері. Ол ерекшеліктер немен байланысты? &amp;lt;br /&amp;gt; 2. 5 күндік бала,күніңе жетіп туған.Туғандағы салмағы 3400 кг, бойы 52 см. Жағдайы қанағатты.Жалпы қан анализынде нейтрофиллдер 45%, лимфоциттер 45%. Неге нейтрофилдің және лимфоциттердің көрсеткіштері бірдей? &amp;lt;br /&amp;gt;</text:p>
          </table:table-cell>
          <table:table-cell office:value-type="string" table:style-name="ce1">
            <text:p>MS3QodKw0KDQkNKa0prQkCDQltCQ0KPQkNCfINCR0JXQoNCG0J8g06jQotCh0JXQnC4g0JXSoyDQsNC70LTRi9C80LXQvSDQsdGW0LfQtNC1LCDQttCw0qPQsCDRgtGD0pPQsNC9INC205nQvdC1INC10YDRgtC1ICDQttCw0YHRgtCw0pPRiyAg0LHQsNC70LvQsNGA0LTQsCDRgtCw0LzRi9GAINGB0L7Sk9GDINC20LjRltC70ZbQs9GW0L3RltKjINC10YDQtdC60YjQtdC70ZbQutGC0LXRgNGW0L0g0pvQsNGA0LDRgdGC0YvRgNGL0L8gINOp0YLQtdGC0LXRgtGW0L0g0LHQvtC70YHQsNC8LNC+0Lsg0L3QtdCz0ZbQt9GWINKb0LDQu9GL0L/RgtGL0YHRiyAg0LzQuNC90YPRgtGL0L3QsCAxMjAg0LTQsNC9IC0xNjAg0pvQsCDRgtC10qMg0LHQvtC70LDQtNGLICDQtNC10L8g0LDQudGC0LAgINCw0LvQsNC80YvQvS4g0JDQuyAxLdCx0ZbRgCAg0LbQsNGB0pvQsCDQtNC10LnRltC90LPRliDQvdOZ0YDQtdGB0YLQtdC70LXRgNC00LUgMTAwINC00LXQvSAtMTMw0pPQsCAg0LTQtdC50ZbQvdCz0ZYg0YjQsNC80LDQvdGLINKb0rHRgNCw0LnQtNGLLtOY0LnRgtGB0LUg0LTQtSwg0LzSsdC90YvSoyDQtdGA0LXRgdC10LrRgtC10YDQvNC10L0g0YHQsNC70YvRgdGC0LDRgNKT0LDQvdC00LDSk9GLINC10YDQtdC60YjQtdC70ZbQs9GW0L0g0LDQudGC0LDRgtGL0L0g0LHQvtC70YHQsNC8LNCx0rHQuyAg0LzQtdGC0LDQsdC+0LvQuNC30Lwg0LbRi9C70LTQsNC80LTRi9KT0YvQvdGL0qMg0LDQudGL0YDQvNCw0YjRi9C70YvSk9GL0L3QtNCwINCx0L7Qu9GL0L8g0LrQtdC70LXQtNGWLtOY0YHRltGA0LXRgdC1LNCx0rHQuyDQttKv0YDQtdC6INGB0L7Sk9GDINC20LjRltC70ZbQs9GW0L0g0LDRgNGC0YLRi9GA0LDQtNGLLiDQnNGL0YHQsNC70Ysg0LHQsNC70LDQu9Cw0YDQtNGL0qMg0YLRi9C90YEg0LDQu9GDINC20YvQu9C00LDQvNC00YvSk9GLINC00LAg0LbSr9GA0LXQuiDRgdC+0pPRgyDQttC40ZbQu9Cz0ZYg0LTQtSDTqdGC0LUg0YLQtdC3INCx0L7Qu9KT0LDQvdC00YvSm9GC0LDQvSwg0LzQtdGC0LDQsdC+0LvQuNC30Lws0LfQsNGCINCw0LvQvNCw0YHRgyzRgtGL0L3Ri9GBINCw0LvRgyDRiNGL0pPQsNGA0YPSk9CwINC00LAg05nRgdC10YAg0LXRgtGW0L8s0L3TmdGC0LjQttC10LTQtSDQttKv0YDQtdC6INGB0L7Sk9GDINC20LjRltC70ZbQs9GWINCw0YDRgtCwINGC0q/RgdC10YLRltC90L3RltC9INCx0LDQudKb0LDQudGC0YvQvSDQsdC+0LvQsNC00Ysg0LXQutC10L3QsdGW0Lcu05jRgNC80LXQvSDSm9Cw0YDQsNGC0LAgLNCx0rHQuyDQsdGW0YDQsNKbINCx0LDQu9CwINKx0LvSk9Cw0LnSk9Cw0L0g0YHQsNC50YvQvSAg0YLQsNC80YvRgCDRgdC+0pPRi9GB0Ysg0LHQsNGP0YPQu9Cw0LnQtNGLINC00LAg0LbTmdC90LUg0pvQsNC70YvQv9GC0Ysg0LDQtNCw0LzQvdGL0qMg0LjQvNC/0YPQu9GM0YHRltC90LUg0YLQtdKjINCx0L7Qu9Cw0LTRiy4g0KHQtdCx0LXQsdGWINC905nRgNC10YHRgtC1INOp0YHQtSDQutC10LvQtSDQvtGA0LPQsNC90LjQvNC30LwgLNGP0pPQvdC4INCw0pPQt9Cw0YHRiyDQtNCwINKb0LDQu9GL0L/RgtGLINC20LDSk9C00LDQudKT0LAg0YLSr9GB0LUg0LHQsNGB0YLQsNC50LTRiy7QldC90LTRliDQvtGB0Ysg0LDQudGC0pvQsNC90LTQsNGA0YvQvNC00Ysg0YLQvtC70YvSm9GC0YvRgNCwINC60LXRgtGDINKv0YjRltC9LCDQvNGL0L3QsCDQtNOZ0LvQtdC70LTQtdGA0LTRliDSm9C+0LvQtNCw0L3QsNC80YvQvS7QldKjINCw0LvQtNGL0LzQtdC9ICDQutC10LfQtdKj0LPQtSDQsdOp0LvRltC/INKb0LDRgNCw0YHRgtGL0YDRi9C/INC60LXRgtC50ZbQvS4g0J3TmdGA0LXRgdGC0LXQu9GW0Log0LrQtdC30LXSoyAg0YLQsNC80YvRgCDRgdC+0pPRgyDQttC40ZbQu9GW0LPRltC90qMgINKb0LDQu9GL0L/RgtGL0LTQsNKT0Ysg0LrTqdGA0YHQtdGC0LrRltGI0ZYgMTQwLTE2MCAg0YDQtdGCINC80LjQvdGD0YLRi9C90LAuINOY0YDRliDSm9Cw0YDQsNC5ICAxLdC20LDRgdKb0LAg0LTQtdC50ZbQvdCz0ZYg0LHQsNC70LDQu9Cw0YDQtNCwIDEwMNC00LXQvSAxMzDSk9CwINC00LXQudGW0L0g0LXQutC10L3RltC9INC00LUg0LDQudGC0LAg0LrQtdGC0YHQtdC6INCx0L7Qu9Cw0LTRiy4gINCh0L7QtNCw0L0g0LrQtdC50ZbQvSDQsdCw0YDRi9C/IDUt0LbQsNGBIDEwMCAg0LPQtSDQttC10YLRgtC10LTRliDQtNC1LDEwLdC20LDRgdGC0LAg0pvQsNC70YvQv9GC0YvSk9CwINGC0q/RgdGW0L8gODAtODUg0YDQtdGCINC80LjQvdGD0YLRi9C90LAsINCw0Lsg0L7QvSDQsdC10YEg0LbQsNGB0YLQsCAg0LXRgNC10YHQtdC60YLQtdGA0LzQtdC9INCx0ZbRgNC00LXQuSDQsdC+0LvQsNC00YsgPGJyIC8+DQoxNdC20LDRgSDRiNCw0LzQsNC80LXQvSA3MC03NSDRgNC10YIu0J7QudGL0LzQtNGLINOZ0YDRliDSm9Cw0YDQsNGC0LAg06nRgNCx0ZbRgtC10YLRltC9INCx0L7Qu9GB0LDQvCwg0LfQsNGCINCw0LvQvNCw0YHRg9C00YvSoyAg0LHQtdC70YHQtdC90LTRltC70ZbQs9GW0L3QtdC9INC205nQvdC1INC20q/RgNC10LrQutC1ICDRgdC40LzQv9Cw0YLQuNC60LDQu9GL0psg05nRgdC10YDQtNGW0qMgINCx0LDRgdGL0LzQtNGL0LvRi9KT0YvQvdGL0qMg05nRgdC10YDRltC90LXQvSAsINC90LXSk9Kx0YDQu9GL0Lwg0LHQsNC70LAg0LbQsNGB0Ysg0LrRltGI0ZYg0LHQvtC70YHQsCwg0YHQvtKT0rHRgNC70YvQvCAg0JbSr9GA0LXQutGC0ZbSoyDQttC40YvRgNGL0LvRgyDQttGL0LvQtNCw0LzQtNGL0pPRiyAg0LbQvtKT0LDRgNGL0LvQsNC5INGC0q/RgdC10LTRli4uINCW0LDRgdGL0L3QsCDRgdCw0Lkg0LbSr9GA0LXQutGC0ZbSoyDQttC40YvRgNGL0LvRgyDQttGL0LvQtNCw0LzQtNGL0pPRiyAg0YLTqdC80LXQvdC00LXRg9GW0L3RltKjINGB0LXQsdC10LHRltC9ICAgINC20q/RgNC10LrRgtC10LPRliDQvtGA0L3QsNC70LDRgdKb0LDQvSDQutCw0LzQtdGA0LDQu9Cw0YAg0LrTqdC70LXQvNGW0L3RltKjICAs0LbSr9GA0LXQutGC0ZbSoyDRgdC+0pPRgyAg0LrTqdC70LXQvNGW0L3RltKjINKx0LTSk9Cw0Y7Ri9C90LAgINC205nQvdC1ICDQtNC1ICDQvtC90YvQvNC10L0g0pvQvtGB0LAgLNCy0LXQs9C10YLQsNGC0LjQstGC0ZYg0L3QtdGA0LIg0LbSr9C50LXRgdGW0L3RltKjICDQv9Cw0YDQsNGB0LjQvNC/0LDRgtC40LrQsNC70YvSmyDQsdOp0LvRltCz0ZbQvdGW0qMgINC20q/RgNC10Log0pvRi9C30LzQtdGC0ZbQvdC1INOZ0YHQtdGA0ZbQvdGW0qMg0LrSr9GI0LXRjtGW0L3QtSDQsdCw0LnQu9Cw0L3QsNGB0YLRiyDQsdC+0LvRi9C/INGC0LDQsdGL0LvQsNC00YsuINCW0q/RgNC10LrRgtGW0qMg0LbQuNGL0YDRi9C70YMg0LbRi9C70LTQsNC80LTRi9KT0YsgINCx0LDQu9Cw0LvQsNGA0LTQsCDTqdGC0LUg0pvSsdCx0YvQu9C80LDQu9GLINC/0YDQvtGG0LXRgSDQtNC10L8g0YLQtSDQsNC50YLRgdCw0psg0LHQvtC70LDQtNGLLCDQtNC10L3QtSDSm9Cw0LvQv9GLINOp0LfQs9C10YDRg9GW0L3QtSDQtNC1LCDQsNC50pvQsNC5INC60LXQt9GW0L3QtNC1ICA8YnIgLz4NCiDRj9KT0L3QuCDRgdGL0YDRgtKb0Ysg0YTQsNC60YLQvtGAINOZ0YHQtdGA0ZbQvdC10L0g0LzQsNC30LDRgdGL0LfQtNCw0L3RgyDQtNC10L8g0LDQudGC0YHQsNKbINGC0LAg0LHQvtC70LDQtNGLINC20YvQu9Cw0YPRi9C90YvSoyDRgdCw0LvQtNCw0YDRiyzQtNC10L3QtSAg0YLQtdC80L/QtdGA0LDRgtGD0LDRgdGL0L3QvdGL0qMg0pvSsdCx0YvQu9C80LDQu9GLINOp0LfQs9C10YDRltGB0ZbQvSDRj9KT0L3QuCDQsdCw0LvQtNCwINGC0LXRgNC80L7RgNC10YLRgtC10LvRgyDQvtGA0YLQsNC70pPRiyDQttCw0pvRgdGLINC00LDQvNGL0LzQsNKT0LDQvdC00YvSm9GC0LDQvSDQvtC70LDRgCDRgtC10Lcg0YvRgdGL0L8g0L3QtdC80LXRgdC1INGC0LXQtyDRgdGD0YvSmyDRgtCw0YDRgtCw0LTRiywg0LHQsNGB0pvQsCDRhNCw0LrRgtC+0YDQu9Cw0YDQtNCw0L0g0LTQsCDQsdC+0LvRg9GLINC80q/QvNC60ZbQvSDQtdC60LXQvdGW0L0g0LTQtSDRgtC+0L/RiNCw0LvQsNC/INCw0LnRgtGB0LDSmyDQsdC+0LvQsNC00YsuICDSmtC+0YDRgtGL0L3QtNGL0LvQsNC5INC60LXQu9C1LCDQvtC50YvQvNC00Ysg0LbQuNC90LDSm9GC0LDQuSDQvtGC0YvRgNCwICzQttCw0YPQsNCx0YvQvNC00Ysg0YLQvtC70YvSm9GC0YvRgNGB0LDQvCwg0LHQsNC70LDQu9Cw0YDSk9CwICAg0YLRi9C90YvRgdGC0YvSmyDQsNGA0LjRgtC80LjRjyDRgtOZ0L0g0LXQutC90ZbQvSDQvtGB0YvQtNCw0L0g0LDSmyDQsdCw0LnSm9Cw0YPSk9CwINCx0L7Qu9Cw0LTRiy4g05jRgCDQttCw0YHRgtCw0pPRiyDQsdCw0LvQsNC70LDRgNCw0LTQsCAg0LbSr9GA0LXQuiDQttC40ZbQu9GW0LPRliDTmdGA0YLSr9GA0LvRli4g0KHQvtC00LDQvSDQutC10LnRltC9INC20q/RgNC10Log0YLQvtC90LTQsNGA0YvQvdGL0qMgICDQtdGA0LXQutGI0LXQu9GW0LrRgtC10YDRlizRgtGL0L3RgdGC0YvSoyDTqdC30LPQtdGA0ZbRgdGC0LXRgNGWINC00LUg0L7RgdGLINC20q/RgNC10Log0YHQvtKT0YMg0LbQuNGW0LvRltCz0ZbQvNC10L0g0LHQsNC50LvQsNC90YvRgdGC0Ysg0LTQtdC/INCw0LnRgtGB0LDQvCDQtNCwINCx0L7Qu9Cw0LTRiy4gICAgICAgICAgICAgICAgICAgICAgICAgICAgICAgICAgICAgICAgICAgICAgICAgICAgICAgICAgICAgICAgIDxiciAvPg0KPGJyIC8+DQogIDIt0KHSsNCg0JDSmtKa0JAg0JbQkNCj0JDQnyAgINCQ0Lsg0LzQtdC9INC20LDRg9Cw0L8g0LHQtdGA0ZbQvyDTqdGC0LXRgtGW0L0g0LHQvtC70YHQsNC8LCDQttCw0qPQsCDRgtGD0YvQu9KT0LDQvSDQvdOZ0YDQtdGB0YLQtdC70LXRgNC00LUgINC90LXQudGC0YDQvtGE0LjQu9GM0LTQtdGAINC80LXQvSDQu9C40LzRhNC+0YbQuNGC0YLQtdGAINKb0LDQvSDQutOp0YDRgdC10YLQutGW0YjRliDQsdGW0YDQtNC10Lks06nQudGC0LrQtdC90ZYgINC905nRgNC10YHRgtC10LvQtdGA0LTQtSAg0LjQvNC80YPQvdC00YvSmyDQttKv0LnQtSDTmdC70ZbQtNC1ICDQtNCw0LzRgyDQv9GA0L7RhtC10YHRltC90LTQtSDQtNC10L8g0LDQudGC0YPSk9CwINCx0L7Qu9Cw0LTRiy4g0KLRg9GL0LvSk9Cw0L0g0LrQtdC30LTQtSDQvdOZ0YDQtdGB0YLQtSDQsNC90LDQtNCw0L0g0LjQvNGD0L3QuNGC0LXRgiDQsNC70LDQtNGLLNCx0ZbRgNCw0pvRgtCwINCx0rHQuyAg0YPQsNKb0YvRgiDTqdGC0LUgINC60LXQu9C1INCx0rHQuyDQsNC30LDRj9C00YsuICDQldC90LTRltCz0ZYg0L7RgdGLINKb0LDQvSDQttCw0YHRg9C70LDRgNC90YvSoyDSm9GL0LfQvNC10YLRliDQttCw0LnQu9GLINCw0LnRgtGL0L8g0LrQtdGC0YHQtdC8LtCd0JXQudGC0YDQvtGE0LjQu9GM0LTQtdGAINCx0LDQutGC0LXRgNC40Y/Qu9GL0psgINC40L3RhNC60YbQuNGP0LvQsNGA0pPQsCDSm9Cw0YDRgdGLICDSm9C+0YDSk9Cw0L3Ri9GB0YLRi9KjICAg0LHRltGA0L3RiNGWINC20LXQu9GW0YHRliDQsdC+0LvRi9C/INGC0LDQsdGL0LvQsNC00YsuICDQntC90YvQvNC10L0g0pvQvtGB0LAg0LDQuyDQu9C40LzRhNC+0YbQuNGC0YLQtdGAICDQstC40YDRg9GB0YLRi9KbINC40L3RhNC10LrRhtC40Y/Sk9CwINKb0LDRgNGB0YsgINC00LXQvdC10L3RltKjINC40LzQvNGD0L3QtNGL0psg0LbQsNGD0LDQsdGL0L3QsCDSm9Cw0YLRi9GB0LDQtNGLLiDTqNC80ZbRgNC90ZbSoyDQsNC70pPQsNGI0pvRiyAg0LrQtdC30LXSo9GW0L3QtNC1ICAg0L3QtdC50YLRgNC+0YTQuNC70YzQtNC10YAg0LzQtdC9INC70LjQvNGE0L7RhtC40YLQtdGAINGB0LDQvdGLICDQvdOZ0YDQtdGB0YLQtdC90ZbSoyDRgdGL0YDRgtKb0Ysg0L7RgNGC0LDSk9CwINCx0LXQudGW0LzQtNC10LvRltC/INCx0LDRgdGC0LDSk9Cw0L3QtNCwINGI0LDQvNCw0LzQsNC9INCx0ZbRgNC00LXQuSDQtNC10qPQs9C10LnQs9C1INC20LXRgtC10LTRli4g0KLRg9KT0LDQvSDQutC10LfQtNC1INC70LXQudC60L7RhtC40YLQtdGAINGB0LDQvdGLIDgsNSDQttOZ0L3QtSAyNSoxMDkgL9C7LCDQsNGA0LDQu9GL0pPRi9C90LTQsCDQsNGD0YvRgtKb0LjQtNGLLiAg0KPQsNKb0YvRgiDQutOp0L8g06nRgtC/0LXQuSAs0YHQvtC00LDQvSDQutC10LnRltC9INGC0LXQtyAg0YLTqdC80LXQvdC00LXQvywgMTXRiNGWIC0g0LrSr9C90LPQtSDSm9Cw0YDQsNC5IDktMTQqMTA5L9C70LjRgtGA0LTRliDSm9Kx0YDQsNC50LTRiy7QndC10LnRgtGA0L7RhNC40LvQtNC10YAg0YHQsNC90YsgINOp0LzRltGA0ZbQvdGW0qMgINCw0LvSk9Cw0YjSm9GLINC60LXQt9GW0L3QtNC1ICDQu9C40LzRhNC+0YbQuNGC0YLQtdGAINGB0LDQvdGL0L3QsNC9INCx0LDRgdGL0Lwg0LrQtdC70LXQtNGWLiAg0JTQtdGB0LXQuiDRgtC1INCw0LvSk9Cw0YjSm9GLIDMg0LrSr9C90LTQtSAg0pvQsNC9INGE0L7RgNC80YPQu9Cw0YHRi9C90LTQsCAg0LbQsNGBINC20LDRgdGD0YjQsNC70LDRgCDQsdC+0LvRg9GLINC00LAgINGL0pvRgtC40LzQsNC7LiAgINCd05nRgNC10YHRgtC10LvQtdGA0LTQtSDTqdC80ZbRgNGW0L3RltKjINCw0LvSk9Cw0YjSm9GLINC60LXQt9GW0L3QtNC1ICDRhNC40LfQuNC+0LvQvtCz0LjRj9C70YvSmyDQvdC10LnRgtGA0L7RhNC40LvQtdC3ICDQsdCw0LnSm9Cw0LvQsNC00YsuINCd0LXQudGC0YDQvtGE0LjQu9GM0LTQtdGAINGB0LDQvdGLIDYwLTcwINC/0LDQudGL0LcsINC70LjQvNGE0L7RhtC40YLRgtC10YAgMjAtMzAg0L/QsNC50YvQtywgINCR0LDQu9CwINGC0YPSk9Cw0L3QvdC90LDQvSDQutC10LnRltC9INC70LXQudC60L7RhtC40YLQsNGA0LvRiyDRhNC+0YDQuNC80YPQu9Cw0YHRiyDQtdC70LXQu9GD0LvRliDTqdC30LPQtdGA0ZbRgdC60LUg0rHRiNGL0YDQsNC50LTRiyzQvdC10LnRgtGA0L7RhNC40LvRjNC00LXRgCDRgdCw0L3RiyDQsNC30LDRj9C00Yss0LvQuNC80YTQvtGG0LjRgtGC0LXRgCDQutC10YDRltGB0ZbQvdGI0LUg0LrTqdCx0LXQudC10LTRliwg0YHQvtC00LDQvSDQutC10LnRltC9INCx0LDRgNGL0L8g06nQvNGW0YDRltC90ZbSoyA0LTYg0LrSr9C90ZbQvdC00LUgINCx0ZbRgNGW0L3RiNGWINKb0LjRi9C70YvRgSDQtNC10L8g0LDRgtCw0LvQsNGC0YvQvSAg0L7Qu9Cw0YDQtNGL0qMg0YHQsNC90Ysg0YLQtdKj0LXRgdGD0ZYg0LHQsNC50pvQsNC70LDQtNGLLiDQndOZ0YDQtdGB0YLQtdC70LXRgNC00ZbSoyDQu9C10LnQutC+0YbQuNGC0YDQsNC70YvSmyAg0YTQvtGA0LzRg9C70LDRgdGL0L3Ri9KjINGB0LDQvdGL0L3QvdGL0qMg0pvSsdGA0YvQu9GL0YHRiyDQtdGA0LXQutGI0LUg0LHQvtC70YvQvyDQutC10LvQtdC00ZYu0JzQtdC9INC+0LnRi9C80LAg0YLQsNKT0Ysg0YLQvtC70YvSm9GC0YvRgNGDINKb0L7RgdGL0L8g06nRgtGB0LXQvCwg0LvQtdC50LrQvtGG0LjRgtGC0LXRgNC00ZbSoyDQttCw0LvQv9GLINGB0LDQvdGLINCw0YPRi9GC0pvRg9GLICDQtNC40LDQv9Cw0LfQvtC90YsgICzTqdC80ZbRgNC90ZbSoyDQsdGW0YDQvdGW0YjRliDQutKv0L3QtNC10YDRliAxMC0zMCoxMNC7LCDTqdC80ZbRgNGW0L3RltKjINC10LrRltC90YjRliDQsNC/0YLQsNGB0YvQvdC00LAgMTAtMTIqMTAtMTAtOSDQuyAsINCi0YPSk9Cw0L3QvdC90LDQvSDQv9Cw0LnQtNCwINCx0L7Qu9KT0LDQvSDQvdC10LnRgtGA0L7RhNC40LvQtdC3ICDQu9C10LnQutC+0YbQuNGC0LDRgNC70YvSmyDRhNC+0YDQvNGD0LvQsNC90YvSoyDRgdC+0LvSk9CwINC00LXQudGW0L0g0YvSk9GL0YHRg9GLICDQttGL0LvQtNCw0Lwg0YLTqdC80LXQvdC00LXQuSDQsdCw0YHRgtCw0LnQtNGLLCDQsNC7INC70LjQvNGE0L7RhtC40YLRgtC10YDQtNGW0qMg0YHQsNC90Ysg0LrTqdCx0LXQudC10LTRli7TqNC80ZbRgNGW0L3RltKjIDUtNiDQutKv0L3RltC90LTQtSAg0L3QtdC50YLRgNC+0YTQuNC70YzQtNC10YAg0LzQtdC9INC70LjQvNGE0L7RhtC40YLRgtGC0LXRgCDRgdCw0L3RiyDRgtC10qPQtdGB0ZbQvywgNDAtNDUg0L/QsNC50YvQt9C00Ysg0pvSsdGA0LDQudC00YsuICDQkdKx0Lsg0YLQtdC+0YDQuNGP0LvRi9KbINGC0rHRgNKT0YvQtNCwICDQsNC70pPQsNGI0pvRiyDRhNC40LfQuNC+0LvQvtCz0LjRj9C70YvSmyDSm9C40YvQu9GL0YEg0LTQtdC/INCw0YLQsNC70LDQtNGLLiDQntGB0Ysg0YPQsNKb0YvRgtGC0LDQvSDQsdCw0YHRgtCw0L8gINC70LjQvNGE0L7RhtC40YLRgtC10YAg0YHQsNC90YsgNTAtNjAg0L/QsNC50YvQt9KT0LAg0YLQtdKjINCx0L7Qu9Cw0LTRiy4gINCR0LDQu9CwINC00LDQvNGL0L8s06nRgdC1INC60LXQu9C1IDUg0LbQsNGB0pvQsCDQtNC10LnRltC9INKb0LDQu9GL0L/RgtGLINC606nRgNGB0LXRgtC60ZbRiCDQsdC+0LvRi9C/INGC0LDQsdGL0LvQsNC00YsuINKu0Ygg0LDQudKT0LAg0pvQsNGA0LDQuSAg0L3QtdC50YLRgNC+0YTQuNC70YzQtNC10YAg0YHQsNC90YsgMTYtNDYg0L/QsNC50YvQt9KT0LAg0LTQtdC50ZbQvSAg0LDQt9Cw0Y/QtNGLLCDQsNC7INC70LjQvNGE0L7RhtC40YLRgtC10YAgNDItNDcg0L/QsNC50YvQt9KT0LAg0LTQtdC50ZbQvSAg06nRgdC10LTRli4gNC01INC20LDRgdKb0LAg0LTQtdC50ZbQvdCz0ZYgINCx0LDQu9Cw0LvQsNGA0LTQsCDQuNC80LzQvNGD0L3QtNGL0psgINC20q/QudC10L3RltKjINKb0LDQu9GL0L/RgtCw0YHRg9GL0L3QsCAg0LHQsNC50LvQsNC90YvRgdGC0YsgINC70LjQvNGE0L7RhtC40YLQvtC3INCx0LDQudKb0LDQu9Cw0LTRiy4gINCh0L7QtNCw0L0g0LrQtdC50ZbQvSDQsdCw0YDRi9C/LCDQvdC10LnRgtGA0L7RhNC40LvRjNC00LXRgCDRgdCw0L3RiyDSsdC70pPQsNGPINCx0LDRgdGC0LDQudC00YssINCw0Lsg0LvQuNC80YTQvtGG0LjRgtGC0LXRgCDRgtOp0LzQtdC90LTQtdC50LTRliDQttOZ0L3QtSA1LTYgINC20LDRgdGL0L3QtNCwINC10LrRltC90YjRliDSm9C40YvQu9GL0YEgINCx0LDQudKb0LDQu9Cw0LTRiy4gINCc0ZbQvdC1INC+0YHRiyDQutC10LfQtNC1LCDQttCw0YHRg9GI0LDQu9Cw0YAg0YHQsNC90Ysg0pvQsNC50YLQsNC00LDQvSDRgtC10qPQtdGB0YLRltGA0ZbQu9C10LTRli4gMTItMTQg0LbQsNGB0pvQsCDSm9Cw0YDQsNC5LCAg0LHQsNC70LDQu9Cw0YDQtNGL0qMg0LvQtdC50LrQvtGG0LjRgtCw0YDQu9GL0psg0YTQvtGA0LzRg9C70LDRgdGLICDQtdGA0LXRgdC10LrRgtC10YDQs9C1INKx0pvRgdCw0YEg0LHQvtC70YvQvyDQutC10LvQtdC00ZYuINKa0L7RgNGC0YvQvdC00YvQu9Cw0Lkg0LrQtdC70LUg0LbQsNKj0LAg0YLRg9KT0LDQvSDQvdOZ0YDQtdGB0YLQtdC90ZbSoyDQvdC10YLRgNC+0YTQuNC70YzQtNC10YAg0LzQtdC9INC70LXQudC60L7RhtC40YLRgtC10YAg0LrTqdGA0YHQtdGC0LrRltGI0YLQtdGA0ZYg0YPQsNKb0YvRgtGI0LAg0pPQsNC90LAgINGC0LXSoyDQutOp0YDRgdC10YLQutGW0YjQutC1INC40LUg0LXQutC10L3RltC9INCw0LnRgtKb0YvQvCDQutC10LvQtdC00ZYuINCW0LDSo9CwINGC0YPSk9Cw0L0g0L3TmdGA0LXRgdGC0LXQtNC1INGD0LDSm9GL0YLRiNCwINGP0pPQvdC4INGE0LjQt9C40L7Qu9Cz0LjRj9C70YvSmyDRgdCw0YDSk9Cw0Y4s0YHQsNC70LzQsNKbINGC0LDRgdGC0LDRgywg0pvQsNC9INC606nRgNGB0LXRgtC60ZbRiNGC0LXRgNGW0L0g0LTQtSDQsNGC0LDQvyDTqdGC0YPQs9C1INCx0L7Qu9Cw0LTRiy4g0KDQsNGF0LzQtdGCL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1-ші сұрақтың жауабы толық емес, қайталанып жазыла берілген. Анатомо-физиологиялық ерекшеліктері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929" table:style-name="ce1">
            <text:p>1066929</text:p>
          </table:table-cell>
          <table:table-cell office:value-type="string" table:style-name="ce1">
            <text:p>kazakh</text:p>
          </table:table-cell>
          <table:table-cell office:value-type="string" table:style-name="ce1">
            <text:p>Билет 34.&amp;lt;br /&amp;gt; 1.Жаңа туған және ерте жастағы балалардың пульсының ерекшелектері. Ол ерекшеліктер немен байланысты? &amp;lt;br /&amp;gt; 2. 5 күндік бала,күніңе жетіп туған.Туғандағы салмағы 3400 кг, бойы 52 см. Жағдайы қанағатты.Жалпы қан анализынде нейтрофиллдер 45%, лимфоциттер 45%. Неге нейтрофилдің және лимфоциттердің көрсеткіштері бірдей? &amp;lt;br /&amp;gt;</text:p>
          </table:table-cell>
          <table:table-cell office:value-type="string" table:style-name="ce1">
            <text:p>MSnQltCw0qPQsCDRgtGD0pPQsNC9IDE0MC0xNjAsIDEg0LbQsNGB0YLQsNKT0YsgMTIwLCA1INC20LDRgdGC0LDSk9GLIDEwMC4g0KfQodChINC20L7Sk9Cw0YDRiyDQsdC+0LvRgdCwLCDQsdCw0LvQsNC90YvQvSDQttCw0YHRi9C00LAg0LrRltGI0ZYg0LHQvtC70LDQtNGLLiDQkdGW0LvQsNC5INCw0LnRgtKb0LDQvdGL0LzRi9C9INGB05nQsdC10LnQu9C10YDQtNC1INC/0YPQu9GM0YEg0LbQvtKT0LDRgNGLINCx0L7Qu9Cw0LTRiywg06nRgdC1INC60LXQu9C1INC/0YPQu9GM0YEg0LXRgNC10YHQtdC6INCw0LTQsNC80LTQsNC5INCx0L7Qu9Cw0LTRiy4g0KHQtdCx0LXQsdGWINC20LDSo9CwINGB05nQsdC10LnQu9C10YDQtNC1INC30LDRgiDQsNC70LzQsNGB0YMg0LbTmdC90LUg0L4g0LzQtdC9INKb0L7RgdCwINGB0LjQvNC/0LDRgtC40LrQsNC70YvSmyDQttKv0LnQtSDQttKv0LnQtdGB0ZYg0LbSr9GA0LXQutC60LUg05nRgdC10YAg0LHQtdGA0LXQtNGWLiDTqNGB0LUg0LrQtdC70LUg0LHQsNC70LDQu9Cw0YDQtNCwINC20q/RgNC10LrRiNC1INKv0LvQutC10LnQs9C10L3QtNC1INC205nQvdC1INCf0LDRgNCw0YHQuNC80L/QsNGC0LjQutCw0LvRi9KbINC20q/QudC60LUg0LbSr9C50LXRgdGWINKb0L7RgdGL0LvQsNKT0LDQvSDRgdCw0LnRi9C9INCn0KHQoSDRgtOp0LzQtdC90LTQtdC5INCx0LDRgdGC0LDQudC00YsuINCR0LvQsNC70LDRgNC00LAg0LTQtdC90LUg0LHRltGC0ZbQvNGWLCDQtNCw0YPRi9GB0Ysg0YjRi9KT0LAg0LrQu9C1ICwg0LbSr9GA0LXQutC60LUg0LrSr9GIINCw0LfRi9GA0LDSmyDRgtKv0YHQtSDQsdCw0YHRgtCw0LnQtNGLLiDQniDQvNC10L0g0pvQvtGB0LAg0LHQsNGB0pvQsNC00LAg0YTQsNGC0L7RgNC70LDRgCDTmdGB0LXRgCDQsdC10YDQtdC00ZYuINCR0LDQu9Cw0LvQsNGA0LTQsCDQutOp0LHRltC90LXRgdC1INC00YvRhdCw0YLQtdC70YzQvdCw0Y8g0LDRgNC40YLQvNC40Y8g0LrQtdC30LTQtdGB0YMg0LzSr9C80LrRltC9LCDQvtC7INC00LXQvCDQsNC70pPQsNC90LTQsCDQp9Ch0KEg0LrTqdGC0LXRgNGW0LvQtdC00ZYsINC00LXQvCDRiNGL0pPQsNGA0pPQsNC90LTQsCDRgtKv0YHQtdC00ZYuIDE1INC20LDRgdGC0LDSk9GLINCx0LDQu9Cw0LvQsNGA0LTQsCDQvtC7INGB0LjRgNC10Log0LrQtdC30LTQtdGB0LXQtNGWLjxiciAvPg0KMinQm9C10LnQutC+0YbQuNGC0LDRgNC90LDRjyDRhNC+0YDQvNGD0LvQtNCwINCx0LDRgdGC0LDQv9Kb0Ysg0LrSr9C90LTQtdGA0ZYg0LHQsNC70LDQu9Cw0YDQtNCwINC90LXQudGC0YDQvtGE0LjQu9GM0LTRliDQu9C10LnQutC+0YbQuNGC0L7QtyDQsdCw0LnSm9Cw0LvQsNC00Ysg0YHQviDRgdC00LjQstC40LPQvtC8INCy0LvQtdCy0L4uINCh0LDQvdGLINC90LXQudGC0YDQvtGE0LjQu9C00LXRgNC00ZbSoyA2NS02NiDQv9Cw0LnRi9C30LTRiyDSm9Kx0YDQsNC50LTRiywg0YLQvtCz0LTQsCDQutCw0Log0LvQuNC80YTQvtGG0LjRgtGLIDE2LTM0INC/0YDQvtGG0LXQvdGC0LAuINCd0LjRgtGA0L7RhNC40LvQtdC3INGB0L4g0YHQtNCy0LjQs9C+0Lwg0LLQu9C10LLQviwg0YHTmdCx0Lgg0YLRg9KT0LDQvSDQutC10LfQtNC1INCx0LDQudKb0LDQu9Cw0LTRiywg0YHQvtC00LDQvSDRgtOp0LzQtdC90LTQtdC5INCx0LDRgdGC0LDQudC00YssINCw0Lsg0LvQuNGE0L7RhtC40YLQtdGAINC20L7Sk9GL0YDQu9Cw0Lkg0LHQsNGB0YLQsNC50LTRiy4g0JDQuyA1LTYg0LrSr9C90LTQtdGA0LPQtSDSm9Cw0YDQsNC5INC+0LvQsNGAINGB0LDQvdGLINGC0LXQvdC10YHQtSDQsdCw0YHRgtCw0LnQtNGLIDQwLTQ1INC/0LDQudGL0LfSk9CwINC00LXQudGW0L0uINCe0Lsg0LHQsNC70LDQvdGL0L0g0LHRltGA0ZbQvdGI0ZYg0YTQuNC30LjQvtC70L7Qs9C40Y/Qu9GL0psg0L/QtdGA0LXQutGA0LXRgdGCINCx0L7Qu9GL0L8g0YHQsNC90LDQu9Cw0LTRiy4g05jRgNGWINKb0LDRgNCw0Lkg0L3QtdC50YLRgNC+0YTQuNC70YzQtNC10YDQtNGW0L0g0YHQsNC90Ysg0YLTqdC80LXQvdC00LXQuSwg0LDQuyDQu9C40YTQvtGG0LjRgtGC0LXRgCDQutOp0LHQudC1INC60LXQu9C10LTRli41INC20LDRgdKb0LAg0LTQtdC50ZbQvSDRhNC40LfQuNC+0LvQvtCz0LjRj9C70YvSmyDQu9C40YTQvtC30LjRgtC+0Lcg0L3QvtGA0LzQsCDQsdC+0LvRi9C/INC10YHQtdC/0YLQtdC70LXQtNGWLiA0LTUg0LbQsNGB0YLQsCDQvdC10LnRgtGA0L7RhNC40LvRjNC00LXRgCDQutOp0LHQtdGW0L8sINC70LjRhNC+0YbQuNGC0LXRgCDRgtOp0YHQtdC00ZYuIDUg0LbTmdC90LUgNiDQttCw0YHRgtCwINC90LXQudGC0YDQvtGE0LjQu9C00LXRgCDQvNC10L0g0LvQuNGE0L7RhtC40YLRgtC10YAg0pvQsNC50YLQsNC00LDQvSDRgtC10L3QtdGB0LXQtNGWLCDQvtC7INC10LrRltC90YjRliDRhNC40LfQuNC+0LvQvtCz0LjRj9C70YvSmyDQv9C10YDQtdC60YDQtdGB0YIg0LHQvtC70LDQtNGLLiAxMi0xNCDQttCw0YHRgtCwINC+0YHRiyDQvdC10LnRgtGA0L7RhNC40LvRjNC00LXRgCDQvNC10L0g0LvQuNC80YTQvtGG0LjRgtGC0LXRgCwg0LXRgNC10YHQtdC6INCw0LTQsNC8INC00LXSo9Cz0LXQudC00LUg0LHQvtC70LDQtNGLLg==</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1-ші сұрақтың 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1067066" table:style-name="ce1">
            <text:p>1067066</text:p>
          </table:table-cell>
          <table:table-cell office:value-type="string" table:style-name="ce1">
            <text:p>kazakh</text:p>
          </table:table-cell>
          <table:table-cell office:value-type="string" table:style-name="ce1">
            <text:p>Билет 34.&amp;lt;br /&amp;gt; 1.Жаңа туған және ерте жастағы балалардың пульсының ерекшелектері. Ол ерекшеліктер немен байланысты? &amp;lt;br /&amp;gt; 2. 5 күндік бала,күніңе жетіп туған.Туғандағы салмағы 3400 кг, бойы 52 см. Жағдайы қанағатты.Жалпы қан анализынде нейтрофиллдер 45%, лимфоциттер 45%. Неге нейтрофилдің және лимфоциттердің көрсеткіштері бірдей? &amp;lt;br /&amp;gt;</text:p>
          </table:table-cell>
          <table:table-cell office:value-type="string" table:style-name="ce1">
            <text:p>MS3RgdKx0YDQsNKbLtCW0LDSo9CwINGC0YPSk9Cw0L0g0LHQsNC70LDQu9Cw0YDQtNGL0qMg0L/Rg9C70YzRgdGLINC10YDRgtC1INC20LDRgdGC0LDSk9GLINCx0LDQu9Cw0LvQsNGA0LTRi9KjINC/0YPQu9GM0YHRi9C90LDQvSDQtdGA0LXQutGI0LXQu9C10L3QtdC00ZYu0JbQsNKj0LAg0YLRg9KT0LDQvSDQsdCw0LvQsNC70LDRgNC00YvSoyDQttKv0YDQtdC60YLRltKjINC20LjRi9GA0YvQu9GDINC20LjRltC70ZbQs9GWINKb0LDQu9GL0L/RgtGL0LTQsCAxMjAtMTYwINGB0L7Sm9Kb0Ysg0LzQuNC90YPRgtGL0L3QsCDSm9Kx0YDQsNC50LTRiyzQsdKx0Lsg0LrTqdGA0YHQtdGC0LrRltGIINGC0YPRi9C70pPQsNC9INGB05nRgtGC0LXQvSDQsdCw0YHRgtCw0L8g0LHRltGAINCw0LnSk9CwINC00LXQudGW0L3Qs9GWINCx0LDQu9Cw0LvQsNGA0LTRi9KjINKb0LDQu9GL0L/RgtGLINC606nRgNGB0LXRgtC60ZbRiNGWINCx0L7Qu9GL0L8g0YHQsNC90LDQu9Cw0LTRiy7QkdGW0YAg0LDQudC70YvSmyDQsdCw0LvQsCDQttOZ0L3QtSDQsdGW0YAg0LbQsNGB0pvQsCDRgtC+0LvSk9Cw0L0g0LHQsNC70LDQu9Cw0YDQtNGL0qMg0LbSr9GA0LXQutGC0ZbSoyDQttC40YvRgNGL0LvRgyDQttC40ZbQu9GW0LPRliDRiNCw0LzQsNC80LXQvSAxMTAtMTUwINGB0L7Sm9Kb0YvQvdGLINKb0rHRgNCw0LnQtNGLLtCW0LDRgdOp0YHQv9GW0YDRltC80LTQtdGAINC80LXQvSDQtdGA0LXRgdC10Log0LDQtNCw0LzQtNCw0YDQtNGL0qMg0LbSr9GA0LXQutGC0ZbSoyDQttC40YvRgNGL0LvRgyDQttC40ZbQu9GW0LPRliDSm9Cw0LvRi9C/0YLRiyDQttCw0pPQtNCw0LnQtNCwIDYwLTEwMCDRgdC+0pvSm9GLINC80LjQvdGD0YLRi9C90LAg0LHQvtC70YvQvyDQtdGB0LXQv9GC0LXQu9GW0L3QtdC00ZYu0JbQsNKj0LAg0YLRg9KT0LDQvSDQvdOZ0YDQtdGB0YLQtdC70LXRgNC00ZbSoyDQv9GD0LvRjNGB0Ysg0LXRgNGC0LUg0LbQsNGB0YLQsNKT0Ysg0LHQsNC70LDQu9Cw0YDQtNGL0qMg0L/Rg9C70YzRgdGL0L3QsCDSm9Cw0YDQsNKT0LDQvdC00LAg0LbQvtKT0LDRgNGLINCx0L7Qu9Cw0LTRiy7QodC10LHQtdCx0ZYs0LbQsNKj0LAg0YLRg9KT0LDQvSDQvdOZ0YDQtdGB0YLQtdC70LXRgNC00ZbSoyDQttKv0YDQtdCz0ZYg0LXRgNGC0LUg0LbQsNGB0YLQsNKT0Ysg0LHQsNC70LDQu9Cw0YDSk9CwINKb0LDRgNCw0pPQsNC90LTQsCDTqdGC0LUg0LrRltGI0LrQtdC90YLQsNC5INCx0L7Qu9Cw0LTRiy7QltCw0qPQsCDRgtGD0pPQsNC9INC905nRgNC10YHRgtC10L3RltKjINC20q/RgNC10LPRliDQutGW0YjQutC10L3RgtCw0Lks05nRgNGWINOZ0LvRliDRgtC+0LvRi9KbINC00LDQvNGL0L8s0LbQtdGC0ZbQu9C80LXQs9C10L3QvdC1INCx0LDQudC70LDQvdGL0YHRgtGLINKb0LDQvdC00Ysg0LDQudC00LDRg9GLINKb0LjRi9C90pPQsCDRgtKv0YHQtdC00ZYu0KHQvtC7INGB0LXQsdC10L/RgtC10L3QtNC1INC20LDSo9CwINGC0YPRi9C70pPQsNC9INC905nRgNC10YHRgtC10L3RltKjINC20q/RgNC10LPRltC90ZbSoyDQttC40YvRgNGL0LvRgyDQttC40ZbQu9GW0LPRliDQttC+0pPQsNGA0Ysg0LHQvtC70YPRiyDSm9Cw0L0g0LDQudC00LDRg9C00Ysg0LbQsNKb0YHQsNGA0YLRg9KT0LAg0LrTqdC80LXQutGC0LXRgdC10LTRli7Qr9KT0L3QuCzQttKv0YDQtdC6INC60ZbRiNC60LXQvdGC0LDQuSDQsdC+0LvSk9Cw0L3QvNC10L0g0LbSr9GA0LXQutGC0ZbSoyDQttC40YvRgNGL0LvRgyDQttC40ZbQu9GW0LPRliDQttC+0pPQsNGA0Ysg0LHQvtC70pPQsNC90LTRi9Kb0YLQsNC9INCw0pPQt9Cw0LvQsNGA0pPQsCDQttOZ0L3QtSDRgtGW0L3QtNC10YDQs9C1INC60LXRgNC10LrRgtGWINC806nQu9GI0LXRgNC00LUg0pvQsNC9INCw0LnQtNCw0LnQtNGLLtCh0L7QvdGL0LzQtdC9INKb0LDRgtCw0YAg0L7RgtGC0LXQs9GWINC80LXQvSDSm9C+0YDQtdC60YLRltC6INC30LDRgtGC0LDRgNC00Ysg0YLQsNGB0YvQvNCw0LvQtNCw0YMs0LzQtdGC0LDQsdC+0LvQuNC30Lwg0L/RgNC+0YbQtdGB0YLQtdGA0ZbQvSDRgtKx0YDQsNKb0YLRiyDSsdGB0YLQsNC/INGC0rHRgNCw0LTRiy7SmtC+0YDRi9GC0LAg0LrQtdC70LPQtdC90LTQtSzQttCw0qPQsCDRgtGD0pPQsNC9INC205nQvdC1INC10YDRgtC1INC20LDRgdGC0LDSk9GLINCx0LDQu9Cw0LvQsNGA0LTRi9KjINC/0YPQu9GM0YHRgtC10YDRltC90ZbSoyDQtdGA0LXQutGI0LXQu9GW0LrRgtC10YDRliDQsdCw0YAu0KHQtdCx0LXQsdGWINC20LDRgSDSsdC70pPQsNC50pPQsNC9INGB0LDQudGL0L0g0L/Rg9C70YzRgdGC0YvSoyDSm9Cw0LvRi9C/0YLRiyDRiNCw0LzQsNGB0YvQvdC00LAg0LDRgdCwINKb0LDRgtGC0Ysg06nQt9Cz0LXRgNGW0YEg0LHQsNC50pvQsNC70LDQtNGLLtCe0pPQsNC9INC005nQu9C10Lsg0L4g0LDQuS0xINCw0LkgMTIwLTE2MCDRgdC+0pvSm9GL0L3RiyDSm9Kx0YDQsNGB0LAsMSDQsNC5LTEg0LbQsNGBIDExMC0xNTAg0YHQvtKb0pvRiyDQvNC40L3Rg9GC0YvQvdCwLDEg0LbQsNGB0YLQsNC9INCx0LDRgdGC0LDQvyDRiNCw0LzQsNC80LXQvSA5MC0xNDAg0YHQvtKb0pvRi9C90Ysg0pvSsdGA0LDQudC00Ysu0JbSr9GA0LXQutGC0ZbSoyDQttC40YvRgNGL0LvRgyDQttC40ZbQu9GW0LPRliDQttCw0YEg06nRgdC1INC60LXQu9C1INGC06nQvNC10L3QtNC10LnQtNGWLNGB0LXQsdC10LHRliDQttKv0YDQtdC6LdKb0LDQvSDRgtCw0LzRi9GAINC20q/QudC10YHRliDQtNCw0LzRg9GL0LzQtdC9INCx0LDQudC70LDQvdGL0YHRgtGLINC205nQvdC1INC20q/RgNC10LrRgtGW0qMg0pvQsNC70YvQv9GC0Ysg0LrTqdC70LXQvNGWLNC/0ZbRiNGW0L3RltKjINOp0LfQs9C10YDRg9GW0LzQtdC9INC205nQvdC1INC+0YDQvdCw0LvQsNGB0YPRi9C90LAg0LHQsNC50LvQsNC90YvRgdGC0YsuINCf0YPQu9GM0YHRgtC10YDRltC90ZbSoyDQtdGA0LXQutGI0LXQu9GW0LrRgtC10YDRliDQttKv0YDQtdC6LdKb0LDQvSDRgtCw0LzRi9GAINC20q/QudC10YHRltC90ZbSoyDRgtC+0LvRi9KbINC00LDQvNGL0LzQsNGD0YvQvNC10L0g0LbTmdC90LUg0LbSr9GA0LXQutGC0ZbQvSDQutGW0YjQutC10L3RgtCw0Lkg0LHQvtC70YPRi9C80LXQvSDRgtGW0LrQtdC70LXQuSDQsdCw0LnQu9Cw0L3Ri9GB0YLRiy48YnIgLz4NCiAgMi3RgdKx0YDQsNKbLtCR0LXRgNGW0LvQs9C10L0g0LbQsNKT0LTQsNC50LvRi9KbINC10YHQtdC/INCx0L7QudGL0L3RiNCwINCx0LDQu9CwINGB0LDRgyzQttCw0pPQtNCw0LnRiyDSm9Cw0L3QsNKT0LDRgtGC0LDQvdCw0YDQu9GL0pss0YHQsNC70LzQsNKT0Ysg0pvQsNC70YvQv9GC0Yso0L3TmdGA0LXRgdGC0LUg0YHQsNC70LzQsNKT0YsgMjUwMC00MDAwINC60LMg0LHQvtC70YPRiyDQutC10YDQtdC6ICku0JfQtdGA0YLRgtGF0LDQvdCw0LvRi9KbINC20LDQu9C/0Ysg0pvQsNC9INCw0L3QsNC70LjQt9GW0L3QtNC1INC90LXQudGC0YDQvtGE0LjQu9C00LXRgCDQvNC10L0g0LvQuNC80YTQvtGG0LjRgtGC0LXRgCA0NSDQv9Cw0LnRi9C30LTRiyDSm9Kx0YDQsNC/INGC0rHRgC7Qr9KT0L3QuCzQvdC10LnRgtGA0L7RhNC40LvQtNC10YAg0LbTmdC90LUg0LvQuNC80YTQvtGG0LjRgtGC0LXRgCDQutOp0YDRgdC10YLQutGW0YjRgtC10YDRliDQsdGW0YDQtNC10Lkg0LHQvtC70YvQvyDRgtKx0YAs0LHSsdC7INCw0LvSk9Cw0YjSm9GLINKb0LjRi9C70YvRgSDQtNC10L8g0LDRgtCw0LvQsNC00Ysu0KHQtdCx0LXQsdGWLNC905nRgNC10YHRgtC1INGC0YPRi9C70pPQsNC90L3QsNC9INC60LXQudGW0L0gNC01INC60q/QvSDTqdGC0LrQtdC90LTQtSDQvdC10LnRgtGA0L7RhNC40LvQtNC10YAg0LzQtdC9INC70LjQvNGE0L7RhtC40YLRgtC10YAgNDUg0L/QsNC50YvQt9C00LDQvSDQttC+0pPQsNGA0Ysg0LrTqdGA0YHQtdGC0LrRltGI0YLRliDSm9Kx0YDQsNC50LTRiy7QkNC7INC905nRgNC10YHRgtC1INGC0YPRi9C70pPQsNC9INC60q/QvdC90LXQvSDQsdCw0YHRgtCw0L8g0L3QtdC50YLRgNC+0YTQuNC70LTQtdGAINGB0LDQvdGLIDY1LTcwINC/0LDQudGL0LfQtNGLLNC70LjQvNGE0L7RhtC40YLRgtC10YAg0YjQsNC80LDQvNC10L0gMjUtMzAg0L/QsNC50YvQt9C00Ysg0pvSsdGA0LDQvyDQttCw0YLQsNC00Ysu0JHQsNC50pvQsNC/INC+0YLRi9GA0pPQsNC90LTQsNC5INC905nRgNC10YHRgtC1INGC0YPRi9C70pPQsNC9INC60q/QvdC90LXQvSDQsdCw0YHRgtCw0L8g0L3QtdC50YLRgNC+0YTQuNC70LTQtdGAINC20L7Sk9Cw0YDRiyDQutOp0YDRgdC10YLQutGW0YjRgtGWINC606nRgNGB0LXRgtC10LTRlizQsNC7IDUg0LrSr9C90ZYg0L3QtdC50YLRgNC+0YTQuNC70LTQtdGAINC606nRgNGB0LXRgtC60ZbRiNGWINGC06nQvNC10L3QtNC10Lkg0LHQsNGB0YLQsNC50LTRiy7QkNC7INC70LjQvNGE0L7RhtC40YLRgtC10YAg0LrQtdGA0ZbRgdGW0L3RiNC1INGC0YPRi9C70pPQsNC9INGB05nRgtGC0LXQvSDQsdCw0YHRgtCw0L8g0LvQuNC80YTQvtGG0LjRgtGC0LXRgCDQtNC10qPQs9C10LnRliDRgtOp0LzQtdC9INCx0L7Qu9Cw0LTRiyw1INC60q/QvdGWINC70LjQvNGE0L7RhtC40YLRgtC10YAg0LTQtdKj0LPQtdC50ZYg0LbQvtKT0LDRgNGL0LvQsNC5INCx0LDRgdGC0LDQudC00Ysu0JTQtdC80LXQuizQsdCw0LvQsCDQtNKv0L3QuNC10LPQtSDQutC10LvQtSDRgdCw0LvRi9GB0YvQvNC10L0g0L3QtdC50YLRgNC+0YTQuNC70LTQtdGAINC20L7Sk9Cw0YDRiyDQsdC+0LvRi9C/INGC0rHRgCzRgdC10LHQtdCx0ZYg0LHQsNC70LAg0LDSk9C30LDRgdGLINC40L3RhNC10LrRhtC40Y/QtNCw0L0g0pvQvtGA0pPQsNC90YvQvyzSm9C+0YDRiNCw0pPQsNC9INC+0YDRgtCw0pPQsCDQsdC10LnRltC80LTQtdC70YMg0L/RgNC+0YbQtdGB0ZbQvSDQsdCw0YHRgtCw0L8g0LbQsNGC0LDQtNGLLtCa0LXQudGW0L0gNSDQutKv0L3QvdC10L0g0LrQtdC50ZbQvSDQvdC10LnRgtGA0L7RhNC40LvQtNC10YAg0LrTqdGA0YHQtdGC0LrRltGI0ZYg0LDQt9Cw0Y/QtNGLLCDRgdC10LHQtdCx0ZYg0LHQsNC70LAg0L7RgNCz0LDQvdC40LfQvNGWINOp0LfRliDTqdC30ZbQvdGW0qMg0LjQvNC80YPQvdC00YvSmyDQttKv0LnQtdGB0ZbQvSDSm9Cw0LvRi9C/0YLQsNGB0YLRi9GA0LAg0LHQsNGB0YLQsNC50LTRiy7SmtC+0YDRi9GC0LAg0LrQtdC70LPQtdC90LTQtSzQttCw0LvQv9GLINKb0LDQvSDQsNC90LDQu9C40LfRltC90LTQtSDQvdC10LnRgtGA0L7RhNC40LvQu9C00LXRgCDQvNC10L0g0LvQuNC80YTQvtGG0LjRgtGC0LXRgCDQutOp0YDRgdC10YLQutGW0YjRltC90ZbSoyDQsdGW0YDQtNC10Lkg0LHQvtC70YPRiyzQsdKx0Lsg0pvQsNC70YvQv9GC0Ysg0YTQuNC30LjQvtC70L7Qs9C40Y/Qu9GL0psg0L/RgNC+0YbQtdGB0YEu0JbQsNC70L/RiyDSm9Cw0L0g0LDQvdCw0LvQuNC30ZbQvdC00LUg0L3QtdC50YLRgNC+0YTQuNC70LTQtdGAINC80LXQvSDQu9C40LzRhNC+0YbQuNGC0YLQtdGA0LTRltKjINC606nRgNGB0LXRgtC60ZbRiNGW0L3RltKjINCx0ZbRgNC00LXQuSDQsdC+0LvRg9GLINCx0LDQu9CwINCw0pPQt9Cw0YHRiyDTqdC30ZbQvdGW0qMg0LjQvNC80YPQvdC00YvSmyDQttKv0LnQtdGB0ZYg0LzQtdC9INC60LXRiNC10L3RltC9INKb0LDQu9GL0L/RgtCw0YHRgtGL0YDRg9GL0LzQtdC9INGC0ZbQutC10LvQtdC5INCx0LDQudC70LDQvdGL0YHRgtGLL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1-ші сұрақтың жауабында анатомиялық-физиологиялық ерекшеліктер ескерілмеген, толық емес</text:p>
          </table:table-cell>
          <table:table-cell office:value-type="float" office:value="0" table:style-name="ce1">
            <text:p>0</text:p>
          </table:table-cell>
          <table:table-cell table:number-columns-repeated="16376"/>
        </table:table-row>
        <table:table-row table:style-name="ro1">
          <table:table-cell office:value-type="float" office:value="915320" table:style-name="ce1">
            <text:p>915320</text:p>
          </table:table-cell>
          <table:table-cell office:value-type="string" table:style-name="ce1">
            <text:p>russian</text:p>
          </table:table-cell>
          <table:table-cell office:value-type="string" table:style-name="ce1">
            <text:p>Билет 34.&amp;lt;br /&amp;gt; 1.Назовите особенности частоты пульса у новорожденных и детей раннего возраста. С чем это связано?&amp;lt;br /&amp;gt; 2. Новорожденному 5 дней, родился в срок. Вес при рождении 3400 кг, рост 52 см. Состояние удовлетворительное. Закричал сразу. В общем анализе крови нейтрофилов 45%, лимфоцитов 45%. Почему эти показатели в крови одинаковые? &amp;lt;br /&amp;gt;</text:p>
          </table:table-cell>
          <table:table-cell office:value-type="string" table:style-name="ce1">
            <text:p>MS4g0YMg0L3QvtCy0L7RgNC+0LbQtNC10L3QvdGL0YUg0Lgg0LTQtdGC0LXQuSDRgNCw0L3QvdC10LPQviDQstC+0LfRgNCw0YHRgtCwICDQsiDRgdCy0Y/Qt9C4INGBINC90LXQtNC+0YHRgtCw0YLQvtGH0L3QvtC5INGA0LDQt9Cy0LjRgtC+0YHRgtGM0Y4g0LLQtdCz0LXRgtCw0YLQuNCy0L3QvtC5INC90LXRgNCy0L3QvtC5INGB0LjRgdGC0LXQvNGLINC4INGG0LXQvdGC0YDQvtCyINGA0LXQs9GD0LvRj9GG0LjQuCAo0YHQvtGB0YPQtNC+0LTQstC40LPQsNGC0LXQu9GM0L3Ri9C5INGG0LXQvdGC0YAg0L/RgNC+0LTQvtC70LPQvtCy0LDRgtC+0LPQviDQvNC+0LfQs9CwKSDRh9Cw0YHRgtC+0YLQsCDQv9GD0LvRjNGB0LAgINCx0YPQtNC10YIg0YHQvtGB0YLQsNCy0LvRj9GC0YwgMTMwLTE0MCgg0LzQvtC20LXRgiDQtNC+0YXQvtC00LjRgtGMINC00LDQttC1INC00L4gMTYwKSDQsiDQvNC40L3Rg9GC0YMuINGN0YLQviDQvdCw0LzQvdC+0LPQviDQsdC+0LvRjNGI0LUsINGH0LXQvCDQv9C+0LrQsNC30LDRgtC10LvQuCDQstC30YDQvtGB0LvQvtCz0L4g0YfQtdC70L7QstC10LrQsCDQuCDQtNC10YLQtdC5INGB0YLQsNGA0YjQtdCz0L4g0LLQvtC30YDQsNGB0YLQsC4g0LTQsNC90L3QvtC80YMg0Y/QstC70LXQvdC40Y4g0YHQv9C+0YHQvtCx0YHRgtCy0YPRjtGCINGB0LvQtdC00YPRjtGJ0LjQtSDQsNC90LDRgtC+0LzQvi3RhNC40LfQuNC+0LvQvtCz0LjRh9C10YHQutC40LUg0L7RgdC+0LHQtdC90L3QvtGB0YLQuDog0YDQsNC30LzQtdGA0Ysg0YHQtdGA0LTRhtCwINGDINC90L7QstC+0YDQvtC20LTQtdC90L3Ri9GFINC4INC00LXRgtC10Lkg0YDQsNC90L3QtdCz0L4g0LLQvtC30YDQsNGB0YLQsCDQvtGC0L3QvtGB0LjRgtC10LvRjNC90L4g0L3QtdCx0L7Qu9GM0YjQuNC1INC/0L4g0L7RgtC90L7RiNC10L3QuNGOINC6INC80LDRgdGB0LUg0YLQtdC70LAuINGN0YLQviDQt9Cw0YHRgtCw0LLQu9GP0LXRgiDRgdC10YDQtNGG0LUg0YHQvtC60YDQsNGJ0LDRgtGM0YHRjyDQvdCw0LzQvdC+0LPQviDQsdGL0YHRgtGA0LXQtSwg0YfRgtC+0LHRiyDQvtCx0LXRgdC/0LXRh9C40YLRjCDQstGB0LUg0L7RgNCz0LDQvdGLINC60LjRgdC70L7RgNC+0LTQvtC8INC4INC90LXQvtCx0YXQvtC00LjQvNGL0LzQuCDQstC10YnQtdGB0YLQstCw0LzQuCwg0LrQvtGC0L7RgNGL0LUg0YDQsNGB0YLQstC+0YDQtdC90Ysg0LIg0LrRgNC+0LLQuC7QsiDRgdCy0Y/Qt9C4INGBINGD0LLQtdC70LjRh9C10L3QuNC10Lwg0KfQodChINCx0YPQtNC10YIg0YPQstC10LvQuNGH0LjQstCw0YLRjNGB0Y8g0Lgg0L/Rg9C70YzRgS4g0YLQsNC60LbQtSDRgyDQtNC10YLQtdC5INC90L7QstC+0YDQvtC20LTQtdC90L3QvtCz0L4g0Lgg0YDQsNC90L3QtdCz0L4g0LTQtdGC0YHQutC+0LPQviDQstC+0LfRgNCw0YHRgtCwINGG0LXQvdGC0YDRiyDRgNC10LPRg9C70Y/RhtC40Lgg0LHQvtC70YzRiNC40L3RgdGC0LLQsCDQv9GA0L7RhtC10YHRgdC+0LIg0L3QsNGF0L7QtNGP0YLRgdGPINC90LAg0YHRgtCw0LTQuNC4INGE0L7RgNC80LjRgNC+0LLQsNC90LjRjyDQuCDRgNCw0LfQstC40YLQuNGPLCDQv9C+0Y3RgtC+0LzRgyDQvtC90Lgg0L3QtSDQvNC+0LPRg9GCINC+0LHQtdGB0L/QtdGH0LjRgtGMINC00L7Qu9C20L3QvtCz0L4g0LrQvtC90YLRgNC+0LvRjyDQt9CwINGH0LDRgdGC0L7RgtC+0Lkg0L/Rg9C70YzRgdCwLiDRgtCw0LrQttC1LCDQsiDRgdCy0Y/Qt9C4INGBINGC0LXQvCwg0YfRgtC+INGDINC00LXRgtC10Lkg0LTQsNC90L3QvtCz0L4g0LLQvtC30YDQsNGB0YLQsCDQuNC80LXRjtGC0YHRjyDQvtGB0L7QsdC10L3QvdC+0YHRgtC4INCyINGB0YLRgNC+0LXQvdC40Lgg0LPRgNGD0LTQvdC+0Lkg0LrQu9C10YLQutC4KNCx0L7Rh9C60L7QvtCx0YDQsNC30L3QsNGPINGE0L7RgNC80LAsINCz0L7RgNC40LfQvtC90YLQsNC70YzQvdC+0LUg0L/QvtC70L7QttC10L3QuNC1INGA0LXQsdC10YAsINC90LXRgdC+0LLQtdGA0YjQtdC90YHRgtCy0L4g0LDQu9GM0LLQtdC+0LvRj9GA0L3QvtC5INGB0LjRgdGC0LXQvNGLINC70LXQs9C60LjRhSDQuCDRgi7QtC4pINGN0YLQviDQv9GA0LjQstC+0LTQuNGCINC6INGC0L7QvNGDLCDRh9GC0L4g0LvQtdCz0LrQuNC1INC90LUg0LIg0YHQvtCy0LXRgNGI0LXQvdGB0YLQstC1INC+0LHQtdGB0L/QtdGH0LjQstCw0Y7RgiDQvtGA0LPQsNC90Ysg0LrQuNGB0LvQvtGA0L7QtNC+0LwsINC/0L7RjdGC0L7QvNGDINC00LvRjyDQutC+0LzQv9C10L3RgdCw0YbQuNC4INC00LDQvdC90L7Qs9C+INC/0YDQvtGG0LXRgdGB0LAg0YMg0LTQtdGC0LXQuSDRg9Cy0LXQu9C40YfQuNCy0LDQtdGC0YHRjyDQv9GD0LvRjNGBLCDRh9GC0L7QsdGLINC+0LHQtdGB0L/QtdGH0LjQstCw0YLRjCDQvtGA0LPQsNC90YsoINCyINC/0LXRgNCy0YPRjiDQvtGH0LXRgNC10LTRjCDQs9C+0LvQvtCy0L3QvtC5INC80L7Qt9CzLCDQv9C10YfQtdC90Ywg0Lgg0LLQtdGA0YXQvdC40LUg0LrQvtC90LXRh9C90L7RgdGC0LgpINC+0LrRgdC40LPQtdC90LjRgNC+0LLQsNC90L3QvtC5INC60YDQvtCy0YzRji4g0YLQsNC60LbQtSDQuNC80LXQtdGC0YHRjyDQtdGJ0LUg0LTQvtC/0L7Qu9C90LXQvdC40LUsINGDINC00LXRgtC10Lkg0LrQsNC6INGD0LbQtSDQv9C40YHQsNC70L7RgdGMINGA0LDQvdC90LXQtSDRgdC10YDQtNGG0LUg0LjQvNC10LXRgiDQvdC10LHQvtC70YzRiNC40LUg0YDQsNC30LzQtdGA0YsoINCyINGC0L7QvCDRh9C40YHQu9C1INC60LDQvNC10YDRiyDRgdC10YDQtNGG0LAg0LfQvdCw0YfQuNGC0LXQu9GM0L3QviDQvdC10LHQvtC70YzRiNC40LUpINC4INC60L7Qu9C40YfQtdGB0YLQstC+INCe0KbQmiDQtNC+0LLQvtC70YzQvdC+INC90LjQt9C60L7QtSgg0L/QviDRgdGA0LDQstC90LXQvdC40Y4g0LTQsNC20LUg0YEg0LHQvtC70LXQtSDRgdGC0LDRgNGI0LjQvNC4INC00LXRgtGM0LzQuCksINCyINGB0LLRj9C30Lgg0YEg0Y3RgtC40Lwg0LjRhSDRg9C00LDRgNC90YvQuSDQvtCx0YrQtdC8INGB0LXRgNC00YbQsCwg0LzQuNC90YPRgtC90YvQuSDQvtCx0YrQtdC8INC60YDQvtCy0LgsINCwINGC0LDQutC20LUg0LLQtdC70LjRh9C40L3QsCDRgdC10YDQtNC10YfQvdC+0LPQviDQstGL0LHRgNC+0YHQsCDQtNC+0YHRgtCw0YLQvtGH0L3QviDQvdC10LHQvtC70YzRiNC40LUsINC/0L7RjdGC0L7QvNGDINC00LDQvdC90YvQtSDQvtGB0L7QsdC10L3QvdC+0YHRgtC4INC60L7QvNC/0LXQvdGB0LjRgNGD0Y7RgtGB0Y8g0LLRi9GB0L7QutC+0Lkg0YfQsNGB0YLQvtGC0L7QuSDRgdC10YDQtNC10YfQvdGL0YUg0YHQvtC60YDQsNGJ0LXQvdC40Lkg0Lgg0LrQsNC6INGB0LvQtdC00YHRgtCy0LjQtSDRjdGC0L4g0L/RgNC40LLQvtC00LjRgiDQuiDRg9Cy0LXQu9C40YfQtdC90LjRjiDQv9GD0LvRjNGB0LAoINGD0LLQtdC70LjRh9C40LLQsNC10YLRgdGPINGH0LDRgdGC0L7RgtCwINGB0L7QutGA0LDRidC10L3QuNC5INC4INGB0LvQtdC00L7QstCw0YLQtdC70YzQvdC+INGD0LLQtdC70LjRh9C40LLQsNC10YLRgdGPINC60L7Qu9C40YfQtdGB0YLQstC+INCy0YvQsdGA0L7RgdC+0LIg0LrRgNC+0LLQuD3Qv9GD0LvRjNGBKS4g0L7QtNC90LDQutC+INGC0LDQutC+0Lkg0L/QvtC60LDQt9Cw0YLQtdC70Ywg0L/Rg9C70YzRgdCwINCy0YDQtdC80LXQvdC90YvQuSDQuCDQv9C+INC80LXRgNC1INGB0YLQsNC90L7QstC70LXQvdC40Y8g0L7RgNCz0LDQvdC+0LIsINGB0LjRgdGC0LXQvCDRgNC10LPRg9C70Y/RhtC40Lkg0LbQuNC30L3QtdC90L3QviDQstCw0LbQvdGL0YUg0L/RgNC+0YbQtdGB0YHQvtCyINC00LDQvdC90YvQuSDQv9C+0LrQsNC30LDRgtC10LvRjCDQsdGD0LTQtdGCINGD0LzQtdC90YzRiNCw0YLRjNGB0Y8g0Lgg0L/RgNC40LHQu9C40LbQsNGC0YzRgdGPINC6INCy0LXQu9C40YfQuNC90LUg0LLQt9GA0L7RgdC70YvRhS4g0L/QvtGN0YLQvtC80YMg0YLQsNC60LjQtSDQstGL0YHQvtC60LjQtSDQv9C+0LrQsNC30LDRgtC10LvQuCDQv9GD0LvRjNGB0LAg0YMg0L3QvtCy0L7RgNC+0LbQtNC10L3QvdGL0YUg0Lgg0LTQtdGC0LXQuSDRgNCw0L3QvdC10LPQviDQstC+0LfRgNCw0YHRgtCwINGP0LLQu9GP0LXRgtGB0Y8g0L3QvtGA0LzQvtC5LiAgICAyLiDQtNCw0L3QvdC+0LUg0YHQvtGB0YLQvtGP0L3QuNC1INGDIDUt0LTQvdC10LLQvdC+0LPQviDQvdC+0LLQvtGA0L7QttC00LXQvdC90L7Qs9C+LCDRgyDQutC+0YLQvtGA0L7Qs9C+INC60L7Qu9C40YfQtdGB0YLQstC+INC90LXQudGC0YDQvtGE0LjQu9C+0LIg0Lgg0LvQuNC80YTQvtGG0LjRgtC+0LIg0LIg0LrRgNC+0LLQuCDRgNCw0LLQvdC+INC4INGB0L7RgdGC0LDQstC70Y/QtdGCIDQ1JSDQvdCw0LfRi9Cy0LDQtdGC0YHRjyDQv9C10YDQstGL0Lwg0YTQuNC30LjQvtC70L7Qs9C40YfQtdGB0LrQuNC8INC/0LXRgNC10LrRgNC10YHRgtC+0LwsINC60L7RgtC+0YDRi9C5INC/0YDQvtC40YHRhdC+0LTQuNGCINC90LAgNC01INC00LXQvdGMINC/0L7RgdC70LUg0YDQvtC20LTQtdC90LjRjyDQuCDRj9Cy0LvRj9C10YLRgdGPINCw0LHRgdC+0LvRjtGC0L3QviDQvdC+0YDQvNCw0LvRjNC90YvQvCDRhNC40LfQuNC+0LvQvtCz0LjRh9C10YHQutC40Lwg0L/RgNC+0YbQtdGB0YHQvtC8LCDQutC+0YLQvtGA0YvQuSDQvtGC0YDQsNC20LDQtdGCINC+0YHQvtCx0LXQvdC90L7RgdGC0Lgg0LTQtdGC0YHQutC+0LPQviDQvtGA0LPQsNC90LjQt9C80LAuINGN0YLQviDQvtCx0YrRj9GB0L3Rj9C10YLRgdGPINGB0LvQtdC00YPRjtGJ0LjQvNC4INC+0YHQvtCx0LXQvdC90L7RgdGC0Y/QvNC4INC40LzQvNGD0L3QvdC+0Lkg0YHQuNGB0YLQtdC80Ysg0L3QvtCy0L7RgNC+0LbQtNC10L3QvdGL0YUuINCyINC/0LXRgNCy0YvQtSDRh9Cw0YHRiyDQuCAg0LTQvdC4INC/0L7RgdC70LUg0YDQvtC20LTQtdC90LjRjyDQvtGA0LPQsNC90LjQt9C8INGA0LXQsdC10L3QutCwINCw0LrRgtC40LLQvdC+INCw0LTQsNC/0YLQuNGA0YPQtdGC0YHRjyDQuiDQstC90LXRg9GC0YDQvtCx0L3Ri9C8INGD0YHQu9C+0LLQuNGP0Lwg0LbQuNC30L3QuC4g0LIg0Y3RgtC+INCy0YDQtdC80Y8g0YDQtdCx0LXQvdC+0Log0LLQv9C10YDQstGL0LUg0YHRgtCw0LvQutC40LLQsNC10YLRgdGPINGBINGA0LDQt9C70LjRh9C90YvQvNC4INCw0L3RgtC40LPQtdC90LDQvNC4INC4INC80LjQutGA0L7RhNC70L7RgNC+0Lkg0LLQvdC10YjQvdC10LPQviDQvNC40YDQsC4g0L3QtdC50YLRgNC+0YTQuNC70YssINC60L7RgtC+0YDRi9C1INC+0LHQtdGB0L/QtdGH0LjQstCw0Y7RgiDQv9C10YDQstC40YfQvdGL0Lkg0LjQvNC80YPQvdC40YLQtdGCINGA0LXQsdC10L3QutCwLCDQsiDQtNCw0L3QvdGL0Lkg0LzQvtC80LXQvdGCINC/0L7QstGL0YjQsNGO0YLRgdGPINC4INC00L7RgdGC0LjQs9Cw0Y7RgiDQvNCw0LrRgdC40LzRg9C80LAtINC+0LrQvtC70L4gNzAlLiDQvdC+INCyINGB0LLRj9C30Lgg0YEg0YLQtdC8LCDRh9GC0L4g0L/RgNC+0LTQvtC70LbQuNGC0LXQu9GM0L3QvtGB0YLRjCDQttC40LfQvdC4INC90LXQudGC0YDQvtGE0LjQu9C+0LIg0LrQvtGA0L7RgtC60LDRjygg0LLRgdC10LPQviA0LTkg0LTQvdC10LkpLCDQsCDQv9C+0YLRgNC10LHQvdC+0YHRgtGMINCyINC90LjRhSDQv9C+0LLRi9GI0LXQvdC90LDRjyAoINCyINGB0LLRj9C30Lgg0YEg0LDQtNCw0L/RgtCw0YbQuNC10LkpLCDRgtC+INC40YUg0LrQvtC70LjRh9C10YHRgtCy0L4g0LogNSDQtNC90Y4g0LbQuNC30L3QuCDQt9C90LDRh9C40YLQtdC70YzQvdC+INGB0L3QuNC20LDQtdGC0YHRjyDQuCDQtNC+0YHRgtC40LPQsNC10YIgNDUlLiDQsiDRjdGC0L4g0LbQtSDQstGA0LXQvNGPINCyINC60YDQvtCy0Lgg0YDQtdCx0LXQvdC60LAg0L3QsNGH0LjQvdCw0Y7RgiDQv9C+0LLRi9GI0LDRgtGM0YHRjyDQu9C40LzRhNC+0YbQuNGC0YssINC60L7RgtC+0YDRi9C1INCx0YPQtNGD0YIg0L7QsdC10YHQv9C10YfQuNCy0LDRgtGMINGA0LXQsdC10L3QutGDINC/0L7RgdC70LXQtNGD0Y7RidC40Lkg0LjQvNC80YPQvdC40YLQtdGCLiDQv9GA0Lgg0Y3RgtC+0Lwg0LjRhSDQutC+0LvQuNGH0LXRgdGC0LLQviDQsdGD0LTQtdGCINGC0LDQutC20LUg0LTQvtGB0YLQuNCz0LDRgtGMIDQ1JS4g0LIg0YLQtdGH0LXQvdC40Lgg0YHQu9C10LTRg9GO0YnQtdCz0L4g0LLRgNC10LzQtdC90Lgg0LrQvtC70LjRh9C10YHRgtCy0L4g0L3QtdC50YLRgNC+0YTQuNC70L7QsiDQsdGD0LTQtdGCINC/0YDQvtC00L7Qu9C20LDRgtGMINGD0LzQtdC90YzRiNCw0YLRjNGB0Y8sINCwINC60L7Qu9C40YfQtdGB0YLQstC+INC70LjQvNGE0L7RhtC40YLQvtCyINC/0L7QstGL0YjQsNGC0YzRgdGPKCDQtNC+0YHRgtC40LPQsNGPINC80LDQutGB0LjQvNGD0LzQsCDQsiA2MC03MCUpLiDQt9Cw0YLQtdC8INC/0L7RgdGC0LXQv9C10L3QvdC+INC60L7Qu9C40YfQtdGB0YLQstC+INC70LjQvNGE0L7RhtC40YLQvtCyINGB0L3QvtCy0LAg0YHQvdC40LbQsNC10YLRgdGPLCDQsCDQvdC10LnRgtGA0L7RhNC40LvQvtCyINGD0LLQtdC70LjRh9C40LLQsNC10YLRgdGPLCDQv9GA0LjQsdC70LjQttCw0Y/RgdGMINC6INC/0L7QutCw0LfQsNGC0LXQu9GP0Lwg0LLQt9GA0L7RgdC70L7Qs9C+INGH0LXQu9C+0LLQtdC60LAuINCyINCy0L7Qt9GA0LDRgdGC0LUgNC01INC70LXRgiDQvdCw0YHRgtGD0L/QsNC10YIg0LLRgtC+0YDQvtC5INGE0LjQt9C40L7Qu9C+0LPQuNGH0LXRgdC60LjQuSDQv9C10YDQtdC60YDQtdGB0YIsINC60L7Qs9C00LAg0LrQvtC70LjRh9C10YHRgtCy0L4g0L3QtdC50YLRgNC+0YTQuNC70L7QsiDQuCDQu9C40LzRhNC+0YbQuNGC0L7QsiDRgdC90L7QstCwINGB0L7RgdGC0LDQstC70Y/QtdGCIDQ1JS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4" table:style-name="ce1">
            <text:p>915324</text:p>
          </table:table-cell>
          <table:table-cell office:value-type="string" table:style-name="ce1">
            <text:p>russian</text:p>
          </table:table-cell>
          <table:table-cell office:value-type="string" table:style-name="ce1">
            <text:p>Билет 34.&amp;lt;br /&amp;gt; 1.Назовите особенности частоты пульса у новорожденных и детей раннего возраста. С чем это связано?&amp;lt;br /&amp;gt; 2. Новорожденному 5 дней, родился в срок. Вес при рождении 3400 кг, рост 52 см. Состояние удовлетворительное. Закричал сразу. В общем анализе крови нейтрофилов 45%, лимфоцитов 45%. Почему эти показатели в крови одинаковые? &amp;lt;br /&amp;gt;</text:p>
          </table:table-cell>
          <table:table-cell office:value-type="string" table:style-name="ce1">
            <text:p>0J/QtdGA0LLRi9C5INCy0L7Qv9GA0L7RgS4g0JPQu9Cw0LLQvdC+0Lkg0L7RgdC+0LHQtdC90L3QvtGB0YLRjNGOINC/0YPQu9GM0YHQsCDRgyDQvdC+0LLQvtGA0L7QttC00LXQvdC90YvRhSDRj9Cy0LvRj9C10YLRgdGPINC/0L7QstGL0YjQtdC90L3QsNGPINC10LPQviDRh9Cw0YHRgtC+0YLQsCwg0YLQviDQtdGB0YLRjCwg0L/QviDQvNC10YDQtSDRgNC+0YHRgtCwINC4INGA0LDQt9Cy0LjRgtC40Y8g0YDQtdCx0LXQvdC60LAt0LXQs9C+INC/0YPQu9GM0YEg0YHRgtCw0L3QvtCy0LjRgtGB0Y8g0L3QuNC20LUg0LTQviDRgtC10YUg0L/QvtGALCDQv9C+0LrQsCDQvdC1INC00L7RgdGC0LjQs9C90LXRgiDRgdCy0L7QtdC5INC90L7RgNC80YsuINCf0YPQu9GM0YEg0L3QvtCy0L7RgNC+0LbQtNC10L3QvdC+0LPQviDQsiDQv9C10YDQstGL0LUg0LTQvdC4INC20LjQt9C90Lgg0YHQvtGB0YLQsNCy0LvRj9C10YIgMTIwLTE2MCDRg9C00LDRgNC+0LIg0LIg0LzQuNC90YPRgtGDLCDRgdGC0L7QuNGCINC+0YLQvNC10YLQuNGC0YwsINGH0YLQviDQv9GD0LvRjNGBINC80L7QttC10YIg0LLQvtC30YDQsNGB0YLQsNGC0Ywg0L/RgNC4INC60L7RgNC80LvQtdC90LjQuCDQuNC70Lgg0L/RgNC4INGA0LDQt9C90YvRhSDQv9GB0LjRhdC+0Y3QvNC+0YbQuNC+0L3QsNC70YzQvdGL0YUg0L/RgNC+0Y/QstC70LXQvdC40Y/RhSDQvNC70LDQtNC10L3RhtCwICjQvdCw0L/RgNC40LzQtdGALdC60YDQuNC6LCDQv9C70LDRhyktINC00LDQvdC90YvQuSDRhNC10L3QvtC80LXQvSDQvdCw0LfRi9Cy0LDQtdGC0YHRjyAi0YTQuNC30LjQvtC70L7Qs9C40YfQtdGB0LrQsNGPINGC0LDRhdC40LrQsNGA0LTQuNGPIiDQuCDRj9Cy0LvRj9C10YLRgdGPINCy0LDRgNC40LDRhtC40LXQuSDQvdC+0YDQvNGLLiDQkiDRgdC70LXQtNGD0Y7RidC40LUg0L/QsNGA0YMg0LzQtdGB0Y/RhtC10LIg0LbQuNC30L3QuCDQv9GD0LvRjNGBINCx0YPQtNC10YIg0LrQvtC70LXQsdCw0YLRjNGB0Y8g0L7RgiAxMTAg0LTQviAxNTAg0YPQtNCw0YDQvtCyINCyINC80LjQvdGD0YLRgywg0LIgNCDQv9C+IDYg0LzQtdGB0Y/RhiDQtdGJ0LUg0LzQtdC90YzRiNC1LSAxMDAtMTQwLCDQuCDRgtCw0Log0LTQsNC70LXQtSDQsdGD0LTQtdGCINGB0L3QuNC20LDRgtGM0YHRjyDQv9C+0LrQsCDQvdC1INC00L7RgdGC0LjQs9C90LXRgiDRgdCy0L7QtdC5INC90L7RgNC80YsuINCf0L4g0LHQvtC70YzRiNC10Lkg0YfQsNGB0YLQuCDRjdGC0L4g0YHQstGP0LfQsNC90L4sINGBINGC0LXQvCwg0YfRgtC+INC60LDQvNC10YDRiyDRgdC10YDQtNGG0LAg0L/RgNC4INGA0L7QttC00LXQvdC40Lgg0LXRidC1INC90LUg0L3QsNGB0YLQvtC70YzQutC+INGA0LDQt9Cy0LjRgtGLINC4INC00L7QstC+0LvRjNC90L4g0LzQsNC70Ysg0LIg0YDQsNC30LzQtdGA0LDRhSwg0LjQtyDQt9CwINGN0YLQvtCz0L4g0L3QsCDQvdC40YUg0L/QsNC00LDQtdGCINCx0J7Qu9GM0YjQsNGPINC90LDQs9GA0YPQt9C60LAg0Lgg0LrQvtC80L/QtdC90YHQsNGC0L7RgNC90L4g0L/QvtCy0YvRiNCw0LXRgtGB0Y8g0LrQsNC6INGH0YHRgSwg0YLQsNC6INC4INC/0YPQu9GM0YEg0LLQvNC10YHRgtC1INGBINC00LDQstC70LXQvdC40LXQvC4g0KEg0LTRgNGD0LPQvtC5INGB0YLQvtGA0L7QvdGLICwg0LLQu9C40Y/QtdGCINC/0L7QstGL0YjQtdC90L3Ri9C5INC+0LHQvNC10L0g0LLQtdGJ0LXRgdGC0LIt0YfQtdGA0LXQtyDQutC+0LbRgywg0LvQtdCz0LrQuNC1LCDQv9C+0LLRi9GI0LXQvdC90L7QtSDQvNC+0YfQtdCy0YvQtNC10LvQtdC90LjQtSDQuCDRjdC60YHQutGA0LXRhtC40Y8g0LrQsNC70LAg0YLQsNC6INC20LUg0L/QvtCy0YvRiNCw0Y7RgiDQv9GD0LvRjNGBLiDQotCw0Log0LbQtSDQuNCz0YDQsNC10YIg0YDQvtC70Ywg0LLQtdCz0LXRgtCw0YLQuNCy0L3QsNGPINC90LXRgNCy0L3QsNGPINGB0LjRgdGC0LXQvNCwLCDQutC+0YLQvtGA0LDRjyDRgtC+0LbQtSDQvdC10LTQvtGB0YLQsNGC0L7Rh9C90L4g0YDQsNC30LLQuNGC0LAg0YMg0L3QvtCy0L7RgNC+0LbQtNC10L3QvdGL0YUuINCg0LXQt9GO0LzQuNGA0YPRjyDQstGB0LUg0LLRi9GI0LXRgdC60LDQt9Cw0L3QvdC+0LUsINGPINC00YPQvNCw0Y4sINGH0YLQviDRgdC90LjQttC10L3QuNC1INC/0YPQu9GM0YHQsCDRgyDQvdC+0LLQvtGA0L7QttC00LXQvdC90YvRhSDQv9C+INC80LXRgNC1INCy0LfRgNC+0YHQu9C10L3QuNGPINGP0LLQu9GP0LXRgtGB0Y8g0LLQsNC20L3Ri9C8INC60L7QvNC/0LXQvdGB0LDRgtC+0YDQvdGL0Lwg0LzQtdGF0LDQvdC40LfQvNC+0LwsINC60L7RgtC+0YDRi9C5INC90LXQvtCx0YXQvtC00LjQvCDQtNC70Y8g0L/QvtC70L3QvtC5INCw0LTQsNC/0YLQsNGG0LjQuCDQvtGA0LPQsNC90LjQt9C80LAg0L3QvtCy0L7RgNC+0LbQtNC10L3QvdC+0LPQvi48YnIgLz4NCjxiciAvPg0K0JLRgtC+0YDQvtC5INCy0L7Qv9GA0L7RgS4g0J7Qv9C40YHQsNC90L3Ri9C5INCyINC30LDQtNCw0YfQtSDRhNC10L3QvtC80LXQvSDQuNC80LXQtdGCINC90LDQt9Cy0LDQvdC40LUgItGE0LjQt9C40L7Qu9C+0LPQuNGH0LXRgdC60LjQuSDQv9C10YDQtdC60YDQtdGB0YIg0LvQtdC50LrQvtGG0LjRgtCw0YDQvdC+0Lkg0YTQvtGA0LzRg9C70YsiLCDQutC+0YLQvtGA0YvQuSDRgdC70YPRh9Cw0LXRgtGB0Y8g0LTQstCwINGA0LDQt9CwINCyINC20LjQt9C90Lgg0L3QvtCy0L7RgNC+0LbQtNC10L3QvdC+0LPQvi4g0J/QtdGA0LLRi9C5INGA0LDQtyDQvdCwINC/0Y/RgtGL0LUt0YjQtdGB0YLRi9C1INGB0YPRgtC60LgsINC60LDQuiDQsdGL0LvQviDRg9C60LDQt9Cw0L3QviDQsiDQt9Cw0LTQsNGH0LUsINC4INCy0L4g0LLRgtC+0YDQvtC5INGA0LDQtyDQsiA2LTcg0LvQtdGCLiDQnNC10YXQsNC90LjQt9C8INGC0LDQutC+0LI6INCd0LXQudGC0YDQvtGE0LjQu9GLINC20LjQstGD0YIg0L3QsNC80L3QvtCz0L4g0LzQtdC90YzRiNC1INGH0LXQvCDQu9C40LzRhNC+0YbQuNGC0YssINC/0YDQuNC80LXRgNC90L4g0L7RgiA0INC00L4gOSDRgdGD0YLQvtC6LCDQsiDRgtC+INCy0YDQtdC80Y8g0LrQsNC6INC70LjQvNGE0L7RhtC40YLRiyDQvNC+0LPRg9GCINC20LjRgtGMINC/0LDRgNGDINC70LXRgi4g0JrQsNC6INC80Ysg0LfQvdCw0LXQvCDRgyDQvdC+0LLQvtGA0L7QttC00LXQvdC90L7Qs9C+INC/0YDQuCDRgNC+0LbQtNC10L3QuNC4INC10YHRgtGMINGB0LLQvtC5INC30LDQv9Cw0YEg0LrRgNC+0LLRj9C90YvRhSDQutC70LXRgtC+0LosINC4INCy0YHQtSDQutC70LXRgtC60Lgg0LIg0L3QsNGF0L7QtNGP0YLRgdGPINCx0L7Qu9GM0YjQvtC8INC60L7Qu9C40YfQtdGB0YLQstC1LiDQl9C90LDRh9C40YIg0L/QvtGB0LvQtSDRgNC+0LbQtNC10L3QuNGPINGH0LXRgNC10LcgNC05INC00L3QtdC5INC90LXQudGC0YDQvtGE0LjQu9GLINCx0YPQtNGD0YIg0L3QtdC40LfQsdC10LbQvdC+INC/0L7Qs9C40LHQsNGC0YwsINC40Lcg0LfQsCDRh9C10LPQviDQuNGFINCy0YvRgdC+0LrQuNC5INGD0YDQvtCy0LXQvdGMINC/0L7QvdC40LfQuNGC0YHRjywg0LIg0YLQviDQstGA0LXQvNGPINC60LDQuiDQu9C40LzRhNC+0YbQuNGC0Ysg0L7RgdGC0LDQvdGD0YLRgdGPINC/0YDQuNC80LXRgNC90L4g0LIg0YLQvtC8INC20LUg0L/QtdGA0LLQvtC90LDRh9Cw0LvRjNC90L7QvCDQstGL0YHQvtC60L7QvCDQutC+0LvQuNGH0LXRgdGC0LLQtSwg0LjQtyDQt9CwINGH0LXQs9C+INGD0YDQvtCy0LXQvdGMINC90LXQudGC0YDQvtGE0LjQu9C+0LIg0Lgg0LvQuNC80YTQvtGG0LjRgtC+0LIg0YHRgNCw0LLQvdC40LLQsNC10YLRgdGPICjQsiDQt9Cw0LTQsNGH0LUgNDUlINC90LXQudGC0YDQvtGE0LjQu9C+0LIg0LggNDUlINC70LjQvNGE0L7RhtC40YLQvtCyKSwg0Y3RgtC+INC4INC10YHRgtGMINC/0LXRgNCy0YvQuSDQv9C10YDQtdC60YDQtdGB0YIuINCS0YLQvtGA0L7QuSDQv9C10YDQtdC60YDQtdGB0YIsINC/0YDQvtC40LfQvtC50LTQtdGCINGC0L7Qs9C00LAsINC60L7Qs9C00LAg0LvQuNC80YTQvtGG0LjRgtGLINC/0YDQvtC20LjQstGD0YIg0YHQstC+0Lkg0LbQuNC30L3QtdC90L3Ri9C5INGG0LjQutC7INC4INC40YUg0YPRgNC+0LLQtdC90Ywg0LIg0LrRgNC+0LLQuCDQvdCw0YfQvdC10YIg0YHQvdC40LbQsNGC0YzRgdGPLCDQsiDRgtC+INCy0YDQtdC80Y8g0LrQsNC6LCDQvdC10LnRgtGA0L7RhNC40LvRiyDRg9C20LUg0LTQvtGB0YLQuNCz0L3Rg9GCINGB0LLQvtC10Lkg0L3QvtGA0LzRiy4g0J3QtdC+0LHRhdC+0LTQuNC80L4g0L7QsdGK0Y/RgdC90LjRgtGMINC80LDQvNC+0YfQutC1LCDRh9GC0L4g0YHRg9C00Y8g0L/QviDQtNCw0L3QvdGL0Lwg0LfQsNC00LDRh9C4LCDQtdC1INGA0LXQsdC10L3QvtC6INGA0LDQt9Cy0LjQstCw0LXRgtGB0Y8g0L3QvtGA0LzQsNC70YzQvdC+INC4INGH0YLQviwg0YTQuNC30LjQvtC70L7Qs9C40YfQtdGB0LrQuNC1INC/0LXRgNC10LrRgNC10YHRgtGLINCx0YvQstCw0Y7RgiDRgyDQstGB0LXRhSDQtNC10YLQvtC6LCDQuCDQvtC90Lgg0L3QtSDQvdC10YHRg9GCINC90LjQutCw0LrQvtC5INC+0L/QsNGB0L3QvtGB0YLQuC4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у н/ рожденного пульс Аритмичен.</text:p>
          </table:table-cell>
          <table:table-cell office:value-type="float" office:value="0" table:style-name="ce1">
            <text:p>0</text:p>
          </table:table-cell>
          <table:table-cell table:number-columns-repeated="16376"/>
        </table:table-row>
        <table:table-row table:style-name="ro1">
          <table:table-cell office:value-type="float" office:value="915383" table:style-name="ce1">
            <text:p>915383</text:p>
          </table:table-cell>
          <table:table-cell office:value-type="string" table:style-name="ce1">
            <text:p>russian</text:p>
          </table:table-cell>
          <table:table-cell office:value-type="string" table:style-name="ce1">
            <text:p>Билет 34.&amp;lt;br /&amp;gt; 1.Назовите особенности частоты пульса у новорожденных и детей раннего возраста. С чем это связано?&amp;lt;br /&amp;gt; 2. Новорожденному 5 дней, родился в срок. Вес при рождении 3400 кг, рост 52 см. Состояние удовлетворительное. Закричал сразу. В общем анализе крови нейтрофилов 45%, лимфоцитов 45%. Почему эти показатели в крови одинаковые? &amp;lt;br /&amp;gt;</text:p>
          </table:table-cell>
          <table:table-cell office:value-type="string" table:style-name="ce1">
            <text:p>MS4g0J7RgdC+0LHQtdC90L3QvtGB0YLQuCDRh9Cw0YHRgtC+0YLRiyDQv9GD0LvRjNGB0LAg0YMg0L3QvtCy0L7RgNC+0LbQtNC10L3QvdGL0YUg0Lgg0LTQtdGC0LXQuSDRgNCw0L3QvdC10LPQviDQstC+0LfRgNCw0YHRgtCwLiDQndC+0YDQvNGLINGH0LDRgdGC0L7RgtGLINC/0YPQu9GM0YHQsCDRgyDQvdC+0LLQvtGA0L7QttC00LXQvdC90YvRhSAxMjAtMTQwINGD0LQv0LzQuNC9LiDQmiAxINCz0L7QtNGDINGH0LDRgdGC0L7RgtCwINC/0YPQu9GM0YHQsCDRgdC90LjQttCw0LXRgtGB0Y8g0L3QsCAxMCDRg9C00LDRgNC+0LIg0Lgg0YHQvtGB0YLQsNCy0LvRj9C10YIgMTEwLTEyMCDRg9C0L9C80LjQvS4g0JAg0LIgMi0zINCz0L7QtNC40LrQsCDRgyDQtNC10YLQtdC5INGH0LDRgdGC0L7RgtCwINC/0YPQu9GM0YHQsCDQutC+0LvQtdCx0LvQtdGC0YHRjyDQsiDQv9GA0LXQtNC10LvQsNGFIDEwMC0xMTAg0YPQtC/QvNC40L0uINCf0YPQu9GM0YEg0YMg0LTQtdGC0LXQuSDRgNCw0L3QvdC10LPQviDQstC+0LfRgNCw0YHRgtCwINC70LXQs9C60L4g0LzQtdC90Y/QtdGC0YHRjyDQsiDQt9Cw0LLQuNGB0LjQvNC+0YHRgtC4INC+0YIg0YHQvtGB0YLQvtGP0L3QuNC1INGA0LXQsdC10L3QutCwLiDQmiDQuNC30LzQtdC90LXQvdC40Y4g0LzQvtCz0YPRgiDQv9GA0LjQstC10YHRgtC4INC90LDQv9GA0LjQvNC10YAg0YTQuNC30LjRh9C10YHQutCw0Y8g0LDQutGC0LjQstC90L7RgdGC0YwuINCi0LDQuiDQttC1INC/0YDQuCDQstC00L7RhdC1INC/0YPQu9GM0YEg0YPRh9Cw0YnQsNC10YLRgdGPLCDQv9GA0Lgg0LLRi9C00L7RhdC1INC30LDQvNC10LTQu9GP0LXRgtGB0Y8uINCi0LDQuiDQttC1INC/0YDQuCDQv9C+0LLRi9GI0LXQvdC40Lgg0YLQtdC80L/QtdGA0LDRgtGD0YDRiyDRh9Cw0YHRgtC+0YLQsCDQv9GD0LvRjNGB0LAg0L/QvtCy0YvRiNCw0LXRgtGB0Y8g0L/RgNC40LzQtdGA0L3QviDQvdCwIDEwLTE1INGD0LQv0LzQuNC9LiDQoyDQvNCw0LvQtdC90YzQutC40YUg0LTQtdGC0LXQuSDQv9GD0LvRjNGB0L7QstCw0Y8g0LLQvtC70L3QsCDRgdC70LDQsdCw0Y8g0LjQty3Qt9CwINC80LXQvdGM0YjQtdC5INGB0LjQu9GLINGB0LXRgNC00LXRh9C90YvRhSDRgdC+0LrRgNCw0YnQtdC90LjQuCDQuCDRgtC+0L3Rg9GB0LAg0YHQvtGB0YPQtNC+0LIuINCh0L4g0LLRgNC10LzQtdC90LXQvCDRgSDRgNC+0YHRgtC+0Lwg0YDQtdCx0LXQvdC60LAsINGB0LjQu9CwINGB0LXRgNC00LXRh9C90YvRhSDRgdC+0LrRgNCw0YnQtdC90LjQuCDQuCDRgtC+0L3Rg9GBINGB0L7RgdGD0LTQvtCyINC/0L7QstGL0YjQsNC10YLRgdGPINGN0YLQviDQv9GA0LjQstC+0LTQuNGCINC6INC30L3QsNGH0LjRgtC10LvRjNC90L7QvNGDINGB0L3QuNC20LXQvdC40Y4g0YfQsNGB0YLQvtGC0Ysg0L/Rg9C70YzRgdCwLiDQotCw0Log0LbQtSDQv9GA0Lgg0LjRgdGB0LvQtdC00L7QstCw0L3QuNC4INGH0LDRgdGC0L7RgtGLINC/0YPQu9GM0YHQsCDQvdCw0LjQsdC+0LvQtdC1INGD0LTQvtCx0L3Ri9C1INCw0YDRgtC10YDQuNC4INGN0YLQviDRhtC10L3RgtGA0LDQu9GM0L3Ri9C1INCw0YDRgtC10YDQuNC4KNGB0L7QvdC90LDRjykg0Lgg0LrRgNGD0L/QvdGL0LUg0LDRgNGC0LXRgNC40LggKNCy0LjRgdC+0YfQvdCw0Y8sINC70YPRh9C10LLQsNGPKS4gPGJyIC8+DQoyLiDQldGB0LvQuCDQs9C+0LLQvtGA0LjRgtGMINC+INGE0LjQt9C40YfQtdGB0LrQvtC8INGA0LDQt9Cy0LjRgtC40Lgg0L3QvtCy0L7RgNC+0LbQtNC10L3QvdC+0LPQviDQstC10YEgMyw0MDDQutCzLCDRgNC+0YHRgiA1MtGB0Lwg0LIg0L/RgNC10LTQtdC70LDRhSDQvdC+0YDQvNGLLiDQotCw0Log0LrQsNC6INGDINC90L7QstC+0YDQvtC20LTQtdC90L3Ri9GFINC90L7RgNC80LAg0YDQvtGB0YLQsCDQuCDQstC10YHQsDog0YMg0LzQsNC70YzRh9C40LrQvtCyOyDQstC10YEgMywzLTMsOSDQutCzLCDRgNC+0YHRgiA1MC01NCDRgdC8LiDRgyDQtNC10LLQvtGH0LXQujsg0YDQvtGB0YIgMywyLTMsOCDQutCzLCDRgNC+0YHRgiA0OS01MyDRgdC8LiDQkiDQv9C10YDQstGL0LUgMy01INC00L3QtdC5LCDQsiDQvdC+0YDQvNC1INCy0LXRgSDRgdC90LjQttCw0LXRgtGB0Y8g0L3QsCA1LTgg0L/RgNC+0YbQtdC90YLQvtCyINC+0YIg0LzQsNGB0YHRiyDQv9GA0Lgg0YDQvtC20LTQtdC90LjQuCwg0YHQvdC40LbQtdC90LjQtSDQstC10YHQsCDRgdCy0Y/Qt9Cw0L3QvdC+INGBINC/0L7RgtC10YDQtdC5INC20LjQtNC60L7RgdGC0LguINCi0LDQuiDQttC1INCY0JzQoiDRgyDQvdC+0LLQvtGA0L7QttC00LXQvdC90YvRhSDRgdC+0YHRgtCw0LLQu9GP0LXRgiAxMi0xNCDQutCzL9C8INC60LIuINCk0LjQt9C40YfQtdGB0LrQvtC1INGA0LDQt9Cy0LjRgtC40LUg0LTQsNC90L3QvtCz0L4g0YDQtdCx0LXQvdC60LAg0LIg0L3QvtGA0LzQtS4g0JXRgdC70Lgg0LPQvtCy0L7RgNC40YLRjCDQviDQntCQ0JosINGD0YDQvtCy0LXQvdGMINC90LXQudGC0YDQvtGE0LjQu9C+0LIgNDUlINC4INC70LjQvNGE0L7RhtC40YLQvtCyIDQ1JSDQsiDQutGA0L7QstC4INC+0LTQuNC90LDQutC+0LLRiy4g0JIg0L3QvtGA0LzQtSDQvdC10LnRgtGA0L7RhNC40LvRiyDQsiDQutGA0L7QstC4INGDINC90L7QstC+0YDQvtC20LTQtdC90L3QvtCz0L4g0L/RgNC10L7QsdC70LDQtNCw0Y7RgiDQvtC60L7Qu9C+ICg2MC03MCUpLCDQsCDQu9C40LzRhNC+0YbQuNGC0Ysg0L7QutC+0LvQviAoMjUtMzAlKS4g0KLQsNC6INC20LUg0LXRgdGC0Ywg0LPRgNCw0YTQuNC6INC/0YDQviDQu9C10LnQutC+0YbQuNGC0LDRgNC90L7QvNGDINC/0LXRgNC10LrRgNC10YHRgtGDLiDQn9C10YDQstGL0Lkg0L/QtdGA0LXQutGA0LXRgdGCINC/0YDQvtC40YHRhdC+0LTQuNGCINC6IDQtNSDQtNC90Y4g0LbQuNC30L3QuCDQvdC+0LLQvtGA0L7QttC00LXQvdC90L7Qs9C+INCyINC/0LXRgNCy0L7QvCDQv9C10YDQtdC60YDQtdGB0YLQtSDRg9GA0L7QstC10L3RjCDQvdC10LnRgtGA0L7RhNC40LvQvtCyINC90LDRh9C40L3QsNC10YIg0YHQvdC40LbQsNGC0YzRgdGPLCDQsCDRg9GA0L7QstC10L3RjCDQu9C40LzRhNC+0YbQuNGC0L7QsiDQv9C+0LLRi9GI0LDRgtGM0YHRjy4g0KLQsNC6INC20LUg0LzQvtC20L3QviDRg9Cy0LjQtNC10YLRjCDQsiDQs9GA0LDRhNC40LrQtSDQu9C10LnQutC+0YbQuNGC0LDRgNC90L7Qs9C+INC/0LXRgNC10LrRgNC10YHRgtCwINCy0YLQvtGA0L7QuSDQv9C10YDQtdC60YDQtdGB0YIg0L/RgNC+0LjRgdGF0L7QtNC40YIg0LogNC01INCz0L7QtNCw0Lwg0LbQuNC30L3QuC4g0KPRgNC+0LLQtdC90Ywg0L3QtdC50YLRgNC+0YTQuNC70L7QsiDQvdCw0YfQuNC90LDQtdGCINC/0L7QstGL0YjQsNGC0YzRgdGPLCDQsCDRg9GA0L7QstC10L3RjCDQu9C40LzRhNC+0YbQuNGC0L7QsiDRgdC90LjQttCw0LXRgtGB0Y8uINCb0LXQudC60L7RhtC40YLQsNGA0L3Ri9C5INC/0LXRgNC10LrRgNC10YHRgi0g0L7RgtGA0LDQttCw0LXRgiDRhNC40LfQuNC+0LvQvtCz0LjRh9C10YHQutGD0Y4g0LDQtNCw0L/RgtCw0YbQuNGOINC40LzQvNGD0L3QvdC+0Lkg0YHQuNGB0YLQtdC80Ysg0YDQtdCx0LXQvdC60LAuINCU0LDQvdC90L7QtSDRhNC40LfQuNC+0LvQvtCz0LjRh9C10YHQutCw0Y8g0LDQtNCw0L/RgtCw0YbQuNGPINGB0LLRj9C30LDQvdC+INGBINC/0L7RgdGC0LXQv9C10L3QvdGL0Lwg0LjQt9C80LXQvdC10L3QuNGP0Lwg0YTRg9C90LrRhtC40Lgg0LjQvNC80YPQvdC40YLQtdGC0LAsINGC0L7Rh9C90LXQtSDQv9C10YDQtdGF0L7QtCDQvtGCINCy0YDQvtC20LTQtdC90L3QvtC5INC30LDRidC40YLRiyDQsiDQuiDQsNC60YLQuNCy0L3QvtC80YMg0YTQvtGA0LzQuNGA0L7QstCw0L3QuNGOINCw0LTQtNCw0L/RgtCw0YbQuNC+0L3QvdC+0LPQviDQuNC80LzRg9C90LjRgtC10YLQsC4g0KLQsNC6INC20LUg0LXRgdC70Lgg0L/QtdGA0LXQutGA0LXRgdGCINC/0YDQvtGF0L7QtNC40YIg0L3QtSDRgdC+0L7RgtCy0LXRgtGB0YLQstC40Lgg0YEg0LLQvtC30YDQsNGB0YLQvdGL0LzQuCDQvdC+0YDQvNCw0LzQuCDRjdGC0L4g0LzQvtC20LXRgiDRg9C60LDQt9Cw0YLRjCDQvdCwINC40L3RhNC10LrRhtC40L7QvdC90YvQtSDQt9Cw0LHQvtC70LXQstCw0L3QuNGPLCDQsNC90LXQvNC40Y8g0Lgg0YIu0LQu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2 ответ. Это происходит из за баланса образовния кровяных клеток и их потребление.</text:p>
          </table:table-cell>
          <table:table-cell office:value-type="float" office:value="0" table:style-name="ce1">
            <text:p>0</text:p>
          </table:table-cell>
          <table:table-cell table:number-columns-repeated="16376"/>
        </table:table-row>
        <table:table-row table:style-name="ro1">
          <table:table-cell office:value-type="float" office:value="1067007" table:style-name="ce1">
            <text:p>1067007</text:p>
          </table:table-cell>
          <table:table-cell office:value-type="string" table:style-name="ce1">
            <text:p>russian</text:p>
          </table:table-cell>
          <table:table-cell office:value-type="string" table:style-name="ce1">
            <text:p>Билет 34.&amp;lt;br /&amp;gt; 1.Назовите особенности частоты пульса у новорожденных и детей раннего возраста. С чем это связано?&amp;lt;br /&amp;gt; 2. Новорожденному 5 дней, родился в срок. Вес при рождении 3400 кг, рост 52 см. Состояние удовлетворительное. Закричал сразу. В общем анализе крови нейтрофилов 45%, лимфоцитов 45%. Почему эти показатели в крови одинаковые? &amp;lt;br /&amp;gt;</text:p>
          </table:table-cell>
          <table:table-cell office:value-type="string" table:style-name="ce1">
            <text:p>MSkg0KfQsNGB0YLQvtGC0LAg0YMg0L3QvtCy0L7RgNC+0LbQtNC10L3QvdGL0YUg0LfQvdCw0YfQuNGC0LXQu9GM0L3QviDQstGL0YjQtSDRh9C10Lwg0YMg0LLQt9GA0L7RgdC70YvRhSwg0L7QvSDRgdC+0YHRgtCw0LLQu9GP0LXRgiAxMjAtMTYwINGD0LTQsNGA0L7QsiDQsiDQvNC40L3Rg9GC0YMuINCjINC00LXRgtC10Lkg0YLQsNC6INC20LUg0LLRi9GB0L7QutCw0Y8g0YfQsNGB0YLQvtGC0LAg0L/Rg9C70YzRgdCwLCDQv9C+0YHRgtC10L/QtdC90L3QviDRgdC90LjQttCw0LXRgtGB0Y8g0YEg0LLQvtC30YDQsNGB0YLQvtC8LiDQrdGC0L4g0YHQstGP0LfQsNC90L4g0YEg0LLRi9GB0L7QutC+0Lkg0L/QvtGC0YDQtdCx0L3QvtGB0YLRjNGOINCyINC60LjRgdC70L7RgNC+0LTQtSDQuCDQstGL0YHQvtC60L7QuSDRgdC60L7RgNC+0YHRgtGM0Y4g0L7QsdC80LXQvdCwINCy0LXRidC10YHRgtCyINGDINC90L7QstC+0YDQvtC20LTQtdC90L3Ri9GFLCDQsCDRgtCw0LrQttC1INGBINC90LXQt9GA0LXQu9C+0YHRgtGM0Y4g0LLQtdCz0LXRgtCw0YLQuNCy0L3QvtC5INC90LXRgNCy0L3QvtC5INGB0LjRgdGC0LXQvNGLLjxiciAvPg0KMinQoyDQvdC+0LLQvtGA0L7QttC00LXQvdC90YvRhSDQvdCwIDQtNdC5INC00LXQvdGMINC/0YDQvtC40YHRhdC+0LTQuNGCICLQv9C10YDQstGL0Lkg0L/QtdGA0LXQutGA0LXRgdGCIiDQu9C10LnQutC+0YbQuNGC0LDRgNC90L7QuSDRhNC+0YDQvNGD0LvRiy4g0K3RgtC+INGE0LjQt9C40L7Qu9C+0LPQuNGH0LXRgdC60L7QtSDRj9Cy0LvQtdC90LjQtSDQv9GA0Lgg0LrQvtGC0L7RgNC+0Lwg0LrQvtC70LjRh9C10YHRgtCy0L4g0L3QtdC50YLRgNC+0YTQuNC70L7QsiDQuCDQu9C40LzRhNC+0YbQuNGC0L7QsiDQsiDQv9GA0L7RhtC10L3RgtC90L7QvCDRgdC+0L7RgtC90L7RiNC10L3QuNC4INGB0YLQsNC90L7QstC40YLRgdGPINC/0YDQuNC80LXRgNC90L4g0L7QtNC40L3QsNC60L7QstGL0LwuINCU0L4g0Y3RgtC+0LPQviDQv9GA0LXQvtCx0LvQsNC00LDRjtGCINC90LXQudGC0YDQvtGE0LjQu9GLLCDQsCDQv9C+0YHQu9C1IC0g0LvQuNC80YTQvtGG0LjRgtGLLiDQrdGC0L7RgiDQv9C10YDQtdC60YDQtdGB0YIg0YHQstGP0LfQsNC9INGBINC/0LXRgNC10YHRgtGA0L7QudC60L7QuSDQuNC80LzRg9C90L3QvtC5INGB0LjRgdGC0LXQvNGLINC/0L7RgdC70LUg0YDQvtC20LTQtdC90LjRjyDQuCDQsNC00LDQv9GC0LDRhtC40LXQuSDQuiDQstC90LXQutGD0YLRgNC+0LHQvdC+0Lkg0LbQuNC30L3QuC4=</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Пульс у новорожденных аритимичен. Плагиат составил 18%, Согласно лиги честности оценка снижена на 5%</text:p>
          </table:table-cell>
          <table:table-cell office:value-type="float" office:value="5" table:style-name="ce1">
            <text:p>5</text:p>
          </table:table-cell>
          <table:table-cell table:number-columns-repeated="16376"/>
        </table:table-row>
        <table:table-row table:style-name="ro1">
          <table:table-cell office:value-type="float" office:value="1067016" table:style-name="ce1">
            <text:p>1067016</text:p>
          </table:table-cell>
          <table:table-cell office:value-type="string" table:style-name="ce1">
            <text:p>russian</text:p>
          </table:table-cell>
          <table:table-cell office:value-type="string" table:style-name="ce1">
            <text:p>Билет 34.&amp;lt;br /&amp;gt; 1.Назовите особенности частоты пульса у новорожденных и детей раннего возраста. С чем это связано?&amp;lt;br /&amp;gt; 2. Новорожденному 5 дней, родился в срок. Вес при рождении 3400 кг, рост 52 см. Состояние удовлетворительное. Закричал сразу. В общем анализе крови нейтрофилов 45%, лимфоцитов 45%. Почему эти показатели в крови одинаковые? &amp;lt;br /&amp;gt;</text:p>
          </table:table-cell>
          <table:table-cell office:value-type="string" table:style-name="ce1">
            <text:p>MS7QoyDQvdC+0LLQvtGA0L7QttC00LXQvdC90YvRhSDQuCDQtNC10YLQtdC5INGA0LDQvdC90LXQs9C+INCy0L7Qt9GA0LDRgdGC0LAg0YHQtdGA0LTQtdGH0L3QviDRgdC+0YHRg9C00LjRgdGC0LDRjyDRgdC40YHRgtC10LzQsCDRgNC10LPRg9C70LjRgNGD0LXRgtGB0Y8g0L/RgNC10LjQvNGD0YnQtdGB0YLQstC10L3QvdC+INGB0LjQvNC/0LDRgtC40YfQtdGB0LrQvtC5INC90LXRgNCy0L3QvtC5INGB0LjRgdGC0LXQvNC+0Lks0YLQvtCz0LTQsCDQutCw0Log0LLQu9C40Y/QvdC40LUg0L/QsNGA0LDRgdC40LzQv9Cw0YLQuNGH0LXRgdC60L7QuSDQsiDRh9Cw0YHRgtC90L7RgdGC0Lgs0LHQu9GD0LbQtNCw0Y7RidC10LPQviDQvdC10YDQstCwLNC10YnQtSDQvdC1INC00L7RgdGC0LDRgtC+0YfQvdC+INGA0LDQt9Cy0LjRgtCwLtCSINGB0LLRj9C30Lgg0YEg0Y3RgtC40Lwg0YMg0LzQsNC70YvRiNC10Lkg0YfQsNGB0YLQvtGC0LAg0YHQtdGA0LTQtdGH0L3Ri9GFINGB0L7QutGA0LDRidC10L3QuNC5INC30L3QsNGH0LjRgtC10LvRjNC90L4g0LLRi9GI0LUs0L/QviDRgdGA0LDQstC90LXQvdC40Y4g0YHQviDQstC30YDQvtGB0LvRi9C80Lgu0K3RgtC+INGB0LLRj9C30LDQvdC+INGBINGC0LXQvCzRh9GC0L4g0L/RgNC+0LjRgdGF0L7QtNC40YIg0LzQuNC10LvQuNC90LjQt9Cw0YbQuNGPINCy0L7Qu9C+0LrQvtC9INCx0LvRg9C20LTQsNGO0YnQtdCz0L4g0L3QtdGA0LLQsCzQutC+0YLQvtGA0YvQuSDQvtGC0LLQtdGH0LDQtdGCINC30LAg0YLQvtGA0LzQvtC30L3QvtC1INCy0LvQuNGP0L3QuNC1INC90LAg0YHQtdGA0LTQtdGH0L3Rg9GOINC00LXRj9GC0LXQu9GM0L3QvtGB0YLRjCDQt9Cw0LLQtdGA0YjQsNC10YLRgdGPINGC0L7Qu9GM0LrQviDQuiAzLTQg0LPQvtC00LDQvCDQttC40LfQvdC4LNC/0L4g0LzQtdGA0LUg0YHQvtC30YDQtdCy0LDQvdC40Y8g0L/QsNGA0LDRgdC40LzQv9Cw0YLQuNGH0LXRgdC60L7QuSDRgNC10LPRg9C70Y/RhtC40Lgg0Lgg0YPQstC10LvQuNGH0LXQvdC40Y8g0LDQutGC0LjQstC90L7RgdGC0Lgg0LHQu9GD0LbQtNCw0Y7RidC10LPQviDQvdC10YDQstCwINC/0YDQvtC40YHRhdC+0LTQuNGCINGB0L3QuNC20LXQvdC40Y8g0YfQsNGB0YLQvtGC0Ysg0YHQtdGA0LTQtdGH0L3Ri9GFINGB0L7QutGA0LDRidC10L3QuNC5LtCSINGN0YLQvtC8INCy0L7Qt9GA0LDRgdGC0LUg0YMg0YDQtdCx0LXQvdC60LAg0LzQvtC20LXRgiDQvdCw0LHQu9GO0LTQsNGC0YzRgdGPINGB0LjQvdGD0YHQvtCy0LDRjyDQsNGA0LjRgtC80LjRjyzQutC+0YLQvtGA0YvQuSDQvdC+0YHQuNGCINGE0LjQt9C40L7Qu9C+0LPQuNGH0LXRgdC60LjQuSDRhdCw0YDQsNC60YLQtdGAINC4INGH0LDRidC1INCy0YHQtdCz0L4g0L/RgNC+0Y/QstC70Y/QtdGC0YHRjyDQsiDQstC40LTQtSDQtNGL0YXQsNGC0LXQu9GM0L3QvtC5INCw0YDQuNGC0LzQuNC4LNGD0YfQsNGJ0LXQvdC90L7QtSDRgdC10YDQtNGG0LXQsdC40LXQvdC40LUg0L3QsCDQstC00L7RhdC1INC4INC30LDQvNC10LTQu9C10L3QuNC1INC90LAg0LLRi9C00L7RhdC1LNGN0YLQviDRgdGH0LjRgtCw0LXRgtGB0Y8g0LLQsNGA0LjQsNC90YLQvtC8INC90L7RgNC80Ysg0YMg0LTQtdGC0LXQuSDRgdGC0LDRgNGI0LUgMyDQu9C10YIg0Lgg0L7RgtGA0LDQttCw0LXRgiDRhNC+0YDQvNC40YDQvtCy0LDQvdC40LUg0L/QvtC70L3QvtGG0LXQvdC90L7Qs9C+INCy0LXQs9Cw0YLQsNGC0LjQstC90L7Qs9C+INC60L7QvdGC0YDQvtC70Y8g0L3QsNC0INGA0LDQsdC+0YLQvtC5INGB0LXRgNC00YbQsC4gMi7QndCwIDUtNiDRgdGD0YLQutC4INC20LjQt9C90Lgg0L/RgNC+0LjRgdGF0L7QtNC40YIg0L/QtdGA0LLRi9C5INGE0LjQt9C40L7Qu9C+0LPQuNGH0LXRgdC60LjQuSDQv9C10YDQtdC60YDQtdGB0YIg0LvQtdC50LrQvtGG0LjRgtCw0YDQvdC+0Lkg0YTQvtGA0LzRg9C70Ys60L/RgNC+0YbQtdC90YLQvdC+0LUg0YHQvtC+0YLQvdC+0YjQtdC90LjQtSDQvdC10LnRgtGA0L7RhNC40LvQvtCyINC4INC70LjQvNGE0L7RhtC40YLQvtCyINGB0YDQsNCy0L3QuNCy0LDQtdGC0YHRjy7QrdGC0L4g0YHQstGP0LfQsNC90L4g0YEg0YDQsNC30L3QvtC5INC/0YDQvtC00L7Qu9C20LjRgtC10LvRjNC90L7RgdGC0YzRjiDQttC40LfQvdC4INC4INGE0YPQvdC60YbQuNC10Lkg0LvQtdC50LrQvtGG0LjRgtC+0LIu0J/RgNC4INGA0L7QttC00LXQvdC40Lgg0L/RgNC10L7QsdC70LDQtNCw0Y7RgiDQvdC10LnRgtGA0L7RhNC40LvRiyAo0YDQtdCw0LrRhtC40Y8g0L3QsCDRgNC+0LTQvtCy0L7QuSDRgdGC0YDQtdGB0YEg0L/RgNC+0LjRgdGF0L7QtNC40YIpLNC90L4g0L7QvdC4INCx0YvRgdGC0YDQviDQv9C+0LPQuNCx0LDRjtGCICjQuNGFINC/0YDQvtC00L7Qu9C20LjRgtGC0LXQu9GM0L3QvtGB0YLRjCDQttC40LfQvdC4INGB0L7RgdGC0LDQstC70Y/QtdGCIDQtOSDQtNC90LXQuSku0JvQuNC80YTQvtGG0LjRgtGLINC90LDQv9GA0L7RgtC40LIg0LjQvNC10Y7RgiDQtNC70LjRgtC10LvRjNC90YPRjiDQttC40LfQvdGMICjQtNC+IDQtNSDQu9C10YIpINC40YUg0YfQuNGB0LvQviDQvdCw0YDQsNGB0YLQsNC10YIu0KLQsNC6INGE0L7RgNC80LjRgNGD0LXRgtGB0Y8g0L/QtdGA0LXQutGA0LXRgdGCLiDQkiDQtNCw0LvRjNC90LXQudGI0LXQvCwg0LrQviDQstGC0L7RgNC+0LzRgy3RgtGA0LXRgtGM0LXQvNGDINCz0L7QtNGDINC20LjQt9C90Lgg0LvQuNC80YTQvtGG0LjRgtGLINC/0YDQtdC+0LHQu9Cw0LTQsNGO0YIs0LAg0LLRgtC+0YDQvtC5INC/0LXRgNC10LrRgNC10YHRgiDQvdCw0LHQu9GO0LTQsNC10YLRgdGPINCyINCy0L7Qt9GA0LDRgdGC0LUgNC01INC70LXRgi7QotC+0LPQtNCwINCy0L3QvtCy0Ywg0L3QsNGH0LjQvdCw0Y7RgiDQv9GA0LXQvtCx0LvQsNC00LDRgtGMINC90LXQudGC0YDQvtGE0LjQu9GLLdC60LDQuiDRgyDQstC30YDQvtGB0LvQvtCz0L4g0YfQtdC70L7QstC10LrQs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90" table:style-name="ce1">
            <text:p>914690</text:p>
          </table:table-cell>
          <table:table-cell office:value-type="string" table:style-name="ce1">
            <text:p>english</text:p>
          </table:table-cell>
          <table:table-cell office:value-type="string" table:style-name="ce1">
            <text:p>Ticket 34.&amp;lt;br /&amp;gt; 1. Specify the special features of frequency of pulse in newborns and in infants. Why is that? &amp;lt;br /&amp;gt; 2. A newborn is 5 days old, born on time. Birth weight 3400 kg, height 52 cm. Condition is satisfactory. Screamed immediately. In the general analysis of blood neutrophils 45%, lymphocytes 45%. What day is this happening? Why are these blood counts the same?&amp;lt;br /&amp;gt;</text:p>
          </table:table-cell>
          <table:table-cell office:value-type="string" table:style-name="ce1">
            <text:p>MSkgIHNwZWNpYWwgZmVhdHVycmVzIG9mIHBsdXMgZnJlcXVlbmN5IGluIG5ld2Jvcm4gYW5kIGluZmZhbnQ7IG5ldyBib3JuICgwLTI4IGRheXMgKSAsLiAgICAgICAgICAgICAgICAgICAgICAgICAgICAgICAgICAgICAgICAgPGJyIC8+DQogICAgbm9ybWFsIHBsdXMgcmFuZ2VlIDsgMTIwLTE2MCBiZWF0cyBwZXIgbWludXRlKGJwbSkgYXQgcmVzdCAuLC4gIHJlYXNvbjsgbmVvb25hdGVzIGhhdmUgYSBoaWdoZXIgYmFzZWxpbmUgaGVhcnQgcmF0ZSBkdWUgdG8gcGh5c3Npb2xvZ2ljYWwgYWRhcHRhdGlvbiBvZiB0aGUgY2FyZGlvdmFzY3VsYXIgc3lzdGVtIGR1cmluZyB0aGUgdHJhbnN0aW9uIGZyb20gIGZlYXRhbCB0byBuZW9uYXRlbCBsaWZlIC4sLiAgICAgICAgICAgICAgICAgICAgICA8YnIgLz4NCiAgICAgaW5mYW50cyAoIDEgbW9udGggLSAxIHllYXIpICBub3JtYWwgcGx1cyByYW5uZ2UgMTAwLTE1MCBicG0gYXQgcmVzdCAuLC4gcmVhc29uOyBhcyBpbmZhbnQgZ3Jvd3MsIHRoYSB0aGUgaGVhcnQgcmF0ZWUgZ3JhZHVhbGx5IGRlY3JlYXNlZSBidXQgcmVtYWlucyByZWxhdnR0aXZlbHkgaGlnaGVyIGNvbXBhaXJlZCB0byBvbGRlciBjaGlpbGRyZW4gYW5kIGFkdWx0cy4sLiB0aGlzIGlzIGluZmx1ZW5jZWQgYnkgdGhlaXIgc21hbGxlciBoZWFydCBzaXplIGFuZCBoaWdoZXIgbWV0YWJvbGlzc20gZGVtYW5kLiwu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gICAgIDxiciAvPg0KMikgICBuZXdib3JuIGF0IDUgZGF5cyBvbGQgd2l0aCBibG9vZCBjb3VubnRzOywuIGRheSBvZiBvYnNlcnJ2YXRpb247IHRoZSBkZXNjcmliZWQgc2NlbmFyaWlvIGlzIGxpa2VsbHkgaGFwcGVuaW5nIG9uIHRoZSA1dGggZGF5IG9mIGxpZmUgZm9yIHRoZSBuZXcgYm9ybi4sLiBibG9vZCBjb3VubnRzIGV4cGxhdGlvbjssLiAgICAgICAgICAgICAgICAgICAgICAgICAgICAgICAgICAgICAgICAgICAgICAgICAgICAgICAgICAgICAgICAgICAgICAgICAgICAgICAgICAgICAgPGJyIC8+DQogICAgbmV1dHJvcGhpbGUgKCA0NSUpOyBuZXV0cm9waGlpbGUgYXJlIHRoZSBwcmVlZG9taW5lbnQgd2hpdGUgYmxvb2QgY2VsbCBpbnZvbHZlZCBpbiB0aGUgaW5uYXRlIGltbXVuZSByZXNwb25zZSwuLiB0aGlzIGVsZXZhdGVkIGNvdW50IG1heSBiZSBhIHJlc3BvbnNlIHRvIHRoZSBwaHlzaW9sb2dpY2FsIHN0cmVzcyBvZiBiaXJ0aCBhbmQgYWRhcHR0YXRpb24gb2YgdGhlIG5ldyBlbnZpcm9ubWVudC4sLiAgICAgICAgICAgICAgICAgICAgICAgICAgICAgICAgICAgICAgIDxiciAvPg0KICAgICBseW1waG9jeXR0ZXMgKCA0NSUpIDsgbHltcGhvY3l0ZXMgYXJlIGFub3RoZXIgdHlwZXMgb2Ygd2hpdGUgYmxvb2QgY2VsbCBpbnZvbGx2ZWQgaW4gdGhlIGltbXVuZSByZXNwb25zZS4gdGhlIGJhbGVuY2VlZCBjb3VudCB3aXRoIG5ldXRyb3BoaWlsZSBpcyBhIG5vcm1hbGwgcmVwcmVzZW50YXRpb24gb2YgdGhlIGltbXVuZWUgc3lzdHRlbXMgcmVzcG9uc2l2ZW5lc3MgaW4gYSBoZWFsdGh5IG5ld2Jvcm4uLiwgICAgICAgICAgICAgICAgICAgICAgICAgICAgPGJyIC8+DQogICAgICBub3RlczsgYmxvb2QgY291bnQgaW4gYSBuZXd3Ym9ybiBjYW4gdmFycnkgaW4gYSBlYXJseSBkYXlzIG9mIGxpaWZlIGFzIHRoZSBpbW11bmUgc3lzdGVtIGFkYXB0IHRvbyBleHRlcm5hbCBmYWN0b3IuLC4=</text:p>
          </table:table-cell>
          <table:table-cell office:value-type="float" office:value="170348" table:style-name="ce1">
            <text:p>170348</text:p>
          </table:table-cell>
          <table:table-cell office:value-type="float" office:value="68" table:style-name="ce1">
            <text:p>68</text:p>
          </table:table-cell>
          <table:table-cell office:value-type="string" table:style-name="ce1">
            <text:p>Your answer is not written completely and there are many spelling errors in the form of many punctuation marks.</text:p>
          </table:table-cell>
          <table:table-cell office:value-type="float" office:value="0" table:style-name="ce1">
            <text:p>0</text:p>
          </table:table-cell>
          <table:table-cell table:number-columns-repeated="16376"/>
        </table:table-row>
        <table:table-row table:style-name="ro1">
          <table:table-cell office:value-type="float" office:value="914706" table:style-name="ce1">
            <text:p>914706</text:p>
          </table:table-cell>
          <table:table-cell office:value-type="string" table:style-name="ce1">
            <text:p>english</text:p>
          </table:table-cell>
          <table:table-cell office:value-type="string" table:style-name="ce1">
            <text:p>Ticket 34.&amp;lt;br /&amp;gt; 1. Specify the special features of frequency of pulse in newborns and in infants. Why is that? &amp;lt;br /&amp;gt; 2. A newborn is 5 days old, born on time. Birth weight 3400 kg, height 52 cm. Condition is satisfactory. Screamed immediately. In the general analysis of blood neutrophils 45%, lymphocytes 45%. What day is this happening? Why are these blood counts the same?&amp;lt;br /&amp;gt;</text:p>
          </table:table-cell>
          <table:table-cell office:value-type="string" table:style-name="ce1">
            <text:p>MS4gc3BlY2lhbCBmZWF0dXJlcyBvZiBwdXNsZSBmcmVxdWVuY3kgaW4gbmV3Ym9ybiBhbmQgaW5mYW50cyAuICAgICAgICAgICAgICAgICAgICAgICAgICAgICAgICAgICAgICAgICAgICAgICAgICAgICAgICAgICAgICAgICAgICAgICAgICAgICAgICAgICAgICAgICAgICAgbmV3Ym9ybiAwLTI4IGRheXMgLG5vcm1hbCBwdXNsZSByYW5nZSAxMjAtMTYwIGJlYXRzIHBlciBtaW51dGUgYXQgcmVzdCBiZWFjdXNlIG5lb2xpbmUgaGF2ZSBhIGhpZ2hlciBiYXNlbGluZSBoZWFydCByYXRlIGR1ZSB0byB0aGUgcGh5c2lvbG9naWNhbCBhZGFwdGF0aW9uIG9mIHRoZSBjYXJkaW92YXNjdWxhciBzeXN0ZW0gZHVyaW5nIHRoZSB0cmFuc2l0aW9uIGZyb20gZmV0YWwgdG8gdGhlIG5lb3RhbCBsaWZlIC4gICAgICAgICAgICAgICAgICAgICAgICAgICAgICAgICAgIGluZmFudHMgMSBtb250aCB0byAxIHllYXIgLSBub3JtYWwgcHVsc2UgcmFuZ2UgMTAwIC0gMTUwIGJwbSBhdCByZXN0IC4gYmVjYXVzZSBpbiBpbmZhbnRzIGdyb3cgdGhlIGhlYXJ0IHJhdGUgZ3JhZHVsbGF5IGRlY3JlYXNlcyBidXQgcmVtYWlucyByZWxhdGl2ZWx5IGhpZ2hlciBjb21wYXJlZCB0byBvbGRlciBjaGlsZHJlbnMgYW5kIGFkdWx0cyAsIHloaXMgaXMgaW5mbHVlbmNlZCBieSBub3JtYWwgaGVhcnQgc2l6ZSBhbmQgaGlnaGVyIG1ldGFib2xpYyBkZW1hbmRzICwuICAgICAgICAgICAgICAgICAgICAgICAgICAgICAgICAgICAgICAgICAgICAgICAgICAgICAgICAgICAgICAgICAgICAgICAgICAgICAgICAgICAgICAgICAgICAgICAgICAgICAgICAgICAgICAgICAgICAgICAgICAgICAgICAgICAgICAgICAgICAyLiBuZXdib3JuIGF0IDUgZGF5cyB3aXRoIGJsb29kIGNvdW50cyAtIGRheXMgb2Ygb2JzZXJ2YXRpb24gdGhleSBkZXNjcmliZWQgc2NlbmFyaW8gaXMgbmxpa2VseSBoYXBwZW5pbmcgb24gdGhlIDUgZGF5IG9mIHRoZSBsaWZlIG9mIHRoZSBuZXdib3JuIC4sICAgZXhwbGFpbiB0aGUgYmxvb2QgY291bnRzIC0gIG5ldXRyb3BoaWxscyA0NSUgICwgbmV1dHJvcGhpbGxzIGFyZSBwcmVkb21pbmFudCB3aGl0ZSBibG9vZCBjZWxscyBpbnZvbHZlZCBpbiB0aGUgaW5uYXRlIGltbXVuZSByZXNwb25zZSAsIHRoZWlyIGVsZXZhdGVkIGNvdW50IG1heSBiZSByZXNwb25zZSB0byB0aGUgcGh5c2lvbG9naWNhbCBzdHJlc3Mgb2YgYmlydGggYW5kIGFkYXB0YXRpb24gdG8gdGhlIG5ldyBlbnZpb3JubWVudCAuLCAgbHltcGhvY3l0ZXMgNDUlIGFyZSBhbm90aGVyIHR5cGUgb2Ygd2hpdGUgYmxvb2QgY2VsbHMgaW52b2x2ZWQgaW4gdGhlIGltbXVuZSByZXNwb25zZSB0aGUgYmFsYW5jZWQgY291bnQgd2l0aCB0aGUgbmV1dHJvcGhpbGxzIGlzIGEgbm9ybWFsIHJlcHJlc2VudGF0aW9uIG9mIHRoZSBpbW11bmUgc3lzdGVtICwgcmVzcG9uc2l2ZW5lc3MgaW4gYSBoZWFsdGh5IG5ld2Jvcm4gLiAgICAgICAgICAgICAgICAgICAgICAgICAgICAgICAgICAgICAgICAgICAgICAgICAgICAgICAgICAgICAgICAgICBibG9vZCBjb3VudHMgaW4gdGhlIG5ld2Jvcm5zIGNhbiB2YXJ5IGluICB0aGUgZWFybHkgZGF5cyBvZiBsaWZlIGFzIHRoZSBpbW11bmUgYWRhcHRzIHRvIHRoZSBleHRlcm5hbCBmYWN0b3JzL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70" table:style-name="ce1">
            <text:p>915070</text:p>
          </table:table-cell>
          <table:table-cell office:value-type="string" table:style-name="ce1">
            <text:p>english</text:p>
          </table:table-cell>
          <table:table-cell office:value-type="string" table:style-name="ce1">
            <text:p>Ticket 34.&amp;lt;br /&amp;gt; 1. Specify the special features of frequency of pulse in newborns and in infants. Why is that? &amp;lt;br /&amp;gt; 2. A newborn is 5 days old, born on time. Birth weight 3400 kg, height 52 cm. Condition is satisfactory. Screamed immediately. In the general analysis of blood neutrophils 45%, lymphocytes 45%. What day is this happening? Why are these blood counts the same?&amp;lt;br /&amp;gt;</text:p>
          </table:table-cell>
          <table:table-cell office:value-type="string" table:style-name="ce1">
            <text:p>MSlzcGVjaWFsIGZlYXR1cmUgb2YgdGhlIHB1bHNlIGZyZXF1ZW5jeSBvZiB0aGUgbmV3IGJvcm4gYW5kIGluZmFudHMgKDAtMjggREFZUyBOT1JNQUwgUHVMU0UgUkFOR0UgMTIwLTE2MCBiZXRlIHBlciBtaW51dGVzIGF0IHJlc3QgcmVhc29uIG5lb25hdGVzIGhhdmUgaGlnaGVyIGJhc2VsaW5lIGhlYXJ0IHJhdGUgZHVlIHRvIHBoeWlvbG9naWNhbCBhZGFwdGlvbiBvZiB0aGUgY2FyZGlvdmFzdWNhbHVyIHN5c3RlbSBkdXJpbmcgdGhlIHRyYW5zaXRpb24gZnJvbSBmZXRhdGwgdG8gbmVvbmF0ZXMgaW5mYW50cyAoIDEgbW9udGggdG8gMSB5ZWFyICkgIG5vcm1hbCBwdWxzZSByYW5nZSAxMDAgLSAxNTAgQlBNIEFUIFJFU1QgLFJFQVNPTiBBUyBJTkZBTlRTICBHUk9XIEFORCBUSEUgSEVTUlQgUkFURSBHUkFEVUxMQVkgREVDUkVTRSBCVVQgUkVNQUlOIFJFQUxUSVZFTFkgSElHSEVSIENPTVBBUkVEIFRPIFRIRSBPTERFUiBDSElMREVSIEFORCBBRFVMVFMgVEhJUyBJTkZMVUNFRCBCWSBUSEUgU01BTExFUiBIRUFSVCBTSVpFIEFORCBISUdIRVIgTUVUQUJPTElDIEFDVElWSVRZIGRlbWFuZCAyKSBuZXdib3JuIGF0IDUgZGF5cyBvbGQgaXMgYmxvb2QgY291bnQgIGRheSBvZiBvYnNlcnZhdGlvbiB0aGUgZGVzY3JpYmUgc2NhNHJpbmlvIGlzIGxpa2VseSBoYXBwZW4gb24gdGhlIDUgZGF5IG9mIHRoZSBsaWZlIGZvciB0aGUgbmV3Ym9ybiBibG9vZCBibG9vZCBjb3VudCBleHBsYXRpb24gbmV1dHJvcGhpbCBpcyA0NSUgbmV1dHJvcGhpbCBhcmUgcHJlZG9taW5lbnQgd2hpdGUgYmxvb2QgY2VsbCBhcmUgaW52bHZlZCBhcmUgaW4gdGhlIGlubmF0ZSBpbW11bmUgcmVzcG9uc2UgdGhlcmlyIGVsZXZhdGVkIGNvdW50ICxtYXkgYmUgcmVzcG9uc2UgdG8gdGhlIHBoeWlvbG9naWNhbCBzdHJlc3MgYmlydGggYW5kIGFkcHRpb24gdG8gdGhlIG5ldyBlbnZpb3JtZW50IGx5bXBvY3l0ZXMgaXMgNDUlIGx5bXBvY3RlcyBhcmUgYW5vdGhlciB0eXBlIG9mIHdoaXRlIGJsb29kIGNlbGwgaW52bHZlZCBpbiB0aGUgaW1tdW5lIHJlc3BvbnNlIHRoZSBibGFuY2VkIGNvdW50IHdpdGggaXMgbmV1dG9waGlsIGlzIGEgbm9ybWFsIHJlcHJlc2F0aW9uIG9mIHRoZSBpbW11bmUgcmVzcG9uc2UgYSByZXNwb25zaXZlIG5lc3Mgb2YgdGhlIGhlYWx0eSBuZXcgYm9ybiAgIG5vdGUgYmxvb2QgY291bnQgaW4gdGhlIG5ldyBib3JuIGNhbiB2YXJ5IGluIHRoZSBlYXJseSBkYXlzIG9mIGxpZmUgYXMgdGhlIGltbXVuZSBzeXN0ZW0gYWRhcHRzIHRvIHRoZSBleHRlcm5hbCBmYWN0b3JzLiAg</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97" table:style-name="ce1">
            <text:p>915197</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7QltCw0LvQv9GLINGW0YjQtdC6INC80LjQutGA0L7RhNC70L7RgNCw0YHRiyDQtNC10LPQtdC90ZbRltC80ZbQtyDQvtC7INCw0YHSm9Cw0LfQsNC9INGW0YjQtdC6INC20L7Qu9C00LDRgNGL0L3QtNCwINC+0YDQvdCw0LvQsNGB0pvQsNC9INGB0YvRgNGC0pvRiyDQvtGA0YLQsNC00LDQvSDQtdC90LPQtdC9INCx0LDQutGC0LXRgNC40Y/Qu9Cw0YDQtNGL0qMg0pvQsNGD0YvQvNC00LDRgdGC0YvSk9GLLtCe0Lsg0LDQtNCw0Lwg0LDSk9C30LDRgdGL0L3QsCDRgtKv0YHQutC10L0g0LDRgtGLINKb0L7RgNGL0YLRg9C00LAg0LDRgdCwINC80LDSo9GL0LfQtNGLINKb0YvQt9C80LXRgiDQsNGC0pvQsNGA0LDRgtGL0L0g0LHQvtC70YvQvyDRgtCw0LHRi9C70LDQtNGLLNC+0Lsg0LHQsNC60YLQtdGA0LjRj9C70LDRgNC00YvSoyDRhNC10YDQvNC10YLRgtGW0Log0LHQtdC70YHQtdC90LTRltC70ZbQs9GW0LzQtdC9INGB0LjQv9Cw0YIg0LDQu9Cw0LTRizvQsNGBINKb0L7RgNGL0YLRg9C00LAg0LrTqdCx0ZbQvdC10YHQtSDQutOp0qPRltC7INCx06nQu9C10YLRltC9INC20LDQudGCINC+0Lsg0LzQsNC50LvQsNGA0LTRi9KTINGL0LTRi9GA0LDRg9GL0L3QsCDSm9Cw0YLRi9GB0YPRiyDQsdC+0LvRi9C/INGC0LDQsdGL0LvQsNC00Ysu0JrQtdC70LXRgdGWINCx0ZbRgCDSm9GL0LfQvNC10YLRgtGWINGA0LXRgtGW0L3QtNC1INC+0LvQsNGA0LTRi9KjINKb0L7RgNKT0LDQvdGL0Ygg0pvRi9C30LzQtdGC0ZbQvSDQsNGC0LDQvyDTqdGC0YPQs9C1INCx0L7Qu9Cw0LTRiyzQvtC7INCx0LDQutGC0LXRgNC40Y/Qu9Cw0YDQtNGL0qMg0LDRgSDSm9C+0YDRi9GC0YMg0LbQvtC70LTQsNGA0YvQvdCwINGC0q/RgdC60LXQvSDRgtC+0LrRgdC40L3QtNC10YDQtNGWINC205nQvdC1INCx0LDRgdKb0LAg0LzQuNGA0LrQvtC+0YDQs9Cw0L3QuNC30LzQtNC10YDQvNC10L0g0LrSr9GA0LXRgdGW0L0g0LDRgtCw0L8g06nRgtGD0LPQtSDQsdC+0LvQsNC00Ysu0J7QtNCw0L0g0LHTqdC70LXQuiDQvtC70LDRgNC00YvSoyDQsdCw0YHRgtGLINKb0YvQt9C80LXRgtGWINGA0LXRgtGW0L3QtNC1IEsg0LLQuNGC0LDQvNC40L3QvdGW0L3RltKjINCw0pPQt9Cw0LTQsNKT0Ysg0YHQuNC90YLQtdC30ZbQvdC1INKb0LDRgtGL0YHQsNGC0YvQvSDQsdC+0LvRi9C/INGC0LDQsdGL0LvQsNC00Ysu0JbQsNC70L/RiyDQvdOZ0YDQtdGB0YLQtdC90ZbSoyDSm9Cw0LvRi9C/0YLRiyDQvNC40LrRgNC+0YTQu9C+0YDQsNGB0Ysg0LDQvdCw0YHRi9C90LDQvSDQsdC10YDRltC70LXQtNGWLNC+0Lsg0LDQvdCwINGB0q/RgtGW0LzQtdC9INGC0q/RgdC10YLRltC9INCx0L7Qu9GL0L8g0YLQsNCx0YvQu9Cw0LTRiy7QkNC90LAg0YHSr9GC0ZbQvNC10L0g0L3TmdGA0LXRgdGC0LUg0LDSk9C30LDRgdGL0L3QsCDQsdGA0LXQsdC40L7RgtC40LrQv9C10L0g0LHRgNC+0LHQuNC+0YLQuNC60YLQtdGAINGC0q/RgNGW0L3QtNC1INGC0q/RgdC10LTRli7Qn9GA0LXQsdC40L7RgtC40Log0LTQtdCz0LXQvdGW0LzRltC3INC+0Lsg0LHQsNC60YLQtdGA0LjQsNC70LDRgNKT0LAg0LDRgNC90LDQu9KT0LDQvSDSm9C+0YDQtdC60YLRltC6INC+0YDRgtCwICDQsNC7INC/0YDQvtCx0LjQvtGC0LjQutGC0LXRgCDQtNC10LPQtdC90ZbQvNGW0Lcg0L7QuyDQsdCw0LrRgtC10YDQuNGP0LvQsNGA0LTRi9KjINOp0LfQtNC10YDRli7QndOZ0YDQtdGB0YLQtdC90ZbSoyDQvdC10LPRltC30LPRliDQvNC40LrRgNC+0YTQu9C+0YDQsNGB0YvQvdCwINC20LDRgtCw0YLRi9C9INCx0LDQutGC0LXRgNC40Y/Qu9Cw0YAg0YDQtdGC0ZbQvdC00LUg0LHQuNGE0LjQtNC+0LHQsNC60YLQtdGA0LjRj9C70LDRgNC80LXQvSDQu9Cw0LrRgtC+0LHQsNC60YLRgNC40LDQu9Cw0YDQtNGLINCw0YLQsNC/INOp0YLRg9Cz0LUg0LHQvtC70LDQtNGLLtCd05nRgNC10YHRgtC1INC+0YDQs9Cw0L3QuNC30LzRltC90LUg0LXQvdCz0LXQvdC90LXQvSDQsdCw0YHRgtCw0L8g0L7Qu9Cw0YAg0LDRgdKb0LDQt9Cw0L0g0ZbRiNC10Log0LbQvtC70LTQsNGA0YvQvdC00LAg06nQtyDQsNC60YLQuNCy0YLRltC70ZbQs9GW0L0g0LHQsNGB0YLQsNC/INC60LXRgtC10LTRliDQttOZ0L3QtSDRhNGD0L3RhtC40L7QvdCw0LvQtNGL0pPRiyDQsdGW0YDRgtC1INCx0ZbRgNGC0LUg0YLQvtC70YvSmyDSm9Cw0LvRi9C/0YLQsNGB0YvQvyDQvtC00LDQvSDTmdGA0ZYg0LTQsNC80Lgg0YLSr9GB0LXQtNGWLtCd05nRgNC10YHRgtC10LTQtSDRltGI0LXQuiDQvNC40LrRgNC+0YTQu9C+0YDQsNGB0YvQvdGL0qMg0pvQsNC70YvQv9GC0LDRgdGD0Ysg0L7QvdGL0qMg0pvQsNC70LDQuSDQtNKv0L3QuNC10LPQtSDQutC10LvRg9GW0LzQtdC9INC00LUg0LXRgNC10LrRiNC10LvQtdC90LXQtNGWINGP0pPQvdC4INGC0LDQsdC40pPQuCDQttC+0LvQvNC10L0g0YLRg9GL0LvSk9Cw0L0g0LHQvtC70YHQsCDQvtC7INCx0LDQu9Cw0LvQsNGA0LTQsCDQvtC7INKb0LDRgNKb0YvQvdC00YvRgNCw0psg0LTQsNC80LjQtNGLINCw0Lsg0LrQtdGB0LXRgNC+0LLQsCDQsNGA0pvRi9C70Ysg0YLRg9GL0LvSk9Cw0L0g0LHQvtC70YHQsCDQvtC70LDRgNC00LAg0LHQtdC70YHQtdC90LTRltC70ZbQuiDRgdCw0LvRi9GB0YLRi9GA0LzQsNC70Ysg0YLSr9GA0LTQtSDTmdC70YHRltC3INCx0L7Qu9Cw0LTRiy7QntC00LDQvSDQsdOp0LvQtdC6INGW0YjQtdC6INC80LjQutGA0L7RhNC70L7RgNCw0YHRiyDSm9Cw0LvRi9C/0YLQsNGB0YPRi9C90LTQsCDQvNCw0qPRi9C30LTRiyDRgNOp0Lsg0YDQtdGC0ZbQvdC00LUg0pvQvtGA0YjQsNKT0LDQvSDQvtGA0YLQsNC90YvRiCDQttOZ0L3QtSDQvdOZ0YDQtdGB0YLQtdC90ZbSoyDRgtCw0LzQsNKb0YLQsNC90YPRiyDRj9KT0L3QuCDSm9C+0YHRi9C80YjQsCDSm9C+0YDQtdC60YLRltC6INC30LDRgtGC0LDRgNC00YvSoyDSm9Cw0LHRi9C70LTQsNGD0YvQtNCwINC80LDSo9GL0LfQtNGLINCx0L7Qu9GL0L8gINGC0LDQsdGL0LvQsNC00YsuICAyLtCW0LDQu9C/0Ysg0LHRltC3INCx0ZbQu9C10YLRltC90LTQtdC5INCx0q/QudGA0LXQuiDQsNKT0LfQsNC00LDSk9GLINC80LDSo9GL0LfQtNGLINKb0YvQt9C80LXRgtGC0LXRgNC00ZbSoyDQsdGW0YDRliDRgdGD0LTRi9KjINGC0LXQv9C1LdGC0LXSo9C00ZbQs9GW0L0g0YHQsNKb0YLQsNGDINKb0YvQt9C80LXRgtGW0L0g0LDRgtKb0LDRgNCw0YLRi9C9INCx0L7Qu9GL0L8g0YLQsNCx0YvQu9Cw0LTRiy7QntC7INC+0YDQs9Cw0L3QuNC30LzQs9C1INC10L3Qs9C10L0g0YHRg9C80LXQvSDQvtGA0LPQsNC90LjQt9C80L3QtdC9INGI0YvSm9Kb0LDQvSDRgdGD0LTRi9KjINCw0YDQsNKb0LDRgtGL0L3QsNGB0YvQvSDQsdGW0YAg0YjQsNC80LDQtNCwINKx0YHRgtCw0LnQtNGLLtCa06nQv9GC0LXQs9C10L0g0LbSr9C50LXQu9GW0Log0LDRgNGD0LvQsNGAINGC0rHRgdGL0L3QtNCwINC205nQvdC1INCx0q/QudGA0LXQutGC0ZbSoyDRhNGD0L3QutGG0LjQvtC90LDQu9C00YvSmyDQsdKx0LfRi9C70YvRgdGLINC60LXQt9GW0L3QtNC1INC305nRgNC00ZbSoyDSm9Cw0YHQuNC10YLRgtC10YDRltC90ZbSoyDTqdC30LPQtdGA0YPRltC9INCx0LDQudKb0LDRg9KT0LAg0LHQvtC70LDQtNGLLtCh0L7QuyDQsdGW0YAg0pvQsNGB0LjQtdGC0YLQtdGA0ZbQvdGW0qMg0LHRltGA0ZYg0YDQtdGC0ZbQvdC00LUg0L7QvdGL0qMg0LrQvtC90YbQtdC90YLRgNCw0YbQuNGP0YHRi9C9INCw0YLQsNC/INOp0YLRg9Cz0LUg0LHQvtC70LDQtNGLLNCw0Lsg0LXQvdC00ZYg0L7QuyDQtNC10LPQtdC90ZbQvNGW0Lcg0LfTmdGA0LTRltKjINGB0rHQudGL0psg0LHTqdC70ZbQs9GW0LzQtdC9INC+0L3Ri9KjINKb0rHRgNKT0LDSmyDQt9Cw0YLRgtCw0YDRi9C90YvSoyDQsNGA0LDRgdGL0L3QtNCw0pPRiyDQsNGA0LDSm9Cw0YLRi9C90LDRgdGLINCx0L7Qu9GL0L8g0YLQsNCx0YvQu9Cw0LTRiy7Qr9KT0L3QuCDQtdCz0LXRgCDQt9OZ0YDQtNC1INGB0rHQudGL0pvRgtGL0psg0LzTqdC70YjQtdGA0ZYg0LrTqdC/INCx0L7Qu9Cw0YLRi9C9INCx0L7Qu9GB0LAg0L7QuyDQutC10LfQtNC1INC305nRgCDQutC+0L3RhtC10YDRgtGA0LDRhtC40Y/RgdGL0L3Ri9KjINGC06nQvNC10L3QtNC10LPQtdC90ZbQvSDQsdCw0LnSm9Cw0Lkg0LDQu9Cw0LzRi9C3INC60LXRgNGW0YHRltC90YnQtSDQtdCz0LXRgCDSm9Kx0YDSk9Cw0psg0LfQsNGCINCw0YDRgtGC0YvQvSDQsdC+0LvRgdCwINC+0L3Ri9KjINC20L7Sk9Cw0YDQu9Cw0YPRi9C9INCw0L3Ri9Kb0YLQsNGD0pPQsCDQsdC+0LvQsNC00Ysu0KHQvtC7INGB0LXQsdC10L/RgtGWINC305nRgNC00ZYg0L7RgdGLINKb0LDRgdC40LXRgtGC0LXRgNGW0L0g0LHQsNKT0LDQu9Cw0YMg0q/RiNGW0L0g0LDQtNCw0LzQtNGLINC30LXRgNGC0YLQtdGDINC60LXQt9GW0L3QtNC1INCx0q/QudGA0LXQutGC0ZbSoyDQutC+0L3RhtC10L3RgtGA0LDRhtC40L7QvdC00YvSmyDRhNGD0L3QutGG0LjRj9GB0YvQvSDQsNC90YvSm9GC0LDQudGC0YvQvSDQsdC+0LvQsNC/INGC0LDQsdGL0LvQsNC00Ysu0JXQvdC00ZYg0LbQsNC70L/RiyDQt9OZ0YAg0LDQvdCw0LvQuNC30ZbQvdC1INGC0LDQu9C00LDRgyDQttKv0YDQs9GW0LfQtdGC0ZbQvSDQsdC+0LvRgdCw0psg0YLSr9GB0ZYg0YHQsNGA0Ysg0L7QuyDSm9Cw0LvQtNGL0L/RgtGLINCx0L7Qu9GL0L8g0YLQsNCx0YvQu9Cw0LTRizvQutC10LvQtdGB0ZYg0LrTqdGA0YHQtdGC0LrRltGIINC+0Lsg0L3TmdGA0YPRltC3INKb0LDQu9GL0L/RgtGLINC20LDSk9C00LDQudC00LAg0LfTmdGA0LTQtSDQvdOZ0YDRg9GW0Lcg0LrTqdC70LXQvNGWINOp0YLQtSDQsNC3INC90LXQvNC10YHQtSDQsdC+0LvQvNCw0YPRiyDSm9Cw0LbQtdGCINGI0LDQvNCw0LzQtdC9IDAsMDAyINC80LMg0LTQtdGB0LXQutGC0LUg0LHQvtC70LDQtNGLINCx0ZbQt9C00ZbSoyDQttCw0pPQtNCw0LnQtNCwINC+0L3Ri9KjINC305nRgNC00LUg06nRgtC1INC606nQvyDQtdC60LXQvdGW0L0g0LHQsNC50pvQsNGD0pPQsCDQsdC+0LvQsNC00Ysg0LHSsdC7INCx0q/QudGA0LXQuiDRhNGD0L3QutGG0LjRj9GB0YvQvdGL0qMg0LHSsdC30YvQu9GDINGB0LDQu9C00LDRgNGLINCx0L7Qu9GD0Ysg0LzSr9C80LrQvSDQvNGL0YHQsNC7INGA0LXRgtGW0L3QtNC1INC90LXRhNGA0L7Qv9Cw0YLQuNGP0LvQsNGA0LTRiyDQutC10LvRgtGW0YDRg9Cz0LUg0LHQvtC70LDQtNGLLNC60LXQu9C10YHRliDQutOp0YDRgdC10YLQutGW0Ygg0L7QuyDRjdGA0LjRgtGA0L7RhtC40YLRgtC10YAg0L7Qu9Cw0YDQtNCwINKb0LDQu9GL0L/RgtGLINC20LDSk9C00LDQudC00LAg0LfTmdGAINKb0rHRgNCw0LzRi9C90LTQsCDQsNC3INC806nQu9GI0LXRgNC00ZYg0pvSsdGA0LDQudC00Ysg0LHRltC30LTQtSDQvtC70LDQtNGL0qMgINC806nQu9GI0LXRgNGWINCw0LfQtNCw0L8g0LbQvtKT0LDRgNC70LDSk9Cw0L0g0LTQtdGB0LXQutGC0LUg0LHQvtC70LDQtNGLINCx0ZbRgNCw0psg0L7QvdGL0qMg0LfQuNGP0L3RiyDQsNGC0LDQvyDQsNC50YLQsNGC0YvQvdC00LDQuSDQutOp0L8g0LXQvNC10YE70LrQtdC70LXRgdGWINC606nRgNGB0LXRgtC60ZbRiCDQvtC7INCz0LjQsNC70LjQvdC00ZYg0LbTmdC90LUg0YLSr9C50ZbRgNGI0ZbQutGC0ZYg0YbQuNC70LjQvdC00YDQu9Cw0YAg0L7Qu9Cw0YAg0LHSr9C50YDQtdC60YLRltKjINKb0rHRgNGL0LvRi9C80LTRi9KbINCx0ZbRgNC70ZbQs9GW0L3RltKjINC90LXQvNC10YHQtSDQvdC10YTRgNC+0L3QvdGL0qMg0pvSsdGA0LDQvNC00LDRgSDQsdOp0LvRltC60YLQtdGA0ZYg0YLSr9GC0ZbQutGI0LXQu9C10YDRltC90ZbSoyDSm9Cx0LDRgNKT0LDQu9Cw0YDRi9C90LTQsCDQvtGA0L3QsNC70LDRgdKb0LDQvSDRjdC/0LjRgtC10LvQuNC50ZYg0LHQvtC70YvQvyDRgtCw0LHRi9C70LDQtNGLINC205nQvdC1INC+0LvQsNGA0LTRi9KjINKb0LDQt9GL0LzQtNCw0L3Rg9GLINC60LXQt9GW0L3QtNC1INC+0LvQsNGA0LTRi9KjINC305nRgNC80LXQvSDQsdGW0YDQs9C1INGB0YvRgNGC0YLSm9CwINCx06nQu9GW0L3Rg9GW0L0g0LHQsNC50pvQsNGD0LzRi9C30pPQsCDQsdC+0LvQsNC00Yss0LTQtdC80LXQuiDQsdGW0LfQtNGW0qMg0L3QsNGD0pvQsNGB0YLQsCDQvtC7INCx0q/QudGA0LXQutGC0ZbSoyDQt9Cw0pvRi9C80LTQsNC70YPRiyDQttCw0LnQu9GLINCw0LnRgtGD0Ysg0LzSr9C80LrRltC9OzEyINC20LDRgdCw0YAg0LHQsNC70LDQu9Cw0YDQtNCwINC90LXRgdC10L/RgtGW0qMg0YHQsNC70YvRgdGC0YvRgNC80LDQu9GLINGC0YvSk9GL0LfQtNGL0pPRiyDSm9Cw0LvRi9C/0YLRi9C0INGI0LDQvNCw0LzQtdC9IDEwMTAtMTA0NSDSm9Kx0YDQsNC50LTRiyDQsNC7INCx0ZbQt9C00ZbSoyDQvdCw0YPSm9Cw0YHRgtCwINC+0LsgMTAwNi3Sk9CwINGC0LXSoyDQtNC10LzQtdC6INC+0L3Ri9KjINCx0q/QudGA0LXQs9GW0L3QtNC1INCx0rHQt9GL0LvRi9GB0YLQsNGA0LTRi9KjINCx0LDRgCDQtdC60LXQvdGW0L0g0LDQvdGL0pvRgtCw0YPSk9GLINCx0L7Qu9Cw0LTRiy4g0JDQu9C00LDSk9GLINGD0LDSm9GL0YLRgtCwINCx0rHQuyDQvdCw0YPSm9Cw0YHRgtCwINKb0L7RgdGL0LzRiNCwINC30LXRgNGC0YLQtdGDINOZ0LTRltGB0YLQtdGA0ZbQvSDQttKv0YDQs9GW0LfRgyDSm9Cw0LbQtdGC0YLRltC70ZbQs9GWINCx0LDRgCzQvNGL0YHQsNC70Ysg0KPQl9CYLNCa0KI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60" table:style-name="ce1">
            <text:p>915260</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4g0JXRgNGC0LUg0LbQsNGB0YLQsNKT0Ysg0LHQsNC70LDQu9Cw0YDQtNGL0qMg0LzQuNC60YDQvtGE0LvQvtGA0LDRgdGLINCw0YEg0pvQvtGA0YvRgtGDINC/0YDQvtGG0LXRgdGW0L3QtSDSm9Cw0YLRi9GB0LDQtNGLLCDRj9KT0L3QuCDQvNC40LrRgNC+0YTQu9C+0YDQsCDQsNGB0pvQvtGA0YvRgtGDINGE0LXRgNC80LXQvdGC0YLQtdGA0ZbQvdGW0qMg0YDTqdC70ZbQvSDQttC10qPRltC70LTQtdGC0LXQtNGWLiDQkdCw0LvQsNC70LDRgNC00YvSoyDQvNC40LrRgNC+0YTQu9C+0YDQsNGB0YvQvdGL0qMg0L/QsNC50LTQsCDQsdC+0LvRg9GLINKv0Ygg0YHQsNGC0YvSk9CwINCx06nQu9GW0L3QtdC00ZYuINCR0ZbRgNGW0L3RiNGWINC60LXQt9C10qPQtNC1INCx0LDQu9Cw0LvQsNGA0LTRi9KjINCw0YHSm9Cw0LfQsNC9INGW0YjQtdC6INC20L7Qu9C00LDRgNGLINGB0YLQtdGA0LjQu9GM0LTRiyDQsdC+0LvRi9C/INGB0LDQvdCw0LvQsNC00Ysg0LDQu9KT0LDRiNKb0YsgMTAtMjIg0YHQsNKT0LDRgiDQsNGA0LDQu9GL0pPRi9C90LTQsCwg0LXQutGW0L3RiNGWINGB0LDRgtGL0YHRi9C90LTQsCDSm9Cw0LvRi9C/0YLRiyDQvNC40LrRgNC+0YTQu9C+0YDQsNC90YvSoyDQv9C+0L/Rg9C70Y/RhtC40Y/RgdGLINC/0LDQudC00LAg0LHQvtC70LAg0LHQsNGB0YLQsNC50LTRiyAxLTMg0YLTmdGD0LvRltC6INCw0YDQsNGB0YvQvdC00LAsINC80YvRgdCw0LvRiyDQsdC40YTQuNC00L7QsdCw0LrRgtC10YDQuNGP0LvQsNGALiDSrtGI0ZbQvdGI0ZYg0YHQsNGC0YvRgdGL0L3QtNCwINKb0LDQu9GL0L/RgtGLINC80LjQutGA0L7RhNC70L7RgNCw0L3Ri9KjINC/0YDQvtC70LjRhNC10YDQsNGG0LjRj9GB0Ysg0LHQvtC70LDQtNGLLCDRj9KT0L3QuCDQuNC90YTQuNGG0LjRgNC70LXQvdGDINGB0LDRgtGL0YHRiyAzLdGI0ZYg0YLTmdGD0LvRltC60YLQtdC9INC60LXQudGW0L0uINKa0LDQu9GL0L/RgtGLINGW0YjQtdC6INC80LjQutGA0L7RhNC70L7RgNCw0YHRiyDQsNGB0pvQvtGA0YvRgtGDINC205nQvdC1INCw0YHRgtGL0qMg0YHRltKj0ZbRgNGW0LvRgyDQv9GA0L7RhtC10YHRgtC10YDRltC90LUg0pvQsNGC0YvRgdCw0LTRiy4g0JDRgdKb0LDQt9Cw0L3QtNCwINCw0pvRg9GL0LfQtNCw0YDQtNGL0qMg0pvQvtGA0YvRgtGL0LvRg9GLINCx0L7Qu9Cw0YLRi9C9INCx0L7Qu9GB0LAsINGW0YjQtdC60YLQtSDQttCw0LvQv9GLINKb0L7RgNGL0YLRi9C70YMg0LbTmdC90LUg0YHRltKj0ZbRgNGW0LvRgyDRgdCw0YLRi9C70LDRgNGLINCx0LDRgdGC0LDQu9Cw0LTRiywg0L7QuyDRgtGA0LjQv9GB0LjQvSDQttOZ0L3QtSDTqdGCINCw0YDSm9Cw0YHRi9C90LTQsCwg0YHQvtC90YvQvNC10L0g0LHRltGA0LPQtSDSsdC50pvRiyDQsdC10LfRltC90ZbSoyDRgdOp0LvRliDQsNGA0pvRi9C70Ysg0pvQsNC20LXRgtGC0ZYgcEgg0L7RgNGC0LDQvdGL0qMg0pvQsNC70YvQv9GC0LDRgdGD0YvQvdCwINGB0LXQv9GC0LXRgdC10LTRli4g0JzQuNC60YDQvtGE0LvQvtGA0LAg0LDRgdKb0L7RgNGL0YLRg9C00LAg0LzQsNKj0YvQt9C00Ysg0L7RgNGL0L0g0LDQu9Cw0LTRiywg0LrQtdC50ZbQvSDRgtC+0psg0ZbRiNC10LrQutC1INC20LXRgtC60LXQvSDQutC10LfQtNC1INC+0L3QtNCwINKb0LDQttC10YLRgtGWINCy0LjRgtCw0LzQuNC90LTQtdGA0LTRltKjINGC0q/Qt9GW0LvRg9GW0L3QtSDQttOZ0L3QtSDQtdGA0YLQtSDQttCw0YHRgtCw0pPRiyDQsdCw0LvQsNC70LDRgNC00LAg0LrQtdC30LTQtdGB0L/QtdGB0LUg0LTQtSwg0LXRgdC10LnQs9C10L0g0LrQtdC30LTQtSDSm9Cw0LvRi9C/0YLRiyDQvNC40LrRgNC+0YTQu9C+0YDQsCDRiNGW0YDRgyDQv9GA0L7RhtC10YHRltC90LUg0LTQtSDSm9Cw0YLRi9GB0LDQtNGLLiDQkdCw0LvQsNC70LDRgNC00YvSoyDQu9Cw0LrRgtC+0LHQsNC60YLQtdGA0LjRj9C70LDRgNGLINCw0L3QsCDRgdKv0YLRltC90ZbSoyDSm9C+0YDRi9GC0YvQu9GD0YvQvdCwINKb0LDRgtGL0YHQsNC00YssINCw0Lsg0LHQuNGE0LjQtNC+0LHQsNC60YLQtdGA0LjRj9C70LDRgCDRgtCw0pPQsNC80LTRi9KbINKb0L7RgdGL0LzRiNCw0LvQsNGA0LzQtdC9INKb0L7RgNC10LrRgtC10L3QtNGW0YDRgyDQutC10LfRltC90LTQtSDQtNCw0LzQuNC00YsuINCc0LjQutGA0L7RhNC70L7RgNCw0L3Ri9KjINC606nQvNC10LPRltC80LXQvSDQmiwg0JExMiwg0JE2INCy0LjRgtCw0LzQuNC90LTQtdGA0ZYg0YHQuNC90YLQtdC30LTQtdC70LXQtNGWLCDRgdC+0L3Ri9C80LXQvSDSm9Cw0YLQsNGAINGB0L7QuyDQstC40YLQsNC80LjQvdC00LXRgNC00ZbSoyDRgdGW0qPRltGA0ZbQu9GD0ZbQvdC1INKb0L7Qu9Cw0LnQu9GLINC20LDSk9C00LDQuSDRgtGD0pPRi9C30LDQtNGLLiA8YnIgLz4NCjIuINCR0q/QudGA0LXQutGC0ZbSoyDQutC+0L3RhtC10L3RgtGA0LDRhtC40L7QvdC00YvSmyDRhNGD0L3QutGG0LjRj9GB0YvQvSDQsNC90YvSm9GC0LDRgyDQvNCw0pvRgdCw0YLRiyAtINCx0LDRgSDQsNGD0YDRg9KT0LAg0LbTmdC90LUg0LHQtdGCINGW0YHRltC90YPRltC90LUsINGC0LXRgNGW0L3RltKjINCx0L7Qt9Cw0YDRg9GLLNCw0pvRiNGL0LvQtNCw0L3Rg9GLLCDQsNC90LDRgdCw0YDQutCwINCx0L7Qu9GD0Ysg0LbTmdC90LUg0LfTmdGAINC806nQu9GI0LXRgNGW0L3RltKjINGC06nQvNC10L3QtNC10YPRli4g0KHQvtC90YvQvNC10L0g0pvQsNGC0LDRgCDRltGI0ZYg0q/Qu9C60LXQudCz0LXQvSwg0LHQsNGD0YvRgNGLINKb0LDQsdGL0YDSk9CwINC00L7Sk9Cw0YHRi9C90LDQvSAxINGB0LDQvdGC0LjQvNC10YLRgNCz0LUg0YjRi9KT0YvQvyDRgtKx0YAuINCR0LXRgtGC0ZbSoyDRltGB0ZbQvdGD0ZYgMTIg0LbQsNGB0LDRgCDQsdCw0LvQsNC00LAg0LHSr9C50YDQtdC6INKb0YvQt9C80LXRgtGW0L3RltKjINCx0rHQt9GL0LvRi9GB0YvQvdCwINC90LXQs9GW0LfQtNC10LnQtNGWLCDRj9KT0L3QuCDRhNC40LvRjNGC0YDQsNGG0LjRj9C70YvSmyDQsNC/0L/QsNGA0LDRgtGC0YvSoyDSm9GL0LfQvNC10YLRltC90ZbSoyDQsdKx0LfRi9C70YvRgdGC0LDRgNGL0L3QsC4g0JHQsNGBINCw0YPRgNGD0Ysg0pvQsNC90LTQsCDQvNC+0YfQtdCy0LjQvdCwINC806nQu9GI0LXRgNGW0L3RltKjINCw0YDRgtGD0YvQvdCw0L0g0YLRg9GL0L3QtNCw0YPRiyDQvNKv0LzQutGW0L0uINCk0LjQt9C40L7Qu9C+0LPQuNGP0LvRi9KbINGC0rHRgNKT0YvQtNCw0L0g0LHQsNGD0YvRgNC00YvSoyDSm9Cw0LHRi9GA0pPQsCDQtNC+0pPQsNGB0YvQvdCw0L0gMS0zINGB0LDQvdGC0LjQvNC10YLRgNCz0LUg0YjRi9KT0YPRiyDRgtC10Log0LDQu9KT0LDRiNKb0Ysg0LbRi9C70LTQsNGA0LTQsCDSk9Cw0L3QsCDQsdC+0LvQsNC00YssINGC0YPRi9C70YMg0LrQtdC30ZbQvdC00LUg0LHQsNGD0YvRgNC00YvSoyDRhNC40LfQuNC+0LvQvtCz0LjRj9C70YvSmyDSr9C70LrQtdC9INCx0L7Qu9GD0YvQvNC10L0g0YLSr9GB0ZbQvdC00ZbRgNGW0LvQtdC00ZYg0LbTmdC90LUg0YLQtdC6IDcg0LbQsNGB0pvQsCDQtNC10LnRltC90LPRliDQsdCw0LvQsNC70LDRgNC00LAg0pPQsNC90LAg0L3QvtGA0LzQsCDQsdC+0LvRi9C/INC10YHQtdC/0YLQtdC70LXQtNGWLiDQkNC7IDEyINC20LDRgdCw0YAg0LHQsNC70LDQtNCwINCx0LDRg9GL0YDQtNGL0qMg0pvQsNCx0YvRgNKT0LAg0LTQvtKT0LDRgdGL0L3QsNC9IDEg0YHQvNCz0LUg0YjRi9KT0YPRiyDQutKv0LzTmdC9INGC0YPQtNGL0YDQsNC00YsuINCX05nRgCDQsNC90LDQu9C40LfRltC90ZbSoyDQuNC90YLQtdGA0L/RgNC40YLQsNGG0LjRj9GB0Ys6INC305nRgNC00ZbSoyDRgtKv0YHRliDRgdCw0YDRiywg0pvQsNC70YvQv9GC0Ysg0LbQsNKT0LTQsNC50LTQsCDQsNKb0YjRi9C7INGB0LDRgNGLINC90LXQvNC10YHQtSDRgdCw0YDSk9GL0Ygg0LHQvtC70LDQtNGLLCDQvtC7INGB0L7QvdGL0LzQtdC9INKb0LDRgtCw0YAg0LHQsNC70LDQu9Cw0YDQtNGL0qMg0YLTmdGD0LvRltC60YLRltC6INC005nRgNC10YIg0YHQsNC90YvQvdCwINCx0LDQudC70LDQvdGL0YHRgtGLLiDQr9KT0L3QuCwgMTIg0LbQsNGB0LDRgCDQsdCw0LvQsNC90YvSoyDRgtOZ0YPQu9GW0LrRgtGW0Log0LTTmdGA0LXRgiDQvNOp0LvRiNC10YDRliA1LTYg0LTQsNC9INC60LXQvCDQsdC+0LvQvNCw0YPRiyDRgtC40ZbRgS4g0J3TmdGA0YPRi9C3INC305nRgNC00LUg0LbQvtKT0LDRgNGL0LvQsNKT0LDQvSwg0L7QuyDQsdKv0LnRgNC10Log0LDQv9C/0LDRgNCw0YLRi9C90YvSoyDSm9GL0LfQvNC10YLRltC90LTQtSDQsNKb0LDRg9C70LDRgNC00YvSoyDQv9Cw0LnQtNCwINCx0L7Qu9GD0YvQvdCwINC90LXQs9GW0LfQtNC10LnQtNGWLCDQt9OZ0YAg0YLQsNC70LTQsNC80LDRgdGL0L3QtNCwIDgsNSDQsy/QuyDQsNKb0YPRi9C3INCw0L3Ri9Kb0YLQsNC70LTRiy4g0K3RgNC40YLRgNC+0YbQuNGC0YLQtdGA0LTRltKjINC/0LDQudC00LAg0LHQvtC70YPRiyDQtNCwINCx0q/QudGA0LXQuiDQsNC/0L/QsNGA0LDRgtGL0L3Ri9KjINGB0q/Qt9Cz0ZbRiNGC0ZbQuiDSm9Cw0LHRltC70LXRgtGW0L3RltKjINCx0rHQt9GL0LvRg9GL0L3QsCDQvdC10LPRltC30LTQtdC50LTRliwg0YHQtdCx0LXQsdGWINGN0YDQuNGC0YDQvtGG0LjRgtGC0LXRgCDQsdC+0YPQvNC10L0g0LrQsNC/0YHRg9C70LDRgdGL0L3QsNC9INOp0YLQtSDQsNC70LzQsNC50LTRiywg0LrTqdGA0YMg0LDQu9Cw0qPRi9C90LTQsCAxLTIg0Y3RgNC40YLRgNC+0YbQuNGCINCx0LDRgC4g0JPQuNCw0LvQuNC90LTRliDQttOZ0L3QtSDRgtKv0LnRltGA0YjRltC60YLRliDRhtC40LvQuNC90LTRgNC70LDRgCwg0Y/Sk9C90Lgg0Y3Qv9C40YLQtdC70LjQuSDQttC+0pPQsNGA0YvQu9Cw0pPQsNC9LCDQvtC7INC00LAg0LHSr9C50YDQtdC60YLRltKjINKb0YvQt9C80LXRgtGW0L3RltKjINCx0rHQt9GL0LvRg9GL0L3QsCDQvdC10LPRltC30LTQtdC50LTRli4g0JfTmdGA0LTRltKjINGC0YvSk9GL0LfQtNGL0pPRiyAxMDA2INKT0LAg0YLQtdKjLCDQsdKx0LsgMTIg0LbQsNGB0LDRgCDSsdC7INCx0LDQu9CwINKv0YjRltC9INCw0Lcg0LHQvtC70YvQvyDQtdGB0LXQv9GC0LXQu9C10LTRliwgMTAxMtC00LXQvSDQutC10Lwg0LHQvtC70LzQsNGD0Ysg0pvQsNC20LXRgi4g0JrQtdC8INC00LXQs9C10L3QtNC1IDEwMTIg0YLRi9KT0YvQt9C00YvSm9GC0LDSk9GLINC305nRgCAxMiDQttCw0YHQsNGAINKx0Lsg0LHQsNC70LAg0q/RiNGW0L0g0pvQsNC70YvQv9GC0YssINGB0LXQsdC10LHRliDQvtC70LDRgNC00YvSoyDRgtOZ0YPQu9GW0LrRgtGW0Log0LTQuNGD0YDQtdC3INGB0LDQvdGL0L3QsCDQsdCw0LnQu9Cw0L3Ri9GB0YLRiy4g0JHRltGA0LDSmyDQv9Cw0YLQvtC70L7Qs9C40Y8g0LrQtdC30ZbQvdC00LUg0L3QtdC80LXRgdC1INCx0q/QudGA0LXQuiDQsNC/0L/QsNGA0LDRgtGL0L3Ri9KjINCx0rHQt9GL0LvRi9GB0Ysg0LrQtdC30ZbQvdC00LUg0LfTmdGA0LTRltKjINGC0YvSk9GL0LfQtNGL0pPRiyDTqdC30LPQtdGA0LXQtNGWLCDQvNGL0YHQsNC70YsgMTAwNiDRgtGL0pPRi9C30LTRi9KbIDEyINC20LDRgdCw0YAg0rHQuyDQsdCw0LvQsCDSr9GI0ZbQvSDQsNC3INCx0L7Qu9GL0L8g0LXRgdC10L/RgtC10LvQtdC00ZYu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0" table:style-name="ce1">
            <text:p>915330</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4t0JXRgNGC0LUg0LbQsNGB0YLQsNKT0YsgINCQ0YHSm9C+0YDRgtGDINC20L7Qu9GL0L3Ri9KjINC80LjQutGA0L7RhNC70LDRgNCw0YHRiyDQutOp0L/RgtC10LPQtdC9INC/0YDQvtGG0LXRgdGC0LXRgNCz0LUg0pvQsNGC0YvRgdCw0LTRiyDRgdC+0L3Ri9KjINGW0YjRltC90LXQtNC1INCw0YHRgtGLINKb0L7RgNGC0YPSk9CwINGW0YjQtdC60YLQtSDQv9Cw0YLQvtCz0LXQvdC00ZYg0YTQu9C+0YDQsNC90YvSoyDQtNCw0LzRg9GL0L3QsCDSm9Cw0YDRgdGLINC60LXQu9C10LTRliDQutC10LnQsdGW0YAg0LLQuNGC0LDQvNC40L3QtNC10YDQtNGW0qMg0YHQvtC90YvSoyDRltGI0ZbQvdC10LTQtSDQsiDQstC40YLQsNC80LjQvdGWINC80LXQvSDQuiDQstC40YLQsNC80YDQvdGWINGB0LjQvdGC0LXQt9C00LXQudC00ZYg0YTQuNC30LjQvtC70LPQs9C40Y/Ri9KbINCx0LXQu9GB0LXQvdC00qPRliDQt9Cw0YLRgtCw0YAg0LzQtdC9INGE0LXRgNC80LXQvdGC0YLQtdGAINC40L3RgtCw0LrRhtC40LrQsNGG0LjRj9GB0YvQtdC90LAg0pvQsNGC0YvRgdCw0LTRiyDRgdC90L7Ri9C80LXQvSDSm9Cw0YLQsNGAINGN0YDQuNGC0YDQvtGG0LjRgtC10YAg0LbQsNKj0LDRgNGDINC20YvQu9C00LDQvNC00YvSo9GL0L0g06nRgiDSm9GL0YjSsdGL0LvQtNCw0YDRi9C9INCx0LDRg9GL0YAt0ZbRiNC10LrRgtGW0Log0YbQuNGA0LrRg9C70Y/RhtC40Y/RgdGL0L0g0LbTmdC90LUg0YIs0LEg0L/RgNC+0YbQtdGB0YLQtdGA0LPQtSDSm9Cw0YLRi9GB0LDQtNGLINC10YDRgtC1INC20LDRgdGC0LDSk9GLINC205nQvdC1INC905nRgNC10YHRgtC10L3RltKjINGW0YjQtdCz0ZYg0LHRltGA0ZbQvdGI0ZYgMTAtMjAg0YHQsNKT0LDRgtGC0LAg0ZbRiNGW0L3QtNC1INGB0YLQtdGA0LjQu9GM0LTRliDQsdC+0LvQsNC00Ysu0JrQtdC50ZbQvSDQvNC40LrRgNC+0LDSk9C30LDQu9Cw0YDQtNGL0qMg0pvQvtC90YvRgdGC0LDQvdGD0Ysg0LbSr9GA0LXQtNGWINCw0Lsg0L7QvdGL0qMg0YLSsdGA0LDSm9GC0LDQvdGD0YsgNiDQsNC50LTQsNC9IDIg0LbQsNGB0pvQsCDQtNC10LnRltC9INC20q/RgNC10LTRliA3LTkg0YLTmdGD0LvRltC60LrQtSDSm9Cw0YDQsNC5INC00LXRliDRgdCw0YMg0LbQtdGC0ZbQu9Cz0LXQvSDQsdCw0LvQu9Cw0YAg05nQtNC10YLRgtC1INCx0LDQutGC0LXRgNC40Y/Qu9Cw0YAg0YTQu9C+0YDQsCDQv9Cw0LnQtNCwINCx0L7Qu9CwINCx0LDRgdGC0LDQudC00Ysu0J7Qu9Cw0YDQtNGL0qMg0pvQsNGC0YvQvdCw0YHRiyDRgtCw0LzQsNKb0YLQsNC90YPSk9CwINCx0LDQudC70LDQvdGL0YHRgtGLINCx0L7Qu9CwINCx0LDRgdGC0L/QsNC50LTRiyDRj9KT0L3QuCDRgtCw0LHQuNKT0Lgg0YLQsNC80LDSm9GC0LDQvdGDINC60LXQt9GW0L3QtNC1IEIuYmlmaWR1bSDQsdCw0YHRi9C80YvRgNCw0psg0LHQvtC70YHQsCDQttCw0YHQsNC90LTRiyDRgtCw0LzQsNKb0YLQsNC90LTRi9GA0YPQtNCwIGwtYWNpZG9waGlsdXMg0Y3QvdGC0LXRgNC+0LrRgtCw0L/RgCDSm9Cw0LvRi9C/0YLRiyBFLmNvbGkg0YjQsNC80LDQvNC10L0g0LHRltC/INC00LXSo9Cz0LXQudC00LUg0LHQvtC70LDQtNGLINCV0YDQtdGB0LXQtdC60YLQtdGA0LTQtSDRgtOZ0L0g0YLQsNC80LDSm9GC0LDQvdC00YvRgNGD0pPQsCDQsNGD0YvRgdKb0LDQvSDQutC10LfQtNC1INGW0YjQtdC6INC80LjQutGA0L7RhNC70LDRgNCw0YHRi9C90YvSoyDSm9Kx0YDQsNC80Ysg06nQt9Cz0LXRgNC10LTRliDRltGI0LXQuiDQvNC40LrRgNC+0YTQu9Cw0YDQsNGB0YvQvdGL0qMg0pvQsNC70YvQv9GC0LDRgdGD0YvQvSA0INC60LXQt9C10qPQs9C1INCx06nQu9C10LzRltC3IDEg0LrQtdC30LXSoyDRgtGD0YvQu9KT0LDQvdCw0L0g0LrQtdC50ZbQvSDQsNC70pPQsNGI0pvRiyDQsNC/0YLQsNKT0LAg0YHQvtC30YvQu9Cw0LTRiyDRgdGC0YDQtdC/0YLQvtC60L7QutC+INC60L7Qu9C+0L3QvtC30Y/RhtC40Y/RgdGLINCx0LDRgdGC0LDQu9Cw0LTRiyA0LTcg0LrSr9C90ZYg0LHQuNGE0LjQtNC+0LHQsNC60YLQtdGA0LjRjtC8INKb0L7QvdGL0YHRgtCw0L3QsNC00YsgMiDQutC10LfQutKjINCw0L3QsCDRgdKv0YLRltC80LXQvSDRgtCw0LzQsNKb0YLQsNC90LTRi9GA0YMg0LrQtdC30ZbQvdC00LUg0LHQvtC70LDQtNGLINC+0YHRiyDQutC10LfQtdKj0LTQtSDQsdC40YTQuNC+0LHQsNC60YLQtdGA0LjRjtC8INGB0LDQvdGLINCw0YDRgtCw0LTRiyAzINC60LXQt9C10qMg0LXQvNGI0LXQuiDRgdKv0YLSo9C80LXQvSDRgtCw0LzQsNKb0YLQsNC90LbRi9GA0YMg0YLQvtKb0YLQsNC60pPQsNC9INC60LXQt9C00LUg0LbRltC90LUg0LXRgNC10YHQtdC60YLQtdGAINGC0LDQvNCw0YvQvdCwINOp0YLQutC10L0g0LrQtdC30LUg0LHQvtC70LTRiyA0INC60LXQt9C10qPQtNC1INC10YDQtdGB0LXQutGC0LXRgCDRgtCw0LzQsNKT0YvQvdCwINGC0L7Qu9KT0YvQvNC10L0g06nRgtGDLtCW0LDSo9CwINGC0YPSk9Cw0L0g0L3TmdGA0LXRgdGC0LXQvdGW0qMg0ZbRiNC10Log0LzQuNC60YDQvtGE0LvQvtGA0LDRgdGL0L3RhNGL0qMg0pvQsNC70YvQv9GC0LDRgdGD0Ysg0LDQu9KT0LDRiNKb0Ysg0LrSr9C90ZbQvdC00LUg0L/QsNC50LTQsCDQsdC+0LvQsNC00Ysg0LvQsNC60YLQvtCx0LDRhtC40Lsg0LzQtdC9INCx0LjRhNC40LTQvtCx0LDQutGC0LXRgNC40Y/QuyDQvNCw0qPRi9C30LTRiyDRgNOp0Lsg0LDRgtKb0LDRgNCw0LTRiyDQvNC40LrRgNC+0L7RgNCz0LDQvdC40LzQt9C80LTQtdGAINC606nQv9GI0ZbQu9GW0LPRliDQsNC90LAg0YHSr9GC0ZbQvNC10L0g0LHQtdGA0ZbQu9C10LTSoyDQsNC90LAg0YHSr9GC0ZbQvdC00LUg0LvQsNC60YLQvtCx0LDQutGC0LXRgNC40LDQu9Cw0YAg0LrTqdC/INCx0L7Qu9Cw0LTRiyDRgdC+0LTQsNC9INC60LXQudGW0L0g0YHRgtGA0LXQv9GC0L7QutC+0LrRgtCw0YDQvNC10L0gINGB0YLQsNGE0LjQu9C+0LrQvtC6INKb0L7RgdGL0LvQsNC00Ysg0LDQuyDQttC10YLRltC70LPQtdC9INGB0q/RgiDSm9GL0YjRi9Kb0LvQsNC00LDRgNGLINCx0LDQutGC0LXRgNC40Y/Qu9Cw0YDRiyDQsdGM0LDRgdGL0Lwg0LHQvtC70LDQtNGLINKa0L7RgNGC0YvQvdC00YvQu9Cw0Lkg0LrQtdC70LUg0LbQsNKj0LAg0YLRg9KT0LDQvSDQvdOZ0YDQtdGB0YLQtdC90ZbSoyDQvNC40LrRgNC+0LHQuNC+0YLQsNGB0Ysg06nQvNGW0YDQtNGW0qMgMS3RiNGWINC20YvQu9GL0L3QtNCw0pPRiyDQsdCw0LvQsNC70LDRgNC00YvSoyDQvtC00LDQvSDTmdGA0ZYg0LDQudGC0LDRgNC70YvSm9GC0LDQuSDQtNCw0LzRg9GL0L3QsCDTmdGB0LXRgCDQtdGC0LXQtNGWINCx0ZbQt9C00ZbSoyDQsNKT0LfQsNC90YvSoyDQvNC40LrRgNC+0YTQu9Cw0YDQsNGB0Ysg0YLRltGA0YjRltC70ZbQuiDQv9GA0L7RhtC10YHRltC9INGB0L7QvdC00LDQuSDQsNKbINGW0YjQutGWINC+0YDRgtCw0L3Ri9KjINGC0rHRgNCw0pvRgtGL0LvRi9KT0LDQvSDQsdCw0YHSm9Cw0YDQsNC00YsuIDxiciAvPg0KMi4t0LfTmdGAINCw0L3QsNC70LjQt9GW0L0g0LjQvdGC0LXRgNC/0LXRgNC10YbQuNGP0LvQsNGDIDEt0YLSr9GB0ZYg0YHQsNGA0YsuMi3QsNKb0YPRi9C3IDgsNdCzL9C7INC/0LDRgtC+0LvQvtCz0LjRj9C70YvSmyDQttCw0pPQtNCw0Lkg0pvQsNC70YvQv9GC0Ysg0LbQsNKT0LTQsNC50LTQsCAwLDAzM9CzL9C7INCw0YHQv9Cw0YMg0LrQtdGA0LXQuiDQsdKx0Lsg0L/RgNC+0YLQtdC90YPRgNC40Y8g0LHQtdC70LPRltGB0ZYgMy3RgtGL0pPRi9C30LTRi9KT0Ysg0YLTqdC80LXQvSDRgtGL0pPRi9C30LTRi9KbINCx0rHQuyDQsdKv0LnRgNC10Log0LrQvtC90YbQtdC90YLRgNCw0YbQuNGPINGE0YPQvdC60YbQuNGP0Y/RgdGL0L3Ri9KjINCx0rHQt9GL0LvRi9GBINC606nRgNGB0LXRgtC60ZbRiNGWIDQt0Y3RgNC40YLRgNC+0YbQuNGC0YLQtdGAIDEtMiDQutOp0YDRgyDQsNC50LzQsNKT0YvQvdC00LAg0pvQsNC70YvQv9GC0Ysg0LTQtdKj0LPQtdC5IDUt0YbQuNC70LjQvdC00LXRgCA1LTUg0LrTqdGA0YMg0LDQudC80LDSk9GL0L3QtNCwINCz0LjQsNC70LjQvdC00ZYg0YbQuNC70LjQvdC00LXRgCDQsdKv0LnRgNC10LrRgtC10LPRliDRhNC40LvRjNGC0YDQsNGG0LjRj9C90YvSoyDQsdKx0LfRi9C70YPRiyAu0YLSr9C50ZbRgNGW0LrRgtGWINGG0LjQu9C40L3QtNC10YAt0LHSsdC7INCx0q/QudGA0LXQuiDTqdC30LXQutGI0LXQu9C10YDSo9C90LTQtdCz0qMg0LDRg9GL0YAg0LTQuNGB0YLRgNC+0YTQuNGP0LvRi9KbINOp0LfQs9C10YDRltGB0YLQtdGA0LTRliDQutOp0YDRgdC10YLQtdC00ZYu0JHSr9C50YDQtdC60YLRltC6INC60L7QvdGG0LXQvdGC0YDQsNGG0LjRj9C70YvSmyDRhNGD0L3QutGG0LjRj9C90YvSoyDQsNC90YvSm9GC0LDRg9C00YvSoyDQvNCw0pvRgdCw0YLRiyAt0LrQvtC90YbQtdC90YLRgNCw0YbQuNGP0LvRi9KbINGE0YPQvdC60YbQuNGPINC305nRgNC00ZbSoyDSm9C+0Y7Qu9Cw0L3QtNGL0YDRgyDQvdC10LzQtdGB0LUg0YHSsdC50YvQu9GC0YMg0pvQsNCx0ZbQu9C10YLRltC9ICDQutOp0YDRgdC10YLQtdC00ZYg0LHSsdC7INC90LXRgdC10L8g0YLRi9KT0YvQt9C00YvSk9GLINCw0YDSm9GL0LvRiyDQsdCw0pPQsNC70LDQvdCw0LTRiy7QkdKv0LnRgNC10Log0LbQtdGC0ZbQv9C10YPRiNGW0LvRltCz0ZYg0LDQvdGL0pvRgtCw0YMv0LHSr9C50YDQtdC60YLRltKjINGB0q/Qt9GDINC205nQvdC1INGA0LXQsNCx0YHQvtGA0LHRhtC40YvQu9Cw0YMg0pvQsNCx0ZbQu9KT0LXRgtGWINGC06nQvNC10L3QtNC10LnQtNGWLtCR0q/QudGA0LXQuiDSm9GL0LfQvNC10YLRltC90qPRltKjINGA0LXQt9C10YDQstGC0LXRgNGW0qPQvSDQsdCw0pPQsNC70LDRgy7QotGD0LHRg9C00Y/RgNC70YvSmyDTqdC30LPQtdGA0ZbQstGB0YLQtdGA0ZbQvSDQsNC90YvSm9GC0LDRgy7QltCw0LvQv9GLINC305nRgCDQsNC90LDQu9C40Lcg0pvQvtGA0YLRi9C90LTRiy4xLdCf0YDQvtGC0LXQvdGD0YDQuNC40Y8g0LDSm9GD0YvQtyDQttC+0pPQsNGA0Ysg0LTQtdKj0LPQtdC50LTQtSDQsdC+0LvRg9GLINCx0q/QudGA0LXQuiDRiNGD0LzQsNKb0YjQsNC70LDRgNGL0L3Ri9KjINC30LDSm9GL0LzQtNCw0L3Rg9GLINGC05nQvS7QptC40LvRg9C90LTRgNC40Y8t0LHSr9C50YDQtdC6INOp0LfQtdC60YjQtdC70LXRgNGW0L3RltKjINC30LDSm9GL0LzQtNCw0LvRgyDQsdC10LvQs9GW0YEuMy3Ql9OZ0YDQtNOZ0ZYg0YLRi9KT0YvQt9C00YvSk9GLINGC06nQvNC10L0gMTAwNiDQsdKx0Lsg0LHSr9C50YDQtdC60YLRltKjINC60L7QvdGG0LXQvdGC0YDQsNGG0LjRj9C00LvRi9KbINGE0YPQvdC60YbQuNGP0YHRi9C90YvSoyDQsdKx0LfRi9C70YvRgdGL0L0g0LrTqdGA0YHRgtC10LTRltKjLjxiciAvPg0KMTIg0LbQsNGB0LDRgCDQsdCw0LvQsNC00LAg0LfTmdGA0LTRltKjINGB0LDQu9GB0YvRgdGL0YDQvNCw0LvRiyDRgtGL0pPRi9C30LTRi9KT0Ysg0pvQsNC70YvQv9GC0Ysg0LbQsNKT0LTQsNC50LTQsCDQvdC+0YDQvNCwIDEwMTUtMTAyNSDQsNGA0LDQu9GL0pPRi9C90LTQsCDQsdC+0YMg0LrQtdGA0LXQtdC6LtCd0LDRg9Kb0LDRgdGC0YvSoyDQutOp0YDRgdC10YLQutGW0YjRliAxMDA2INCz0LjQv9C+0YHRgtC10L3Rg9GA0LjRjyDQtNC10L8g0LDRgtCw0LvQsNC00Ysg0LHSsdC7INCx0q/QudGA0LXQuiDQutC+0L3RhtC10L3RgtGA0LDRhtC40Y8g0LDQudGC0LDRgNC70YvSsdGC0LDQuSDQsdKb0LfRi9C70YPRiy7QndCw0YPSm9Cw0YHRgtCwINCx0q/QudGA0LXQuiDQttC10YLRltGB0L/QtdGD0YjQu9GW0LPRliDQsdC10LvQs9GW0LvQtdGA0ZYg05nRgdGW0YDQtdGB0LUg0L3QtdGE0YDQvtGC0LjQutCw0LvRi9KbICDRgdC40L3QtNGA0L7QvCDQvdC10LzQtdGB0LUg0LPQu9C+0LzQtdGA0YPQu9C+0L3QtdGE0YDQuNGCINC60q/QtNGW0LPRliDQsdCw0YAg0LHSr9C50YDQtdC60YLRltC6INC60L7QvdGG0LXQvdGC0YDQsNGG0LjRj9C70YvSmyDRhNGD0L3QutGG0LjRj9GB0Ysg0LDQudGC0LDRgNC70YvSm9GC0LDQuSDRgtOp0LzQtdC90LTQtdCz0LXQvSDQsdKx0Lsg0LfTmdGA0LTRltKjINGC0YvSk9GL0LfQtNGL0pPRi9C80LXQvSDRgNCw0YHRgtCw0LvQsNC00Ysg0YLQvtC70YvSmyDQtNC40LDQs9C90L7QtyDSm9C+0Y4g0q/RiNGW0L3RliDSm9C+0YHRi9C80YjQsCDQt9C10YDRgtGC0LXRg9C70LXRgCDSm9Cw0LfQttC10YIgMS3Qt9OZ0YDQtNOZ0ZbSoyDRgtOZ0YPQu9GW0LrRgtGW0Log0LzTqdC70YjQtdGA0ZbQvSDQsNC90YvSm9GC0LDRgyDRgtOZ0YPQu9GW0LrRgtGW0Log0LTQuNGD0YDQtdC3IDIt0pvQsNC90L3Ri9KjINCx0LjQvtGF0LjQvNC40Y/RgdGLINC60YDQtdCw0YLQuNC9ICwg0LzQvtGH0LXQstC40L3QsCAzLSDQsdKv0LnRgNC10LrRgtGW0qMg0YPQu9GC0YDQsCDQtNGL0LHRi9GB0YLRi9Kb0LfQtdGA0YLRgtC10YMgNC3RhNGD0L3QutGG0LjQvtC90LvQsNC00Ysg0YHRi9C90LDQvNCw0L7QsNGAINC30LjQvNC90LjRhtC60LjQuSDRgdGL0L3QsNC80LDRgdGL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6" table:style-name="ce1">
            <text:p>915336</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3RgdKx0YDQsNKb0YLRi9KjINC20LDRg9Cw0LHRizog0JXRgNGC0LUg0LbQsNGB0YLQsNKT0Ysg0LHQsNC70LDQu9Cw0YDQtNCwINKb0LDQu9GL0L/RgtGLINGW0YjQtdC6INC80LjQutGA0L7RhNC70L7RgNCw0YHRiyDQsdCw0LvQsNC90YvSoyDQtNC10L3RgdCw0YPQu9GL0pPRiyDQvNC10L0g0LTQsNC80YPRi9C90LAg0YvSm9C/0LDQuyDQtdGC0LXQtNGWLiDQntC00LDQvSDQsdOp0LvQtdC6INCx0ZbRgNKb0LDRgtCw0YAg0LzQsNKj0YvQt9C00Ysg0YTQuNC30LjQvtC70L7Qs9C40Y/Qu9GL0psg0L/RgNC+0YbQtdGB0YLQtdGA0LPQtSDSm9Cw0YLRi9GB0LDQtNGLLiDQkNGC0LDQvyDQsNC50YLQsNGAINCx0L7Qu9GB0LDQvDo8YnIgLz4NCtCV0qMg0LDQu9C00YvQvNC10L0g0ZbRiNC10Log0LzQuNC60YDQvtGE0LvQvtGA0LDRgdGLINCx0LDQu9Cw0L3Ri9KjINCw0pPQt9Cw0YHRi9C90LTQsNKT0Ysg0pvQvtGA0LXQutGC0YzRgtGW0Log0LfQsNGC0YLQsNGA0LTRi9C9INKb0L7RgNGL0YLRi9C70YPRi9C90LAg0LbTmdC90LUg0YHRltKj0ZbRgNGW0LvRg9GW0L3QtSwg0LbQsNC70L/RiyDQvNC10YLQsNCx0L7Qu9C40LfQvNCz0LUg0pvQsNGC0YvRgdCw0LTRiy4g0JHSsdC7INC/0YDQvtGG0LXRgdGC0LXRgNC00LUg0LHQsNC60YLQtdGA0LjRj9C70LDRgCDQutOp0LzRltGA0YHRg9C70LDRgNC00YssINCx0LXQu9C+0LrRgtCw0YDQtNGLLCDQvNCw0LnQu9Cw0YDQtNGLINC205nQvdC1INCx0LDRgdKb0LAg0LTQsCDQvNCw0L3Ri9C30LTRiyDQt9Cw0YLRgtCw0YDQtNGLINGL0LTRi9GA0LDRgtGL0L8sINC00LXQvdC10LPQtSDSm9Cw0LbQtdGCINKb0L7RgdGL0LvRi9GB0YLQsNGA0LTRiyDRgtKv0LfRg9Cz0LUg0LDRgtGB0LDQu9GL0YHQsNC00YsuIDxiciAvPg0K0JXQutGW0L3RiNGW0LTQtdC9LCDQsdCw0LvQsNC00LAg0JjQvNC80YPQvdC00YvSmyDQttGD0LnQtdC90ZbSoyDQtNCw0LzRg9GL0L3QsCDQutOp0LzQtdC60YLQtdGB0LXQtNGWLiDQkdKx0Lsg0LzQuNC60YDQvtC+0YDQs9Cw0L3QuNC30LzQtNC10YAg0L/QsNGC0L7Qs9C10L3QtNGW0Log0LzQuNC60YDQvtC+0YDQs9Cw0L3QuNC30LzQtNC10YDQvNC10L0g0LrSr9GA0LXRgdGD0LPQtSwg0LjQvNC80YPQvdC00YvSmyDQttCw0YPQsNC/0YLRiyDSm9Cw0LvRi9C/0YLQsNGB0YLRi9GA0YPSk9CwINC606nQvNC10LrRgtC10YHRltC/INKb0LDQvdCwINKb0L7QudC80LDQuSwg0pvQsNCx0YvQvdGDINGA0LXQsNC60YbQuNGP0LvQsNGA0YvQvdCwINC00LAg05nRgdC10YAg0LXRgtC10LTRli4g0KHQvtC90YvQvNC10L0g0pvQsNGC0LDRgCwg0LzQuNC60YDQvtGE0LvQvtGA0LAg0LjQvNC80YPQvdC00YvSmyDQttKv0LnQtdC90ZbSoyDQtNKx0YDRi9GBINC20rHQvNGL0YEg0ZbRgdGB0YLQtdGD0ZYg0q/RiNGW0L0g0pvQsNC20LXRgtGC0ZYg0LDQvdGC0LjQtNC10L3QtdC70LXRgCDQvNC10L0gINC40LzQvNGD0L3QtNGL0psg0LzQvtC70LXQutGD0LvQsNC70LDRgNC00Ysg06nQvdC00ZbRgNGD0LPQtSDSm9Cw0YLRi9GB0LDQtNGLLiA8YnIgLz4NCtCh0L7QvdGL0LzQtdC9INKb0LDRgtCw0YAsINGW0YjQtdC6INC80LjQutGA0L7RhNC70L7RgNCw0YHRiyDSmtC+0YDSk9Cw0L3Ri9GIINCx06nQs9C10YLRltC90ZbSoyDSm9Cw0LvRi9C/0YLQsNGB0YPRi9C90LAg0LbTmdC90LUg0L/QsNGC0L7Qs9C10L3QtNGWINC80LjQutGA0L7QvtGA0LPQsNC90LjQt9C80LTQtdGA0LTRltKjINGW0YjQtdC60LrQtSDQtdC90YPRltC9INCx0L7Qu9C00YvRgNC80LDRg9KT0LAg0LrTqdC80LXQutGC0LXRgdC10LTRli4g0J7QuyDRltGI0LXQuiDRjdC/0LjRgtC10LvQuNC50ZbQvdGW0qMg0YjRi9GA0YvRiNGC0Ysg0pvQsNCx0YvSk9GL0L0g0pvQvtGA0pPQsNC/LCDQttCw0pvRgdGLLdC20LDQvNCw0L0g0LHQsNC60YLQtdGA0LjRj9C70LDRgCDQsNGA0LDRgdGL0L3QtNCw0pPRiyDRgtC10qPQs9C10YDRltC80LTRliDRgdCw0pvRgtCw0LnQtNGLLiA8YnIgLz4NCtCW05nQvdC1INC00LUg0LzQuNC60YDQvtGE0LvQvtGA0LAg0LrQtdC50LHRltGAINC80LDSo9GL0LfQtNGLINCy0LjRgtCw0LzQuNC90LTQtdGA0LTRliwg0LzRi9GBOiDQmiDQttOZ0L3QtSDQkiDRgtC+0LHRi9C90YvSoyDQstC40YLQsNC80LjQvdC00LXRgNGW0L0g0LbTmdC90LUg0LHQsNGB0pvQsCDQtNCwINCx0LjQvtC70L7Qs9C40Y/Qu9GL0psg0LHQtdC70YHQtdC90LTRliDSm9C+0YHRi9C70YvRgdGC0YzQsNGA0LTRiywg0LzRi9GBOiDRhNC10YDQvNC10L3RgtGC0LXRgCDQvNC10L0g0LDQvNC40L0g0pvRi9GI0pvRi9C70LTQsNGA0YvQvSDRgdC40L3RgtC10LfQtNC10LnQtNGWLiDQkdKx0LvQsNGA0LTRi9KjINCx0LDRgNC70YvSk9GLINCx0LDQu9Cw0L3Ri9GWINOp0YHRg9GWINC80LXQvSDQtNCw0LzRg9GLINKv0YjRltC9INOp0YLQtSDQvNCw0qPRi9C30LTRiy48YnIgLz4NCtCh0L7QvdC00LDQuS3QsNKbINCG0YjQvdC10Log0LzQuNC60YDQvtGE0LvQvtGA0LDRgdGLINKb0YvRiNKb0YvQu9C00YvSmyDQvtGA0YLQsNC90Ysg0pvQsNC70YvQv9GC0LDRgdGC0YvRgNGL0L8sINC/0LDRgtC+0LPQtdC90LTRliDQvNC40LrRgNC+0L7RgNCz0LDQvdC40LfQvNC00LXRgCDSr9GI0ZbQvSDSm9C+0LvQsNC50YHRi9C3INC20LDSk9C00LDQudC70LDRgCDRgtGD0pPRi9C30LDQtNGLLiDQkdKx0Lsg0L7RgNCz0LDQvdC40LrQsNC70YvSmyDSm9GL0YnSm9GL0LvQtNCw0YDQtNGL0qMg0LzRi9GBLCDRgdKv0YIg0pvRi9GI0pvRi9C70Ysg06nQvdC00ZbRgNGW0YHRliDQsNGA0pvRi9C70Ysg0LbSr9C30LXQs9C1INCw0YHQsNC00YsuIDxiciAvPg0K0KLQsNKT0Ysg0LHRltGAINCw0LnRgtCwINC60LXRgtC10YLRltC9INC20LDQudGCLCDRltGI0LXQuiDQvNC40LrRgNC+0YTQu9C+0YDQsNGB0Ysg0ZbRiNC10Lot0LzQuCDQvtGB0ZYg0LDRgNKb0YvQu9GLINCx0LDQu9Cw0L3Ri9KjINC90LXRgNCyINC20q/QudC10YHRltC90LUg0YvSm9C/0LDQuyDQtdGC0LXQtNGWLiDQltKv0LnQutC1INC80LXQvSDQvNC40LrRgNC+0YTQu9C+0YDQsCDQsNGA0LDRgdGL0L3QtNCw0pPRiyDQsdCw0LnQu9Cw0L3Ri9GBINGN0LzQvtGG0LjQvtC90LDQu9C00YvSmyDQttCw0pPQtNCw0Lkg0LzQtdC9INC606nSo9GW0Lsg0LrSr9C50LTRliDRgNC10YLRgtC10LnQtNGWLiA8YnIgLz4NCjxiciAvPg0KMi3RgdKx0YDQsNKb0YLRi9KjINC20LDRg9Cw0LHRizog0JHSsdC7IDEyINC20LDRgdCw0YAg0LHQsNC70LDQvdGL0qMg0YHQuNC80L/RgtC+0LzQtNCw0YDRiyDQvNC10L3RliDQsdKv0LnRgNC10Log0LDRg9GA0YPRi9C90LAg0LHQsNKT0YvRgtGC0LDQvyDRgtKx0YAuINOY0YHRltGA0LXRgdC1INC/0YDQvtGC0LXQuNC90YPRgNC40Y8sINGN0YDQuNGC0YDQvtGG0LjRgtGD0YDQuNGPLCDQs9C40L/QtdGA0YLQtdC90LfQuNGPINC205nQvdC1INGW0YHRltC90YMuINCV0L3QtNGWINC+0YHRiyDQttCw0pPQtNCw0LnQtNGL0qMg0YLRg9GL0L3Qu9C00LDRg9GL0L3QsCDQsdCw0LnQu9Cw0L3Ri9GB0YLRiyDRgdKx0YDQsNKb0YLQsNGA0pPQsCDQttCw0YPQsNC/INCx0LXRgNC10YAg0LHQvtC70YHQsNC8LiA8YnIgLz4NCjEuINCR0q/QudGA0LXQutGC0ZbSoyDQutC+0L3RhtC10L3RgtGA0LDRhtC40Y/Qu9GL0psg0YTRg9C90LrRhtC40Y/RgdGL0L0g0LDQvdGL0pvRgtCw0YPQtNGL0qMg0LzQsNKb0YHQsNGC0YsgLSDQsdKv0LnRgNC10LrRgtGW0qMg0LfTmdGAINGI0YvSk9Cw0YDRg9C00LDSk9GLINC60L7QvdGG0LXQvdGC0YDQsNGG0LjRj9C70LDRgyDSm9Cw0LHRltC70LXRgtGW0L0g0LHQsNKT0LDQu9Cw0YPSk9CwINC90LXQs9GW0LfQtNC10LvQs9C10L0uINCW0LDQu9C/0Ysg0LHSr9C50YDQtdC60YLRltKjINCx0rHQuyDSm9GL0LfQvNC10YLRliDQt9OZ0YDQtNC10LPRliDQtdGA0ZbQs9C10L0g0LfQsNGC0YLQsNGA0LTRiyDQutC+0L3RhtC10L3RgtGA0LDRhtC40Y/Qu9Cw0YMg0L3QtSDRgdKx0LnRi9C70YLRgyDSm9Cw0LHRltC70LXRgtGW0L0g0LrTqdGA0YHQtdGC0LXQtNGWLiDSmtCw0LvRi9C/0YLRiyDQttCw0pPQtNCw0LnQtNCwINCx0q/QudGA0LXQuiDRgdKx0LnRi9Kb0YLRi9Kb0YLRiyDSm9Cw0LbQtdGC0YLRliDQtNC10qPQs9C10LnQtNC1INGB0LDSm9GC0LDQvywg0LDRgNGC0YvSmyDRgdGD0LTRiyDRiNGL0pPQsNGA0LDQtNGLLiA8YnIgLz4NCjIuINCW0LDQu9C/0Ysg0LfTmdGAINCw0L3QsNC70LjQt9GW0L0g0YLQsNC70LTQsNC50YLRi9C9INCx0L7Qu9GB0LDQvCwg0LzSsdC90LTQsNKT0Ysg0LfTmdGA0LTQtNGW0qMg0YLSr9GB0ZYg0pvQsNC70YvQv9GC0YssINCx0rHQuyDQt9OZ0YDQtNC1INCx0LjQu9C40YDRg9Cx0LjQvSDQttOZ0L3QtSDRgi7QsSwg0LfQsNGC0YLQsNGAINC20L7SmyDQtNC10LPQtdC9INGB06nQty4gPGJyIC8+DQo4LDUg0LMv0Lsg0L3TmdGA0YPRi9C3INC20L7Sk9Cw0YDRiyDQutOp0YDRgdC10YLQutGW0Ygg0LHQvtC70YvQvyDRgtCw0LHRi9C70LDQtNGLLiDQkNC7INOZ0LTQtdGC0YLQtSDQt9OZ0YDQtNC1IDE1MNC80LMv0YLTmdGD0LvRltCz0ZbQvdC1INKT0LDQvdCwINCx0L7Qu9GDINC60LXRgNC10LouINCU0LXQvNC10Log0LHSsdC7INCx0LDQu9Cw0LTQsCDQv9GA0L7RgtC10LjQvdGD0YDQuNGPINC00LXQs9C10L0g0YHTqdC3LCDQsdKx0Lsg0LHSr9C50YDQtdC6INKb0YvQt9C80LXRgtGW0L3RltKjINCx0rHQt9GL0LvSk9Cw0L3Ri9C9INC606nRgNGB0LXRgtC10LTRli4gPGJyIC8+DQrQodC+0L3QtNCw0Lkt0LDSmyDTmdC00LXRgtGC0LUg0LfTmdGA0LTQtSDRjdGA0LjRgtGA0L7RhtC40YLRgtC10YAg0LHQvtC70LzQsNGDINC60LXRgNC6LiDQkNC7INC80rHQvdC00LAg0LfTmdGAIDEtMiDQutOp0Lcg0LDQudC80LDSk9GL0L3QtNCwLiA8YnIgLz4NCtCQ0Lsg0LPQuNCw0LvQuNC90LTRliDQttOZ0L3QtSDRgtKv0LnRltGA0YjRltC60YLRliDRhtC40LvQuNC90LTRgNC70LXRgNC00ZbSoyA3LTgg0LrTqdGA0YHQtdGC0LrRltGI0ZbQvdC00LUg0LHQvtC70YPRiyDQsdKv0LnRgNC10Log0LfQsNKb0YvQvNC00LDQvdGD0YvQvdGL0qMg0LHQtdC70LPRltGB0ZYg0LHQvtC70YvQvyDRgtCw0LHRi9C70LDQtNGLLiDQk9C40LDQu9C40L3QtNGWINGG0LjQu9C40L3QtNGA0LvQtdGAINCx0q/QudGA0LXQutGC0ZbSoyDQttC+0pPQsNGA0pPRiyDQsdOp0LvRltCz0ZbQvdC1INC30LDSm9GL0Lwg0LrQtdC70LPQtdC90ZbQvSDQutOp0YDRgdC10YLQtdC00ZYuINCQ0Lsg0YLSr9C50ZbRgNGI0ZbQutGC0ZYg0YbQuNC70LjQvdC00YDQu9C10YAg0LHSr9C50YDQtdC60YLRltKjINC20LXQtNC10Lsg0pvQsNCx0YvQvdGD0YvQvSDQvdC10LzQtdGB0LUg0pvQsNC9INCw0LnQvdCw0LvRi9C80YvQvdGL0qMg0LHSsdC30YvQu9GL0YHRi9C9INC606nRgNGB0LXRgtC10LTRli4gPGJyIC8+DQozLiDQodCw0LvRi9GB0YLRi9GA0LzQsNC70Ysg0YLRi9KT0YvQt9C00YvSm9Kb0LAg0LrQtdC70LXRgCDQsdC+0LvRgdCw0pssINC+0Lsg0LbQsNGBINCx0LDQu9Cw0LvQsNGA0LTQsCDQvtGA0YLQsCDQtdGB0LXQv9C/0LXQvSAxMDEwLTEwMzAg0LDRgNCw0LvRi9KT0YvQvdC00LAg0LHQvtC70YPRiyDQutC10YDQtdC6LiDQkdKx0Lsg0LHQsNC70LDQtNCw0pPRiyAxMDA2INGC0YvSk9GL0LfQtNGL0pPRiyDQsdKv0LnRgNC10LrRgtGW0qMg0LTSsdGA0YvRgSDQttKx0LzRi9GBINGW0YHRgtC10LzQtdGD0ZbQvSDRj9C60Lgg0L7QvdGL0qMg0YHSsdC50YvSm9GC0YvSm9GC0Ysg0YLQuNGW0YHRgtGWINGC0q/RgNC00LUg0LrQvtC90YbQtdC90YLRgNCw0YbQuNGP0LvQsNC5INCw0LvQvNCw0YPRi9C9INC606nRgNGB0LXRgtC10LTRli4g</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78" table:style-name="ce1">
            <text:p>1066878</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7QldGA0YLQtSDQttCw0YHRgtCw0pPRiyDQsdCw0LvQsNC70LDRgNC00LAg0ZbRiNC10Log0LzQuNC60YDQvtGE0LvQvtGA0LDRgdGLOiDQsNGB0pvQsNC30LDQvSDQttOZ0L3QtSDRltGI0LXQutGC0LXQs9GWINOp0LfRltC90LTRltC6INGE0LXRgNC80LXQvdGC0YLQtdGAINOZ0YHQtdGA0ZbQvdC10L0g0pvQvtGA0YvRgtGL0LvQvNCw0LnRgtGL0L0g0LrQvtC70LvQsNCz0LXQvSDRgtOZ0YDRltC30LTRliDQt9Cw0YLRgtCw0YDQtNCw0pPRiyDQsdC10YLQsCDRgtGW0LfQsdC10LrRgtGWINGL0LTRi9GA0LDRgtGD0pPQsCDQsNGA0L3QsNC70pPQsNC9INCw0YDQvdCw0LnRiyDRhNC10YDQvNC10L3RgtGC0LXRgCDTqdC90LTRltGA0LXQtNGWLiDQodC+0L3Ri9KjINC10YHQtdCx0ZbQvdC10L0g0L7Qu9Cw0YDQtNGLINKb0L7RgNGC0YPSk9CwINC205nQvdC1INC+0LvQsNGA0LTQsNC9INGN0L3QtdGA0LPQuNGPINOp0L3QtNGW0YDRg9C00ZYg0LbSr9C30LXQs9C1INCw0YHRi9GA0LDQtNGLLiDQldC60ZbQvdGI0ZYg0LrQtdC30LXQutGC0LUsINCSINC205nQvdC1INCaINGC0L7QsdGL0L3QtNCw0pPRiyDQstC40YLQsNC80LjQvdC00LXRgNC00ZYg0YHQuNC90YLQtdC30LTQtdGD0LTRliDQttKv0LfQtdCz0LUg0LDRgdGL0YDQsNC00YsuINCh0L7QvdGL0LzQtdC9INKb0LDRgtCw0YAg0LjQvNC80YPQvdC00YvSmyDQttKv0LnQtdC90ZbSoyDSm9GL0LfQvNC10YLRltC9INCw0YDRgtGC0YvRgNGD0pPQsCwg0LDRgdKb0L7RgNGL0YLRgyDQttC+0LvRi9C90LTQsCDQv9Cw0YLQvtCz0LXQvdC00ZYg0LzQuNC60YDQvtGE0LvQvtGA0LDQvdGL0qMg0L/QsNC50LTQsCDQsdC+0LvRg9GL0L3QsCDQutC10LTQtdGA0LPRliDQttCw0YHQsNC50LTRiy4g0KHQvtC90YvQvNC10L0g0pvQsNGC0LDRgCwg0LHQsNGD0YvRgNC00LAg06nQvdC00ZbRgNGW0LvQs9C10L0gMS3RiNGWINGA0LXRgtGC0LXQs9GWINOp0YIg0pvRi9GI0pvRi9C70LTQsNGA0Yst0YXQvtC70Lgg0LbTmdC90LUg0LTQtdC+0LrRgdC40YXQvtC70Lgg0pvRi9GI0pvRi9C70YvQvdCw0L0t0LXQutGW0L3RiNGW0LvRltC6INOp0YIg0pvRi9GI0pvRi9C70LTQsNGA0YvQvdGL0qMg0LvQuNGC0L7RhdC+0LvQuCDQttOZ0L3QtSDQtNC10LfQvtC60YHQuNGF0L7Qu9C4INKb0YvRiNKb0YvQu9C00LDRgNGL0L3Ri9KjINGC0q/Qt9GW0LvRg9GW0L0g0LbSr9C30LXQs9C1INCw0YHRi9GA0YvQvywg0pvQsNC50YLQsCDRhtC40YDQutGD0LvRj9GG0LjRj9GB0Ysg0L3QtdCz0ZbQt9GW0L3QtNC1INC+0LvQsNGA0LTRi9KjINC40L3QsNC60YLQuNCy0LDRhtC40Y/RgdGL0L0g0pvQsNC80YLQsNC80LDRgdGL0Lcg0LXRgtC10LTRli4g0prQsNC70YvQv9GC0YvQtNCwINC20LDSo9CwINGC0YPSk9Cw0L0g0L3TmdGA0LXRgdGC0LXQu9C10YDQtNC1INGW0YjQtdC6INKb0LDQsdGL0YDSk9Cw0YHRiyAxMC0yMNGB0LDSkyDQvNC10YDQt9GW0LzRltC90LTQtSDRgdGC0LXRgNC40LvRjNC00ZYg0LHQvtC70YvQvyDQutC10LvQtdC00ZYuINCh0L7QvdCw0L0g0YHQvtKjINGB0YvRgNGC0pvRiyDQvtGA0YLQsNC80LXQvSDQsdCw0LnQu9Cw0L3Ri9GBINC+0YDQvdCw0YLRgyDQvdC10LPRltC30ZbQvdC00LUg0LbTmdC90LUg0YLQsNCx0LjSk9C4INCw0L3QsCDRgdKv0YLRltC80LXQvSDSm9C+0YDQtdC60YLQtdC90YPRliDQvdC10LPRltC30ZbQvdC00LUg0pvQsNC70YvQv9GC0Ysg0LzQuNC60YDQvtGE0LvQvtGA0LDQvdGL0qMg0pvQsNC70YvQv9GC0LDRgdGD0Ysg0LHQsNGB0YLQsNC70LDQtNGLLiDQndC10LPRltC30ZYg0LzQuNC60YDQvtGE0LvQvtGA0LDQvdGL0qMg0pvQsNC70YvQv9GC0LDRgdGD0YsgNC3QutC10LfQtdKj0LPQtSDQsdOp0LvRltC90LXQtNGWOiDQkdCw0YHRgtCw0L/Sm9GL0LTQsCBFLmNvbGkgINGC0L7QsdGL0L3QtNCw0pPRiyDQsdCw0LrRgtC10YDQuNGP0LvQsNGA0LTRi9KjINGW0YjQtdC60YLQtSDQttC40L3QsNKb0YLQsNC70YPRiyDQsdCw0YHRgtCw0LvQsNC00YsuINCV0LrRltC90YjRliDQutC10LfQtdKjINCw0L3QsCDRgdKv0YLRltC80LXQvSDSm9C+0YDQtdC60YLQtdC90YMg0L3QtdCz0ZbQt9GW0L3QtNC1INCx0LjRhNC40LTQvtCx0LDQutGC0LXRgNC40Y/Qu9Cw0YDQtNGL0qMg0YHQsNC90Ysg0LDRgNGC0LDRgtGL0L0g0LHQvtC70YHQsCwg0q/RiNGW0L3RiNGWINC60LXQt9C10qPQtNC1INCw0L3QsCDRgdKv0YLRltC80LXQvSDSm9C+0YDQtdC60YLQtdC90YMg0LDRj9KT0YvQvdC00LAsINKb0L7RgdGL0LzRiNCwINGC0LDSk9Cw0LzQtNCw0YAg0YLSsdGC0YvQvdGD0YvQvNC10L0g0LHRltGA0LPQtS3Qu9Cw0LrRgtC+0LHQsNC60YLQtdGA0LjRj9C70LDRgNC00YvSoyDRgdCw0L3RiyDQsNGA0YLQsCDRgtKv0YHQtdC00ZYuINCi06nRgNGC0ZbQvdGI0ZYg0LrQtdC30LXSo9C00LUg0LXRgNC10YHQtdC6INCw0pPQt9Cw0L3Ri9KjINC80LjQutGA0L7RhNC70L7RgNCw0YHRi9C90LAg0YHTmdC50LrQtdGBINKb0LDQu9GL0L/RgtGLLdC70LDQutGC0L4g0LbTmdC90LUg0LHQuNGE0LjQtNC+LdCx0LDQutGC0LXRgNC40Y/Qu9Cw0YDQtNCw0L0g0YLSsdGA0LDRgtGL0L0sINKb0L7RgdGL0LzRiNCwLSBFLmNvbGkg0LHQsNC60YLQtdGA0LjRj9C70LDRgNGL0L3QsNC9INGC0rHRgNCw0YLRi9C9INC+0YDRgtCwINKb0LDQu9GL0L/RgtCw0YHQsNC00YsuINCe0L3Ri9KjINGW0YjRltC90LTQtSDSm9Cw0LvRi9C/0YLRiyDQvNC40LrRgNC+0YTQu9C+0YDQsC05MCUg0LDQuyDSm9C+0YHRi9C80YjQsCDQvNC40LrRgNC+0YTQu9C+0YDQsCA5JS3Ri9C9INKb0rHRgNCw0LnQtNGLLiDQodC+0L3QtNCwLCDSm9Cw0LvRi9C/0YLRiyDQvNC40LrRgNC+0YTQu9C+0YDQsC3QvNC10YLQsNCx0L7Qu9C40LfQvNC00ZbQuiwg0LjQvNC80YPQvdC00YvSmyzSm9C+0YDSk9Cw0L3Ri9GBINC205nQvdC1INGB0LjQvdGC0LXQt9C00LXRgyDQv9GA0L7RhtC10YHRgdGC0LXRgNGW0L3QtSDSm9Cw0YLRi9GB0LDQtNGLLjxiciAvPg0KMi4g0JbQsNC70L/RiyAxMiDQttCw0YHQsNGAINCx0LDQu9CwINC20LDSk9C00LDQudGL0L3QsCDQutC10LvQtdGC0ZbQvSDQsdC+0LvRgdCw0pssINC20q/RgNC10LrRgtGW0qMg0YHQvtKT0YMg0LbQuNGW0LvRltCz0ZYg0LDRgNGC0pvQsNC90LTRi9KT0YssINCx0LDRg9GL0YDQtNGL0qMg0rHQu9KT0LDQudKT0LDQvdC00YvSk9GL0L0g0LrTqdGA0YPRltC80ZbQt9Cz0LUg0LHQvtC70LDQtNGLLiDQodC+0L3Ri9C80LXQvSDSm9Cw0YLQsNGALCDQtNC40YPRgNC10LfQtNGW0Log0YHQuNC90LTRgNC+0Lwg0L3QtdCz0ZbQt9GW0L3QtNC1OiDQt9OZ0YAg0YjRi9KT0LDRgNGD0Ysg0YHQuNGA0LXQuiDQtdC60LXQvdC00ZbQs9GWLdC+0LvQuNCz0YPRgNC40Y8sINGC0YvSk9GL0LfRi9C00YvSk9GLINGC06nQvNC10L0g0LXQutC10L3QtNGW0LPRltC9LdCz0LjQv9C+0YHRgtC10L3Rg9GA0LjRjyDQsdCw0YDRi9C9INC606nRgNC10LzRltC3LiDSmtCw0LvRi9C/0YLRi9C00LA6INC305nRgCDRgtGL0pPRi9C30LTRi9KT0Ys6MTAxMC0xMDI10LMv0Lsg0LDRgNCw0LvRi9KT0YvQvdC00LAg0LHQvtC70LDQtNGLLiDSmtCw0LvRi9C/0YLRi9C00LAg0LfTmdGAINCw0L3QsNC70LjQt9GW0L3QtNC1INCx0LXQu9C+0Log0LzSr9C70LTQtSDQsdC+0LvQvNCw0YPRiyDQutC10YDQtdC6INC90LXQvNC10YHQtSDQvtC90YvSoyDQvNCw0LrRgdC40LzQsNC70LTRiyDQtNC10qPQs9C10LnRliAwLDAwMzPQsy/QuyDQsNGB0L/QsNGD0Ysg0LrQtdGA0LXQui4g0JHRltGA0LDSmyDQsdCw0LvQsNC00LAg0LzQsNGB0YHQuNCy0YLRliDQv9GA0L7RgtC10LjQvdGD0YDQuNGPLTMsNdCzL9C7INC20L7Sk9Cw0YDRiyDQsdC+0LvSk9Cw0L3QtNGL0pPRiy3QvdC10YTRgNC+0YLQuNC60LDQu9GL0psg0YHQuNC90LTRgNC+0LzQvdGL0qMg0LHQsNGA0YvQvSDQtNOZ0LvQtdC70LTQtdC50LTRli4g0KHTmdC50LrQtdGB0ZbQvdGI0LUsINOp0YLQtSDQsNC3INC20LjRltC70ZbQutGC0LXQs9GWINGN0YDQuNGC0YDQvtGG0LjRgtGD0YDQuNGPINC80LXQvSDRhtC40LvQuNC90LTRgNGD0YDQuNGP0L3Ri9KjINCx0LDRgCDQtdC60LXQvdC00ZbQs9GW0L0g0LrTqdGA0LXQvNGW0LcuINKa0LDQu9GL0L/RgtGL0LTQsCDQt9OZ0YDQtNC1INGG0LjQu9C40L3QtNGA0LvQtdGAINCx0L7Qu9C80LDRg9GLINC60LXRgNC10LosINC+0LvQsNGA0LTRi9KjINC305nRgNCz0LUg0YjRi9Kb0pvQsNC90LTRi9KT0Ysg0LHSr9C50YDQtdC60YLRltKjINGC0q/RgtGW0LrRiNC10LvRltC6INCw0L/Qv9Cw0YDQsNGC0YvQvdGL0qMg0LfQsNKb0YvQvNC00LDQu9KT0LDQvdC00YvSk9GLLCDRgdOZ0LnQutC10YHRltC90YjQtSDRgNC10LDQsdGB0L7RgNCx0YbQuNGPINC/0YDQvtGG0LXRgdGB0ZYg0LTQtSDQsdKx0LfRi9C70LDRgtGL0L3QtNGL0pPRi9C9LCDRgtKv0YLRltC60YjQtdC70LXRgNCz0LUt0LHQtdC70L7QuiDRiNOp0LPRltC/INKb0LDQu9KT0LDQvdC00YvSk9GLINC20LDQudC70Ysg0LDSm9C/0LDRgNCw0YIg0LHQtdGA0LXQtNGWLiDQkdKv0LnRgNC10LrRgtGW0qMg0LrQvtC90YbQtdC90YLRgNCw0YbQuNGP0LvRi9KbINKb0YvQt9C80LXRgtGWLdGB0YMg0LzQtdC9INGN0LvQtdC60YLRgNC+0LvQuNGC0YLQtdGAINCw0YDQsNGB0YvQvdC00LDSk9GLINGC0LXQv9C1LdGC0LXSo9C00ZbQutGC0ZYg0YHQsNKb0YLQsNGD0LTQsNKT0Ysg0LzQsNKj0YvQt9C00Ysg0YDTqdC70ZYg0YHQsNC90LDQu9Cw0LTRiy4g0J7QvdGLINCw0L3Ri9Kb0YLQsNGD0LTRi9KjINC80LDSo9GL0LfRiy3QsdKv0LnRgNC10Log0YTRg9C90LrRhtC40Y/RgdGLINGC0YPRgNCw0LvRiyDQsNKb0L/QsNGA0LDRgiDQsdC10YDQtdC00ZYuINKa0LDQt9GW0YDQs9GWINC305nRgCDQuNC90YLQtdGA0L/RgNC10YLQsNGG0LjRj9GB0YvQvdCwINC60LXQu9GB0LXQuiwg0LfTmdGAINGC0YvSk9GL0LfQtNGL0pPRiyDRgtOp0LzQtdC90LTQtdCz0LXQvdGWLCDRgtKx0LfQtNCw0YAg0LzQtdC9INGN0LvQtdC60YLRgNC+0LvQuNGC0YLQtdGAINGC0LXQv9C1LdGC0LXSo9C00ZbQs9GWINCx0rHQt9GL0LvSk9Cw0L3QtNGL0pPRi9C9INC606nRgNC10LzRltC3LCDRgdC10LHQtdCx0ZY60YTQuNC70YzRgtGA0LDRhtC40Y/Qu9GL0psg0LHQsNGA0YzQtdGA0LTRltKjINCx0LDQt9Cw0LvRjNC00Ysg0LzQtdC80LHRgNCw0L3QsNGB0Yst0L7SoyDQt9Cw0YDRj9C00pvQsCDQsNGD0YvRgdGD0YssINC/0L7QtNC+0YbQuNGC0YLQtdGA0LTRltKjINC30LDSm9GL0LzQtNCw0LvRg9GLINC10YHQtdCx0ZbQvdC10L0tINC80LDRgdGB0LjQstGC0ZYg0L/RgNC+0YLQtdC40L3Rg9GA0LjRjywg0pvQsNC90LTQsC0g0L7QvdGL0qMg0LXRgdC10LHRltC90LXQvSDQs9C40L/QvtCw0LvRjNCx0YPQvdC10LzQuNGPINC+0YDRi9C9INCw0LvRg9GL0L3QsNC9LdC+0L3QutC+0YLQuNC60LDQu9GL0psg0pvRi9GB0YvQvCDRgtOp0LzQtdC90LTQtdC/LCDSm9Cw0L0g0YLQsNC80YvRgNGLINCx0L7QudGL0L3QtNCw0pPRiyDRgdKx0LnRi9Kb0YLRi9Kb0YLRi9KjINC40L3RgtC10YDRgdGC0LjRhtC40LnQs9C1INOp0YLRg9GWINC10YHQtdCx0ZbQvdC10L0t0LHQsNC70LDQtNCwINGW0YHRltC90YPQtNGW0qMg0L/QsNC50LTQsCDQsdC+0LvSk9Cw0L3QtNGL0pPRi9C9INC606nRgNGD0ZbQvNGW0LfQs9C1INCx0L7Qu9Cw0LTRiy4g0JDQudC90LDQu9GL0LzQtNCw0pPRiyDSm9Cw0L0g0LrTqdC70LXQvNGWINCw0YDRgtGD0Ysg0L3QtdCz0ZbQt9GW0L3QtNC1LdC60L7QvNC/0LXQvdGB0LDRgtC+0YDQu9GLINC80LXRhdCw0L3QuNC30Lwg0L3QtdCz0ZbQt9GW0L3QtNC1LSDSm9Cw0L0g0pvRi9GB0YvQvNGLINCw0YDRgtGL0L8sINC20q/RgNC10Log0YHQvtKT0YMg0LbQuNGW0LvRltCz0ZYg0LbQvtKT0LDRgNGL0LvQsNC50YLRi9C90LTRi9KT0YvQvSDQutOp0YDRg9GW0LzRltC30LPQtSDQsdC+0LvQsNC00Ys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89" table:style-name="ce1">
            <text:p>1066889</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0JTQtdC90ZYg0YHQsNGDINC20LDRgSDQsdCw0LvQsNC70LDRgNC00LAg0ZbRiNC10LrRgtGW0qMg0LHQsNC60YLQtdGA0LjRj9C70YvSmyDQvNC40LrRgNC+0YTQu9C+0YDQsNGB0YvQvdC00LAg0LHRltGA0L3QtdGI0LUg0YTQuNC30LjQvtC70L7Qs9C40Y/Qu9GL0psg0LzQsNKj0YvQt9C00Ysg0L/RgNC+0YbQtdGB0YEg0LbSr9GA0LXQtNGWINC205nQvdC1INCx0rHQuyDQsdCw0LvQsNC90YvSoyDSm9Cw0LvRi9C/0YLRiyDRhNC40LfQuNC+0LvQvtCz0LjRj9C70YvSmyDTqdGB0ZbQvyDQttC10YLRltC70YPRltC90LUsINC40LzQvNGD0L3QuNGC0LXRgiDSm9Cw0LvRi9C/0YLQsNGB0YPRi9C90LAgINGL0pvQv9Cw0Lsg0LXRgtC10LTRli4g0IbRiNC10LrRgtGW0qMg0pvQsNC70YvQv9GC0Ysg0LzQuNC60YDQvtGE0LvQvtGA0LDRgdGLINCw0pPQt9Cw0L3Ri9KjINOp0LfRltC90LTRltC6INC80LXQvdGI0ZbQutGC0ZYg0LHQsNC60YLQtdGA0LjRj9GB0Ysg0LXRgdC10LHRltC90LTQtSDSm9Cw0LvRi9C/0YLQsNGB0LDQtNGLLiDQldKjINCw0LvSk9Cw0Ygg0YLRg9GL0LvSk9Cw0L0g0YPQsNKb0YvRgtGC0LAg0Y/Sk9C90Lgg0LDQvdCwINKb0rHRgNGB0LDSk9GL0L3QsNC9INGI0YvSk9CwINGB0LDQu9CwINCw0L3QsNC90YvSoyDQtNC10L3QtdGB0ZbQvdC1INC20LDRgtKb0YvQt9GDINCw0YDSm9GL0LvRiyDQsNC90LDQvdGL0qMg0LzQuNC60YDQvtGE0LvQvtGA0LDRgdGLINCx0LDQu9Cw0pPQsCDTqdGC0ZbQvyDSm9Cw0LvRi9C/0YLQsNGB0LDQtNGLLiDQldC80YjQtdC60L/QtdC9INKb0L7RgNC10LrRgtC10L3QtdGC0ZbQvSDRgdOZ0LHQuNC70LXRgNC00LUg0ZbRiNC10Log0LzQuNC60YDQvtGE0LvQvtGA0LDRgdGLINC90LXQs9GW0LfRltC90LXQvSDQsdC40YTQuNC00L7QsdCw0LrRgtC10YDQuNGP0LvQsNGAINC80LXQvSDQu9Cw0LrRgtC+0LHQsNC60YLQtdGA0LjRj9C70LDRgCDQtdGB0LXQsdGW0L3QtdC9INKb0rHRgNCw0LvQsNC00YsuINKa0L7RgdGL0LzRiNCwINGC0LDSk9Cw0Lwg0LzQtdC9INKb0L7RgNC10LrRgtGW0Log0LfQsNGC0YLQsNGALCDSm9C+0YDQtdC60YLRltC6INC+0YDRgtCwINOp0LfQs9C10YDQs9C10L0g0YHQsNC50YvQvSDQsdCw0YHSm9CwINC80LjQutGA0L7QvtGA0LPQsNC90LjQt9C80LTQtdGAINC80YvRgdCw0LvRiyDRltGI0LXQuiDRgtCw0Y/Sm9GI0LDRgdGLLCDRjdC90YLQtdGA0L7QutC+0LrQutGC0LDRgCwg0LDQvdCw0Y3RgNC+0LHRgtCw0YAg0pvQvtGB0YvQu9CwINCx0LDRgdGC0LDQudC00YsuINCG0YjQtdC6INC80LjQutGA0L7RhNC70L7RgNCw0YHRi9C90LTQsCDQttKv0YDQtdGC0ZbQvSDQvdC10LPRltC30LPRliAg0YTQuNC30LjQvtC70L7Qs9C40Y/Qu9GL0psg0L/RgNC+0YbQtdGB0YHRgtC10YAg0YLRltC60LXQu9C10Lkg0LzQuNC60YDQvtCw0pPQt9Cw0LvQsNGA0LTRi9KjINKb0YvQt9C80LXRgtGW0L3QtSDQsdCw0LnQu9Cw0L3Ri9GB0YLRiy4g0KTQtdGA0LzQtdC90YLQsNGC0LjQstGC0ZbQuiDSm9GL0LfQvNC10YIsINGP0pPQvdC4INC606nQvNGW0YDRgdGD0LvQsNGA0LTRi9KjINOZ0YHRltGA0LXRgdC1INC70LDQutGC0L7Qt9Cw0L3Ri9KjINCw0YjRi9GC0YvQu9GD0YssINC60LvQtdGC0YfQsNGC0LrQsNC90YvSoyDQttOZ0L3QtSDQsdC10LvQvtC6INKb0LDQu9C00YvSm9GC0LDRgNGL0L3Ri9KjINGL0LTRi9GA0LDRg9GLINCw0YDSm9GL0LvRiyDSm9GL0YHSm9CwINGC0ZbQt9Cx0LXQutGC0ZYg0LzQsNC5INKb0YvRiNKb0YvQu9C00LDRgNGLINGC0q/Qt9GW0LvQtdC00ZYuINCR0rHQuyDQt9Cw0YLRgtCw0YAg0ZbRiNC10Log0Y3Qv9C40YLQtdC70LjQudGW0L3RltKjINC90LXQs9GW0LfQs9GWINKb0YPQsNGCINC606nQt9GWINGB0LDQvdCw0LvQsNC00Ysu0KHQvtC90YvQvNC10L0g0pvQsNGC0LDRgCDRltGI0LXQuiDQvNC40LrRgNC+0YTQu9C+0YDRgdGL0L3Ri9KjINGB0LjQvdGC0LXRgtC40LrQsNC70YvSmyDSm9GL0LfQvNC10YLRliDQsdCw0YAuINCG0YjQtdC6INCx0LDQutGC0LXRgNC40Y/Qu9Cw0YDRiyDQutC10LnQsdGW0YAg0LLQuNGC0LDQvNC40L3QtNC10YDQtNGWLCDQvdC10LPRltC30ZbQvdC10L0g0JIg0YLQvtCx0YvQvdGL0qMg0LbTmdC90LUg0Jog0LLQuNGC0LDQvNC40L3RltC9INGB0LjQvdGC0LXQt9C00LXRgyDQsNGA0pvRi9C70Ysg0LDSk9C30LDQtNCw0pPQsCDQtNOZ0YDRg9C80LXQvdC00ZbSoyDQtNC10L/QvtC90Ysg0YHQsNKb0YLQsNC/ICwg0LDQstC40YLQsNC80LjQvdC+0LfQtNCw0YDQtNGL0qMg0LDQu9C00YvQvSDQsNC70LDQtNGLLiDQldGA0YLQtSDQttCw0YHRgtCw0pPRiyDQsdCw0LvQsNC70LDRgNC00LAg0LHSsdC7INCw0YHQsCDQvNCw0qPRi9C30LTRiywg0YHQtdCx0LXQsdGWINC+0YDRgtCw0pPQsCDQsdC10LnRltC80LTQtdC70YMg05nQu9GWINC00LUg0LbQsNC70pPQsNGB0YPQtNCwLiDQmNC80LzRg9C90L7QvNC+0LTRg9C70Y/RhtC40Y8g0pvRi9C30LzQtdGC0ZYg0L3QtdCz0ZbQt9GW0L3QtdC9INC40LzQvNGD0L3QtNGL0psg0LbSr9C50LXQvdGWINGA0LXRgtGC0LXQvyDQvtGC0YvRgNGD0LTQsCwg0pvQsNC70YvQv9GC0Ysg0LjQvNC80YPQvdC40YLQtdGC0YLRliDRgdCw0pvRgtCw0YPQtNCwINC80LDSo9GL0LfQtNGLLiDQhtGI0LXQutGC0ZbSoyDRiNGL0YDRi9GI0YLRiyDSm9Cw0LHQsNGC0YvQvdGL0qMg0YHRi9GA0YLRgtCw0L0g0YLSr9GB0LrQtdC9INGC0L7QutGB0LjQvdC00LXRgNCz0LUsINC30LDSm9GL0LzQtNCw0YPRiNGLINCw0LPQtdC90YLRgtC10YDQs9C1INKb0LDRgNGB0Ysg0LHQsNGA0YzQtdGA0ZbQvSDSm9Cw0LvRi9C/0YLQsNGB0YLRi9GA0LDQtNGLLiDQkdKx0Lsg0pvRi9C30LzQtdGCINC40LzQvNGD0L3QvtCz0LvQvtGD0LHQu9C40L0g0YHQuNC90YLQtdC30ZYg0q/RiNGW0L0g0LrQtdGA0LXQutGC0ZYg0LzQuNC60YDQvtC80L7Qu9C10LrRg9C70LDQu9Cw0YAg0YHQuNC90YLQtdC30LTQtdGDINCw0YDSm9GL0LvRiyDRgtKv0YHRltC90LTRltGA0ZbQu9C10LTRli4g0prQvtGA0pPQsNC90YvRiCDSm9GL0LfQvNC10YLRliwg0pvQsNC70YvQv9GC0Ysg0LzQuNC60YDQvtGE0LvQvtGA0LAg0L/QsNGC0L7Qs9C10L3QtNGWINC80LjQutGA0L7QsNKT0LfQsNC70LDRgNC00YvSoyDRltGI0LXQutC60LUg0LXQvdGD0ZYg0LzQtdC9INC606nQsdC10Y7RltC9INGC0LXQttC10LnQtNGWLiDQmtC+0L3QutGD0YDQtdC90YLRgtGW0Log0YLQtdC20LXQu9GDLCDQsdCw0LrRgtC10YDQuNC+0YbQuNC00YLRltC6INOZ0YHQtdGA0ZYg0LHQsNGAINGE0LXRgNC80LXQvdGC0YLQtdGAINCx06nQu9GDINCw0YDSm9GL0LvRiyDQsNGC0pvQsNGA0YvQu9Cw0LTRiy4g0JzQtdGC0LDQsdC+0LvQuNC60LDQu9GL0psg0pvRi9C30LzQtdGC0ZYg06nRgiDSm9GL0YjSm9GL0LvQtNCw0YDRi9C9INC80LXRgtCw0LHQvtC70LjQt9C00LXRg9Cz0LUg0LHQsNC50LvQsNC90YvRgdGC0YsuINCv0pPQvdC4INCx0LDRg9GL0YDQtNCwINGB0LjQvdGC0LXQt9C00LXQu9Cz0LXQvSDQsdGW0YDRltC90YjRltC70ZbQuiDTqdGCINKb0YvRiNKb0YvQu9C00LDRgNGLINOp0YIg0pvSsdGA0LDQvNGL0L3QtNCwINC+0L0g0LXQutGWINC10LvRliDRltGI0LXQutC60LUg0YLSr9GB0ZbQvywg0LzQsNC50LvQsNGA0LTRi9KjINGL0LTRi9GA0LDRgtGL0LvRg9GL0L3QsCDRi9Kb0L/QsNC7INC10YLRltC/LCDRgtC+0psg0ZbRiNC10LrQutC1INGF0LjQvNGD0YHQv9C10L0g0YLSr9GB0LrQtdC90LTQtSDQvNC40LrRgNC+0YTQu9C+0YDQsCDTmdGB0LXRgNGW0L3QtdC9INC80LXRgtCw0LHQvtC70LjQt9C00LXQvdGW0L8g0pvQsNC50YLQsCDSm9Cw0L3Sk9CwINGB0ZbSo9GW0YDRltC70LXQtNGWLiDQkdKx0Lsg06nRgiDSm9GL0YjSm9GL0LvQtNCw0YDRi9C90YvSoyDQsdCw0YPRi9GALdGW0YjQtdC60YLRltC6INCw0LnQvdCw0LvRi9C80YsuINCW05nQvdC1INCx0rHQuyDQsNC50L3QsNC70YvQvNC00Ysg0YHQsNKb0YLQsNGD0LTQsCDQvNC40LrRgNC+0YTQu9C+0YDQsCDQvNCw0qPRi9C30LTRiyDRgNOp0Lsg0LDRgtKb0LDRgNCw0LTRiy4g0KHQvtC90YvQvNC10L0g0pvQsNGC0LDRgCwg0LzQuNC60YDQvtGE0LvQvtGA0LAg05nRgdC10YDRltC90LXQvSDQsdC10LvQs9GW0LvRliDQsdGW0YAg0LTQtdKj0LPQtdC50LTQtSDQsdC40LvQuNGA0YPQsdC40L3QvdGW0qMg0YvQtNGL0YDQsNGD0YssINC80LjQvdC10YDQsNC70LTQsNGA0LTRi9KjINGB0ZbSo9GW0YDRltC70YPRliwg05nRgdGW0YDQtdGB0LUg0LrQsNC70YzRhtC40LksINC80LDQs9C90LjQuSDQvNC10L0g0YLQtdC80ZbRgNC00ZbSoyDRgdGW0qPRltGA0ZbQu9GD0ZYg0LbQtdKj0ZbQu9C00LXQudC00ZYuINCG0YjQtdC6INC80LjQutGA0L7RhNC70L7RgNCw0YHRiyDQsdCw0LvQsNC90YvSoyDQsNGBINKb0L7RgNGL0YLRgyDQvNC10L0g0LfQsNGCINCw0LvQvNCw0YHRgywg0LjQvNC80YPQvdC40YLQtdGCINC205nQvdC1INCw0L3RgtC40LHQsNC60YLQtdGA0LjQsNC70YzQtNGLINC20q/QudC10YHRltC90ZbSoyDQsNC20YvRgNCw0LzQsNGBINCx06nQu9GW0LPRli4gMiDRgdKx0YDQsNKbLiAxMiDQttCw0YHRgtCw0pPRiyDQsdKx0Lsg0LHQsNC70LDQtNCwINC90LXRhNGA0L7RgtC40LrQsNC70YvSmyDRgdC40L3QtNGA0L7QvNKT0LAg0YLTmdC9INC60LvQuNC90LjQutCw0LvRi9KbINC205nQvdC1INC70LDQsdC+0YDQsNGC0L7RgNC40Y/Qu9GL0psg0LHQtdC70LPRltC70LXRgCDQsdCw0YAuINCG0YHRltC90YPQu9C10YAg0LHSr9C50YDQtdC6INKb0YvQt9C80LXRgtGWINCx0rHQt9GL0LvRi9C/LCDRhNC40LvRjNGC0YDQsNGG0LjRj9C70YvSmyDQsdCw0YDRjNC10YDQtNGW0qMg0LHQtdC70L7QutGC0LDRgNC00Ysg06nRgtC60ZbQt9Cx0LXRgyDSm9Cw0LHRltC70LXRgtGWINGC06nQvNC10L3QtNC10L8sINC305nRgNCz0LUg0LHQtdC70L7QutGC0LDRgNC00YvSoyDQutOp0L8g0LHTqdC70ZbQs9GWINOp0YLRltC/INC60LXRgtGD0ZbQvdC10L0sINKb0LDQvdC00LAg0LHQtdC70L7QuiDQsNC30LDQudGL0L8sINKb0LDQvdC90YvSoyDQvtC90LrQvtGC0LjQutCw0LvRi9KbINKb0YvRgdGL0LzRiyDRgtOp0LzQtdC90LTQtdC/LCDQv9C70LDQt9C80LDQvdGL0qMg0YHSsdC50YvSm9GC0YvSk9GLINCw0YDQsNC70YvSmyDRgtGW0L3Qs9C1INOp0YLRg9GW0L3QtdC9INGC0YPRi9C90LTQsNC50LTRiy4g0J7RgdGLINGB0LXQsdC10L/RgtC10L0g0YLQtSwg0LfTmdGAINCw0L3QsNC70LjQt9GW0L3QtNC1INCx0LXQu9C+0LrRgtGL0qMg0LDRgNGC0YvQvyDQutC10YLRg9GW0L0g0LrTqdGA0LXQvNGW0Lcu0J/RgNC+0YLQtdC40L3Rg9GA0LjRjyDQsNC50pvRi9C9INC00LXSo9Cz0LXQudC00LUuICDQndC+0YDQvNCw0LTQsCDQt9OZ0YDQtNC1INCx0LXQu9C+0Log0LzSr9C70LTQtdC8INCx0L7Qu9C80LDRgyDQutC10YDQtdC6LtCi0q/RgdGWINC90L7RgNC80LDQtNCwINC806nQu9C00ZbRgCDRgdCw0YDSk9GL0Ygg0LHQvtC70YMg0LrQtdGA0LXQuiwg0YHQsNGA0Ysg0LHQvtC70YPRiyDQvdCw0pvRgtGLINC/0LDRgtC+0LvQvtCz0LjRj9C90Ysg0LTTmdC70LXQu9C00LXQvNC10LnQtNGWLiDQkdGW0YDQsNKbINCx0q/QudGA0LXQuiDSm9GL0LfQvNC10YLRliDQsdKx0LfRi9C70pPQsNC90YvQvSDRgdC+0L3QtNCwINC00LAg0LrTqdGA0YHQtdGC0LXQtNGWLiDQk9C10LzQsNGC0YPRgNC40Y8g0LbQvtKb0YLRi9KT0YvQvSDQsNC50pvRi9C90LTQsNC50LTRiy4g0KHQtdCx0LXQsdGWINCz0LXQsNC80YLRg9GA0LjRjyDQttCw0pPQtNCw0LnRi9C90LTQsCwg0LfTmdGA0LTRltKjINGC0q/RgdGWINC10YIg0YjQsNC50YvQvdC00YvRgdGLINGB0LXQutGW0LvQtNGWINKb0L7RiNKb0YvQuyDSm9GL0LfRi9C7INGC0q/RgdGC0LUg0LHQvtC70LDQtNGLLiDQotGL0pPRi9C30LTRi9KT0Ysg0YLTqdC80LXQvdC00LXQs9C10L0sINCx0rHQuyDQsdKv0LnRgNC10LrRgtGW0qMg0LrQvtC90YbQtdC90YLRgNCw0YbQuNGP0LvRi9KbINKb0YvQt9C80LXRgtGWINCx0rHQt9GL0LvSk9Cw0L3Ri9C9INC606nRgNGB0LXRgtC10LTRli4g0JHSsdC7INC20LDRgdGC0LAg0L3QtdGB0LXQv9GC0ZbSoyDSm9Cw0LvRi9C/0YLRiyDRgdCw0LvRi9GB0YLRi9GA0LzQsNC70Ysg0YLRi9KT0YvQt9C00YvSk9GLIDEwMTgtMTAyNSDRiNCw0LzQsNGB0YvQvdC00LAg0LHQvtC70YMg0LrQtdGA0LXQuiwg0LDQuyDQsdCw0LvQsNC00LAg0YLTqdC80LXQvdC00LXQs9C10L0g0Y/Sk9C90Lgg0LPQuNC/0L7RgdGC0LXQvdGD0YDQuNGPIC4g0JHQsNC70LDQtNCwINGB0LjRgNC10Log05nRgNGWINCw0Lcg0LzTqdC70YjQtdGA0LTQtSDQt9OZ0YAg0YjRi9KT0LDRgNGDLCDRj9KT0L3QuCDQvtC70LjQs9GD0YDQuNGPINCx0LXQu9Cz0ZbRgdGWINCx0LDRgC4g0JbSr9GA0LXQuiDRgtC+0L3QtNCw0YDRi9C90YvSoyDTmdC70YHRltGA0LXRg9GWLCDQsNC50L3QsNC70YvQvNC00LDSk9GLINKb0LDQvSDQutOp0LvQtdC80ZYg0LDQt9Cw0LnSk9Cw0L3QvdCw0L0g0LHQvtC70YPRiyDQvNKv0LzQutGW0L0uINCR0rHQuyDQs9C40L/QvtCy0L7Qu9C10LzQuNGPINC905nRgtC40LbQtdGB0ZYuINCd0LXRhNGA0L7RgtC40LrQsNC70YvSmyDRgdC40L3QtNGA0L7QvNC90YvSoyDQvdCw0pvRgtGLINC00LjQsNCz0L3QvtGB0YLQuNC60LDQu9GL0psg0LrRgNC40YLQtdGA0LjQudGWINCx0rHQuyDQvdC10YHQtdC/0YLQtdCz0ZYg0LHQtdC70L7QutGC0LDRgNC00YvSoyDQsNGA0YLRg9GLINGB0LDQvdCw0LvQsNC00YsuINCR0LXQu9C+0Log0LzTqdC70YjQtdGA0ZYg06nRgtC1INC20L7Sk9Cw0YDRiyDQvNOp0LvRiNC10YDQtNC1LCDQsdKx0Lsg0LDRg9GL0YAg0LbQsNKT0LTQsNC5LiDQrdGA0LjRgtGA0L7RhtC40YLRgtC10YAg0L3QvtGA0LzQsNC00LAsINOZ0LTQtdGC0YLQtdCz0ZYg0LrTqdC3INCw0LnQvNCw0pPRi9C90LTQsNKT0Ysg0LHRltGAINC10LrRliDQsdC+0LvRg9GLINC90LDSm9GC0Ysg06nQt9Cz0LXRgNGW0YEg0LXQvNC10YEuINCT0LjQsNC70LjQvdC00ZYg0LbTmdC90LUg0YLSr9C50ZbRgNGI0ZbQutGC0ZYg0YbQuNC70LjQvdC00YDQu9C10YAg0LHQvtC70YPRiyDQsdKv0LnRgNC10Log0YLSr9GC0ZbQutGI0LXQu9C10YDRltC90ZbSoyDQt9Cw0pvRi9C80LTQsNC70YPRi9C9ICwg0Y/Sk9C90Lgg0YLRg9Cx0YPQu9C+0LjQvdGC0LXRgNGB0YLQuNGG0LjQsNC70YzQtNGLINC60L7QvNC/0L7QvdC10L3RgiDQt9Cw0pvRi9C80YvQvSDQutOp0YDRgdC10YLQtdC00ZYuINCR0q/QudGA0LXQutGC0ZbSoyDQutC+0L3RhtC10L3RgtGA0LDRhtC40Y/Qu9GL0psg0pvRi9C30LzQtdGC0ZYg0LHSsdC7INCx0q/QudGA0LXQutGC0ZbSoyDQt9OZ0YDQtNC10L0g0YHRg9C00Ysg0pvQsNC50YLQsCDRgdGW0qPRltGA0ZbQvywg0pvQsNC90LTQsNKT0Ysg0LDQt9C+0YLRgtGLINKb0LDQu9C00YvSm9GC0LDRgNC00Ysg0LfTmdGA0LPQtSDRiNGL0pPQsNGA0YvQvywg0LfTmdGA0LTRliDQutC+0L3RhtC10L3RgtGA0LDRhtC40Y/Qu9Cw0YMg0pvQsNCx0ZbQu9C10YLRltC9INGB0LjQv9Cw0YLRgtCw0LnQtNGLLiDQr9KT0L3QuCDQvtC90Ysg0LDQvdGL0pvRgtCw0YMg0LHSr9C50YDQtdC6INKb0YvQt9C80LXRgtGW0L0g0LHQsNKT0LDQu9Cw0YPQtNCwINC80LDSo9GL0LfQtNGLLiDQkdKx0Lsg0LrTqdGA0YHQtdGC0LrRltGI0YLRltKjINGC06nQvNC10L3QtNC10YPRliDQsdKv0LnRgNC10Log0L/QsNGA0LXQvdGF0LjQvNCw0YHRi9C90YvSoyDQt9Cw0pvRi9C80YvQvSzTmdGB0ZbRgNC10YHQtSDQtNC40YHRgtCw0LvRjNC00Ysg0YLSr9GC0ZbQutGI0LUg0LzQtdC9INC20LjQvdCw0pvRgtCw0YPRiNGLINGC0q/RgtGW0LrRgtGW0qMg0LfQsNKb0YvQvNGL0L0g0LrTqdGA0YHQtdGC0LXQtNGWLiDQkdCw0LvQsNC00LAg0LDQudKb0YvQvSDQvdC10YTRgNC+0YLQuNC60LDQu9GL0psg0YHQuNC90LTRgNC+0LzSk9CwINGC05nQvSDQsdC10LvQs9GW0LvQtdGAINCx0LDRgCDQtNC10L8g0pvQvtGA0YvRgtGL0L3Ri9C00YvQu9Cw0LnQvNGL0LcuINCh0L7QvdGL0LzQtdC9INKb0LDRgtCw0YAsINCx0q/QudGA0LXQutGC0ZbSoywg0LrQvtC90YbQtdC90YLRgNCw0YbQuNGP0LvRi9KbINKb0YvQt9C80LXRgtGWINGC06nQvNC10L3QtNC10YPRliwg0LPQu9C+0LzQtdGA0YPRj9C70YDQu9GLINC205nQvdC1INGC0YPQsdGD0LvRj9GA0LvRiyDQsNC/0L/QsNGA0LDRgtGC0YvSoyDQsdGW0YDQu9C10YHRltC/INC20q/RgNGD0ZbQvSDQutOp0YDRgdC10YLQtdC00ZYuINCX05nRgCDRgtGL0pPRi9C30LTRi9KT0Ysg06nQt9Cz0LXRgNGD0ZYg0LXRgNGC0LUg0LTQuNCw0LPQvdC+0YHRgtC40LrQsNC70YvSmyDQttOZ0L3QtSDQsdC+0LvQttCw0LzQtNGL0psg0LHQtdC70LPRliDRgNC10YLRltC90LTQtSDQtdGA0LXQutGI0LUg0LzQsNKj0YvQt9KT0LAg0LjQtS4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37" table:style-name="ce1">
            <text:p>1067137</text:p>
          </table:table-cell>
          <table:table-cell office:value-type="string" table:style-name="ce1">
            <text:p>kazakh</text:p>
          </table:table-cell>
          <table:table-cell office:value-type="string" table:style-name="ce1">
            <text:p>Билет 35.&amp;lt;br /&amp;gt; 1.Ерте жастағы балаларда қалыпты ішек микрофлорасы қандай процесстерге қатысады? &amp;lt;br /&amp;gt; 2.Нефрологиялық бөліміңе 12-жасар үл бала басының ауруына, бетінің ісінуіне, зәр шығуының сиреуіне шағымданып түскен. Қарағанда: Терісі ақшыл,енжар, анасарка, АҚ 120/85 мм.рт.ст. Жүрек үндері әлсәз, жүрек соғу жиілігі минуттына 90 . Іші үлкейген,бауырдың шетті қабырға доғасынан 1 см шыққан. Зәр шығаруы сирек, аз мөлшерде. Зәр анализы : түсі – сары, нәруыз 8,5 г/л, тығыздығы 1006, эритроциттер 1-2 көз аймағында, гиалинды және түйіршікті цилиндрлар – 7-8 көз аймағында. Қандай мақсатпен бүйректің концентрациондық функциясы анықталады. Жалпы зәр анализың интерпритацияcын жүргізіңіз және осы жаста несептің салыстырмалы тығыздығы қалыпты жағдайда қанша болады?&amp;lt;br /&amp;gt;</text:p>
          </table:table-cell>
          <table:table-cell office:value-type="string" table:style-name="ce1">
            <text:p>MS7QltCw0LvQv9GLINGW0YjQtdC6INC80LjQutGA0L7RhNC70L7RgNCw0YHRiyDQsdGW0YDRidCw0LzQsCDQvNCw0qPRi9C30LTRiyDRhNC40LfQuNC+0LvQvtCz0LjRj9C70YvSmyDQv9GA0L7RhtC10YHRgtC10YDQs9C1INKb0LDRgtGL0YHQsNC00Ysg0LTQtdGB0LXQuiDQsdC+0LvQsNC00Ysu0J7QvdGL0qMg0ZbRiNGW0L3QtNC1INC90LDSm9GC0YvQu9Cw0L8g0LDQudGC0LDRgtGL0L0g0LHQvtC70YHQsNC8LNCx0LDQu9Cw0L3Ri9KjINCw0pPQt9Cw0YHRi9C90LTQsNKT0YsgINKb0L7RgNC10LrRgtGW0Log0LfQsNGC0YLQsNGA0LTRi9KjINKb0L7RgNGL0YLRi9C70YPRi9C90LAgINC205nQvdC1INC00LUg0YHRltKj0ZbRgNGW0LvRg9GW0L3QtSDQutOp0LzQtdC60YLQtdGB0LXQtNGWLtCR0rHQuyDQsNC50YLRi9C70pPQsNC9INC/0YDQvtGG0LXRgdGC0LUg0LHQsNC60YLQtdGA0LjRj9C70LDRgCDQutOp0LzRltGA0YHRgyzQvNCw0Lks0LDSm9GD0YvQt9C00LDRgNC00Ysg0LbTmdC90LUg0LHQsNGB0pvQsCDQtNCwINC80LDSo9GL0LfQtNGLINC30LDRgtGC0LDRgNC00Ysg0YvQtNGL0YDQsNGC0YvQvyDQsNKT0LfQsNKT0LAg0pvQsNC20LXRgiDQt9Cw0YLRgtCw0YDQtNGLINGC0q/Qt9C10LTRli7SmtGL0YjSm9GL0LvQtNGL0psg0L7RgNGC0LDQvdGL0qMg0pvQsNC70YvQv9GC0LDRgdGD0YvQvdCwINC00LAg06nQtyDTmdGB0LXRgNGW0L0g0YLQuNCz0ZbQt9C10LTRli7SmtGL0YjSm9GL0LvQtNGL0psg0L7RgNGC0LAg0pvQsNC70YvQv9GC0LDRgdKb0LDQvdC00LAg0L/QsNGC0L7Qs9C10L3QtNGWINC80LjQutGA0L7QvtGA0LPQsNC90LjQt9C80LTQtdGAINKv0YjRltC9INKb0L7Qu9Cw0LnRgdGL0Lcg0LbQsNKT0LTQsNC5INGC0YPQtNGL0YDQsNC00Ysu0J7QuyDQvtGA0LPQsNC90LjQutCw0LvRi9KbINKb0YvRiNKb0YvQu9C00LDRgNC00YvSoyDQsNGC0LDQvyDQsNC50YLSm9Cw0L3QtNCwINGB0q/RgiDSm9GL0YjSm9GL0LvRi9C90YvSoyDTqdC90LTRltGA0ZbRgdGWINCw0YDSm9GL0LvRiyDQttKv0LfQtdCz0LUg0LDRgdCw0LTRiy7QntC90YvQvNC10L0g0pvQvtGB0LAg0LHQsNC70LDQvdGL0qMg0LjQvNC80YPQvdC00YvSmyDQttKv0LnQtdGB0ZbQvdGW0qMg0LTQsNC80YPRi9C90LAg0LTQsCDQutOp0LzQtdC60YLQtdGB0LXQtNGWLtCf0LDRgtC+0LPQtdC90LTRltC6INC80LjQutGA0L7QvtGA0LPQsNC90LjQt9C80LTQtdGA0LzQtdC9INC60q/RgNC10YHRg9Cz0LUs0YHQvtKT0LDQvSDSm9Cw0YDRgdGLINC40LzQvNGD0L3QtNGL0psg0LbQsNGD0LDQv9GC0Ysg0pvQsNC70YvQv9GC0LDRgdGC0YvRgNCw0LTRiyDQttOZ0L3QtSDSm9Cw0LHRi9C90YMg0YDQtdCw0LrRhtC40Y/Qu9Cw0YDRi9C90LAg05nRgdC10YAg0LXRgtC10LTRli7QnNC40LrRgNC+0YTQu9C+0YDQsCDQuNC80LzRg9C90LTRi9KbINC20q/QudC10L3RltKjINC00rHRgNGL0YEg0pvRi9C30LzQtdGCINCw0YLSm9Cw0YDRg9GLINKv0YjRltC9LNKb0LDQttC10YLRgtGWINCw0L3RgtC40LTQtdC90LXQu9C10YDQtNGWINGC0q/Qt9C10LTRli7SmtC+0YDSk9Cw0L3Ri9GIINCx06nQs9C10YLRltC9INKb0LDQu9GL0L/RgtCw0YHRgtGL0YDQsNC00Ysu0K/Sk9C90Lgs0L/QsNGC0L7Qs9C10L3QtNGWINC80LjQutGA0L7QvtGA0LPQsNC90LjQt9C80LTQtdGA0LTRltKjINGW0YjQtdC60LrQtSDTqdGC0ZbQvyDQutC10YLRg9GW0L3QtdC9INGB0LDSm9GC0LDQvyDRgtKx0YDQsNC00Ysu0JzQuNC60YDQvtGE0LvQvtGA0LAg0LLQuNGC0LDQvNC40L3QtNC10YDQtNGWLNCx0LjQvtC70L7Qs9C40Y/Qu9GL0psg0LHQtdC70YHQtdC90LTRliDQt9Cw0YLRgtCw0YDQtNGLINC00LAg0YLSr9C30YPQs9C1INKb0LDRgtGL0YHQsNC00Ysu0JzQsNKj0YvQt9C00Ysg0Jos0JIg0LLQuNGC0LDQvNC40L3QtNC10YDRlizRhNC10YDQvNC10L3RgtGC0LXRgCDQvNC10L0g0LDQvNC40L0g0pvRi9GI0pvRi9C70LTQsNGA0YvQvSDRgdC40L3RgtC10LfQtNC10LnQtNGWLtCG0YjQtdC6INC80LjQutGA0L7RhNC70L7RgNCw0YHRiyDRltGI0LXQuiDQvNC4INC+0YHRliDQsNGA0pvRi9C70Ysg0LHQsNC70LDQvdGL0qMg0LbSr9C50LrQtSDQttKv0LnQtdGB0ZbQvdC1INC00LUg0pvQsNGC0YvRgdCw0LTRiy7QltCw0LvQv9GLINC80LjQutGA0L7RhNC70L7RgNCwINC80LXQvSDQvdC10YDQsiDQttKv0LnQtdGB0ZYg0LDRgNCw0YHRi9C90LTQsNKT0Ysg0LHQsNC50LvQsNC90YvRgSDQv9GB0LjRhdC+0Y3QvNC+0YbQuNC+0L3QsNC70LTRi9KbICDQutOp0qPRltC7INC60q/QudCz0LUg05nRgdC10YAg0LXRgtC10LTRli48YnIgLz4NCjIu0JbQsNC70L/RiyDQsdKv0LnRgNC10LrRgtGW0qMg0LrQvtC90YbQtdC90YLRgNCw0YbQuNC+0L3QtNGL0psg0YTRg9C90LrRhtC40Y/RgdGLINCw0pPQt9Cw0LTQsNKT0Ysg0YHRgyDRgtKx0Lcg0LDQu9C80LDRgdGD0YvQvdGL0qMg0YLQtdC/0LUg0YLQtdKj0LTRltCz0ZbQvSDQutOp0YDRgdC10YLQtdC00ZYu0JbQsNC70L/RiyDQsdKx0Lsg0YTRg9C90LrRhtC40Y8g0LfTmdGA0LTRltKjINGB0LDQu9GL0YHRgtGL0YDQvNCw0LvRiyDRgtGL0pPRi9C30LTRi9KT0Ysg0LDRgNKb0YvQu9GLINCx0LDSk9Cw0LvQsNC90LDQtNGLINC00LXRgdC10Log0LHQvtC70LDQtNGLLtCd0LXQs9GW0LfQs9GWINC80LDSm9GB0LDRgtGC0LDRgNGL0L3QsCDRgtC+0pvRgtCw0LvQsCDQutC10YLRgdC10Los0LHSr9C50YDQtdC6INOp0LfQtdC60YjQtdC70LXRgNGW0L3RltKjINGB0YMg0YDQtdCw0LHRgdC+0YDQsdGG0LjRj9GB0YvQvSDQsdCw0pPQsNC70LDRgyzRgdC+0LfRi9C70LzQsNC70Ysg0LHSr9C50YDQtdC6INC20LXRgtGW0YHQv9C10YPRiNGW0LvRltCz0ZYg0LbTmdC90LUg0L3QtdGE0YDQuNGC0YLRltC6INGB0LjQvdC00YDQvtC8INGB0LjRj9Kb0YLRiyDQsNGD0YDRg9C70LDRgNC00LAg0LHSr9C50YDQtdC60YLRltKjINGE0LjQu9GM0YLRgNCw0YbQuNGP0LvRi9KbINC205nQvdC1INC00LUg0LrQvtC90YbQtdC90YLRgNCw0YbQuNGP0LvRi9KbINC80q/QvNC60ZbQvdC00ZbQs9GW0L0g0LDQvdGL0pvRgtCw0YMg0LHQvtC70YvQvyDRgtCw0LHRi9C70LDQtNGLLtCV0L3QtNGW0LPRliDQt9OZ0YAg0LDQvdCw0LvQuNC30ZbQvSDRgtCw0LvQtNCw0LnRgtGL0L0g0LHQvtC70YHQsNKbLNC305nRgCDRgtKv0YHRliDRgdCw0YDRiyzSm9Cw0LvRi9C/0YLRiy7QndOZ0YDRg9GL0LcgOCw10LMv0Lsu0prQsNC70YvQv9GC0Ysg0LTQsCAwLDAz0LMv0Lsg0LPQtSDQtNC10LnRltC9INCx0L7Qu9GD0Ysg0LrQtdGA0LXQui7QkdGW0LfQtNC1INCx0rHQuyDQv9GA0L7RgtC10LjQvdGD0YDQuNGP0L3RiyDQutOp0YDRgdC10YLQtdC00ZYu0K/Sk9C90Lgg0LDQudKb0YvQvSDQvdC10YTRgNC+0YLQuNC60LDQu9GL0psg0L/RgNC+0YLQtdC40L3Rg9GA0LjRjy7QotGL0pPRi9C30LTRi9KT0YsgMTAwNizQkdKx0Lsg0YLTqdC80LXQvSDQutOp0YDRgdC10YLQutGW0Ygu0K3RgNC40YLRgNC+0YbQuNGC0YLQtdGAIDEtMizSm9Cw0LvRi9C/0YLRiyDRiNC10LPRltC90LTQtS7QkdCw0LvQsNC00LDSk9GLINC90LXRgdC10L/RgtGW0qMg0YHQsNC70YvRgdGC0YvRgNC80LDQu9GLINGC0YvSk9GL0LfQtNGL0pPRiy3RgtCw0qPQtdGA0YLQtdKj0LPRliDQt9OZ0YAg0q/RiNGW0L0gMTAxOC0xMDI2LtCa0q/QvdGWINCx0L7QudKT0Ysg0L7RgNGC0LDRiNCwINC805nQvdGWIDEwMTAtMTAyMC7QkNC90LDQu9C40LfQtNGWINGC0LDQu9C00LDQuSDQutC10LvQtSzQsdKx0Lsg0LHQsNC70LDQtNCwINCx0q/QudGA0LXQutGC0ZbSoyDRhNGD0L3QutGG0LjQvtC90LDQu9C00YvSmyDQsdKx0LfRi9C70YvRgdGLLNC90LXRhNGA0L7RgtC40LrQsNC70YvSmyDRgdC40L3QtNGA0L7QvCDQv9Cw0LnQtNCwINCx0L7Qu9KT0LDQvSDQtNC10L8g0L7QudC70LDQudC80YvQvS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2-ші сұрақта нақты қойылған -салыстырмалы тығыздығы туралы нақты толық жауап жазылмаған. Анатомо-физиологиялық ерекшеліктер ескерілмеген</text:p>
          </table:table-cell>
          <table:table-cell office:value-type="float" office:value="0" table:style-name="ce1">
            <text:p>0</text:p>
          </table:table-cell>
          <table:table-cell table:number-columns-repeated="16376"/>
        </table:table-row>
        <table:table-row table:style-name="ro1">
          <table:table-cell office:value-type="float" office:value="915278" table:style-name="ce1">
            <text:p>915278</text:p>
          </table:table-cell>
          <table:table-cell office:value-type="string" table:style-name="ce1">
            <text:p>russian</text:p>
          </table:table-cell>
          <table:table-cell office:value-type="string" table:style-name="ce1">
            <text:p>Билет 35.&amp;lt;br /&amp;gt; 1.В каких процессах участвует бактериальная микрофлора кишечника у здоровых детей раннего возраста и ее физиологическая роль?&amp;lt;br /&amp;gt; 2. Мальчик 12 лет, поступил в нефрологическое отделение с жалобами на отеки на лице, увеличение живота, редкое мочеиспускание. Бледный, вялый, отеки типа анасарки. АД в пределах 120/85 мм.рт.ст. Тоны сердца приглушены, ЧСС 90 в мин. Живот увеличен в объеме, край печени выступает из-под реберного края на 1 см. Мочится редко, малыми порциями. Анализ мочи: цвет – желтый, белок 8,5 г/л, удельный вес мочи 1006, эритроциты 1-2 в п/зр, гиалиновые и зернистые цилиндры – 7-8 в п/зр. С какой целью определяется концентрационная функция почек. Сделайте интерпретацию общего анализа мочи и укажите норму удельного веса данного возраста.&amp;lt;br /&amp;gt;</text:p>
          </table:table-cell>
          <table:table-cell office:value-type="string" table:style-name="ce1">
            <text:p>MS4g0JIg0L/QtdGA0LLRi9C1IDE2LTIwINGH0LDRgdC+0LIg0LbQuNC30L3QuCDRgyDQvdC+0LLQvtGA0L7QttC00LXQvdC90L7Qs9C+INC60LjRiNC10YfQvdC40Log0L3QsNGF0L7QtNC40YLRgdGPINCyINGB0YLQtdGA0LjQu9GM0L3QvtC5INGE0LDQt9C1INGB0L7QvtGC0LLQtdGC0YHRgtCy0LXQvdC90L4g0Y/QstC70Y/QtdGC0YHRjyDRh9C40YHRgtGL0LwuINCf0L7Qt9C20LUg0LIg0L/QtdGA0LLRi9C1INGB0YPRgtC60Lgg0L/QvtGP0LLQu9GP0LXRgtGB0Y8g0LrQvtC60LrQvtCy0LDRjyDRhNC70L7RgNCwLCDQvdCwINCy0YLQvtGA0YvQtSDRgdGD0YLQutC4INCz0YDQsNC8LdC/0L7Qu9C+0LbQuNGC0LXQu9GM0L3Ri9C1INC/0LDQu9C+0YfQutC4LCDRgSDRgtGA0LXRgtGM0LjRhSDRgdGD0YLQvtC6INGA0LDQt9Cy0LjQstCw0Y7RgtGB0Y8g0LHQuNGE0LjQtNGD0Lwt0LHQsNC60YLQtdGA0LjQuCwgINC60LjRiNC10YfQvdGL0LUg0L/QsNC70L7Rh9C60LguINCa0L7Qu9C40YfQtdGB0YLQstC+INCx0LDQutGC0LXRgNC40Lkg0LHRi9GB0YLRgNC+INGD0LLQtdC70LjRh9C40LLQsNC10YLRgdGPLCDQuCDQvdCw0YfQuNC90LDQtdGC0YHRjyDRhNCw0LfQsCDQuNC90YTQuNGG0LjRgNC+0LLQsNC90LjRjywg0LIg0YHQu9C10LTRgdGC0LLQuNC4INGH0LXQs9C+INC60L7Qu9C40YfQtdGB0YLQstC+INC60LvQtdGC0L7QuiDQtNC+0YHRgtC40LPQsNC10YIg0YHQstC+0LXQs9C+INC80LDQutGB0LjQvNGD0LzQsCDQvdCwIDMt0Lgg0YHRg9GC0LrQuC4g0KTQsNC30LAg0LjQvdGE0LjRhtC40YDQvtCy0LDQvdC40Lgg0LTQu9C40YLRgdGPINC+0YIgNCDQtNC+IDUg0LTQvdC10LksINC00LDQu9C10LUg0L3QsNGH0LjQvdCw0LXRgtGB0Y8g0L/QvtGB0LvQtdC00L3Rj9GPINGE0LDQt9CwINGC0YDQsNC90YHRhNC+0YDQvNCw0YbQuNC4INC60LjRiNC10YfQvdC+0Lkg0YTQu9C+0YDRiyDQv9GA0L7QtNC+0LvQttC40YLQtdC70YzQvdC+0YHRgtGM0Y4gNS02INC00L3QtdC5LiDQndCwINCy0YLQvtGA0L7QvCDQvNC10YHRj9GG0LUg0LbQuNC30L3QuCwg0LrQuNGI0LXRh9C90LDRjyDQvNC40LrRgNC+0YTQu9C+0YDQsCDRhdCw0YDQsNC60YLQtdGA0LjQt9GD0LXRgtGB0Y8g0LHQuNGE0LjQtNGD0Lwt0LHQsNC60YLQtdGA0LjRj9C80LguINCa0L7Qs9C00LAg0Log0LrQvtC90YbRgyDQv9C10YDQstC+0LPQviDQs9C+0LTQsCDQttC40LfQvdC4INGA0LDRhtC40L7QvSDRgNC10LHQtdC90LrQsCDRg9GB0LvQvtC20L3Rj9C10YLRgdGPLCDQutC+0LvQuNGH0LXRgdGC0LLQviDQsdC40YTQuNC00YPQvC3QsdCw0LrRgtC10YDQuNC5INGD0LzQtdC90YzRiNCw0LXRgtGB0Y8sINCwINC60LjRiNC10YfQvdGL0LUg0L/QsNC70L7Rh9C60Lgg0YPQstC10LvQuNGH0LjQstCw0LXRgtGB0Y8uINCR0LDQutGC0LXRgNC40LDQu9GM0L3QsNGPINC80LjQutGA0L7RhNC70L7RgNCwINC60LjRiNC10YfQvdC40LrQsCDRg9GH0LDRgdGC0LLRg9C10YIg0LI6INCh0LjQvdGC0LXQt9C1INCy0LjRgtCw0LzQuNC90L7QsiDQs9GA0YPQv9C/0YsgSyDQuCBCLCDRg9GH0LDRgdGC0LLRg9C10YIg0LIg0YTQtdGA0LzQtdC90YLQsNGG0LjQuCDQvdC10L/QtdGA0LXQstCw0YDQtdC90L3Ri9GFINGD0LPQu9C10LLQvtC00L7Qsiwg0L/QvtC00LTQtdGA0LbQutCwINC60LjRgdC70L7RgtC90L4t0YnQtdC70L7Rh9C90L7Qs9C+INCx0LDQu9Cw0L3RgdCwLCDRg9GH0LDRgdGC0LjQtSDQsiDQuNC80LzRg9C90L3QvtC5INC30LDRidC40YLQtSDQvtGA0LPQsNC90LjQt9C80LAg0YfQtdGA0LXQtyDRgdGC0LjQvNGD0LvRj9GG0LjRjiDQsNC90YLQuNGC0LXQuywg0LrQvtC70L7QvdC40LfQsNGG0LjQvtC90L3QsNGPINGA0LXQt9C40YHRgtC10L3RgtC90L7RgdGC0Ywg0LfQsNGJ0LjRgtCwINC+0YIg0L/QsNGC0L7Qs9C10L3QvdGL0YUg0LHQsNC60YLQtdGA0LjQuS4g0KTQuNC30LjQvtC70L7Qs9C40YfQtdGB0LrQsNGPINGA0L7Qu9GMINCx0LDQutGC0LXRgNC40LDQu9GM0L3QvtC5INC80LjQutGA0L7RhNC70L7RgNGLOiDQv9C+0LzQvtCz0LDQtdGCINCyINC/0LXRgNC10LLQsNGA0LjQstCw0L3QuNC4INC/0LjRidC10LLRi9GFINC+0YHRgtCw0YLQutC+0LIsINC/0L7QtNC00LXRgNC20LrQsCDRgNCw0LfQstC40YLQuNGPINC40LzQvNGD0L3QvdC+0Lkg0YHQuNGB0YLQtdC80YssINC+0LHQtdGB0L/QtdGH0LXQvdC40LUg0YDQsNC30LvQvtC20LXQvdC40Y8g0LrQu9C10YLRh9Cw0YLQutC4LCDRgdC/0L7RgdC+0LHRgdGC0LLRg9C10YIg0LLRgdCw0YHRi9Cy0LDQvdC40Y4g0LzQuNC90LXRgNCw0LvQvtCyKNC60LDQu9GM0YbQuNC5INC80LDQs9C90LjQuSDQuCDRgtC0KSwg0YDQtdCz0YPQu9GP0YbQuNGPINC80L7RgtC+0YDQvdC+0Lkg0YTRg9C90LrRhtC40Lgg0LrQuNGI0LXRh9C90LjQutCwLjxiciAvPg0KPGJyIC8+DQo8YnIgLz4NCjIuINCf0L4g0LjQvdGC0LXRgNC/0YDQtdGC0LDRhtC40Lg6INCW0LDQu9C+0LHRizog0J7RgtC10LrQuCDQvdCwINC70LjRhtC1LCDRg9Cy0LXQu9C40YfQtdC90LjQtSDQttC40LLQvtGC0LAsINCx0LvQtdC00L3QvtGB0YLRjCwg0LLRj9C70L7RgdGC0YwsINGA0LXQtNC60L7QtSDQvNC+0YfQtdC40YHQv9GD0YHQutCw0L3QuNC1LiA8YnIgLz4NCtCd0LAg0L7RgdC80L7RgtGA0LU6INCQ0JQgMTIwLzg1INC80Lwu0YDRgi7RgdGCLCDQp9Ch0KEgOTAv0LzQuNC9LCDRgtC+0L3RiyDRgdC10YDQtNGG0LAg0L/RgNC40LPQu9GD0YjQtdC90YssINC20LjQstC+0YIg0YPQstC10LvQuNGH0LXQvSDQsiDQvtCx0YrQtdC80LUsINC60YDQsNC5INC/0LXRh9C10L3QuCDQstGL0YHRgtGD0L/QsNC10YIg0LjQtyDQv9C+0LQg0YDQtdCx0LXRgNC90L7Qs9C+INC60YDQsNGPINC90LAgMSDRgdC8LiA8YnIgLz4NCtCQ0L3QsNC70LjQtyDQvNC+0YfQuDog0KbQstC10YI6INC20LXQu9GC0YvQuSAtINC90L7RgNC80LAsINCR0LXQu9C+0Lo6OCw1INCzL9C7IC0g0LLRi9GA0LDQttC10L3QvdCw0Y8g0L/RgNC+0YLQtdC40L3Rg9GA0LjRjywg0K3RgNC40YLRgNC+0YbQuNGC0Ys6IDEtMiDQsiDQvy/Qt9GAIC0g0YPQutCw0LfRi9Cy0LDQtdGCINC90LAg0L3QtdC30L3QsNGH0LjRgtC10LvRjNC90YPRjiDQs9C10LzQsNGC0YPRgNC40Y4sINCT0LjQsNC70LjQvdC+0LLRi9C1INC4INC30LXRgNC90LjRgdGC0YvQtSDRhtC40LvQuNC90LTRgNGLOiA3LTgg0LIg0L8v0LfRgCAtINC90LDQu9C40YfQuNC1INCz0LjQsNC70LjQvdC+0LLRi9GFINC4INC30LXRgNC90LjRgdGC0YvRhSDRhtC40LvQuNC90LTRgNC+0LIg0LIg0LzQvtGH0LUg0YPQutCw0LfRi9Cy0LDQtdGCINC90LAg0L/QvtGA0LDQttC10L3QuNC1INC/0L7Rh9C10YfQvdGL0YUg0LrQsNC90LDQu9GM0YbQtdCyICwg0YPQtNC10LvRjNC90YvQuSDQstC10YEg0LzQvtGH0Lg6IDEwMDYgLSDQv9C+0L3QuNC20LXQvdC+INGD0LrQsNC30YvQstCw0LXRgiDQvdCwINCz0LjQv9C+0YHRgtC10L3Rg9GA0LjRjiwg0LIg0L3QvtGA0LzQtSDRg9C00LXQu9GM0L3Ri9C5INCy0LXRgSDQvNC+0YfQuCDQsiDQstC+0LfRgNCw0YHRgtC1IDEyINC70LXRgjogMTAxMC0xMDI1LiA8YnIgLz4NCtCm0LXQu9GM0Y4g0L7Qv9GA0LXQtNC10LvQtdC90LjRjyDQutC+0L3RhtC10L3RgtGA0LDRhtC40L7QvdC90L7QuSDRhNGD0L3QutGG0LjQuCDQv9C+0YfQtdC6INGP0LLQu9GP0LXRgtGB0Y8g0L7RhtC10L3QutCwINGB0L/QvtGB0L7QsdC90L7RgdGC0Lgg0L/QvtGH0LXQuiDQutC+0L3RhtC10L3RgtGA0LjRgNC+0LLQsNGC0Ywg0LzQvtGH0YMg0Lgg0LLRi9Cy0L7QtNC40YLRjCDRgtC+0LrRgdC40L3Riywg0L3QsNGA0YPRiNC10L3QuNC1INGN0YLQvtC5INGE0YPQvdC60YbQuNC4INC80L7QttC10YIg0YHQstC40LTQtdGC0LXQu9GM0YHRgtCy0L7QstCw0YLRjCDQviDQvdCw0YDRg9GI0LXQvdC40Lgg0LPQu9C+0LzQtdGA0YPQu9GP0YDQvdC+0Lwg0LjQu9C4INC60LDQvdCw0LvRjNGG0LXQstC+0Lwg0L/QvtCy0YDQtdC20LTQtdC90LjQuC4gPGJyIC8+DQo=</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79" table:style-name="ce1">
            <text:p>915379</text:p>
          </table:table-cell>
          <table:table-cell office:value-type="string" table:style-name="ce1">
            <text:p>russian</text:p>
          </table:table-cell>
          <table:table-cell office:value-type="string" table:style-name="ce1">
            <text:p>Билет 35.&amp;lt;br /&amp;gt; 1.В каких процессах участвует бактериальная микрофлора кишечника у здоровых детей раннего возраста и ее физиологическая роль?&amp;lt;br /&amp;gt; 2. Мальчик 12 лет, поступил в нефрологическое отделение с жалобами на отеки на лице, увеличение живота, редкое мочеиспускание. Бледный, вялый, отеки типа анасарки. АД в пределах 120/85 мм.рт.ст. Тоны сердца приглушены, ЧСС 90 в мин. Живот увеличен в объеме, край печени выступает из-под реберного края на 1 см. Мочится редко, малыми порциями. Анализ мочи: цвет – желтый, белок 8,5 г/л, удельный вес мочи 1006, эритроциты 1-2 в п/зр, гиалиновые и зернистые цилиндры – 7-8 в п/зр. С какой целью определяется концентрационная функция почек. Сделайте интерпретацию общего анализа мочи и укажите норму удельного веса данного возраста.&amp;lt;br /&amp;gt;</text:p>
          </table:table-cell>
          <table:table-cell office:value-type="string" table:style-name="ce1">
            <text:p>MS4g0JzQuNC60YDQvtGE0LvQvtGA0LAg0LrQuNGI0LXRh9C90LjQutCwIC0g0Y3RgtC+INGB0YDQtdC00LAg0L7RgNCz0LDQvdC40LfQvNCwLCDQutC+0YLQvtGA0LDRjyDQvdGD0LbQvdCwINC00LvRjyDQvdC+0YDQvNCw0LvRjNC90L7QuSDRgNCw0LHQvtGC0Ysg0LrQuNGI0LXRh9C90LjQutCwLiDQnNC40LrRgNC+0YTQu9C+0YDQsCDQvtCx0LvQsNC00LDQtdGCINGA0Y/QtNC+0Lwg0YTRg9C90LrRhtC40Lk6INC/0L7QvNC+0YnRjCDQsiDRgNCw0YHRidC10L/Qu9C10L3QuNC4INC/0LjRidC10LLQvtCz0L4g0LrQvtC80LrQsCwg0LLRgdC/0L7QvNC+0LPQsNGC0LXQu9GM0L3QvtC1INCy0YHQsNGB0YvQstCw0L3QuNC1LCDQsNC90YLQuNCx0LDQutGC0LXRgNC40LDQu9GM0L3QsNGPINGE0YPQvdC60YbQuNGPLCDQstGL0LTQtdC70LXQvdC40LUg0YTQtdGA0LzQtdC90YLQvtCyINC00LvRjyDRgNCw0YHRidC10L/Qu9C10L3QuNGPLiDQotCw0LrQttC1INC80LjQutGA0L7RhNC70L7RgNCwINC80L7QttC1INGB0L/QvtGB0L7QsdGB0YLQstC+0LLQsNGC0Ywg0L3QvtGA0LzQsNC70YzQvdC+0LzRgyDRhNC+0YDQvNC40YDQvtCy0L3QuNGOINC60LDQu9C70L7QstGL0YUg0LzQsNGB0YEuINCSINC/0LXRgNCy0YvQtSDRh9Cw0YHRiyDQv9C+0YHQu9C1INGA0L7QttC00LXQvdC40Y8gKDEwLTIw0YfQsNGB0L7Qsikg0LrQuNGI0LXRh9C90LjQuiDRgyDRgNC10LHQtdC90LrQsCDQv9C+0LvQvdC+0YHRgtGM0Y4g0YHQstC+0LHQvtC00LXQvSDQvtGCINCx0LDQutGC0LXRgNC40LksINGC0L4g0LXRgdGC0Ywg0YHRgtC10YDQuNC70YzQvdGL0LkuINCX0LDRgtC10Lwg0LjQtNC10YIg0Y3RgtCw0L8g0LfQsNGB0LXQu9C10L3QuNGPINCx0LDQutGC0LXRgNC40LkgKDItNNC00LXQvdGMKS4g0Jgg0YLRgNC10YLRjNC40Lwg0Y3RgtCw0L/QvtC8INC/0YDQvtC40YHRhdC+0LTQuNGCINGB0YLQsNCx0LjQu9C40LfQsNGG0LjRjyDQvdC+0YDQvNCw0LvRjNC90L7QuSDQvNC40LrRgNC+0YTQu9C+0YDRiyDQutC40YjQtdGH0L3QuNC60LAgKNC80L7QttC10YIg0L/QvtC00L7Qu9C20LDRgtGM0YHRjyDQtNC+IDLRhSDQu9C10YIpLiAg0JIg0Y3RgtC+INCy0YDQtdC80Y8g0YMg0YDQtdCx0LXQvdC60LAg0LzQvtCz0YPRgtGMINCx0YvRgtGMINC60L7Qu9C40LrQuCwg0LLQt9C00YPRgtC40LUsINGC0LDQuiDQutCw0Log0LzQuNC60LvQvtGE0LvQvtGA0LAg0LzQtdC90Y/QtdGC0YHRjywg0YfRgtC+INC80L7QttC10YIg0L3QsNGA0YPRiNCw0YLRjCDQv9GA0L7RhtC10YHRgdGLINCy0YHQsNGB0YvQstCw0L3QuNGPLiDQodC90LDRh9Cw0LvQsCDQsiDQvtGB0L3QvtCy0L3QvtC8INC/0YDQtdC+0LHQu9Cw0LTQsNC10YIg0LHQuNGE0LjQtNC+0LHQsNC60YLQtdGA0LjQuCwg0LfQsNGC0LXQvCDQu9Cw0LrRgtC+0LHQsNC60YLQtdGA0LjQuC4g0JTQsNC90L3Ri9C1INCy0LjQtNGLINCx0LDQutGC0LXRgNC40Lkg0LzQuNC60YDQvtGE0LvQvtGA0Ysg0LfQsNGB0LXQu9GP0Y7RgtGB0Y8sINGC0LDQuiDQutCw0Log0YDQtdCx0LXQvdC+0Log0LIg0L7RgdC90L7QstC90L7QvCDQv9C40YLQsNC10YLRgdGPINCz0YDRg9C00L3Ri9C8INC80L7Qu9C+0LrQvtC8LiDQntC90Lgg0YHQv9C+0YHQvtCx0YHRgtCy0YPRjtGCINGD0YHQstC+0LXQvdC40Y4g0LLQtdGJ0LXRgdGC0LIsINC60L7RgtC+0YDRi9C1INC90LDRhdC+0LTRj9GC0YHRjyDQsiDQs9GA0YPQtNC90L7QvCDQvNC+0LvQvtC60LUu0JfQsNGC0LXQvCDQvdCw0YfQuNC90LDQtdGCINC/0L7Rj9Cy0LvRj9GC0YzRgdGPINCVLtCa0L7Qu9C4IC0g0L/QsNC70L7Rh9C60LAsINC60L7RgtC+0YDQsNGPINCyINCx0L7Qu9GM0YjQvtC8INC60L7Qu9C40YfQtdGB0YLQstC1INC/0YDQuNGB0YPRgtGB0YLQstGD0LXRgiDQsiDQvtGA0LPQsNC90LjQt9C80LUg0LLQt9GA0L7RgdC70L7Qs9C+INGH0LXQu9C+0LLQtdC60LAuINCe0YHQvdC+0LLQvdCw0Y8g0LzQsNGB0YHQsCDQsdCw0LrRgtC10YDQuNC5INC/0L7Rj9Cy0LvRj9C10YLRgdGPINC/0L7RgdC70LUg0LLQstC10LTQtdC90LjRjyDQv9GA0LjQutC+0YDQvNCwINC4INCy0LfRgNC+0YHQu9C10L3QuNGPINGA0LXQsdC10L3QutCwLCDRgtCw0Log0LrQsNC6INC80LDQu9GL0YjQuCDQvNC+0LPRg9GCINCy0LXQt9C00LUg0L/QvtC70LfQsNGC0YwsINC60LvQsNGB0YLRjCDQsiDRgNC+0YIg0L/QsNC70YzRhtGLINC4INGC0LQuINCt0YPQsdCw0LrRgtC10YDQuNC+0LcgLSDQvdC+0YDQvNCw0LvRjNC90LDRjyDQvNC40LrRgNC+0YTQu9C+0YDQsC4gICAgICAgICAgICAgICAgICAgICAgICAgICAgICAgICAgIDIuINCQ0L3QsNC70LjQtyDQvNC+0YfQuCDQvdC1INGP0LLQu9GP0LXRgtGB0Y8g0L3QvtGA0LzQvtC5LCDRgtCw0Log0LrQsNC6INGC0LDQvCDQv9GA0LjRgdGD0YLRgdGC0LLRg9C10YIg0LHQtdC70L7QuiDQsiDQsdC+0LvRjNGI0L7QvCDQutC+0LvQuNGH0LXRgdGC0LLQtSAtIDgsNSDQsy/QuyAo0LIg0L3QvtGA0LzQtSDQvdC1INC/0YDQtdCy0YvRiNCw0LXRgiAwLDAzMyDQsy/QuyksINGG0LLQtdGCINCyINC90L7RgNC80LUg0YHQvtC70L7QvNC10L3QvdC+LdC20LXQu9GC0YvQuSwg0Y3RgNC40YLRgNC+0YbQuNGC0Ysg0LIg0L3QvtGA0LzQtSAo0LIg0L3QvtGA0LzQtSAwLTIg0LIg0L/QvtC70LXQt9GA0LXQvdC40Y8pLCDQs9C40LDQu9C40L3QvtCy0YvQtSDQuCDQt9C10YDQvdC40YHRgtGL0LUg0YbQuNC70LjQvdC00YDRiyDQv9C+0LLRi9GI0LXQvdGLICjQsiDQvdC+0YDQvNC1INC90LUg0LTQvtC70LbQvdGLINCx0YvRgtGMINCyINC80L7Rh9C1KSwg0YPQtNC10LvRjNC90YvQuSDQstC10YEg0LIg0L3QvtGA0LzQtSAo0J0gPSAxLDAwMiAtIDEsMDMwKS4g0KMg0LHQvtC70YzQvdC+0LPQviDQv9GA0L7RgtC10LjQvdGD0YDQuNGPINC/0L4g0J7QkNCcLCDRh9GC0L4g0LzQvtC20LXRgiDQs9C+0LLQvtGA0LjRgtGMINC+INC90LDRgNGD0YjQtdC90LjRj9GFINC60L7QvdGG0LXQvdGC0YDQsNGG0LjQuNC+0L3QvdC+0Lkg0YTRg9C90LrRhtC40Lgg0LzQvtGH0LXQstGL0LTQtdC70LjRgtC10LvRjNC90L7QuSDRgdC40YHRgtC10LzRiyAo0LrRgNC+0LzQtSDRjdGC0L7Qs9C+INCx0LXQu9C+0Log0LIg0LzQvtGH0LUg0LzQvtC20LXRgiDQstC+0LfQvdC40LrQsNGC0Ywg0L/RgNC4INCy0L7RgdC/0LDQu9C10L3QuNGP0YUsINC/0YDQuCDQtdCz0L4g0LjQt9Cx0YvRgtC60LUg0LIg0L7RgNCz0LDQvdC40LfQvNC1LCDQv9GA0Lgg0L3QtdGD0YHQstC+0LXQvdC40Lgg0LHQtdC70LrQvtCyKS4g0JrQvtC90YbQtdC90YLRgNCw0YbQuNC+0L3QvdCw0Y8g0YTRg9C90LrRhtC40Y8g0L/QvtGH0LXQuiDQvtC/0YDQtdC00LXQu9GP0LXRgtGB0Y8g0YEg0YbQtdC70YzRjiDQstGL0Y/RgdC90LXQvdC40Y8g0L3QvtGA0LzQsNC70YzQvdC+0Lkg0YDQsNCx0L7RgtGLINCy0YHQsNGB0YvQstCw0L3QuNGPLCDRgNC10LDQsdGB0L7RgNCx0YbQuNC4INC/0L7Rh9C10LouINCf0YDQuCDQvdCw0YDRg9GI0LXQvdC40Y/RhSDQtNCw0L3QvdC+0Lkg0YTRg9C90LrRhtC40Lgg0LzQvtCz0YPRgiDQstC+0LfQvdC40LrQsNGC0Ywg0L7RgtC10LrQuCwg0YLQsNC6INC60LDQuiDQv9GA0L7QuNGB0YXQvtC00LjRgiDQt9Cw0LTQtdGA0LbQutCwINC90LDRgtGA0LjRjyDQsiDQvtGA0LPQsNC90LjQt9C80LUsINCwINGB0LvQtdC00L7QstCw0YLQtdC70YzQvdC+INC4INCy0L7QtNGLLCDQsiDQvNC+0YfQtSDQvNC+0LbQtdGCINC80LXQvdGP0YLRjNGB0Y8g0L/RiCAo0YfQsNGJ0LUg0LIg0LrQuNGB0LvRg9GOINGB0YLQvtGA0L7QvdGDKSwg0LLRi9GP0LLQu9GP0YLRjNGB0Y8g0LHQvtC70YzRiNC+0LUg0LrQvtC70LjRh9C10YHRgtCy0L4g0LHQtdC70LrQsCDQuCDQs9C70Y7QutC+0LfRiywg0LrQvtGC0L7RgNGL0YUg0LIg0L3QvtGA0LzQtSDQvdC1INC00L7Qu9C20L3QviDQsdGL0YLRjCDRgtCw0Lwu0JIg0YbQtdC70L7QvCwg0LrQvtC90YbQtdC90YLRgNCw0YbQuNC+0L3QvdCw0Y8g0YTRg9C90LrRhtC40Y8g0LIg0L/QtdGA0LLQvtC1INCy0YDQtdC80Y8g0L/QvtGB0LvQtSDRgNC+0LbQtNC10L3QuNGPINGB0L3QuNC20LXQvdCwLNGC0LDQuiDQutCw0Log0L/RgNC+0YbQtdGB0YHRiyDQstC70LjRj9GO0YnQuNC1INC90LAg0LrQvtC90YbQtdC90YLRgNCw0YbQuNGOLCDRgNC10LDQsdGB0L7RgNCx0YbQuNGOINC4INGN0LrRgdC60YDQtdGG0LjRjiDRgtCw0Log0LbQtSDRgdC90LjQttC10L3Riy4g0J3QsNC/0YDQuNC80LXRgCzQs9C+0YDQvNC+0L0g0JDQlNCTINGB0YDQsNC30YMg0L/QvtGB0LvQtSDRgNC+0LbQtNC10L3QuNGPINGB0L3QuNC20LXQvSwg0LAg0L7QvSDQvtGC0LLQtdGH0LDQtdGCINC30LAg0L/RgNC+0YbQtdGB0YHRiyDRgNC10LDQsdGB0L7RgNCx0YbQuNC4INCd0LDRgtGA0LjRjyDQuCDQstC+0LTRiy4g0J3QviDQsiDQsdC+0LvQtdC1INGB0YLQsNGA0YjQtdC8INCy0L7Qt9GA0LDRgdGC0LUg0Y3RgtC+INC80L7QttC10YIg0LHRi9GC0Ywg0YHQstGP0LfQsNC90L4g0YEg0L3QsNGA0YPRiNC10L3QuNGP0LzQuCDRgNCw0LHQvtGC0Ysg0LPQuNC/0LDRgtCw0LvQsNC80L4t0LPQuNC/0L7RhNC40LfQsNGA0L3QvtC5INGN0L3QtNC+0LrRgNC40L3QvdC+0Lkg0YHQuNGB0YLQtdC80YssINGC0LDQuiDQutCw0Log0L7QvdCwINCy0YvQtNC10LvRj9C10YIg0LPQvtGA0L7QvNC+0L3RiyDQtNC70Y8g0YDQtdCw0LHRgdC+0YDQsdGG0LjQuCwg0LjQu9C4INC90LDRgNGD0YjQtdC90LjRjyDQsiDRgNCw0LHQvtGC0LUg0L/QvtGH0LXQuiwg0L/QvtGH0LXRh9C90YvRhSDQu9C+0YXQsNC90L7Quiwg0L3QsNGA0YPRiNC10L3QuNC1INCyINC60YDQvtCy0L7RgtC+0LrQtSDQuNC70Lgg0YHQvtGB0YPQtNCw0YUg0L/QvtGH0LXQuiAu</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07" table:style-name="ce1">
            <text:p>915407</text:p>
          </table:table-cell>
          <table:table-cell office:value-type="string" table:style-name="ce1">
            <text:p>russian</text:p>
          </table:table-cell>
          <table:table-cell office:value-type="string" table:style-name="ce1">
            <text:p>Билет 35.&amp;lt;br /&amp;gt; 1.В каких процессах участвует бактериальная микрофлора кишечника у здоровых детей раннего возраста и ее физиологическая роль?&amp;lt;br /&amp;gt; 2. Мальчик 12 лет, поступил в нефрологическое отделение с жалобами на отеки на лице, увеличение живота, редкое мочеиспускание. Бледный, вялый, отеки типа анасарки. АД в пределах 120/85 мм.рт.ст. Тоны сердца приглушены, ЧСС 90 в мин. Живот увеличен в объеме, край печени выступает из-под реберного края на 1 см. Мочится редко, малыми порциями. Анализ мочи: цвет – желтый, белок 8,5 г/л, удельный вес мочи 1006, эритроциты 1-2 в п/зр, гиалиновые и зернистые цилиндры – 7-8 в п/зр. С какой целью определяется концентрационная функция почек. Сделайте интерпретацию общего анализа мочи и укажите норму удельного веса данного возраста.&amp;lt;br /&amp;gt;</text:p>
          </table:table-cell>
          <table:table-cell office:value-type="string" table:style-name="ce1">
            <text:p>MS7QkdCw0LrRgtC10YDQuNCw0LvRjNC90LDRjyDQvNC40LrRgNC+0YTQu9C+0YDQsCDQutC40YjQtdGH0L3QuNC60LAg0YMg0LfQtNC+0YDQvtCy0L7Qs9C+INGA0LXQsdC10L3QutCwINGD0YfQsNGB0YLQstGD0LXRgiDQsiDQv9C+0LTQtNC10YDQttCw0L3QuNC4INC30LTQvtGA0L7QstGM0Y8sINC+0YHQvtCx0LXQvdC90L4g0LIg0YDQsNC90L3QtdC8INCy0L7Qt9GA0LDRgdGC0LUuINCyINGN0YLQviDQstGA0LXQvNGPINC60LjRiNC10YfQvdC40Log0LDQutGC0LjQstC90L4g0LrQvtC70L7QvdC40LfQuNGA0YPQtdGC0YHRjyDQvNC40LrRgNC+0LHQsNC80Lgg0Lgg0LjRhSDQvdCw0LvQuNGH0LjQtSDQtNC10LnRgdGC0LLRg9C10YIg0L3QsCDQvNC90L7Qs9C40LUg0YTQuNC30LjQvtC70L7Qs9C40YfQtdGB0LrQuNC1INC/0YDQvtGG0LXRgdGB0YsuINCd0LDQv9GA0LjQvNC10YAg0L3QsCDRgNCw0LfQstC40YLQuNC1INC4INGE0L7RgNC80LjRgNC+0LLQsNC90LjQtSAg0LjQvNC80YPQvdC90L7QuSDRgdC40YHRgtC10LzRiywg0LAg0LjQvNC10L3QvdC+INC/0L7QtNC00LXRgNC20LDQvdC40LUg0LjQvNC80YPQvdC40YLQtdGC0LAsINGC0LDQuiDQutCw0Log0LHQsNC60YLQtdGA0LjQuCDQt9Cw0YHQtdC70Y/RjtGJ0LjQtSDQvNC40LrRgNC+0YTQu9C+0YDRgyDQutC40YjQtdGH0L3QuNC60LAg0YPRh9Cw0YHRgtCy0YPQtdGCINCyINGB0YLQuNC80YPQu9GP0YbQuNC4INC80LXRgdGC0L3QvtCz0L4g0LjQvNC80YPQvdC40YLQtdGC0LAsINCyINC+0YHQvtCx0LXQvdC90L7RgdGC0Y/RhSDQvdCwINGD0YDQvtCy0L3QtSDQutC40YjQtdGH0L3Ri9GFINC70LjQvNGE0L7QuNC00L3Ri9GFINGC0LrQsNC90LXQuSwg0L7QvdC4INCw0LrRgtC40LLQuNGA0YPRjtGCINC40LzQvNGD0L3QvdGL0LUg0LrQu9C10YLQutC4LCDRgdC/0L7RgdC+0LHRgdGC0LLRg9GPINCy0YvRgNCw0LHQvtGC0LrQtSDQsNC90YLQuNGC0LXQuywg0Lgg0LTRgNGD0LPQuNGFINC40LzQvNGD0L3QvdGL0YUg0LrQvtC80L/QvtC90LXQvdGC0L7QsiDQtNC70Y8g0LfQsNGJ0LjRgtGLINC+0YIg0L/QsNGC0L7Qs9C10L3QvdGL0YUg0LzQuNC60YDQvtC+0YDQs9Cw0L3QuNC30LzQvtCyLiDQvtC90Lgg0YLQsNC60LbQtSDRgdC/0L7RgdC+0LHQvdGLINCy0YvQtNC10LvRj9GC0Ywg0LLQtdGJ0LXRgdGC0LLQsCDQutC+0YLQvtGA0YvQtSDQv9C+0LTQsNCy0LvRj9GO0YIg0L/QsNGC0L7Qs9C10L3QvdGL0LUg0LzQuNC60YDQvtCx0YsuINCa0YDQvtC80LUg0LjQvNGD0YPQvdC+0Lkg0YHQuNGB0YLQtdC80YssINC80LjQutGA0L7RhNC70L7RgNCwINC60LjRiNC10YfQvdC40LrQsCDRgyDQt9C00L7RgNC+0LLQvtCz0L4g0YDQtdCx0LXQvdC60LAg0LLQu9C40Y/QtdGCINC90LAg0LLRi9Cx0L7RgNCw0YLQutGDINGA0Y/QtNC+0LIg0LLQuNGC0LDQvNC40L3QsCwg0L3QsNC/0YDQuNC80LXRgCDQutCw0Log0LLQuNGC0LDQvNC40L0g0JIxMiwg0LHQuNC+0YLQuNC9LCDRhNC+0LvQuNC10LLQsNGPINC60LjRgdC70L7RgtCwLNGA0LjQsdC+0YTQu9Cw0LLQuNC9INC4INCy0LjRgtCw0LzQuNC9INCaLCDQsCDRgtCw0LrQttC1INCy0LvQuNGP0LXRgiDQvdCwINCy0YvRgNC+0LHQvtGC0LrRgyDQvNC40LrRgNC+0Y3Qu9C80LXQvdGC0L7Qsi4g0K3RgtC4INCy0LjRgtCw0LzQuNC90Ysg0LjQs9GA0LDRjtGCINC60LvRjtGH0LXQstGD0Y4g0YDQvtC7INCyINC80LXRgtCw0LHQvtC70LjQt9C80LUsINC60YDQvtCy0LXRgtCy0L7RgNC10L3QuNC4INC4INC00YDRg9Cz0LjRhSDQsdC40L7Qu9C+0LPQuNGH0LXRgdC60LjRhSDQv9GA0L7RhtC10YHRgdCw0YUuINCf0YDQvtCx0LjQvtGC0LjRh9C10YHQutC40LUg0LHQsNC60YLQtdGA0LjQuCDRgtCw0LrQuNC1INC60LDQuiDQu9Cw0LrRgtC+0LHQsNC60YLQtdGA0LjQuCDQuCDQsdC40YTQuNC00L7QsdCw0LrRgtC10YDQuNC4INC80LXRgtCw0LHQsNC70LjQt9C40YDRg9C10YIg0LrQu9C10YLRh9Cw0YLQutGDINC4INC00YDRg9Cz0LjQtSDQvdC10L/QtdGA0LXQstCw0YDQuNC80YvQtSDRg9Cz0LvQtdCy0L7QtNGLICwg0L7QsdGA0LDQt9GD0Y8g0LrQvtGA0L7RgtC60L7RhtC10L/QvtGH0L3Ri9C1INC20LjRgNC90YvQtSDQutC40YHQu9C+0YLRiyAsINC90LDQv9GA0LjQvNC10YAg0LDRhtC10YLQsNGCINC/0YDQvtC/0LjQvtC90LDRgiwg0LrQvtGC0L7RgNGL0LUg0L/QvtC00LTQtdGA0LbQuNCy0LDRjtGCINC30LTQvtGA0L7QstGM0LUg0YHRgtC10L3QutC4INC60LjRiNC10YfQvdC40LrQsC4g0YLQsNC60LbQtSDQv9C+0LTQtNC10YDQttCw0L3QuNC1INCx0LDRgNGM0LXRgNC90L7QuSDRhNGD0L3QutGG0LjQuCDQsdCw0LrRgtC10YDQuNC4INC60LjRiNC10YfQvdC40LrQsCDQv9C+0LzQvtCz0LDRjtGCINC/0L7QtNC00LXRgNC20LjQstCw0YLRjCDQsdCw0YDQsdC10YDQvdGD0Y4g0YTRg9C90LrRhtC40LzRjiDQutC40YjQtdGH0L3QuNC60LAg0YPQutGA0LXQv9C70Y/RjyDRgdC70LjQt9C40YHRgtGD0Y4g0LrQuNGI0LXRh9C90LjQutCwINC4INGB0L3QuNC20LDRjyDQv9GA0L7QvdC40YbQsNC10LzQvtGB0YLRjCAg0LrQuNGI0LXRh9C90L7QuSDRgdGC0LXQvdC60Lgg0LTQu9GPINGC0L7QutGB0LjQvdC+0LIg0Lgg0L/QsNGC0L7Qs9C10L3QvtCyLiDQndC10LrQvtGC0L7RgNGL0LUg0LLQuNC00Ysg0LHQsNC60YLQtdGA0LjQuCDQvNC+0LPRg9GCINGB0YLQuNC80YPQu9C40YDQvtCy0LDRgtGMINC/0YDQvtC70LjQvNGE0LXRgNCw0YbQuNGOINC60LvQtdGC0L7QuiDRjdC/0LjRgtC10LvQuNGPINC60LjRiNC10YfQvdC40LrQsCwg0YfRgtC+INGB0L/QvtGB0L7QsdGB0YLQstGD0LXRgiDQstC+0YHRgtCw0L3QvtCy0LvQtdC90LjRjiDQuCDQv9C+0LTQtNC10YDQttCw0L3QuNGOINC10LPQviDQvdC+0YDQvNCw0LvRjNC90L7QuSDRgdGC0YDRg9C60YLRg9GA0Ysg0Lgg0YTRg9C90LrRhtC40LguINCh0LDQvNCwINC80LjQutGA0L7RhNC70L7RgNCwINC60LjRiNC10YfQvdC40LrQsCDQv9C+0LzQvtCz0LDQtdGCINGA0LDRgdGJ0LXQv9C70Y/RgtGMINC60LvQtdGC0YfQsNGC0LrRgywg0YLQsNC8INGB0LDQvNGL0Lwg0L/QvtC80L7Qs9Cw0Y8g0L7RgNCz0LDQvdC40LfQvNGDINGA0LXQsdC10L3QutCwINGD0YHQstCw0LjQstCw0YLRjCDQv9C40YLQsNGC0LXQu9GM0L3Ri9C1INCy0LXRidC10YHRgtCy0LAuINCc0LjQutGA0L7RhNC70L7RgNCwINC60LjRiNC10YfQvdC40LrQsCDQstC70LjRj9C10YIg0L3QsCDQvNC10YLQsNCx0L7Qu9C40LfQvCDQstC60LvRjtGH0LDRjyDRgNC10LPRg9C70Y/RhtC40Y4g0Y3QvdC10YDQs9C10YLQuNGH0LXRgdC60L7Qs9C+INC+0LHQvNC10L3QsCDQuCDQttC40YDQvtCy0L7QuSDRgtC60LDQvdC4LiDQndCw0L/RgNC40LzQtdGAINC80LjQutGA0L7QsdC40L7RgtCwINC80L7QttC10YIg0L/QvtCy0LvQuNGP0YLRjCDQvdCwINCw0L/Qv9C10YLQuNGCICwg0LrRgNC+0LzQtSDRgtC+0LPQviDQvNC40LrRgNC+0YTQu9C+0YDQsCDQutC40YjQtdGH0L3QuNC60LAg0YHQv9C+0YHQvtCx0YHRgtCy0YPQtdGCINC+0LHQvdC+0LLQu9C10L3QuNGOINC60LvQtdGC0L7QuiDQutC40YjQtdGH0L3QuNC60LAsINGA0LXQs9GD0LvQuNGA0YPQtdGCINC60LjRiNC10YfQvdC+LdC/0LXRh9C10L3QvtGH0L3Rg9GOINGG0LjRgNC60YPQu9GP0YbQuNGOINC20LXQu9GH0L3QvdGL0YUg0LrQuNGB0LvQvtGCINC4INGC0LXQvCDRgdCw0LzRi9C8INGC0LDQutC20LUg0L/QvtC80L7Qs9Cw0LXRgiDQv9C+0LTQtNC10YDQttC40LLQsNGC0Ywg0LHQsNC70LDQvdGBINC40LzQvNGD0L3QvdC+0Lkg0YHQuNGB0YLQtdC80YsuINCyINGG0LXQu9C+0Lwg0LLQsNC20L3QvtC5INGE0YPQvdC60YbQuNC10Lkg0LzQuNC60YDQvtGE0LvQvtGA0Ysg0LrQuNGI0LXRh9C90LjQutCwINGP0LLQu9GP0LXRgtGB0Y8g0L/QtdGA0LXQstCw0YDQuNCy0LDQvdC40LUg0Lgg0YLQviDRh9GC0L4g0L7QvSDQvNC+0LbQtdGCINCw0LTQsNC/0YLQuNGA0L7QstCw0YLRjCDQvtGA0LPQsNC90LjQt9C8INGA0LXQsdC10L3QutCwINC6INC40LfQvNC10L3QtdC90LjRj9C8INCyINC00LjQtdGC0LUg0LjQu9C4INCy0L3QtdGI0L3QtdC5INGB0YDQtdC00LUg0Lgg0L/QvtC00LTQtdC20LjQstCw0YLRjCDQvtCx0YnQuNC5INCz0L7QvNC10L7RgdGC0LDQtyDQvtGA0LPQsNC90LjQt9C80LAuICAgICAgICAgICAgICAgICAgICAgICAgICAgMi4g0JjQvdGC0LXRgNC/0YDQtdGC0LDRhtC40Y8g0L7QsdGJ0LXQs9C+INCw0L3QsNC70LjQt9CwINC80L7Rh9C4LSDRhtCy0LXRgiDQttC10LvRgtGL0Lkt0LIg0L3QvtGA0LzQtTsg0LIg0L3QvtGA0LzQtSDQsdC10LvQvtC6INCyINC80L7Rh9C1INC/0YDQsNC60YLQuNGH0LXRgdC60Lgg0L7RgtGB0YPRgtGB0YLQstGD0LXRgiDQuNC70Lgg0L3QsNGF0L7QtNC40YLRjNGB0Y8g0LIg0L3QtdC30L3QsNGH0LjRgtC10LvRjNC90YvRhSDQutC+0LvQuNGH0LXRgdGC0LLQsNGFLCDQvdC+INCyINC00LDQvdC90L7QvCDRgdC70YPRh9Cw0LUg0LHQtdC70L7Qui04LDUg0LMv0Lsg0L7Rh9C10L3RjCDQv9C+0LLRi9GI0LXQvSAsINGD0LTQtdC70YzQvdGL0Lkg0LLQtdGBINC80L7Rh9C4IDEwMDYsINCyINC90L7RgNC80LUg0YMgMTIt0LvQtdGC0L3QtdCz0L4g0YDQtdCx0LXQvdC60LAgMTAxMS0xMDI1INGB0LvQtdC00L7QstCw0YLQtdC70YzQvdC+INGDINGA0LXQsdC10L3QutCwINC90LDRgNGD0YjQtdC90LAg0LrQvtC90YbQtdC90YLRgNCw0YbQuNGPINC80L7Rh9C4ICwg0Y3RgNC40YLRgNC+0YbQuNGC0YsgMS0yINCyINC/L9C30YAg0LIg0L3QvtGA0LzQtSwg0LPQuNCw0LvQuNC90L7QstGL0LUg0Lgg0LfQtdGA0L3QuNGB0YLRi9C1INGG0LjQu9C40L3QtNGA0YstIDctOCDQsiDQvy/Qt9GAINCyINC90L7RgNC80LUg0L3QtSDQtNC+0LvQttC90L4g0LHRi9GC0YwuINC/0L4g0LTQsNC90L3Ri9C8INC/0L7QutCw0LfQsNGC0LXQu9GP0Lwg0LzQvtC20L3QviDQv9GA0LXQtNC/0L7Qu9C+0LbQuNGC0Ywg0YfRgtC+INGDINGA0LXQsdC10L3QutCwINC90LDRgNGD0YjQtdC90LAg0L/QvtGH0LXRh9C90LDRjyDRhNGD0L3QutGG0LjRjyDQsCDQuNC80LXQvdC90L4g0L3QsNGA0YPRiNC10L3QsCAg0LrQvtC90YbQtdC90YLRgNCw0YbQuNC+0L3QvdCw0Y8g0YTRg9C90LrRhtC40Y8g0L/QvtGH0LXQui4g0JrQvtC90YbQtdC90YLRgNCw0YbQuNC+0L3QvdCw0Y8g0YTRg9C90LrRhtC40Y8g0L/QvtGH0LXQuiDQvtC/0YDQtdC00LXQu9GP0LXRgtGB0Y8g0YEg0YbQtdC70Y4g0YPQt9C90LDRgtGMINC/0L7Rh9C10LzRgyDRgyDRgNC10LHQtdC90LrQsCDRgNC10LTQutC+0LUg0LzQvtGH0LXQuNGB0L/Rg9GB0LrQsNC90LjQtSwg0L7RgtC10LrQuCDQvdCwINC70LjRhtC1INC4INGD0LLQtdC70LjRh9C10L3QuNC1INC20LjQstC+0YLQsCwg0Lgg0LTQu9GPINGC0L7Qs9C+INGH0YLQvtCx0Ysg0L3QsNC30L3QsNGH0LjRgtGMINGC0L7Rh9C90YPRjiDRgtC10YDQsNC/0LjRjiDQtNC70Y8g0LTQsNC90L3QvtCz0L4g0YDQtdCx0LXQvdC60LAgICAgICAg</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15" table:style-name="ce1">
            <text:p>915415</text:p>
          </table:table-cell>
          <table:table-cell office:value-type="string" table:style-name="ce1">
            <text:p>russian</text:p>
          </table:table-cell>
          <table:table-cell office:value-type="string" table:style-name="ce1">
            <text:p>Билет 35.&amp;lt;br /&amp;gt; 1.В каких процессах участвует бактериальная микрофлора кишечника у здоровых детей раннего возраста и ее физиологическая роль?&amp;lt;br /&amp;gt; 2. Мальчик 12 лет, поступил в нефрологическое отделение с жалобами на отеки на лице, увеличение живота, редкое мочеиспускание. Бледный, вялый, отеки типа анасарки. АД в пределах 120/85 мм.рт.ст. Тоны сердца приглушены, ЧСС 90 в мин. Живот увеличен в объеме, край печени выступает из-под реберного края на 1 см. Мочится редко, малыми порциями. Анализ мочи: цвет – желтый, белок 8,5 г/л, удельный вес мочи 1006, эритроциты 1-2 в п/зр, гиалиновые и зернистые цилиндры – 7-8 в п/зр. С какой целью определяется концентрационная функция почек. Сделайте интерпретацию общего анализа мочи и укажите норму удельного веса данного возраста.&amp;lt;br /&amp;gt;</text:p>
          </table:table-cell>
          <table:table-cell office:value-type="string" table:style-name="ce1">
            <text:p>MS4g0J3QvtGA0LzQsNC70YzQvdCw0Y8g0LzQuNC60YDQvtGE0LvQvtGA0LAg0LrQuNGI0LXRh9C90LjQutCwINGDINC00LXRgtC10Lkg0LjQs9GA0LDQtdGCINGG0LXQvdGC0YDQsNC70YzQvdGD0Y4g0YDQvtC70Ywg0LIg0L/QvtC00LTQtdGA0LbQsNC90LjQuCDQvNC10YHRgtC90L7Qs9C+INC4INGB0LjRgdGC0LXQvNC90L7Qs9C+INC30LTQvtGA0L7QstGM0Y8sINC+0LrQsNC30YvQstCw0Y8g0LLQu9C40Y/QvdC40LUg0L3QsCDRgNCw0LfQstC40YLQuNC1INC4INGE0YPQvdC60YbQuNC+0L3QuNGA0L7QstCw0L3QuNC1INC+0YDQs9Cw0L3QuNC30LzQsC4g0J7QvdCwINGB0L/QvtGB0L7QsdGB0YLQstGD0LXRgiDRgdC+0LfRgNC10LLQsNC90LjRjiDQuNC80LzRg9C90L3QvtC5INGB0LjRgdGC0LXQvNGLLCDQsNC60YLQuNCy0LjRgNGD0Y8g0LzQtdGB0YLQvdGL0Lkg0LjQvNC80YPQvdC40YLQtdGCINC4INC80L7QtNC10LvQuNGA0YPRjyDRhtC40YLQvtC60LjQvdC+0LLRi9C5INC/0YDQvtGE0LjQu9GMLCDRh9GC0L4g0L/QvtC30LLQvtC70Y/QtdGCINGB0LHQsNC70LDQvdGB0LjRgNC+0LLQsNGC0Ywg0LjQvNC80YPQvdC90YvQtSDQvtGC0LLQtdGC0YsgVGgxLCBUaDIg0LggVGgzL1RoMS4g0K3RgtC+INC90LUg0YLQvtC70YzQutC+INC30LDRidC40YnQsNC10YIg0L7RgNCz0LDQvdC40LfQvCDQvtGCINC/0LDRgtC+0LPQtdC90L7Qsiwg0L3QviDQuCDQv9C+0LzQvtCz0LDQtdGCINC/0YDQtdC00L7RgtCy0YDQsNGJ0LDRgtGMINCw0LvQu9C10YDQs9C40Lgg0Lgg0LDRg9GC0L7QuNC80LzRg9C90L3Ri9C1INGA0LXQsNC60YbQuNC4LiDQntC00L3QuNC8INC40Lcg0LrQu9GO0YfQtdCy0YvRhSDQvNC10YXQsNC90LjQt9C80L7QsiDRjdGC0L7QuSDQt9Cw0YnQuNGC0Ysg0Y/QstC70Y/QtdGC0YHRjyDRgdGC0LjQvNGD0LvRj9GG0LjRjyDQstGL0YDQsNCx0L7RgtC60Lgg0YHQtdC60YDQtdGC0L7RgNC90L7Qs9C+INC40LzQvNGD0L3QvtCz0LvQvtCx0YPQu9C40L3QsCBBIChJZ0EpLCDQutC+0YLQvtGA0YvQuSDQv9C+0LrRgNGL0LLQsNC10YIg0YHQu9C40LfQuNGB0YLRg9GOINC60LjRiNC10YfQvdC40LrQsCwg0YHQvtC30LTQsNCy0LDRjyDQt9Cw0YnQuNGC0L3Ri9C5INCx0LDRgNGM0LXRgCDQv9GA0L7RgtC40LIg0L/QsNGC0L7Qs9C10L3QvdGL0YUg0LzQuNC60YDQvtC+0YDQs9Cw0L3QuNC30LzQvtCyLiDQnNC40LrRgNC+0LHQuNC+0YLQsCDQsNC60YLQuNCy0L3QviDRg9GH0LDRgdGC0LLRg9C10YIg0LIg0L/QtdGA0LXQstCw0YDQuNCy0LDQvdC40Lgg0YHQu9C+0LbQvdGL0YUg0YPQs9C70LXQstC+0LTQvtCyLCDQsdC10LvQutC+0LIg0Lgg0LbQuNGA0L7Qsiwg0L7QsdC10YHQv9C10YfQuNCy0LDRjyDQtNC+0L/QvtC70L3QuNGC0LXQu9GM0L3QvtC1INGD0YHQstC+0LXQvdC40LUg0L/QuNGC0LDRgtC10LvRjNC90YvRhSDQstC10YnQtdGB0YLQsi4g0K3RgtC+INC+0YHQvtCx0LXQvdC90L4g0LLQsNC20L3QviDQtNC70Y8g0LTQtdGC0LXQuSDRgSDQtdGJ0ZEg0L3QtdC30YDQtdC70L7QuSDRhNC10YDQvNC10L3RgtCw0YLQuNCy0L3QvtC5INGB0LjRgdGC0LXQvNC+0LkuINCf0L7QvNC40LzQviDQv9C40YnQtdCy0LDRgNC40YLQtdC70YzQvdC+0Lkg0YTRg9C90LrRhtC40LgsINC80LjQutGA0L7RhNC70L7RgNCwINCy0YvQv9C+0LvQvdGP0LXRgiDQsdCw0YDRjNC10YDQvdGD0Y4g0YDQvtC70YwsINGB0L7Qt9C00LDQstCw0Y8g0LrQvtC90LrRg9GA0LXQvdGC0L3Rg9GOINGB0YDQtdC00YMsINC60L7RgtC+0YDQsNGPINC/0YDQtdC/0Y/RgtGB0YLQstGD0LXRgiDRgNCw0LfQvNC90L7QttC10L3QuNGOINC/0LDRgtC+0LPQtdC90L7Qsi4g0J/RgNC+0LTRg9C60YbQuNGPINCx0LDQutGC0LXRgNC40L7RhtC40L3QvtCyINC4INC00YDRg9Cz0LjRhSDQsNC90YLQuNC80LjQutGA0L7QsdC90YvRhSDRgdC+0LXQtNC40L3QtdC90LjQuSDQv9C+0LTQsNCy0LvRj9C10YIg0YDQvtGB0YIg0LLRgNC10LTQvtC90L7RgdC90YvRhSDQvNC40LrRgNC+0L7RgNCz0LDQvdC40LfQvNC+0LIsINGB0L/QvtGB0L7QsdGB0YLQstGD0Y8g0L/QvtC00LTQtdGA0LbQsNC90LjRjiDQt9C00L7RgNC+0LLQvtC5INC80LjQutGA0L7QsdC90L7QuSDRgdGA0LXQtNGLLiDQnNC40LrRgNC+0YTQu9C+0YDQsCDRgtCw0LrQttC1INC40LPRgNCw0LXRgiDQstCw0LbQvdGD0Y4g0YDQvtC70Ywg0LIg0LzQtdGC0LDQsdC+0LvQuNGH0LXRgdC60LjRhSDQv9GA0L7RhtC10YHRgdCw0YUuINCe0L3QsCDRgdC40L3RgtC10LfQuNGA0YPQtdGCINCy0LjRgtCw0LzQuNC90Ysg0LPRgNGD0L/Qv9GLIEIgKNCy0LrQu9GO0YfQsNGPIEIxMiDQuCBCMiksINCy0LjRgtCw0LzQuNC9IEsg0Lgg0LTRgNGD0LPQuNC1INCx0LjQvtC70L7Qs9C40YfQtdGB0LrQuCDQsNC60YLQuNCy0L3Ri9C1INGB0L7QtdC00LjQvdC10L3QuNGPLCDQutC+0YLQvtGA0YvQtSDQvdC10L7QsdGF0L7QtNC40LzRiyDQtNC70Y8g0LzQtdGC0LDQsdC+0LvQuNC30LzQsCDRgNC10LHRkdC90LrQsC4g0JrRgNC+0LzQtSDRgtC+0LPQviwg0L7QvdCwINC40L3QsNC60YLQuNCy0LjRgNGD0LXRgiDRgtC+0LrRgdC40L3RiyDQuCDRhNC40LfQuNC+0LvQvtCz0LjRh9C10YHQutC4INCw0LrRgtC40LLQvdGL0LUg0LLQtdGJ0LXRgdGC0LLQsCwg0L7QsdC70LXQs9GH0LDRjyDQuNGFINCy0YvQstC10LTQtdC90LjQtSDQuNC3INC+0YDQs9Cw0L3QuNC30LzQsC4g0KPRh9Cw0YHRgtCy0YPRjyDQsiDQvtCx0L3QvtCy0LvQtdC90LjQuCDQutC70LXRgtC+0Log0LrQuNGI0LXRh9C90L7Qs9C+INGN0L/QuNGC0LXQu9C40Y8gKNGN0L3RgtC10YDQvtGG0LjRgtC+0LIpLCDQvNC40LrRgNC+0YTQu9C+0YDQsCDQv9C+0LTQtNC10YDQttC40LLQsNC10YIg0LHQsNGA0YzQtdGA0L3Ri9C1INGE0YPQvdC60YbQuNC4INGB0LvQuNC30LjRgdGC0L7QuSDQvtCx0L7Qu9C+0YfQutC4LCDQvtCx0LXRgdC/0LXRh9C40LLQsNGPINC10ZEg0YDQtdCz0LXQvdC10YDQsNGG0LjRjiDQuCDQt9Cw0YnQuNGC0YMuINCe0L3QsCDRgtCw0LrQttC1INGA0LXQs9GD0LvQuNGA0YPQtdGCINC60LjRiNC10YfQvdC+LdC/0LXRh9GR0L3QvtGH0L3Rg9GOINGG0LjRgNC60YPQu9GP0YbQuNGOINC20LXQu9GH0L3Ri9GFINC60LjRgdC70L7Rgiwg0YHQv9C+0YHQvtCx0YHRgtCy0YPRjyDQuNGFINC/0LXRgNC10YDQsNCx0L7RgtC60LUg0Lgg0YPRgtC40LvQuNC30LDRhtC40LguINCi0LDQutC40Lwg0L7QsdGA0LDQt9C+0LwsINC80LjQutGA0L7RhNC70L7RgNCwINC60LjRiNC10YfQvdC40LrQsCDRgyDQtNC10YLQtdC5INCy0YvQv9C+0LvQvdGP0LXRgiDQutC70Y7Rh9C10LLRi9C1INC40LzQvNGD0L3QvdGL0LUsINC/0LjRidC10LLQsNGA0LjRgtC10LvRjNC90YvQtSwg0LHQsNGA0YzQtdGA0L3Ri9C1INC4INC80LXRgtCw0LHQvtC70LjRh9C10YHQutC40LUg0YTRg9C90LrRhtC40LguINCV0ZEg0LfQtNC+0YDQvtCy0YzQtSDQuCDQsdCw0LvQsNC90YEg0Y/QstC70Y/RjtGC0YHRjyDQvdC10L7QsdGF0L7QtNC40LzRi9C80Lgg0YPRgdC70L7QstC40Y/QvNC4INC00LvRjyDQvdC+0YDQvNCw0LvRjNC90L7Qs9C+INGA0L7RgdGC0LAg0Lgg0YDQsNC30LLQuNGC0LjRjyDRgNC10LHRkdC90LrQsC4g0J3QsNGA0YPRiNC10L3QuNGPINC80LjQutGA0L7QsdC40L7RgtGLLCDRgtCw0LrQuNC1INC60LDQuiDQtNC40YHQsdC40L7Qtywg0LzQvtCz0YPRgiDQv9GA0LjQstC10YHRgtC4INC6INC40L3RhNC10LrRhtC40Y/QvCwg0LDQu9C70LXRgNCz0LjRh9C10YHQutC40Lwg0YDQtdCw0LrRhtC40Y/QvCwg0L/RgNC+0LHQu9C10LzQsNC8INGBINC/0LjRidC10LLQsNGA0LXQvdC40LXQvCDQuCDQtNGA0YPQs9C40Lwg0LfQsNCx0L7Qu9C10LLQsNC90LjRj9C8LiDQrdGC0L4g0L/QvtC00YfRkdGA0LrQuNCy0LDQtdGCINCy0LDQttC90L7RgdGC0Ywg0L/QvtC00LTQtdGA0LbQsNC90LjRjyDQt9C00L7RgNC+0LLQvtC5INC80LjQutGA0L7RhNC70L7RgNGLINC60LjRiNC10YfQvdC40LrQsCDQuCDQvdC10L7QsdGF0L7QtNC40LzQvtGB0YLQuCDQtdGRINCy0L7RgdGB0YLQsNC90L7QstC70LXQvdC40Y8g0L/RgNC4INC90LDRgNGD0YjQtdC90LjRj9GFLjxiciAvPg0KPGJyIC8+DQoyLiDQoyDRgNC10LHRkdC90LrQsCAxMiDQu9C10YIsINC20LDQu9GD0Y7RidC10LPQvtGB0Y8g0L3QsCDQvtGC0ZHRh9C90L7RgdGC0Ywg0LvQuNGG0LAg0Lgg0YDQtdC00LrQvtC1INC80L7Rh9C10LjRgdC/0YPRgdC60LDQvdC40LUsINC/0LXRgNCy0YvQvCDQuCDQvdCw0LjQsdC+0LvQtdC1INCy0LDQttC90YvQvCDQtNC40LDQs9C90L7RgdGC0LjRh9C10YHQutC40Lwg0LzQtdGC0L7QtNC+0Lwg0Y/QstC70Y/QtdGC0YHRjyDQvtCx0YnQuNC5INCw0L3QsNC70LjQtyDQvNC+0YfQuCAo0J7QkNCcKS4g0K3RgtC4INGB0LjQvNC/0YLQvtC80Ysg0YfQsNGB0YLQviDRg9C60LDQt9GL0LLQsNGO0YIg0L3QsCDQvdCw0YDRg9GI0LXQvdC40Y8g0YTRg9C90LrRhtC40Lgg0L/QvtGH0LXQuiwg0YXQsNGA0LDQutGC0LXRgNC90YvQtSDQtNC70Y8g0YLQsNC60LjRhSDRgdC+0YHRgtC+0Y/QvdC40LksINC60LDQuiDQs9C70L7QvNC10YDRg9C70L7QvdC10YTRgNC40YIsINC90LXRhNGA0L7RgtC40YfQtdGB0LrQuNC5INGB0LjQvdC00YDQvtC8INC4INC00YDRg9Cz0LjQtSDQv9Cw0YLQvtC70L7Qs9C40Lgg0LzQvtGH0LXQstGL0LTQtdC70LjRgtC10LvRjNC90L7QuSDRgdC40YHRgtC10LzRiy4g0J7QsdGJ0LjQuSDQsNC90LDQu9C40Lcg0LzQvtGH0Lgg0L/QvtC30LLQvtC70Y/QtdGCINCy0YvRj9Cy0LjRgtGMINCy0LDQttC90YvQtSDQuNC30LzQtdC90LXQvdC40Y8sINGB0LLQuNC00LXRgtC10LvRjNGB0YLQstGD0Y7RidC40LUg0L4g0LfQsNCx0L7Qu9C10LLQsNC90LjRj9GFINC/0L7Rh9C10LouINCf0YDQuNGB0YPRgtGB0YLQstC40LUg0LHQtdC70LrQsCDQsiDQvNC+0YfQtSg4LDUg0LzQtdC20LTRgyDQv9GA0L7Rh9C40LwpICjQv9GA0L7RgtC10LjQvdGD0YDQuNGPKSDRg9C60LDQt9GL0LLQsNC10YIg0L3QsCDQvdCw0YDRg9GI0LXQvdC40LUg0YTQuNC70YzRgtGA0LDRhtC40L7QvdC90L7QuSDRgdC/0L7RgdC+0LHQvdC+0YHRgtC4INC/0L7Rh9C10LosINGC0L7Qs9C00LAg0LrQsNC6INC/0YDQuNC80LXRgdGMINC60YDQvtCy0LggKNCz0LXQvNCw0YLRg9GA0LjRjykg0LzQvtC20LXRgiDQsdGL0YLRjCDQv9GA0LjQt9C90LDQutC+0Lwg0LLQvtGB0L/QsNC70LjRgtC10LvRjNC90YvRhSDQuNC70Lgg0LjQvNC80YPQvdC90YvRhSDQv9GA0L7RhtC10YHRgdC+0LIg0LIg0L/QvtGH0LrQsNGFLiDQmNC30LzQtdC90LXQvdC40Y8g0L/Qu9C+0YLQvdC+0YHRgtC4INC80L7Rh9C4INC00LDRjtGCINC40L3RhNC+0YDQvNCw0YbQuNGOINC+INGB0L/QvtGB0L7QsdC90L7RgdGC0Lgg0L/QvtGH0LXQuiDQutC+0L3RhtC10L3RgtGA0LjRgNC+0LLQsNGC0Ywg0LzQvtGH0YMsINCwINC70LXQudC60L7RhtC40YLRg9GA0LjRjyDQuCDRhtC40LvQuNC90LTRgNGD0YDQuNGPINGB0LjQs9C90LDQu9C40LfQuNGA0YPRjtGCINC+INCy0L7Qt9C80L7QttC90L7QvCDQstC+0YHQv9Cw0LvQtdC90LjQuCDQuNC70Lgg0L/QvtCy0YDQtdC20LTQtdC90LjQuCDQv9C+0YfQtdGH0L3Ri9GFINC60LDQvdCw0LvRjNGG0LXQsi4g0JTQu9GPINC/0L7Qu9GD0YfQtdC90LjRjyDQsdC+0LvQtdC1INC/0L7Qu9C90L7QuSDQutCw0YDRgtC40L3RiyDRgdC+0YHRgtC+0Y/QvdC40Y8g0L7RgNCz0LDQvdC40LfQvNCwINGG0LXQu9C10YHQvtC+0LHRgNCw0LfQvdC+INC00L7Qv9C+0LvQvdC40YLQtdC70YzQvdC+INC/0YDQvtCy0LXRgdGC0Lgg0L7QsdGJ0LjQuSDQsNC90LDQu9C40Lcg0LrRgNC+0LLQuCAo0J7QkNCaKSDQuCDQsdC40L7RhdC40LzQuNGH0LXRgdC60LjQuSDQsNC90LDQu9C40Lcg0LrRgNC+0LLQuC4g0JIg0J7QkNCaINC80L7Qs9GD0YIg0LHRi9GC0Ywg0LLRi9GP0LLQu9C10L3RiyDQv9GA0LjQt9C90LDQutC4INCw0L3QtdC80LjQuCwg0YXQsNGA0LDQutGC0LXRgNC90L7QuSDQtNC70Y8g0YXRgNC+0L3QuNGH0LXRgdC60LjRhSDQv9C+0YfQtdGH0L3Ri9GFINC30LDQsdC+0LvQtdCy0LDQvdC40LksINCwINGC0LDQutC20LUg0L/QvtCy0YvRiNC10L3QuNC1INGD0YDQvtCy0L3RjyDQu9C10LnQutC+0YbQuNGC0L7QsiDQuNC70Lgg0LTRgNGD0LPQuNGFINC80LDRgNC60LXRgNC+0LIg0LLQvtGB0L/QsNC70LXQvdC40Y8uINCR0LjQvtGF0LjQvNC40YfQtdGB0LrQuNC5INCw0L3QsNC70LjQtyDQutGA0L7QstC4INC/0L7Qt9Cy0L7Qu9GP0LXRgiDQvtGG0LXQvdC40YLRjCDRg9GA0L7QstC10L3RjCDQutGA0LXQsNGC0LjQvdC40L3QsCwg0LzQvtGH0LXQstC40L3RiyDQuCDRjdC70LXQutGC0YDQvtC70LjRgtC+0LIgKNC90LDRgtGA0LjRjywg0LrQsNC70LjRjyksINGH0YLQviDQtNCw0ZHRgiDQv9GA0LXQtNGB0YLQsNCy0LvQtdC90LjQtSDQviDRgdC+0YHRgtC+0Y/QvdC40Lgg0YTQuNC70YzRgtGA0LDRhtC40L7QvdC90L7QuSDRhNGD0L3QutGG0LjQuCDQv9C+0YfQtdC6INC4INCy0L7QtNC90L4t0Y3Qu9C10LrRgtGA0L7Qu9C40YLQvdC+0LPQviDQsdCw0LvQsNC90YHQsC4g0J7RgtGR0YfQvdC+0YHRgtGMINC70LjRhtCwINC4INGA0LXQtNC60L7QtSDQvNC+0YfQtdC40YHQv9GD0YHQutCw0L3QuNC1INC80L7Qs9GD0YIg0LHRi9GC0Ywg0YDQtdC30YPQu9GM0YLQsNGC0L7QvCDRgdC90LjQttC10L3QuNGPINGB0L/QvtGB0L7QsdC90L7RgdGC0Lgg0L/QvtGH0LXQuiDQstGL0LLQvtC00LjRgtGMINCy0L7QtNGDINC4INC90LDRgtGA0LjQuSwg0YfRgtC+INC/0YDQuNCy0L7QtNC40YIg0Log0LjRhSDQt9Cw0LTQtdGA0LbQutC1INCyINC+0YDQs9Cw0L3QuNC30LzQtSDQuCDRhNC+0YDQvNC40YDQvtCy0LDQvdC40Y4g0L7RgtGR0LrQvtCyLiDQn9C+0Y3RgtC+0LzRgyDQv9GA0L7QstC10LTQtdC90LjQtSDQvtCx0YnQtdCz0L4g0LDQvdCw0LvQuNC30LAg0LzQvtGH0Lgg0Y/QstC70Y/QtdGC0YHRjyDQv9GA0LjQvtGA0LjRgtC10YLQvdGL0LwsINGC0LDQuiDQutCw0Log0L7QvSDQsdGL0YHRgtGA0L4g0Lgg0YLQvtGH0L3QviDQv9C+0LfQstC+0LvRj9C10YIg0LLRi9GP0LLQuNGC0Ywg0L/RgNC40LfQvdCw0LrQuCDQv9C+0YDQsNC20LXQvdC40Y8g0L/QvtGH0LXQui4g0J/QviDRgNC10LfRg9C70YzRgtCw0YLQsNC8INGN0YLQvtCz0L4g0LjRgdGB0LvQtdC00L7QstCw0L3QuNGPINCy0YDQsNGHINGB0LzQvtC20LXRgiDQvtC/0YDQtdC00LXQu9C40YLRjCDQvdC10L7QsdGF0L7QtNC40LzQvtGB0YLRjCDQtNC+0L/QvtC70L3QuNGC0LXQu9GM0L3Ri9GFINC00LjQsNCz0L3QvtGB0YLQuNGH0LXRgdC60LjRhSDQvNC10YLQvtC00L7Qsiwg0YLQsNC60LjRhSDQutCw0Log0YPQu9GM0YLRgNCw0LfQstGD0LrQvtCy0L7QtSDQuNGB0YHQu9C10LTQvtCy0LDQvdC40LUg0L/QvtGH0LXQuiwg0L7RhtC10L3QutCwINGD0YDQvtCy0L3RjyDRgdGD0YLQvtGH0L3QvtC5INC/0YDQvtGC0LXQuNC90YPRgNC40Lgg0LjQu9C4INC40LzQvNGD0L3QvtC70L7Qs9C40YfQtdGB0LrQuNC1INGC0LXRgdGC0Ysg0LTQu9GPINGD0YLQvtGH0L3QtdC90LjRjyDQtNC40LDQs9C90L7Qt9CwLiA8YnIgLz4NCjxiciAvPg0K0JXRgdC70Lgg0L/QtdGA0LXQudC00LXQvCDQuNC80LXQvdC90L4g0Log0J7QkNCcINGC0L4g0L/QviDRhtCy0LXRgtGDINC80L7Rh9C4INC80L7QttC90L4g0YHQutCw0LfQsNGC0Ywg0YfRgtC+INC20ZHQu9GC0YvQuSDRhtCy0LXRgiDRjdGC0L4g0L3QvtGA0LzQsC4g0JHQtdC70L7QuiDQsiDQvNC+0YfQtSA4LDUg0LMv0LssINCyINC40LTQtdCy0LvQtSDQvtC9INC00L7Qu9C20LXQvSDQstC+0L7QsdGJ0LUg0L7RgtGB0YPRgdGC0LLQvtCy0LDRgtGMINC40LvQuCDQsdGL0YLRjCDQsiDQvNCw0LvQtdC90YzQutC+0Lwg0LrQvtC70LjRh9C10YHRgtCy0LUuINCj0LTQtdC70YzQvdGL0Lkg0LLQtdGBINC80L7Rh9C4OiDQoyDQvNCw0LvRjNGH0LjQutCwIDEyINC70LXRgiDQvdC+0YDQvNCwINGP0LLQu9GP0LXRgtGB0Y8gMSwwMTEtMSwwMjUu0KMg0L/QsNGG0LjQtdC90YLQsCDQv9C+0LvRg9GH0LDQtdGC0YHRjyDRg9C00LXQu9GM0L3Ri9C5INCy0LXRgSDQvdC40LbQtSDQvdC+0YDQvNGLLCDRjdGC0L4g0YPQutCw0LfRi9Cy0LDQtdGCINC90LAg0L3QsNGA0YPRiNC10L3QuNC1INC60L7QvdGG0LXQvdGC0YDQsNGG0LjQuCDQvNC+0YfQuC4g0K3RgNC40YLRgNC+0YbQuNGC0Ysg0YMg0LzQsNC70YzRh9C40LrQsCAxLTIg0LIg0L/QvtC70LUg0LfRgNC10L3QuNGPKNC10YHQu9C4INC80LXQvdGM0YjQtSAzINCyINC/0L7Qu9C1INC30YDQtdC90LjRjyDRgtC+INGN0YLQviDQvdC+0YDQvNCwKS4g0JPQuNCw0LvQuNC90L7QstGL0LUg0Lgg0LfQtdGA0L3QuNGB0YLRi9C1INGG0LjQu9C40L3QtNGA0Ysg0YMg0L/QsNGG0LjQtdC90YLQsCA3LTgg0LIg0L/QvtC70LUg0LfRgNC10L3QuNGPKNCy0YvRgdC+0LrQvtC1INC60L7Qu9C40YfQtdGB0YLQstC+LCDQsiDQvdC+0YDQvNC1INC90LUg0LTQvtC70LbQvdC+INCx0YvRgtGMKS48YnIgLz4NCjxiciAvPg0K0KPRh9C40YLRi9Cy0LDRjyDQstGB0ZEg0YLQviDRh9GC0L4g0Y8g0L/QtdGA0LXRh9C40YHQu9C40Lsg0L/QviDRgdC40LzQv9GC0L7QvNCw0Lwg0L/QsNGG0LjQtdC90YLQsCDQuCDQntCQ0JwsINGPINGC0L7Rh9C90L4g0YHQutCw0LbRgyDRh9GC0L4g0YMg0LzQsNC70YzRh9C40LrQsCDQvdCw0YDRg9GI0LXQvdCwINGE0LjQu9GM0YLRgNCw0YbQuNC+0L3QvdCw0Y8g0YTRg9C90LrRhtC40Y8g0L/QvtGH0LXQuiDQuNC3INC30LAg0LLQvtGB0L/QsNC70LXQvdC40Y8g0L/QvtGH0LXRh9C90YvRhSDQutCw0L3QsNC70YzRhtC10LIg0LrQvtGC0L7RgNC+0LUg0LTQvtC60LDQt9GL0LLQsNC10YIg0LPQuNCw0LvQuNC90L7QstGL0LUg0Lgg0LfQtdGA0L3QuNGB0YLRi9C1INGG0LjQu9C40L3QtNGA0YsuPGJyIC8+DQo8YnIgLz4NCg==</text:p>
          </table:table-cell>
          <table:table-cell office:value-type="float" office:value="170348" table:style-name="ce1">
            <text:p>170348</text:p>
          </table:table-cell>
          <table:table-cell office:value-type="float" office:value="86" table:style-name="ce1">
            <text:p>86</text:p>
          </table:table-cell>
          <table:table-cell office:value-type="string" table:style-name="ce1">
            <text:p>На первый вопрос ответ полный, правильный. На второй вопрос ответ неполный. Несовершенствием регуляторных механизмов,малой длиной петли нефронов, низкой клубочковой фильтрацией.</text:p>
          </table:table-cell>
          <table:table-cell office:value-type="float" office:value="0" table:style-name="ce1">
            <text:p>0</text:p>
          </table:table-cell>
          <table:table-cell table:number-columns-repeated="16376"/>
        </table:table-row>
        <table:table-row table:style-name="ro1">
          <table:table-cell office:value-type="float" office:value="914667" table:style-name="ce1">
            <text:p>914667</text:p>
          </table:table-cell>
          <table:table-cell office:value-type="string" table:style-name="ce1">
            <text:p>english</text:p>
          </table:table-cell>
          <table:table-cell office:value-type="string" table:style-name="ce1">
            <text:p>Ticket 35.&amp;lt;br /&amp;gt; 1.What processes is involved in the bacterial microflora of the intestine in healthy young children and its physiological role?&amp;lt;br /&amp;gt; 2. A boy of 12 years old, was admitted to the nephrology department with complaints of swelling on the face, an increase in the abdomen, and rare urination. Pale, lethargic, swelling like anasarca. Blood pressure within 120/85 mm Hg Heart sounds are muffled, heart rate 90 per min. The abdomen is enlarged in volume, the edge of the liver protrudes 1 cm below the costal margin. It rarely urinates, in small portions. Urinalysis: color - yellow, protein 8.5 g / l, specific gravity of urine 1006, erythrocytes 1-2 in s / sp, hyaline and granular cylinders - 7-8 in s / sp. For what purpose is the concentration function of the kidneys determined. Interpret the general urine test. and indicate the rate of specific gravity for a given age.&amp;lt;br /&amp;gt;</text:p>
          </table:table-cell>
          <table:table-cell office:value-type="string" table:style-name="ce1">
            <text:p>KDEpdGhlIGludGVzdGluYWwgbWljcm9mbG9yYSBpbiBhICBoZWFsdGh5ICAgY2hpbGRyZW4gcGxheXMgYSBjcnVjaWFsIHJvbGUgaW4gbWFpbnRhaW5pbmcgIHRoZSBkaWdlc3RpdmUgYW5kIHRoZWUgaW1tdW5lIGhlYWx0aCAuIEl0IGNvbnNpc3RzIG9mIGJlbmVmaWNpYWwgYmFjdGVyaWFzIGxpa2UgIEJJRklET0JBQ1RFUklBLCBMQUNUT0JBQ0lMTEkgYW5kIHNtYWxsZXIgYW1vdW50cyBvZiBvdGhlciBtaWNyb29yZ2FuaXNtcy4gVEhFIFBST0NFU1NFUyBJTlZPTFZFRCBBUkU6IHRoZSBkaWdlc3RpdmUgc3lzdGVtIGJyb2tlZG93biB0aGUgIGNvbXBsZXggICBjb21wb3VuZHMgaW50LG8gdGhlIHNpbXBsZXIsICAgZm9ybXMgIGxpa2UgdGhlIGNhcmJvaHlkcmF0ZXMscHJvdGVpbnMgYW5kIHRoZSBsaXBpZHMuIGFsc28gcHJvZHVjZSBzaG9ydCBjaGFpbiBmYXR0dHkgYWNpZHMgZm9yIHRoZSAgZW5lcmd5IHJlcXVpcmVtZW50IHRvIHRoZSBpbnRlc3RpbmFsIGNlbGxzLiAgLlByb2R1Y2VzIHZpdGFtaW5zIHN1Y2ggYXMgIHZpdGFtaW4gayBhbmQgdml0YW1pbiBCIC5JVCBtb2R1bGF0ZXMgdGhlIGltbXVuZSByZXNwb25zZSB3aGljaCByZWR1Y2VzIHRoZSBpbmZsYW1tYXRpb24gYW5kICBwcmV2ZW50IHRoZSBvdmVyIHJlYWN0aW9ucy4gU3RyZW5ndGhlbnNzIHRoZSBpbnRlc3RpbmFsIG11Y29zYSBhbmQgcHJlZXZlbnRzIGZyb20gdGhlIGhhcm1mdWwgb3JnYW5pc21zIHRvIGVudGVyIGludG8gdGhlIGJsb29kc3RyZWFtLiAuQXNzaXRzIGluIGJpbGUgYWNpZCBtZXRhYm9saXNtIGFuZCBjaG9sZXN0ZXJvbCAsIHJlZ3VsYXRpb24uICAgICAgICAgICAgICAgICAgICAgICAgICAgICAgICAgICAgICAgICAgICAgICAgICAgICAgICAgICAgICAgICAgICAgICAgICAgICAgICAgIDxiciAvPg0KKDIpQ0xJTklDQUwgIENBU0U6IHRoZSBjb25jZW50cmF0aW9uIGZ1bmN0aW9uIGluIHRoZSBraWRuZXlzOiBpcyBhc3Nlc2VkIHRvIGRldGVybWluZSB0aGVpciBhYmlsaXR5ICB0byBjb25jZW50cmF0ZSB1cmluZSBpbiByZXNwb25zZSB0byB3YXRlciBhbmQgZWxlY3Ryb2x5dGUgaW1iYWxhbmNlcy4gdGhlIHR1YnVsYXIgZnVuY3Rpb246ICBpbmRpY2F0ZXMgaG93IHdlbGwgdGhlIHJlYWJzb3JidGlvbiBvZiB3YXRlciBhbmQgc29sdXRlcyBpcyBkb25lIGJ5IHRoZSBkaXN0YWwgdHVidWxlcyAuS2lkbmV5IGRhbWFnZSByZWR1Y2VlcyB0aGUgIGNvbmNlbnRyYXRpbmcgYWJpbGl0eSBhbmQgYWxzbyBsZWFkcyB0byBkeXNmdW5jdGlvbiBhbmQgdHVidWxhciBpbmp1cnkuLklOVEVSUEVUYXRpb24gT0YgVEhFIHVyaW5hbHlzaXM6IDooMSljb2x1cjogeWVsbG93IHdoaWNoIGlzcyBub3JtYWwuICAgKDIpUHJvdGVpbiA6OC41IGcvbCB3aGljaCBpcyBzbGlnaHRseSBlbGV2YXRlZCBpbmRpY2F0ZXMgbmVwaHJvdGljIHN5bmRyb21lIG9yIHNldmVyIHByb3RlaW51cmlhLigzKSkgc3BlY2lmaWMgZ3Jhdml0eSBvZiB1cmluZTogIDEuMDA2ICB3aGljaCBpcyBsb3cgZm9yIHRoZSBsZXZlbCBvZiBwcm90ZWludXJpYSAsc3VnZ2dlc3RpbmcgdGhlIGltcGFpcmVkIGFiaWxpdHlvZiBraWRuZXkgIHRvIGNvbmNjZW50cmF0ZSB0aGUgdXJpbmUgLig0KUVyeXRocm9jeXRlczoxLTIgaW4gcy9zcCB3aGljaCBpcyBtaW5pbWFsIHNpZ25pZmljYW50YWxseSBubyBoZW1hdHVyaWEuKDUpICBoeWFsaW5lIGFuZCBncmFudWxhciBjeWxpbmRlcnM6IDctOCBpbiBzL3NwIHdoaWNoIHNob3dzIHR1YnVsYXIgZGFtYWdlIG9yIHByb3RlaW4gcHJlY2lwaWl0YXRpb24gLnRoZSBub3JtYWwgcmFuZ2Ugb2Ygc3BlY2lmaWMgZ3Jhdml0eSBvZiBhIDEyIHllYXJzIG9sZCBjaGlsZCBpcyAxLjAxNS0xLjAyNSB3aGljaCBkZXBlbmRzcyBvbiB0aGUgaHlkcmF0aW9uLiB0aGUgZ2l2ZW4gc3BlY2lmaWMgZ3Jhdml0eSBpcyAxLjAwNiB3aGljaCBpcyBhYm5vcm1hbGx5IGxvdyBpbiB0aGUgY29udGV4dCBvZiBuZXBocm90aWNjIHN5bmRyb21lIGFzIGl0IGluZGljYXRlc3MgaW1wYWlybWVudCBpbiB0aGUgY29uY2VudHJhdGluZyBhYmlsaXR5LlRIZSBmaW5kaW5ncyBsaWtlIHByb3RlaW51cmlhICwgLGxvdyBzcGVjaWZpYyBncmF2aXR5ICBhbmQgYW5hc2FyY2Egc3Ryb25nbHkgc3VnZ2VzdHMgTkVwaHJvdGljIHN5bmRyb21lIHdpdGggaW1wYXJlZCByZW5hbCBmdW5jdGlvbiAuZnVydGhlciB0ZXN0cyBsaWtlICBzZXJ1bSBhbGJ1bWluLGtpZG5leSAgdWx0cmFzb3VuZCxsaXBpZCBwcm9maWxlIGFuZCByZW5hbCBiaW9wc3kgY2FuIGJlIGRvbmUgZm9yIHRoZSBjb25maXJtYXRpb24gYW5kIHRvIGRldGVjdCB0aGUgdW5kZXJseWluZyBjYXVzZS4=</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there are many spelling errors in the form of many punctuation marks.</text:p>
          </table:table-cell>
          <table:table-cell office:value-type="float" office:value="0" table:style-name="ce1">
            <text:p>0</text:p>
          </table:table-cell>
          <table:table-cell table:number-columns-repeated="16376"/>
        </table:table-row>
        <table:table-row table:style-name="ro1">
          <table:table-cell office:value-type="float" office:value="914674" table:style-name="ce1">
            <text:p>914674</text:p>
          </table:table-cell>
          <table:table-cell office:value-type="string" table:style-name="ce1">
            <text:p>english</text:p>
          </table:table-cell>
          <table:table-cell office:value-type="string" table:style-name="ce1">
            <text:p>Ticket 35.&amp;lt;br /&amp;gt; 1.What processes is involved in the bacterial microflora of the intestine in healthy young children and its physiological role?&amp;lt;br /&amp;gt; 2. A boy of 12 years old, was admitted to the nephrology department with complaints of swelling on the face, an increase in the abdomen, and rare urination. Pale, lethargic, swelling like anasarca. Blood pressure within 120/85 mm Hg Heart sounds are muffled, heart rate 90 per min. The abdomen is enlarged in volume, the edge of the liver protrudes 1 cm below the costal margin. It rarely urinates, in small portions. Urinalysis: color - yellow, protein 8.5 g / l, specific gravity of urine 1006, erythrocytes 1-2 in s / sp, hyaline and granular cylinders - 7-8 in s / sp. For what purpose is the concentration function of the kidneys determined. Interpret the general urine test. and indicate the rate of specific gravity for a given age.&amp;lt;br /&amp;gt;</text:p>
          </table:table-cell>
          <table:table-cell office:value-type="string" table:style-name="ce1">
            <text:p>MS50aGVjcHJvY2VzcyBpbnZvdmxlZCBpbiBhY3RlcmlhbCBmbG9yYSBpcyBjb2xvam5pemF0aW9uICBoZWFsdGh5IHlvdW5nIGNqaWxkcmVucyB1bmRlcmdvIHRvIHRoZSB2YXJpb3VzIGVzdGFibGlzaGVkICBvZCBkaXZlcnNlbWlyYnJvYmlhbCAgY29tbXVuaXR5IGluIHRoZSAgaW50ZXN0aW5lICBzdGFydGluZyBmcm9tIHRoZSBiaXJ0aCBhbmQgZXZvbHZpbmcgZHVyaW5nIGVhcmx5IGxpZmUgLnRoYXQgaGVscCBzdWNjZXNzc2lvbiB0aGUgY29tcHNvdHJpb24gb2YgbWljcm9iaWFsIGNvb211bm9pdHkgY25hZ2UgYnkgdGhlIHRpbWUgaW1mbHVlbmNlZCBieSB2aWFyaW9vdXMgZmFjdG9ycyAgbGlrZSBkaWV0IGVudmlyb25tZW50ICBhbmQgbWF0cnV0cmF0aW9uIG9mIHRoZSBpbW11bmUgc3N5dGVtICAubWljcm9iaWFsIG1ldGFibG9pc20gIGJhY3RlcmlhbCBtaWNyb2Zsb3JhICBjaW50cmlidXRyZWQgdGhlICB0b2kgdGhlIGZlcm1lbnRzdGlvbiBvZiB0aGUgIG5vbiBkaWdlc3RpYmxlICBzdWJzYXRuYWNlcyBwcm9kdWNlcyAgc2hvcnQgY2hhaW4gIGZhdHR5IGFjaWQgIGFuZCBvdGhlciBtZXRhYm9saXRlcyAuIHBoeXNpbG9sb2dvaWNhbCByb2xlLSB0aGlzIG51dHJpZW50IGFic29ydHBpb24gIHNvaW1lIGJhY3RlcmlhIGFpZCBpbiB0aGUgYnJlYWtkb3duIG9mIHRoZSAgY29tcGxlc3hjYXJib2h5ZHJhdGVzICBlbmhhbmNpbmcgbnV0cmlldG50YWJzb3JwdGlvbiAgLmltbW51bmUgc3lzdGVtIG1hdHVyYWlvbiAtaW50ZXJhY3Rpb24gd2l0aCB0aGUgZ3V0IGJhY3RlcmlhIGhlbHAgaW4gdGhlIG1hdHVyYXRpb24gb2YgaW1tdW5lIHN5c3RlbSAgcHJvbW90aW5nIHRoZSBiYWxhbm5jZWQgaW1tdW5lIHJlc3BvbnNlIC4gcHJvdGVjdGlvbiBhZ2FpbnN0IHBhaHRvZ2VuICBjb21tZW5zYWsgYmFjdGVyaWEgcHJvdmlkZSB0aGUgcHJvdGVjdGlvbiBiYXJyaWVyIHB0cmV2ZW50aW5nIHRoZSBjb2xvbml6YXRpb24gb2YgaHNhcm1mdWwgcGFodG9nZXJuIC5tZXRhYmxvc2ltIG9mIGVuZXJneSByZWd1bGF0OWlvbiBoZWxwIGluIHRoZSBzeW50ZXNpcyBvZiBjcmV0aW5lIHZpdHNhbWlubiAuLi4uICAgMi5BIDEyIHllYXIgb2xkIGJveSBwdXVycG9zZSBvZiBkZXRlZW1pbmluZyBvZiB0aGUga2lkbmV5IGNvbmN3bnRyYXRpOW9uIG9mIGtpZG5leSBmdW5jdGlvbiAudGhhdCBsZWFkIHRvIHRoZSBhY2Nlc3MgdGhlIGtpZG5leSBhYmlsaXR5IHRvIHRvIGNvbmNlbnRyYXRlIHVyaW5lICB3aGljaCBpcyBjcnVjaXNhbCBmb3IgbWFpbnRpbm5nIHRoZSAgZmx1aWQgYmFsYW5jZSAgYW5kIGVsaW1pbmF0aW5nIHdhc3RlIHByb2R1Y3RzIC5pbnRlcnByZXRhdGlvbiBvZiBnZW5lcmFsIHVyaW5lIHRlc3QgIHRoYXQgaGVscCBpbiB0aGUgdmFyaW91cyBwcm9jZXNzIHRoYXQgbGVhZCBwcm90ZWluIGluZGljYXRlcyB0aGUgIHByb3RpZW51cmlhIHN1Z2dlc3RpbmcgaW1hcG9haXJlZCBraWRuZXkgIGZpbHRyYXRpb24gLiBzcGVjaWZpYyBncmF2aXR5IGxvd2VyIDEwMDYgdGhhbiB0aGUgbG93ZXIgdGhhbiB0aGUgbm9ybWFsIGluZGljYXRlcyB0aGUgZGVjcmVhZXNkIGFiaWxpdHkgdG8gY29uY25ldHJhdGUgdGhlIHVyaW5lIC5lcnl0aHJvY3l0ZXMgLXByZXNuZXRzIHJlbmFsIGR5c2Z1bmNjdGlvbiBhbmQgY29tcHJvbWlzZWQgZmxpdHJhdGlvbm4uICBzcGVjaWZpYyBncnNhdml0eSBvZiBhZ2UgLSBub3JtYWwgc3BlY2lmaWMgZ3Jhc3ZpdHkgZm9pciBhIDEyIHllYXIgYm95ICBpcyB0eXBpY2FsbHkgYXJvdW5kIDEuMDE2IHRvIDEuMDIyIGFuZCB0aGUgb2JzZTNydmVkIHZhbHVlIGRldGVybWluZSB0aGUgaW1wYWlyZWQgY29uY2VudHJhdGlvbiBmdW5jdGlvbm5uLg==</text:p>
          </table:table-cell>
          <table:table-cell office:value-type="float" office:value="170348" table:style-name="ce1">
            <text:p>170348</text:p>
          </table:table-cell>
          <table:table-cell office:value-type="float" office:value="68" table:style-name="ce1">
            <text:p>68</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4767" table:style-name="ce1">
            <text:p>914767</text:p>
          </table:table-cell>
          <table:table-cell office:value-type="string" table:style-name="ce1">
            <text:p>english</text:p>
          </table:table-cell>
          <table:table-cell office:value-type="string" table:style-name="ce1">
            <text:p>Ticket 35.&amp;lt;br /&amp;gt; 1.What processes is involved in the bacterial microflora of the intestine in healthy young children and its physiological role?&amp;lt;br /&amp;gt; 2. A boy of 12 years old, was admitted to the nephrology department with complaints of swelling on the face, an increase in the abdomen, and rare urination. Pale, lethargic, swelling like anasarca. Blood pressure within 120/85 mm Hg Heart sounds are muffled, heart rate 90 per min. The abdomen is enlarged in volume, the edge of the liver protrudes 1 cm below the costal margin. It rarely urinates, in small portions. Urinalysis: color - yellow, protein 8.5 g / l, specific gravity of urine 1006, erythrocytes 1-2 in s / sp, hyaline and granular cylinders - 7-8 in s / sp. For what purpose is the concentration function of the kidneys determined. Interpret the general urine test. and indicate the rate of specific gravity for a given age.&amp;lt;br /&amp;gt;</text:p>
          </table:table-cell>
          <table:table-cell office:value-type="string" table:style-name="ce1">
            <text:p>QmFjdGVyaWFsIG1pY3JvZmxvcmEgaW4gdGhlIGludGVzdGluZSBvZiB5b3VuZyBjaGlsZHJlbiA6IHByb2Nlc3MgaW52b2x2ZWQgOiBjb2xvbml6YXRpb24gLCBoZWFsdGh5ICB5b3VuZyBjaGlsZHJlbiB1bmRlcmdvIHRoZSBlc3RhYmxpc21lbnQgb2YgYSBkaXZlcnNlIG1pY3JvYmlhbCBjb21tdW5pdHkgaW4gdGhlIGludGVzdGluZSAsc3RhcnRpbmcgZnJvbSBiaXJ0aCBhbmQgZW52b2xuaW5nIGR1cmluZyBlYXJseSBsaWZlLiBzdWNjZXNzaW9uIDogdGhlIGNvbXBvc2l0aW9uIG9mIHRoZSBtaWNyb2JpYWwgY29tbXVuaXR5IGNoYW5nZXMgb3ZlciB0aW1lICwgaW5mbHVlbmNlZCBieSBmYWN0b3IgbGlrZSAsICBkaWV0LCBlbnZpcm9ubWVudCAsYW5kIG1hdHVyYXRpb24gb2YgdGhlIGltbXVuZSBzeXN0ZW0gLiBtaWNyb2JpYWwgbWV0YWJvbGlzbSA6IGJhY3RlcmlhbCBtaWNyb2Zsb3JhIGNvbnRyaWJ1dGVzIHRvIHRoZSBmZXJtZW50YXRpb24gIG9mIG5vbmRpZ2VzdGl2ZSBzdWJzdGFuY2VzICwgcHJvZHVzaW5nIHNob3J0IGNoYWluIGZhdHR5IGFjaWRzIGFuZCBvdGhlciBtZXRhYm9saXNtIHBoeXNpb2xvZ2ljYWwgcm9sZSAsIG51dHJpdGlvbiBhYnNvcnB0aW9uIHNvbWUgYmFjdGVyaWEgYWlkIGluIGJyZWFrZG93biBvZiBjb21wbGV4IGluICBjYXJib2h5ZHJhdGUsIGVuaGFuY2luZyBudXRyaWVudCBhYnNvcnB0aW9uIC4gaXVtbW5lIHN5c3RlbSBtYXR1cmF0aW9uIDogaW50ZXJhY3Rpb24gd2l0aCBndXQgYmFjdGVyaWEgaGVscHMgaW4gdGhlIG1hdHVyYXRpb24gb2YgdGhlIGltbXVuZSBzeXN0ZW0sIHByb21vdGluZyBhIGJhbGFuY2VkIGltbXVuZSByZXNwb25zZWUuIHByb3RlY3Rpb24gYWdhaW5zdCBwYXRob2dlbnMgY29tbWVyc2FsIGJhY3RlcmlhIHByb3ZpZGUgYSBwcm90ZWN0aXZlIGJhcnJpZXIgLHByZXZlbnRpbmcgdGhlIGNvbG9pemF0aW9uIG9mIHRoZSBoYXJtZnVsIHBhdGhvZ2VucywgbWV0YWJvbGlzbSBhbmQgZW5lcmd5IHJlZ3VsYXRpb24gOiBtaWNyb2JpYWwgbWV0YWJvbGlzbSBjb250cmlidXRlcyB0byBlbmVyZ3kgcmVndWxhdGlvbiBhbmQgdGhlIHN5bnRoZXNpcyBvZiBjZXJ0YWluIHZpdGFtaW5zIC4gMi4gMTIgeWVhcnMgb2xkIGJveSB3aXRoIGtpZG5leSByZWxhdGVkIHN5bmRyb21lOiBwdXJwb3NlIG9mIGRldGVybWluaW5nIGNvbmNlbnRyYXRpb24gZnVuY3Rpb24gb2YgdGhlIGtpZG5leSA6IHRvIGFjY2VzcyBraWRlbnkgYWJpbGl0eSB0byBjb25jZW50cmF0ZSB1cmluZSAsd2hpY2ggaXMgY3J1Y2lhbCBmb3IgbWFpbnRhaW5pbmcgZmx1aWQgYmFsYW5jZSBhbmQgZWxpbWluYXRpbmcgd2FzdGUgcHJvZHVjdHMuIGludGVycHJldGF0aW9uIG9mIGdlbmVyYWwgdXJpbmUgdGVzdDogcHJvdGVpbiggOC41IGcvbCkgOiBpbmRpY2F0ZXMgc2lnbmlmaWNhbnQgcHJvdGVuaXVyaWEgLHN1Z2dlc3RpbmcgaW1wYXJpZWQga2lkbmV5IGZpbHRyYXRpb24gLiBzcGVjaWZpYyBncmF2aXR5ICgxMDA2KSA6IGxvd2VyIHRoZW4gbm9ybWFsICwgaW5kaWNhdGluZyBkZWNyZWFzZWQgIGFiaWxpdHkgdG8gY29uY2VudHJhdGUgIHVyaW5lIC4gZXJ5dGhyb2N5dGVzIGN5bGluZGVyZXM6IHByZXNlbmNlIHN1Z2dlc3RzICByZW5hbCBkeXNmdW5jdGlvbiBhbmQgY29tcHJvbWlzZWQgZmlsdHJhdGlvbiBub3JtYWwgc3BlY2lmaWMgZ3Jhdml0eSBmb3IgYWdlIDogbm9ybWFsIHNwZWNpZmljIGZvciBhIDEyIHllYXIgb2xkIGlzIHR5cGljYWxseSBhcm91bmQgMS4wMTYgdG8gMS4wMjIgdGhlIG9ic2VydmVkICB2YWx1ZSBvZiAxMDA2ICBzdWdnZXN0cyBpbXBhcmllZCBjb25jZW50cmF0aW9uIGZ1bmN0aW9uLiA=</text:p>
          </table:table-cell>
          <table:table-cell office:value-type="float" office:value="170348" table:style-name="ce1">
            <text:p>170348</text:p>
          </table:table-cell>
          <table:table-cell office:value-type="float" office:value="72" table:style-name="ce1">
            <text:p>7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94" table:style-name="ce1">
            <text:p>915094</text:p>
          </table:table-cell>
          <table:table-cell office:value-type="string" table:style-name="ce1">
            <text:p>english</text:p>
          </table:table-cell>
          <table:table-cell office:value-type="string" table:style-name="ce1">
            <text:p>Ticket 35.&amp;lt;br /&amp;gt; 1.What processes is involved in the bacterial microflora of the intestine in healthy young children and its physiological role?&amp;lt;br /&amp;gt; 2. A boy of 12 years old, was admitted to the nephrology department with complaints of swelling on the face, an increase in the abdomen, and rare urination. Pale, lethargic, swelling like anasarca. Blood pressure within 120/85 mm Hg Heart sounds are muffled, heart rate 90 per min. The abdomen is enlarged in volume, the edge of the liver protrudes 1 cm below the costal margin. It rarely urinates, in small portions. Urinalysis: color - yellow, protein 8.5 g / l, specific gravity of urine 1006, erythrocytes 1-2 in s / sp, hyaline and granular cylinders - 7-8 in s / sp. For what purpose is the concentration function of the kidneys determined. Interpret the general urine test. and indicate the rate of specific gravity for a given age.&amp;lt;br /&amp;gt;</text:p>
          </table:table-cell>
          <table:table-cell office:value-type="string" table:style-name="ce1">
            <text:p>MzUuMSAtaW4gaGVhbHRoeSB5b3VuZyBjaGlsZHJlbix0aGUgYmFjdGVyaWFsIG1pY3JvZmxvcmEgb2YgdGhlIGludGVzdGluZSBwbGF5cyBhIGNydWNpYWwgcm9sZSBpbiBtYWludGFpbmluZyBvdmVyYWxsIGhlYWx0aCBhbmQgY29udHJpYnV0aW5nIHRvIG5vcm1hbCBwaHlzaW9sb2d5IHByb2Nlc3Nlcy50aGUgbWFpbiBwcm9jZXNzZXMgYXJlIDEuIGNvbG9uYWl6YXRpb24gYW5kIGVzdGFibGlzaG1lbnQtYmFjdGVyaWFsIGNvbG9uYWl6YXRpb24gYmVnaW5zIHdpdGggYmlydGggd2hlbiB0aGUgaW5mYW50IGlzIGV4cG9zZWQgdG8gYmFjdGVyaWEgZnJvbSBlbnZpcm9tZW50IHN1cnJvdW5kaW5nIHN1Y2ggYXMgZHVyaW5nIHZhZ2luYWwgYmlydGggYWZ0ZXIgc2hvcnRseSBhZnRlciBjZXNzZXJpYW4gZGVsaXZlcnkuICAgYnJlc3QgZmVlZGluZyBwcm9tb3RlcyB0aGUgZ3JvdGggb2YgYmVuaWZpY2lhbCBiYWN0ZXJpYSBzdWNoIGFzICBsYWN0b2JhY2lsbGkgd2hpY2ggYXJlIHByZWRvbWluYW50IGluIGd1dCBmbG9yYSBvZiB0aGUgYnJlc3RmZWVkZWQgaW5mYW50LiAgMi5mZXJtZW50YXRpb24gYW5kIG1ldGFib2xpc20tZmVybWVudGF0aW9uIG9mIHVuZGlnZXN0ZWQgY2FyYnM7dGhlIGJhY3RlcmlhbG1pY3JvYmVzIGZlcm1lbnQgZGlhdGVyeSBmaWJyZXMgYW5kIG5vbiBkaWF0ZXJ5IGZpYnJlcyBpbnRvIHRoZSBzaG9ydCBjaGFpbiBmYXR0eSBhY2lkc2xpa2UgYWNldGF0ZSBhbmQgYnV0cnlhdGUsdGhlc2UgU0NGQXMgcHJvdmlkZXMgZW5lcmd5IGZvciBpbnRlc3RpbmFsIGVwaXRoaWxpdW1hbmQgaGVscCByZWd1bGF0ZSBQaCB0byBtYWludGFpbiBoZWFsdGh5IGVudmlyb21lbnQgLi4uLjMubWV0YWJvbGlzbSBvZiBwcm90ZWlucy1ndXQgYmFjdGVyaWEgYWxzbyBicmVhayBkb3duIHByb3RlaW5zIHJlcXVpcmVkICBhbmQgdXRpbGl6ZWQgYnkgYm9keS4gICA0LmltbXVuZSBzeXN0ZW0gbW9kdWxhdGlvbi1ndXQgYmFjdGVyaWEgcGxheXMgdGhlIHZpdGFsIHJvbGUgaW4gZGV2ZWxvcG1lbnQgIG9mIGltbXVuZSBhcXVpcmVkIHN5c3RlbSBsaWtlIGRldmVsb3BpbmcgYW50aWJvZGllcyAgYWxzbyBoZWxwIGluIG1vZHVsYXRlIGltbXVuZSByZXNwb25zZSBwcm9tb3RpbmcgZGV2ZWxvcG1lbnQgb2YgcmVndWxhdG9yeSBUIGNlbGxzIGFuZCBtYWludGFpbiAgYmFsYW5jZSBiZXR3ZWVuIHByby1pbmZsYW1hdG9yeSBhbmQgaW5mbGFtYXRvcnkgcmVzcG9uc2UuICAgICBpdCBhbHNvIGFjdHMgYXMgYmFycmllciAgZnVuY3Rpb24gYXMgZ3V0IGJhY3RlcmlhIHByb2R1Y2VzIGFudGltaWNyb2JpYWwgc3Vic3RhbmNlcyB0aGF0IHByb3RlY3QgYWdhaW5zdCB0aGUgUGF0aG9nZW5zLiAgNS5wcm90ZWN0aW9uIGFnYWluc3QgUGF0aG9nZW5zIGFzIGl0cyBwcmVzZW5jZSAgZGl2ZXJzZSBhbmQgYmFsYW5jZSBtaWNyb2Zsb3JhIGluaGliaXQgIHRoZSBjb2xvbml6YXRpb24gYW5kIGdyb3RoIG9mIGhhcm1mdWxsIHBhdGhvZ2VucyBieSBvY2N1cGluZyBiaW5kaW5nIHNpdGVzIG9uIHRoZSBndXQgbGluaW5nIGFuZCBwcm9kdWNlIGFudGkgcGF0aG9nZW5pYyBzdWJzdGFuY2UuICAgNi4gdGhleSBhbHNvIGhlbHAgaW4gdml0IGsgc3ludGhlc2lzIGluIGludGVzdGluZSBieSBFY29saSBiYWN0ZXJpYSAgICBoZW5jZSB0aGUgYWxsIHRoZXNlIHByb2Nlc3Mgb2YgbWljcm9mbG9yYSAgY2FuIGJlIGhlbHAgaW4gcGh5c2lvbG9naWNhbCBhY3Rpdml0eSBvZiBoZWFsdGh5IGNoaWxkIGdyb3RoLi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ICAgICAgICAgICAgICAgICAgICAgICAgICAgICAgICAgICAgICAgICAgICAgICAgICAgICAgICAgICAgMzUuMi0gZnJvbSB0aGUgZ2l2ZW4gYW5hbHlzaXMgb2YgMTIgeWVhciBvbGQgY2hpbGQgdGhlIHBvdXJwb3NlIHdlIGhhdmUgdG8gZGV0ZXJtaW5lICBpcyB0aGUga2lkbmV5IGNvbmNlbnRyYXRpb24gZnVuY3Rpb24gaW4gdGhlIGJveSB3aXRoIHN5bXB0b21zIGxpa2UgIHN3ZWxsaW5nLHJhcmUgdXJpbmF0aW9uIGFuZCBwcm90ZWludXJlYSBpcyBjcnVjaWFsIGZvciBhc3Nlc3NpbmcgcmVuZWwgZnVuY3Rpb24sd2UgY2FuIGV2YWx1YXRlIHRoZSBraWRuZXkgYWJpbGl0eSB0byBjb25jZW50cmF0ZSB1cmluZSB3aGljaCBpcyBhbiBpbmRpY2F0b3Igb2YgdGhlaXIgY2FwaWNpdHkgdG8gaGFuZGxlIHdhdGVyIGFuZCBlbGVjdHJvbHl0ZSAgZWZmaWNpZW50bHkuLiAgICBmcm9tIHRoZSBnaXZlbiByZXBvcnQgb2YgdGhlIHVyaW5lIGFuYWx5c2lzIHdlIGNhbiBpbnRlcnByZXQgb3IgdGVsbCAgYXMgMS5jb2xvdXIgaXMgeWVsbG93IGluZGljYXRlIG5vcm1hbCBoeWRyYXRpb24gaW4gYm9keSAyLnByb3RpdXJlYSAtOC41Zy9sIHNpZ25pZmllcyBlbGV2YXRlZCBsb3NzIG9mIHByb3RlaW4gICB3aGljaCBjb3VsZCBiZSBpbmRpY2F0ZSBnbG9tZXJ1bHVzIGRhbWFnZSBvciBuZXBocm90aWMgc3luZHJvbWUgICAzLiBzcGVjaWZpYyBncmF2aXR5IC0xMDA2ICB3aGljaCBpcyBsb3dlciB0aGVuIG5vcm1hbCByYW5nZSBmb3IgMTIgeWVhciBvbGQgY2hpbGQgIHdoaWNoIG1heSBpbmRpY2F0ZSBkZWNyZXNlZCBhYmlsaXR5IG9mIGtpZG5leSBjb25jZXRyYXRpb24gb2YgdXJpdXJpbmVzICAgIDQuIGVyeXRocm9jeXRlcy0xLTIgcGVyIG1pY3Jvc2NvcGljIGZpZWxkIHdoaWNoIGlzIG5vcm1hbCBob3dldmVyICBwcmVzZW5jZSBvZiBlcnl0aHJvY3l0ZSBjYW4gaW5kaWNhdGUgcmVuZWwgcGF0aG9sb2dpZXMuICBoeWxpbmUgYW5kIGdyYW51bGxhciBjeWxpbmRlcnMgYXJlIDctOCBpbiBzL3NwIHRoaXMgaW5kaWNhdGVzIHRoZXR1YnViYWwgZGFtYWdlICB3aGljaCBvZmZ0ZW4gZm91bmQgaW4gbmVwaG90aWMgdHVidWxlcyBkYW1hZ2UgICAgYmxvb2QgcHJlc3N1cmUgdGFrZW4gZm9yIDEyIHllYXIgb2xkIGdpdmVuIGlzIDEyMC84NSAgd2hpY2ggaXMgaGlnaGVyIGhlcmUgd2hpY2ggY2FuIGluZGljYXRlIGh5cGVydGVudGlvbiBpbiByZW5lbCBjYXBpbGFyaWVzIHdoaWNoIGNhbiBsZWFkIHRvIGRhbWFnZSBpbiB0dWJ1bGVzIHVyaW5lIGNvbmNlbnRyYXRpb24gd2hpY2ggY2FuIGFmZmVjdCBnZnIgcmF0ZS4gICAgdGhlIG5vcm1hbCByYXRlIG9mIFNwLkdyYXZpdHkgY2FuIGJlIGZyb20gMTAxMC0xMDIwICAgcHJvdGVpbiAgbGV2ZWwgbXVzdCBiZSBuZWdldGl2ZSB0byB0cmFjZSAtLjNnL2RsICBub3JtYWwgZXJ5dGhyb2N5dGUgbXVzdCBiZSBsZXNzIHRoZW4gMiBwZXIgaGlnaCBwb3dlciBmaWVsZCwsICAgIHdoaWxlIGh5bGluZSBjYXN0IG9mdGVuIHNlZW4gaW4gbm9ybWFsIGJ1dCBncmFudWxsYXIgY2FzdCBhcmUgc2lnbnMgb2YgcGF0aG9sb2d5LiAgIGhlbmNlIHdlIGNhbiBzYXkgZnJvbSB0aGUgYW5hbHlzaXMgb2YgdXJpbmUgcmVwb3J0cyB0aGF0IDEyIHllYXIgb2xkIGJveSBjYW4gaGF2ZSBwYXRob2xvZ3kgY29uZGl0aW9uIG9mIHJlbmVsb3IgZ2xvbWVydXJvbmVwaHJpdGllcyBkYW1hZ2Ugb3IgdHVidWxhciBkYW1hZ2Uu</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54" table:style-name="ce1">
            <text:p>915354</text:p>
          </table:table-cell>
          <table:table-cell office:value-type="string" table:style-name="ce1">
            <text:p>kazakh</text:p>
          </table:table-cell>
          <table:table-cell office:value-type="string" table:style-name="ce1">
            <text:p>Билет 36.&amp;lt;br /&amp;gt; 1.Жаңа туған қыз балада 3-ші күні жыныс жолдарынаң бөлінулер пайда болғаны анасын аландатады. Баланың жалпы жағдайы қанағаттарлы.Табиғи тамақтануда,жақсы емеді.Осы жағдай немен байланысты? Осы өзгерістер балаға қауыптыма? &amp;lt;br /&amp;gt; 2. 3 айлық баланың анасы педиатрға қаралды, шағымдары баланың жиі лоқсуына.Қарағанда патология анықталмаған. Физикалық дамуы жасына сәйкес. Балада қандай асқазаның анатомо физиологилық еркешеліктерімен осы лоқсу байланысты?&amp;lt;br /&amp;gt;</text:p>
          </table:table-cell>
          <table:table-cell office:value-type="string" table:style-name="ce1">
            <text:p>INCW0LDSo9CwINGC0YPSk9Cw0L0g0LrRi9C30LTRi9KjINC20YvQvdGL0YEg0LbQvtC70LTQsNGA0YvQvdCw0L0g0YjRi9GA0YvRiNGC0Ysg0LHTqdC70ZbQvdGW0YHRgtC10YDQtNGW0qMg0L/QsNC50LTQsCDQsdC+0LvRg9GLINGE0LjQt9C40L7Qu9C+0LPQuNGP0LvRi9KbINC20LDSk9C00LDQuSDQsdC+0LvRg9GLINC80q/QvNC60ZbQvS4g0JHSsdC7INC00LXQs9C10L3RltC80ZbQtyDQvdOZ0YDQtdGB0YLQtdC90ZbSoyDQs9C+0YDQvNC+0L3QsNC70YzQtNGLINC60q/QudGW0L3QtSDQsdCw0LnQu9Cw0L3Ri9GB0YLRiy4g0JzSsdC90LTQsNC5INC20LDSk9C00LDQuSDQttGL0L3Ri9GB0YLRi9KbINC60YDQuNC3INC00LXQvyDQsNGC0LDQu9Cw0LTRiy4g0J7QuyDQtNC10LPQtdC90ZbQvNGW0Lcg0L3TmdGA0LXRgdGC0LXQvdGW0qMg06nQvNGW0YDRltC90ZbSoyDQsNC70pPQsNGI0pvRiyDQutKv0L3QtNC10YDRltC90LTQtSDQttC40ZYg0LrQtdC30LTQtdGB0LXQtNGWLtCe0L3Ri9C9INGB0LXQsdC10LHRltC9INGC0q/RgdGW0L3QtNGW0YDQtdGC0ZbQvSDQsdC+0LvRgdCw0Lwg0LDQvdCw0L3Ri9C9INC20q/QutGC0ZbQu9GW0Log0LrQtdC30ZbQvdC00LUg0LHTqdC70ZbQvdCz0LXQvSDRjdC60YHRgtGA0L7Qs9C10L0g0LPQvtGA0LzQvtC90LTQsNGA0YvQvdGL0qMg0L3TmdGA0LXRgdGC0LXQs9C1INC/0LvQsNGG0LXQvdGC0LAg0LDRgNKb0YvQu9GLINOp0YLRg9GW0L3QtNC1LiDRgtGD0YvQu9KT0LDQvdC90LDQvSDQutC10LnRltC9INC905nRgNC10YHRgtC10L3RltKjINCw0pPQt9Cw0YHRi9C90LTQsCDQsdKx0Lsg0LPQvtGA0LzQvtC90LTQsNGA0LTRi9KjINC00LXSo9Cz0LXQudGWINCx0ZbRgNGC0ZbQvdC00LXQvyDQsNC30LDRjyDQsdC10YDQtdC00ZYs0LHSsdC7INCz0L7RgNC80L7QvdCw0LvRjNC00Ysg0pvQsNC50YLQsCDQv9GA0L7RhtC10YHRltC90LUg0LDQutC10LvQtdC00ZYu0J3TmdGC0LjQttC10YHRltC90LTQtSDSm9GL0Lcg0LHQsNC70LDQu9Cw0YDQtNCwINGC06nQvNC10L3QtNC10LPRltC00LXQuSDQsdC10LvQs9GW0LvQtdGAINCx0LDQudKb0LDQu9GD0Ysg05nQsdC00LXQvSDQvNKv0LzQutGW0L0uMS3QttGL0L3Ri9GBINC20L7Qu9C00LDRgNGL0L3QsNC9INGI0YvRgNGL0YjRgtGLINCx06nQu9GW0L3RltGB0YLQtdGAINC/0LDQudC00LAg0LHQvtC70YPRiy4g0JHSsdC7INCx06nQu9GW0L3RltGB0YLQtdGAINOZ0LTQtdGC0YLQtSDQvNOp0LvQtNGW0YAg0L3QtdC80LXRgdC1INCw0pvRiNGL0Lsg0YHQsNGA0Ysg0YLSr9GB0YLRliwg0LrQtdC5INC60LXQt9C00LXRgNC00LUg0LbQtdKj0ZbQuyDSm9Cw0L3QtNGLINCx0L7Qu9GD0Ysg0LzSr9C80LrRltC9INGP0pPQvdC4INC/0YHQtdCy0LTQvtC80LXQvdGB0YLRg9GA0LDRhtC40Y8uMi3QodKv0YIg0LHQtdC30LTQtdGA0ZbQvdGW0qMg0YjQsNC80LDQu9GLINGW0YHRltC90YPRli4zLdKa0YvQvdCw0L8g0YjRi9GA0YvRiNGL0L3Ri9KjINGD0LDSm9GL0YLRiNCwINCz0LjQv9C10YDQsNC80LjRj9GB0YsuINCR0rHQuyDRhNC40LfQuNC+0LvQvtCz0LjRj9C70YvSmyDQttCw0pPQtNCw0LnQtNGL0qMg0LXRgNC10LrRiNC10LvRltC60YLQtdGA0ZbQvdC1INGC0L7Sm9GC0LDQu9Cw0YLRi9C9INCx0L7Qu9GB0LDSmy3RidGL0YDRi9GJ0YLRiyDQvdC10LzQtdGB0LUg0LbQtdKj0ZbQuyDSm9Cw0L3QtNGLINCx06nQu9GW0L3RltGB0YLQtdGAIDMtNiDQutKv0L3Qs9C1INC00LXQudGW0L0g0LHQsNC50pvQsNC70LDQtNGLLCDQutC10LnRltC9INOp0LfQtNGW0LPRltC90LXQvSDQttC+0pPQsNC70LDQsdC10YDQtdC00ZYu0JHQsNC70LDQvdGL0qMg0LbQsNC70L/RiyDQttCw0pPQtNCw0LnRiyDQsNGD0YvRgCDQsdC+0LvQvNCw0LnQtNGLLdC+0Lsg0LHQtdC70YHQtdC90LTRlizQtNKx0YDRi9GBINC10LzRiNC10Log0YHSr9GC0ZbQvNC10L0g0pvQvtGA0LXQutGC0LXQvdC10LTRli4g0JHSsdC7INC20LDSk9C00LDQuSDQtdGI0pvQsNC90LTQsNC5INC10LzQtNC10YPQtNGWINKb0LDQttC10YIg0LXRgtC/0LXQudC00ZYu0J3TmdGA0LXRgdGC0LXQvdGW0qMg0LbRi9C90YvRgSDQsNC50LzQsNKT0YvQvSDQtNKx0YDRi9GBINGC0LDQt9Cw0YDRgtGL0L8g0YLSsdGA0YMg0pvQsNC20LXRgi4qKjIt0YjRliDRgdKx0YDQsNKb0pvQsCDQttCw0YPQsNC/INCx0LXRgNGB0LXQvC0gMyDQsNC50LvRi9KbINC905nRgNC10YHRgtC10LvQtdGA0LTQtSDRgNC10LPRg9GA0YLQuNGC0LDRhtC40Y8g0Y/Sk9C90Lgg0LvQvtKb0YHRgy3QsNGB0pvQsNC30LDQvS3RltGI0LXQuiDQttC+0LvQtNCw0YDRi9C90YvSoyDQttC10YLRltC70LzQtdGD0ZbQvNC10L0g0LHQsNC50LvQsNC90YvRgdGC0Ysg0LbQuNGWINC60LXQt9C00LXRgdC10YLRltC9INCw0YPRgNGDINCx0L7Qu9GL0L8g0YHQsNC90LDQu9Cw0LTRiy4g0JHSsdC7INC606nQsdGW0L3QtdGB0LUg0pvQsNC70YvQv9GC0Ysg0pvSsdCx0YvQu9GL0YEg0LHQvtC70YvQvyDRgdCw0L3QsNC70LDQtNGLINC205nQvdC10LTQtSDQsNGA0L3QsNC50Ysg0LHRltGAINC10LzQtNC10YPQtNGWINGC0LDQu9Cw0L8g0LXRgtC/0LXQudC00ZYuINCc0rHQvdC00LDQuSDQttCw0pPQtNCw0LnQtNGL0qMg0YHQtdCx0LXQsdGWINCx0LDQu9Cw0L3Ri9KjINCw0YHSm9Cw0LfQsNC9LdGW0YjQtdC6INC20q/QudC10YHRltC90ZbSoyDQsdC10LvQs9GW0LvRliDQsdGW0YAg0LXRgNC10LrRiNC10LvRltCz0ZbQvdC1INCx0LDQudC70LDQvdGL0YHRgtGLINCx0L7Qu9GL0L8g0LrQtdC70LXQtNGWLiDQkNGB0pvQsNC30LDQvdC90YvSoyDQsNC90LDRgtC+0LzQuNGP0LvRi9KbINC10YDQtdC60YjQtdC70ZbQutGC0LXRgNGWINC20LDQudC70Ysg0LDQudGC0LDRgCDQsdC+0LvRgdCw0LwtINCa0LDRgNC00LjRj9C70LTRiyDRgdGE0LjQvdC60YLQtdGA0LTRltKjINC00rHRgNGL0YEg0LTQsNC80YvQvNCw0YPRiyzRj9KT0L3QuCDQvdOZ0YDQtdGB0YLQtdC70LXRgNC00LUg0LrQsNGA0LTQuNCw0LvRjNC00YvSmyDRgdGE0LjQvdC60YLQtdGA0LTRltKjINCx0rHQu9GI0YvSm9C10YLRgtC10YDRliDTmdC70YHRltC3INCx0L7Qu9GL0L8g0LrQtdC70LXQtNGWLiDQkdKx0Lsg0YHRhNC40L3QutGC0LXRgCDQsNGB0pvQsNC30LDQvSDQvNC10L0g06nSo9C10Ygg0LDRgNCw0YHRi9C90LTQsNKT0Ysg0LrQtdGA0ZYg0LDSk9GL0L3Sk9CwINGC0L7RgdKb0LDRg9GL0Lsg0pvQvtGP0LTQsi4g0JHRltGA0LDSmyDQvdOZ0YDQtdGB0YLQtdC70LXRgNC00LUg0L7QvdGL0qMg0LbQtdGC0ZbQu9C80LXRg9GWINCw0YHSm9Cw0LfQsNC90LTQsNKT0Ysg0LfQsNGC0YLQsNGA0LTRi9KjINOp0qPQtdGI0LrQtSDTqdGC0YPRltC90LUg0LDQu9GL0L8g0LrQtdC70LXQtNGWLiAyLtCQ0YHSm9Cw0LfQsNC9INC606nQu9C00LXSo9C10L0g0L7RgNC90LDQu9Cw0YHQsNC00Yst0LHSsdC7INC10YDQtdC60LXRiNC10LvRltC6INCw0YHSm9Cw0LfQsNC90pPQsCDRgtKv0YHQutC10L0g0LfQsNGC0YLQsNGA0LTRi9KjINC60LXRgNGWINKb0L7Qt9KT0LDQu9GL0YHRi9C9INC20LXSo9GW0LvQtNC10YLQtdC00ZYuIDMuINCQ0YHSm9Cw0LfQsNC9INGB0YvQudGL0LzQtNGL0LvRi9KT0Ysg0LDQtyDQsdC+0LvQsNC00Yst0YjQsNC80LDQvNC10L0gMzAtMzUg0LzQvCDSk9Cw0L3QsC4g0JDQuyAzINCw0LnQu9GL0psg0L3TmdGA0LXRgdGC0LXQu9C10YDQtNC1INCx0rHQuyDQutOp0YDRgdC10YLQutGW0YggMTAwLTE1MNC80Lwg0LPQtSDQttC10YLQtdC00ZYuINCs0ZbRgNCw0psg0L3TmdGA0LXRgdGC0LXQu9C10YAg0LrTqdC/INC806nQu9GI0LXRgNC00LUg0YHSsdC50YvSm9GC0YvSmyDSm9Cw0LHRi9C70LTQsNGB0LAs0LDRgNGC0YvSmyDQvNOp0LvRiNC10YDQtNC1INGA0LXRgtGD0YDQs9C40YLQsNGG0LjRjyDRgtKv0YDRltC90LTQtSDRiNGL0pPQsNGA0YvQu9Cw0LTRiy4gNC4g06jSo9C10Ygg0L7QuyDSm9GL0YHSm9CwINOZ0YDRliDRgtCw0YAg0pvSsdGA0YvQu9GL0LwuINCR0rHQuyDSm9Kx0YDRi9C70YvQvNC00LAg0LDRgdKb0LDQt9Cw0L3Sk9CwINGC0q/RgdC60LXQvSDQt9Cw0YLRgtCw0YDQtNGL0qMg0LrTqdGC0LXRgNGW0LvRg9GW0L3QtSDRi9Kb0L/QsNC7INC10YLQtdC00ZYuINCk0LjQt9C40L7Qu9C+0LPQuNGP0LvRi9KbINC10YDQtdC60YjQtdC70ZbQutGC0LXRgNC00ZYg0LXRgdC60LXRgNC10YAg0LHQvtC70YHQsNC8INCw0YHSm9Cw0LfQsNC90L3Ri9KjINC80L7RgtC+0YDQu9GL0psg0pvRi9C30LzQtdC/0YLRliDQttC10YLRltC70LzQtdCz0LXQvSDQtNC10L8g0pvQsNGA0LDRgdGC0YvRgNCwINCw0LvQsNC80YvQty4g0JHSsdC7INGC0LDSk9Cw0LzQvdGL0qMg0LDRgdKb0LDQt9Cw0L3QvdCw0L0g0YLQtdC3INC20YvQu9C20YPRi9C90LAg0LzSr9C80LrRltC90LTQtdC5INCx0LXRgNC80LXQuSwg0YDQtdCz0YPRgNCz0LjRgtCw0YbQuNGP0L3RiyDQttC40ZbQu9C10YLRg9GWINC80q/QvNGD0ZbQvS4g0KHQvtC90YvQvNC10L0g0pvQsNGC0LDRgNCwINCw0YHSm9Cw0LfQsNC9INKb0YvRiNKb0YvQu9C00YvSk9GLINGC06nQvNC10L0tINGP0pPQvdC4INCx0LXQudGC0LDRgNCw0L8g0L3QtdC80LXRgdC1INGB0ZbQu9GC0ZbQu9GW0Log0L7RgNGC0LAg0LHQvtC70LDQtNGLLiDQkdKx0Lsg0YLQsNKT0LDQvCDSm9C+0YDRi9GC0YvQu9GD0YvQvSDQsdCw0Y/Rg9C70LDRgtCw0LTRiy4=</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62" table:style-name="ce1">
            <text:p>1066862</text:p>
          </table:table-cell>
          <table:table-cell office:value-type="string" table:style-name="ce1">
            <text:p>kazakh</text:p>
          </table:table-cell>
          <table:table-cell office:value-type="string" table:style-name="ce1">
            <text:p>Билет 36.&amp;lt;br /&amp;gt; 1.Жаңа туған қыз балада 3-ші күні жыныс жолдарынаң бөлінулер пайда болғаны анасын аландатады. Баланың жалпы жағдайы қанағаттарлы.Табиғи тамақтануда,жақсы емеді.Осы жағдай немен байланысты? Осы өзгерістер балаға қауыптыма? &amp;lt;br /&amp;gt; 2. 3 айлық баланың анасы педиатрға қаралды, шағымдары баланың жиі лоқсуына.Қарағанда патология анықталмаған. Физикалық дамуы жасына сәйкес. Балада қандай асқазаның анатомо физиологилық еркешеліктерімен осы лоқсу байланысты?&amp;lt;br /&amp;gt;</text:p>
          </table:table-cell>
          <table:table-cell office:value-type="string" table:style-name="ce1">
            <text:p>MSDRgdKx0YDQsNKbLiDQltCw0qPQsCDRgtGD0pPQsNC9INKb0YvQt9C00YvSoyDQttGL0L3Ri9GB0YLRiyDQttC+0LvQtNCw0YDRi9C90LDQvSDRiNGL0YDRi9GI0YLRiyDQsdOp0LvRltC90ZbRgdGC0LXRgNC00ZbSoyDQv9Cw0LnQtNCwINCx0L7Qu9GD0Ysg0YTQuNC30LjQvtC70L7Qs9C40Y/Qu9GL0psg0LbQsNKT0LTQsNC5INCx0L7Qu9GL0L8g0pvQsNGA0LDRgdGC0YvRgNGL0LvQsNC00YssINGP0pPQvdC4INCx0rHQuyDQv9Cw0YLQvtC70L7Qs9C40Y/Qu9GL0psg0LbQsNKT0LTQsNC5INC10LzQtdGBLiDQkdKx0Lsg0L3QvtGA0LzQsC4g0JHSsdC7INCx0LDQu9CwINC20LDSo9CwINGC0YPSk9Cw0L0g0YHTmdGC0YLQtdC9INCx0LDRgdGC0LDQu9Cw0YLRi9C9INCz0L7RgNC80L7QvdCw0LvQtNGLINOp0LfQs9C10YDRltGB0YLQtdGA0LPQtSDQsdCw0LnQu9Cw0L3Ri9GB0YLRiyDQttCw0pPQtNCw0Lkg0LTQtdC/INCw0YLQsNC70LDQtNGLLiDQnNKx0L3RiyDQvNC10LTQuNGG0LjQvdCwINGC0ZbQu9GW0LzQtdC9INCz0L7RgNC80L7QvdCw0LvQtNGL0psg0LrRgNC40Lcg0LTQtdC/INCw0YLQsNC50LzRi9C3LCDQvtC7INC905nRgNC10YHRgtC10L3RltKjINOp0LzRltGA0ZbQvdGW0qMg0LDQu9KT0LDRiNKb0Ysg0LrSr9C90LTQtdGA0ZbQvdC00LUg0LbQuNGWINC60LXQt9C00LXRgdC10LTRli4g0JbQsNC70L/RiyDQvtC90YvSoyDRgdC10LHQtdCx0ZYg0YLRg9GA0LDQu9GLINGC0L7Sm9GC0LDQu9GL0L8g06nRgtC10YAg0LHQvtC70YHQsNC8LCDQsNC90LAg0LbSr9C60YLRliDQutC10LfRltC90LTQtSDQsdOp0LvRltC90LPQtdC9INGN0YHRgtGA0L7Qs9C10L0g0LPQvtGA0LzQvtC90LTQsNGA0Ysg0LTQtdKj0LPQtdC50ZbQvdC1INCx0LDQudC70LDQvdGL0YHRgtGLLiDQr9KT0L3QuCDQsdCw0LvQsCDRltGI0YLQtSDQttCw0YLSm9Cw0L0g0LrQtdC30LTQtSDQsNC90LAg0LHQsNC70LDQvdGLINKb0L7RgNC10LrRgtGW0Log0LfQsNGC0YLQsNGA0LzQtdC9INC00LUsINCy0LjRgtCw0LzQuNC90LTQtdGA0LzQtdC9INC00LUs0LPQvtGA0LzQvtC90LTQsNGA0LzQtdC90LTQtSDRgtGD0YvQu9KT0LDQvdGI0LAg0pvQsNC80YLQsNC80LDRgdGL0Lcg0LXRgtGW0L8g0YLSsdGA0LDRgtGL0L3Ri9C9INCx0ZbQtyDQsdGW0LvQtdC80ZbQty4g0J7RgdGLINGB0LXQutGW0LvQtNGWINGN0YHRgtGA0L7Qs9C10L0sINC/0YDQvtCz0LXRgdGC0LXRgNC+0L0g0LPQvtGA0LzQvtC90LTQsNGA0Ysg0LHQsNC70LDSk9CwINC/0LvQsNGG0LXQvdGC0LAg0LDRgNKb0YvQu9GLINOp0YLQtdC00ZYuINCh0L7QuyDRgdC10LHQtdC/0YLRliDQvdOZ0YDQtdGB0YLQtSDRgtGD0YvQu9KT0LDQvSDRgdOZ0YLRgtC1INCx0rHQuyDQs9C+0YDQvNC+0L3QtNCw0YAg0LTQtdKj0LPQtdC50ZYg0L7QvdGL0qMg0LDSk9C30LDRgdGL0L3QtNCwINGD0LDSm9GL0YLRiNCwINC606nQvyDQsdC+0LvRi9C/LCDRgtGD0YvQu9KT0LDQvdC90LDQvSDQutC10LnRltC9INCx0ZbRgCDQsNC/0YLQsCDRiNCw0LzQsNGB0YvQvdC00LAg0L7QvdGL0qMg0LzTqdC70YjQtdGA0ZYg0LHRltGA0YLRltC90LTQtdC/INGC06nQvNC10L3QtNC10LnQtNGWLiDQlNC10qPQs9C10Lkg0pvQsNC70YvQv9GC0YvSk9CwINGC0q/RgdGW0L8sINCx0LDQu9Cw0L3Ri9KjINOp0Lcg0LPQvtGA0LzQvtC90LTQsNGA0Ysg06nQvdC00ZbRgNGW0LvQtSDQsdCw0YHRgtCw0LnQtNGLLiDQkdKx0Lsg0LPQvtGA0LzQvtC90LDQu9C00Ysg0pvQsNC50YLQsCDSm9Kx0YDRi9C70YMg0L/RgNC+0YbQtdGB0ZbQvdC1INCw0LvRi9C/INC60LXQu9C10LTRli4g0KHQvtC7INGB0LXQsdC10L/RgtGWLCDQsdCw0YHRgtCw0L/Sm9GLINC60LXQt9C00LUg0LPQvtGA0LzQvtC9INC00LXSo9Cz0LXQudGWINC20L7Sk9Cw0YDRi9C70LDRgyDQsdC+0LvSk9Cw0L3QtNGL0pvRgtCw0L0g0pvRi9C3INCx0LDQu9Cw0LvQsNGA0LTQsCDQs9C+0YDQvNC+0L3QtNCw0YAg0LbQvtKT0LDRgNGL0LTQsCDQsNC50YLRi9C70pPQsNC9INOp0LfQs9C10YDRltGB0YLQtdGA0LTRliDQv9Cw0LnQtNCwINC10YLQtdC00ZYsINGP0pPQvdC4INC20YvQvdGL0YEg0LbQvtC70LTQsNGA0YvQvdCw0L0g0YjRi9GA0YvRiNGC0Ysg0LHTqdC70ZbQvdGW0YHRgtC10YDQtNGW0qMg0L/QsNC50LTQsCDQsdC+0LvRg9GLINCw0L3Ri9Kb0YLQsNC70LDQtNGLLtCe0Lsg0LHTqdC70ZbQvdGW0YHRgtC10YAg05nQtNC10YLRgtC1INC806nQu9C00ZbRgCDRgtKv0YHRgtGWINC90LXQvNC10YHQtSDQsNKb0YjRi9C7INGB0LDRgNGLINGC0q/RgdGC0ZYsINC60LXQudC00LUg0pvQsNC90LTRiyDQsdC+0LvRg9GLINC80q/QvNC60ZbQvS4g0prQvtGB0YvQvNGI0LAg0LbQsNKT0LTQsNC5INGA0LXRgtGW0L3QtNC1INCz0L7RgNC80L7QvdC00LDRgCDQtNC10qPQs9C10LnRltC90LUg0LHQsNC50LvQsNC90YvRgdGC0Ysg0YHSr9GCICDQsdC10LfQtNC10YDRltC90ZbSo9C00LUg0LbQtdKj0ZbQuyDRgtKv0YDQtNC10LPRliDRltGB0ZbQvdGD0LvQtdGA0ZYg0LTQsNC80YPRiyDQvNKv0LzQutGW0L0uINCa0LXQudC00LUg0YHSr9GCINCx0LXQt9C00LXRgNGW0L3QtdC9INC00LUg0YPRi9C3INGC05nRgNGW0LfQtNGWINCx06nQu9GW0L3RltGB0YLQtdGAINGI0YvSk9GD0Ysg0LzSr9C80LrRltC9LiDQntC90Ysg0LLQtdC00YzQvNCwINGB0q/RgtGWINC00LXQvyDRgtC1INCw0YLQsNC/INC20LDRgtCw0LTRiy4gINCh0L7QvdGL0LzQtdC9INKb0LDRgtCw0YAg0pvRi9C90LDQvyDRiNGL0YDRi9GI0YvQvdGL0qMg0LPQuNC/0LXRgNC10LzQuNGP0YHRiyDQtNCwINCz0L7RgNC80L7QvdC00LDRgCDQtNC10qPQs9C10LnRltC90LUg0LHQsNC50LvQsNC90YvRgdGC0Ysg0LDQvdGL0pvRgtCw0LvQsNC00YsuINCh0q/RgiDQsdC30LTQtdGA0ZbQvdGW0qMg0rHQu9KT0LDRjtC70LDRgNGLINC10LrRliDQttCw0pvRgtGLINC00LAg0LHQvtC70YPRiyDQvNKv0LzQutGW0L0sINC+0L3Ri9KjINKv0YHRgtGW0L3QtNC10LPRliDRgtC10YDRliDQs9C40L/QtdGA0LXQvNC40Y/RgdGLINC00LAg0LHQvtC70LDQtNGLLCDQvtC7INKb0LDQu9GL0L/RgtGLINC20LDSk9C00LDQuS4g0JHQsNGA0LvRi9KbINCx0rHQuyDQttCw0pPQtNCw0LnQu9Cw0YDQtNGL0qMg0LHQsNGA0LvRi9KT0Ysg0LTQsCDSm9Cw0LvRi9C/0YLRiyDRhNC40LfQuNC+0LvQvtCz0LjRj9C70YvSmyDQttCw0pPQtNCw0Lkg0LHQvtC70YvQvyDRgtCw0LHRi9C70LDQtNGLLiDQqNGL0YDRi9GI0YLRiyDQvdC10LzQtdGB0LUg0pvQsNC90LTRiyDQsdOp0LvRltC90ZbRgdGC0LXRgCAzLTYg0LrSr9C90LPQtSDQtNC10LnRltC9INCx0LDQudKb0LDQu9Cw0LTRiyzQutC10LnRltC9INC+0Lsg06nQt9C00ZbQs9GW0L3QtdC9INC20L7QudGL0LvQsNC00Ysu0JHSsdC7INCx06nQu9GW0L3RltGB0YLQtdGA0LTRliDQvdOZ0YDQtdGB0YLQtdC70ZbQuiDQvNC10L3QsNGA0YXQtSDQtNC10L8g0YLQtSDQsNC50YLQsNC80YvQty4g0JHSsdC7INC60LXQt9C00LUg0LHQsNC70LDQvdGL0qMg0LbQsNKT0LTQsNC50YvQvdCwINC00LAg0L3QsNC30LDRgCDQsNGD0LTQsNGA0LDQvNGL0LcuINCR0LDQu9CwINCx0LXQu9GB0LXQvdC00ZYg0LHQvtC70LDQtNGLLCDQtdC80YjQtdC6INGB0q/RgtGW0LzRltC10L0g0LTQtSDQttCw0pvRgdGLINKb0L7RgNC10LrRgtC10L3QtdC00ZYsINCx0rHQuyDQutC10LfQtNC1INC905nRgNC10YHRgtC10L3RltKjINC20YvQvdGL0YEg0LDQudC80LDSk9GL0L0g0LTSsdGA0YvRgSDRgtCw0LfQsNC70LDRg9GL0LzRi9C3INKb0LDQttC10YIuINCV0LPQtdGAINGB0q/RgiDQsdC10LfQtNC10YDRliDRltGB0ZbQvdGD0ZYg0q/Qu9C60LXQvSDQsdC+0LvRi9C/LCDQsNGD0YvRgNGB0YvQvdGDINKb0LDRgtGC0Ysg0LHQvtC70YHQsCwg0YLQtdC80L/QtdGA0LDRgtGD0YDQsCDQsdC+0LvRgdCwINC/0LXQtNC40LDRgtGAINC005nRgNGW0LPQtdGA0LPQtSDQutOp0YDRltC90YMg0LDQsdC30LDQuy4g0JDQuyDQtdCz0LXRgCDQtdGI0pvQsNC90LTQsNC5INC60q/QtNGW0Log0LHQvtC70LzQsNGB0LAsINC606nQvyDRg9Cw0pvRi9GC0pvQsCDRgdC+0LfRi9C70LzQsNGB0LAg0LHSsdC7INC20LDSk9C00LDQuSDQvtC90LTQsCDQtdGI0pvQsNC90LTQsNC5INC10LzQtNC10YPQtNGWINKb0LDQttC10YIg0LXRgtC/0LXQudC80ZbQty4gMi0g0YHSsdGA0LDSmy4g0JbQsNC70L/RiyDQsdCw0LvQsCDQttCw0qPQsCDRgtGD0YvQu9KT0LDQvSDRgdOZ0YLRgtC1INC+0Lsg0LXRgNC10YHQtdC6INCw0LTQsNC80LzQtdC9INGB0LDQu9GL0YHRgtGL0YDSk9Cw0L3QtNCwINOZ0LvQtNC10pvSsdGA0LvRi9C8INC905nQt9GW0LosINOZ0LvRgdGW0LfQtNC10YMg0LHQvtC70YvQvyDRgtGD0YvQu9Cw0LTRiy4g0J7QvdGL0qMg0LDSk9C30LDRgdGLINCx0LXQu9Cz0ZbQu9GWINCx0ZbRgCDRg9Cw0pvRi9GC0YLQsNGA0pPQsCDQttC10YLQutC10L3QtNC1INKT0LDQvdCwINC+0L3Ri9KjINOZ0YDQsdGW0YAg0LzSr9GI0LXRgdGWINC20LXQutC1INC20LXQutC1INC00LDQvNGD0Ysg0LDRj9Kb0YLQsNC70LDQtNGLLiDQodC+0Lsg0YHQtdCx0LXQv9GC0ZYg05nRgNCx0ZbRgCDQsNKT0LfQsNGB0YvQvdC00LAg0LrRltGI0LrQtdC90LUg06nQt9GW0L3QtNGW0Log0LXRgNC10LrRiNC10LvRltC60YLQtdGAINCx0L7Qu9GD0Ysg0pvQsNC70YvQv9GC0YsuIDMg0LDQudC70YvSmyDQvdOZ0YDQtdGB0YLQtdC70LXRgNC00LUg0LvQvtKb0YHRgyDRgNC10LPRg9GA0LPQuNGC0LDRhtC40Y8g0LDQt9Kb0LDQt9Cw0L0g0ZbRiNC10Log0LbQvtC70LTQsNGA0YvQvdGL0qMg0LbQtdGC0ZbQu9C80LXRg9GW0LzQtdC9INCx0LDQudC70LDQvdGL0YHRgtGLINC20LjRliDQutC10LfQtNC10YHQtdGC0ZbQvSDSm9Cw0LvRi9C/0YLRiyDRhNC40LfQuNC+0LvQvtCz0LjRj9C70YvSmyDQttCw0pPQtNCw0Lkg0LHQvtC70YvQvyDRgtCw0LHRi9C70LDQtNGLLiDQkdKx0Lsg0LbQsNKT0LTQsNC50LTRi9KjINGB0LXQsdC10LHRliDQsdCw0LvQsNC90YvSoyDQsNGB0pvQsNC30LDQvSDRltGI0LXQuiDQttC+0LvRi9C90YvSoyDQtdGA0LXQutGI0LXQu9GW0LrRgtC10YDRltC90LUg0LHQsNC50LvQsNC90YvRgdGC0Ysg0LHQvtC70YvQvyDRgtCw0LHRi9C70LDQtNGLLiDQkdGW0YDRltC90ZbRiNGWINC10YDQtdC60YjQtdC70ZbQuiDQsdCw0LvQsNC70LDRgNC00LAg0LrQvtGA0L7QvdCw0LvQtNGLINGB0YTQuNC90LrRgtC10YDQtNGW0qMg0YLQvtC70YvSmyDQttC10YLRltC70LzQtdGD0ZYsINGP0pPQvdC4INCx0LDQu9Cw0LvQsNGA0LTQsCDTqdKj0LXRiCDRgdGE0LjQvdC60YLQtdGA0ZbQvdGW0qMg0YLQvtC70YvSmyDQttC10YLRltC70LzQtdGD0ZYg0LTQtdC/INCw0LnRgtGB0LDSmyDQsdC+0LvQsNC00YsuINCe0YHRiyDRgdGE0LjQvdC60YLQtdGA0LTRltKjINOZ0LvRgdGW0Lcg0LHQvtC70YPRiyDQsNGB0pvQsNC30LDQvSDQvNC10L0g06nSo9C10Ygg0LDRgNCw0YHRi9C90LTQsNKT0Ysg0LHQsNC50LvQsNC90YvRgdGC0Ysg0LbQtdKj0ZbQu9C00LXRgtC10LTRliwg0Y/Sk9C90Lgg0LDRgdKb0LDQt9Cw0L3Sk9CwINGC0q/RgdC60LXQvSDRgtCw0LzQsNKbINGB0q/RgtGC0ZbSoyDQutC10YDRgyDSm9Cw0YDQsNC5INCw0pPRg9GLINC+0qPQsNC5INCx0L7Qu9Cw0LTRiy4g0JXQutGW0L3RiNGWINC10YDQtdC60YjQtdC70ZbQuiDQsNGB0pvQsNC30LDQvdC90YvSoyDQvtGA0L3QsNC70LDRgdGDINKb0LDQu9C/0YssINCx0LDQu9Cw0LvQsNGA0LTQsCDQvtC7INC606nQu9C00LXQvdC10qMg0LHQsNKT0YvRgtGC0LAg0L7RgNC90LDQu9Cw0YHQsNC00YssINCx0rHQuyDQtdGA0LXQutGI0LXQu9GW0Log0LDRgdKb0LDQt9Cw0L3Sk9CwINGC0q/RgdC60LXQvSDQt9Cw0YLRgtCw0YDQtNGL0qMg0LrQtdGA0ZYg0pvQvtC30pPQsNC70YvRgdGL0L0g0LbQtdKj0ZbQu9C00LXRgtC10LTRli4g0q7RiNGW0L3RiNGWINC10YDQtdC60YjQtdC70ZbQuiDQsNGB0pvQsNC30LDQvdC90YvSoyDRgdGL0LnRi9C80LTRi9C70YvSk9GL0L3Ri9KjINCw0Lcg0LHQvtC70YPRiy4g0JHQsNC70LDQu9Cw0YDQtNCwINGI0LDQvNCw0LzQtdC9ICAzMC0zNSDQvNC7INKT0LDQvdCwINCx0L7Qu9Cw0LTRiy4gMyDQsNC50LTQsCDQsdKx0LsgMTAwLTE1MCDQvNC7INC00LXQudGW0L0g0LbQtdGC0YPRliDQvNKv0LzQutGW0L0uINCh0L7QvdGL0qMg0L3TmdGC0LjQttC10YHRltC90LTQtSDQtdCz0LXRgCDQsdCw0LvQsCDQutOp0L8g0LzTqdC70YjQtdGA0LTQtSDRgdKx0LnRi9Kb0YLRi9Kb0YLRiyDSm9Cw0LHRi9C70LTQsNC50YLRi9C9INCx0L7Qu9GB0LAsINCw0YDRgtGL0psg0LzTqdC70YjQtdGA0ZYg0YjRi9KT0LDRgNGL0LvRi9C/INC60LXRgtC10LTRli4g0KLTqdGA0YLRltC90YjRliDQtdGA0LXQutGI0LXQu9GW0Log06nSo9C10YjRgtGW0qMg0pvRi9GB0pvQsCDQttOZ0L3QtSDRgtCw0YAg0LHQvtC70YPRiywg0LHSsdC7INC00LAg0LDRgdKb0LDQt9Cw0L3Sk9CwINGC0q/RgdC60LXQvSDQt9Cw0YLRgtCw0YDQtNGL0qMg0LbQvtKT0LDRgNGLINC606nRgtC10YDRltC70YPRltC90LUg0YvSm9C/0LDQuyDQtdGC0LXQtNGWLiDQkdKx0Lsg0LDQudGC0YvQvyDTqdGC0LrQtdC90LTQtdGA0ZbQvCwg0LDQvdCw0YLQvtC80LjRj9C70YvSmyDQtdGA0LXQutGI0LXQu9GW0LrRgtC10YDRliDQsdC+0LvRi9C/INGC0LDQsdGL0LvQsNC00YsuINCV0L3QtNGWINGE0LjQt9C40L7Qu9C+0LPQuNGP0LvRi9KbINC10YDQtdC60YjQtdC70ZbQutGC0LXRgNGW0L3QtSDRgtC+0pvRgtCw0LvRi9C/INOp0YLQtdGAINCx0L7Qu9GB0LDQvCwg0LHRltGA0ZbQvdGI0ZbRgdGWINCw0YHSm9Cw0LfQsNC90L3Ri9KjINC80L7RgtC+0YDQu9GL0psg0pvRi9C30LzQtdGC0ZbQvdGW0qMg0LHQsNGP0YMg0LHQvtC70YPRiyDTmdGA0ZYg0YLQvtC70YvSmyDQttC10YLRltC70LzQtdGD0ZYuINCR0rHQuyDQsNGB0pvQsNC30LDQvdKT0LAg0YLSr9GB0LrQtdC9INGC0LDSk9Cw0LzQvdGL0qMg0LbRi9C70LbRg9GL0L3QsCDQutC10LTQtdGA0LPRltC70LXRgCDQutC10LvRgtGW0YDQtdGC0ZbQvSDQsdC+0LvRi9C/INGC0LDQsdGL0LvQsNC00YsuINCV0LrRltC90YjRltGB0ZYsINCw0YHSm9Cw0LfQsNC90L3Ri9KjINKb0YvRiNKb0YvQu9C00YvQu9GL0pPRi9C90YvSoyDRgtOp0LzQtdC9INCx0L7Qu9GD0YsuINCR0LDQu9Cw0LvQsNGA0LTQsCDQsdKx0Lsg0LHQtdC50YLQsNGA0LDQvyDQvdC10LzQtdGB0LUg0YHRltC70YLRltC70ZYg0LHQvtC70LDQtNGLLCDQsdKx0Lsg0YLQsNKT0LDQvNC90YvSoyDRgdGW0qPRltGA0ZbQu9GW0YPRltC90LUg0LrQtdC00LXRgNCz0ZYg0LrQtdC70YLRltGA0LXQtNGWLiDSrtGI0ZbQvdGI0ZbQtNC10L0g0LTQuNGE0YDQsNCz0LzQsCDQvNC10L0g0pvSsdGA0YHQsNKbINCx0rHQu9GI0YvSm9C10YLRgtC10YDRltC90ZbSoyDTmdC70YHRltC3INCx0L7Qu9GD0YvQvSDQvNGL0YHQsNC7INC10YLRg9Cz0LUg0LHQvtC70LDQtNGLLiDQodC+0L3Ri9C80LXQvSDSm9Cw0YLQsNGAINKb0L7RgdGL0LzRiNCwINGE0LDQutGC0L7RgCDRgNC10YLRltC90LTQtSDQsdCw0LvQsNC90YvSoyDQsNGA0YLRi9KbINC806nQu9GI0LXRgNC00LUg0YHSr9GCINKb0LDQsdGL0LvQtNCw0YPRiyDQttOZ0L3QtSDQtdC80ZbQt9GDINC60LXQt9GW0L3QtNC1INCw0YPQsCDQttKx0YLRi9C/INKb0L7RjtGLINC00LAg0YDQtdCz0YPRgNCz0LjRgtCw0YbQuNGP0L3RiyDQv9Cw0LnQtNCwINC10YLQtdGC0ZbQvSDRhNCw0LrRgtC+0YDSk9CwINC20LDRgtCw0LTRiy4g0KDQtdCz0YPRgNCz0LjRgtCw0YbQuNGP0L3RiyDQsdC+0LvQtNGL0YDQvNCw0YMg0q/RiNGW0L0g0LHQsNC70LAg0YLQsNC80LDSmyDRltGI0LrQtdC9INGB05nRgtGC0LUg0L7QvdGLINC00rHRgNGL0YEg0pvQsNC70YvQv9GC0LAg0rHRgdGC0LDRgywg0Y/Sk9C90Lgg0LbQsNGA0YLRi9C70LDQuSDRgtGW0Log0pvQsNC70YvQv9GC0LAuINCV0LzRltC30YPQtNC10L0g0YHQvtKjINCx0LDQu9Cw0L3RiyAxMC0xNSDQvNC40L3Rg9GCINCx0LDSm9GL0LvQsNC/INC+0YLRi9GA0YMsINGB0L7QvdGL0LzQtdC9INKb0LDRgtCw0YAg0LDRgNGC0YvSmyDRgtCw0LzQsNKb0YLQsNC90LTRi9GA0LzQsNGDLiDQodKv0YLRgtGW0qMg0LHQsNC70LDQvdGL0qMg0YLRi9C90YvRgSDQttC+0LvQtNCw0YDRi9C90LAg0YLSr9GB0ZbQvyDQutC10YLRg9GW0L3QtdC9INGB0LDSm9GC0LDRgyDSm9Cw0LbQtdGCLiDQtdCz0LXRgCDQu9C+0pvRgdGDINKx0LfQsNKb0pvQsCDRgdC+0LfRi9C70YHQsCwg0YLQtdC80L/QtdGA0LDRgtGD0YDQsCDSm9C+0YHQsNGA0LvQsNC90YvQvywg0LHQsNC70LAg0YLQsNC80LDSm9GC0LDQvdGD0LTQsNC9INCx0LDRgSDRgtCw0YDRgtGL0L8sINGC0YvQvdGL0YEg0LDQu9GDINKb0LjRi9C90LTQsNGB0LAg0LTTmdGA0ZbQs9C10YDQs9C1INC606nRgNGW0L3Qs9C10L0g0LbTqdC9Lg==</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16" table:style-name="ce1">
            <text:p>1066916</text:p>
          </table:table-cell>
          <table:table-cell office:value-type="string" table:style-name="ce1">
            <text:p>kazakh</text:p>
          </table:table-cell>
          <table:table-cell office:value-type="string" table:style-name="ce1">
            <text:p>Билет 36.&amp;lt;br /&amp;gt; 1.Жаңа туған қыз балада 3-ші күні жыныс жолдарынаң бөлінулер пайда болғаны анасын аландатады. Баланың жалпы жағдайы қанағаттарлы.Табиғи тамақтануда,жақсы емеді.Осы жағдай немен байланысты? Осы өзгерістер балаға қауыптыма? &amp;lt;br /&amp;gt; 2. 3 айлық баланың анасы педиатрға қаралды, шағымдары баланың жиі лоқсуына.Қарағанда патология анықталмаған. Физикалық дамуы жасына сәйкес. Балада қандай асқазаның анатомо физиологилық еркешеліктерімен осы лоқсу байланысты?&amp;lt;br /&amp;gt;</text:p>
          </table:table-cell>
          <table:table-cell office:value-type="string" table:style-name="ce1">
            <text:p>MS3RgdKx0YDQsNKbOiDQltCw0qPQsCDRgtGD0YvQu9KT0LDQvSDQsdCw0LvQsCDTqdC80ZbRgNGW0L3RltKjINCw0LvSk9Cw0YjSm9GLINC60q/QvdC00LXRgNGWINC20YvQvdGL0YEg0LbQvtC70LTQsNGA0YvQvdCw0L0g0LHTqdC70ZbQvdGD0LvQtdGALCDRgdKv0YIg0LHQtdC30ZYsINKx0LzQsCDRltGB0ZbQvdGD0LvQtdGA0ZYg0LHQvtC70YPRiyDQvNKv0LzQutGW0L0uINCR0rHQuyDSsdGA0YvSm9GC0YvSmyDQutC10LfQtdKj0LTQtSDQsNC90LDRgdGL0L3QsNC9INCx0LDQu9Cw0pPQsCDSsdGA0YvSm9C20L7Qu9C00LDRgSDQsNGA0pvRi9C70Ysg0LbRi9C90YvRgSDQs9C+0YDQvNC+0L3QtNCw0YDRi9C90YvSoyDTqdGC0YPRltC90LUg0LHQsNC50LvQsNC90YvRgdGC0YsuINOY0YHRltGA0LXRgdC1INC20q/QutGC0ZbQu9GW0LrRgtGW0qMg0YHQvtKj0YvQvdC00LAg0Y3RgdGC0YDQvtCz0LXQvSwg0L/RgNC+0LvQsNC60YLQuNC9INKb0YvQtyDQsdCw0LvQsCDQvtGA0LPQsNC90LjQt9C80ZbQvdC00LUg0LbQuNC90LDQu9GL0L8sINGC0YPSk9Cw0L0g0YHQvtKjINC20YvQvdGL0YHRgtGL0psv0LPQvtGA0LzQvtC90LDQu9GM0LTRi9KbINC60YDQuNC3INC90LUg0LTQsNKT0LTQsNGA0YvRgSDRgNC10YLRltC90LTQtSDQutOp0YDRltC90ZbRgSDQsdC10YDQtdC00ZYuINCW0YvQvdGL0YEg0LbQvtC70LTQsNGA0YvQvdCw0L0g0YjRi9GA0YvRiCDQsdOp0LvRltC90YPRliDQstGD0LvRjNCy0L7QstCw0LPQuNC90LjRgiDQtNC10L8g0LDRgtCw0LvQsNC00YsuINCR0rHQuyDQutOp0YDRltC90ZbRgdGC0LXRgCDQsdCw0LvQsCDQtNC10L3RgdCw0YPQu9GL0pPRi9C90LAg0pvQsNGD0ZbQv9GC0ZYg0LXQvNC10YEsIDYwLTcwJSDQsdCw0LvQsNC70LDRgNC00LAg0LrQtdC30LTQtdGB0LXQtNGWINC205nQvdC1ICDQsdGW0YDQvdC10YjQtSDQutKv0L3QvdC10L0g0YHQvtKjINC20YvQvdGL0YEg0LPQvtGA0LzQvtC90LTQsNGA0YvQvdGL0qMg0YHQsNGA0pvRi9C70YPRi9C90LAg0LHQsNC50LvQsNC90YvRgdGC0Ysg0LrQtdGC0LXQtNGWLiDQmNC90YTQtdC60YbQuNGPINGC0q/RgdC/0LXRgyDQvNCw0pvRgdCw0YLRi9C90LTQsCDQs9C40LPQuNC10L3QsNC70YvSmyDRiNCw0YDQsNC70LDRgNC00Ysg0YHQsNKb0YLQsNC5INC+0YLRi9GA0LAg0LbQuNGWINGI0L7QvNGL0LvQtNGL0YDRgyDSm9Cw0LbQtdGCICjQnNGL0YHQsNC70YssINC80LDRgNCz0LDQvdGG0L7QstC60LAg0LXRgNGW0YLRltC90LTRltGB0ZbQvdC1INC20YPRi9C90LTRi9GA0YHQsCDQsdC+0LvQsNC00YspICA8YnIgLz4NCjIt0YHSsdGA0LDSmzog0JXRgNGC0LUg0LbQsNGBINCx0LDQu9Cw0LvQsNGA0YvQvdC00LAg0LbQuNGWINC70L7Sm9GB0YMg0LHQtdC70LPRltC70ZYg0L/QsNGC0L7Qu9C+0LPQuNGPINC90LXQvNC10YHQtSDQsNGB0pvQsNC30LDQvdC90YvSoyDQsNC90LDRgtC+0LzQuNGP0LvRi9KbLCDRhNC40LfQuNC+0LvQvtCz0LjRj9C70YvSmyDQtdGA0LXQutGI0LXQu9GW0LrRgtC10YDRltC90LUg0LHQsNC50LvQsNC90YvRgdGC0Ysg0L/QsNC50LTQsCDQsdC+0LvRg9GLINC80q/QvNC60ZbQvS4g0J7Qu9Cw0YDQtNGL0qMg0LHRltGA0ZYg0LDRgdKb0LDQt9Cw0L0g0LHQsNC70LDQu9Cw0YDQtNCwINCz0L7RgNC40LfQvtC90YLQsNC70YzQtNGLINC+0YDQvdCw0LvQsNGB0YPRiywg0LrTqdC70LXQvNGW0L3RltKjINC60ZbRiNGWINCx0L7Qu9GD0YsuIDItMyDQttCw0YHQsNGA0LvRi9KbINCx0LDQu9Cw0L3Ri9KjINCw0YHSm9Cw0LfQsNC90YvQvdGL0qMg0LzQsNC60YHQuNC80LDQu9GM0LTRiyDRgdGL0LnRi9C80LTRi9C70YvSk9GLIDEwMC0xNTAg0LzQuyDQsdC+0LvRi9C/INGC0LDQsdGL0LvQsNC00YsuINCW05nQvdC1INC60LDRgNC00LjQsNC70YzQtNGLINCx06nQu9GW0LPRliAo06nSo9C10YjRgtGW0qMg0YLTqdC80LXQvdCz0ZYg0YHRhNC40L3QutGC0LXRgNGWKSDQsdC+0YEsINC/0LjQu9C+0YDQuNC60LDQu9GL0psg0LHTqdC70ZbQutGC0ZbSoyDRhtC40YDQutGD0LvRj9GA0LvRiyDRgdGE0LjQvdC60YLQtdGA0ZbQvdGW0qMg0YLQvtC90YPRgdGLINC60LXRgNGW0YHRltC90YjQtSDQttC+0pPQsNGA0Ysg0LHQvtC70LDQtNGLLiDQkNGB0pvQsNC30LDQvdC90YvSoyDSm9Cw0YLQv9Cw0YDQu9Cw0YDRiywg0LrRgNC40YHRgtCw0LvQsNGA0Ysg0YLQvtC70YvSmyDQttC10YLRltC70LzQtdCz0LXQvSwg0YTQtdGA0LzQtdC90YLRgtGW0Log0LbSr9C50LXRgdGWINC10YDQtdGB0LXQutGC0LXRgNC00ZbQutGW0L3QtSDSsdKb0YHQsNGBLCDQsNC70LDQudC00LAg0LDQtyDQsdC10LvRgdC10L3QtNGW0LvRltC60LrQtSDQuNC1INCx0L7Qu9GL0L8g0LrQtdC70LXQtNGWLiDQntGB0Ysg0LXRgNC10LrRiNC10LvRltC60YLQtdGA0ZbQvSDSm9C+0YDRi9GC0LAg0LrQtdC70LUsINCx0LDQu9Cw0pPQsCDRgtC40ZbRgdGC0ZYg0LzTqdC70YjQtdGA0LTQtdC9INCw0YDRgtGL0psg0YHSr9GCINCx0LXRgNCz0LXQvSDQttCw0pPQtNCw0LnQtNCwLCDQvdC10LzQtdGB0LUg0YLQsNC80LDSm9GC0LDQvdKT0LDQvSDRgdC+0qMg0LHRltGA0LTQtdC9INC20LDRgtKb0YvQt9GB0LAsINGI0YvRgNGL0YjRgtGLINKb0LDQsdGL0pPRiyDRgtGW0YLRltC60LXQvdGW0L8sINC60LXRgNGWINGA0LXRhNC70Y7QutGBINC+0YDQvdCw0LnQtNGLINC00LAg0YHSr9GCINOp0qPQtdGI0LrQtSDQvtC00LDQvSDTmdGA0ZYg0LbQvtKT0LDRgNGLINCw0YHSm9C+0YDRi9GC0YMg0LbQvtC70LTQsNGA0YvQvdCwINC+0qPQsNC5INGC0q/RgdC10LTRliDQtNC1LCDRltGI0LrQtdC9INGB0q/RgtGW0L0g0YjRi9KT0LDRgNGL0L8g0pvSsdGB0LDQtNGLINC90LUg0LvQvtKb0YHQuNC00YsuINCh0L7QvdGL0LzQtdC9INKb0LDRgtCw0YAsINCx0LDQu9Cw0L3Ri9KjINC10LzRg9GWINC00rHRgNGL0YEg0LHQvtC70LzQsNGB0LAg0L3QtSDQsNGI0YvQvdGL0L8g0LXQvNGB0LUg0YHSr9GC0L/QtdC9INKb0L7RgdCwINCw0YPQsCDQttKx0YLRi9C/INCw0Y3RgNC+0YTQsNCz0LjRjyDQvtGA0YvQvSDQsNC70LDQtNGLLiDQkNGD0LAg0LDRgdKb0LDQt9Cw0L3QtNGLINC60LXRgNGW0L8sINC20L7Sk9Cw0YDRiyDRgdKv0YLRgtGWINCw0LvQsCDRiNGL0pPQsNC00YsuINCc0rHQvdGL0qMg0LDQu9C00YvQvSDQsNC70YMg0q/RiNGW0L0g0LHQsNC70LDQvdGLINGC0LDQvNCw0pvRgtCw0L3QtNGL0YDSk9Cw0L0g0YHQvtKjIDgtMTAg0LzQuNC90YPRgiDQsdC+0LnRiyDRgtGW0Log0rHRgdGC0LDQvyDQttKv0YDRgyDQutC10YDQtdC6LCDQttOZ0L3QtSDQu9C+0pvRgdGL0pPQsNC9INC20LDSk9C00LDQudC00LAg0YHSr9GCINGC0YvQvdGL0YEg0LbQvtC70LTQsNGA0YvQvdCwINGC0q/RgdGW0L8g0LrQtdGC0L/QtdGBINKv0YjRltC9ICjQsNGB0L/QuNGA0LDRhtC40Y8pINKb0YvRgNGL0LzQtdC9INC20LDRgtKb0YvQt9GDINC60LXRgNC10LouINCQ0LnRgtGL0LvSk9Cw0L0g0YHQtdCx0LXQv9GC0LXRgNC00LXQvSDQsdOp0LvQtdC6LCDQv9C40LvQvtGA0LjQutCw0LvRi9KbINCx06nQu9GW0LrRgtGW0qMg0YLQvtC90YPRgdGLINC20L7Sk9Cw0YDRiyDQsdC+0LvQsNGC0YvQvdGL0L3QsCDQsdCw0LnQu9Cw0L3Ri9GB0YLRiyDQv9C40LvQvtGA0L7RgdC/0LDQt9C8INC90LUg0YHRgtC10L3QvtC3INKb0LDRg9C/0ZYg0LDRgNGC0LDQtNGLLCDQsdKx0Lsg0LrQtdC30LTQtSDQsdCw0LvQsNC90YvSoyDRgtOZ0LHQtdGC0ZYg0LbQvtKT0LDQu9Cw0LTRiywg0LHQsNC70LAg0YHQsNC70LzQsNKbINKb0L7RgdC/0LDQudC00Ysg0L3QtdC80LXRgdC1INCw0YDRi9Kb0YLQsNC50LTRiywg0LTQuNGB0YLRgNC+0YTQuNGP0LvRi9KbINOp0LfQs9C10YDRltGB0YLQtdGAINC00LUg0L7RgNGL0L0g0LDQu9GD0Ysg0LzSr9C80LrRltC9LiDQmtKv0L3QtNC10LvRltC60YLRliDRltGI0LrQtdC9INGB0q/RgtGW0L0sINGW0YDRltC80YjRltC60YLTmdGA0ZbQt9C00ZYg0LzQsNGB0YHQsNC90YsgKNGB0L/QsNC30Lwg0LrQtdC30ZbQvdC00LUg0LDRiNGL0pPQsNC9INGB0q/Rgikg0pvSsdGB0LDQtNGLLiDQkdC10YDRltC70LPQtdC9INC/0LDRhtC40LXQvdGC0YLQtSDQvNKx0L3QtNCw0Lkg06nQt9Cz0LXRgNGW0YHRgtC10YAg0LbQvtKbLCDRgdC+0L3QtNGL0pvRgtCw0L0g0LDQvdCw0YHRi9C90LAg0YHSr9GCINC806nQu9GI0LXRgNGW0L0g0LbTmdC90LUg0LbQvtKT0LDRgNGL0LTQsNKT0Ysg0LrQtdKj0LXRgdGC0LXRgNC00ZYg0L7RgNGL0L3QtNCw0YMg0pvQsNC20LXRgi4=</text:p>
          </table:table-cell>
          <table:table-cell office:value-type="float" office:value="170348" table:style-name="ce1">
            <text:p>170348</text:p>
          </table:table-cell>
          <table:table-cell office:value-type="float" office:value="84" table:style-name="ce1">
            <text:p>84</text:p>
          </table:table-cell>
          <table:table-cell office:value-type="string" table:style-name="ce1">
            <text:p>Жыныс жолдарынан шырыш бөлінуі вульвовагинит деп аталады-жазбаңыз қате. (Мысалы, марганцовка ерітіндісіне жуындырса болады)-нәрестелерде қолдануға тыйым салынған</text:p>
          </table:table-cell>
          <table:table-cell office:value-type="float" office:value="0" table:style-name="ce1">
            <text:p>0</text:p>
          </table:table-cell>
          <table:table-cell table:number-columns-repeated="16376"/>
        </table:table-row>
        <table:table-row table:style-name="ro1">
          <table:table-cell office:value-type="float" office:value="1066978" table:style-name="ce1">
            <text:p>1066978</text:p>
          </table:table-cell>
          <table:table-cell office:value-type="string" table:style-name="ce1">
            <text:p>kazakh</text:p>
          </table:table-cell>
          <table:table-cell office:value-type="string" table:style-name="ce1">
            <text:p>Билет 36.&amp;lt;br /&amp;gt; 1.Жаңа туған қыз балада 3-ші күні жыныс жолдарынаң бөлінулер пайда болғаны анасын аландатады. Баланың жалпы жағдайы қанағаттарлы.Табиғи тамақтануда,жақсы емеді.Осы жағдай немен байланысты? Осы өзгерістер балаға қауыптыма? &amp;lt;br /&amp;gt; 2. 3 айлық баланың анасы педиатрға қаралды, шағымдары баланың жиі лоқсуына.Қарағанда патология анықталмаған. Физикалық дамуы жасына сәйкес. Балада қандай асқазаның анатомо физиологилық еркешеліктерімен осы лоқсу байланысты?&amp;lt;br /&amp;gt;</text:p>
          </table:table-cell>
          <table:table-cell office:value-type="string" table:style-name="ce1">
            <text:p>MSnQltCw0qPQsCDRgtGD0pPQsNC9INKb0YvQtyDQsdCw0LvQsNC00LAg0LbRi9C90YvRgSDQttC+0LvQtNCw0YDRi9C90LTQsCDQsdOp0LvRltC90YPQu9C10YDQtNGW0qMg0L/QsNC50LTQsCDQsdC+0LvRgyDRgdC10LHQtdC/0YLQtdGA0ZbQvdC1INCw0L3QsNC90YvSoyDQs9C+0YDQvNC+0L3QtNCw0YDRi9C90YvSoyDTmdGB0LXRgNGW0L3QtdC9INC00LXQvyDRgtKv0YHRltC90LTRltGA0YPQs9C1INCx0L7Qu9Cw0LTRiy4g06jQudGC0LrQtdC90ZYg0LbQsNKj0LAg0YLRg9KT0LDQvSDQsdCw0LvQsCDRgtGD0YvQu9KT0LDQvSDQutC10LfQtNC1LCDQutC+0YDRiNCw0pPQsNC9INC+0YDRgtCw0pPQsCDQsdC10LnRltC80LTQtdC70LUg0LHQsNGB0YLQsNC50LTRiyDQsdGW0YDQsNKbINGN0YHRgtGA0L7Qs9C10L0g0LPQvtGA0LzQvtC90Ysg0LDQvdCw0YHRi9C90LDQvSDSm9Cw0LvQsNC00Ysg0LbTmdC90LUg0L7RgdGL0pPQsNC9INCx0LDQudC70LDQvdGL0YHRgtGLINGA0LDQt9GA0Y/QtCDQsdCw0YHRgtCw0LvQsNC00Ysu0prRi9C3INCx0LDQu9Cw0L3Ri9KjINGB0YvRgNGC0pvRiyDQttGL0L3Ri9GBINC80q/RiNC10LvQtdGA0ZYg0ZbRgdGW0L3Qs9C10L0sINKb0YvQt9Cw0YDSk9Cw0L0g0LHQvtC70YvQvyDQutOp0YDRltC90YPRliDQvNKv0LzQutGW0L0uINCR0rHSk9Cw0L0g0YLRg9GL0LvSk9Cw0L3Sk9CwINC00LXQudGW0L0g0LDQvdCw0LTQsNC9INCx0LDQu9Cw0pPQsCDQsdC10YDRltC70LXRgtGW0L0g0LPQvtGA0LzQvtC90LTQsNGAINGB0LXQsdC10L8g0LHQvtC70LDQtNGLLiDQkdKx0LsgMS00INCw0L/RgtCwINOp0YLQutC10L0g0YHQvtKjINOp0LfRliDQutC10YLRg9GWINC60LXRgNC10LouINCW0LDSo9CwINGC0YPRi9C70pPQsNC9INC905nRgNC10YHRgtC10LTQtdCz0ZYg0LLQsNCz0LjQvdCw0LvRjNC00Ysg0YDQsNC30YDRj9C0INCx0rHQuyDSm9Cw0LvRi9C/0YLRiyDQttCw0pPQtNCw0Lkg0LbTmdC90LUg0LbTmdC90LUg0L3TmdGA0LXRgdGC0LUg0L7QvdGLINCw0L3QsNGB0YvQvdGL0qMg0LPQvtGA0LzQvtC90YvQvdGL0qMg0LTQtdKj0LPQtdC50ZbQvdC1INCx0LDQudC70LDQvdGL0YHRgtGLINGB0LXQt9GW0L3Rg9GWINC80q/QvNC60ZbQvS4g0JbSr9C60YLRltC70ZbQuiDQutC10LfRltC90LTQtSDQsNC90LDQvdGL0qMg0LTQtdC90LXRgdGW0L3QtNC1INGN0YHRgtGA0L7Qs9C10L0g0LbTmdC90LUg0L/RgNC+0LPQtdGB0YLQtdGA0L7QvdC90YvSoyDQttC+0pPQsNGA0Ysg0LTQtdKj0LPQtdC50ZYg0LDQudC90LDQu9GL0L8g0L7RgtGL0YDQsNC00Ysu0J7Qu9Cw0YAg0L/Qu9Cw0YbQtdC90YLQsCDQsNGA0pvRi9C70Ysg06nRgtGW0L8g0L3TmdGA0LXRgdGC0LXQs9C1INC20LXRgtC10LTRli4g0JHSsdC7INKb0LDQu9GL0L/RgtGLINC205nQvdC1INKb0LDRg9GW0L/RgdGW0Lcg0LHQsNC70LDSk9CwINC10YjSm9Cw0L3QtNCw0Lkg0LfQuNGP0L0g0LrQtdC70YLRltGA0LzQtdC50LTRli4g0J3TmdGA0LXRgdGC0LXQvdGW0qMg0LTSsdGA0YvRgSDQtNCw0LzRg9GLINKv0YjRltC9INC60LXQudCx0ZbRgCDQs9C+0YDQvNC+0L3QtNCw0YAg0pvQsNC20LXRgiDQsdC+0LvQsNC00YsuINCR0rHQuyDQttCw0pPQtNCw0LnQtNGLINCx0LDQu9Cw0L3RiyDQtdC80LTQtdGDINKb0LDQttC10YIg0LXRgtC/0LXQudC00ZYu0K/Sk9C90Lgg0LHSsdC7INOp0Lcg0LHQtdGC0ZbQvNC10L0g0LrQtdGC0LXRgtGWLiDQmtC10LfQtNC10LnRgdC+0psg0LjQvdGE0LXQutC40Y/QvdGLINCx0L7Qu9C00YvRgNC80LDRgyDSr9GI0ZbQvSDQsNC90LDRgdGLINC905nRgNC10YHRgtC10L3RliDQttGL0LvRiyDSm9Cw0LnQvdCw0pPQsNC9INGB0YPQvNC10L0g0LbRg9GDINC60LXRgNC10LouINOo0LzRltGA0LTRltKjINCw0LvSk9Cw0YjSm9GLINC60q/QvdC00LXRgNGW0L3QtNC1INC20LDSo9CwINGC0YPSk9Cw0L0g0pvRi9C30LTRi9KjINC20YvQvdGL0YEg0LbQvtC70LTQsNGA0Ysg05nRgNGC0q/RgNC70ZYg0LbQvtC70LTQsNGA0LzQtdC9INC606nRgNGW0L3Rg9GWINC80q/QvNC60ZbQvSwg0LHRltGA0LDSmyDTmdC00LXRgtGC0LUg0L7QuyDQsNKbLNGB0LDRgNGLLCDQsNKb0YjRi9C7INC205nQvdC1INC806nQu9C00ZbRgCDSm9Cw0L3QtNGLLjIp0J7RgdGLINOp0LfQs9C10YDRltGB0YLQtdGAINCx0LDQu9Cw0pPQsCDSm9Cw0YPRltC/0YLRliDQsdC+0LvRg9GLINC80q/QvNC60ZbQvS4xKdCh0LXQsdC10LHRliDQt9OZ0YAg0YjRi9KT0LDRgNGDINC20L7Qu9C00LDRgNGL0L3Ri9KjINC/0LDRgtC+0LvQvtCz0LjRj9GB0Ysg0LTQsNC80YMg0pvQsNGD0L/RliDQttC+0pPQsNGA0YsuMinQkdCw0LvQsNC00LAg0L3QtdGE0YDQvtGC0LjQutCw0LvRi9KbINGB0LjQvdC00YDQvtC8INCx0L7Qu9GD0Ysg0YvSm9GC0LjQvNCw0Lsu0K/Sk9C90Lgg0LHSsdC7INC90LXRgdC10L/RgtC10LPRliDQsNKb0YPRi9C30LTRi9KjINC806nQu9GI0LXRgNGW0L3RltKjINCw0YDRgtGL0L8g0LrQtdGC0YPRli4g0JHSsdC7INGW0YHRltC90YMg0LbTmdC90LUg0LPQuNC/0L7QsNC70YzQsdGD0LzQuNGP0LzQtdC9INC606nRgNGW0L3RltGBINCx0LXRgNC10LTRli48YnIgLz4NCjxiciAvPg0KMikxKdCb0L7Sm9GB0YMg0Y/Sk9C90Lgg0YDQtdCz0YPRgNCz0LjRgtCw0YbQuNGPINC606nQsdGW0L3QtdGB0LUg06nQvNGW0YDQtNGW0qMg0LHRltGA0ZbQvdGI0ZYg0LbRi9C70YvQvdC00LDSk9GLINCx0LDQu9Cw0LvQsNGA0LTQsCDQsdCw0LnSm9Cw0LvQsNC00Ysg0LbTmdC90LUg0LDRg9GL0Lcg0LDRgNKb0YvQu9GLINCw0YHSm9Cw0LfQsNC90L3Ri9KjINC80LDQt9C80rHQvdGL0L0g0L/QsNGB0YHQuNCy0YLRliDQsdC+0YHQsNGC0YMg0L3QtdC80LXRgdC1INC60LXQvdC10YLRgtC10L0g0LHQvtGB0LDRgtGD0LzQtdC9INCx0ZbRgNCz0LUg0LbSr9GA0LXQtNGWLiDQlNC10L3RliDRgdCw0YMg0LbQsNKj0LAg0YLRg9KT0LDQvSDQvdOZ0YDQtdGB0YLQtdC00LUg0YDQtdCz0YPRgNCz0LjRgtCw0YbQuNGPINC606nQu9C10LzRliDTmdC00LXRgtGC0LUgMjUtMzDQvNC7INKb0rHRgNCw0LnQtNGLLtCg0LXQs9GD0YDQs9C40YLQsNGG0LjRjyDQttC40ZbQu9GW0LPRliDQsdCw0LvQsNC90Ysg0LrSr9C90ZbQvdC1INCx0ZbRgNC90LXRiNC1INGA0LXRgiDQsNC70LDQvdC00LDRgtGDINC80q/QvNC60ZbQvS4g0JHQsNC70LDQu9Cw0YDQtNCwINOZ0LTQtdGC0YLQtSA4MCDQv9Cw0LnRi9C30Ysg0LHSsdC7INGN0L/QuNC30L7QtNGC0LDRgCA2LdCw0LnSk9CwINC00LXQudGW0L0g0LbQvtC50YvQu9Cw0LTRiy7QoNC10LPRg9GA0LPQuNGC0LDRhtC40Y8g0ZbRgSDQttKv0LfRltC90LTQtSDRgdCw0YMg0LHQsNC70LDQu9Cw0YDQtNCwINGC05nRg9C10LvRgdGW0Lcg0LrTqdGA0ZbQvdGW0YEg0YDQtdGC0ZbQvdC00LUg0LTQtSDQsdGW0YDSm9Cw0YLQsNGAINCw0YPRgNGD0LvQsNGA0LvQsNGA0LTQsCDQttKv0YDQtdGC0ZbQvSDQv9Cw0YLQvtC70L7Qs9C40Y8g0YDQtdGC0ZbQvdC00LUg0LTQtSDQttC40ZYg0YLRltGA0LrQtdC70LXQtNGWLtCg0LXQs9GD0YDQs9C40YLQsNGG0LjRjyDQvNCw0LrRgdC40LzQsNC70LTRiyDQttC40ZbQu9GW0LPRliA0LTXQsNC5INCx0LDQu9Cw0LvQsNGA0LTQsCDQsdCw0LnSm9Cw0LvQsNC00Ysu06jQvNGW0YDQtNGW0qMg0LHRltGA0ZbQvdGI0ZYg0LbRi9C70LTQsNGA0YvQvdC00LAg0LHQsNC70LDQu9Cw0YDQtNCwINC20LjRliDQu9C+0pvRgdGDINGB0LXQsdC10L/RgtC10YDRliDQvNGL0L3QsNC90LTQsNC5INCw0YHSm9Cw0LfQsNC9IC3RltGI0LXQuiDQttC+0LvQtNCw0YDRi9C90YvSoyDQsdOp0LvRltCz0ZbQvdGW0qMg0pvSsdGA0YvQu9GL0LzRi9C90YvSoyDRhNC90LDRgtC+0LzQuNGP0LvRi9KbLdGE0LjQt9C40L7Qu9C+0LPQuNGP0LvRi9KbICDQtdGA0LXQutGI0LXQu9GW0LrRgtC10YDRltC90LUg0YHTmdC50LrQtdGBINCx0L7Qu9Cw0LTRiy7Qr9KT0L3QuCDQv9C40LvQvtGA0LjQutCw0LvRi9KbINGB0YTQuNC90LrRgtC10YDQtNGW0L0g0LTSsdGA0YvRgSDQttKx0LzRi9GBINGW0YHRgtC10LzQtdGD0ZYu0JHQsNC70LDQu9Cw0YDQtNCwINCw0LvSk9Cw0YjSm9GLINOp0LzRltGAINCx0LDRgNGL0YHRi9C90LTQsCDQvtC70LDRgNC00YvSoyDQsNGB0pvQsNC30LDQvdC90YvSoyDQv9C10YDQuNGB0YLQsNGC0LjQutCw0YHRiyDQsdCw0Y/Rgywg0pvQvtGA0YvRgtGL0LvRgyDQsdCw0Y/RgyDQsdC+0LvQsNC00Ysu0JDRgdKb0LDQt9Cw0L3QvdCw0L0g0YLQsNKT0LDQvNC00Ysg0Y3QstCw0LrRg9Cw0YbQuNGP0LvQsNGDINGD0LDSm9GL0YLRi9C70Ysg0YLQsNC80LDSm9GC0LDQvdGDINCw0YDSm9GL0LvRiyDQttKv0YDQtdC00ZYuPGJyIC8+DQoyKdCR0LDRgdKb0LAg0YHQtdCx0LXQv9GC0LXRgNC00ZYg0LDQu9Cw0YLRi9C9INCx0L7Qu9GB0LDSmy4g0J7QuyDQsNGB0pvQsNC30LDQvdC90YvSoyDSm9Cw0LvRi9C/0YLRiyDRgdGL0LnRi9C80LTRi9C70YvSk9GL0L3QsNC9INCw0YDRgtGL0L8g0LrQtdGC0YPRli7QkNGB0pvQsNC30LDQvSDRgdC+0Lsg0LbQsNKb0YLQsNKT0Ysg0pvQsNCx0YvRgNKT0LAg0LDRgdGC0YvQvdC00LAg0L7QvdGL0qMg0LrQsNGA0LTQuNCw0LvRjNC00Ysg0LHTqdC70ZbQs9GWINClINGB0L7QuyDQutC10YPQtNC1INC+0LzRi9GA0YLSm9Cw0YHRi9C90YvSoyDQsNGB0YLRi9C90LTQsCDQvtGA0L3QsNC70LDRgdKb0LDQvS4g0KjRi9KT0LAg0LHQtdGA0ZbRgSDQvtGA0YLQsCDRgdGL0LfRi9Kb0YLRi9KjINC80LDQvdGL0qPQtNCwLCDQpdCG0IYg0LrQtdGD0LTQtSDQvtC80YvRgNGC0pvQsNGB0YvQvdGL0qMg0LTQtdKj0LPQtdC50ZbQvdC00LUg0LbTmdC90LUg0L7QvNGL0YDRgtKb0LAg0LzQtdC9INGC06nRgdGC0ZbSoyDRgdC10LzRgdC10YAg0YLTmdGA0ZbQt9C00ZYg06nRgdGW0L3QtNGW0YHRltC90ZbSoyDQvtGA0YLQsNGB0YvQvdC00LAg0L7RgNC90LDQu9Cw0YHQsNC00YsuINCR0LDQu9Cw0L3Ri9KjINC20LDRgdGL0L3QsCDQsNGB0pvQsNC30LDQvdC90YvSoyDQv9GW0YjRltC90ZbQvdC1INKb0LDRgNCw0Lkg0L7RgNC90LDQu9Cw0YHRg9GLINC00LXSo9Cz0LXQudGWINOp0LfQs9C10YDRltC/INC+0YLRi9GA0LDQtNGLLiDQkNGB0pvQsNC30LDQvdC90YvSoyDRhNC40LfQuNC+0LvQvtCz0LjRj9C70YvSmyDQutOp0LvQtdC80ZYg0LDQvdCw0YLQvtC80LjRj9C70YvSmyDRgdGL0LnRi9C80LTRi9C70YvSk9GL0L3QsNC9INOZ0LTQtdGC0YLQtSDQutC10LwsINGB0L7QvdC00YvSm9GC0LDQvSDRgtGD0LDRgCDQutC10LfRltC90LTQtSA30LzQuyDQsdC+0LvQsNC00Ysu06jQvNGW0YDQtNGW0qMgNC3RiNGWINGC05nRg9C70LXQs9GW0L3QtdC9INCx0LDRgdGC0LDQvywg0YTQuNC30LjQvtC70L7Qs9C40Y/Qu9GL0psg0YHRi9C50YvQvNC00YvQu9GL0pPRiyA0MC01MNC80Lsg0LTQtdC50ZbQvSDQsNGA0YLQsNC00YssIDEwLdGI0Ysg0LrSr9C90L3QtdC9INCx0LDRgdGC0LDQvyA4MC3QvNC7INC00LXQudGW0L0uINCe0LTQsNC9INOZ0YDRliDQsNC5INGB0LDQudGL0L0g0LrTqdC70LXQvNGWIDI10LzQuyDQsNGA0YLRi9C/INC+0YLRi9GA0LDQtNGLLiDQr9KT0L3QuCDSm9Cw0LvRi9C/0YLRiyDQutOp0LvQtdC80L3QtdC9INCw0YDRgtGL0LvRgyDTmdGB0LXRgNGW0L3QtdC9INCx0LDQu9Cw0LTQsCDQu9C+0pvRgdGDINCx0LXQu9Cz0ZbQu9C10YDRliDQutOp0YDRltC90YMg0LzSr9C80LrRltC9LjxiciAvPg0KPGJyIC8+DQo8YnIgLz4NCjxiciAvPg0K</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2)Осы өзгерістер балаға қауіпті болуы мүмкін.1)Себебі зәр шығару жолдарының патологиясы даму қаупі жоғары.2)Балада нефротикалық синдром болуы ықтимал.Яғни бұл несептегі ақуыздың мөлшерінің артып кетуі. Бұл ісіну және гипоальбумиямен көрініс береді-жазған жазбаныз қате. 2-ші сұрақтың жауабына келсек, академическая политикаға сүйене отырып, плагиат деңгейін ескерсек, жауабыңызда интернет ресурстарын пайдаланғаны, яғни өз бетінізбен жауап жазылмағаны ескеріледі. Және де жауап толық ашылып жазылмаған</text:p>
          </table:table-cell>
          <table:table-cell office:value-type="float" office:value="0" table:style-name="ce1">
            <text:p>0</text:p>
          </table:table-cell>
          <table:table-cell table:number-columns-repeated="16376"/>
        </table:table-row>
        <table:table-row table:style-name="ro1">
          <table:table-cell office:value-type="float" office:value="915245" table:style-name="ce1">
            <text:p>915245</text:p>
          </table:table-cell>
          <table:table-cell office:value-type="string" table:style-name="ce1">
            <text:p>russian</text:p>
          </table:table-cell>
          <table:table-cell office:value-type="string" table:style-name="ce1">
            <text:p>Билет 36.&amp;lt;br /&amp;gt; 1.Мама новорожденной девочки обеспокоена появлением на 3-й день жизни слизистых выделений из половых путей. Общее состояние ребенка не страдает. Активная. На грудном вскармливании. Сосет хорошо. С чем можно связать данное состояние? Являются ли эти изменения опасными для ребенка? &amp;lt;br /&amp;gt; 2. К педиатру обратилась мама с ребенком 3 месяцев с жалобами на срыгивания у ребенка. При осмотре патологии не выявлено. Физическое развитие соответствует возрасту. С какими анатомо-физиологическими особенностями желудка возможны срыгивания у ребенка?&amp;lt;br /&amp;gt;</text:p>
          </table:table-cell>
          <table:table-cell office:value-type="string" table:style-name="ce1">
            <text:p>MS4gINCS0YvQtNC10LvQtdC90LjQtSDRgdC70LjQt9C4INGP0LLQu9GP0LXRgtGB0Y8g0YTQuNC30LjQvtC70L7Qs9C40YfQtdGB0LrQvtC5INC90L7RgNC80L7QuS4g0K3RgtC+INC80L7QttC10YIg0LHRi9GC0Ywg0YHQstGP0LfQsNC90L3QviDRgSDQs9C+0YDQvNC+0L3QsNC70YzQvdGL0Lwg0LjQu9C4INC/0L7Qu9C+0LLRi9C8INC60YDQuNC30L7QvC4g0JfQsCDRgdGH0LXRgiDRgtC+0LPQviwg0YfRgtC+INCy0L4g0LLQvdGD0YLRgNC40YPRgtGA0L7QsdC90L7QvCDQv9C10YDQuNC+0LTQtSDQv9C70L7QtCDQvtGCINC80LDRgtC10YDQuCDQv9C+0LvRg9GH0LDQtdGCINC/0L7Qu9C+0LLRi9C1INCz0L7RgNC80L7QvdGLLiDQoyDQvdC+0LLQvtGA0L7QttC00LXQvdC90YvRhSDQvdCwIDMtNCDQtNC10L3RjCDQv9GA0L7QuNGB0YXQvtC00LjRgiDQstGL0LTQtdC70LXQvdC40LUg0YHQu9C40LfQuCwg0LrQvtGC0L7RgNCw0Y8g0L7QsdGA0LDQt9GD0LXRgtGB0Y8g0LjQty3Qt9CwINC/0L7QstGL0YjQtdC90L3QvtC5INCy0LDRgdC60YPQu9GP0YDQuNC30LDRhtC40Lgg0L7RgNCz0LDQvdC+0LIg0L/QvtC70L7QstGL0YUg0L/Rg9GC0LXQuSDQuCDQv9C+0LLRi9GI0LXQvdC90L7QuSAg0L/RgNC+0L3QuNGG0LDQtdC80L7RgdGC0YzRjiDRgdC+0YHRg9C00L7Qsi4g0K3RgtC+INC90LUg0L7Qv9Cw0YHQvdC+INC00LvRjyDRgNC10LHQtdC90LrQsCwg0YLQsNC6INC60LDQuiDRh9C10YDQtdC3INCy0YDQtdC80Y8g0LzQsNGC0LXRgNC40L3RgdC60LjQtSDQs9C+0YDQvNC+0L3RiyDQstGL0LLQvtC00Y/RgtGB0Y8g0LjQtyDQvtGA0LPQsNC90LjQt9C80LAg0Lgg0L/QvtC60LDQt9Cw0YLQtdC70Lgg0L/RgNC40YXQvtC00Y/RgiDQsiDQvdC+0YDQvNGDLiA8YnIgLz4NCjIuINCh0YDRi9Cz0LjQstCw0L3QuNC1INGDINGA0LXQsdC10L3QutCwINC/0YDQuCDQutC+0YDQvNC70LXQvdC40Lgg0YHQstGP0LfQsNC90L3QviDRgSDRgtC10Lwg0YfRgtC+INGDINC90LXQs9C+INC90LXQtNC+0YHRgtCw0YLQvtGH0L3QviDRgNCw0LfQstC40YLRiyDQvtGA0LPQsNC90Ysg0L/QuNGJ0LXQstCw0YDQuNGC0LXQu9GM0L3QvtC5INGB0LjRgdGC0LXQvNGLLiDQkiDQv9C40YnQtdCy0L7QtNC1INGB0LvQsNCx0L4g0LLRi9GA0LDQttC10L3RiyDQsNC90LDRgtC+0LzQuNGH0LXRgdC60LjQtSDRgdGD0LbQtdC90LjRjyDQuCDRgdGE0LjQvdC60YLQtdGA0Ysg0LjQty3Qt9CwINC90LXQtNC+0YHRgtCw0YLQvtGH0L3QvtGB0YLQuCDQvNGL0YjQtdGH0L3QvtCz0L4g0YHQu9C+0Y8uINCSINC20LXQu9GD0LTQutC1INC90LXQtNC+0YHRgtCw0YLQvtGH0L3QviDRgNCw0LfQstC40YLQsCDQk9GD0LHQsNGA0LXQstCwINGB0LrQu9Cw0LTQutCwLiDQlNC90L4g0Lgg0LrQsNGA0LTQuNCw0LvRjNC90LDRjyDRh9Cw0YHRgtGMINGB0LvQsNCx0L4g0LLRi9GA0LDQttC10L3Riy4g0JLRhdC+0LTQvdGL0LUg0LLQvtGA0L7RgtCwINC90LDRhdC+0LTRj9GC0YHRjyDQstGL0YjQtSDQtNC40LDRhNGA0LDQs9C80YsuINCf0L7RjdGC0L7QvNGDINC/0YDQuCDQv9C10YDQtdC60L7RgNC80LUg0YDQtdCx0LXQvdC60LAg0YHQvtC00LXRgNC20LjQvNC+0LUg0LbQtdC70YPQtNC60LAg0YHQv9C+0LrQvtC50L3QviDRgNC10LPRg9GA0LPQuNGC0LjRgNGD0LXRgiDQvtCx0YDQsNGC0L3Qvi4g0J/QviDQvNC10YDQtSDQstC30YDQvtGB0LvQtdC90LjRjyDQv9GA0L7QuNGB0YXQvtC00LjRgiDQvtC/0YPRgdC60LDQvdC40LUg0LbQtdC70YPQtNC60LAg0Lgg0LLRhdC+0LTQvdGL0LUg0LLQvtGA0L7RgtCwINC+0L/Rg9GB0LrQsNGO0YLRgdGPINC90LjQttC1INC00LjQsNGE0YDQsNCz0LzRiy4g0JTQvdC+INC4INC60LDRgNC00LjQsNC70YzQvdCw0Y8g0YfQsNGB0YLRjCDRgdGC0LDQvdC+0LLRj9GC0YHRjyDRhdC+0YDQvtGI0L4g0LLRi9C00LXQu9C10L3Riy4g0JIg0L/QuNGJ0LXQstC+0LTQtSDQv9GA0L7QuNGB0YXQvtC00LjRgiDRg9GC0L7Qu9GJ0LXQvdC40LUg0LzRi9GI0LXRh9C90L7Qs9C+INGB0LvQvtGPLCDQsNC90LDRgtC+0LzQuNGH0LXRgdC60LjQtSDRgdGD0LbQtdC90LjRjyDRhdC+0YDQvtGI0L4g0LLRi9C00LXQu9C10L3RiyDQuCDRgdGE0LjQvdC60YLQtdGA0Ysg0L3QsNGH0LjQvdCw0Y7RgiDQvdC+0YDQvNCw0LvRjNC90L4g0YTRg9C90LrRhtC40L7QvdC40YDQvtCy0LDRgtGMLiDQn9C+0YHQu9C1INGN0YLQvtCz0L4g0YMg0YDQtdCx0LXQvdC60LAg0L3QtSDQvdCw0LHQu9GO0LTQsNC10YLRgdGPINC/0YDQvtC40LfQstC+0LvRjNC90LDRjyDRgNC10LPRg9GA0LPQuNGC0LDRhtC40Y8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03" table:style-name="ce1">
            <text:p>915403</text:p>
          </table:table-cell>
          <table:table-cell office:value-type="string" table:style-name="ce1">
            <text:p>russian</text:p>
          </table:table-cell>
          <table:table-cell office:value-type="string" table:style-name="ce1">
            <text:p>Билет 36.&amp;lt;br /&amp;gt; 1.Мама новорожденной девочки обеспокоена появлением на 3-й день жизни слизистых выделений из половых путей. Общее состояние ребенка не страдает. Активная. На грудном вскармливании. Сосет хорошо. С чем можно связать данное состояние? Являются ли эти изменения опасными для ребенка? &amp;lt;br /&amp;gt; 2. К педиатру обратилась мама с ребенком 3 месяцев с жалобами на срыгивания у ребенка. При осмотре патологии не выявлено. Физическое развитие соответствует возрасту. С какими анатомо-физиологическими особенностями желудка возможны срыгивания у ребенка?&amp;lt;br /&amp;gt;</text:p>
          </table:table-cell>
          <table:table-cell office:value-type="string" table:style-name="ce1">
            <text:p>MSDQktC+0L/RgNC+0YEuINCU0LDQvdC90L7QtSDRgdC+0YHRgtC+0Y/QvdC40LUg0YHQstGP0LfQsNC90L3QviDRgSDRgtC10Lwg0YfRgtC+INGDINC00LXQstC+0YfQutC4INC/0YDQvtC40LfQvtGI0ZHQuyDQs9C+0YDQvNC+0L3QsNC70YzQvdGL0Lkg0LrRgNC40LcuINGE0YPQvdC60YbQuNC+0L3QsNC70YzQvdGL0Lkg0LPQvtGA0LzQvtC90LDQu9GM0L3Ri9C5INC60YDQuNC3LSDQv9C+0LLRi9GI0LXQvdC40LUg0L/QvtC70L7QstGL0YUg0LPQvtGA0LzQvtC90L7QsiDQsiDQutGA0L7QstC4INGA0LXQsdGR0L3QutCwLiDQodCy0Y/Qt9Cw0L3QvdC+INGBINGC0LXQvCDRh9GC0L4g0L/QtdGA0LXQtCDRgNC+0LbQtNC10L3QuNC10Lwg0Lgg0LLQviDQstGA0LXQvNGPINGA0L7QtNC+0LIg0LTQtdCy0L7Rh9C60LAg0L/QvtC70YPRh9Cw0LvQsCDQvtGH0LXQvdGMINC80L3QvtCz0L4g0L/QvtC70L7QstGL0YUg0LPQvtGA0LzQvtC90L7QsiDQvtGCINGB0LLQvtC10Lkg0LzQsNGC0LXRgNC4LiDQodC+0L7RgtCy0LXRgtGB0YLQstC10L3QvdC+INC/0L7RgdC70LUg0YDQvtC20LTQtdC90LjRjyDRgyDQtNC10LLQvtGH0LrQuCDQvtGH0LXQvdGMINCy0YvRgdC+0LrQuNC5INGD0YDQvtCy0LXQvdGMINC/0L7Qu9C+0LLRi9GFINCz0L7RgNC80L7QvdC+0LIo0Y3RgdGC0YDQvtCz0LXQvdGLKSwg0LIg0YDQtdC30YPQu9GM0YLQsNGC0LUg0LrQvtGC0L7RgNGL0YUg0YMg0LTQtdCy0L7Rh9C60Lgg0L3QsCAzLdC5INC00LXQvdGMINC90LXQtNC10LvQuCDQv9C+0Y/QstC40LvQuNGB0Ywg0YHQu9C40LfQuNGB0YLRi9C1INCy0YvQtNC10LvQtdC90LjRjyDQuNC3INC/0L7Qu9C+0LLRi9GFINC/0YPRgtC10LkuINCU0LDQvdC90YvQtSDQuNC30LzQtdC90LXQvdC40Y8g0L3QtSDRj9Cy0LvRj9GO0YLRgdGPINC+0L/QsNGB0L3Ri9C8INC00LvRjyDRgdC+0YHRgtC+0Y/QvdC40LUg0YDQtdCx0LXQvdC60LAg0Lgg0L/RgNC+0LjRgdGF0L7QtNC40YIg0YMg0LzQvdC+0LPQuNGFINC00LXRgtC10Lkg0LIg0L3QvtGA0LzQtS4g0JLRi9C00LXQu9C10L3QuNGPINC80L7Qs9GD0YIg0LHRi9GC0Ywg0YHQu9C40LfQuNGB0YLRi9C80LgsINC/0YDQvtC30YDQsNGH0L3Ri9C80LgsINGC0LXQvNC90YvQvNC4LCDQutC+0YDQuNGH0L3QtdCy0L7Qs9C+INGG0LLQtdGC0LAuINCc0LDRgtC10YDQuCDRgdGC0L7QuNGCINC/0YDQvtCy0L7QtNC40YIg0L/RgNC+0YTQuNC70LDQutGC0LjQutGDINC40L3RhNC10LrRhtC40Lkg0L/QvtC70L7QstGL0YUg0L/Rg9GC0LXQuS0g0LzRi9GC0Ywg0LrQuNC/0Y/Rh9C10L3QvdC+0LksINGC0LXQv9C70L7QuSDQstC+0LTQvtC5INC/0YDQvtC80LXQttC90L7RgdGC0Ywg0YDQtdCx0ZHQvdC60LAg0YfRgtC+0LHRiyDQstC+0LTQsCDRgdC90LDRh9Cw0LvQsCDQvtCx0LzRi9Cy0LDQu9CwINC/0L7Qu9C+0LLQvtC5INC+0YDQs9Cw0L0g0LAg0LfQsNGC0LXQvCDQv9C+0L/Rgy4gIDIuINCS0L7Qv9GA0L7RgS4g0J3QtSDQvtGB0LLQtdC00L7QvNC70ZHQvdC90LDRjyDQvNCw0YLRjCDQvdC1INC30L3QsNC10YIg0YfRgtC+INGDINC90L7QstC+0YDQvtC20LTRkdC90L3Ri9GFINC00L3QviDQttC10LvRg9C00LrQsCDQv9C+0YfRgtC4INCz0L7RgNC40LfQvtC90YLQsNC70YzQvdC+INC4INCyINC80LXRgdGC0LUg0YEg0L/QuNGJ0LXQstC+0LTQvtC8INC/0YDQuCDQv9GA0LjQvdGP0YLQuNC4INC/0L7Qu9C+0LbQtdC90LjQtSDRgNC10LHRkdC90LrQsCDQsiDQs9C+0YDQuNC30L7QvdGC0LDQu9GM0L3QvtC1INC/0L7Qu9C+0LbQtdC90LjQtSDQttC10LvRg9C00L7QuiDQuCDQv9C40YnQtdCy0L7QtCDRgtCw0LrQttC1INC/0YDQuNC90LjQvNCw0LXRgiDQs9C+0YDQuNC30L7QvdGC0LDQu9GM0L3QvtC1INC/0L7Qu9C+0LbQtdC90LjQtSDRh9GC0L4g0Lgg0LLRi9C30YvQstCw0LXRgiDRgdGA0YvQs9C40LLQsNC90LjQtSDRgNC10LHRkdC90LrQsC4g0KDQtdCx0ZHQvdC60LAg0YHQu9C10LTRg9C10YIg0LrQvtGA0LzQuNGCINC/0YDQsNCy0LjQu9GM0L3QviDQuCDRgSDQvtC/0YDQtdC00LXQu9GR0L3QvdGL0Lwg0YDQsNGB0L/QvtC70L7QttC10L3QuNC1INCyINC/0YDQvtGB0YLRgNCw0L3RgdGC0LLQtSwg0YfRgtC+0LHRiyDQvtC9INC90LUg0LHRi9C7INCz0L7RgNC40LfQvtC90YLQsNC70YzQvdC+INC4INC90LUg0LfQsNGF0LvRkdCx0YvQstCw0LvRgdGPLiDQodGE0LjQvdC60YLQtdGAINC80LXQttC00YMg0L/QuNGJ0LXQstC+0LTQvtC8INC4INC20LXQu9GD0LTQutC+0Lwg0LzQvtC20LXRgiDQsdGL0YLRjCDQvdC1INC30YDQtdC7INC40Lcg0LfQsCDRh9C10LPQviDQvNC+0LbQtdGCINCx0YvRgtGMINGB0YDRi9Cz0LjQstCw0L3QuNC1LiDQotCw0Log0LbQtSDQvNC+0LbQtdGCINCx0YvRgtGMINC60LDQuiDQstCw0YDQuNCw0L3RgiDRgNCw0LfQstC40YLQuNGPINC/0YDQvtCx0LvQtdC80LAg0YEg0LzQvtC70L7QutC+0Lwg0LzQsNGC0LXRgNC4LCDQvdC1INC/0LXRgNC10L3QvtGB0LjQvNC+0YHRgtGMINGA0LXQsdGR0L3QutCwINC80L7Qu9C+0LrQsCDQvNCw0YLQtdGA0LgsINC80L7QttC10YIg0LvRjtCx0LjQvNCw0Y8g0LzQsNGC0Ywg0L/QtdGA0LXQutCw0YDQvNC70LjQstCw0LXRgiDRgdCy0L7QtdCz0L4g0YDQtdCx0ZHQvdC+0YfQutCwINGH0YLQviDQvtC9INCw0LYg0YHRgNGL0LPQuNCy0LDQtdGCICLQodGD0LzQvtC40YHRgiIuICAgIA==</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ответ на второй вопрос не полный. Не описаны АФО желудка. Привратник, пилорический и кардиальный отдел не указан.</text:p>
          </table:table-cell>
          <table:table-cell office:value-type="float" office:value="0" table:style-name="ce1">
            <text:p>0</text:p>
          </table:table-cell>
          <table:table-cell table:number-columns-repeated="16376"/>
        </table:table-row>
        <table:table-row table:style-name="ro1">
          <table:table-cell office:value-type="float" office:value="1067081" table:style-name="ce1">
            <text:p>1067081</text:p>
          </table:table-cell>
          <table:table-cell office:value-type="string" table:style-name="ce1">
            <text:p>russian</text:p>
          </table:table-cell>
          <table:table-cell office:value-type="string" table:style-name="ce1">
            <text:p>Билет 36.&amp;lt;br /&amp;gt; 1.Мама новорожденной девочки обеспокоена появлением на 3-й день жизни слизистых выделений из половых путей. Общее состояние ребенка не страдает. Активная. На грудном вскармливании. Сосет хорошо. С чем можно связать данное состояние? Являются ли эти изменения опасными для ребенка? &amp;lt;br /&amp;gt; 2. К педиатру обратилась мама с ребенком 3 месяцев с жалобами на срыгивания у ребенка. При осмотре патологии не выявлено. Физическое развитие соответствует возрасту. С какими анатомо-физиологическими особенностями желудка возможны срыгивания у ребенка?&amp;lt;br /&amp;gt;</text:p>
          </table:table-cell>
          <table:table-cell office:value-type="string" table:style-name="ce1">
            <text:p>MS7QoSDRh9C10Lwg0LzQvtC20L3QviDRgdCy0Y/Qt9Cw0YLRjCDQtNCw0L3QvdC+0LUg0YHQvtGB0YLQvtGP0L3QuNC4PyDQlNCw0L3QvdC+0LUg0YHQvtGB0YLQvtGP0L3QuNC1INC90L7QstC+0YDQvtC20LTRkdC90L3QvtC5INC00LXQstC+0YfQutC4INGB0LLRj9C30LDQvdC+INGBINCz0L7RgNC80L7QvdCw0LvRjNC90YvQvCDQuNC70Lgg0L/QvtC70L7QstGL0Lwg0LrRgNC40LfQuNGB0L7QvC4g0LLQviDQstC90YPRgtGA0LjRg9GC0YDQvtGA0LHQvdC+0Lwg0L/QtdGA0LjQvtC00LUsINGA0LXQsdC10L3QvtC6INC60LDQuiDQuCDQvNCw0LzQsCDQv9GA0L7RhdC+0LTQuNGCINCy0YHQtSDRjdGC0LDQv9GLINCz0L7RgNC80L7QvdCw0LvRjNC90L7QuSDQv9C10YDQtdGB0YLRgNC+0LnQutC4INC4INC/0L7Qu9GD0YfQsNC10YIg0LIg0LHQvtC70YzRiNC+0Lwg0LrQvtC70LjRh9C10YHRgtCy0LUg0L/QvtC70L7QstGL0LUg0LPQvtGA0LzQvtC90Yso0Y3RgdGC0YDQvtCz0LXQvdGLKS4g0J7RgdC+0LHQtdC90L4g0LLRi9GB0L7QutC40Lkg0YPRgNC+0LLQtdC90Ywg0L/QvtC70L7QstGL0YUg0LPQvtGA0LzQvtC90L7QsiDRgyDRgNC10LHQtdC90LrQsCDQv9C+0YHQu9C1INGA0L7RgNC00L7QsijQvdC+0LLQvtGA0L7QttC00LXQvdGL0YUpLiDQn9C+0YHQu9C1INGA0L7QttC00LXQvdC40Y8g0L/RgNC+0LjRgdGF0L7QtNC40YIg0L/QvtGB0YLQtdC/0LXQvdC+0LUg0YHQvdC40LbQtdC90LjQtSDRjdGC0YDQvtCz0LXQvdC+0LIg0YMg0L3QvtCy0L7RgNC+0LbQtNC10L3QvtC5INC00LXQstC+0YfQutC4LiDQn9C+0Y/QstC70LXQvdC40LUg0YHQu9C40LfQuNGB0YLRi9GFINCy0YvQtNC10LvQtdC90LjQuSDQuNC3INC/0L7Qu9C+0LLRi9GFINC/0YPRgtC10Lkg0YMg0LTQtdCy0L7Rh9C60LjQvdCwINC80L7Qs9GD0YIg0LHRi9GC0Ywg0LbQtdC70YLRi9C80LgsINCx0LXQu9GL0LzQuCwg0LrRgNC+0LLRj9C90LjRgdGC0YvQvNC4LCDRgdCy0LXRgtC70YvQvCwg0L/RgNC+0LfRgNCw0YfQvdGL0LzQuCDQuCDQuNC80LXRjtGCINC+0L3QuCDRgdC70LjQt9C40YHRgtGL0Lkg0YXQsNGA0LDQutGC0LXRgC4gINCv0LLQu9GP0LXRgtGB0Y8g0LvQuCDRjdGC0Lgg0LjQt9C80LXQvdC10L3QuNGPINC+0L/QsNGB0L3Ri9C80Lgg0LTQu9GPINGA0LXQsdC10L3QutCwID8g0J3QtdGCINC00LDQvdC+0LUg0YHQvtGB0YLQvtGP0L3QuNC1ICDRj9Cy0LvRj9C10YLRgdCwINC90L7RgNC80L7QuSDRgyDRgNC10LHQtdC90LrQsCDQuCDQvdC1INGC0YDQtdCx0YPQtdGCINC70LXRh9C10L3QuNGPLiDQlNCw0L3QvdC+0LUg0YHQvtGB0YLQvtGP0L3QuNC1INC90YPQttC90L4g0L7QsdGK0Y/RgdC90LjRgtGMINC80LDRgtC10YDQuCDRgNC10LHQtdC90LrQsCDRh9GC0L7QsdGLINCw0L3QsCDQvdC1INCy0L7Qu9C90L7QstCw0LvQsNGB0Ywg0L4g0YHQvtGB0YLQvtGP0L3QuNC5INGB0LLQvtC10LPQviDRgNC10LHQtdC90LrQsC4g0KLQsNC6INC20LUg0LXQuSDQvdCw0LTQviDRgdC70LXQtNC40YLRjCDQt9CwINCz0LjQs9C40LXQvdC+0Lkg0YHQstC+0LXQs9C+INGA0LXQsdC10L3QutCwLCDQvNGL0YLRjCDRgNC10LHQtdC90LrQsCDRgtC10L/Qu9C+0Lkg0L/RgNC+0LrQuNC/0Y/Rh9GR0L3QvdC+0Lkg0LLQvtC00L7QuSDRh9GC0L7QsdGLINC90LXQsdGL0LvQviDQvdC40LrQsNC60L7QuSDQuNC90YTQtdC60YbQuNC5LiDQn9GA0Lgg0Y3RgtC+0Lwg0LTQtdGA0LbQsNGC0Ywg0YDQtdCx0LXQvdC60LAg0LbQuNCy0L7RgtC+0Lwg0LLQtdGA0YUg0YfRgtC+0LHRiyDRgdGC0YDRg9C50LrQsCDQstC+0LTRiyDQvtC80YvQstCw0LvQsCDRgdC90LDRh9Cw0LvQsCDQv9C+0LvQvtCy0YvQtSDQv9GD0YLQuCDQv9C+0YLQvtC8INGP0LPQvtC00LjRhtGLLiAyLtCg0LXQsdC10L3QvtC6IDMg0LzQtdGB0Y/RhtCwINCw0L3QsNGC0L7QvNC+LdGE0LjQt9C40L7Qu9C+0LPQuNGH0LXRgdC60LjQtSDQvtGB0L7QsdC10L3QvdC+0YHRgtC4INGDINC00LXRgtC10Lkg0LTQsNC90L3QvtCz0L4g0LLQvtC30YDQvtGB0YLQsD8g0YMg0YDQtdCx0LXQvdC60LAg0LXRidC1INC90LUg0LTQvtC60L7QvdGG0LAg0YHRhNC+0YDQvNC40YDQvtCy0LDQvdGLINGA0LXRhNC70LXQutGB0YssINC90LDQv9GA0LjQvNC10YAg0YfQsNGB0YLQviDRgyDQvdC+0LLQvtGA0L7QttC00LXQvdGL0YUg0LTQtdGC0LXQuSDQvdC1INGB0YTQvtGA0LzQuNGA0L7QstCw0L0g0LPQu9GC0LDRgtC10LvRjNC90YvQuSDRgNC10YTQu9C10LrRgSDQuCDQvtC90Lgg0YfQsNGB0YLQviDRgdC/0LvQtdCy0YvQstCw0Y7RgiDRgdC70Y7QvdGDINC40LvQuCDQuNC70Lgg0LzQsNC70L7QutC+INC80LDRgtC10YDQuCjQstC+0YIg0YHQtNC10YHRjCDQvdGD0LbQvdC+INCx0YvRgtGMINC+0YHRgtC+0YDQvtC20L3Ri9C8INC60L7Qs9C00LAg0YDQtdCx0LXQvdC+0Log0YHQv9C40YIg0L3QtdC70YzQt9CwINC00L7Qv9GD0YHQutCw0YLRjCDRh9GC0LHRiyDQs9C+0LvQvtCy0LAg0YDQtdCx0LXQvdC60LAg0LHRi9C70LAg0L/QvtGB0YLQvtGP0L3QsCDQsiDQstC10YDRgtC10LrQsNC70YzQvdC+0Lwg0L/QvtC70L7QttC10L3QuNC5INGH0YLQvtCx0Ysg0YDQtdCx0LXQvdC+0Log0L3QtSDQt9Cw0YXQu9C10LHQvdGD0LvRgdGPLiDQotCw0LrQttC1INC80LDRgtC10YDQuCDQvdGD0LbQvdC+0L/QvtGB0YLQvtGP0L3QviDQvNC10L3Rj9GC0Ywg0L/QvtC70L7QttC10L3QuCDQs9C+0LvQvtCy0Ysg0YDQtdCx0LXQvdC60LAg0LIg0LLQtdGA0YLQtdC60LDQu9GM0L3QvtC8INC/0L7Qu9C+0LbQtdC90LjQuSDRgdGC0L7QsdGLINC80YvRiNGG0Ysg0YjQtdC5INGA0LXQsdC10L3QutCwINC/0YDQsNCy0LjQu9GM0L3QviDRgdGE0L7RgNC80LjRgNC+0LLQsNC70LjRgdGMKS4g0KHRgNGL0LPQuNCy0LDQvdC40LUg0YMg0YDQtdCx0LXQvdC60LAg0YHQstGP0LfQsNC90L4g0YEg0YLQtdC8INGH0YLQviDQstC+INCy0YDQtdC80Y8g0LrQvtGA0LzQu9C10L3QuNGPINGA0LXQsdC10L3QutCwINCy0LzQtdGB0YLQtSDRgSDQvNC+0LvQvtC60L7QvCDQvNCw0YLQtdGA0Lgg0LIg0LbQtdC70YPQtNC+0Log0YDQtdCx0LXQvdC60LAg0L/QvtC/0LDQtNCw0LXRgiDQuCDQstC+0LfQtNGD0YUsINC+0YLRgdGO0LTQsCDQuCDQv9GA0L7QuNGB0YXQvtC00LjRgiDRgdGA0YvQs9C40LLQsNC90LjQtSDRgyDRgNC10LHQtdC90LrQsCDQv9C+0Y3RgtC+0LzRgyDQv9GA0LjRh9C40L0g0LTQu9GPINCx0LXRgdC/0L7QutC+0LnRgdGC0LLQsCDRgyDQvNCw0YLQtdGA0Lgg0L3QtdGCLiDQldC5INC90YPQttC90L4g0L7QsdGP0YHQvdC40YLRjCDRjdGC0L4sINC4INC/0L7QutC+0LfQsNGC0Ywg0LrQsNC6INC/0L7QvNC+0YfRjCDRgNC10LHQtdC90LrRgyDRgSDRjdGC0Lgg0L/QvtGB0LvQtSDRgtC+0LPQviDQutCw0Log0YDQtdCx0LXQvdC+0Log0L/QvtC10LssINGN0YLQviDQsNC60YPRgNCw0YLQvdC+INC/0L7RhdC70L7Qv9Cw0YLRjCDRgNC10LHQtdC90LrQsCDQv9C+INGB0L/QuNC90LUg0YfRgtC+0LHRiyDQstC+0LfQtNGD0YUg0L3QtSDQvdCw0LrQsNC/0LvQuNCy0LDQu9GB0Y8g0LIg0LbQtdC70YPQtNC60LUuINCi0LDQuiDQttC1INGDINGA0LXQsdC10L3QutCwINCyINC20LXQu9GD0LTQutC1INC/0YDQtdC+0LHQu9C+0LTQsNC10YIg0LzQvtC70L7Rh9C90LDRjyDQutC40YHQu9Cw0YLQsCDRjdGC0L4g0YHQstGP0LfQvtC90L4g0YEg0YHRgNGL0LPQuNCy0LDQvdC40LXQvCDRgyDRgNC10LHQtdC90LrQsC4gKyDRgyDRgNC10LHQtdC90LrQsCDQtdGJ0LUg0L3QtSDQtNC+0LrQvtC90YbQsCDRgNCw0LfQstC40YLQsCDQv9C10YDQtdGB0YLQsNC70YzRgtC40LrQsCDQutC40YjQtdGH0L3QuNC60LAsINC60L7RgtC+0YDQsNGPINGC0L7QttC1INCy0LvQuNGP0LXRgiDQvdCwINGB0YLRg9C7INGA0LXQsdC10L3QutCwLiA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Не написано про АФО желудка.Про дно , кардиальный отдел желудка. Привратник широкий. Расположение желудка горизонтальное. и т,д.</text:p>
          </table:table-cell>
          <table:table-cell office:value-type="float" office:value="0" table:style-name="ce1">
            <text:p>0</text:p>
          </table:table-cell>
          <table:table-cell table:number-columns-repeated="16376"/>
        </table:table-row>
        <table:table-row table:style-name="ro1">
          <table:table-cell office:value-type="float" office:value="914713" table:style-name="ce1">
            <text:p>914713</text:p>
          </table:table-cell>
          <table:table-cell office:value-type="string" table:style-name="ce1">
            <text:p>english</text:p>
          </table:table-cell>
          <table:table-cell office:value-type="string" table:style-name="ce1">
            <text:p>Ticket 36.&amp;lt;br /&amp;gt; 1. The mother of a newborn girl is concerned about the appearance on the 3rd day of life of mucous secretions from the genital tract. The general condition of the child does not suffer. Active. On breastfeeding. Sucks well. What can this condition be associated with? &amp;lt;br /&amp;gt; 2. A mother with a 3-month-old child came to the pediatrician with complaints of regurgitation in the child; no pathology was revealed during examination; physical development corresponds to age. With what anatomical and physiological features of the stomach, regurgitation in a child is possible.&amp;lt;br /&amp;gt;</text:p>
          </table:table-cell>
          <table:table-cell office:value-type="string" table:style-name="ce1">
            <text:p>MS4pdGhpcyBjb25kaXRpaW9uIGlzIGxpa2VseSBhc3NvY2lhdGVkIHdpdGggJydtYXRlcm5hbCBob3Jtb25hbCBpbmZsdWVuY2UnJy4gYW5kIGh5cG9vdGh5cm9kaXNtIHRoZSBuZXdib3JuIGlzIGV4aGliaXRpbmcgcGh5c2lvbG9naWNhbCBlc3Ryb2dlbiB3aXRoZHJhd2FsIGR1ZSB0byBkZWNsaW5lIG9mIG1hdGVybmFsIGVzdHJvZ2VuIGFmdGVyIGJpcnRoLiAgID4+IGR1cmluZyBwcmVnbmFjeSwgbWF0ZXJuYWxsIGhvcm1vbmUgZXNwZWNpYWxseSAoZXN0cm9nZW4pIGNyb29zc2VzIHRoZSBwbGFjZW50YSBhbmQgc3RpbXVsYXRlIGJhYnkgZ2VuaXRhbCB0cmFjdCBhbmQgYWZ0ZXIgdGhlIGJpcnRoICBtYXRlcm5hbCBlc3Ryb2dlbiBsZXZlbCBkZWNyZWFzZSwgIHRoYXQgY2FuIGxlYWQgdG8gdGVtcG9yYWwgbXVjb3VzIGRpc2NoYXJnZSByZWxlYXNlIGZyb20gdGhlIGdlbml0YWwgdHJhY3RvciBvciBldmVuIG1pbm9yIGJsZWRpbmcgaW4gYSBtb3RoZXIgYW5kIHRoaXMgaXMgY2FsbGVkIGZhbHNlIG1lbnN0cnVhdGlvbiBhbmQgbmVvbmF0YWwgZXN0cm9nZW4gd2l0aGRyYXdhbC4gICAgPGJyIC8+DQogICAgICAgICAgICAgICAgICAgICAgICAgICAgICAgICAgICAgICAgICAgICAgICAgICAgICAgICAgICAgICAgICAgICAgICAgICAgICAgICAgICAgICAgICAgICAgICAgICAgICAgICAgICAgICAgICAgICAgICAgICAgICAgICAgMi4pUmVndXJnaXRhdGlvbiBpbiB0aGUgY2hpbGQgaXMgY29tbW9uIGR1ZSB0byBpbW1hdHVyaXR5IG9mIGxvd2VyIGVzb3BoYWdlYWwgc3BoaW5jdGVyciAoTEVTKS4gICAgICAgICAgICAgICAgICAgICAgICAgICAgICAgICAgICAgICAgICA8YnIgLz4NCj4+IGFub3RvbWljYWwgYW5kIHBoeXNpb2xvZ2ljYWwgZmVhdXR1cmVzIG9mIHRoZSBzdG9tYWNoOi0gICAgICAgICAgICAgICAgICAgICAgICAgICAgICAgICAgICAgICAgICAgICAgICAgICAgICAgICAgICAgICAgICAgICAgICAgICAgICAgIDEuKXNob3J0ZXIgZXNvcGhhZ3VzOi0gdGhlIHNob3J0ZXIgbGVuZ3RoIG1ha2UgZWFzaWVyIGZvciBnYXN0cmljIGNvbnRlbnQgdG8gcmVhY2ggdGhlIGVzb3BoYWd1cy4gICAgICAgICAgICAgICAgICAgICAgICAgICAgICAgICAgICAgICAgICAgICAgICAgICAgICAgICAgICAgICAgICAgICAgIDIuKWhvcml6b250YWwgcG9zaXRpb24gb2Ygc3RvbWFjaDotICBpbiBpbmZhbnQgIHN0b21hY2ggbGllcyBtb3JlIGhvcml6b250YWxsIGFzIGNvbXBhcmVkIHRvIGFkdWx0cyAuICAgICAgICAgICAgICAgICAgICAgICAgICAgICAgICAgICAgICAgICAgICAgICAgICAgICAgICAgICAgICAgICAgICAgICAgICAgICAgICAgICAzLil3ZWFrZXIgbG93ZXIgZXNvcGhlZ2VhbCBzcGhpbmN0ZXI6LWluIGluZmFudHMsIExvd2VyIGVzb3BhZ2VhbHNwaGluY3RlciAoTEVTKSBpcyBub3QgZnVsbHkgZGV2ZWxvcGVkIGFzIGNvbXBhcmVkIHRvIGFkdWx0cyB0aGF0IGNhbiBsZWFkIHRvIHJlZmx1eC4gICAgICAgICAgICAgICAgICAgICAgICAgICAgICAgICAgICAgICAgICAgICAgICAgICAgICAgICAgICAgICAgICAgICAgICAgICAgICAgICAgICAgICAgICAgICAgICAgICAgICAgICAgICAgICA0LikgcHJlZG9taW5lYXRpbHRseSBsaXF1aWQgZGlldCA6LSBpbiBpbmZhbnRzLCBicmVhc3QgbWlsayBvciBmb3JtdWxhIGluY3JlYXNlcyB0aGUgbGlrZWxpaG9vZCBvZiByZWd1cmdpdGF0aW9uIGR1ZSB0byBpdHMgY29uc2lzdGVuY3kuICAgICAgICAgICAgICAgICAgICAgICAgICAgICAgICAgICAgICAgICAgICAgICAgICAgICAgICAgICAgICAgICAgICAgICAgICAgICAgICAgICAgICAgICAgICAgPGJyIC8+DQo1LikgZnJlcXVlbnQgZmVlZGluZyBhbmQgYWlyIHN3YWxsb3dpbmc6LSBvdmVyZmVlZGluZyBvciBhaXIgc3dhbGxvd2luZyBsZWFkIHRvICBnYXN0cmljIGRpc3RlbnNpb24sd2hpY2ggY2FuIGxlYWQgdG8gcHJvbW90aW5nIHJlZ3VyZ2l0YXRpb24gaW4gYSBjaGlsZC4=</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753" table:style-name="ce1">
            <text:p>914753</text:p>
          </table:table-cell>
          <table:table-cell office:value-type="string" table:style-name="ce1">
            <text:p>english</text:p>
          </table:table-cell>
          <table:table-cell office:value-type="string" table:style-name="ce1">
            <text:p>Ticket 36.&amp;lt;br /&amp;gt; 1. The mother of a newborn girl is concerned about the appearance on the 3rd day of life of mucous secretions from the genital tract. The general condition of the child does not suffer. Active. On breastfeeding. Sucks well. What can this condition be associated with? &amp;lt;br /&amp;gt; 2. A mother with a 3-month-old child came to the pediatrician with complaints of regurgitation in the child; no pathology was revealed during examination; physical development corresponds to age. With what anatomical and physiological features of the stomach, regurgitation in a child is possible.&amp;lt;br /&amp;gt;</text:p>
          </table:table-cell>
          <table:table-cell office:value-type="string" table:style-name="ce1">
            <text:p>VGhlIGNvbmRpdGlvbiB3aGljaCBpcyBjaGFyYWN0ZXJpemVkIGJ5IHRoZSBwcmVzZW5jZSBvZiB0aGUgbXVjb3VzIHNlY3JldGlvbiB0aHJvdWdoIHRoZSBnZW5pdGFsIHRyYWN0IGlzIGtub3duIGFzIHRoZSB0aGUgcHNldWRvbWVuc3VyYXRpb24gb3IgdmFnaW5hbCBkaXNjaGFyZ2UgaW4gdGhlIG5ld2Jvcm5zIC4gSXQgaXMgYSBub3JtYWwgcGh5c2lvbG9naWNhbCBjb25kaXRpb24gYW5kIGl0IGlzIHJlc29sdmVkIGFmdGVyIGZldyBkYXlzIG9mIHRoZSBiaXJ0aCAuIHRoZSBldGlvbG9naWNhbCBmYWN0b3IgcmVzcG9uc2libGUgZm9yIHRoZSBjYXVzZSBvZiBwc2V1ZG9tZW5zdXJhdGlvbiBpcyB0aGUgd2l0aGRyYXdsIG9mIHRoZSBtYXRlcm5hbCBob3Jtb25lcyB0aGF0IGNyb3NzZWQgdGhlIHBsYWNlbnRhIGxlYWRpbmcgdG8gYSB0ZW1wb3JhcnkgaG9ybW9uYWwgaW1iYWxhbmNlIGluIHRoZSBjaGlsZCAgLiBUaGUgMyBtb250aCBvbGQgY2hpbGQgIGlzIHN1ZmZlcmluZyBmcm9tIHJlZ3VyZ2l0YXRpb24gd2hpY2ggaXMgY29tbW9uIGluIGNoaWxkcmVuIG9mIHRoaXMgYWdlIGR1ZSB0byB0aGVpciBpbW11bmFsIGltbWF0dXJpdHkgb2YgdGhlIGdhc3Ryb2ludGVzdGluYWwgc3lzdGVtIHNwZWNpZmljYWxseS4gdGhlIGFuYXRvbWljYWwgYW5kIHBoeXNpb2xvZ2ljYWwgZmVhdHVyZXMgd2hpY2ggYXJlIGNvbnRyaWJ1dGluZyB0byB0aGUgc3RvbWFjaCByZWd1cmdpdGF0aW9uIGFyZSBhcyBmb2xsb3dlZCA6ICAvIDEuIGltbWF0dXJpdHkgb2YgdGhlIGxvd2VyIGVzb3BoYWdlYWwgc3BoaW5jaHRlcjogdGhlIGxvd2VyIGVzb3BoYWdlYWwgc3BoaW5jdGVyIGlzIGltbWF0dXJlIGFuZCBpdCBsZWFkcyB0byByZWZsdXggb2YgdGhlIHN0b21hY2ggY29udGVudHMgaW50byB0aGUgZXNvcGhhZ2VvdXMgY2F1c2luZyBkaXNjb21mb3J0IGFuZCBhbnhpZXR5IDIuaG9yaXpvbnRhbCBzdG9tYWNoIG9yaWVudGF0aW9uOiB0aGUgc3RvbWFjaCBvZiB0aGUgaW5mYW50cyBpcyBvcmllbnRlZCBpbiB0aGUgaG9yaXpvbnRhbCBwb3NpdGlvbiB1bmxpa2UgdGhlIGFkdWx0cyB3aG8gaGF2ZSBtb3JlIHZlcnRpY2FsbHkgc2l0dWF0ZWQgc3RvbWFjaCBtYWtpbmcgaXQgbW9yZSBwcm9uZSB0byBnYXN0cm9lc29waGFnZWFsIHJlZmx1eCAzLiBzbWFsbCBzdG9tYWNoIGNhcGFjaXR5IDogdGhlIHN0b21hY2ggb2YgdGhlIGluZmFudHMgaGFzIGEgc21hbGxlciBzaXplIGFuZCB0aHVzIGEgc21hbGwgYW1vdW50b2YgZmVlZGluZyBjYW4gbGVhZCB0byByZWd1cmdpdGF0aW9uIG9mIHRoZSBhY2lkaWMgY29udGVudHMgb2YgdGhlIHN0b21hY2ggNC5zaG9ydCBlc29waGFnb3VzIDogdGhlIHNob3J0IGVzb3BoYWdvdXMgcmVkdWNlcyB0aGUgZGlzdGFuY2UgdGhhdCBzdG9tYWNoIGNvbnRlbnRzIG11c3QgdHJhdmVsIHRvIGNhdXNlIHJlZ3VyZ2l0YWlvbiA1LnVuZGVyZGV2ZWxvcGVkIG1vdG9yIGNvbnRyb2wgOiB0aGUgaW5jb21wbGV0ZSBkZXZlbG9wbWVudCBvZiB0aGUgbmVydm91cyBpbm5lcnZhdGlvbiBsZWFkcyB0byBtaXNjb29yZGluYXRlZCBwZXJpc3RhbGF0aWMgbW92ZW1lbnRzIHRoaXMgY291bGQgYWxzbyBiZSBhIHBvdGVudGlhbCByZWFzb24gYmVoaW5kIHJlZ3VyZ2l0YWlvbiAgI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04" table:style-name="ce1">
            <text:p>915004</text:p>
          </table:table-cell>
          <table:table-cell office:value-type="string" table:style-name="ce1">
            <text:p>english</text:p>
          </table:table-cell>
          <table:table-cell office:value-type="string" table:style-name="ce1">
            <text:p>Ticket 36.&amp;lt;br /&amp;gt; 1. The mother of a newborn girl is concerned about the appearance on the 3rd day of life of mucous secretions from the genital tract. The general condition of the child does not suffer. Active. On breastfeeding. Sucks well. What can this condition be associated with? &amp;lt;br /&amp;gt; 2. A mother with a 3-month-old child came to the pediatrician with complaints of regurgitation in the child; no pathology was revealed during examination; physical development corresponds to age. With what anatomical and physiological features of the stomach, regurgitation in a child is possible.&amp;lt;br /&amp;gt;</text:p>
          </table:table-cell>
          <table:table-cell office:value-type="string" table:style-name="ce1">
            <text:p>QW5zIFRJQ0tFVCAzNiBUSEUgTU9USEVSIE9GIEEgTkVXQk9STiBHSVJMIElTIENPTkNFUkVEIGFib3V0IHRoZSBhcHBlcmFuY2Ugb24gdGhlIDMgcmQgZGF5IG9mIGxpZmUgb2YgbW91Y291cyBzZWNyZXRpb25zIGZyb20gdGhlIGFiaWxpdHkgdG8gcmVzcG9uc2UgMSBUSEUgTVVDT1VTIFNFQ1JFVElPTlMgRlJPTSBUSEUgZ2VuaXRhbCB0cmFjdCBpbiBhIG5ld2Jvcm4gZ2lybCAsIGVzcGVjaWFsbHkgb24gdGhlIDNyZCBkYXkgb2YgbGlmZSAsIGlzIGxpa2VseSBhc3NvY2lhdGVkIHdpdGggYSBwaGVub21lbm9ubiBrbm93biBhcyBwc2VkdWRvbWVuc3RyYXV0aW9uIG9yIG1pbmlhdHVyZSBvciB0aGUgY29uZGl0aW9uIHdpdGhkcmF3YWwgYmxlZGRpbmdnZyAtIGV4cGxhbnRhdGlvbiAtIERVUklORyBQUkVHQU5DWSAtIFRIRSBCQUJZIGlzIGV4cG9zZWQgdG8gdGhlIG1vdGhlcidzIGhvcm1vbmVzICwgaW5jbHVkaW5nIGVzdHJvZ2VuIC4uLi4gQUZURVIgVEhFIEJJUlRIIFRIRSBIT1JNT05FUyBzdWRkZW4gd2l0aGRyYXdhbCBvZiB0aGVzZSBob3Jtb25lcyAgY2FuIGNhdXNlIG9mIHRoZSB0ZW1wb3JhcnkgaG9ybW9uYWwgaW4gdGhlIGJhbGFuY2UgaW4gdGhlIG5ld2Jvcm4gLXRoZSBtdWNvdXMgc2VjcmV0aW9ucyBvciBzbWFsbCBhbW91bnRzIG9mIGJsb29kIGZyb20gdGhlIGdlbml0YWwgdHJhY3QgYXJlIGEgcmVzcG9uc2UgdG8gdGhpcyBob3Jtb25hbCB3aXRoZHJlYXdhbCBhbmQgYXJlIG5vdCBhIHNpZ24gb2YgcGF0aG9sb2d5IC0gcHNldWRvbWVuc2F0dXJhdGlvbiBpcyBhbm9ybWFsIGFuZCBTRUxGIC0gTElNSVRJTkcgT0NDVVJFTkNFICwgQU5EIElUJ1MgRE9FUyBOT1QgQ0FVU0UgQU5ZIEhBUk0gVE8gVEhFIE5FV0JPUk4gLi4uLiBpdCB0eXBpY2FsbHkgcmVzb2x2ZXMgb24gaXQncyBvd24ncyB3aXRob3V0IGludGVydmF0aW9uIC4uLi4ua2V5IHBvaW50cyAgQ0FVU0UgLSBNQVRFUk5BTCBIT1JNT05FUyBXSVRIREFSV0FMIFsgUFJJTUFSSUxZIEVTVFJPR0VOIF0gJydUSU1JTkcgJycgVVNVQUxMWSBPQ0NVUlMgV0lUSElOIFRIRSBGSVJTVCBXRUFLIE9GIExJRkUgJycgQVBQRUFSQU5DRSAuLiBXSElURSBPUiBDTEVBUiBNVUNPVVMgRElTQ0hBUkdFIE9DQ0FTSU9OQUxMWSBNSVhFRCBXSVRIIEJMT09EIC4uIEdFTkVSQUwgQ09ORElUSU9OIC0gVEhFIEJBQlkgUkVNQUlOUyBBQ1RJVkUgLCBGRUVEUyBXRUxMUyBBTkQgU0hPV1MgTk8gT1RIRVIgU1lNUFRPTVMgLi4uLiBDTElOSUNBTCBTSUdOSUZJQ0FOQ0UgQ09ORElUSU9OIE5PUk1BTCBQSFlTSU9MT0dZIFBST0NFU1NFUyAnJycgQU5EIERPRVMgTk9UIFJFUVVJUkUgVFJFQVRNRU5UICcnIFJFU09MVVRJT04gJyBUSEUgRElTQ0hBUkdFIFJFU09MVkVTIFNQT05UQU5FT1VTTFkgQVMgVEhFIEhPUk1PTkUgTEVWRUxTIFNUQklMSVpFUyAsIFRZUElDQUxMWSBXSVRISU4gQSBGRVcgREFZUyBUTyBBV0VFSyAuLi4uJycgUkVTQVVVUkFOQ0UgVE8gUEFSRU5UUydTIC4uLiBUSElTIElTIEEgTk9STUFMIE9DQ1VSRU5DRSBBTkQgUEFSVCBPRiBUSEUgQk9EWSBBREpVU1QgVEhFRSBMSUZFIE9VVFNJREUgVEhFIFdPTUIgLi4uICAyIGEgbW90aGVyIHdpdGggYSAzIC0gbW9udGggb2xkIGNoaWxkIHRvIHRoZSBwZWRpYWN0cmlhbiBjb21wbGFpbnRzcyByZWdydXJnYXRpb24gaW4gYSAzIC0gbW9udGggb2xkIGNoaWxkIC0gYW5hdG9taWNhbCBhbmQgcGh5c2lvbG9naWNhbCAtIEZFQVVUUkVTIElOIFRIRSBTVE9NQUNIIC0gSU4gWU9VTkcgaW5mYW50cyAsIHJlZ3J1dGF0aW9uIGlzIGEgY29tbW9uIGFuZCBub3JtYWwgb2NjdXJlbmNlICwgb2Z0ZW4gcmVmZXJlZCB0byBhIGdhc3Ryb2Vzb3BoYWdlYWwgcmVmbHV4IFsgR0VSXS0gQU5BVE9NSUNBTCBGRUFVVFJFUyAtIFRIRSBMT1dFUiBFU09QSEFHRUFMIHNwaGluY3RlciBbIExFU10sIHdoaWNoIHNlcGFyYXRlcyB0aGUgZXNvcGhhZ3VzIGZyb20gdGhlIHN0b2FtY2ggLCBpcyBub3QgZnVsbHkgbWF0dXJlIGlzIHRoZSBhYmlsaXR5IHRvIHRoZSBpbiBpbmZhbnRzIC4uLi4gdGhpcyBhbGxvd3MgZm9yIHRoZSBiYWNrd2FyZCBmbG93IG9mIHRoZSBzdG9tYWNoIGNvbnR0ZW50cnMgaW50byB0aGUgZXNvcGhhZ3VzIC0gdGhlIHN0b2FtY2ggaXRzZWxmIHJlbGF0aXZlbHkgc21hbGwgaW4gc2l6ZSBjb21wYXJlZCB0byB0aGUgYWR1bHQgc3RvYW1jaCAtIFBIWVNJT0xPR0lDQUwgRkVBVVRSRVMgLi4gdGhlIGFjdCBvZiBzd2FsbG9pbmcgaXMgbm90IGZ1bGx5IGNvb3JkaW5hdGVkIGluIGluZmFudHMgLCBhbmQgdGhleSBtYXkgc3dhbGxvdyBhaXIgYWxvbmcgd2l0aCB0aGVpciBmZWVkcyAtIElORkFOVFMgTUFZIFNQRU5EIE1PUkUgVElNRSBJTiBBIHN1cGluZSBbIGxpdmluZyBkb3duIF0gcG9zaXRpb24gYW5kIHRoaXMgLCBjb2JpbmVkIGl0aCB0aGUgaW1tYXR1cmUgTEVTICwgQ09OVFJJQlVURSBUTyBUSEVMSUtFSE9PRCBPRiBSRUdSVVRBVElPTiAtIFRIRSBNVVNDTEUgVE9ORSBvZiB0aGUgc3RvbWNoIGFuZCBlc29waGFnZXVzIGlzIG5vdCBmdWxseSBkZXZlbG9wZWQgLCBtYWtpbmcgaXQnc2Vhc2llciBmb3Igc3RvYW1jaCBjb250ZW50cyB0byBmbG93IGJhY2sgaW50byB0aGUgZXNvcGhhZ2V1cyAtIENMSU5JQ0FMIENPTlNJREVSQVRJT05TIC0gQVMgTE9ORydTIEFTIFRIRSBDSElMRCBJUyBUSFJJVklORyAsIEdBSU5OSU5HICwgd2VpZ2h0IGFwcG9yaXBhdGVseXkgJ2FuZCB0aGVyZSBhcmUgbm8gc2lnbnMgb2YgZGlzY29tZm9yeXQgb3IgZGlzdHJlc3MgLCByZWdydXRhdGlvbnMgaXMgZ2VuZXJhbGx5ICwgY29uc2lkZXJlZCBub3JtYWwgLSBQRURJQVRSQUlDSUFOIE9GVEVOIFJFU1NBVVJFIFBBUkVOVFMgVEhBVCBSRUdSVUlUQVRJT05TIFRFTkRTIFRPIGFiaWxpdHkgdG8gcmVzcG9uc2Ugd2FzIHJldmVsYXZlZCBIT1JJWk9OVEFMIFBPU0lUSU9OIE9GIFRIRSBJTkZBTlQgLSBJTkZBTlRTIFNQRUVEIE1PU1QgT0YgVEhFSVJTIFRJTUUgTFlJTkcgRE9XTiAsIFdISUNIIFJFRFVDRVMgVEhFIEVGRkVDVCBPRiBHUkFWSVRZIE9OIFRIRSBTVE9NQUNIIENPTlRFTlRTICwgSU5DUkVBU0lORyBUSEUgUkVHUlVSR0FUSU9OIC4uLiAnJyBTTUFMTCBTVE9NQUNIIENBUEFDSVRZIC4uLiBBIE5FV0JPUk1OUyBTVE9NQUNIIEhBUyBBIFZFUlkgU01BTEwgVk9MVU1FIFsgQVBQUk9YIDMwLSA5MCBtbF0gLi4uIGl0cyBmaWxscyBxdWlja2x5IGR1cmluZyBmZWRkcyAsIGFuZCBhbnkgc2xpZ2h0eSAtIGluY3JlYXNlcyBpbiBwcmVzc3VyZSBjYW4gcHVzaCBiYWNrIGludG8gZXNvcGhhZ3VzIC4uLi4gJydzaG9ydGVyIGVzb3BoYWd1cyAuLi4uIHRoZSBlc3BvaGFndXMgaW5mYW50cyBpcyBzaG9ydGVyIGNvbXBhcmVkIHRvIGFkdWx0cyAuLi4uIHRoamUgc2hvcnRlciBsZW5ndGggYWxsb3dzIHN0b21hY2ggLi4uLiBjb250ZW50cyByZWZsdXggbW9yZSBlYXNpbHkgLi4uICcnIGZyZXF1ZW50bHkgZmVkZGluZyAuLi4gWyBzbWFsbCBmcmVxdWVudCBtZWxhcyAsIF0ga2VlcHMgdGhlIHN0b21hY2ggZnVsbHMgZm9yIGxvbmdlciBwZXJpb2RzICwgaW5jcmVhc2luZyB0aGUgY2huYWNlIG9mIHJlZ3J1dGF0aW9ucyAuLi4nJyBsaXF1aWQgZGlldCAuLi4uIGJyZWFzdCBtaWxrIGZvcm11bGEgaXMgbGlxdWlkICwgbWFraW5nIGl0cyBlYXNpZSB0byBmbG93IGJhY2sgaW50byBvZXNvcGhhZ3VzIC4uLi4uIHJlYXNzdXJhbmNlIHRvIHBhcmVudHMgLi4uLi4gcmVncnVpdGF0aW9ubiBpcyBjb21tb24gYW5kIG5vcm1hbCBhdCB0aGlzIGFnZSAuLi4gc2ltcGxlIG1lYXN1cmVzIGxpa2UgbGtlZXBpbmcgdGhlIGJhYnkgdXByaWdodCBhZnRlcnMgZmVlZHMgLCBhdm9pZGluZyBvdmVyZmVkZGluZyBhbmQgYnVycGluZyB0aGUgYmFieSBjYW4gaGVscCByZWR1Y2UgcmVncnVpdGF0aW9uIC4uLi4uIGlmIHRoZSBjaGlsZCdzIGlzIG90aGVyd2lzZSB0aHJpdmluZyBhbmQgdGhlcmUgYXJlIG5vIHNpZ25zIG9mIHBhdGhvbG9neSAsIG5vIGludGVydmF0aW9uIGlzIG5lZGVkIC4uLi4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5192" table:style-name="ce1">
            <text:p>915192</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3RgdKx0YDQsNKbOiAxMiDQttCw0YHRgtCwINCx0LDQu9Cw0LvQsNGA0LTRi9KjINCw0YHSm9Cw0LfQsNC9LdGW0Ygg0LHTqdC70ZbQvNGWINC20LXRgtC60ZbQu9GW0LrRgtGWINC00LDQvNC40YLRi9C9INCx0L7Qu9GL0L8g0LrQtdC70LXQtNGLLiDQkNGD0YvRgNGB0YvQvdGDINGB0LXQt9GL0LzQtNC10YDRiyDRjdC/0LjQs9Cw0YHRgtGA0LjQuSDQsNC50LzQsNKT0YvQvdC00LAg0LHQvtC70YvQvyDQttCw0YLRi9GALCDRltGI0ZYg0L/QsNC70YzQv9Cw0YbQuNGP0LTQsCDQttKx0LzRgdCw0psg0LbTmdC90LUg0YLQtdGA0ZbRgdGW0L3RltKjINCw0pvRiNGL0Lsg0LHQvtC70YPRi9C9INCx0LDQudKb0LDQudC80YvQtywg0YLRltC70ZYg0LDSm9GI0YvQu9C80LXQvSDTqdKj0LXQt9C00LXQvdCz0LXQvS4g0J3QsNGD0pvQsNGB0YLRi9KjINCx0LDRgdGC0Ysg0YjQsNKT0YvQvNGLINCw0Ygg0pvQsNGA0YvQvdC00LAg0ZbRiNGW0L3RltKjINCw0YPRi9GA0YHRi9C90YPRiywg0pvRi9C20YvQu9C00LDRg9GLINC205nQvdC1INC20LDQu9C/0Ysg05nQu9GB0ZbQt9C00ZbQutC/0LXQvSDQutC10LvRltC/INGC0rHRgC4g0JHSsdC7INC90LDRg9Kb0LDRgdKb0Ysg0LHRltC3INC10qMg0LDQu9C00YvQvNC10L0g0pvQsNC9INGC0LDQu9C00LDRg9GL0L3QsCjQsdC40L7RhdC40LzQuNGP0YHRi9C90LApLCDQt9OZ0YAg0YLQsNC70LTQsNGD0YvQvdCwINC20ZbQsdC10YDQtdC80ZbQty4g0J3QsNKb0YLRi9GA0LDSmyDQsNC50YLSm9Cw0L3QtNCwINKb0LDQvSDRgtCw0LvQtNCw0YPRi9C90LTQsNKT0Ysg0LPQtdC80L7Qs9C70L7QsdC40L3RltC9LCDQsdC40LvQuNGA0YPQsdC40L0o0LbQsNC70L/RiyDQttOZ0L3QtSDQttCw0LvQv9GLINC10LzQtdGBKSwg0pvQsNC9INC20LDRgdGD0YjQsNC70LDRgNGL0L0sINKb0LDQvdGC0YLRi9KjINC00LXSo9Cz0LXQudGW0L0sINGP0pPQvdC4INCz0LvRjtC60L7Qt9CwLCDQt9OZ0YAg0pvRi9GI0pvRi9C70YvQvdGL0qMg0YLQsNC70LTQsNGD0LvQsNGA0YvQvSDQsdCw0pPQsNC70LDRgyDQutC10YDQtdC6LiDQodC10LHQtdCx0ZYgMTIg0LbQsNGB0LDRgCDSm9GL0Lcg0LHQsNC70LDRgdGL0L3QtNCwINGF0L7Qu9C40YHRhtC40YHRgtC40YIg0LHQvtC70YMg0LzSr9C80LrRltC90LTRltCz0ZYg0LHQsNGAINC90LXQvNC10YHQtSDTqdGCINC20L7Qu9C00LDRgNGL0L3Ri9KjINGC0L7Qu9GD0Ysg0LHQvtC70YPRiyDQvNKv0LzQutGW0L0u0JTQuNCw0LPQvdC+0LfQtNGLINC90LDSm9GC0YvQu9Cw0YMg0q/RiNGW0L0g0YLQsNC70LTQsNGD0LvQsNGAINC20q/RgNCz0ZbQt9GDINC60LXRgNC10LouINKa0L7RgdGL0LzRiNCwINGC0LDQvNCw0pvRgtCw0L3RgyDRgtOZ0YDRgtGW0LHRltC9LCDQttC40ZbQu9GW0LPRltC9INGB0rHRgNCw0YPRi9C80YvQtyDQutC10YDQtdC6LiDQldCz0LXRgCDSr9C90LXQvNGWINC30LjRj9C90LTRiyDRgtCw0pPQsNC80LTQsNGA0LzQtdC9INGC0LDQvNCw0pvRgtCw0L3QsNGC0YvQvSDQsdC+0LvRgdCwINC90LUg0YPQsNKb0YvRgtGL0LvRiyDRgtCw0LzQsNKb0YLQsNC90LHQsNGB0LAg0LbTmdC90LUg0LrQtdGIINGD0LDSm9GL0YLRgtCwINGC0LDQvNCw0pvRgtCw0L3Ri9GD0YvQvdGL0qMg0LHQsNGA0LvRi9KT0Ysg0LzQsNKj0YvQt9C00Ysg0LHQvtC70LDQtNGLLiDQltOZ0L3QtSDQtNC1INC90LDRg9Kb0LDRgdGC0LDQvSDQo9CU0Jcg0YLQsNC70LTQsNGD0LvQsNGA0YvQvdCw0L0g0LHQsNGD0YvRgCwg0rHQudKb0Ysg0LHQtdC3INCw0LnQvNCw0pPRi9C9INGB0L3QuNC80L7QuiDQttCw0YHQsNGC0YPRi9C9INGB0rHRgNCw0LnQvNGL0LcuINOo0LzRltGAINCw0L3QsNC80L3QtdC30ZbQvSwg0LDRgtCwLdCw0L3QsNGB0YvQvdGL0qMg0LDRg9GA0YPQu9Cw0YDRi9C90LAg0LTQsCDQvNOZ0L0g0LHQtdGA0YMg0LrQtdGA0LXQui4gMTIg0LXQu9GWINGW0YjQtdC60YLRliDQv9Cw0LvRjNC/0LDRhtC40Y/Qu9Cw0L8g0LHQsNKb0YvQu9Cw0LnQvNGL0LcsINC10LPQtdGAINCw0YPRi9GA0YHRi9C90YMg0YHQtdC30ZbQvNC00LXRgNGWINCx0L7Qu9GB0LAg0L7QvdGLINC00LAg0YLQtdC60YHQtdGA0YMg0LrQtdGA0LXQui4g0KLQsNC70LTQsNGD0pPQsCDQvdOZ0LbRltGBINC80LDRgdGB0LDRgdGL0L0g0LbRltCx0LXRgNC10LzRltC3LiDQr9KT0L3QuCDQvdCw0pvRgtGL0LvQsNC5INC60LXRgtGB0LXQuiDQvNGL0L3QsCDQt9C10YDRgtGC0LXRg9C70LXRgDog0LbQsNC70L/RiyDSm9Cw0L0g0LDQvdCw0LvQuNC30ZY7INCx0LDRg9GL0YAsINKx0LnSm9GLINCx0LXQtyDSm9GL0LfQvNC10YLRgtC10YDRltC9INCx0LDSm9GL0LvQsNGDOyDQt9OZ0YAg0LDQvdCw0LvQuNC30ZY7INCx0q/QudGA0LXQuiDSm9GL0LfQvNC10YLRltC9INCx0LDSk9Cw0LvQsNGDINKv0YjRltC9INC60LDQv9C/0L7Qs9GA0LDQvNC80LA7INKb0rHRgNGB0LDSmyDSm9GD0YvRgdGL0L3Ri9KjINGA0LXQvdGC0LPQtdC90L7Qs9GA0LDQvNC80LDRgdGLINC80LXQvSDQo9CX0JQg0YLQsNC70LTQsNGD0LvQsNGA0Ys7INKb0L7RgdGL0LzRiNCwINGC0LXQutGB0LXRgNGDINGA0LXRgtGW0L3QtNC1INCw0YHSm9Cw0LfQsNC90L3Ri9KjINKb0YvRiNKb0YvQu9C00YvSmy3RgdGW0LvRgtGW0LvRltC6INC00LXSo9Cz0LXQudGW0L0sINCx0LjQvtC/0YHQuNGP0YHRi9C9INCw0LvRg9KT0LAg0LHQvtC70LDQtNGLINCx0rHQuyDQsNGB0pvQsNC30LDQvdC00LAg0YXQtdC70LjQutC+0LHQsNC60YLQtdGAINC/0LjQu9C+0YDQuCDQtNC10qPQs9C10LnRltC9INCx0LDSk9Cw0LvQsNGDINKv0YjRltC9INC60LXRgNC10LouINCR0rHQuyDRgtCw0LvQtNCw0YPQu9Cw0YAg0LDRgNKb0YvQu9GLINCw0YPRgNGD0LTRi9KjINC00LjQsNCz0L3QvtC30YvQvSDQvdCw0pvRgtGL0LvQsNGD0pPQsCDQsdC+0LvQsNC00Ysg0LbTmdC90LUg0L3QtdC70ZbQutGC0LXQvSDQsNGD0YvRgNGB0YvQvdGD0LvQsNGAINC80LDQt9Cw0LvQsNGD0YvQvSDQsNC90YvSm9GC0LDQudC80YvQty4gICAgICAgICAgICAgICAgICAgICAgICAgICAgICAgICAgICAgICAgICAgICAgICAgICAgICAgICAgICAgICAgICAgICAgICAgICAgICAgICAgICAgICAgICAgICAgICAgICAgICAgICAgICAgICAgICAgICAgICAgICAgICAgICAgMi3RgdKx0YDQsNKbOiA2INCw0LnQu9GL0psg0LHQsNC70LAg0YLQtdC80L/QtdGA0LDRgtGD0YDQsNGB0YsgMzYsNiDQoSDQvdC+0YDQvNCw0LTQsCwg0YLRi9C90YvRgSDQsNC70YMg0LbQuNGW0LvRltCz0ZYgMzAg0LzQuNC90YPRgtGL0L3QsCA2INCw0LnQu9GL0psg0LHQsNC70LDSk9CwINKb0LDQu9GL0L/RgtGLINCx0L7Qu9GL0L8g0YLQsNCx0YvQu9Cw0LTRiy4g0JrQtdGD0LTQtSDSm9GD0YvRgdGLINGG0LjQu9C40L3QtNGAINGC05nRgNGW0LfQtNGWINCx0L7Qu9GL0YPRiyDQvdC+0YDQvNCwINCx0L7Qu9GL0L8g0LXRgdC10L/RgtC10LvQtdC00ZYuINCh0LXQsdC10LHRliA2INCw0LnQtNCwINCx0LDQu9Cw0LvQsNGA0LTRi9KjINOp0LrQv9C10YHRliwg0pvQsNCx0YvRgNKT0LAg0YHSr9C50LXQutGC0LXRgNGWINGC0L7Qu9GL0psg0LbQtdGC0ZbQu9C80LXQs9C10L3QvdC10L0g0LHQvtC70LDQtNGLLiDQn9C10YDQutGD0YHRgdC40Y8g0LrQtdC30ZbQvdC00LUg0LDRiNGL0psg06nQutC/0LXQu9GW0Log0LTRi9Cx0YvRgSDQtdGB0YLRltC70LXQtNGWLiDQkNC7INCw0YPRgdC60YPQu9GM0YLQsNGG0LjRjyDQutC10LfRltC90LTQtSDTmdC70YHRltGA0LXQs9C10L0g0LLQtdC30LjQutGD0LvRj9GA0LvRiyDQtNGL0LHRi9GBINGI0YvSk9Cw0LTRiy4g0J7Qu9Cw0YDQtNGL0qMg0YLRi9C90YvRgdGLINC20LjRliDQsdC+0LvQsNC00YsuINCe0Lsg0pvSsdGA0YvQu9GL0LzQtNGL0psg0LXRgNC10LrRiNC10LvRltC60YLQtdGA0ZbQvdC1INCx0LDQudC70LDQvdGL0YHRgtGLLiDQotGL0L3Ri9GBINCw0LvRg9GLINGB0LjQvNC80LXRgtGA0LjRj9C70Ysg0LbTmdC90LUg0LHTmdGA0LrQtdC70LrRliDRgtGL0L3Ri9GBINCw0LvRg9KT0LAg0pvQsNGC0YvRgdCw0LTRiy4g0JrQtdGD0LTQtSDRgtKx0YHRiyDRgdC10YDQv9GW0LzQtNGWINCx0L7Qu9GL0L8g0LrQtdC70LXQtNGWLiDQotGL0L3Ri9GBINCw0LvRgyDQutC10LfRltC90LTQtSDQtNGW0YDRltC70LTQtdGAINCx0LDQudKb0LDRg9KT0LAg0LHQvtC70LDQtNGLLtCe0L3Ri9KjINC00ZbRgNGW0LvQtNC10YDRliDTqdC60L/QtSDQttC+0LvQtNCw0YDRi9C90YvSoyDRgtC+0LvRi9KbINC00LDQvNGL0LzQsNKT0LDQvdGL0L3QsNC9INC/0LDQudC00LAg0LHQvtC70LDQtNGLLiDQltOZ0L3QtSDQtNC1INC905nRgNC10YHRgtC10LvQtdGA0LTQtSDTqdC60L/QtdGB0ZYg0YLQvtC70YvSmyDQtNCw0LzRi9C80LDSk9Cw0L3QvdCw0L0g0LrQvtC90YHQuNGB0YLQtdC90YbQuNGP0YHRiyDRgtGL0pPRi9C3INC205nQvdC1INOp0LvRiNC10LzRliDQutGW0YjRliDQsdC+0LvRi9C/INC60LXQu9C10LTRli4g06jRgdC1INC60LXQu9C1INKb0LDQu9GL0L/RgtGLINGE0L7RgNC80LDSk9CwINC40LUg0LHQvtC70LDQtNGLLiDQltCw0LvQv9GLINCx0LDQu9Cw0L3Ri9KjINC20LDSk9C00LDQudGLINKb0LDQu9GL0L/RgtGLINC00LXQvyDQsNC50YLRg9KT0LAg0LHQvtC70LDQtNGLLiDQltOZ0L3QtSDQsdCw0LvQsNC70LDRgNC00LAg0YLRi9C90YvRgdGC0YvSmyDRiNGD0LzQtNCw0YAg0LHQvtC70YPRiyDQvNKv0LzQutGW0L0g0LbTmdC90LUg0YLRi9C90YvRgSDQsNC70YMg0YvRgNKT0LDSk9GL0L3QsCDQsdCw0LnQu9Cw0L3Ri9GB0YLRiyDQtNCwINC606nQv9GC0LXQs9C10L0g0L/QsNGC0L7Qu9C+0LPQuNGP0LvRi9KbINC20LDSk9C00LDQudC70LDRgCDQsdCw0YAuINCi0YvQvdGL0YEg0LDQu9GD0YvQvdGL0qMg0LbQuNGW0LvRltCz0ZYsINGA0LXRgtGC0ZbQu9GW0LPRliDQttOZ0L3QtSDRgtGL0L3Ri9GB0YLRiyDSm9Cw0L3RiNCw0LvRi9Kb0YLRiyDSsdGB0YLQsNC/INGC0rHRgNGD0Ysg0LzQsNKj0YvQt9C00Ysg0LHQvtC70YvQvyDQutC10LvQtdC00ZYuINCR0rHQvdC00LDQuSDRgdC40LzQv9GC0L7QvNC00LDRgCDQutOp0LHRltC90LUg0L3TmdGA0LXRgdGC0LXQu9C10YDQtNGW0qMg0LDQu9KT0LDRiNKb0Ysg0LDQudC70LDRgNGL0L3QtNCwINCx0LDSm9GL0LvQsNC90LDQtNGLINC205nQvdC1INC+0Lsg0pvQsNC70YvQv9GC0YssINGB0LXQsdC10LHRliDSm9Kx0YDRgdCw0psg0pvRg9GL0YHRi9C90LDQvSDRiNGL0pvSm9Cw0L3RgdC+0qMg0YHRi9GA0YLSm9GLINC+0YDRgtCw0pPQsCDQsdC10LnRltC80LTQtdC70YMg0LrQtdC30LXSo9C00LXRgNGWINC20q/RgNC10YLRltC9INCx0L7Qu9Cw0LTRiy4g0prQsNC70YvQv9GC0Ysg0LbQsNKT0LTQsNC50LTQsCDQsdKx0L3QtNCw0Lkg0YHQuNC80L/RgtC+0LzQtNCw0YAg0LHRltGA0L3QtdGI0LUg0LDQuSDTqdGC0LrQtdC90L3QvdC10L0g0YHQvtKjINOp0LfQtNGW0LPRltC80LXQvSDQttC+0LnRi9C70YvQvyDQutC10YLQtdC00ZYuINCQ0Lsg0LXQs9C10YAg0YHQvtC7INCx0LXQu9Cz0ZbQu9C10YAg0pvQsNC70LDRgtGL0L0g0LHQvtC70YHQsCDQtNOZ0YDRltCz0LXRgCDQutOp0LzQtdCz0ZbQvdC1INC20q/Qs9GW0L3RgyDQutC10YDQtdC6LiDQndOZ0YDQtdGB0YLQtdC90ZbSoyDQsNC70pPQsNGI0pvRiyDQttCw0YDRgtGLINC20LDQu9C00YvSk9GL0L3QtNCwINC60LXQuSDQttKv0LnQtdC70LXRgNC00ZbSoyDSm9Cw0LvRg9GLINCx0LDQudKb0LDQu9GD0Ysg0LzSr9C80LrRltC9LCDRgdC10LHQtdCx0ZYg0L7QvdGL0qMg0LHQsNGA0LvRi9KT0Ysg0YHRi9GA0YLSm9GLINGE0LDQutGC0L7RgNC70LDRgNC00YvSoyDTmdGB0LXRgNGW0L3QtdC9INCx0L7Qu9Cw0LTRiy4g0JHQtdC50ZbQvNC00LXQu9GDINOp0YLQutC10L0g0YHQvtKjINKb0LDQu9GL0L/RgtGLINC20LDSk9C00LDQudKT0LAg0LDRg9GL0YHQsNC00YsuI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7" table:style-name="ce1">
            <text:p>915337</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4g0J3QtdCz0ZbQt9GWINCw0Ygg0pvQsNGA0YvQvdC00LAg0LHQvtC70LDRgtGL0L0g0LDRg9GL0YDRgdGL0L3RgyDRgdC10LfRltC80ZYg0LDRgdKb0LDQt9Cw0L0g0L3QtdC80LXRgdC1INC+0L0g0LXQutGWINGW0YjQtdC60YLRltKjINC+0LnRi9KbINC20LDRgNCw0YHRiyDQsNGD0YDRg9C70LDRgNGL0L3QsCDQutKv0LTRltC6INGC0YPQtNGL0YDQsNC00YsuINCQ0Lsg0YLQtdGA0ZbRgdGWINCw0pvRiNGL0Lsg0YLSr9GB0YLRliDQsdC+0LvRg9GLINC205nQvdC1INOZ0LvRgdGW0LfQtNGW0Log0YLQtdC80ZbRgCDRgtCw0L/RiNGL0LvRi9KT0YvQvdGL0qMg0YHQtdCx0LXQsdGWINCx0L7Qu9GD0Ysg0YvSm9GC0LjQvNCw0LsuINCh0LXQsdC10LHRliDQsNGB0pvQsNC30LDQvSDRltGI0LXQutGC0ZbSoyDQttC+0LvQtNCw0YDRi9C90YvSoyDQvtC50YvSmyDQttCw0YDQsNGB0Ysg0LrQtdC30ZbQvdC00LUg0LDQvdC10LzQuNGPINC00LDQvNGD0Ysg0LzSr9C80LrRltC9LiDQl9C10YDRgtGC0LXRgyDTmdC00ZbRgdGC0LXRgNGW0L3QtSDQutC10LvQtdGC0ZbQvSDQsdC+0LvRgdCw0psg0LXSoyDQsNC70LTRi9C80LXQvSDQkNCG0JYg0Y3QvdC00L7RgdC60L7Qv9C40Y/Qu9GL0psg0LfQtdGA0YLRgtC10YMg0LbSr9GA0LPRltC30ZbQu9C10LTRli4g0K/Sk9C90Lgg0KTQk9CU0KEg0LDRgNKb0YvQu9GLINCw0YHSm9Cw0LfQsNC90L3Ri9KjINGI0YvRgNGL0YjRgtGLINKb0LDQsdCw0YLRi9C90LAg0LfQtdGA0YLRgtC10YMg0LbSr9GA0LPRltC30LXQvNGW0LcuINCR0rHQuyDTmdC00ZbRgSDQsNGA0pvRi9C70Ysg0LDRgdKb0LDQt9Cw0L0g0L7QudGL0psg0LbQsNGA0LDQu9Cw0YDRiywg0Y/Qt9Cy0LDQvdGLINCw0L3Ri9Kb0YLQsNC5INCw0LvQsNC80YvQty4g0JbQsNC70L/RiyDSm9Cw0L0g0LDQvdCw0LvQuNC30ZYs0pvQsNC9INCx0LjQvtGF0LjQvNC40Y/RgdGLINC205nQvdC1INC20LDQu9C/0Ysg0LfTmdGAINCw0L3QsNC70LjQt9C00LXRgNGW0L0g0LDQu9Cw0LzRi9C3LiDQltCw0LvQv9GLINKb0LDQvSDQsNC90LDQu9C40LfRltC90LTQtSDQs9C10LzQvtCz0LvQsNCx0LjQvdC90ZbSoywg0Y3RgNC40YLRgNC+0YbQuNGC0YLQtdGA0LTRltKjINC806nQu9GI0LXRgNGW0L3QtSzQv9C+0LnQutC40LvQvtGG0LjRgtC+0Lcg0LbTmdC90LUg0LDQvdC60LjQu9C+0YbQuNGC0L7Qt9KT0LAg0LrTqdKj0ZbQuyDQsNGD0LTQsNGA0LDQvNGL0LcuINCv0pPQvdC4LCDQsdGW0Lcg0pvQvtC50pPQsNC9INCz0LjQv9C+0YLQtdC30LAg0LHQvtC50YvQvdGI0LAg0LDQvdC10LzQuNGP0L3Ri9KjINCx0LDRgCDQttC+0pPRi9C9LCDQsdCw0YAg0LHQvtC70YHQsCDQtNOZ0YDQtdC20LXRgdGW0L0g0LDQvdGL0pvRgtCw0LnQvNGL0LcuINKa0LDQvSDQsdC40L7RhdC40LzQuNGP0YHRi9C90LDQvSDQsNGB0pvQsNC30LDQvSDRltGI0LXQuiDQttC+0LvQtNCw0YDRiyDQvNC10L0g0LHQsNGD0YvRgCDSm9GL0LfQvNC10YLRltC9INCx0LDSk9Cw0LvQsNC50LzRi9C3KEFMVC5BU1QsINCx0LjQu9C40YDRg9Cx0LjQvSku0prQsNC90LTQsNKT0Ysg0YTQtdGA0YDQuNGC0LjQvSDQvNC10L0g0YLQtdC80ZbRgCDQtNC10qPQs9C10LnRltC9INCw0L3Ri9Kb0YLQsNC50LzRi9C3LiAo0JDQvdC10LzQuNGP0L3RiyDQsNC90YvSm9GC0LDRgyDQvNCw0pvRgdCw0YLRi9C90LTQsCkuICDQl9OZ0YAg0LDQvdCw0LvQuNC30ZbQvdC10L0g0LHSr9C50YDQtdC6INC205nQvdC1INC90LXRgdC10L8g0YjRi9KT0LDRgNGDINC20L7Qu9C00LDRgNGL0L3Ri9KjINC20LDSk9C00LDQudGL0L0g0YLQtdC60YHQtdGA0LXQvNGW0LcuINCh0L7QvdGL0LzQtdC9INKb0LDRgtCw0YAsINC+0YHRiyDQvtC50YvSmyDQttCw0YDQsCDQsNGD0YDRg9C70LDRgNGLINC80LXQvSDQs9Cw0YHRgtGA0LjRgtGC0ZbSoyDRgdC10LHQtdCx0ZYg0LHQvtC70YMg0YvSm9GC0LjQvNCw0LvQtNGL0LvRi9KT0Ysg0LHQsNGAIEhlbGljb2JhY3RlcmkgcHlsb3JpLdCz0LUg0YHRi9C90LDQvNCwINC20LDRgdCw0LnQvNGL0Lco0pvQsNC9INC90LXQvNC10YHQtSDQvdOZ0LbRltGBINCw0YDSm9GL0LvRiykuINCa0LDQv9GA0L7Qu9C+0LPQuNGP0LvRi9KbINC30LXRgNGC0YLQtdGD0LvQtdGALCDQttOZ0L3QtSDQvdOZ0LbRltGB0YLRliDRgtC10LrRgdC10YDRgy4g0J3TmdC20ZbRgdGC0ZbSoyDSm9Kx0YDQsNC80YvQvdC00LAg0pvQsNC9INC90LXQvNC10YHQtSDSm9Kx0YDRgtGC0LDRgNC00Ysg0LDQvdGL0pvRgtCw0YMg0q/RiNGW0L0uINCR0LXQudC90LXQu9C10YMg0YHRi9C90LDQvNCw0LvQsNGA0Ysg0ZbRiCDSm9GD0YvRgdGLINCw0pPQt9Cw0LvQsNGA0YvQvSDQstC40LfRg9Cw0LvQtNGLINC606nRgNGDINC80LDSm9GB0LDRgtGL0L3QtNCwINC20LDRgdCw0LvQsNC00YsuINCR0rHQuyDQttCw0pPQtNCw0LnQtNCwINCj0JTQlyDQvdC10LzQtdGB0LUg0JrQoiDTmdC00ZbRgdGC0LXRgNGW0L0g0pvQvtC70LTQsNC90pPQsNC90YvQvNGL0Lcg0LbTqdC9LiAgICAgICAgICAgICAgICAgICAgICAgICAgICAgICAgICAgICAgICAgICAgICAgICAgICAgICAgICAgICAgICAgICAgICAgICAgICAgICAgICAgICAgICAgICAgICAgICAgICAgICAgICAgICAgICAgICAgICAgICAgIDIuINCh0LjQv9Cw0YLRgtCw0LzQsNKT0LAg0YHSr9C50LXQvdC10YLRltC9INCx0L7Qu9GB0LDSmyDQsdCw0LvQsNC90YvSoyDQttCw0pPQtNCw0LnRiyDTqdC3INC20LDRgdGL0L3QsCDSm9Cw0LvRi9C/0YLRiy4g0JHQsNC70LAg06nQvNGW0YDRltC90ZbSoyDQsNC70pPQsNGI0pvRiyDQttGL0LvRi9C90LTQsCDRgdC+0L3Ri9C00pvRgtCw0L0g0KLQliDQtdGA0LXRgdC10LrRgtC10YDQtNC10L0g0LbQuNGWINCx0L7Qu9Cw0LTRiy4g0JrQldGD0LTQtSDSm9GD0YvRgdGLINCw0L3QsNGC0L7QvNC40Y/Qu9GL0psg0LXRgNC10LrRiNC10LvRltCz0ZYg0LHQvtC50YvQvdGI0LAg0YbQuNC70LjQvdC00YAg0L/RltGI0ZbQvdC00ZYg0L3QtdC80LXRgdC1INCx06nRiNC60LUg0YLTmdGA0ZbQt9C00ZYg0LHQvtC70YvQvyDRgdCw0L3QsNC70LDQtNGLLiDQn9C10YDQutGD0YHRgdC40Y8g0LrQtdC30ZbQvdC00LUg0YHQsNGDINCx0LDQu9Cw0LTQsCDQsNGI0YvSmyDTqdC60L/QtdC70ZbQuiDQtNGL0LHRi9GBINC10YHRgtGW0LvQtdC00ZYu0KLRi9C90YvRgSDQsNC70YPRiyDRgdC40LzQvNC10YLRgNC40Y/Qu9GLLCDRj9KT0L3QuCDQv9Cw0YLQvtC70L7Qs9C40Y8g0LrTqdGA0ZbQvdCx0LXQudC00ZYuICDQkdGW0YDQsNKbINC90LDSm9GC0Ysg06nQutC/0LXQvdGW0qMg0LbQsNKT0LTQsNC50YvQvSDRgtC10LrRgdC10YDRgyDQvNCw0pvRgdCw0YLRi9C90LTQsCDTqdC60L/QtSDQsNGD0YHQutGD0LvRjNGC0LDRhtC40Y/RgdGLINC20q/RgNCz0ZbQt9GW0LvQtdC00ZYuINCe0Lsg0LDRgNKb0YvQu9GLINC/0L3QtdCy0LzQvtC90LjRjyDQttOZ0L3QtSDQsdGA0L7QvdGF0LjRgiDRgdC40Y/Sm9GC0Ysg06nQutC/0LXQvdGW0qMg0LDRg9GA0YPQu9Cw0YDRi9C9INCw0L3Ri9Kb0YLQsNC5INCw0LvQsNC80YvQty4g0J3TmdGA0LXRgdGC0LXQu9C10YDQtNC1INOp0LzRltGA0ZbQvdGW0qMgINCw0LvSk9Cw0YjSm9GLINC20LDRgNGC0YvQttGL0LvQtNGL0pPRi9C90LTQsCDTmdC70YHRltGA0LXQs9C10L0g0LLQtdC30LjQutGD0LvRj9GA0LvRiyDRgtGL0L3Ri9GBINC10YHRgtGW0LvQtdC00ZYu0JLQtdC30LjQutGD0LvRj9GA0LvRiyDRgtGL0L3Ri9GBLSDQttKx0LzRgdCw0pssINCx0ZbRgNKb0LDQu9C/0YLRiyDQttOZ0L3QtSDRgtGL0L3Ri9GBINCw0LvRg9GL0LTSoyDQsdCw0YDQu9GL0psg0YTQsNC30LDRgdGL0L3QtNCwINC10YHRgtGW0LvQtdC00ZYuINCR0ZbRgNCw0psg0YLRi9C90YvRgSDQsNC70YMg0YLRi9C90YvRgSDRiNGL0pPQsNGA0YPSk9CwINKb0LDRgNCw0pPQsNC90LTQsCDSm9GL0YHSm9CwINC205nQvdC1INOZ0LvRgdGW0Lcg0LHQvtC70LDQtNGLLiDQotGL0L3Ri9GBINCw0LvRg9GLINGB0LjQvNC80LXRgtGA0LjRj9C70Ysg0LbTmdC90LUg0YLSsdGA0LDSm9GC0Ysg0LHQvtC70YPRiyDSm9Cw0LbQtdGCLiDQldCz0LXRgCDQsNGD0YHQutGD0LvRgtCw0YbQuNGPINC60LXQt9GW0L3QtNC1INGB0YvRgNGL0LvQtNCw0YAg0L3QtdC80LXRgdC1INCx0LDRgdKb0LAg06nQt9Cz0LXRgNGW0YHRgtC10YAg0LXRgdGC0LXQu9GB0LUg0LHSsdC7INGA0LXRgdC/0LjRgNCw0YLQvtGA0LvRi9KbINCw0YPRgNGD0LvQsNGA0pPQsCDQvdC10LPRltC3INCx0L7Qu9CwINCw0LvQsNC00YsuIDxiciAvPg0K0JHRltGA0LDSmyDQsdC10YDRltC70LPQtdC9INGB0LjQv9Cw0YLRgtCw0LzQsNKT0LAg0YHSr9C50LXQvdGB0LXQuiwg0LHQsNC70LDQtNCwINC10YjSm9Cw0L3QtNCw0Lkg0L/QsNGC0L7Qu9C+0LPQuNGP0LvRi9KbINCw0YPRgNGD0LvQsNGAINC20L7SmyDQtNC10L8g0LDQudGC0LAg0LDQu9Cw0LzRi9C3LiA=</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38" table:style-name="ce1">
            <text:p>915338</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7QodKw0KDQkNKaINC20LDRg9Cw0LHRiy4g0J3QtdCz0ZbQt9GW0L3QtdC9INCw0Ygg0pvQsNGA0YvQvdKT0LAg0LHQvtC70LDRgtGL0L0g0LDRg9GL0YDRgdGL0L3RgyDQttOZ0L3QtSDRgtCw0LzQsNKb0YLQsNC90pPQsNC9INGB0L7SoyDQttC10qPRltC70LTQtdGDICDQsdKx0Lsg0LrTqdCx0ZbQvdC10YHQtSAtINCw0YHSm9Cw0LfQsNC9INC90LXQvNC10YHQtSDQvtC9INC10LrRliDQtdC70ZYg0ZbRiNC10LrRgtGW0qMg0L7QudGL0psg0LbQsNGA0LAg0LDRg9GA0YPRi9C90YvSoyDQsdC10LvQs9GW0YHRliDQsdC+0LvRi9C/INGC0LDQsdGL0LvQsNC00YsuINCW05nQvdC1INC00LUg05nQu9GB0ZbQt9C00ZbQutC/0LXQvSDQsdCw0YEg0LDRg9GA0YPRiyDRgtC10LzRltGAINGC0LDQv9GI0YvQu9GL0pPRi9C80LXQvSDQsdCw0LnQu9Cw0L3Ri9GB0YLRiyDQsdC+0LvRg9GLINC80q/QvNC60ZbQvS4g0KHQtdCx0LXQsdGWINC+0LnRi9KbINC20LDRgNCwINC60LXQt9GW0L3QtNC1INCw0L3QtdC80LjRjyDQtNCw0LzRg9GLINC00LAg0YvSm9GC0LjQvNCw0LsuINCQ0Lsg0L3TmdC205nRgdGC0ZbSoyDQutC10LHRg9GWLCDQsNGB0pvQsNC30LDQvS3RltGI0LXQuiDQttC+0LvRi9C90YvSoyDSm9GL0LfQvNC10YLRltC90ZbSoyDQsdKx0LfRi9C70YPRiyDQvtC50YvSmyDQttCw0YDQsCDQsNGD0YDRg9GLINGE0L7QvdGL0L3QtNCwINC/0LDQudC00LAg0LHQvtC70YPRiyDQvNKv0LzQutGW0L0uINCV0L3QtNGWINKb0L7QudKT0LDQvSDQtNC40LDQs9C90L7Qt9C00Ysg0L3QsNKb0YLRi9C70LDRgyDSr9GI0ZbQvSDQutC10LvQtdGB0ZYg0LfQtdGA0YLRgtC10YMg05nQtNGW0YHRgtC10YDRltC9INC20q/RgNCz0ZbQt9C10LzRltC3LiDQkdGW0YDRltC90YjRltGB0ZYt0Y3Qt9C+0YTQsNCz0L7Qs9Cw0YHRgtGA0L7QtNGD0LDQtNC10L3QvtGB0LrQvtC/0LjRjyjQrdCT0JTQoSkg05nQtNGW0YHRltC9INKb0L7Qu9C00LDQvdCw0YLRi9C9INCx0L7Qu9Cw0LzRi9C3INC+0YHRiyDQsNGA0pvRi9C70Ysg0LDRgdKb0LDQt9Cw0L0t0ZbRiNC10Log0LbQvtC70YvQvdGL0qMg0LbTmdC90LUg0L7QvSDQtdC60ZYg0LXQu9GWINGW0YjQtdC60YLRltKjICDRiNGL0YDRi9GI0YLRiyDSm9Cw0LHQsNGC0YvQvSDQt9C10YDRgtGC0LXQudC80ZbQty4g0JbTmdC90LUgINC+0LnRi9KbINC20LDRgNCw0L3Ri9KjINCx0LDRgCAs0LbQvtKT0YvQvSDQsNC90YvSm9GC0LDQudC80YvQty7QntC90YvSoyDQvtGA0L3QsNC70LDRgdGD0Ysg0LzQtdC9INC606nQu9C10LzRltC9INCx0LDSk9Cw0LvQsNC50LzRi9C3LiDQmtC10LvQtdGB0ZYtINCl0LXQu9C40LrQvtCx0LDQutGC0LXRgCDQv9C40LvQvtGA0Lgg0LDQvdGL0pvRgtCw0YMg0LHQvtC70YvQvyDRgtCw0LHRi9C70LDQtNGLLiDQndC10LPRltC30LPRliDQsdKx0Lsg0LHQsNC60YLQtdGA0LjRjyDQvtC50YvSmyDQttCw0YDQsNC90Ysg0LDQvdGL0pvRgtCw0YPQtNGL0qMg0L3QtdCz0ZbQt9Cz0ZYg0LHRltGAINGB0LXQsdC10L/RgtC10YDRliDQsdC+0LvRi9C/INGC0LDQsdGL0LvQsNC00YsuINKu0YjRltC90YjRliAtINC20LDQu9C/0Ysg0pvQsNC9INCw0L3QsNC70LjQt9GWLCDQsdKx0Lsg0LDQvdC10LzQuNGPINCx0LXQu9Cz0ZbQu9C10YDRltC9INCw0L3Ri9Kb0YLQsNGDINKv0YjRltC9INKb0LDQttC10YIuINCc0YvRgdCw0LvSk9CwLCDQs9C10LzQvtCz0LvQvtCx0LjQvSwg0Y3RgNC40YLRgNC+0YbQuNGCINC806nQu9GI0LXRgNC70LXRgNGW0L0g0LDQvdGL0pvRgtCw0YMg0q/RiNGW0L0g0pvQsNC20LXRgiDQsdC+0LvQsNC00YsuINCh0L7QvdGL0LzQtdC9INKb0LDRgtCw0YAsINCw0L3QtdC80LjRjyDQvtC50YvSmyDQttCw0YDQsCDQutC10LfRltC90LTQtSAg0YHQvtC30YvQu9C80LDQu9GLINKb0LDQvSDQttC+0pPQsNC70YLRg9KT0LAg0LHQsNC50LvQsNC90YvRgdGC0Ysg0L/QsNC50LTQsCDQsdC+0LvRg9GLINC80q/QvNC60ZbQvSDQtdC60LXQvdGW0L0g0LDQudGC0LAg0LrQtdGC0LrQtdC90ZbQvNGW0Lcg0LbTqdC9LiDQotOp0YDRgtGW0L3RiNGW0LTQtdC9LSDQsdC40L7RhdC40LzQuNGP0LvRi9KbINKb0LDQvSDRgtCw0LvQtNCw0YPRiyAt0LbQsNC70L/RiyDQsdC10LvQvtC6LCDRgtC10LzRltGAINC00LXSo9Cz0LXQudGW0L0g0LDQvdGL0pvRgtCw0YMg0LbTmdC90LUg0LHQsNGD0YvRgCwg0LHSr9C50YDQtdC6INKb0YvQt9C80LXRgtGW0L0gINCx0LDSk9Cw0LvQsNGDINKv0YjRltC9INKb0LDQttC10YIuINCR0LXRgdGW0L3RiNGW0LTQtdC9IC0g0L3TmdC20ZbRgdGC0ZYg0LbQsNGB0YvRgNGL0L0g0pvQsNC90pPQsCDRgtC10LrRgdC10YDRgyAs0L7QuyDRj9KT0L3QuCDQsNGB0pvQsNC30LDQvSDRltGI0LXQuiDQttC+0LvRi9C90LTQsNKT0YsgINC20LDRgdGL0YDRi9C9INKb0LDQvSDQutC10YLRg9C00ZYg0LDQvdGL0pvRgtCw0LnQtNGLLiDQkdKx0Lsg0LrTqdCx0ZbQvdC1INC+0LnRi9KbINC20LDRgNCwINC60LXQt9GW0L3QtNC1INC20LjRliDQutC10LfQtNC10YHQtdC00ZYuINCQ0LvRgtGL0L3RiNGL0LTQsNC9INCj0JTQlyAtINCx0rHQuyDQt9C10YDRgtGC0LXRgyDTmdC00ZbRgdGW0LzQtdC9ICDRltGIINKb0YPRi9GB0Ysg0LzSr9GI0LXQu9C10YDRltC90ZbSoyDQttCw0pPQtNCw0LnRi9C9INCx0LDSk9Cw0LvQsNGDINKv0YjRltC9INC90LDSm9GC0Ysg0LDQudGC0LAg0LrQtdGC0LXRgCDQsdC+0LvRgdCw0LwtINCx0LDRg9GL0YAsINOp0YIg0pvQsNCx0YssINKx0LnSm9GLINCx0LXQt9GWINGB0L7QvdGL0LzQtdC9INKb0LDRgtCw0YAg0LHQsNGB0pvQsCDQtNCwINC80q/RiNC10LvQtdGA0LTRliDRgtC10LrRgdC10YDRgyDSr9GI0ZbQvSwg0L/QsNGC0L7Qu9C+0LPQuNGP0LvQsNGA0YvQvSDRgNCw0YHRgtCw0YMg0q/RiNGW0L0g0pvQvtC70LTQsNC90LDRgtGL0L0g0LHQvtC70LDQvNGL0LcuINCW0LXRgtGW0L3RiNGW0LTQtdC9IC0g0J3TmdC20ZbRgSDRgtCw0LvQtNCw0YMgLCDQsdKx0Lsg05nQtNGW0YEg0LDRgNKb0YvQu9GLINCw0YHSm9C+0YDRi9GC0YMg0LHSsdC30YvQu9GL0YHRgtCw0YDRi9C9INC+0L3QtNCw0pPRiyDQv9Cw0YDQsNC30LjRgtGC0LXRgNC00ZbSoyAg0LHQsNGAINC20L7Sk9GL0L0g0LDQvdGL0pvRgtCw0L8g0LHRltC70LXQvNGW0LcuINCe0YHRi9C80LXQvSDQsdGW0YDRltC90ZbRiNGWINGB0rHRgNCw0psg0LbQsNGD0LDQsdGLINCw0Y/Sm9GC0LDQu9C00YsuIDxiciAvPg0KPGJyIC8+DQo8YnIgLz4NCjIu0KHSsNCg0JDSmiDQttCw0YPQsNCx0YsuINCW0LDQu9C/0YsgNiDQsNC50LvRi9KbINCx0LDQu9Cw0LTQsCDQsdC10YDRltC70LPQtdC9INC805nQu9GW0LzQtdGC0YLQtdGAINCx0L7QudGL0L3RiNCwINOp0LrQv9C10L3RltKjINC20LDQu9C/0Ysg0LbQsNKT0LTQsNC50Ysg0pvQsNC70YvQv9GC0Ysg0LHQvtC70YvQvyDQutOp0YDRltC90LXQtNGWLiA2INCw0LnQu9GL0psg0LHQsNC70LDQtNCwINGC0YvQvdGL0YEg0LDQu9GDINC90LXQs9GW0LfQvdC10L0tINC00LjQsNGE0YDQsNCz0LzQsNC70YvSmyDRj9KT0L3QuCDRltGI0L/QtdC9INGC0YvQvdGL0YEg0LDQu9GDINCx0L7Qu9Cw0LTRiy4g0JHSsdC7INC20LDRgdGC0LAg0pvQsNCx0YvRgNKT0LDQu9GL0psg0LHSsdC70YjRi9Kb0LXRgtGC0LXRgCDRgtC+0LvRi9KbINC20LXRgtGW0LvQvNC10LPQtdC9INCx0L7Qu9GL0L8g0YLQsNCx0YvQu9Cw0LTRiyzRgdC+0L3QtNGL0pvRgtCw0L0g0LTQuNCw0YTRgNCw0LPQvNCwICDQvdC10LPRltC30LPRliDRgtGL0L3Ri9GBINCw0LvRgyDQsdKx0LvRiNGL0pvQtdGC0ZYg0YDQtdGC0ZbQvdC00LUg0pvRi9C30LzQtdGCINCw0YLSm9Cw0YDQsNC00YsuINCa0LXQu9C10YHRliwg0KLRi9C90YvRgSDQsNC70YMg0LbQuNGW0LvRltCz0ZbQvdC1INC60LXQu9C10YAg0LHQvtC70YHQsNKbICDSm9Cw0LvRi9C/0YLRiyDQttCw0pPQtNCw0LnQtNCwINC90LXQs9GW0LfRltC90LXQvSAzMC00MCDRgNC10YIgLCDRj9KT0L3QuCDQsdKx0Lsg0LbQsNKT0LTQsNC50LTQsCDQvdC+0YDQvNCw0LTQsCDQttOZ0L3QtSDQutC10YPQtNC1INKb0YPRi9GB0YvQvdGL0qMg0YHQuNC80LzQtdGC0YDQuNGP0YHRiyDQvNC10L0g0L/QtdGA0LrRg9GB0YHQuNGPINC905nRgtC40LbQtdGB0ZbQvdC00LUg0L/QsNGC0L7Qu9C+0LPQuNGPINC20L7Sm9GC0YvSk9GL0L0g0LrTqdGA0YHQtdGC0LXQtNGWLiDQnNKx0L3QtNCw0pPRiyDTqdC60L/QtSDQsNGD0YHQutGD0LvRgtCw0YbQuNGP0YHRiyDQutC10LfRltC90LTQtSwg0YLRi9C90YvRgSDQsNC70YMg0YHQuNC/0LDRgtGLINC20LDQudC70Ysg0LDQudGC0LAg0LrQtdGC0YHQtdC8IC0g0JLQtdC30LjQutGD0LvRj9GA0LvRi9KbINGC0YvQvdGL0YEg0LXRgdGC0ZbQu9C10LTRli4g0J3TmdGA0LXRgdGC0LXQu9C10YDQtNC1INCx0rHQuyDQvdC10LPRltC30LPRliDRgtGL0L3Ri9GBINCw0LvRgyDRgtKv0YDRliDQsdC+0LvRi9C/INGC0LDQsdGL0LvQsNC00YsuINCW0LDQu9C/0Ysg0LbQsNGBINCx0LDQu9Cw0LvQsNGA0LTQsCDQstC10LfQuNC60YPQu9GP0YDQu9GL0psg0YLRi9C90YvRgSDQtdGA0LXRgdC10LrRgtC10YDQs9C1INKb0LDRgNCw0pPQsNC90LTQsCDQutKv0YjRgtGW0YDQtdC6INCx0L7Qu9GL0L8g0LrQtdC70LXQtNGWLiDQkdKx0Lsg0YTQtdC90L7QvNC10L0gLSDQv9GD0Y3RgNC40LvRjNC00ZYg0YLRi9C90YvRgSDQtNC10L8g0LDRgtCw0LvQsNC00Ysu0JbQsNC70L/RiyDQvdOZ0YDQtdGB0YLQtdC70LXRgNC00LUg0LDRg9CwINCw0pPRi9GB0YvQvdGL0qMg0LrSr9GI0LXRjtGWINC60LXRg9C00LUg0pvRg9GL0YHRiyDSm9Cw0LHRi9GA0pPQsNC70LDRgNGL0L3Ri9KjINC20rHSm9Cw0LvQsNC90YPRi9C90LAsINGB0LXRgNC/0ZbQvNC00ZbQu9GW0LPRltC90LUg0LHQsNC50LvQsNC90YvRgdGC0Ysg0L/Rg9GN0YDQuNC70YzQtNGWINGC0YvQvdGL0YEg0LDQvdGL0psg0LHQvtC70LDQtNGLLCDQttOZ0L3QtSDQttKx0LzRgdCw0psg0YjRgyDRgNC10YLRltC90LTQtSDQtdGB0YLRltC70ZbQtNGWLiDQkdGA0L7QvdGFINGB0LDSo9GL0LvQsNGD0YvQvdGL0qMg0YLQsNGAINCx0L7Qu9GD0Ysg0LTQsCDQv9GD0Y3RgNC40LvRjNC00ZbQuiDRgtGL0L3Ri9GB0YLRi9KjINC10YDQtdC60YjQtdC70ZbQs9GW0L0g0LrTqdGA0YHQtdGC0LXQtNGWLi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78" table:style-name="ce1">
            <text:p>915478</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4gMTIt0LbQsNGB0LDRgCDQutGL0Lcg0LHQsNC70LAuINCo0LDQs9GL0Lw6INGW0YjRltC90ZbQvSDQsNGD0YvRgNGD0YssINKb0YvQttGL0LvQtNCw0YPRiywg05nQu9GB0ZbQt9C00ZbQui4g0JrQsNGA0LDQs9Cw0L3QtNCwOiDRgtC10YDRltGB0ZYg0LDSm9GI0YvQuywg0YLRltC70ZYg0YvQu9Cz0LDQu9C00YssINGC0ZbQu9GWINCw0LrRiNGL0LvQvNC10L0g06nQvdC10LfQtNC10L3Qs9C10L0sINGN0L/QuNCz0LDRgdGC0YDQuNGPINCw0LnQvNCw0LPRi9C90YvQvSDQsNGD0YvRgNGB0YvQvdGD0YssINCx0LDRg9GL0YDRiyDQutCw0LvRi9C/0YLRiywg0ZbRiCDQutCw0YLRg9GL0L3QsCDQsdC10LnRltC8LiDQnNKx0L3QtNCw0Lkg0LbQsNCz0LTQsNC50LTQsCDQvNGL0L3QsNC90LTQsNC5INGI0LXRiNGW0Lwg0LrQsNCx0YvQu9C00LDQudC80YvQtyDQttOZ0L3QtSDQvNGL0YHQsNC70LPQsCDQvNGL0L3QsNC90LTQsNC5INC30LXRgNGC0YLQtdGD0LvQtdGAINC20q/RgNCz0ZbQt9GW0LvRg9GWINC60LDQttC10YI6IDEyLSDQttCw0YHQsNGAINC60YvQt9C00YvQvSDRiNCw0LPRi9C80LTQsNGA0Ysg0LzQtdC9INC60LvQuNC90LjQutCw0LvRi9C6INCx0LXQu9Cz0YvQu9C10YDRltC90LUg0YHQtdC90LUg0L7RgtGL0YDRi9C/LCDQsNGB0LrQsNC30LDQvSDRltGI0LXQuiDQttC+0LvQtNCw0YDRiyDQsNGD0YDRg9C70LDRgNGL0L3QsCDQutKv0LTRltC6INGC0YPRi9C90LTQsNC50LTRiyDQvNGL0YHQsNC70Ys6INCz0LDRgdGC0YDQuNGCINC90LXQvNC10YHQtSDQsNGB0LrQsNC30LDQvSDQttCw0YDQsNGB0YsuINCU0LjQsNCz0L3QvtC30LTRiyDQvdCw0LrRgtGL0LvQsNGDINC205nQvdC1INCx0LDRgdKb0LAg0L/QsNGC0L7Qu9C+0LPQuNGP0LvQsNGA0LTRiyDQttC+0LrQutCwINGI0YvQs9Cw0YDRgyDSr9GI0ZbQvSDQutC10LvQtdGB0ZYg0LfQtdGA0YLRgtC10YPQu9C10YAg0LbSr9GA0LPRltC30ZbQu9C10LTRljog0LbQsNC70L/RiyDQutCw0L0g0LDQvdCw0LvQuNC30ZYsINCw0L3QuNC80LjRj9C90YvQvSDQsdCw0YAg0LbQvtCz0YvQvSDQsNC90YvQutGC0LDRgyDSr9GI0ZbQvSDQs9C10LzQvtCz0LvQvtCx0LjQvSwg0Y3RgNC40YLRgNC+0YbQuNGC0YLQtdGAINC00LXSo9Cz0LXQudGW0qMg0YLQtdC60YHQtdGA0YMuINCR0LjQvtGF0LjQvNC40Y/Qu9GL0Log0LrQsNC9INGC0LDQu9GC0LDRg9GLINCx0LDRg9GL0YAg0LrRi9C30LzQtdGC0ZbQvSDRgtC10LrRgdC10YDRgyDSr9GI0ZbQvSDQttCw0LvQv9GLINCx0LjQu9C10YDRg9Cx0LjQvdC00ZYg0LbTmdC90LUg0LDQu9Cw0YIt0LDRgdCw0YIg0LrQsNC9INGB0LDRgNGL0YHRg9GL0L3QtNCw0LPRiyBMRyAuINCW0LDQu9C/0Ysg0L3TmdC20ZbRgSDQsNC90LDQu9C40LfRliwg0LbQsNGB0YvRgNGL0L0g0LrQsNC90LPQsCDQt9C10YDRgtGC0LXRgyDQv9Cw0YDQsNC30LjRgtGC0LXRgNC00ZYg0LDQvdGL0LrRgtCw0YMsINC90LXRgdC10L8g0LDQvdCw0LvQuNC30ZYg0LrQvtGB0YvQvNGI0LAg0L/QsNGC0L7Qu9C+0LPQuNGP0LvQsNGA0LTRiyDQsNC90YvQutGC0LDRgyDSr9GI0ZbQvSAuINCt0LfQvtGE0LDQs9C+0LPQsNGB0YLRgNC+0LTRg9C+0LTQtdC90L7RgdC60L7Qv9C40Y8g0JDRgdC60LDQt9Cw0L3QvdGL0L0g0LbTmdC90LUg0L7QvSDQtdC60ZYg0LXQu9GWINGW0YjQtdC60YLRltC9INGB0YvRgNGC0pvRiyDQutCw0LHQsNGC0YvQvSDRgtC10LrRgdC10YDRgywg0LbQsNGA0LAg0L3QtdC80LXRgdC1INGN0YDQvtC30LjRjyDQsdCw0YAg0LbQvtCz0YvQvSDQutOp0YDRgyDSr9GI0ZbQvS4g0KPQlNCXINCx0LDRg9GL0YAsINOp0YIg0LbQvtC70LTQsNGA0Ysg0LbTmdC90LUg0YPQudC60Ysg0LHQtdC30ZbQvdGW0L0g0LbQsNCz0LTQsNC50YvQvSDQsdCw0LPQsNC70LDRgy4g0prRi9GI0LrRi9C70LTRi9C60YLRiyDQsNC90YvQutGC0LDRgyDQuNC90YLRgNC+0LPQsNGB0YLRgNCw0LvRjNC00YsgcEgg0YHQuNC80LzQtdGC0YDQuNGPINCw0YHQutCw0LfQsNC9INGB06nQu9GW0L3RltC9INC60YvRiNC60YvQu9C00YvQs9GL0L0g0YLQtdC60YHQtdGA0YMuPGJyIC8+DQoyLiA2INCw0LnQu9GL0Log0LHQsNC70LAuINCi0LXQvNC/0LXRgNCw0YLRg9GA0LDRgdGLINC60LDQu9GL0L/RgtGLIDM2LDYg0KEuINCi0YvQvdGL0YEg0LDQu9GDINC20LjRltC70ZbQs9GWINC80LjQvdGD0YLRi9C90LAgMzAuINCa0LXRg9C00LUg0LrRg9GL0YHRiyDRhtC40LvQuNC90LTRgCDRgtOZ0YDRltC30LTRli4g0KLRi9C90YvRgSDQsNC70YMg0YHQuNC80LzQtdGC0YDQuNGP0LvRiyDQttOZ0L3QtSDQsdGW0YDQutC10LvQutGWINGC0YvQvdGL0YEg0LDQu9GD0YvQvdCwINKb0LDRgtGL0YHQsNC00YsuINCf0LXRgNC60YPRgdGB0LjRj9C00LAg06nQutC/0LXQtNC1INCw0YjRi9C6INOp0LrQv9C10LvRi9C6INC00YvQsdGL0YEuINOo0LrQv9C10L3RltKjINCw0YPRgdC60YPQu9GM0YLQsNGG0LjRj9GB0Ys6IDYg0LDQudC70YvQuiDRgdCw0YMg0LHQsNC70LDQtNCwINOp0LrQv9C1INCw0YPRgdC60YPQu9GM0YLQsNGG0LjRj9GB0Ysg0LrQtdC30ZbSo9C00LUg0LLQuNC30LjQutGD0LvRj9GA0LvRiyDRgtGL0L3Ri9GBINC10YHRgtGW0LvQtdC00ZYuINCR0YPQuyDQutCw0LvRi9C/0YLRiyDRgtGL0L3Ri9GBINCw0LvRgyDQtNGL0LHRi9GB0Ysg0LHQvtC70YvQvyDRgtCw0LHRi9C70LDQtNGLLiDQktC10LfQuNC60YPQu9GP0YDQu9GLINGC0YvQvdGL0YEg0YHQuNC/0LDRgtGC0LDQvNCw0YHRizog0LTRi9Cx0YvRgdGC0YvQvSDRiNGL0LPRg9GLINCw0LvRjNCy0LXQvtC70LDQu9Cw0YAg0LDQudC80LDQs9GL0L3QtNCw0LPRiyDQsNGD0LAg0LrQvtC30LPQsNC70YvRgdGL0LzQtdC9INCx0LDQudC70LDQvdGL0YHRgtGLLiDQldGB0YLRltC70YMg0LXRgNC10LrRiNC10LvRltCz0ZYg0LbRg9C80YHQsNC6INCx0ZbRgNC60LXQu9C60ZYg0YjRg9GL0LvQtNCw0LPQsNC9INC00YvQsdGL0YEuINCY0L3RgdC/0LjRgNCw0YbQuNGPINC00LXQvCDQsNC70YMg0YTQsNC30LDRgdGLINKx0LfQsNCz0YvRgNCw0Los0LDQuyDRjdC60YHQv9C10YDQsNGG0LjRjyDQtNC10Lwg0YjRi9Cz0LDRgNGDINC60YvRgdC60LDRgNCw0Log0LbTmdC90LUg0LHTmdGB0LXQvdGW0YDQtdC6INC10YHRgtGW0LvQtdC00ZYuINCR0LDQu9Cw0LvQsNGA0LTQsCDQstC10LfQuNC60YPQu9GP0YDQu9GLINGC0YvQvdGL0YEg05nQtNC10YLRgtC1INCw0L3Ri9Cz0YvRgNCw0Log0LbTmdC90LUg0LrSr9GI0YLRltGA0LXQuiDQtdGB0YLRltC70LXQtNGWLCDRgdC10LHQtdCx0ZYg0L7Qu9Cw0YDQtNGL0L0g0LrQtdGD0LTQtSDQutGD0YvRgdGLINC20rHQutCwINOZ0YDRliDQsNGD0LAg06nRgtC60ZbQt9GDINC20L7Qu9C00LDRgNGLINC60YvRgdC60LAuINCR0rHQuyDQv9GD0Y3RgNC40LvRjNC00Ysg0YLRi9C90YvRgSDQtNC10L8g0LDRgtCw0LvQsNC00YsuINCV0LPQtdGAINCx0LDQu9Cw0LvQsNGA0LTQsCDQv9Cw0YLQvtC70L7Qs9C40Y8g0LHQtdC70LPRltC70LXRgNGWINCx0L7Qu9C80LDRgdCwLCDQvNGL0YHQsNC70Ys6INGC0YvQvdGL0YEg0LbQtdGC0ZbRgdC/0LXRg9GI0ZbQu9GW0LPRliwg0YHRi9GA0YvQuyDQvdC10LzQtdGB0LUg0LrQsNGC0LDQvSDRgtGL0L3Ri9GBLCDQutCw0LvRi9C/0YLRiyDQttCw0LPQtNCw0LnQtNCwINCw0YPRgdC60YPQu9GM0YLQsNGG0LjRjyDQutC10LfRltC90LTQtSDRgtC10Log0LLQtdC30LjQutGD0LvRj9GA0LvRiyDRgtGL0L3Ri9GBINC10YHRgtGW0LvRg9GWINGC0LjRltGBLiAgICAgICAg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47" table:style-name="ce1">
            <text:p>1066847</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kxMiDQttCw0YHQsNGAINKb0YvQtyDQsdCw0LvQsNC00LAg0YjQsNKT0YvQvNC00LDRgNGL0L3QsCDRgdOZ0LnQutC10YEg0KHQuNC/0LDRgtGC0LDQu9Cz0LDQvSDQsdC10LvQs9GW0LvQtdGA0ZYg0LDRgNGC0YPRgNC70ZYg0L/QsNGC0L7Qu9C+0LPQuNGP0LvQsNGA0LTRi9KjINCx0LDRgCDQtdC60LXQvdGW0L0g0LrTqdGA0YHQtdGC0LXQtNGWINGB0L7QvdGL0L0g0LjRiNC40L3QtNC1INCz0LDRgdGC0YDQuNGCLCDQvtC50YvSmyDQttCw0YDQsNC70LDRgNC00YssINC90LXQvNC10YHQtSDQsdCw0YHQutCwINC00LAg0LDRgdKb0LDQt9Cw0L0g0LjRiNC10Log0LDRg9GA0YPQu9Cw0YDRiyDQsdCw0YDRi9C9INGA0LDRgdGC0LDQudC00YsuINCY0Ygg0LDQudC80LDQs9GL0L3Ri9C9INCw0YPRi9GA0YHRi9C90YPRiyDRgdC+0L3Ri9C80LXQvSDSm9Cw0YLQsNGAINKb0YvQttGL0Lsg0LDQu9GB0ZbQt9C00ZbQuiDQsdC10LvQs9GW0LvQtdGA0ZbQvdGW0qMg0LHQsNGA0LvRi9KT0Ysg0L7RgdGLINCw0YPRgNGD0LvQsNGA0LPQsCDRgtOZ0L0g0LHQvtC70YvQvyDRgtCw0LHRi9C70LDQtNGLLiDQodC+0Lsg0YHQtdCx0LXQv9GC0Lgg0LTQuNCw0LPQvdC+0LfQtNGLINGA0LDRgdGC0LDRgyDRg9GI0LjQvSDQsdCw0LvQsNKT0LAg0LfQtdGA0YLRgtC10YPQu9C10YAg0LbSr9GA0LPRltC30ZbQu9GD0ZYg0YPRgdGL0L3Ri9C70LDQtNGLLiDQl9C10YDRgtGF0LDQvdCw0LvRi9KbINC30LXRgNGC0YLQtdGD0LvQtdGA0LTQuNC9INGW0YjRltC90LTQtSDQltCw0LvQv9GLINKa0LDQvSDQkNC90LDQu9C40LfRltC9LCDQsdC40L7RhdC40LzRj9C70YvSmyDQutCw0L0g0YLQsNC70LTQsNGD0Yst0LHQsNGD0YvRgCDRg9C50LrRiyDQsdC10Lcg0pvRi9C30LzQtdGC0YLQtdGA0ZbQvSDQsdC10LvQvtC6INCx0LDRg9GL0YAg0YTQtdGA0LzQtdGC0YLQtdGA0ZbQvdGW0qMg0Y3Qu9C10LrRgtGA0L7Qu9C40YLRgtC10YDQtNGW0qMg0LTQtdC90LPQtdC50YvQvSDQsNC90YvSm9GC0LDRgyDRg9GI0LjQvSDQutCw0LbQtdGCLiDQmtC10LvQtdGB0Lgg0LfQtdGA0YLRgtC10YPQu9C10YDQs9C1INC30LDRgCDQsNC90LDQu9C40LfRiyDQsdGD0LnRgNC10Log0pvRi9C30LzQtdGC0YLQtdGA0ZbQvdGW0qMg0pvRi9C30LzQtdGC0YLQtdGA0ZbQvSDQsdCw0LPQsNC70LDRgyDRg9GI0LjQvSwg0LrQvtC/0YDQvtCz0YDQsNC80LzQsCDQsNGBINKb0L7RgNGL0YLRgyDQsdGD0LfRi9C70YvRgdGC0LDRgNGL0L0g0LDQvdGL0pvRgtCw0YMg0LzQsNKb0YHQsNGC0YvQvdC00LAg0LbQsNC90LUg0LTQuNGB0LHQsNC60YLQtdGA0LjQvtC30LPQsCDQvdCw0LbQuNGB0YLQtdCz0ZYg06nQt9Cz0LXRgNGW0YHRgtC10YDQtNGWINCw0L3Ri9Kb0YLQsNGD0LTQsCDSm9Cw0LbQtdGCLiDQodC+0L3Ri9C80LXQvSDSm9Cw0YLQsNGAINC90LDSm9GC0Ysg0L/QvtGC0L7Qu9C+0LPQuNGP0L3RiyDQsNC90YvSm9GC0LDRgyDRg9GI0LjQvSDQpNCT0JTQoSDQt9C10YDRgtGC0LXRgyDTmdC00ZbRgdGC0LXRgNGWINGA0LXQvdGC0LPQtdC9LCDRg9C70YzRgtGA0LDQtNGL0LHRi9GB0YLRi9KbINC30LXRgNGC0YLQtdGDICDQsNC00LjRgdGC0LXRgNC40L3QtNC1INKb0L7Qu9C00LDQvdGD0LPQsCDQsdC+0LvQsNC00Ysg0L3QsNKb0YLRi9C70LDRgyDSr9GI0ZbQvS4gMik2INCw0LnQu9GL0psg0LHQsNC70LDQtNCwINGC0LXQvNC/0LXRgNCw0YLRg9GA0LDRgdGL0L3Ri9KjINC90L7RgNC80LDQtNCwICDQttCw0L3QtSDQmtC10YPQtNC1INKb0YPRi9GB0Ysg0YbQuNC70LjQvdC00YAg0YLTmdGA0ZbQt9C00ZYg0LHQvtC70YvQvyDRgtCw0LHRi9C70LDQtNGLLiDQkNGD0YHQutGD0LvRjNGC0LDRhtC40Y8g0LrQtdC30ZbQvdC00LUg0LDQtNC10YLRgtC1ICw2INCw0LnQs9CwINC00LXQudC40L3Qs9C4INCx0LDQu9Cw0LvQsNGA0LTQsCAg0LLQtdC30LjQutGD0LvRj9GA0LvRiyDQtNGL0LHRi9GB0YLRiyDQtdGB0YLQuCDQsNC70LDQvNGL0LcuICwgNiDQsNC50LTQsNC9IDUtNyDQttCw0YHSm9CwINC00LXQudC40L3Qs9C4INCx0LDQu9Cw0LvQsNGA0LTQsCDQv9GD0Y3RgNC10LvRjNC00Ysg0LTRi9Cx0YvRgdGC0Ysg0LXRgdGC0LjQvNGW0Lcu0JHRg9C7INGC0YvQvdGL0YEg0LDQu9GD0LTRi9C9INC10LrQuCDRhNCw0LfQsNGB0YvQvdC00LAg0YLRi9C90YvRgSDRiNGD0Ysg0LrQsNGC0YLRi9GA0LDQuiDQttCw0L3QtSDRg9C30LDQs9GL0YDQsNC6INCx0L7Qu9GL0L8g0YLQsNCx0YvQu9Cw0LTRiy4g0J/Rg9GN0YDQtdC70YzQtNGWINGC0YvQvdGL0YEg0LrQtdC30ZbQvSDQsNC90YvSm9GC0LDQudGC0YvQvSDQsdCw0LvQsNC70LDRgNC00YvQvSDRgtGL0L3Ri9GBINC80YPRiNC10LvQtdGA0ZbQvSDQsdC40YDQvdC10YjQtSDQutGD0YDRi9C70YvQvNC00YvQuiDQtdGA0LXQutGI0LXQu9C40LrRgtC10YDQuCDQutC10LvRgtC40YDQuNC70LPQtdC9LNC80YvRgdCw0LvRiyDQutC10YPQtNC1INC60YPRi9GB0YvQvdGL0L0g0LrQuNGI0LjRgNC10Log0LHQvtC70YPRi9C90LAg0LHQsNC50LvQsNC90YvRgdGC0YsgINC+0LfQuNC90LTQuNC6INC10YDQtdC60YjQtdC70LjQutGC0LXRgNC4INCx0LDRgCDQttCw0L3QtSDRgtGL0L3Ri9GB0Ysg0LHQsNGB0pvQsCDRgtGL0L3Ri9GB0pvQsCDSm9Cw0YDQsNKT0LDQvdC00LAg0YHQsNC70YvRgdGC0YvRgNC80LDQu9GLINKx0LfQsNKT0YvRgNCw0psg0LbTmdC90LUg0pvQsNGC0YLRi9GA0LDSmyDQsdC+0LvRi9C/INGC0LDQsdGL0LvQsNC00Ys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1-ші сұрақтың жауабы толық емес. ИФА қан анализі-хеликобактер пилори, паразитозға тексеру үшін қан мен нәжіс анализдері жазылмаған. 2-ші сұрақтың жауабы толық емес</text:p>
          </table:table-cell>
          <table:table-cell office:value-type="float" office:value="0" table:style-name="ce1">
            <text:p>0</text:p>
          </table:table-cell>
          <table:table-cell table:number-columns-repeated="16376"/>
        </table:table-row>
        <table:table-row table:style-name="ro1">
          <table:table-cell office:value-type="float" office:value="1066849" table:style-name="ce1">
            <text:p>1066849</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kxMiDQttCw0YHQsNGAINKb0YvQtyDQsdCw0LvQsNC90YvSoyDRiNCw0pPRi9C80LTQsNGA0Ysg0LHQvtC50YvQvdGI0LAg0pvQsNGA0LDRgdGC0YvRgNCw0YLRi9C9INCx0L7Qu9GB0LDSmyDQutOp0L/RgtC10LPQtdC9INC30LXRgNGC0YLQtdGDINC905nRgtC40LbQtdC70LXRgNGW0L0g0pvQsNGA0LDRg9GL0LzRi9C3INKb0LDQttC10YIg0LbTmdC90LUg0L7QvdGL0qMg0ZbRiNGW0L3QtNC1INC60L7Qv9Cw0LPRgNCw0LzQvNCwINGC0LDQv9GB0YvRgNGDINKb0LDQttC10YIu0JzRi9GB0LDQu9GLINCw0LnRgtCw0YAg0LHQvtC70YHQsNKbINC905nRgNC10YHRgtC10LvQtdGA0LzQtdC9INCx0LDQu9Cw0LvQsNGA0LTQsCDRltGI0LXQutGC0LXRgNGWINC10YDQtdGB0LXQutGC0LXRgNCz0LUg0pvQsNGA0LDSk9Cw0L3QtNCwINKx0LfRi9C90YvRgNCw0psg0LHQvtC70YvQvyDQutC10LvQtdC00ZYu0JbTmdC90LXQtNC1IDEyINC20LDRgdCw0YAg0LHQsNC70LDQvdGL0qMg0ZbRiNC10LrRgtC10YDRliDQvNC10L0g0LDRgdKb0LDQt9Cw0L0g0LbSr9C50LXRgdGWINGC0L7Qu9GL0psg0pvQsNC70YvQv9GC0LDRgdC/0LDSk9Cw0L3QtNGL0pvRgtCw0L0g0LrTqdC/0YLQtdCz0LXQvSDTqdC30LPQtdGA0ZbRgdGC0LXRgCDQttOZ0L3QtSDQsNGD0YDRg9C70LDRgNKT0LAg0LHQtdC50ZbQvCDQsdC+0LvRgyDRi9Kb0YLQuNC80LDQu9C00YvQu9GL0pPRiyDQttC+0pPQsNGA0Ysg0LHQvtC70YvQvyDRgtCw0LHRi9C70LDQtNGLLtCv0pPQvdC4INGW0YjQtdC6INC20L7Qu9C00LDRgNGL0L3Ri9KjINGC0L7Qu9GL0pPRi9C80LXQvSDSm9Cw0LvRi9C/0YLQsNGB0L/QsNGD0YvQvdCw0L0g0YLRg9GL0L3QtNCw0YPRiyDQvNKv0LzQutGW0L0g0LTQtdGB0LXQuiDQsdC+0LvQsNC00Ysu0JHRltC30LTQtSAxMiDQttCw0YHQsNGAINKb0YvQtyDQsdCw0LvQsNC00LAg0ZbRiCDSm9Cw0YLRg9GLINCx0LDQudKb0LDQu9Cw0LTRiyDRj9KT0L3QuCDQvtKT0LDQvSDQt9C10YDRgtGC0LXRgyDQvdOZ0YLQuNC20LXQu9C10YDRltC90LUg0pvQsNGA0LDQvyDQtdCz0LXRgNC00LUg0pvQsNC90LTQsNC5INC00LAg0LHRltGAINC/0LDRgtC+0LvQvtCz0LjRjyDRgtCw0LHRi9C70LDRgtGL0L0g0LHQvtC70YHQsCDQv9C10LTQuNCw0YLRgNC00YvQvSDQutC10L3QtdGB0ZYg0LHQvtC50YvQvdGI0LAg0LTTmdGA0ZYg0LTTmdGA0LzQtdC6INGC0LDSk9Cw0LnRi9C90LTQsNC70YPRiyDSm9Cw0LbQtdGCLtCQ0LvQsNC50LTQsCDQsdKx0Lsg0LHQsNC70LDQtNCw0pPRiyDQttCw0pPQtNCw0Lkg0L7QuyDQsdGW0LfQtNC1INKb0LDQu9GL0L/RgtGLINGE0LjQt9C40L7Qu9C+0LPQuNGP0LvRi9KbINC20LDSk9C00LDQudC00YvQvSDQsdGW0YDRltC00LUg0LHQvtC70YPRiyDQvNKv0LzQutGW0L0u0KHQtdCx0LXQsdGWLNGC0LXQutGB0LXRgNGDINCx0LDRgNGL0YHRi9C90LTQsNKT0Ysg0LrTqdGA0YHQtdGC0LrRltGI0YLQtdGA0LPQtSDQsNGB0LAg0pvQsNGC0YLRiyDQvNOZ0L0g0LHQtdGA0LPQtdC9INC206nQvS7Ql9C10YDRgtGC0LXRg9C70LXRgCDRgtC+0LHRi9C90LAg0LDQvdCw0LvQuNC30LTQtdGAINCw0LvRgyDQttOZ0L3QtSDRg9C00Lcg0LbSr9GA0LPRltC30YPQs9C1INCx0L7Qu9Cw0LTRiy7QkNGB0pvQsNC30LDQvSDQsNC50LzQsNKT0YvQvdC00LAg0Y/Sk9C90Lgg0L3QsNGD0pvQsNGB0pvQsCDQv9Cw0LvRjNC/0LDRhtC40Y8g0LbSr9GA0LPRltC30LPQtdC90LTQtSDRjdC/0LjQs9Cw0YHRgtGA0LjQuSDQsNC50LzQsNKT0YvQvdC00LAg0LXRiNKb0LDQvdC00LDQuSDQsNGD0YvRgNGB0YvQvdGDINCx0L7Qu9C80LDSk9Cw0L0u0K/Sk9C90Lgg0LDQudGC0LDRgCDQsdC+0LvRgdCw0psgMTIg0LbQsNGB0LDRgCDQsdCw0LvQsNC90YvSoyDQsNGB0pvQsNC30LDQvSDRltGI0LXQuiDQttKv0LnQtdGB0ZYg0YLQvtC70YvSk9GL0LzQtdC9INKb0LDQu9GL0L/RgtCw0YHQv9Cw0pPQsNC9LtCW05nQvdC1INGW0Ygg0pvQsNGC0YPRi9C90LAg0LHQtdC50ZbQvCDQsdC+0LvRg9GLINGW0YjQtdC6INC20L7Qu9C00LDRgNGL0L3Ri9KjINGC0L7Qu9GL0pvSm9Cw0L3QtNGLINC20LXRgtGW0LvQvNC10YPRltC90LXQvdC00LUg0YLRg9GL0L3QtNCw0YPRiyDQvNKv0LzQutGW0L0u0JrQtdC50LHRltGAINC20LDSk9C00LDQudC70LDRgNC00LAg0LHSsdC7INGI0LDSk9GL0LzQtNCw0YAg0LHQsNC70LDQvdGL0qMg0YLSsdGC0YvQvdKT0LDQvSDRgtCw0pPQsNC80LTQsNGA0YvQvdCw0LTQsCDQsdCw0LnQu9Cw0L3Ri9GB0YLRiyDQsdC+0LvRg9GLINC80q/QvNC60ZbQvS7QldCz0LXRgNC00LUg0L/QsNC70YzQv9Cw0YbQuNGPINC60LXQt9GW0L3QtNC1INKb0LDQvdC00LDQuSDQtNCwINCx0ZbRgCDRjdC/0LjQs9Cw0YHRgtGA0LjQuSDQsNC50LzQsNKT0YvQvdC00LAg0LDRg9GL0YDRgdGL0L3RgyDQsdC+0LvQsNGC0YvQvSDQsdC+0LvRgdCwLNC+0L3QtNCwINC/0LDRgtC+0LvQvtCz0LjRj9KT0LAg0LrSr9C00ZbQuiDRgtGD0pPRi9C30YPRi9C80YvQtyDQvNKv0LzQutGW0L0s0LbTmdC90LXQtNC1INCw0YHQv9Cw0L/RgtGL0psg0LfQtdGA0YLRgtC10YPQu9C10YAg0YLQsNKT0LDQudGL0L3QtNCw0YPSk9CwINCx0L7Qu9Cw0LTRiy7QnNGL0YHQsNC70Ysg0LDRgdKb0LDQt9Cw0L3QtNGLINGC0L7Qu9GL0pvSm9Cw0L3QtNGLINKb0LDRgNCw0YPSk9CwINCx0L7Qu9Cw0YLRi9C9INGE0LPQtNGBINC30LXRgNGC0YLQtdGD0ZYuMTIg0LbQsNGB0LDRgCDSm9GL0Lcg0LHQsNC70LDQtNCwINKb0L7RgdGL0LzRiNCwINGI0LDSk9GL0LzQtNCw0YDRiyDQsdC+0LnRi9C90YjQsCDQttOZ0L3QtdC00LUg0LfQtdGA0YLRgtC10YMg0L3TmdGC0LjQttC10LvQtdGA0ZYg0LHQvtC50YvQvdGI0LAg0YLQtdC60YHQtdGA0ZbQvyDQutOp0YDQtSDQsNC70LDQvNGL0Lcu0KjQsNKT0YvQvNC00LDRgNGLINCx0L7QudGL0L3RiNCwINCw0Ykg0pvQsNGA0YvQvdC00LAg0ZbRiNGW0L3RltKjINCw0YPRgNGD0YvQvdCwINC205nQvdC1INKb0YvQttGL0LvQtNCw0L3Rg9GLINOZ0LvRgdGW0LfQtNGW0LPRliDQutC10LnQsdGW0YAg0LbQsNKT0LTQsNC50LTQsCDSm9Cw0LvRi9C/0YLRiyDQsdC+0LvRg9GLINC80q/QvNC60ZbQvS7QltOZ0L3QtSDRltGI0LXQutGC0LXRgNC00ZbQvSDRgtC+0LvRi9KbINKb0LDQu9GL0L/RgtCw0YHQv9Cw0YPRi9C90YvSoyDQvdOZ0YLQuNC20LXRgdGW0L3QtNC1INGC0YPRi9C90LTQsNC50YLRi9C9INGE0LjQt9C40L7Qu9C+0LPQuNGP0LvRi9KbINKb0LDQu9GL0L/RgtGLINC20LDSk9C00LDQuSDQtNC10L/RgtC1INCw0LnRgtGD0pPQsCDQsdC+0LvQsNC00Ysu0prQsNC90LTQsNC5INC30LXRgNGC0YLQtdGD0LvQtdGAINC20q/RgNCz0ZbQt9GDINKb0LDQttC10YIg0LTQtdGB0LXQuiDQutOp0L/RgtC10LPQtdC9INCw0YHQv9Cw0L/RgtGL0psg0LfQtdGA0YLRgtC10YPQu9C10YDQtNC1INC20q/RgNCz0ZbQt9GD0LPQtSDQsdC+0LvQsNC00Ysu0IbRiCDSm9Cw0YLRg9GL0L3QsCDQsdC10LnRltC8INCx0L7Qu9GD0Ysg0LHQvtC50YvQvdGI0LAg0LrQsNC/0L7Qs9GA0LDQvNC80LAg0LDQu9GB0LDSmyDQsdC+0LvQsNC00YsuPGJyIC8+DQoyKTYg0LDQudC70YvSmyDQsdCw0LvQsCDRgtC10LzQv9C10YDQsNGC0YPRgNCw0YHRiyDSm9Cw0LvRi9C/0YLRiyDQttOZ0L3QtSDRgtGL0L3Ri9GBINCw0LvRgyDQttC40ZbQu9GW0LPRliAzMCDQvNC40L3Rg9GC0YvQvdCwINC205nQvdC1INC60LXRg9C00LUg0pvRg9GL0YHRiyDSm9Cw0LvRi9C/0pvQsCDRgdCw0Lkg0Y/Sk9C90Lgg0YbQuNC70LjQvdC00YAg0YLTmdGA0ZbQt9C00ZYg0L7QuyDQvdC+0YDQvNCwINCx0L7Qu9GL0L8g0YLQsNCx0YvQu9Cw0LTRiyzRgtGL0L3Ri9GBINCw0LvRg9GLINGB0LjQvNC80LXRgtGA0LjRj9C70Ysg0LbTmdC90LUg0LHRltGA0LrQtdC70LrRliDRgtGL0L3Ri9GBINCw0LvRg9GL0L3QsCDSm9Cw0YLRi9GB0LDQtNGLLtCf0LXRgNC60YPRgdGB0LjRjyDQutC10LfRltC90LTQtSDTqdC60L/QtdC00LUg0LDRiNGL0psg06nQutC/0LXQu9GW0Log0LTRi9Cx0YvRgSDQtdGB0YLRltC70LXQtNGWINC+0Lsg0L3QvtGA0LzQsCDRj9KT0L3QuCDQv9Cw0YLQvtC70L7Qs9C40Y/Sk9CwINC20LDRgtC/0LDQudC00Ysu06jQutC/0LXQvdGW0qMg0LDRg9GB0LrRg9C70YzRgtCw0YbQuNGP0YHRiyDQutC10LfRltC90LTQtSA2INCw0LnQu9GL0psg0LHQsNC70LDQtNCwINGP0pPQvdC4INC20LDQu9C/0Ysg0LDQudC70YvSmyDQvdOZ0YDQtdGB0YLQtdC70LXRgNC00LUg06nQutC/0LXQvdGW0qMg0YLQvtC70YvSmyDQttC10YLRltC70LzQtdGD0ZbQvdC1INCx0LDQudC70LDQvdGL0YHRgtGL0LTQsCDRgtGD0YvQvdC00LDQudC00Ysg0LDRg9GB0LrRg9C70YzRgtCw0YbQuNGPINC20q/RgNCz0ZbQt9Cz0LXQvSDQutC10LfQtNC1LtCQ0YPRgdC60YPQu9GM0YLQsNGG0LjRjyDQutC10LfRltC90LTQtSDQttC10qPRltC7INCy0LXQt9C40LrRg9C70Y/RgNC70Ysg0YLRi9C90YvRgSDQtdGB0YLRltC70LXQtNGWINC00LXQvyDQsNC50YLRgdCw0psg0LHQvtC70LDQtNGLLtCR0rHQuyDQtNGL0LHRi9GBIDYg0LDQudC70YvSmyDQsdCw0LvQsNKT0LAg0L3QvtGA0LzQsCDQsdC+0LvRi9C/INGC0LDQsdGL0LvQsNC00Ysu0K/Sk9C90Lgg0LHSsdC7INC905nRgNC10YHRgtC10LvQtdGA0LTQtdCz0ZYg0pvQsNC70YvQv9GC0Ysg0YTQuNC30LjQvtC70L7Qs9C40Y/Qu9GL0psg0LbQsNKT0LTQsNC5INCx0L7Qu9GL0L8g0YLQsNCx0YvQu9Cw0LTRiy7QltOZ0L3QtSDQvdOZ0YDQtdGB0YLQtSDTqdGB0LUg0LrQtdC70LUg0LHSsdC7INC00YvQsdGL0YEg0Y/Sk9C90Lgg0L/QtdGA0LrRg9GB0YHQuNGPINC60LXQt9GW0L3QtNC1INGC0rHQudGL0pvRgtCw0LvSk9Cw0L0g0LHQvtC70LDQtNGLINGP0pPQvdC4INCx0LDQu9Cw0L3Ri9KjINC00LDQvNGD0Ysg0LbTmdC90LUg06nRgdGD0ZbQvdC1INCx0LDQudC70LDQvdGL0YHRgtGLINOp0LfQs9C10YDQtdC00ZYu0JbQsNC70L/RiyDQvdOZ0YDQtdGB0YLQtSDQtNKv0L3QuNC1INC10YHRltCz0ZbQvSDQsNGI0pvQsNC90L3QsNC9INCx0LDRgdGC0LDQvyDTqdC60L/QtdGB0ZYg0LbQsNC9INC20LDSm9Kb0LAg0LbTmdC90LUg0LHQtdC50ZbQvNC00LXQu9C1INCx0LDRgdGC0LDQudC00Ysg0LTQtdGB0LXQuiDQsdC+0LvQsNC00Ysu0K/Sk9C90Lgg0LDQudC70YvSmyDQvdOZ0YDQtdGB0YLQtdC70LXRgNC00LUg06nQutC/0LUg0YLQvtC70YvSm9Kb0LDQvdC00Ysg0LTQsNC80YvQvNCw0pPQsNC9INC205nQvdC1INCx0YDQvtC90YUg0YHQsNC90YvQu9Cw0YPQu9Cw0YDRiyDRgtCw0YDQu9Cw0YMg0LHQvtC70YvQvyDQutC10LvQtdC00ZYu0JDRg9GB0LrRg9C70YzRgtCw0YLRhtC40Y8g0LrQtdC30ZbQvdC00LUg0LLQtdC30LjQutGD0LvRj9GA0LvRiyDQtNGL0LHRi9GB0YLRi9C9INC10YHRgtGW0LvRg9GWINKb0LDQu9GL0L/RgtGLINC20LDSk9C00LDQuSDQtNC10L8g0LDQudGC0YHQsNKbINCx0L7Qu9Cw0LTRiy7QltCw0LvQv9GLINC905nRgNC10YHRgtC10LvQtdGA0LTQtSDTqdC60L/QtdC90ZbSoyDQtNCw0LzRg9GLINCw0L3QsNGB0YvQvdGL0qMg0pvSsdGA0YHQsNKT0YvQvdCw0L0g0LHQsNGB0YLQsNC70LDQtNGLINC00LXQvyDQsNC50YLRgdCw0psg0LHQvtC70LDQtNGLLtOo0LrQv9C10L3RltKjINC00LDQvNGD0Ysg0LHQsNC70LAg0LbQtdGC0ZbQu9Cz0LXQvSDRgdCw0LnRi9C9INC00LDQvNC4INCx0LDRgdGC0LDQudC00Ysu0K/Sk9C90LggNiDQsNC50LvRi9KbINCx0LDQu9Cw0LTQsCDQsNGD0YHQutGD0LvRjNGC0LDRgtGG0LjRjyDQutC10LfRltC90LTQtSDQtdGB0YLRltC70LPQtdC9INCy0LXQt9C40LrRg9C70Y/RgNC70YvSmyDQtNGL0LHRi9GBINKb0LDQu9GL0L/RgtGLINGE0LjQt9C40L7Qu9C+0LPQuNGP0LvRi9KbINC20LDSk9C00LDQuSDQsdC+0LvRi9C/INC10YHQtdC/0YLQtdC70ZbQvdC10LTRli7QltOZ0L3QtdC00LUg0L3TmdGA0LXRgdGC0LXQu9C10YDQtNC1INC60LXRg9C00LUg0pvRg9GL0YHRiyDRhtC40LvQuNC90LTRgCDRgtOZ0YDRltC30LTRliDQsdC+0LvQsNC00Ysg0L7QuyDQsdGW0LfQtNC1INKb0LDQu9GL0L/Sm9CwINGB0LDQuSDQsdC+0LvRi9C/INGC0LDQsdGL0LvQsNC00Ysu0JbTmdC90LUg0L3TmdGA0LXRgdGC0LXQu9C10YDQtNC1INCw0LvRjNCy0LXQvtC70LDQu9Cw0YAg0YLQvtC70YvSmyDQtNCw0LzRi9C80LDSk9Cw0L0g0LHQvtC70LDQtNGLINC+0LvQsNGALDUg0LbQsNGB0YLQsNC9INCx0LDRgdGC0LDQvyDQsdCw0LvQsNC70LDRgNC00LAg0LDQu9GM0LLQtdC+0LvQsNC70LDRgNGLINGC0L7Qu9GL0psg0L/QsNC50LTQsCDQsdC+0LvRi9C/INCx0LDRgdGC0LDQudC00Ysu0K/Sk9C90Lgg0LXRgNC10YHQtdC6INCw0LTQsNC80LTQsNGA0LzQtdC9INGB0LDQu9GL0YHRgtGL0YDSk9Cw0L3QtNCwINCx0LDQu9Cw0LvQsNGA0LTQsCDRgtGL0L3Ri9GBINCw0LvRgyA4LTEwINC10YHQtSDRgtOp0LzQtdC9INCx0L7Qu9Cw0LTRiy7QnNGL0YHQsNC70YssMSDQttCw0YHRgtCw0pPRiyDQsdCw0LvQsNC70LDRgNC00LAg0YLRi9C90YvRgSDQsNC70YMg0LDQudGA0YvSm9GI0LAg0LHQsNGB0pvQsNGI0LAg0LHQvtC70LDQtNGLLtCe0Lsg0LHRltC30LTQtSDQsNGG0LjQvdGD0YHRgtCw0YDSk9CwINCx0LDQudC70LDQvdGL0YHRgtGLINCx0L7Qu9Cw0LTRiy7QodC+0Lsg0YHQtdCx0LXQv9GC0ZYg0LDRg9GB0LrRg9C70YzRgtCw0YLRhtC40Y8g0LrQtdC30ZbQvdC00LUgNiDQsNC50LvRi9KbINCx0LDQu9Cw0LTQsCDQttC10qPRltC7INCy0LXQt9C40LrRg9C70Y/RgNC70Ysg0YLRi9C90YvRgSDQtdGB0YLRltC70LXQtNGWLtCW05nQvdC1INCx0rHQuyDQtNGL0LHRi9GBINCx0LDQu9CwINOp0YHQtSDQutC10LvQtSDSm9Cw0YLRgtGLINCy0LXQt9C40LrRg9C70Y/RgNC70Ysg0LTRi9Cx0YvRgSDQsdC+0LvRi9C/INOp0LfQs9C10YDQtdC00ZYg0LTQtdGB0LXQuiDQsdC+0LvQsNC00Ysu0JHQsNC70LAg06nRgdC1INC60LXQu9C1INC205nQvdC10LTQtSDQtNCw0LzQuNGCINC60LXQu9C1INOp0LrQv9C10YHRltC00LUg0YLQvtC70YvSm9Kb0LDQvdC00Ysg0LTQsNC80YMg0q/RgdGC0ZbQvdC00LUg0LHQvtC70LDQtNGLLiAg</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1-шісінде нақты қойылған сұрақ-Қандай зерттеулер жүргізу қажет? жауап толық ашылып жазылмаған. Асқазан аймағында яғни науқасқа пальпация жүргізгенде эпигастрий аймағында ешқандай ауырсыну болмаған???Тапсырманы мұқият оқу керек.</text:p>
          </table:table-cell>
          <table:table-cell office:value-type="float" office:value="0" table:style-name="ce1">
            <text:p>0</text:p>
          </table:table-cell>
          <table:table-cell table:number-columns-repeated="16376"/>
        </table:table-row>
        <table:table-row table:style-name="ro1">
          <table:table-cell office:value-type="float" office:value="1066879" table:style-name="ce1">
            <text:p>1066879</text:p>
          </table:table-cell>
          <table:table-cell office:value-type="string" table:style-name="ce1">
            <text:p>kazakh</text:p>
          </table:table-cell>
          <table:table-cell office:value-type="string" table:style-name="ce1">
            <text:p>Билет 37.&amp;lt;br /&amp;gt; 1. 12жасар қыз бала. Шағымдары ащ қарында ішінің ауыруына,қыжылдауына, әлсіздікке. Қарағанда: терісі ақшыл, тілі ылғалды, тілі ақшылмен өңезденуі, іші пальпация кезінде жұмсақ, в эпигастрий аймағынің ауырсынусы, бауыр қалыпты, іш қаттуына бейім. Қандай зерттеулер жүргізу қажет? &amp;lt;br /&amp;gt; 2.6 айлық бала. Температурасы 36,6 С. Тыныс алу жиілігі 30 минутына. Кеуде қуысы цилиндр тәрізді. Тыныс алу симметриялы және біркелі тыныс алуына қатысады. Перкуссия кезіңде өкпеде ашық өкпелік дыбыс. Өкпенің аускультатциясында қандай тыныс естіледі? &amp;lt;br /&amp;gt;</text:p>
          </table:table-cell>
          <table:table-cell office:value-type="string" table:style-name="ce1">
            <text:p>MSDRgtCw0L/RgdGL0YDQvNCwLS0xMiDQttCw0YHQsNGAINKb0YvQtyDQsdCw0LvQsCDQsNGIINKb0LDRgNGL0L3QtNCwINGW0YjRltC90ZbSoyDQsNGD0YvRgNGD0YvQvdCwINKb0YvQttGL0LvQtNCw0YPRi9C90LAg05nQu9GB0ZbQt9C00ZbQutC60LUg0YjQsNKT0YvQvNC00LDQvdCw0LTRiy4g0JTQtdC80LXQuiDQsdKx0Lsg0LbQtdGA0LTQtSDQttCw0LvQv9GLINKb0LDQvSDQsNC90LDQu9C40LfRltC9INGP0pPQvdC4INC70LXQudC60L7RhtC40YLRgtC10YAg0Y3RgNC40YLRgNC+0YbQuNGC0YLQtdGAINCt0KLQliwg0LPQtdC80L7Qs9C70L7QsdC40L0g0LTQtdKj0LPQtdC50ZbQvSDQtNC1INKb0LDRgNCw0LnQvNGL0LcsINGC0ZbQu9GWINCw0pvRiNGL0Lsg0LHQvtC70YPRiyDQsNGB0pvQvtGA0YvRgtGDINC20L7Qu9GL0L3Ri9KjINC/0LDRgtC+0LvQvtCz0LjRj9GB0YvQvSDQutOp0YDRgdC10YLQtdC00ZYsINC00LXQvNC10Log0LHRltC30LPQtSDRgtCw0pPRiyDQu9GD0YfQtdCy0LDRjyDQtNC40LDQs9C90L7RgdGC0LjQutCwINKb0LDQttC10YIg0LHQvtC70LDQtNGLINGB0L7QvdGL0qMg0ZbRiNGW0L3QtNC1INGD0LvRjNGC0YDQsNC00YvQsdGL0YHRgtGL0pssINC80YDRgiwg0LrQvtC90YLRgNCw0YHRgtC/0LXQvSDQvNGL0YHQsNC70Ysg0LnQvtC0INCw0YDSm9GL0LvRiyDQsdGW0Lcg0L/QsNGC0L7Qu9C+0LPQuNGP0LvRi9KbINC+0YjQsNKb0YLRiyDQsNC90YvSm9GC0LDRg9KT0LAg0LHQvtC70LDQtNGLLiDQntC90YvSoyDQsNC70LTRi9C9INCw0LvQsCDQsNC70LvQtdGA0LPQuNGP0LvRi9KbINC/0YDQvtCx0LDRgdGL0L0g0LbQsNGB0LDQudC80YvQty4g0K3Qv9C40LPQsNGB0YLRgNC40Lkg0LDQudC80LDSk9GL0L0g0pvQsNGA0LDRgyDQutC10YDQtdC6LtKa0YvQttGL0LvQtNCw0YPRiyDQvNKv0LzQutGW0L0g0YDQtdGE0LvRjtC60YEg05nRgdC10YDRltC90LXQvSDQsdC+0LvRg9GLINC80q/QvNC60ZbQvS4g0pvRi9GI0pvRi9C7INOp0LfQs9C10YDRg9GWLiAgMiDRgtCw0L/RgdGL0YDQvNCwINCx0L7QudGL0L3RiNCwINC905nRgNC10YHRgtC10LvQtdGAINC205nQvdC1INC00LUg06nQvNGW0YDQtNGW0qMg0LHRltGA0ZbQvdGI0ZYg0LbQsNGA0YLRiyDQttGL0LvQtNGL0pPRi9C90LTQsCDQsdCw0LvQsNC70LDRgNC00LAgMyDQsNC5INOZ0LvRgdGW0YDQtdCz0LXQvSDQstC10LfQuNC60YPQu9GP0YDQu9GLINC00YvQsdGL0YEg0LHQvtC70LDQtNGLLiA2INCw0LnQtNCw0L0gNS03INC20LDRgdKb0LAg0LTQtdC50ZbQvSDQsNGA0LDQu9GL0pPRi9C90LTQsCDTmdGB0ZbRgNC10YHQtSDQsdCw0LvQsNC70LDRgNGL0L3Ri9KjINC20LDQu9C/0YsgINC00LXQvCDQsNC70YPRiyDQvNC10L0g0LTQtdC8INGI0YvSk9Cw0YDRgyDQsdCw0YDRi9GB0YvQvdC00LAg0YLRi9C90YvRgdGLINC60q/RiNC10LnRltC/INC10YHRgtGW0LvQtdC00ZYg0YHQvtC00LDQvSDQv9GD0Y3RgNC40LvRjNC00ZYg0Y/Sk9C90Lgg0L7QuyDQutKv0YjQtdC50YLRltC70LPQtdC9INCy0LXQt9C40LrRg9C70Y/RgNC70Ysg0LTRi9Cx0YvRgSDQtNC10L8g0YLQtSDQsNGC0LDRg9GL0L0g0LDQu9Cw0LTRiy4g0JHSsdC7INC60LXQt9GW0L3QtNC1INGC0YvQvdGL0YEg0YjRg9GLINC00LXQvCDQsNC70YMg0LTQtdC8INGI0YvSk9Cw0YDRgyDQutC10LfQtdKj0LTQtdGA0ZbQvdC00LUg0LDQvdGL0psg0LXRgdGC0ZbQu9C10LTRli4g0J/Rg9GN0YDQuNC70YzQtNGWINGC0YvQvdGL0YHRgtCw0pPRiyDQsdCw0LvQsNC70LDRgNC00YvSoyAg0YLRi9C90YvRgSDQsNC70YMg0L7RgNCz0LDQvdC00LDRgNGL0L3Ri9KjINKb0rHRgNGL0LvRi9GB0YvQvdGL0qMg0LXRgNC10LrRiNC10LvRltC60YLQtdGA0Lgg0LrQtdC70YHQtdC6INC+0Lsg0LrTqdC60ZbRgNC10LrRgtGW0qMg0LbQsNC70L/RiyDQutGW0YjRliDQutOp0LvQtdC80LTRliDQsdC+0LvRg9GL0L3QsNC9INC00LDRg9GL0YHRgtGL0qMg0YHQsNC90YvQu9Cw0YPRiyDQtNCwINC+0YDRi9C9INCw0LvQsNC00YssINCw0YPRgdC60YPQu9GM0YLQsNGG0LjRjyDQutC10LfRltC90LTQtSDQttKv0YDQs9GW0LfRltC70LPQtdC9INCw0LnQvNCw0pvSm9CwINC00LXQudGW0L3Qs9GWINCw0YDQsNKb0LDRiNGL0pvRgtGL0pvRgtGL0pPRiyDQsdC+0LnRi9C90YjQsCDSm9GL0YHSm9Cw0YDRi9GA0LDSmyDQsdC+0LvQsNC00Ysg0YHQvtC90LTRi9Kb0YLQsNC9INC606nQvNC10LnQtNGW0L0gINGI0YPQu9Cw0YDRi9C9INGW0YjRltC90LDRgNCwINC10YHRgtGD0LPQtSDQtNC1INCx0L7Qu9Cw0LTRiy4g0KHQvtC7INGB0LjRj9Kb0YLRiyDQsdGA0L7QvdGF0YLQsNGAINGB0LDSo9GL0LvQsNGD0YvQvdGL0qMg0YLQsNGAINCx0L7Qu9GD0YsgLCDQutOp0LrRltGA0LXQutGC0ZbSoyDQttC+0pPQsNGA0pPRiyDRgdC10YDQv9GW0LzQtNGW0LvRltCz0ZYg0LbTmdC90LUg0pvQsNCx0YvRgNKT0LDQu9Cw0YDQtNGL0L0g0LbSsdKb0LAg0LHQvtC70YPRiyDQvtC90YvSoyDQstC40LHRgNCw0YbQuNGP0YHRi9C9INC60q/RiNC10LnRgtGW0L8g0LbRltCx0LXRgNC10LTRli4g05jRgdGW0YDQtdGB0LUg0LzSsdC90LTQsCDQuNC90YLQtdGA0YHRgtC40YbQuNCw0LvQtNGLINGC0ZbQvSDQttCw0pvRgdGLINC00LDQvNGL0pPQsNC9INOp0LrQv9C10L3RltKjINCw0YPQsNC70YvQs9GLINCx0rHQuyDQutC10LfQtNC1INGC06nQvNC10L3QtNC10L8g0LrQtdGC0LXQtNGWLiA3INC20LDRgdGC0LDQvSDQutC10LnRltC9INCx0LDQu9Cw0LvQsNGA0LTRi9KjINGC0YvQvdGL0YHRiyDQutC10LnRltC9INCy0LXQt9C40LrRg9C70Y/RgNC70YvSk9CwINCw0YPRi9GB0LDQtNGLLi4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1-ші сұрақтың жауабы толық емес- лабораторлы зерттеулер мен аспапты зерттеулер толық аталып жазылмаған. 2-ші сұрақтың жауабы академическая политикаға сүйене отырып, плагиат деңгейі ескеріліп бағаланды.</text:p>
          </table:table-cell>
          <table:table-cell office:value-type="float" office:value="0" table:style-name="ce1">
            <text:p>0</text:p>
          </table:table-cell>
          <table:table-cell table:number-columns-repeated="16376"/>
        </table:table-row>
        <table:table-row table:style-name="ro1">
          <table:table-cell office:value-type="float" office:value="915247" table:style-name="ce1">
            <text:p>915247</text:p>
          </table:table-cell>
          <table:table-cell office:value-type="string" table:style-name="ce1">
            <text:p>russian</text:p>
          </table:table-cell>
          <table:table-cell office:value-type="string" table:style-name="ce1">
            <text:p>Билет 37.&amp;lt;br /&amp;gt; 1.Девочка 12 лет. Жалуется на боли в животе, на голодный желудок. Беспокоят также изжога, слабость, раздражительность. При обследовании: питания пониженного, язык влажный, обложен белым налетом, живот при пальпации мягкий, болезненный во всех отделах, более выраженная болезненность в эпигастрии, печень не увеличена, стул имеется склонность к запорам. Какие методы исследования нужно провести для уточнения диагноза? &amp;lt;br /&amp;gt; 2.Ребенку 6 месяцев. Температура тела 36,6 С. ЧДД 30 в минуту. Грудная клетка цилиндрической формы. Обе половины симметричные и одинаково участвуют в акте дыхания. Перкуторно над легким ясный легочный звук. Определите характер дыхания у него при аускультации легких?&amp;lt;br /&amp;gt;</text:p>
          </table:table-cell>
          <table:table-cell office:value-type="string" table:style-name="ce1">
            <text:p>MSkg0KHRg9C00Y8g0L/QviDQv9GA0LXQtNC+0YHRgtCw0LLQu9C10L3QvdGL0Lwg0YHQuNC80L/RgtC+0LzQsNC8LCDRgtCw0LrQuNC8INC60LDQujog0LHQvtC70Lgg0LIg0LbQuNCy0L7RgtC1INC90LAg0LPQvtC70L7QtCDQttC10LvRg9C00L7Quiwg0LjQt9C20L7Qs9CwLCDRgdC70LDQsdC+0YHRgtGMINC4INGA0LDQt9C00YDQsNC20LjRgtC10LvRjNC90L7RgdGC0Ywg0LTQtdC+0LLRh9C60LgsINGP0LfQsNC6INC+0LHQu9C+0LbQtdC90YvQuSDQsdC10LvRi9C8INC90LDQu9C10YLQvtC8LCDQsdC+0LvQtdC30L3QtdC90L3QvtGB0YLRjCDQttC40LLQvtGC0LAsINCy0YvRgNCw0LbQtdC90L3QsNGPINCx0L7Qu9C10LfQvdC10L3QvdC+0YHRgtGMINC40LzQtdC90L3QviDQsiDRjdC/0LjQs9Cw0YHRgtGA0LjQuCwg0LzQvdC1INC60LDQttC10YLRgdGPLCDRh9GC0L4g0YMg0LTQtdCy0L7Rh9C60Lgg0LLQvtC30LzQvtC20L3QviDQs9Cw0YHRgtGA0LjRgi4gINCU0LvRjyDQv9C+0LTRgtCy0LXRgNC20LTQtdC90LjRjyDRjdGC0L7Qs9C+INC00LjQsNCz0L3QvtC30LAg0L3QsNC8INC90YPQttC90L4g0L/RgNC+0LLQtdGB0YLQuCDQu9Cw0LHQvtGA0LDRgtC+0YDQvdGL0LUg0Lgg0LjQvdGB0YLRgNGD0LzQtdC90YLQsNC70YzQvdGL0LUg0LzQtdGC0L7QtNGLINC40YHRgdC70LXQtNC+0LLQsNC90LjRjy4g0Jog0LvQsNCxLdC90YvQvCDQvNC10YLQvtC00LDQvDog0LzRiyDQvNC+0LbQtdC8INCy0LfRj9GC0Ywg0L7QsdGJ0LjQuSDQsNC90LDQu9C40Lcg0LrRgNC+0LLQuCwg0LHQuNC+0YXQuNC80LjQuNGH0LXRgdC60LjQuSDQsNC90LDQu9C40Lcg0LrRgNC+0LLQuCwg0LAg0YLQsNC60LbQtSDQstC30Y/RgtGMINC90LAg0LDQvdCw0LvQuNC3INC20LXQu9GD0LTQvtGH0L3QvtC1INGB0L7QtNC10YDQttC40LzQvtC1INC00LvRjyDQstGL0Y/QstC70LXQvdC40Y8gSC5weWxvcmksINC60L7RgtC+0YDRi9C5INC80L7QttC10YIg0YLQvtGH0L3QviDRg9C60LDQt9Cw0YLRjCDQvdCwINCz0LDRgdGC0YDQuNGCLCDRgtCw0LrQttC1INC10YnQtSDQvNC+0LbQvdC+INC/0YDQvtCy0LXRgdGC0Lgg0LjRgdGB0LvQtdC00L7QstCw0L3QuNC1INGA0J0g0LbQtdC70YPQtNC60LAgKNC+0L3QviDQsdGD0LTQtdGCINC60LjRgdC70YvQvCkuICDQotCw0LrQttC1INC40Lcg0LjQvdGB0YLRgNGD0LzQtdC90YLQsNC70YzQvdGL0YUg0LzQtdGC0L7QtNC+0LIg0LzRiyDQvNC+0LbQtdC8INC/0YDQvtCy0LXRgdGC0Lgg0KTQk9CU0KEsINCj0JfQmCDQvtGA0LPQsNC90L7QsiDQsdGA0Y7RiNC90L7QuSDQv9C+0LvQvtGB0YLQuCwg0LAg0LjQvNC10L3QvdC+INC20LXQu9GD0LTQutCwLiDQndCwINCk0JPQlNChINC80Ysg0LzQvtC20LXQvCDRg9Cy0LjQtNC10YLRjCDRj9C30LLQvtGH0LrQuCwg0LzQtdGB0YLQsCDQstC+0YHQv9Cw0LvQtdC90LjRjyDQttC10LvRg9C00LrQsC4gICAgICAgICAgICAgICAgICA8YnIgLz4NCiAgIDIpINCSINC90L7RgNC80LUg0YMg0LTQtdGC0LXQuSDQtNC+IDYt0YLQuCDQvNC10YHRj9GG0LXQsiDQstGL0YHQu9GD0YjQsNC40LLQsNC10YLRgdGPINC+0YHQu9Cw0LHQu9C10L3QvdC+0LUg0LLQtdC30LjQutGD0LvRj9GA0L3QvtC1INC00YvRhdCw0L3QuNC1LiDQndC+INC/0L7RgdC70LUgNi3RgtC4INC80LXRgdGP0YbQtdCyINC4INC00L4gNS030LvQtdGCINC/0YDQuCDQsNGD0YHQutGD0LvRjNGC0LDRhtC40LgsINC90LDQtCDQu9C10LPQutC40LzQuCDQvNGLINC80L7QttC10Lwg0LLRi9GB0LvRg9GI0LjQstCw0YLRjCDQv9GD0Y3RgNC40LvRjNC90L7QtSDQtNGL0YXQsNC90LjQtS4gINCf0YPRjdGA0LjQu9GM0L3Ri9C8INC00YvRhdCw0L3QuNC10Lwg0LzQvtC20L3QviDQvdCw0LfQstCw0YLRjCDQs9GA0L7QvNC60L7QtSDQuCDQv9GA0L7QtNC+0LvQttC40YLQtdC70YzQvdC+0LUg0LTRi9GF0LDQvdC40LUg0LIg0L7QsdC10LjRhSDRhNCw0LfQsNGFINC00YvRhdCw0L3QuNGPLiAg0J/RgNC40YfQuNC90L7QuSDQv9GD0Y3RgNC40LvRjNC90L7Qs9C+INC00YvRhdCw0L3QuNGPINGP0LLQuy3RgdGPINC+0YHQvtCx0LXQvdC90L7RgdGC0Lgg0YHRgtGA0L7QtdC90LjRjyDQvtGA0LPQsNC90L7QsiDQtNGL0YXQsNC90LjRjyDRgyDQvNC70LDQtNC10L3RhtC10LI6IDEt0LzQsNC70LXQvdGM0LrQuNC5INGA0LDQt9C80LXRgCDQs9GA0YPQtNC90L7QuSDQutC70LXRgtC60LgsINGC0L4g0LXRgdGC0Ywg0L3QtdCx0L7Qu9GM0YjQvtC1ICjQutC+0YDQvtGC0LrQvtC1KSDRgNCw0YHRgdGC0YLQvtGP0L3QuNC1INC80LXQttC00YMg0LPQvtC70L7RgdC+0LLQvtC5INGJ0LXQu9GM0Y4g0Lgg0LzQtdGB0YLQvtC8INCy0YvRgdC70YPRiNC40LLQsNC90LjRjyDQtNGL0YXQsNC90LjRjywgIDIt0L3QtdCx0L7Qu9GM0YjQsNGPINGC0L7Qu9GJ0LjQvdCwINGB0YLQtdC90LrQuCDQs9GA0YPQtNC90L7QuSDQutC70LXRgtC60LgsINC60L7RgtC+0YDQsNGPINGF0L7RgNC+0YjQviDQv9GA0L7QstC+0LTQuNGCINCy0LjQsdGA0LDRhtC40Y4sIDMt0LLRi9GA0LDQttC10L3QvdC+0LUg0YDQsNC30LLRgtC40LUg0LjQvdGC0LXRgNGB0YLQuNGG0LjQsNC70YzQvdC+0Lkg0YLQutCw0L3QuCwgINC60L7RgtC+0YDQsNGPINGB0L3QuNC20LDQtdGCINCy0L7Qt9C00YPRiNC90L7RgdGC0Ywg0LvQtdCz0LrQuNGFLiDQn9C+0YHQu9C1IDct0LvQtdGCINGDICDRgNC10LHQtdC90LrQsCwg0YLQsNC60LbQtSDQutCw0Log0Lgg0YMg0LLQt9GA0L7RgdC70YvRhSDQvNC+0LbQvdC+INCy0YvRgdC70YPRiNC40LLQsNGC0Ywg0L3QvtGA0LzQsNC70YzQvdC+0LUg0LLQtdC30LjQutGD0LvRj9GA0L3QvtC1INC00YvRhdCw0L3QuNC1L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не полный ответ первого вопроса</text:p>
          </table:table-cell>
          <table:table-cell office:value-type="float" office:value="0" table:style-name="ce1">
            <text:p>0</text:p>
          </table:table-cell>
          <table:table-cell table:number-columns-repeated="16376"/>
        </table:table-row>
        <table:table-row table:style-name="ro1">
          <table:table-cell office:value-type="float" office:value="915303" table:style-name="ce1">
            <text:p>915303</text:p>
          </table:table-cell>
          <table:table-cell office:value-type="string" table:style-name="ce1">
            <text:p>russian</text:p>
          </table:table-cell>
          <table:table-cell office:value-type="string" table:style-name="ce1">
            <text:p>Билет 37.&amp;lt;br /&amp;gt; 1.Девочка 12 лет. Жалуется на боли в животе, на голодный желудок. Беспокоят также изжога, слабость, раздражительность. При обследовании: питания пониженного, язык влажный, обложен белым налетом, живот при пальпации мягкий, болезненный во всех отделах, более выраженная болезненность в эпигастрии, печень не увеличена, стул имеется склонность к запорам. Какие методы исследования нужно провести для уточнения диагноза? &amp;lt;br /&amp;gt; 2.Ребенку 6 месяцев. Температура тела 36,6 С. ЧДД 30 в минуту. Грудная клетка цилиндрической формы. Обе половины симметричные и одинаково участвуют в акте дыхания. Перкуторно над легким ясный легочный звук. Определите характер дыхания у него при аускультации легких?&amp;lt;br /&amp;gt;</text:p>
          </table:table-cell>
          <table:table-cell office:value-type="string" table:style-name="ce1">
            <text:p>MS7QnNC10YLQvtC00Ysg0LjRgdGB0LvQtdC00L7QstCw0L3QuNGPOiAxKdCz0LDRgdGC0YDQvtGB0LrQvtC/0LjRjyjQtdC5INCx0YPQtNC10YIg0LLQstC+0LTQuNGC0YHRjyDQs9Cw0YHRgtGA0L7RgdC60L7Qvy3RjdGC0L4g0LPQuNCx0LrQsNGPINGC0YDRg9Cx0LrQsCDRgSDQutCw0LzQtdGA0L7QuSDQvdCwINC60L7QvdGG0LUu0LLQstC+0LTQuNGC0YHRjyDQv9C10YDQvtGA0LDQu9GM0L3Qvi7QtNC70Y8g0L7RgdC80L7RgtGA0LAg0YHQu9C40LfQuNGB0YLQvtC5INC+0LHQvtC70L7Rh9C60Lgg0L7RgNCz0LDQvdC+0LIg0LHRgNGO0YjQvdC+0Lkg0L/QvtC70L7RgdGC0Lgg0Lgg0LTQuNCw0LPQvdC+0YHRgtC40LrQuCDQv9GA0LjQvNC10YDQvdC+0LPQviDQtNC40LDQs9C90L7Qt9CwKS4yKdCb0LDQsdC+0YDQvtGC0L7RgNC90YvQtSAg0LjRgdGB0LvQtdC00L7QstCw0L3QuNGPOtCd0LDQv9GA0LjQvNC10YAg0L7QsdGJ0LjQuSDQsNC90LDQu9C40Lcg0LrRgNC+0LLQuCDQtNC70Y8g0L/RgNC+0LLQtdGA0LrQuCDQvtCx0YnQtdCz0L4g0YHQvtGB0YLQvtGP0L3QuNGPINC+0YDQs9Cw0L3QuNC30LzQsCDQuCDRgi7QtC4g0Lgg0JDQvdCw0LvQuNC3INC60LDQu9CwLNC00LvRjyDRgtC+0LPQviDRh9GC0L7QsdGLINC/0L7RgdC80L7RgtGA0LXRgtGMINC90LDQu9C40YfQuNC1INC60LDQutC40YUg0LvQuNCx0L4g0LjQvdC+0YDQvtC00L3Ri9GFINC80LDRgdGBKNC60YDQvtCy0Ywg0LjQu9C4INGB0LvQuNC30YwpINCyINC60LDQu9C1LNC90L4g0LjQty3Qt9CwINGC0L7Qs9C+LNGH0YLQviDQtNC10LLQvtGH0LrQsCDQuNC80LXQtdGCINGB0LrQu9C+0L3QvdC+0YHRgtGMINC6INC30LDQv9C+0YDQsNC8LNGN0YLQviDQsdGD0LTQtdGCINC90LXQvNC90L7Qs9C+INC30LDRgtGA0YPQtNC90LXQvdC+LjMp0KPQt9C4INCx0YDRjtGI0L3QvtC5INC/0L7Qu9C+0YHRgtC4INC00LvRjyDQv9C+0LjRgdC60LAg0LrQsNC60LjRhdC70LjQsdC+INC/0LDRgtC+0LvQvtCz0LjQuSDRgdCy0Y/Qt9Cw0L3QvdGL0YUg0YEg0LbQtdC70YPQtNC+0YfQvdC+LdC60LjRiNC10YfQvdGL0Lwg0YLRgNCw0LrRgtC+0Lws0LAg0LjQvNC10L3QvdC+INC+0YDQs9Cw0L3QvtCyINCx0YDRjtGI0L3QvtC5INC/0L7Qu9C+0YHRgtC4KNC90LDQv9GA0LjQvNC10YAs0YHQtdC70LXQt9C10L3QutCwLNC/0L7QtNC20LXQu9GD0LTQvtGH0L3QsNGPINC20LXQu9C10LfQsCzQttC10LvRg9C00L7QuiDQuCDQtNGALikuNCnQlNC+0L/QvtC70L3QuNGC0LXQu9GM0L3Ri9C1INC40YHRgdC70LXQtNC+0LLQsNC90LjRjzrQvNC+0LbQvdC+INC/0YDQvtCy0LXRgdGC0Lgg0L7RhtC10L3QutGDINGA0J0g0LIg0LrQuNGI0LXRh9C90LjQutC1INC00LvRjyDQuNC30LzQtdGA0LXQvdC40Y8g0LrQuNGB0LvQvtGC0L3QvtGB0YLQuCDRgdGA0LXQtNGLLiDQnNCw0L3QvtC80LXRgtGA0LjRj9C00LvRjyDQuNC30LzQtdGA0LXQvdC40Y8g0LTQsNCy0LvQtdC90LjRjyDQstCx0YDRjtGI0L3QvtC5INC/0L7Qu9C+0YHRgtC4LNGH0YLQvtCx0Ysg0LLRi9GP0LLQuNGC0Ywg0L3QsNC70LjRh9C40LUg0YDQtdGE0LvRjtC60YHQsCDQuNC70Lgg0LXRgdC70Lgg0L7QvSDQv9C+0LTQvtC30YDQtdCy0LDQtdGC0YHRjy7QnNC+0LbQvdC+INCx0YvQu9C+ICDQsdGLINC10YnQtSDQtNC+0LHQsNCy0LjRgtGMINGA0LXQvdGC0LPQtdC90L7Qs9GA0LDRhNC40Y4g0LTQu9GPINGD0YHRgtCw0L3QvtCy0LvQtdC90LjRjyDQvdCw0LvQuNGH0LjRjyDQutCw0LrQuNGFINC70LjQsdC+INC90L7QstC+0L7QsdGA0LDQt9C+0LLQsNC90LjQuSDQuNC70Lgg0LTQtdGE0L7RgNC80LDRhtC40Lgg0L7RgNCz0LDQvdC+0LIg0LHRgNGO0YjQvdC+0Lkg0L/QvtC70L7RgdGC0Lgs0L3QviDQv9C+0LrQsCDQtNGD0LzQsNGOINC/0YDQtdC00YvQtNGD0YnQuNGFINCx0YPQtNC10YIg0LHQvtC70LXQtSzRh9C10Lwg0LTQvtGB0YLQsNGC0L7Rh9C90L4uPGJyIC8+DQoyLtCf0YPRjdGA0LjQu9GM0L3QvtC1INC00YvRhdCw0L3QuNC1LdCz0YDQvtC80LrQuNC5INC4INC/0YDQvtC00L7Qu9C20LjRgtC10LvRjNC90YvQuSDQtNGL0YXQsNGC0LXQu9GM0L3Ri9C5INGI0YPQvCDQsiDQvtCx0LXQuNGFINGE0LDQt9Cw0YUu0L/RgNC4INCy0LTQvtGF0LUg0Lgg0LLRi9C00L7RhdC1LiDRhdCw0YDQsNC60YLQtdGA0L3QvtC1INC00LvRjyDQtNC10YLQtdC5INGN0YLQvtCz0L4g0LLQvtC30YDQsNGB0YLQsCDQuCDQtNC+INCz0L7QtNCwLNC/0YDQvtC40YHRhdC+0LTQuNGCINGN0YLQviDQuNC3LdC30LAg0LjRhSDQsNC90LDRgtC+0LzQvi3RhNC40LfQuNC+0LvQvtCz0LjRh9C10YHQutC40YUg0L7RgdC+0LHQtdC90L3QvtGB0YLQtdC5LNGC0LDQutC40YUg0LrQsNC6IDEp0LrQvtGA0L7RgtC60L7QtSDRgNCw0YHRgdGC0L7Rj9C90LjQtSDQvtGCINC80LXRgdGC0LAg0LPQvtC70L7RgdC+0LLRi9GFINGJ0LXQu9C10Lkg0LTQviDQvNC10YHRgiDQv9GA0L7RgdC70YPRiNC40LLQsNC90LjQuSjQuNC3LdC30LAg0YDQsNC30LzQtdGA0L7QsiDQs9GA0YPQtNC90L7QuSDQutC70LXRgtC60Lgg0YMg0LTQtdGC0LXQuSkuMinQn9GA0L7RgdCy0LXRgiDQsdGA0L7QvdGF0L7QsiDQtNC+0YHRgtCw0YLQvtGH0L3QviDRg9C30L7QuiAuMynQk9GA0YPQtNC90LDRjyDQutC70LXRgtC60LAg0LLQv9GA0LjQvdGG0LjQv9C1INC80LDQu9CwLNC/0YDQuCDRjdGC0L7QvCDQstGB0LXQvCDRgdGC0LXQvdC60LAg0LPRgNGD0LTQvdC+0Lkg0LrQu9C10YLQutC4INGN0LvQsNGB0YLQuNGH0L3QsCDQuCDQtNC+0YHRgtCw0YLQvtGH0L3QviDRgtC+0L3QutCw0Y8u0YfRgtC+INGD0YHQuNC70LjQstCw0LXRgiDQv9GA0L7RgdC70YPRiNC40LLQsNC90LjQtSDQstC40LHRgNCw0YbQuNC4LjQp0KHQvdC40LbQsNC10YLRgdGPINGD0YDQvtCy0LXQvdGMINCy0L7Qt9C00YPRiNC90L7RgdGC0Lgg0YLQutCw0L3QuC7Qv9C+0YLQvtC80YMg0YfRgtC+INC90LDRh9C40L3QsNC10YIg0YDQsNC30LLQuNCy0LDRgtGM0YHRjyDQuNC90YLQtdGA0YHRgtC40YbQuNCw0LvRjNC90LDRjyDRgtC60LDQvdGMLtCS0YHQtSDRjdGC0Lgg0YTQsNC60YLQvtGA0Ysg0LTRi9GF0LDRgtC10LvRjNC90L7QuSDRgdC40YHRgtC10LzRiyDQtNC10YLQtdC5INC00L4g0LPQvtC00LAg0LjRhSDQttC40LfQvdC4INCyINGB0L7QstC+0LrRg9C/0L3QvtGB0YLQuCDRgdC/0L7RgdC+0LHRgdGC0LLRg9GO0YIg0L3QsNC70LjRh9C40Y4g0YMg0L3QuNGFINC/0YPRjdGA0LjQu9GM0L3QvtCz0L4g0LTRi9GF0LDQvdC40Y8u</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по второму вопросу не указан возраст ребенка , у которого пуэрильное дыхание.По первому вопросу не указан б/химический анализ крови</text:p>
          </table:table-cell>
          <table:table-cell office:value-type="float" office:value="0" table:style-name="ce1">
            <text:p>0</text:p>
          </table:table-cell>
          <table:table-cell table:number-columns-repeated="16376"/>
        </table:table-row>
        <table:table-row table:style-name="ro1">
          <table:table-cell office:value-type="float" office:value="915566" table:style-name="ce1">
            <text:p>915566</text:p>
          </table:table-cell>
          <table:table-cell office:value-type="string" table:style-name="ce1">
            <text:p>russian</text:p>
          </table:table-cell>
          <table:table-cell office:value-type="string" table:style-name="ce1">
            <text:p>Билет 37.&amp;lt;br /&amp;gt; 1.Девочка 12 лет. Жалуется на боли в животе, на голодный желудок. Беспокоят также изжога, слабость, раздражительность. При обследовании: питания пониженного, язык влажный, обложен белым налетом, живот при пальпации мягкий, болезненный во всех отделах, более выраженная болезненность в эпигастрии, печень не увеличена, стул имеется склонность к запорам. Какие методы исследования нужно провести для уточнения диагноза? &amp;lt;br /&amp;gt; 2.Ребенку 6 месяцев. Температура тела 36,6 С. ЧДД 30 в минуту. Грудная клетка цилиндрической формы. Обе половины симметричные и одинаково участвуют в акте дыхания. Перкуторно над легким ясный легочный звук. Определите характер дыхания у него при аускультации легких?&amp;lt;br /&amp;gt;</text:p>
          </table:table-cell>
          <table:table-cell office:value-type="string" table:style-name="ce1">
            <text:p>MSnQstC+0L/RgNC+0YE60L3QsCDQvtCx0YHQu9C10LTQvtCy0LDQvdC40Lkg0LTQtdCy0L7Rh9C60LAgMTIg0LvQtdGCLNC20LDQu9C+0LHRiyDQvdCwINCz0L7Qu9C+0LTQvdGL0Lkg0LbQtdC70YPQtNC+0Los0LAg0YLQsNC60LbQtSDQsdC+0LvQuCzRjdGC0L4g0LPQvtCy0L7RgNC40YIg0L4g0L3QsNGA0YPRiNC10L3QuNGP0YUg0LIg0LbQtdC70YPQtNC+0YfQvdC+LdC60LjRiNC10YfQvdC+0Lwg0YLRgNCw0LrRgtC1LNGC0LDQuiDQttC1INCx0LXRgdC/0L7QutC+0Y/RgiDQuNC30LbQvtCz0LAs0YHQu9Cw0LHQvtGB0YLRjCDQuCDRgNCw0LfQtNGA0LDQttC40YLQtdC70YzQvdC+0YHRgtGMLdCz0L7QstC+0YDQuNGCINC+0LEg0L7QsdGJ0LXQuSDRgdC70LDQsdC+0YHRgtC4LNGC0LDQuiDQttC1INGB0LrQu9C+0L3QvdC+0YHRgtGMINC6INC30LDQv9C+0YDQsNC8LtCU0LDQvdC90YPRjiDQv9Cw0YbQuNC10L3RgtC60YMg0L3QtdC+0LHRhdC+0LTQuNC80L4g0YHQvdCw0YfQsNC70LAg0L7RgdC80L7RgtGA0LXRgtGMINCy0LjQt9GD0LDQu9GM0L3QvizRgdC+0LHRgNCw0YLRjCDQv9C+0LvQvdGL0Lkg0LDQvdCw0LzQvdC10Lco0YLQsNC6INC20LUg0L/QvtCz0L7QstC+0YDQuNGC0Ywg0YEg0LHQu9C40LfQutC40LzQuCDRgNC+0LTRgdGC0LLQtdC90L3QuNC60LDQvNC4INC4INGD0YLQvtGH0L3QuNGC0Ywg0LXQtSDQvtCx0YnQtdC1INGB0L7RgdGC0L7Rj9C90LjQtSDRgSDRgtC+0LPQviDQvNC+0LzQtdC90YLQsCzQutCw0Log0L7QvdCwINC30LDQsdC+0LvQtdC70LApLtCU0LvRjyDQtNCw0LvRjNC90LXQudGI0LXQs9C+INGD0YLQvtGH0L3QtdC90LjRjyDQtNC40LDQs9C90L7Qt9CwLNC90LXQvtCx0YXQvtC00LjQvNC+INC/0YDQvtCy0LXRgdGC0Lgg0YHQu9C10LTRg9GO0YnQuNC1INC40YHRgdC70LXQtNC+0LLQsNC90LjRjzoxLdGA0LXQvdGC0LPQtdC9LdC90LXQvtCx0YXQvtC00LjQvCDQtNC70Y8g0LjRgdC60LvRjtGH0LXQvdC40Y8g0LjQu9C4INC20LUg0L/QvtC00YLQstC10YDQttC00LXQvdC40Y8g0LTQuNCw0LPQvdC+0LfQsCDQv9Cw0YLQvtC70L7Qs9C40Lkg0LvQtdCz0LrQuNGFINC4INGC0LQsMi3QvtCx0YnQuNC5INCw0L3QsNC70LjQtyDQutGA0L7QstC4LNC00LvRjyDQstGL0Y/QstC70LXQvdC40Y8g0L3QvtGA0LzRiyDQuNC70Lgg0L/QvtCy0YvRiNC10L3QvdC+0LPQvi/Qv9C+0L3QuNC20LXQvdC90L7Qs9C+INGH0LjRgdC70LAg0L7RgdC90L7QstC90YvRhSDQv9C+0LrQsNC30LDRgtC10LvQtdC5KNGN0YDQuNGC0YDQvtGG0LjRgtC+0LIs0Y3RgNC40YLRgNC+0YbQuNGC0L7Qv9C10L3QuNGPINC40LvQuCDRjdGA0LjRgtGA0L7RhtC40YLQvtC/0L7RjdC3KSzQu9C10LnQutC+0YbQuNGC0Yss0YHQutC+0YDQvtGB0YLRjCDQvtGB0LXQtNCw0L3QuNGPINGN0YDQuNGC0YDQvtGG0LjRgtC+0LIs0LrQvtC80L/QvtC90LXQvdGC0Ysg0LHQtdC70L7QuSzQutGA0LDRgdC90L7QuSDQutGA0L7QstC4INC4INGC0LQs0LAg0YLQsNC6INC20LUg0LTQu9GPINCy0YvRj9Cy0LvQtdC90LjRjyDQstC+0YHQv9Cw0LvQuNGC0LXQu9GM0L3Ri9GFINC/0YDQvtGG0LXRgdGB0L7QsiwzLdC+0LHRidC40Lkg0LDQvdCw0LvQuNC3INC80L7Rh9C4LdC80L7QttC10YIg0LPQvtCy0L7RgNC40YLRjCDQviDQv9C+0LLRi9GI0LXQvdC40Lkg0LzQvtGH0LXQstC+0Lkg0LrQuNGB0LvQvtGC0Yso0LPQuNC/0LXRgNGD0YDQuNC60LXQvNC40LgpINC40LvQuCDQuNC90YvRhSDQv9C+0LrQsNC30LDRgtC10LvQtdC5INC40YHQutC70Y7Rh9Cw0Y7RidC40YUg0LjQu9C4INC/0L7QtNGC0LLQtdGA0LbQtNCw0Y7RidC40YUg0LHQvtC70LXQt9C90YwsNC3Qo9CX0Jgo0YPQu9GM0YLRgNCwLdC30LLRg9C60L7QstC+0LUg0LjRgdGB0LvQtdC00L7QstCw0L3QuNC1INCx0YDRjtGI0L3QvtC5INC/0L7Qu9C+0YHRgtC4KS3QtNC70Y8g0Y/RgdC90L7Qs9C+INC/0L7QtNGC0LLQtdGA0LbQtNC10L3QuNGPINC00LjQsNCz0L3QvtC30LAg0LjQu9C4INC10LPQviDQuNGB0LrQu9GO0YfQtdC90LjRjyzQvtCx0YHQu9C10LTQvtCy0LDQvdC40LUg0L/QtdGH0LXQvdC4LNGB0LXQu9C10LfQtdC90LrQuCzQttC10LvRh9C90L7Qs9C+INC/0YPQt9GL0YDRjyw1LdCz0LDRgdGC0YDQvtGB0LrQvtC/0LjRjyjQv9GA0Lgg0L7QsdGB0LvQtdC00L7QstCw0L3QuNC4INC40YHQv9C+0LvRjNC30YPQtdGC0YHRjyDQs9C40LHQutCw0Y8g0YLRgNGD0LHQsCDRgSDQutCw0LzQtdGA0L7QuSks0L7QvSDQv9C+0LzQsNCz0LDQtdGCINC00LvRjyDQstGL0Y/QstC70LXQvdC40Y8g0LLQvtGB0L/QsNC70LXQvdC40Y8s0LAg0YLQsNC6INC20LUg0LjQt9C80LXQvdC10L3QuNGP0YUg0LIg0YHQu9C40LfQuNGB0YLQvtC5INC+0LHQvtC70L7Rh9C60LUsNi3QvtCx0YnQuNC5INCw0L3QsNC70LjQtyDQutCw0LvQsCjQvNC+0LbQtdGCINGD0LrQsNC30YvQstCw0YLRjCDQvdCwINC60YDQvtCy0L7RgtC10YfQtdC90LjRjyDQsiDQltCa0KIpLtCi0LDQuiDQttC1INC40YHRgdC70LXQtNC+0LLQsNC90LjQtSDRhNGD0L3QutGG0LjQvtC90LDQu9GM0L3QvtCz0L4g0YHQvtGB0YLQvtGP0L3QuNGPINCW0JrQoijQvtC/0YDQtdC00LXQu9C10L3QuNC1IHBoKSDQtNC70Y8g0LjQt9C80LXRgNC10L3QuNGPINC60LjRgdC70L7RgtC90L7RgdGC0Lgg0LIg0LbQtdC70YPQtNC60LUu0JLRi9Cy0L7QtDrQlNC70Y8g0YPRgtC+0YfQvdC10L3QuNGPINC00LjQsNCz0L3QvtC30LAg0L3QtdC+0LHRhdC+0LTQuNC80L4g0L/RgNC+0LLQtdGB0YLQuCDQtNCw0L3QvdGL0LUg0LjRgdGB0LvQtdC00L7QstCw0L3QuNGPLjxiciAvPg0KMinQn9GA0Lgg0L7QsdGB0LvQtdC00L7QstCw0L3QuNC5INGA0LXQsdC10L3QutCwIDYt0YLQuCDQvNC10YHRj9GG0LXQsijRgNC10LHQtdC90L7QuiDQsiDQsdC+0LvRjNGI0LXQvCDRgdC70YPRh9Cw0LUg0LIg0LPRgNGD0LTQvdC+0Lwg0LLRgdC60LDRgNC80LvQuNCy0LDQvdC40Lkv0L/QuNGC0LDQtdGC0YHRjyDQtNC10YLRgdC60LjQvNC4INC/0L7RgNC+0YjQutCw0LzQuCks0YLQtdC80L/QtdGA0LDRgtGD0YDQsCAzNiw2LdC90L7RgNC80LAs0YfQsNGB0YLQvtGC0LAg0YHQtdGA0LTQtdGH0L3Ri9GFINGB0L7QutGA0LDRidC10L3QuNC5IDMwINCyINC80LjQvdGD0YLRgyAs0LPRgNGD0LTQvdCw0Y8g0LrQu9C10YLQutCwINGG0LjQu9C40L3QtNGA0LjRh9C10YHQutC+0Lkg0YTQvtGA0LzRiy3QvdC+0YDQvNCwKNC/0LDRgtC+0LvQvtCz0LjRjyDQsdC+0YfQutC+0L7QsdGA0LDQt9C90LDRjyDQuCDRgtC0KSzQtNGA0YPQs9C40LUg0LTQsNC90L3Ri9C1INGC0LDQuiDQttC1INCyINC90L7RgNC80LUu0J3QsCDQt9Cw0L3Rj9GC0LjRj9GFINC/0LXQtNC40LDRgtGA0LjQuSAs0LzRiyDQuNC30YPRh9Cw0LvQuCDQutCw0Log0L/QtdGA0LrRg9GC0LjRgNC+0LLQsNGC0Yws0L/QsNC70YzQv9C40YDQvtCy0LDRgtGMINC4INCw0YPRgdC60YPQu9GM0YLQuNGA0L7QstCw0YLRjCDQtNC10YLQtdC5LNCyINC00LDQvdC90L7QvCDRgdC70YPRh9Cw0LUg0L3QtdC+0LHRhdC+0LTQuNC80L4g0L7Qv9GA0LXQtNC10LvQuNGC0Ywg0YXQsNGA0LDQutGC0LXRgCDQtNGL0YXQsNC90LjRjyDRgyDRgNC10LHQtdC90LrQsCDQv9GA0Lgg0LDRg9GB0LrRg9C70YzRgtCw0YbQuNC5INC70LXQs9C60LjRhS7QkNGD0YHQutGD0LvRjNGC0LDRhtC40Y4g0LzQvtC20LXRgiDQv9GA0L7QstC+0LTQuNGC0Ywg0LLRgNCw0Ycg0L/QtdC00LjQsNGC0YAo0L/RgNC4INCw0YPRgdC60YPQu9GM0YLQsNGG0LjQuSDRgNGD0LrQuCDQstGA0LDRh9CwINC00L7Qu9C20L3RiyDQsdGL0YLRjCDRh9C40YHRgtGL0LzQuCzRhNC+0L3QtdC90LTQvtGB0LrQvtC/L9GB0YLQtdGC0L7RgdC60L7QvyDQtNC+0LvQttC10L0g0LHRi9GC0Ywg0YLQtdC/0LvRi9C8INC00LvRjyDRgtC10LvQsCDRgNC10LHQtdC90LrQsCzQsiDRgtC10L/Qu9C+0Lwg0L/QvtC80LXRidC10L3QuNC5KS7Qn9GA0Lgg0LDRg9GB0LrRg9C70YzRgtCw0YbQuNC5ICDQvdC40LbQtdGB0LvQtdC00YPRjtGJ0LjQtSDQv9C+0LrQsNC30LDRgtC10LvQuCA60LIg0L3QvtGA0LzQtSDRgyDRgNC10LHQtdC90LrQsCAg0LLRi9GP0LLQu9C10L3QviDQv9GD0Y3RgNC40LvRjNC90L7QtSDQtNGL0YXQsNC90LjQtSzQtNGL0YXQsNGC0LXQu9GM0L3Ri9C5INGI0YPQvCDRgyDRgNC10LHQtdC90LrQsCDQs9GA0L7QvNC60LjQuSzQsCDRgtCw0Log0LbQtSDQv9GA0L7QtNC+0LvQttC40YLQtdC70YzQvdGL0Lkg0LIg0LTQstGD0YUg0YTQsNC30LDRhSDQtNGL0YXQsNC90LjRjy7QmNC80LXRjtGC0YHRjyDQvtGB0L7QsdC10L3QvdC+0YHRgtC4OtC80LDQu9C10L3RjNC60L7QtSjQutC+0YDQvtGC0LrQvtC1KdGA0LDRgdGB0YLQvtGP0L3QuNC1INC+0YIg0YnQtdC70Lgg0LTQviDQvNC10YHRgtCwINCw0YPRgdC60YPQu9GM0YLQsNGG0LjQuSAg0YLQsNC6INC20LUg0LrQvtGA0L7RgtC60L7QtSjQuNC3LdC30LAg0YTQuNC30LjQvtC70L7Qs9C40YfQtdGB0LrQuNGFINC+0YHQvtCx0LXQvdC90L7RgdGC0LXQuSzRgtCw0Log0LrQsNC6INCz0YDRg9C00L3QsNGPINC60LvQtdGC0LrQsCDQvNCw0LvQtdC90YzQutCw0Y8pLNC/0YDQvtGB0LLQtdGCINCx0YDQvtC90YXQvtCyINGD0LfQutC40Lks0YHRgtC10L3QutCwINCz0YDRg9C00L3QvtC5INC60LvQtdGC0LrQuCDQsdC+0LvQtdC1INGN0LvQsNGB0YLQuNGH0L3QsNGPKNC70L7QutCw0LvQuNC30L7QstCw0L3RiyDQvNC90L7Qs9C+INGN0LvQsNGB0YLQuNGH0L3Ri9GFINC60LvQtdGC0L7Quiks0YLQvtC70YnQuNC90LAg0LzQsNC70LXQvdGM0LrQsNGPLNC40Lct0LfQsCDQutC+0YLQvtGA0L7QuSDQv9GA0L7QuNGB0YXQvtC00LjRgiDQstC40LHRgNCw0YbQuNGPLdCy0L7Qt9C00YPRiNC90L7RgdGC0Ywg0YLQutCw0L3QuCDQu9C10LPQutC40YUg0YHQttC40LzQsNC10YLRgdGPICzRgtCw0Log0LrQsNC6INGA0LDQt9Cy0LjQstCw0LXRgtGB0Y8g0LjQvdGC0LXRgNGB0YLQuNGG0LjQsNC70YzRgtC90LDRjyDRgtC60LDQvdGMLtCS0YvQstC+0LQ60L/RgNC4INCw0YPRgdC60YPQu9GM0YLQsNGG0LjQuSDQstGA0LDRhyDQstGL0Y/QstC70Y/QtdGCINCy0YvRiNC10L/QtdGA0LXRh9C40YHQu9C10L3QvdGL0LUg0L/QvtC60LDQt9Cw0YLQtdC70Lgg0YMg0YDQtdCx0LXQvdC60LAu</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по первому вопросу не указан Рентген желудка, б/ химический анализ крови, Рн метрия желудка. Не указано до какого возраста пуэрильное дыхание бывает</text:p>
          </table:table-cell>
          <table:table-cell office:value-type="float" office:value="0" table:style-name="ce1">
            <text:p>0</text:p>
          </table:table-cell>
          <table:table-cell table:number-columns-repeated="16376"/>
        </table:table-row>
        <table:table-row table:style-name="ro1">
          <table:table-cell office:value-type="float" office:value="915667" table:style-name="ce1">
            <text:p>915667</text:p>
          </table:table-cell>
          <table:table-cell office:value-type="string" table:style-name="ce1">
            <text:p>russian</text:p>
          </table:table-cell>
          <table:table-cell office:value-type="string" table:style-name="ce1">
            <text:p>Билет 37.&amp;lt;br /&amp;gt; 1.Девочка 12 лет. Жалуется на боли в животе, на голодный желудок. Беспокоят также изжога, слабость, раздражительность. При обследовании: питания пониженного, язык влажный, обложен белым налетом, живот при пальпации мягкий, болезненный во всех отделах, более выраженная болезненность в эпигастрии, печень не увеличена, стул имеется склонность к запорам. Какие методы исследования нужно провести для уточнения диагноза? &amp;lt;br /&amp;gt; 2.Ребенку 6 месяцев. Температура тела 36,6 С. ЧДД 30 в минуту. Грудная клетка цилиндрической формы. Обе половины симметричные и одинаково участвуют в акте дыхания. Перкуторно над легким ясный легочный звук. Определите характер дыхания у него при аускультации легких?&amp;lt;br /&amp;gt;</text:p>
          </table:table-cell>
          <table:table-cell office:value-type="string" table:style-name="ce1">
            <text:p>MS4g0JjRgdGF0L7QtNGPINC40Lcg0LbQsNC70L7QsSDQvNGLINCy0LjQtNC40Lwg0YfRgtC+INGDINGA0LXQsdC10L3QutCwINC/0YDQvtCx0LvQtdC80Ysg0YEg0JbQmtCiLiDQlNC70Y8g0YPRgtC+0YfQvdC10L3QuNC1INC00LjQsNCz0L3QvtC30LAgINGDINGA0LXQsdC10L3QutCwINGBINGC0LDQutC40LzQuCDQttCw0LvQvtCx0LDQvNC4INC60LDQuiDQsdC+0LvQuCDQsiDQttC40LLQvtGC0LUsINC40LfQttC+0LPQsCwg0YHQu9Cw0LHQvtGB0YLRjCwg0LAg0YLQsNC60LbQtSDRgSDRgtCw0LrQuNC80Lgg0YHQuNC80L/RgtC+0LzQsNC80LggLSDRj9C30YvQuiDQvtCx0LvQvtC20LXQvSDQsdC10LvRi9C8INC90LDQu9C10YLQvtC8LCDQttC40LLQvtGCINCx0L7Qu9C10LfQvdC10L3QvdGL0Lkg0LLQviDQstGB0LXRhSDQvtGC0LTQtdC70LDRhSwg0L3QtdC+0LHRhdC+0LTQuNC80L4g0L/RgNC+0LLQtdGB0YLQuCDQutC+0LzQv9C70LXQutGB0L3QvtC1INC+0LHRgdC70LXQtNC+0LLQsNC90LjQtSDRgSDQsNC60YbQtdC90YLQvtC8INC90LAg0LLQtdGA0YXQvdC40Lkg0L7RgtC00LXQuyDQltCa0KIuPGJyIC8+DQrQk9Cw0YHRgtGA0L7RgdC60L7Qv9C40Y8g0Y3RgtC+INC40YHRgdC70LXQtNC+0LLQsNC90LjQtSDQv9GA0Lgg0LrQvtGC0L7RgNC+0Lwg0LLRgNCw0Ycg0LLQstC+0LTQuNGCINCz0LDRgdGC0YDQvtGB0LrQvtC/KNCz0LjQsdC60YPRjiDRgtGA0YPQsdC60LAg0YEg0LrQsNC80LXRgNC+0LkpINGH0LXRgNC10Lcg0YDQvtGC0L7QstGD0Y4g0L/QvtC70L7RgdGC0Ywg0L/QsNGG0LjQtdC90YLQsCDQtNC70Y8g0LLQuNC30YPQsNC70LjQt9Cw0YbQuNC4INCy0L3Rg9GC0YDQtdC90L3QtdC5INGB0YLQtdC90LrQuCDQttC10LvRg9C00LrQsC4g0K3RgtC+INC80L7QttC10YIg0L/QvtC80L7Rh9GMINCy0YvRj9Cy0LjRgtGMINC90LDQu9C40YfQuNC1INCy0L7RgdC/0LDQu9C10L3QuNGPLCDRj9C30LIg0LjQu9C4INC00YDRg9Cz0LjRhSDQuNC30LzQtdC90LXQvdC40Lkg0LIg0YHQu9C40LfQuNGB0YLQvtC5INC+0LHQvtC70L7Rh9C60LUuPGJyIC8+DQrQpNC40LHRgNC+0LPQsNGB0YLRgNC+0LTRg9C+0LTQtdC90L7RgdC60L7Qv9C40Y8gKNCk0JPQlNChKS0g0LTQu9GPINCy0LjQt9GD0LDQu9GM0L3QvtC5INC+0YbQtdC90LrQuCDRgdC70LjQt9C40YHRgtC+0Lkg0L7QsdC+0LvQvtGH0LrQuCDQttC10LvRg9C00LrQsCDQuCDQtNCy0LXQvdCw0LTRhtCw0YLQuNC/0LXRgNGB0YLQvdC+0Lkg0LrQuNGI0LrQuCwg0LTQu9GPINCy0YvRj9Cy0LvQtdC90LjQtSDRjdGA0L7Qt9C40LksINGP0LfQsiDQuNC70Lgg0L/RgNC40LfQvdCw0LrQvtCyINCy0L7RgdC/0LDQu9C10L3QuNGPICjQs9Cw0YHRgtGA0LjRgtCwLCDQtNGD0L7QtNC10L3QuNGC0LApLjxiciAvPg0K0KPRgNC10LDQt9C90YvQuSDQtNGL0YXQsNGC0LXQu9GM0L3Ri9C5INGC0LXRgdGCINC40LvQuCDQuNGB0YHQu9C10LTQvtCy0LDQvdC40LUg0L3QsCBILiBweWxvcmksINC+0L3QsCDQuNGB0L/QvtC70YzQt9GD0LXRgtGB0Y8g0LTQu9GPINCy0YvRj9Cy0LvQtdC90LjQtSDQuNC90YTQtdC60YbQuNC4KNCyINGH0LDRgdGC0L3QvtGB0YLQuCDRhdC10LvQuNC60L7QsdCw0LrRgtC+0YDQvtCyKSwg0LrQvtGC0L7RgNCw0Y8g0YfQsNGB0YLQviDRj9Cy0LvRj9C10YLRgdGPINC/0YDQuNGH0LjQvdC+0Lkg0YXRgNC+0L3QuNGH0LXRgdC60L7Qs9C+INCz0LDRgdGC0YDQuNGC0LAg0Lgg0Y/Qt9Cy0LXQvdC90L7QuSDQsdC+0LvQtdC30L3QuC4gPGJyIC8+DQrQo9C30Lgg0L7RgNCz0LDQvdC+0LIg0LHRgNGO0YjQvdC+0Lkg0L7QsdC70LDRgdGC0LgsINC/0YDQuNC80LXQvdGP0LXRgtGB0Y8g0LTQu9GPINC40YHQutC70Y7Rh9C10L3QuNC1INC/0LDRgtC+0LvQvtCz0LjQuCDQv9C10YfQtdC90LgsINC/0L7QtNC20LXQu9GD0LTQvtGH0L3QvtC5INC20LXQu9C10LfRiyDQuCDQttC10LvRh9C90L7Qs9C+INC/0YPQt9GL0YDRjy4gPGJyIC8+DQrQmtC70LjQvdC40YfQtdGB0LrQuNC5INCw0L3QsNC70LjQtyDQutGA0L7QstC4IC0g0LzQvtC20LXRgiDQsdGL0YLRjCDRgyDRgNC10LHQtdC90LrQsCDQsNC90LXQvNC40Y8sINGC0LDQuiDQutCw0Log0YHQu9Cw0LHQvtGB0YLRjCDQvdCw0LHQu9GO0LTQsNC10YLRgdGPINC/0YDQuNGH0LjQvdCw0LzQuCDQutC+0YLQvtGA0L7Qs9C+INC80L7QttC10YIg0LHRi9GC0Ywg0LTQtdGE0LjRhtC40YIg0LbQtdC70LXQt9CwINC4INCy0LjRgtCw0LzQuNC90LAg0JIxMi4g0JjQu9C4INC20LUg0L/RgNC4INCy0L7RgdC/0LDQu9C40YLQtdC70YzQvdGL0YUg0LjQvdGE0LXQutGG0LjRjyDQv9C+0LLRi9GI0LXQvdC40LUg0KHQntCtLCDQsCDRgtCw0LrQttC1INC/0L7QstGL0YjQtdC90LjQtSDQu9C10LnQutC+0YbQuNGC0L7Qsi48YnIgLz4NCtCb0JDQsdC+0YDQsNGC0L7RgNC90YvQuSDQuNGB0YHQu9C10LTQvtCy0LDQvdC40LU6IDxiciAvPg0K0JHQuNC+0YXQuNC80LjRh9C10YHQutC40Lkg0LDQvdCw0LvQuNC3INC60YDQvtCy0LggLSDQtNC70Y8g0L7Rh9C10L3QutC4INC/0L7QutCw0LfQsNGC0LXQu9C10Lkg0LHQtdC70LrQvtCy0L7Qs9C+INC+0LHQvNC10L3QsCwg0YTRg9C90LrRhtC40Lgg0L/QtdGH0LXQvdC4KNCQ0JvQoiwg0JDQodCiKSwg0YPRgNC+0LLQvdGPINCz0LvRjtC60L7Qt9GLINC4INGN0LvQtdC60YLRgNC+0LvQuNGC0L7Qsi48YnIgLz4NCtCQ0L3QsNC70LjQtyDQutCw0LvQsCDQvdCwINGB0LrRgNGL0YLRg9GOINC60YDQvtCy0Ywg0Lgg0LrQvtC/0YDQvtCz0YDQsNC80LzQsCjQuNGB0YHQu9C10LTRg9C10YIg0L7RgdGC0LDRgtC60Lgg0L/QuNGJ0LgsINC20LjRgNGLLCDQsdC10LvQutC4INC4INGCLtC0LikgLSAg0LTQu9GPINCy0YvRj9Cy0LvQtdC90LjRjyDQvNCw0LvQvtC30LDQvNC10YLQvdGL0YUg0LrRgNC+0LLQvtGC0LXRh9C10L3QuNC5INC4INC+0YbQtdC90LrQuCDQv9GA0L7RhtC10YHRgdC+0LIg0L/QtdGA0LXQstCw0YDQuNCy0LDQvdC40Y8g0L/QuNGJ0LguIDxiciAvPg0K0JAg0YLQsNC60LbQtSDQvNC+0LbQvdC+INC/0YDQvtCy0LXRgdGC0Lgg0LjRgdGB0LvQtdC00L7QstCw0L3QuNC1INGE0YPQvdC60LjQuCDQltCa0KIsINC90LDQv9GA0LjQvNC10YAg0YDQnS3QvNC10YLRgNC40Y8g0LTQu9GPINC+0YbQtdC90LrQuCDRg9GA0L7QstC90Y8g0LrQuNGB0LvQvtGC0L3QvtGB0YLQuCDQsiDQttC10LvRg9C00LrQtSwg0LzQsNC90L7QvNC10YLRgNC40Y8o0LXRgdC70Lgg0L/QvtC00L7Qt9GA0LXQstCw0LXQvCDRgNC10YTQu9GO0LrRgSksINC+0L3QviDQv9C+0LzQvtCz0LDQtdGCINC+0YbQtdC90LjRgtGMINC00LDQstC70LXQvdC40Y8g0LIg0L/QuNGJ0LXQstC+0LTQtS48YnIgLz4NCtC4INC60L7QvdC10YfQvdC+INC20LUg0YDQtdC90YLQs9C10L3QvtCy0YHQutC40LUg0LjRgdGB0LvQtdC00L7QstCw0L3QuNC1INC20LXQu9GD0LTQutCwLiDQn9C+0LzQvtCz0LDQtdGCINCy0YvRj9Cy0LjRgtGMINC+0L/Rg9GF0L7Qu9C10LLRi9C1INC+0LHRgNCw0LfQvtCy0LDQvdC40LUsINGP0LLQtywg0L/QvtCy0YDQtdC20LTQtdC90LjQuS48YnIgLz4NCtCb0LDQv9Cw0YDQvtGB0LrQvtC/0LjRjyDQvNC40L3QuNC80LDQu9GM0L3Ri9C5INC40L3QstCw0LfQuNCy0L3Ri9C5INC80LXRgtC+0LQg0L7RgdC80L7RgtGA0LAg0LHRgNGO0YjQvdC+0Lkg0L/QvtC70L7RgdGC0LguINCf0YDQuCDQv9C+0LTQvtC30YDQtdC90LjRjyDQvtGA0YTQsNC90L3Ri9GFINC30LDQsdC+0LvQtdCy0LDQvdC40Lgg0YHQvtC/0YDQsNCy0LDQttC00LDRjtGJ0LjQtSDQv9C+0YDQsNC20LXQvdC40LXQvCDQutC40YjQtdGH0L3QuNC60LAg0Lgg0LTRgNGD0LPQuNGFINC+0YDQs9Cw0L3Qs9C+0LIuPGJyIC8+DQrQn9GA0LXQtNCy0LDRgNC40YLQtdC70YzQvdGL0Lkg0LTQuNCw0LPQvdC+0Lcg0YEg0YPRh9C10YLQvtC8INGB0LjQvNC/0YLQvtC80L7QsiDRhdGA0L7QvdC40YfQtdGB0LrQuNC5INCz0LDRgdGC0YDQuNGCINC40LvQuCDRj9C30LLQtdC90L3Rg9GOINCx0L7Qu9C10LfQvdGMINC20LXQu9GD0LTQutCwLiDQndC+INC00LvRjyDRg9GC0L7Rh9C90LXQvdC40LUg0LTQuNCz0L3QvtC30LAg0L3Rg9C20L3QviDQv9GA0L7QstC10YHRgtC4INC00L7Qv9C+0LvQvdC40YLQtdC70YzQvdGL0LUg0LzQtdGC0L7QtNGLINC40YHRgdC70LXQtNC+0LLQsNC90LjQtS4gIDxiciAvPg0KMi4g0KMg0YDQtdCx0LXQvdC60LAg0L/Rg9GN0YDQuNC70YzQvdC+0LUg0LTRi9GF0LDQvdC40Y8uINCt0YLQvtGCINC00YvRhdCw0YLQtdC70YzQvdGL0Lkg0YjRg9C8INCx0L7Qu9C10LUg0LPRgNC+0LzQutC40Lkg0Lgg0L7RgtGH0LXRgtC70LjQstGL0Lkg0YfQtdC8INGDINCy0LfRgNC+0YHQu9GL0YUuINCQINGC0LDQutC20LUg0L7RgtC70LjRh9Cw0LXRgtGB0Y8g0L/RgNC+0YLRj9C20L3QvtGB0YLQuCDQstC00L7RhdCwINC4INC+0YLQvdC+0YHQuNGC0LXQu9GM0L3QviDQutC+0YDQvtGC0LrQuNC80Lgg0LLRi9C00L7RhdCw0LzQuC4g0K3RgtC+INGB0LLRj9C30LDQvdC+ICDRgSDQsNC90LDRgtC+0LzQuNGH0LXRgdC60L7QuSDQvdC10LfRgNC10LvQvtGB0YLRjNGOINC00YvRhdCw0YLQtdC70YzQvdC+0Lkg0YHQuNGB0YLQtdC80Ysg0Lgg0L/RgNC+0LLQvtC00LjQvNC+0YHRgtGM0Y4g0LfQstGD0LrQsCDRh9C10YDQtdC3INGC0L7QvdC60YPRjiDQs9GA0YPQtNC90YPRjiDRgdGC0LXQvdC60YMuINCS0L7Qt9C90LjQutCw0LXRgiDQvtC90L4g0LIg0YHQu9C10LTRgdGC0LLQuNC4INGB0LvQtdC00YPRidC40YUg0L7RgdC+0LHQtdC90L3QvtGB0YLQtdC5OiDRgNCw0YHRgdGC0L7Rj9C90LjQtSDQvtGCINCz0L7Qu9C+0YHQvtCy0L7QuSDRidC10LvQuCDQtNC+INC80LXRgdGC0L4g0LDRg9GB0LrRg9C70YzRgtCw0YbQuNC4INC60L7RgNC+0YLQutC+0LUsINGN0YLQviDQuNC3LdC30LAg0LzQsNC70L7Qs9C+INGA0LDQt9C80LXRgNCwINCz0YDRg9C00L3QvtC5INC60LvQtdGC0LrQuC4gINCQINGC0LDQutC20LUg0L/RgNC+0YHQstC10YIg0LHRgNC+0L3RhdC+0LIg0LHQvtC70LXQtSDRg9C30LrQuNC5LCDRh9C10Lwg0YMg0LLQt9GA0L7RgdC70YvRhSwg0LrQvtGC0L7RgNCw0Y8g0L7QsdGD0YHQu9C+0LLQu9C40LLQsNC10YIg0L/QvtCy0YvRiNC10L3QvdGD0Y4g0LPRgNC+0LzQutC+0YHRgtGMINCy0L7Qt9C00YPRiNC90L7Qs9C+INC/0L7RgtC+0LrQsCDQv9GA0Lgg0LLQtNC+0YXQtSDQuCDQv9GA0Lgg0LLRi9C00L7RhdC1LiDQoyDRgNC10LHQtdC90LrQsCDRgdGC0LXQvdC60LAg0LPRgNGD0LTQvdC+0Lkg0LrQu9C10YLQutC4INC40LzQtdC10YIg0LHQvtC70YzRiNGD0Y4g0Y3Qu9Cw0YHRgtC40YfQvdC+0YHRgtGMINC4INC80LXQvdGM0YjRg9GOINGC0L7Qu9GJ0LjQvdGDINCw0LvRjNCy0LXQvtC70Y/RgNC90YvRhSDQv9C10YDQtdCz0L7RgNC+0LTQvtC6KNGC0LDQuiDQutCw0Log0LIg0L3QtdC30YDQtdC70L7QuSDQu9C10LPQvtGH0L3QvtC5INGC0LrQsNC90LggINC30LLRg9C6INGA0LDRgdC/0YDQvtGB0YLRgNCw0L3Rj9C10YLRgdGPINC70LXQs9GH0LUg0Lgg0LvRg9GH0YjQtSDQstC+0YHQv9GA0LjQvdC40LzQsNC10YLRgdGPINC/0YDQuCDQsNGD0YHQutGD0LvRjNGC0LDRhtC40LgpINC40Lct0LfQsCDRjdGC0L7Qs9C+INGD0LLQtdC70LjRh9C40LLQsNC10YLRgdGPINCy0LjQsdGA0LDRhtC40Y8g0LPRgNGD0LTQvdC+0Lkg0LrQu9C10YLQutC4LiDQkCDRgtCw0LrQttC1INC40L3RgtC10YDRgdGC0LjRhtC40LDQu9GM0L3QsNGPINGC0LrQsNC90Ywg0LvQtdCz0LrQuNGFINCy0L7Qt9GA0LDRgdGC0LDQtdGCINC40Lct0LfQsCDRjdGC0L7Qs9C+INC4INGB0L3QuNC20LDQtdGC0YHRjyDQstC+0LfQtNGD0YjQvdC+0YHRgtGMINGC0LrQsNC90Lgg0LvQtdCz0LrQuNGFLiDQotCw0Log0LrQsNC6INGDINGA0LXQsdC10L3QutCwINGG0LjQu9C40L3QtNGA0LjRh9C10YHQutCw0Y8g0YTQvtGA0LzQsCDQs9GA0YPQtNC90L7QuSDQutC70LXRgtC60Lgg0Lgg0L3QtSDQv9GA0LjQvtCx0YDQtdC70LAg0L7QstCw0LvRjNC90L7QuSDRhNC+0YDQvNGLINC60LDQuiDRgyDQstC30YDQvtGB0LvRi9GFINC4INGE0L7RgNC80LAg0LPRgNGD0LTQvdC+0Lkg0LrQu9C10YLQutC4INCy0LvQuNGP0LXRgiDQvdCwINC00YvRhdCw0YLQtdC70YzQvdGL0Lkg0L7QsdGK0LXQvCDQuCDRhdCw0YDQsNC60YLQtdGAINC30LLRg9C60LAuINCY0Lct0LfQsCDRgtCw0LrQuNGFINC+0YHQvtCx0LXQvdC90L7RgdGC0LXQuSDQtNC10YLQtdC5INGDINC90LjRhSDQstGL0YHQu9GD0YjQuNCy0LDQtdGC0YHRjyDQv9GD0Y3RgNC40LvRjNC90L7QtSDQtNGL0YXQsNC90LjQtSDQuCDRjdGC0L4g0YHRh9C40YLQsNC10YLRgdGPINC90L7RgNC80L7QuS4g0J7QvdC+INCy0YvRgdC70YPRiNC40LLQsNC10YLRgdGPINC00L4gNyDQu9C10YIuIA==</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4" table:style-name="ce1">
            <text:p>1066934</text:p>
          </table:table-cell>
          <table:table-cell office:value-type="string" table:style-name="ce1">
            <text:p>russian</text:p>
          </table:table-cell>
          <table:table-cell office:value-type="string" table:style-name="ce1">
            <text:p>Билет 37.&amp;lt;br /&amp;gt; 1.Девочка 12 лет. Жалуется на боли в животе, на голодный желудок. Беспокоят также изжога, слабость, раздражительность. При обследовании: питания пониженного, язык влажный, обложен белым налетом, живот при пальпации мягкий, болезненный во всех отделах, более выраженная болезненность в эпигастрии, печень не увеличена, стул имеется склонность к запорам. Какие методы исследования нужно провести для уточнения диагноза? &amp;lt;br /&amp;gt; 2.Ребенку 6 месяцев. Температура тела 36,6 С. ЧДД 30 в минуту. Грудная клетка цилиндрической формы. Обе половины симметричные и одинаково участвуют в акте дыхания. Перкуторно над легким ясный легочный звук. Определите характер дыхания у него при аускультации легких?&amp;lt;br /&amp;gt;</text:p>
          </table:table-cell>
          <table:table-cell office:value-type="string" table:style-name="ce1">
            <text:p>MS0g0JjRgdGF0L7QtNGPINC40Lcg0L/QtdGA0LXRh9C40YHQu9C10L3QvdGL0YUg0YHQuNC80L/RgtC+0LzQvtCyLCDQvNC+0LbQvdC+INC/0YDQtdC00L/QvtC70L7QttC40YLRjCDQvdCw0LvQuNGH0LjQtSDRgyDQv9Cw0YbQuNC10L3RgtC60Lgg0YHQuNC90LTRgNC+0LzQvtCyINC20LXQu9GD0LTQvtGH0L3QvtC5INC4INC60LjRiNC10YfQvdC+0Lkg0LTQuNGB0L/QtdC/0YHQuNC40Lgg0Lgg0LDQsdC00L7QvNC40L3QsNC70YzQvdC+0Lkg0LHQvtC70LguINCf0YDQuNGH0LjQvdC+0Lkg0LzQvtC20LXRgiDQsdGL0YLRjCDRgNCw0LfQstC40YLQuNC1INGDINC00LXQvtCy0YfQutC4INGP0LfQstC10L3QvdC+0Lkg0LHQvtC70LXQt9C90Lgg0LbQtdC70YPQtNC60LAg0LjQu9C4INCz0LDRgdGC0YDQuNGC0LAgKyDQk9Ct0KDQkSAo0LPQsNGB0YLRgNC+LdGN0LfQvtGE0LDQs9Cw0LvRjNC90LDRjyDRgNC10YTQu9GO0LrRgdC90LDRjyDQsdC+0LvQtdC30L3RjNGMKS4g0JzQtdGC0L7QtNCw0LzQuCDQuNGB0YHQu9C10LTQvtCy0LDQvdC40Y8sINC60L7RgtC+0YDRi9C80Lgg0LzQvtC20L3QviDQv9C+0LTRgtCy0LXRgNC00LjRgtGMINC90LDQu9C40YfQuNC1L9C+0YLRgdGD0YLRgdGC0LLQuNC1INCx0L7Qu9C10LfQvdC4LCDRj9Cy0LvRj9GO0YLRgdGPOiAxKSDQpNCT0JTQoSAo0LPQsNGB0YLRgNC+LdC00YPQvtC00LXQvdC+0YHQutC+0L/QuNGPKS0g0LzQtdGC0L7QtCDRhNGD0L3QutGG0LjQvtC90LDQu9GM0L3QvtC5INC00LjQsNCz0L3QvtGB0YLQuNC60LgsINGP0LLQu9GP0LXRgtGB0Y8g0LfQvtC70L7RgtGL0Lwg0YHRgtCw0L3QtNCw0YDRgtC+0Lwg0L/RgNC4INC40YHRgdC70LXQtNC+0LLQsNC90LjQuCDQsdC+0LvQtdC30L3QtdC5INC20LXQu9GD0LTQutCwINC4INC00LLQtdC90LDQtNGG0LDRgtC40L/QtdGA0YHRgtC90L7QuSDQutC40YjQutC4LiDQoSDQv9C+0LzQvtGJ0YzRjiDRgdC/0LXRhtC40LDQu9GM0L3QvtC5INGC0YDRg9Cx0LrQuCwg0YDQsNC30LzQtdGA0L7QvCDQsiAxINC80LXRgtGALCDQutC+0YLQvtGA0Y4g0LLQstC+0LTRj9GCINGH0LXRgNC10Lcg0YDQvtGC0L7QstGD0Y4g0L/QvtC70L7RgdGC0YwsINC80L7QvdC20L4g0YPQstC40LTQtdGC0Ywg0YHQu9C40LfQuNGB0YLRi9C1INC+0LHQvtC70L7Rh9C60Lgg0L/QuNGJ0LXQstC+0LTQsCwg0LbQtdC70YPQtNC60LAg0Lgg0LTQstC10L3QsNC00YbQsNGC0LjQv9C10YDRgdGC0L3QvtC5INC60LjRiNC60LggKNCyINC90LXQtSDQstGB0YLRgNC+0LXQvdCwINC60LDQvNC10YDQsCwg0LrQvtGC0L7RgNCw0Y8g0L/RgNC+0LXRhtC40YDRg9C10YIg0LLQvdGD0YLRgNC10L3QvdGD0Y4g0L/QvtC70L7RgdGC0Ywg0L3QsCDRjdC60YDQsNC9KS4g0J/QoNC4INGN0YLQvtC8INC80LXRgtC+0LTRiyDQuNGB0YHQu9C10LbQvtCy0LDQvdC40Y8g0YXQvtGA0L7RiNC+INC30LDQvNC10YLQvdGLINGA0LDQt9C70LjRh9C90YvQtSDRj9C30YrQstC10L3QvdGL0LUg0L/QvtGA0LDQttC10L3QuNGPOyDQstC+0YHQv9Cw0LvQtdC90L3Ri9C1INC4INCz0LjQv9C10YDQtdC80LjRgNC+0LLQsNC90L3Ri9C1INC+0LHQvtC70YfQutC4OyDQvdC+0LLQvtC+0LHRgNCw0LfQvtCy0LDQvdC40Y87INC/0LDRgtC+0LvQvtCz0LjRh9C10YHQutC40LUg0YHRg9C20LXQvdC40Y8g0L/RgNC+0YHQstC10YLQsCDQuCDRgtC0LiDQldC00LjQvdGB0YLQstC10L3QvdC+0Lkg0L/RgNC+0LHQu9C10LzQvtC5INC80L7QttC10YIg0LHRi9GC0Ywg0L3QsNC70LjRh9C40LUg0YMg0L/QsNGG0LjQtdC90YLQutC4INGD0YHQuNC70LXQvdC90L7Qs9C+INGA0LLQvtGC0L3QvtCz0L4g0YDQtdGE0LvQtdC60YHQsCwg0LIg0LTQsNC90L3QvtC8INGB0LvRg9Cw0YfQtSDQvNC+0LbQvdC+INC/0YDQvtC40LfQstC10YHRgtC4INGE0LPQtNGBINC/0L7QtCDQvdCw0YDQutC+0LfQvtC8OyAyKSDQotCw0LrQttC1INGP0LfQstC10L3QvdGD0Y4g0LHQvtC70LXQt9C90Ywg0LbQtdC70YPQtNC60LAv0LrQuNGI0LrQuCDQvNC+0LbQvdC+INGD0LLQuNC00LXRgtGMINC/0YDQuCAg0YDQtdC90YLQs9C10L3QvtCz0YDQsNGE0LjQuCDRgSDQutC+0L3RgtGA0LDRgtGB0LjRgNC+0LLQsNC90LjQtSAo0LIg0LTQsNC90L3QvtC8INGB0LvRg9Cw0YfQtSDQuNGB0L/QvtC70YzQt9GD0Y7RgiDQstC10YnQtdGB0YLQstC+INCx0LDRgNC40Y8pLiDQoNC10L3RgtCz0LXQvSDQv9GA0LjQt9C90LDQutCw0LzQuCDQv9GA0Lgg0Y3RgtC+0Lwg0Y/QstC70Y/QtdGC0YHRjzog0LAuINCh0LjQv9C80YLQvtC8ICLQvdC40YjQuCIgKNGA0LXQt9C60L7QtSDQvtGC0YHRg9GC0YHRgtCy0LjQtSDQutC+0L3RgtCw0YDRgdGC0LAg0L3QsCDRgdGC0LXQvdC60LUg0YHQu9C40LfQuNGB0YLQvtC5INC+0YDQs9Cw0L3QsCDQvdCwINC60LDRgNGC0LjQvdC1KSwg0YLQsNC60LbQtSDQsiDQvdC10LrQvtGC0L7RgNGL0YUg0YHQu9GD0YfQsNGP0YUgItC90LjRiNCwIiDQvNC+0LbQtdGCINGD0LrQsNC30YvQstCw0YLRjCDQvdCwINCy0LjQtCDRj9C30LLRiyAo0L/RgNC4INC/0YDQvtCx0L7QtNCw0Y7RidC10Lkg0L7QvdCwINC80L7QttC10YIg0YHQvtGB0YLQvtGP0YLRjCDQuNC3INGC0YDQtdGFINGB0LvQvtC10LIsINCyINC+0YHRgtCw0LvRjNC90YvRhSDRgdC70YPRh9Cw0Y/RhSDQvtC90LAg0YHQvtGB0YLQvtC40YIg0LjQtyAxLTIg0YHQu9C+0LXQsik7INCxLiDQnNC10LTQu9C10L3QvdC+0LUg0LLRi9Cy0LXQtNC10L3QuNC1INC60L7QvdGC0YDQsNGB0YLQsCDQs9C+0LLQvtGA0LjRgiDQviDQt9Cw0LzQtdC00LvQtdC90LjQuCDQvNC+0YLQvtGA0LjQutC4INC20LXQu9GD0LTQutCwL9C60LjRiNC60LggKNC/0YDQuNC30L3QsNC6INC/0LDRgtC+0LvQvtCz0LjRh9C10YHQutC+0LPQviDQv9GA0L7RhtC10YHRgdCwKTsg0YEuINCi0LDQutC20LUg0LjQvdC+0LPQtNCwINC80L7QttC90L4g0YDQsNC30LvQuNGH0LjRgtGMINCy0L7RgdC/0LDQu9C10L3QvdGD0Y4g0L7QsdC+0LvQvtGH0LrRgyDQvtGA0LPQsNC90LAgKNC/0YDQuCDQvNCw0YHRgdC40LLQvdGL0YUg0LLQvtGB0L/QsNC70LXQvdC40Y/RhSDQuCDQtNC+0LvQs9C+0Lwg0YLQtdGH0LXQvdC40Lgg0LHQvtC70LXQt9C90LgpOyDQtC4g0JPQrdCg0JEg0LzQvtC20L3QviDRg9Cy0LjQtNC10YLRjCDQvdCwINC60LDRgNGC0LjQvdC1INC/0YDQuCDQvdC10LTQvtGB0YLQsNGC0L7RgtGH0L3QvtC8INC30LDQutGA0YvRgtC40Lgg0LrQsNGA0LTQuNCw0LvRjNC90L7Qs9C+INGB0YTQuNC90LrRgtC10YDQsCDQttC10LvRg9C00LrQsC4g0J3QviDQtNCw0L3QvdGL0Lkg0LzQtdGC0L7QtCDQvdC1INGP0LLQu9GP0LXRgtGB0Y8g0L7RgdC90L7QstC90YvQvCDQuNC3LdC30LAg0YLQvtCz0L4sINC/0LDRhtC40LXQvdGC0LrQsCDRj9Cy0LvRj9C10YLRgdGPINGA0LXQsdC10L3QutC+0LwsINCwINC00LDQvdC90YvQuSDQvNC10YLQvtC0INGC0YDQtdCx0YPQtdGCINC40YHQv9C+0LvRjNC30L7QstCw0L3QuNC1INC60L7QvdGC0YDQsNGB0YLQsCAo0L3QsNC00L4g0LjRgdC/0L7Qu9GM0LfQvtCy0LDRgtGMINGBINC+0YHRgtC+0YDQvtC20L3QvtGB0YLRjCDRgyDQtNC10YLQtdC5KS4g0Jgg0L3QsCDRgNC10L3RgtCz0LXQvSDQutCw0YDRgtC40L3QtSDQvdC10LvRjNC30Y8g0YLQvtGH0L3QviDRg9Cy0LjQtNC10YLRjCDRgNCw0LfQstC40YLQuNC1INCz0LDRgdGC0YDQuNGC0LA7IDMpINCf0YDQuCDQtNC+0LrQsNC30LDQvdC90L7QvCDQvdCw0LvQuNGH0LjQuCDQs9Cw0YHRgtGA0LjRgtCwL9GP0LfQstC10L3QvdC+0Lkg0LHQvtC70LXQt9C90LgsINC90LXQvtCx0YXQvtC00LjQvNC+INC90LDQudGC0Lgg0Y3RgtC40L7Qu9C+0LPQuNGH0LXRgdC60YPRjiDQv9GA0LjRh9C40L3Rgy4g0K3RgtC+INC80L7QttC10YIg0LHRi9GC0Ywg0L3QsNC70LjRh9C40LUgSC5weWxvcmkgKNCx0LDQutGC0LXRgNC40Y8sINC60L7RgtC+0YDQsNGPINC80L7QttC10YIg0YDQsNC30LzQvdC+0LbQsNGC0YzRgdGPLCDQvdC10YHQvNC+0YLRgNGPINC90LAg0LrQuNGB0LvRg9GOINGB0YDQtdC00YMg0LbQtdC70YPQtNC60LApLiDQk9C70LDQstC90YvQvCDQuNGB0YHQu9C10LTQvtCy0LDQvdC40LXQvCDQvdCwIEhlbGljb2JhY3RlciBweWxvcmkg0Y/QstC70Y/QtdGC0YHRjyDQtNGF0LDRgtC10LvRjNC90YvQuSDRg9GA0LXQsNC30L3Ri9C5INGC0LXRgdGCLiDQn9Cw0YbQuNC10L3RgiDQstGL0L/QuNCy0LDQtdGCINGA0LDRgdGC0LLQvtGAINC80L7Rh9C10LLQuNC90Ysg0Lgg0YfQtdGA0LXQtyDQvdC10LrQvtGC0L7RgNC+0LUg0LLRgNC10LzRjyDQstGL0LTRi9C00YXQsNC10YIg0LIg0YLRgNGD0LHQutGDLCDQutC+0YLQvtGA0LDRjyDRgNCw0YHQv9C+0LfQvdCw0LXRgiwg0LXRgdGC0Ywg0LvQuCDRgdC70LXQtNGLINCw0LzQvNC40LDQutCwINCyINCy0YvQtNGL0YXQsNC10LzQvtC8INCy0L7Qt9C00YPRhdC1LiDQkdCw0LrRgtC10YDQuNGPINC90LDQuNGH0L3QsNC10YIg0YDQsNC30LLQuNCy0LDRgtGM0YHRjyDQsiDQo9CW0JUg0L/QvtCy0YDQtdC20LTQtdC90L3QvtC5INGB0YLQtdC90LrQtSDRgdC70LjQt9C40YHRgtC+0LkgKNC40Lct0LfQsCDQtNGA0YPQs9C40YUg0YTQsNC60YLQvtGA0L7QsiDQutCw0Log0L3QsNGB0LvQtdC00YHRgtCy0LXQvdC90L7RgdGC0YwsINC90LXQv9GA0LDQstC40LvRjNC90L4g0L/QuNGC0LDQvdC40LUsINCw0LvQutC+0LPQvtC70Ywv0LrRg9GA0LXQvdC40LUg0Lgg0YIu0LQuKSwg0LXQtSDQt9Cw0YnQuNGC0L3Ri9C8INC80LXRhdCw0L3QuNC30LzQvtC8INC+0YIg0LTQtdC50YHRgtCy0LjRjyDRgdC+0LvQvdGP0LrQvtC5INC60LjRgdC70L7RgtGLINGP0LLQu9GP0LXRgtGB0Y8g0LLRi9C00LXQu9C10L3QuNC1INGD0YDQtdCw0LfRiywg0LrQvtGC0L7RgNCw0Y8g0YHQstGP0LfRi9Cy0LDQtdGC0YHRjyDRgSDQv9C+0YHRgtGD0L/QsNGO0YnQtdC5INGH0LXRgNC10Lcg0L/RgNC+0L/QvtGC0LXQstCw0L3QuNC1INC40Lcg0LrRgNC+0LLQtdC90L7RgdC90YvRhSDRgdC+0YHRg9C00L7Qsiwg0LzQvtGH0LXQstC40L3QvtC5LiDQkiDQuNGC0L7Qs9C1INC00LDQvdC90L7QuSDRgNC10LDQutGG0LjQuCDQstGL0LTQtdC70Y/QtdGC0YHRjyDQsNC80LzQuNCw0LosINC60L7RgtC+0YDRi9C5INC+0LHQtdC30LLRgNC10LbQuNCy0LDQtdGCINGB0L7Qu9GP0L3Rg9GOINC60LjRgdC70L7RgtGDINC4INGB0L7Qt9C00LDQtdGCICLQsdC10LfQvtC/0LDRgdC90YPRjiDQt9C+0L3RgyIg0LLQvtC60YDRg9GD0LMg0LzQtdGB0YLQsCDRgNCw0LfQvNC90L7QttC10L3QuNGPINCx0LDQutGC0LXRgNC40Lg7IDQpINCc0J7QttC90L4g0L/RgNC+0LLQtdGB0YLQuCDQntCQ0JogLSDQvdCwINC90LDQu9C40YfQuNC1INCy0L7RgdC/0LDQu9C10L3QuNGPINCyINC+0YDQs9Cw0L3QuNC30LzQtSAo0L/QvtCy0YvRiNC10L3RiyDQu9C10LnQutC+0YbRgtGLINC4INGB0L7RjSksINC4INGC0LDQutC20LUg0LzQvtC20L3QviDQv9GA0L7QstC10YDQuNGC0Ywg0LrQutCw0Lsg0L3QsCDRj9C50YbQsCDQs9C10LvRjNC80LjQvdGC0L7Qsiwg0YHQutGA0YvRgtC+0LUg0LrRgNC+0LLQvtGC0LXRh9C10L3QuNC1LiAgICAgICAgIDItINCjINC00LXRgtC10Lkg0LTQviA3INC70LXRgiDQsiDQvdC+0YDQvNC1INC90LDQsdC70Y7QtNCw0LXRgtGB0Y8g0L/Rg9GN0YDQuNC70YzQvdC+0LUg0LTRi9GF0LDQvdC40LXQtSAo0YfQsNGJ0LUg0YMg0LDRgdGC0LXQvdC40LrQvtCyKSwg0LIg0LHQvtC70YzRiNC40L3RgdGC0LLQtSDRgdC70YPRh9Cw0LXQsiDQv9GD0Y3RgNC40LvRjNC90L7QtSDQtNGL0LDRhdCw0L3QuNC1INC90LDRh9C40L3QsNC10YLRgdGPINGBICA2INC80LXRgdGP0YbQtdCyINC4INCyIDIsNSDQs9C+0LTQsCDQv9C10YDQtdGF0L7QtNC40YIg0L3QsCDQvtCx0YvRh9C90L7QtSDQstC10LfQuNC60YPQu9GP0YDQvdC+0LUuINCe0L3QviDRhdCw0YDQsNC60YLQtdGA0LjQt9GD0LXRgtGB0Y8g0LrQsNC6INCz0YDQvtC80LrQvtC1INCy0LXQt9C40LrRg9C70Y/RgNC90L7QtSDQtNGL0YXQsNC90LjQtSwg0LIg0LrQvtGC0L7RgNC+0Lwg0LzQvtC20LXRgiDQvtC00LjQvdCw0LrQvtCy0L4g0L/RgNC+0YHQu9C00YPRiNC40LLQsNGC0YzRgdGPINCy0LTQvtGFINC4INCy0YvQtNC+0YUuINCt0YLQviDRgdCy0Y/Qt9Cw0L3QviDQuNC3LdC30LAg0LDQvdCw0YLQvtC80L4t0YTQuNC30LjQvtC70L7Qs9C40YfQtdGB0LrQuNGFINC+0YHQvtCx0LXQvdC90L7RgdGC0LXQuSDRgdGC0YDQvtC10L3QuNGPINC00YvRhdCw0YLQtdC70YzQvdC+0Lkg0YHQuNGB0YLQtdC80Ysg0YMg0LTQtdGC0LXQuTogMSkg0KPQt9C60LjQtSDQv9GA0L7RgdCy0LXRgtGLINCx0YDQvtC90YXQuNCw0LvRjNC90L7Qs9C+INC00LXRgNC10LLQsCDQvNC+0LPRg9GCOyAyKdCh0LDQvNCwINGC0L7QvdC60LDRjyDQs9GA0YPQtNC90LDRjyDQutC70LXRgtC60LAg0L7Qv9GA0LTQtdC70LXRj9C10YIg0LvRg9GH0YjRg9GOINGB0LvRi9GI0LjQvNC+0YHRgtGMINCy0LTQvtGF0L7QsiDQuCDQstGL0LTQvtGF0L7Qsiwg0YfQtdC8INGDINCy0LfRgNC+0YHQu9GL0YU7IDMp0JLQvtC30LzQvtC20L3QviDQuNC3LdC30LAg0YDQvtGB0YLQsCDQuNC90YLQtdGA0YHRgtC40YbQuNCw0LvRjNC90L7QuSDRgtC60LDQvdC4INC80L7QttC10YIg0YHQvdC40LfQuNGC0YzRgdGPINCy0L7Qt9C00YPRiNC90L7RgdGC0Ywg0YLQutCw0L3QuCDQu9C10LPQutC40YU7IDQpINCh0KLQtdC90LrQsCDRjdC70LDRgdGC0LjRh9C90LAsINC90L4g0LHQvtC70LXQtSDRgtC+0L3QutCw0Y8sINC40Lct0LfQsCDRjdGC0L7Qs9C+INC/0YDQuCDQtNGL0YXQsNC90LjQuCDQvNC+0LPRg9GCINCx0YvRgtGMINCy0LjQsdGA0LDRhtC40LguICAgIA==</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По первому вопросу не указано исследование РН метрии желудка, УЗИ брюшной полости., биохимический анализ крови.По 2 вопросу. Пуэрильное дыхание до 5-7 лет. Короткое расстояние от голосовой щели до меса аускультации.</text:p>
          </table:table-cell>
          <table:table-cell office:value-type="float" office:value="0" table:style-name="ce1">
            <text:p>0</text:p>
          </table:table-cell>
          <table:table-cell table:number-columns-repeated="16376"/>
        </table:table-row>
        <table:table-row table:style-name="ro1">
          <table:table-cell office:value-type="float" office:value="914963" table:style-name="ce1">
            <text:p>914963</text:p>
          </table:table-cell>
          <table:table-cell office:value-type="string" table:style-name="ce1">
            <text:p>english</text:p>
          </table:table-cell>
          <table:table-cell office:value-type="string" table:style-name="ce1">
            <text:p>Ticket 37.&amp;lt;br /&amp;gt; 1. Тhe girl is 12 years old. Complains of abdominal pain that appears on an empty stomach. After eating, the pain decreases. Heartburn, weakness, frequent headaches, irritability are also disturbing. During the examination: nutrition is reduced, pale, tongue is moist, with white coating, abdomen on palpation is soft, painful in all departments, more painful in epigastrium, liver is not enlarged, feces is constipated. What research methods should be carried out to clarify the diagnosis?&amp;lt;br /&amp;gt; 2. The child is 6 months old. Body temperature 36.6 C. Respiratory rate 30 per minute. The chest is cylindrical in shape. Both halves are symmetrical and equally participate in the act of breathing. Percussion over the lung a clear pulmonary sound. Determine the nature of his breathing during auscultation of the lungs?&amp;lt;br /&amp;gt;</text:p>
          </table:table-cell>
          <table:table-cell office:value-type="string" table:style-name="ce1">
            <text:p>MS4uLi4uRGlhZ25vc2lzIGNsYXJpZmNhdGlvbiBmb3IgYSAxMiB5ZWFyIG9sZCBnaXJsIHdpdGggYWJkb21pbmFsIHBhaW4gOnJlY29tbWVtZGVkIHJlc2VhcmNoIG1ldGhvZCA6IHVwcGVyIGdhc3Ryb2ludGVzdGluYWwgZW5kb3Njb3B5IChlc29waGhhZ29nYXN0cm9kdW9kZW5vc2NvcHkpIHRvIGV4YW1pbmUgdGhlIGxpbmluZyBvZiB0aGUgZXNvcGhhZ3VzIHN0b21hY2ggYW5kIGR1b2RlbnVtIGZvciBpbmZsYW1tYXRpb24gdWxjZXJzIGFuZCBvdGhlciBhYm5vcm1hbGl0aWVzLiAgICAgICAgICAgICAgICAgICAgICAgICAgICAgICAgICAgICAgICAgICAgICAgICAgICAgICAgICAgICAgICAgICAgICAgICAgICAgICAgICAgICAgICAgICAgICAgICAgICAgICAgICAgICAgICAgICAgICAgICAgICAgIDxiciAvPg0KICAgICAgICAgICAgICAgICAgICAgICAgICAgICAgICAgICAgICAgICAgICAgICAgICAgICAgICAgICAgICAgICAgICAgICAgICAgICAgICAgICAgICAgICAgICAgICAgICAgICAgICAgICAgICAgICAgICAgICAgICAgPGJyIC8+DQogICAgICAgICAgICAgICAgICAgICAgICAgICAgICAgICAgICAgICAgICAgICAgICAgICAgICAgICAgICAgICAgICAgICAgICAgICAgICAgICAgICAgICAgICAgICAgICAgICAgICAgICAgICAgICAgICAgICAgICAgICA8YnIgLz4NCmNvbXBsZXRlIGJsb29kIGNvdW50IChDQkMgKSA6IHRvIGFzc2VzcyBmb3Igc2lnbiBvZiBhbmVtaWEgb3IgaW5mZWN0aW9uIC4uLi4uIC4uICAgICAgICAgICAgICAgICAgICAgICAgICAgICAgICAgICAgIDxiciAvPg0KICAgICAgICAgICAgICAgICAgICAgICAgICAgICAgICAgICAgICAgICAgICAgICAgICAgICAgICAgICAgICAgICAgICAgICAgICAgICAgICAgICAgICAgICAgICAgICAgICAgICAgICAgICAgICAgICAgICAgPGJyIC8+DQpHYXN0cm9zY29weTogIGlmIEggcHlsb3JpIGluZmVjdGlvbiBpcyBwcmVzZW50IHRoZSBhZmZlY3QgdGhlIG11Y2Nvc2EgbWVtYnJhbmUgYW5kIHByb2R1Y2UgaW5mbGFtbWF0aW9uIC4uLi4uIC4uLi4gICAgICAgICAgICAgICA8YnIgLz4NCiAgICAgICAgICAgICAgICAgICAgICAgICAgICAgICAgICAgICAgICAgICAgICAgICAgICAgICAgICAgICAgICAgICAgICAgICAgICAgICAgICAgICAgICAgICAgICAgICAgICAgICAgICAgICAgICAgICAgICAgICAgICAgIFN0b29sIGV4YW1pbmF0aW9uIDogY2hlY2tpbmcgZm9yIHRoZSBibG9vZCBpbiBzdG9vbCBvciBhYm5vcm1hYWwgY29tcG9uZW50cyAgIC4uLi4uICAgICAgICAgICAgICAgICAgICAgICAgICAgICAgICAgICAgICAgICAgICAgICAgICAgICAgPGJyIC8+DQogICAgICAgICAgICAgICAgICAgICAgICAgICAgICAgICAgICAgICAgICAgICAgICAgICAgICAgICAgICAgICAgICAgICAgICAgICAgICAgICAgICAgICAgICAgICAgICAgICAgICAgICAgICAgICAgICAgICAgICAgIEFiZG9taW5hbCB1bHRyYXNvdW5kIDogdG8gdmlzdWFsaXplIGFiZG9taW5hbCBvcmdhbnMgYW5kIGFzc2VzcyB0aGUgYWJub3JtYWxpdHkgQWJkb21pbmFsICAuIC4uLi4gICAgICAgICAgICAgICAgICAgICAgICAgICAgICAgICA8YnIgLz4NCiAgICAgICAgICAgICAgICAgICAgICAgICAgICAgICAgICAgICAgICAgICAgICAgICAgICAgICAgICAgICAgICAgICAgICAgICAgICAgICAgICAgICAgICAgICAgICAgICAgICAgICAgICAgICAgICAgICAgICAgICAgICAgICAgICBYIHJheSBhbmQgQ1Qgc2NhbjogICggSWYgbmVlZGVkICkgICAgICAgICAgICAgICAgICAgICAgICAgICAgICAgICAgICAgICAgICAgICAgICAgICAgICAgICAgICAgICAgICAgICAgICAgICAgICAgICAgICAgICAgICAgICAgICAgICAgICAgICAgICAgICAgICAgICAgICAgICAgICAgPGJyIC8+DQogICAgICAgICAgICAgICAgICAgICAgICAgICAgICAgICAgICAgICAgICAgICAgICAgICAgICAgICAgICAgICAgICAgICAgICAgICAgICAgICAgICAgICAgICAgICAgICAgICAgICAgICAgICAgICAgICAgICAgICAgIDxiciAvPg0KRGlhZ25vc2lzIDogZHVvZGVuYWwgIHVsY2VycyBvciBwZXB0aWMgdWxjZXIgZGlzZWFzZS4gICAgICAgICAgICAgICAgICAgICAgICAgICAgICAgICAgICAgICAgICAgICAgICAgICAgICAgICAgICAgICAgICAgICAgICAgICAgPGJyIC8+DQogICAgICAgICAgICAgICAgICAgICAgICAgICAgICAgICAgICAgICAgICAgICAgICAgICAgICAgICAgICAgICAgICAgICAgICAgICAgICAgICAgICAgICAgICAgICAgICAgICAgICAgICAgICAgICAgICAgICAgICAgICAgICAgICBpdCBnaXZlIGFiZG9taW5hbCByZWxpZWYgYWZ0ZXIgZWF0aW5nIGZvb2QgYmVjYXVzZSBzcGhpbmN0ZXIgYmV0d2VlbiBzdG9tYWNoIGFuZCBkdW9kZW51bSAgaXMgY2xvc2VkIC4gZHVlIHRvIHRoZSB1bGNlcnMgaW4gZHVkb2VudW0gLCBnYXN0cm8gaW50ZXN0aW5hbCBhcnRlcnkgYWxzbyBkYW1hZ2UgYW5kIGJsZWVkaW5nIG9jY3VycyAuIGFuZCB3ZSBwcmVzY3JpYmVkIHRoZSBwcm90b24gcHVtcCBpbmhpYml0b3JzICggcHBpICkgdG8gdGhlIHBhdGllbnQgdG8gcmVkdWNlIHRoZSBwYWluIC4gICAgICAgICAgICAgICAgICAgICAgICAgICAgICAgICAgICAgICAgICAgICAgICAgICAgICAgICAgICAgICAgICAgICAgICAgICAgICAgICAgICAgICAg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8YnIgLz4NCiAgICAgICAgICAgICAgICAgICAgICAgICAgICAgICAgICAgICAgICAgICAgICAgICAgICAgICAgICAgICAgICAgICAgICAgICAgICAgICAgICAgICAgICAgICAgICAgICAgICAgICAgICAgICAgICAgICAgICAgICAgICAgICAyLi4uIE5hdHVyZSBvZiB0aGUgYnJlYXRoaW5nIGluIDYgbW9udGggb2xkIGNoaWxkIC4gYnJlYXRoaW5nIGNoYXJhY3Rlcml6YXRpb24gdGhlIGRlc2NyaWJlZCBicmVhdGhpbmcgcGF0dGVybiAsd2hlcmUgYm90aCBoYWx2ZXMgb2YgdGhlIGNoZXN0IGFyZSBlcXVhbCBhbmQgc3ltbWV0cmljYWwgcGFydGljaXBhdGUgZXF1YWwgaW4gYnJlYXRoaW5nIGFuZCBjbGVhciBwdWxvbW9uYXJ5IHNvdW5kIHRoZW4gV2Ugc3VnZ2VzdCBOT1JNQUwgIHBoeXNpbG9naWNhbCBicmVhdGggLiBhIGN5bGluZHJpY2FsIGNoZXN0IHNoYXBlIGlzIG5vcm1hbCBpbiBpbmZhbnRzICwgYW5kIHRoZSBhYnNlbmNlIG9mIGFzeW1tZXRyeSBvciBhYm5vcm1hbCBzb3VuZCBpcyByZWFzc3VyaW5nIC4gQnJlYXRoaW5nIHNvdW5kIGluIGEgaGVhbHRoeSA2IG1vbnRoIGhlYWx0aHkgaW5mYW50IHlvdSB3b3VsZCB0eXBpY2FsbHkgaGVhciAnIFZlc2ljdWxhciBicmVhdGggc291bmQgJyB3aGljaCBhcmUgc29mdCBhbmQgbG93IHBpdGNoZWQgc291bmQgaGVhcmVkIHRocm91Z2hvdXQgdGhlIGx1bmcgZmllbGRzLi4gICAg</text:p>
          </table:table-cell>
          <table:table-cell office:value-type="float" office:value="170348" table:style-name="ce1">
            <text:p>170348</text:p>
          </table:table-cell>
          <table:table-cell office:value-type="float" office:value="74" table:style-name="ce1">
            <text:p>74</text:p>
          </table:table-cell>
          <table:table-cell office:value-type="string" table:style-name="ce1">
            <text:p>Your answer is not written completely and there are many spelling errors in the form of many punctuation marks. There are many spelling errors.</text:p>
          </table:table-cell>
          <table:table-cell office:value-type="float" office:value="0" table:style-name="ce1">
            <text:p>0</text:p>
          </table:table-cell>
          <table:table-cell table:number-columns-repeated="16376"/>
        </table:table-row>
        <table:table-row table:style-name="ro1">
          <table:table-cell office:value-type="float" office:value="915069" table:style-name="ce1">
            <text:p>915069</text:p>
          </table:table-cell>
          <table:table-cell office:value-type="string" table:style-name="ce1">
            <text:p>english</text:p>
          </table:table-cell>
          <table:table-cell office:value-type="string" table:style-name="ce1">
            <text:p>Ticket 37.&amp;lt;br /&amp;gt; 1. Тhe girl is 12 years old. Complains of abdominal pain that appears on an empty stomach. After eating, the pain decreases. Heartburn, weakness, frequent headaches, irritability are also disturbing. During the examination: nutrition is reduced, pale, tongue is moist, with white coating, abdomen on palpation is soft, painful in all departments, more painful in epigastrium, liver is not enlarged, feces is constipated. What research methods should be carried out to clarify the diagnosis?&amp;lt;br /&amp;gt; 2. The child is 6 months old. Body temperature 36.6 C. Respiratory rate 30 per minute. The chest is cylindrical in shape. Both halves are symmetrical and equally participate in the act of breathing. Percussion over the lung a clear pulmonary sound. Determine the nature of his breathing during auscultation of the lungs?&amp;lt;br /&amp;gt;</text:p>
          </table:table-cell>
          <table:table-cell office:value-type="string" table:style-name="ce1">
            <text:p>MS5hIGdpcmwgaXMgMTIgeWVhciBvbGQgd2l0aCBjb21wbGFpbiBvZiBhYmRvbWluYWwgcGFpbiB0aGF0IGFwcGVhciBvbiBhbiBlbXB0eSBzdG9tYWNoLiBhZnRlciBlYXRpbmcgdGhnZSBwYWluIGRlY3JlYXNlcyAuaGVhcnRidXJuLCB3ZWFrbmVzcywgZnJlcXV3bnQgaGVhZGFjaGUsIGlycml0YWJpbGl0eSBhcmUgYWxzbyBkaXN0dXJiaW5nLiBzbyBiYXNlZCBvbiB0aGUgc3ltcHRvbXMgZGVzY3JpYmVkIHRoZSBnaXJsIG1heSBoYXZlIGdhc3RyaXRpdGlzIGFuZCBwZXB0aWMgdWxjZXIgZGlzZWFzZS4gdG8gY2xhcmlmeSBkaW9hZ25vc2lzIHRoZSB0aGUgZm9sbG93aW5nIHJlc2VhcmNoZyBtZXRob2Qgc2hvdWxkIGJlIGNhcnJpZWQgb3V0OyB1cHBlciBnYXN0b2ludGVzdGluYWwgZW5kb3Njb3B5OiB0aGlzIHdpbGwgYWxsb3cgdGhlIGRvY3RjdG9yIHRvIGRpcmVjdGx5IHZpc3VhbGl6ZSB0aGUgbGluaW5nIG9mIHRoZSBzdG9tYWNoIGFuZCBkdW9kb251bSBhbmQgYmlvc3B5IHNhbXBsZSBpZiBuZXJjZXNzYXJ5LCBibG9vZCB0ZXN0OiB0aGVzZSBjYW4gaWRlbnRpZnkgdGhlIHByZXNlbmNlIG9mIHRoZSBoZWxpbGNvYmFjdGVyIHB5bG9yaWMgYmFjdGVyaWEuIHdoaWNoIGlzIGEgY29tbW9uIGNhdXNlIG9mIGdhc3RyaXRpdGlzIGFuZCBwZXB0aWMgdWxjZXIuIHVsY2VyIGRpc2Vhc2UsIHN0b29sIHRlc3Q6IHRoZSB0ZXN0IGlzIHRha2VuIGJ5IHRoZSBkb2N0b3IgdG8gaWRlbnRpZnkgYW55IHR5cGUgb2YgYmFjdGVyaWEgYW5kIHBoeXNpY2FsbHkgZXhhbWluaW5nIHRoZSB1bGNlciBwcmVzZW50IG9yIG5vdCBhbmQgdGhlIHByc2VuY2Ugb2YgaCBweWxvcmljIGJhY3RlcmlhIGFuZCBvdGhlciBpbmZlY3Rpb3VzIHZhcmlhbnQgdGhhdCBtYXkgYmUgY2F1c2luZyB0aGUgc3ltcHRvbWQuIHhyYXkgYW5kIHVsdHJhIHNvdW5kOiBpbiB0aGlzIHRoZSBpbWFnZXMgdGhhdCBoZWxwIHRvICBpZGVudGlmeSBhbnkgc3RydWN0dXJhbCBhYm5vcm1hbGl0aWVzIGFuZCBibG9ja2FnZSBpbiB0aGUgZGlnZXN0aXZlIHN5c3RlbSBtYXkgYmUgY29udHJpYnV0aW5nIHRvIHRoZSBzeW1wdG9tcywgcGggbW9uaXRvcmluZzogaW4gdGhpcyBwaCBpcyBpZGVudGlmaWVkIHdoZXRnZXIgaXQgaXVzIGJhc2ljIG9kIGFjaWRpYyB0aGlzIG1ldGhvZCBpbnZvbHZjZSBwbGFjaW5nIGEgc21hbGwgZGV2aWNlIGluIHRoZSBlc29waGFndXMgdG8gbWVhc3VyZSB0aGUgYW1vdW50IG9mIGFjaWQgcmVmdWx4aW5nIGludG8gdGhlIGVzb3BoYWd1cyB3aGloIGNhbiBoZWxwIHRvIGRpYWdub3NlIGdhc3Ryb2Vzb3BoYWdlYWwgcmVmdWx4IGRpc2Vhc2UgKEdFUkQpLiB0aGUgZG9jdG9yIG1heSBhbHNvIHJlY29tbWVuZCBjaGFuZ2VzIGluIGdpcmwgZGlldCBhbmQgbGlmZXN0eWxlIGFuZCBtZWRpY2F0aW9ucyB0byByZWR1Y2Ugc3RvbWF2Y2ggYWNpZCBhbmQgdHJlYXQgaW5mZWN0aW9uIHRoYXQgbWF5IGJlIHByZXNlbnQuIDIuIHRoZSBjaGlsZCBpcyA2IG1vbnRoIG9sZCB3aXRoIDM2LjYgYyBib2R5IHRlbXBlcmF0dXJlIGlzIHdpdGhpbiB0aGUgbm9ybWFsIHJhbmdlLCByZXNwaXJhdG9yeXQgcmF0ZSAzMCBwZXIgbWludXRlIG9mIHRoZSBjaGlsZCBpcyBnaXZlbiBzbyB0aGUgZ2VuZXJhbGx5IDI1LTMwIHBlciBtaW51dGUgaXMgbm9ybWFsIHJhbmdlIG9mIGJyZWF0aGluZyB0aGUgY3lsaW5kcmljYWwgc2hhcGUgb2YgdGhlIGNoZXN0IGlzIGFsc28gY29uc2lkZXJlZCBub3JtYWwgYXQgaW5mYW50cyBhdCB0aGlzIGFnZSBhbmQgdGhlIGJvdGggaGFsdmVzIGFyZSBzeW1tZWVydHJpY2FsIGFuZCBlcXVhbGx5IHBhcnRpY2lwYXRlIGluIHRoZSBhY3Qgb2YgYnJlYXRoaW5nIHNvIHRoYXQgbWVhbnMgYnJlYXRoZ2luZyByYXRlIGlzIG5vdCBkaXN0dXJiZWQgYW5kIGZ1bmN0aW9ucyBhcmUgd29ya2luZyBwcm9wZXJseSAuIHBlcmN1c3Npb24gb3ZlciB0aGUgbHVuZyBhIGNsZWFyIHB1bG1vbmFyeSBzb3VuZCBpcyBhbHNvIGNvbnNpZGVyZWQgYSBnb29kIHNpZ24gbm8gcHJvYmxlbSBpcyBzZWVuLiB0aGlzIGl1cyBpbXBvcnRhbnQgdG8gbm90ZSB0aGF0IGZ1cnRoZXIgcGh5c2ljYWwgZXhhbWluYXRpb24gYW5kIGRpc2dub3NpcyBtYXkgYmUgbmVjZXNzYXJ5IHRvIGZ1bGx5IGV2YWx1YXRlIHRoZSByZXNwb2lyYXRvcnkgaGVhbHRoIG9mIHRoZSBjeGhpbGQuIG5hdHVyZSBvZiBicmVhdGhpbmcgaXMgbm9ybWFsIGFjY29yZGluZyB0byB0aGUgaW5mYW50IGJyZWF0aGluZyByYXRlIGFuZCBmdW5jdGlvbnMuIHRoZXJlIGlzIG5vcm1hbCBhdXNjdWxhdG9yeSBsdW5nIHNvdW5kIGlzIHNlZW4gc28gdGhlIGNvbmRpdGlvbiBvZiB0aGUgY2hpbGQgaXMgbm9ybWFsLg==</text:p>
          </table:table-cell>
          <table:table-cell office:value-type="float" office:value="170348" table:style-name="ce1">
            <text:p>170348</text:p>
          </table:table-cell>
          <table:table-cell office:value-type="float" office:value="72" table:style-name="ce1">
            <text:p>7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24" table:style-name="ce1">
            <text:p>915124</text:p>
          </table:table-cell>
          <table:table-cell office:value-type="string" table:style-name="ce1">
            <text:p>english</text:p>
          </table:table-cell>
          <table:table-cell office:value-type="string" table:style-name="ce1">
            <text:p>Ticket 37.&amp;lt;br /&amp;gt; 1. Тhe girl is 12 years old. Complains of abdominal pain that appears on an empty stomach. After eating, the pain decreases. Heartburn, weakness, frequent headaches, irritability are also disturbing. During the examination: nutrition is reduced, pale, tongue is moist, with white coating, abdomen on palpation is soft, painful in all departments, more painful in epigastrium, liver is not enlarged, feces is constipated. What research methods should be carried out to clarify the diagnosis?&amp;lt;br /&amp;gt; 2. The child is 6 months old. Body temperature 36.6 C. Respiratory rate 30 per minute. The chest is cylindrical in shape. Both halves are symmetrical and equally participate in the act of breathing. Percussion over the lung a clear pulmonary sound. Determine the nature of his breathing during auscultation of the lungs?&amp;lt;br /&amp;gt;</text:p>
          </table:table-cell>
          <table:table-cell office:value-type="string" table:style-name="ce1">
            <text:p>QU5TV0VSIE5PLiAxIC0gIEhlcmUgdGhlIGNhc2Ugb2YgYSAxMiB5ZWFycyBvbGQgZ2lybCBzbyAsIFRoZSBkZXNjcmliZWQgc3ltcHRvbXMgbWF5IGluY2x1ZGUgdmFyaW91cyBwYXRob2xvZ2llcyBpbmNsdWRpbmcgdGhlIGdhc3RyaWMgcGVwdGljIHVsY2VyIGRpc2Vhc2Ugb3IgbWF5IGJlIHNvbWUgb3RoZXIgZ2FzdHJvaW50ZXN0aW5hbCBkaXNvcmRlcnMgLiBUbyBjbGFyaWZ5IHRoZSBkaWFnbm9zaXMgdGhlIGZvbGxvd2luZyBtZXRob2RzIGNhbiBiZSBjYXJyaWVkIG91dCBhbmQgYXJlIGxpc3RlZCBiZWxvdyA6IDEpIFVwcGVyIGVuZG9zY29weSB3aXRoIGJpb3BzeSB0byBhY2Nlc3MgdGhlIGNvbmRpdGlvbiBvZiB0aGUgc3RvbWFjaCBhbmQgdGhlIGRldWRvbnVtIGFuZCB0byBkZXRlY3QgdGhlIHBvc3NpYmxlIGxlc2lvbnMgLiAyKSBCbG9vZCB0ZXN0IHRvIGV2YWx1YXRlIHRoZSBsZXZlbCBvZiBpbmZsYW1tYXRpb24gYW5kIHRoZSBwcmVzZW5jZSBvZiBILnB5bG9yaWMgaW5mZWN0aW9uLiAzKSBTdG9vbCB0ZXN0IHRvIGFjY2VzcyBmb3IgdGhlIHByZXNlbmNlIG9mIHRoZSBibG9vZCBvciBvdGhlciBhYm5vcm1hbGl0aWVzIC4gNCkgSW1hZ2luZyBzdHVkaWVzIHN1Y2ggYXMgdGhlIHVsdHJhc291bmQgb3IgQ1QtU2NhbiB0byB2aXN1YWxpc2UgdGhlIGRpZ2VzdGl2ZSBzeXN0ZW0gYW5kIHRvIGRldGVjdCBhbnkga2luZCBvZiB0aGUgc3RydWN0dXJhbCBhYm5vcm1hbGl0aWVzIC4gIEFOU1dFUiBOTy4gMiAtIEhlcmUgaXMgdGhlIGNhc2Ugb2YgYSA2IG1vbnRocyBvbGQgY2hpbGQgc28sIGJhc2VkIG9uIHRoZSBkaXNjcmlwdGlvbiB0aGUgYnJlYXRoaW5nIG9mIHRoZSBjaGlsZCBpcyBub3JtYWwgd2l0aCBjbGVhciBwdWxtb25hcnkgc291bmRzIGhlYXJlZCBkdXJpbmcgdGhlIHBlcmN1c3Npb24gLiBSZXNwaXJhdG9yeSByYXRlIGlzIDMwIHBlciBtaW51dGVzIC4gSG93ZXZlciwgIHRvIGZ1bGx5IGFjY2VzcyB0aGUgbmF0dXJlIG9mIHRoZSBicmVhdGhpbmcgaXQgaXMgaW1wb3J0YW50IHRvIHBlcmZvcm0gdGhlIGF1c2N1bHRhdGlvbiBvZiB0aGUgbHVuZ3MgdG8gbGlzdGVuIGZvciBhbnkgYWJub3JtYWwgc291bmQgc3VjaCBhcyB3aGl6emluZyBzb3VuZCAsIGNyYWNrbGVzIG9yIGRlY3JlYXNlZCBicmVhdGhpbmcgc291bmQgLiBUaGlzIGNhbiBoZWxwIGluIGRldGVjdGluZyBhbnkgdW5kZXJseWluZyBhbnkgcmVzcGlyYXRvcnkgaXNzdWVzIHN1Y2ggYXMgYnJvbmNoaXRpcyBhbmQgcG5ldW1vbmlhIC4gIA==</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95" table:style-name="ce1">
            <text:p>915195</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DRgdKx0YDQsNKbOiAzINCw0LnQu9GL0psg0LHQsNC70LDQtNCwINGW0YjRltC90ZbSoyDQttC10LvQtNC10L3Rg9GWINC205nQvdC1INC60q/QvdGW0L3QtSDQsNC70YLRiyDQttC10YLRliDRgNC10YIg0L3TmdC20ZbRgSDRiNGL0pPQsNGA0LDRgtGL0L3QtNGL0pPRi9C90LAg0YjQsNKT0YvQvNC00LDQvdGL0L8g0LrQtdC70ZbQvyDRgtKx0YAuINCX0LXRgNGC0YLQtdGD0LvQtdGAINC60LXQt9GW0L3QtNC1INCx0LDQu9Cw0L3Ri9KjINC905nQttGW0YHRliDQsdC+0YLSm9CwINGC05nRgNGW0LfQtNC10YEg0LbTmdC90LUg0YHQsNGA0Ysg0YLSr9GB0YLRliwg0L7QvdGL0qMg0pvSsdGA0LDQvNGL0L3QtNCwINC90LXQudGC0YDQsNC7INC80LDQudC70LDRgNC00YvSoywg0pvQvtGA0YvRgtGL0LvQvNCw0Lkg0pvQsNC70pPQsNC9INC60LvQtdGH0LDRgtC60LDQu9Cw0YDRi9C90YvSoyDQttOZ0L3QtSDQutGW0LvQtdCz0LXQudC70LXRgNC00ZbSoyDQsdCw0YDRi9C9INC606nRgNC00ZbQui4g0J7RgdGLINC20LDSk9C00LDQudC70LDRgNC00YvSoyDQsdCw0YDQu9GL0pPRiyDQsdCw0LvQsNC70LDRgNC00YvSoyDRgtC+0psg0ZbRiNC10LPRltC90ZbSoyDQsNC90LDRgtC+0LzQuNGPINGE0LjQt9C40L7Qu9C+0LPQuNGH0LvRi9KbINC10YDQtdC60YjQtdC70ZbQs9GW0L3QtSDQsdCw0LnQu9Cw0L3Ri9GB0YLRiyDQsdC+0LvRi9C/INGC0rHRgC4g0JHQsNC70LDQu9Cw0YDQtNGL0qMg0LDQvdCw0YLQvtC80LjRj9C70YvSmyDQtdGA0LXQutGI0LXQu9GW0LrRgtC10YDRltC90LUg0LrQtdC70LXRgCDQsdC+0LvRgdCw0psg0L7Qu9Cw0YDQtNGL0qMg0YLQvtKbINGW0YjQtdCz0ZYg0rHQt9GL0L3Ri9GA0LDSmyDQttOZ0L3QtSDQtNC40LDQvNC10YLRgNGWINCx0L7QudGL0L3RiNCwINC60ZbRiNGWINGB0L7QvdGL0LzQtdC9INKb0LDRgtCw0YAg0LHSsdC70YjRi9Kb0LXRgtGC0LXRgNGWINOZ0LvRgdGW0Lcg0L3QtdC80LXRgdC1INGC0L7Qu9GL0psg0LTQsNC80YvQvyDQttC10YLRltC70LzQtdCz0LXQvSDQsdC+0LvRi9C/INC60LXQu9C10LTRli4g0JHQsNC70LAg0YLRg9GL0LvSk9Cw0L3QtNCwINC+0L3Ri9KjINGC0L7SmyDRltGI0LXQs9GW0L3RltKjINKx0LfRi9C90LTRi9KT0Ysg0LDQu9C/0YvRgSDSr9GIINGB0LDQvdGC0LjQvNC10YLRgCDRiNCw0LzQsNGB0YvQvdC00LAg0LHQvtC70LDQtNGLINCw0Lsg0LHRltGAINC20LDRgdKb0LAg0YLQvtC70pPQsNC9INC60LXQt9GW0L3QtNC1INGB0LXQutGB0LXQvSDSr9GIINGB0LDQvdGC0LjQvNC10YLRgNCz0LUg0LTQtdC50ZbQvSDTqdGB0LXRgtGW0L0g0LHQvtC70LDQtNGLLiDQkdCw0LvQsNC70LDRgNC00YvSoyDRgtC+0psg0ZbRiNC10LPRltC90ZbSoyDSm9Cw0YLQv9Cw0YDQu9Cw0YDRiyDRgtC+0LvRi9KbINCx06nQu9GW0L3RltC/INC606nRgNGW0L3QsdC10LnQtNGWINC205nQvdC10LTQtSDQvtC70LDRgNC00YvSoyDRiNCw0LbRi9GA0pvQsNC50LvQsNGA0Ysg0YLQvtC70YvSmyDSm9Cw0LvRi9C/0YLQsNGB0L/QsNKT0LDQvSDQsdC+0LvRi9C/INC60LXQu9C10LTRliDQttOZ0L3QtSDQvtC70LDRgNC00YvSoyDSm9Cw0LzQv9Cw0LnQvNCw0LvRi9GA0Ysg0LTQsCDRgtC+0LvRi9KbINCx06nQu9GW0L3RltC/INC606nRgNGW0L3QsdC10LnRgtGW0L0g0LHQvtC70LDQtNGLLCDQsdKx0Lsg0pvSsdGA0YvQu9GL0LzQtNCw0YDQtNGL0qMg0pvQsNC70YvQv9GC0LDRgdGD0Ysg0L3TmdGA0LXRgdGC0LXQvdGW0qMg0LXQutGWINCw0LnRiyDRiNCw0LzQsNGB0YvQvdC00LAg0LbQsNKb0YHRiyDQutOp0YDRltC90LXRgtGW0L0g0LHQvtC70LDQtNGLLiDQndOZ0YDQtdGB0YLQtdC70LXRgNC00ZbSoyDRgtC+0psg0ZbRiNC10LPRltC90ZbSoyDRiNGL0YDRi9GI0YLRiyDSm9Cw0LHQsNGC0YvQvdGL0qMg0pvSsdGA0YvQu9GL0YHRi9C90LAg0LHQsNC50LvQsNC90YvRgdGC0Ysg0LXRgNC10LrRiNC10LvRltC60YLQtdGA0ZbQvdC1INC60LXQu9C10YAg0LHQvtC70YHQsNC8INC+0LvQsNGA0LTQsCDRgtCw0pPQsNC80L3Ri9KjINGC0L7Qu9GL0psg0YHRltKj0ZbRgNGW0LvRg9GWINC80LXQvSDRgtCw0pPQsNC8INKb0rHRgNCw0LzRi9C90LTQsNKT0Ysg0YHRg9C00Ysg0YHRltKj0ZbRgNGD0ZYg0L3QsNGI0LDRgCDQsdC+0LvQsNC00Ysg0LbTmdC90LXQtNC1INGC0L7SmyDRltGI0LXQutGC0ZbSoyDRjdC/0LjRgtC10LvQuNC50ZYg0LrTqdC/INCx0L7Qu9GD0YvQvdCwINCx0LDQudC70LDQvdGB0YvRgiDRiNGL0YDRi9GIINC606nQvyDQsdOp0LvRltC90LXRgtGW0L0g0LHQvtC70LDQtNGLLCDQvtGB0YvSk9Cw0L0g0LHQsNC50LvQsNC90YvRgdGC0Ysg0LHQsNC70LDQvdGL0qMg0L3TmdC20ZbRgdGWINGB0YPQu9GLINGP0pPQvdC4INCx0L7RgtKb0LAg0YLTmdGA0ZbQt9C00ZYg0LHQvtC70YvQvyDQutOp0YDRltC90LXQtNGWLCDQsNC7INGC0LDSk9Cw0LzQvdGL0qMg0YLQvtC70YvSmyDRgdGW0qPRltGA0ZbQu9C80LXRg9GW0L3QtSDQsdCw0LnQu9Cw0L3Ri9GB0YLRiyDRj9KT0L3QuCDQsdCw0LvQsNC70LTRi9KjINKb0L7RgNGL0YLQsCDQu9Cw0LzQsNGD0YvQvdCwINCx0LDQudC70LDQvdGL0YHRgtGLINC905nQttGW0YHRgtGW0qMg0pvSsdGA0LDQvNGL0L3QtNCwINKb0L7RgNGL0YLRi9C70LzQsNC5INKb0LDQu9KT0LDQvSDQutC70LXRh9Cw0YLQutCw0LvQsNGAINC80LXQvSDQvNCw0LnQu9Cw0YDQtNGLINC606nRgNGD0LPQtSDQsdC+0LvQsNC00YsuINCd05nRgNC10YHRgtC10LvQtdGA0LTQtSDRgtCw0LzQsNKb0YLRi9KjINKb0L7RgNGL0YLRi9C70LzQsNGD0YvQvdCwINGC0LDSk9GLINGE0LXRgNC80LXQvdGC0YLQtdGA0LTRltKjINC20LXRgtC60ZbQu9GW0LrRgdGW0LfQtNGW0LPRliDQvdC10LzQtdGB0LUg0L7Qu9Cw0YDQtNGL0qMg0LHQsNC70LDQu9Cw0YDQtNCwINGC0L7Qu9GL0psg0pvQsNC70YvQv9GC0LDRgdC/0LDRg9GL0L3QsCDQsdCw0LnQu9Cw0L3Ri9GB0YLRiyDQtNC10YPQs9C1INC00LUg0LHQvtC70LDQtNGLLCDQvtC7INGE0LXRgNC80LXQvdGCINGA0LXRgtGW0L3QtNC1INC70LDQutGC0L7Qt9Cw0L3RiyDQsNC50YLRg9KT0LAg0LHQvtC70LDQtNGLLiDQndOZ0YDQtdGB0YLQtdC70LXRgNC00ZbSoyDRgtC+0psg0ZbRiNC10LPRltC90LTQtSDQmiDQstC40YLQsNC80LjQvdGWINGB0qPRltGA0ZbQu9C10YLRltC9INC10qMg0L3QtdCz0ZbQt9Cz0ZYg0L7RgNC90Ysg0LHQvtC70YvQvyDQutC10LvQtdC00ZYuINCR0rHQtNCw0L0g0LHQsNGB0pvQsCDQvdOZ0YDQtdGB0YLQtdC70LXRgNC00LUg0ZbRiNC10Log0LzQvtGC0L7RgNC40LrQsNGB0YvQvdGL0qMg0LbQtdGC0ZbQu9C80LXQs9C10L3QtNGW0LPRliDQvNC10L0g0ZbRiNC10LrRgtC10YDQvdGW0qMg0pvRi9GB0pvQsNC70YvSk9GL0L3QsCDQtNCwINCx0LDQudC70LDQvdGL0YHRgtGLINC10YDQtdC60YjQtdC70ZbQutGC0LXRgNGW0L0g0LDQudGC0YPSk9CwINCx0L7Qu9Cw0LTRiy4g0J3TmdGA0LXRgdGC0LXQu9C10YDQtNGW0qMg0ZbRiNC10LPRltC90ZbSoyDSm9Kx0YDQsNC80YvQvdC00LAg0LHQuNGE0LjQtNC+INC205nQvdC1INC70LDQutGC0L7QsdCw0LrRgtC10YDQuNGP0LvQsNGA0LvQsNGAINCx0L7Qu9Cw0LTRiy4gINCh0rHRgNCw0psg0LzTmdGC0ZbQvdGW0L3QtNC1INCx0LXRgNGW0LvQs9C10L0g0LDSm9C/0LDRgNCw0YLRgtCw0YAgMyDQsNC50LvRi9KbINCx0LDQu9CwINKv0YjRltC9INKb0LDQu9GL0L/RgtGLINC20LDSk9C00LDQuSDQtNC10YPQs9C1INCx0L7Qu9Cw0LTRiyDQttOZ0L3QtdC00LUg0LDQvdCw0YHRi9C90LAg0LXRiNKb0LDQvdC00LDQuSDSm9Cw0YPRltC/0YLRltKjINC20L7SmyDQtdC60LXQvdGW0L0g0LDQudGC0YPSk9CwINCx0L7Qu9Cw0LTRiy4gMiDRgdKx0YDQsNKbLiDSmtKx0YDRgdCw0psg0ZbRiNGW0L3QtNC10LPRliDQutC10LfQtdKj0LTQtSDSm9Cw0L3QtNCw0Lkg0YTQsNC60YLQvtGA0LvQsNGAINKx0YDRi9Kb0YLRi9KjINKb0LDQvdCw0LnQvdCw0LvRi9C80LDQvdGL0qMg0LHQtdC50ZbQvNC00LXQu9GD0ZbQvdC1INOZ0YHQtdGA0ZbQvSDRgtC40LPRltC30LXQtNGWLiDSsNGA0YvSmyDQv9C70LDRhtC10L3RgtCw0YDQu9GL0psg0pvQsNC5INCw0LnQvdCw0LvRi9C80Ysg0L7QuyDQsNC90LAg0LzQtdC9INCx0LDQu9CwINCw0YDQsNGB0YvQvdC00LDSk9GLINC90LXQs9GW0LfQs9GWINOZ0YDRliDQvNCw0qPRi9C30LTRiyDQsdCw0LnQu9Cw0L3Ri9GB0YLRi9GA0YPRiNGLINKb0rHRgNGL0LvRi9C8INC90LXRgdC10LzQtSDQvNKv0YjQtSDQtNC10YHQtdC6INGC0LUg0LHQvtC70LDQtNGLLCDQsdCw0LvQsCDRgdC+0Lsg0LDRgNKb0YvQu9GLINC00LDQvNGL0L8g06nRgdGW0L8g0LbTmdC90LXQtNC1INKb0L7RgNC10LrRgtC10L3QtdC00ZYsINC+0YLRgtC10LPRltC90ZYg0LDQu9Cw0YLRi9C9INCx0L7Qu9GL0L8g0LrQtdC70LXQtNGWLiDQsNC7INC10L3QtNGWINC+0L3Ri9KjINCx0LXQudGW0LzQtNC10LvRg9GW0L3QtSDRgtC40LPRltC30LXRgtGW0L0g0YTQsNC60YLQvtGA0LvQsNGA0pPQsCDQutC10LvQtdGAINCx0L7Qu9GB0LDQvCDQtdKjINCx0ZbRgNGW0L3RiNGWINCw0YLQsNC/INOp0YLQtdGC0ZbQvSDQvtC7INC+0YLRgtC10LPRltC80LXQvSDQsdCw0LnQu9Cw0L3Ri9GB0YPRiywg0Y/Sk9C90Lgg0LHQsNC70LDQvdGL0qMg0LDQvdCw0L3Ri9KjINKb0LDQvdGL0L3QsCDQvtGC0YLQtdCz0ZbQvdGWINCw0LvRg9GLINC+0YHRi9KT0LDQvSDSm9Cw0LbQtdGC0YLRliDQtdKjINC90LXQs9GW0LfQs9GWINGE0LDQutGC0L7RgCDQvtC7INCx0LDQu9Cw0L3Ri9KjINCz0LXQvNCw0LPQu9C+0LHQuNC90ZbQvdC1INCx0LDQudC70LDQvdGL0YHRgtGLLiDSmtKx0YDRgdCw0pvRgtCw0pPRiyDRgdOZ0LHQuNC70LXRgNC00ZbSoyDQs9C10LzQvtCz0LvQvtCx0LjQvdGWINGE0LXRgtCw0LvRjNC00Ysg0LPQtdC80L7Qs9C70L7QsdC40L3QvdGW0qMg0LHQvtC70YPRiyDRj9KT0L3QuCDQvtC7INC10YDQtdC10LrRgtC10YDQs9C1INKb0LDRgNCw0pPQsNC90LTQsCDQsNC90LAg0pvQsNC90YvQvdCw0L0g0L7RgtGC0LXQs9GW0L3RliDRgtC10Lcg0LHQsNC50LvQsNC90YvRgdGC0YvRgNGL0L8g0LDQu9GD0YjRiyDQsdC+0LvRi9C/INC60LXQu9C10LTRliwg0L7QvdGL0qMg0LHSsdC7INC10YDQtdC60YjQtdC70ZbQs9GWINCz0LXQvNC+0LPQu9C+0LHQuNC90L3RltKjINKb0rHRgNCw0LzRi9C90LTQsCDQtdC60ZYg0LPQsNC80LzQsCDRgtGW0LfQsdC10LPRltC90ZbSoyDQsdC+0LvRg9GL0L3QsCDQsdCw0LnQu9Cw0L3Ri9GB0YLRiyDQsdC+0LvQsNC00YsuINCQ0L3QsNC90YvSoyDSm9Cw0L0g0pvRi9GB0YvQvNGL0qMg0LbQvtKT0LDRgNGLINCx0L7Qu9GD0Ysg0Y/Sk9C90Lgg0LbSr9C60YLRltC70ZbQuiDQutC10LfRltC90LTQtSDQsNC90LDQvdGL0qMg0pvQsNC9INCw0pPRi9GB0Ysg0pvQsNC70YvQv9GC0YvQtNCw0L0g0LbQvtKT0LDRgNGLINCx0L7Qu9GL0L8g0LrQtdC70LXQtNGWLCDQsNC7INCx0LDQu9Cw0LTQsCDSm9Cw0L0g0pvRi9GB0YvQvNGLINGC06nQvNC10L0g0LHQvtC70LDQtNGLLiDQndOZ0YDQtdGB0YLQtdC90ZbSoyDQvtGC0LXQs9GW0LPQtSDSm9Cw0L3Ri9Kb0YLRi9GA0YvQu9KT0LDQvSDSm9Cw0L3RiyDQtdKjINCx0ZbRgNGW0L3RiNGWINC20q/RgNC10Log0LbTmdC90LUg0LzQuCDQvNC10L0g0LHQsNGD0YvRgNC00Ysg0pvQsNC80YLQuNGC0YvQvSDQsdC+0LvQsNC00YssINCw0Lsg0LDRgNC70LDRgdKb0LDQvSDSm9Cw0L3RiyDSm9Cw0LvSk9Cw0L0g0YLTqdC80LXQvdCz0ZYg0LHTqdC70ZbQutGC0ZYg0pvQsNC80YLQuNGC0YvQvSDQsdC+0LvQsNC00YsuINCf0LvQsNGG0LXQvdGC0LDRgNC70YvSmyDSm9Cw0L0g0LDQudC90LDQu9GL0LzRi9C9INCx0LDQu9Cw0YDQtNCwINC10YDQtdC60YjQtSDTqdC30LXQutGC0LXRgNGWINC90LXQvNC10YHQtSDRgtC10YHRltC60YLQtdGA0ZbQvdGW0qMg0LHQvtC70YPRiyDQutGW0YjRliDSm9Cw0L0g0LDQudC90LDQu9GL0LzRiyDQvNC10L0g0q/Qu9C60LXQvSDSm9Cw0Lkg0LDQudC90LDQu9GL0LzRi9C90YvSoyDRgtGD0YvQu9KT0LDQvdC90LDQvSDQutC10LnRltC90LPRliDSm9Cw0L0g0LDQudC90LDQu9GL0LzRi9C90LDQvSDQtdGA0LXQutGI0LXQu9C10LnRgtGW0L0g0LHQvtC70LDQtNGLLCDRj9KT0L3QuCDQsdCw0LvQsNC70LDRgNC00YvSk9GLINC20q/RgNC10LrRiNC1INCw0YDQsNC70YvSmyDQttOZ0L3QtSDQsNGA0YLQtdGA0LjRj9C70LDRgNGL0L3Ri9KjINCw0YDQu9Cw0YDQtNGLINC+0YDQvdCw0LvQsNGB0pvQsNC9INOp0LfQtdC60YLQtdGA0ZYg0LDRgNKb0YvQu9GLINOZ0YHQtdGAINC10YLQtdC00ZYuINCR0LDQu9Cw0pPQsCDQutC10LvQs9C10L0g0pvQsNC9INC10qMg0LHRltGA0ZbQvdGI0ZbQsdGW0YAg0YLQsNGA0LzQsNKT0Ysg0LHQsNGD0YvRgNKT0LAg0LHQsNGA0LDQtNGLINCw0Lsg0LHRltGAINGC0LDRgNC80LDSk9GLINGC06nQvNC10L3Qs9GWINKb0YPRi9GBINCy0LXQvdCw0pPQsCDQsdCw0YDQsNC00Ysg0YHQvtC00LDQvSDRgdC+0qMg0L7QuyDQvtKjINC80LbSr9GA0LXQutGI0YnQtdCz0LUg0L7QtNCw0L0g0LbSr9GA0LXQutGI0LUg0LDRgNCw0LvRi9KbINOp0LfQtdC6INCw0YDSm9GL0LvRiyDRgdC+0Lsg0LbSr9GA0LXQutGI0LUg0L7QtNCw0L0g0pvQsNGA0YvQvdGI0LDSk9CwINGB0L7QtNCw0L0g0YHQvtKjINC806nRgNC70LXQvNC10LvRliDSm9C+0LvSm9CwINCw0YDRgtC10YDQuNGP0YHRiyDQsNGA0pvRi9C70Ysg0LzQuNKT0LAg0pvQsNC9INCx0LDRgNCw0YLRi9C9INCx0L7Qu9Cw0LTRiy4g0J7QtNCw0L0g0LHQsNGB0pvQsCDQttC+0pPQsNGA0pPRiyDSm9GD0YvRgdGC0LDQvSDQutC10LvQs9C10L0g0pvQsNC9INC80LXQvSDQsdCw0YPRi9GA0LvQsNC9INC60LXQu9Cz0LXQvSDSm9Cw0L0g0L7QuyDQtdC60LXRg9GWINC+0qMg0LbQsNKbINKb0LDRgNGL0L3RiNCwINCw0YDSm9GL0LvRiyDTqdC60L/QtdCz0ZYg0L7QvSDQv9Cw0LnRi9C3INKT0LDQvdCwINCx0LDRgNCw0LTRiyDQsNC7INKb0LDQu9KT0LDQvdGLINCw0YDRgtC10YDQuNGP0LvRi9KbINOp0LfQtdC60YLQtdGAINCw0YDSm9GL0LvRiyDSr9C70LrQtdC9INKb0LDQvSDQsNC50L3QsNC70YvQvNGL0L3QsCDSm9C+0YHRi9C70LDRgtGL0L0g0LHQvtC70YvQvyDQutC10LvQtdC00ZYsINC+0Lsg0pvQsNC9INCw0LnQvdCw0LvRi9C80YvQvSDQutGW0L3QtNGW0Log0LDRgNGC0LXRgNC40Y/RgdGL0L3QsCDQutC10LvQs9C10L3QtNC1INC/0LvQsNGG0LXQvdGC0LDRgNC70YvSmyDQsNGA0YLQtdGA0LjRj9C70LDRgCDRgNCw0pvRi9C70Ysg0LDQvdCw0pPQsCDSm9Cw0LnRgtCw0YLRi9C9INCx0L7Qu9GL0L8g0LrQtdC70LXQtNGWLiDQn9C70LDRhtC10L3RgtCw0YDQu9GL0psg0pvQsNC9INCw0LnQvdCw0LvRi9C80L3Ri9Kj0LzQsNC00LDQv9GC0LDRhtC40Y/RgdGL0L3QsCDTmdGB0LXRgCDQtdGC0LXRgtGW0L0g0YTQsNC60YLQvtGA0LvQsNGA0pPQsCDQvtGB0YvQu9Cw0YDQtNGLINC205nQvdC1INKx0YDRi9Kb0YLRi9KjINOp0LfRltC90LTRltC6INC20q/RgNC10Log0pvQsNC9INCw0LnQvdCw0LvRi9C80YvQvdGL0qMg0LHQvtC70YPRiyDQvNC10L0g06nQt9GW0L3QtNGW0Log0pvRi9GB0YvQvCDQvNC10L0g0pvQsNC9INKb0rHRgNCw0LzRi9C90LAg0LbTmdC90LXQtNC1INCw0L3QsNGC0L7QvNC40Y/Qu9GL0psg0LXRgNC10LrRiNC10LvRltC60YLQtdGA0ZbQvdGW0qMg0LHQvtC70YPRiyDQv9C70LDRhtC10L3RgtCw0YDQu9GL0psg0LHQtdC50ZbQvNC00LXQu9GD0LPQtSDTmdGB0LXRgCDQtdGC0LXRgtGW0L0g0LHQvtC70YvQvyDQutC10LvQtdC00ZYu</text:p>
          </table:table-cell>
          <table:table-cell office:value-type="float" office:value="170348" table:style-name="ce1">
            <text:p>170348</text:p>
          </table:table-cell>
          <table:table-cell office:value-type="float" office:value="90" table:style-name="ce1">
            <text:p>9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198" table:style-name="ce1">
            <text:p>915198</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IDEuINCi0L7SmyDRltGI0LXQutGC0ZbSoyDQsNC90LDRgtC+0LzQuNGP0LvRiyDRhNC40LfQuNC+0LvQvtCz0LjRj9C70YvSmyDQtdGA0LXQutGI0LXQu9GW0LrRgtC10YDRltC90LUg0LrQtdC70YHQtdC6ICDQsdCw0LvQsNC90YvSoyDRgtC+0psg0ZbRiNC10LPRliDQtdGA0LXRgdC10LrRgtC10YDQs9C1INC60LDRgNCw0LPQsNC90LTQsCDRgdCw0LvRi9GB0YLRi9GA0LzQsNC70Ysg0YLRg9GA0LTQtSDSsdC30YvQvSDQsdC+0LvRi9C/INC60LXQu9C10LTRli4gINCj0LfRi9C90LTRi9KT0YsgNjMg0YHQvCDQutKx0YDQsNC50LTRiy4gINCi0LXQs9GW0YHRgtC10YMg0LrQtdC70LPQtdC9INGB0YvRgNGC0pvRiyDQsdC10YLRliAg0LbTmdC90LXQtNC1INGC0LDRgCDQsdC+0LvRi9C/INC60LXQu9C10LTRli4gINCV0YHQtdC50LUg0LrQtdC70LUg0LHQsNC70LDQu9Cw0YDQtNGL0qMg0YLQvtC6INGW0YjQtdCz0ZYg0LrQsNC80L/QsNC50LzQsNC70LDRgNGLINC80LXQvSDRgtCw0YHQv9Cw0LvQsNGA0Ysg0LrQsNC70YvQv9GC0LDRgdGL0L8g0LHQsNGB0YLQsNC50LTRiy4gINCW05nQvdC10LTQtSDRgdC+0L3Ri9C80LXQvSDQsdGW0YDQs9C1INGI0LDQttGL0YDQsNC60LDQudGL0LTQsCDQutCw0LvRi9C/0YLQsNGB0LDQtNGLLiDQotC+0Log0ZbRiNC10Log0YHQvtC60YvRgCDRltGI0LXQuiwg0LbQvtCz0LDRgNGL0LvQsNCz0LDQvSDQttOZ0L3QtSDQutOp0LvQtNC10L3QtdKjINGB0L7RgdGL0L0g0YLTqdC80LXQvdC00LXQs9C10L0g0YLQvtC6INGW0YjQtdC60YLQtdC9ICwg0YHQuNCz0LzQsCDRgtOZ0YDRltC30LTRliDRltGI0LXQutGC0LXQvSAg0YLSsdGA0LDQtNGLLiDQntC7INCw0YDQvNC10L0g0pvQsNGA0LDQuSDRgtGW0Log0ZbRiNC10Log0LDQvdGD0YHQv9C10L0g0LDRj9Kb0YLQsNC70LDQtNGLLiAg0JHRltC30LTQtSDQsdCw0LvQsCAzINCw0LnQu9GL0psg0ZbRiNGW0L3RltKjINC20LXQu9C00LXQvdGD0ZYgICwg0LrRg9C90ZbQvdC1IDUtNiDRgNC10YIg0L3TmdC20ZbRgSDRiNGL0pPQsNGA0LDRgtGL0L3Ri9C90LAgLNCx0L7RgtC60LAg0YLTmdGA0ZbQt9C00ZYg0YHQsNGA0Ysg0L3TmdC20ZbRgSwg0L3QtdC50YLRgNCw0LvQtNGLINC80LDQudC70LDRgCDQvtKjLCAg0pvQvtGA0YvRgtGL0LvQvNCw0pPQsNC9INC60LvQtdGH0LDRgtC60LAgLCDQutGW0LvQtdCz0LXQuSDQvtKjLCDQu9C10LnQutC+0YbQuNGCIDEtMiDQutOp0Lcg0LDQu9Cw0L3Ri9C90LTQsCAsMi0zINGN0L/QuNGC0LXQu9C40Lkg0LrTqdC3INCw0LvQsNC90YvQvdC00LAg0LHQsNGAINC10LrQtdC90LTRltCz0ZbQvdC1INGI0LDSk9GL0LzQtNCw0L3Ri9C/INC60LXQu9GW0L8g0YLSsdGALiAg0JbQvtKT0LDRgNGL0LTQsCDQsNC50YLRi9C70YvQvyDQutC10YLQutC10L3QtNC10LkgINCx0LDQu9Cw0LvQsNGA0LTRi9KjINGC0L7SmyDRltGI0LXQs9GWINGC0L7Qu9GL0psg0pvQsNC70YvQv9GC0LDRgdC/0LDSk9Cw0L0gLCDQsdKx0LvRiNGL0pvQtdGC0YLQtdGA0ZYg05nQu9GWINGC0L7Qu9GL0psg0LbQtdGC0ZbQu9C80LXQs9C10L0gINCx0L7Qu9Cw0LTRiy4g0KLQvtKbINGW0YjQtdC60YLRltKjINC90LXQs9GW0LfQs9GWINKb0YvQt9C80LXRgtGWICDRgdGDINGB0ZbSo9GW0YDRgyAsINC005nRgNGD0LzQtdC9INCaINOp0L3QtNGW0YDRltC70LXRgtGW0L0g0LbQtdGALiDQkdCw0LvQsNC70LDRgNC00YvSoyDRgtC+0psg0ZbRiNC10LPRltC90ZbSoyDRltGI0LrRliDSm9Kx0YDRi9C70YvRgdGL0L3QsCDQutC10LvRgdC10Log0L7Qu9Cw0YDQtNCwICDRjdC/0LjQu9C10LvQuNC50LvQtdGA0ZbQvdGW0qMg0LDRgNCw0YHRi9C90LTQsCDQsdC+0LrQsNC7INGC05nRgNGW0LfQtNGWINC20LDRgdGD0YjQsNC70LDRgNGLICDQutOp0L/RgtC10YMg0L7RgNC90LDQu9Cw0YHQsNC00YsuINCe0LvQsNGAINGI0YvRgNGL0Ygg0LHTqdC70YPQs9C1INKb0LDQsdGW0LvQtdGC0YLRli4gICDQodC+0L3Ri9C80LXQvSDSm9Cw0YLQsNGAINGE0LXRgNC80LXRgtGC0ZbQuiAg0LbSr9C50LXRgdGWINGC0L7Qu9GL0psg0LbQtdGC0ZbQu9C80LXQs9C10L0g0LHQvtC70LDQtNGLLiAg0J7QmyDRhNC10YDQvNC10L3RgiDRj9KT0L3QuCDRgdKv0YIg0pvQsNC90YLRi9C9INGL0LTRi9GA0LDRgtCw0YLRi9C9ICDQu9Cw0LrRgtCw0LfQsCDRhNC10YDQvNC10L3RgtGW0L3RltKjINC20LXRgtGW0YHQv9C10YPRiNGW0LvRltCz0ZYg0LHQvtC70LDQtNGLLiAgINCi0LDSk9GL0LTQsCDQsdGW0YAg0LXRgNC10LrRiNC10LvRltCz0ZYg0ZbRiNC10Log0LzQuNC60YDQvtGE0LvQvtGA0LDRgdGL0L3Ri9KjICDRgtC+0LvRi9KbINKb0LDQu9GL0L/RgtCw0YHQv9Cw0YPRiy4g0IbRiNC10LrRgtC1INC90LXQs9GW0LfRltC90LXQvSAg0YLQsNC60YLQvtCx0LDQutGC0LXRgNC40Y/Qu9Cw0YAg0LzQtdC9INCx0LjRhNC40LTQvtCx0LDQutGC0LXRgNC40Y/Qu9Cw0YDQtNCw0L0g0YLSsdGA0LDQtNGLLiAg0K/Qs9C90Lgg0L/QsNC50LTQsNC70Ysg0LzQuNC60YDQvtGE0LvQvtGA0LDQu9Cw0YAgINC70LDQutGC0L7Qt9Cw0L3RiyDQutC+0YDRi9GC0YPQs9CwINKb0LDRgtGL0YHQsNC00YsuICAg0KHQvtC90YvQvNC10L0g0LHRltGA0LPQtSDQsdCw0LvQsNC70LDRgNC00YvSoyDRltGI0LXQuiAg0LzQvtGC0L7RgNC40LrQsNGB0Ysg0LHQtdC70YHQtdC90LTRliDQsdC+0LvRi9C/INC60LXQu9C10LTRli4g0J7QuyAg0YLQsNKT0LDQvNC90YvSoyDRgtC10Lcg06nRgtGW0L8g0LrQtdGC0YPRltC9INGC0YPQtNGL0YDQsNC00YsuICDQodC+0L3Ri9C80LXQvSDQutCw0YLQsNGAINC60YvRgdC60LAg05nRgNGWINGC0LDRgNC70LDRgyDQsdC+0LvSk9Cw0L3QtNC00YvSm9GC0LDQvdC00LAg0YLQtdC3INOp0YLRltC/INC60LXRgtGD0ZYg0LbSr9GA0LXQtNGWLiAgINCh0L7QuyDRgdC10LHQtdC/0YLRliDQutC+0YDRi9GC0YvQu9C80LDSk9Cw0L0gINC60LvQtdGH0LDRgtC60LDQu9Cw0YAgINC606nRgNGW0L3QtdC00ZYuICDQkNC7INC70LXQudC60L7RhtC40YLRgtC10YAg0LzQtdC9INGN0L/QuNGC0LXQu9C40LkgINCx0L7Qu9GD0Ysg0LrQtdC70LXRgtGW0L0g0LHQvtC70YHQsNC6INC+0LvQsNGAINGW0YjQtdC60YLRltKjINKb0LDQsdGL0L3Rg9GL0L0g0LrTqdGA0YHQtdGC0LXQtNGWLiA8YnIgLz4NCjIuINKa0rHRgNGB0LDQuiDRltGI0ZbQvdGW0qMgINC60LXQt9C10qPQtNC1INC/0LvQsNGG0LXQvdGC0LDRgNC70YvSmyDSm9Cw0L0g0LDQudC90LDQu9GL0Lwg0LrQsNC90LTQsNC5INGE0LDQutGC0L7RgNC70LDRgCDTmdGB0LXRgCDQtdGC0LXQtNGWLiDQntCz0LDQvSDQtdKjINCx0ZbRgNGW0L3RiNGWICDQsNC90LDQvdGL0qMg0LrQsNC90LDQudC90LDQu9GL0LzQvdGL0qMg0LbRi9C70LTQsNC80LTRi9KT0Ysg0LbQsNGC0LDQtNGLLiDQkNC90LDQvdGL0qMg0pvQsNC9INCw0LnQvdCw0LvRi9C8INC20q/QudC10YHRliDTqdC30LPQtdGIINCx0L7Qu9Cw0LTRiy4gINKw0YDRi9KbINCw0L3QsNC00LDQvSDQv9C70LDRhtC10L3RgtCwINCw0YDSm9GL0LvRiyDRj9Kj0L3QuCDQtdC60ZYg0LDRgNGC0LXRgNC40Y/QvNC10L0gLCDQsdGW0YAg0LLQtdC90LDQtNCw0L0g0YLSsdGA0LDQtNGLLiDQkNGA0YLQtdGA0LjRj9C70LDRgNGLINCw0YDQutGL0LvRiyDTqdC+0YDQtdC60YLRltC6INC30LDRgtGC0LDRgCDQvNC10L0g0L7RgtGC0LXQs9GW0LPQtSDSm9Cw0L3Ri9Kb0LDQvSDQs9C10LzQvtCz0LvQsNCx0LjQvdC00LXRgCDTqdGC0LXQtNGWLiDQkNC7INCy0LXQvdCwINCw0YDSm9GL0LvRiyAg0pvQsNC70LTRi9KbINC30LDRgtGC0LDRgNGLINCw0LvQvNCw0YHRi9C/INC+0YLRi9GA0LDQtNGLLiAg0J7QuyDQsdCw0LvQsNC90YvSo9C00LAg0LrQsNC90LDQudC90LDQu9GL0LzRi9C90LAg0pvQvtGA0LXQutGC0ZbQuiDQt9Cw0YLRgtCw0YAg0LzQtdC9ICDQvtGC0YLQtdCz0ZbQvdGWINC20LXRgtC60ZbQt9GDINKb0YvQt9C80LXRgtGW0L0g0LDRgtC60LDRgNCw0YLRi9C90LTRi9C60YLQsNC9LiAg0JXQutGW0L3RiNGW0LTQtdC9ICDQsdCw0LvQsNC90YvSoyAg0pvQsNC9INCw0LnQvdCw0LvRi9C80YvQvdC00LAgINGE0LXRgtCw0LvRjNC00Ysg0LPQtdC80L7Qs9C70LDQsdC40L3QvdGW0qMg0LHQvtC70YPRi9C90LAg0LHQsNC50LvQsNC90YvRgdGC0YsuINCe0Lsg0LXQutGWINCw0LvRjNGE0LAg0LzQtdC9INC10LrRliDQsdC10YLRgtCwICDRgdCw0LrQuNC90LDQu9Cw0YDRi9C90LDQvSDRgtKx0YDQsNC00YsuINCR0rHQuyDQs9C10LzQvtCz0LvQvtCx0LjQvSDRgtGW0L3QtNC10YDQs9C1ICDQvtGC0YLQtdCz0ZbQvdGWINC20LXRgtC60ZbQt9GD0ZYg06nRgtC1INGC0LjRltC80LTRliDTmdGAINC20YvQu9C00LDQvCAg0LrQsNC80YLQsNC80LDRgdGL0Lcg0LXRgtGW0L8g0L7RgtGL0YDQsNC00YsuICDQkdCw0LvQsNC90YvSoyDSm9Cw0L3RiyDQsNGA0LDQu9Cw0YEg0LHQvtC70pPQsNC90LTRi9Kb0YLQsNC9ICDQvtGC0YLQtdCz0ZbQvNC10L0gINGC0LjRltC80LTRliDQttC10YLQutGW0LfRgyDSr9GI0ZbQvSDSm9Cw0LbQtdGC0YLRli4gINCR0LDQu9Cw0L3Ri9KjINKa0LDQvdCw0LnQvdCw0LvRi9C80Ysg0YLQtdC6INGD0LvQutC10L0g0LrQsNC90LDQudC90YvQu9GL0LzQvdCw0L0g0YLSsdGA0LDQtNGLLiDQmtGW0YjRliDSm9Cw0L3QsNC50L3QsNC70YvQvCAg0LHQvtC70LzQsNC50LTRiy4g0JbQvtKT0LDRgNKT0Ysg0pvRg9GL0YEg0LLQtdC90LDQvNC10L0g0YLTqdC80LXQvdCz0ZYg0pvRg9GL0YEg0LLQtdC90LAg0LHRltGAINCx0ZbRgNGW0LzQtdC9ICDQsNGA0LDQu9Cw0YHQv9Cw0LnQtNGLLiAg0KHQvtC90YvQvNC10L0g0LHRltGA0LPQtSDRgtCw0pPRiyAg0LDQvdCw0L3Ri9KjINCx0LXQudGW0LzQtNC10LvRg9GWICwg0YLQsNC80LDSm9GC0LDQvdGD0YvQvdGL0qMg0LTSsdGA0YvRgSDQsdC+0LvRg9GLLCDRgtCw0LfQsCDQsNGD0LDQvNC10L0g0LbQuNGWINGC0YvQvdGL0YHRgtCw0YPRiyDRgdC40Y/Sm9GC0Ysg0YLSr9GA0LvRliDRhNCw0LrRgtC+0YDQu9Cw0YAg0LHQsNGALiDQntGB0Ysg0LDQudGC0YvQu9KT0LDQvSDRhNCw0LrRgtC+0YDQu9Cw0YAgINC/0LvQsNGG0LXQvdGC0LDRgNC70YvSmyDSm9Cw0L3QsNC50L3QsNC70YvQvNC90YvSoyDQsNC00LDQv9GC0LDRhtC40Y/RgdGL0L0g0pvQsNC70YvQv9GC0LDRgdGC0YvRgNCw0LTRiy4gICA=</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3" table:style-name="ce1">
            <text:p>915233</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3RgdKx0YDQsNKbINC20LDRg9Cw0LHRizogMyDQsNC50LvRi9KbINCx0LDQu9Cw0LTQsNKT0Ysg0LHSsdC90LTQsNC5INGI0LDSk9GL0LzQtNCw0YDQtNGL0qMg0LHQvtC70YPRiywg0LrQsNC/0YDQvtC70L7Qs9C40Y/Qu9GL0pssINGP0pPQvdC4INC905nQttGW0YEg0LfQtdGA0YLRgtC10YPRltC90LUg0LHQsNC50LvQsNC90YvRgdGC0Ysg06nQt9Cz0LXRgNGW0YHRgtC10YAg0LDRgdKb0LDQt9Cw0L0t0ZbRiNC10Log0LbQvtC70LTQsNGA0YvQvdGL0qMg0LDQvdCw0YLQvtC8LdGE0LjQt9C40L7Qu9C+0LPQuNGP0LvRi9KbINC10YDQtdC60YjQtdC70ZbQutGC0LXRgNGW0L3QtSDQsdCw0LnQu9Cw0L3Ri9GB0YLRiyDQsdC+0LvRi9C/INGC0rHRgC4g0JDQhtCWINGB0L7QvdGL0qMg0ZbRiNGW0L3QtNC1INGC0L7SmyDRltGI0LXQutGC0ZbQuiDQtdGA0LXQutGI0LXQu9GW0LrRgtC10YDRltC90LUg0YLQvtKb0YLQsNC70LDRgtGL0L0g0LHQvtC70YHQsNKbLCDRgtC+0psg0ZbRiNC10Log0LHQsNC70LDQu9Cw0YDQtNCwIDY4INGB0Lwg0LTQtdC5INKx0LfRi9C9LCDQsNGA0Ysg0pvQsNGA0LDQuSA4MyDRgdC8INCz0LUg0LTQtdC50ZbQvSDSsdC30LDRgNGD0Ysg0pvQsNGA0pvRi9C90LTRiyDQttKv0YDQtdC0LiAxLdGI0ZbQtNC10L3RgiDQvdOZ0YDQtdGB0YLQtdGA0LXQu9C10YDQtNC1INC20LDQu9C/0Ysg0L/RgNC+0YLQtdC+0LvQuNGC0LjQutCw0LvRi9KbINGE0LXRgNC80LXQvdGC0YLQtdGA0LTRltKjINKb0YvQt9C80LXRgtGC0LXRgNGWINOZ0LvRgdGW0Lcg0LHQvtC70YvQvyDQutC10LvQtdC00ZYsINGB0L7QvdGL0qMg0L3TmdGC0LjQttC10YHRltC90LTQtSDQvdOZ0LbRltGB0ZYg0YHQsNGA0Ysg0YLSr9GB0YLRliDQttOZ0L3QtSDSm9Kx0YDQsNC80YvQvdC00LAg0L3QtdC50YLRgNCw0Lsg0LzQsNC50LvQsNGAINC205nQvdC1INKb0L7RgNGL0YLRi9C70LzQsNKT0LDQvSDQutC70LXRgtGH0LDRgtC60LAg0LrQtdC30LTQtdGB0LXRgtGW0L3RltC9INC606nRgNC10LzRltC3LiAyLSDQotC+0psg0ZbRiNC10Log0YHQsNC70YvRgdGC0YvRgNC80LDQu9GLINGC0q/RgNC00LUg0q/Qu9C60LXQvSDQttOZ0L3QtSDSm9Cw0L3RgtCw0LzRi9GA0LvQsNGA0YvQvNC10L0g0LbQsNKb0YHRiyDSm9Cw0LzRgtCw0LzRi9C3INC10YLRltC70LPQtdC9LiDQkdGW0YDQsNKbINC+0LvQsNGA0LTRi9KjINC20LjQtdC6INGW0YjQtdC60YLQtdGA0LTRltKjINGC0LDRgdC/0LAsINKb0LDQvNC/0LDQudC80LAg0LbTmdC90LUg0YjQsNGA0LHRi9C70LDRgNGLINC20L7Smywg0YLQtdC6IDYtNyDQttCw0YHSm9CwINKb0LDRgNCw0Lkg0YLQvtC70YvSmyDSm9Cw0LvRi9C/0YLQsNGB0LDQtNGLLCDRgdC+0L3Ri9KjINOZ0YHQtdGA0ZbQvdC10L0g0YHRg9C70LDRgCDQttOZ0L3QtSDRgtCw0pPQsNC80LTQsNGAINC00rHRgNGL0YEg0YHRltKj0ZbRgNGW0LvQvNC10LnQtNGWINC905nRgtC40LbQtdGB0ZbQvdC00LUg0L3TmdC20ZbRgSDQsdC+0YLSm9CwINGC05nRgNGW0LfQtNGWINCx0L7Qu9Cw0LTRiy4gMy3RiNGW0LTQtdC9INGC0L7SmyDRltGI0LXQutGC0ZbSoyDQsdCw0LrRgtC10YDQuNC+0LvQvtCz0LjRj9C70YvSmyDQvNC40LrRgNC+0YTQu9C+0YDQsNGB0Ysg0LTSsdGA0YvRgSDSm9Cw0LvRi9C/0YLQsNGB0L/QsNKT0LDQvSwg0L7QvdC00LAg0YLQtdC6INCw0L3QsCDRgdKv0YLRltC90LXQvSDRgtKv0YHQtdGC0ZbQvSDQkdC40YTQuNC00L7QsdCw0LrRgtC10YDQuNGPINC205nQvdC1INC70LDQutGC0L4t0LHQsNC60YLQtdGA0LjRj9C70YvRgCDQsdC+0LvQsNC00YssINGB0L7QvdGL0qMg05nRgdC10YDRltC90LXQvSDSm9C+0YDRi9GC0YvQu9C80LDSk9Cw0L0g0LrQu9C10YLRh9Cw0YLQutCwINC/0LDQudC00LAg0LHQvtC70LDQtNGLLCDRgdC10LHQtdCx0ZYg0ZbRiNC10Log0LzQuNC60YDQvtGE0LvQvtGA0LDRgdGLINC+0LvQsNGA0LTRiyDQsNGI0ZbRiNC10LrRgtC10L0g0LrQtdC70LPQtdC9INGE0LXRgNC80LXQvdGC0YLQtdGA0LzQtdC9INCx0ZbRgNCz0LUg0YvQtNGL0YDQsNGD0YvQvdCwINCw0YLRgdCw0LvRi9GB0LDQtNGLLiA0LdGI0ZbQtNC10L0sINGC0L7SmyDRltGI0LXQuiDQttC+0pPQsNGA0Ysg0L/RgNC+0LvQuNGE0LXRgNCw0YbQuNGP0LvRi9KbINKb0LDRgdC40LXRgtC60LUg0LjQtSDQsdC+0LvRi9C/INC60LXQu9C10LTRliwg0YHQvtC90YvSoyDQvdOZ0YLQuNC20LXRgdGW0L3QtNC1INC10LPQtdGAINCx0LDQu9CwINC20LjRliDRgtCw0LzQsNKb0YLQsNC90LDRgtGL0L0g0LHQvtC70YHQsCwg0L3TmdC20ZbRgdGC0LUg0Y3Qv9C40YLQtdC70LjQuSDQv9Cw0LnQtNCwINCx0L7Qu9Cw0LTRiy4gNS3RiNGW0LTQtdC9LCDRgdOZ0LHQuNC00LUg0ZbRiNC10Log0LzQvtGC0L7RgNC40LrQsNGB0YvQvdGL0qMg0LbQsNKb0YHRiyDQsdC+0LvRg9GLLCDQttC40ZYg0L3TmdC20ZbRgdGC0ZbSoyDQv9Cw0LnQtNCwINCx0L7Qu9GD0YvQvdCwINCw0LvRi9C/INC60LXQu9C10LTRli4gNi3QotC+0psg0ZbRiNC10LrRgtGW0qMgINC90LXQs9GW0LfRltC90LXQvSDQtdGA0LXRgdC10LrRgtC10YDQvNC10L0g0YHQsNC70YvRgdGC0YvRgNKT0LDQvdC00LAg0YjQsNC20YvRgNKb0LDQudGLINKx0LfRi9C9INC60LXQu9C10LTRliwg0L3TmdGC0LjQttC10YHRltC90LTQtSDRgdC+0pvRi9GAINGW0YjQtdC6INKb0L7Qt9KT0LDQu9C80LDQu9GLINC205nQvdC1INC10YDQtdGB0LXQutGC0LXRgNCz0LUg0pvQsNGA0LDSk9Cw0L3QtNCwINC20L7Sk9Cw0YDRiyDQvtGA0L3QsNC70LDRgdKb0LDQvSDQsdC+0LvRi9C/INC60LXQu9C10LTRli4g0J7RgdGL0pPQsNC9INCx0LDQudC70LDQvdGL0YHRgtGLINCw0L/Qv9C10L3QtNC40LrRgdGC0LAg0pvQvtC30pPQsNC70LzQsNC70Ysg0LbTmdC90LUg05nRgCDRgtKv0YDQu9GWINC+0YDRi9C90LTQsNGA0LTQsCDQvtGA0L3QsNC70LDRgdCw0YLRi9C9INCx0L7Qu9GL0L8g0LrQtdC70LXQtNGWLiDQvtC7INOp0Lcg0LrQtdC30LXQs9GW0L3QtNC1INC20LXQtNC10Lsg0LDQv9C/0LXQvdC00LjQutGBINKb0LDQsdGL0L3RgyDQutC10LfRltC90LTQtSDQtNC40LDQs9C90L7RgdGC0LjQutCw0LvQsNGD0LTQsCDSm9C40YvQvdC00YvSmyDRgtGD0LTRi9GA0YLQsNC00YsuIDct0KHQuNCz0LzQsCDRgtOZ0YDRltC30LTRliDTqdGB0ZbQvdC00ZbRgdGWINKx0LfRi9C9INC205nQvdC1INC60LXSoyDQsdC+0LvRi9C/INC60LXQu9C10LTRliwg0L7QuyDQvdOZ0LbRltGB0YLRltKjINCw0Lcg0LzTqdC70YjQtdGA0LTQtSDRgtC10Lcg0YjRi9KT0YPRi9C90LAg0YvSm9C/0LDQuyDQtdGC0LXQtNGWLiA4LdGI0ZbQtNC10L0sINCw0Ygg0ZbRiNC10LrRgtC1INGB05nQsdC40LvQtdGA0LTQtSDQsNGD0LAg0LrTqdC/INCx0L7Qu9Cw0LTRiywg0ZbRiNC10LrRgtC1INGC0LDQsdC40pPQuCDRgtCw0LzQsNKb0YLQsNC90YMg0L3QtdCz0ZbQt9GW0L3QtNC1INCw0YPQsCDRgtCw0pPQsNC80LzQtdC9INC10L3Qs9C10L3QtNC1INC205nQvdC1INGC0L7SmyDRltGI0LXQutGC0LXQs9GWINC80LjQutGA0L7RhNC70L7RgNCw0L3Ri9KjINCx0LDQutGC0LXRgNC40Y/RgdGLINGC0LDSk9Cw0Lwg0pvQvtGA0YvRgtGL0LvRg9GL0L3QsCDQsdCw0LnQu9Cw0L3Ri9GB0YLRiyDQs9Cw0LfQtNCw0YAg0YLRg9GL0L3QtNCw0YPRiy0g0LHQsNC70LDQtNGL0pPRiyDRltGI0ZbQvdGW0qMg0LbQtdC70LTQtdC90YPRliDQvNC10L0g0LzQsNC30LDRgdGL0LfQtNGL0pPRi9C9INGI0LDSm9GL0YDQsNC00YsuINKa0L7RgNGL0YLRi9C90LTRi9C70LDQuSwg0YLQvtKbINGW0YjQtdC60YLRltKjINCw0L3QsNGC0L7QvC3RhNC40LfQuNC+0LvQvtCz0LjRj9C70YvSmyDQtdGA0LXQutGI0LXQu9GW0LrRgtC10YDRljog0LbQvtKT0LDRgNGLINC/0YDQvtC70LjRhNC10YDQsNGG0LjRj9GB0YssINGE0LXRgNC80LXRgtGC0ZbQuiDQttOZ0L3QtSDQvNC40LrRgNC+0YTQu9C+0YDQsNGB0YvQvdGL0qMg05nQu9GB0ZbQtyDQttC10YLRltC70YPRliwg0LbQuNC10Log0ZbRiNC10LrRgtC10YAg0LzQtdC9INKb0LDQvNC/0LDQudC80LDQu9Cw0YAg0pvQsNC70YvQv9GC0LDRgdC/0LDRg9GLINGB05nQsdC40LTQtSDRltGIINC60LXQsdGDINC80LXQvSDQutCw0L/RgNC+0LvQvtCz0LjRj9C70YvSmyDQt9C10YDRgtGC0LXRgyDQvdOZ0YLQuNC20LXRgdGW0L3RltKjINOp0LfQs9C10YDRltGB0ZbQvSDRgtGD0YvQvdC00LDRgtKb0LDQvS4gIDIt0KHSsdGA0LDSmzog0prSsdGA0YHQsNKbINGW0YjRltC90LTQtSDSsdGA0YvSmyDSm9Cw0L3QsNC50L3QsNC70YvQvCDQsNC00LDQv9GC0LDRhtC40Y/RgdGLINCx0ZbRgNC90LXRiNC1INC60LXQt9C10qPQtNC10YDQtNC10L0g06nRgtC10LTRljogMS0g0YHQsNGA0YPRi9C30LTRi9KbLCAyLdCw0LvQu9Cw0L3RgtC+0LjQtNGC0YvSmyDQttOZ0L3QtSAzLSAzLdCw0LnQu9Cw0YDQtNCwLCDRj9KT0L3QuCAyINGC0YDQuNC80LXRgdGC0YDQtNC1INC/0LvQsNGG0LXQvdGC0LDRgNC70YvSmyDSm9Cw0L3QsNC50L3QsNC70YvQvCDQttKv0LnQtdGB0ZYg0pvQsNC70YvQv9GC0LDRgdCw0LTRiywg0Y/Sk9C90Lgg0LDQvdCwINC80LXQvSDQsdCw0LvQsCDQsNGA0LDRgdGL0L3QtNCw0pPRiyDQt9Cw0YIg0LDQu9C80LDRgdGDINC/0LvQsNGG0LXQvdGC0LDQvdGL0qMg0LrTqdC80LXQs9GW0LzQtdC9INC20q/RgNC10YLRltC9INCx0L7Qu9GL0L8g0LrQtdC70LXQtNGWLiDSsNGA0YvSm9GC0YvSoyDQv9C70LDRhtC10L3RgtCw0YDQu9GL0psg0LDQtNCw0L/RgtCw0YbQuNGP0YHRi9C90LAg0LHRltGA0L3QtdGI0LUg0YTQsNC60YLQvtGA0LvQsNGAINOZ0YHQtdGAINC10YLQtdC00ZYsIDEtINGI0ZbQtNC10L0sINCw0L3QsNGC0L7QvNGP0LvRi9KbINC10YDQtdC60YjQtSDSm9Kx0YDRi9C70YvQvNC00LDRgCDQsdC+0LvRg9GLINC205nQvdC1INCx0LDQudC70LDQvdGL0YHRgtCw0YA6IDEt0rHRgNGL0pvRgtGL0qMg0LrRltC90LTRltC6INCy0LXQvdCw0YHRiyDQvtGC0YLQtdCz0ZbQvNC10L0g0pvQsNC90YvSm9Kb0LDQvSDSm9Cw0L3QvdGL0qMg0LHQsNGD0YvRgNC00YvSoyDQttC+0pPQsNGA0pPRiyDQsdC10YLRltC90LUg0LrQtdC70LPQtdC90LTQtSAyLdCz0LUg0LHTqdC70ZbQvdGW0L8sIDYwINC/0LDQudGL0LfSk9CwINC20YPRi9KT0Ysg0LDRgNCw0L3RhtC40LXQsiDTqdC30LXQs9GWINCw0YDSm9GL0LvRiyDRgtOp0LzQtdC90LPRliDSm9GD0YvRgSDQstC10L3QsNGB0YvQvdCwINGC0q/RgdGW0L8sINC+0L3QtNCw0pPRiyDSm9Cw0L3QtNGLINC+0YLRgtC10LPRltC80LXQvSDSm9Cw0L3Ri9Kb0YLRi9GA0YvQvywg0L7RgtGC0LXQs9GW0LPQtSDQsdCw0Lkg0LDRgNCw0LvQsNGBINKb0LDQvSDQsdC+0LvQsNC00YsuIDIt0J7RgtGC0LXQs9GW0LPQtSDQsdCw0Lkg0pvQsNC9INC+0qMg0LbQsNKbINC20q/RgNC10LrRiNC10LPQtSDRgtKv0YHRltC/LCDQvtC90LTQsNKT0Ysg0pvQsNC90L3Ri9KjINC606nQvyDQsdOp0LvRltCz0ZYg0YHQvtC7INC20LDSmyDQttKv0YDQtdC60YjQtdCz0LUtINGB0L7Qv9Cw0pvRiNCwINGC0LXRgdGW0Log0LDRgNKb0YvQu9GLINGC0q/RgdC10LTRliwg0L7QuyDTqdC3INC60LXQt9C10LPRltC90LTQtSDRgdC+0Lsg0LbQsNKbINKb0LDRgNGL0L3RiNCw0pPQsCwg0LrQtdC50ZbQvSDQsNC+0YDRgtCw0pPQsC0g0LDQvtGA0YLQsCDTqdC3INC20L7Qu9GL0L3QtNCwINGC0ZbQvdC00LXRgNC00ZYg0pvQsNC90LzQtdC9INKb0LDQvNGC0LDQvNCw0YHRi9C3INC10YLQtdC00ZYuIDMt0J7SoyDQttKv0YDQtdC60YjQtdC00LXQvSDQvtKjINKb0LDRgNGL0L3RiNCw0pPQsCDRgtKv0YHQutC10L0g0pvQsNC9INOp0LrQv9C1INGB0LDQsdCw0YPRiyDQsNGA0pvRi9C70Ysg06nQutC/0LXQs9C1INCx0LDRgNGD0Ysg0LrQtdGA0LXQuiwg0LHRltGA0LDSmyDTqdC60L/QtSDQttKx0YDRi9GBINC20LDRgdCw0LzQsNKT0LDQvdC00YvSm9GC0LDQvSDQvtC90YvSoyDSm9Cw0L3RiyDTqdC60L/QtSDRgdCw0LHQsNGD0YvQvdCw0L0g0JHQsNGC0YLQsNC70L7QsiDTqdC30LXQs9GWINCw0YDSm9GL0LvRiyDQsNC+0YDRgtCw0pPQsCDRgtKv0YHQtdC00ZYuINCe0YHRiyDQsNC90LDRgtC+0LzQuNGP0LvRi9KbINC10YDQtdC60YjQtSDSm9Kx0YDRi9C70YvQvNC00LDRgCDQv9C70LDRhtC10L3RgtCw0YDQu9GLINCw0LTQsNC80YLQsNGG0LjRj9KT0LAg05nRgdC10YAg0LXRgtC10LTRli4gMi3RiNGW0LTQtdC9LCDSm9Cw0L3QsNC50L3QsNC70YvQvNGL0L3QtNCwINC+0YLRgtC10LPRliDRgdCw0LvRi9GB0YLRi9GA0LzQsNC70Ysg0YLSr9GA0LTQtSDQsNC3INCx0L7Qu9Cw0LTRiywg0L7Qu9Cw0YDQtNGL0qMg0rHRgNGL0pvRgtGLINC+0YLRgtC10LPRltC80LXQvSDSm9Cw0L3Ri9KT0YPRi9C90LAg0rDRgNGL0pvRgtGL0psg0LPQtdC80L7Qs9C70L7QsdC40L0g0L3QtdC80LXRgdC1INGE0LXRgtCw0LvQtNGLINCz0LXQvNC+0LPQu9C+0LHQuNC9INCx0L7Qu9GD0Ysg0YDQtdGC0YLQtdC50LTRli4g0JPQtdC80L7Qs9C70L7QsdC40L0g0pIg0LXRgNC10LrRgdC10LrRgtC10YAg0LPQtdC80L7Qs9C70L7QsdC40L0g0JAtINKT0LAg0pvQsNGA0LDSk9Cw0L3QtNCwINC10YDQtdC60YjQtSDSm9Kx0YDRi9C70YvQvNC00Ys6INC+0LsgMiDQsNC70YzRhNCwINC205nQvdC1IDIg0LPQsNC80LzQsCDRgdGD0LHQsdGW0YDQu9GW0LrRgtC10YDQtNC10L0g0YLSsdGA0LDQtNGLINC00LAsINCz0LDQvNC80LAg0YHRg9Cx0LHRltGA0LvRltC60YLQtdGA0ZYg0LXRgNC10YHQtdC60YLQtdGA0LTQtdCz0ZYg0LHQtdGC0YLQsCDRgdGD0LHQsdGW0YDQu9GW0LPRltC90LUg0pvQsNGA0LDSk9Cw0L3QtNCwINC+0YLRgtC10LPRltCz0LUg0YHTmdC50LrQtdGB0YLRltCz0ZYg0LbQvtKT0LDRgNGLLCDRgdC+0L3QtNGL0pvRgtCw0L0g0L7QuyDQvtGC0YLQtdCz0ZbQvdGWINC80LDQutGB0LjQvNCw0LvQtNGLINGC0q/RgNC00LUg0LHQsNC50LvQsNC90YvRgdGC0YvRgNGL0L8sINGC0LDRgdGL0LzQsNC70LTQsNC5INCw0LvQsNC00YsuIDMt0YjRltC00LXQvSDRhNC40LfQuNC+0LvQvtCz0LjRj9C70YvSmyDQtdGA0LXQutGI0LXQu9GW0LrRgtC10YAsIDEtINKx0YDRi9Kb0YLQsCDQttKv0YDQtdC60YLRltKjINC80LjQvdGD0YLRgtGL0psg0LrTqdC70LXQvNGWINC20L7Sk9Cw0YDRiywg0L7QuyDQvtGC0YLQtdCz0ZYg0LzQtdC9INKb0L7RgNC10LrRgtGW0Log0LfQsNGC0YLQsNGA0LTRiyDQutOp0L8g0LrTqdC70LXQvNC00LUg0YLQtdC3INGC0LDRgdGL0LzQsNC70LTQsNGD0pPQsCDQutOp0LzQtdC60YLQtdGB0LXQtNGWLiAyLSDSsdGA0YvSm9GC0YvSmyDSm9Cw0L3QsNC50L3QsNC70YvQvNGL0L3Ri9KjINKb0YvRgdGL0LzRiyDRgdCw0LvRi9GB0YLRi9GA0LzQsNC70Ysg0YLTqdC80LXQvSDQsdC+0LvQsNC00YssINC+0LvQsNGAINC60LXQt9C10LPRltC90LTQtSDQv9C70LDRhtC10L3RgtCw0YDQtNC70Ysg0pvQsNC90LDQudC90LDQu9GL0LzRi9C90LAg0LDQvdCw0LTQsNC9INC+0YLRgtC10LPRliDQvNC10L0g0pvQvtGA0LrRgtGW0Log0LfQsNGC0YLQsNGAINGC0q/RgdGW0L8g0L7So9Cw0Lkg0L/Qu9Cw0YbQtdC90YLQsCDQsNGA0pvRi9C70Ysg06nRgtGD0ZbQvdC1LCDRgtCw0YHRi9C80LDQu9C00LDQvdGD0YvQvdCwINC606nQvNC10LrRgtC10YHQtdC00ZYuINKa0L7RgNGL0YLRi9C90LTRi9C70LDQuSDQutC10LvQtSwg0L/Qu9Cw0YbQtdC90YLQsNGA0LvRiyDSm9Cw0L3QsNC50L3QsNC70YvQvCDQttKv0LnQtdGB0ZbQvdC1INCw0LTQsNC/0YLQsNGG0LjRj9GB0YvQvdCwOiAxLdCw0L3QsNGC0L7QvNC40Y/Qu9GL0psg0LXRgNC10LrRiNC1INKb0rHRgNGL0LvRi9C80LTQsNGAOiDQsNGA0LDQvdGG0LjQtdCyINOp0LfQtdCz0ZYsINGB0L7Qv9Cw0pvRiNCwINGC0LXRgdGW0Log0LbTmdC90LUg0LHQsNGC0YLQsNC70L7QsiDTqdC30LXQs9GWINCx0L7Qu9GD0Ys7IDItINKb0LDQvSDSm9Kx0YDQsNC80YvQvdC00LDSk9GLINGN0YDQuNGC0YDQvtGG0LjRgtGC0LXRgNC00LUg0YTQtdGC0LDQu9C00YvSmyDQs9C10LzQvtCz0LvQvtCx0LjQvdC90ZbSoyDQsdC+0LvRg9GLOyAzLSDRhNC40LfQuNC+0LvQvtCz0LjRj9C70YvSmyDQtdGA0LXQutGI0LXQu9GW0Lo6INC80LjQvdGD0YLRgtGL0psg0pvQsNC9INC606nQu9C10LzRliDQttC+0pPQsNGA0Ysg0LbTmdC90LUg0pvQsNC9INKb0YvRgdGL0LzRiyDRgtOp0LzQtdC9INCx0L7Qu9GD0YstINGB0LXQutGW0LvQtNGWINGE0LDQutGC0L7RgNC70LDRgCDTmdGB0LXRgCDQtdGC0LXQtNGW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46" table:style-name="ce1">
            <text:p>915246</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4g0JbQsNC70L/RiyDQsdGW0LfQtNC1IDMt0LDQudC70YvSmyDQsdCw0LvQsNC90YvSoyDRltGI0ZbQvdGW0qMg0LbQtdC70LTQtdC90YPRltC90ZYsINC905nQttGW0YHRltC90ZbSoyDQttC40ZYg0YHSsdC50YvSmyDQsdC+0LvRg9GLINC+0Lsg0LHQsNC70LDQvdGL0qMg06nQt9GW0L3QtNGW0Log0LbQsNGB0YLRi9KbINC10YDQtdC60YjQtdC70ZbQs9GW0L3QtSDQsdCw0LnQu9Cw0L3Ri9GB0YLRiyDQsdC+0LvRg9GLINC80q/QvNC60ZbQvS4g0J3TmdGA0LXRgdGC0LXQu9C10YDQtNC1INC90LXQs9GW0LfRltC90LXQvSDQu9C40L/QsNC30LAsINCw0LzQuNC70LDQt9CwINGB0YvQvdC00Ysg0YLQsNKT0Ysg0LHQsNGB0pvQsCDRhNC10YDQvNC10L3RgtGC0LXRgNC00ZbSoyDRhNGD0L3QutGG0LjQvtC90LDQu9C00YvSmyDQsdC10LvRgdC10L3QtNGW0LvRltCz0ZYg0YLTqdC80LXQvSDQsdC+0LvRi9C/INC60LXQu9C10LTRli4g0J3TmdGC0LjQttC10LTQtSDQsdGW0LfQtNC1INKb0L7RgNC10LrRgtGW0qMg0Y/Sk9C90Lgg0LrTqdC80ZbRgNGB0YPQu9Cw0YAsINC80LDQudC70LDRgCwg0LDSm9GD0YvQt9C00LDRgCDRgdGL0L3QtNGLINC+0YDQs9Cw0L3QuNC60LDQu9GL0psg0LfQsNGC0YLQsNGA0LTRi9KjINGC0L7Qu9GL0pPRi9C80LXQvSDRi9C00YvRgNCw0YPRiyDQttKv0YDQvNC10LnRgtGW0L0g0LHQvtC70YvQvyDQutC10LvQtdC00ZYuINCe0YHRiyDQttCw0pPQtNCw0LnQtNCwINC60LDQv9GA0L7Qs9GA0LDQvNC80LDQtNCw0L0g0LrTqdGA0YPRltC80ZbQtyDQsdC+0LnRi9C90YjQsDog0L3QtdC50YLRgNCw0LvRjNC00Ysg0LzQsNC50LvQsNGA0LTRi9KjINCx0L7Qu9GD0YssINC80LDQudC70LDRgNC00YvSoyDQu9C40L/QsNC30LAg0YTQtdGA0LzQtdC90YLRltC90ZbSoyDQutOp0LzQtdCz0ZbQvNC10L0g0LbQsNKb0YHRiyDSm9C+0YDRi9GC0YvQu9C80LDSk9Cw0L3Ri9C90YvSoyDQsdC10LvQs9GW0YHRliDQsdC+0LvRi9C/INC60LXQu9C10LTRli4g0KHQvtC90YvQvNC10L0g0pvQsNGC0LDRgCDSm9Cw0LvRi9C/0YLRiyDQttCw0pPQtNCw0LnQtNCwINC905nQttGW0YHRgtC1INGN0L/QuNGC0LXQu9C40Lkg0Y3Qu9C10LzQtdC90YLRgtC10YDRliDQsdC+0LvQvNCw0YPRiyDRgtC40ZbRgS4g0JbQsNC70L/RiyDQsdCw0LvQsNC70LDRgNC00LAg0ZbRiNC10LrRgtGW0qMg0LzQvtGC0L7RgNC40LrQsNGB0YvQvdGL0qMsINCw0pPQt9Cw0L3Ri9KjINC80LXRgtCw0LHQvtC70LjQt9C80ZYg0LHQtdC70YHQtdC90LTRliDQsdC+0LvRg9GL0L3QsCDQsdCw0LnQu9Cw0L3Ri9GB0YLRiyDQsdCw0LvQsNC90YvSoyDQvdOZ0LbRltGB0ZbQtNC1INC20LjRliDTqdC90LTRltGA0ZbQu9C10YLRltC9INCx0L7Qu9GL0L8g0LrQtdC70LXQtNGWLiDQodC+0L3QtNGL0pvRgtCw0L3QtNCwINC20LjRliDRgtCw0LzQsNKb0YLQsNC90LTRi9GA0YPQtNGL0qMg05nRgdC10YDRltC90LXQvSDRgtCw0LzQsNKbINGC0L7Qu9GL0pPRi9C80LXQvSDRi9C00YvRgNCw0LzQsNC5INKb0LDQu9Cw0LTRiywg0LDQuyDQutGW0LvQtdCz0LXQudC00ZbSoyDQsdC+0LvRg9GLINGW0YjQtdC60YLQtdCz0ZYg0LzQuNC60YDQvtGE0LvQvtGA0LDQvdGL0qMg0LHQsNC70LDQvdGB0YvQvdGL0qMg0LHSsdC30YvQu9GD0YvQvSDQvdC10LzQtdGB0LUg0pvQsNC70YvQv9GC0Ysg0LHQvtC70YPRi9C9INC606nRgNGB0LXRgtC10LTRli4g0KLRg9GA0LAg0L7RgdGL0LvQsNC5INCx0LDQu9CwINGB0q/RgtC/0LXQvSDQtdC80LPQtdC9INC60LXQt9GW0L3QtNC1INC10LPQtdGAINC20LjRliDQsdC+0LvQsNGC0YvQvSDQsdC+0LvRgdCwLCDQvtC90LTQsCDRgdKv0YIg0YLQvtC70YvSk9GL0LzQtdC9INGL0LTRi9GA0LDQvyDSr9C70LPQtdGA0LzQtdC5INC+0L3Ri9KjINGL0LTRi9GA0LDQvNCw0pPQsNC9INCx06nQu9GI0LXQutGC0LXRgNGWINKb0LDQu9GL0L8g0pvQvtGP0YLRi9C9INCx0L7Qu9Cw0LTRiy4g0J7RgdGLINKb0L7RgNGL0YLRi9C70LzQsNKT0LDQvSDQsdOp0LvRiNC10LrRgtC10YAg0LHSsdC7INOZ0LTQtdGC0YLQtSDRgdKv0YIg0LDSm9GD0YvQt9GL0L3Ri9KjICwg0L7QuyDQsdGW0LfQtNC1INC60LDQt9C10LjQvSDQsNKb0YPRi9C30YssINCx0ZbRgCDQsdGW0YDRltC90LUg0LbQsNCx0YvRgdGD0YvQvdCw0L0g0YLSr9C30ZbQu9C10YLRltC9INGB0q/Qt9Cx0LUg0LHQvtC70YvQvyDRgtCw0LHRi9C70LDQtNGLLiDQkdCw0LvQsNC70LDRgNC00LAg0LbQsNC70L/RiyDRltGI0LXQutGC0ZbSoyDSm9C+0YDSk9Cw0L3Ri9GI0YLRi9KbINKb0YvQt9C80LXRgtGW0L3RltKjINGC06nQvNC10L0g0LHQvtC70YPRi9C90LAg0LHQsNC50LvQsNC90YvRgdGC0Ysg0L7QuyDRiNGL0YDRi9GI0YLRi9KjINGB0LjQvdGC0LXQt9GW0L0g0LDRgNGC0YLRi9GA0LDQtNGLLCDQsNC7INC905nQttGW0YHRgtC1INCw0Lcg0LzTqdC70YjQtdGA0LTQtSDQu9C10LnQutC+0YbQuNGC0YLQtdGA0LTRltKjINC/0LDQudC00LAg0LHQvtC70YPRi9C90LAg0LDQu9GL0L8g0LrQtdC70LXRgtGW0L0g0LHQvtC70LDQtNGLLiDQkNC7INGW0YjQtdC6INKb0rHRgNGC0YLQsNGA0Ysg0LHSsdC7INC20LXRgNC00LUg0LDQvdGL0pvRgtCw0LvQvNCw0pPQsNC9LiAgMi4g0rDRgNGL0pvRgtGL0qMg0pvSsdGA0YHQsNKb0ZbRiNGW0LvRltC6INC00LDQvNGD0YvQvdC00LDSk9GLICDSsdGA0YvSm9C20L7Qu9C00LDRgdGC0YvSmyDRj9KT0L3QuCDQv9C70LDRhtC10L3RgtCw0LvRi9KbINKb0LDQvdCw0LnQvdCw0LvRi9C80YvQvdGL0qMg0LDQtNCw0L/RgtCw0YbQuNGP0YHRi9C90LAg05nRgdC10YAg0LXRgtC10YLRltC9INGE0LDQutGC0L7RgNC70LDRgDog0L7QuyDQutGW0L3QtNGW0Log0LLQtdC90LDRgdGL0L3Ri9KjINC+0YLRgtC10LPRltC80LXQvSDSm9Cw0L3Ri9Kb0pvQsNC9INKb0LDQvdC90YvSoyDQsdCw0YPRi9GA0LTRiyDQsNC50L3QsNC70YvQvyDTqdGC0ZbQvywg0YLTqdC80LXQvdCz0ZYg0pvRg9GL0YHRgtGLINCy0LXQvdCw0pPQsCDTqdGC0YMg0LzSr9C80LrRltC90LTRltC6INCx0LXRgNC10YLRltC9INCy0LXQvdC+0LfQtNGL0psg0YLSr9GC0ZbQutGC0ZbSoyDQsdC+0LvRg9GLINKx0YDRi9Kb0YLRiyDSm9Cw0LbQtdGC0YLRliDQvNOp0LvRiNC10YDQtNC1INKb0LDQvdC80LXQvSDSm9Cw0LzRgtCw0LzQsNGB0YvQtyDQtdGC0LXRgtGW0L3RliDQsdC+0LvRi9C/INC10YHQtdC/0YLQtdC70LXQtNGWLiDQodC+0L3Ri9C80LXQvSDSm9Cw0YLQsNGAINC+0YHRiyDSsdGA0YvSm9GC0YvSoyDSm9Cw0L0g0LDQudC90LDQu9GL0LzRiyDRhdC+0YDQuNC+0L0g0YLSr9GC0ZbQutGC0LXRgNGWINCw0YDSm9GL0LvRiyDQsNC90LAg0pvQsNC90YvQvdCwINC20LDSm9GL0L0g0L7RgNC90LDQu9Cw0YHQsNC00YssINCw0Lsg0LHSsdC7INC00LjRhNGE0YPQt9C40Y/QvdGLINC20LXSo9GW0LvQtNC10YLQtdC00ZYuINCh0L7QvdGL0LzQtdC9INKb0LDRgtCw0YAg0LDQudGC0LDRgtGL0L0g0YLQsNKT0Ysg0LHRltGAINGE0LDQutGC0L7RgCDQvtC7INKx0YDRi9Kb0YLRi9KjINKb0LDQvdGL0L3QtNCw0pPRiyDQs9C10LzQvtCz0LvQvtCx0LjQvdC90ZbSoyDQttC+0pPQsNGA0Ysg0LrQvtC90YbQtdC90YLRgNCw0YbQuNGP0YHRiyDQsdC+0LvRi9C/INC10YHQtdC/0YLQtdC70LXQtNGWLCDTqdC50YLQutC10L3RliDSsdGA0YvSm9GC0YvSmyDRhNC10YLQsNC70YzQtNGLINCz0LXQvNC+0LPQu9C+0LHQuNC90L3RltKjINC10YDQtdGB0LXQuiDQs9C10LzQvtCz0LvQvtCx0LjQvdCz0LUg0YHQsNC70YHRi9GC0YvRgNC80LDQu9GLINGC0q/RgNC00LUg0pvQsNGA0LDSk9Cw0L3QtNCwINC+0L3Ri9KjINC+0YLRgtC10LPRltCz0LUg0LbQsNKb0YvQvdC00YvSk9GLINC20L7Sk9Cw0YDRiyDQsdC+0LvRi9C/INC60LXQu9C10LTRli4g0J7QuyDQsdGW0LfQtNC1INC+0YHRiyDQs9C10LzQvtCz0LvQvtCx0LjQvdC90ZbSoyDSm9Kx0YDRi9C70YvRgdGL0L3QsCDQsdCw0LnQu9Cw0L3Ri9GB0YLRiyDQsdC+0LvQsNC00Ys6INGE0LXRgtCw0LvRjNC00Ysg0LPQtdC80L7Qs9C70L7QsdC40L3QtNC1INC10LrRliDQsNC70YzRhNCwINC205nQvdC1INC10LrRliDQs9Cw0LzQvNCwINGC0ZbQt9Cx0LXQutGC0LXRgCDQsdC+0LvQsNC00YssINCw0Lsg0LXRgNC10YHQtdC6INCz0LXQvNC+0LPQu9C+0LHQuNC90LTQtSDQvtGB0Ysg0LXQutGWINCz0LDQvNC80LDQvdGL0qMg0L7RgNC90YvQvdC00LAg0LXQutGWINCx0LXRgtGC0LAg0YLRltC30LHQtdC6INCx0L7Qu9Cw0LTRiywg0LTTmdC7INC+0YHRiyDQtdC60ZYg0LPQsNC80LzQsCDRgtGW0LfQsdC10LrRgtC10YDRliDQutOp0LzQtdCz0ZbQvNC10L0g0LbSr9C30LXQs9C1INCw0YHQsNC00YssINGP0pPQvdC4INC+0YLRgtC10LPRltCz0LUg0LbQsNKb0YvQvdC00YvSk9GLINC20L7Sk9Cw0YDRiyDQsdC+0LvRg9GL0L3QsCDQsdCw0LnQu9Cw0L3Ri9GB0YLRiyDQvtGC0YLQtdCz0ZbQvNC10L0g0LbQsNKb0YHRiyDSm9Cw0LzRgtCw0LzQsNGB0YvQtyDQtdGC0ZbQu9C10LTRliwg0LbTmdC90LXQtNC1INC/0LvQsNGG0LXQvdGC0LAg0rHRgNGL0pvRgtGL0qMg0pvQsNC90YvQvdCw0L0g0LrTqdC80ZbRgNKb0YvRiNKb0YvQuyDQs9Cw0LfRiyDQvNC10L0g0pvQsNC70LTRi9KbINOp0L3RltC80LTQtdGA0LTRliDRiNGL0pPQsNGA0YvQvyDQvtGC0YvRgNGL0L8g0L7Qu9Cw0YDQtNGLINC20L7RjiDSr9GI0ZbQvSDQsNC90LDQvdGL0qMg0pvQsNC90YvQvdCwINCx0LXRgNGDINCw0YDSm9GL0LvRiyDSsdGA0YvSm9GC0YvSoyDQsNC00LDQv9GC0LDRhtC40Y/RgdGL0L3QtNCwINC80LDSo9GL0LfQtNGLINGA06nQuyDQsNGC0pvQsNGA0LDQtNGLLiDQkdGW0LfQtNC1INCw0YDQvdCw0LnRiyDSsdGA0YvSm9GC0YvSmyDSm9Kx0YDRi9C70YvQvNC00LDRgCDQsdC+0LvRi9C/INC+0LvQsNGAOiDQktC10L3QvtC30LTRi9KbINOp0LfQtdC6IC0g0LrRltC90LTRltC6INCy0LXQvdCw0YHRi9C90YvSoyDSm9Cw0L3QvdGL0qMg0LrTqdC/INCx06nQu9GW0LPRltC9INCx0LDRg9GL0YDQtNGLINCw0LnQvdCw0LvRi9C/INOp0YLQtdGC0ZbQvdGW0L0g0pvQsNC80YLQsNC80LDRgdGL0Lcg0LXRgtC10YLRltC9INCx0L7Qu9GL0L8g0LrQtdC70LXQtNGWLiDQntCy0LDQu9GM0LTRiyDRgtC10YHRltC6IC0g0L7QuyDQsdGW0LfQtNC1INC+0qMg0LbTmdC90LUg0YHQvtC7INC20q/RgNC10LrRiNC10LvQtdGA0LTRltKjINCw0YDQsNGB0YvQvdC00LAg0L7RgNC90LDQu9Cw0YHRi9C/INKb0LDQvdC90YvSoyDQsNGA0LDQu9Cw0YHRg9GL0L3QsCDTmdGB0LXRgCDQtdGC0LXQtNGWLCDRj9KT0L3QuCDQvtC90YvSoyDQvtKjINC20LDSmyDQttKv0YDQtdC60YjQtdC00LXQvSDRgdC+0Lsg0LbQsNKbINC20q/RgNC10LrRiNC10LPQtSDTqdGC0YPRltC9INKb0LDQvNGC0LDQvNCw0YHRi9C3INC10YLQtdC00ZYuINCQ0YDRgtC10YDQuNGP0LvRi9KbINOp0LfQtdC6IC0g0L7QuyDTqdC60L/QtSDQsNGA0YLQtdGA0LjRj9GB0YvQvdC00LDSk9GLINKb0LDQvdC90YvSoyDQsNC+0YDRgtCw0pPQsCDSm9Cw0YDQsNC5INOp0YLRg9GW0L3QtSDQttCw0pPQtNCw0Lkg0LbQsNGB0LDQudGC0YvQvSDQsdC+0LvRi9C/INC60LXQu9C10LTRli4g0JbQsNC70L/RiyDSsdGA0YvSm9GC0LAg0LbSr9GA0LXQutGC0ZbSoyDRgdC+0pPRgyDQttC40ZbQu9GW0LPRliwg0LzQuNC90YPRgtGC0YvSmyDQutOp0LvQtdC80ZYg0LbQvtKT0LDRgNGLINCx0L7Qu9GL0L8g0LrQtdC70LXQtNGWLCDQvtGB0YvQvdGL0L3QtNCw0Lkg0LHQvtC70YPRiyDSm9Cw0LbQtdGCINCx0L7Qu9KT0LDQvSDQvtGC0YLQtdC6INC205nQvdC1INKb0L7RgNC10LrRgtGW0Log0LfQsNGC0YLQsNGA0LTRi9KjINC20LXRgtC60ZbQu9GW0LrRgtGWINCx0L7Qu9GD0YvQvdCwINC20LDSk9C00LDQuSDQttCw0YHQsNC50LTRiy4g05jRgdC10YAg0LXRgtC10YLRltC9INGE0LDQutGC0L7RgNC70LDRgNKT0LAg0YLQsNKT0YvQtNCwINKb0L7RgdCwINC60LXRgtGB0LXQvDog0LbQsNC70L/RiyDQv9C70LDRhtC10L3RgtCw0LTQsNKT0Ysg0YLRi9C90YvRgSDQsNC70YMg0LHQtdGC0ZbQvdGW0qMg0rHQu9KT0LDRjtGL0L0g0LbQsNGC0pvRi9C30YPSk9Cw0LTQsCDQsdC+0LvQsNC00YsuINCQ0Lsg0L7QtNCw0L0g0LrQtdC70LXRgdGWINGE0LDQutGC0L7RgCDQvtC7INCx0ZbQt9C00LUg0LbQsNC70L/RiyDSm9Cw0L0g0LDQudC90LDQu9GL0Lwg0LbSr9C50LXRgdGW0L3QtNC10LPRliDSm9GL0YHRi9C80L3Ri9KjINGC06nQvNC10L0g0LHQvtC70YPRi9C90LTQsCDQttCw0YLSm9GL0LfRg9KT0LAg0LHQvtC70LDQtNGLLCDTqdC50YLQutC10L3RliDQv9C70LDRhtC10L3RgtCw0LvRi9KbINKb0LDQvdC90YvSoyDQsNKT0YPRiyDQvtKj0LDQuSDQsdC+0LvQsNC00YsuIA==</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3" table:style-name="ce1">
            <text:p>915323</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7QotC10Log0LXQvNGI0LXQuiDRgdKv0YLRltC80LXQvSDSm9C+0YDQtdC60YLQtdC90LXRgtGW0qMgMyDQsNC50LvRi9KbINCx0LDQu9Cw0LTQsCDQutC10LHRg9C70LXRgCDQvNC10L0g0YHQsNKj0YvRgNCw0YPSm9Kx0LvQsNKbINGC05nRgNGW0LfQtNC10YEg0L3TmdC20ZbRgSDQvdOZ0YDQtdGB0YLQtdC90ZbSoyDQsNGB0pvQsNC30LDQvSDRltGI0LXQuiDQttC+0LvQtNCw0YDRi9C90YvSoyDQtNKx0YDRi9GBINC20LXRgtGW0LvQvNC10LPQtdC90ZbQvdC10L0g0YLRg9GL0L3QtNCw0YPRiyDQvNKv0LzQutGW0L0u0JXQvNGI0LXQuiDRgdKv0YLRliDQsNKT0LfQsNKT0LAg0YLQtdC3INC10L3QtdC00ZYg0LbTmdC90LUg0LHQsNC70LDQvdGL0L0g0LDRgSDSm9C+0YDRgtGDINC20q/QudC10YHRliDQsNGA0pvRi9C70Ysg0YLQtdC3INOp0YLQtdC00ZYs0LHSsdC7INGW0YjQtdC60ZbSoyDQttC40ZYg0pvQvtC30pPQsNC70YPRi9C90LAg0LDQu9GL0L8g0LrQtdC70LXQtNGWLtCh0L7QvdGL0LzQtdC9INKb0LDRgtCw0YAg0L3TmdGA0LXRgdGC0LXQvdGW0L0g0LDRgSDSm9C+0YDRgtGDINC20q/QudC10YHRliDTmdC70ZYg0LTQsNC80YMg0q/RgdGC0ZbQvdC00LUg0LHQvtC70pPQsNC9INGB0L7SoyzQtdC80YjQtdC6INGB0q/RgtGW0L3QtdC9INKb0L7RgNC10LrRgtGW0Log0LfQsNGC0YLQsNGA0LTRiyDRgdGW0qPRltGA0YMg0LbTmdC90LUg0YHRltKj0ZbRgNGDINKv0YjRltC9INGE0LXRgNC80LXQvdGC0YLQtdGAINGI0YvSk9Cw0YDQsNC00Ysu0JHSsdC7INC905nQttGW0YHRgtC1INKb0L7RgNGL0YLRi9C70LzQsNKT0LDQvSDRgtCw0LvRiNGL0pvRgtGL0qMg0LrQu9C10YfQsNGC0LrQsNC90YvSoyDQsdC+0LvRg9GL0L3QsCDQsNC70YvQvyDQutC10LvRg9GWINC80q/QvNC60ZbQvdC00ZbQs9GW0L0g0YLRg9GL0L3QtNCw0YLQsNC00Ysu0J3TmdC20ZbRgdGC0LUg0YjRi9GA0YvRiNGC0YvQvSzQvdC10LnRgtGA0LDQu9GM0LTRiyDQvNCw0LnQu9Cw0YDQtNGL0qMs0LrRltC70LXQs9C10LnQtNGW0qMg0LHQvtC70YPRiyDRltGI0LXQutGC0ZbSoyDRiNGL0YDRi9GI0YLRiyDSm9Cw0LHRi9KT0YvQvSDSm9C+0YDSk9Cw0YMg0pvRi9C30LzQtdGC0ZbQvSDQsNGC0pvQsNGA0YMg0q/RiNGW0L0g0LDRgNGC0YvSmyDRiNGL0YDRi9GIINOp0L3QtNGW0YDRgyDQttC10YLRltC70LzQtdCz0LXQvSDRltGI0LXQuiDQuNC80LzRg9C90LTRi9KbINC20q/QudC10YHRltC90ZbSoyDQtNC1INGC0YPRi9C90LTQsNGD0Ysg0LzSr9C80LrRltC9LtCd05nRgNC10YHRgtC10L3RltC9INKv0LvQutC10L0g0L3TmdC20ZbRgdGW0L3QtNC1INC606nRgNGDINCw0LnQvNCw0pPRi9C90LTQsCDQu9C10LnQutC+0YbQuNGC0YLQtdGA0LTRltC9INCx0L7Qu9GD0Ysg0pvQsNC70YvQv9GC0YvQvdGL0L0g0LbQvtKT0LDRgNKT0Ysg0YjQtdCz0ZbQvdC00LUg0LbTmdC90LUg0pvQsNGC0YLRiyDQv9C+0YLQvtC70L7Qs9C40Y/Sk9CwINGB05nQudC60LUg0LrQtdC70LzQtdC50LTRli7QltCw0LvQv9GLINCw0LvSk9Cw0L3QtNCwINCx0rHQuyDRgdC40L/QsNGC0YLQsNC70pPQsNC9INC606nRgNGW0L3RltGB0YLQtdGAINC90ZbRgNC10YHRgtC10L3RltC9INKb0LDQu9GL0L/RgtGLINC20LDSk9C00LDQudGL0L3QsCDRgtOZ0L0g0LbTmdC90LUg0LHQsNGA0LvRi9KbINGD0LDSm9GL0YLRgtCwINC/0L7RgtC+0LvQvtCz0LjRj9C90Ysg0LrTqdGA0YHQtdGC0L/QtdC50LTRli7Qr9KT0L3QuCDQvdOZ0YDQtdGB0YLQtdC00LUg0YHQuNC/0LDRgtGC0LDQu9KT0LDQvSDQutOp0YDRltC90ZbRgdGC0LXRgCDTqdC3INCw0LnRi9C90LAg0pvQsNC70YvRgtGLLtCe0Lsg0LHQtdC70LPRltC70LXRgCDRgtC+0psg0ZbRiNC10LrRgtGW0qMg0L7RgdGLINCw0LnQu9Cw0YDQtNCwINCw0L3QsNGC0L7QvNC+INGE0LjQt9C40L7Qu9C+0LPQuNGP0LvRi9KbINKb0LDQu9GL0L/RgtCw0YHRi9C/INKv0LvQs9C10YDQvNC10YPRltC80LXQvSDRgdC40L/QsNGC0YLQsNC70LDQtNGLLtCd05nRgNC10YHRgtC10LTQtSDSm9Cw0LvRi9C/0YLRiyDRgtKv0YDQtNC1INCx0LDSm9GL0LvQsNGDINGB0LDQu9C80LDSmyDTqdC70YjQtdGD0ZYg0LbSr9GA0LPRltC30ZbQu9GD0ZYg0LrQtdGA0LXQui4yLtKa0rHRgNGB0LDSmyDRltGI0ZbQvdC00LXQs9GWINC60LXQt9C10qPQtNC1INGN0LzQsdGA0LjQvtCz0LXQvdC10LfQtNC1INKx0YDRi9KbLNGP0pPQvdC4INGN0LzQsdGA0LjQvtC9INCx0ZbRgNC90LXRiNC1INGE0LDQutGC0L7RgNC70LDRgNKT0LAg0LHQsNC50LvQsNC90YvRgdGC0Ysg0L/Qu9Cw0YbQtdC90YLQsNGA0LvRiyDSm9Cw0L0g0LDQudC90LDQu9GL0Lwg0LbQsNKT0LTQsNC50YvQvdCwINCx0LXQudGW0LzQtNC10LvQtdC00ZYu0KHQvtC7INGE0LDQutGC0L7RgNC70LDRgNKT0LAg0YLQvtKb0YLQsNC70YvQvyDQutC10YLQtdGC0ZbQvSDQsdC+0LvRgdCw0pss0YTQsNC60YLQvtGA0LvQsNGA0LTRi9KjINCx0ZbRgNGWINCy0LXQvdC+0LfQtNGL0psg0YLSr9GC0ZbQutGC0ZbQvSDQsdC+0LvRg9GLLtCR0rHQuyDQutGW0L3QtNGW0Log0YLQsNC80YvRgNC70LDRgNGL0L3Ri9KjINC+0YLRgtC10LPRltC80LXQvSDSm9Cw0L3Ri9Kb0pvQsNC9INKb0LDQvdC90YvSoyDQsdCw0YPRi9GA0LTRiyDQsNC50L3QsNC70YvQvyDTqdGC0ZbQvyzRgtOp0LzQtdC90LPRliDSm9GD0YvRgSDQstC10L3QsNKT0LAg0LXQvdGD0ZbQvdC1INC80q/QvNC60ZbQvdC00ZbQuiDQsdC10YDQtdC00ZYu0L7QuyDSsdGA0YvSm9GC0YvQvSDQttC10YLQutGW0LvRltC60YLRliDQvtGC0YLQtdCz0ZbQvdGWINCw0LvRg9GL0L0g0pvQsNC80L/RgtCw0LzQsNGB0YvQtyDQtdGC0LXQtNGWLtCi0LDSk9GLINCx0ZbRgCDRhNCw0LrRgtC+0YAg0L7QuyDSsdGA0YvSm9GC0YvSoyDQv9C70LDRhtC10L3RgtCw0YDQu9GL0psg0pvQsNC9INCw0LnQvdCw0LvRi9C80YvQvdGL0qMg0LDQtNCw0L/RgtCw0YbQuNGP0YHRi9C90LAg05nRgdC10YAg0LXRgtC10YLRltC9INC10YDQtdGB0LXQutGC0LXRgNC00ZbSoyDQs9C10LzQvtCz0LvQsNCx0LjQvdC90ZbQvdC1INKb0LDRgNCw0pPQsNC90LTQsCDSsdGA0YvSm9GC0YvSoyDQs9C10LzQvtCz0LvQvtCx0LjQvdGW0L3RltKjINC20L7Sk9Cw0YDRiyDQutC+0L3RhtC10L3RgtGA0LDRhtC40Y/RgdGLLtKw0YDRi9Kb0YLRi9KjINCw0LTQsNC/0YLQsNGG0LjRj9GB0YvQvdC00LAg0LzQsNKj0YvQt9C00Ysg0pvRi9C30LzQtdGC0YLRltC9INCx0ZbRgNGW0L0g0L/Qu9Cw0YbQtdC90YLQsNC00LAg0LDRgtKb0LDRgNCw0LTRiy7Qn9C70LDRhtC10L3RgtCwINKx0YDRi9Kb0YLRi9KjINC+0YDQs9Cw0L3QuNC30ZbQvNGW0L3QtNC10LPRliDQutOp0LzRltGAINKb0YvRiNKb0YvQuyDQs9Cw0LfRi9C9INCw0L3QsNC90YvQvSDQsNKT0LfQsNGB0YvQvdCwINC20LXRgtC60ZbQt9GW0L8g0L7RgtGL0YDQsNC00Ysu0J7QvdGLINC10YDQtdGB0LXQuiDQsNC00LDQvNC90YvQvSDQutGW0YjRliDSm9Cw0L3QsNC50L3QsNC70YvQvCDQvdC10LzQtdGB0LUg06nQutC/0LXQu9GW0Log0LDQudC90LDQu9GL0LzQvNC10L0g0pvRi9C30LzQtdGC0ZYg0rHSm9GB0LDRgSDQsdC+0LvRi9C/INC60LXQu9C10LTRliDQtNC10YPQs9C1INCx0L7Qu9Cw0LTRiy7Qn9C70LDRhtC10L3RgtCw0YDQu9GLINKb0LDQvSDQsNC50L3QsNC70YvQvCDQsNC70LDQvdGC0L7QuNC00YLRiyDQsNC70LzQsNGB0YLRi9GA0YPRiNGLINCx0L7Qu9GL0L8g0YLQsNCx0YvQu9Cw0LTRiy7Qn9C70LDRhtC10L3RgtCw0YDQu9GL0psg0pvQsNC9INCw0LnQvdCw0LvRi9C8INC20q/QutGC0ZbQu9C10LrRgtGW0qMg0q/RiNGW0L3RiNGWINGC06nRgNGC0ZbQvdGI0ZYg0LDQudGL0L3QtNCwINKb0LDQu9GL0L/RgtCw0YHQsCDQsdCw0YHRgtCw0L8g0LbSr9C60YLRltC70ZbQuiDRgdC+0L3Ri9C90LTQsCDQsNGP0pvRgtCw0LvQsNC00Ysu0J/Qu9Cw0YLRhtC10L3RgtCw0YbQuNGP0L3Ri9C9INCz0LXQvNC+0YXQvtGA0LjQvtC90LTRiyDRgtKv0YDRltC80LXQvSDQsNC90LAg0LzQtdC9INKx0YDRi9KbINCw0YDQsNGB0YvQvdC00LAg0LXQvSDRgtC40ZbQvNC00ZYg0LHQsNGA0LDQsdCw0YAg0LDQu9C80LDRgdGDINC20q/Qt9C10LPQtSDQsNGB0LDQtNGLLtCW0ZbQvdC1INC+0YHRiyDQsNC90LAg0LzQtdC9INKx0YDRi9Kb0YLRi9C9INCw0YDQsNGB0YvQvdC00LAg0LHQtdC50ZbQvNC00LXQu9GDINGA0LXQutGG0LjRj9GB0YvQvdCwINGB0LXQv9GC0ZbQs9GW0L0g0YLQuNCz0ZbQt9C10LTRli4=</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33" table:style-name="ce1">
            <text:p>1066833</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0JHQtdGA0ZbQu9Cz0LXQvSDQttCw0pPQtNCw0Y/RgtGC0YvSmyDQtdGB0LXQv9GC0LXQs9GWINC90LXQs9GW0LfQs9GWINGB0rHRgNCw0pvRgtCw0YDRi9C90LAg0YLQvtC70YvSmyDRgtC+0pvRgtCw0LvQsNGC0YvQvSDQsdC+0LvRgdCw0LwsINC10qMg0LDQu9C00YvQvNC10L0gMyDQsNC50LvRi9KbINCx0LDQu9Cw0L3Ri9KjINGC0L7Qu9GL0psg0YjQsNKT0YvQvNC00LDRgNGL0L3QvyDQsdCw0LnQu9Cw0L3Ri9GB0YLRiyDRgtC10LrRgdC10YDRg9C70LXRgCDTqdGC0LrRltC30ZbQu9GI0LPQtdC9LtCd05nRgtC40LbQtdGB0L3RltC00LUg0LHQsNC70LDQvdGL0qMg0LDRg9GA0YPRi9C90LAg0LHQsNC50LvQsNC90YvRgdGC0YssINC+0L3Ri9KjINCw0L3QsNC70LjQt9C00ZbQuiDQutOp0YDRgdC10YLQutGW0YjRgtC10YDRliDQsdC+0LnRi9C90YjQsCDQvdOZ0LbRltGB0ZbQvdGW0qMg0YLSr9GB0ZbQvdGW0qMg0YHQsNGA0pPRi9GI0YnRgtGL0LPRi9C80LXQvSDQsdC+0YLSm9CwINGC05nRgNGW0LfQtNC10YEg0LDRg9GL0YHSm9Cw0L3QtNGL0LvRi9KT0Ysg0LDQudKb0YvQvdC00LDQu9GL0L3QsNC00Yss0L3TmdC20ZbRgdGWINKb0LDQu9GL0L/RgtCw0YHQv9Cw0pPQsNC9LNGI0YvRgNGL0YjRgtGLINC60LXQu9Cz0LXQvS7SmtKx0YDRgiDQttKx0LzRi9GA0YLSm9Cw0LvQsNGA0Ysg0LbQvtKbLtCQ0Lsg0YHSsdGA0LDSmyDQsdC+0LnRi9C90YjQsCDQsNC70pPQsNGI0pvRiyDRgtC+0psg0ZbRiNC10Log0YLRg9GA0LDQu9GLINCw0L3QsNGC0L7QvNC40Y/Qu9GL0psg0YTQuNC30LjQvtC70L7Qs9C40Y/Qu9GL0psg0LXRgNC10LrRiNC10LvRltC60YLQtdGA0ZbQvdC1INGC0L7Sm9GC0LDQu9GB0LDQvCwg0YLQvtKbINGW0YjQtdC6INC+0Lsg0pvSsdGA0YHQsNKbINCx06nQu9GW0LzQtNC1INC00LjQsNGE0YDQsNCz0LzQsNC90YvSoyDQsNGB0YLRi9C90pPRiyDQsdOp0LvRltC80ZbQvdC00LUg0L7RgNC90LDQu9Cw0YHSm9Cw0L0s0LDRgSDSm9C+0YDRi9GC0YPQtNCwINC80LDSo9GL0LfQtNGLINGA0L7Qu9GMINCw0YLSm9Cw0YDQsNGC0YvQvSwg0LHRltGA0L3QtdGI0LUg0LHTqdC70ZbQvNC00LXRgNGWINCx0LDRgDog0LbQvtKT0LDRgNGL0LvQsNC90pPQsNC9INC606nQu9C00LXQvdC10qMg0YLTqdC80LXQvdC00LXQs9C10L0g0YHQuNCz0LzQsCDRgtOZ0YDRltC30LTRliDQvtC90YvSoyDQttCw0LvSk9Cw0YHRiyDRgNC10YLRltC90LTQtSDRgtGW0Log0ZbRiNC10LrQv9C10L0g0YDQtdC60YLRg9C8INC20LDQu9KT0LDRgdKb0LDQvSDSsdC30YvQvSwg0LHQsNGB0YLQsNC/0pvRiyDRgtGD0YvQu9Cz0LDQvSDQvdOZ0YDQtdGB0YLQtdC70LXRgNC00LUg0YjQsNC80LDQvNC10L0g0rHQt9GL0L3QtNGL0pPRiyA2MyDRgdC8INGD0LDSm9GL0YIg06nRgtC1IDEtMiDQttCw0YHRi9C90LDQvSDQutC10LnRltC9INC+0Lsg0YjQsNC80LDQvNC10L0gODMg0YHQvCDQsNGA0LDQu9GL0pvRgtCwINGB0L7Qt9GL0LvRi9C/LNGC0ZbQv9GC0ZYg0LHQsNC70LDQvdGL0qMg0LbQsNC70L/RiyDQsdC+0LnRi9C90YvSoyDSsdC30YvQvdC00YvSk9GL0LzQtdC9INC00LUg0YHTmdC50LrQtdGBINC60LXQu9C10LTRli7QotC+0psg0ZbRiNC10Log0YjQsNC20YvRgNKb0LDQudC80LXQvSDQsdCw0LnQu9Cw0L3Ri9GB0pvQsNC9INCw0LnQvNCw0pvRgtCw0YDRiyDQttCw0qPQsCDRgtGD0YvQu9KT0LDQvSDQvdOZ0YDQtdGB0YLQtdC70LXRgNC00LUg0LDQudKb0YvQvSDQsdCw0LnQu9Cw0L3Ri9GB0L/QsNKT0LDQvSDQsdGW0YDQsNKbINGB0L7QvdGL0LzQtdC9INKb0LDRgtCw0YAg0L7QvdGL0qMg0LbRltC/0YjQtSDRgtOZ0YDRltC30LTRliDRgtKv0LnQvdC10LrRgtC10YDRliDQvNC10LfQvtC/0LXRgNC40L7RgtCw0L3QsNC70YzQtNGLINCx0LDSk9GL0YLRgtCwINCx0LDQu9Cw0LvQsNGA0LTQsCDQttC40ZYg0LrQtdC30LTQtdGB0LXRli7QotC+0psg0ZbRiNC10LrRgtGW0qMg0LHQsNGB0pvQsCDRltGI0LXQutGC0LXRgNC00LXQvSDQsNC90LDRgtC+0LzQuNGP0LvRi9KbINC10YDQtdC60YjQtdC70ZbQs9GWINGC0LXQuiDSsdC30YvQvdC00YvSk9GL0L3QtNCwINOp0LvRiNC10LzRltC90LTQtSDSk9Cw0L3QsCDQtdC80LXRgSDQsNGC0pvQsNGA0LDRgtGL0L0g0YTRg9C90LrRhtC40Y/RgdGL0LzQtdC9INC00LXQvdC10LTQtSDQvtGA0L3QsNC70LDRgdGDINCx0LDSk9GL0YLRiyDQu9C+0LrQsNC70LjQt9Cw0YbQuNGP0YHRiyDTqdC30LPQtdGI0LUu0JzTmdGB0LXQu9C10L0g0L7QvdGL0qMg0LbQvtKT0LDRgNGL0LvQsNC90pPQsNC9INCx06nQu9GW0LPRliDRgdC+0pvRi9GAINGW0YjQtdC6INC90LXQvNC10YHQtSDSm9C+0YHRi9C80YjQsCDRltGI0LXQutC/0LXQvSDQsdCw0LnQu9Cw0L3Ri9GB0YvQvyzQsNGD0YvRgNGB0YvQvdGDINC60LXQt9GW0L3QtNC1INC60ZbRiNC60LXQvdGC0LDQuSDQsdCw0LvQsNC70LDRgNC00LAg0LzRi9Kb0YvQvSDQsNC50LzQsNKb0YLQsNC9INC60ZbQvdC00ZbQuiDQsNC50LzQsNKb0pvQsCDSm9Cw0YDQsNC5INC40YDRgNCw0LTQsNGG0LjRj9C70LDQvdGL0L8g0YLQsNGA0LDQu9Cw0LTRiyzQsNC7INC606nQu9C00LXQvdC10qMg0LHTqdC70ZbQs9GWINGN0LrRgdGC0YDQsNC/0LXRgNC40YLQvtC90LDQu9GM0LTRiyDQvtGA0L3QsNC70LDRgdGD0Ysg0LDRgNKb0YvQu9GLINGW0YjQutGWINCw0LnQvNCw0pvSm9CwINGW0YjQsNGB0YLQsNGA0LzQtdC9INGC0L7Qu9GL0pvRgtGL0YDRi9C/INKb0LDQvNGC0LDQvNCw0YHRi9C3INC10YLRltC70LPQtdC9LtCQ0Lsg0YHQuNCz0LzQsCDRgtOZ0YDRltC30LTRliDRltGI0LXQuiDQsdOp0LvRltCz0ZYg0YjQsNC20YvRgNKb0LDQudC80LXQvSDTqdGC0LUg0LbQsNKb0YHRiyDQsdCw0LnQu9Cw0L3Ri9GB0pvQsNC9INCx06nQu9GW0LzRliDQsdC+0LvRi9C/INGB0LDQvdCw0LvQsNC00YsuINCh0L7QvdGL0LzQtdC9INKb0LDRgtCw0YAg0L7QvdGL0qMg0YTQuNC30LjQvtC70L7Qs9C40YfRj9C70YvSmyDQtdGA0LXQutGI0LXQu9GW0LrRgtC10YDRliDQsNKT0LfQsNKT0LAg0YLSr9GB0LrQtdC9INCw0YEg0L/QtdC9INGB0YMgLCDRgtCw0pPQsNC8LCDQutOp0LzRltGA0YHRg9C70LDRgNC00YvSoyDQsdC+0LnRi9C90LAg0YHRltKj0ZbRgNGC0ZbQvyDSm9C+0YDRi9GC0LDRgtGL0L0g0L7RgNGC0LDQu9GL0pPRiyDRgNC10YLRltC90LTQtSDSm9GL0LfQvNC10YLRliDQsdC10LvQs9GW0LvRli7QltOZ0L3QtSDQvtC90LTQsNKT0Ysg0YTQtdGA0LzQtdC90YLRgtC10YDQtNGW0qMg0LrQtdC30LTQtdGB0YPRliDQv9C10L/RgdC40L3QvtCz0LXQvSwg0YXQtdC80L7RgtGA0LjQv9GB0LjQvdC90ZbSoyDQttKx0LzRi9GB0YLQsNGA0YvQvdGL0qMg0YLQvtC70YvSmyDQvtGA0YvQvdC00LDQu9GD0YvQvdCwINC20LDRg9Cw0L/RgtGLINC80LXRhdCw0L3QuNC30LzQvNC10L0g0LbSsdC80YHQsNC70YvQvdCw0LTRiy4g0JHQsNC70LDQtNCw0pPRiyDRgtCw0LvQtNCw0YMg0LDQvdCw0LvQuNC30ZbQvdC00LXQs9GWINC60LXQt9C00LXRgdC60LXQvSDQvdC10LnRgtCw0YDQu9C00Ysg0LzQsNC50LvQsNGA0LzQtdC9INKb0L7RgNGL0YLRi9C70LzQsNKT0LDQvSDQv9C+0LvQuNGB0LDRhdCw0YDQuNC00YLRltC6INC60LvQtdGC0YfQsNGC0LrQsNC70LDRgNC00YvQvSDQvtKjINC005nRgNC10LbQtdC00LUg0LrTqdGA0ZbQvdGW0YEg0LHQtdGA0YPRliDQvtC90YvSoyDQttKx0LzRi9GB0YvQvdGL0qMg0LHSsdC30YvQu9KT0LDQvdC00YvSk9GL0LzQtdC9ICwg0YTQtdGA0LzQtdC90YLRgtGW0Log0LbSr9C50LXQvdGW0qMg05nQu9GB0ZbQt9C00LXQvdGD0ZYg0L7RgNGL0L0g0LDQu9KT0LDQvdC00YvSm9GC0LDQvSDQutOp0YDRltC90ZbRgSDQsdC10YDQtdC00ZYu0IbRiNC10Log0YjRi9GA0YvRiNGC0Ysg0pvQsNCx0LDRgtGC0LDRgNGL0L3Ri9KjINGE0LjQt9C40L7Qu9C+0LPQuNGP0LvRi9KbINCz0LjQv9C10YDRgtGA0L7RhNC40Y/RgdGLIDrQvdOZ0YDQtdGB0YLQtdC70LXRgNC00LUg0ZbRiNC10LrRgtGW0qMg0YjRi9GA0YvRiNGC0Ysg0pvQsNCx0LDRgtGLINGC0ZbRgtGW0YDQutC10L3QtNGW0YDQs9GW0Ygg0YTQsNC60YLQvtGA0LvQsNGA0LTQsNC9INKb0L7RgNKT0LDRgyDQttOZ0L3QtSDRgtCw0pPQsNC80L3Ri9KjINOp0YLRg9GW0L0g0LbQtdKj0ZbQu9C00LXRgtGDINKv0YjRltC9INGI0YvQv9GA0YvRiCDRiNGL0pPQsNGA0LDQtNGLLtCR0rHQuyDQvdOZ0LbRltGB0YLQtSDRiNGL0YDRi9GI0YLRi9KjINCx0L7Qu9GD0YvQvSDRgtKv0YHRltC90LTRltGA0LXQtNGWLtCX0LDRgtGC0LDRgNC00YvSo9C00LAg0ZbRiNC10LrRgtC1INGC0L7Qu9GL0psg0YHRltKj0LHQtdGD0LvQtdGA0ZYg0L3TmdC20ZbRgdGC0LUg0LzQsNC5INC60LvQtdGC0YfQsNGC0LrQsNC90YvSoyDQsdC+0LvRg9GL0LzQtdC9INC606nRgNGW0L3QtdC00ZYuIDIu0rDRgNGL0pvRgtGL0psg0pvQsNC9INCw0LnQvdCw0LvRi9C80Ysg0YLTqdC80LXQvdCz0ZYg0LbSr9C50LXQu9GW0Log0LbTmdC90LUg0LbQvtKT0LDRgNKT0Ysg06nQutC/0LXQu9GW0Log0pvQsNGA0YHRi9C70YvSm9C/0LXQvSDRgdC40L/QsNGC0YLQsNC70YvQvdCw0LTRiy7QkdC+0YHQsNC90pPQsNC90L3QsNC9INC60LXQudGW0L0g05nRgdGW0YDQtdGB0LUg0LzRg9C70LTQtdC8INKb0LDRgNCw0LzQsCDSm9Cw0YDRgdGLINC20LDSk9C00LDQudC70LDRgCDQvtGA0YvQvSDQsNC70LDQtNGLLtKw0YDRi9Kb0YLRi9KjINKb0LDQuSDQsNC50L3QsNC70YvQvNGLINC/0LvQsNGG0LXQvdGC0LAg0LDRgNKb0YvQu9GLINC20LDQv9C/0LDQuSDSm9Cw0L0g0LDSk9GL0LzRi9C9INKb0LDQvNGC0LDQvNCw0YHRi9C3INC10YLRg9Cz0LUg0LDRgNC90LDQu9KT0LDQvSDQsdGW0YDQsNKb0YLQsCDQvtC7INOp0LrQv9C1INCw0YDSm9GL0LvRiyDRltGB0LrQtSDQsNGB0L/QsNC50LTRiy7TqNC50YLQutC10L3RliDQvtC70LDRgNC00LAg0YLRg9GL0LvSk9Cw0L3Sk9CwINC00LXQudGW0L3Qs9GWINCz0LDQtyDQsNC70LzQsNGB0YMg0LHQvtC70LzQsNKT0LDQvdC00YvSm9GC0LDQvS4g0J/Qu9Cw0YbQtdC90YLQsNC90YvSoyDQsdC10YLRliDSr9C70LrQtdC9INCx0L7Qu9KT0LDQvdC00YvSm9GC0LDQvSwg0L7QvdC00LDSk9GLINKb0LDQuSDQsNC50L3QsNC70YvQvNGL0L3Ri9KjINKb0LDRgNGB0YvQu9GL0pPRi9C80LXQvSDSm9GL0YHRi9C80Ysg0YLTqdC80LXQvS7QttCw0YLRi9GA0LTQsCDQv9C70LDRhtC10L3RgtCw0pPQsCDQstC10L3QvtC30LTRi9C6INC+0YDQsNC70YPQtNGLINC20LDSm9GB0LDRgNGC0LDRgtGL0L0g0q/RiCDRiNGD0L3RgiDQsNGC0LDRgdCw0Lwg0LHQvtC70LDQtNGLOiDQstC10L3QvtC30LTRi9KbINC/0YDQvtGC0L7QuiDQttOZ0L3QtSDTqdC60L/QtSDQsNGA0pvRi9C70Ysg0pvQsNC9INCw0pPRi9C80YvQvdGC06nQvNC10L3QtNC10YLQtdGC0ZbQvSDQtdC60ZYg0YjRg9C90YIg0YHQvtC/0LDSm9GI0LAg0YLQtdGB0ZbQuiDQv9C10L0g0LDRgNGC0LXRgNC40LDQu9GM0LTRiyDQv9GA0L7RgtC+0LrRgtCw0YAuINCh0L7Qv9Cw0rHRiNCwINGC0LXRgdGW0Log0YLRltC70LXRg9GW0LzQtdC9INC10YDQtdC60YjQtdC70ZbSo9C90LXQtNGWLiDSsNGA0YvSm9GC0LAg0pvQsNC9INC/0LvQsNGG0LXQvdGC0LDQtNCwINOp0YLRgtC10LPRltC80LXQvSDSm9Cw0L3Ri9Kb0pvQsNC9INC205nQvdC1INCx0LDRg9GL0YDQtNGL0qMg0LLQtdC90LAg0L/QvtGA0YLQsCDQsNGA0pvRi9C70Ysg0LDSk9Cw0YLRi9C9INC60ZbQvdC00ZbQuiDQstC10L3QsCDQstC10L3QsCDRg9C80LHQu9C40LrQsNC70LXRgdGC0LDQvSDSsdGA0YvSm9Kb0LAg0pvQsNGA0LDQuSDSm9Cw0LnRgtCwINKb0LDQvSDQvtGA0LDQu9Cw0LTRiy7QltKv0YDQtdC6INGI0YvSk9Cw0YDRi9C70YvQvNGL0L3Ri9KjINGI0LDQvNCw0LzQtdC9IDQw0L/QsNC50YvQt9GLINC/0LvQsNGG0LXQvdGC0LAg0LDRgNKb0YvQu9GLINOp0YLQtdC00ZYu0JLQtdC90L7Qt9C00Ysg0YLSr9GC0ZbQuiDQsNGA0pvRi9C70Ysg06nRgtGW0L8g0YLTqdC80LXQvdCz0ZYg0pvRg9GL0YEg0LLQtdC90LDRgdGL0L3QsCDQtdC90LPQtdC9INGB0L7QvSDQv9C70LDRhtC10L3RgtCw0LTQsNKT0Ysg0L7RgtGC0LXQs9GW0LzQtdC9INKb0LDQvdGL0pvSm9Cw0L0g0pvQsNC9INGC06nQvNC10L3Qs9GWINC00LXQvdC10L3RltKjINC+0YLRgtC10LPRltC90YHRltC3INKb0LDQvdGL0LzQtdC9INCw0YDQsNCw0LvQsNGB0L/QsNC50LTRiy4g0rDRgNGL0pvRgtGL0qMg0LHQtdC50ZbQvNC00LXRg9C70ZbQvdC1INC20LDQu9C/0Ysg0YvSm9C/0LDQuyDQtdGC0LXRgtGW0L0g0YTQsNC60YLQvtGA0LvQsNGAOiDQtdC9INCw0LvQtNGL0LzQtdC9INKx0YDRi9Kb0YLRi9KbINKb0LDQvSDQsNC50L3QsNC70YvQvNGL0L3Ri9C9INC10YDQtdC60YjQtdC70ZbQs9GWOiDRgtOp0LHQtdC00LUg0LDRgtCw0L8g06nRgtC60LXQvSDSr9GIINGI0YPQvdGCINCw0YDSm9GL0LvRiyDSm9Cw0L3QvdGL0qMg0YLQuNGW0LzQtNGWINGC0LDRgNCw0LvRg9GLINC+0YDRi9C9INCw0LvQsNC00Ysu0JbTmdC90LUg0L7Qu9Cw0YAg06nQutC/0LXQs9C1INC00LXQs9C10L0g0LbSr9C60YLRliDQsNC30LDQudGM0YLQsNC00Ysu0rDRgNGL0psg0pvQsNC90YvQvdGLINC20L7Sk9Cw0YDRiyDQvtGC0YLQtdCz0ZYg0YHRi9C50YvQvNC00YvQu9GL0pPRizrQvWJGINCx0rHQuyDSsdGA0YvSm9GC0YvSmyDQs9C10LzQvtCz0LvQsNCx0LjQvdGWICzQtdGA0LXRgdC10Log0LPQtdC80L7Qs9C70L7QsdC40L3RltC90LXQvSBoYkEg0LDSk9C30LDSk9CwINC60LXRgNC10Log0L7RgtGC0LXQs9GW0L3RliDQsdCw0LnQu9Cw0L3Ri9GB0YLRi9GA0YMg0pvQsNCx0ZbQu9C10YLRltC90ZbSoyDQttC+0pPQsNGA0YvQu9GL0pPRi9C80LXQvSDQtdGA0LXQutGI0LXQu9GW0L3QtdC00ZYuINCR0rHQuyDSsdGA0YvSm9GC0YvSoyDRgtGW0L/RgtGWINGC06nQvNC10L3Qs9GWINC/0LDRgNGG0LjQsNC70YzQtNGLINKb0YvRgdGL0LzQtNCw0LTQsCDQvtGC0YLQtdCz0ZbQvSDQttCw0pvRgdGLINGB0ZbSo9GW0YDRg9Cz0LUg0LzSr9C80LrRltC90LTRltC6INCx0LXRgNC10LTRli7SmtCw0L0g0LDSk9GL0LzRgdGL0L3Ri9KjINGC0LDRgNCw0LvRgyDQtdGA0LXQutGI0LXQu9Kj0LrRgtC10YDRljrQv9C70LDRhtC10L3RgtGC0LDQtNCw0L0g0L7RgtGC0LXQs9GW0LPQtSDQsdCw0Lkg0LXQvSDSm9Cw0L0g0LrRltC90LTRltC6INCy0LXQvdCw0YHRiyDQsNGA0pvRi9C70Ysg0LXQvdGD0ZYg0LbSr9C30LXQs9C1INCw0YHQsNC00YssINC10L0g0LDQu9C00YvQvNC10L0g0rHRgNGL0pvRgtGL0qMg0LzQuNGL0L3QsCDQttKv0YDQtdCz0ZbQvdC1INC205nQvdC1INCx0LDRg9GL0YDRi9C90LAg0pvQsNGA0LDQuSAg0LHQsNKT0YvRgtCw0LvRi9C/LNC+0YDQs9Cw0L3QtNCw0YDQtNGLINKb0LDQvNGC0LDQvNCw0YHRi9C3INC10YLQtdC00ZYuINCQ0Lsg0YLRltC90LTQtdGA0LTRltKjINC+0YLRgtC10LPRltC90LUg0LTQtdCz0LXQvSDRgdKx0YDQsNC90YvRgdGC0LDRgNGL0L3Ri9KjINGC06nQvNC10L3QtNC10YPRliDQtdGB0LU6INKx0YDRi9Kb0YLRi9KbINC80LXRgtCw0LHQvtC70LjQt9C80ZYg0L3QtdCz0ZbQt9GW0L3QtdC9INCw0L3QsNGN0YDQvtCx0YLRiyDRj9KT0L3QuCDQvtGC0YLQtdC60YHRltC3LCDRgdC+0Lsg0YHQtdCx0LXQv9GC0ZYg0LHSsdC7INC+0YLRgtC10LPRltC90ZbSoyDRgtOp0LzQtdC9INC00LXQvdCz0LXQudGW0L0g06nRgtC10YPQs9C1INC606nQvNC10LrRgtC10YHQtdC00ZYuINKw0YDRi9KbINGC0ZbQvdC00LXRgNGWINC606nQsdGW0L3QtdGB0LUg0LPQuNC/0L7QutGB0LjRj9KT0LAg0YLTqdC30ZbQvNC00ZYg0LrQtdC70LXQtNGWLiDQn9C70LDRhtC10L3RgtCw0L3Ri9KjINKv0LvQutC10L0g0LzQsNGB0YHQsNGB0Ysg0LzQtdC9INC+0L3Ri9C9INC20LDQu9C/0Ysg0LbQuNC90LDSm9GC0LDQvNCw0LvRiyDQstCw0YHQutGD0LvQuNGA0LjQt9Cw0YbQuNGP0YHRiyDQutC10LvRgdC10Los0LHSsdC7INC/0LvQsNGG0LXQvdGC0LAg0LXRgNC10LrRiNC1INCx0LDRgNGM0LXRgNC70ZbQuiDQutOp0L/RltGAINCw0L3QsCDQvNC10L0g0LHQsNC70LAg0LDRgNCw0YHRi9C90LTQsCDRgdCw0L3QsNC70LDQtNGLLiDQntGB0YvQvdGL0L0g0LXRgdC10LHRltC80LXQvSwg0YLQuNGW0LzQtNGWINCz0LDQtyDQsNC70LzQsNGB0YMg0LzQtdC9INKb0L7RgNC10Log0LfQsNGCINCw0LvQvNCw0YHRgyDQttC10YLQutGW0LfRltC70YPRltC9INKb0LDQvNGC0LDQvNCw0YHRi9C3INC10YLQtdC00ZYuINCl0L7RgNC40L7QvdC90YvQvSDSr9C70LrQtdC9INCw0YPQtNCw0L3RiyDQtNCwINC/0LvQsNGG0LXQvdGC0LDRgNC70Ysg0pvQsNC9INCw0pPRi9C80YvQvdCwINGC06nQvNC10L0g0pvQsNGA0YHRi9C70YvSm9GC0Ysg0L7RgtGC0LXQs9GWINC80LXQvSDRgdC+MiDQsNC70LzQsNGB0YPRi9C90LAg0L7So9GC0LDQudC70Ysg0LbQsNKT0LTQsNC5INC20LDRgdCw0LnQtNGLLiDQn9C70LDRhtC10L3RgtCw0L3Ri9KjINGC0LjRltC80LTRliDQvNC10YLQsNCx0L7Qu9C30LjRltC80ZY6INC/0LvQsNGG0LXQvdGC0LAg0LPQu9GO0LrQvtC30LDQvdGLINCw0LzQuNC90pvRi9GI0pvRi9C70LTQsNGA0YvQvSDQttOZ0L3QtSDQvNCw0Lkg0pvRi9GI0pvRi9C70LTQsNGA0YvQvSDQsdC10LvRgdC10L3QtNGWINGC0LDRgdGL0LzQsNC70LTQsNC50LTRiywg0rHRgNGL0pvRgtGL0qMg0Y3QvdC10YDQs9C40Y8g0pvQsNC20LXRgtGC0ZbQu9GW0LPRltC9INKb0LDQvNGC0LDQvNCw0YHRi9C3INC10YLQtdC00ZYu0JDQvdGC0LjQvtC60YHQuNC00LDQvdGC0YLRi9KbINC20q/QudC10LvQtdGAINCx0LXQu9GB0LXQvdGD0ZYg0LDRgNKb0YvQu9GLINKx0YDRi9Kb0YLRiyDQsdC+0YEg0YDQsNC00LjQutCw0LvQtNCw0YDQtNGL0qMg0LfQsNKb0YvQvNC00LDQvdGD0YvQvdCw0L0g0pvQvtGA0pPQsNC50LTRiy7QntGB0Ysg0YHQtdCx0LXQv9GC0LXRgNC00ZbSoyDRgtC+0LvRi9KbINC606nRgNGB0LXRgtC60ZbRiNGC0LXRgNGWINCw0YDSm9GL0LvRiyDSm9Kx0YDRgdCw0psg0ZbRiNGW0L3QtNC10LPRliDQsdKx0Lsg0YTQsNC60YLQvtGA0LvQsNGAINCx0LXQu9GB0LXQvdC00ZYg0LrSr9C50LTQtSDSsdGA0YvSm9GC0YvQvSDSm9Cw0L0g0LDQudC90LDQu9GL0LzRi9C90YvSoyDQsNC00LDQv9GC0LDRhtC40Y/RgdGL0L3QsCAs0Y/Sk9C90Lgg0LHQtdC50ZbQvNC00LXQu9GD0ZbQvdC1INC20LDSk9C00LDQuSDQttCw0YHQsNC50LTRi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33" table:style-name="ce1">
            <text:p>1066933</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7QkdCw0LvQsNC90YvSoyDQsNGBINKb0L7RgNGL0YLRgyDRhNC10YDQvNC10L3RgtGC0LXRgNGWINC70LDQutGC0LfQsCzQsNC80LjQu9Cw0LfQsCzQu9C40L/QsNC30LAg0YLQvtC70YvSm9C20LXRgtGW0LvQvNC10LPQtdC9INCx0q/QuyDQvNCw0LnQu9Cw0YDQtNGL0qMgLNC60pvQvNGW0YDRgdGD0LvQsNGA0LTRi9KjINC205nQvdC1INC60LXQudCx0ZbRgCDQsdC10LvQvtC60YLQsNGA0LTRi9KjINGC0L7Qu9GL0psg0pvQvtGA0YvRgtGL0LvQvNCw0YPRi9C90LAg05nQutC10LvQtdC00ZYu0J3TmdC20ZbRgdGC0LUg0L3QtdC50YLRgNCw0LvRjNC00ZYg0LzQsNC50LvQsNGA0LTRi9KjINCx0L7Qu9GD0Ysg0L7RgdGEINGE0LXRgNC80LXQvdGC0LDRgtC40LLRgtGWINC20LXRgtGW0LvQvNC10LPQtdC90LTRltC60YLRliDQutOp0YDRgdC10YLQtdC00ZYu0JbQsNKj0LAg0KLQo9KS0JDQnSDQkdCQ0JvQkNCb0JDQoNCU0JAg0ZbRiNC10Log0LzQuNC60YDQvtGE0LvQvtGA0LDRgdGLINCx0ZbRgNGC0ZbQvdC00LXQvyDSm9Cw0LvRi9C/0YLQsNGB0LDQtNGLLtCQ0L3QsCDRgdKv0YLRltC80LXQvSDSm9C+0YDQtdC60YLQtdC90LXRgtGW0L0g0LHQsNC70LDQu9Cw0YDQtNCwINC70LDQutGC0L7QsdCw0LrRgtC10YDQuNGP0LvQsNGAINCx0LDRgdGL0Lwg0LHQvtC70LDQtNGLLNCx0ZbRgNCw0psg0pvQsNC70YvQv9GC0LDRgdGDINGC0L7Qu9GL0psg0LDRj9Kb0YLQsNC70LzQsNKT0LDQvdC00YvSm9GC0LDQvSDQs9Cw0Lcg0YLSr9C30ZbQu9GD0ZYg0LbTmdC90LUg0LbQtdC70LTQtdC90YMg0LHQvtC70YPRiyDQvNKv0LzQutGW0L0u0KLQvtKbINGW0YjQtdKT0LrRgtGW0qMg0YHQsNC70YvRgdGC0YvRgNC80LDQu9GLINGC0q/RgNC00LUg0pvRi9GB0pvQsCDQsdC+0LvRg9GLINC80LXQvSDQttKv0LnQutC1INC20q/QudC10YHRltC90ZbSoyDQttC10YLRltC70LzQtdGD0ZYg0L7QvdGL0qMg0LzQvtGC0L7RgNC70YvSmyDSm9GL0LfQvNC10YLRltC90ZbSoyDQttC10YLQutGW0LvRltC60YHRltC30LTRltCz0ZbQvdC10L0g0L3TmdC20ZbRgdGC0ZbSoyDQttC40ZYg0LHQvtC70YPRiyDQttOZ0L3QtSDSm9C+0YDRi9GC0YMg0L/RgNC+0YbQtdGB0ZbQvdGW0qMg0YLQvtC70YvSmyDQttC10YLRltC70LzQtdGD0ZbQvdC1INOZ0YHQtdGAINC10YLQtdC00LXRli7QsNCh0prQkNCX0JDQnSDSmtCr0KjSmtCr0JvQq9Cd0KvSoiDQotOo0JzQldCd0JTQhtCT0IYg0LDRgdKb0LDQt9Cw0L3QvdGL0pMg0pvRi9GI0pvRi9C70LTRi9KT0Ysg0LbQtdGC0LrRltC70ZbQutGC0ZYg0LTQtdKj0LPQtdC50LTQtSDQtdC80LXRgdGC0ZbQs9GWLNCx0rHQuyDQutC10LnQsdGW0YAg0pvQvtGA0LXQutGC0ZbQuiDQt9Cw0YLRgtCw0YDQtNGL0qMg0YLQvtC70YvSmyDSm9C+0YDRi9GC0YvQu9GD0YvQvdCwINOZ0YHQtdGAINC10YLQtdC00ZYu0ZbRiNC10Log0LzQvtGC0L7RgNC40LrQsNGB0YvQvdGL0qMg0LbQvtKT0LDRgNGLINCx0LXQu9GB0LXQvdC00ZbQu9GW0LPRliAt0L3TmdGA0LXRgdGC0LXQu9C10YDQtNC1INGW0YjQtdC60YLRltKjINC20LjRi9GA0YvQu9GD0Ysg0LHQtdC70YHQtdC90LTRliDQttKv0YDQtdC00ZYu0JHSsdC7INC905nQttGW0YHRgtGW0qMg0LbQuNGWINGI0YvSk9GD0YvQvdCwINOZ0YHQtdGAINC10YLQtdC00ZYu0JvQsNC60YLQvtC30LDSk9CwINCx0LXQudGW0LzQtNC10LvRg9GWLdC10LzRiNC10Log0YHSr9GC0ZbQvdC00LXQs9GWINC70LDQutGC0L7Qt9CwINC20L7Sk9Cw0YDRiyDQutC+0L3RhtC10L3RgtGA0LDRhtC40Y/QtNCwINCx0L7Qu9Cw0LTRiyAu0JvQsNC60YLQvtC30LDQvdGLINGL0LTRi9GA0LDRgtCw0YLRi9C9INC70LDQutGC0LDQt9CwINGE0LXRgNC80LXQvdGC0ZYg0LbQtdGC0LrRltC70ZbQutGB0ZbQtyDQsdC+0LvRgdCwINC905nQttGW0YHRgtGW0qMg0LbQuNGW0LvRltCz0ZYg0LDRgNGC0YPRiyDQvNKv0LzQutGW0L0u0JjQvNC80YPQvdC00YvSmyDQttKv0LnQtdC90ZbSoyDQttC10YLRltC70LzQtdGD0ZYgLdGI0YvRgNGL0YjRgtGLINKx0LDQsdCw0YLQsNGAINC80LXQvSDRjdC/0LjRgtC10LvQuNC5INC20LDRgdGD0YjQsNC70LDRgNGL0L3Ri9KjINKx0L7RgNKT0LDRgyDSsdGL0LfQvNC10YLRliDRgtC+0LvRi9KbINC20LXRgtGW0LvQvNC10LPQtdC90LTRltC60YLQtdC9INCx0L7Qu9Cw0LTRiy7QkdKx0Lsg0YjRi9GA0YvRiNGC0YvSoyDQsdOp0LvRltC90YPRltC90LUg0LbTmdC90LUg0L3TmdC20ZbRgSDSm9Kx0YDQsNC80YvQvdC00LAg0Y3Qv9C40YLQtdC70LjQuSDQttCw0YHRg9GI0LDQu9Cw0YDRi9C90YvSoyDQsdC+0LvRg9GL0L3QsCDTmdC60LXQu9C10LTRliAu0JrQvtC/0YDQvtC70L7Qs9C40Y/Qu9GL0psg0LfQtdGA0YLRgtC10YPQtNGWINGC0q/RgdGW0L3QtNGW0YDRgyDQsdC10LnRgtCw0YDQsNC/INC80LDQudC70LDRgNC00YvSoyAg0YLQvtC70YvSmyDSm9C+0YDRi9GC0YvQu9GD0Ysg0q/RiNGW0L0g0LDRgdKb0LDQt9Cw0L0t0ZbRiNC10Log0LbQvtC70YvQvdGL0qMg0YTQtdGA0LzQtdC90YLQtdGA0ZYg0LbQtdGC0ZbQu9GD0ZbQvdGW0qPQtNC10LPRliDQsdCw0LvQsNC70LDRgNC00LAg0pvQsNC70YvQv9GC0Ysg0pvSsdGA0YvQu9GL0YHRiyDQsdC+0LvRi9C/INGC0LDQsdGL0LvQsNC00Ysu0prQvtGA0YvRgtGL0LvQvNCw0pPQsNC9INGC0LDQu9GI0YvSm9GC0LDRgC3QsNGB0pvQsNC30LDQvSDRltGI0LXQuiDQttC+0LvRi9C90YvSoyDRhNC10YDQvNC10L3RgtCw0YLQuNCy0YLRliDQttKv0LnQtdGB0ZYg0LfQsNGC0YLQsNGA0LTRiyDSm9C+0YDRg9GC0pPQsCDQtNCw0LnRi9C9INC10LzQtdGB0YLRltC60ZbQvSDQutOp0YDRgdC10YLQtdC00ZYu0KjRi9GA0YvRiCDRltGI0LXQutGC0ZbSoyDSm9Cw0LHRi9C90YMg0YDQtdCw0LrRhtC40Y/RgdGLINC90LXQvNC10YHQtSDRiNGL0pPQsNGA0YMg0L/RgNC+0YbQtdGB0ZbQvdGW0qMg0LHQtdC70YHQtdC90LTRltC70ZbQs9GW0L3QtSDQsdCw0LnQu9Cw0L3Ri9GB0YLRiyDQsdOp0LvRltC90LXQtNGWLtCR0rDQmyDQrdC/0LjRgtC10LvQuNC40Lkg0LDRgdKb0LDQt9Cw0L0g0ZbRiNC10Log0LbQvtC70YvQvdGL0qMg0YjRi9GA0YvRiNGC0Ysg0pvQsNCx0LDRgtGL0L3Ri9KjINGA0LXQs9C10L3QtdGA0LDRhtC40Y8g0L/RgNC+0YbQtdGB0ZbQvSDQutOp0YDRgdC10YLQtdC00ZYuPGJyIC8+DQoyLtKw0YDRi9KbINC/0LvQsNGG0LXQvdGC0LDRgNC70YvSmyDSm9Cw0L0g0LDQudC90LDQu9GL0LzRiyDQttCw0pPQtNCw0LnRi9C90LAg0LHRltGA0L3QtdGI0LUg0YTQsNC60YLQvtGA0LvQsNGAINCw0YDSm9GL0LvRiyDQsdC10LnRltC80LTQtdC70L7QtdC00ZYu0J7RgdGL0L3QtNCw0Lkg0YTQsNC60YLQvtGA0LvQsNGA0LTRi9KjINCx0ZbRgNGWLdC60ZbQvdC00ZbQuiDQstC10L3QsNGB0YvQvdCw0L0g0L7RgtGC0LXQs9GWINC80LXQvSDSm9Cw0L3Ri9Kb0pvQsNC9INKb0LDQvdC90YvSoyDQsdCw0YPRi9GA0LTQsCDQsNC50L3QsNC70YvQvyDTqdGC0ZbQvyzRgtOp0LzQtdC90LPRliDSm9GD0YvRgSDQstC10L3QsNKT0LAg0LXQvdGD0ZbQvdC1INC80q/QvNC60ZbQvdC00ZbQuiDQsdC10YDQtdGC0ZbQvSDQstC10L3QvtC30LTRi9KbINGC0q/RgtGW0LrRgtGW0qMg0LHQvtC70YPRiyDSsdGA0YvSm9GC0YvSkyDQttC10YLQutGW0LvRltC60YLRliDQvtGC0YLQtdCz0ZbQvNC10L0g0pvQsNC80YLQsNC80LDRgdGL0Lcg0LXRgtGW0LvRg9GW0L0g0pvQsNC80YLQsNC80LDRgdGL0Lcg0LXRgtC10LTRli7QotCw0pPRiyDQsdGW0YAg0YTQsNC60YLQvtGA0LTQu9GLINCw0LnRgtCw0YLRi9C9INCx0L7Qu9GB0LDQvCDSsdGA0YvSm9GC0YvSoyDQs9C10LzQvtCz0LvQsNCx0LjQvdGW0L3RltKjINC20L7Sk9Cw0YDSk9GLINC60L7QvdGG0LXQvdGC0YDQsNGG0LjRj9GB0YsgLdC+0Lsg0LXRgNC10YHQtdC6INCz0LXQvNC+0LPQu9Cw0LHQuNC90LPQtSDSm9Cw0YDQsNKT0LDQvdC00LAg0L7RgtGC0LXQs9GW0LPQtSDQutOp0LHRltGA0LXQuiDQttCw0pvRi9C90LTRi9KT0Ysg0LHQsNGALtKw0YDRi9KbINGC0ZbQvdC00LXRgNGW0L3QtSDQvtGC0YLQtdCz0ZbQvdGW0qMg0YLQuNGW0LzQtNGWINC20LXRgtC60ZbQt9GW0LTRg9GW0L3RltKjINKb0LDQvNGC0LDQvNCw0YHRi9C3INC10YLQtdC00ZYu0J/Qu9Cw0YbQtdC90YLQsCDRgdC+0L3Ri9C80LXQvSDSm9Cw0YLQsNGAINKx0YDRi9Kb0YLRi9KjINKb0LDQvdGL0L3QsNC9INC606nQvNGW0YDSm9GL0YjSm9GL0Lsg0LPQsNC30YvQvNC10L0g0pvQsNC70LTRi9KbINOp0L3RltC80LTQtdGA0LTRliDRiNGL0pPQsNGA0YvQvyDQvtC70LDRgNC00Ysg0LbQvtGOINKv0YjRltC9INCw0L3QsCDSm9Cw0L3Ri9C90LAg0LHQtdGA0YMg0LDRgNKb0YvQu9GLINKx0YDRi9Kb0YLRi9KjINCx0LXQudGW0LzQtNC10LvRg9GW0L3QtNC1INGI0LXRiNGD0YjRliDRgNOp0Lsg0LDRgtKb0LDRgNCw0LTRiy7SsNGA0YvSm9GC0YvSoyDRiNGD0L3RgtGC0LDRgNGL0L3Ri9KjINC205nQvdC1INKx0YDRi9Kb0YLRi9KTINKb0LDQvSDQsNC50L3QsNC70YvQvNGL0L3SoyDSr9C70LPRltC70LXRgNC90ZbSoyDQsdC+0LvRg9GLINKx0YDRi9Kb0YLRi9KTINC00LDQvNGL0L8g0LrQtdC70LUg0LbQsNGC0pvQsNC9INC80q/RiNC10LvQtdGA0qPQvdC1INC+0YLRgtC10LPRliDQvNC10L0g0pvQsNC9INCw0pPRi9C80YvQvdGL0qMg0pvQsNC80YLQsNC80LDRgdGL0Lcg0LXRgtC10LTRli7SsNGA0YvSm9GC0LAg0pvQsNC9INCw0LnQvdCw0LvRi9C8INC20q/QudC10YHRliDQutGW0L3QtNGW0Log0YLQsNC80YvRgNC70LDRgCDQsNGA0pvRi9C70Ysg0LbRg9GA0LXQtNGWIC7SsNGA0YvSm9GC0YvSoyAzLTQg0LDQv9GC0LDRgdGL0L3QsNC9INCx0LDRgdGC0LDQvyDQv9C70LDRhtC10L3RgtCw0YDQu9GL0psg0pvQsNC9INCw0LnQvdCw0LvRi9C8INC00LDQvNC40LTRiyzRj9KT0L3QuCDQs9Cw0Lcg0LDQu9C80LDRgdGDINC80LXQvSDSm9Cw0L0g0LDQudC90LDQu9GL0Lwg0LbSsdGA0LUg0LHQsNGB0YLQsNC50LTRiy7SsNGA0YvSmyDQvtGC0YLQtdCz0ZYg0LzQtdC9INKb0L7RgNC10LrRgtGW0Log0LfQsNGC0YLQsNGA0pPQsCDQsdCw0Lkg0pvQsNC90LTRiyDQutGW0L3QtNGW0Log0LLQtdC90LDRgdGL0L3QsNC9INCw0LvQsNC00Ysu0JrRltC90LTRltC6INCy0LXQvdCw0YHRiyDSsdGA0YvSsdGC0LAg0LHQsNGD0YvRgNKT0LAg0LrRltGA0LXRgCDQttC+0LvQtNCwINC10LrRliDRgtCw0YDQvNCw0pvSm9CwINCx06nQu9GW0L3QtdC00ZYt0JrQldKiINCW05jQndCVINKa0KvQodKa0JAg0JLQldCd0JDQm9Cr0pog06jQl9CV0JogINCw0YDSm9GL0LvRiyDRgtOp0LzQtdC90LPRliDSm9GD0YvRgSDQstC10L3QsNKT0LAg0pvSsdGP0LTRiyzQtdC60ZbQvdGI0ZbRgdGWINC90LDRiNCw0YDQu9Cw0YMg0LTQsNC80YvSk9Cw0L0g0pvQsNKb0L/QsCDQstC10L3QsNGB0YvQvSDSm9Kx0Y/QtNGLLtCh0L7Qu9Cw0LnRiNCwINKb0LDQvdKT0LAg0LrTqdC/INKb0LDQvdGL0pvSm9Cw0L0g0pvQsNC90LTRiyDQsdCw0YPRi9GAINCw0LvQsNC00Ysu0JHSsdC7INKb0LDQvSDQsdCw0YPRi9GL0YDQtNCw0L0g06nRgtC60LXQvSDRgdC+0qMg0YLTqdC80LXQvdCz0ZYg0pvRg9GL0YHRi9C90LAg0LHQsNGA0LDQtNGLLtCQ0YDQsNC70LDRgdKb0LDQvSDSm9Cw0L0g0YLTqdC80LXQvdCz0ZYg0pvRg9GL0YEg0LLQtdC90LDRgdGLINCw0YDSm9GL0LvRiyDQvtKjINC20q/RgNC10LrRiNC10LPQtSDQutC10LvRltC/INKb0rHRj9C00Ysu0J7QuyDQttC10YDQtNC1INC20L7Sk9Cw0YDSk9GLINKb0YPRi9GBINCy0LXQvdCwINCw0YDSm9GL0LvRiyDQttC+0pPQsNGA0pPRiyDQsdOp0LvRltC60YLRltKjINKb0LDQvdGLINC60LXQu9GW0L8g0pvSsdGP0LTRiyAs0LHRltGA0LDSmyDQsdKx0Lsg0LXQutGWINKb0LDQvSDQsNGA0LDQu9Cw0YHQv9Cw0LnQtNGLLtCW0L7Sk9Cw0YDSk9GLINKb0YPRi9GBINCy0LXQvdCw0YHRiyDQvtKjINC20q/RgNC10LrRiNC10LTQtdC9INC+0qMg0pvQsNGA0YvQvdGI0LDSk9CwINOp0YLQtdC00ZYg0LTQtSDTqdC60L/QtSDQsNGA0YLQtdGA0LjRj9GB0YvQvdCwINKb0rHRj9C00Ysu06jQutC/0LXQs9C1IDEwINC/0LDQudGL0Lcg0pvQsNC9INCx0LDRgNCw0LTRiyAs0pvQsNC70pPQsNC90Ysg0JHQntCi0JDQmyDTqdC30LXQs9GWINCw0YDSm9GL0LvRiyDQsNC+0YDRgtCw0L3Ri9KjINGC06nQvNC10L3Qs9GWINCx06nQu9GW0LPRltC90LUg06nRgtGW0L8gLNC00LXQvdC10L3RltKjINGC06nQvNC10L3Qs9GWINCx06nQu9GW0LPRltC90LUg0YLQsNGA0LDQudC00YsgLtCQ0L7RgNGC0LDQvdGL0qMg0YLTqdC80LXQvdC00LXQs9C10L0g0LHTqdC70ZbQs9GW0L3RltKjINKb0LDQvdGLINC60ZbQvdC00ZbQuiDQsNGA0YLQtdGA0LjRj9C70LDRgNGLINCw0YDSm9GL0LvRiyDQv9C70LDRhtC10L3RgtCw0pPQsCDSm9Cw0LnRgtCw0LTRiy4=</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65" table:style-name="ce1">
            <text:p>1066965</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MSDQvdOZ0YDQtdGB0YLQtSDQsdCw0LvQsNC70LDRgNC00YvSoyDRgtC+0psg0ZbRiNGW0LXQuiDSsdC30YvQvdC00YvSk9GLIDYzINGB0Lwg0LHQvtC70YvQvyDQutC10LvQtdC00ZYuINCx0ZbRgNGW0L3RiNGWINC20YvQu9GL0L3Ri9KjINGB0L7So9GL0L3QsCDSm9Cw0YDQsNC5IDgzINGB0Lwg0LPQtSDQtNC10LnRltC9INKx0LfQsNGA0LDQtNGL0LrQtdC50ZbQvdC10L0g0LHQsNC70LDQvdGL0qMg0pvRgdGDINC20ZbQvdC1INCx0L7QudGL0L3Ri9KjINKx0LfQsNGA0YPRi9C90LAg0LHQsNC50LvQsNC90YvRgdGC0Ysg0LHQvtC50YvQvNC10L0g0LHRltGA0LTQtdC5INCx0L7Qu9GL0L8g0L7RgtGL0YDQsNC00Ysu0L3TmdGA0LXRgdGC0LUg0YLRg9GL0LvSk9Cw0L3QtNCwINC+0LvQsNGA0LTRi9KjINGC0L7SmyDRltGI0LXQuiDRgtC+0LvRi9KbINKb0LDQu9GL0L/RgtCw0YHRi9C/INC20LXRgtGW0LvQs9C10L0g0LHQvtC70LzQsNC50LTRiy4g0L7Qu9Cw0YDQtNGLINC10YDQtdGB0LXQuiDQsNC00LDQvNKT0LAg0pvQsNGA0LDSk9Cw0L3QtNCwINGI0LDRgNCx0YvQu9GL0psg06nRgdGW0L3QtNGW0LvQtdGA0ZYg0LHQvtC70LzQsNC50LTRiy4g0L7QuyAyINC20LDRgdKb0LAg0pvQsNGA0LDQuSDSm9Cw0LvRi9C/0YLQsNGB0LAg0LHQsNGB0YLQsNC50LTRiy7QttC40LXQuiDRltGI0LXQuiDRgtCw0YHQv9Cw0LvQsNGA0Ysg05nRgNC10qMg0LHRltC70ZbQvdC10LTRltC20LjQtdC6INGW0YjQtdC6INKb0LDQv9Cw0LnQvNCw0YHRiyDQsdC+0LvQvNCw0LnQtNGLINC+0Lsg0YLQtdC6IDYg0LDQudC00LDQvSDQsdCw0YHRgtCw0L8g0pvQsNC70YvQv9GC0LDRgdCwINCx0LDRgdGC0LDQudC00Ysu0LbQuNC10Log0ZbRiNC10LrRgtGW0qMg0pvQsNC80L/QsNC50LzQsNC70LDRgNGLINGC0LDRgdC/0LDQu9Cw0YDRiyAg0YjQsNGA0LHRi9C70YvSmyDTqdGB0ZbQvdC00ZbQu9C10YDRliA2LTcg0LbQsNGB0pvQsCDQtNC10LnRltC9INGC0L7Qu9GL0psg0pvQsNC70YvQv9GC0LDRgdKb0LDQvSDQsdC+0LvRi9C/INCw0Y/Sm9GC0LDQu9Cw0LTRiy4g0L3TmdGA0LXRgdGC0LXQu9C10YDQtNGW0qMg0pvSsdGA0YIg0YLTmdGA0ZbQt9C00ZYg06nRgdGW0L3QtNGW0LvQtdGA0ZYg0LrQvtC90YPRgSDQv9GW0YjRltC90LTRliDQsdC+0LvRi9C/INC60LXQu9C10LTRli4g0rHQt9GL0L0g0YjQsNC20YvRgNKb0LDQudGL0L3Ri9KjINCx0L7Qu9GL0YPQvNC10L0g0LbQvtKT0LDRgNGLINOp0L7Qt9KT0LDQu9GL0YHSm9CwINC40LUg0LHQvtC70LDQtC7QttOZ0L3QtSDTmdGIINKb0YPRi9GB0YvQvdGL0qMg0LrQtdC3INC60LXQu9Cz0LXQvSDQttC10YDRltC90LTQtSDQvtGA0L3QsNC70LDRgdGD0Ysg0LzSr9C80LrRltC9ICwg0YHQvtKb0YvRgCDRltGI0LXQutGC0ZbQutGC0ZbSoyDQsNGC0LjQv9GC0ZYg0L7RgNC90LDQu9Cw0YHRg9GLINCx0L7QudGL0L3RiNCwIDEg0YDQtdGC0YDQvtGG0LXQutCw0LvRjNC00YsgMiDQvNCw0LvRi9C5INGC0LDQt9C00LAgMyDQsdCw0YPRi9GA0LTQsCDQvtGA0L3QsNC70LDRgdKb0LDQvSDQsdC+0LvRi9C/INC60LXQu9C10LTRli7RgtC+0psg0ZbRiNC10Log0YHRg9C00YvSoyDRgdGD0LTRi9KjINGB0ZbSo9GW0YDRltC70YPRltC9INC205nQvdC1INGN0LLQsNC60YPQsNGC0L7RgNGLIC0g0YDQtdC30LXRgNCy0YPQsNGA0LvRi9KbINOp0YvQt9C80LXRgtGWINC00LUg0LHQsNGALiDQvtC90LTQsCDSm9C+0YDQtdC60YLRltC6INKb0L7RgCDRi9C00YvRgNCw0L8g0L3TmdC20ZbRgdGC0ZbSoyDRgtKv0LfRltC70YPRliDQttKv0YDQtdC00ZYuPGJyIC8+DQrQvdGW0YDQtdGB0YLQtdC00LXQs9GWINGC0L7SmyDRltGI0LXQutGC0ZbSoyDRiNGL0YDRi9GI0YLRiyDSm9Cw0LHQsNGC0YvQvdC00LAgINGC0LXRgNC10qPQtNC10L3Qs9C10L0g0rHSo9KT0YvQuyDQttCw0LvQv9Cw0psg0Y3Qv9C40YLQtdC70LjQuSDQttC+0pPQsNGA0Ysg0LTQtdKj0LPQtdC50LTQtdCz0ZYg0L/RgNC+0LvQuNGE0LXRgNCw0YbQuNGPINC20q/RgNGW0L8g0L7RgtGL0YDQsNC00YsuINKb0LDQu9GL0L/RgtGLINC20LDSk9C00LDQudC00LAg0YLQvtKbINGW0YjQtdC60YLQtSDRgdOp0Lsg0LHTqdC70ZbQvdGW0YMg0LDQt9KT0LDQvdGC0LDQuSDQsdC+0LvRi9C/INC60LXQu9C10LTRli4g0LHRltGA0LDSmyDRiNGL0YDRi9GI0YLRiyDSm9Cw0LHQsNGC0YLRiyDQvNC10YUg0YLRltGC0ZbRgNC60LXQvdC00ZbRgNCz0LXQvdC00LUg0YHTqdC7INCx06nQu9GW0L3RltGBINCx0ZbRgNC00LXQvSDQttC+0pPQsNGA0YvQu9Cw0LnQtNGLLiAgPGJyIC8+DQog0LDRgdKb0L7RgNGL0YLRgyDRhNC10YDQvNC10L3RgtGC0LXRgNGW0L3RltKjINC20LXRgtC60ZbQu9GW0LrRgdGW0LfQtNGW0LPRltC90LXQvSAt0Y/Sk9C90Lgg0L3QsNC60YLRiyDQvtC90LTQsNCz0YsgINGC0YDQuNC/0YHQuNC9INGF0LXQvNC+0YLRgNC40L/RgdC40L0g0Y3Qu9Cw0YHRgtCw0LfQsCDRgdGL0L3QtNGLINGE0LXRgNC80LXRgtGC0LXRgCDQvtC70LDRgCDQsNGBINKb0L7RgNGL0YPSk9CwINC20LDRg9Cw0L8g0LHQtdGA0LXQtNGWLiDRgdC+0L3Ri9C80LXQvSDSm9Cw0YLQsNGAINCx0LDQu9Cw0LTQsCDQsdCw0YPRi9GAINGC0L7Qu9GL0psg0LbQtdGC0ZbQu9C80LXQs9C10L0g0L7QtNCw0L0g0LHTqdC70ZbQvdC10YLRltC9INOp0YIg0pvRi9GI0rHRi9C70Ysg0LDRgNKb0YvQu9GLICDQtdGA0LXRgdC10Log0LDQtNCw0LzQtNCwINC80LDQudC70LDRgCDRi9C00YvRgNCw0L8g0L7RgtGL0YDQsNC00YsgINCw0YHSm9C+0YDRi9GC0YMg0LbSr9C50LXRgdGWINKb0LDQu9GL0L/Sm9CwINC60LXQu9Cz0LXQvdC90LXQvSDQutC10LnRltC9INC905nQttGW0YEg0pvQsNC50YLQsCDSm9Cw0LvQv9GL0L3QsCDQutC10LvQtdC00ZYu0LHQsNC70LDQtNCwINC90LXQs9C1INC20LXQu9C00LXQvdGDINCx0L7Qu9GL0L8g0LbQsNGC0YvRgCDQvtC7INGE0LXRgNC80LXQvdGCINC20LXRgtC60ZbQu9GW0LrRgdGW0LfQtNGW0LPRliDQsdGW0LfQtNC1INGB0q/RgtC60LUg0LTQtdCz0LXQvSDRgtOp0LfRltC80YHRltC30LTRltC6INGC0YPQtNGL0YDQsNC00Ysg0LDQuyDQvtC7INCx0ZbQt9C00LUg0LHQsNC70LDQvdGL0qMg0ZbRiNGW0L3RltKjINC60LXQsdGD0qMg0pvQvtGA0YvRgtGL0LvQvNCw0pPQsNC9INGC0LDQvNCw0pvQv9C10L0g0LHRltGA0LPQtSDRgdC+0L3Ri9C80LXQvSDQsdGW0YDQs9C1INCw0YjRgyDQv9GA0L7RhtC10YHRltC90LXQvSDQs9Cw0Lcg0LbQuNC90LDQu9Cw0LTRiy4g0L7RgdGL0L3Ri9KjINGW0YHQtdGA0ZbQvdC10L0g0LHQsNC70LDQtNCwINC20LXQu9C00LXQvdGDINGW0YjRltC90ZbSoyDQutC10LHRg9GWINCx0L7Qu9Cw0LTRiy4g0YLQvtKbINGW0YjRltC10LrRgtGW0qMg0LDQvdCw0YLQvtC80LjRj9C70YvSmyDQtdGA0LXQutGI0LXQu9GW0LPRliDQvtC7INC905nRgNC10YHRgtC10LvQtdGA0LTQtSDSsdC30YvQvSDQutC10qMg0LHRg9GL0LvRgtGL0pvRgtCw0YDRiyDQsNC3INGC0LXQs9GW0YHRgtC10YMg0LHQvtC70YvQvyDQutC10LvQtdC00ZYg0YHQtdCx0LXQsdGWINC+0LvQsNGA0LTRiyDTmdC70ZYg0YLQvtC70YvSmyDQttC10YLRltC70LzQtdCz0LXQvS4g0LHRltGA0LDSmyDQvtC70LDRgNC00YvSoyDQsNGB0pvQsNC30LDQvSDRltGI0LXQuiDQttC+0LvRi9C90LTQsCDQsdC+0LvQutCw0Lsg0YLTmdGA0ZbQt9C00ZYg0LbQsNGB0YPRiNCw0LvQsNGAINC606nQv9GC0LXQvyDQutC10LvQtdC00ZYu0JDQvdCw0L3Ri9KjINGB0q/RgtGWINCx0LDQu9Cw0pPQsCDRgtCw0LzQsNKbINKb0L7RgNGL0YLRg9KT0LAg0LrSm9C80LXQutGC0LXRgdC10YLRltC9INGE0LXRgNC80LXQvdGC0YLQtdGAINGB0L7QvdGL0LzQtdC9INKb0LDRgtCw0YAg0LDQvdCwINGB0q/RgtGW0L3RltKjINOp0LfRliDSm9C+0YDRi9GC0YvQu9GD0LTRiyDTqdCw0LbQtdGCINC10YLQv9C10LnRgtGW0L0g06nQvdGW0Lwg0LHQvtC70pPQsNC90LTRi9Kb0YLQsNC9INGC0LXQtyDRgdGW0L3QtdC00ZYuICA8YnIgLz4NCjIg0rHRgNGL0pvRgtGL0psg0pvQsNC9INCw0LnQvdCw0LvRi9C8INC2LtC50LXRgdGWINC90LXQs9GW0LfQs9GWINC+0LvQsNGA0LTRi9KjINKb0L7RgNC10LrRgtGW0Log0L7RgNGC0LDQvNC10L0g0LbQsNC90LUg0L4yINC80LXQvSDQutCw0LzQsNC80LDRgdGL0Lcg0LXRgtOZ0LvRltGDINCw0YDRiyDQutCw0YDQsNC5INKx0YDRi9Kb0YLRi9KjINC00LDQvNGD0Ysg0LbSr9GA0LXQtNGWLiAxINC60LXQt9C10qMgINC/0LvQsNGG0LXQvdGC0LDQu9GL0Log0LXRgNC10LrRiNC10LvRltC6INGB0L7QuyDQsNGA0LrRi9C70Ysg0LrQvtGA0LXQutGC0LXQvdGD05kg0L7QuyDQttKv0LrRgtGW0LvRltC60YLRltKjINCw0LvSk9Cw0YjSm9GLINCw0L/RgtCw0LvQsNGA0YvQvdCw0L0g0LHQsNGB0YLQsNC/INKx0YDRi9Kb0YLQsNKT0Ysg0pvQsNC9INGC0LDQvNGL0YDQu9Cw0YDRiyDRhdC+0YDQuNC+0L0g0LHSr9GA0LvQtdGA0ZbQvdC10L0g0YLQsNGA0LDQvNC00LDQvdGL0L8g0LDQvdCwINKb0LDQvdGL0LzQtdC9INGC0ZbQutC10LvQtdC5INCx0LDQudC70LDQvdGL0YEg0LbQsNGB0LDQudC00YsuKCDQvtC7INC60LDQv9C40LvQu9GP0YDQu9Cw0YAg0LDRgNKb0YvQu9GLINC10LzQtdGBKSDQsdKx0Lsg0LzQtdGC0L7QsdC+0LvQuNC30LzQvCDRgtC40ZbQvNC00ZbQu9GW0LPRltC9INCw0YDRgtGC0YvRgNCw0LTRiy4gINC/0LvQsNGG0LXQvdGC0LDQtNCwINKb0LDQvSDRgtCw0LzRi9GA0LvQsNGA0YvQvdGL0qMg0LrQtdKj0LXRjtGWINC80LXQvSDQutCw0L/QuNC70LvRj9GAINOp0YLQutGW0LfQs9GW0YjRgtGW0LPRliDQsNGA0YLRi9C/INC+MiDQvNC10L0g0pvQvtGA0LXQutGC0ZbQuiDSm9C+0YAgINKx0YDRi9Kb0pvQsCDQvtKj0LDQuSDQttC10qPRltC7INGC0q/RgNC00LUg06nRgtC10LTRli4gINGC0YDQvtGE0L7QsdC70LDRgdGCINC20LDRgdGD0YjQsNC70LDRgNGLINC80LXRgtC+0LvQuNC30LzQvNC10L0g0LPQsNC30LTQsNGA0LTRiyDRgNC10YLRgtC10L8g0L7RgtGL0YDQsNC00YsuIDIg0LrQtdC30LXQvdGWINKb0YDRi9Kb0YLRi9KjINKb0LDQvSDQsNC50L3QsNC70YvQvCDQttKv0LnQtdGB0ZYg0LXRgNC10LrRiNC10LvRltCz0ZYgINC80q/QvdC00LAgMyDQv9GA0L7RgtC+0Log0LzQsNKj0YvQt9C00Ysg0YDTqdC7INCw0YLSsdCw0YDQsNC00Ysg0LLQtdC90L7Qt9C00YvQuiDQv9GA0L7RgtC+0Log0LDRhtC40LXQvdGC0LjQtdCyINC/0YDQvtGC0L7QuiDQvtC7ICDQutGW0L3QtNGW0Log0LLQtdC90LDRgdGL0L3QsNC9INC60LXQu9C10YLRltC9INKx0LDQvdC00YsgINCx0LDRg9GL0YDQtNGLINCw0LnQvdCw0LvRi9C/INOp0YLQtdGC0ZbQvSDQsNGA0YLQtdGA0LjRj9KT0LAg0LHQsNKT0YvRgtGC0LDQudC00YsuINCx0rHQuyDRgtCw0LfQsCDSm9Cw0L0uIDxiciAvPg0K0LDRgNGC0LXRgNC40Y/Qu9GL0psg0L/RgNC+0YLQvtC6INCx0L7RgtGC0LDQu9C+0LIg0L/RgNC+0YLQvtCz0YsgLSDQvtC7INOp0LrQv9C1INCw0YDRgtC10YDQuNGP0YHRi9C90LDQvSDSm9Cw0L3Qu9GLINGC0ZbQutC10LvQtdC5INCw0L7RgNGC0LDSk9CwINCx0LDSk9GL0YLRgtCw0LnQtNGLLjxiciAvPg0K0YHQvtC/0LDSm9GI0LAg0YLQtdGB0ZbQuiAtINC+0Lsg0rHQsNC90LTRiyDQvtKjINC20LDSmyDQttKv0YDQtdC60YjQtdC00LXQvSDRgdC+0Lsg0LbQsNKbINC20q/RgNC10LrRiNC10LPQtSDSm9Cw0YDQsNC5INCx0LDSk9GL0YLRgtCw0LnQtNGLLtC+0LvQsNGAINKb0LDQvdC90YvSoyDSm9C60L/QtdC90ZYg0LDQudC90LDQu9GL0L8g0pvRgtGD0ZbQvdC1INKb0LDQvNGC0LDQvNCw0YHRi9C3INC10YLQtdC00ZYuINGB0LXQsdC10LHRliDSsdGA0YvSmyDSm9C60L/QtSDQsNGA0pvRi9C70Ysg0YLRi9C90YvRgdGC0LDQvNCw0LnQtNGLLtC+0LvQsNGAINGE0LXRgtCw0LvRjNC00Ysg0LPQtdC80L7Qs9C70LDQsdC40L0g0LDRgNKb0YvQu9GLINC20LDQvdC1INCz0LXQvNCw0LPQu9C+0LHQuNC9INCw0L3QsNC90YvSoyDQs9C10LzQvtCz0LvQsNCx0LjQvdGWINCw0YDSm9GL0LvRiyDQsNGA0LrRi9C70Ysg0L4yINC80LXQvSDQttCw0L3QtSDQutC+0YDQtdC60YLRltC6INC60L7RgNC80LXQvSDQsNC90LAg0LDQs9C30LDRgdGL0L3Ri9KjINCx0LXQudGW0LzQtNC10LvRg9GWINC20rHQutGC0ZbQu9GW0Log0LrQtdC30LXRltC90LTQtSDQutCw0L0g0LrTqdC70LXQvNGWINCw0YDRgtCw0LTRiy4zMC01MCDQv9Cw0LnRi9C30pPQsC4g0LHQsNC70LDQvdGLINKb0LDQvdC80LXQvSDSm9Cw0LzRgtCw0LzQsNGB0YvQtyDQtdGC0YPRliDQttCw0pvRgdCw0YDRgtGDINKv0YjRltC9IC48YnIgLz4NCtGB0L7QvdGL0LzQtdC9INC60LDRgtCw0YAg0LbSr9C60YLRltC70ZbQuiDQutC10LfRltC90LTQtSDQsNC90LAg0LbSr9GA0LXQs9GWINC10LrTmSDQtdGB0LUg0LbSsdC80YvRgSDQttCw0YHQsNC50LTRiyAtINC/0LvRhtC10L3RgtCw0pPQsCDRj9KT0L3QuCDSsdGA0YvSsdGC0Ysg0pvQsNC90LzQtdC9INC60LDQvNGC0LDQvNCw0YHRi9C3INC10YLRltC70YPQtNGWINCw0YDRgtGC0YvRgNGDINKv0YjRltC9IC4g0LbTmdC90LUg0LPQvtGA0LzQvtC90LTQsNGAINC/0YDQvtCz0LXRgdGC0LXRgNC+0L0g0Y3RgdGC0YDQvtCz0LXQvSDQs9C+0YDQvNC+0L3QtNCw0YDRiyDQutC+0YDQtdC60YLRltC6INC60L7RgNC00Ysg0rHRgNGL0pvSm9CwINC20LXRgtC60ZbQt9GDINKx0YjRltC9INC60LDQvSDRgtCw0LzRi9GA0LvQsNGA0YvQvSDQutC10qPQtdC50YLRltC/INC60L7RgNC10LrRgtGW0Log0LrQvtGAINKb0YLQutGW0LfQs9GW0YjRgtGW0LPRltC9INCw0YDRgtGC0YvRgNCw0LTRiy4g0YHQvtC90YvQvNC10L0g0LrQsNGC0LDRgCDQs9Cw0Lcg0LDQu9C80LDRgdGDINGC0LjRltC80LTRltC70ZbQs9GWICDQs9Cw0Lcg0LDQu9C80LDRgdGDINCw0L3QsCDQvNC10L0g0LHQsNC70LAg0LDRgNCw0YHRi9C90LTQsCDQtNC40YTRhNGD0LfQtNGLINCx0L7Qu9GL0L8g06nRgtGW0L8g0L7RgtGL0YDQsNC00YsuICDSsdGA0YvSsdGC0YvSoyDQs9C10LzQvtCz0LvQvtCx0LjQvdGWINC+0YLRgtC10LPRltC80LXQvSDQsdCw0LnQu9Cw0L3Ri9GBINCw0YDRgtCw0LTRiy4g0L/Qu9Cw0YbQtdC90YLQsCDQsNGA0pvRi9C70Ysg0LPQu9GO0LrQvtC30LAg0LDQvNC40L0u0LrQuNGBLiDQvNCw0LnQu9Cw0YAg0YLQsNGB0YvQvNCw0LvQtNCw0L3Ri9C/INC+0YLRi9GA0LDQtNGLLiDRgdC+0L3Ri9C80LXQvSDQsdC40YDQs9C1INGB0L4yINC80L7Rh9C10LLQuNC90LAg0YHQuNGP0LrRgtGLINKb0L3RltC80LXRgNC00LUg0YjRi9KT0LDRgNGL0LvQsNC00YsuINC10LPQtdGAINC/0LDRgtC+0LvQvtCz0LjRj9C00YvQuiDQttCw0LPQtNCw0Lkg0LrQtdC30ZbQvdC00LUg0LPQuNC/0L7QutGB0LjRjyDQvtGC0YLQtdCz0ZYg0LbQtdGC0ZbRgdC/0LXRg9GI0ZbQu9GW0LPRliDSsdGA0YvSo9GM0YvQvSDQttC10YLRltC70LzQtdC5INC60LDQu9GD0YvQvdCwINOZ0LrQtdC70LXQtNGWL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61" table:style-name="ce1">
            <text:p>1067161</text:p>
          </table:table-cell>
          <table:table-cell office:value-type="string" table:style-name="ce1">
            <text:p>kazakh</text:p>
          </table:table-cell>
          <table:table-cell office:value-type="string" table:style-name="ce1">
            <text:p>Билет 38.&amp;lt;br /&amp;gt; 1.Педиатрға 3 айлық баланың анасы шағымданды баланың ішінің желденуіне, нәжісі күніңе 6-7 рет. Бала табиғи тамақтануда, бақылау салмақ өлшеуі жүргізілмеген.Үлкен нәжісі ботқа тәрізді,-сары, нейтралды майлар+, қортылмаған клетчатка -+, клегей+, Лейкоциттер - 1 - 2 көз аланында, Эпителий - 2 - 3 көз аланында, ішек қүртары жоқ. Тоқ ішектің қандай анатомо-физиологиялық ерекшеліктерімен осы байланысты?&amp;lt;br /&amp;gt; 2.Құрсақ ішіндегі кезеңінде қандай факторлар ұрықтын плацентарлық қанайналымының адаптациясына әсер етеді? &amp;lt;br /&amp;gt;</text:p>
          </table:table-cell>
          <table:table-cell office:value-type="string" table:style-name="ce1">
            <text:p>IDMg0LDQudC70YvSmyDQvdCw0YDQtdGB0YLQtdC90ZbQvSDRltGB0ZbQvdGD0ZYg0L3TmdC20ZbRgdGC0YvQvSDQttC40ZYg0LHQvtC70YvQvyDRgtKx0YDRg9GLINC60q/QvdGW0L3QtSA1LTYg0YDQtdGCLCDQttOZ0L3QtSDQvdOZ0LbRltGB0YLRltC9INOp0LfQs9C10YDRg9GWINCw0YHQutC+0YDRi9GC0YMg0LbSr9C50LXRgdGW0L3RltKjICDTmdC70ZYg0YLQvtC70YvSmyDQttC10qPRltC70YPRltC80LXQvSDQsdCw0LnQu9Cw0L3Ri9GB0YLRiy4g0J7RgdGL0pPQsNC9INC+0YDQsNC5INCw0YHQutCw0LfQsNC9INGW0YjQtdC6INC20L7Qu9C00LDRgNGL0L3Ri9C9INCw0L3QsNGC0L7QvNC40Y/Qu9GL0Log0LbTmdC90LUg0LTQtSDRhNC40LfQuNC+0LvQvtCz0LjRj9C70YvQuiDQtdGA0LXQutGI0LXQu9GW0LrRgtC10YDRltC90LUg0LrQtdC70LXRgtGL0L0g0LHQvtC70YHQsNC8LiDQndOZ0YDQtdGB0YLQtdC70LXRgNC00LUg0rHQudKb0Ysg0LHQtdC3INGE0LXRgNC80LXQvdGC0YLQtdGA0ZYg0Y/Sk9C90Lgg0LvQuNC/0LDQt9CwINC80LXQvSDQsNC80LjQu9Cw0LfQsCDQttC10YLQutGW0LvRltC60YHRltC3INGC0q/RgNC00LUg0LHTqdC70ZbQvdC10LTRiywg0LHSsdC7INGC0LDQs9Cw0LzQvdGL0L0g0LzQsNC50LvQsNGA0LTRi9C9INGC0L7Qu9GL0Log0pvQvtGA0YvRgtGL0LvQvNCw0YPRi9C90LAg0LDQu9GL0L8g0LrQtdC70LXRgtGL0L0g0LHQvtC70LDQtNGLLiDQodC40LzQv9GC0L7QvNC70LDRgNC80LXQvSDQsdCw0LnQu9Cw0L3Ri9GB0Ysg0JrQuNC/0L7Qs9GA0LDQvNC80LDQtNCwINCx0LXQudGC0LDRgNCw0L8g0LzQsNC50LTRi9C9ICsg0LHQvtC70YPRiyDQvNCw0LnQtNGL0qMg0LbQtdGC0LrRltC70ZbQutGB0ZbQtyDQutC+0YDRi9GC0YvQu9GD0YvQvSDQutC+0YDRgdC10YLQtdGC0YvQvSDQsdC+0LvQsNC00YsuINCc0LDQudC70LDRgNC00YvSoyDQvdCw0YjQsNGAINGB0ZbSo9GW0YPRiyDRjdC90LXRgNCz0LjRjyDRgtCw0L/RiNGL0LvRi9Cz0YvQvdCwINOZ0LrQtdC70YvQvywg0LHSsdC7INGW0YHRltC90YPQtNGL0qMg0L/QsNC50LTQsCDQsdC+0LvRg9GL0L3QsCDRgdC10LHQtdC/INCx0L7Qu9GD0Ysg0LzSr9C80LrRltC9LiDQndOZ0YDQtdGB0YLQtdC70LXRgNC00YvQvSDRltGI0LXQutGC0LXRgNGW0L3QtNC1INC80LDQu9GM0YLQsNC30LAs0YHQsNGF0LDRgNCw0LfQsCwg0LvQsNC60YLQvtC30LAg0YHQuNGP0LrRgtGLINGE0LXRgNC80LXQvdGC0LXRgCDQttC10YLQutGW0LvRltC60YHRltC3INCx06nQu9GW0L3QtdC00ZYuINCR0rHQuyDQutOp0LzRi9GA0YHRg9C70LDRgNC80LXQvSDQvNC10L0g0LDQutGD0YvQt9C00LDRgNC00YvQvSDQutC+0YDRi9GC0YvQu9GD0YvQvdC00LAg0LrQuNGL0L3QtNGL0LrRgtCw0YAg0YLRg9C00YvRgNCw0LTRiy4g0JrQvtGA0YvRgtGL0LvQvNCw0LPQsNC9INC30LDRgtGC0LDRgNC00YvQvSDQvdOZ0LbRltGB0YLQtSDQsdC+0LvRg9GLINGP0pPQvdC4INC60L7RgNGL0YLRi9C70LzQsNCz0LDQvSDRgtCw0LvRiNGL0LrRgtCw0YAgKyDQsdC+0LvRi9C/INGW0YjQtdC6INGE0LXRgNC80LXQvdGC0YLQtdGA0ZbQvdGW0qMg0LbQtdGC0LrRltC70ZbQutGB0ZbQt9C00YvQs9GL0L0g0YLRg9GL0L3QtNCw0YLQsNC00YsuICAzINCw0LnQu9GL0Log0L3QsNGA0LXRgdGC0LXQtNC1INGW0YjQtdC6INGI0YvRgNGL0YjRgtGLINC60LDQsdCw0YLRiyDRgtC+0LvRi9C6INC20LXRgtGW0LvQvNC10LPQtdC9INC+0L3Ri9C9INOp0YLQutGW0LfQs9GW0YjRgtGW0LPRliDQttC+0LPQsNGA0YsgLiDQkdKx0Lsg0ZbRgNGWINC80L7Qu9C10LrRg9C70LDQu9Cw0YDQtNGL0L0g0LrQsNC90pPQsCDTqdGC0YPRltC90LUgLCDQsNC70LvQtdGA0LPQuNGP0LvRi9C6INC90LXQvNC10YHQtSDQutCw0LHRi9C90YMg0YDQtdCw0LrRhtC40Y/Qu9Cw0YDRi9C90YvSoyDQtNCw0LzRg9GL0L3QsCDTmdC60LXQu9GD0ZYg0LzSr9C80LrRltC9LiDQndOZ0LbRltGB0YLQtdCz0ZYg0YjRi9GA0YvRiNGC0YvSoyArINCx0L7Qu9GD0YvQvSDRiNGL0YDRi9GI0YLRiyDSm9Cw0LHQsNGC0YLRi9KjINGC0ZbRgtGW0YDQutC10L3Rg9GW0L0g0LrTqdGA0YHQtdGC0LXRgtGL0L0g0LHQvtC70LDQtNGLLiDQm9C10LnQutC+0YbQuNGC0YLQtdGA0LTRltKjIDEtMiDQutOp0YDRgyDQsNC70LDSo9GL0L3QtNCwINC205nQvdC1INC00LUg0Y3Qv9C40YLQtdC70LjQuSDQttCw0YHRg9GI0LDQu9Cw0YDRi9C90YvSoyAyLTMg0LrTqdGA0YMg0LDQu9Cw0qPRi9C90LTQsCDQsdC+0LvRg9GLINC20LXSo9GW0Lsg0LrQsNCx0YvQvdGDINCx0LXQu9Cz0ZbQu9C10YDRliDQsdC+0LvRi9C/INGC0LDQsdGL0LvQsNC00YsuLiDQkdC10LvQvtC60YLQsNGAINC80LXQvSDQvNCw0LnQu9Cw0YDQtNGL0L0g0LbQtdGC0LrRltC70ZbQutGW0Lcg0YHRltKj0ZbRgNC70YPRliDQs9C40L/QvtC/0YDQvtGC0LXQvdC10LzQuNGP0pPQsCDTmdC60LXQu9GD0ZYg0LzSr9C80LrRltC9LCDQsdKx0Lsg0L7QvdC60L7RgtC40LrQsNC70YvSmyDTqdGL0YHRi9C80LTRiyDRgtOp0LzQtdC90LTQtdGC0YvQvyDRltGB0ZbQvdGD0LTRltKjINC/0LDQudC00LAg0LHQvtC70YPRi9C90LAg0YHQtdCx0LXQvyDQsdC+0LvQsNC00YsuLiDQndOZ0YDQtdGB0YLQtdC70LXRgNC00LUg0LzQuNC60YDQvtGE0LvQvtGA0LDQvdGL0L0g0LrQsNC70YvQv9GC0LDRgdGD0Ysg05nQu9GWINC20q/RgNGW0L8g0LbQsNGC0YvRgC4g0JvQsNC60YLQvtCx0LDQutGC0LXRgNC40Y/Qu9Cw0YAg0LzQtdC9INCx0LjRhNC+0LTQvtCx0LDQutGC0LXRgNC40Y/Qu9Cw0YAg0LHQsNGB0YvQvCDQsdC+0LvQs9Cw0L3Ri9C80LXQvSDRgtC10L/QtSDRgtC10qPQtNGW0Log05nQu9GWINGC0L7Qu9GL0Log0LrQsNC70YvQv9GC0LDRgdC/0LDQs9Cw0L0uINCR0YPQuyDQsNGI0YvRgtGDINC205nQvdC1INC00LUg0LPQsNC3INGC0q/Qt9GW0LvRgyDQv9GA0L7RhtC10YHRgtC10YDRltC9INC60q/RiNC10LnRgtC10LTRliDQttOZ0L3QtSDQtNC1INC905nQttGW0YHRgtC1INGI0YvRgNGL0YjRgtGL0L0g0L/QsNC50LTQsCDQsdC+0LvRg9GL0L3QsCDRi9C60L/QsNC7INC10YLQtdC00YsuINCd05nRgNC10YHRgtC10LvQtdGA0LTRi9C9INGW0YjQtdC60YLQtdGA0ZYg0YHRgyDQvNC10L0g0Y3Qu9C10LrRgtGA0L7Qu9C40YLRgtC10YDQtNGL0L0g0LDQu9C80LDRgdGDINC/0YDQvtGG0LXRgdGW0L3QtSDQsdC10LvRgdC10L3QtNGWINC60LDRgtGL0YHQsNC00YsuINCW0LjRliDQvdOZ0LbRltGBINC905nRgtGW0LbQtdGB0ZbQvdC00LUg0YHRgyDQvNC10L0g0YLSsdC30LTQsNGA0LTRi9C9INC20L7Qs9Cw0LvRg9GLINCx0LDQudC60LDQu9Cw0LTRiy4g0JHRg9C7INGB0rHQudGL0LrRgtGL0LrRgtGL0L0g0LDSk9C30LDQtNCwINKx0YHRgtCw0LvRg9GL0L0g0LHSsdC30YvQvyDRltGB0ZbQvdGD0LvQtdGA0LPQtSDRltC60LXQu9GD0ZYg0LzSr9C80LrRltC9LiDQn9C10YDQuNGB0YLQuNC70LrQsNC90YvSoyDQsdCw0YHRi9C8INCx0L7Qu9GD0Ysg0L3RltGA0LXRgdGC0LXQu9C10YDQtNC1INGW0YjQtdC6INC80L7RgtC+0YDQuNC60LDRgdGLINOZ0LvRliDSr9C50LvQtdGB0ZbQvNGB0ZbQtyAuINCR0rHQuyDRgtCw0LPQsNC80L3Ri9C9INGW0YjQtdC6INCw0YDQutGL0LvRiyDRgtC10Lcg06nRgtGD0ZbQvdC1INOZ0LrQtdC70LXQtNGWLiDQkdKx0Lsg0L3TmdC20ZbRgdGC0YvQvSDQttC40ZYg0LHQvtC70YPRiyDRj9Cz0L3QuCDQutKv0L3RltC90LUgNS02INGA0LXRgiDQutC+0YDRi9GC0YvQu9C80LDQs9Cw0L0g0LfQsNGC0YLQsNGA0LTRi9KjINC905nQttGW0YHRgtC1INC60LDQu9GD0YvQvNC10L0g0YHQuNC/0LDRgtGC0LDQu9Cw0LTRiy4g0KHQvtC90YvQvNC10L0g0LrQsNGC0LDRgCwg0L3RltGA0LXRgdGC0LXQu9C10YDQtNGL0L0g0ZbRiNC10LrRgtC10YDRliDQtdGA0LXRgdC10LrRgtC10YDQs9C1INC60LDRgNCw0LPQsNC90LTQsCDSm9GL0YHSm9CwINOZ0YDRliDRgtCw0YAg0LHQvtC70YvQvyDQutC10LvQtdC00YsuINCR0rHQuyDQtNCwINOp0Lcg0LrQtdC30LXQs9GW0L3QtNC1INCw0YHRgtGL0qMg0LTSsdGA0YvRgSDQutC+0YDRi9GC0YvQu9C80LDRg9GL0L3QsCDTmdC60LXQu9GD0ZYg0LzSr9C80LrRltC9LiDQndCw0YPSm9GL0YHRgtGL0qMg0LfQtdGA0YLRgtC10YMg0YLQsNC70LTQsNGD0LvQsNGA0YvQvdGLINCx0LDSk9Cw0LvQsNC5INC+0YLRi9GA0LAg0LHQsNC70LDQtNCwINC70LDQutGC0LDQt9CwINGC0LDQv9GI0YvQu9GL0pPRiyDQvNC10L0g0YHRltKj0ZbRgNGDINGB0LjQvNC/0YLQvtC80LTQsNGA0Ysg0LDQvdGL0LrRgtCw0LvRg9GLINC80q/QvNC60ZbQvS4g0K/Sk9C90Lgg0LHSsdC7INC20ZbSo9GW0YjQutC1INGW0YjQtdC60YLQtdCz0ZYg0LvQsNC60YLQsNC30LAg0YTQtdGA0LzQtdC90YLRgtGW0L3RltKjINC20LXRgtC60ZbQu9GW0LrRgdGW0LfQtNGW0LPRliDRgdCw0LvQtNCw0YDRi9C90LDQvSDQsNC90LAg0YHSr9GC0ZbQvdC00LUg0LvQsNC60YLQvtC30LDQvdGLINC60L7RgNGL0YLQsCDQsNC70LzQsNGD0YvQvdCw0L0g0LHQvtC70LDQtNGLLiDQodC+0L3QtNGL0LrRgtCw0L0g0LPQuNC/0L7Qu9Cw0LrRgtC10LzQuNGP0pPQsCDQsdC+0LvQttCw0Lwg0LbQsNGB0LDRg9Cz0LAg0LHQvtC70LDQtNGLLiAgPGJyIC8+DQo8YnIgLz4NCjIsINKw0YDRi9C60YLRi9C9INC/0LvQsNGG0LXQvdGC0LDRgNC70Ysg0LrQsNC9INCw0LnQvdCw0LvRi9C80YvQvdGL0L0g0LbQsNCz0LTQsNC50YvQvdCwINCx0LXQudGW0LzQtNC10LvRg9GWINC60L7Qv9GC0LXQs9C10L0g0YTQsNC60YLQvtGA0LvQsNGA0LzQtdC9INC60LDQvNGC0LDQvNCw0YHRi9C3INC10YLRltC70LXRgtGL0L0g0LrSr9GA0LTQtdC70ZYg0LbTmdC90LUg0LrQvtC/INC60YvRgNC70Ysg0L/RgNC+0YbQtdGBINCx0L7Qu9Cw0LTRiy4g0J3QtdCz0ZbQt9Cz0ZYg0YTQsNC60YLQvtGA0LvQsNGA0YvQvSDQsNC50YLQsCDQutC10YLQtdGC0YvQvSDQsdC+0LvRgdCw0LwuIDEtINGD0YDRi9C60YLRi9C9INCw0L3QsNC70YvQuiDQutCw0L0g0LDQudC90LDQu9GL0LzRi9C90LDQvSDTqdC30LPQtdGI0LUsINOp0Lcg0LrQsNC9INCw0LnQvdCw0LvRi9C8INC20q/QudC10YHRliDQsdC+0LvQsNC00Ysg0rHRgNGL0Log0LrQsNC90Ysg0L/Qu9Cw0YbQtdC90YLQsNC00LDSk9GLINC+0YLRgtC10LPRliDQvNC10L0g0LrQvtGA0LXQutGC0YvQuiDQt9Cw0YLRgtCw0YDQs9CwINCx0LDQuS4g0LDQuyDQutCw0LvQtNGL0Log06nQvdGW0LzQtNC10YAg0L/Qu9Cw0YbQtdC90YLQsCDQsNGA0LrRi9C70Ysg0LDQvdCw0L3Ri9KjINC60LDQvdGL0L3QsCDQutCw0LnRgtCwINOp0YLQtdC00YsuIDItINCf0LvQsNGG0LXQvdGC0YLRltC6INC60LDQvSDQsNC50L3QsNC70YvQvCDQsNGA0L3QsNC50Ysg0YLQsNC80YvRgNC70LDRgCDQutGW0L3QtNGW0Log0LDRgNGC0LXRgNC40Y/Qu9Cw0YDRiyDQvNC10L0g0LLQtdC90LAg0LDRgNC60YvQu9GLINC20q/Qt9C10LPQtSDQsNGB0YvRgNGL0LvQsNC00YsuINKw0YDRi9C6INC10YDQtdGB0LXQuiDQs9C10LzQvtCz0LvQvtCx0LjQvdCz0LUg0LrQsNGA0LDQs9Cw0L3QtNCwINC+0YLRgtC10LPRltC90ZbSoyDRgtC40ZbQvNC00ZbRgNC10Log0LbQtdGC0LrRltC30ZbQu9GD0ZbQvSDQutCw0LzRgtCw0LzQsNGB0YvQtyDQtdGC0LXQtNGLLiAzLSDQkNGA0L3QsNC50Ysg0LzSr9GI0LXQu9C10YDQtNC1INC00LUg0LDRgtCw0L8g0L7RgtC60LXQvSDQttOp0L0g0LzRi9GB0LDQu9GLINC/0LvQsNGG0LXQvdGC0LAg0LPQsNC3INCw0LvQvNCw0YHRg9C00Ysg0YLQsNC80LDQutGC0LDQvdGD0LTRiyDQttOZ0L3QtSDQutCw0LvQtNGL0LrRgtCw0YDQtNGLINC60LXRgtGW0YDRg9C00Ysg0LrQsNC80YLQsNC80LDRgdGL0Lcg0LXRgtC10LTRiy4g0LDQuyDQutGW0L3QtNGW0Log0YPRgNGL0LrRgtGLINC/0LvQv9GG0LXQvdGC0LDQvNC10L0g0LHQsNC50LvQsNC90YvRgdGC0YvRgNCw0LTRiywg0LrQsNC90L3Ri9C9INC20LXRgtC60ZbQt9GW0LvRg9GL0L0g0LrQsNC80YLQsNC80LDRgdGL0Lcg0LXRgtC10LTRiy4g</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234" table:style-name="ce1">
            <text:p>915234</text:p>
          </table:table-cell>
          <table:table-cell office:value-type="string" table:style-name="ce1">
            <text:p>russian</text:p>
          </table:table-cell>
          <table:table-cell office:value-type="string" table:style-name="ce1">
            <text:p>Билет 38.&amp;lt;br /&amp;gt; 1.К педиатру обратилась мама с ребенком 3 месяцев с жалобами на вздутие живота у ребенка, стул 6-7 раз в день. Ребенок на грудном вскармливании, кормится по требованию, контрольное взвешивание не проводили. Стул неоформленный, кашицеобразный,-желтый, нейтральный жир+, -непереваренная клетчатка +, слизь+, Лейкоциты - 1 - 2 в п/з, Эпителий - 2 - 3 в п/з, Яйца глист – нет. С какими анатомо-физиологическими особенностями толстого кишечника это может быть связано?&amp;lt;br /&amp;gt; 2.Назовите какие факторы способствуют адаптации плода к условиям плацентарного кровообращения? &amp;lt;br /&amp;gt;</text:p>
          </table:table-cell>
          <table:table-cell office:value-type="string" table:style-name="ce1">
            <text:p>MSkg0JLQt9C00YPRgtC40LUg0LbQuNCy0L7RgtCwINGDINC80LvQsNC00LXQvdGG0LXQsiDRgNCw0L3QvdC10LPQviDQstC+0LfRgNCw0YHRgtCwINGN0YLQviDRh9Cw0YHRgtC+INCy0YHRgtGA0LXRh9Cw0Y7RidC40YHRjyDRgdC70YPRh9Cw0Lkg0LjQty3Qt9CwINCw0L3QsNGC0L7QvNC+LdGE0YPQvdC60YbQuNC+0L3QsNC70YzQvdGL0YUg0L7RgdC+0LHQtdC90L3QvtGB0YLQtdC5INGC0L7Qu9GB0YLQvtC5INC60LjRiNC60LgsINGC0LDQutC20LUg0Y3RgtC+INC80L7QttC10YIg0LHRi9GC0Ywg0YHQstGP0LfQsNC90L4g0YEg0L7RgdC+0LHQtdC90L3QvtGB0YLRj9C80Lgg0LrQvtGA0LzQu9C10L3QuNGPINC4INGE0LXRgNC80LXQvdGC0LDRgtC40LLQvdC+0Lkg0L7RgdC+0LHQtdC90L3QvtGB0YLQuCDRgyDQtNC10YLQtdC5INGA0LDQvdC90LXQs9C+INCy0L7Qt9GA0LDRgdGC0LAuINCi0LDQutC20LUg0L3QtdC+0YTQvtGA0LzQu9C10L3QvdGL0Lkg0YHRgtGD0LssINC60LDRiNC40YbQtdC+0LHRgNCw0LfQvdGL0Lkg0YLQsNC60LbQtSDRgdCy0Y/Qt9Cw0L3RiyDRgSDQvtGB0L7QsdC10L3QvdC+0YHRgtGP0LzQuCDRgdGC0YDQvtC10L3QuNGPLCDQsCDRhtCy0LXRgiDRgdC+INCy0YHQutCw0YDQvNC70LjQstCw0L3QuNC10LwgLCDQvdC10LnRgtGA0LDQu9GM0L3Ri9C5INC20LjRgCDRgtC+0LbQtSDQstGB0YLRgNC10YfQsNC10YLRgdGPINCyINC90L7RgNC80LUg0LjQty3Qt9CwINC90LjQt9C60L7QuSDQsNC60YLQuNCy0L3QvtGB0YLQuCDRhNC10YDQvNC10L3RgtC+0LIg0L/QtdGH0LXQvdC4INC4INC70LjQv9Cw0LfRiywg0LrQu9C10YLRh9Cw0YLQutCwINGC0L7QttC1INC90LUg0L/QtdGA0LXQstCw0YDQuNCy0LDQtdGC0YHRjyDQtNCw0LbQtSDRgyDQstC30YDQvtGB0LvRi9GFINCy0LXQtNGMINGE0LXRgNC80LXQvdGC0L7QsiDQtNC70Y8g0LTQu9GPINGN0YLQvtCz0L4g0L3QtdGCKNCy0LXQtNGMINC60LvQtdGC0YfQsNGC0LrQsCDRg9GB0LjQu9C40LLQsNC10YIg0L/QtdGA0LjRgdGC0LDQu9GM0YLQuNC60YMg0LrQuNGI0LXRh9C90LjQutCwKS4g0J3QsNC70LjRh9C40LUg0LvQtdC50LrQvtGG0LjRgtC+0LIgMS0yINCyINC/0L7Qu9C1INC30YDQtdC90LjRjyDRjdGC0L4g0LzQsNC70L7QtSDQutC+0LvQuNGH0LXRgdGC0LLQviDQstGB0YLRgNC10YfQsNC10LzQsNGPINC4INCyINC90L7RgNC80LUg0YLQsNC6INGH0YLQviDRjdGC0L4g0L3QvtGA0LzQsNC70YzQvdC+LCDRjdC/0LjRgtC10LvQuNC5IDItMyDQsiDQv1zQtyAg0YLQvtC20LUg0L/RgNC10LTQtdC70Ysg0L3QvtGA0LzRiywg0YHQu9C40LfRjCDQsiDQutCw0LvQtSDQstGB0YLRgNC10YfQsNC10YLRgdGPINCyINC90L7RgNC80LUg0YMg0LTQtdGC0LXQuSDRgNCw0L3QvdC10LPQviDQstC+0LfRgNCw0YHRgtCwKCDQvtGB0L7QsdC10L3QvdC+INC90LAg0LPRgNGD0LTQvdC+0Lwg0LLRgdC60LDRgNC80LvQuNCy0LDQvdC40LgpLiDQodC70LjQt9GMLCDQu9C10LnQutC+0YbQuNGC0YssINGN0L/QuNGC0LXQu9C40Lkg0LzQvtCz0YPRgiDQv9C+0LLRi9GI0LDRgtGB0Y8g0L/RgNC4INCy0L7RgdC/0L7Qu9C10L3QuNC4INCW0JrQoi4g0Y/QudGG0LUg0LPQu9C40YHRgtCwINC90LXRgiDRjdGC0L4g0L/QvtC00YLQstC10YDQttC00LDQtdGCINC+0YLRgdGD0YLRgdGC0LLQuNC1INCz0LvQuNGB0YLQvtCyICgg0L/QsNGA0LDQt9C40YLQvtCyKSDQsiDQutC40YjQtdGH0L3QuNC60LUuINCi0LDQutC20LUg0YfQsNGB0YLQviDQstGB0YLRgNC10YfQsNGO0YLRgdGPINGB0LvRg9GH0LDQuCDQutC+0LPQtNCwINC80LvQsNC00LXQvdC10YYg0LrQsNC6INCx0Ysg0L/RgNC+0LPQu9Cw0YLRi9Cy0LDQtdGCINCy0L7Qt9C00YPRhSDQv9GA0LggINCy0YHQutCw0YDQvNC70LjQstCw0L3QuNC4INCy0LXQtNGMINC+0L0g0LzQvtC20LXRgiDQvtC00L3QvtCy0YDQtdC80LXQvdC90L4g0Lgg0LTRi9GI0LDRgtGMINC4INC60YPRiNCw0YLRjCDRh9GC0L4g0LzQvtC20LXRgiDQsiDRgdCy0L7RjiDQvtGH0LXRgNC10LTRjCDQv9GA0LjQstC10YHRgtC4INC6INCy0LfQtNGD0YLQuNGOINC20LjQstC+0YLQsC4gPGJyIC8+DQogPGJyIC8+DQoyKSDQkNC00LDQv9GC0LDRhtC40Y8g0L/Qu9C+0LTQsCDQuiDRg9GB0LvQvtCy0LjRj9C8INC/0LvQsNGG0LXQvdGC0LDRgNC90L7Qs9C+INC60YDQvtCy0L7QvtCx0YDQsNGJ0LXQvdC40Y8g0L/RgNC+0LjRgdGF0L7QtNC40YIg0LfQsCDRgdGH0LXRgiDQsNC90LDRgtC+0LzQvi0g0YTQuNC30LjQvtC70L7Qs9C40YfQtdGB0LrQuNGFINC+0YHQvtCx0LXQvdC90L7RgdGC0LXQuSDRgdGC0YDQvtC10L3QuNGPINGB0LXRgNC00YbQsCwg0Log0Y3RgtC40Lwg0L7RgdC+0LHQtdC90L3QvtGB0YLRj9C8INC80L7QttC90L4g0L7RgtC90LXRgdGC0Lg6INC+0YLQutGA0YvRgtGL0Lkg0LDRgNGC0LXRgNC40LDQu9GM0L3Ri9C5INC/0YDQvtGC0L7QuiDQuCDQvtCy0LDQu9GM0L3QvtC1INC+0LrQvdC+ICgg0LrQvtGC0L7RgNGL0LUg0LfQsNC60YDRi9Cy0LDRjtGC0YHRjyDQv9C+0YHQu9C1INGA0L7QttC00LXQvdC40Y8pINC+0L3QuCDRgdC/0L7RgdC+0LHRgdGC0LLRg9GO0YIg0L/QtdGA0LXQvNC10YnQtdC90LjRjiDQstC10L3QvtC30L3QvtC5INC60YDQvtCy0Lgg0LIg0LDRgNGC0LXRgNC40LDQu9GM0L3Ri9C5INC60LDQuiDQsdGLINC+0LHRhdC+0LTRjyDQvNCw0LvRi9C5INC60YDRg9CzLiDQotCw0LrQttC1INC6INC+0YHQvtCx0LXQvdC90L7RgdGC0Y/QvCDQvNC+0LbQvdC+INC+0YLQvdC10YHRgtC4INC90LXRhNGD0L3QutGG0LjQvtC90LjRgNGD0Y7RidC40Lkg0LzQsNC70YvQuSDQutGA0YPQsyDQutGA0L7QstC+0L7QsdGA0LDRidC10L3QuNGPINCy0LXQtNGMINC70LXQs9C60LjQtSDQvdC1INGE0YPQvdC60YbQuNC+0L3QuNGA0YPRjtGCLCDQsCDQutGA0L7QstGMINCx0L7Qs9Cw0YLQsNGPINC60LjRgdC70L7RgNC+0LTQvtC8INC/0L7RgdGC0YPQv9Cw0LXRgiDQuNC3INC/0YPQv9C+0YfQvdC+0Lkg0LLQtdC90Ysg0L/RgNC40YXQvtC00Y/RidC40Lkg0L7RgiDQvNCw0YLQtdGA0LgoINC+0L3QviDRgtCw0LrQttC1INGA0YPQtNC40LzQtdC90YLQuNGA0YPQtdGC0YHRjyDQv9C+0YHQu9C1INGA0L7QttC00LXQvdC40Y8pLiDQotCw0LrQttC1INC6INCw0LTQsNC/0YLQsNGG0LjQuCDQvNC+0LbQvdC+INC+0YLQvdC10YHRgtC4INC90LDQu9C40YfQuNC1INGDINC/0LvQvtC00LAgSGJGKCDRhNC10YLQsNC70YzQvdGL0Lkg0LPQtdC80L7Qs9C70L7QsdC40L0pINGDINC60L7RgtC+0YDQvtCz0L4g0YHRgNC+0LTRgdGC0LLQviDRgSDQutC40YHQu9C+0YDQvtC00L7QvCDQstGL0YjQtSDQv9C+INGB0YDQsNCy0L3QtdC90LjRjiDRgSBIYkEoINCz0LXQvNC+0LPQu9C+0LHQuNC9INCy0LfRgNC+0YHQu9C+0LPQvikg0LIg0L3QtdGB0LrQvtC70YzQutC+INGA0LDQty4g0JLRgdC1INGN0YLQuCDQvtGB0L7QsdC10L3QvdC+0YHRgtC4INC/0YDQuNCy0L7QtNGP0YIg0Log0LHQvtC70LXQtSDQu9GD0YfRiNC10Lkg0LDQtNCw0L/RgtCw0YbQuNC4INC/0LvQvtC00LAg0Log0L/Qu9Cw0YbQtdC90YLQsNGA0L3QvtC80YMg0LrRgNC+0LLQvtC+0LHRgNCw0YnQtdC90LjRji4gINCc0L7QttC90L4g0L7RgtC80LXRgtC40YLRjCDRh9GC0L4g0L3QtSDRgyDQstGB0LXRhSDQvdC+0LLQvtGA0L7QttC00LXQvdC90YvRhSDQv9C+0YHQu9C1INGA0L7RgNC20LTQtdC90LjRjyDQt9Cw0LrRgNGL0LLQsNGO0YLRgdGPINCw0L7RgNGC0LDQu9GM0L3Ri9C5INC/0YDQvtGC0L7QuiDQuCDQvtCy0LDQu9GM0L3QvtC1INC+0LrQvdC+INC90L4g0LjRhSDQvtGA0LPQsNC90LjQt9C8INC6INGN0YLQvtC80YMg0L/RgNC40YHQv9C+0YHQsNCx0LvQuNCy0LDQtdGC0YHRjy4g</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неполный ответ по первому вопросу. Написаны не все АФО толстого кишечника.</text:p>
          </table:table-cell>
          <table:table-cell office:value-type="float" office:value="0" table:style-name="ce1">
            <text:p>0</text:p>
          </table:table-cell>
          <table:table-cell table:number-columns-repeated="16376"/>
        </table:table-row>
        <table:table-row table:style-name="ro1">
          <table:table-cell office:value-type="float" office:value="915404" table:style-name="ce1">
            <text:p>915404</text:p>
          </table:table-cell>
          <table:table-cell office:value-type="string" table:style-name="ce1">
            <text:p>russian</text:p>
          </table:table-cell>
          <table:table-cell office:value-type="string" table:style-name="ce1">
            <text:p>Билет 38.&amp;lt;br /&amp;gt; 1.К педиатру обратилась мама с ребенком 3 месяцев с жалобами на вздутие живота у ребенка, стул 6-7 раз в день. Ребенок на грудном вскармливании, кормится по требованию, контрольное взвешивание не проводили. Стул неоформленный, кашицеобразный,-желтый, нейтральный жир+, -непереваренная клетчатка +, слизь+, Лейкоциты - 1 - 2 в п/з, Эпителий - 2 - 3 в п/з, Яйца глист – нет. С какими анатомо-физиологическими особенностями толстого кишечника это может быть связано?&amp;lt;br /&amp;gt; 2.Назовите какие факторы способствуют адаптации плода к условиям плацентарного кровообращения? &amp;lt;br /&amp;gt;</text:p>
          </table:table-cell>
          <table:table-cell office:value-type="string" table:style-name="ce1">
            <text:p>0JLQvtC/0YDQvtGBIDEuINCh0YLRg9C7INGA0LXQsdC10L3QutCwINC90LXQvtGE0L7RgNC80LvQtdC90L3Ri9C5INC4INC60LDRiNC40YbQtdC+0LHRgNCw0LfQvdGL0LkgLSDRjdGC0L4g0Y/QstC70Y/QtdGC0YHRjyDQvdC+0YDQvNC+0LksINGC0LDQuiDQutCw0Log0LrQuNGI0LXRh9C90LjQuiDQtdGJ0LUg0L3QtSDQtNC+INC60L7QvdGG0LAg0YHRhNC+0YDQvNC40YDQvtCy0LDQvSDQuCDQtdCz0L4g0YTQtdGA0LzQtdC90YLQvdGL0LUg0YHQuNGB0YLQtdC80Ysg0L3QtSDRgdC+0LLQtdGA0YjQtdC90L3Riy4g0J3QtdC/0LXRgNC10LLQsNGA0LXQvdC90LDRjyDQutC70LXRgtGH0LDRgtC60LAg0YLQsNC60LbQtSDRj9Cy0LvRj9C10YLRgdGPINC90L7RgNC80L7QuSDQtNC70Y8gMyDQvNC10YHRj9GH0L3QvtCz0L4g0YDQtdCx0LXQvdC60LAsINGC0LDQuiDQutCw0Log0LrQuNGI0LXRh9C90LjQuiDQvdC+0LLQvtGA0L7QttC00LXQvdC90L7Qs9C+INC10YnQtSDQvdC1INGB0L/QvtGB0L7QsdC10L0g0L3QsCDRgtC+LCDRh9GC0L7QsdGLINGA0LDRgdGJ0LXQv9C40YLRjCDQutC70LXRgtGH0LDRgtC60YMuINCf0L7Rj9Cy0LvRj9C10YLRgdGPINGN0YLQviDQuNC3LdC30LAg0YHQsdC40YLRi9GFINCx0LXQu9C60L7QsiDQvNC+0LvQvtC60LAg0LzQsNGC0LXRgNC4LCDQutC+0YLQvtGA0YvQtSDRh9Cw0YHRgtC+INC90LDQv9C+0LzQuNC90LDRjtGCINGC0LLQvtGA0L7QttC90YPRjiDQvNCw0YHRgdGDLiDQndCw0LvQuNGH0LjQtSDRgdC70LjQt9C4INCyINGB0YLRg9C70LUg0LzQvtC20LXRgiDQsdGL0YLRjCDRgdCy0Y/Qt9Cw0L3QviDRgSDQvdC10LfRgNC10LvQvtGB0YLRjNGOINC40LzQvNGD0L3QvdC+0Lkg0YHQuNGB0YLQtdC80Ysg0LrQuNGI0LXRh9C90LjQutCwLCDRh9GC0L4g0L/RgNC40LLQvtC00LjRgiDQuiDQvtCx0YDQsNC30L7QstCw0L3QuNGOINC00L7Qv9C+0LvQvdC40YLQtdC70YzQvdC+0Lkg0YHQu9C40LfQuCDQsiDQutCw0YfQtdGB0YLQstC1INC30LDRidC40YLQvdC+0Lkg0YDQtdCw0LrRhtC40LguINCb0LXQudC60L7RhtC40YLRiyDRgyDRgNC10LHQtdC90LrQsCAxLTIg0LIg0L8v0LcsINGH0YLQviDRj9Cy0LvRj9C10YLRgdGPINC90L7RgNC80L7QuSAoMS0zINCyINC/L9C3KS4g0K3Qv9C40YLQtdC70LjQuSDQuCDQvtGC0YHRg9GC0YHRgtCy0LjQtSDRj9C50YbQsCDQs9C70LjRgdGC0LAg0Y/QstC70Y/QtdGC0YHRjyDQvdC+0YDQvNC+0LkuINCi0L7Qu9GB0YLRi9C5INC60LjRiNC10YfQvdC40Log0YDQtdCx0LXQvdC60LAg0L3QtSDQtNC+INC60L7QvdGG0LAg0YHRhNC+0YDQvNC40YDQvtCy0LDQvS4g0KMg0L3QtdCz0L4g0L7RgtGB0YPRgtGB0YLQstGD0Y7RgiDRgdCw0LvRjNC90LjQutC4LCDQu9C10L3RgtGLINGB0LvQsNCx0L4g0LLRi9GA0LDQttC10L3Riywg0LrQsNC6INC4INCz0LDRg9GB0YLRgNGLLiDQkdGA0YvQttC10LnQutCwINC00LvQuNC90L3QsNGPINC4INC40Lct0LfQsCDRjdGC0L7Qs9C+INCw0L/Qv9C10L3QtNC40LrRgSDQvNC+0LbQtdGCINGA0LDRgdC/0L7Qu9Cw0LPQsNGC0YzRgdGPINCyINC70Y7QsdC+0Lkg0YfQsNGB0YLQuCDQsdGA0Y7RiNC90L7QuSDQv9C+0LvQvtGB0YLQuCAtINC80LXQtNC40LDQu9GM0L3QviAoMzAlKSwg0LvQsNGC0LXRgNCw0LvRjNC90L4gKDE2JSksINCyINC80LDQu9C+0Lwg0YLQsNC30YMgKDIyJSksINCwINGC0LDQutC20LUg0Lgg0LIg0LfQsNCx0YDRjtGI0LjQvdC90L7QvCDQv9GA0L7RgdGC0YDQsNC90YHRgtCy0LUuINCi0LDQutC20LUg0LzQvtC20L3QviDRgdC60LDQt9Cw0YLRjCDRgtC+0LwsINGH0YLQviDRgyDRgNC10LHQtdC90LrQsCDRhNC+0YDQvNCwINCw0L/Qv9C10L3QtNC40LrRgdCwINGP0LLQu9GP0LXRgtGB0Y8g0L/RgNC40LzQtdGH0LDRgtC10LvRjNC90L7QuS4g0J7QvSDQuNC80LXQtdGCINGE0L7RgNC80YMg0LrQvtC90YPRgdCwINGBINC90LXRgNCw0LfQstC40YLRi9C8INC60LvQsNC/0LDQvdC+0LwsINGN0YLQviDQv9C+0LfQstC+0LvRj9C10YIg0LDQv9C/0LXQvdC00LjQutGB0YMg0L3QtSDRgdGC0YDQsNC00LDRgtGMINC+0YIg0LfQsNGB0YLQvtC50L3Ri9GFINGP0LLQu9C10L3QuNC5LCDQvdC+INC90LXQu9GM0LfRjyDQuNGB0LrQu9GO0YfQsNGC0Ywg0LjRhSDQv9C+0LvQvdC+0LUg0L7RgtGB0YPRgtGB0YLQstC40LUg0LIg0YDQtdC00LrQuNGFINGB0LvRg9GH0LDRj9GFINC+0L3QuCDQstC+0LfQvNC+0LbQvdGLLiDQldGB0LvQuCDQs9C+0LLQvtGA0LjRgtGMINC+INC+0YHQvtCx0LXQvdC90L7RgdGC0Y/RhSDRjdC/0LjRgtC10LvQuNGPIDMt0LzQtdGB0Y/Rh9C90L7Qs9C+INGA0LXQsdC10L3QutCwLCDRgtC+INC80L7QttC90L4g0YHQutCw0LfQsNGC0Ywg0L4g0YLQvtC8LCDRh9GC0L4g0LrRgNC40L/RgtGLINCz0LvRg9Cx0L7QutC40LUg0Lgg0YHQu9C40LfQuNGB0YLQsNGPINC+0YfQtdC90Ywg0LHQvtCz0LDRgtCwINC60YDQvtCy0LXQvdC+0YHQvdGL0LzQuCDRgdC+0YHRg9C00LDQvNC4LiDQntGH0LXQvdGMINGF0L7RgNC+0YjQviDRgNCw0LfQstC40YIg0L/QuNC90L7RhtC40YLQvtC3LCDQsdC70LDQs9C+0LTQsNGA0Y8g0LrQvtGC0L7RgNC+0LzRgyDQt9Cw0YXQstCw0YfQtdC90L3Ri9C1INCx0LXQu9C60Lgg0L/QvtC/0LDQtNCw0Y7RgiDQsiDQutGA0L7QstGMINC4INC90LAg0L3QuNGFINC40LzQvNGD0L3QvdCw0Y8g0YHQuNGB0YLQtdC80LAg0LzQvtC20LXRgiDQstGL0YDQsNCx0LDRgtGL0LLQsNGC0Ywg0LDQvdGC0LjRgtC10LvQsC4gItCl0L7RgNC+0YjQuNGFIiDQsdCw0LrRgtC10YDQuNC5INCyINC60LjRiNC10YfQvdC40LrQtSDQvNCw0LvQviwg0YLQsNC6INC60LDQuiDQvtC90Lgg0L/QvtGB0YLRg9C/0LDRjtGCINGBINC80L7Qu9C+0LrQvtC8INC80LDRgtC10YDQuCwg0LIg0LrQvtGC0L7RgNC+0Lwg0YHQvtC00LXRgNC20LDRgtGB0Y8g0L/RgNC+0LHQuNC+0YLQuNC60LguIDxiciAvPg0K0JLQvtC/0YDQvtGBIDIuINCjINC/0LvQvtC00LAg0LLRi9C00LXQu9GP0Y7RgiAzINGB0YLQsNC00LjQuCDQutGA0L7QstC+0L7QsdGA0LDRidC10L3QuNGPLCDQsCDQuNC80LXQvdC90L46IDEgLSDQttC10LvRgtC+0YfQvdCw0Y8gLSDQtNC+IDctOCDQtNC90Y8sINC60L7Qs9C00LAg0L/RgNC+0LjRgdGF0L7QtNC40YIg0LjRgdC/0L7Qu9GM0LfQvtCy0LDQvdC40LUg0LfQsNC/0LDRgdC+0LIg0LbQtdC70YLQvtGH0L3QvtCz0L4g0LzQtdGI0LrQsDsgMiAtINCw0LvQu9Cw0L3RgtC+0LjRgdC90LDRjyAtINC90LAg0LTQsNC90L3QvtC8INGN0YLQsNC/0LUg0YTQtdGC0LDQu9GM0L3Ri9C1INGB0L7RgdGD0LTRiyDQstCw0YHQutGD0LvRj9GA0LjQt9C40YDRg9GO0YIg0LbQtdC70YLQvtGH0L3Ri9C5INC80LXRiNC+0Log0Lgg0YXQvtGA0LjQvtC9LCDRgtC10Lwg0YHQsNC80YvQvCDRjdGC0L4g0L/QvtC30LLQvtC70Y/QtdGCINC/0L7RgdGC0YPQv9Cw0YLRjCDQsdC+0LvRjNGI0L7QvNGDINC60L7Qu9C40YfQtdGB0YLQstGDINC/0LjRgtCw0YLQtdC70YzQvdGL0YUg0LLQtdGJ0LXRgdGC0LIsINCwINGC0LDQutC20LUg0LrQuNGB0LvQvtGA0L7QtNCwINC6INC/0LvQvtC00YM7IDMgLSDQv9C70LDRhtC10L3RgtCw0YDQvdCw0Y8gLSDQvdCw0YfQuNC90LDQtdGC0YHRjyDQvdCwIDMtNCDQvNC10YHRj9GG0LUg0LHQtdGA0LXQvNC10L3QvdC+0YHRgtC4LCDQvdCwINC00LDQvdC90YvQvCDRjdGC0LDQv9C1INC/0YDQvtC40YHRhdC+0LTQuNGCINC60L7QvdGC0LDQutGCINC/0LvQvtC00LAg0YEg0LrRgNC+0LLRjNGOINC80LDRgtC10YDQuC4g0Jog0YTQsNC60YLQvtGA0LDQvCwg0LrQvtGC0L7RgNGL0LUg0YHQv9C+0YHQvtCx0YHRgtCy0YPRjtGCINCw0LTQsNC/0YLQsNGG0LjQuCDQv9C70L7QtNCwINC6INGD0YHQu9C+0LLQuNGP0Lwg0L/Qu9Cw0YbQtdC90YLQsNGA0L3QvtCz0L4g0LrRgNC+0LLQvtC+0LHRgNCw0YnQtdC90LjRjyDQvtGC0L3QvtGB0Y/RgtGB0Y8g0YHQu9C10LTRg9GO0YnQtdC1OiAxLiDQo9Cy0LXQu9C40YfQtdC90LjQtSDQv9C70L7RidCw0LTQuCDQs9Cw0LfQvtC+0LHQvNC10L3QsCDQsiDQv9C70LDRhtC10L3RgtC1LCDRh9GC0L4g0L/QvtC80L7Qs9Cw0LXRgiDQsdC+0LvQtdC1INGN0YTRhNC10LrRgtC40LLQvdC+INGB0L3QsNCx0LbQsNGC0Ywg0L/Qu9C+0LQg0LrQuNGB0LvQvtGA0L7QtNC+0LwuIDIuINCj0LLQtdC70LjRh9C10L3QuNC1INGB0LrQvtGA0L7RgdGC0Lgg0LrRgNC+0LLQvtGC0L7QutCwINGB0L/QvtGB0L7QsdGB0YLQstGD0LXRgiDQsdC+0LvQtdC1INCx0YvRgdGC0YDQvtC80YMg0L7QsdC80LXQvdGDINCy0LXRidC10YHRgtCyINC80LXQttC00YMg0LzQsNGC0LXRgNGM0Y4g0Lgg0L/Qu9C+0LTQvtC8LiAzLiDQn9C+0LLRi9GI0LXQvdC40LUg0YPRgNC+0LLQvdGPINCz0LXQvNC+0LPQu9C+0LHQuNC90LAg0Lgg0LrQvtC70LjRh9C10YHRgtCy0LAg0Y3RgNC40YLRgNC+0YbQuNGC0L7QsiDQsiDQutGA0L7QstC4INC/0LvQvtC00LAsINGH0YLQviDQv9C+0LzQvtCz0LDQtdGCINGD0LvRg9GH0YjQuNGC0Ywg0YLRgNCw0L3RgdC/0L7RgNGC0LjRgNC+0LLQutGDINC60LjRgdC70L7RgNC+0LTQsC4gNC4g0J3QsNC70LjRh9C40LUg0YTQtdGC0LDQu9GM0L3QvtCz0L4g0LPQtdC80L7Qs9C70L7QsdC40L3QsCAoSGJGKSwg0LrQvtGC0L7RgNGL0Lkg0L7QsdC70LDQtNCw0LXRgiDQsdC+0LvRjNGI0LjQvCDRgdGA0L7QtNGB0YLQstC+0Lwg0Log0LrQuNGB0LvQvtGA0L7QtNGDLCDRh9GC0L4g0LfQvdCw0YfQuNGC0LXQu9GM0L3QviDRg9C70YPRh9GI0LDQtdGCINC/0L7RgdGC0YPQv9C70LXQvdC40LUg0LIg0YLQutCw0L3QuCDQv9C70L7QtNCwLiA1LiDQntGC0L3QvtGB0LjRgtC10LvRjNC90L4g0L3QuNC30LrQsNGPINC/0L7RgtGA0LXQsdC90L7RgdGC0Ywg0YLQutCw0L3QtdC5INC/0LvQvtC00LAg0LIg0LrQuNGB0LvQvtGA0L7QtNC1INC90LAg0YDQsNC90L3QuNGFINGB0YLQsNC00LjRj9GFINGA0LDQt9Cy0LjRgtC40Y8u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26" table:style-name="ce1">
            <text:p>915026</text:p>
          </table:table-cell>
          <table:table-cell office:value-type="string" table:style-name="ce1">
            <text:p>english</text:p>
          </table:table-cell>
          <table:table-cell office:value-type="string" table:style-name="ce1">
            <text:p>Ticket 38.&amp;lt;br /&amp;gt; 1. A mother with a 3-month-old child came to the pediatrician with complaints of bloating in a child, feces 6-7 times a day. The baby is breastfed, feeds on demand, control weighing was not carried out.&amp;lt;br /&amp;gt; COPROLOGICAL RESEARCH:&amp;lt;br /&amp;gt; The feces is unformed, mushy, -yellow, neutral fat +,-undigested fiber - +, mucus +, White blood cells - 1 - 2 in s / s, Epithelium - 2 - 3 in s / s, Worm eggs - no.&amp;lt;br /&amp;gt; Worm eggs - no&amp;lt;br /&amp;gt; What anatomical and physiological features of the gastrointestinal tract can this be associated with?&amp;lt;br /&amp;gt; 2. What factors contribute to the adaptation of the fetus to the conditions of placental circulation? &amp;lt;br /&amp;gt;</text:p>
          </table:table-cell>
          <table:table-cell office:value-type="string" table:style-name="ce1">
            <text:p>MS4gdGhlIGdhc3Ryb2ludGVzdGluYWwgZmVhdHVyZXMgaWluIGEgMyBtb250aCBvbGQgY2hpbGQgLCwuIHRoZSBkZXNjcmliZWQgY29wcm9sb2dpY2FsIGZpbmRpbmcgLCwgaW5jbHVkaW5nIHVuZm9ybWVkICwsIG11c2h5ICB5ZWxsb3cgc3Rvb2wgIHdpdGhoIHVuZGlnZXN0ZWQgZmliZXIsLCBtdWN1cyAsIGFuZCB0aGUgYW5zZW5jZSBvZiB3b3JuIGUzZ2cgLCwgY2FuIGJlIGFzc29jaWF0ZWQgd2l0aCBzZXZlcmFsIGFuYXRvbWljYWwgYW5kIHBoeXNpb2xvZ2ljYWwgZmVhdHR1cmVzIG9mIHRoZSBnYXN0cm9pbnRlc3RpbmFsbC4sIHRyYWN0IGluICBhbiBpbmZhbnQgLCwuIGltbWF0dXJpdHkgb2YgZGlnZXN0aXZlIHN5c3RlbSwsIGF0IDMgbW9udGggLCB0aGUgZGlnZXN0aXZlIHN5c3RlbW1tbSBpc3Mgc3RpbGwgZGV2bG9waW5nIGFuZCB0aGUgZW56eW1hdGljIG1heSBub3QgYmUgZnVsbHkgbWF0dXJlZCwsIGxlYWRpbmcgdG8gaW5jb21wbGV0ZSBkaWdlc3Rpb24gYW5kZCB1bmZvcm1lZCBzdG9vbGwgLCwuIGdhc3Ryb2NvbGljIHJlZmxleCA6IGJyZWFzdGZlZWRpbmcgdHJpZ2dlciwgdGhlIGdhc3Ryb2NvbGljIHJlZmxleCAsIGNhdXNpbmcgbW9yZSBmcmVxdWVudCBib3dlbCBtb3ZlbWVudHNzICwsLCBhbmQgdGhpIHVuZm9ybWVkIG5hdHVycmUgb2Ygc3Rvb2wgY2FuIGJlIGEgbm9ybWFsIHZhcmlhdGlvbiBpbiBicmVhc3RmZWVkaW5nIGluZmFudHQgLCwgLi48YnIgLz4NCjIuIHRoZSBmYWN0b3JyIGNvbnRyaWJ1dGUgdG8gdGhlIGFkYXB0YXRpb24gb2YgdGhpIGNvbmRpdGlvbiBvZiBwbGFlbnRhbCBjaXJjdWxhdGlvbiBpcyB0byBmYXRhbCBhZGFwdGF0aW9uIHRvICBwbGFjZW50YWwgLCwgIG94eWdlbiBhbmQgbnV0cml0aW9uICwsIHRoZSBmYWNpbGl0YXRlcyAgdGhlIGV4Y2hhbmdlIG9mIG94eWdlbm0gLCwgbnV0cmlhbnRzIGFuZCAgcHJvZHVjdHNzIGJldHdlZW4gIHRoZSBtb3RoZXIgYW5kIGZlYXR1cyBlbnN1cmluZyB0aGVlIGZldGFsIG1ldGFib2xpYyBuZWVkcyBhcmUgbWV0ICwsLC4gZmV0YWwgaGVtb2dsb2JpbiA6IGZldGFsIGhlbW9nbG9iaW4gKEhCZikgaGFzIGEgaGlnaGVyIGFmZmluaXR5IGZvciBveHlnZW4gdGhhbiBhZHVsdHMgaGVtb2dsb2JpbiAsLCBvcHRpbWl6aW5nIG94eWdlbiB1cHRha2UgZnJvbSBtYXRlcm5hbCBibG9vZCAsLC4gZHVjdHVzIHZlbm9zdXMgYW5kIGZvcmFtZW4gb3ZhbGUgOi4sIHRoZXNlIGluZnJhY3RlcmluZSBzaHVudHMgaGVscCBkaXJlY3R0dCBveHlnZW5hdGVkIGJsb29kIHRvIHZpdGFsIGZldGFsICBvcmdhbnMgYW5kIGJ5cGFzcyBsZXNzIGNyaXRpY2FsICBhcmVhcyAsIGFkYXB0aW5nIHRvIHRoaSB1bmlxdWUgY29uZGl0aW9uIG9mIHBsYWNlbnRhayBjY2lyY3VsYXRpb24gLCwsLiBwbGFjZW50YWwgcGVyZnVzaW9uIDogYWRlcXVhdGUgYmxvb2QgZmxvdyBpbiB0aGkgcGxhY3hlbnRhIGVuc3VyZSBlZmZpY2lhbnQgZXhjaGFuZ2Ugb2YgZ2FzZXMgYW5kIG51dHJpZW50cyAsLCBzdXBwb3J0aW5nIGZhdGFsIGdyb3d0aCBhbmQgZGV2ZWxvcG1lbnQgLCwsLiBtYXRlcm5uYWwgZmV0YWwgaW50ZXJmYWNlIDogdGhlIHN0cnVjdHVyZSBvZiB0aGkgcGxhY2VudGFsIGJhcnJpZXIgYWxsb3dzIHNzZWxlY3RpdmVseSB0cmFuc3BvcnQgb2Ygc3Vic3RyYW52ZSAsLCBwcm90ZWN0aW5nIHRoZSBmZXR1cyBmcm9tIGhhcm1mdWwgYWdlbnRzIHdoaWxlIGFsbG93aW5nIGVzc2VudGlhbCBtb2xlY3VsZSB0b28gcGFzcywsLiB0aGVzZSBhZGFwdGF0aW9uIGVuc3VyZSB0aGUgZmV0dXMgcmVjaWV2ZSBhZGVxdWF0ZSBveHlnZW4gYW5kIG51dHJpZW50cyBpbiB0aGUgbG93IG94eWdlbiBlbnZpcm9ubWVudCBvZiB0aGUgdXRlcnVzICwsLi48YnIgLz4NCjxiciAvPg0KPGJyIC8+DQo8YnIgLz4NCjxiciAvPg0KPGJyIC8+DQo8YnIgLz4NCjxiciAvPg0KPGJyIC8+DQo8YnIgLz4NCjxiciAvPg0KPGJyIC8+DQo8YnIgLz4NCjxiciAvPg0KPGJyIC8+DQo8YnIgLz4NCg==</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59" table:style-name="ce1">
            <text:p>915059</text:p>
          </table:table-cell>
          <table:table-cell office:value-type="string" table:style-name="ce1">
            <text:p>english</text:p>
          </table:table-cell>
          <table:table-cell office:value-type="string" table:style-name="ce1">
            <text:p>Ticket 38.&amp;lt;br /&amp;gt; 1. A mother with a 3-month-old child came to the pediatrician with complaints of bloating in a child, feces 6-7 times a day. The baby is breastfed, feeds on demand, control weighing was not carried out.&amp;lt;br /&amp;gt; COPROLOGICAL RESEARCH:&amp;lt;br /&amp;gt; The feces is unformed, mushy, -yellow, neutral fat +,-undigested fiber - +, mucus +, White blood cells - 1 - 2 in s / s, Epithelium - 2 - 3 in s / s, Worm eggs - no.&amp;lt;br /&amp;gt; Worm eggs - no&amp;lt;br /&amp;gt; What anatomical and physiological features of the gastrointestinal tract can this be associated with?&amp;lt;br /&amp;gt; 2. What factors contribute to the adaptation of the fetus to the conditions of placental circulation? &amp;lt;br /&amp;gt;</text:p>
          </table:table-cell>
          <table:table-cell office:value-type="string" table:style-name="ce1">
            <text:p>ezF9IGdhc3Ryb2ludGVzaW5hbCBmZWF0dXJlIG9mIDMgbW9udGggb2xkIGNoaWxkIHRoZSBkZXNjcmliZWUgQ09QUk9MT0dJQ0FMIGZpbmRpbmcgaW5jbHVkZSB1bmZvcm1lZCBtdXNoeSB5ZWxsb3cgc3Rvb2wgd2l0aCB1bmRpZ2VzdCBmaWJyZSBtdWN1cyBhbmQgdGhlIGFic2VuY2Ugb2Ygd29ybSBlZ2cgY2FuIGJlIGFzc3NvY2lhdGVkIHdpdGggc2V2ZXJhbCBhbmF0b21pY2FsbHkgcGh5c2lsb2dpY2FsIGZlYXR1cmVvZiB0aGUgZ2FzdHJvaW50ZXNpbmFsIHRyYWN0IGluIGFuIGluZmFudC4gSU1NQVRVUklUWSBvZiBkaWdlc3RpdmUgc3lzdGVtLiBhdCAzIG1vbnRoIHRoZSBkaWdlc3RpdmUgc3lzdGVtIGlzIHN0aWxsIGRldmVsb3BpbmdnIGFuZCB0aGUgZW56eW1hdGljIGFjdGl2aXR5IG1heSBub3QgYmUgZnVsbHkgbWF0dXJlZCBsZWFkaW5nIHRvIGluY29tcGx0ZSBkaWdlc3Rpb24gYW5kIHVuZm9ybWVkIHN0b29scy4gR0FTVFJPQ09MSUMgUkVGTEVYOi1icmVhc3RmZWVkaW5nIHRyaWdlZXJzIHRoZSBnYXN0cm9jbGljIGNhdXNpbmcgbW9yZSBmcmVxdWVudCBib3dlbCBtb3ZlbWVudCBhbmQgdW5mb3JtZWQgbmF0dXJlIG9mIHN0b29sIGNhbiBiZSBub3JtYWwgdmFyaWF0aW9uIGJyZWFzZmVkIGluZmFudC4gICAgICAgICAgICAgICAgICAgICAgICAgICAgICAgICAgICAgICAgICAgICAgICAgICAgICAgICAgICAgICAgICAgICAgICAgICAgICAgICAgICAgPGJyIC8+DQogICAgICAgICAgICAgICAgICAgICAgICAgICAgICAgICAgICAgICAgICAgICAgICAgICAgICAgICAgICAgICAgICAgICAgICAgICAgICAgICAgICAgICAgICAgICAgICAgICAgICAgICAgICAgICAgICAgICAgICAgICAgICAgICAgICB7Mn0gZmFjdG9ycyBjb250cmlidXRlIHRvIGZldGFsIGFkYXB0aW9uIHRvIHBsYWNlbnRhbCBjaXJjdWxhdGlvbi0tIE9YWUdFTiBBTkQgTlVUUklFTlQgRVhDSEFOR0U6LSB0aGUgcGxhY2VudGEgZmFjaWlsYXRlcyBveHlnZW4gLG51dHJpZW50IGFuZCB3YXN0ZSBwcnJvZHVjdCBiZXR3ZWVuIHRoZSBtb3RoZXIgYW5kIGZlYXR1cyAsIGVuc3VyaW5nIHRoZSBmZXRhbCBtZXRhYm9saWMgbmVlZCBhcmUgbWV0LCBmZXRhbCBoZW1vZ2xvYmluICAgZmV0YWwgaGVtb2dsb2JpbiBIQmYgaGFzIGEgIGhpZ2hlciBhZmZpbml0eSBmb3Igb3h5Z2VuIHRoYW4gYWR1bHQgaGVtb2dsb2JpbiAgb3B0aW1pemluZyAgb3h5Z2VuIHVwdGFrZSBmcm9tIG1hdGVybmFsIGJsb29kLiBEVUNUVVMgdmVub3N1cyBhbmQgZm9yYW1lbiBvdmFsZTsgdGhzZXMgaW50cmF1dGVyaW5lIHNodW50cyBoZWxwIGRpcmVjdCBveHlnZW5hdGVkIGJsb29kIHRvIHZpdGFsIGZldGFsIG9yZ2FuIGJ5cGFzc3MgTEVTUyBDUklUQ0FMIEFSRVMgLCBBREFQVElORyBUTyBUSEUgVU5JUVVFIGNvbmRpdGlvbiBvZiBwbGFjZW50YWwgY2lyY3VsYXRpb24uICBQTEFDRU5UQUwgUEVSRlVTSU9OLSBBZGVxdWF0ZSBibG9vZCBmbG93IGluIHRoZSBwbGFjZW50YSBlbnN1cmUgIGVmZmljZW50ICBleGNoYW5nZSBvZiBnYXNlcyBhbmQgbnV0cmllbnMsIHN1cG9vcnRpbmcgZmV0YWwgZ3Jvd3RoIGFuZCBkZXZscG9tZW50LiBNQVRFUk5BTCBGRVRBTCBJTlRFUkZBQ0U6LSAgVEhFIHN0cnVjdHVyZSBvZiB0aGUgcGxhY2VudGFsIGJhcnJyaWVyIGFsbG93cyBzZWxlY3RpdmUgdHJhc25wb3J0IG9mIHN1YnN0YW5jZXMgLCBwcm90ZWN0aW5nIHRoZSBmZWF0dXMgZnJvbSBoYXJtbWZ1bCBhZ2VudHMgd2hpbGUgYWxsb3dpbmcgZXNzZW50aWFsZSBtb2xlY3VsZXMgdG8gcGFzcy4=</text:p>
          </table:table-cell>
          <table:table-cell office:value-type="float" office:value="170348" table:style-name="ce1">
            <text:p>170348</text:p>
          </table:table-cell>
          <table:table-cell office:value-type="float" office:value="80" table:style-name="ce1">
            <text:p>80</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7116" table:style-name="ce1">
            <text:p>1067116</text:p>
          </table:table-cell>
          <table:table-cell office:value-type="string" table:style-name="ce1">
            <text:p>english</text:p>
          </table:table-cell>
          <table:table-cell office:value-type="string" table:style-name="ce1">
            <text:p>Ticket 38.&amp;lt;br /&amp;gt; 1. A mother with a 3-month-old child came to the pediatrician with complaints of bloating in a child, feces 6-7 times a day. The baby is breastfed, feeds on demand, control weighing was not carried out.&amp;lt;br /&amp;gt; COPROLOGICAL RESEARCH:&amp;lt;br /&amp;gt; The feces is unformed, mushy, -yellow, neutral fat +,-undigested fiber - +, mucus +, White blood cells - 1 - 2 in s / s, Epithelium - 2 - 3 in s / s, Worm eggs - no.&amp;lt;br /&amp;gt; Worm eggs - no&amp;lt;br /&amp;gt; What anatomical and physiological features of the gastrointestinal tract can this be associated with?&amp;lt;br /&amp;gt; 2. What factors contribute to the adaptation of the fetus to the conditions of placental circulation? &amp;lt;br /&amp;gt;</text:p>
          </table:table-cell>
          <table:table-cell office:value-type="string" table:style-name="ce1">
            <text:p>Z2FzdHJvaW50ZXN0aW5hbCBmZWF0dXJlcyBpbiBhIDMtbW9udGggY2hpbGQgdGhlIGRlc2NyaWJlIGNvcHJvbG9naWNhbCBmaW5kaW5ncyBpbmNsdWRpbmcgIHRoZSB1bmZvbm5lZCBtdXNoeSB5ZWxsb3cgc3Rvb2xzIHdpdGggdW5kaWdlc3RlZCBmaWJlcnMgLCBtdWN1cyBhbmQgdGhlIGFic2VuY2Ugb2Ygd29ybSBlZ2cgYW5kICwgY2FuIGJlIGFzc29jaXRlZCB3aXRoIHNldmVyYWwgYW50b21pY2FsIGZlYXR1cmVzIG9mIHRoZSBnYXN0cm9pbnRlc3RpbmFsIHRyYWN0IGluIGFuIGluZmFudHMgaW1tYXR1cmF0eSBvZiBkaWdlc3RpdmUgc3lzdGVtIC4gYXQgdGhlICAzIG1vbnRoIHRoZSBkaWdlc3RpdmUgc3lzdGVtIHN0aWxsIGRldmVsb3BpbmcgYW5kIHRoZSBlbnp5bWV0aWMgYWN0aXZpdHkgbWF5IG5vdCBiZSBmdWxseSBtYXR1cmVkICwgbHRvIGluY29tcGxldGUgZGlnZXN0aW9uIGFuZCB0aGUgdW5mb3JtZWQgc3Rvb2wgLiBnYXN0cm9jb2xpYyByZWZsZXggLSB0aGUgIGJyZWFzdGZlZWRpbmcgdHJpZ2dlcmVkIHRoZSBnYXN0cm9jb2xpYyByZWZsZXggYW5kICAsIGNhdXNpbmcgbW9yZSBmcmVxdWVudCBib3dlbCBtb3ZlbWVudHMgYW5kICwgYW5kIHRoZSB1bmZvcm1lZGQgbmF0dXJlIG9mIHN0b29scyBjYW4gYmUgdGhlICBhIG5vcm1hbCB2YXJpdGlvbiBpbiBicmVhc3RmZWQgaW5mYW50cyAuIDItIGZhY3RvcnMgY29udHJpYnV0aW5nIHRvIGZlYXRlbCBhZGFwYXRpb24gdG8gcGxhY2VudGE7IGNpcmN1bGF0aW9uIC4gb3h5Z2VuIGFuZCBudXRyaWVudCB4Y2hhbmdlICAtIHRoZSBwbGFjZW50YSBmYWNpbGl0YXRlcyB0aGUgZXhjaGFuZ2Ugb2Ygb3h5Z2VuICwgbnV0cmllbnRzIGFuZCB3YXN0ZXMgcHJvZHVjdHMgYmV0d2VlbiB0aGUgbW90aGVyIGFuZCB0dGhlIGZldHVzICwgZW5zdXJpbmcgdGhlIGZldGFsIG1ldGFib2xpYyBuZWVkc2FuZCAuIGZldGFsIGhlbW9nbG9iaW4gLSBmZXRhbCBoZW1vZ2xvYmluZSAoSEJTKSBoYXMgYSBoaWdoZXJhZmZpbml0eSBmcG9yIG94eWdlbiB0aGVuIGFkdWx0IGhlbW9nbG9iaW4gb3B0aW1pemluZyBveHlnZW4gdXB0YWtlbiBmcm9tIHRoZSBtZXRlcm5hbCBibG9vZCAuIGR1Y3R1cyB2YW5vc3VzIGFuZCBmb3JhbWVuIG92YWxzIC4gdGhlc2UgaW50cmF1dGVyaW5lIHNodW50cyBoZWxwIGRpcmVjdCBveHlnZW5ldGVkIGJsb29kIHRvIHZpdGFsIGZldGFsIG9yZ2FucyBhbmQgYnlwYXNzIHRoZSBsZXNzIGNyaXRpY2FsIGFyZWFzICwgYWRhcHRpbmcgdGhlIHVuaXF1ZSBjb25kaXRpb24gb2YgcGxhY2VudGFsIGNpcmN1bGF0aW9uIC4gdGhlIHBsYWNlbnRhbCBwZXJydXNpb24gYWRhcHRhZGUgYmxvb2QgZmxvdyB0aGUgcGxhY2VudGEgZW5zdXJlcyB0aGUgZXhjaGFuZ2UgdGhlIGdhc2VzIGFuZCBudXRyaW50IHRoZXNlIHN1cHBvcnQgdGhlIGZldGFsIGdyb3d0aCAgYW5kIHRoZSBkZXZlbG9wbWVudCAubWV0ZXJuYWwgZmV0YWwgaW50ZXJmYWNlIC0gdGhpcyBpcyB0aGUgc3RydWN0dXJlIG9mIHRoZSBwbGFjZW50YWwgYmFycmllciBhbGxvdyB0aGUgc2VsZWN0aXZlIHN1YnN0YW5jZSB0cmFuc3BvcnQgYW5kIHRoZSBwcm90YWN0IHRoZSBoYXJtZnVsIGFnZW50cyB3aGlsZSB0aGUgYWxsb3dpbmcgZXNzZW50aWFsIG1vbGVjdWxlcyB0byBwYXNzIC4=</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70" table:style-name="ce1">
            <text:p>1066970</text:p>
          </table:table-cell>
          <table:table-cell office:value-type="string" table:style-name="ce1">
            <text:p>kazakh</text:p>
          </table:table-cell>
          <table:table-cell office:value-type="string" table:style-name="ce1">
            <text:p>Билет 39.&amp;lt;br /&amp;gt; 1.3 күндік бала. Туғандағы салмағы 3.200 кг, бойы 50 см.Дауысы бірден ішқті.Табиғи тамақтануда. Жалпы зәр анализында салыстырмалы тығыздығы төмен. Қалыпты жағдайда осы балада зәрінің салыстырмалы тығыздығы атаныз және ол немен байланысты.&amp;lt;br /&amp;gt; 2. 10 жасар бала. Эндокринолoгтын қабылдауында қалқанша без ауыруымен. Осы балалада қалыпты жағдайда қалқанша безінің көлемі және онын сипаттамасы.&amp;lt;br /&amp;gt;</text:p>
          </table:table-cell>
          <table:table-cell office:value-type="string" table:style-name="ce1">
            <text:p>MS7QltCw0LvQv9GLINCx0LDQu9Cw0L3Ri9KjINC20LDSk9C00LDQudGLINC20LDSm9GB0Ysg0LHQvtC70YvQvyDRgtGD0YvQu9KT0LDQvS7QodCw0LvQvNCw0pPRiywg0LHQvtC50Ysg0LHTmdGA0ZYg0LbQsNKb0YHRiy4g0JTQsNGD0YvRgdGLINCx0ZbRgNC00LXQvSDRiNGL0pvSm9Cw0L0u0KLQsNCx0LjSk9C4INGC0LDQvNCw0pvRgtCw0L3Rg9C00LAs0Y/Sk9C90Lgg0LDQvdCwINGB0q/RgtGW0LzQtdC9INGC0LDQvNCw0pvRgtCw0L3QsNGC0YvQvdGLINCx0LXQu9Cz0ZbQu9GWLNKb0L7RgdGL0LzRiNCwINGC0LDQvNCw0pvRgtCw0L3QsdCw0LnQtNGLLtCR0rHQuyDQttC10YDQtNC1INCx0LDQu9Cw0L3Ri9KjINGC0LXQuiDQt9OZ0YAg0YjRi9KT0LDRgNGDINC20q/QudC10YHRltC80LXQvSDQvNOZ0YHQtdC70LUg0LHQsNGAINC10LrQtdC90ZYg0LHQtdC70LPRltC70ZYu0J3QsNKb0YLRi9GA0LDSmyDQsdCw0LvQsNC90YvSoyDQt9OZ0YDRltC90ZbSoyDRgdCw0LvRi9GB0YLRi9GA0LzQsNC70Ysg0YLRi9KT0YvQt9C00YvSk9GLINGC06nQvNC10L3QtNC10LPQtdC9LiDQltCw0LvQv9GLINC305nRgCDRgtGL0pPRi9C30LTRi9KT0Ysg0YjQsNC80LDQvNC10L0gMSwwMzAg0LHQvtC70LDQtNGLLtCW0LDQu9C/0Ysg0LfTmdGAINGI0YvSk9Cw0YDRgyDQsdC+0LnRi9C90YjQsCDQvNGL0L3QsNC90LTQsNC5INCw0L3QsNC70LjQt9C00LXRgCDRgtCw0L/RgdGL0YDQsNC00Ys60LbQsNC70L/RiyDQt9OZ0YAg0LDQvdCw0LvQuNC30ZYsINCX0LjQvNC90LjRhtC60LjQuSwg0J3QtdGH0LjQv9C+0YDQtdC90LrQviwg0KHQmtCkINC205nQvdC1INGCLtCxLtCX05nRgCDRgtGL0pPRi9C30LTRi9KT0YvQvdGL0qMg0YLTqdC80LXQvdC00LXRg9GW0L0g0JfQuNC80L3QuNGG0LrQuNC5INC90LXQvNC10YHQtSDQndC10YfQuNC/0L7RgNC10L3QutCwINGB0YvQvdCw0LzQsNGB0Ysg0LDRgNKb0YvQu9GLINC20q/RgNCz0ZbQt9C10LTRli7QltCw0LvQv9GLINC305nRgCDQsNC90LDQu9C40LfRliDQsNGA0pvRi9C70Ysg0LfTmdGA0LTRltKjINKb0rHRgNCw0LzRi9C90LTQsCDSm9Cw0L3QtNCw0LnQtNCwINCx0ZbRgCDQsdCw0LrRgtC10YDQuNGPINCx0LDRgNC80LAg0LXQutC10L3RltC9LNC60LXRgNCw0YLQuNC90LjQvSzQvNC+0YfQtdCy0LjQvdC+LNCz0LvRjtC60L7Qt9CwLNC60LXRgtC+0L0g0LTQtdC90LXQu9C10YDRltC9LNCx0LXQu9C+0Log0YIu0LEuINCx0LDRgdKb0LAg0pvSsdGA0YvQu9GL0LzQtNCw0YDQtNGLINCw0L3Ri9Kb0YLQsNC50LTRiy7QkNC7INCX0LjQvNC90LjRhtC60LjQuSDQvNC10L0g0J3QtdGH0LjQv9C+0YDQtdC90LrQsCDQsNGA0pvRi9C70Ysg0LHSr9C50YDQtdC60YLRltKjINC20LDQu9C/0Ysg0YTRg9C90LrRhtC40Y/RgdGL0L0s0YHSr9C30YMg0pvQsNCx0ZbQu9C10YLRltC9INCw0L3Ri9Kb0YLQsNC50LTRiy7QkNC7INCh0JrQpCDQsdKx0Lsg0YHQutC+0YDQvtGB0YLRjCDQutC70YPQsdC+0YfQutC+0LLRi9C5INGE0LjQu9GM0YLRgNCw0YbQuNC5LCDRj9KT0L3QuCDQsdKv0LnRgNC10LrRgtGW0qMg0YHSr9C30YMg0LbRi9C70LTQsNC80LTRi9KT0YsuINCe0Lsg0LDRgNKb0YvQu9GLINCx0q/QudGA0LXQutGC0ZbSoyAxINC80LjQvdGD0YLRgtCwINKb0LDQvdGI0LAg0LHSr9C50YDQtdC6INGB0q/Qt9GDINKb0YvQt9C80LXRgtGW0L0g0LDRgtKb0LDRgNCwINCw0LvQsNGC0YvQvdGL0L0g0LDQvdGL0pvRgtCw0LnQtNGLLiDQkdKx0Lsg0LbQtdGA0LTQtSDQt9OZ0YDQtNGW0qMg0YHQsNC70YvRgdGC0YvRgNC80LDQu9GLINGC0YvSk9GL0LfQtNGL0pPRi9C90YvSoyDRgtOp0LzQtdC90LTQtdGD0ZYg0LHSr9C50YDQtdC6INGE0YPQvdC60YbQuNGP0YHRi9C9INC00rHRgNGL0YEg0LDRgtKb0LDRgNCwINCw0LvQvNCw0LnRgtGL0L3Ri9C9INC606nRgNGB0LXRgtGW0L8g0YLSsdGALtCR0rHQuyDQsdKv0LnRgNC10LrRgtC10LPRliDRgtC+0YHRgtCw0pPQsNC90YjQsNC70LDRgCDQvNC10L0g0LDRgdGC0LDRg9GI0LDQu9Cw0YDQtNCwINC90LXQvNC10YHQtSDQsdKv0LnRgNC10Log0YjRg9C80LDSm9GI0LDQu9Cw0YDRi9C90LTQsCzQvdC10YHQtdC/0LDSk9Cw0YAs0pvRg9GL0pvRgtCwINC90LXQvNC10YHQtSDQvdC10YHQtdC/INGI0YvSk9Cw0YDQsNGC0YvQvSDTqdC30LXQutGI0LXRgNGW0L3QtNC1INC805nRgdC10LvQtSDQsdC+0LvRg9GLINC80q/QvNC60ZbQvS7QltCw0LvQv9GLINC90LXRgdC10L8g0YLSr9C30YMg0LbSr9C50LXRgdGWINCx0L7QudGL0L3RiNCwINC80YvQvdCw0L3QtNCw0Lkg0L/QsNGC0L7Qu9C+0LPQuNGP0LvQsNGAINCx0LDRgDrSm9Cw0LHRi9C90YMs0LzRi9GB0LDQu9GLINC/0LjQtdC70L7QvdC10YTRgNC40YIs0LPQu9C+0LzQtdGA0YPQu9C90LXRhNGA0LjRgizQsdKv0LnRgNC10Log0LbQtdGC0LrRltC70ZbQutGB0ZbQt9C00ZbQs9GWLNC90LXRhNGA0L7Qu9C40YLQuNCw0Lcs05nQudC10LvQtNC10YDQtNC1INC20LjRliDQutC10LfQtNC10YHQtdGC0ZbQvSDRhtC40YHRgtC40YIg0LbTmdC90LUg0YIu0LEu0JzRi9GB0LDQu9GLINC/0LjQtdC70L7QvdC10YTRgNC40YLRgtC1INCx0LDQutGC0LXRgNC40Y/Qu9Cw0YAg0LDRgNKb0YvQu9GLINKb0LDQsdGL0L3RgyDRgtGD0LDQtNGLLtCT0LvQvtC80LXRgNGD0LvQvtC90LXRhNGA0LjRgtGC0LUg0YjRg9C80LDSm9GI0LDQu9Cw0YDQtNGL0qMg0pvQsNCx0YvQvdGD0Yss0Y/Sk9C90Lgg0LDRg9GC0L7QuNC80LzRg9C90LTRiyDQsNGD0YDRgyDQutC10LfRltC90LTQtSDQsNC90YLQuNC00LXQvdC10LvQtdGA0LTRltKjINOZ0YHQtdGA0ZYu0J3QtdGE0YDQvtC70LjRgtC40LDQtyDQsdKx0Lsg0L3QtdGB0LXQvyDQttC+0LvQtNCw0YDRi9C90LTQsCDRgtCw0YEg0YHQuNGP0pvRgtGLINKb0rHRgNGL0LvRi9C80LTQsNGA0LTRi9KjINC20LjQvdCw0pvRgtCw0LvRg9GL0L3Ri9KjINOZ0YHQtdGA0ZbQvdC10L0g0LfTmdGA0LTRltKjINCw0Lcg0LzTqdC70YjQtdGA0LTQtSDRiNGL0pPRg9GLLtCm0LjRgdGC0LjRgiDQvdC10YHQtdC/INGI0YvSk9Cw0YDQsNGC0YvQvSDTqdC30LXQutGC0LXRgNC00ZbSoyDSm9Cw0LHRi9C90YPRiyzQvtC70LDRgNC00YvSoyDTmdC50LXQu9C00LXRgNC00LUg0LbQuNGWINCx0L7Qu9GDINGB0LXQsdC10LHRliDQvdC10YHQtdC/INGI0YvSk9Cw0YDQsNGC0YvQvSDTqdC30LXQutGC0LXRgNC00ZbSoyDSm9GL0YHSm9CwINCx0L7Qu9GD0YvQvdCw0L0u0JbQsNC70L/RiyDQsdKv0LnRgNC10LrQutC1INOZ0YHQtdGAINC10YLQtdGC0ZbQvSDQttCw0pPRi9C80YHRi9C3INGE0LDQutGC0L7RgNC70LDRgNC00YvSoyDQsdGW0YDRliDRgdGD0YvSmyDRgtC10LzQv9C10YDQsNGC0YPRgNCwLtCX05nRgNC00ZbSoyDRgdCw0LvRi9GB0YLRi9GA0LzQsNC70Ysg0YLRi9KT0YvQt9C00YvSk9GL0L3Ri9KjINGC06nQvNC10L3QtNC10YPRltC90LUg0LbQvtKT0LDRgNGL0LTQsCDQsNGC0LDQu9KT0LDQvSDRhNCw0LrRgtC+0YDQu9Cw0YAg05nRgdC10YAg0LXRgtGD0ZYg0LzSr9C80LrRltC9LtCW0L7Sk9Cw0YDRi9C00LAg0LDRgtCw0LvSk9Cw0L0g0LDQvdCw0LvQuNC30LTQtdGA0LTQtdC9INCx06nQu9C10Log0YLQtdC60YHQtdGA0YMg05nQtNGW0YHRgtC10YDRltC90LUg0L/QsNC70YzQv9Cw0YbQuNGPLNC/0LXRgNC60YPRgdGB0LjRj9C90Ysg0LbQsNGC0pvRi9C30LDQvNGL0Lcu0prQsNC70YvQv9GC0YvQtNCwINCx0q/QudGA0LXQuiDQv9Cw0LvRjNC/0LDRhtC40Y/Qu9Cw0L3QsdCw0YPRiyDQutC10YDQtdC6LtCf0LXRgNC60YPRgdGB0LjRj9C00LAg0LHSr9C50YDQtdC60YLRlizQsdC10LvQtNGWINCw0YDRgtKb0Ysg0LbQsNKb0YLRiyDQttOZ0Lkg0rHRgNKT0YvQu9Cw0L8g0LrTqdGA0LPQtdC90LTQtSDQsNGD0YvRgNC80LDRg9GLINC60LXRgNC10Lou0KHQvtC90YvQvNC10L0g0pvQsNGC0LDRgCDQsdKv0LnRgNC10Log0LDRgNGC0LXRgNC40Y/Qu9GL0psg0pvRi9GB0YvQvNKT0LDQtNCwINOZ0YHQtdGAINC10YLQtdC00ZYu0JDRgdC/0LDQv9GC0YvSmyDQt9C10YDRgtGC0LXRg9C70LXRgNCz0LUg0LHSr9C50YDQtdC60YLRltKjINGD0LTQty3RlizQutGCLNC80YDRgiDQttOZ0L3QtSDRgi7QsS4g0pvQvtC70LTQsNC90YPSk9CwINCx0L7Qu9Cw0LTRiy4gMi7QkdKx0Lsg0LbQsNKT0LTQsNC50LTQsCDSm9Cw0LvSm9Cw0L3RiNCwINCx0LXQtyDQsdC+0LnRi9C90YjQsCDQtdC60LXQvS7QltCw0LvQv9GLINKb0LDQu9Kb0LDQvdGI0LAg0LHQtdC3INC+0Lsg0LHRltC30LTQtdCz0ZYg0LXSoyDQvNCw0qPRi9C30LTRiyDQsdC10LfQtNC10YDQtNGW0qMg0LHRltGA0ZYu0prQsNC70pvQsNC90YjQsCDQsdC10LfQtNC10L0g0KIzINC205nQvdC1INCiNCzRj9KT0L3QuCDRgtGA0LjQudC+0LTRgtC40YDQvtC90LjQvSDQttOZ0L3QtSDRgtC40YDQvtC60YHQuNC9INCz0L7RgNC80L7QvdC00LDRgNGLINCx06nQu9GW0L3QtdC00ZYu0JPQuNC/0L7RgtCw0LvQsNC80L4t0LPQuNC/0L7RhNC40Lcg0LbSr9C50LXRgdGWINCx0ZbQt9C00LUg0LPQvtGA0LzQvtC90LTQsNGAINCx06nQu9C10LTRliDQttOZ0L3QtSDQsdCw0YHSm9CwINCx0LXQt9C00LXRgNC00ZYg0LHQsNGB0pvQsNGA0LDRgtGL0L0g0LPQvtGA0LzQvtC90LTQsNGA0LTRiyDQtNCwINCx06nQu9C10LTRli7QnNGL0YHQsNC70Ysg0LPQuNC/0L7RhNC40Lcg0pvQsNC70pvQsNC90YjQsCDQsdC10LfQtNGWINCx0LDRgdKb0LDRgNCw0YLRi9C9INGC0LjRgNC10L7RgtGA0L7Qv9GC0Ysg0LPQvtGA0LzQvtC90LTQsNGA0LTRiyDQsdOp0LvQtdC00ZYuINCQ0Lsg0LPQuNC/0L7RhNC40LfQtNGWINCx0LDRgdKb0LDRgNCw0YLRi9C9INCz0LjQv9C+0YLQsNC70LDQvNGD0YEg0YHRgtCw0YLQuNC90LTQtdGAINC80LXQvSDQu9C40LHQtdGA0LjQvdC00LXRgCDQsdOp0LvQtdC00ZYu0KHRgtCw0YLQuNC9INC80LXQvSDQu9C40LHQtdGA0LjQvSDQsdGW0YDQtdGD0ZYg0LPQvtGA0LzQvtC9INOp0L3QtNGW0YDRg9C00ZYg0YvQvdGC0LDQu9Cw0L3QtNGL0YDRgdCwLNCx0ZbRgNC10YPRliDRgtC10LbQtdC50LTRli7SmtCw0LvSm9Cw0L3RiNCwINCx0LXQt9C00ZbSoyDQs9C+0YDQvNC+0L3QtNCw0YDRi9C90LAg0LrQtdC70YHQtdC6LNCx0rHQu9Cw0YDQtNGL0qMg0LDRgtKb0LDRgNCw0YLRi9C9INKb0YvQt9C80LXRgtGC0LXRgNGWINC606nQvy7QntC70LDRgDog0LfQsNGCINCw0LvQvNCw0YHRg9KT0LAg0pvQsNGC0YvRgdCw0LTRiyzRj9KT0L3QuCDQsNKT0LfQsNC00LAg0LHQtdC70L7QuizQvNCw0Lks0LrTqdC80ZbRgNGB0YMg0LDQu9C80LDRgdGD0YvQvdCwINKb0LDRgtGL0YHQsNC00Yss0LDSk9C30LDQvdGL0qMg06nRgdGD0ZYg0LzQtdC9INC00LDQvNGD0YvQvdCwINOZ0YHQtdGAINC10YLQtdC00ZYg0LbTmdC90LUg0YIu0LEuINC606nQv9GC0LXQs9C10L0g0pvRi9C30LzQtdGC0YLQtdGAINCw0YLSm9Cw0YDQsNC00Ysu0JHSsdC7INGE0LjQt9C40L7Qu9C+0LPQuNGP0LvRi9KbINC10YDQtdC60YjQtdC70ZbQs9GWLiDQkNC7INCw0L3QsNGC0L7QvNC40Y/Qu9GL0psg0YHQuNC/0LDRgtGC0LDQvNCw0YHRi9C90LAg0LrQtdC70YHQtdC6LtCe0Lsg0L7SoyDQttOZ0L3QtSDRgdC+0Lsg0LHTqdC70ZbQutGC0LXQvSDRgtKx0YDQsNC00Yss0L/QuNGA0LDQvNC40LTQsNC70YvSmyDQsdOp0LvRltCz0ZYg0L7RgNGC0LDRgdGL0L3QtNCwINGC0rHRgNCw0LTRiyzQutC10qPRltGA0LTQtdC60YLRltKjINCw0LvQtNGL0qPSk9GLINC20LDSk9GL0L3QtNCwINC+0YDQvdCw0LvQsNGB0LDQtNGLLtCe0Lsg0YTQvtC70LvQuNC60YPQu9Cw0LvQsNGA0LTQsNC9INC205nQvdC1INC60L7Qu9C70L7QudC00Ysg0LXRgNGC0ZbQvdC00ZbQu9C10YDQtNC10L0g0YLSsdGA0LDQtNGLLNCw0Lsg0L7RgdGLINCx0LXQt9C00ZYg0LHTqdC70ZbQutGC0LXRgNCz0LUg0LHTqdC70ZbQvyDRgtKx0YDQsNGC0YvQvSDRgdGL0YDRgtKb0Ysg0L/QsNGA0LXQvdGF0LjQvNCw0YHRi9C90LDQvSDRltGI0LrQtSDSm9Cw0YDQsNC5INCx06nQu9GW0LrRiNC10LvQtdGAINGC0LDRgNCw0LvQsNC00Ysu0KLQuNGA0LXQvtGG0LjRgiDQttCw0YHRg9GI0LDQu9Cw0YDRi9C90LDQvSDRgtKx0YDQsNC00Ysu0JHSsdC7INCx0LXQt9C00ZbSoyDQttKx0LzRi9GBINGW0YHRgtC10YPRltC90LUg0LnQvtC0INKb0LDQttC10YIu0KHQvtC90YvQvNC10L0g0pvQsNGC0LDRgCDQsNKb0YjRi9C7INC20LDRgdGD0YjQsNC70LDRgCDQsdCw0YAu0J7Qu9Cw0YAg0L/QsNGA0LDRgtCz0L7RgNC80L7QvdC00LDRgNGL0L0g06nQvdC00ZbRgNGD0LPQtSDSm9Cw0YLRi9GB0LDQtNGLLtKa0LDQu9Kb0LDQvdGI0LAg0LHQtdC30LTQtSDQutGW0YjQutC10L3RgtCw0Lkg0LDRgNGC0pvRiyDQttCw0pPRi9C90LTQsCDQsdGW0YDQvdC10YjQtSDSm9Cw0LvSm9Cw0L3RiNCwINC80LDSo9GLINCx0LXQt9C00LXRgNGWINC+0YDQvdCw0LvQsNGB0pvQsNC9LtCe0Lsg0LbQtdGA0LTQtSDQutCw0LvRjNGG0LjRgtC+0L3QuNC9INCz0L7RgNC80L7QvdC00LDRgNGL0L0g06nQvdC00ZbRgNC10LTRli7Qn9Cw0YDQsNGC0LPQvtGA0LzQvtC9INC80LXQvSDQutCw0LvRjNGG0LjRgtC+0L3QuNC9INCx0rHQuyDQsNKT0LfQsNC00LAg0LrQsNC70YzRhtC40Lkg0LTQtdKj0LPQtdC50ZbQvSDRgNC10YLRgtC10L8g0L7RgtGL0YDQsNGC0YvQvSDQs9C+0YDQvNC+0L3QtNCw0YAu0K/Sk9C90Lgg0pvQsNC90LTQsCDQutCw0LvRhtC40LnQtNGW0qMg0LTQtdKj0LPQtdC50ZbQvSDQutOp0YLQtdGA0ZbQvywg0YLSr9GB0ZbRgNGW0L8g0L7RgtGL0YDQsNGC0YvQvSDQs9C+0YDQvNC+0L3QtNCw0YAu0prQsNC90L3QsNC9INC60LDQu9GM0YbQuNC50LTRltKjINC00LXSo9Cz0LXQudGW0L0g0YLTqdC80LXQvdC00LXRgtGDINKv0YjRltC9INGB0q/QudC10LrRgtC10YDQtNC10L0g0LrQsNC70YzRhtC40LnQtNGW0qMg0YjRi9KT0YPRi9C9INGC0LXQttC10LnQtNGWLtCQ0Lsg0LrTqdGC0LXRgNGDINKv0YjRltC9INC60LDQu9GG0LjQudC00ZYg0YHSr9C50LXQutGC0LXRgNC00LXQvSDRiNGL0pPQsNGA0YvQvyzQttCw0YHRg9GI0LDQu9Cw0YDSk9CwINC10L3Rg9GW0L0g0LrSr9GI0LXQudGC0ZbQvyzQsNGB0pvQsNC30LDQvdC90LDQvSDRgdGW0qPRltGA0YPRltC9INCw0YDRgtGC0YvRgNGL0L8s0LHSr9C50YDQtdC60YLRltKjINC60LDQu9GM0YbQuNC50LTRliDQutC10YDRliDRgNC10LDQsdGB0L7RgNCx0YbQuNGP0LvQsNGD0YvQvSDQsNGA0YLRgtGL0YDQsNC00Ysu0prQsNC70pvQsNC90YjQsCDQsdC10LfRliDQsdC+0LnRi9C90YjQsCDQvNGL0L3QsNC90LTQsNC5INC/0LDRgtC+0LvQvtCz0LjRj9C70LDRgCDQsdC+0LvRg9GLINC80q/QvNC60ZbQvTrRgtC40YDQtdC+0LjQtNC40YIgKNKb0LDQu9Kb0LDQvdGI0LAg0LHQtdC30LTRltKjINKb0LDQsdGL0L3Rg9GLKSzQvtC90YvSoyDQutOp0LvQtdC80ZbQvdGW0qMg0LrRltGI0ZbRgNC10Y7RliDQvdC10LzQtdGB0LUg0rHQu9KT0LDRjtGLLiDSmtCw0LfQsNKb0YHRgtCw0L0g0LHQvtC50YvQvdGI0LAg0LDQu9GB0LDSmyDQutOp0L8g0YLQsNGA0LDSk9Cw0L0g0Y3Qv9C40LTQtdC80LjRj9C70YvSmyDQt9C+0LEg0LHQvtC70YPRiyDQvNKv0LzQutGW0L0uINCh0LXQsdC10LHRliDRgtC10qPRltC30LHQtdC9INGI0LXQutGC0LXRgdC/0LXQs9C10L0g0LDQudC80LDSmyDQsdC+0LvSk9Cw0L3QtNGL0pvRgtCw0L0g0LnQvtC0INCw0pPQt9Cw0pPQsCDQttC10YLRltGB0L/QtdC50LTRli7QkdGW0YDQsNKbINC+0L3Ri9KjINGI0LXRiNGW0LzRliDRgNC10YLRltC90LTQtSDRgtKx0LfQtNCw0YDQtNGL0qMg0LnQvtC00YLQsNC70YPRiyDQsdC+0LvRi9C/INGC0LDQsdGL0LvQsNC00YsuINCW0LDQu9C/0Ysg0pvQsNC70pvQsNC90YjQsCDQsdC10LfQtNGW0qMg0LrTqdC70LXQvNGW0L3RltKjINC60ZbRiNGW0YDQtdGO0ZYg0LzQtdC9INKx0LvSk9Cw0Y7Ri9C90YvSoyDRgdC10LHQtdCx0ZYg0LnQvtC00YLRi9KjINC20LXRgtGW0YHQv9C10YPRliDQsdC+0LvRi9C/INGC0LDQsdGL0LvQsNC00Ysu0prQsNC70pvQsNC90YjQsCDQsdC10LfQtNGW0qMg0LbQsNKT0LTQsNC50YvQvSDQsdGW0Lcg0L/QsNC70YzQv9Cw0YbQuNGP0LvQsNGDINCw0YDSm9GL0LvRiyDQsNC90YvSm9GC0LDRg9GL0LzRi9C30pPQsCDQsdC+0LvQsNC00Ysu0prQsNC70YvQv9GC0Ysg0LbQsNKT0LTQsNC50LTQsCDQvtC7INC606nRgNGW0L3QsdC10YPRliDQutC10YDQtdC6LtCf0LDQu9GM0L/QsNGG0LjRj9C70LDRgyDQutC10LfRltC90LTQtSDQvtC7INC/0LDQu9GM0L/QsNGG0LjRj9C70LDQvdCx0LDRg9GLINC60LXRgNC10Lou0JbSsdGC0YvQvdGDINCw0YDSm9GL0LvRiyDQvtC90YvSoyDSm9C+0LfSk9Cw0LvSk9GL0YjRgtGL0pPRi9C9LNC20rHQvNGB0LDSmyDQtdC60LXQvdGW0L0g0LDQvdGL0pvRgtCw0Lkg0LDQu9Cw0LzRi9C3LtCh0L7QvdGL0LzQtdC9INKb0LDRgtCw0YAg0pvQsNC70pvQsNC90YjQsCDQsdC10LfRltC9INKb0LDQvdC00LDSk9GLINCiMyDQttOZ0L3QtSDQojQsINGC0LjRgNC10L7RgtGA0L7Qv9GC0Ysg0LPQvtGA0LzQvtC90LTQsNGALNGB0YLQsNGC0LjQvdC00LXRgCDQvNC10L0g0LvQuNCx0LXRgNC40L0g0LTQtdKj0LPQtdC50ZbQvSDQsNC90YvSm9GC0LDRgyDQsNGA0pvRi9C70Ysg0LDQvdGL0pvRgtCw0LnQvNGL0Lcu0JzRi9GB0LDQu9GLINKb0LDQu9Kb0LDQvdGI0LAg0LHQtdC30LTRltKjINKb0YvQt9C80LXRgtGWINGC06nQvNC10L3QtNC10LPQtdC90LTQtSDQsNC00LDQvCDRgdCw0LvQvNCw0psg0pvQvtGB0LDQtNGLLNOZ0LvRgdGW0Lcs0YjQsNGA0YjQsNKj0pvRiyDQsdC+0LvQsNC00Ysu0JDQuyDQutC10YDRgdGW0L3RiNGWINKb0YvQt9C80LXRgtGWINCw0YDRgtKb0LDQvdC00LAg0LDQtNCw0Lwg0YHQsNC70LzQsNKbINC20L7Sk9Cw0LvRgtGL0L8s0LrTqdC30ZYg0YjQsNGA0LDRgdGL0L3QsNC9INGI0YvSk9GL0L8s0LbSr9C50LrQtdGB0ZYg0pvQvtC30pPRi9GIINC60LXQu9C10LTRli7QkdKx0Lsg05nRgNC40L3QtSDQsNKT0LfQsNC00LDSk9GLINC30LDRgiDQsNC70LzQsNGB0YPQtNGL0qMg0LHQsNGP0YMg0L3QtdC80LXRgdC1INGC0LXQtyDQsdC+0LvRg9GL0L3QsCDQsdCw0LnQu9Cw0L3Ri9GB0YLRiy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0" table:style-name="ce1">
            <text:p>915310</text:p>
          </table:table-cell>
          <table:table-cell office:value-type="string" table:style-name="ce1">
            <text:p>russian</text:p>
          </table:table-cell>
          <table:table-cell office:value-type="string" table:style-name="ce1">
            <text:p>Билет 39.&amp;lt;br /&amp;gt; 1.Ребенку 3 дня. Родился весом 3.200 кг, рост 50 см. Закричал сразу. На грудном вскармливании. В общем анализе мочи удельный вес низкий. Укажите норму удельного веса у данного ребенка и с чем это связано.&amp;lt;br /&amp;gt; 2. Ребенку 5 лет. находится на стационарном лечении в отделении реанимации длительное время. в общем анализе крови гемоглобин 93 г/л, эритроциты 3,3*10в 12/л, ЦП 0,8, лейкоциты 27,5 * 10 в 9/л, СОЭ 35 мм/ч, палочек 10, сегментоядерные 65, моноциты 6, лимфоциты 19. Дайте интерпретацию анализа крови.&amp;lt;br /&amp;gt;</text:p>
          </table:table-cell>
          <table:table-cell office:value-type="string" table:style-name="ce1">
            <text:p>MS4g0KMg0L3QvtCy0L7RgNC+0LbQtNC10L3QvdGL0YUg0LTQtdGC0LXQuSDQsiDQvtGB0L7QsdC10L3QvdC+0YHRgtC4INCyINC/0LXRgNCy0YvQtSDQtNC90Lgg0LbQuNC30L3QuCDRg9C00LXQu9GM0L3Ri9C5INCy0LXRgSDQvNC+0YfQuCDQvNC+0LbQtdGCINCx0YvRgtGMINC90LjQttC1INGH0LXQvCDRgyDQstC30YDQvtGB0LvRi9GFLCDQvdC+0YDQvNCw0LvRjNC90YvQuSDQtNC40LDQv9Cw0LfQvtC9INGD0LTQtdC70YzQvdC+0LPQviDQstC10YHQsCDQvNC+0YfQuCDRgyDQvdC+0LLQvtGA0L7QttC00LXQvdC90YvRhSDQv9GA0LjQvNC10YDQvdC+INC+0YIgMS4wMDIg0LTQviAxLjAxMiwg0YPRh9C40YLRi9Cy0LDRjyDRgtC+LCDRh9GC0L4g0YDQtdCx0LXQvdC60YMgMyDQtNC90Y8g0Lgg0L7QvSDQvdCwINCz0YDRg9C00L3QvtC8INCy0YHQutCw0YDQvNC70LjQstCw0L3QuNC4INC90LjQt9C60LjQuSDRg9C00LXQu9GM0L3Ri9C5INCy0LXRgSDQvNC+0YfQuCDQvNC+0LfQttC10YIg0LHRi9GC0Ywg0YHQstGP0LfQsNC9INGBOiAxLSDQs9C40LTRgNCw0YLQsNGG0LjQtdC5LCDQsiDQv9GA0LXQstGL0LUg0LTQvdC4INC/0L7RgdC70LUg0YDQvtC20LTQtdC90LjRjyDRgyDQvdC+0LLQvtGA0L7QttC00LXQvdC90YvRhSDRh9Cw0YHRgtC+INC90LDQsdC70Y7QtNCw0LXRgtGB0Y8g0YTQuNC30LjQvtC70L7Qs9C40YfQtdGB0LrQsNGPINC/0L7RgtC10YDRjyDQttC40LTQutC+0YHRgtC4INGH0YLQviDQvNC+0LbQtdGCINC/0YDQuNCy0L7QtNC40YLRjCDQuiDQsdC+0LvQtdC1INC90LjQt9C60L7QvNGDINGD0LTQtdC70YzQvdC+0LzRgyDQstC10YHRgyDQvNC+0YfQuCwgMi0g0L/RgNC+0LTRg9C60YLQuNCy0L3QvtGB0YLRjCDQv9C+0YfQtdC6LCDQv9C+0YfQutC4INC10YnQtSDRgNCw0LfQstC40LLQsNGO0YLRgdGPINC4INC80L7Qs9GD0YIg0L3QtSDQv9C+0LvQvdC+0YHRgtGM0Y4g0YTRg9C90LrRhtC40L7QvdC40YDQvtCy0LDRgtGMLCDQuNC3INC30LAg0L3QtdC30YDQtdC70L7RgdGC0Lgg0L/QvtGH0LXRh9C90YvRhSDQutCw0L3QsNC70YzRhtC10LIg0Lgg0L7RgdC+0LHQtdC90L3QvtGB0YLRj9C80Lgg0LLQvtC00L3QviDRjdC70LXQutGC0YDQvtC70LjRgtC90L7Qs9C+INC+0LHQvNC10L3QsC4gMy0g0L/QuNGC0LDQvdC40LUsINCz0YDRg9C00L3QvtC1INC80L7Qu9C+0LrQviDQuNC80LXQtdGCINCy0YvRgdC+0LrQvtC1INGB0L7QtNC10YDQttCw0L3QuNC1INCy0L7QtNGLINC4INC10YHQu9C4INC+0L0g0L/QvtC70YPRh9Cw0LXRgiDQtdCz0L4g0LTQvtGB0YLQsNGC0L7Rh9C90L4sINGN0YLQviDQvNC+0LbQtdGCINGB0L/QvtGB0L7QsdGB0YLQstC+0LLQsNGC0Ywg0L3QuNC30LrQvtC80YMg0YPQtNC10LvRjNC90L7QvNGDINCy0LXRgdGDINC80L7Rh9C4LiA8YnIgLz4NCjIuINCT0LXQvNC+0LPQu9C+0LHQuNC9IC0gOTPQsy/Quywg0L3QvtGA0Lwg0YPRgNC+0LLQtdC90Ywg0LTQu9GPINC00LXRgtC10Lkg0LIg0LLQvtC30YDQsNGB0YLQtSA1INC70LXRgi0gMTEwLTE0NSDQsy/Quywg0LIg0Y3RgtC+0Lwg0YHQu9GD0YfQsNC1INGD0LrQsNC30YvQstCw0LXRgiDQvdCwINCw0L3QtdC80LjRjiDRgNC10LfRg9C70YzRgtCw0YLQvtC8INC80L7QttC10YIg0LHRi9GC0Ywg0YHQstGP0LfQsNC90L3QviDRgSDRhdGA0L7QvS4g0LfQsNCx0L7Qu9C10LLQsNC90LjRj9C80LgsINC00LXRhNC40YbQuNGC0L7QvCDQttC10LvQtdC30LAsINC/0L7RgtC10YDRjyDQutGA0L7QstC4INC40LvQuCDQsiDRjdGA0LjRgtGA0L7Qv9C+0Y3Qt9C1LiDQrdGA0LjRgtGA0L7RhtC40YLRiyAzLDMqMTAg0LIgMTIv0LssINC90L7RgNC80LDQu9GM0L3Ri9C1INC30L3QsNGH0LXQvdC40Y8g0LTQu9GPINC00LXRgtC10Lkg0LIg0YLQsNC60L7QvCDQstC+0LfRgNCw0YHRgtC1INC/0YDQuNC80LXRgNC90L4gNC4wLTUuNSoxMCDQsiAxMi/Quywg0Y3RgtC+INGC0LDQuiDQttC1INGD0LrQsNC30YvQstCw0LXRgiDQvdCwINCw0L3QtdC80LjRji4g0KbQny0gMCw4LCDQvdC+0YDQvNCw0LvRjNC90YvQuSDQptCfLSAwLjg1LTEuMDUsICDQt9C90LDRh9C10L3QuNGPINCyINC00LDQvdC90L7QuSDQt9Cw0LTQsNGH0LUg0YPQutCw0LfRi9Cy0LDRjtGCINC90LAg0LPQuNC/0L7RhdGA0L7QvNC90YPRjiDQsNC90LXQvNC40Y4sINGF0LDRgNCw0LrRgtC10YDQvdGD0Y4g0LIg0L7RgdC90L7QstC90L7QvCDQtNC70Y8g0LTQtdGE0LjRhtC40YLQsCDQttC10LvQtdC30LAuINCb0LXQudC60L7RhtC40YLRiy0gMjcsNSoxMCDQsiA5L9C7LCDQsiDQtNCw0L3QvdC+0Lkg0LfQsNC00LDRh9C1INC80L7QttC90L4g0YPQstC40LTQtdGC0Ywg0YfRgtC+INGD0YDQvtCy0LXQvdGMINC70LXQudC60L7RhtC40YLQvtCyINCy0YvRiNC1INC90L7RgNC80YssINGC0L4g0LXRgdGC0Ywg0LvQtdC50LrQvtGG0LjRgtC+0LcsINCyINC90L7RgNC80LUg0LIg0LTQsNC90L3QvtC8INCy0L7Qt9GA0LDRgdGC0LUgNS4wLTE1LjAgKiAxMCDQsiA5L9C7LCDQvNC+0LbQtdGCINCz0L7QstC+0YDQuNGC0Ywg0L4g0LLQvtGB0L/QsNC70LjRgtC10LvRjNC90L7QvCDQv9GA0L7RhtC10YHRgdC1INCyINC+0YDQs9Cw0L3QuNC30LzQtSDQuNC70Lgg0YHRgtGA0LXRgdGB0LAg0LjQtyDQt9CwINGA0LXQsNC90LjQvNCw0YbQuNC4LiDQodCe0K0tINCd0L7RgNC80LDQu9GM0L3QvtC1INC30L3QsNGH0LXQvdC40LUg0LTQu9GPINC00LXRgtC10Lkg0YHQvtGB0YLQsNCy0LvRj9C10YIg0LTQviAxMCDQvNC8L9GHLCDQtdCz0L4g0YPQstC10LvQuNGH0LXQvdC40LUg0LzQvtC20LXRgiDQs9Cy0L7RgNC40YLRjCDQviDQvdCwINC90LDQu9C40YfQuNC1INCy0L7RgdC/LiDQv9GA0L7RhtC10YHRgdCwINC4INGCLtC0LiDQm9C10LnQutC+0YbQuNGC0LDRgNC90LDRjyDRhNC+0YDQvNGD0LvQsDog0L/QsNC70L7Rh9C60L7Rj9C00LXRgNC90YvQtSDQvdC10LnRgtGA0L7RhNC40LvRiyDQsiDQvdC+0YDQvNC1INC00L7Qu9C20L3RiyDQsdGL0YLRjCDQvtGCIDEg0LTQviA2INC/0YDQvtGG0LXQvdGC0L7Qsiwg0LAg0YHQtdCz0LzQtdC90YLQvtGP0LTQtdGA0L3Ri9C1IDQwLTcwINC/0YDQvtGG0LXQvdGC0L7Qsiwg0YPQstC10LvQuNGH0LXQvdC40LUg0L/QsNC70L7Rh9C60L7Rj9C00LXRgNC90YvRhSDQvNC+0LbQtdGCINGD0LrQsNC30YvQstCw0YLRjCDQvdCwINC60YPQutGD0Y4g0YLQviDQvtGB0YLRgNGD0Y4g0LjQvdGE0LXQutGG0LjRjiDQuNC70Lgg0LLQvtGB0L/QsNC70LXQvdC40LUuINCc0L7QvdC+0YbQuNGC0YsgNiDQv9GA0L7RhtC10L3RgtC+0LItINCyINC90L7RgNC80LUuINCb0LjQvNGE0L7RhtC40YLRiyAxOSDQv9GA0L7RhtC10L3RgtC+0LItINC90L7RgNC80LDQu9GM0L3QvtC1INC30L3QsNGH0LXQvdC40LUg0L/RgNC40LzQtdGA0L3QviAyMC00MCDQv9GA0L7RhtC10L3RgtC+0LIsINGC0YPRgiDQu9C40LzRhNC+0YbQuNGC0L7Qv9C10L3QuNGPLCDRgtCw0LrQuNC1INC/0L7QutCw0LfQsNGC0LXQu9C4INC80L7Qs9GD0YIg0YPQutCw0LfRi9Cy0LDRgtGMINC90LAg0L3QsCDRgdC90LjQttC10L3QuNC1INC70LjQvNGE0L7RhtC40YLQsNGA0L3QvtC5INCw0LrRgtC40LLQvdC+0YHRgtC4LiDQmNC90YLQtdGA0L/RgNC10YLQsNGG0LjRjzogICAgICAgICAgICAgICAgICAgICAgICAgINCjINCg0LXQsdC10L3QutCwINCw0L3QtdC80LjRjywg0LPQtdC80L7Qs9C70L7QsdC40L0g0Lgg0Y3RgNC40YLRgNC+0YbQuNGC0Ysg0L3QuNC20LUg0L3QvtGA0LzRiywg0YEg0LPQuNC/0L7RhdGA0L7QvNC90YvQvCDRgtC40L/QvtC8KNCm0J8pLCDQvNC+0LbQtdGCINGD0LrQsNC30YvQstCw0YLRjCDQvdCwINC00LXRhNC40YbQuNGCINC20LXQu9C10LfQsC4g0JvQtdC50LrQvtGG0LjRgtC+0Lcg0Lgg0LLRi9GB0L7QutC+0LUg0KHQntCtINCz0L7QstC+0YDQuNGCINC+INCy0L7RgdC/0LDQu9C40YLQtdC70YzQvdC+0Lwg0L/RgNC+0YbQtdGB0YHQtSDQuNC70Lgg0LjQvdGE0LXQutGG0LjQuCwg0LvQtdC50LrQvtGG0LjRgtCw0YDQvdCw0Y8g0YTQvtGA0LzRg9C70LAtINC+0L3QsCDQv9C+0LrQsNC30YvQstCw0LXRgiDRgdC80LXRidC10L3QuNC1INCy0LvQtdCy0L4gKNGD0LLQtdC70LjRh9C10L3QuNC1INC/0LDQu9C+0YfQutC+0Y/QtNC10YDQvdGL0YUg0L3QtdC50YLRgNC+0YTQuNC70L7QsiksINGH0YLQviDQvNC+0LbQtdGCINGD0LrQsNC30YvQstCw0YLRjCDRg9C20LUg0L3QsCDQvtGB0YLRgNC+0LUg0LLQvtGB0L/QsNC70LXQvdC40LUg0LjQu9C4INCx0LDQutGC0LXRgNC40LDQu9GM0L3Rg9GOINC40L3RhNC10LrRhtC40Y4u</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27" table:style-name="ce1">
            <text:p>915327</text:p>
          </table:table-cell>
          <table:table-cell office:value-type="string" table:style-name="ce1">
            <text:p>russian</text:p>
          </table:table-cell>
          <table:table-cell office:value-type="string" table:style-name="ce1">
            <text:p>Билет 39.&amp;lt;br /&amp;gt; 1.Ребенку 3 дня. Родился весом 3.200 кг, рост 50 см. Закричал сразу. На грудном вскармливании. В общем анализе мочи удельный вес низкий. Укажите норму удельного веса у данного ребенка и с чем это связано.&amp;lt;br /&amp;gt; 2. Ребенку 5 лет. находится на стационарном лечении в отделении реанимации длительное время. в общем анализе крови гемоглобин 93 г/л, эритроциты 3,3*10в 12/л, ЦП 0,8, лейкоциты 27,5 * 10 в 9/л, СОЭ 35 мм/ч, палочек 10, сегментоядерные 65, моноциты 6, лимфоциты 19. Дайте интерпретацию анализа крови.&amp;lt;br /&amp;gt;</text:p>
          </table:table-cell>
          <table:table-cell office:value-type="string" table:style-name="ce1">
            <text:p>MSkg0J3QvtGA0LzQsCDRg9C00LXQu9GM0L3QvtCz0L4g0LLQtdGB0LAg0LzQvtGH0Lgg0YMg0YDQtdCx0LXQvdC60LAgMS4wMDItMS4wMjAuINCd0LjQt9C60LjQuSDRg9C00LXQu9GM0L3Ri9C5INCy0LXRgSDQvNC+0YfQuCDRgyDRgNC10LHQtdC90LrQsCDRgdCy0Y/Qt9Cw0L0g0LHQvtC70YzRiNC40Lwg0YHQvtC00LXRgNC20LDQvdC40LXQvCDQsiDQvNC+0YfQtSDRgNC10LHQtdC90LrQsCDQstC+0LTRiywg0YEg0L3QuNC30LrQvtC5INCw0LrRgtC40LLQvdC+0YHRgtGMINCz0L7RgNC80L7QvdCwINCQ0JTQkyDQutC+0YLQvtGA0YvQuSDQtNC10LnRgdGC0LLRg9C10YIg0L3QsCDQtNC40YHRgtCw0LvRjNC90YvQtSDQutCw0L3QsNC70YzRhtGLINC/0L7Rh9C60Lgg0Lgg0LLQu9C40Y/QtdGCINC90LAg0YDQtdCw0LHRgdC+0YDQsdGG0LjRjiDQvdCw0YLRgNC40Y8g0Lgg0LLQvtC00YsgLCDQvdC10LTQvtGA0LDQt9Cy0LjRgtC+0YHRgtGMINC/0L7Rh9C10YfQvdC+0LPQviDQsNC/0L/QsNGA0LDRgtCwINC60L7RgNC+0YLQutCw0Y8g0L/QtdGC0LvRjyDQvdC10YTRgNC+0L3QsCwg0L3QtdC00L7RgNCw0LfQstC40YLRi9C5INGN0L/QuNGC0LXQu9C40Lkg0LTQuNGB0YLQsNC70YzQvdGL0YUg0LrQsNC90LDQu9GM0YbQtdCyINC/0L7Rh9C60LgsINC90LjQt9C60LDRjyDRgNC10LfQvtGA0LHRhtC40L7QvdC90LDRjyDRhNGD0L3QutGG0LjRjyDRgdCy0Y/Qt9Cw0L3QvdCw0Y8g0YEg0L3QtdC00L7RgNCw0LfQstC40YLQvtGB0YLRjNGOINC60LDQvdCw0LvRjNGG0LXQstC+0LPQviDQsNC/0L/QsNGA0LDRgtCwINC/0L7Rh9C60Lgg0L3QuNC30LrQvtC5INGE0LjQu9GM0YLRgNCw0YbQuNC+0L3QvdC+0Lkg0YHQv9C+0YHQvtCx0L3QvtGB0YLRjNGOINC4INC90LjQt9C60LjQvCDQutCw0L3QsNC70YzRhtC10LLRi9C8INC90LDQv9C+0LvQvdC10L3QuNC10LwgLCDQv9C+0YfQutC4INC90LUg0LzQvtCz0YPRgiDRjdGE0YTQtdC60YLQuNCy0L3QviDRhNC40LvRjNGC0YDQvtCy0LDRgtGMINC80L7Rh9GDIC4g0J3QsCDRjdGC0L4g0YLQsNC60LbQtSDQstC70LjRj9C10YIg0YHQvtC00LXRgNC20LDQvdC40LUg0LPRgNGD0LTQvdC+0LPQviDQvNC+0LvQvtC60LAg0LIg0LrQvtGC0L7RgNC+0Lwg0LHQvtC70YzRiNC+0LUg0LrQvtC70LvQuNGH0LXRgdCy0L4g0YHQvtC00LXRgNC20LDQvdC40Y8g0LLQvtC00YsgLiAgMikg0J/QviDQtNCw0L3QvdC+0LzRgyDQsNC90LDQu9C40LfRgyDQutGA0L7QstC4INC80L7QttC90L4g0YHQutCw0LfQsNGC0Ywg0YfRgtC+INCz0LXQvNC+0LPQu9C+0LHQuNC9INGDINGA0LXQsdC10L3QutCwINCyINC60YDQvtCy0Lgg0L/QvtC90LjQttC10L0sINGN0YDQuNGC0YDQvtGG0LjRgtGLINC/0L7QvdC40LbQtdC90YsgLCDRhtC/INC90L7RgNC80L7RhdGA0L7QvNC90LDRjyDQsNC90LXQvNC40Y8gLNC70LXQudC60L7RhtC40YLRiyDQv9C+0LLRi9GI0LXQvdGLICwg0YHQvtGNINC/0L7QstGL0YjQtdC90LAg0LzQvtC20LXRgiDQsdGL0YLRjCDQuNC3LdC30LAg0LLQvtGB0L/QsNC70LjRgtC10LvRjNC90L7Qs9C+INC/0YDQvtGG0LXRgdGB0LAg0LIg0L7RgNCz0LDQvdC40LfQvNC1LCDQv9Cw0LvQvtGH0LrQvtGP0LTQtdGA0L3Ri9C1INC/0L7QstGL0YjQtdC90YsgLCDRgdC10LPQvNC10L3RgtC+0Y/QtNC10YDQvdGL0LUg0L/QvtCy0YvRiNC10L3QvdGL0LUgINC80L7QvdC+0YbQuNGC0Ysg0LIg0L3QvtGA0LzQtSDQu9C40LzRhNC+0YbQuNGC0Ysg0L/QvtC90LjQttC10L3RiyDQn9C+INC00LDQvdC90YvQvCDQsNC90LDQu9C40LfQsNC8INC60YDQvtCy0Lgg0YDQtdCx0LXQvdC60LAg0LzQvtC20L3QviDRgdC60LDQt9Cw0YLRjCDQviDQvdCw0LvQuNGH0LjQuCDQstC+0YHQv9Cw0LvQuNGC0LXQu9GM0L3QvtCz0L4g0L/RgNC+0YbQtdGB0YHQsCAsINC4INC90LDQu9C40YfQuNC1INC90L7RgNC80L7RhdGA0L7QvNC90L7QuSDQsNC90LXQvNC40LguICAg</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 полные ответы. Нет конкретики.</text:p>
          </table:table-cell>
          <table:table-cell office:value-type="float" office:value="0" table:style-name="ce1">
            <text:p>0</text:p>
          </table:table-cell>
          <table:table-cell table:number-columns-repeated="16376"/>
        </table:table-row>
        <table:table-row table:style-name="ro1">
          <table:table-cell office:value-type="float" office:value="915347" table:style-name="ce1">
            <text:p>915347</text:p>
          </table:table-cell>
          <table:table-cell office:value-type="string" table:style-name="ce1">
            <text:p>russian</text:p>
          </table:table-cell>
          <table:table-cell office:value-type="string" table:style-name="ce1">
            <text:p>Билет 39.&amp;lt;br /&amp;gt; 1.Ребенку 3 дня. Родился весом 3.200 кг, рост 50 см. Закричал сразу. На грудном вскармливании. В общем анализе мочи удельный вес низкий. Укажите норму удельного веса у данного ребенка и с чем это связано.&amp;lt;br /&amp;gt; 2. Ребенку 5 лет. находится на стационарном лечении в отделении реанимации длительное время. в общем анализе крови гемоглобин 93 г/л, эритроциты 3,3*10в 12/л, ЦП 0,8, лейкоциты 27,5 * 10 в 9/л, СОЭ 35 мм/ч, палочек 10, сегментоядерные 65, моноциты 6, лимфоциты 19. Дайте интерпретацию анализа крови.&amp;lt;br /&amp;gt;</text:p>
          </table:table-cell>
          <table:table-cell office:value-type="string" table:style-name="ce1">
            <text:p>0JLQvtC/0YDQvtGBINC90L7QvNC10YAgLSAxOiDQndC+0YDQvNCw0LvRjNC90YvQuSDQv9C+0LrQsNC30LDRgtC10LvRjCDRg9C00LXQu9GM0L3QvtCz0L4g0LLQtdGB0LAg0LzQvtGH0Lgg0YMg0L3QvtCy0L7RgNC+0LbQtNC10L3QvdGL0YUg0YHQvtGB0YLQsNCy0LvRj9C10YIgMTAwMi0xMDE1LiDQn9GA0LjRh9C40L3QsNC80Lgg0L3QuNC30LrQvtCz0L4g0YPQtNC10LvRjNC90L7Qs9C+INCy0LXRgdCwINGDINC00LDQvdC90L7Qs9C+INGA0LXQsdC10L3QutCwINC80L7QttC10YIg0Y/QstC70Y/RgtGM0YHRjyAtINGE0LjQt9C40L7Qu9C+0LPQuNGH0LXRgdC60LDRjyDQvdC10LfRgNC10LvQvtGB0YLRjCjQutCw0L3QsNC70YzRhtGLINC/0L7Rh9C10Log0Lgg0YHQuNGB0YLQtdC80LAg0LrQvtC90YbQtdC90YLRgNC40YDQvtCy0LDQvdC40Y8g0LzQvtGH0Lgg0L3QtSDQv9C+0LvQvdC+0YHRgtGM0Y4g0YDQsNC30LLQuNGC0Ysg0YfRgtC+INC+0LPRgNCw0L3QuNGH0LjQstCw0LXRgiDRgdC/0L7RgdC+0LHQvdC+0YHRgtGMINC6INGA0LXQsNCx0YHQvtGA0LHRhtC40Lgg0LLQvtC00Ysg0Lgg0YDQsNGB0YLQstC+0YDQtdC90L3Ri9GFINCy0LXRidC10YHRgtCyKS4g0KLQsNC6INC20LUg0LLQvtC30LzQvtC20L3QviDRgyDQvdC10LPQviDQvdC40LfQutCw0Y8g0YfRg9Cy0YHRgtCy0LjRgtC10LvRjNC90L7RgdGC0Ywg0LDQvdGC0LjQtNC40YPRgNC10YLQuNGH0LXRgdC60L7Qs9C+INCz0L7RgNC80L7QvdCwIC0g0LrQvtGC0L7RgNGL0Lkg0L/QvtC80L7Qs9Cw0LXRgiDRg9C00LXRgNC20LjQstCw0YLRjCDQstC+0LTRgyDQsiDQvtGA0LPQsNC90LjQt9C80LUo0JrQvtC90YbQtdGC0YDQsNGG0LjQvtC90L3QsNGPINGE0YPQvdC60YbQuNGPINC/0L7Rh9C10Log0L3QtSDRgNCw0LfQstC40YLQsCkuINCg0LXQsdC10L3QvtC6INC90LAg0LPRgNGD0LTQvdC+0Lwg0LLRgdC60LDRgNC80LvQuNCy0LDQvdC40Lgg0LAg0LPRgNGD0LTQvdC+0LUg0LzQvtC70L7QutC+INGB0L7QtNC10YDQttC40YIg0LHQvtC70YzRiNC+0Lkg0L/RgNC+0YbQtdC90YIg0LLQvtC00YsgKDgwLTg4JSkg0YfRgtC+INGB0L3QuNC20LDQtdGCINC60L7QvdGG0LXQvdGC0YDQsNGG0LjRjiDRgdC+0LvQtdC5INCyINC80L7Rh9C1INGC0LXQvCDRgdCw0LzRi9C8INGD0LzQtdC90YzRiNCw0Y8g0LXQtSDRg9C00LXQu9GM0L3Ri9C5INCy0LXRgS4g0KHRgtC+0LjRgiDQvtGC0LzQtdGC0LjRgtGMINGH0YLQviDQsiDQv9C10YDQstGL0LUg0LTQvdC4INC20LjQt9C90Lgg0L/RgNC+0LjRgdGF0L7QtNC40YIg0LLRi9Cy0LXQtNC10L3QuNC1INC40LfQsdGL0YLQvtGH0L3QvtC5INC20LjQtNC60L7RgdGC0Lgg0LrQvtGC0L7RgNCw0Y8g0LHRi9C70LAg0L3QsNC60L7Qv9C70LXQvdCwINCy0L3Rg9GC0YDQuNGD0YLRgNC+0LHQvdC+INGH0YLQviDQv9GA0LjQstC+0LTQuNGCINC6INCy0YvQtNC10LvQtdC90LjRjiDRgNCw0LfQsdCw0LLQu9C10L3QvdC+0Lkg0LzQvtGH0LggLSDRhNC40LfQuNC+0LvQvtCz0LjRh9C10YHQutC40Lkg0LTQuNGD0YDQtdC3INC60L7RgtC+0YDRi9C5INC/0YDQvtC40YHRhdC+0LTQuNGCINCyINC/0LXRgNCy0YvQtSAyLTMg0LTQvdGPINC20LjQt9C90Lgg0L3QvtCy0L7RgNC+0LbQtNC10L3QvdC+0LPQvijQvNC+0YfQsCDQstGL0LTQtdC70Y/QtdGC0YHRjyDQsiDQsdC+0LvRjNGI0L7QvCDQvtCx0YzQtdC80LUg0L/RgNC4INGN0YLQvtC8INGB0L7QtNC10YDQttC40YIg0L3QuNC30LrRg9GOINC/0LvQvtGC0L3QvtGB0YLRjCku0JIg0LTQsNC90L3QvtC5INGB0LjRgtGD0LDRhtC40Lgg0YMg0YDQtdCx0LXQvdC60LAg0L/RgNC+0YLQtdC60LDRjtGCINC90L7RgNC80LDQu9GM0L3Ri9C1INGE0LjQt9C40L7Qu9C+0LPQuNGH0LXRgdC60LjQtSDQv9GA0L7RhtC10YHRgdGLINC60L7RgtC+0YDRi9C1INC90LUg0YLRgNC10LHRg9GO0YIg0YHRgNC+0YfQvdC+0LPQviDQstC80LXRiNCw0YLQtdC70YzRgdGC0LLQsCDRgdC+INCy0YDQtdC80LXQvdC10Lwg0L/QviDQvNC10YDQtSDRgdC+0LfRgNC10LLQsNC90LjRjyDQv9C+0YfQtdC6INC4INGD0LLQtdC70LjRh9C10L3QuNGOINC60L7QvdGG0LXQvdGC0YDQsNGG0LjQuCDQstC10YnQtdGC0YHRgtCyINCyINC/0LjRidC1INGD0LTQtdC70YzQvdGL0Lkg0LLQtdGBINC80L7Rh9C4INC90L7RgNC80LDQu9C40LfQuNGA0YPQtdGC0YHRjy48YnIgLz4NCtCS0L7Qv9GA0L7RgSDQvdC+0LzQtdGAIC0gMjog0LPQtdC80L7Qs9C70L7QsdC40L0gOTMg0LMv0LsgLSDQv9C+0L3QuNC20LXQvSDQvdC+0YDQvNCwINC00LvRjyDQtNC10YLQtdC5IDUg0LvQtdGCIDExMC0xNDAg0LMv0LssINGN0YDQuNGC0YDQvtGG0LjRgtGLIDMuMyoxMCDQsiAxMi/QuyAtINC00LDQvdC90YvQuSDQv9C+0LrQsNC30LDRgtC10LvRjCDQv9C+0L3QuNC20LXQvSDQvdC+0YDQvNCwIDQuMS00LjcsINCm0J8gLTAuOCAtINC/0L7QvdC40LbQtdC9INC90L7RgNC80LAg0YHQvtGB0YLQsNCy0LvRj9C10YIgMC44NS0xLjA1LCDQu9C10LnQutC+0YbQuNGC0YsgMjcuNSoxMC850Lsg0L/RgNC4INC90L7RgNC80LUgNC41LTEwKjEwINCyIDkv0LssINCh0J7QrSAzNdC80Lwv0Ycg0L/QvtCy0YvRiNC10L0g0LIg0L3QvtGA0LzQtSDRgdC+0YHRgtCw0LLQu9GP0LXRgiDQtNC+IDgtMTAgLNCb0LXQudC60L7RhtC40YLQsNGA0L3QsNGPINGE0L7RgNC80YPQu9CwOiDQv9Cw0LvQvtGH0LXQuiAxMCAt0L/QvtCy0YvRiNC10L3RiyDRgdC00LLQuNCzINCy0LvQtdCy0L4sINGB0LXQs9C80LXQvdGC0L7Rj9C00LXRgNC90YvQtSA2NSAtINCyINC90L7RgNC80LUg0L3QsCDRhNC+0L3QtSDRgdC00LLQuNCz0LAg0LLQu9C10LLQviwg0LzQvtC90L7RhtC40YLRiyA2IC0g0L3QvtGA0LzQsCjQvdC+0YDQvNCwIDItOCwg0LvQuNC80YTQvtGG0LjRgtGLIDE5LSDQv9C+0L3QuNC20LXQvdGLINCyINC90L7RgNC80LUg0YHQvtGB0YLQsNCy0LvRj9GO0YIgMzAtNTAu0JjRgdGF0L7QtNGPINC40Lcg0LDQvdCw0LvQuNC30LAg0LzQvtC20L3QviDRgdC00LXQu9Cw0YLRjCDQstGL0LLQvtC0INGH0YLQviDRgyDRgNC10LHQtdC90LrQsCDQs9C40L/QvtGF0YDQvtC80L3QsNGPINCw0L3QtdC80LjRjygg0L/QvtC90LjQttC10L3RiyDQptCfINCT0LXQvNC+0LPQu9C+0LHQuNC9INCt0YDQuNGC0YDQvtGG0LjRgtGLKS7Qm9C10LnQutC+0YbQuNGC0L7QtyDQuCDQv9C+0LLRi9GI0LXQvdC90YvQuSDQodCe0K0tINGP0LLQu9GP0Y7RgtGB0Y8g0L/RgNC40LfQvdCw0LrQsNC80LggINC40L3RhNC10LrRhtC40L7QvdC90L4t0LLQvtGB0L/QsNC70LjRgtC10LvRjNC90L7Qs9C+INC/0YDQvtGG0LXRgdGB0LAuINCh0LTQstC40LMg0LvQtdC50LrQvtGG0LjRgtCw0YDQvdC+0Lkg0YTQvtGA0LzRg9C70Ysg0LLQu9C10LLQviDRg9C60LDQt9GL0LLQsNC10YIg0L3QsCDQstC+0LfQvNC+0LbQvdC+0LUg0L3QsNGH0LvQuNGH0LjQtSDQsdCw0LrRgtC10YDQuNCw0LvRjNC90L7QuSDQuNC90YTQtdC60YbQuNC4LtCY0YHRgtC+0YnQtdC90LAg0LjQvNGD0L3QvdCw0Y8g0YHQuNGB0YLQtdC80LAuINCQ0L3QtdC80LjRjyDQuCDQstC+0YHQv9Cw0LvQuNGC0LXQu9GM0L3Ri9C5INC/0YDQvtGG0LXRgdGBINGC0YDQtdCx0YPQtdGCINC00LDQu9GM0L3QtdC50YjQtdC5INC00LjQsNCz0L3QvtGB0YLQuNC60Lgg0Lgg0LvQtdGH0LXQvdC40Y8u</text:p>
          </table:table-cell>
          <table:table-cell office:value-type="float" office:value="170348" table:style-name="ce1">
            <text:p>170348</text:p>
          </table:table-cell>
          <table:table-cell office:value-type="float" office:value="78" table:style-name="ce1">
            <text:p>78</text:p>
          </table:table-cell>
          <table:table-cell office:value-type="string" table:style-name="ce1">
            <text:p>2 ответ, не описаны показатели анализы крови , почему они высокие или низкие</text:p>
          </table:table-cell>
          <table:table-cell office:value-type="float" office:value="0" table:style-name="ce1">
            <text:p>0</text:p>
          </table:table-cell>
          <table:table-cell table:number-columns-repeated="16376"/>
        </table:table-row>
        <table:table-row table:style-name="ro1">
          <table:table-cell office:value-type="float" office:value="1067003" table:style-name="ce1">
            <text:p>1067003</text:p>
          </table:table-cell>
          <table:table-cell office:value-type="string" table:style-name="ce1">
            <text:p>russian</text:p>
          </table:table-cell>
          <table:table-cell office:value-type="string" table:style-name="ce1">
            <text:p>Билет 39.&amp;lt;br /&amp;gt; 1.Ребенку 3 дня. Родился весом 3.200 кг, рост 50 см. Закричал сразу. На грудном вскармливании. В общем анализе мочи удельный вес низкий. Укажите норму удельного веса у данного ребенка и с чем это связано.&amp;lt;br /&amp;gt; 2. Ребенку 5 лет. находится на стационарном лечении в отделении реанимации длительное время. в общем анализе крови гемоглобин 93 г/л, эритроциты 3,3*10в 12/л, ЦП 0,8, лейкоциты 27,5 * 10 в 9/л, СОЭ 35 мм/ч, палочек 10, сегментоядерные 65, моноциты 6, лимфоциты 19. Дайте интерпретацию анализа крови.&amp;lt;br /&amp;gt;</text:p>
          </table:table-cell>
          <table:table-cell office:value-type="string" table:style-name="ce1">
            <text:p>MS4g0J3QvtGA0LzQvtC5INGD0LTQtdC70YzQvdC+0LPQviDQstC10YHQsCDQtNC70Y8g0L3QvtCy0L7RgNC+0LbQtNC10L3QvdC+0LPQviDRgNC10LHQtdC90LrQsCDRj9Cy0LvRj9C10YLRgdGPINC/0L7QutCw0LfQsNGC0LXQu9GMINC60L7RgtC+0YDRi9C5INCy0LDRgNGM0LjRgNGD0LXRgtGB0Y8g0LIg0L/QtdGA0LXQtNC10LvQsNGFIDEwMDItMTAxOC4g0JIg0L7QsdGJ0LXQvCDQsNC90LDQu9C40LfQtSDQvNC+0YfQuCDRgyDQvdC+0LLQvtGA0L7QttC00LXQvdC90L7Qs9C+INGA0LXQsdC10L3QutCwINGD0LTQtdC70YzQvdGL0Lkg0LLQtdGBINC90LjQt9C60LjQuS4g0J7QsdGM0Y/RgdC90LXQvdC40LU6INCd0LjQt9C60LjQuSDRg9C00LXQu9GM0L3Ri9C5INCy0LXRgSDQsiDRjdGC0L7QvCDQstC+0LfRgNCw0YHRgtC1INC+0LHRg9GB0LvQvtCy0LvQtdC9INCw0L3QsNGC0L7QvNC+LdGE0LjQt9C40L7Qu9C+0LPQuNGH0LXRgdC60L7QuSDQvdC10LfRgNC10LvQvtGB0YLRjNGOINC/0L7Rh9C10LosINCwINC40LzQtdC90L3QviDQsiDRh9Cw0YHRgtC90L7RgdGC0Lgg0L3QtdC00L7RgdGC0LDRgtC+0YfQvdC+0Lkg0YHQv9C+0YHQvtCx0L3QvtGB0YLRjNGOINC/0L7Rh9C10YfQvdGL0YUg0LrQsNC90LDQu9GM0YbQtdCyINC6INC60L7QvdGG0LXQvdGC0YDQsNGG0LjQuCDQvNC+0YfQuC4g0JrQsNC90LDQu9GM0YbQtdCy0LDRjyDRgdC40YHRgtC10LzQsCDRgyDQvdC+0LLQvtGA0L7QttC00LXQvdC90YvRhSDQtdGJ0LUg0L3QtSDQv9C+0LvQvdC+0YHRgtGM0Y4g0YDQsNC30LLQuNGC0LAg0Log0LzQvtC80LXQvdGC0YMg0YDQvtC20LTQtdC90LjRjywg0LAg0L7RgdC+0LHQtdC90L3QviDQvNC10YXQsNC90LjQt9C80Ysg0L7QsdGA0LDRgtC90L7Qs9C+INCy0YHQsNGB0YvQstCw0L3QuNGPINCy0L7QtNGLINC4INGA0LDRgdGC0LLQvtGA0LXQvdC90YvRhSDQstC10YnQtdGB0YLQsiAoTmEsIENsLCDQvNC+0YfQtdCy0LjQvdCwKSwg0YfRgtC+INCyINGB0LLQvtGOINC+0YfQtdGA0LXQtNGMINGB0L3QuNC20LDQtdGCINC60L7QvdGG0LXQvdGC0YDQsNGG0LjQvtC90L3Rg9GOINGB0L/QvtGB0L7QsdC90L7RgdGC0Ywg0L3QtdGE0YDQvtC90L7Qsi4g0JrRgNC+0LzQtSDRgtC+0LPQviwg0LIg0Y3RgtC+0YIg0L/QtdGA0LjQvtC0INGDINGA0LXQsdC10L3QutCwINGC0LDQuiDQttC1INC80L7QttC10YIg0LHRi9GC0Ywg0L7Qs9GA0LDQvdC40YfQtdC90L3QvtC1INC/0L7RgtGA0LXQsdC70LXQvdC40LUg0LbQuNC00LrQvtGB0YLQuCwg0LLQvtC30LzQvtC20L3RiyDQv9C+0YLQtdGA0Lgg0YfQtdGA0LXQtyDQutC+0LbRgyDQuCDQtNGL0YXQsNGC0LXQu9GM0L3Ri9C1INC/0YPRgtC4LCDQsCDRgtCw0LrQttC1INC/0YDQtdC+0LHQu9Cw0LTQsNC10YIg0LrQsNGC0LDQsdC+0LvQuNC30LwsINGH0YLQviDQtNC+0L/QvtC70L3QuNGC0LXQu9GM0YLQvdC+INCy0LvQuNGP0LXRgiDQvdCwINGB0L7RgdGC0LDQsiDQvNC+0YfQuC4g0KLQsNC60LjQvCDQvtCx0YDQsNC30L7QvCwg0LTQsNC90L3QvtC1INGB0L7RgdGC0L7Rj9C90LjQtSDRj9Cy0LvRj9C10YLRgdGPINGE0LjQt9C40L7Qu9C+0LPQuNGH0LXRgdC60L7QuSDQvdC+0YDQvNC+0LkgKNC/0YDQuCDQvtGC0YHRg9GC0YHRgtCy0LjQuCDQtNGA0YPQs9C40YUg0L/QsNGC0L7Qu9C+0LPQuNGH0LXRgdC60LjRhSDQv9GA0L7RhtC10YHRgdC+0LIpLjxiciAvPg0KMi4g0KHRg9C00Y8g0L/QviDQsNC90LDQu9C40LfQsNC8INC80L7QttC90L4g0L/RgNC10LTQv9C+0LvQvtC20LjRgtGMINGH0YLQviDRgyDRgNC10LHQtdC90LrQsCDRgNCw0LfQstC40LvRgdGPINC+0YHRgtGA0YvQuSDQstC+0YHQv9Cw0LvQuNGC0LXQu9GM0L3Ri9C5INC/0YDQvtGG0LXRgdGBLiDQn9C+INCw0L3QsNC70LjQt9Cw0Lw6INCT0LXQvNC+0LPQu9C+0LHQuNC9IC0g0L3QuNC20LUg0L3QvtGA0LzRiyAoINCyINC90L7RgNC80LUgMTEwLTE0MNCzL9C7KSAtINGN0YLQviDQs9C+0LLQvtGA0LjRgiDQviDRgNCw0LfQstC40YLQuNC4INCw0L3QtdC80LjQuC4g0JLQutGD0L/QtSDRgSDRhtCy0LXRgtC+0LLRi9C8INC/0L7QutCw0LfQsNGC0LXQu9C10LwgMCw4IC0g0YMg0L/QsNGG0LjQtdC90YLQutC4INCz0LjQv9C+0YXRgNC+0LzQvdCw0Y8g0LDQvdC10LzQuNGPICjQstC+0LfQvNC+0LbQvdCwINC20LXQu9C10LfQvtC00LXRhNC40YbQuNGC0L3QsNGPINC40LvQuCDQsNC90LXQvNC40Y8g0YXRgNC+0L3QuNGH0LXRgdC60L7Qs9C+INC30LDQsdC+0LvQtdCy0LDQvdC40Y8pLiDQrdGA0LjRgtGA0L7RhtC40YLRiyDQvdC40LbQtSDQvdC+0YDQvNGLICgg0LIg0L3QvtGA0LzQtSDQvtGCIDQuMC01LDIpIC0g0L/QvtC00YLQstC10YDQttC00LDQtdGCINCw0L3QtdC80LjRji4g0JvQtdC50LrQvtGG0LjRgtGLINC/0L7QstGL0YjQtdC90YsgLSDQs9C+0LLQvtGA0LjRgiDQviDQvdCw0LvQuNGH0LjQtSDQstC+0YHQv9Cw0LvQuNGC0LXQu9GM0L3QvtCz0L4g0L/RgNC+0YbQtdGB0YHQsCDQsiDQvtGA0LPQsNC90LjQt9C80LUgLSDRgdC00LLQuNCzINC70LXQudC60L7RhtC40YLQsNGA0L3QvtC5INGE0L7RgNC80YPQu9GLINCy0LvQtdCy0L4gLS0+INCS0YvRgNCw0LbQtdC90L3Ri9C5INC70LXQudC60L7RhtC40YLQvtC3INGBINC90LXQudGC0YDQvtGE0LjQu9GM0L3Ri9C8INGB0LTQstC40LPQvtC8INCy0LvQtdCy0L4gKCDRgi7QuiDQu9C10LnQutC+0YbQuNGC0Ysg0L/QvtCy0YvRiNC10L3Riywg0L/QsNC70L7Rh9C10LogMTAsINGB0LXQs9C80LXQvdGC0L7Rj9C00LXRgNC90YvQtSA2NSkuINCf0L7QstGL0YjQtdC90L3QsNGPINCh0J7QrSAo0L3QvtGA0LzQsCAxMC0xNSkg0L/QvtC00YLQstC10YDQttC00LDQtdGCINGH0YLQviDQsiDQvtGA0LPQsNC90LjQt9C80LUg0L/RgNC+0LjRgdGF0L7QtNGP0YIg0LLRi9GA0LDQttC10L3QvdGL0LUg0LLQvtGB0L/QsNC70LjRgtC10LvRjNC90YvQtSDQv9GA0L7RhtC10YHRgdGLLiDQnNC+0L3QvtGG0LjRgtGLIDYsINC70LjQvNGE0L7RhtC40YLRiyAxOS0gIC0g0LTQsNC90L3Ri9C1INC/0L7QutCw0LfQsNGC0LXQu9C4INC80L7Qs9GDINC90LDQsdC70Y7QtNCw0YLRjNGB0Y8g0L/RgNC4INC+0YHRgtGA0YvRhSDQsdCw0LrRgtC10YDQuNCw0LvRjNC90YvRhSDQuNC90YTQtdC60YbQuNGP0YUg0L3QsCDRhNC+0L3QtSDQstGL0YDQsNC20LXQvdC90L7Qs9C+INC90LXQudGC0YDQvtGE0LjQu9GM0L3QvtCz0L4g0L7RgtCy0LXRgtCwLiDQn9GA0LXQtNC/0L7Qu9C+0LbQuNGC0LXQu9GM0L3Ri9C5INC00LjQsNCz0L3QvtC3OiDQs9C40L/QvtGF0YDQvtC80L3QsNGPINCw0L3QtdC80LjRjyDQstGB0LvQtdC00YHRgtCy0LjQtSDQtNC10YTQuNGG0LjRgtCwINC20LXQu9C10LfQsC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678" table:style-name="ce1">
            <text:p>914678</text:p>
          </table:table-cell>
          <table:table-cell office:value-type="string" table:style-name="ce1">
            <text:p>english</text:p>
          </table:table-cell>
          <table:table-cell office:value-type="string" table:style-name="ce1">
            <text:p>Ticket 39.&amp;lt;br /&amp;gt; 1. A 3 days old child was born with the weight of 3.200 kg, height 50 cm. He screamed right away. On breastfeeding. In the general analysis of urine, the specific gravity is 1002. Specify the rate of specific gravity for this child and what is it connected with.&amp;lt;br /&amp;gt; 2. At the appointment with the endocrinologist, a 10-year-old boy with a thyroid disease. Specify the normal size of the thyroid gland during palpation in this child?&amp;lt;br /&amp;gt;</text:p>
          </table:table-cell>
          <table:table-cell office:value-type="string" table:style-name="ce1">
            <text:p>MS4gaGVyZSwgdGhlIHdlaWdodCBvZiB0aGUgY2hpbGQgaXMgMy4ya2cgYW5kIGhlaWdodCBpcyA1MCBjbSAuIGFuZCBoZXJlIHRoZSBzcGVjaWZpYyBncmF2aXR5IG9mIHRoZSB1cmluZSBpcyAxMDAyIHdoaWNoIGlzIGxvdyBiZWNhdXNlIHRoZSBub3JtYWwgc3BlY2lmaWMgZ3Jhdml0eSBvZiB0aGlzIGFnZSBjaGlsZCBpcyAxMDAzLTEwMDUgYW5kIGhlcmUgaXMgbG93IHdoaWNoIGluZGljYXRlcyB0aGF0IHRoZSBjaGlsZCB1cmluZSBpcyBvdmVyIGRpbHV0ZWQgIHRoZW4gdGhlIG5vcm1hbCBvbmUgYW5kICB0aGlzIGNoaWxkIHNob3dzIGFub3RoZXIgcGhlbm9tZW5vbiBvZiBvdmVyIHRoaXJzdCB0aGF0IG1lYW5zIHRoZXJlIG1pbGsgbmVlZCBpcyB2ZXJ5IG11Y2ggaGlnaCBhcyBjb21wYXJlZGQgdG8gbm9ybWFsIGNoaWxkIHdoaWNoIHNob3cgYSBwcm9ibGVtIG9mIGRpYWJldGVzIGluc2NpcGlkdXMgLm90aGVyIGZhY3RvciBhdCB0aGlzIGFnZSBpcyBkZXBlbmRlbmN5IG9mIHRoZSBjaGlsZCBvbiAgb24gdGhlIGJyZWFzdGZlZWQgYW5kIGtpZG5leXMgYXJlIG5vdCBmdWxseSBkZXZlbG9wZWQgc28gdGhhdCB0aGV5IGNhbiBwZXJmb3JtIHRoZSBtZWNoYW5pc20gb2YgcmVhYnNvcnB0aW9uIC4gc29tZXRpbWVzIG1vdGhlciBpcyBvdmVyaHlkcmF0ZWQgbWVhbnMgd2F0ZXIgY29udGVudCBpbiB0aGUgbWlsayBpcyBoaWdoIGFuZCBhbHNvIHRoZSBuby4gb2YgZmVlZCBvZiB0aGUgYmFieSBpcyB2ZXJ5IGhpZ2ggLnNvbWV0aW1lcyB0aGUgZW52aXJvbm1lbnQgb3IgdGhlIHN1cnJvdW5kaW5nIGluIHdoaWNoIHRoZSBiYWJ5IGlzIGxpdmluZyBpcyBub3Qgc28gZ29vZCBsaWtlIHRlbXAuIG1lbmFzIHZlcnkgY29sZCBvciBzb21ldGltZXMgdGhlIHByb3BlciBudXRyaXRpb24gdGhhdCB0aGUgY2hpbGQgcmVxdWlyZSBpcyBub3QgbWVldGluZyB0aGUgZGVtYW5kIG9mIHRoZSBjaGlsZC4gICAgICAgICAgICAgICAgICAgICAgICAgICAgICAgICAgICAgICAgICAgICAgICAgICAgICAgICAgICAgICAgICAgICAgICAgICAgICAyLiB0aHlyb2lkIGdsYW5kIGlzIGEgYmlsb2JlZCBzdHJ1Y3R1cmUgdGhhdCBwcm9kdWNlIGhvcm1vbmUga25vd24gYXMgdGh5cm94aW5lICh0aGUgbm9ybWFsIHNpemUgb2YgdGhlIHRoeXJvaWQgZ2xhbmQgaW4gMTAgeWVhciBvbGQgYm95KCh0MyBhbmQgdDQpLiB0aHlyb2lkIGdsYW5kIGlzIHJlc3BvbnNpYmxlIGZvciB0aGUgcmVndWxhdGlvbiBvZiBtYW55IGltcG9ydGFudCBhY3Rpdml0eSBpbiBib2R5IGFuZCBhbHNvIGlzIGEgY3J1Y2lhbCBnbGFuZCBpbiBodW1hbiBib2R5IC4gc29tZXRpbWVzIHRoZSBkZWZpY2llbmN5IG9mIHRoZSBpb2RpbmUgaW4gdGhlIGRpb2V0IG9mIGFuIGluZGl2aWR1YWwgcmVkdWx0cyBpbiB0aGUgZ29pdHVyZSBtZW5hIHN0aGUgYWJub3JtYWwgc3dlbGxpbmcgb2YgdGhlIHRoeXJvaWQgZ2xhbmQgYW5kIGluIG1hbnkgY2FzZXMgdGVocmUgaXMgYSB0dW1vciB0aGUgZ2xhbmQgbGVhZHMgdG8gdGhlIHByb2R1Y3Rpb24gb2YgZXhjZXNzaXZlIGFtb3VudCBvZiBob3Jtb25lcy4gYWx0aG91Z2ggaGVyZSBpIGhhdmUgdG8gZGlzY3VzcyBhYm91dCB0aGUgbm9tYWwgc2l6ZSBvZiB0aGVlIHRoeXJvaWQgZ2xhbmQgaW4gMTAgeWVhciBvbGQgYm95IHdoaWNoIGlzIGdpdmVuIGJlbG93LiAgICAgICAgICAgICAgICAgICAgICAgICAgICAgICAgICAgICAgICAgICAgICAgICAgICAgICAgICAgICAgICAgICAgICAgICAgICAgICAgICAgICAgICAgICAgICAgICAgICAgICAgIDxiciAvPg0KICAgICAgIHRoeXJvaWQgdm9sdW1lIGlzIDMtNW1sLiAgICAgICAgICAgICAgICAgICAgICAgICAgICAgICAgICAgICAgICAgICAgICAgICAgICAgICAgICAgICAgICAgICAgICAgICAgICAgICAgICAgICAgICAgICAgICAgICAgIDxiciAvPg0KICAgICAgIDItM2NtIGluIGxlbmdodC4gICAgICAgICAgICAgICAgICAgICAgICAgICAgICAgICAgICAgICAgICAgICAgICAgICAgICAgICAgICAgICAgICAgICAgICAgICAgICAgICAgICAgICAgICAgICAgICAgICAgICAgICA8YnIgLz4NCiAgICAgICAwLjUtMWNtIGluIGJyZWFkdGguICAgICAgICAgICAgICAgICAgICAgICAgICAgICAgICAgICAgICAgICAgICAgICAgICAgICAgICAgICAgICAgICAgICAgICAgICAgICAgICAgICAgICAgICAgICAgICAgICAgICAgICAgICAgICAgICAgICAgICAgICAgICAgICA8YnIgLz4NCiAgICAgICAxLTEuNWNtIGluIHRoaWNrbmVzcy4gIA==</text:p>
          </table:table-cell>
          <table:table-cell office:value-type="float" office:value="170348" table:style-name="ce1">
            <text:p>170348</text:p>
          </table:table-cell>
          <table:table-cell office:value-type="float" office:value="82" table:style-name="ce1">
            <text:p>8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089" table:style-name="ce1">
            <text:p>915089</text:p>
          </table:table-cell>
          <table:table-cell office:value-type="string" table:style-name="ce1">
            <text:p>english</text:p>
          </table:table-cell>
          <table:table-cell office:value-type="string" table:style-name="ce1">
            <text:p>Ticket 39.&amp;lt;br /&amp;gt; 1. A 3 days old child was born with the weight of 3.200 kg, height 50 cm. He screamed right away. On breastfeeding. In the general analysis of urine, the specific gravity is 1002. Specify the rate of specific gravity for this child and what is it connected with.&amp;lt;br /&amp;gt; 2. At the appointment with the endocrinologist, a 10-year-old boy with a thyroid disease. Specify the normal size of the thyroid gland during palpation in this child?&amp;lt;br /&amp;gt;</text:p>
          </table:table-cell>
          <table:table-cell office:value-type="string" table:style-name="ce1">
            <text:p>MSB0aGUgbm9ybWFsIHJhbmdlIGZvciBzcGVjaWZpYyBncmF2aXR5IGluIHRoZSB1cmluZSBvZiBhIG5ld2Jvcm4gaXMgMTAwMSB0byAxMDA0IHNvIGEgc3BlY2lmaWMgZ3Jhdml0eSBvZiAxMDAyIGluIGEgMyBkYXkgb2xkIGNoaWxkIGlzIHdoaXRpbiB0aGUgbm9ybWFsIHJhbmdlIHRoZSB2YWx1ZSBpcyByZWxhdGVkIHRvIHRoZSBpbW1hdHVyaXR5IG9mIHRoZSByZW5hbCB0dWJ1bGUgYW5kIG9mIHRoZSBraWRuZXkgaW4gY29uY2VudHJhdGVkIHVyaW5lIHdoaWNoIGlzIHdoeSB0aGUgc3BlY2lmaWMgZ3Jhdml0eSBpcyB1c3VhbGx5IGxvdyBpbiBuZXcgYm9ybiBhcyB0aGUga2lkbmV5IG1hdHVyZSBvdmVyIHRpbWUgdGhlIHNwZWNpYyBncmF2aXR5IGlzIGdyYWR1YWxseSBpbmNyZWFzZSB0byByZWFjaCB0aGUgYWR1bHQgcmFuZ2UgaW1tYXR1cmUgcmVuYWwgaW5mZWN0aW9uIG5lb25hdGVzIGhhdmUgaW1tYXR1cmUga2lkbmV5IHRoYXQgYXJlIG5vdCB5ZXQgZWZmaWNlbnQgYXQgY29uY2VudHJhdGluZyB1cmluZSBlc3BlY2lhbGx5IGFmdGVyIGZpcnN0IGZldyBkYXlzIGFmdGVyIGJpcnRoIGhpZ2ggZmx1aWQgaW50YWtlIG9yIGJyZWFzdCBmZWVkaW5nIGJyZXN0IG1pbGsgaGFzIGxvdyBzb2x1dGUgbG9hZCBsZWFkaW5nIHRvIGRpbHV0ZSB1cmluZSBwaHlzaW9sb2dpY2FsIGFkYXB0YXRpb25zIGFmdGVyIGJpcnRoIG5lb25hdGVzIGV4cGVyaW5jZSBkaXVyZXNpcyBhcyB0aGVpciBib2R5IGFkYXB0IHRvIGxpZmUgb3V0c2lkZSB0aGUgd29tYiB1bmxlc3MgYWNjb21wYWluZWQgYnkgY2xpbmljYWwgc3ltcHRvbXMgZXhhbXBsZSBkZWh5ZHJhdGlvbiBvciBhYm5vcm1hbCBmZWVkaW5nIHRoZSBmaW5kaW5nIGlzIGxpa2VseSBwaHlzaW9sb2dpY2FsIGFuZCBub3QgY29uY2VybmluZyA8YnIgLz4NCjIgdGhlIG5vcm1hbCBzaXplIG9mIHRoZSB0aHlyb2lkIGdsYW5kIGR1cmluZyBwYWxwYXRpb24gaW4gYSAxMCB5ZWFyIG9sZCBib3kgaXMgdXB0byAxMCBncmFtcyBob3dldmVyIGl0IGlzIGltcG9ydGFudCB0byBub3RlIHRoZSBzaXplIG9mIHRoZSB0aHlyb2lkIGdsYW5kIGNhbiB2ZXJ5IGJhc2VkIG9uIHZhcmlvdXMgZmFjdG9ycyBzdWNoIGFzIGFnZSBzZXggYW5kIG92ZXJhbGwgaGVhbHRoIHRoZXJlZm9yZSB0aGUgZW5kb2NyaW5vbG9naXN0IHdpbGwgYWxzbyB0YWtlIGludG8gY29uc2lkZXJhdGlvbiB0aGUgaW5kaXZpZHVhbCBjaGFyYWN0ZXJzdGljcyBvZiB0aGUgY2hpbGQgYmVmb3JlIGRldGVybWluZyB0aGUgc2l6ZSBvZiB0aGUgdGh5cm9pZCBnbGFuZCBpcyBub3JtYWwgb3Igbm90IHRoZSB0aHlyb2lkIGdsYW5kIHNob3VsZCBub3QgYmUgcGFscGF0ZWQgaW4gaGVhbHRoeSBjaGlsZHJlbnMgb3IgaWYgcGFscGFibGUgaXQgc2hvdWxkIGZlZWwgc29mdCBzbW9vdGggYW5kIG5vbiB0ZW5kb3Igd2l0aG91dCB2aXNpYmxlIGVubGFyZ2VtZW50IHRoeXJvaWQgZGltZW5zaW9ucyB1bHRyYXNvdW5kIHJlZnJlbmNlcyBhdCAxMCB5ZWFyIG9sZCB0aGUgdXBwZXIgbGltaXQgb2YgdGhlIHRoeXJvaWQgdm9sdW1lIGlzIDEwIG1sIGVhY2ggbG9iZSBsZW5naHQgaXMgdHlwaWNhbGx5IDIgdG8gMyBjbSBhbmQgdGhlIHRoaWNrbmVzcyBpcyAwLjIgdG8gMC42IGNtIGEgcGFscGFibGUgb3IgZW5sYXJnZWQgdGh5cm9pZCBtYXkgaW5kaWNhdGUgcGF0aG9sZ3kgc3VjaCBhcyBnb2l0ZXIgZHVyIHRvIGlvZGluZSBkZWZlaW5jeSBvciBhdXRvaW1tdW5lIHRoeXJvaWQgZGlzZXNlIGxpa2UgaGFzaGltb3RvIG9yIGdyYXZlcyBkaXNlc2UgdGh5cm9pZCBub2R1bGVzIG9yIGluZmxhbW1hdGlvbiB0aHlyb2lkaXRzIGVuZG9jcmluZSBhYm5vcm1pbGl0eSBleGFtcGxlIGh5cG90aHlyb2lkaXNtIG9yIGh5cGVydGh5cm9pZGlzbSA=</text:p>
          </table:table-cell>
          <table:table-cell office:value-type="float" office:value="170348" table:style-name="ce1">
            <text:p>170348</text:p>
          </table:table-cell>
          <table:table-cell office:value-type="float" office:value="76" table:style-name="ce1">
            <text:p>7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837" table:style-name="ce1">
            <text:p>1066837</text:p>
          </table:table-cell>
          <table:table-cell office:value-type="string" table:style-name="ce1">
            <text:p>kazakh</text:p>
          </table:table-cell>
          <table:table-cell office:value-type="string" table:style-name="ce1">
            <text:p>Билет 40. &amp;lt;br /&amp;gt; 1.4 жасар қыз бала. Шағымы: тәбіеттінің өзгеруі және кіңдік аймағынын ауырсынуы тамақпен байланысты емес. Қарағанда: терісі ақшыл, тілі ылғалды,тілі ақшылмен өңезденуі, іші пальпация кезінде жұмсақ,ауырсынусыз, бауыр қалыпты, ұлкен нәжісісі өзгерісіз. Қандай зерттеулер жүргізу қажет? &amp;lt;br /&amp;gt; 2. 5 жасар бала. Шағымдары жиі несеп шығаруыңа ауырсынуымен, ішінің ауыруына, температурасының 38,5° жоғарлауына, әлсіздікке. Ауырғанына 3 күн болды. Несеп анализынде: белок- 0,099 г/л, лейкоциттер - 20-30 көз аймағында, бактериялар ++. Қандай бүйрек-несеп шығару жолдарының анатомо-физиологиялық ерекшеліктері осы патологиялық жағдайға әкеліу мұмкін? &amp;lt;br /&amp;gt;</text:p>
          </table:table-cell>
          <table:table-cell office:value-type="string" table:style-name="ce1">
            <text:p>MSDRgdKx0YDQsNKbOiDQn9Cw0YbQuNC10L3RgtGC0ZbSoyDQvdC10LPRltC30LPRliDRiNCw0pPRi9C80Ysg0YLQsNC80LDSmyDSm9Cw0LHRi9C70LTQsNGD0YvQvdCwINGC05nRg9C10LvRgdGW0Lcg0LDRg9GL0YDRgdGL0L3RgyDRgdC10LfRltC80ZYg0LbTmdC90LUg0YLRltC70LTRltKjINCx0LXRgtGW0L3RltKjINCw0pvRiNGL0Lsg0YLQsNGA0YLRg9GLLiDQkdKx0Lsg0LDRgdKb0LDQt9Cw0L0g0ZbRiNC10Log0LbQvtC70YvQvdC00LDSk9GLICDQsdKx0LfRi9C70YvRgdGC0LDRgNC00YvSoyDQsdCw0YAg0LXQutC10L3QtNGW0LPRltC9INC90LXQvNC10YHQtSDQuNC90YTQtdC60YbQuNGP0L3Ri9KjINCx0LDRgCDQsdC+0LvRgyDQvNKv0LzQutGW0L3QtNGW0LPRltC9INC606nRgNGB0LXRgtC10LTRli4g0JDQu9Cw0LnQtNCwINGW0Ygg0L/QsNC70L/QsNGG0LjRj9GB0Ysg0LDRg9GL0YDRgdGL0L3Rg9GB0YvQty4g0JbQsNC70L/RiyDQt9OZ0YAg0LbTmdC90LUg0pvQsNC9INCw0L3QsNC70LjQt9GWLCDQvdOZ0LbRltGBINCw0L3QsNC70LjQt9GWINCw0LvRi9C90YPRiyDSm9Cw0LbQtdGCLiDQndOZ0LbRltGBINC205nQvdC1INC305nRgCDQsNC90LDQu9C40LfRltC90ZbSoyDRgtKv0YAsINGC0q/RgdGWLCDQuNGW0YHRliwg0LrQvtC90YHQuNGB0YLQtdC90YbQuNGP0YHRi9C90YvSoyDTqdC30LPQtdGA0ZbRgdGC0LXRgNGW0L3RltKjINCx0L7Qu9GD0Ysg0LzSr9C80LrRltC9INC205nQvdC1ICDQv9Cw0YDQsNC30LjRgiwg0LHQsNC60YLQtdGA0LjRjyDQv9Cw0YLQvtCz0LXQvdC00LXRgNGWINC606nRgNGW0L3QtdC00ZYsINCw0Lsg0pvQsNC9INCw0L3QsNC70LjQt9GW0L3QtdC9INKb0LDQvSDQttCw0YHRg9GI0LDQu9Cw0YDRiyDQvNC10L0g0LjQvNC80YPQvdC00YvSmyDQttCw0YHRg9GI0LDQu9Cw0YDQtNGL0qMg06nQt9Cz0LXRgNGW0YHRltC9INCx0LDQudKb0LDQuSDQsNC70LDQvNGL0LcuINCe0LTQsNC9INCx06nQu9C10Log0YTQtdGA0LzQtdC90YLRgtC10YAg06nQt9Cz0LXRgNGW0YHRliDQti/QtSDRgi7QsSDQvNCw0qPRi9C30LTRiyDQutOp0YDRgdC10YLQutGW0YjRgtC10YDQtNGWINCx0LDSm9GL0LvQsNC5INCw0LvQsNC80YvQtyjQoS3RgNC10LDQutGC0LjQstGC0ZYg0LHQtdC70L7Quiwg0LPQtdC80L7Qs9C70L7QsdC40L0sINGN0YDQuNGC0YDQvtGG0LjRgiwg0YLRgNC+0LzQsdC+0YbQuNGCLCDQu9C10LnQutC+0YbQuNGCLCDQkNC70LDRgizQkNGB0LDRgijQsdCw0YPRi9GAINC/0LDRgtC+0LvQvtCz0LjRj9GB0YspLCDQsNC80LjQu9Cw0LfQsCwg0YPRgNC10LDQt9CwINC2L9C1INGCLtCxKSAg0J7QtNCw0L0g0LHTqdC70LXQuiDQvNKv0LzQutGW0L0g0LHQvtC70pPQsNC9INCz0LDRgdGC0YDQuNGCINC/0LXQvSDQvtC50YvSmyDQttCw0YDQsCDQsNGD0YDRg9GL0L3Ri9KjINGB0LXQsdC10L/RiNGW0YHRliAtIEgucHlsb3JpLdCz0LUg0YHRi9C90LDQvNCwOiDQpNCT0JTQoSDQsNGA0pvRi9C70Ysg0LHQuNC+0L/RgdC40Y8g0LDQu9GDINC90LXQvNC10YHQtSDQsdKx0Lsg0L/QsNGC0L7Qs9C10L3QtNGWINCx0LDQutGC0LXRgNC40Y/QvdGLINKb0LDQvSDQsNC90LDQu9C40LfRltC90LTQtSDQtNC1INCw0L3Ri9Kb0YLQsNGD0pPQsCDQsdC+0LvQsNC00YsuINCe0LTQsNC9INCx06nQu9C10Log0pvSsdGA0YHQsNKbINKb0YPRi9GB0YvQvdGL0qMg0YDQtdC90YLQs9C10L3QvtCz0YDQsNGE0LjRj9GB0Ysg0LzQtdC9INGD0LvRjNGC0YDQsNC00YvQsdGL0YHRgtGL0psg0LfQtdGA0YLRgtC10YPRliDQttKv0YDQs9GW0LfRltC70YPRliDSm9Cw0LbQtdGCLiDSmtCw0LbQtdGCINCx0L7Qu9KT0LDQvSDQttCw0pPQtNCw0LnQtNCwINCx0LDRgNC40Lkg0YHRg9C70YzRhNCw0YLRiyDRgNC10L3RgtCz0LXQvdC+0LrQvtC90YLRgNCw0YHRgtGC0Ysg0LfQsNGC0YvQvNC10L0g0LfQtdGA0YLRgtC10YMg0LbSr9GA0LPRltC30YPQs9C1INCx0L7Qu9Cw0LTRiy4g0JHSsdC7INOZ0LTRltGBINC606nQsdGW0L3QtdGB0LUg0LXRgNC10YHQtdC60YLQtdGA0LPQtSDSm9C+0LvQtNCw0L3Ri9C70LDQtNGLLCDQsdCw0LvQsNC70LDRgNKT0LAg0YHQuNGA0LXQui4gINCe0Lsg0pvQsNC90LTQsNC5INC00LAg0LHRltGAINCx0rHQt9GL0LvRi9GB0YLQsNGAINC80LXQvSDQt9Cw0pvRi9C80LTQsNC70YMsINGC0LDRgNGL0LvRgyDRgdC10LrRltC70LTRliDQsdCw0YDQu9GL0psg0L/QsNGC0L7Qu9C+0LPQuNGP0LvRi9KbINOp0LfQs9C10YDRltGB0YLQtdGA0LTRliDQutOp0YDRgdC10YLQtSDQsNC70LDQtNGLLiDQldCz0LXRgCDRgtCw0YDRi9C70YPQu9Cw0YAg0L3QtdC80LXRgdC1INOp0YLQtSDQsNC70LzQsNGD0YjRi9C70YvSmyjQvdC10L/RgNC+0YXQvtC00LjQvNC+0YHRgtGMKSAsINCw0pPQt9Cw0L3Ri9KjINC40L3RgtC40LzQsNGB0YvQvdGL0qMg0LHSsdC30YvQu9GD0Ysg0LHQvtC70YHQsCAtINC60L7QvdGC0YDQsNGB0YLRgtGLINC30LDRgtGC0YvSoyDRgdC+0Lsg0LDQudC80LDSm9GC0LAg0LbQuNC90LDSm9GC0LDQu9GL0L8g0pvQsNC70YvQvywg06nRgtGD0ZbQvdC00LUg0LrQtdC00LXRgNCz0ZYg0LHQsNGAINC10LrQtdC90LTRltCz0ZYg0LHQsNC50pvQsNC70LDQtNGLLCDQs9Cw0YHRgtGA0LjRgiDQvdC10LzQtdC1INC+0LnRi9KbINC20LDRgNCwINC60LXQt9GW0L3QtNC1IC0g0L3QuNGI0LAg0LrTqdGA0ZbQvdC10LTRli4gINCR0LDQu9Cw0LvQsNGA0LTQsCDQsNGB0pvQsNC30LDQvSDRltGI0LXQuiDQttC+0LvRiyDQsNGD0YDRg9C70LDRgNGL0L0g0YLRg9C00YvRgNGD0Ysg0LzSr9C80LrRltC9INC606nQv9GC0LXQs9C10L0g0L/RgNC+0LHQu9C10LzQsNC70LDRgCDQsdCw0YAuINCh0L7Qu9Cw0YDQtNGL0qMg0LHRltGA0ZYg0ZbRiCDSm9Cw0YLRgyDQvdC10LzQtdGB0LUg0LTQuNCw0YDQtdGP0pPQsCwg0LjQvdGE0LXQutGG0LjRj9KT0LAg0LHQtdC50ZbQvNC00ZbQu9GW0LouICAgICAgICA8YnIgLz4NCjxiciAvPg0KPGJyIC8+DQoyINGB0rHRgNCw0ps6INC/0LDRhtC40LXQvdGC0YLQtdC9INC+0LHRitC10LrRgtC40LLRgtGWINGC0LXQutGB0LXRgNGW0YEg0LrQtdC30ZbQvdC00LUg0LbTmdC90LUg0YHSsdGA0LDRgyDQutC10LfRltC90LTQtSDQsNGD0YvRgNGB0YvQvdGDINGB0LXQt9GW0LzQvNGW0LzQtdC9INC20q/RgNC10YLRltC9INC/0L7Qu9C40YPRgNC40Y8sINC40L3RgtC+0LrRgdC40LrQsNGG0LjQvtC90LTRi9KbINGB0LjQvdC00YDQvtC80pPQsCDQttCw0YLQsNGC0YvQvSDQttC+0pPQsNGA0Ysg0YLQtdC80L/QtdGA0LDRgtGD0YDQsCAoMzguNS3Sm9Cw0LHRi9C90YMg05nRgdC10YDRltC90LXQvSDQuNC80LzRg9C90LTRi9KbINC20q/QudC10L3RltKjINC20LDRg9Cw0LHRiy4pLCDTmdC70YHRltC30LTRltC6INCx0LDQudKb0LDQu9Cw0LTRiy4g0J3QtdGB0LXQvyDQsNC90LDQu9C40LfRltC90LTQtSDQutGW0YjRltCz0ZbRgNGW0Lwg0L/RgNC+0YLQtdC40L3Rg9GA0LjRjywg0LvQtdC50LrQvtGG0LjRgtGC0LXRgNC00ZbSoyDQttC+0pPQsNGA0Ysg0LHQvtC70YPRiyDSm9Cw0LHRi9C90YPQtNGL0qMg0LHQsNGAINC10LrQtdC90ZbQvdGW0qMg0LTTmdC70LXQu9GWLCDQsNC7INC+0qMg0L3TmdGC0LjQttC10LvRliDQsdCw0LrRgtC10YDQuNGPLSDQvtGB0Ysg0pvQsNCx0YvQvdGD0LTRi9KjINC90LXQs9GW0LfQs9GWINGB0LXQsdC10LHRli4gINCR0rHQtNCw0L0g0pvQvtGA0YvRgtGL0L3QtNGL0LvQsNC5INC305nRgCDRiNGL0pPQsNGA0YMg0LbQvtC70LTQsNGA0YvQvdGL0qMg0LjQvdGE0LXQutGG0LjRj9GB0YvQvNC10L0g0YjQsNC70LTRi9Kb0pvQsNC90YvQvdCwINGC0rHQttGL0YDRi9C8INC20LDRgdCw0Lkg0LDQu9Cw0LzRi9C3LiDQntGB0Ysg0L/QsNGC0L7Qu9C+0LPQuNGP0LvRi9KbINC20LDSk9C00LDQudKT0LAg05nQutC10LvQtdGC0ZbQvSDQkdCw0LvQsNC70LDRgNC00LDSk9GLINCx0q/QudGA0LXQui0g0L3QtdGB0LXQvyDRiNGL0pPQsNGA0YMg0LbQvtC70LTQsNGA0YvQvdGL0qMg0LXRgNC10LrRiNC10LvRltC60YLQtdGA0ZY6IDEu0J3QtdGB0LXQvyDRiNGL0pPQsNGA0YMg0LbQvtC70Ysg0pvRi9GB0pvQsCDTmdGA0ZYg0LTQuNCw0LzQtdGC0YDRliDQutGW0YjQutC10L3RgtCw0LkgKNC10YDQtdGB0LXQutGC0LXRgNC80LXQvSDRgdCw0LvRi9GB0YLRi9GA0pPQsNC90LTQsCkg0J7RgdGLINGB0LXQsdC10L/Qv9C10L0g0LHQsNC60YLQtdGA0LjRj9C80LXQvSDRiNCw0pvRi9GA0YvQu9KT0LDQvSDSm9Cw0LHRi9C90YMg0LHRltGA0LTQtdC9INC90LXRgdC10L8g0LbQvtC70LTQsNGA0YvQvdGL0qMg0YLQsNGA0YvQu9GD0YvQvdCwINOZ0LrQtdC70LPQtdC9LCDQsNGA0YLRi9C90YjQsCDQsNGD0YvRgNGB0YvQvdGDINGB0LXQt9GW0LzRltC90LUg05nQutC10LvQtNGWLiDQndC10YHQtdC/INGI0YvSk9Cw0YDRgyDQttKv0LnQtdGB0ZbQvdGW0qMg0pvRi9GB0pvQsNC70YvSk9GLINC60LXQtyDQutC10LvQs9C10L0g0LHQsNC60YLQtdGA0LjRj9C90Ysg0YLQtdC3INC20rHSm9GC0YvRgNGL0L8g0LDQu9GDINC80q/QvNC60ZbQvdC00ZbQs9GW0L0g0LbQvtKT0LDRgNGL0LvQsNGC0LDQtNGLLiAgMi7SmtC+0YDSk9Cw0L3Ri9GIINKb0YvQt9C80LXRgtGWINGC0L7Qu9GL0psg0pvQsNC70YvQv9GC0LDRgdGL0L8g0q/Qu9Cz0LXRgNC80LXQs9C10L0sINGI0YvRgNGL0YjRgtGLINKb0LDQsdCw0YLRiywg0Y3Qv9C40YLQtdC70LjQudGWINC20rHSm9CwLCDQt9Cw0pvRi9C80LTQsNC70YPSk9CwINCx0LXQudGW0LwsINC/0LDRgtC+0LPQtdC90LTRliDQvNC40LrRgNC+0YTQu9C+0YDQsNC00LDQvSDQvdC10LzQtdGB0LUg0LHQsNC60YLQtdGA0LjRj9C00LDQvSDRgdCw0pvRgtCw0YMg0LzQsNKb0YHQsNGC0YvQvdC00LDSk9GLINGI0YvRgNGL0Ygg0LHTqdC70ZbQvdGD0ZYg0LDQty4g0J3QtdGB0LXQvy3QttGL0L3Ri9GBINC20L7Qu9GLINGC0L7Qu9GL0psg0LzQuNC60YDQvtGE0LvQvtGA0LDRgdGL0L0g0pvQsNC70YvQv9GC0LDRgdGC0YvRgNGL0L8g0q/Qu9Cz0LXRgNC80LXQs9C10L0uICAgMy4g0JHSr9C50YDQtdC60YLRltKjINC10YDQtdGB0LXQutGC0LXRgNC80LXQvSDRgdCw0LvRi9GB0YLRi9GA0pPQsNC90LTQsCDRgtOp0LzQtdC90LPRliDRiNC10LrQsNGA0LDRgdGL0L3Ri9KjINGC06nQvNC10L3RltGA0LXQuiDQvtGA0L3QsNC70LDRgdGD0YsuINCe0LsgNC01INCx0LXQuyDQvtC80YvRgNGC0pvQsNGB0Ysg0LTQtdKj0LPQtdC50ZbQvdC1INGB05nQudC60LXRgSDQutC10LvQtdC00ZYuINKa0LDQvdGI0LDQu9GL0pvRgtGLINC20LDSm9GL0L0g0L7RgNC90LDQu9Cw0YHRgdCwLCDRgdC+0L3RiNCw0LvRi9Kb0YLRiyDQsdCw0LrRgtC10YDQuNGP0L3Ri9KjINCx0q/QudGA0LXQutGC0ZYg0LTQtSDQt9Cw0pvRi9C80LTQsNC/LCDSm9Cw0LHRi9C90LTRi9GA0YMg0LzSr9C80LrRltC90LTRltCz0ZYg0LbQvtKT0LDRgNGLLiDQnNGL0YHQsNC70Ysg0YbQuNGB0YLQuNGCINC90LXQvNC10YHQtSDQv9C40LXQu9C+0L3QtdGE0YDQuNGCLCDQuNC90YTQtdC60YbQuNGPINOp0YDQu9C10LzQtdC70ZYg0LbTmdC90LUg0YLTqdC80LXQvdC00LXQvNC10LvRliDQttC+0LvQvNC10L0g0YLSr9GB0YPRliDQvNKv0LzQutGW0L0uINOo0YDQu9C10LzQtdC70ZYg0LbQvtC7IC0g0L/QsNGC0L7Qs9C10L3QvdGW0qMg0YHRi9GA0YLSm9GLINC90LXRgdC10L8g0YjRi9KT0LDRgNGDINC20L7Qu9GL0L3QsNC9INC10L3Rg9GWLiDQotOp0LzQtdC90LTQtdC80LXQu9GWINC20L7QuyDQutC10LfRltC90LTQtSDRltGI0LXQutGC0ZbSoyDSm9Cw0LvRi9C/0YLRiyDQvNC40LrRgNC+0YTQu9C+0YDQsNGB0YvQvdCwINC20LDRgtCw0YLRi9C9INCx0LDQutGC0LXRgNC40Y/Qu9Cw0YAg0L3QtdGB0LXQvyDRiNGL0pPQsNGA0YMg0LbSr9C50LXRgdGW0L3QtSAsINCx0q/QudGA0LXQutC60LUg0YLSr9GB0LXQtNGWLihlLmNvbGlpKSDQodC10LHQtdCx0ZYg0L7Qu9Cw0YAg0q/RiNGW0L0g0LbQsNKT0YvQvNC00Ysg0LbQsNKT0LTQsNC5INKb0LDQu9GL0L/RgtCw0YHSm9Cw0L0g0LHQvtC70YPRiyDQvNKv0LzQutGW0L0uINCW0LDSk9GL0LzQtNGLINC20LDSk9C00LDQudC00Ysg0pvQsNC70YvQv9GC0LDRgdGC0YvRgNGD0YjRiyDQsNCz0YDQtdGB0YHQuNGPINGE0LDQutGC0L7RgNC70LDRgNGLOiDRgdGD0YvSmyDRgtC40Y4sINCx0LDRgdKb0LAg0LbSr9C50LUg0L/QsNGC0L7Qu9C+0LPQuNGP0LvQsNGA0YvQvdGL0qMg0LDRgdKb0YvQvdGL0YHRgtCw0YDRiyDQttOZ0L3QtSDQuNC80LzRg9C90LjRgtC10YIg0YLTqdC80LXQvdC00LXRg9GWLiAg0J7Sk9Cw0L0g0pvQvtGB0LAg0LHSr9C50YDQtdC60YLRltKjINKb0rHRgNGL0LvRi9C80LTRi9KbINKb0LDQsdCw0YLRgtCw0YDRiyDQvNC10L0gINGE0LjQu9GM0YLRgNCw0YbQuNGP0LvRi9KbLCDQutCw0L3QsNC70LTRi9KbINGA0LXQsNCx0YHQvtGA0LHRhtC40Y/Qu9GL0psg0LbTmdC90LUg0YHQtdC60YDQtdGG0LjRj9C70YvSmyDRhNGD0L3QutGG0LjRj9GB0Ysg05nQu9GWINGC0L7Qu9GL0pPRi9C80LXQvSDQttC10YLRltC70ZbQvyDSr9C70LPQtdGA0LzQtdCz0LXQvS4g05jRgNC40L3QtSDQttCw0qPQsCDRgtGD0YvQu9KT0LDQvSDQvdOZ0YDQtdGB0YLQtdC70LXRgNC80LXQvSDRgdCw0LvRi9GB0YLRi9GA0pPQsNC90LTQsCA1INC20LDRgdGC0LDSk9GLINC/0LDRhtC40LXQvdGC0YLQtSDQsdGW0YDRiNCw0LzQsCDQttC10YLRltC70LPQtdC9LCDQsdGW0YDQsNKbINC+0Lsg0LXRgNC10YHQtdC60YLQtdGA0LTQtdCz0ZbQtNC10Lkg0LHSr9C50YDQtdC60YLRltKjINGC0L7Qu9GL0psg0YTRg9C90LrRhtC40Y/RgdGL0L0g0LDRgtKb0LDRgNCwINCw0LvQvNCw0LnQtNGLL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1.Несеп шығару жолы ? қысқа әрі диаметрі кішкентай (ересектермен салыстырғанда)-жауап толық емес. Қуық туралы мәлімет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850" table:style-name="ce1">
            <text:p>1066850</text:p>
          </table:table-cell>
          <table:table-cell office:value-type="string" table:style-name="ce1">
            <text:p>kazakh</text:p>
          </table:table-cell>
          <table:table-cell office:value-type="string" table:style-name="ce1">
            <text:p>Билет 40. &amp;lt;br /&amp;gt; 1.4 жасар қыз бала. Шағымы: тәбіеттінің өзгеруі және кіңдік аймағынын ауырсынуы тамақпен байланысты емес. Қарағанда: терісі ақшыл, тілі ылғалды,тілі ақшылмен өңезденуі, іші пальпация кезінде жұмсақ,ауырсынусыз, бауыр қалыпты, ұлкен нәжісісі өзгерісіз. Қандай зерттеулер жүргізу қажет? &amp;lt;br /&amp;gt; 2. 5 жасар бала. Шағымдары жиі несеп шығаруыңа ауырсынуымен, ішінің ауыруына, температурасының 38,5° жоғарлауына, әлсіздікке. Ауырғанына 3 күн болды. Несеп анализынде: белок- 0,099 г/л, лейкоциттер - 20-30 көз аймағында, бактериялар ++. Қандай бүйрек-несеп шығару жолдарының анатомо-физиологиялық ерекшеліктері осы патологиялық жағдайға әкеліу мұмкін? &amp;lt;br /&amp;gt;</text:p>
          </table:table-cell>
          <table:table-cell office:value-type="string" table:style-name="ce1">
            <text:p>MSDRgdGD0YDQsNKbINCd0LDRg9Kb0LDRgSA0INC20LDRgdCw0YAg0pvRi9C3INCx0LDQu9CwINC80YvQvdCw0L3QtNCw0Lkg0YjQsNKT0YvQvNC00LDRgNC80LXQvSDQutC10LvQs9C10L0g0YLTmdCx0LXRgtGW0L3RltKjINOp0LfQs9C10YDRg9GWINC60ZbQvdC00ZbQuiDQsNC50LzQsNKT0YvQvdGL0qMg0LDRg9GL0YDRgdGL0L3Rg9GLINGC0LDQvNCw0psg0L/QtdC9INCx0LDQudC70LDQvdGL0YHRgtGLINC10LzQtdGBLtKa0LDRgNCw0pPQsNC90LTQsCDRgtC10YDRltGB0ZYg0LDSm9GI0YvQuyDRgtGW0LvRliDRi9C70pPQsNC70LTRiyzRgtGW0LvRliDQsNKb0YjRi9C7INC80LXQvSDTqdKj0LXQt9C00LXQvdGDINGW0YjRliDQv9Cw0LvQv9Cw0YbQuNGPINC60LXQt9GW0L3QtNC1INC20YPQvNGB0LDSmyzQsNGD0YvRgNGB0YvQvdGL0YHRgdGL0Lcg0LHQsNGD0YvRgCDSm9Cw0LvRi9C/0YLRiyzSr9C70LrQtdC9INC905nQttGW0YHRliDTqdC30LPQtdGA0ZbRgdGB0ZbQtyDQtNC10L8g0YLRg9GALiDQkdCw0LvQsNC90YvSoyDRgtOZ0LHQtdGC0ZYg0LHRg9C30YvQu9KT0LDQvSDQttOZ0L3QtSDQutGW0L3QtNGW0Log0LDQudC80LDSk9GL0L3QtNCw0pPRiyDQsNGD0YvRgNGB0YvQvdGD0pPQsCDQsdCw0LnQu9Cw0L3Ri9GB0YLRiyDQvdOZ0LbRltGBINGC0LDQu9C00LDRg9GL0L3QsCDQttGW0LHQtdGA0LXQvNGW0Lcg0LDQuyDRgtGW0LvRltC90YvSoyDQsNKb0YjRi9C7INOp0qPQtdC30LTQtdC90YPRliDQsdCw0YAg0LHRg9C7INC00LXQs9C10L0g0LDRgdKb0LDQt9Cw0L0g0ZbRiNC10Log0LbQvtC70LTQsNGA0YvQvdC00LAg0pvQsNC90LTQsNC50LTQsCDQsNGD0YvRgtKb0YMg0L3QtdC80LXRgdC1INC40L3RhNC10LrRhtC40Y8g0LHQsNGAINCx0L7Qu9GD0YvQvSDQutC+0YDRgdC10YLRg9GWINC80YPQvNC60ZbQvS7QndOZ0LbRltGBINGC0LDQu9C00LDRg9GLINGC0YPRgNC70ZYg0YHQuNC80L/RgtC+0LzQtNCw0YDQtNGLINGC0YPQtNGL0YDRg9GLINC80YPQvNC60ZbQvSDQvdOZ0LbRltGB0YLQtSDRgtKv0YDQu9GWINC/0LDRgtC+0LPQtdC90LTQtdGA0LTRltKjLNCx0LDQutGC0LXRgNC40Y/Qu9Cw0YDQtNGL0qMs0LHQsNGB0pvQsNC00LAg0LDRg9GL0YLSm9GD0LvQsNGA0LTRi9KjINCx0LDRgCDQtdC60LXQvdGW0L0g0LDQvdGL0pvRgtCw0YPSk9CwINC80YPQvNC60ZbQvdC00ZbQuiDQsdC10YDQtdC00ZYu0JHQsNC70LDRgNC00LAg0LDRgdKb0LDQt9Cw0L0g0LDRg9GA0YPRi9C9INGC0YPQtNGL0YDQsNGC0YvQvSDQutOp0L/RgtC10LPQtdC9INC00LXQvdGB0LDRg9C70YvSmyDQv9GA0L7QsdC70LXQvNCw0LvQsNGA0Ysg0LHQsNGALtCh0L7Qu9Cw0YDQtNGL0qMg0LHRltGA0LXRg9GWINGW0YjQtdC60YLQtdCz0ZYg0LDRg9GL0YLSm9GD0LvQsNGAINGW0Ygg0pvQsNGC0YPRiyzQutC+0LvQuNGCLNC00LjQsNGA0LXRjyzRgtGW0YLRltGA0LrQtdC90LPQtdC9INGW0YjQtdC6INC40L3RhNC10LrRhtC40Y/Qu9Cw0YDRiyDQsdGD0LnRgNC10Log0L3QtdC80LXRgdC1INKb0YPRi9KbINC40L3RhNC10LrRhtC40Y/Qu9Cw0YDRi9C9LNKb0YPQu9Cw0psg0L3QtdC80LXRgdC1INC60LXRg9C00LUg0LjQvdGE0LXQutGG0LjRj9C70LDRgNGL0L0g0LbQsNGC0pvRi9C30LDQvNGL0Lcg0LbTmdC90LXQu9C1INCw0LfRi9KbINGC0YPQu9GW0LrQv9C10L0g0L/RgNC+0LHQu9C10LzQsCDRgtCw0LzQsNC60L/QtdC9INGD0LvQsNC90YMg0ZbRiNGC0ZbSoyDRgdGL0YDRgtGL0L3QtNCw0pPRiyDQv9GA0L7QsdC70LXQvNCwINGW0YjRgtGW0qMg0LHRg9C70YjRi9KbINC10YLRgtC10YDRltC90ZbSoyDQutC10YDQvdC10YPRliAs0LzQuNCz0YDQtdC90Ywg0YXQuNGA0YPRgNCz0LjRj9C70YvSmyDQv9GA0L7QsdC70LXQvNCw0LvQsNGAINCw0L/QtdC90LTQuNGG0LjRgizRltGI0LXQuiDTqdGC0ZbQvNGB0ZbQt9C00ZbQs9GWLtCV0LPQtdGA0LTQtSDQvNOZ0YHQtdC70LUg0LDQudKb0YvQvSDQsdC+0LvRgdCwINC10YjQutCw0L3QtNCw0Lkg0YHRi9C90LDSmyDSm9Cw0LbQtdGCINCx0L7Qu9C80LDQudC00Ysu0JXQs9C10YAg0YHRi9C90LDSm9GC0LDRgCAg0pvQsNC20LXRgiDQsdC+0LvQsNGC0L0g0LHQvtC70YHQsDo8YnIgLz4NCtKa0LDQvSDQsNC90LDQu9C40LfRiyzQt9OZ0YAg0LDQvdCw0LvQuNC30Yss0L3TmdC20ZbRgSDRgtCw0LvQtNCw0YPRiyDRgNC10L3RgtCz0LXQvSDRgdOZ0YPQu9C10YDRliDQvtGB0YvQu9Cw0YDQtNGLINC20YPRgNCz0ZbQt9GW0L8g0LfQtdGA0YLRgtC10YPQs9C1INCx0L7Qu9Cw0LTRiyA8YnIgLz4NCjIg0YHRg9GA0LDSmzog0JbQuNGWINGI0YvSk9Cw0YDQsNGC0YvQvSDQt9OZ0YAg0LDRg9GA0YPRiyzRltGI0YLRltKjINCw0YPRgNGD0Ysg0LTQtdC90LUg0pvRi9C30YPRi9C90YvSoyDQutOp0YLQtdGA0LvQtdGDINC205nQvdC1INCx0LDRgdKb0LDQtNCwINC305nRgCDRiNGL0pPQsNGA0YMg0LHQtdC70LPRltC70LXRgNGWINCx0LDRgCA1INC20LDRgdCw0YAg0L3QsNGD0pvQsNGB0YLQsCDQsNKb0YPRi9C3LNCx0LDQutGC0LXRgNC40Y/Qu9Cw0YDQtNGL0qMg0LHQvtC70YPRiywg0LvQtdC50LrQvtGG0LjRgtGC0LXRgNC00ZbSoyDQsdC+0LvRg9GLINC305nRgCDRiNGL0pPQsNGA0YMg0LbQvtC70LTQsNGA0YvQvdGL0qMg0LjQvdGE0LXQutGG0LjRj9GB0YvQvSDQutOp0YDRgdC10YLQtdC00ZYuINCa0ZbRiNC60LXQvdGC0LDQuSDQsdCw0LvQsNC70LDQtNCwINC30ZbRgCDRiNGL0pPQsNGA0YMg0LbRg9C50LXRgdGW0L3RltKjINCw0L3QsNGC0L7QvNCwINGE0LjQt9C40L7Qu9C+0LPQuNGP0LvRi9KbINC10YDQtdC60YjQtdC70ZbQutGC0LXRgNGWOtC+0LvQsNGA0LTQsCDSm9GL0YHSm9CwINGD0YDQtdGC0YDQsCzQsNC90YPRgdGC0YvSoyDRg9GA0LXRgtGA0LDQs9CwINC20YvSm9GL0L0g0L7RgNC90LDQu9Cw0YHSm9Cw0LTRi9KT0Ysg0LHRg9C7INC20LXRgNC00LUg0JbQltCYINC00LDQvNGDINC205nQvdC1INGC0LDRgNCw0LvRgyDSm9Cw0YPQv9GW0L0g0LDRgNGC0YLRi9GA0LDQtNGLINC80YvRgdCw0LvSk9CwINKb0YvRgdKb0LAg0YPRgNC10YLRgNCwINCx0LDQutGC0LXRgNC40Y/Qu9Cw0YDQtNGL0qMg0pvRg9GL0pvSm9CwINGC0LXQtyDQtdC90YPRltC90LUg0YHQtdCx0LXQsSDQsNC90YPRgdKb0LAg0LbQsNKb0YvQvSDQvtGA0L3QsNC70LDRgdKb0LDQvdC00YvSk9GLINCx0LDQutGC0LXRgNC40Y/Qu9Cw0YDQtNGLINGC0LXQtyDQu9Cw0YHRgtCw0L3Rg9GL0L3QsCDRi9Kb0YLQuNC80LDQu9C00YvSk9GL0L0g0LDRgNGC0YLRi9GA0LDQtNGLLtCR0YPQuyDRhNCw0LrRgtC+0YDQu9Cw0YAg0LXRgNC10YHQtdC60YLQtdGA0LzQtdC9INGB0LDQu9GL0YHRgtGL0YDSk9Cw0L3QtNCwINCx0LDQu9Cw0YDQtNCwINC305nRgCDRiNGL0pPQsNGA0YMg0LbQvtC70LTQsNGA0YvQvdGL0qMg0LjQvdGE0LXQutGG0LjRj9C70LDRgNGL0L3QsCDQsdC10LnRltC8INC10YLQtdC00ZYsINCY0L3RhNC10LrRhtC40Y/QvdGL0qMg0LDQu9C00YvQvSDQvdC10LzQtdGB0LUg0LbQvtGOINKv0YjRltC9INC/0LXQtNC40LDRgtC+0YAg0LzQsNC80LDQvdGL0L3QsCDQttGD0LPRltC90YMg0LrQtdGA0LXQui7QptC40YHRgtC40YIg0L3QtdGB0LXQvyDQsNKT0LDRgNC00YvSoyDQvNC40LrRgNC+0LHRgtGL0qMg0pvQsNCx0YvQvdGD0Ysg0ZbRiNGC0ZbSoyDRiNCw0L8g0LDQudC80LDSk9GL0L3Ri9KT0qMgINCw0YPRi9GA0YHRi9C90YPRi9C80LXQvSDQtNC40LfRg9GA0LjRjyDQttC40ZYg0LDRg9GL0YDRgdGL0L3Rg9C70Ysg0LfTmdGAINGI0YvSk9Cw0YDRgyzQt9C10YAg0YjRi9KT0LDRgNGD0LTRiyDRg9GB0YLQsNC80LDRgyzQsdCw0LrRgtC10YDQuNC+0YPRgNC40Y8s0LvQtdC50LrQvtGG0LjRgtC+0YPRgNC40Y8s0L/QuNGD0YDQuNGPINKv0Ygg06nQu9GI0LXQvNC00ZYg0YjRi9C90Ysg0LzQuNC60YDQvtCz0LXQvNC+0YLRg9GA0LjRjyDRgdGL0L3QsNKT0Ysg0LHQvtC50YvQvdGI0LAg0YLQtdGA0LzQuNC90LDQuy7Ql9OZ0YAg0YjRi9KT0LDRgNGDINC20L7Qu9C00LDRgNGL0L3Ri9KjINC60LXQtNC10YDQs9GW0LvQtdGA0ZYg0LzQtdC9INCw0pvQsNGD0LvQsNGA0Ysg0KjQsNC70LAg0YLRg9GL0LvRgywg0YLRg9GA0LLSm9GC0Ysg0LfTmdGAINGI0YvSk9Cw0YDRgyAg0LrQsNGC0LXRgtC10YDQu9C10YDRliDSsNC70LTQsNGA0LTQsCDRgdGD0L3QtNC10YLQutC1INC+0YLRi9GA0pPRi9C30YvQt9GD0LTRi9KjINCx0L7Qu9C80LDRg9GLLCDQttC+0pPQsNGA0Ysg0LTTmdGA0LXQttC10LvRliDQstC10LfQtdC60L7Rg9GA0LXRgtC10YDQsNC70YzQtNGLINGA0LXRhNC70Y7QutGBLCAg0JrRltGI0LrQtdC90YLQsNC5INCx0LDQu9Cw0LvQsNGA0LTQsCDQsdCw0YHSm9Cw0LTQsCDQsdC10LnRltC80LTRliDRhNCw0LrRgtC+0YDQu9Cw0YDSk9CwINGW0YjQtdC60L/QtdC9INKb0YPRi9Kb0YLRi9C9INC00LjRgdGE0YPQvdC60YbQuNGP0YHRiyDRgdC+0L3Ri9KjINGW0YjRltC90LTQtSDRltGIINKb0LDRgtGDINC60ZbRgNC10LTRliAyINC20LDRgdGC0LDSk9GLINCx0LDQu9Cw0LvQsNGA0LTQsCDQv9C40LvQvtC90LXRhNGA0LjRgiDQvdC10LzQtdGB0LUg0YbQuNGB0YLQuNGC0YLRltKjINC60LvQsNGB0YHQuNC60LDQu9GL0psg0LrTqdGA0ZbQvdGW0YHRliDQv9Cw0LnQtNCwINCx0L7Qu9CwINCx0LDRgdGC0LDQudC00Ysg0YbQuNGB0YLQuNGCINCx0LXQu9Cz0ZbQu9C10YDRljog0LTQuNC30YPRgNC40Y8g0LbQuNGW0LvRltC6INCz0LXQvNC+0YLRg9GA0LjRjyDQt9OZ0YDQtNGW0qMg0YLQvtKb0YvRgNCw0YPRiyDRiNCw0L/RiNCw0L3QtNGL0psg0pvRi9GI0YMuIA==</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1-ші сұрақтың жауабы - қулақ немесе кеуде инфекцияларын жатқызамыз жәнеле азық тулікпен проблема тамакпен улану іштің сыртындағы проблема іштің булшық еттерінің кернеуі ,мигрень хирургиялық проблемалар апендицит,ішек өтімсіздігі- бұл қате. Толық жауап жазылмаған</text:p>
          </table:table-cell>
          <table:table-cell office:value-type="float" office:value="0" table:style-name="ce1">
            <text:p>0</text:p>
          </table:table-cell>
          <table:table-cell table:number-columns-repeated="16376"/>
        </table:table-row>
        <table:table-row table:style-name="ro1">
          <table:table-cell office:value-type="float" office:value="1066941" table:style-name="ce1">
            <text:p>1066941</text:p>
          </table:table-cell>
          <table:table-cell office:value-type="string" table:style-name="ce1">
            <text:p>kazakh</text:p>
          </table:table-cell>
          <table:table-cell office:value-type="string" table:style-name="ce1">
            <text:p>Билет 40. &amp;lt;br /&amp;gt; 1.4 жасар қыз бала. Шағымы: тәбіеттінің өзгеруі және кіңдік аймағынын ауырсынуы тамақпен байланысты емес. Қарағанда: терісі ақшыл, тілі ылғалды,тілі ақшылмен өңезденуі, іші пальпация кезінде жұмсақ,ауырсынусыз, бауыр қалыпты, ұлкен нәжісісі өзгерісіз. Қандай зерттеулер жүргізу қажет? &amp;lt;br /&amp;gt; 2. 5 жасар бала. Шағымдары жиі несеп шығаруыңа ауырсынуымен, ішінің ауыруына, температурасының 38,5° жоғарлауына, әлсіздікке. Ауырғанына 3 күн болды. Несеп анализынде: белок- 0,099 г/л, лейкоциттер - 20-30 көз аймағында, бактериялар ++. Қандай бүйрек-несеп шығару жолдарының анатомо-физиологиялық ерекшеліктері осы патологиялық жағдайға әкеліу мұмкін? &amp;lt;br /&amp;gt;</text:p>
          </table:table-cell>
          <table:table-cell office:value-type="string" table:style-name="ce1">
            <text:p>MS4g0J/QsNGG0LjQtdC90YLRgtGW0qMgINGI0LDSk9GL0LzQtNCw0YDRiyDQsdC10LvQs9GW0LvRliDQsdGW0YAg0LTQuNCw0LPQvdC+0Lcg0LHQvtC70LbQsNGD0pPQsCDQsNC3INCx0L7Qu9GL0L8g0YLQsNCx0YvQu9Cw0LTRiy4g0KHQvtC7INGB0LXQsdC10L/RgtGWINC+0pPQsNC9INKb0L7RgdGL0LzRiNCwINC30LXRgNGC0YLQtdGD0LvQtdGAINC20q/RgNCz0ZbQt9GDINKb0LDQttC10YIuINCX0LXRgNGC0YLQtdGD0LvQtdGA0LPQtSDQutC10LvQtdGAINCx0L7Qu9GB0LDSmywg0LrRltC90LTRltC6INCw0LnQvNCw0pPRi9C90LTQsCDQsNGD0YvRgNGB0YvQvdGD0LTRi9KjINCx0L7Qu9GD0YvQvdCwINCx0LDQudC70LDQvdGL0YHRgtGLINCj0JTQlyDTmdC00ZbRgdGWINCw0YDSm9GL0LvRiyDRltGIINCw0LnQvNCw0pPRi9C9LCDRgdC+0L3Ri9KjINGW0YjRltC90LTQtSDQutGW0L3QtNGW0Log0LDQudC80LDSk9GL0L0g0LfQtdGA0YLRgtC10L8g0LrTqdGA0YPQs9C1INCx0L7Qu9Cw0LTRiy4g0JHSsdC7INOZ0LTRltGBINCw0YDSm9GL0LvRiyDRltGIINCw0LnQvNCw0pPRi9C90LTQsCDQvtGA0L3QsNGB0pvQsNC9INCw0L3QsNGC0L7QvNC40Y/Qu9GL0psg0pvSsdGA0YvQu9GL0LzQtNCw0YDQtNGL0qMg0YLQvtC/0L7Qs9GA0LDRhNC40Y/Qu9GL0psg0L7RgNC90LDQu9Cw0YHRg9GL0L0sINCw0L3QsNGC0L7QvNC40Y/Qu9GL0psg0pvSsdGA0YvQu9GL0YHRi9C9LCDQttOZ0L3QtSDQvNKv0LzQutGW0L0g0LHQvtC70pPQsNC9INC/0LDRgtC+0LvQvtCz0LjRj9C70LDRgCwg0YHQvtC90YvSoyDRltGI0ZbQvdC00LUg0ZbRgdGW0LrRgtC10YAsINKb0LDQvSDQutC10YLRg9C70LXRgCwg0L3QtdC80LXRgdC1INGW0YjQtdC60YLQtdGA0LTQtdCz0ZYg0L3QtdC/0YDQvtGF0L7QtNC40LzQvtGB0YLRjCDQutOp0YDQtSDQsNC70LDQvNGL0LcuINCV0LPQtdGAINCj0JTQlyDQsNGA0pvRi9C70Ysg0YLQvtC70YvSmyDQsNKb0L/QsNGA0LDRgiDQsNC70LAg0LDQu9C80LDQudGC0YvQvSDQttCw0pPQtNCw0Lkg0LHQvtC70LDRgtGL0L0g0LHQvtC70YHQsCwg0L7QvdC00LAg0LrQvtC90YLRgNCw0YHRgtGC0Ysg0YDQtdC90YLQs9C10L3QvtCz0YDQsNGE0LjRjyDQttCw0YHQsNGD0pPQsCDQsdC+0LvQsNC00YsuINCQ0Lsg0L/QsNGG0LjQtdC90YLRgtGW0qMg0YLTmdCx0LXRgtGW0L3RltKjINCx0rHQt9GL0LvRg9GLINC80LXQvSDRgtGW0LvRltC90LTQtdCz0ZYg0LDSm9GI0YvQuyDQvdCw0LvQtdGC0YLRi9KjINCx0L7Qu9GD0YssINCw0YPRi9C3INKb0YPRi9GB0Ysg0LzQtdC9INCw0YEg06nRgtC60ZbQt9GDINC20L7Qu9C00LDRgNGL0L3QtNCw0pPRiyDSm9Cw0LHRi9C90YMg0L/RgNC+0YbQtdGB0YHRgtC10YDRltC90ZbSoyDQutOp0YDRltC90ZbRgdGWINCx0L7Qu9GD0Ysg0LzSr9C80LrRltC9LiDQodC+0Lsg0YHQtdCx0LXQv9GC0ZYg0L7QvdGL0qMg0L3QsNKb0YLRiyDQsdCw0YAg0LbQvtKT0YvQvSDQsNC90YvSm9GC0LDRgyDSr9GI0ZbQvSwg0pvQsNC9INCw0L3QsNC70LjQt9GW0L0g0LbTmdC90LUg0LfTmdGAINCw0L3QsNC70LjQt9GW0L0g0LbQsNGB0LDRgyDSm9Cw0LbQtdGCLiDQkdKx0Lsg0LfQtdGA0YLRgtC10YPQu9C10YAg0LDRgNKb0YvQu9GLINC70LXQudC60L7RhtC40YLRgtC10YDQtNGW0qMg0L3QtdC80LXRgdC1INC90LXQudGC0YDQvtGE0LjQu9C00LXRgNC00ZbSoyDQutOp0LHQtdGO0ZbQvSDQutOp0YDRgyDQsNGA0pvRi9C70Ysg0pvQsNCx0YvQvdGDINC/0YDQvtGG0LXRgdGWINGC0YPRgNCw0LvRiyDQsdC+0LvQttCw0LzQtNGLINGA0LDRgdGC0LDQuSDQsNC70LDQvNGL0Lcg0L3QtdC80LXRgdC1INC60LXRgNGW0YHRltC90YjQtSDQttC+0pvSm9CwINGI0YvSk9Cw0YDQsNC80YvQty4g0KHQvtC90YvQvNC10L0g0pvQsNGC0LDRgCDSm9Cw0L0g0LDQvdCw0LvQuNC30ZbQvdC00LXQs9GWINGN0YDQuNGC0YDQvtGG0LjRgtGC0LXRgCwg0LPQtdC80L7Qs9C70L7QsdC40L0g0LzTqdC70YjQtdGA0LvQtdGA0ZbQvSDQsNC90YvSm9GC0LDRgyDQsNGA0pvRi9C70Ysg0L/QsNGG0LjQtdC90YLRgtC1INCw0L3QtdC80LjRjyDQsdCw0YAg0L3QtdC80LXRgdC1INC20L7SmyDQtdC60LXQvdC00ZbQs9GWINGC0YPRgNCw0LvRiyDQsNKb0L/QsNGA0LDRgiDQsNC70YPSk9CwINCx0L7Qu9Cw0LTRiy4g06jQudGC0LrQtdC90ZYg0YLTmdCx0LXRgtGC0ZbSoyDQsdKx0LfRi9C70YPRiyDQsNC90LXQvNC40Y/Sk9CwINGC05nQvSDQsdC+0LvRg9GLINC80q/QvNC60ZbQvS4g0J7QtNCw0L0g0LHTqdC70LXQuiDQt9OZ0YAg0LDQvdCw0LvQuNC30ZYg0L3TmdGC0LjQttC10YHRliDQsNGA0pvRi9C70Ysg0LbQsNGB0YvRgNGL0L0g0LPQtdC80LDRgtGD0YDQuNGPLCDQv9GA0L7RgtC10LjQvdGD0YDQuNGP0L3RiyDQsNC90YvSm9GC0LDRgyDQttOZ0L3QtSDQsNC30L7RgtC10LzQuNGP0L3RiyDQsNC90YvSm9GC0LDRgyDQvNKv0LzQutGW0L3QtNGW0LPRltC90LUg0LjQtSDQsdC+0LvQsNC80YvQty4g0J7RgdGLINGC0LDQu9C00LDRg9C70LDRgNC00LDQvSDQsdOp0LvQtdC6INC905nQttGW0YEg0LbSsdKT0YvQvdC00YvRgdGL0L0g0LPQtdC70YzQvNC40L3RgtGC0LXRgNCz0LUg0LfQtdGA0YLRgtC10YMg0LbSr9GA0LPRltC30ZbQu9GD0ZYg0pvQsNC20LXRgi4g06jQudGC0LrQtdC90ZYg0LDRg9GL0YDRgdGL0L3Rg9C70LDRgCDQvNC10L0g0YLTmdCx0LXRgtGC0ZbSoyDTqdC30LPQtdGA0YPRliDQs9C10LvRjNC80LjQvdGC0YLQtdGA0LzQtdC9INC20rHSk9GD0LTRi9KjINC606nRgNGW0L3RltGB0ZYg0LHQvtC70YPRiyDQvNKv0LzQutGW0L0uICA8YnIgLz4NCjIuINCR0ZbQt9C00ZbSoyDQv9Cw0YbQuNC10L3RgtGC0LXQs9GWINGI0LDSk9GL0LzQtNCw0YAg0LzQtdC9INC20LDRgdCw0LvSk9Cw0L0g0LfQtdGA0YLRgtC10YPQu9C10YAg0L/QsNGG0LjQtdC90YLRgtC1INC305nRgCDRiNGL0pPQsNGA0YMg0LbQvtC70LTQsNGA0Ysg0LjQvdGE0LXQutGG0LjRj9GB0YvQvdGL0qMg0LHQvtC70YMg0pvQsNGD0L/RltC9INC606nRgNGB0LXRgtC10LTRli4g0LHQsNC70LDQu9Cw0YDQtNGL0qMg0LbQuNGWINCw0YPRgNGD0Ysg0LDQvdCw0YLQvtC80LjRj9C70YvSmyDRhNC40LfQuNC+0LvQvtCz0LjRj9C70YvSmyDQtdGA0LXQutGI0LXQu9GW0LrRgtC10YDQs9C1INCx0LDQudC70LDQvdGL0YHRgtGLINCx0L7Qu9Cw0LTRiywg0LzRi9GB0LDQu9GLICDQutGW0YjQutC10L3RgtCw0Lkg0LHQsNC70LDQu9Cw0YDQtNCwINGD0YDQtdGC0YDQsCDSm9GL0YHSm9CwLCDRgdC+0L3Ri9C80LXQvSDSm9Cw0YLQsNGAINCw0L3Rg9GB0pvQsCDQttCw0pvRi9C9INC+0YDQvdCw0LvQsNGB0YPRiywg0LfTmdGAINGI0YvSk9Cw0YDRgyDQttC+0LvQtNCw0YDRi9C90LAg0LjQvdGE0LXQutGG0LjRjyDQttKx0pPRgyDSm9Cw0YPQv9GW0L0g0LDRgNGC0YLRi9GA0LDQtNGLLiDQptC40YHRgtC40YIg0L3QtdGB0LXQv9Cw0pPQsNGA0LTRi9KjINC40L3RhNC10LrRhtC40Y/Qu9GL0psg0pvQsNCx0YvQvdGD0Ysg0LHQvtC70YvQvyDRgtCw0LHRi9C70LDQtNGLLiDQvtKT0LDQvSDRgtOZ0L0g0YHQuNC80L/RgtC+0LzQtNCw0YDSk9CwINGI0LDQvyDQsNC50LzQsNKT0YvQvdC00LDSk9GLINCw0YPRi9GA0YHRi9C90YMsINC20LjRliDQt9OZ0YAg0YjRi9KT0LDRgNGDLCDQt9OZ0YAg0YjRi9KT0LDRgNGDINC60LXQt9GW0L3QtNC10LPRliDQsNGD0YvRgNGB0YvQvdGDLCDQt9OZ0YDQtNGWINKx0YHRgtCw0Lkg0LDQu9C80LDRgyDRgdC40Y/Sm9GC0Ysg0YHQuNC80L/RgtC+0LzQtNCw0YAg0LbTmdC90LUg0LfQtdGA0YLRgtC10YMg0L3TmdGC0LjQttC10LvQtdGA0ZbQvdC00LUg0LrTqdGA0ZbQvdC10YLRltC9INCx0LDQutGC0LXRgNC40YPRgNC40Y8sINC70LXQudC60L7RhtC40YLRg9GA0LjRjywg0L/RgNGC0LXQuNC90YPRgNC40Y8g0LbQsNGC0LDQtNGLLiDQndC10LPRltC30LPRliDRjdGC0LjQvtC70L7Qs9C40Y/Qu9GL0psg0YTQsNC60YLQvtGAINGA0LXRgtGW0L3QtNC1INGI0LDQu9CwINGC0YPRi9C70YMsINC10YAg0LHQsNC70LDQu9Cw0YDQtNCwINGB0q/QvdC00LXRgtC60LUg0L7RgtGL0YDSk9GL0LfRg9C00YvSoyDQsdC+0LvQvNCw0YPRiywg0LbQvtKT0LDRgNKT0Ysg0LTTmdGA0LXQttC10LvRliDQstC10LfQuNC60L7Rg9GA0LXRgtGA0LDQu9C00Ysg0YDQtdGE0LvRjtC60YEg0LbQsNGC0LDQtNGLLiDQmtGW0YjQutC10L3RgtCw0Lkg0LHQsNC70LDQu9Cw0YDQtNCw0pPRiyDSm9Cw0YPRltC/INGE0LDQutGC0L7RgNKT0LAg0ZbRiCDSm9Cw0YLRg9GLLCDSm9GD0YvSmyDQtNC40YHRhNGD0L3QutGG0LjRj9GB0YvQvSDQttCw0YLSm9GL0LfRg9KT0LAg0LHQvtC70LDQtNGLLiDQnNKx0L3QtNCw0Lkg0LHQsNC70LDQu9Cw0YDQtNCwINC606nQvyDQttCw0pPQtNCw0LnQtNCwIDIg0LbQsNGB0YLQsNC9INCw0YHSm9Cw0L0g0YHQvtKjINGG0LjRgdGC0LjRgiDQv9C10L0g0L/QuNC10LvQvtC90LXRhNGA0LjRgtGC0ZbSoyDQutC70LDRgdGB0LjQutCw0LvRi9KbINCx0LXQu9Cz0ZbQu9C10YDRliDQtNCw0LzRi9C/LCDQutOp0YDRltC90ZbRgSDQsdC10YDQtSDQsdCw0YHRgtCw0LnQtNGLLiDQntC70LDRgNKT0LAg0LTQuNC30YPRgNC40Y8sINCz0LXQvNCw0YLRg9GA0LjRjywg0L/RgNC+0YLQtdC50LjQvdGD0YDQuNGPLCDSm9GL0YjRi9C90YMsINC305nRgNC00ZYg0rHRgdGC0LDQuSDQsNC70LzQsNGDINC205nQvdC1INGCLtCxINC20LDRgtCw0LTRiy4g</text:p>
          </table:table-cell>
          <table:table-cell office:value-type="float" office:value="170348" table:style-name="ce1">
            <text:p>170348</text:p>
          </table:table-cell>
          <table:table-cell office:value-type="float" office:value="82" table:style-name="ce1">
            <text:p>82</text:p>
          </table:table-cell>
          <table:table-cell office:value-type="string" table:style-name="ce1">
            <text:p>кішкентай балаларда уретра қысқа, сонымен қатар анусқа жақын орналасуы-қыз балаларда деп қоспағансыз. Екі сұрақтың жауабы толықтырылмаған</text:p>
          </table:table-cell>
          <table:table-cell office:value-type="float" office:value="0" table:style-name="ce1">
            <text:p>0</text:p>
          </table:table-cell>
          <table:table-cell table:number-columns-repeated="16376"/>
        </table:table-row>
        <table:table-row table:style-name="ro1">
          <table:table-cell office:value-type="float" office:value="915296" table:style-name="ce1">
            <text:p>915296</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MSkg0KHQu9C10LTRg9C10YIg0YHQtNCw0YLRjCDQsNC90LDQu9C40LfRizog0J7QsdGJ0LjQuSDQsNC90LDQu9C40Lcg0LrRgNC+0LLQuCDQtNC70Y8g0LLRi9C10LLQu9C10L3QuNGPINGD0YDQvtCy0L3RjyDQs9C10LzQvtCz0LvQvtCx0LjQvdCwKNCy0L3QvtGA0LzQtSAxMTAtMTQ10LMv0LspLCDRjdGA0LjRgtGA0L7RhtC40YLQvtCyKNCy0L3QvtGA0LzQtSA0LjAtNS4yKjEwINCyIDEyINGB0YLQtdC/0LXQvdC4L9C7KSwg0LvQtdC50LrQvtGG0LjRgtC+0LIoNS4wLTEyKjEwINCyIDkg0YHRgtC10L/QtdC90Lgv0LspLNGC0YDQvtC80LHQvtGG0LjRgtC+0LIoMTUwLTIwMCoxMCDQsiDRgdGC0LXQv9C10L3QuCA5L9C7KSzQodCe0K0oMi0xMNC80Lwv0YcpLCDRgtC10Lwg0YHQsNC80YvQvCDQvNC+0LbQvdC+INGD0LfQvdCw0YLRjCDQvdC1INC40LzQtdC10YLRgdGPINC70Lgg0YMg0YDQtdCx0LXQvdC60LAg0LDQvdC10LzQuNGPKNGD0YDQvtCy0LXQvdGMINCt0KAg0LggSGIpLCDRgtC6INC/0YDQuCDQsNC90LXQvNC40Lgg0YfQsNGB0YLQviDQstC+0LfQvdC40LrQsNC10YIg0L/QvtGC0LXRgNGPINCw0L/Qv9C10YLQuNGC0LAsINCh0J7QrSDQuCDQu9C10LnQutC+0YbQuNGC0Ysg0L/QvtC60LDQttGD0YIg0L3QsNC8INCy0L7RgdC/0LDQu9C40YLQtdC70YzQvdGL0Lkg0L/RgNC+0YbQtdGB0YEg0LIg0L7RgNCz0LDQvdC40LfQvNC1LCDQv9GA0Lgg0LrQvtGC0L7RgNC+0Lwg0YLQsNC60LbQtSDRgtC10YDRj9C10YLRgdGPINCw0L/Qv9C10YLQuNGCINC4INC80L7Qs9GD0YIg0LHQvtC70Lgg0L7QutC+0LvQviDQv9GD0L/QutCwKNC30LDRh9Cw0YHRgtGD0Y4g0LHQvtC70Lgg0LIg0Y3RgtC+0Lkg0L7QsdC70LDRgdGC0Lgg0YHQstGP0LfQsNC90Ysg0YEg0L/QsNGC0L7Qu9C+0LPQuNGP0LzQuCDQsiDRgtC+0L3QutC+0Lwg0LrQuNGI0LXRh9C90LjQutC1INC4INC/0LjQu9C+0YDQuNGH0LXRgdC60L7QvCDQvtGC0LTQtdC70LUg0LbQtdC70YPQtNC60LApLiDQntCx0YnQuNC5INCw0L3QsNC70LjQtyDQvNC+0YfQuCDQv9C+0LrQsNC20LXRgiDQvdCw0Lwg0YPRgNC+0LLQtdC90Yw6INCyINC90L7RgNC80LU6INGG0LLQtdGCINC80L7Rh9C4INGB0LLQtdGC0LvQvi3QttC10LvRgtGL0LksINC/0YDQvtC30YDQsNGH0L3QvtGB0YLRjCDQv9C+0LvQvdCw0Y8sINC/0LvQvtGC0L3QvtGB0YLRjDogMTAwMi0xMDI1LCDQsdC10LvQvtC6OiDQu9C40LHQviDQvtGC0YHRg9GC0YEv0LTQviAwLDAzM9CzL9C7LCDQu9C10LnQutC+0YbQuNGC0Ys6MC01INCyINC/0L7Qu9C1INC30YDQtdC90LjRjywg0Y3RgNC40YLRgNC+0YbQuNGC0Ys6IDAtMSDQsiDQv9C+0LvQtSDQt9GA0LXQvdC40Y8sINCx0LDQutGC0LXRgNC4INC4INGB0LDRhdCw0YAg0L7RgtGB0YPRgtGB0YLRgtCy0YPRjtGCLCDQutC40YHQu9C+0YLQvdC+0YHRgtGMOiA1LjAtNy4wLCDRjdGC0L7RgiDQsNC90LDQu9C40Lcg0L3QsNC8INC/0L7QutCw0LbQtdGCINC90L3QsNC8INC/0LDRgtC+0LvQvtCz0LjRjiDQv9C+0YfQtdC6LiAsINCR0LjQvtGF0LjQvNC40YfQtdGB0LrQuNC5INCw0L3QsNC70LjQtyDQutGA0L7QstC4INC/0L7QutCw0LbQtdGCINC90LDQvCDRg9GA0L7QstC10L3RjCDQkNCb0KIsINCQ0KHQoiwg0YPRgNC+0LLQtdC90Ywg0L7QsdGJ0LXQs9C+INCx0LXQu9C60LAsINCw0LvRjNCx0YPQvNC40L3QsCwg0LzQvtGH0LXQstC+0Lkg0LrQuNGB0LvQvtGC0Ysg0LIg0LrRgNC+0LLQuCjQvtCx0YvRh9C90L4g0L/QvtC60LDQt9GL0LLQsNGO0YIg0YTRg9C90LrRhtC40L7QvdCw0LvRjNC90YPRjiDRgdC/0L7RgdC+0LHQvdC+0YHRgtGMINC/0LXRh9C10L3QuCjQv9GA0Lgg0L/QsNGC0L7Qu9C+0LPQuNGP0YUg0L/QtdGH0LXQvdC4INCQ0JvQoiwg0JDQodCiLCDQvtCx0YnQuNC5INCx0LXQu9C+0LosINCw0LvRjNCx0YPQvNC40L0g0YHQvdC40LbQsNGO0YLRgdGPKNGC0Log0LIg0L/QtdGH0LXQvdC4INC+0L3QuCDRgdC40L3RgtC10LfQuNGA0YPRjtGC0YHRjyDQs9C70LDQstC90YvQvCDQvtCx0YDQsNC30L7QvCksINCwINC80L7Rh9C10LLQsNGPINC60LjRgdC70L7RgtCwINC/0L7QstGL0YjQsNC10YLRgdGPKNCy0YHQu9C10LTRgdGC0LLQuNC4INC90LDRgNGD0YjQtdC90LjRjyDQtNC10LfQuNC90YLQvtC60YHQuNC60LDRhtC40L7QvdC90L7QuSDRgdC/0L7RgdC+0LHQvdC+0YHRgtC4INC/0LXRh9C10L3QuCksINCh0KDQkSDQsdC10LvQutCwKNCx0LXQu9C+0Log0L7RgdGC0YDQvtC5INGE0LDQt9GLLCDQv9C+0LLQstGL0YjQsNC10YLRgdGPINC/0YDQuCDQstC+0YHQv9Cw0LvQuNGC0LXQu9GM0L3Ri9GFINGA0LXQsNC60YbQuNGP0YUpLCDQo9CX0Jgg0LLQvdGD0YLRgNC10L3QvdC40YUg0L7RgNCz0LDQvdC+0LIg0LHRgNGO0YjQvdC+0Lkg0L/QvtC70L7RgdGC0Lgo0LTQu9GPINCy0YvRj9Cy0LvQtdC90LjRjyDQsNC90LDRgtC+0LzQuNGH0LXRgdC60LjRhSDRgdGC0YDRg9C60YLRg9GAINCy0L3Rg9GC0YDQtdC90L3QuNGFINC+0YDQs9Cw0L3QvtCyINC90LDQv9GA0LjQvNC10YA6INGD0LfQuCDQttC10LvRg9C00LrQsCDQtNC70Y8g0LLRi9GP0LLQu9C10L3QuNGPINC90LAg0L3QsNC70LjRh9C40LUg0L/QvtGA0LDQttC10L3QuNGPINGB0YLQtdC90L7QuiDQttC10LvRg9C00LrQsCwg0L3QsNC70LjRh9C40LUg0Y/Qt9CyLNC00LvRjyDQtNC40YTRhNC10YDQtdC90YbQuNCw0LvRjNC90L7Qs9C+INCw0L3QsNC70LjQt9CwINC90LAg0LPQsNGB0YLRgNC40YIpLCDRgtCw0LrQttC1INC80L7QttC90L4g0L3QsNC30L3QsNGH0LjRgtGMINCk0JPQlNChLCDRh9C10YDQtdC3INC60L7RgtC+0YDRg9GOINC80L7QttC90L4g0L/RgNC+0LLQtdGA0LjRgtGMINCy0L3Rg9GC0YDQtdC90L3QtdC1INGB0L7RgdGC0L7Rj9C90LjQtSDRgdC70LjQt9C40YHRgtC+0Lkg0L7QsdC+0LvQvtGH0LrQuCwg0L3QsCDQvdCw0LvQuNGH0LjQtSDRj9C30LIsINGN0YDQvtC30LjQuCDQsiDRgdGC0LXQvdC60LUg0LbQtdC70YPQtNC60LAsIDEyINC/0LXRgNGB0YLQvdC+0Lkg0LrQuNGI0LrQuCksICDQmtCw0L/RgNC+0LPRgNCw0LzQvNGDKNC00LvRjyDQv9GA0L7QstC10YDQutC4INC60LDQu9CwLCDQsiDQvdC+0YDQvNC1OiDQvtGE0L7RgNC80LvQtdC90L3Ri9C5LCDQttC10LvRgtC+LdC60L7RgNC40YfQvdC10LLQvtCz0L4g0YbQstC10YLQsCwg0YHRgNC10LTQvdC10Lkg0LrQvtC90YHQuNGB0YLQtdC90YbQuNC4LCDRgdC70LjQt9GMINC+0YLRgdGD0YLRgS4g0LvQtdC50LrQvtGG0LjRgtGLINC4INC20LjRgNGLINCyINC90L7RgNC80LUg0YLQvtC20LUg0L7RgtGB0YPRgtGBLiwg0Y/QudGG0LAg0LPQtdC70YzQvNC10L3RgtC+0LIg0YLQsNC60LbQtSDQvtGC0YHRg9GC0YHRgtCy0YPRjtGCINCyINC90L7RgNC80LUsINGN0YDQuNGC0YDQvtGG0LjRgtGLINGC0LDQutC20LUg0L7RgtGB0YPRgi4pINCw0L3QsNC70LjQtyDQutCw0LvQsCDQv9C+0LrQsNC20LXRgiDQs9C70LDQstC90YvQvCDQvtCx0YDQsNC30L7QvCDQvdCwINC90LDQu9C40YfQuNC1INGB0LrRgNGL0YLQvtC5INC60YDQvtCy0Lgg0LIg0LrQsNC70LUo0L/RgNC4INGP0LfQstCw0YUg0LIg0LbQtdC70YPQtNC60LAsIDEyINC/0LXRgdGC0L3QvtC5INC60LjRiNC60LgsINC4INC+0YHRgtCw0LvRjNC90YvRhSDQvtGC0LTQtdC70L7QsiDQutC40YjQtdGH0L3QuNC60LAg0LIg0LrQsNC70LUg0LzQvtC20L3QviDQvdCw0LnRgtC4INGB0LrRgNGL0YLRg9GOINC60YDQvtCy0YwuINCQ0L3QsNC70LjQtyDQvdCwINCz0LvQuNGB0YLRiyjQv9Cw0YDQsNC30LjRgtGLKSDQt9Cw0YfQsNGB0YLRg9GOINC/0L7RgNCw0LbQsNGO0YIg0YLQsNC60LjQtSDQvtGA0LPQsNC90Ysg0LrQsNC6INC20LXQu9GH0L3Ri9C1INC/0YDQvtGC0L7QutC4LCDQutC40YjQtdGH0L3QuNC6KSwg0LDQvdCw0LvQuNC3INC90LAgSC4gcGlsb3JpINGC0LDQuiDQutCw0Log0L/RgNC4INC90LDQu9C40YfQuNC4INC00LDQvdC90L7QuSDQsdCw0LrRgtC10YDQuNC4LCDQvtC90LAg0L/QvtGA0LDQttCw0LXRgiDRgdGC0LXQvdC60Lgg0LbQtdC70YPQtNC60LAsINGH0YLQviDQv9GA0LjQstC+0LTQuNGCINC30LDRh9Cw0YHRgtGD0Y4g0Log0LPQsNGB0YLRgNC40YLRgywg0Y/Qt9Cy0LDQvC4g0J/QviDQsNC90LDQu9C40LfQsNC8INC4INGB0LjQvNC/0YLQvtC80LDQvCDQsiDQtNCw0LvRjNC90LXRhtC50YjQtdC8INC80L7QttC90L4g0LHRg9C00LXRgiDQv9GA0LXQtNC/0L7Qu9C+0LPQsNGC0Ywg0LTQuNCw0LPQvdC+0Lc6INC+0YHRgtGA0YvQuSDQs9Cw0YHRgtGA0LjRgi4gMinQn9C+INCw0L3QsNC70LjQt9Cw0Lw6INCx0LXQu9C+0Log0LIg0LzQvtGH0LUg0L/QvtCy0YvRiNC10L0o0L3QvtGA0LzQsCDQtNC+IDAsMDk50LMv0LspLCDQu9C10LnQutC+0YbQuNGC0Ysg0L/QvtCy0YvRiNC10L3RiyjQvdC+0YDQvNCwINC+0YLRgdGD0YIuLCDQu9C40LHQviDQtNC+IDAtNSDQsiDQv9C70LUg0LfRgNC10L3QuNGPKSwg0LHQsNC60YLQtdGA0LjQuCDRgtC+0LbQtSDQvdC1INC00L7Qu9C20L3RiyDQv9GA0LjRgdGD0YHRgtCy0L7QstCw0YLRjCDQsiDQvNC+0YfQtS4g0K3RgtC+INCy0YHQtSDQs9C+0LLQvtGA0LjRgiDQviDRgtC+0LwsINGH0YLQviDQv9GA0L7QuNGB0YXQvtC00LjRgiDQstC+0YHQv9Cw0LvQuNGC0LXQu9GM0L3Ri9C1INC/0YDQvtGG0LXRgdGB0Ysg0LIg0L/QvtGH0LrQsNGFKNC90LDQu9C40YfQuNC1INCx0LDQutGC0LXRgNC40Lgg0LIg0L7Rh9C10L3RjCDQstGL0YHQvtC60L7QvCDRgdC+0LTQtdGA0LbQsNC90LjQuCDQuCDQu9C10LnQutC+0YbQuNGC0L7QsiDRgtC+0LbQtSksINCwINC40LzQtdC90L3QviDQsiDQtdC1INC/0LDRgNC10L3RhdC40LzQtSjQvdCw0LvQuNGH0LjQtSDQsdC10LvQutCwINCyINC80L7Rh9C1KS4g0KHQutC+0YDQtdC1INCy0YHQtdCz0L4g0YMg0LTQtdCy0L7Rh9C60Lgg0L/QuNC10LvQvtC90LXRhNGA0LjRgiwg0YLQuiDQtNCw0L3QvdGL0LUg0L/QvtC60LDQt9Cw0YLQtdC70Lgg0Lgg0LbQsNC70L7QsdGLINGB0L7QvtGC0LLQtdGC0YHRgtCy0YPRjtGCINC00LDQvdC90L7QuSDQv9Cw0YLQvtC70L7Qs9C40LguINCaINGN0YLQvtC5INC/0LDRgtC+0LvQvtCz0LjQuCDQv9GA0LXQtNGA0LDRgdC/0L7Qu9C+0LPQsNGO0YIg0L7RgdC+0LHQtdC90L3QvtGB0YLQuCDRgdGC0YDQvtC10L3QuNGPINC80L7Rh9C10YLQvtGH0L3QuNC60LAsINGDINC60L7RgtC+0YDQvtCz0L4g0LIg0LTQsNC90L3Ri9C5INC/0LXRgNC40L7QtCDQttC40LfQvdC4KDUg0LvQtdGCKSjQnNCf0KAg0L3QtdC40LfQu9C10YfQtdC90L3Ri9C5INC00L4g0LPQvtC00LAsINC/0YDQvtCz0YDQtdGB0YHQuNGA0YPQtdGCINC4INC+0YLRj9Cz0LDRidCw0LXRgtGB0Y8g0LXQs9C+INGC0LXRh9C10L3QuNC1INGDINC00LXRgtC10Lkg0YEgMyDQtCA3INC70LXRgikg0L/RgNC+0LjRgdGF0L7QtNC40YIg0LfQuNGP0L3QuNC1INCyINC00LjRgdGC0LDQu9GM0L3QvtC5INGH0LDRgdGC0LgsINGH0YLQviDQv9GA0LjQstC+0LTQuNGCINC6INC80L7Rh9C10YLQvtGH0L3QuNC60L7QstC+LdC/0YPQt9GL0YDQvdC+0LzRgyDRgNC10YTQu9GO0LrRgdGDLCDRh9GC0L4g0LIg0YHQstGOINC+0YfQtdGA0LXQtNGMINC/0YDQuNCy0L7QtNC40YIg0Log0L7QsdGA0LDRgtC90L7QvNGDINC30LDQsdGA0LDRgdGL0LLQsNC90LjRjiDQvNC+0YfQuCDQsiDQstC10YDRhdC70LXQttCw0YnQuNC1INGC0YDRg9C60YLRg9GA0Yso0L/QvtGH0LXRh9C90LDRjyDQu9C+0YXQsNC90LrQsCwg0L/QvtGH0LrQuCksINGH0YLQviDQsiDRgdCy0L7RjiDQvtGH0LXRgNC10LTRjCDQt9Cw0YfQsNGB0YLRg9GOINC/0YDQuNCy0L7QtNC40YIg0Log0YDQsNC30LLQuNGC0LjRjiDQstC+0YHQv9Cw0LvQuNGC0LXQu9GM0L3Ri9GFINGA0LXQsNC60YbQuNC4INCyINC80L7Rh9C10LLRi9Cy0L7QtNGP0YnQtSDRgdC40YHRgtC10LzQtSDQodC/0LXRgNCy0LAg0LzQvtGH0LAg0LfQsNCx0YDQsNGB0YvQstCw0LXRgtGB0Y8g0LIg0LzQvtGH0LXRgtC+0YfQvdC40LosINC90L4g0L3QtSDRgNCw0YHRiNC40YDRj9C10YIg0LXQsyAoMSDRgdGC0LXQv9C10L3RjCksINC/0L7RgtC+0Lwg0LfQsNCx0YDQsNGB0YvQstCw0LXRgiDQvNC+0YfRgyDQsiDQu9C+0YXQsNC90LrRgywg0L3QviDQvdC1INGA0LDRgdGI0LjRgNGP0LXRgiDQvNC+0YfQtdGC0L7Rh9C90LjQutC6KDIg0YHRgtC10L/QtdC90YwpLCAzINGB0YLQtdC/0LXQvdGMINC/0YDQvtC40YHRhdC+0LTQuNGCINGD0LzQtdGA0LXQvdC90L7QtSDRgNCw0YHRiNC40YDQtdC90LjQtSDQvNC+0YfQtdGC0L7Rh9C90LjQutCwINC4INC70L7RhdCw0L3QutC40LwsINCyIDQg0YHRgtC10L/QtdC90LggINC/0YDQvtC40YHRhdC+0LTQuNGCINGB0LjQu9GM0L3QvtC1INGA0LDRgdGI0LjRgNC10L3QuNC1INC80L7Rh9C10YLQvtGH0L3QuNC60LAg0Lgg0LvQvtGF0LDQvdC60Lgg0YfRgtC+INCyINGB0LLQvtGOINC+0YfQtdGA0LXQtNGMINC/0YDQuNCy0L7QtNC40YIg0Log0L3QsNGA0YPRiNC10L3QuNGOINGE0YPQvdC60YbQuNC4INC80L7Rh9C10LLRi9Cy0LXQtNC10L3QuNGPINC4INC10LUg0L7QsdGA0LfQvtCy0LDQvdC40Y8sICDQsiA1INGB0YLQtdC/0LXQvdC4INC/0YDQvtC40YHRhdC+0LTQuNGCINGD0LbQtSDRgtGP0LYuINGA0LDRgdGI0LjRgNC10L3QuNC1LCDQuNC30LLQuNGB0L7RgdGC0Ywg0LzQvtGH0LXRgtC+0YfQvdC40LrQvtCyINC4INC90LDRgNGD0YjQsNC10YHRjyDRgNCw0LHQvtGC0LAg0L/QvtGH0LXQui4=</text:p>
          </table:table-cell>
          <table:table-cell office:value-type="float" office:value="170348" table:style-name="ce1">
            <text:p>170348</text:p>
          </table:table-cell>
          <table:table-cell office:value-type="float" office:value="86" table:style-name="ce1">
            <text:p>86</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15" table:style-name="ce1">
            <text:p>915315</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0J7RgtCy0LXRgiDQvdCwIDEg0LLQvtC/0YDQvtGBOiDQndC10L7QsdGF0L7QtNC40LzQviDQv9GA0L7QstC10YHRgtC4INC70LDQsdC+0YDQsNGC0L7RgNC90YvQtSDQuCDQuNC90YHRgtGA0YPQvNC10L3RgtCw0LvRjNC90YvQtSDQuNGB0YHQu9C10LTQvtCy0LDQvdC40Y8uINCb0LDQsdC+0YDQsNGC0L7RgNC90YvQtTogMSnQntCx0YnQuNC5INCw0L3QsNC70LjQtyDQutGA0L7QstC4ICjQtNC70Y8g0LLRi9GP0LLQu9C10L3QuNGPINCy0L7RgdC/0LDQu9C40YLQtdC70YzQvdGL0YUg0LjQt9C80LXQvdC10L3QuNC5KS4gMinQntCx0YnQuNC5INCw0L3QsNC70LjQtyDQvNC+0YfQuDog0YLQviDQtdGB0YLRjCwg0LHQuNC+0YXQuNC80LjRh9C10YHQutC40Lkg0LDQvdCw0LvQuNC3INC60YDQvtCy0Lgo0L3QsCDRgdCw0YXQsNGAINCwINGC0LDQutC20LUg0L/QtdGH0LXQvdC+0YfQvdGL0LUg0L/RgNC+0LHRiyk7INCa0LDQv9C+0LPRgNCw0LzQvNCwICjQtNC70Y8g0LDQvdCw0LvQuNC30LAg0YTRg9C90LrRhtC40Lgg0LrQuNGI0LXRh9C90LjQutCwKS4gMykg0J/RgNC+0LHQsCDQl9C40LzQvdC40YbQutC+0LPQviAo0L7RhtC10L3QutCwINC60L7QvdGG0LXQvdGC0YDQsNGG0LjQvtC90L3QvtC5INGA0LDQsdC+0YLRiyDQv9C+0YfQtdC6KS4g0JjQvdGB0YLRgNGD0LzQtdC90YLQsNC70YzQvdGL0LUg0LzQtdGC0L7QtNGLINC40YHRgdC70LXQtNC+0LLQsNC90LjRjyDRgtCw0LrQuNC1INC60LDQujogMSnQo9C70YzRgtGA0LDQt9Cy0YPQutC+0LLQvtC1INC40YHRgdC70LXQtNC+0LLQsNC90LjQtSDQvtGA0LPQsNC90L7QsiDQsdGA0Y7RiNC90L7QuSDQv9C+0LvQvtGB0YLQuCAo0LTQu9GPINC40YHQutC70Y7Rh9C10L3QuNC5INC/0LDRgtC+0LvQvtCz0LjQuSksIDIp0KbQuNGB0YLQvtGB0LrQvtC/0LjRjyAo0LTQu9GPINCy0LjQt9GD0LDQu9GM0L3QvtC5INC+0YbQtdC90LrQuCDRgdC70LjQt9C40YHRgtC+0Lkg0LzQvtGH0LXQstC+0LPQviDQv9GD0LfRi9GA0Y8gKNC/0YDQuCDQvdC10L7QsdGF0L7QtNC40LzQvtGB0YLQuCkpLiAzKdCm0LjRgdGC0L7Qs9GA0LDRhNC40Y8gKNC00LvRjyDQstGL0Y/QstC70LXQvdC40Y8g0L/Rg9C30YvRgNC90L4t0LzQvtGH0LXRgtC+0YfQvdC40LrQvtCy0L7Qs9C+INGA0LXRhNC70Y7QutGB0LApLiDQntGC0LLQtdGCINC90LAgMiDQstC+0L/RgNC+0YE6IDEu0KjQuNGA0L7QutCw0Y8g0Lgg0LrQvtGA0L7RgtC60LDRjyDRg9GA0LXRgnDQsCDRgyDQtNC10LLQvtGH0LXQuiDRgdC/0L7RgdC+0LHRgdGC0LLRg9C10YIg0LvQtdCz0LrQvtC80YMg0L/RgNC+0L3QuNC60L3QvtCy0LXQvdC40Y4g0LHQsNC60YLQtdGA0LjQuTsgMi7QndC10LTQvtGA0LDQt9Cy0LjRgtC+0YHRgtGMINC40LzQvNGD0L3QvdC+0Lkg0YHQuNGB0YLQtdC80YssINCwINGC0LDQutC20LUg0YHQvdC40LbQtdC90LjQtSDQt9Cw0YnQuNGC0Ysg0YHQu9C40LfQuNGB0YLRi9GFINC+0LHQvtC70L7Rh9C10Lo7IDMu0KMg0LTQtdCy0L7Rh9C10Log0YLQsNC60LbQtSDQsdC70LjQt9C60L4g0YDQsNGB0L/QvtC70L7QttC10L3QsCDRg9GA0LXRgtGA0LAg0Log0LDQvdCw0LvRjNC90L7QvNGDINC+0YLQstC10YDRgdGC0LjRjjsgNC7Ql9Cw0LTQtdGA0LbQutCwINC80L7Rh9C10LjRgdC/0YPRgdC60LDQvdC40Y8g0Lgg0L3QtSDQv9C+0LvQvdC+0LUg0LLRi9Cy0LXQtNC10L3QuNC1INC80L7Rh9C4INC40Lcg0LzQvtGH0LXQstC+0LPQviDQv9GD0LfRi9GA0Y87IDUu0JjQvNC10LXRgtGB0Y8g0YHQutC70L7QvdC90L7RgdGC0Ywg0LogcNC10YTQu9GO0LrRgdGDINC80L7Rh9C4INC40Lcg0LzQvtGH0LXQstC+0LPQviDQv9GD0LfRi9GA0Y8g0LIg0LzQvtGH0LXRgtC+0YfQvdC40LrQuDsgIDYuINCd0LXQt3DQtdC70L7RgdGC0Ywg0LHQsNGA0YzQtdGA0L3QvtC5INGE0YPQvdC60YbQuNC4INC80L7Rh9C10LLRi9Cy0L7QtNGP0YnQuNGFINC/0YPRgtC10Lk7IDcuINCd0LXQtNC+0YHRgtCw0YLQvtGH0L3QsNGPINCw0LrRgtC40LLQvdC+0YHRgtGMINC/0LXRgNC40YHRgtCw0LvRjNGC0LjQutC4INC80L7Rh9C10YLQvtGH0L3QuNC60L7Qsi4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361" table:style-name="ce1">
            <text:p>915361</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0LTQu9GPINC/0L7RgdGC0LDQvdC+0LLQu9C10L3QuNGPINC00LjQsNCz0L3QvtC30LAg0YDQtdCx0LXQvdC60LAg0L3QtdC+0LHRhdC+0LTQuNC80L4g0L/RgNC+0LLQtdGB0YLQuCDRgdC70LXQtNGD0Y7RidC40LUg0LDQvdCw0LvQuNC30YsuIDxiciAvPg0K0JrQu9C40L3QuNGH0LXRgdC60LjQuSDQsNC90LDQu9C40Lcg0LrRgNC+0LLQuCAg0LTQu9GPINGC0L7Qs9C+INGH0YLQvtCx0Ysg0L7RhtC10L3QuNGC0Ywg0YPRgNC+0LLQtdC90Ywg0LPQtdC80L7Qs9C70L7QsdC40L3QsCwg0LvQtdC50LrQvtGG0LjRgtC+0LIsINGN0L7Qt9C40L3QvtGE0LjQu9C+0LIuINCf0L7QstGL0YjQtdC90L3Ri9C1INGN0L7Qt9C40L3QvtGE0LjQu9GLINC80L7Qs9GD0YIg0YPQutCw0LfRi9Cy0LDRgtGMINC90LAg0L/QsNGA0LDQt9C40YLQsNGA0L3Rg9GOINC40L3QstCw0LfQuNGOINC40LvQuCDQsNC70LvQtdGA0LPQuNGH0LXRgdC60LjQtSDRgNC10LDQutGG0LjQuC4gMi4g0L7QsdGJ0LjQuSDQsNC90LDQu9C40Lcg0LrQsNC70LAsINGN0YLQviDQv9C+0LzQvtC20LXRgiDQvdCw0Lwg0L7RhtC10L3QuNGC0Ywg0YLQviDQutCw0Log0YDQsNCx0L7RgtCw0LXRgiDQttC60YIg0YMg0YDQtdCx0LXQvdC60LAg0Lgg0LXRgdGC0Ywg0LvQuCDQutCw0LrQuNC1INC90LDRgNGD0YjQtdC90LjRjyAv0L/QtdGA0LXQstCw0YDQuNCy0LDQvdC40LUg0L/QuNGJ0Lgg0YMg0YDQtdCx0LXQvdC60LAgLCDQvdCw0LvQuNGH0LjQtSDRgdC70LjQt9C4LCDQuNC30LzQtdC90LXQvdC40Y8g0LzQuNC60YDQvtGE0LvQvtGA0YsvIDMu0LjRgdGB0LvQtdC00L7QstCw0L3QuNC1INC60LDQu9CwINC90LAg0Y/QudGG0LAg0LPQtdC70YzQvNC40L3RgtC+0LIg0Lgg0L/RgNC+0YHRgtC10LnRiNC40YUg0LAg0YLQsNC6INC20LUg0YHQtNC10LvQsNGC0Ywg0YHQvtGB0LrQvtCxINC90LAg0L7RgdGC0YDQuNGG0YsgLCDQsNGB0LrQsNGA0LjQtNC+0Lc8YnIgLz4NCtCf0YDQvtCy0LXRgNC40YLRjCDQvdCwINGN0L3RgtC10YDQvtCx0LjQvtC3ICjRgdC+0YHQutC+0LEg0L3QsCDQvtGB0YLRgNC40YbRiyksINCw0YHQutCw0YDQuNC00L7Qty4gNCDRgtCw0Log0LbQtSDQvdC10L7QsdGF0L7QtNC40LzQviDQv9GA0L7QstC10YHRgtC4INCw0L3QsNC70LjQtyDQvdCwINC70Y/QvNCx0LvQuNC4LjxiciAvPg0KNS7Qo9CX0Jgg0L7RgNCz0LDQvdC+0LIg0LHRgNGO0YjQvdC+0Lkg0L/QvtC70L7RgdGC0Lgg0LzQvtC20L3QviDQv9GA0L7QstC10YHRgtC4INC/0YDQuCDQvdCw0LvQuNGH0LjQuCDRgdC+0LzQvdC10L3QuNC5INC00LvRjyDRgtC+0LPQviDRh9GC0L7QsdGLINGC0L7Rh9C90L4g0LjRgdC60LvRjtGH0LjRgtGMINC/0LDRgtC+0LvQvtCz0LjQuCDQv9C10YfQtdC90LgsINC20ZHQu9GH0L3QvtCz0L4g0L/Rg9C30YvRgNGPICwg0L/QvtC00LbQtdC70YPQtNC+0YfQvdC+0Lkg0LbQtdC70LXQt9GLLiA2LiDQsNC90LDQu9C40Lcg0LrQsNC70LAg0L3QsCDQtNC40YHQsdCw0LrRgtC10YDQuNC+0Lcg0LjQutC70Y7Rh9C40YLRjCDQv9Cw0YLQvtC70L7Qs9C40Y4g0L3QsNGA0YPRiNC10L3QuNGPINC80LjQutGA0L7RhNC70L7RgNGLINC+0YDQs9Cw0L3QuNC30LzQsCDRgyDRgNC10LHQtdC90LrQsC48YnIgLz4NCtCy0L7Qv9GA0L7RgSAyPGJyIC8+DQrQoyDQtNC10LLQvtGH0LXQuiDRg9GA0LXRgtGA0LAg0LrQvtGA0L7Rh9C1INC4INGI0LjRgNC1INGH0LXQvCDRgyDQvNCw0LvRjNGH0LjQutC+0LIuINCt0YLQviDQvtCx0LvQtdCz0YfQsNC10YIg0L/Qv9C+0L/QsNC00LDQvdC40LUg0LjQvdGE0LXQutGG0LjQuCDQsiDQvNC+0YfQtdC/0L7Qu9C+0LLRi9C1INC/0YPRgtC4INGDINC00LXQstC+0YfQtdC6LCDRgtCw0LrQuNC1INC40L3RhNC10LrRhtC40Lgg0LrQsNC6INC60LjRiNC10YfQvdCw0Y8g0L/QsNC70L7Rh9C60LAuINCx0LDQutGC0LXRgNC40LjRj9C8INC70LXQs9GH0LUg0L/RgNC+0L3QuNC60LDRgtGMINC40Lcg0L7QsdC70LDRgdGC0Lgg0L/RgNC+0LzQtdC20L3QvtGB0YLQuCDQuiDQvNC+0YfQtdCy0L7QvNGDINC/0YPQt9GL0YDRjiwg0YfRgtC+INGC0LDQuiDQttC1INC80L7QttC10YIg0LLRi9C30YvQstCw0YLRjCDQuNC90YTQtdC60YbQuNGOLiDRgtCw0Log0LbQtSDRgyDQtNC10LLQvtGH0LXQuiDRgNCw0YHQv9C+0LvQvtC20LXQvdC40LUg0YPRgNC10YLRgNGLINC6INCw0L3QsNC70YzQvdC+0LzRgyDQvtGC0LLQtdGA0YHRgtC40Y4g0L7Rh9C10L3RjCDQsdC70LjQt9C60L7QtSDQtNGA0YPQsyDQuiDQtNGA0YPQs9GDIDxiciAvPg0K0KMg0LTQtdCy0L7Rh9C10Log0LDQvdCw0YLQvtC80LjRh9C10YHQutC4INC90LDRgNGD0LbQvdC+0LUg0L7RgtCy0LXRgNGB0YLQuNC1INGD0YDQtdGC0YDRiyDQuCDQsNC90YPRgSDQvdCw0YXQvtC00Y/RgtGB0Y8g0LHQu9C40LbQtSDQtNGA0YPQsyDQuiDQtNGA0YPQs9GDLiDQrdGC0L4g0YHQvtC30LTQsNGR0YIg0YPRgdC70L7QstC40Y8g0LTQu9GPINCx0YvRgdGC0YDQvtCz0L4g0L/RgNC+0L3QuNC60L3QvtCy0LXQvdC40Y8g0LjQvdGE0LXQutGG0LjQuCDQsiDRg9GA0LXRgtGA0YMuINC90LDQv9GA0LjQvNC10YAg0YMg0LzQsNC70LXQvdGM0LrQuNGFINC00LXRgtC10Lkg0LfQsNGJ0LjRgtC90YvQtSDQvNC10YXQsNC90LjQt9C80Ysg0YHQu9C40LfQuNGB0YLQvtC5INC80L7Rh9C10LLRi9Cy0L7QtNGP0YnQuNGFINC/0YPRgtC10Lkg0LXRidGRINGE0L7RgNC80LjRgNGD0Y7RgtGB0Y8uINCSINGH0LDRgdGC0L3QvtGB0YLQuCwg0LjQvNC80YPQvdC+0LPQu9C+0LHRg9C70LjQvdC+0LLRi9C5INCx0LDRgNGM0LXRgCDQuCDQsdCw0LrRgtC10YDQuNGG0LjQtNC90LDRjyDQsNC60YLQuNCy0L3QvtGB0YLRjCDRgdC70LjQt9C40YHRgtGL0YUg0LzQvtCz0YPRgiDQsdGL0YLRjCDQvdC10LTQvtGB0YLQsNGC0L7Rh9C90L4g0YDQsNC30LLQuNGC0YssINGH0YLQviDQtNCw0LXRgiDQsdCw0LrRgtC10YDQuNGP0Lwg0L3QsNC40LHQvtC70YzRiNC40Lkg0YDQvtGB0YIuINCf0L7Qu9C+0LLRi9C1INCz0YPQsdGLINC4INC+0YHQvtCx0LXQvdC90L7RgdGC0Lgg0YHRgtGA0L7QtdC90LjRjyDQstGD0LvRjNCy0Ysg0YMg0LzQsNC70LXQvdGM0LrQuNGFINC00LXQstC+0YfQtdC6INC80L7Qs9GD0YIg0YHQv9C+0YHQvtCx0YHRgtCy0L7QstCw0YLRjCDQv9GA0L7QvdC40LrQvdC+0LLQtdC90LjRjiDQuNC90YTQtdC60YbQuNC4INC10YHQu9C4INC90LXRgdC+0LHQu9GO0LTQsNC10YLRgdGPINCz0LjQs9C40LXQvdGLLg==</text:p>
          </table:table-cell>
          <table:table-cell office:value-type="float" office:value="170348" table:style-name="ce1">
            <text:p>170348</text:p>
          </table:table-cell>
          <table:table-cell office:value-type="float" office:value="84" table:style-name="ce1">
            <text:p>8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5442" table:style-name="ce1">
            <text:p>915442</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MSnQryDQtNGD0LzQsNGOINC90YPQttC90L4g0L7RgtC90LXRgdGC0LjRgdGMINGB0LXRgNGM0LXQt9C90L4g0Lgg0L/RgNC+0LLQvtC00LjRgtGMINGC0YnQsNGC0LXQu9GM0L3QvtC1INC40YHRgdC70LDQtNC+0LLQsNC90LjQtSDQv9GA0Lgg0YLQsNC60LjRhSDRgdC40LzQv9GC0L7QvNCw0YUu0JLQstC40LTRgyDQvdCw0LvQuNGH0LjRjyDQsdC+0LvQtdCy0YvRhSDQvtGJ0YPRidC10L3QuNC5INCyINC20LjQstC+0YLQtSDRgyAg0YDQtdCx0LXQvdC60LAg0Lgg0LHQtdC70LXRgdC10LPQviDQvdCw0LvQtdGC0LAg0L3QsCDRj9C30YvQutC1LCDQvdGD0LbQvdC+INGG0LXQu9C10YHQvtC+0LHRgNCw0LfQvdC+0LUg0L/RgNC+0LLQtdC00LXQvdC40LUg0LjRgdGB0LvQtdC00L7QstCw0L3QuNGPINC00LvRjyDQstGL0Y/QstC70LXQvdC40Y8g0L/RgNC10L/QvtC00L7Qu9Cw0LPQsNC10LzRi9GFINC/0LDRgtC+0LvQvtCz0LjQuCDQuNC70Lgg0LjQvdGE0LXQutGG0LjQuCDQsiDRgdC40YHRgtC10LzQtSDQv9C40YnQtdCy0LDRgNC10L3QuNGPLtCf0LXRgNCy0L7QvdCw0YfQsNC70YzQvdC+INC80L7Qs9GD0YIg0LHRi9GC0Ywg0L3QsNC30L3QsNGH0LXQvdGLINCw0L3QsNC70LjQt9GLINC60LDQu9CwINGBINGG0LXQu9GM0Y4g0L7QsdC90LDRgNGD0LbQtdC90LjRjyDQv9Cw0YDQsNC30LjRgtCw0YDQvdGL0YUg0LjQvdGE0LXQutGG0LjQuCzQuCDQtNGA0YPQs9C40YXQv9Cw0YLQvtCz0LXQvdC90YvRhSDQvNC40LrRgNC+0L7RgNCz0LDQvdC40LfQvNC+0LIu0JTQsNC90L3Ri9C5INCw0L3QsNC70LjQtyDQstC60LvRjtGH0LDQtdGCINCyINGB0LXQsdGPINC/0L7QuNGB0Log0Y/QuNGGINCz0LXQu9GM0LzQuNC90YLQvtCyICzRhtC40YHRgiDQuCDQtNGA0YPQs9C40YUg0LjQvdC00LjQsNC60YLQvtGA0L7QsiDQuNC90LLQsNC30LjQuC7QkCDRgtCw0Log0LbQtSDQtNC+0LrRgtC+0YAg0LzQvtC20LXRgiDQv9C+0YDQtdC60L7QvNC10L3QtNC+0LLQsNGC0Ywg0L/RgNC+0LLQtdC00LXQvdC40LUg0LTQvtC/LtC40YHRgdC70LXQtNC+0LLQsNC90LjQuSzRgtCw0LrQuNC1INC60LDQujrQntCQ0Lo60L7QvSDQv9C+0LfQstC+0LvRj9C10YIg0LLRi9GP0LLQuNGC0Ywg0L/RgNC40LfQvdCw0LrQuCDQstC+0YHQv9Cw0LvQuNGC0LXQu9GM0L3Ri9GFINC40LvQuCDQuNC90YTQtdC60YbQuNC+0L3QvdGL0YUg0L/RgNC+0YbQtdGB0YHQvtCyINCyINC+0YDQs9Cw0L3QuNC30LzQtS7Qo9C70YzRgtGA0L7Qt9Cy0LrQvtCy0L7QtSDQuNGB0LvQu9C10LTQvtCy0LDQvdC40LUg0L7RgNCz0LDQvdC+0LIgOiDQv9C+0LfQstC+0LvRj9C10YIg0LLQuNC30YPQsNC70LjQt9C40YDQvtCy0LDRgtGMINGB0L7RgdGC0L7Rj9C90LjQtSDQstC90YPRgtGA0LXQvdC90LjRhSDQvtGA0LPQsNC90L7QsizQvdCw0L/RgNC40LzQtdGAICzQttC10LvRg9C00L7QuizQv9C10YfQtdC90Yws0LbQtdC70YfQvdGL0Lkg0L/Rg9C30YvRgNGMINC4INC60LjRiNC10YfQvdC40Lou0Lgg0LTRg9C80LDRjiDQtNC+0L/QvtC70L3QuNGC0LXQu9GM0L3QviDQvNC+0LbQvdC+INCy0LfRj9GC0Ywg0LHQuNC+0YXQuNC80LjRh9C10YHQutC40Lkg0LDQvdCw0LvQuNC3INC4INCx0LDQuiDQv9C+0YHQtdCyINC60LDQu9CwLjxiciAvPg0KMinQoyDQv9GP0YLQuNC70LXRgtC70LXRgtC90LXQuSDQtNC10LLQvtGH0LrQuCDQvdCw0LHQu9GO0LTQsNGO0YLRgdGPINGH0LDRgdGC0YvQtSDQsdC+0LvQtdC30L3QtdC90L3Ri9C1INC/0L7Qt9GL0LLRiyDQuiDQvNC+0YfQtdC40YHQv9GD0YHQutCw0L3QuNGOLNCx0L7Qu9C4INCyINC+0LHQu9Cw0YHRgtC4INC20LjQstC+0YLQsCzQu9C40YXQvtGA0LDQtNC60LAg0Lgg0LTRgNGD0LPQuNC1INGB0LjQvNC/0YLQvtC80Yss0LrQvtGC0L7RgNGL0LUg0YPQutCw0LfRi9Cy0LDRjtGCINC90LAg0LLQvtC30LzQvtC20L3Rg9GOINC40L3RhNC10LrRhtC40Y4g0LjQu9C4INC20LUg0L3QsCDQstC+0YHQv9Cw0LvQtdC90LjQtSDQvNC+0YfQtdCy0YvQstC+0LTRj9GJ0LjRhSDQv9GD0YLQtdC5LtCd0LDQu9C40YfQuNC1INCx0LXQu9C60LAs0L/QvtCy0YvRiNC10L3QvdGL0YUg0LvQtdC50LrQvtGG0LjRgtC+0LIg0Lgg0LHQsNC60YLQtdGA0LjQuSDQsiDQvNC+0YfQtSDQv9C+0YLQstC10YDQttC00LDQtdGCINGN0YLQviDQv9GA0LXQtNC/0L7Qu9C+0LbQtdC90LjQtS7QotCw0Log0LrQsNC6INC70LXQudC60L7RhtC40YLRiyDQuCDQsdCw0LrRgtC10YDQuNC4INGD0LrQsNC30YvQstCw0Y7RgiDQvdCwINC/0YDQvtC90LjQutC90L7QstC10L3QuNC1INC40L3RhNC10LrRhtC40Lgg0Lgg0LjQtNC10YIg0L7RgtCy0LXRgiDQuNC80LzRg9C90L3QvtC5INGB0LjRgdGC0LXQvNGLLtCQ0L3QsNGC0L7QvNC40YfQtdGB0LrQuNC1INC+0YHQvtCx0LXQvdC90L7RgdGC0Lgg0LzQvtGH0LXQstGL0LLQtdC70LjRgtC10LvRjNC90L7QuSDRgdC40YHRgtC10LzRi9C00LXRgtC10Lks0YLQsNC60LjQtSDQutCw0Log0LrQvtGA0L7RgtC60LjQtSDQvNC+0YfQtdC/0YPRgdC60LDRgtC10LvRjNC90YvQtSDQv9GD0YLQuCDQuNCx0LvQuNC30L7RgdGC0Ywg0LzQvtGH0LXQstC+0LPQviDQutCw0L3QsNC70LAg0Log0LfQsNC00L3QtdC80YMg0L/RgNC+0YXQvtC00YMs0YHQvtC30LTQsNGO0YIg0LHQu9Cw0LPQvtC/0YDQuNGP0YLQvdGL0LUg0YPRgdC70L7QstC40Y/QtNC70Y8g0L/RgNC+0L3QuNC60L3QvtCy0LDQvdC40LUg0LHQsNC60YLQtdGA0LjQuSDQsiDQvNC+0YfQtdCy0L7QuSDQv9GD0LfRi9GA0Ywu0J3QtSDRgdC+0LHQu9GO0LTQtdC90LjQtSDQv9GA0LDQstC40Lsg0LPQuNCz0LXQvdGLICzQvtGB0L7QsdC10L3QvdC+INC/0L7RgdC70LUg0YLRg9Cw0LvQtdGC0LAs0LzQvtC20LXRgiDRgdC/0L7RgdC+0LHRgdGC0LLQvtCy0LDRgtGMINGA0LDRgdC/0YDQvtC/0YDQvtGB0YLRgNCw0L3QtdC90LjRjizRgNCw0LfQvNC90L7QttC10L3QuNGOINCx0LDQutGC0LXRgNC40Lgg0Log0LLRhdC+0LTRgyDQsiDRg9GA0LXRgtGA0YMu0JrRgNC+0LzQtSDRgtC+0LPQviDQvdC10LTQvtGB0YLQsNGC0L7Rh9C90L4g0YDQsNC30LLQuNGC0LDRjyDQuNC80LzRg9C90L3QsNGPINGB0LjRgdGC0LXQvNCw0LTQtdGC0LXQuSDQtNC10LvQsNC10YIg0LjRhSDQsdC+0LvQtdC1INCy0L7RgdC/0YDQuNC40LzRh9C40LLRi9C80Lgg0Log0LjQvdGE0LXQutGG0LjQvtC90L3Ri9C8INCw0LPQtdC90YLQsNC8INC4INGB0L7Qt9C00LDQtdGC0YHRjyDQsdC70L7QsNCz0L7Qv9GA0LjRj9GC0L3Ri9C1INGD0YHQu9C+0LLQuNGPINC00LvRjyDRgNCw0LfQvNC90L7QttC10L3QuNGPINCx0LDQutGC0LXRgNC40Lku</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сдать анализ на копрограмму по 1 ответу.</text:p>
          </table:table-cell>
          <table:table-cell office:value-type="float" office:value="0" table:style-name="ce1">
            <text:p>0</text:p>
          </table:table-cell>
          <table:table-cell table:number-columns-repeated="16376"/>
        </table:table-row>
        <table:table-row table:style-name="ro1">
          <table:table-cell office:value-type="float" office:value="915741" table:style-name="ce1">
            <text:p>915741</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MSDQstC+0L/RgNC+0YEg0J/QvtGB0LrQvtC70YzQutGDINGDINGA0LXQsdC10L3QutCwINC/0L7QutGA0YvRgiDRj9C30YvQuiDQsdC10LvRi9C8INC90LDQu9C10YLQvtC8ICzQsdC+0LvQuCDQsiDQttC40LLQvtGC0LUgLNC80L7QttC10YIg0LHRi9GC0Ywg0L/QvtC70LXQt9C90L4g0L7RhtC10L3QuNGC0Ywg0L3QsNC70LjRh9C40LUg0LrQsNC60LjRhSDQu9C40LHQviDQvtGC0LrQu9C+0L3QtdC90LjQuSDQuNC70Lgg0LjQvdGE0LXQutGG0LjRjyDQsiDQutC40YjQtdGH0L3QviDQttC10LvRg9C00L7Rh9C90L7QvCDRgtGA0LDQutGC0LUgLtCe0LTQuNC9INC40Lcg0L/QtdGA0LLRi9GFINC40YHRgdC70LXQtNC+0LLQsNC90LjQuCDQvNC+0LbQtdGCINCx0YvRgtGMINCw0L3QsNC70LjQtyDQutCw0LvQsCDQvdCwINC/0YDQtdC00LzQtdGC0L7QsiDQvdCw0LvQuNGH0LjRjyDQuCDQtNGA0YPQs9C40YUg0L/QsNGC0L7Qs9C10L3QvtCyIC7QtNCw0L3QvdGL0Lkg0LDQvdCw0LvQuNC3INC80L7QttC10YIg0LLQutC70Y7Rh9Cw0YLRjCDQvtC/0YDQtdC00LXQu9C10L3QuNC1INGP0LnRhiDQs9C10LvRjNC80LjQvdGC0L7QsizRhtC40YHRgtGLINC/0YDQvtGB0YLQtdC50YjQuNGFICzQu9GP0LzQsdC70LjQvtC3INC4INGC0LDQuiDQtNCw0LvQtdC1IC7QutGA0L7QvNC1INGC0L7Qs9C+INGH0YLQviDQstGA0LDRhyDQvNC+0LbQtdGCINGA0LXRiNC40YLRjCDQv9GA0L7QstC10YHRgtC4INGB0LvQtdC00YPRjtGJ0LjQtSDQuNGB0YHQu9C10LTQvtCy0LDQvdC40Y8u0J7QsdGJ0LjQuSDQsNC90LDQu9C40Lcg0LrRgNC+0LLQuCAg0J/QntCX0JLQntCb0K/QldCiINCS0KvQr9CS0JvQmNCi0Kwg0LLQvtGB0L/QsNC70LjRgtC10LvRjNC90YvQtSDQv9GA0L7RhtC10YHRgdGLINC4INC40L3RhNC10LrRhtC40L7QvdC90YvQtSDQv9GA0L7RhtC10YHRgdGLINC+0YDQs9Cw0L3QuNC30LzQtSAu0KLQsNC60LbQtSDQvNC+0LbQvdC+INCx0YPQtNC10YIg0L7QsdGA0LDRgtC40YLRjCDQstC90LjQvNCw0L3QuNC1INC90LAg0YPRgNC+0LLQtdC90Ywg0Y3RgNC40YLRgNC+0YbQuNGC0L7QsiDQuCDQs9C10LzQvtCz0LvQvtCx0LjQvdCwINC4INCy0YvRj9Cy0LjRgtGMINCw0L3QtdC80LjRjiAo0L/RgNC40LfQvdCw0Log0LDQvdC10LzQuNC4INGDINGA0LXQsdC10L3QutCwICzQvNC+0LbQtdGCINGD0LrQsNC30YvQstGC0Ywg0L3QsCDQv9Cw0YDQsNC30LjRgtCw0YDQvdGL0LUg0LjQvdGE0LXQutGG0LnQuNC5INC70LjQsdC+INCy0L7RgdC/0LDQu9C10L3QuNC1INC60LDQuiDQs9C+0LLQvtGA0LjQu9CwINGA0LDQvdC10LUpLtCj0JfQmCDQkdCg0K7QqNCd0J7QmSDQn9Ce0JvQntCh0KLQmCDQv9C+0LfQstC+0LvRj9C10YIg0LjRgdGB0LvQtdC00L7QstCw0YLRjCDQstC90YPRgtGA0LXQvdC90LjQtSDRgdC+0YHRgtC+0Y/QvdC40Y8g0L7RgNCz0LDQvdC+0LIg0LLQutC70Y7Rh9Cw0Y8g0LbQtdC70YPQtNC+0LogLNC/0LXRh9C10L3RjCzRgdC10LvQtdC30LXQvdC60LAg0L/QvtC00LbQtdGD0LTQvtGH0L3QsNGPINC20LXQu9C10LfQsCzQv9C10YfQtdC90Yws0LbQtdC70YfQtdCy0YvQstC+0LTRj9GJ0LjQtSDQv9GD0YLQuCAuIC4yINCy0L7Qv9GA0L7RgSDRgyA1INC70LXRgtC90LXQuSDQtNC10LLQvtGH0LrQuCDRh9Cw0YHRgtGL0Lwg0LHQvtC70LXQt9C90LXQvdC90YvQvCDQvNC+0YfQtdC40YHQv9GD0YHQutCw0L3QuNC10Lwg0LHQvtC70YzRjiDQsiDQttC40LLQvtGC0LUs0LvQuNGF0L7RgNCw0LTQutC+0Lkg0Lgg0LTRgNGD0LPQuNC80Lgg0YHQuNC80L/RgtC+0LzQsNC80LggLtCyINC80L7Rh9C10LjQv9GB0LrRg9C60LDQvdC40LUg0L3QsNC70LjRh9C40LUg0YEg0YDQtdCw0LrRgtC40LLQvdC+0LPQviDQsdC10LvQutCwICzQu9C10LnQutC+0YbQuNGC0L7QsizQsdCw0LrRgtC10YDQuNC5INCyINC80L7Rh9C1INC80L7QttC10YIg0YPQutCw0LfRi9Cy0LDRgtGMINC90LAg0LjQvdGE0LXQutGG0LjRjyDQu9C40LHQviDQstC+0YHQv9Cw0LvQtdC90LjQtSDQvNC+0YfQtdCy0YvQstC+0LTRj9GJ0LjRhSDQv9GD0YLQtdC5LtCY0L3RgtC10YDQv9GA0LXRgtCw0YbQuNGPINCw0L3QsNC70LjQt9CwINC80L7Rh9C4IC3QsdC10LvQvtC6IDAsMDk50LMg0Lsg0YHQstC40LTQtdGC0LXQu9GM0YHRgtCy0YPQtdGCINC+INGC0L7QvCDRh9GC0L4g0LLQvtGB0L/Qu9Cw0L3QuNC1INGB0LLRj9C30LDQvdC+INGBINCc0JLQoS7Qm9C10LnQutC+0YbQuNGC0YsgMjAtMzAg0LIg0L/QvtC70LUg0LfRgNC10L3QuNGPINC/0YDQuNC30L3QsNC6INC70LXQudC60L7RhtGD0YLRg9GA0LjQuCAu0JHQsNC60YLQtdGA0LjQuCArKyDRg9C60LDQt9Cw0YvQstCw0LXRgiDQvSDQsNCx0LDQutGC0LXRgNC40LDQu9GM0L3Rg9GOINC40L3RhNC10LrRhtC40Y4u0JzQvtC20L3QviDRgtCw0LrQttC1INC30LDQv9C+0LTQvtC30YDQuNGC0Ywg0YMg0YDQtdCx0LXQvdC60LAg0L/QviDQsNC90LDQu9C40LfQsNC8INC+0YHRgtGA0YvQuSDRhtC40YHQuNGC0LjRgiDQuNC70Lgg0LLQvtGB0YXQvtC00Y/RidC40LUg0LjQvdGE0LXQutGG0LjRjyDQvdCw0L/RgNC40LzQtdGAIC3Qv9C40LXQu9C+0L3QtdGE0YDQuNGCLiAg0JDQvdCw0YLQvtC80L4g0YTQuNC30LjQvtC70L7Qs9C40YfQtdGB0LrQuNC1INC+0YHQvtCx0LXQvdC90L7RgdGC0Lgg0LzQvtGH0LXQstGL0LTQtdC70LjRgtC10LvRjNC90L7QuSDRgdC40YHRgtC10LzRiyDQtNC10YLQtdC5INC80L7Qs9GD0YIg0L/RgNC10LTRgNCw0YHQv9C+0LvQvtCz0LDRgtGMINC6INGA0LDQt9Cy0LjRgtC40Y4g0YLQsNC60LjRhSDRgdC+0YHRgtC+0Y/QvdC40Lkg0LrQvtGA0L7RgtC60LjQtSDQvNC+0YfQtdGB0LjRgdC/0YPRgdC60LDRgtC10LvRjNC90YvQtSDQv9GD0YLQuCAt0YHQv9C+0YHQvtCx0YHRgtCy0YPQtdGCINCx0L7Qu9C10LUg0LvQtdCz0LrQvtC80YMg0L/RgNC+0L3QuNC60L3QvtCy0LXQvdC40LUg0LHQsNC60YLQtdGA0LjQuCDQsiDQvNC+0YfQtdCy0L7QuSDQv9GD0LfRi9GA0YwgLtCx0LvQuNC30L7RgdGC0Ywg0LzQvtGH0LXQstC+0LPQviDQutCw0L3QsNC70LAg0Log0LfQsNC00L3QtdC80YMg0L/RgNC+0YXQvtC00YMgLdGD0LLQtdC70LjRh9C40LLQsNC10YIg0YDQuNGB0LogINC/0YDQvtC90LjQutC90L7QstC10L3QuNC1INCx0LDQutGC0LXRgNC50LjQtyDQutC40YjQtdGH0L3QuNC60LAgLtC90LXQv9GA0LDQstC40LvRjNC90LDRjyDQs9C40LPQuNC10L3QsCDQv9GA0LjQstC+0LTQuNGCINC+0YHQvtCx0LXQvdC90L4g0L/QvtC70YHQtSDRgtGD0LDQu9C10YLQsCDRgdC/0L7RgdC+0LHRgdGC0LLRg9C10YIg0L/QtdGA0LXQtNCw0YfQtSDQsdCw0LrRgtC10YDQuNC5INC6INCy0YXQvtC00YMg0LIg0YPRgNC10YLRgNGDIC7QvdC10LTQvtGA0LDQt9Cy0LjRgtC+0YHRgtGMINC40LzQvNGD0L3QvdC+0Lkg0YHQuNGB0YLQtdC80Ysg0LTQtdC70LDQtdGCINC00LXRgtC10Lkg0LHQvtC70LXQtSDRj9GD0LfQstC40LzRiyDQv9C10YDQtdC0INCy0L7Qt9Cx0YPQtNC40YLQtdC70Y/QvNC4INC40L3RhNC10LrRhtC40Lku0KLQsNC60LbQtSDQvNC+0LbQvdC+INC00L7QsdCw0LLQuNGC0Ywg0L3QtdC00L7RgdGC0LDRgtC+0YfQvdC+0YLRgdGMINC30YDQtdC70L7RgdGC0Ywg0LfQsNGJ0LjRgtC90YvRhSDQvNC10YXQsNC90LjQt9C80L7QvCDQsiDQtNC10YLRgdC60L7QvCDQstC+0LfRgNCw0YHRgtC1INC90LUg0YHQuNC70YzQvdC+INGA0LDQt9Cy0LjRgtCwINC40LzQvNGD0L3QsNGPINGB0LjRgdGC0LXQvNCwINGH0YLQviDRgdC90LjQttCw0LXRgiDQvtGA0LPQsNC90LjQt9C80LAg0LHQvtGA0L7RgtGM0YHRjyDRgSDQuNC90YTQtdC60YbQuNGP0LzQuCAu</text:p>
          </table:table-cell>
          <table:table-cell office:value-type="float" office:value="170348" table:style-name="ce1">
            <text:p>170348</text:p>
          </table:table-cell>
          <table:table-cell office:value-type="float" office:value="76" table:style-name="ce1">
            <text:p>76</text:p>
          </table:table-cell>
          <table:table-cell office:value-type="string" table:style-name="ce1">
            <text:p>не полные ответы .Не написано о АФО почек по 2 вопросу.</text:p>
          </table:table-cell>
          <table:table-cell office:value-type="float" office:value="0" table:style-name="ce1">
            <text:p>0</text:p>
          </table:table-cell>
          <table:table-cell table:number-columns-repeated="16376"/>
        </table:table-row>
        <table:table-row table:style-name="ro1">
          <table:table-cell office:value-type="float" office:value="1066966" table:style-name="ce1">
            <text:p>1066966</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0KPQpdCj0JTQqNCV0J3QmNCVICDQkNCf0J/QldCi0JjQotCQICwg0J/QldCg0JjQntCU0JjQp9CV0KHQmtCY0JUg0JHQntCb0Jgg0J7QmtCe0JvQniDQn9Cj0J/QmtCQICwg0J7QkdCb0J7QltCV0J3QndCe0KHQotCsINCv0JfQq9Ca0JAg0JIg0JTQkNCd0J3QntCcINCf0JXQoNCY0J7QlNCVINCc0J7Qk9Cj0KIg0JHQq9Ci0Kwg0KTQmNCX0JjQntCb0J7Qk9CY0KfQldCh0JrQmNCc0JggLNCd0J4gLCAgINCc0J7Qk9Cj0KIg0KPQmtCQ0JfQkNCi0KwgINCd0JAg0J/QntCg0JDQltCV0J3QmNCvINCW0JXQm9Cj0JTQntCn0J3QniDQmtCY0KjQldCn0J3QntCT0J4g0KLQoNCQ0JrQotCQLiAg0JTQm9CvINCi0J7Qk9CeINCn0KLQntCR0Ksg0JTQmNCQ0JPQndCe0KHQotCY0KDQntCS0JDQotCsINCYINCd0JDQp9CQ0KLQrCDQm9CV0KfQldCd0JjQryAsINCd0JXQntCR0KXQntCU0JjQnNCeINCf0KDQntCS0JXQodCi0Jgg0JrQntCc0J/Qm9CV0JrQodCd0J7QlSDQntCR0KHQm9CV0JTQntCS0JDQndCY0JUgIC0g0JLQmtCb0K7Qp9CQ0K8g0JjQndCh0KLQoNCj0JzQldCd0KLQkNCb0KzQndCe0JUg0Jgg0JvQkNCR0J7QoNCQ0KLQntCg0J3QntCVIC4g0KMg0JTQldCi0JXQmSDQlNCe0KjQmtCe0JvQrNCd0J7Qk9CeINCS0J7Ql9Cg0JDQodCi0JAg0J3QldCg0JXQlNCa0J4g0J3QkNCR0JvQrtCU0JDQldCi0KHQryDQndCQ0JvQmNCn0JjQlSDQn9CQ0KDQkNCX0JjQotCe0JIgLCDQn9Ce0K3QotCe0JzQoyDQkiDQn9CV0KDQktCj0K4g0J7Qp9CV0KDQldCU0Kwg0KHQm9CV0JTQo9CV0KIg0J/QoNCe0JLQldCg0JjQotCsINCa0JDQmyDQndCQINCT0JXQm9Cs0JzQmNCd0KLQqyAo0JrQkNCbINCd0JAg0KHQmtCg0KvQotCj0K4g0JrQoNCe0JLQrCApLiDQktCe0JfQnNCe0JbQndCeINCc0J7QltCV0KIg0J7QkdCd0JDQoNCj0JbQmNCS0JDQotCs0KHQryDQk9CV0JvQrNCc0JjQndCi0Ksg0JXQodCb0Jgg0KMg0KDQldCR0JXQndCa0JAg0JDQodCa0JDQoNCY0JTQntCXINCb0K/QnNCR0JvQmNCe0JcgLiDQmNCXINCY0J3QodCi0KDQo9Cc0JXQndCi0JDQm9Cs0J3Qq9ClINCY0KHQodCb0JXQlNCe0JLQkNCd0JjQmSAtINCj0JfQmCDQkdCg0K7QqNCd0J7QmSDQn9Ce0JvQntCh0KLQmCAoINCe0KbQldCd0JjQktCQ0JXQotCh0K8gINCf0JXQp9CV0J3QrCAsINCf0J7QlNCW0JXQm9Cj0JTQntCn0J3QkNCvINCW0JXQm9CV0JfQkCwg0JbQldCb0KfQndCr0Jkg0J/Qo9CX0KvQoNCsICkg0JzQntCT0KPQoiDQndCQ0JHQm9Cu0JTQkNCi0KzQodCvINCS0J7Ql9Cc0J7QltCd0KvQlSAg0KHQotCg0KPQmtCi0KPQoNCd0KvQlSDQmNCX0JzQldCd0JXQndCY0K8gLNCg0JDQl9Cc0JXQoNCQLCDQpNCe0KDQnNCrICwg0JTQmNCk0KTQo9CX0J3Qq9CVINCY0JfQnNCV0J3QldCd0JjQryDQn9CQ0KDQldCd0KXQmNCc0KsgLCDQmtCe0J3Qk9Cg0JXQnNCV0J3QotCrINCSINCf0KDQntCi0J7QmtCQ0KUg0JbQldCb0KfQndCe0JPQniDQn9Cj0JfQq9Cg0K8gLiDQotCQ0JrQltCVINCc0J7QltCd0J4g0J/QoNCY0JzQldCd0JjQotCsINCg0JXQndCi0JPQldCd0J7QktCh0JrQntCVINCY0KHQodCb0JXQlNCe0JLQkNCd0JjQlSDQoSDQmtCe0J3QotCg0JDQodCi0J7QnCDQodCj0JvQrNCk0JDQotCQINCR0JDQoNCY0K8gKNCh0J3QkNCn0JDQm9CQINCd0JXQntCR0KXQntCU0JjQnNCeINCf0KDQntCS0JXQoNCY0KLQrCDQp9Cj0JLQodCi0JLQmNCi0JXQm9Cs0J3QntCh0KLQrCAg0Jog0KHQo9Cb0KzQpNCQ0KLQoyAg0JHQkNCg0JjQryApLiDQnNCe0JbQldCiINCe0JHQndCQ0KDQo9CW0JjQktCQ0KLQrNCh0K8gINCU0JXQpNCV0JrQoiDQndCQ0J/QntCb0J3QldCd0JjQryAsINCh0JjQndCU0KDQntCcINCd0JjQqNCQICwg0JPQkNCX0Ksg0J3QldCf0KDQntCl0J7QlNCY0JzQntCh0KLQrCDQmtCY0KjQldCn0J3QmNCa0JAgLiDQoyDQlNCV0KLQldCZINCn0JDQodCi0J4g0JzQntCT0KPQoiDQndCQ0JHQm9Cu0JTQkNCi0KzQodCvINCS0JfQlNCj0KLQmNCVINCW0JjQktCe0KLQkCDQmNCXINCX0JAg0J3QldCX0KDQldCb0J7QodCi0Jgg0KTQldCg0JzQldCd0KLQkNCi0JjQktCd0J7QmSDQodCY0KHQotCV0JzQqyDQltCa0KIgLCDQotCQ0JrQltCVINCc0JjQmtCg0J7QpNCb0J7QoNCrINCa0JjQqNCV0KfQndCY0JrQkCAuINCf0KDQmCDQrdCT0JTQoSAo0K3Ql9Ce0KTQkNCT0J7Qk9CQ0KHQotCg0J7QlNCj0J7QlNCV0J3QkNCb0KzQndCe0JnQodCa0J7Qn9CY0JggKSAtINCS0J7Ql9Cc0J7QltCd0KsgINCT0JjQn9CV0KDQldCc0JjQryDQodCb0JjQl9CY0KHQotCe0Jkg0J7QkdCe0JvQntCn0JrQmCAg0JbQldCb0KPQlNCa0JAgLNCt0KDQntCX0JjQmCAs0K/Ql9CS0KsuICDQotCQ0JrQltCVINCc0J7QltCd0J4g0J/QoNCY0JzQldCd0JjQotCsINCj0KDQldCQ0JfQndCr0Jkg0KLQldCh0KIg0JTQm9CvINCf0J7QotCS0JXQoNCW0JTQldCd0JjQryDQk9CQ0KHQotCg0JjQotCQINCYINCv0JfQktCV0J3QndCe0Jkg0JHQntCb0JXQl9Cd0JggLiDQn9Cg0Jgg0J3QkNCb0JjQp9CY0Jgg0JTQkNCd0J3Qq9ClINCd0J7Ql9Ce0JvQntCT0JjQmCDQo9Cg0JXQkNCX0J3Qq9CZINCi0JXQodCiINCf0J7Qm9Ce0JbQmNCi0JXQm9CV0J0gIC4g0J/QoNCYINCe0JHQqdCV0Jwg0JDQndCQ0JvQmNCX0JUg0JrQoNCe0JLQmCDQnNCe0JPQo9CiINCd0JDQkdCb0K7QlNCQ0KLQrNCh0K8gINCf0KDQmNCX0J3QkNCa0Jgg0JDQndCV0JzQmNCYICgg0KHQndCY0JbQldCd0JjQryDQk9CV0JzQntCT0JvQntCR0JjQndCQICAg0Jgg0K3QoNCY0KLQoNCe0KbQmNCi0J7QkiAgOyDQotCQ0JrQltCVINCd0JXQmdCi0KDQntCk0JjQm9Cs0J3Qq9CZINCb0JXQmdCa0J7QptCY0KLQntCXLdCj0JrQkNCX0KvQktCQ0JXQoiDQndCQICDQndCQ0JvQmNCn0JjQlSDQktCe0KHQn9CQ0JvQmNCi0JXQm9Cs0J3QntCT0J4g0J/QoNCe0KbQldCh0KHQkCDQl9CQINCh0KfQldCiINCR0JDQmtCi0JXQoNCY0JDQm9Cs0J3QntCZINCY0J3QpNCV0JrQptCY0JggOyDQm9CY0JzQpNCQ0KbQmNCi0JDQoNCd0KvQmSAg0JvQldCZ0JrQntCm0JjQotCe0JcgINCj0JrQkNCX0KvQktCQ0JXQoiDQndCQINCd0JDQm9CY0KfQmNCVINCS0JjQoNCj0KHQndCe0Jkg0JjQndCk0JXQmtCm0JjQmCA7INCi0JDQmtCW0JUg0JzQntCW0JXQoiDQkdCr0KLQrCDQn9Ce0JLQq9Co0JDQotCs0KHQryDQodCg0JEgLdCa0J7QotCe0KDQq9CZINCi0JDQmtCW0JUg0K/QktCb0K/QldCi0KHQryDQnNCQ0KDQmtCV0KDQntCcICDQktCe0KHQn9CQ0JvQldCd0JjQryAuINCf0KDQmCDQkdCY0J7QpdCY0JzQmNCn0JXQodCa0J7QnCDQkNCd0JDQm9CY0JfQlSDQmtCg0J7QktCYINCc0J7Qk9Cj0KIg0J3QkNCR0JvQrtCU0JDQotCs0K8g0J/QntCS0KvQqNCV0J3QmNCvINCQ0JvQoiwg0JDQodCiICzQqdCV0JvQntCn0J3QntCZINCk0J7QodCk0JDQotCQ0JfQqyAgKNCc0JDQoNCa0JXQoNCrINCf0JXQp9CV0J3QntCn0J3QntCT0J4g0J/QntCS0KDQldCW0JTQldCd0JjQryApLCAg0J/QntCS0KvQqNCV0J3QmNCvINCQ0JzQmNCb0JDQl9CrICzQm9CY0J/QkNCX0KssINCi0KDQmNCf0KHQmNCd0JAoINCc0JDQoNCa0JXQoNCrINCf0JDQndCa0KDQldCQ0KLQmNCi0JAgKS4g0JIg0JrQntCf0KDQntCT0KDQkNCc0JzQlSDQndCV0J/QldCg0JXQktCQ0KDQldCd0J3Qq9CVINCe0KHQotCQ0KLQmtCYINCW0JjQoNCQLCDQntCh0KLQkNCi0JrQmCDQkdCV0JvQmtCe0JIg0JLQntCX0JzQntCW0J3QniDQo9Ca0JDQl9CQ0KLQrCDQndCQICDQl9CQ0KHQotCe0Jkg0JbQldCb0KfQmCDQmNCb0Jgg0J/QntCg0JDQltCV0J3QmNCvINCf0J7QlNCW0JXQm9Cj0JTQntCn0J3QntCZINCW0JXQm9CV0JfQqyAuINCd0J4g0J/QoNCYINCt0KLQntCcINCd0JDQlNCeINCf0J7QnNCd0JjQotCsINCi0J4g0KfQotCeINCSINCf0JXQoNCS0KPQriDQntCn0JXQoNCV0JTQrCDQndCQ0JTQniDQo9Cn0JjQotCr0JLQkNCi0KwgINCe0JHQqdCV0JUg0KHQntCh0KLQntCv0J3QmNCVINCY0J3QlNCY0JLQmNCU0JrQkNCb0KzQndCr0JUg0J7QodCe0JHQldCd0J3QntCh0KLQmCAgICA8YnIgLz4NCjxiciAvPg0KPGJyIC8+DQo8YnIgLz4NCjxiciAvPg0KPGJyIC8+DQo8YnIgLz4NCjIgINCjICA1INCb0JXQotCd0JXQmSDQlNCV0JLQntCn0JrQmCDQltCQ0JvQntCR0Ksg0J3QkCDQp9CQ0KHQotCr0JUg0JHQntCb0JXQl9Cd0JXQndCd0KvQlSDQnNCe0KfQldCY0KHQn9Cj0KHQmtCQ0J3QmNCvICgg0J/QntCb0JvQkNCa0JjQo9Cg0JjQryDQodCeINCh0KLQoNCQ0J3Qk9Cj0KDQmNCV0JkgICksINCk0JXQkdCg0JjQm9Cs0J3QkNCvINCi0JXQnNCf0JXQoNCQ0KLQo9Cg0JAgLNCg0JXQl9Cj0JvQrNCi0JDQotCrINCQ0J3QkNCb0JjQl9CQINCc0J7Qp9CYICDQnNCe0JPQo9CiINCj0JrQkNCX0JDQotCsINCd0JAgINCd0JDQm9CY0KfQmNCVINCY0J3QpNCV0JrQptCY0Jgg0JzQntCn0JXQktCr0JLQntCU0K/QqdCV0JkgINCh0JjQodCi0JXQnNCrICjQktCe0JfQnNCe0JbQndCeINCm0JjQodCi0JjQoiDQmNCb0Jgg0J/QmNCV0JvQntCd0JXQpNCg0JjQoiApLiDQldCh0KLQrCDQoNCv0JQg0J7QodCe0JHQldCd0J3QntCh0KLQldCZINCa0J7QotCe0KDQq9CVINCf0KDQldCU0KDQkNCh0J/QntCb0J7Qk9CQ0K7QoiDQmiDQoNCQ0JfQktCY0KLQmNCuINCS0J7QodCf0JDQm9CV0J3QmNCvIC4g0KMg0JTQldCS0J7Qp9CV0Jog0JzQm9CQ0JTQqNCV0JPQniDQqNCa0J7Qm9Cs0J3QntCT0J4g0JLQntCX0KDQkNCh0KLQkCAtINCj0KDQldCi0KDQkCA60JrQntCg0J7QotCa0JDQryDQmCDQqNCY0KDQntCa0JDQryA70KHQotCV0J3QmtCQINCi0J7QndCs0JrQkNCvIC4g0JjQndCk0JXQmtCm0JjQryDQnNCe0JbQldCiINCg0JDQodCf0KDQodCi0KDQkNCd0JjQotCs0KHQryDQkiDQktCe0KHQpdCe0JTQr9Cp0JXQnCDQndCQ0J/QoNCQ0JLQm9CV0J3QmNCYICzQndCeINCf0KDQmCDQrdCi0J7QnCDQn9Ce0JvQndCe0KbQldCd0J3QniDQpNCj0J3QmtCm0JjQntCd0JjQoNCj0JXQoiAuINCc0J7Qp9CV0JLQntCZINCf0KPQl9Cr0KDQrCDQnNCQ0JvQntCT0J4g0J7QkdCs0JXQnNCQICgzMC01MCDQnNCbICksINCh0KLQldCd0JrQkCDQotCe0J3QrNCa0JDQryAsINCg0KvQpdCb0JDQrywgINCS0JDQodCa0KPQm9Cv0KDQmNCX0JDQptCY0K8g0J7QkdCY0JvQrNCd0JDQryAo0J/QntCt0KLQntCc0KMg0J3QlSDQodCf0J7QodCe0JHQldCdICDQn9Ce0JvQndCe0KbQldCd0J3QniDQktCr0J/QntCd0JjQotCsINCk0KPQndCa0KbQmNCuICkgICDQndCV0KTQoNCe0J3QqyAoINCk0KPQndCa0KbQmNCe0J3QkNCb0KzQndCQ0K8g0JXQlNCY0J3QmNCm0JAg0J/QntCn0JXQmiAg0JIg0J/QoNCe0KbQldCh0KHQlSDQodCe0JfQoNCV0JLQkNCd0JjQryA60JTQmNCh0KLQkNCb0KzQndCr0JUg0JjQl9CS0JjQotCr0JUg0JrQkNCd0JDQm9Cs0KbQqyAs0J/QldCi0JvQmCDQk9CV0J3Qm9CVICkuINCa0JvQo9CR0J7Qp9Ca0J7QktCr0Jkg0JHQkNCg0KzQldCgINCf0J7Qm9Cd0J7QodCi0KzQriDQndCVINCh0KTQntCg0JzQmNCg0J7QktCQ0J0gLCsg0KLQkNCa0JbQlSDQntCR0JjQm9Cs0J3QkNCvINCS0JDQodCa0KPQm9Cv0KDQmNCX0JDQptCY0K8gINCh0J/QntCh0J7QkdCh0KLQktCj0K7QoiDQn9Ce0JLQq9Co0JXQndCY0K4gINCT0JjQlNCg0J7QodCi0JDQotCY0KfQldCh0JrQntCT0J4g0JTQkNCS0JvQldCd0JjQryAsINCSINCU0JDQm9Cs0J3QldCZ0KjQldCcINCk0JjQm9Cs0KLQoNCQ0KbQmNCe0J3QndCe0JPQniDQlNCQ0JLQm9CV0J3QmNCvICzQp9Ci0J4g0KHQn9Ce0KHQntCR0KHQotCS0KPQrtCiINCf0J7Qm9Cb0JDQmtCY0KPQoNCY0JggLtCi0JDQmtCW0JUg0JzQntCW0J3QniDQntCi0JzQldCi0JjQotCsINCg0JDQodCf0J7Qm9Ce0JbQldCd0JjQlSDQn9Ce0KfQldCaINCe0KLQndCe0KHQmNCi0JXQm9Cs0J3QniDQndCY0JbQlSDQmCDQktCV0KDQotCY0JrQkNCb0KzQndCV0JUg0KfQldCcINCjINCS0JfQoNCe0KHQm9Cr0KUoINCd0JjQltCd0K/QryDQk9Cg0JDQndCY0KbQkCDQndCQINCj0KDQntCS0J3QlSA0INCf0J7Qr9Ch0J3QmNCn0J3QntCT0J4pIC4g0JrQntCd0KbQldCd0KLQoNCQ0KbQmNCe0J7QndCd0JDQryDQpNCj0J3QmtCm0JjQryDQn9Ce0KfQldCaINCh0J3QmNCW0JXQndCQICgg0J7QotCd0J7QodCY0KLQldCb0KzQndCeINCd0JjQl9Ca0JjQmSDQo9CU0JXQm9Cs0J3Qq9CZINCS0JXQoSAgKSDQotCQ0JrQltCVINCh0JjQndCi0JXQotCY0KfQldCh0JrQkNCvINCk0KPQndCa0KbQmNCvINCf0J7Qp9CV0Jog0JXQqdCVINCd0JUg0J7QodCe0JHQniDQn9Cg0J7Qr9CS0JvQr9CV0KLQodCvICAoINCt0KDQmNCi0KDQntCf0J7QrdCi0JjQnSAg0J3QntCg0JzQkNCb0KzQndCeINCd0JUg0JLQq9Cg0JDQkdCQ0KLQq9CS0JDQldCi0KHQryAsINCg0JDQl9CS0JjQktCQ0JXQotCh0K8g0JDQndCV0JzQmNCvKSDQrdCi0J4g0JXQqdCVINCj0KHQo9CT0KPQkdCb0K/QldCiINCh0JjQotCj0JDQptCY0K4gLiDQldCp0JUg0J/QoNCV0J7QkdCb0JDQlNCQ0JXQoiDQodCY0JzQn9CQ0KLQmNCn0JXQodCa0JDQryDQmNCd0J3QldCg0JLQkNCm0JjQryAsINCQINChINCS0J7Ql9Cg0JDQodCi0J7QnCDQn9Cg0J7QmNCh0KXQntCU0JjQoiDQn9Cg0JXQntCR0JvQkNCU0JDQndCY0JUg0J/QkNCg0JDQodCY0JzQn9CQ0KLQmNCn0JXQodCa0J7Qk9CeIC4g0JIg0KbQldCb0J7QnCDQktCh0JUg0K3QotCYINCQ0J3QkNCi0J7QnNCeINCk0JjQl9CY0J7Qm9Ce0JPQmNCn0JXQodCa0JjQlSDQntCh0J7QkdCV0J3QndCe0KHQotCYINCh0J/QntCh0J7QkdCh0KLQo9Cu0KIg0KDQkNCX0JLQmNCi0JjQriDQktCe0KHQn9CQ0JvQldCd0JjQryDQoyDQoNCV0JHQldCd0JrQkCDQkiDQlNCQ0J3QndCe0Jwg0JLQntCX0KDQkNCh0KLQlS48YnIgLz4NCtC40L3RgtC10YDQv9GA0LXRgtCw0YbQuNGPINCw0L3QsNC70LjQt9CwINCx0LXQu9C+0LogMDA5OSAo0JIg0J3QntCg0JzQlSDQlNCeIDAwMzMgKSDQl9Cd0JDQp9CY0KLQldCb0KzQndCeINCS0KvQoNCQ0JbQldCd0J3QkNCvINCf0KDQntCi0JXQmNCd0KPQoNCY0K8gINCj0JrQkNCX0KvQktCQ0JXQoiDQndCQINCd0JDQm9CY0KfQmNCVINCd0JXQpNCg0J7QotCY0KfQldCh0JrQntCT0J4g0KHQmNCd0JTQoNCe0JzQkCA7INCb0JXQmdCa0J7QptCY0KLQqyAgMjAtMzAg0JIg0J/QntCb0JUg0JfQoNCV0J3QmNCvICgg0JIg0J3QntCg0JzQlSDQlNCeIDUtNiApLSDQndCQ0JHQm9Cu0JTQkNCV0KLQodCvINCb0JXQmdCa0J7QptCY0KLQo9Cg0JjQryA7INCR0JDQmtCi0JXQoNCY0JggKysgKNCSINCd0J7QoNCc0JUg0J3QlSDQlNCe0JvQltCd0J4g0JHQq9Ci0KwgKSDQktCh0JUg0K3QotCYINCf0KDQmNCX0J3QkNCa0JggKCDQn9Cg0J7QotCV0JjQndCj0KDQmNCvICzQm9CV0JnQmtCe0KbQmNCi0KPQoNCY0K8sICDQkdCQ0JrQotCV0KDQmNCv0KPQoNCY0K8g0KPQmtCQ0JfQq9CS0JDQrtCiINCd0JAg0J/QntCg0JDQltCV0J3QmNCvINCa0JvQo9CR0J7Qp9Ca0J7QktCe0JPQniDQkNCf0J/QkNCg0JDQotCQKS4gICAgICA=</text:p>
          </table:table-cell>
          <table:table-cell office:value-type="float" office:value="170348" table:style-name="ce1">
            <text:p>170348</text:p>
          </table:table-cell>
          <table:table-cell office:value-type="float" office:value="92" table:style-name="ce1">
            <text:p>92</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1066998" table:style-name="ce1">
            <text:p>1066998</text:p>
          </table:table-cell>
          <table:table-cell office:value-type="string" table:style-name="ce1">
            <text:p>russian</text:p>
          </table:table-cell>
          <table:table-cell office:value-type="string" table:style-name="ce1">
            <text:p>Билет 40.&amp;lt;br /&amp;gt; 1.Ребенку 4 года. Жалобы на ухудшение аппетита и периодические боли около пупка, не связанные с приемом и характером пищи. Состояние удовлетворительное. Язык обложен. Живот при пальпации безболезненный, печень не увеличена. Со стороны других внутренних органов без особенностей. Стул оформленный регулярный, дизурических явлений нет.&amp;lt;br /&amp;gt; Какие исследования необходимо провести?&amp;lt;br /&amp;gt; 2.Девочки 5 лет. Жалобы на частые болезненные мочеиспускания, боли в животе, повышение температуры до 38,5°, вялость. Больна в течении 3 дней. В анализе мочи: белок- 0,099 г/л, лейкоциты - 20-30 в поле зрения, бактерии ++. Какие анатомо -физиологические особенности мочевыводящей системы предрасполагают к развитию воспаления? &amp;lt;br /&amp;gt;</text:p>
          </table:table-cell>
          <table:table-cell office:value-type="string" table:style-name="ce1">
            <text:p>MSkg0J3QtdC+0LHRhdC+0LTQuNC80L4g0L/RgNC+0LLQtdGB0YLQuCDQsiDQv9C10YDQstGD0Y4g0L7Rh9C10YDQtdC00Ywg0LDQvdCw0LvQuNC3INC60LDQu9CwINC90LAg0L3QsNC70LjRh9C40LUg0LPQtdC70YzQvNC40L3RgtC+0LIgKDMg0YDQsNC30LAg0YEg0LjQvdGC0LXRgNCy0LDQu9C+0Lwg0LIg0LTQstCwINC4INGC0YDQuCDQtNC90Y8pIC0g0LjRgdC60LvRjtGH0LjRgtGMINGN0L3RgtC10YDQvtCx0LjQvtC3INC4INCw0YHQutCw0YDQuNC00L7Qt9CwLiDQotC+INC10YHRgtGMINC60LDQu9C7INC/0YDQvtCy0LXRgNGP0Y7RgiDQvdCwINC90LDQu9C40YfQuNC1INC40YUg0Y/QuNGGPGJyIC8+DQoyKSDQndGD0LbQvdC+INCy0LfRj9GC0Ywg0YHQvtGB0LrQvtCxICjQv9GA0L7QsdCwKSDQvdCwINC90LDQu9C40YfQuNC1INGN0L3RgtC10YDQvtCx0LjQvtC30LAg0YMg0YDQtdCx0LXQvdC60LA8YnIgLz4NCtCt0YLQviDQvtGB0L3QvtCy0L3QvtC5INC80LXRgtC+0LQsINCz0LTQtSDQstGA0LDRhyDQvtC/0YDQtdC00LXQu9GP0LXRgiDQvdCw0LvQuNGH0LjQtSDRj9C40YYg0L/QsNGA0LDQt9C40YLQvtCyICjRj9C40YYg0LPQtdC70YzQvNC40L3RgtC+0LIpLiDQotCw0Log0LbQtSDQvNGLINC80L7QttC10Lwg0L3QsNC30L3QsNGH0LjRgtGMINC60LDQutC40LUt0LvQuNCx0L4g0LTQvtC/0L7Qu9C90LjRgtC10LvRjNC90YvQtSDQvNC10YLQvtC00Ysg0LTQuNCw0LPQvdC+0YHRgtC40LrQuCDQtNCw0L3QvdC+0LzRgyDQv9Cw0YbQuNC10L3RgtGDLCDRgtC+INC10YHRgtGMOjxiciAvPg0KMSkg0J7QsdGJ0LjQuSDQsNC90LDQu9C40Lcg0LrRgNC+0LLQuCDQvdCwINC90LDQu9C40YfQuNC1INCy0L7RgdC/0LDQu9C10L3QuNC5INC40LvQuCDQuNC90YTQtdC60YbQuNC4ICjRhiDRgNC10LDQutGC0LjQstC90YvQuSDQsdC10LvQvtC6IC0g0LHQtdC70L7QuiDQvtGB0YLRgNC+0Lkg0YTQsNC30Ysg0LLQvtGB0L/QsNC70LXQvdC40Y8sINCy0YvRgNC+0LHQsNGC0YvQstCw0LXQvNGL0Lkg0L/QtdGH0LXQvdGM0Y4g0Lgg0Y/QstC70Y/QtdGC0YHRjyDQvtGB0L3QvtCy0L3Ri9C8INC80LXRgtC+0LTQvtC8INC00LjQsNCz0L3QvtGB0YLQuNC60LgsINGC0LDQuiDQutCw0Log0L7QvSDQvdCw0LjQsdC+0LvQtdC1INGH0YPQstGB0YLQstC40YLQtdC70YzQvdGL0Lkg0Log0LLQvtGB0L/QsNC70LXQvdC40Y4uKTxiciAvPg0KMikg0KPQt9C4INC+0YDQs9Cw0L3QvtCyICjQv9C10YfQtdC90YwsINC20LXQu9GD0LTQvtC6LCDQutC40YjQtdGH0L3QuNC6LCDQttC10LvRh9C90YvQuSDQv9GD0LfRi9GA0YwpLSDQtNC70Y8g0L7RhtC10L3QutC4INC40YUg0YHQvtGB0YLQvtGP0L3QuNC5INCyINGA0LXQttC40LzQtSDRgNC10LDQu9GM0L3QvtCz0L4g0LLRgNC10LzQtdC90LgsINCwINGC0LDQutC20LUg0LjQtNC10YIg0L7RhtC10L3QutCwINC40YUg0YTRg9C90LrRhtC40LguPGJyIC8+DQo8YnIgLz4NCtCS0YLQvtGA0L7QuSDQstC+0L/RgNC+0YE8YnIgLz4NCjEpINCjINC00LXQstC+0YfQtdC6INCyINGC0LDQutC+0Lwg0LLQvtC30YDQsNGB0YLQtSDRg9C60L7RgNC+0YfQtdC90L3QsNGPINGD0YDQtdGC0YDQsCwg0LrQvtGC0L7RgNCw0Y8g0L7QsdC70LXQs9GH0LDQtdGCINC/0L7Qv9Cw0LTQsNC90LjQtSDQvNC40LrRgNC+0LHQvtCyINCyINC80L7Rh9C10LLQvtC5INC/0YPQt9GL0YDRjDxiciAvPg0KMikg0KDQsNGB0L/QvtC70L7QttC10L3QuNC1INC80L7Rh9C10LjRgdC/0YPRgdC60LDRgtC10LvRjNC90L7Qs9C+INC60LDQvdCw0LvQsCDRgNGP0LTQvtC8INGBINCw0L3QsNC70YzQvdGL0Lwg0L7RgtCy0LXRgNGB0YLQuNC10LwsINC60L7RgtC+0YDQsNGPINCx0YPQtNC10YIg0YHQv9C+0YHQvtCx0YHRgtCy0L7QstCw0YLRjCDQv9C+0LLRi9GI0LXQvdC40Y4g0YDQuNGB0LrQsCDQv9C10YDQtdC90L7RgdGDINC60LjRiNC10YfQvdC+0Lkg0LzQuNC60YDQvtGE0LvQvtGA0YsuPGJyIC8+DQozKSDQotCw0Log0LbQtSDRgyDQtNC10LLQvtGH0LXQuiDQsiDRjdGC0L7QvCDQstC+0LfRgNCw0YHRgtC1INC90LXQtNC+0YHRgtCw0YLQvtGH0L3Ri9C1INC90LDQstGL0LrQuCDQuiDQuNC90YLQuNCy0L3QvtC5INCz0LjQs9C40LXQvdC1ICjQvtGB0L7QsdC10L3QvdC+INC/0L7RgdC70LUg0L/QvtGB0LXRidC10L3QuNGPINGC0YPQsNC70LXRgtCwKSwg0LrQvtGC0L7RgNGL0LUg0YLQsNC6INC20LUg0YHQv9C+0YHQvtCx0YHRgtCy0L7QstCw0LvQuCDQv9C+0L/QsNC00LDQvdC40Y4g0LjQvdGE0LXQutGG0LjQuC48YnIgLz4NCjxiciAvPg0KPGJyIC8+DQo=</text:p>
          </table:table-cell>
          <table:table-cell office:value-type="float" office:value="170348" table:style-name="ce1">
            <text:p>170348</text:p>
          </table:table-cell>
          <table:table-cell office:value-type="float" office:value="80" table:style-name="ce1">
            <text:p>80</text:p>
          </table:table-cell>
          <table:table-cell office:value-type="string" table:style-name="ce1">
            <text:p>копрограмму надо взять по первому вопросу . По второму вопросу не описаны АФО мочевыводящей системы. ( мочеточники, лоханки...)</text:p>
          </table:table-cell>
          <table:table-cell office:value-type="float" office:value="0" table:style-name="ce1">
            <text:p>0</text:p>
          </table:table-cell>
          <table:table-cell table:number-columns-repeated="16376"/>
        </table:table-row>
        <table:table-row table:style-name="ro1">
          <table:table-cell office:value-type="float" office:value="914718" table:style-name="ce1">
            <text:p>914718</text:p>
          </table:table-cell>
          <table:table-cell office:value-type="string" table:style-name="ce1">
            <text:p>english</text:p>
          </table:table-cell>
          <table:table-cell office:value-type="string" table:style-name="ce1">
            <text:p>Ticket 40.&amp;lt;br /&amp;gt; 1.4-year-old child complaints of decreased appetite and periodic pain near the navel, not related to the intake and nature of the food. The condition is satisfactory. The tongue is coated. The abdomen is painless on palpation, the liver is not enlarged. Other internal organs are without any special features. Regular stools, there are no dysuric phenomena. What study is needed?&amp;lt;br /&amp;gt; 2. 5-year-old girl complaints on frequent painful urination, abdominal pain, fever up to 38.5 °, weakness. Sick from last 3 days. In the analysis of urine: protein - 0.099 g / l, white blood cells - 20-30 in the field of vision, bacteria ++. What anatomical and physiological features of the urinary system predispose to the development of inflammation?&amp;lt;br /&amp;gt;</text:p>
          </table:table-cell>
          <table:table-cell office:value-type="string" table:style-name="ce1">
            <text:p>dGhlIGNoaWxkIGhhcyBkZWNyZXNlZCBhcGV0aXRlIHBlcmlvZGljIHBhaW4gbmVhciB0aGUgbmF2ZWwgdW5yZWxhdGVkIHRvIGZvb2QgYW5kIGEgY29hdGVkIHRvbmd1ZSAudGhlIGFic2VuY2Ugb2Ygc2lnbmlmaWNhbmNlIGZpbmRpbmdzIGxpa2UgbGl2ZXIgZW5sYXJnZW1lbnQgb3IgYm93ZWwgaXJyZWd1bGFyaXRpZXMgaW5kaWNhdGUgZnVydGhlciBpbnZlc3RpZ2F0aW9ucyBpZiBuZWVkZWQgIHJlY2NvbWVuZGVkIC0xLnN0b29sIGV4YW1pbmF0aW9uIC10byBjaGVjayBmb3IgcGFyYXNpdGUgaW5mZWN0aW9uIChnaWFyZGlhIGxhbWJpYSBvciBhc2NhcmlzIGx1bXJpY29pZGVzKXRoYXQgYXJlIGNvbW1vbiBjYXVzZSBvZiBhYmRvbWluYWwgcGFpbiBpbiBjaGlsZHJlbi4gMi5jYmMgLSBldmFsdmF0ZSBmb3IgYW5lbWlhICxpbmZlY3Rpb25zICxlb3Npbm9waGlsaWEsd2hpY2ggbWF5IGluZGljYXRlIGEgcGFyYXNpdGljIGluZmVjdGlvbi4gMyBhYmRvbWluYWwgdWx0cmFzb3VuZC10byBydWxlIG91dCBzdHJ1Y3R1cmFsIGlzc3VlcyBsaWtlIG1lc2VudHJpYyBseW1waGVkZW5vcGF0aHkgb3IgaW50dHVzdWNjZXB0aW9uLiB1cmluYWx5c2lzLXRvIGV4Y2x1ZGUgdXJpbmFyeSB0cmFjdCBpbmZlY3Rpb25zIHdoaWNoIGNhbiBjYXVzZSBhYmRvbWluYWwgcGFpbiBpbiBjaGlsZHJlbiAuLnJhdHJpb25hbGUtIHBhaW4gbmVhciB0aGUgbmF2ZWwgaXMgb2Z0ZW4gYXNzb2NpYXRlZCB3aXRoIG1lc2VudHJpYyAgbHltcGhhZGVuaXRpcyAscGFyYXNpdGljIGluZmVjdGlvbiBvciBmdW5jdGlvbmFsIGFiZG9taW5hbCBwYWluIGluIGNoaWxkcmVuLiAgICAgICAgICAybmQgY2FzZS0gaW4geW91bmcgY2hpbGRyZW4gcGFydGljdWxhcmx5IGdpcmxzIHNwZWNpZmljIGFuYXRvbWljYWwgYW5kIHBoeXNpb2xvZ2ljYWwgZmVhdHVyZXMgbWFrZSB0aGVtIHByb25lIHRvIHVyaW5hcnkgdHJhY3QgaW5mZWN0aW9uLSAxLiBzaG9ydCB1cmV0aHJhIC1naXJscyBoYXZlIGEgc2hvcnRlciB1cmV0aHJhIChhcHByb3hpbWF0bGV5IDItNGNtKSB3aGljaCBhbG93cyBiYWN0ZXJpYWwgKGVnLmUgY29saSApIHRvIGFzY2VuZCBlYXNpbHkgaW50byB0aGUgYmxhZGRlci4gMi4gcHJveGltaXR5IG9mIHVyZXRocmEgdG8gdGhlIGFudXMtdGhlIGNsb3NlIGFuYXRvbWljYWwgcmVsYXRpb25zaGlwIGJldHdlZW4gdXJldGhyYWwgb3BlbmluZyBhbmQgdGhlIGFudXMgZmFjaWxhdGVzIGNvbnRhbWluYXRpb24gYnkgaW50ZXN0aW9uYWwgYmFjdGVyaWEgLiAgMy4gaW1hbWF0dXJlIHVyaW5hcnkgY29udHJvbC0gaW5jb21wbGV0ZSBkZXZlbG9wbW50IG9mIGJsYWRkZXIgYmxhZGRlciBjb250cm9sIG9yIGltcHJvcGVyIHZvaWRpbmcgaGFiaXRzIGNhbiBsZWFkIHRvIHVyaW5hcnkgc3Rhc2lzIGluY3JlYXNpbmcgdGhlIHJpc2sgb2YgaW5mZWN0aW9uLiA0LiBpbmNvbXBsZXRlIGJsYWRkZXIgZW1wdHlpbmctIGNoaWxkcmVuIG1heSBub3QgZW1wdHkgdGhlaXIgYmxhZGRlcnMgY29tcGxldGxleSBkdWUgdG8gaW1hbXR1cmUgbmV1cm9sb2dpY2FsIGNvbnRyb2wgLHByZWRpc3Bvc2luZyB0aGVtIHRvIGJhY3RlcmlhbCBjb2xvbml6YXRpb24uIDUuIGltYXR1cmUgaW1tdW5lIHJlc3BvbnNlIC10aGUgaW1hdHVyZSBzeXN0ZW0gaW4geW91bmcgY2hpbGRyZW4gaXMgbm90IGZ1bGx5IGRldmVsb3BlZCAsbWFraW5nIGl0IGhhcmRlciB0byBmaWdodCBvZmYgaW5mZWN0aW91cyBlZmZpY2llbnRseS4gNi4gd2Vha2VyIG11Y29zYWwgZGVmZW5zZS0gdGhlIGJsYWRkZXIgbXVjb3NhIG1heSBoYXZlIHdlYWtlciBwcm90ZWN0aXZlIGJhcnJpZXJzIGFnYWluc3QgYmFjdGVyaWEgaW4geW91bmcgY2hpbGRyZW5zIGNvbXBhcmVkIHRvIGFkdWx0cy4gdXJpbmUgZmluZGluZ3MtcHJvdGVpbi0oMC45OWcvbCkgbWlsZCBwcm90ZWludXJpYSB3aGljaCBjYW4gb2NjdXIgd2l0aCBpbmZlY3Rpb24gIHdiYy0gKCAyMC0zMCBwZXIgaHBmIClpbmRpY2F0ZSBwZXJwdXJhIChwdXMgaW4gdXJpbmUpY29uc2lzdGVudCB3aXRoIGluZmVjdGlvbi4gYmFjdGVyaWEtIGNvbmZpcm1zIGJhY3Rlcml1cmlhLHN1Z2dlc3RpbmcgdXRpLiAgIG5leHQgc3RlcHMtIHBlcmZvcm0gYSB1cmluZSBjdWx0dXJlIHRvbWlkZW50aWZ5IHRoZSBjYXVzYXRpdmUgb3JnYW5pc20gYW5kIGRldGVybWluZSBhcHByb3ByaWF0ZSBhbnRpYmlvdGljIHRoZXJhcHkuIG1vbml0b3IgdGhlIGNoaWxkIGh5ZHJhdGlvbiBzdGF0dXMgYW5kIGluc3VyZSBwcm9wZXIgdm9pZGluZyBoYWJpdHMu</text:p>
          </table:table-cell>
          <table:table-cell office:value-type="float" office:value="170348" table:style-name="ce1">
            <text:p>170348</text:p>
          </table:table-cell>
          <table:table-cell office:value-type="float" office:value="88" table:style-name="ce1">
            <text:p>88</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857" table:style-name="ce1">
            <text:p>914857</text:p>
          </table:table-cell>
          <table:table-cell office:value-type="string" table:style-name="ce1">
            <text:p>english</text:p>
          </table:table-cell>
          <table:table-cell office:value-type="string" table:style-name="ce1">
            <text:p>Ticket 40.&amp;lt;br /&amp;gt; 1.4-year-old child complaints of decreased appetite and periodic pain near the navel, not related to the intake and nature of the food. The condition is satisfactory. The tongue is coated. The abdomen is painless on palpation, the liver is not enlarged. Other internal organs are without any special features. Regular stools, there are no dysuric phenomena. What study is needed?&amp;lt;br /&amp;gt; 2. 5-year-old girl complaints on frequent painful urination, abdominal pain, fever up to 38.5 °, weakness. Sick from last 3 days. In the analysis of urine: protein - 0.099 g / l, white blood cells - 20-30 in the field of vision, bacteria ++. What anatomical and physiological features of the urinary system predispose to the development of inflammation?&amp;lt;br /&amp;gt;</text:p>
          </table:table-cell>
          <table:table-cell office:value-type="string" table:style-name="ce1">
            <text:p>MSk0IHllYXJvbGQgY2hpbGQgY29tcGxhaW50cyAtaW52ZXN0aWdhdGlvbiBmb3IgYSA0IHllYXIgb2xkIGNoaWxkIHdpdGggZGVjcmVhc2VkIGFwcGV0aXRlICBhbmQgYWJkb21pbmFsIHBhaW4gcmVjb21tZW5kZWQgc3R1ZHktZ2l2ZW4gdGhlIHBlcmlvZGljIHBhaW4gbmVhciB0aGUgY29hdGVkIHRvbmd1ZSAsYW4gYWJkb21pbmFsIHVsdHJhc291bmQgbWF5IGJlIGluZGljYXRlZCB0byBhc3NlcyB0aGUgYWJkb21pbmFsIG9yZ2FucyxpbmNsdWRpbmcgZ2FzdHJvaW50ZXN0aW5hbCB0cmFjdC50aGlzIG5vbi1pbnZhc2l2ZSBpbWFnaW5nIHN0dWR5IGNhbiBoZWxwIGlkZW50aWZ5IGFueSBzdHJ1Y3R1cmFsIGFibm9ybWFsaXRpZXMgb3IgaW5mbGFtbWF0aW9uLlJBVElPTkFMRS0gYWJkb21pbmFsIHVsdHJhc291bWQgY2FuIHByb3ZpZGUgZGV0YWlsZWQgaW1hZ2VzIG9mIHRoZSAgYWJkb21pbmFsIG9yZ2FucywgaGVscGluZyB0byBldmFsdWF0ZSB0aGUgZ2FzdHJvaW50ZXN0aW5hbCB0cmFjdCxsaXZlcixhbmQgYXMgZ2FzdHJpdGlzLGludGVzdGluYWwgaW5mbGFtbWF0aW9uIG9yIG90aGVyIGFiZG9taW5hbCBpc3N1ZWVzLi4gICAgICAgICAgICAgICAgICAgICAgICAgICAgICAgICAgICAgICAgICAgICAgICAgICAgICAgICAgICAgICAgICAgICAgICAgICAyKSBwaHlzaW9sb2dpY2FsIGZlYXR1cmVzIHByZWRpc3Bvc2luZyB0byBpbmZsYW1tYXRpb24gaW4gYSA1IHllYXIgb2xkcyB1cmluYXJ5IHN5c3N0ZW0gLmFuYXRvbWljYWwgZmFjdG9ycy4gc2hvcnQgdXJldGhyYSA6aW4geW91bmcgY2hpbGRyZW5zLHRoZSB1cmV0aHJhIGlzIHNob3J0ZXIsIGFsbG93aW5nIGVhc2llciBhY2Nlc3MgZm9yIGJhY3RlcmlhIHRvIHJlYWNoIHRoZSBibGFkZGVyLCBpbmNyZWFzaW5nIHRoZSByaXNrIG9mIHVyaW5hcnkgdHJhY3QgaW5mZWN0aW9ucyhVVElzKSAuUFJPWElNSVRZIE9GIFVSRVRIUkEgVE8gQU5VUyA6IHRoZSBjbG9zZW5lc3Mgb2YgdGhlIHVyZXRocmFsIG9wZW5pbmcgdG8gdGhlIGFudXMgaW4gY2hpbGRyZW4gZmFjaWxpdGF0ZXMgdGhlIGFzY2VudCBvZiB0aGUgYmFjdGVyaWEsIGNvbnRyaWJ1dGluZyB0byBVVElzIC4gUEhZU0lPTE9HSUNBTCBGQUNUT1JTOiBpbmNvbXBsZXRlIGJsYWRkZXIgZW1wdHlpbmc6IHlvdW5nIGNoaWxkcmVuIG1heSBub3QgY29tcGxldGVseSBlbXB0eSB0aGVpciBibGFkZGVycyBkdXJpbmcgLGNyZWF0aW5nIGFuIGVudmlyb25tZW50IGNvbmR1Y2l2ZSB0byBiYWN0ZXJpYWwgZ3Jvd3RoIC5MSU1JVEVEIEhZR0lFTkUgUFJBQ1RJQ0VTOiBkZXZlbG9waW5nIGh5Z2llbmUgaGFiaXRzIGluIHlvdW5nIGNoaWxkcmVuIG1heSBpbXBhY3QgdGhlIHJpc2sgb2YgYmFjdGVyaWFsIGNvbnRhbWluYXRpb24uQ0xJTklDQUwgQ09OU0lERVJBVElPTlM6dGhlIGNvbWJpbmF0aW9uIG9mIHN5bXB0b21zICxpbmNsdWRpbmcgZnJlcXVlbnQgcGFpbmZ1bCB1cmluYXRpb24sYWJkb21pbmFsIHBhaW4sIGFuZHBvc2l0aXZlIGZpbmRpbmdzIGluIHRoZSB1cmluZSBhbmFseXNpcyAsc3VnZ2VzdHMgYSBwb3RlbnRpYWwgdXJpbmFyeSB0cmFjdCBpbmZlY3Rpb25zLnByb21wdCBtZWRpY2FsIGF0dGVudGlvbiBpcyBlc3NlbnRpYWwgZm9yIHByb3BlciBkaWFnbm9zaXMgYW5kIHRyZWF0bWVudA==</text:p>
          </table:table-cell>
          <table:table-cell office:value-type="float" office:value="170348" table:style-name="ce1">
            <text:p>170348</text:p>
          </table:table-cell>
          <table:table-cell office:value-type="float" office:value="74" table:style-name="ce1">
            <text:p>74</text:p>
          </table:table-cell>
          <table:table-cell table:style-name="ce2"/>
          <table:table-cell office:value-type="float" office:value="0" table:style-name="ce1">
            <text:p>0</text:p>
          </table:table-cell>
          <table:table-cell table:number-columns-repeated="16376"/>
        </table:table-row>
        <table:table-row table:style-name="ro1">
          <table:table-cell office:value-type="float" office:value="914908" table:style-name="ce1">
            <text:p>914908</text:p>
          </table:table-cell>
          <table:table-cell office:value-type="string" table:style-name="ce1">
            <text:p>english</text:p>
          </table:table-cell>
          <table:table-cell office:value-type="string" table:style-name="ce1">
            <text:p>Ticket 40.&amp;lt;br /&amp;gt; 1.4-year-old child complaints of decreased appetite and periodic pain near the navel, not related to the intake and nature of the food. The condition is satisfactory. The tongue is coated. The abdomen is painless on palpation, the liver is not enlarged. Other internal organs are without any special features. Regular stools, there are no dysuric phenomena. What study is needed?&amp;lt;br /&amp;gt; 2. 5-year-old girl complaints on frequent painful urination, abdominal pain, fever up to 38.5 °, weakness. Sick from last 3 days. In the analysis of urine: protein - 0.099 g / l, white blood cells - 20-30 in the field of vision, bacteria ++. What anatomical and physiological features of the urinary system predispose to the development of inflammation?&amp;lt;br /&amp;gt;</text:p>
          </table:table-cell>
          <table:table-cell office:value-type="string" table:style-name="ce1">
            <text:p>MS40IGFwcGV0aXRlIHBlcmlvZGljIHBhaW4gdGhlIG5hdmFsIG5vdCByZWxhdGVkIHRvIHRoZSBpbnRha2UgYW5kIG5hdHVyZSBvZiB0aGUgZm9vZCB0aGUgY29uZGl0aW9uIGlzIHNhdGlzZmFjdG9yeSB0aGUgdG9vbmdlIGlzIGNvYXRlZCB0aGUgYWJkb21lbiBpcyBwYWluIGxlc3Mgb24gcGFscGF0aW9uIHRoZSBsaXZlciBpcyBub3QgZW5sYXJnZSBvdGhlciBpbnRlcm5hbCBvcmdhbiBnYW5zIGF0cmUgd2l0aG91dCBhbnkgc3BlY2lhbCBmZWF0dXJlIHJlZ3VsYXRpb24gc3Rvb2xzIHRoZXJlIGFyZSBubyBkeXN1cmljIHBoZW5vbWVuYSBnaXZlbiBwYWluIG5lYXIgdGhlIG5hdmFsIGFuZCBjYXRlZCB0b25nZSBhbiBhYmRvbWluYWwgdWx0cmFzb3VuZCBtYXkgYmUgaW5kaWNhdGVkIHRvIGFzc2VzcyB0aGUgYWJkb21pbmFsIG9yZ2FuIGluY2x1ZGUgdGhlIGdhc3RvaW50aW9ubCB0cmFjdCB0aGUgbm9uIGltbWFnaW5naCBzdHVkeSBjYW4gaGVscCAgaXVubmRlbnRpaWZ5IGFueSBzdHJ1Y2h1cmUgYWJub3JtYWxpdHkgb3IgaW5mbGFtYW10aW9uIHJhdGlvbmFsZSBhYmRvbWluYWwgdWx0cmFzb3VuZCBjYW4gcHJvdmlkZSBkZXRhaWxlZCBpbWFhZ2Ugb2YgdGhlIGFiZG9taWFsIG9yZ2FOIEhFTFBJTkdIIFRPIEVMSVZFUiBBTkQgT1RIRVIgT1JHQU4gR0FTVFRSSVRJUkVTIElOVEVSVElOQUwgSU5GTEFNTUFUSU9OIE9SIE9USEVSIEFCRE9NSU5BTCAgSVNTVUUgMiBQWVNJT0xPR0lDQUwgRkVBVFVSRSBQUkVESVNQT1NJTkdIIFRPIElORkxBTUFBVElPTiBJTiBBICAlWUVBUiBPTDtEIFVSSU5BUlkgU1lTVEVFTSBBTkFUT01JQ0FMIEZBQ1RPUkUgU0hPUlQgVVJFVEhSQUEgVU4gWU9VTkdHIENISUxEUkVOIFRIRSBVUkVUSFJBIElTIFNIT1JUIEFMTE9XSU5HSCBFQVJJU0VSIEFDQ1NTIEZPUiBCQUNURVJJUkEgVE8gUkVBQ0ggVEhFIEJMQURERVIgSU5DUklOR0ggVEhFIFJJU0sgVVJJTkFSWSBUUkVBQ1hUIElORkFDVElPTiAoVVRJKXByb3hpLGFsIG9mIHVyZXRocmEgdG8gYW51c3NzIHRoZWUgY2xvc2VuZXNzIG9mIHRoZSB1cmV0aHJhbCBvcGVpbmdoIHRvIHRoZSBhbnVzIGluIHRoZSBjaGlsZGVyZW4gZmFjaWxpdGF0ZXMgdGhlIGFzZW50IG9mIHRyaHllIGJhY3RyaWFzIGNvbnRyaWJ1dGluZ2ggdG8gVVRJIHBoeWlvbG9naWNhbCBmYWN0b3JlIGluY29tcGxldGUgYmxhZGRlciBlZW5tcHR5IHlvdW5nIGNoaWxkcmVuIG1heSBub3QgY29tcGxldGVseSBlbXB0eSB0aGVpciBibGFkZGVyIGR1cmluZ2ggdXJpbmF0aW9uIGNyZWF0aW5nIGFuIGVudmlyb25tZW50IGNvbmR1Y3RpdmUgdG8gYmFjdGVyaWFsIGdyb3d0aCAgbGltaXRlZCBoeWdpbmMgcHJhY3RpY2VzIGRldmVsb3BtZW50IGh5Z2lubmUgaGFiaXQgaW4gdGggeW91Z2VyIGNoaWxkcmVuIG1heSBpbXBhY3QgdGhlIHJpY2sgb2YgYmFjdGVyYWwgY29udGFtaW5hdGlvbiAgY2xpbmljYWwgY29uc2lkZXJhdGlvbiB0aGUgY29tYmluYXRpb24gb2Ygc3ltdG9tcyBpbmNsdWRlIGZyZXF1ZW50IHBhaW4gZnVsbCB1cmluYXRpb24gYWJkb21pbmFsIHBhaW4gYW5kIHBvc2l0aXZlIGZpbmRpbmdoIGluIHRoZSB1cmluZSBhbmFseXNpcyBhIHBvdGVudGV0aWFsIHRyYWN0IGluZmFlY3Rpb24gcHJvbXB0IG1lZGljYWwgYXR0ZW50aW9uIGlzIGVzc2VudGlhbCBmb3IgcHJvcGVyIGRhaWdub3NvaXMgYW5kIHRyZWF0bWVuIFxcXFxcXFxcXFxcXFxcXFxcXFxcXFxcXFxcXFxcXFxcXFxcXFxcXFxcXFxcXFxcXFxcXFxcXFxcXFxcXC4uLi4uLi4uLi4uLi4vLy8vLy8vLy8vLy8vLy8vLy8vLy8vLy8vLy8vLy8vLy8vLy8vLy8vLy8vLy8vLy8vLy8vLy8vLy9cXFxcXFxcXFxcXFxcXFxcXFxcXFxcXFxcXFxcXFxcXFxcXFxcXFxcXFxcXFxcXFxcXFxcXFxcXFxcXFxcXFxcXFxcXFxcXFxcXFxcXFxcXFxcXFxcXFxcXFxcXFxcXFxcXFxcXFxcXFxcXFxcXFxcXFxcXFxcXFxcXFxcXFxcXFw=</text:p>
          </table:table-cell>
          <table:table-cell office:value-type="float" office:value="170348" table:style-name="ce1">
            <text:p>170348</text:p>
          </table:table-cell>
          <table:table-cell office:value-type="float" office:value="70" table:style-name="ce1">
            <text:p>70</text:p>
          </table:table-cell>
          <table:table-cell office:value-type="string" table:style-name="ce1">
            <text:p>Your answer is not written completely and there are many spelling errors in the form of many punctuation marks. There are many spelling errors.//// What is?</text:p>
          </table:table-cell>
          <table:table-cell office:value-type="float" office:value="0" table:style-name="ce1">
            <text:p>0</text:p>
          </table:table-cell>
          <table:table-cell table:number-columns-repeated="16376"/>
        </table:table-row>
        <table:table-row table:style-name="ro1">
          <table:table-cell office:value-type="float" office:value="915118" table:style-name="ce1">
            <text:p>915118</text:p>
          </table:table-cell>
          <table:table-cell office:value-type="string" table:style-name="ce1">
            <text:p>english</text:p>
          </table:table-cell>
          <table:table-cell office:value-type="string" table:style-name="ce1">
            <text:p>Ticket 40.&amp;lt;br /&amp;gt; 1.4-year-old child complaints of decreased appetite and periodic pain near the navel, not related to the intake and nature of the food. The condition is satisfactory. The tongue is coated. The abdomen is painless on palpation, the liver is not enlarged. Other internal organs are without any special features. Regular stools, there are no dysuric phenomena. What study is needed?&amp;lt;br /&amp;gt; 2. 5-year-old girl complaints on frequent painful urination, abdominal pain, fever up to 38.5 °, weakness. Sick from last 3 days. In the analysis of urine: protein - 0.099 g / l, white blood cells - 20-30 in the field of vision, bacteria ++. What anatomical and physiological features of the urinary system predispose to the development of inflammation?&amp;lt;br /&amp;gt;</text:p>
          </table:table-cell>
          <table:table-cell office:value-type="string" table:style-name="ce1">
            <text:p>MS4gR2l2ZW4gc3ltcHRvbXMgaW4gYSA0LXllYXItb2xkIGNoaWxkIGRlc2NyaWJlZCBhICJzdG9vbCBhbmFseXNlcyIgbWF5IGJlIHBvc3NpYmxlIGdhc3Ryb2ludGVzdGluYWwgaXNzdWUgb3IgdGhlcmUgY2FuIGJlIGluZmVjdGlvbiBpbiB0aGUgZGlnZXN0aXZlIHRyYWN0LiB0aGUgY29hdGVkIHRvdW5nZSBhbmQgcGVyb2RpYyBwYWluIG5lYXIgdGhlIG5hdmFsIGNvdWxkIGJlIGFzc29jaWF0ZWQgd2l0aCBkaWdlc3RpdmUgcHJvYmxlbXMgb3IgYW4gdW5kZXJseWluZyBpbmZlY3Rpb24gYWZmZWN0aW5nIHRoZSBnYXN0cm9pbnRlc3RpbmFsIHRyYWN0LiAiU1RPT0wgQU5BTFlTRVMiIHN0b29sIGFuYWx5c2VzIGNhbiBwcm92aWRlIGluZm9ybWF0aW9uIGFib3V0IHRoZSBwcmVzZW5jZSBvZiBhYm5vcm1hbCBzdWJzdGFuY2UsIGJsb29kIG9yIHBhdGhvZ2VucyBpbiB0aGUgc3Rvb2wuIGl0IG1heSBoZWxwIGlkZW50aWZ5IGdhc3Ryb2ludGVzdGluYWwgaW5mZWN0aW9uLCBwYXJhc2l0ZXMgb3Igb3RoZXIgZmFjdG9ycyBjb250cmlidXRpaW5nIHRvIHRoZSBzeW1wdG9tcy4gYWRkaXRpb25hbCBzdHVkaWVzIHN1Y2ggYXMgdGhyb3VnaCBjbGluaWNhbCBleGFtaW5hdGlvbmFuZCBwb3NzaWJsZSBibG9vZCB0ZXN0IG1heSBiZSBjb25zaWRlciBiYXNlZCBvbiB0aGUgZmluZGluZ3Mgb2YgdGhlIHN0b29sIGFuYWx5c2VzLiAgICAgICAgICAgICAgIDxiciAvPg0KMi4gVGhlIGFuYXRvbWljYWwgYW5kIHBoeXNpb2xvZ2ljYWwgZmVhdHVyZXMgb2YgdGhlIHVyaW5hcnkgc3lzdGVtIGluIGFuIDUteWVhciBvbGQgZ2lybCwgdGhlIHN5c3B0b21zIG9mIGZyZXF1ZW50IHBhaW5mdWxsIHVyaW5hdGlvbiwgYWJkb21pbmFsIHBhaW4sIGZldmVyIGFuZCB0aGUgcHJlc2VuY2Ugb2YgYmFjdGVyaWEgYW5kIHdoaXRlIGJsb29kIGNlbGxzIGluIHRoZSB1cmluZSBzdWdnZXN0IGEgdXJpbmFyeSB0cmFjdCBpbmZlY3Rpb24gVVRJLiBzZXZlcmFsIGFuYXRvbWljYWwgYW5kIHBoeXNpb2xvZ2ljYWwgZmVhdHVyZXMgb2YgdGhlIHVyaW5hcnkgc3lzdGVtIGluIGNoaWxkZXJlbnMgIHRvIHRoZSBkZXZlbG9wbWVudCBvZiBpbmZsYW1hdGlvbi0gU0hPUlQgVVJFVEhSQTogSW4geW91bmcgY2hpbGRlcmVucyBlc3BpY2lhbGx5IGdpcmxzLCB0aGUgdXJldGhyYSBpcyByZWxhdGl2ZWx5IHNob3J0LCBhbGxvd2luZyBiYWN0ZXJpYSB0byBhc2NlbmQgbW9yZSBlYXNpbHkgZnJvbSB0aGUgZXh0ZXJuYWwgZ2VuaXRhbGlhIGludG8gdGhlIGJsYWRkZXItIENMT1NFIFBST1hJTUlUWSBBTlVTIFRPIFVSRVRIUkE6IFRoZSBwcm94aW1pdGl0eSBvZiB0aGUgYW51cyB0byB0aGUgdXJldGhyYSBpbiBjaGlsZGVyZW4gbWFrZXMgaXQgZWFzaWVyIGZvciBiYWN0ZXJpYSBmcm9tIHRoZSBnYXN0cm9pbnRlc3RpbmFsIHRyYWN0IHRvIHJlYWNoIHRoZSB1cmluYXJ5IHRyYWN0LiBJTkNPTVBMRVRFIEVNUFRZSU5HIE9GIFRIRSBCTEFEREVSOiBDaGlsZGVyZW4gbWF5IG5vdCBmdWxseSBlbXB0eSB0aGVpciBibGFkZGVyIGR1cmluZyB2b2lkaW5nLCB3aGljaCBjYW4gbGVhZCB0byB0aGUgc3RhZ25hdGlvbiBvZiB1cmluZSBhbmQgYW4gaW5jcmVhc2VkIHJpc2sgb2YgYmFjdGVyaWFsIGdyb3d0aC4gICAgICAgIA==</text:p>
          </table:table-cell>
          <table:table-cell office:value-type="float" office:value="170348" table:style-name="ce1">
            <text:p>170348</text:p>
          </table:table-cell>
          <table:table-cell office:value-type="float" office:value="72" table:style-name="ce1">
            <text:p>72</text:p>
          </table:table-cell>
          <table:table-cell table:style-name="ce2"/>
          <table:table-cell office:value-type="float" office:value="0" table:style-name="ce1">
            <text:p>0</text:p>
          </table:table-cell>
          <table:table-cell table:number-columns-repeated="16376"/>
        </table:table-row>
        <table:table-row table:number-rows-repeated="10480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7</meta:generator>
    <meta:initial-creator>phpMyAdmin 5.2.1</meta:initial-creator>
    <dc:creator>Данила Силищев</dc:creator>
    <meta:creation-date>2026-04-21T12:44:38Z</meta:creation-date>
    <dc:date>2026-04-21T12:45:20Z</dc:date>
  </office:meta>
</office:document-meta>
</file>